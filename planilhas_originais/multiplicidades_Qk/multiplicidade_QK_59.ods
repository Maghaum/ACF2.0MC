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5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59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68287037037037" calcext:value-type="float">
            <text:p>0,00000682870370370370</text:p>
          </table:table-cell>
          <table:table-cell table:formula="of:=[.D3]-[.D2]" office:value-type="float" office:value="0.0000068287037037037" calcext:value-type="float">
            <text:p>0,00000682870370370370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59" office:value-type="float" office:value="118" calcext:value-type="float">
            <text:p>11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36574074074074" calcext:value-type="float">
            <text:p>0,00001365740740740740</text:p>
          </table:table-cell>
          <table:table-cell table:formula="of:=[.D4]-[.D3]" office:value-type="float" office:value="0.00000682870370370371" calcext:value-type="float">
            <text:p>0,0000068287037037037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59" office:value-type="float" office:value="177" calcext:value-type="float">
            <text:p>177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04861111111111" calcext:value-type="float">
            <text:p>0,00002048611111111110</text:p>
          </table:table-cell>
          <table:table-cell table:formula="of:=[.D5]-[.D4]" office:value-type="float" office:value="0.0000068287037037037" calcext:value-type="float">
            <text:p>0,0000068287037037037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59" office:value-type="float" office:value="236" calcext:value-type="float">
            <text:p>23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73148148148148" calcext:value-type="float">
            <text:p>0,00002731481481481480</text:p>
          </table:table-cell>
          <table:table-cell table:formula="of:=[.D6]-[.D5]" office:value-type="float" office:value="0.0000068287037037037" calcext:value-type="float">
            <text:p>0,0000068287037037037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59" office:value-type="float" office:value="295" calcext:value-type="float">
            <text:p>29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41435185185185" calcext:value-type="float">
            <text:p>0,00003414351851851850</text:p>
          </table:table-cell>
          <table:table-cell table:formula="of:=[.D7]-[.D6]" office:value-type="float" office:value="0.00000682870370370371" calcext:value-type="float">
            <text:p>0,00000682870370370371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59" office:value-type="float" office:value="354" calcext:value-type="float">
            <text:p>35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409722222222222" calcext:value-type="float">
            <text:p>0,00004097222222222220</text:p>
          </table:table-cell>
          <table:table-cell table:formula="of:=[.D8]-[.D7]" office:value-type="float" office:value="0.0000068287037037037" calcext:value-type="float">
            <text:p>0,0000068287037037037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59" office:value-type="float" office:value="413" calcext:value-type="float">
            <text:p>413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478009259259259" calcext:value-type="float">
            <text:p>0,00004780092592592590</text:p>
          </table:table-cell>
          <table:table-cell table:formula="of:=[.D9]-[.D8]" office:value-type="float" office:value="0.0000068287037037037" calcext:value-type="float">
            <text:p>0,00000682870370370370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59" office:value-type="float" office:value="472" calcext:value-type="float">
            <text:p>47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546296296296296" calcext:value-type="float">
            <text:p>0,00005462962962962960</text:p>
          </table:table-cell>
          <table:table-cell table:formula="of:=[.D10]-[.D9]" office:value-type="float" office:value="0.0000068287037037037" calcext:value-type="float">
            <text:p>0,00000682870370370370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59" office:value-type="float" office:value="531" calcext:value-type="float">
            <text:p>531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614583333333333" calcext:value-type="float">
            <text:p>0,00006145833333333330</text:p>
          </table:table-cell>
          <table:table-cell table:formula="of:=[.D11]-[.D10]" office:value-type="float" office:value="0.0000068287037037037" calcext:value-type="float">
            <text:p>0,00000682870370370370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59" office:value-type="float" office:value="590" calcext:value-type="float">
            <text:p>59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68287037037037" calcext:value-type="float">
            <text:p>0,00006828703703703700</text:p>
          </table:table-cell>
          <table:table-cell table:formula="of:=[.D12]-[.D11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59" office:value-type="float" office:value="649" calcext:value-type="float">
            <text:p>649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751157407407408" calcext:value-type="float">
            <text:p>0,00007511574074074080</text:p>
          </table:table-cell>
          <table:table-cell table:formula="of:=[.D13]-[.D12]" office:value-type="float" office:value="0.0000068287037037037" calcext:value-type="float">
            <text:p>0,00000682870370370370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59" office:value-type="float" office:value="708" calcext:value-type="float">
            <text:p>70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819444444444445" calcext:value-type="float">
            <text:p>0,00008194444444444450</text:p>
          </table:table-cell>
          <table:table-cell table:formula="of:=[.D14]-[.D13]" office:value-type="float" office:value="0.0000068287037037037" calcext:value-type="float">
            <text:p>0,00000682870370370370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59" office:value-type="float" office:value="767" calcext:value-type="float">
            <text:p>767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887731481481482" calcext:value-type="float">
            <text:p>0,00008877314814814820</text:p>
          </table:table-cell>
          <table:table-cell table:formula="of:=[.D15]-[.D14]" office:value-type="float" office:value="0.0000068287037037037" calcext:value-type="float">
            <text:p>0,00000682870370370370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59" office:value-type="float" office:value="826" calcext:value-type="float">
            <text:p>82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956018518518519" calcext:value-type="float">
            <text:p>0,00009560185185185190</text:p>
          </table:table-cell>
          <table:table-cell table:formula="of:=[.D16]-[.D15]" office:value-type="float" office:value="0.0000068287037037037" calcext:value-type="float">
            <text:p>0,00000682870370370370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59" office:value-type="float" office:value="885" calcext:value-type="float">
            <text:p>88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02430555555556" calcext:value-type="float">
            <text:p>0,00010243055555555600</text:p>
          </table:table-cell>
          <table:table-cell table:formula="of:=[.D17]-[.D16]" office:value-type="float" office:value="0.0000068287037037037" calcext:value-type="float">
            <text:p>0,00000682870370370370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59" office:value-type="float" office:value="944" calcext:value-type="float">
            <text:p>94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09259259259259" calcext:value-type="float">
            <text:p>0,00010925925925925900</text:p>
          </table:table-cell>
          <table:table-cell table:formula="of:=[.D18]-[.D17]" office:value-type="float" office:value="0.0000068287037037037" calcext:value-type="float">
            <text:p>0,00000682870370370370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59" office:value-type="float" office:value="1003" calcext:value-type="float">
            <text:p>1003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16087962962963" calcext:value-type="float">
            <text:p>0,00011608796296296300</text:p>
          </table:table-cell>
          <table:table-cell table:formula="of:=[.D19]-[.D18]" office:value-type="float" office:value="0.00000682870370370369" calcext:value-type="float">
            <text:p>0,00000682870370370369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59" office:value-type="float" office:value="1062" calcext:value-type="float">
            <text:p>106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22916666666667" calcext:value-type="float">
            <text:p>0,00012291666666666700</text:p>
          </table:table-cell>
          <table:table-cell table:formula="of:=[.D20]-[.D19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59" office:value-type="float" office:value="1121" calcext:value-type="float">
            <text:p>1121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2974537037037" calcext:value-type="float">
            <text:p>0,00012974537037037000</text:p>
          </table:table-cell>
          <table:table-cell table:formula="of:=[.D21]-[.D20]" office:value-type="float" office:value="0.00000682870370370369" calcext:value-type="float">
            <text:p>0,00000682870370370369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59" office:value-type="float" office:value="1180" calcext:value-type="float">
            <text:p>11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36574074074074" calcext:value-type="float">
            <text:p>0,00013657407407407400</text:p>
          </table:table-cell>
          <table:table-cell table:formula="of:=[.D22]-[.D21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59" office:value-type="float" office:value="1239" calcext:value-type="float">
            <text:p>1239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43402777777778" calcext:value-type="float">
            <text:p>0,00014340277777777800</text:p>
          </table:table-cell>
          <table:table-cell table:formula="of:=[.D23]-[.D22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59" office:value-type="float" office:value="1298" calcext:value-type="float">
            <text:p>129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50231481481482" calcext:value-type="float">
            <text:p>0,00015023148148148200</text:p>
          </table:table-cell>
          <table:table-cell table:formula="of:=[.D24]-[.D23]" office:value-type="float" office:value="0.00000682870370370369" calcext:value-type="float">
            <text:p>0,00000682870370370369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59" office:value-type="float" office:value="1357" calcext:value-type="float">
            <text:p>1357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57060185185185" calcext:value-type="float">
            <text:p>0,00015706018518518500</text:p>
          </table:table-cell>
          <table:table-cell table:formula="of:=[.D25]-[.D24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59" office:value-type="float" office:value="1416" calcext:value-type="float">
            <text:p>141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63888888888889" calcext:value-type="float">
            <text:p>0,00016388888888888900</text:p>
          </table:table-cell>
          <table:table-cell table:formula="of:=[.D26]-[.D25]" office:value-type="float" office:value="0.00000682870370370369" calcext:value-type="float">
            <text:p>0,00000682870370370369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59" office:value-type="float" office:value="1475" calcext:value-type="float">
            <text:p>14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70717592592593" calcext:value-type="float">
            <text:p>0,00017071759259259300</text:p>
          </table:table-cell>
          <table:table-cell table:formula="of:=[.D27]-[.D26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59" office:value-type="float" office:value="1534" calcext:value-type="float">
            <text:p>153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77546296296296" calcext:value-type="float">
            <text:p>0,00017754629629629600</text:p>
          </table:table-cell>
          <table:table-cell table:formula="of:=[.D28]-[.D27]" office:value-type="float" office:value="0.00000682870370370369" calcext:value-type="float">
            <text:p>0,00000682870370370369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59" office:value-type="float" office:value="1593" calcext:value-type="float">
            <text:p>1593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84375" calcext:value-type="float">
            <text:p>0,00018437500000000000</text:p>
          </table:table-cell>
          <table:table-cell table:formula="of:=[.D29]-[.D28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59" office:value-type="float" office:value="1652" calcext:value-type="float">
            <text:p>165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91203703703704" calcext:value-type="float">
            <text:p>0,00019120370370370400</text:p>
          </table:table-cell>
          <table:table-cell table:formula="of:=[.D30]-[.D29]" office:value-type="float" office:value="0.00000682870370370369" calcext:value-type="float">
            <text:p>0,00000682870370370369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59" office:value-type="float" office:value="1711" calcext:value-type="float">
            <text:p>1711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98032407407407" calcext:value-type="float">
            <text:p>0,00019803240740740700</text:p>
          </table:table-cell>
          <table:table-cell table:formula="of:=[.D31]-[.D30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59" office:value-type="float" office:value="1770" calcext:value-type="float">
            <text:p>177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04861111111111" calcext:value-type="float">
            <text:p>0,00020486111111111100</text:p>
          </table:table-cell>
          <table:table-cell table:formula="of:=[.D32]-[.D31]" office:value-type="float" office:value="0.00000682870370370369" calcext:value-type="float">
            <text:p>0,00000682870370370369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59" office:value-type="float" office:value="1829" calcext:value-type="float">
            <text:p>1829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11689814814815" calcext:value-type="float">
            <text:p>0,00021168981481481500</text:p>
          </table:table-cell>
          <table:table-cell table:formula="of:=[.D33]-[.D32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59" office:value-type="float" office:value="1888" calcext:value-type="float">
            <text:p>188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18518518518519" calcext:value-type="float">
            <text:p>0,00021851851851851900</text:p>
          </table:table-cell>
          <table:table-cell table:formula="of:=[.D34]-[.D33]" office:value-type="float" office:value="0.00000682870370370369" calcext:value-type="float">
            <text:p>0,00000682870370370369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59" office:value-type="float" office:value="1947" calcext:value-type="float">
            <text:p>1947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25347222222222" calcext:value-type="float">
            <text:p>0,00022534722222222200</text:p>
          </table:table-cell>
          <table:table-cell table:formula="of:=[.D35]-[.D34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59" office:value-type="float" office:value="2006" calcext:value-type="float">
            <text:p>200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32175925925926" calcext:value-type="float">
            <text:p>0,00023217592592592600</text:p>
          </table:table-cell>
          <table:table-cell table:formula="of:=[.D36]-[.D35]" office:value-type="float" office:value="0.00000682870370370369" calcext:value-type="float">
            <text:p>0,00000682870370370369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59" office:value-type="float" office:value="2065" calcext:value-type="float">
            <text:p>206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3900462962963" calcext:value-type="float">
            <text:p>0,00023900462962963000</text:p>
          </table:table-cell>
          <table:table-cell table:formula="of:=[.D37]-[.D36]" office:value-type="float" office:value="0.00000682870370370369" calcext:value-type="float">
            <text:p>0,00000682870370370369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59" office:value-type="float" office:value="2124" calcext:value-type="float">
            <text:p>212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45833333333333" calcext:value-type="float">
            <text:p>0,00024583333333333300</text:p>
          </table:table-cell>
          <table:table-cell table:formula="of:=[.D38]-[.D37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59" office:value-type="float" office:value="2183" calcext:value-type="float">
            <text:p>2183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52662037037037" calcext:value-type="float">
            <text:p>0,00025266203703703700</text:p>
          </table:table-cell>
          <table:table-cell table:formula="of:=[.D39]-[.D38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59" office:value-type="float" office:value="2242" calcext:value-type="float">
            <text:p>224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59490740740741" calcext:value-type="float">
            <text:p>0,00025949074074074100</text:p>
          </table:table-cell>
          <table:table-cell table:formula="of:=[.D40]-[.D39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59" office:value-type="float" office:value="2301" calcext:value-type="float">
            <text:p>2301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66319444444444" calcext:value-type="float">
            <text:p>0,00026631944444444400</text:p>
          </table:table-cell>
          <table:table-cell table:formula="of:=[.D41]-[.D40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59" office:value-type="float" office:value="2360" calcext:value-type="float">
            <text:p>23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73148148148148" calcext:value-type="float">
            <text:p>0,00027314814814814800</text:p>
          </table:table-cell>
          <table:table-cell table:formula="of:=[.D42]-[.D41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59" office:value-type="float" office:value="2419" calcext:value-type="float">
            <text:p>2419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79976851851852" calcext:value-type="float">
            <text:p>0,00027997685185185200</text:p>
          </table:table-cell>
          <table:table-cell table:formula="of:=[.D43]-[.D42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59" office:value-type="float" office:value="2478" calcext:value-type="float">
            <text:p>247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86805555555556" calcext:value-type="float">
            <text:p>0,00028680555555555600</text:p>
          </table:table-cell>
          <table:table-cell table:formula="of:=[.D44]-[.D43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59" office:value-type="float" office:value="2537" calcext:value-type="float">
            <text:p>2537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93634259259259" calcext:value-type="float">
            <text:p>0,00029363425925925900</text:p>
          </table:table-cell>
          <table:table-cell table:formula="of:=[.D45]-[.D44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59" office:value-type="float" office:value="2596" calcext:value-type="float">
            <text:p>259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00462962962963" calcext:value-type="float">
            <text:p>0,00030046296296296300</text:p>
          </table:table-cell>
          <table:table-cell table:formula="of:=[.D46]-[.D45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59" office:value-type="float" office:value="2655" calcext:value-type="float">
            <text:p>265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07291666666667" calcext:value-type="float">
            <text:p>0,00030729166666666700</text:p>
          </table:table-cell>
          <table:table-cell table:formula="of:=[.D47]-[.D46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59" office:value-type="float" office:value="2714" calcext:value-type="float">
            <text:p>271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1412037037037" calcext:value-type="float">
            <text:p>0,00031412037037037000</text:p>
          </table:table-cell>
          <table:table-cell table:formula="of:=[.D48]-[.D47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59" office:value-type="float" office:value="2773" calcext:value-type="float">
            <text:p>2773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20949074074074" calcext:value-type="float">
            <text:p>0,00032094907407407400</text:p>
          </table:table-cell>
          <table:table-cell table:formula="of:=[.D49]-[.D48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59" office:value-type="float" office:value="2832" calcext:value-type="float">
            <text:p>283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27777777777778" calcext:value-type="float">
            <text:p>0,00032777777777777800</text:p>
          </table:table-cell>
          <table:table-cell table:formula="of:=[.D50]-[.D49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59" office:value-type="float" office:value="2891" calcext:value-type="float">
            <text:p>2891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34606481481481" calcext:value-type="float">
            <text:p>0,00033460648148148100</text:p>
          </table:table-cell>
          <table:table-cell table:formula="of:=[.D51]-[.D50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59" office:value-type="float" office:value="2950" calcext:value-type="float">
            <text:p>29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41435185185185" calcext:value-type="float">
            <text:p>0,00034143518518518500</text:p>
          </table:table-cell>
          <table:table-cell table:formula="of:=[.D52]-[.D51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59" office:value-type="float" office:value="3009" calcext:value-type="float">
            <text:p>3009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348263888888889" calcext:value-type="float">
            <text:p>0,00034826388888888900</text:p>
          </table:table-cell>
          <table:table-cell table:formula="of:=[.D53]-[.D52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59" office:value-type="float" office:value="3068" calcext:value-type="float">
            <text:p>306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355092592592593" calcext:value-type="float">
            <text:p>0,00035509259259259300</text:p>
          </table:table-cell>
          <table:table-cell table:formula="of:=[.D54]-[.D53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59" office:value-type="float" office:value="3127" calcext:value-type="float">
            <text:p>3127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361921296296296" calcext:value-type="float">
            <text:p>0,00036192129629629600</text:p>
          </table:table-cell>
          <table:table-cell table:formula="of:=[.D55]-[.D54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59" office:value-type="float" office:value="3186" calcext:value-type="float">
            <text:p>318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36875" calcext:value-type="float">
            <text:p>0,00036875000000000000</text:p>
          </table:table-cell>
          <table:table-cell table:formula="of:=[.D56]-[.D55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59" office:value-type="float" office:value="3245" calcext:value-type="float">
            <text:p>324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375578703703704" calcext:value-type="float">
            <text:p>0,00037557870370370400</text:p>
          </table:table-cell>
          <table:table-cell table:formula="of:=[.D57]-[.D56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59" office:value-type="float" office:value="3304" calcext:value-type="float">
            <text:p>330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382407407407407" calcext:value-type="float">
            <text:p>0,00038240740740740700</text:p>
          </table:table-cell>
          <table:table-cell table:formula="of:=[.D58]-[.D57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59" office:value-type="float" office:value="3363" calcext:value-type="float">
            <text:p>3363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389236111111111" calcext:value-type="float">
            <text:p>0,00038923611111111100</text:p>
          </table:table-cell>
          <table:table-cell table:formula="of:=[.D59]-[.D58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59" office:value-type="float" office:value="3422" calcext:value-type="float">
            <text:p>342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396064814814815" calcext:value-type="float">
            <text:p>0,00039606481481481500</text:p>
          </table:table-cell>
          <table:table-cell table:formula="of:=[.D60]-[.D59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59" office:value-type="float" office:value="3481" calcext:value-type="float">
            <text:p>3481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402893518518519" calcext:value-type="float">
            <text:p>0,00040289351851851900</text:p>
          </table:table-cell>
          <table:table-cell table:formula="of:=[.D61]-[.D60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59" office:value-type="float" office:value="3540" calcext:value-type="float">
            <text:p>35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409722222222222" calcext:value-type="float">
            <text:p>0,00040972222222222200</text:p>
          </table:table-cell>
          <table:table-cell table:formula="of:=[.D62]-[.D61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59" office:value-type="float" office:value="3599" calcext:value-type="float">
            <text:p>3599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416550925925926" calcext:value-type="float">
            <text:p>0,00041655092592592600</text:p>
          </table:table-cell>
          <table:table-cell table:formula="of:=[.D63]-[.D62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59" office:value-type="float" office:value="3658" calcext:value-type="float">
            <text:p>365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42337962962963" calcext:value-type="float">
            <text:p>0,00042337962962963000</text:p>
          </table:table-cell>
          <table:table-cell table:formula="of:=[.D64]-[.D63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59" office:value-type="float" office:value="3717" calcext:value-type="float">
            <text:p>3717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430208333333333" calcext:value-type="float">
            <text:p>0,00043020833333333300</text:p>
          </table:table-cell>
          <table:table-cell table:formula="of:=[.D65]-[.D64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59" office:value-type="float" office:value="3776" calcext:value-type="float">
            <text:p>377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437037037037037" calcext:value-type="float">
            <text:p>0,00043703703703703700</text:p>
          </table:table-cell>
          <table:table-cell table:formula="of:=[.D66]-[.D65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59" office:value-type="float" office:value="3835" calcext:value-type="float">
            <text:p>383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443865740740741" calcext:value-type="float">
            <text:p>0,00044386574074074100</text:p>
          </table:table-cell>
          <table:table-cell table:formula="of:=[.D67]-[.D66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59" office:value-type="float" office:value="3894" calcext:value-type="float">
            <text:p>389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450694444444444" calcext:value-type="float">
            <text:p>0,00045069444444444400</text:p>
          </table:table-cell>
          <table:table-cell table:formula="of:=[.D68]-[.D67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59" office:value-type="float" office:value="3953" calcext:value-type="float">
            <text:p>3953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457523148148148" calcext:value-type="float">
            <text:p>0,00045752314814814800</text:p>
          </table:table-cell>
          <table:table-cell table:formula="of:=[.D69]-[.D68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59" office:value-type="float" office:value="4012" calcext:value-type="float">
            <text:p>401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464351851851852" calcext:value-type="float">
            <text:p>0,00046435185185185200</text:p>
          </table:table-cell>
          <table:table-cell table:formula="of:=[.D70]-[.D69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59" office:value-type="float" office:value="4071" calcext:value-type="float">
            <text:p>4071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471180555555556" calcext:value-type="float">
            <text:p>0,00047118055555555600</text:p>
          </table:table-cell>
          <table:table-cell table:formula="of:=[.D71]-[.D70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59" office:value-type="float" office:value="4130" calcext:value-type="float">
            <text:p>413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478009259259259" calcext:value-type="float">
            <text:p>0,00047800925925925900</text:p>
          </table:table-cell>
          <table:table-cell table:formula="of:=[.D72]-[.D71]" office:value-type="float" office:value="0.00000682870370370372" calcext:value-type="float">
            <text:p>0,00000682870370370372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59" office:value-type="float" office:value="4189" calcext:value-type="float">
            <text:p>4189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484837962962963" calcext:value-type="float">
            <text:p>0,00048483796296296300</text:p>
          </table:table-cell>
          <table:table-cell table:formula="of:=[.D73]-[.D72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59" office:value-type="float" office:value="4248" calcext:value-type="float">
            <text:p>424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491666666666667" calcext:value-type="float">
            <text:p>0,00049166666666666700</text:p>
          </table:table-cell>
          <table:table-cell table:formula="of:=[.D74]-[.D7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59" office:value-type="float" office:value="4307" calcext:value-type="float">
            <text:p>4307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49849537037037" calcext:value-type="float">
            <text:p>0,00049849537037037000</text:p>
          </table:table-cell>
          <table:table-cell table:formula="of:=[.D75]-[.D74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59" office:value-type="float" office:value="4366" calcext:value-type="float">
            <text:p>436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505324074074074" calcext:value-type="float">
            <text:p>0,00050532407407407400</text:p>
          </table:table-cell>
          <table:table-cell table:formula="of:=[.D76]-[.D7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59" office:value-type="float" office:value="4425" calcext:value-type="float">
            <text:p>44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512152777777778" calcext:value-type="float">
            <text:p>0,00051215277777777800</text:p>
          </table:table-cell>
          <table:table-cell table:formula="of:=[.D77]-[.D76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59" office:value-type="float" office:value="4484" calcext:value-type="float">
            <text:p>448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518981481481482" calcext:value-type="float">
            <text:p>0,00051898148148148200</text:p>
          </table:table-cell>
          <table:table-cell table:formula="of:=[.D78]-[.D77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59" office:value-type="float" office:value="4543" calcext:value-type="float">
            <text:p>4543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525810185185185" calcext:value-type="float">
            <text:p>0,00052581018518518500</text:p>
          </table:table-cell>
          <table:table-cell table:formula="of:=[.D79]-[.D7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59" office:value-type="float" office:value="4602" calcext:value-type="float">
            <text:p>460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532638888888889" calcext:value-type="float">
            <text:p>0,00053263888888888900</text:p>
          </table:table-cell>
          <table:table-cell table:formula="of:=[.D80]-[.D79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59" office:value-type="float" office:value="4661" calcext:value-type="float">
            <text:p>4661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539467592592593" calcext:value-type="float">
            <text:p>0,00053946759259259300</text:p>
          </table:table-cell>
          <table:table-cell table:formula="of:=[.D81]-[.D80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59" office:value-type="float" office:value="4720" calcext:value-type="float">
            <text:p>47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546296296296296" calcext:value-type="float">
            <text:p>0,00054629629629629600</text:p>
          </table:table-cell>
          <table:table-cell table:formula="of:=[.D82]-[.D8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59" office:value-type="float" office:value="4779" calcext:value-type="float">
            <text:p>4779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553125" calcext:value-type="float">
            <text:p>0,00055312500000000000</text:p>
          </table:table-cell>
          <table:table-cell table:formula="of:=[.D83]-[.D82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59" office:value-type="float" office:value="4838" calcext:value-type="float">
            <text:p>483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559953703703704" calcext:value-type="float">
            <text:p>0,00055995370370370400</text:p>
          </table:table-cell>
          <table:table-cell table:formula="of:=[.D84]-[.D8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59" office:value-type="float" office:value="4897" calcext:value-type="float">
            <text:p>4897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566782407407407" calcext:value-type="float">
            <text:p>0,00056678240740740700</text:p>
          </table:table-cell>
          <table:table-cell table:formula="of:=[.D85]-[.D84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59" office:value-type="float" office:value="4956" calcext:value-type="float">
            <text:p>495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573611111111111" calcext:value-type="float">
            <text:p>0,00057361111111111100</text:p>
          </table:table-cell>
          <table:table-cell table:formula="of:=[.D86]-[.D85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59" office:value-type="float" office:value="5015" calcext:value-type="float">
            <text:p>501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580439814814815" calcext:value-type="float">
            <text:p>0,00058043981481481500</text:p>
          </table:table-cell>
          <table:table-cell table:formula="of:=[.D87]-[.D8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59" office:value-type="float" office:value="5074" calcext:value-type="float">
            <text:p>507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587268518518519" calcext:value-type="float">
            <text:p>0,00058726851851851900</text:p>
          </table:table-cell>
          <table:table-cell table:formula="of:=[.D88]-[.D87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59" office:value-type="float" office:value="5133" calcext:value-type="float">
            <text:p>5133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594097222222222" calcext:value-type="float">
            <text:p>0,00059409722222222200</text:p>
          </table:table-cell>
          <table:table-cell table:formula="of:=[.D89]-[.D8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59" office:value-type="float" office:value="5192" calcext:value-type="float">
            <text:p>519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600925925925926" calcext:value-type="float">
            <text:p>0,00060092592592592600</text:p>
          </table:table-cell>
          <table:table-cell table:formula="of:=[.D90]-[.D89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59" office:value-type="float" office:value="5251" calcext:value-type="float">
            <text:p>5251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60775462962963" calcext:value-type="float">
            <text:p>0,00060775462962963000</text:p>
          </table:table-cell>
          <table:table-cell table:formula="of:=[.D91]-[.D90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59" office:value-type="float" office:value="5310" calcext:value-type="float">
            <text:p>531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614583333333333" calcext:value-type="float">
            <text:p>0,00061458333333333300</text:p>
          </table:table-cell>
          <table:table-cell table:formula="of:=[.D92]-[.D9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59" office:value-type="float" office:value="5369" calcext:value-type="float">
            <text:p>5369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621412037037037" calcext:value-type="float">
            <text:p>0,00062141203703703700</text:p>
          </table:table-cell>
          <table:table-cell table:formula="of:=[.D93]-[.D92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59" office:value-type="float" office:value="5428" calcext:value-type="float">
            <text:p>542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628240740740741" calcext:value-type="float">
            <text:p>0,00062824074074074100</text:p>
          </table:table-cell>
          <table:table-cell table:formula="of:=[.D94]-[.D93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59" office:value-type="float" office:value="5487" calcext:value-type="float">
            <text:p>5487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635069444444444" calcext:value-type="float">
            <text:p>0,00063506944444444400</text:p>
          </table:table-cell>
          <table:table-cell table:formula="of:=[.D95]-[.D9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59" office:value-type="float" office:value="5546" calcext:value-type="float">
            <text:p>554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641898148148148" calcext:value-type="float">
            <text:p>0,00064189814814814800</text:p>
          </table:table-cell>
          <table:table-cell table:formula="of:=[.D96]-[.D95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59" office:value-type="float" office:value="5605" calcext:value-type="float">
            <text:p>560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648726851851852" calcext:value-type="float">
            <text:p>0,00064872685185185200</text:p>
          </table:table-cell>
          <table:table-cell table:formula="of:=[.D97]-[.D9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59" office:value-type="float" office:value="5664" calcext:value-type="float">
            <text:p>566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655555555555556" calcext:value-type="float">
            <text:p>0,00065555555555555600</text:p>
          </table:table-cell>
          <table:table-cell table:formula="of:=[.D98]-[.D97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59" office:value-type="float" office:value="5723" calcext:value-type="float">
            <text:p>5723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662384259259259" calcext:value-type="float">
            <text:p>0,00066238425925925900</text:p>
          </table:table-cell>
          <table:table-cell table:formula="of:=[.D99]-[.D98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59" office:value-type="float" office:value="5782" calcext:value-type="float">
            <text:p>578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669212962962963" calcext:value-type="float">
            <text:p>0,00066921296296296300</text:p>
          </table:table-cell>
          <table:table-cell table:formula="of:=[.D100]-[.D9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59" office:value-type="float" office:value="5841" calcext:value-type="float">
            <text:p>5841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676041666666667" calcext:value-type="float">
            <text:p>0,00067604166666666700</text:p>
          </table:table-cell>
          <table:table-cell table:formula="of:=[.D101]-[.D100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59" office:value-type="float" office:value="5900" calcext:value-type="float">
            <text:p>59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68287037037037" calcext:value-type="float">
            <text:p>0,00068287037037037000</text:p>
          </table:table-cell>
          <table:table-cell table:formula="of:=[.D102]-[.D101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59" office:value-type="float" office:value="5959" calcext:value-type="float">
            <text:p>5959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689699074074074" calcext:value-type="float">
            <text:p>0,00068969907407407400</text:p>
          </table:table-cell>
          <table:table-cell table:formula="of:=[.D103]-[.D10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59" office:value-type="float" office:value="6018" calcext:value-type="float">
            <text:p>601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696527777777778" calcext:value-type="float">
            <text:p>0,00069652777777777800</text:p>
          </table:table-cell>
          <table:table-cell table:formula="of:=[.D104]-[.D103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59" office:value-type="float" office:value="6077" calcext:value-type="float">
            <text:p>6077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703356481481482" calcext:value-type="float">
            <text:p>0,00070335648148148200</text:p>
          </table:table-cell>
          <table:table-cell table:formula="of:=[.D105]-[.D10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59" office:value-type="float" office:value="6136" calcext:value-type="float">
            <text:p>613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710185185185185" calcext:value-type="float">
            <text:p>0,00071018518518518500</text:p>
          </table:table-cell>
          <table:table-cell table:formula="of:=[.D106]-[.D105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59" office:value-type="float" office:value="6195" calcext:value-type="float">
            <text:p>619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717013888888889" calcext:value-type="float">
            <text:p>0,00071701388888888900</text:p>
          </table:table-cell>
          <table:table-cell table:formula="of:=[.D107]-[.D106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59" office:value-type="float" office:value="6254" calcext:value-type="float">
            <text:p>625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723842592592593" calcext:value-type="float">
            <text:p>0,00072384259259259200</text:p>
          </table:table-cell>
          <table:table-cell table:formula="of:=[.D108]-[.D10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59" office:value-type="float" office:value="6313" calcext:value-type="float">
            <text:p>6313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730671296296296" calcext:value-type="float">
            <text:p>0,00073067129629629600</text:p>
          </table:table-cell>
          <table:table-cell table:formula="of:=[.D109]-[.D108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59" office:value-type="float" office:value="6372" calcext:value-type="float">
            <text:p>637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7375" calcext:value-type="float">
            <text:p>0,00073750000000000000</text:p>
          </table:table-cell>
          <table:table-cell table:formula="of:=[.D110]-[.D10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59" office:value-type="float" office:value="6431" calcext:value-type="float">
            <text:p>6431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744328703703704" calcext:value-type="float">
            <text:p>0,00074432870370370400</text:p>
          </table:table-cell>
          <table:table-cell table:formula="of:=[.D111]-[.D110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59" office:value-type="float" office:value="6490" calcext:value-type="float">
            <text:p>649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751157407407407" calcext:value-type="float">
            <text:p>0,00075115740740740700</text:p>
          </table:table-cell>
          <table:table-cell table:formula="of:=[.D112]-[.D111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59" office:value-type="float" office:value="6549" calcext:value-type="float">
            <text:p>6549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757986111111111" calcext:value-type="float">
            <text:p>0,00075798611111111100</text:p>
          </table:table-cell>
          <table:table-cell table:formula="of:=[.D113]-[.D11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59" office:value-type="float" office:value="6608" calcext:value-type="float">
            <text:p>660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764814814814815" calcext:value-type="float">
            <text:p>0,00076481481481481500</text:p>
          </table:table-cell>
          <table:table-cell table:formula="of:=[.D114]-[.D113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59" office:value-type="float" office:value="6667" calcext:value-type="float">
            <text:p>6667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771643518518519" calcext:value-type="float">
            <text:p>0,00077164351851851900</text:p>
          </table:table-cell>
          <table:table-cell table:formula="of:=[.D115]-[.D114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59" office:value-type="float" office:value="6726" calcext:value-type="float">
            <text:p>672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778472222222222" calcext:value-type="float">
            <text:p>0,00077847222222222200</text:p>
          </table:table-cell>
          <table:table-cell table:formula="of:=[.D116]-[.D11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59" office:value-type="float" office:value="6785" calcext:value-type="float">
            <text:p>678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785300925925926" calcext:value-type="float">
            <text:p>0,00078530092592592600</text:p>
          </table:table-cell>
          <table:table-cell table:formula="of:=[.D117]-[.D116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59" office:value-type="float" office:value="6844" calcext:value-type="float">
            <text:p>684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79212962962963" calcext:value-type="float">
            <text:p>0,00079212962962963000</text:p>
          </table:table-cell>
          <table:table-cell table:formula="of:=[.D118]-[.D11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59" office:value-type="float" office:value="6903" calcext:value-type="float">
            <text:p>6903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798958333333333" calcext:value-type="float">
            <text:p>0,00079895833333333400</text:p>
          </table:table-cell>
          <table:table-cell table:formula="of:=[.D119]-[.D118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59" office:value-type="float" office:value="6962" calcext:value-type="float">
            <text:p>696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805787037037037" calcext:value-type="float">
            <text:p>0,00080578703703703700</text:p>
          </table:table-cell>
          <table:table-cell table:formula="of:=[.D120]-[.D119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59" office:value-type="float" office:value="7021" calcext:value-type="float">
            <text:p>7021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812615740740741" calcext:value-type="float">
            <text:p>0,00081261574074074100</text:p>
          </table:table-cell>
          <table:table-cell table:formula="of:=[.D121]-[.D12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59" office:value-type="float" office:value="7080" calcext:value-type="float">
            <text:p>70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819444444444445" calcext:value-type="float">
            <text:p>0,00081944444444444500</text:p>
          </table:table-cell>
          <table:table-cell table:formula="of:=[.D122]-[.D121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59" office:value-type="float" office:value="7139" calcext:value-type="float">
            <text:p>7139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826273148148148" calcext:value-type="float">
            <text:p>0,00082627314814814800</text:p>
          </table:table-cell>
          <table:table-cell table:formula="of:=[.D123]-[.D122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59" office:value-type="float" office:value="7198" calcext:value-type="float">
            <text:p>719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833101851851852" calcext:value-type="float">
            <text:p>0,00083310185185185200</text:p>
          </table:table-cell>
          <table:table-cell table:formula="of:=[.D124]-[.D12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59" office:value-type="float" office:value="7257" calcext:value-type="float">
            <text:p>7257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839930555555556" calcext:value-type="float">
            <text:p>0,00083993055555555600</text:p>
          </table:table-cell>
          <table:table-cell table:formula="of:=[.D125]-[.D124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59" office:value-type="float" office:value="7316" calcext:value-type="float">
            <text:p>731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846759259259259" calcext:value-type="float">
            <text:p>0,00084675925925925900</text:p>
          </table:table-cell>
          <table:table-cell table:formula="of:=[.D126]-[.D12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59" office:value-type="float" office:value="7375" calcext:value-type="float">
            <text:p>73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853587962962963" calcext:value-type="float">
            <text:p>0,00085358796296296300</text:p>
          </table:table-cell>
          <table:table-cell table:formula="of:=[.D127]-[.D126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59" office:value-type="float" office:value="7434" calcext:value-type="float">
            <text:p>743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860416666666667" calcext:value-type="float">
            <text:p>0,00086041666666666700</text:p>
          </table:table-cell>
          <table:table-cell table:formula="of:=[.D128]-[.D127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59" office:value-type="float" office:value="7493" calcext:value-type="float">
            <text:p>7493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86724537037037" calcext:value-type="float">
            <text:p>0,00086724537037037000</text:p>
          </table:table-cell>
          <table:table-cell table:formula="of:=[.D129]-[.D12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59" office:value-type="float" office:value="7552" calcext:value-type="float">
            <text:p>755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874074074074074" calcext:value-type="float">
            <text:p>0,00087407407407407400</text:p>
          </table:table-cell>
          <table:table-cell table:formula="of:=[.D130]-[.D129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59" office:value-type="float" office:value="7611" calcext:value-type="float">
            <text:p>7611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880902777777778" calcext:value-type="float">
            <text:p>0,00088090277777777800</text:p>
          </table:table-cell>
          <table:table-cell table:formula="of:=[.D131]-[.D13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59" office:value-type="float" office:value="7670" calcext:value-type="float">
            <text:p>767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887731481481482" calcext:value-type="float">
            <text:p>0,00088773148148148200</text:p>
          </table:table-cell>
          <table:table-cell table:formula="of:=[.D132]-[.D131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59" office:value-type="float" office:value="7729" calcext:value-type="float">
            <text:p>7729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894560185185185" calcext:value-type="float">
            <text:p>0,00089456018518518500</text:p>
          </table:table-cell>
          <table:table-cell table:formula="of:=[.D133]-[.D132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59" office:value-type="float" office:value="7788" calcext:value-type="float">
            <text:p>778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901388888888889" calcext:value-type="float">
            <text:p>0,00090138888888888900</text:p>
          </table:table-cell>
          <table:table-cell table:formula="of:=[.D134]-[.D13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59" office:value-type="float" office:value="7847" calcext:value-type="float">
            <text:p>7847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908217592592593" calcext:value-type="float">
            <text:p>0,00090821759259259300</text:p>
          </table:table-cell>
          <table:table-cell table:formula="of:=[.D135]-[.D134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59" office:value-type="float" office:value="7906" calcext:value-type="float">
            <text:p>790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915046296296296" calcext:value-type="float">
            <text:p>0,00091504629629629600</text:p>
          </table:table-cell>
          <table:table-cell table:formula="of:=[.D136]-[.D135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59" office:value-type="float" office:value="7965" calcext:value-type="float">
            <text:p>796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921875" calcext:value-type="float">
            <text:p>0,00092187500000000000</text:p>
          </table:table-cell>
          <table:table-cell table:formula="of:=[.D137]-[.D13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59" office:value-type="float" office:value="8024" calcext:value-type="float">
            <text:p>802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928703703703704" calcext:value-type="float">
            <text:p>0,00092870370370370400</text:p>
          </table:table-cell>
          <table:table-cell table:formula="of:=[.D138]-[.D137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59" office:value-type="float" office:value="8083" calcext:value-type="float">
            <text:p>8083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935532407407407" calcext:value-type="float">
            <text:p>0,00093553240740740700</text:p>
          </table:table-cell>
          <table:table-cell table:formula="of:=[.D139]-[.D13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59" office:value-type="float" office:value="8142" calcext:value-type="float">
            <text:p>814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942361111111111" calcext:value-type="float">
            <text:p>0,00094236111111111100</text:p>
          </table:table-cell>
          <table:table-cell table:formula="of:=[.D140]-[.D139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59" office:value-type="float" office:value="8201" calcext:value-type="float">
            <text:p>8201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949189814814815" calcext:value-type="float">
            <text:p>0,00094918981481481500</text:p>
          </table:table-cell>
          <table:table-cell table:formula="of:=[.D141]-[.D140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59" office:value-type="float" office:value="8260" calcext:value-type="float">
            <text:p>82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956018518518519" calcext:value-type="float">
            <text:p>0,00095601851851851900</text:p>
          </table:table-cell>
          <table:table-cell table:formula="of:=[.D142]-[.D14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59" office:value-type="float" office:value="8319" calcext:value-type="float">
            <text:p>8319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962847222222222" calcext:value-type="float">
            <text:p>0,00096284722222222200</text:p>
          </table:table-cell>
          <table:table-cell table:formula="of:=[.D143]-[.D142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59" office:value-type="float" office:value="8378" calcext:value-type="float">
            <text:p>837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969675925925926" calcext:value-type="float">
            <text:p>0,00096967592592592600</text:p>
          </table:table-cell>
          <table:table-cell table:formula="of:=[.D144]-[.D143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59" office:value-type="float" office:value="8437" calcext:value-type="float">
            <text:p>8437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97650462962963" calcext:value-type="float">
            <text:p>0,00097650462962963000</text:p>
          </table:table-cell>
          <table:table-cell table:formula="of:=[.D145]-[.D144]" office:value-type="float" office:value="0.00000682870370370366" calcext:value-type="float">
            <text:p>0,00000682870370370366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59" office:value-type="float" office:value="8496" calcext:value-type="float">
            <text:p>849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983333333333333" calcext:value-type="float">
            <text:p>0,00098333333333333300</text:p>
          </table:table-cell>
          <table:table-cell table:formula="of:=[.D146]-[.D14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59" office:value-type="float" office:value="8555" calcext:value-type="float">
            <text:p>855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990162037037037" calcext:value-type="float">
            <text:p>0,00099016203703703700</text:p>
          </table:table-cell>
          <table:table-cell table:formula="of:=[.D147]-[.D14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59" office:value-type="float" office:value="8614" calcext:value-type="float">
            <text:p>861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996990740740741" calcext:value-type="float">
            <text:p>0,00099699074074074100</text:p>
          </table:table-cell>
          <table:table-cell table:formula="of:=[.D148]-[.D14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59" office:value-type="float" office:value="8673" calcext:value-type="float">
            <text:p>8673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00381944444444" calcext:value-type="float">
            <text:p>0,00100381944444444000</text:p>
          </table:table-cell>
          <table:table-cell table:formula="of:=[.D149]-[.D148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59" office:value-type="float" office:value="8732" calcext:value-type="float">
            <text:p>873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01064814814815" calcext:value-type="float">
            <text:p>0,00101064814814815000</text:p>
          </table:table-cell>
          <table:table-cell table:formula="of:=[.D150]-[.D14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59" office:value-type="float" office:value="8791" calcext:value-type="float">
            <text:p>8791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01747685185185" calcext:value-type="float">
            <text:p>0,00101747685185185000</text:p>
          </table:table-cell>
          <table:table-cell table:formula="of:=[.D151]-[.D15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59" office:value-type="float" office:value="8850" calcext:value-type="float">
            <text:p>88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02430555555556" calcext:value-type="float">
            <text:p>0,00102430555555556000</text:p>
          </table:table-cell>
          <table:table-cell table:formula="of:=[.D152]-[.D151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59" office:value-type="float" office:value="8909" calcext:value-type="float">
            <text:p>8909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03113425925926" calcext:value-type="float">
            <text:p>0,00103113425925926000</text:p>
          </table:table-cell>
          <table:table-cell table:formula="of:=[.D153]-[.D15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59" office:value-type="float" office:value="8968" calcext:value-type="float">
            <text:p>896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03796296296296" calcext:value-type="float">
            <text:p>0,00103796296296296000</text:p>
          </table:table-cell>
          <table:table-cell table:formula="of:=[.D154]-[.D15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59" office:value-type="float" office:value="9027" calcext:value-type="float">
            <text:p>9027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04479166666667" calcext:value-type="float">
            <text:p>0,00104479166666667000</text:p>
          </table:table-cell>
          <table:table-cell table:formula="of:=[.D155]-[.D154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59" office:value-type="float" office:value="9086" calcext:value-type="float">
            <text:p>908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05162037037037" calcext:value-type="float">
            <text:p>0,00105162037037037000</text:p>
          </table:table-cell>
          <table:table-cell table:formula="of:=[.D156]-[.D15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59" office:value-type="float" office:value="9145" calcext:value-type="float">
            <text:p>914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05844907407407" calcext:value-type="float">
            <text:p>0,00105844907407407000</text:p>
          </table:table-cell>
          <table:table-cell table:formula="of:=[.D157]-[.D15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59" office:value-type="float" office:value="9204" calcext:value-type="float">
            <text:p>920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06527777777778" calcext:value-type="float">
            <text:p>0,00106527777777778000</text:p>
          </table:table-cell>
          <table:table-cell table:formula="of:=[.D158]-[.D157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59" office:value-type="float" office:value="9263" calcext:value-type="float">
            <text:p>9263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07210648148148" calcext:value-type="float">
            <text:p>0,00107210648148148000</text:p>
          </table:table-cell>
          <table:table-cell table:formula="of:=[.D159]-[.D15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59" office:value-type="float" office:value="9322" calcext:value-type="float">
            <text:p>932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07893518518519" calcext:value-type="float">
            <text:p>0,00107893518518519000</text:p>
          </table:table-cell>
          <table:table-cell table:formula="of:=[.D160]-[.D15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59" office:value-type="float" office:value="9381" calcext:value-type="float">
            <text:p>9381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08576388888889" calcext:value-type="float">
            <text:p>0,00108576388888889000</text:p>
          </table:table-cell>
          <table:table-cell table:formula="of:=[.D161]-[.D160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59" office:value-type="float" office:value="9440" calcext:value-type="float">
            <text:p>94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09259259259259" calcext:value-type="float">
            <text:p>0,00109259259259259000</text:p>
          </table:table-cell>
          <table:table-cell table:formula="of:=[.D162]-[.D16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59" office:value-type="float" office:value="9499" calcext:value-type="float">
            <text:p>9499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0994212962963" calcext:value-type="float">
            <text:p>0,00109942129629630000</text:p>
          </table:table-cell>
          <table:table-cell table:formula="of:=[.D163]-[.D16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59" office:value-type="float" office:value="9558" calcext:value-type="float">
            <text:p>955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10625" calcext:value-type="float">
            <text:p>0,00110625000000000000</text:p>
          </table:table-cell>
          <table:table-cell table:formula="of:=[.D164]-[.D16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59" office:value-type="float" office:value="9617" calcext:value-type="float">
            <text:p>9617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1130787037037" calcext:value-type="float">
            <text:p>0,00111307870370370000</text:p>
          </table:table-cell>
          <table:table-cell table:formula="of:=[.D165]-[.D164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59" office:value-type="float" office:value="9676" calcext:value-type="float">
            <text:p>967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11990740740741" calcext:value-type="float">
            <text:p>0,00111990740740741000</text:p>
          </table:table-cell>
          <table:table-cell table:formula="of:=[.D166]-[.D16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59" office:value-type="float" office:value="9735" calcext:value-type="float">
            <text:p>973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12673611111111" calcext:value-type="float">
            <text:p>0,00112673611111111000</text:p>
          </table:table-cell>
          <table:table-cell table:formula="of:=[.D167]-[.D16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59" office:value-type="float" office:value="9794" calcext:value-type="float">
            <text:p>979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13356481481482" calcext:value-type="float">
            <text:p>0,00113356481481482000</text:p>
          </table:table-cell>
          <table:table-cell table:formula="of:=[.D168]-[.D167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59" office:value-type="float" office:value="9853" calcext:value-type="float">
            <text:p>9853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14039351851852" calcext:value-type="float">
            <text:p>0,00114039351851852000</text:p>
          </table:table-cell>
          <table:table-cell table:formula="of:=[.D169]-[.D16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59" office:value-type="float" office:value="9912" calcext:value-type="float">
            <text:p>991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14722222222222" calcext:value-type="float">
            <text:p>0,00114722222222222000</text:p>
          </table:table-cell>
          <table:table-cell table:formula="of:=[.D170]-[.D16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59" office:value-type="float" office:value="9971" calcext:value-type="float">
            <text:p>9971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15405092592593" calcext:value-type="float">
            <text:p>0,00115405092592593000</text:p>
          </table:table-cell>
          <table:table-cell table:formula="of:=[.D171]-[.D170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59" office:value-type="float" office:value="10030" calcext:value-type="float">
            <text:p>1003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16087962962963" calcext:value-type="float">
            <text:p>0,00116087962962963000</text:p>
          </table:table-cell>
          <table:table-cell table:formula="of:=[.D172]-[.D17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59" office:value-type="float" office:value="10089" calcext:value-type="float">
            <text:p>10089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16770833333333" calcext:value-type="float">
            <text:p>0,00116770833333333000</text:p>
          </table:table-cell>
          <table:table-cell table:formula="of:=[.D173]-[.D17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59" office:value-type="float" office:value="10148" calcext:value-type="float">
            <text:p>1014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17453703703704" calcext:value-type="float">
            <text:p>0,00117453703703704000</text:p>
          </table:table-cell>
          <table:table-cell table:formula="of:=[.D174]-[.D173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59" office:value-type="float" office:value="10207" calcext:value-type="float">
            <text:p>10207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18136574074074" calcext:value-type="float">
            <text:p>0,00118136574074074000</text:p>
          </table:table-cell>
          <table:table-cell table:formula="of:=[.D175]-[.D17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59" office:value-type="float" office:value="10266" calcext:value-type="float">
            <text:p>1026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18819444444444" calcext:value-type="float">
            <text:p>0,00118819444444444000</text:p>
          </table:table-cell>
          <table:table-cell table:formula="of:=[.D176]-[.D17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59" office:value-type="float" office:value="10325" calcext:value-type="float">
            <text:p>103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19502314814815" calcext:value-type="float">
            <text:p>0,00119502314814815000</text:p>
          </table:table-cell>
          <table:table-cell table:formula="of:=[.D177]-[.D17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59" office:value-type="float" office:value="10384" calcext:value-type="float">
            <text:p>1038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20185185185185" calcext:value-type="float">
            <text:p>0,00120185185185185000</text:p>
          </table:table-cell>
          <table:table-cell table:formula="of:=[.D178]-[.D177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59" office:value-type="float" office:value="10443" calcext:value-type="float">
            <text:p>10443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20868055555556" calcext:value-type="float">
            <text:p>0,00120868055555556000</text:p>
          </table:table-cell>
          <table:table-cell table:formula="of:=[.D179]-[.D17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59" office:value-type="float" office:value="10502" calcext:value-type="float">
            <text:p>1050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21550925925926" calcext:value-type="float">
            <text:p>0,00121550925925926000</text:p>
          </table:table-cell>
          <table:table-cell table:formula="of:=[.D180]-[.D17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59" office:value-type="float" office:value="10561" calcext:value-type="float">
            <text:p>10561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22233796296296" calcext:value-type="float">
            <text:p>0,00122233796296296000</text:p>
          </table:table-cell>
          <table:table-cell table:formula="of:=[.D181]-[.D180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59" office:value-type="float" office:value="10620" calcext:value-type="float">
            <text:p>106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22916666666667" calcext:value-type="float">
            <text:p>0,00122916666666667000</text:p>
          </table:table-cell>
          <table:table-cell table:formula="of:=[.D182]-[.D18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59" office:value-type="float" office:value="10679" calcext:value-type="float">
            <text:p>10679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23599537037037" calcext:value-type="float">
            <text:p>0,00123599537037037000</text:p>
          </table:table-cell>
          <table:table-cell table:formula="of:=[.D183]-[.D18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59" office:value-type="float" office:value="10738" calcext:value-type="float">
            <text:p>1073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24282407407407" calcext:value-type="float">
            <text:p>0,00124282407407407000</text:p>
          </table:table-cell>
          <table:table-cell table:formula="of:=[.D184]-[.D183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59" office:value-type="float" office:value="10797" calcext:value-type="float">
            <text:p>10797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24965277777778" calcext:value-type="float">
            <text:p>0,00124965277777778000</text:p>
          </table:table-cell>
          <table:table-cell table:formula="of:=[.D185]-[.D18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59" office:value-type="float" office:value="10856" calcext:value-type="float">
            <text:p>1085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25648148148148" calcext:value-type="float">
            <text:p>0,00125648148148148000</text:p>
          </table:table-cell>
          <table:table-cell table:formula="of:=[.D186]-[.D18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59" office:value-type="float" office:value="10915" calcext:value-type="float">
            <text:p>1091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26331018518519" calcext:value-type="float">
            <text:p>0,00126331018518519000</text:p>
          </table:table-cell>
          <table:table-cell table:formula="of:=[.D187]-[.D186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59" office:value-type="float" office:value="10974" calcext:value-type="float">
            <text:p>1097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27013888888889" calcext:value-type="float">
            <text:p>0,00127013888888889000</text:p>
          </table:table-cell>
          <table:table-cell table:formula="of:=[.D188]-[.D18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59" office:value-type="float" office:value="11033" calcext:value-type="float">
            <text:p>11033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27696759259259" calcext:value-type="float">
            <text:p>0,00127696759259259000</text:p>
          </table:table-cell>
          <table:table-cell table:formula="of:=[.D189]-[.D18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59" office:value-type="float" office:value="11092" calcext:value-type="float">
            <text:p>1109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2837962962963" calcext:value-type="float">
            <text:p>0,00128379629629630000</text:p>
          </table:table-cell>
          <table:table-cell table:formula="of:=[.D190]-[.D18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59" office:value-type="float" office:value="11151" calcext:value-type="float">
            <text:p>11151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290625" calcext:value-type="float">
            <text:p>0,00129062500000000000</text:p>
          </table:table-cell>
          <table:table-cell table:formula="of:=[.D191]-[.D190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59" office:value-type="float" office:value="11210" calcext:value-type="float">
            <text:p>1121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2974537037037" calcext:value-type="float">
            <text:p>0,00129745370370370000</text:p>
          </table:table-cell>
          <table:table-cell table:formula="of:=[.D192]-[.D19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59" office:value-type="float" office:value="11269" calcext:value-type="float">
            <text:p>11269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30428240740741" calcext:value-type="float">
            <text:p>0,00130428240740741000</text:p>
          </table:table-cell>
          <table:table-cell table:formula="of:=[.D193]-[.D19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59" office:value-type="float" office:value="11328" calcext:value-type="float">
            <text:p>1132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31111111111111" calcext:value-type="float">
            <text:p>0,00131111111111111000</text:p>
          </table:table-cell>
          <table:table-cell table:formula="of:=[.D194]-[.D193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59" office:value-type="float" office:value="11387" calcext:value-type="float">
            <text:p>11387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31793981481481" calcext:value-type="float">
            <text:p>0,00131793981481481000</text:p>
          </table:table-cell>
          <table:table-cell table:formula="of:=[.D195]-[.D19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59" office:value-type="float" office:value="11446" calcext:value-type="float">
            <text:p>1144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32476851851852" calcext:value-type="float">
            <text:p>0,00132476851851852000</text:p>
          </table:table-cell>
          <table:table-cell table:formula="of:=[.D196]-[.D19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59" office:value-type="float" office:value="11505" calcext:value-type="float">
            <text:p>1150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33159722222222" calcext:value-type="float">
            <text:p>0,00133159722222222000</text:p>
          </table:table-cell>
          <table:table-cell table:formula="of:=[.D197]-[.D196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59" office:value-type="float" office:value="11564" calcext:value-type="float">
            <text:p>1156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33842592592593" calcext:value-type="float">
            <text:p>0,00133842592592593000</text:p>
          </table:table-cell>
          <table:table-cell table:formula="of:=[.D198]-[.D19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59" office:value-type="float" office:value="11623" calcext:value-type="float">
            <text:p>11623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34525462962963" calcext:value-type="float">
            <text:p>0,00134525462962963000</text:p>
          </table:table-cell>
          <table:table-cell table:formula="of:=[.D199]-[.D19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59" office:value-type="float" office:value="11682" calcext:value-type="float">
            <text:p>1168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35208333333333" calcext:value-type="float">
            <text:p>0,00135208333333333000</text:p>
          </table:table-cell>
          <table:table-cell table:formula="of:=[.D200]-[.D199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59" office:value-type="float" office:value="11741" calcext:value-type="float">
            <text:p>11741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35891203703704" calcext:value-type="float">
            <text:p>0,00135891203703704000</text:p>
          </table:table-cell>
          <table:table-cell table:formula="of:=[.D201]-[.D20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59" office:value-type="float" office:value="11800" calcext:value-type="float">
            <text:p>11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36574074074074" calcext:value-type="float">
            <text:p>0,00136574074074074000</text:p>
          </table:table-cell>
          <table:table-cell table:formula="of:=[.D202]-[.D20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59" office:value-type="float" office:value="11859" calcext:value-type="float">
            <text:p>11859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37256944444444" calcext:value-type="float">
            <text:p>0,00137256944444444000</text:p>
          </table:table-cell>
          <table:table-cell table:formula="of:=[.D203]-[.D202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59" office:value-type="float" office:value="11918" calcext:value-type="float">
            <text:p>1191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37939814814815" calcext:value-type="float">
            <text:p>0,00137939814814815000</text:p>
          </table:table-cell>
          <table:table-cell table:formula="of:=[.D204]-[.D20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59" office:value-type="float" office:value="11977" calcext:value-type="float">
            <text:p>11977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38622685185185" calcext:value-type="float">
            <text:p>0,00138622685185185000</text:p>
          </table:table-cell>
          <table:table-cell table:formula="of:=[.D205]-[.D20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59" office:value-type="float" office:value="12036" calcext:value-type="float">
            <text:p>1203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39305555555556" calcext:value-type="float">
            <text:p>0,00139305555555556000</text:p>
          </table:table-cell>
          <table:table-cell table:formula="of:=[.D206]-[.D20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59" office:value-type="float" office:value="12095" calcext:value-type="float">
            <text:p>1209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39988425925926" calcext:value-type="float">
            <text:p>0,00139988425925926000</text:p>
          </table:table-cell>
          <table:table-cell table:formula="of:=[.D207]-[.D206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59" office:value-type="float" office:value="12154" calcext:value-type="float">
            <text:p>1215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40671296296296" calcext:value-type="float">
            <text:p>0,00140671296296296000</text:p>
          </table:table-cell>
          <table:table-cell table:formula="of:=[.D208]-[.D20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59" office:value-type="float" office:value="12213" calcext:value-type="float">
            <text:p>12213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41354166666667" calcext:value-type="float">
            <text:p>0,00141354166666667000</text:p>
          </table:table-cell>
          <table:table-cell table:formula="of:=[.D209]-[.D20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59" office:value-type="float" office:value="12272" calcext:value-type="float">
            <text:p>1227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42037037037037" calcext:value-type="float">
            <text:p>0,00142037037037037000</text:p>
          </table:table-cell>
          <table:table-cell table:formula="of:=[.D210]-[.D209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59" office:value-type="float" office:value="12331" calcext:value-type="float">
            <text:p>12331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42719907407407" calcext:value-type="float">
            <text:p>0,00142719907407407000</text:p>
          </table:table-cell>
          <table:table-cell table:formula="of:=[.D211]-[.D21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59" office:value-type="float" office:value="12390" calcext:value-type="float">
            <text:p>1239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43402777777778" calcext:value-type="float">
            <text:p>0,00143402777777778000</text:p>
          </table:table-cell>
          <table:table-cell table:formula="of:=[.D212]-[.D21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59" office:value-type="float" office:value="12449" calcext:value-type="float">
            <text:p>12449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44085648148148" calcext:value-type="float">
            <text:p>0,00144085648148148000</text:p>
          </table:table-cell>
          <table:table-cell table:formula="of:=[.D213]-[.D212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59" office:value-type="float" office:value="12508" calcext:value-type="float">
            <text:p>1250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44768518518519" calcext:value-type="float">
            <text:p>0,00144768518518518000</text:p>
          </table:table-cell>
          <table:table-cell table:formula="of:=[.D214]-[.D21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59" office:value-type="float" office:value="12567" calcext:value-type="float">
            <text:p>12567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45451388888889" calcext:value-type="float">
            <text:p>0,00145451388888889000</text:p>
          </table:table-cell>
          <table:table-cell table:formula="of:=[.D215]-[.D21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59" office:value-type="float" office:value="12626" calcext:value-type="float">
            <text:p>1262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46134259259259" calcext:value-type="float">
            <text:p>0,00146134259259259000</text:p>
          </table:table-cell>
          <table:table-cell table:formula="of:=[.D216]-[.D215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59" office:value-type="float" office:value="12685" calcext:value-type="float">
            <text:p>1268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4681712962963" calcext:value-type="float">
            <text:p>0,00146817129629630000</text:p>
          </table:table-cell>
          <table:table-cell table:formula="of:=[.D217]-[.D21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59" office:value-type="float" office:value="12744" calcext:value-type="float">
            <text:p>1274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475" calcext:value-type="float">
            <text:p>0,00147500000000000000</text:p>
          </table:table-cell>
          <table:table-cell table:formula="of:=[.D218]-[.D21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59" office:value-type="float" office:value="12803" calcext:value-type="float">
            <text:p>12803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4818287037037" calcext:value-type="float">
            <text:p>0,00148182870370370000</text:p>
          </table:table-cell>
          <table:table-cell table:formula="of:=[.D219]-[.D21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59" office:value-type="float" office:value="12862" calcext:value-type="float">
            <text:p>1286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48865740740741" calcext:value-type="float">
            <text:p>0,00148865740740741000</text:p>
          </table:table-cell>
          <table:table-cell table:formula="of:=[.D220]-[.D219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59" office:value-type="float" office:value="12921" calcext:value-type="float">
            <text:p>12921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49548611111111" calcext:value-type="float">
            <text:p>0,00149548611111111000</text:p>
          </table:table-cell>
          <table:table-cell table:formula="of:=[.D221]-[.D22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59" office:value-type="float" office:value="12980" calcext:value-type="float">
            <text:p>129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50231481481481" calcext:value-type="float">
            <text:p>0,00150231481481481000</text:p>
          </table:table-cell>
          <table:table-cell table:formula="of:=[.D222]-[.D22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59" office:value-type="float" office:value="13039" calcext:value-type="float">
            <text:p>13039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50914351851852" calcext:value-type="float">
            <text:p>0,00150914351851852000</text:p>
          </table:table-cell>
          <table:table-cell table:formula="of:=[.D223]-[.D222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59" office:value-type="float" office:value="13098" calcext:value-type="float">
            <text:p>1309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51597222222222" calcext:value-type="float">
            <text:p>0,00151597222222222000</text:p>
          </table:table-cell>
          <table:table-cell table:formula="of:=[.D224]-[.D22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59" office:value-type="float" office:value="13157" calcext:value-type="float">
            <text:p>13157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52280092592593" calcext:value-type="float">
            <text:p>0,00152280092592593000</text:p>
          </table:table-cell>
          <table:table-cell table:formula="of:=[.D225]-[.D22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59" office:value-type="float" office:value="13216" calcext:value-type="float">
            <text:p>1321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52962962962963" calcext:value-type="float">
            <text:p>0,00152962962962963000</text:p>
          </table:table-cell>
          <table:table-cell table:formula="of:=[.D226]-[.D225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59" office:value-type="float" office:value="13275" calcext:value-type="float">
            <text:p>132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53645833333333" calcext:value-type="float">
            <text:p>0,00153645833333333000</text:p>
          </table:table-cell>
          <table:table-cell table:formula="of:=[.D227]-[.D22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59" office:value-type="float" office:value="13334" calcext:value-type="float">
            <text:p>1333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54328703703704" calcext:value-type="float">
            <text:p>0,00154328703703704000</text:p>
          </table:table-cell>
          <table:table-cell table:formula="of:=[.D228]-[.D22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59" office:value-type="float" office:value="13393" calcext:value-type="float">
            <text:p>13393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55011574074074" calcext:value-type="float">
            <text:p>0,00155011574074074000</text:p>
          </table:table-cell>
          <table:table-cell table:formula="of:=[.D229]-[.D228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59" office:value-type="float" office:value="13452" calcext:value-type="float">
            <text:p>1345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55694444444444" calcext:value-type="float">
            <text:p>0,00155694444444444000</text:p>
          </table:table-cell>
          <table:table-cell table:formula="of:=[.D230]-[.D22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59" office:value-type="float" office:value="13511" calcext:value-type="float">
            <text:p>13511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56377314814815" calcext:value-type="float">
            <text:p>0,00156377314814815000</text:p>
          </table:table-cell>
          <table:table-cell table:formula="of:=[.D231]-[.D23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59" office:value-type="float" office:value="13570" calcext:value-type="float">
            <text:p>1357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57060185185185" calcext:value-type="float">
            <text:p>0,00157060185185185000</text:p>
          </table:table-cell>
          <table:table-cell table:formula="of:=[.D232]-[.D23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59" office:value-type="float" office:value="13629" calcext:value-type="float">
            <text:p>13629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57743055555556" calcext:value-type="float">
            <text:p>0,00157743055555556000</text:p>
          </table:table-cell>
          <table:table-cell table:formula="of:=[.D233]-[.D232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59" office:value-type="float" office:value="13688" calcext:value-type="float">
            <text:p>1368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58425925925926" calcext:value-type="float">
            <text:p>0,00158425925925926000</text:p>
          </table:table-cell>
          <table:table-cell table:formula="of:=[.D234]-[.D23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59" office:value-type="float" office:value="13747" calcext:value-type="float">
            <text:p>13747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59108796296296" calcext:value-type="float">
            <text:p>0,00159108796296296000</text:p>
          </table:table-cell>
          <table:table-cell table:formula="of:=[.D235]-[.D23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59" office:value-type="float" office:value="13806" calcext:value-type="float">
            <text:p>1380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59791666666667" calcext:value-type="float">
            <text:p>0,00159791666666667000</text:p>
          </table:table-cell>
          <table:table-cell table:formula="of:=[.D236]-[.D235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59" office:value-type="float" office:value="13865" calcext:value-type="float">
            <text:p>1386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60474537037037" calcext:value-type="float">
            <text:p>0,00160474537037037000</text:p>
          </table:table-cell>
          <table:table-cell table:formula="of:=[.D237]-[.D23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59" office:value-type="float" office:value="13924" calcext:value-type="float">
            <text:p>1392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61157407407407" calcext:value-type="float">
            <text:p>0,00161157407407407000</text:p>
          </table:table-cell>
          <table:table-cell table:formula="of:=[.D238]-[.D23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59" office:value-type="float" office:value="13983" calcext:value-type="float">
            <text:p>13983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61840277777778" calcext:value-type="float">
            <text:p>0,00161840277777778000</text:p>
          </table:table-cell>
          <table:table-cell table:formula="of:=[.D239]-[.D238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59" office:value-type="float" office:value="14042" calcext:value-type="float">
            <text:p>1404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62523148148148" calcext:value-type="float">
            <text:p>0,00162523148148148000</text:p>
          </table:table-cell>
          <table:table-cell table:formula="of:=[.D240]-[.D23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59" office:value-type="float" office:value="14101" calcext:value-type="float">
            <text:p>14101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63206018518519" calcext:value-type="float">
            <text:p>0,00163206018518519000</text:p>
          </table:table-cell>
          <table:table-cell table:formula="of:=[.D241]-[.D24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59" office:value-type="float" office:value="14160" calcext:value-type="float">
            <text:p>141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63888888888889" calcext:value-type="float">
            <text:p>0,00163888888888889000</text:p>
          </table:table-cell>
          <table:table-cell table:formula="of:=[.D242]-[.D241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59" office:value-type="float" office:value="14219" calcext:value-type="float">
            <text:p>14219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64571759259259" calcext:value-type="float">
            <text:p>0,00164571759259259000</text:p>
          </table:table-cell>
          <table:table-cell table:formula="of:=[.D243]-[.D24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59" office:value-type="float" office:value="14278" calcext:value-type="float">
            <text:p>1427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6525462962963" calcext:value-type="float">
            <text:p>0,00165254629629630000</text:p>
          </table:table-cell>
          <table:table-cell table:formula="of:=[.D244]-[.D24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59" office:value-type="float" office:value="14337" calcext:value-type="float">
            <text:p>14337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659375" calcext:value-type="float">
            <text:p>0,00165937500000000000</text:p>
          </table:table-cell>
          <table:table-cell table:formula="of:=[.D245]-[.D244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59" office:value-type="float" office:value="14396" calcext:value-type="float">
            <text:p>1439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6662037037037" calcext:value-type="float">
            <text:p>0,00166620370370370000</text:p>
          </table:table-cell>
          <table:table-cell table:formula="of:=[.D246]-[.D24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59" office:value-type="float" office:value="14455" calcext:value-type="float">
            <text:p>1445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67303240740741" calcext:value-type="float">
            <text:p>0,00167303240740741000</text:p>
          </table:table-cell>
          <table:table-cell table:formula="of:=[.D247]-[.D24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59" office:value-type="float" office:value="14514" calcext:value-type="float">
            <text:p>1451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67986111111111" calcext:value-type="float">
            <text:p>0,00167986111111111000</text:p>
          </table:table-cell>
          <table:table-cell table:formula="of:=[.D248]-[.D24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59" office:value-type="float" office:value="14573" calcext:value-type="float">
            <text:p>14573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68668981481482" calcext:value-type="float">
            <text:p>0,00168668981481482000</text:p>
          </table:table-cell>
          <table:table-cell table:formula="of:=[.D249]-[.D248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59" office:value-type="float" office:value="14632" calcext:value-type="float">
            <text:p>1463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69351851851852" calcext:value-type="float">
            <text:p>0,00169351851851852000</text:p>
          </table:table-cell>
          <table:table-cell table:formula="of:=[.D250]-[.D24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59" office:value-type="float" office:value="14691" calcext:value-type="float">
            <text:p>14691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70034722222222" calcext:value-type="float">
            <text:p>0,00170034722222222000</text:p>
          </table:table-cell>
          <table:table-cell table:formula="of:=[.D251]-[.D25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59" office:value-type="float" office:value="14750" calcext:value-type="float">
            <text:p>14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70717592592593" calcext:value-type="float">
            <text:p>0,00170717592592593000</text:p>
          </table:table-cell>
          <table:table-cell table:formula="of:=[.D252]-[.D251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59" office:value-type="float" office:value="14809" calcext:value-type="float">
            <text:p>14809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71400462962963" calcext:value-type="float">
            <text:p>0,00171400462962963000</text:p>
          </table:table-cell>
          <table:table-cell table:formula="of:=[.D253]-[.D25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59" office:value-type="float" office:value="14868" calcext:value-type="float">
            <text:p>1486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72083333333333" calcext:value-type="float">
            <text:p>0,00172083333333333000</text:p>
          </table:table-cell>
          <table:table-cell table:formula="of:=[.D254]-[.D25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59" office:value-type="float" office:value="14927" calcext:value-type="float">
            <text:p>14927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72766203703704" calcext:value-type="float">
            <text:p>0,00172766203703704000</text:p>
          </table:table-cell>
          <table:table-cell table:formula="of:=[.D255]-[.D254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59" office:value-type="float" office:value="14986" calcext:value-type="float">
            <text:p>1498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73449074074074" calcext:value-type="float">
            <text:p>0,00173449074074074000</text:p>
          </table:table-cell>
          <table:table-cell table:formula="of:=[.D256]-[.D25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59" office:value-type="float" office:value="15045" calcext:value-type="float">
            <text:p>1504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74131944444444" calcext:value-type="float">
            <text:p>0,00174131944444444000</text:p>
          </table:table-cell>
          <table:table-cell table:formula="of:=[.D257]-[.D25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59" office:value-type="float" office:value="15104" calcext:value-type="float">
            <text:p>15104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74814814814815" calcext:value-type="float">
            <text:p>0,00174814814814815000</text:p>
          </table:table-cell>
          <table:table-cell table:formula="of:=[.D258]-[.D257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59" office:value-type="float" office:value="15163" calcext:value-type="float">
            <text:p>15163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75497685185185" calcext:value-type="float">
            <text:p>0,00175497685185185000</text:p>
          </table:table-cell>
          <table:table-cell table:formula="of:=[.D259]-[.D25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59" office:value-type="float" office:value="15222" calcext:value-type="float">
            <text:p>15222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76180555555556" calcext:value-type="float">
            <text:p>0,00176180555555556000</text:p>
          </table:table-cell>
          <table:table-cell table:formula="of:=[.D260]-[.D25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59" office:value-type="float" office:value="15281" calcext:value-type="float">
            <text:p>15281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76863425925926" calcext:value-type="float">
            <text:p>0,00176863425925926000</text:p>
          </table:table-cell>
          <table:table-cell table:formula="of:=[.D261]-[.D26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59" office:value-type="float" office:value="15340" calcext:value-type="float">
            <text:p>1534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77546296296296" calcext:value-type="float">
            <text:p>0,00177546296296296000</text:p>
          </table:table-cell>
          <table:table-cell table:formula="of:=[.D262]-[.D261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59" office:value-type="float" office:value="15399" calcext:value-type="float">
            <text:p>15399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78229166666667" calcext:value-type="float">
            <text:p>0,00178229166666667000</text:p>
          </table:table-cell>
          <table:table-cell table:formula="of:=[.D263]-[.D26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59" office:value-type="float" office:value="15458" calcext:value-type="float">
            <text:p>15458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78912037037037" calcext:value-type="float">
            <text:p>0,00178912037037037000</text:p>
          </table:table-cell>
          <table:table-cell table:formula="of:=[.D264]-[.D26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59" office:value-type="float" office:value="15517" calcext:value-type="float">
            <text:p>15517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79594907407407" calcext:value-type="float">
            <text:p>0,00179594907407407000</text:p>
          </table:table-cell>
          <table:table-cell table:formula="of:=[.D265]-[.D264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59" office:value-type="float" office:value="15576" calcext:value-type="float">
            <text:p>15576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80277777777778" calcext:value-type="float">
            <text:p>0,00180277777777778000</text:p>
          </table:table-cell>
          <table:table-cell table:formula="of:=[.D266]-[.D26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59" office:value-type="float" office:value="15635" calcext:value-type="float">
            <text:p>1563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80960648148148" calcext:value-type="float">
            <text:p>0,00180960648148148000</text:p>
          </table:table-cell>
          <table:table-cell table:formula="of:=[.D267]-[.D26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59" office:value-type="float" office:value="15694" calcext:value-type="float">
            <text:p>15694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81643518518519" calcext:value-type="float">
            <text:p>0,00181643518518519000</text:p>
          </table:table-cell>
          <table:table-cell table:formula="of:=[.D268]-[.D267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59" office:value-type="float" office:value="15753" calcext:value-type="float">
            <text:p>15753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82326388888889" calcext:value-type="float">
            <text:p>0,00182326388888889000</text:p>
          </table:table-cell>
          <table:table-cell table:formula="of:=[.D269]-[.D26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59" office:value-type="float" office:value="15812" calcext:value-type="float">
            <text:p>15812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83009259259259" calcext:value-type="float">
            <text:p>0,00183009259259259000</text:p>
          </table:table-cell>
          <table:table-cell table:formula="of:=[.D270]-[.D26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59" office:value-type="float" office:value="15871" calcext:value-type="float">
            <text:p>15871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8369212962963" calcext:value-type="float">
            <text:p>0,00183692129629630000</text:p>
          </table:table-cell>
          <table:table-cell table:formula="of:=[.D271]-[.D270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59" office:value-type="float" office:value="15930" calcext:value-type="float">
            <text:p>1593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84375" calcext:value-type="float">
            <text:p>0,00184375000000000000</text:p>
          </table:table-cell>
          <table:table-cell table:formula="of:=[.D272]-[.D27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59" office:value-type="float" office:value="15989" calcext:value-type="float">
            <text:p>15989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8505787037037" calcext:value-type="float">
            <text:p>0,00185057870370370000</text:p>
          </table:table-cell>
          <table:table-cell table:formula="of:=[.D273]-[.D27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59" office:value-type="float" office:value="16048" calcext:value-type="float">
            <text:p>16048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85740740740741" calcext:value-type="float">
            <text:p>0,00185740740740741000</text:p>
          </table:table-cell>
          <table:table-cell table:formula="of:=[.D274]-[.D27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59" office:value-type="float" office:value="16107" calcext:value-type="float">
            <text:p>16107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86423611111111" calcext:value-type="float">
            <text:p>0,00186423611111111000</text:p>
          </table:table-cell>
          <table:table-cell table:formula="of:=[.D275]-[.D274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59" office:value-type="float" office:value="16166" calcext:value-type="float">
            <text:p>16166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87106481481481" calcext:value-type="float">
            <text:p>0,00187106481481481000</text:p>
          </table:table-cell>
          <table:table-cell table:formula="of:=[.D276]-[.D27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59" office:value-type="float" office:value="16225" calcext:value-type="float">
            <text:p>162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87789351851852" calcext:value-type="float">
            <text:p>0,00187789351851852000</text:p>
          </table:table-cell>
          <table:table-cell table:formula="of:=[.D277]-[.D27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59" office:value-type="float" office:value="16284" calcext:value-type="float">
            <text:p>16284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88472222222222" calcext:value-type="float">
            <text:p>0,00188472222222222000</text:p>
          </table:table-cell>
          <table:table-cell table:formula="of:=[.D278]-[.D277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59" office:value-type="float" office:value="16343" calcext:value-type="float">
            <text:p>16343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89155092592593" calcext:value-type="float">
            <text:p>0,00189155092592593000</text:p>
          </table:table-cell>
          <table:table-cell table:formula="of:=[.D279]-[.D27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59" office:value-type="float" office:value="16402" calcext:value-type="float">
            <text:p>16402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89837962962963" calcext:value-type="float">
            <text:p>0,00189837962962963000</text:p>
          </table:table-cell>
          <table:table-cell table:formula="of:=[.D280]-[.D27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59" office:value-type="float" office:value="16461" calcext:value-type="float">
            <text:p>16461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90520833333333" calcext:value-type="float">
            <text:p>0,00190520833333333000</text:p>
          </table:table-cell>
          <table:table-cell table:formula="of:=[.D281]-[.D280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59" office:value-type="float" office:value="16520" calcext:value-type="float">
            <text:p>1652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91203703703704" calcext:value-type="float">
            <text:p>0,00191203703703704000</text:p>
          </table:table-cell>
          <table:table-cell table:formula="of:=[.D282]-[.D28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59" office:value-type="float" office:value="16579" calcext:value-type="float">
            <text:p>16579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91886574074074" calcext:value-type="float">
            <text:p>0,00191886574074074000</text:p>
          </table:table-cell>
          <table:table-cell table:formula="of:=[.D283]-[.D28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59" office:value-type="float" office:value="16638" calcext:value-type="float">
            <text:p>16638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92569444444444" calcext:value-type="float">
            <text:p>0,00192569444444444000</text:p>
          </table:table-cell>
          <table:table-cell table:formula="of:=[.D284]-[.D283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59" office:value-type="float" office:value="16697" calcext:value-type="float">
            <text:p>16697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93252314814815" calcext:value-type="float">
            <text:p>0,00193252314814815000</text:p>
          </table:table-cell>
          <table:table-cell table:formula="of:=[.D285]-[.D28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59" office:value-type="float" office:value="16756" calcext:value-type="float">
            <text:p>16756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93935185185185" calcext:value-type="float">
            <text:p>0,00193935185185185000</text:p>
          </table:table-cell>
          <table:table-cell table:formula="of:=[.D286]-[.D28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59" office:value-type="float" office:value="16815" calcext:value-type="float">
            <text:p>1681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94618055555556" calcext:value-type="float">
            <text:p>0,00194618055555556000</text:p>
          </table:table-cell>
          <table:table-cell table:formula="of:=[.D287]-[.D286]" office:value-type="float" office:value="0.00000682870370370355" calcext:value-type="float">
            <text:p>0,00000682870370370355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59" office:value-type="float" office:value="16874" calcext:value-type="float">
            <text:p>16874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95300925925926" calcext:value-type="float">
            <text:p>0,00195300925925926000</text:p>
          </table:table-cell>
          <table:table-cell table:formula="of:=[.D288]-[.D287]" office:value-type="float" office:value="0.00000682870370370399" calcext:value-type="float">
            <text:p>0,00000682870370370399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59" office:value-type="float" office:value="16933" calcext:value-type="float">
            <text:p>16933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95983796296296" calcext:value-type="float">
            <text:p>0,00195983796296296000</text:p>
          </table:table-cell>
          <table:table-cell table:formula="of:=[.D289]-[.D288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59" office:value-type="float" office:value="16992" calcext:value-type="float">
            <text:p>16992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96666666666667" calcext:value-type="float">
            <text:p>0,00196666666666667000</text:p>
          </table:table-cell>
          <table:table-cell table:formula="of:=[.D290]-[.D28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59" office:value-type="float" office:value="17051" calcext:value-type="float">
            <text:p>17051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97349537037037" calcext:value-type="float">
            <text:p>0,00197349537037037000</text:p>
          </table:table-cell>
          <table:table-cell table:formula="of:=[.D291]-[.D29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59" office:value-type="float" office:value="17110" calcext:value-type="float">
            <text:p>1711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98032407407407" calcext:value-type="float">
            <text:p>0,00198032407407407000</text:p>
          </table:table-cell>
          <table:table-cell table:formula="of:=[.D292]-[.D29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59" office:value-type="float" office:value="17169" calcext:value-type="float">
            <text:p>17169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98715277777778" calcext:value-type="float">
            <text:p>0,00198715277777778000</text:p>
          </table:table-cell>
          <table:table-cell table:formula="of:=[.D293]-[.D29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59" office:value-type="float" office:value="17228" calcext:value-type="float">
            <text:p>17228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99398148148148" calcext:value-type="float">
            <text:p>0,00199398148148148000</text:p>
          </table:table-cell>
          <table:table-cell table:formula="of:=[.D294]-[.D29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59" office:value-type="float" office:value="17287" calcext:value-type="float">
            <text:p>17287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00081018518519" calcext:value-type="float">
            <text:p>0,00200081018518519000</text:p>
          </table:table-cell>
          <table:table-cell table:formula="of:=[.D295]-[.D29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59" office:value-type="float" office:value="17346" calcext:value-type="float">
            <text:p>17346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00763888888889" calcext:value-type="float">
            <text:p>0,00200763888888889000</text:p>
          </table:table-cell>
          <table:table-cell table:formula="of:=[.D296]-[.D295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59" office:value-type="float" office:value="17405" calcext:value-type="float">
            <text:p>1740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01446759259259" calcext:value-type="float">
            <text:p>0,00201446759259259000</text:p>
          </table:table-cell>
          <table:table-cell table:formula="of:=[.D297]-[.D29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59" office:value-type="float" office:value="17464" calcext:value-type="float">
            <text:p>17464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0212962962963" calcext:value-type="float">
            <text:p>0,00202129629629630000</text:p>
          </table:table-cell>
          <table:table-cell table:formula="of:=[.D298]-[.D29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59" office:value-type="float" office:value="17523" calcext:value-type="float">
            <text:p>17523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028125" calcext:value-type="float">
            <text:p>0,00202812500000000000</text:p>
          </table:table-cell>
          <table:table-cell table:formula="of:=[.D299]-[.D29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59" office:value-type="float" office:value="17582" calcext:value-type="float">
            <text:p>17582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0349537037037" calcext:value-type="float">
            <text:p>0,00203495370370370000</text:p>
          </table:table-cell>
          <table:table-cell table:formula="of:=[.D300]-[.D29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59" office:value-type="float" office:value="17641" calcext:value-type="float">
            <text:p>17641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04178240740741" calcext:value-type="float">
            <text:p>0,00204178240740741000</text:p>
          </table:table-cell>
          <table:table-cell table:formula="of:=[.D301]-[.D30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59" office:value-type="float" office:value="17700" calcext:value-type="float">
            <text:p>177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04861111111111" calcext:value-type="float">
            <text:p>0,00204861111111111000</text:p>
          </table:table-cell>
          <table:table-cell table:formula="of:=[.D302]-[.D301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59" office:value-type="float" office:value="17759" calcext:value-type="float">
            <text:p>17759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05543981481481" calcext:value-type="float">
            <text:p>0,00205543981481481000</text:p>
          </table:table-cell>
          <table:table-cell table:formula="of:=[.D303]-[.D30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59" office:value-type="float" office:value="17818" calcext:value-type="float">
            <text:p>17818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06226851851852" calcext:value-type="float">
            <text:p>0,00206226851851852000</text:p>
          </table:table-cell>
          <table:table-cell table:formula="of:=[.D304]-[.D30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59" office:value-type="float" office:value="17877" calcext:value-type="float">
            <text:p>17877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06909722222222" calcext:value-type="float">
            <text:p>0,00206909722222222000</text:p>
          </table:table-cell>
          <table:table-cell table:formula="of:=[.D305]-[.D30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59" office:value-type="float" office:value="17936" calcext:value-type="float">
            <text:p>17936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07592592592593" calcext:value-type="float">
            <text:p>0,00207592592592593000</text:p>
          </table:table-cell>
          <table:table-cell table:formula="of:=[.D306]-[.D30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59" office:value-type="float" office:value="17995" calcext:value-type="float">
            <text:p>1799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08275462962963" calcext:value-type="float">
            <text:p>0,00208275462962963000</text:p>
          </table:table-cell>
          <table:table-cell table:formula="of:=[.D307]-[.D30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59" office:value-type="float" office:value="18054" calcext:value-type="float">
            <text:p>18054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08958333333333" calcext:value-type="float">
            <text:p>0,00208958333333333000</text:p>
          </table:table-cell>
          <table:table-cell table:formula="of:=[.D308]-[.D307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59" office:value-type="float" office:value="18113" calcext:value-type="float">
            <text:p>18113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09641203703704" calcext:value-type="float">
            <text:p>0,00209641203703704000</text:p>
          </table:table-cell>
          <table:table-cell table:formula="of:=[.D309]-[.D30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59" office:value-type="float" office:value="18172" calcext:value-type="float">
            <text:p>18172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10324074074074" calcext:value-type="float">
            <text:p>0,00210324074074074000</text:p>
          </table:table-cell>
          <table:table-cell table:formula="of:=[.D310]-[.D30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59" office:value-type="float" office:value="18231" calcext:value-type="float">
            <text:p>18231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11006944444444" calcext:value-type="float">
            <text:p>0,00211006944444444000</text:p>
          </table:table-cell>
          <table:table-cell table:formula="of:=[.D311]-[.D31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59" office:value-type="float" office:value="18290" calcext:value-type="float">
            <text:p>1829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11689814814815" calcext:value-type="float">
            <text:p>0,00211689814814815000</text:p>
          </table:table-cell>
          <table:table-cell table:formula="of:=[.D312]-[.D31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59" office:value-type="float" office:value="18349" calcext:value-type="float">
            <text:p>18349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12372685185185" calcext:value-type="float">
            <text:p>0,00212372685185185000</text:p>
          </table:table-cell>
          <table:table-cell table:formula="of:=[.D313]-[.D31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59" office:value-type="float" office:value="18408" calcext:value-type="float">
            <text:p>18408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13055555555556" calcext:value-type="float">
            <text:p>0,00213055555555556000</text:p>
          </table:table-cell>
          <table:table-cell table:formula="of:=[.D314]-[.D31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59" office:value-type="float" office:value="18467" calcext:value-type="float">
            <text:p>18467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13738425925926" calcext:value-type="float">
            <text:p>0,00213738425925926000</text:p>
          </table:table-cell>
          <table:table-cell table:formula="of:=[.D315]-[.D314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59" office:value-type="float" office:value="18526" calcext:value-type="float">
            <text:p>18526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14421296296296" calcext:value-type="float">
            <text:p>0,00214421296296296000</text:p>
          </table:table-cell>
          <table:table-cell table:formula="of:=[.D316]-[.D31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59" office:value-type="float" office:value="18585" calcext:value-type="float">
            <text:p>1858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15104166666667" calcext:value-type="float">
            <text:p>0,00215104166666667000</text:p>
          </table:table-cell>
          <table:table-cell table:formula="of:=[.D317]-[.D31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59" office:value-type="float" office:value="18644" calcext:value-type="float">
            <text:p>18644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15787037037037" calcext:value-type="float">
            <text:p>0,00215787037037037000</text:p>
          </table:table-cell>
          <table:table-cell table:formula="of:=[.D318]-[.D31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59" office:value-type="float" office:value="18703" calcext:value-type="float">
            <text:p>18703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16469907407407" calcext:value-type="float">
            <text:p>0,00216469907407407000</text:p>
          </table:table-cell>
          <table:table-cell table:formula="of:=[.D319]-[.D31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59" office:value-type="float" office:value="18762" calcext:value-type="float">
            <text:p>18762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17152777777778" calcext:value-type="float">
            <text:p>0,00217152777777778000</text:p>
          </table:table-cell>
          <table:table-cell table:formula="of:=[.D320]-[.D31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59" office:value-type="float" office:value="18821" calcext:value-type="float">
            <text:p>18821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17835648148148" calcext:value-type="float">
            <text:p>0,00217835648148148000</text:p>
          </table:table-cell>
          <table:table-cell table:formula="of:=[.D321]-[.D320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59" office:value-type="float" office:value="18880" calcext:value-type="float">
            <text:p>1888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18518518518519" calcext:value-type="float">
            <text:p>0,00218518518518519000</text:p>
          </table:table-cell>
          <table:table-cell table:formula="of:=[.D322]-[.D32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59" office:value-type="float" office:value="18939" calcext:value-type="float">
            <text:p>18939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19201388888889" calcext:value-type="float">
            <text:p>0,00219201388888889000</text:p>
          </table:table-cell>
          <table:table-cell table:formula="of:=[.D323]-[.D32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59" office:value-type="float" office:value="18998" calcext:value-type="float">
            <text:p>18998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19884259259259" calcext:value-type="float">
            <text:p>0,00219884259259259000</text:p>
          </table:table-cell>
          <table:table-cell table:formula="of:=[.D324]-[.D32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59" office:value-type="float" office:value="19057" calcext:value-type="float">
            <text:p>19057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2056712962963" calcext:value-type="float">
            <text:p>0,00220567129629630000</text:p>
          </table:table-cell>
          <table:table-cell table:formula="of:=[.D325]-[.D32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59" office:value-type="float" office:value="19116" calcext:value-type="float">
            <text:p>19116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2125" calcext:value-type="float">
            <text:p>0,00221250000000000000</text:p>
          </table:table-cell>
          <table:table-cell table:formula="of:=[.D326]-[.D32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59" office:value-type="float" office:value="19175" calcext:value-type="float">
            <text:p>1917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2193287037037" calcext:value-type="float">
            <text:p>0,00221932870370370000</text:p>
          </table:table-cell>
          <table:table-cell table:formula="of:=[.D327]-[.D32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59" office:value-type="float" office:value="19234" calcext:value-type="float">
            <text:p>19234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22615740740741" calcext:value-type="float">
            <text:p>0,00222615740740741000</text:p>
          </table:table-cell>
          <table:table-cell table:formula="of:=[.D328]-[.D327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59" office:value-type="float" office:value="19293" calcext:value-type="float">
            <text:p>19293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23298611111111" calcext:value-type="float">
            <text:p>0,00223298611111111000</text:p>
          </table:table-cell>
          <table:table-cell table:formula="of:=[.D329]-[.D32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59" office:value-type="float" office:value="19352" calcext:value-type="float">
            <text:p>19352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23981481481481" calcext:value-type="float">
            <text:p>0,00223981481481481000</text:p>
          </table:table-cell>
          <table:table-cell table:formula="of:=[.D330]-[.D32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59" office:value-type="float" office:value="19411" calcext:value-type="float">
            <text:p>19411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24664351851852" calcext:value-type="float">
            <text:p>0,00224664351851852000</text:p>
          </table:table-cell>
          <table:table-cell table:formula="of:=[.D331]-[.D33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59" office:value-type="float" office:value="19470" calcext:value-type="float">
            <text:p>1947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25347222222222" calcext:value-type="float">
            <text:p>0,00225347222222222000</text:p>
          </table:table-cell>
          <table:table-cell table:formula="of:=[.D332]-[.D33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59" office:value-type="float" office:value="19529" calcext:value-type="float">
            <text:p>19529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26030092592593" calcext:value-type="float">
            <text:p>0,00226030092592593000</text:p>
          </table:table-cell>
          <table:table-cell table:formula="of:=[.D333]-[.D33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59" office:value-type="float" office:value="19588" calcext:value-type="float">
            <text:p>19588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26712962962963" calcext:value-type="float">
            <text:p>0,00226712962962963000</text:p>
          </table:table-cell>
          <table:table-cell table:formula="of:=[.D334]-[.D333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59" office:value-type="float" office:value="19647" calcext:value-type="float">
            <text:p>19647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27395833333333" calcext:value-type="float">
            <text:p>0,00227395833333333000</text:p>
          </table:table-cell>
          <table:table-cell table:formula="of:=[.D335]-[.D33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59" office:value-type="float" office:value="19706" calcext:value-type="float">
            <text:p>19706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28078703703704" calcext:value-type="float">
            <text:p>0,00228078703703704000</text:p>
          </table:table-cell>
          <table:table-cell table:formula="of:=[.D336]-[.D33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59" office:value-type="float" office:value="19765" calcext:value-type="float">
            <text:p>1976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28761574074074" calcext:value-type="float">
            <text:p>0,00228761574074074000</text:p>
          </table:table-cell>
          <table:table-cell table:formula="of:=[.D337]-[.D33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59" office:value-type="float" office:value="19824" calcext:value-type="float">
            <text:p>19824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29444444444444" calcext:value-type="float">
            <text:p>0,00229444444444444000</text:p>
          </table:table-cell>
          <table:table-cell table:formula="of:=[.D338]-[.D33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59" office:value-type="float" office:value="19883" calcext:value-type="float">
            <text:p>19883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30127314814815" calcext:value-type="float">
            <text:p>0,00230127314814815000</text:p>
          </table:table-cell>
          <table:table-cell table:formula="of:=[.D339]-[.D33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59" office:value-type="float" office:value="19942" calcext:value-type="float">
            <text:p>19942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30810185185185" calcext:value-type="float">
            <text:p>0,00230810185185185000</text:p>
          </table:table-cell>
          <table:table-cell table:formula="of:=[.D340]-[.D33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59" office:value-type="float" office:value="20001" calcext:value-type="float">
            <text:p>20001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31493055555556" calcext:value-type="float">
            <text:p>0,00231493055555556000</text:p>
          </table:table-cell>
          <table:table-cell table:formula="of:=[.D341]-[.D340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59" office:value-type="float" office:value="20060" calcext:value-type="float">
            <text:p>2006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32175925925926" calcext:value-type="float">
            <text:p>0,00232175925925926000</text:p>
          </table:table-cell>
          <table:table-cell table:formula="of:=[.D342]-[.D34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59" office:value-type="float" office:value="20119" calcext:value-type="float">
            <text:p>20119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32858796296296" calcext:value-type="float">
            <text:p>0,00232858796296296000</text:p>
          </table:table-cell>
          <table:table-cell table:formula="of:=[.D343]-[.D34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59" office:value-type="float" office:value="20178" calcext:value-type="float">
            <text:p>20178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33541666666667" calcext:value-type="float">
            <text:p>0,00233541666666667000</text:p>
          </table:table-cell>
          <table:table-cell table:formula="of:=[.D344]-[.D34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59" office:value-type="float" office:value="20237" calcext:value-type="float">
            <text:p>20237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34224537037037" calcext:value-type="float">
            <text:p>0,00234224537037037000</text:p>
          </table:table-cell>
          <table:table-cell table:formula="of:=[.D345]-[.D34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59" office:value-type="float" office:value="20296" calcext:value-type="float">
            <text:p>20296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34907407407407" calcext:value-type="float">
            <text:p>0,00234907407407407000</text:p>
          </table:table-cell>
          <table:table-cell table:formula="of:=[.D346]-[.D34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59" office:value-type="float" office:value="20355" calcext:value-type="float">
            <text:p>2035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35590277777778" calcext:value-type="float">
            <text:p>0,00235590277777778000</text:p>
          </table:table-cell>
          <table:table-cell table:formula="of:=[.D347]-[.D346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59" office:value-type="float" office:value="20414" calcext:value-type="float">
            <text:p>20414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36273148148148" calcext:value-type="float">
            <text:p>0,00236273148148148000</text:p>
          </table:table-cell>
          <table:table-cell table:formula="of:=[.D348]-[.D34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59" office:value-type="float" office:value="20473" calcext:value-type="float">
            <text:p>20473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36956018518519" calcext:value-type="float">
            <text:p>0,00236956018518519000</text:p>
          </table:table-cell>
          <table:table-cell table:formula="of:=[.D349]-[.D34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59" office:value-type="float" office:value="20532" calcext:value-type="float">
            <text:p>20532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37638888888889" calcext:value-type="float">
            <text:p>0,00237638888888889000</text:p>
          </table:table-cell>
          <table:table-cell table:formula="of:=[.D350]-[.D34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59" office:value-type="float" office:value="20591" calcext:value-type="float">
            <text:p>20591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38321759259259" calcext:value-type="float">
            <text:p>0,00238321759259259000</text:p>
          </table:table-cell>
          <table:table-cell table:formula="of:=[.D351]-[.D35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59" office:value-type="float" office:value="20650" calcext:value-type="float">
            <text:p>206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3900462962963" calcext:value-type="float">
            <text:p>0,00239004629629630000</text:p>
          </table:table-cell>
          <table:table-cell table:formula="of:=[.D352]-[.D35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59" office:value-type="float" office:value="20709" calcext:value-type="float">
            <text:p>20709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396875" calcext:value-type="float">
            <text:p>0,00239687500000000000</text:p>
          </table:table-cell>
          <table:table-cell table:formula="of:=[.D353]-[.D35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59" office:value-type="float" office:value="20768" calcext:value-type="float">
            <text:p>20768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4037037037037" calcext:value-type="float">
            <text:p>0,00240370370370370000</text:p>
          </table:table-cell>
          <table:table-cell table:formula="of:=[.D354]-[.D353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59" office:value-type="float" office:value="20827" calcext:value-type="float">
            <text:p>20827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41053240740741" calcext:value-type="float">
            <text:p>0,00241053240740741000</text:p>
          </table:table-cell>
          <table:table-cell table:formula="of:=[.D355]-[.D35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59" office:value-type="float" office:value="20886" calcext:value-type="float">
            <text:p>20886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41736111111111" calcext:value-type="float">
            <text:p>0,00241736111111111000</text:p>
          </table:table-cell>
          <table:table-cell table:formula="of:=[.D356]-[.D35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59" office:value-type="float" office:value="20945" calcext:value-type="float">
            <text:p>2094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42418981481482" calcext:value-type="float">
            <text:p>0,00242418981481482000</text:p>
          </table:table-cell>
          <table:table-cell table:formula="of:=[.D357]-[.D35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59" office:value-type="float" office:value="21004" calcext:value-type="float">
            <text:p>21004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43101851851852" calcext:value-type="float">
            <text:p>0,00243101851851852000</text:p>
          </table:table-cell>
          <table:table-cell table:formula="of:=[.D358]-[.D35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59" office:value-type="float" office:value="21063" calcext:value-type="float">
            <text:p>21063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43784722222222" calcext:value-type="float">
            <text:p>0,00243784722222222000</text:p>
          </table:table-cell>
          <table:table-cell table:formula="of:=[.D359]-[.D35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59" office:value-type="float" office:value="21122" calcext:value-type="float">
            <text:p>21122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44467592592593" calcext:value-type="float">
            <text:p>0,00244467592592593000</text:p>
          </table:table-cell>
          <table:table-cell table:formula="of:=[.D360]-[.D359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59" office:value-type="float" office:value="21181" calcext:value-type="float">
            <text:p>21181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45150462962963" calcext:value-type="float">
            <text:p>0,00245150462962963000</text:p>
          </table:table-cell>
          <table:table-cell table:formula="of:=[.D361]-[.D36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59" office:value-type="float" office:value="21240" calcext:value-type="float">
            <text:p>2124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45833333333333" calcext:value-type="float">
            <text:p>0,00245833333333333000</text:p>
          </table:table-cell>
          <table:table-cell table:formula="of:=[.D362]-[.D36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59" office:value-type="float" office:value="21299" calcext:value-type="float">
            <text:p>21299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46516203703704" calcext:value-type="float">
            <text:p>0,00246516203703704000</text:p>
          </table:table-cell>
          <table:table-cell table:formula="of:=[.D363]-[.D36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59" office:value-type="float" office:value="21358" calcext:value-type="float">
            <text:p>21358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47199074074074" calcext:value-type="float">
            <text:p>0,00247199074074074000</text:p>
          </table:table-cell>
          <table:table-cell table:formula="of:=[.D364]-[.D36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59" office:value-type="float" office:value="21417" calcext:value-type="float">
            <text:p>21417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47881944444444" calcext:value-type="float">
            <text:p>0,00247881944444444000</text:p>
          </table:table-cell>
          <table:table-cell table:formula="of:=[.D365]-[.D36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59" office:value-type="float" office:value="21476" calcext:value-type="float">
            <text:p>21476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48564814814815" calcext:value-type="float">
            <text:p>0,00248564814814815000</text:p>
          </table:table-cell>
          <table:table-cell table:formula="of:=[.D366]-[.D36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59" office:value-type="float" office:value="21535" calcext:value-type="float">
            <text:p>2153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49247685185185" calcext:value-type="float">
            <text:p>0,00249247685185185000</text:p>
          </table:table-cell>
          <table:table-cell table:formula="of:=[.D367]-[.D366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59" office:value-type="float" office:value="21594" calcext:value-type="float">
            <text:p>21594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49930555555556" calcext:value-type="float">
            <text:p>0,00249930555555556000</text:p>
          </table:table-cell>
          <table:table-cell table:formula="of:=[.D368]-[.D36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59" office:value-type="float" office:value="21653" calcext:value-type="float">
            <text:p>21653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50613425925926" calcext:value-type="float">
            <text:p>0,00250613425925926000</text:p>
          </table:table-cell>
          <table:table-cell table:formula="of:=[.D369]-[.D36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59" office:value-type="float" office:value="21712" calcext:value-type="float">
            <text:p>21712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51296296296296" calcext:value-type="float">
            <text:p>0,00251296296296296000</text:p>
          </table:table-cell>
          <table:table-cell table:formula="of:=[.D370]-[.D36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59" office:value-type="float" office:value="21771" calcext:value-type="float">
            <text:p>21771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51979166666667" calcext:value-type="float">
            <text:p>0,00251979166666667000</text:p>
          </table:table-cell>
          <table:table-cell table:formula="of:=[.D371]-[.D37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59" office:value-type="float" office:value="21830" calcext:value-type="float">
            <text:p>2183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52662037037037" calcext:value-type="float">
            <text:p>0,00252662037037037000</text:p>
          </table:table-cell>
          <table:table-cell table:formula="of:=[.D372]-[.D37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59" office:value-type="float" office:value="21889" calcext:value-type="float">
            <text:p>21889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53344907407407" calcext:value-type="float">
            <text:p>0,00253344907407407000</text:p>
          </table:table-cell>
          <table:table-cell table:formula="of:=[.D373]-[.D372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59" office:value-type="float" office:value="21948" calcext:value-type="float">
            <text:p>21948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54027777777778" calcext:value-type="float">
            <text:p>0,00254027777777778000</text:p>
          </table:table-cell>
          <table:table-cell table:formula="of:=[.D374]-[.D37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59" office:value-type="float" office:value="22007" calcext:value-type="float">
            <text:p>22007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54710648148148" calcext:value-type="float">
            <text:p>0,00254710648148148000</text:p>
          </table:table-cell>
          <table:table-cell table:formula="of:=[.D375]-[.D37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59" office:value-type="float" office:value="22066" calcext:value-type="float">
            <text:p>22066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55393518518519" calcext:value-type="float">
            <text:p>0,00255393518518519000</text:p>
          </table:table-cell>
          <table:table-cell table:formula="of:=[.D376]-[.D37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59" office:value-type="float" office:value="22125" calcext:value-type="float">
            <text:p>2212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56076388888889" calcext:value-type="float">
            <text:p>0,00256076388888889000</text:p>
          </table:table-cell>
          <table:table-cell table:formula="of:=[.D377]-[.D37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59" office:value-type="float" office:value="22184" calcext:value-type="float">
            <text:p>22184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56759259259259" calcext:value-type="float">
            <text:p>0,00256759259259259000</text:p>
          </table:table-cell>
          <table:table-cell table:formula="of:=[.D378]-[.D37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59" office:value-type="float" office:value="22243" calcext:value-type="float">
            <text:p>22243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5744212962963" calcext:value-type="float">
            <text:p>0,00257442129629630000</text:p>
          </table:table-cell>
          <table:table-cell table:formula="of:=[.D379]-[.D37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59" office:value-type="float" office:value="22302" calcext:value-type="float">
            <text:p>22302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58125" calcext:value-type="float">
            <text:p>0,00258125000000000000</text:p>
          </table:table-cell>
          <table:table-cell table:formula="of:=[.D380]-[.D379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59" office:value-type="float" office:value="22361" calcext:value-type="float">
            <text:p>22361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5880787037037" calcext:value-type="float">
            <text:p>0,00258807870370370000</text:p>
          </table:table-cell>
          <table:table-cell table:formula="of:=[.D381]-[.D38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59" office:value-type="float" office:value="22420" calcext:value-type="float">
            <text:p>2242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59490740740741" calcext:value-type="float">
            <text:p>0,00259490740740741000</text:p>
          </table:table-cell>
          <table:table-cell table:formula="of:=[.D382]-[.D38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59" office:value-type="float" office:value="22479" calcext:value-type="float">
            <text:p>22479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260173611111111" calcext:value-type="float">
            <text:p>0,00260173611111111000</text:p>
          </table:table-cell>
          <table:table-cell table:formula="of:=[.D383]-[.D38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59" office:value-type="float" office:value="22538" calcext:value-type="float">
            <text:p>22538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260856481481482" calcext:value-type="float">
            <text:p>0,00260856481481482000</text:p>
          </table:table-cell>
          <table:table-cell table:formula="of:=[.D384]-[.D38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59" office:value-type="float" office:value="22597" calcext:value-type="float">
            <text:p>22597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261539351851852" calcext:value-type="float">
            <text:p>0,00261539351851852000</text:p>
          </table:table-cell>
          <table:table-cell table:formula="of:=[.D385]-[.D38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59" office:value-type="float" office:value="22656" calcext:value-type="float">
            <text:p>22656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62222222222222" calcext:value-type="float">
            <text:p>0,00262222222222222000</text:p>
          </table:table-cell>
          <table:table-cell table:formula="of:=[.D386]-[.D385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59" office:value-type="float" office:value="22715" calcext:value-type="float">
            <text:p>2271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62905092592593" calcext:value-type="float">
            <text:p>0,00262905092592593000</text:p>
          </table:table-cell>
          <table:table-cell table:formula="of:=[.D387]-[.D38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59" office:value-type="float" office:value="22774" calcext:value-type="float">
            <text:p>22774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63587962962963" calcext:value-type="float">
            <text:p>0,00263587962962963000</text:p>
          </table:table-cell>
          <table:table-cell table:formula="of:=[.D388]-[.D38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59" office:value-type="float" office:value="22833" calcext:value-type="float">
            <text:p>22833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64270833333333" calcext:value-type="float">
            <text:p>0,00264270833333333000</text:p>
          </table:table-cell>
          <table:table-cell table:formula="of:=[.D389]-[.D388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59" office:value-type="float" office:value="22892" calcext:value-type="float">
            <text:p>22892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264953703703704" calcext:value-type="float">
            <text:p>0,00264953703703704000</text:p>
          </table:table-cell>
          <table:table-cell table:formula="of:=[.D390]-[.D38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59" office:value-type="float" office:value="22951" calcext:value-type="float">
            <text:p>22951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265636574074074" calcext:value-type="float">
            <text:p>0,00265636574074074000</text:p>
          </table:table-cell>
          <table:table-cell table:formula="of:=[.D391]-[.D39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59" office:value-type="float" office:value="23010" calcext:value-type="float">
            <text:p>2301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266319444444444" calcext:value-type="float">
            <text:p>0,00266319444444444000</text:p>
          </table:table-cell>
          <table:table-cell table:formula="of:=[.D392]-[.D39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59" office:value-type="float" office:value="23069" calcext:value-type="float">
            <text:p>23069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267002314814815" calcext:value-type="float">
            <text:p>0,00267002314814815000</text:p>
          </table:table-cell>
          <table:table-cell table:formula="of:=[.D393]-[.D392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59" office:value-type="float" office:value="23128" calcext:value-type="float">
            <text:p>23128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267685185185185" calcext:value-type="float">
            <text:p>0,00267685185185185000</text:p>
          </table:table-cell>
          <table:table-cell table:formula="of:=[.D394]-[.D39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59" office:value-type="float" office:value="23187" calcext:value-type="float">
            <text:p>23187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68368055555556" calcext:value-type="float">
            <text:p>0,00268368055555556000</text:p>
          </table:table-cell>
          <table:table-cell table:formula="of:=[.D395]-[.D394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59" office:value-type="float" office:value="23246" calcext:value-type="float">
            <text:p>23246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269050925925926" calcext:value-type="float">
            <text:p>0,00269050925925926000</text:p>
          </table:table-cell>
          <table:table-cell table:formula="of:=[.D396]-[.D39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59" office:value-type="float" office:value="23305" calcext:value-type="float">
            <text:p>2330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269733796296296" calcext:value-type="float">
            <text:p>0,00269733796296296000</text:p>
          </table:table-cell>
          <table:table-cell table:formula="of:=[.D397]-[.D39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59" office:value-type="float" office:value="23364" calcext:value-type="float">
            <text:p>23364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270416666666667" calcext:value-type="float">
            <text:p>0,00270416666666667000</text:p>
          </table:table-cell>
          <table:table-cell table:formula="of:=[.D398]-[.D397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59" office:value-type="float" office:value="23423" calcext:value-type="float">
            <text:p>23423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271099537037037" calcext:value-type="float">
            <text:p>0,00271099537037037000</text:p>
          </table:table-cell>
          <table:table-cell table:formula="of:=[.D399]-[.D398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59" office:value-type="float" office:value="23482" calcext:value-type="float">
            <text:p>23482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271782407407407" calcext:value-type="float">
            <text:p>0,00271782407407407000</text:p>
          </table:table-cell>
          <table:table-cell table:formula="of:=[.D400]-[.D399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59" office:value-type="float" office:value="23541" calcext:value-type="float">
            <text:p>23541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272465277777778" calcext:value-type="float">
            <text:p>0,00272465277777778000</text:p>
          </table:table-cell>
          <table:table-cell table:formula="of:=[.D401]-[.D400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59" office:value-type="float" office:value="23600" calcext:value-type="float">
            <text:p>236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273148148148148" calcext:value-type="float">
            <text:p>0,00273148148148148000</text:p>
          </table:table-cell>
          <table:table-cell table:formula="of:=[.D402]-[.D401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59" office:value-type="float" office:value="23659" calcext:value-type="float">
            <text:p>23659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273831018518519" calcext:value-type="float">
            <text:p>0,00273831018518519000</text:p>
          </table:table-cell>
          <table:table-cell table:formula="of:=[.D403]-[.D402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59" office:value-type="float" office:value="23718" calcext:value-type="float">
            <text:p>23718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274513888888889" calcext:value-type="float">
            <text:p>0,00274513888888889000</text:p>
          </table:table-cell>
          <table:table-cell table:formula="of:=[.D404]-[.D403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59" office:value-type="float" office:value="23777" calcext:value-type="float">
            <text:p>23777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275196759259259" calcext:value-type="float">
            <text:p>0,00275196759259259000</text:p>
          </table:table-cell>
          <table:table-cell table:formula="of:=[.D405]-[.D404]" office:value-type="float" office:value="0.00000682870370370334" calcext:value-type="float">
            <text:p>0,00000682870370370334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59" office:value-type="float" office:value="23836" calcext:value-type="float">
            <text:p>23836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27587962962963" calcext:value-type="float">
            <text:p>0,00275879629629630000</text:p>
          </table:table-cell>
          <table:table-cell table:formula="of:=[.D406]-[.D405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59" office:value-type="float" office:value="23895" calcext:value-type="float">
            <text:p>2389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2765625" calcext:value-type="float">
            <text:p>0,00276562500000000000</text:p>
          </table:table-cell>
          <table:table-cell table:formula="of:=[.D407]-[.D406]" office:value-type="float" office:value="0.00000682870370370377" calcext:value-type="float">
            <text:p>0,00000682870370370377</text:p>
          </table:table-cell>
          <table:table-cell table:number-columns-repeated="1637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59" office:value-type="float" office:value="23954" calcext:value-type="float">
            <text:p>23954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27724537037037" calcext:value-type="float">
            <text:p>0,00277245370370370000</text:p>
          </table:table-cell>
          <table:table-cell table:formula="of:=#REF!-[.D407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1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21:00.398606812</meta:creation-date>
    <dc:date>2026-05-17T18:21:13.762788900</dc:date>
    <meta:editing-duration>PT14S</meta:editing-duration>
    <meta:editing-cycles>1</meta:editing-cycles>
    <meta:document-statistic meta:table-count="1" meta:cell-count="2035" meta:object-count="0"/>
    <meta:generator>LibreOffice/24.2.7.2$Linux_X86_64 LibreOffice_project/420$Build-2</meta:generator>
  </office:meta>
</office:document-meta>
</file>