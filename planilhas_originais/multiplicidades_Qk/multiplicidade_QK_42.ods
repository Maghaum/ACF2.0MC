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86111111111111" calcext:value-type="float">
            <text:p>0,00000486111111111111</text:p>
          </table:table-cell>
          <table:table-cell table:formula="of:=[.D3]-[.D2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2" office:value-type="float" office:value="84" calcext:value-type="float">
            <text:p>8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972222222222222" calcext:value-type="float">
            <text:p>0,00000972222222222222</text:p>
          </table:table-cell>
          <table:table-cell table:formula="of:=[.D4]-[.D3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2" office:value-type="float" office:value="126" calcext:value-type="float">
            <text:p>12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45833333333333" calcext:value-type="float">
            <text:p>0,00001458333333333330</text:p>
          </table:table-cell>
          <table:table-cell table:formula="of:=[.D5]-[.D4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2" office:value-type="float" office:value="168" calcext:value-type="float">
            <text:p>16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94444444444444" calcext:value-type="float">
            <text:p>0,00001944444444444450</text:p>
          </table:table-cell>
          <table:table-cell table:formula="of:=[.D6]-[.D5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2" office:value-type="float" office:value="210" calcext:value-type="float">
            <text:p>21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43055555555556" calcext:value-type="float">
            <text:p>0,00002430555555555560</text:p>
          </table:table-cell>
          <table:table-cell table:formula="of:=[.D7]-[.D6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2" office:value-type="float" office:value="252" calcext:value-type="float">
            <text:p>25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91666666666667" calcext:value-type="float">
            <text:p>0,00002916666666666670</text:p>
          </table:table-cell>
          <table:table-cell table:formula="of:=[.D8]-[.D7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2" office:value-type="float" office:value="294" calcext:value-type="float">
            <text:p>29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40277777777778" calcext:value-type="float">
            <text:p>0,00003402777777777780</text:p>
          </table:table-cell>
          <table:table-cell table:formula="of:=[.D9]-[.D8]" office:value-type="float" office:value="0.00000486111111111112" calcext:value-type="float">
            <text:p>0,00000486111111111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2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88888888888889" calcext:value-type="float">
            <text:p>0,00003888888888888890</text:p>
          </table:table-cell>
          <table:table-cell table:formula="of:=[.D10]-[.D9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2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375" calcext:value-type="float">
            <text:p>0,00004375000000000000</text:p>
          </table:table-cell>
          <table:table-cell table:formula="of:=[.D11]-[.D10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2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86111111111111" calcext:value-type="float">
            <text:p>0,00004861111111111110</text:p>
          </table:table-cell>
          <table:table-cell table:formula="of:=[.D12]-[.D11]" office:value-type="float" office:value="0.00000486111111111112" calcext:value-type="float">
            <text:p>0,00000486111111111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2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34722222222222" calcext:value-type="float">
            <text:p>0,00005347222222222220</text:p>
          </table:table-cell>
          <table:table-cell table:formula="of:=[.D13]-[.D12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2" office:value-type="float" office:value="504" calcext:value-type="float">
            <text:p>50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83333333333333" calcext:value-type="float">
            <text:p>0,00005833333333333330</text:p>
          </table:table-cell>
          <table:table-cell table:formula="of:=[.D14]-[.D13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2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31944444444444" calcext:value-type="float">
            <text:p>0,00006319444444444440</text:p>
          </table:table-cell>
          <table:table-cell table:formula="of:=[.D15]-[.D14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2" office:value-type="float" office:value="588" calcext:value-type="float">
            <text:p>58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680555555555556" calcext:value-type="float">
            <text:p>0,00006805555555555560</text:p>
          </table:table-cell>
          <table:table-cell table:formula="of:=[.D16]-[.D15]" office:value-type="float" office:value="0.00000486111111111112" calcext:value-type="float">
            <text:p>0,00000486111111111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2" office:value-type="float" office:value="630" calcext:value-type="float">
            <text:p>63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729166666666667" calcext:value-type="float">
            <text:p>0,00007291666666666670</text:p>
          </table:table-cell>
          <table:table-cell table:formula="of:=[.D17]-[.D16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2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777777777777778" calcext:value-type="float">
            <text:p>0,00007777777777777780</text:p>
          </table:table-cell>
          <table:table-cell table:formula="of:=[.D18]-[.D17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2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826388888888889" calcext:value-type="float">
            <text:p>0,00008263888888888890</text:p>
          </table:table-cell>
          <table:table-cell table:formula="of:=[.D19]-[.D18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2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875" calcext:value-type="float">
            <text:p>0,00008750000000000000</text:p>
          </table:table-cell>
          <table:table-cell table:formula="of:=[.D20]-[.D19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2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923611111111111" calcext:value-type="float">
            <text:p>0,00009236111111111110</text:p>
          </table:table-cell>
          <table:table-cell table:formula="of:=[.D21]-[.D20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2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972222222222222" calcext:value-type="float">
            <text:p>0,00009722222222222220</text:p>
          </table:table-cell>
          <table:table-cell table:formula="of:=[.D22]-[.D21]" office:value-type="float" office:value="0.00000486111111111112" calcext:value-type="float">
            <text:p>0,00000486111111111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2" office:value-type="float" office:value="882" calcext:value-type="float">
            <text:p>88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02083333333333" calcext:value-type="float">
            <text:p>0,00010208333333333300</text:p>
          </table:table-cell>
          <table:table-cell table:formula="of:=[.D23]-[.D22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2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06944444444444" calcext:value-type="float">
            <text:p>0,00010694444444444400</text:p>
          </table:table-cell>
          <table:table-cell table:formula="of:=[.D24]-[.D23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2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11805555555556" calcext:value-type="float">
            <text:p>0,00011180555555555600</text:p>
          </table:table-cell>
          <table:table-cell table:formula="of:=[.D25]-[.D24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2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16666666666667" calcext:value-type="float">
            <text:p>0,00011666666666666700</text:p>
          </table:table-cell>
          <table:table-cell table:formula="of:=[.D26]-[.D25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2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21527777777778" calcext:value-type="float">
            <text:p>0,00012152777777777800</text:p>
          </table:table-cell>
          <table:table-cell table:formula="of:=[.D27]-[.D26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2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26388888888889" calcext:value-type="float">
            <text:p>0,00012638888888888900</text:p>
          </table:table-cell>
          <table:table-cell table:formula="of:=[.D28]-[.D27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2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3125" calcext:value-type="float">
            <text:p>0,00013125000000000000</text:p>
          </table:table-cell>
          <table:table-cell table:formula="of:=[.D29]-[.D28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2" office:value-type="float" office:value="1176" calcext:value-type="float">
            <text:p>117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36111111111111" calcext:value-type="float">
            <text:p>0,00013611111111111100</text:p>
          </table:table-cell>
          <table:table-cell table:formula="of:=[.D30]-[.D29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2" office:value-type="float" office:value="1218" calcext:value-type="float">
            <text:p>121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40972222222222" calcext:value-type="float">
            <text:p>0,00014097222222222200</text:p>
          </table:table-cell>
          <table:table-cell table:formula="of:=[.D31]-[.D30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2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45833333333333" calcext:value-type="float">
            <text:p>0,00014583333333333300</text:p>
          </table:table-cell>
          <table:table-cell table:formula="of:=[.D32]-[.D31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2" office:value-type="float" office:value="1302" calcext:value-type="float">
            <text:p>130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50694444444444" calcext:value-type="float">
            <text:p>0,00015069444444444400</text:p>
          </table:table-cell>
          <table:table-cell table:formula="of:=[.D33]-[.D32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2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55555555555556" calcext:value-type="float">
            <text:p>0,00015555555555555600</text:p>
          </table:table-cell>
          <table:table-cell table:formula="of:=[.D34]-[.D33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2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60416666666667" calcext:value-type="float">
            <text:p>0,00016041666666666700</text:p>
          </table:table-cell>
          <table:table-cell table:formula="of:=[.D35]-[.D34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2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65277777777778" calcext:value-type="float">
            <text:p>0,00016527777777777800</text:p>
          </table:table-cell>
          <table:table-cell table:formula="of:=[.D36]-[.D35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2" office:value-type="float" office:value="1470" calcext:value-type="float">
            <text:p>147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70138888888889" calcext:value-type="float">
            <text:p>0,00017013888888888900</text:p>
          </table:table-cell>
          <table:table-cell table:formula="of:=[.D37]-[.D36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2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75" calcext:value-type="float">
            <text:p>0,00017500000000000000</text:p>
          </table:table-cell>
          <table:table-cell table:formula="of:=[.D38]-[.D37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2" office:value-type="float" office:value="1554" calcext:value-type="float">
            <text:p>155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79861111111111" calcext:value-type="float">
            <text:p>0,00017986111111111100</text:p>
          </table:table-cell>
          <table:table-cell table:formula="of:=[.D39]-[.D38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2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84722222222222" calcext:value-type="float">
            <text:p>0,00018472222222222200</text:p>
          </table:table-cell>
          <table:table-cell table:formula="of:=[.D40]-[.D39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2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89583333333333" calcext:value-type="float">
            <text:p>0,00018958333333333300</text:p>
          </table:table-cell>
          <table:table-cell table:formula="of:=[.D41]-[.D40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2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94444444444444" calcext:value-type="float">
            <text:p>0,00019444444444444400</text:p>
          </table:table-cell>
          <table:table-cell table:formula="of:=[.D42]-[.D41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2" office:value-type="float" office:value="1722" calcext:value-type="float">
            <text:p>172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99305555555556" calcext:value-type="float">
            <text:p>0,00019930555555555600</text:p>
          </table:table-cell>
          <table:table-cell table:formula="of:=[.D43]-[.D42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2" office:value-type="float" office:value="1764" calcext:value-type="float">
            <text:p>176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04166666666667" calcext:value-type="float">
            <text:p>0,00020416666666666700</text:p>
          </table:table-cell>
          <table:table-cell table:formula="of:=[.D44]-[.D43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2" office:value-type="float" office:value="1806" calcext:value-type="float">
            <text:p>180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09027777777778" calcext:value-type="float">
            <text:p>0,00020902777777777800</text:p>
          </table:table-cell>
          <table:table-cell table:formula="of:=[.D45]-[.D44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2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13888888888889" calcext:value-type="float">
            <text:p>0,00021388888888888900</text:p>
          </table:table-cell>
          <table:table-cell table:formula="of:=[.D46]-[.D45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2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1875" calcext:value-type="float">
            <text:p>0,00021875000000000000</text:p>
          </table:table-cell>
          <table:table-cell table:formula="of:=[.D47]-[.D46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2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23611111111111" calcext:value-type="float">
            <text:p>0,00022361111111111100</text:p>
          </table:table-cell>
          <table:table-cell table:formula="of:=[.D48]-[.D47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2" office:value-type="float" office:value="1974" calcext:value-type="float">
            <text:p>197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28472222222222" calcext:value-type="float">
            <text:p>0,00022847222222222200</text:p>
          </table:table-cell>
          <table:table-cell table:formula="of:=[.D49]-[.D48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2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33333333333333" calcext:value-type="float">
            <text:p>0,00023333333333333300</text:p>
          </table:table-cell>
          <table:table-cell table:formula="of:=[.D50]-[.D49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2" office:value-type="float" office:value="2058" calcext:value-type="float">
            <text:p>205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38194444444444" calcext:value-type="float">
            <text:p>0,00023819444444444400</text:p>
          </table:table-cell>
          <table:table-cell table:formula="of:=[.D51]-[.D50]" office:value-type="float" office:value="0.00000486111111111111" calcext:value-type="float">
            <text:p>0,0000048611111111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2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43055555555556" calcext:value-type="float">
            <text:p>0,00024305555555555600</text:p>
          </table:table-cell>
          <table:table-cell table:formula="of:=[.D52]-[.D51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2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47916666666667" calcext:value-type="float">
            <text:p>0,00024791666666666700</text:p>
          </table:table-cell>
          <table:table-cell table:formula="of:=[.D53]-[.D5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2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52777777777778" calcext:value-type="float">
            <text:p>0,00025277777777777800</text:p>
          </table:table-cell>
          <table:table-cell table:formula="of:=[.D54]-[.D53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2" office:value-type="float" office:value="2226" calcext:value-type="float">
            <text:p>222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57638888888889" calcext:value-type="float">
            <text:p>0,00025763888888888900</text:p>
          </table:table-cell>
          <table:table-cell table:formula="of:=[.D55]-[.D5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2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625" calcext:value-type="float">
            <text:p>0,00026250000000000000</text:p>
          </table:table-cell>
          <table:table-cell table:formula="of:=[.D56]-[.D55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2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67361111111111" calcext:value-type="float">
            <text:p>0,00026736111111111100</text:p>
          </table:table-cell>
          <table:table-cell table:formula="of:=[.D57]-[.D5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2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72222222222222" calcext:value-type="float">
            <text:p>0,00027222222222222200</text:p>
          </table:table-cell>
          <table:table-cell table:formula="of:=[.D58]-[.D57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2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77083333333333" calcext:value-type="float">
            <text:p>0,00027708333333333300</text:p>
          </table:table-cell>
          <table:table-cell table:formula="of:=[.D59]-[.D5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2" office:value-type="float" office:value="2436" calcext:value-type="float">
            <text:p>243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81944444444444" calcext:value-type="float">
            <text:p>0,00028194444444444400</text:p>
          </table:table-cell>
          <table:table-cell table:formula="of:=[.D60]-[.D59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2" office:value-type="float" office:value="2478" calcext:value-type="float">
            <text:p>247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86805555555556" calcext:value-type="float">
            <text:p>0,00028680555555555600</text:p>
          </table:table-cell>
          <table:table-cell table:formula="of:=[.D61]-[.D60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2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91666666666667" calcext:value-type="float">
            <text:p>0,00029166666666666700</text:p>
          </table:table-cell>
          <table:table-cell table:formula="of:=[.D62]-[.D6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2" office:value-type="float" office:value="2562" calcext:value-type="float">
            <text:p>256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96527777777778" calcext:value-type="float">
            <text:p>0,00029652777777777800</text:p>
          </table:table-cell>
          <table:table-cell table:formula="of:=[.D63]-[.D62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2" office:value-type="float" office:value="2604" calcext:value-type="float">
            <text:p>260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01388888888889" calcext:value-type="float">
            <text:p>0,00030138888888888900</text:p>
          </table:table-cell>
          <table:table-cell table:formula="of:=[.D64]-[.D6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2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0625" calcext:value-type="float">
            <text:p>0,00030625000000000000</text:p>
          </table:table-cell>
          <table:table-cell table:formula="of:=[.D65]-[.D64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2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11111111111111" calcext:value-type="float">
            <text:p>0,00031111111111111100</text:p>
          </table:table-cell>
          <table:table-cell table:formula="of:=[.D66]-[.D6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2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15972222222222" calcext:value-type="float">
            <text:p>0,00031597222222222200</text:p>
          </table:table-cell>
          <table:table-cell table:formula="of:=[.D67]-[.D66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2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20833333333333" calcext:value-type="float">
            <text:p>0,00032083333333333300</text:p>
          </table:table-cell>
          <table:table-cell table:formula="of:=[.D68]-[.D6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2" office:value-type="float" office:value="2814" calcext:value-type="float">
            <text:p>281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25694444444444" calcext:value-type="float">
            <text:p>0,00032569444444444400</text:p>
          </table:table-cell>
          <table:table-cell table:formula="of:=[.D69]-[.D68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2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30555555555556" calcext:value-type="float">
            <text:p>0,00033055555555555600</text:p>
          </table:table-cell>
          <table:table-cell table:formula="of:=[.D70]-[.D6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2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35416666666667" calcext:value-type="float">
            <text:p>0,00033541666666666700</text:p>
          </table:table-cell>
          <table:table-cell table:formula="of:=[.D71]-[.D70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2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40277777777778" calcext:value-type="float">
            <text:p>0,00034027777777777800</text:p>
          </table:table-cell>
          <table:table-cell table:formula="of:=[.D72]-[.D71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2" office:value-type="float" office:value="2982" calcext:value-type="float">
            <text:p>298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45138888888889" calcext:value-type="float">
            <text:p>0,00034513888888888900</text:p>
          </table:table-cell>
          <table:table-cell table:formula="of:=[.D73]-[.D7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2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5" calcext:value-type="float">
            <text:p>0,00035000000000000000</text:p>
          </table:table-cell>
          <table:table-cell table:formula="of:=[.D74]-[.D73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2" office:value-type="float" office:value="3066" calcext:value-type="float">
            <text:p>306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54861111111111" calcext:value-type="float">
            <text:p>0,00035486111111111100</text:p>
          </table:table-cell>
          <table:table-cell table:formula="of:=[.D75]-[.D7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2" office:value-type="float" office:value="3108" calcext:value-type="float">
            <text:p>310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59722222222222" calcext:value-type="float">
            <text:p>0,00035972222222222200</text:p>
          </table:table-cell>
          <table:table-cell table:formula="of:=[.D76]-[.D75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2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64583333333333" calcext:value-type="float">
            <text:p>0,00036458333333333300</text:p>
          </table:table-cell>
          <table:table-cell table:formula="of:=[.D77]-[.D7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2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69444444444444" calcext:value-type="float">
            <text:p>0,00036944444444444400</text:p>
          </table:table-cell>
          <table:table-cell table:formula="of:=[.D78]-[.D77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2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74305555555556" calcext:value-type="float">
            <text:p>0,00037430555555555600</text:p>
          </table:table-cell>
          <table:table-cell table:formula="of:=[.D79]-[.D7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2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79166666666667" calcext:value-type="float">
            <text:p>0,00037916666666666700</text:p>
          </table:table-cell>
          <table:table-cell table:formula="of:=[.D80]-[.D79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2" office:value-type="float" office:value="3318" calcext:value-type="float">
            <text:p>331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84027777777778" calcext:value-type="float">
            <text:p>0,00038402777777777800</text:p>
          </table:table-cell>
          <table:table-cell table:formula="of:=[.D81]-[.D8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2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88888888888889" calcext:value-type="float">
            <text:p>0,00038888888888888900</text:p>
          </table:table-cell>
          <table:table-cell table:formula="of:=[.D82]-[.D81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2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9375" calcext:value-type="float">
            <text:p>0,00039375000000000000</text:p>
          </table:table-cell>
          <table:table-cell table:formula="of:=[.D83]-[.D8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2" office:value-type="float" office:value="3444" calcext:value-type="float">
            <text:p>344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98611111111111" calcext:value-type="float">
            <text:p>0,00039861111111111100</text:p>
          </table:table-cell>
          <table:table-cell table:formula="of:=[.D84]-[.D83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2" office:value-type="float" office:value="3486" calcext:value-type="float">
            <text:p>348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03472222222222" calcext:value-type="float">
            <text:p>0,00040347222222222200</text:p>
          </table:table-cell>
          <table:table-cell table:formula="of:=[.D85]-[.D84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2" office:value-type="float" office:value="3528" calcext:value-type="float">
            <text:p>352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08333333333333" calcext:value-type="float">
            <text:p>0,00040833333333333300</text:p>
          </table:table-cell>
          <table:table-cell table:formula="of:=[.D86]-[.D8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2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13194444444444" calcext:value-type="float">
            <text:p>0,00041319444444444400</text:p>
          </table:table-cell>
          <table:table-cell table:formula="of:=[.D87]-[.D86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2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18055555555556" calcext:value-type="float">
            <text:p>0,00041805555555555600</text:p>
          </table:table-cell>
          <table:table-cell table:formula="of:=[.D88]-[.D8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2" office:value-type="float" office:value="3654" calcext:value-type="float">
            <text:p>365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22916666666667" calcext:value-type="float">
            <text:p>0,00042291666666666700</text:p>
          </table:table-cell>
          <table:table-cell table:formula="of:=[.D89]-[.D88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2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27777777777778" calcext:value-type="float">
            <text:p>0,00042777777777777800</text:p>
          </table:table-cell>
          <table:table-cell table:formula="of:=[.D90]-[.D8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2" office:value-type="float" office:value="3738" calcext:value-type="float">
            <text:p>373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32638888888889" calcext:value-type="float">
            <text:p>0,00043263888888888900</text:p>
          </table:table-cell>
          <table:table-cell table:formula="of:=[.D91]-[.D90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2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375" calcext:value-type="float">
            <text:p>0,00043750000000000000</text:p>
          </table:table-cell>
          <table:table-cell table:formula="of:=[.D92]-[.D9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2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42361111111111" calcext:value-type="float">
            <text:p>0,00044236111111111100</text:p>
          </table:table-cell>
          <table:table-cell table:formula="of:=[.D93]-[.D92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2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47222222222222" calcext:value-type="float">
            <text:p>0,00044722222222222200</text:p>
          </table:table-cell>
          <table:table-cell table:formula="of:=[.D94]-[.D9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2" office:value-type="float" office:value="3906" calcext:value-type="float">
            <text:p>390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52083333333333" calcext:value-type="float">
            <text:p>0,00045208333333333300</text:p>
          </table:table-cell>
          <table:table-cell table:formula="of:=[.D95]-[.D94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2" office:value-type="float" office:value="3948" calcext:value-type="float">
            <text:p>394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56944444444444" calcext:value-type="float">
            <text:p>0,00045694444444444500</text:p>
          </table:table-cell>
          <table:table-cell table:formula="of:=[.D96]-[.D95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2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61805555555556" calcext:value-type="float">
            <text:p>0,00046180555555555600</text:p>
          </table:table-cell>
          <table:table-cell table:formula="of:=[.D97]-[.D9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2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66666666666667" calcext:value-type="float">
            <text:p>0,00046666666666666700</text:p>
          </table:table-cell>
          <table:table-cell table:formula="of:=[.D98]-[.D97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2" office:value-type="float" office:value="4074" calcext:value-type="float">
            <text:p>407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71527777777778" calcext:value-type="float">
            <text:p>0,00047152777777777800</text:p>
          </table:table-cell>
          <table:table-cell table:formula="of:=[.D99]-[.D9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2" office:value-type="float" office:value="4116" calcext:value-type="float">
            <text:p>411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76388888888889" calcext:value-type="float">
            <text:p>0,00047638888888888900</text:p>
          </table:table-cell>
          <table:table-cell table:formula="of:=[.D100]-[.D99]" office:value-type="float" office:value="0.00000486111111111114" calcext:value-type="float">
            <text:p>0,000004861111111111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2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8125" calcext:value-type="float">
            <text:p>0,00048125000000000000</text:p>
          </table:table-cell>
          <table:table-cell table:formula="of:=[.D101]-[.D10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2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86111111111111" calcext:value-type="float">
            <text:p>0,00048611111111111100</text:p>
          </table:table-cell>
          <table:table-cell table:formula="of:=[.D102]-[.D10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2" office:value-type="float" office:value="4242" calcext:value-type="float">
            <text:p>424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90972222222222" calcext:value-type="float">
            <text:p>0,00049097222222222200</text:p>
          </table:table-cell>
          <table:table-cell table:formula="of:=[.D103]-[.D102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2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95833333333333" calcext:value-type="float">
            <text:p>0,00049583333333333300</text:p>
          </table:table-cell>
          <table:table-cell table:formula="of:=[.D104]-[.D10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2" office:value-type="float" office:value="4326" calcext:value-type="float">
            <text:p>432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00694444444445" calcext:value-type="float">
            <text:p>0,00050069444444444500</text:p>
          </table:table-cell>
          <table:table-cell table:formula="of:=[.D105]-[.D10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2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05555555555556" calcext:value-type="float">
            <text:p>0,00050555555555555600</text:p>
          </table:table-cell>
          <table:table-cell table:formula="of:=[.D106]-[.D10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2" office:value-type="float" office:value="4410" calcext:value-type="float">
            <text:p>441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10416666666667" calcext:value-type="float">
            <text:p>0,00051041666666666700</text:p>
          </table:table-cell>
          <table:table-cell table:formula="of:=[.D107]-[.D106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2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15277777777778" calcext:value-type="float">
            <text:p>0,00051527777777777800</text:p>
          </table:table-cell>
          <table:table-cell table:formula="of:=[.D108]-[.D10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2" office:value-type="float" office:value="4494" calcext:value-type="float">
            <text:p>449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20138888888889" calcext:value-type="float">
            <text:p>0,00052013888888888900</text:p>
          </table:table-cell>
          <table:table-cell table:formula="of:=[.D109]-[.D10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2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25" calcext:value-type="float">
            <text:p>0,00052500000000000000</text:p>
          </table:table-cell>
          <table:table-cell table:formula="of:=[.D110]-[.D109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2" office:value-type="float" office:value="4578" calcext:value-type="float">
            <text:p>457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29861111111111" calcext:value-type="float">
            <text:p>0,00052986111111111100</text:p>
          </table:table-cell>
          <table:table-cell table:formula="of:=[.D111]-[.D11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2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34722222222222" calcext:value-type="float">
            <text:p>0,00053472222222222200</text:p>
          </table:table-cell>
          <table:table-cell table:formula="of:=[.D112]-[.D11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2" office:value-type="float" office:value="4662" calcext:value-type="float">
            <text:p>466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39583333333333" calcext:value-type="float">
            <text:p>0,00053958333333333300</text:p>
          </table:table-cell>
          <table:table-cell table:formula="of:=[.D113]-[.D11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2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44444444444444" calcext:value-type="float">
            <text:p>0,00054444444444444400</text:p>
          </table:table-cell>
          <table:table-cell table:formula="of:=[.D114]-[.D113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2" office:value-type="float" office:value="4746" calcext:value-type="float">
            <text:p>474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49305555555556" calcext:value-type="float">
            <text:p>0,00054930555555555600</text:p>
          </table:table-cell>
          <table:table-cell table:formula="of:=[.D115]-[.D11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2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54166666666667" calcext:value-type="float">
            <text:p>0,00055416666666666700</text:p>
          </table:table-cell>
          <table:table-cell table:formula="of:=[.D116]-[.D11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2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59027777777778" calcext:value-type="float">
            <text:p>0,00055902777777777800</text:p>
          </table:table-cell>
          <table:table-cell table:formula="of:=[.D117]-[.D11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2" office:value-type="float" office:value="4872" calcext:value-type="float">
            <text:p>487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63888888888889" calcext:value-type="float">
            <text:p>0,00056388888888888900</text:p>
          </table:table-cell>
          <table:table-cell table:formula="of:=[.D118]-[.D117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2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6875" calcext:value-type="float">
            <text:p>0,00056875000000000000</text:p>
          </table:table-cell>
          <table:table-cell table:formula="of:=[.D119]-[.D11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2" office:value-type="float" office:value="4956" calcext:value-type="float">
            <text:p>495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73611111111111" calcext:value-type="float">
            <text:p>0,00057361111111111100</text:p>
          </table:table-cell>
          <table:table-cell table:formula="of:=[.D120]-[.D11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2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78472222222222" calcext:value-type="float">
            <text:p>0,00057847222222222200</text:p>
          </table:table-cell>
          <table:table-cell table:formula="of:=[.D121]-[.D120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2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83333333333333" calcext:value-type="float">
            <text:p>0,00058333333333333300</text:p>
          </table:table-cell>
          <table:table-cell table:formula="of:=[.D122]-[.D12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2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88194444444445" calcext:value-type="float">
            <text:p>0,00058819444444444500</text:p>
          </table:table-cell>
          <table:table-cell table:formula="of:=[.D123]-[.D12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2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93055555555556" calcext:value-type="float">
            <text:p>0,00059305555555555600</text:p>
          </table:table-cell>
          <table:table-cell table:formula="of:=[.D124]-[.D12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2" office:value-type="float" office:value="5166" calcext:value-type="float">
            <text:p>516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97916666666667" calcext:value-type="float">
            <text:p>0,00059791666666666700</text:p>
          </table:table-cell>
          <table:table-cell table:formula="of:=[.D125]-[.D124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2" office:value-type="float" office:value="5208" calcext:value-type="float">
            <text:p>520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02777777777778" calcext:value-type="float">
            <text:p>0,00060277777777777800</text:p>
          </table:table-cell>
          <table:table-cell table:formula="of:=[.D126]-[.D12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2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07638888888889" calcext:value-type="float">
            <text:p>0,00060763888888888900</text:p>
          </table:table-cell>
          <table:table-cell table:formula="of:=[.D127]-[.D12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2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6125" calcext:value-type="float">
            <text:p>0,00061250000000000000</text:p>
          </table:table-cell>
          <table:table-cell table:formula="of:=[.D128]-[.D12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2" office:value-type="float" office:value="5334" calcext:value-type="float">
            <text:p>533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17361111111111" calcext:value-type="float">
            <text:p>0,00061736111111111100</text:p>
          </table:table-cell>
          <table:table-cell table:formula="of:=[.D129]-[.D128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2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22222222222222" calcext:value-type="float">
            <text:p>0,00062222222222222200</text:p>
          </table:table-cell>
          <table:table-cell table:formula="of:=[.D130]-[.D12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2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627083333333333" calcext:value-type="float">
            <text:p>0,00062708333333333300</text:p>
          </table:table-cell>
          <table:table-cell table:formula="of:=[.D131]-[.D13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2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31944444444444" calcext:value-type="float">
            <text:p>0,00063194444444444400</text:p>
          </table:table-cell>
          <table:table-cell table:formula="of:=[.D132]-[.D131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2" office:value-type="float" office:value="5502" calcext:value-type="float">
            <text:p>550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36805555555556" calcext:value-type="float">
            <text:p>0,00063680555555555600</text:p>
          </table:table-cell>
          <table:table-cell table:formula="of:=[.D133]-[.D13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2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641666666666667" calcext:value-type="float">
            <text:p>0,00064166666666666700</text:p>
          </table:table-cell>
          <table:table-cell table:formula="of:=[.D134]-[.D13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2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46527777777778" calcext:value-type="float">
            <text:p>0,00064652777777777800</text:p>
          </table:table-cell>
          <table:table-cell table:formula="of:=[.D135]-[.D13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2" office:value-type="float" office:value="5628" calcext:value-type="float">
            <text:p>562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51388888888889" calcext:value-type="float">
            <text:p>0,00065138888888888900</text:p>
          </table:table-cell>
          <table:table-cell table:formula="of:=[.D136]-[.D135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2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65625" calcext:value-type="float">
            <text:p>0,00065625000000000000</text:p>
          </table:table-cell>
          <table:table-cell table:formula="of:=[.D137]-[.D13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2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661111111111111" calcext:value-type="float">
            <text:p>0,00066111111111111100</text:p>
          </table:table-cell>
          <table:table-cell table:formula="of:=[.D138]-[.D13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2" office:value-type="float" office:value="5754" calcext:value-type="float">
            <text:p>575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65972222222222" calcext:value-type="float">
            <text:p>0,00066597222222222200</text:p>
          </table:table-cell>
          <table:table-cell table:formula="of:=[.D139]-[.D13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2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670833333333333" calcext:value-type="float">
            <text:p>0,00067083333333333300</text:p>
          </table:table-cell>
          <table:table-cell table:formula="of:=[.D140]-[.D139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2" office:value-type="float" office:value="5838" calcext:value-type="float">
            <text:p>583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675694444444445" calcext:value-type="float">
            <text:p>0,00067569444444444500</text:p>
          </table:table-cell>
          <table:table-cell table:formula="of:=[.D141]-[.D14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2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680555555555556" calcext:value-type="float">
            <text:p>0,00068055555555555600</text:p>
          </table:table-cell>
          <table:table-cell table:formula="of:=[.D142]-[.D14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2" office:value-type="float" office:value="5922" calcext:value-type="float">
            <text:p>592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685416666666667" calcext:value-type="float">
            <text:p>0,00068541666666666700</text:p>
          </table:table-cell>
          <table:table-cell table:formula="of:=[.D143]-[.D142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2" office:value-type="float" office:value="5964" calcext:value-type="float">
            <text:p>596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690277777777778" calcext:value-type="float">
            <text:p>0,00069027777777777800</text:p>
          </table:table-cell>
          <table:table-cell table:formula="of:=[.D144]-[.D14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2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695138888888889" calcext:value-type="float">
            <text:p>0,00069513888888888900</text:p>
          </table:table-cell>
          <table:table-cell table:formula="of:=[.D145]-[.D14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2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7" calcext:value-type="float">
            <text:p>0,00070000000000000000</text:p>
          </table:table-cell>
          <table:table-cell table:formula="of:=[.D146]-[.D14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2" office:value-type="float" office:value="6090" calcext:value-type="float">
            <text:p>609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704861111111111" calcext:value-type="float">
            <text:p>0,00070486111111111100</text:p>
          </table:table-cell>
          <table:table-cell table:formula="of:=[.D147]-[.D146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2" office:value-type="float" office:value="6132" calcext:value-type="float">
            <text:p>613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709722222222222" calcext:value-type="float">
            <text:p>0,00070972222222222200</text:p>
          </table:table-cell>
          <table:table-cell table:formula="of:=[.D148]-[.D14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2" office:value-type="float" office:value="6174" calcext:value-type="float">
            <text:p>617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714583333333333" calcext:value-type="float">
            <text:p>0,00071458333333333300</text:p>
          </table:table-cell>
          <table:table-cell table:formula="of:=[.D149]-[.D14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2" office:value-type="float" office:value="6216" calcext:value-type="float">
            <text:p>621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719444444444444" calcext:value-type="float">
            <text:p>0,00071944444444444400</text:p>
          </table:table-cell>
          <table:table-cell table:formula="of:=[.D150]-[.D14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2" office:value-type="float" office:value="6258" calcext:value-type="float">
            <text:p>625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724305555555556" calcext:value-type="float">
            <text:p>0,00072430555555555600</text:p>
          </table:table-cell>
          <table:table-cell table:formula="of:=[.D151]-[.D150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2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729166666666667" calcext:value-type="float">
            <text:p>0,00072916666666666700</text:p>
          </table:table-cell>
          <table:table-cell table:formula="of:=[.D152]-[.D15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2" office:value-type="float" office:value="6342" calcext:value-type="float">
            <text:p>634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734027777777778" calcext:value-type="float">
            <text:p>0,00073402777777777800</text:p>
          </table:table-cell>
          <table:table-cell table:formula="of:=[.D153]-[.D15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2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738888888888889" calcext:value-type="float">
            <text:p>0,00073888888888888900</text:p>
          </table:table-cell>
          <table:table-cell table:formula="of:=[.D154]-[.D153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2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74375" calcext:value-type="float">
            <text:p>0,00074375000000000000</text:p>
          </table:table-cell>
          <table:table-cell table:formula="of:=[.D155]-[.D15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2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748611111111111" calcext:value-type="float">
            <text:p>0,00074861111111111100</text:p>
          </table:table-cell>
          <table:table-cell table:formula="of:=[.D156]-[.D15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2" office:value-type="float" office:value="6510" calcext:value-type="float">
            <text:p>651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753472222222222" calcext:value-type="float">
            <text:p>0,00075347222222222200</text:p>
          </table:table-cell>
          <table:table-cell table:formula="of:=[.D157]-[.D15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2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758333333333333" calcext:value-type="float">
            <text:p>0,00075833333333333300</text:p>
          </table:table-cell>
          <table:table-cell table:formula="of:=[.D158]-[.D157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2" office:value-type="float" office:value="6594" calcext:value-type="float">
            <text:p>659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763194444444445" calcext:value-type="float">
            <text:p>0,00076319444444444500</text:p>
          </table:table-cell>
          <table:table-cell table:formula="of:=[.D159]-[.D15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2" office:value-type="float" office:value="6636" calcext:value-type="float">
            <text:p>663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768055555555556" calcext:value-type="float">
            <text:p>0,00076805555555555600</text:p>
          </table:table-cell>
          <table:table-cell table:formula="of:=[.D160]-[.D15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2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772916666666667" calcext:value-type="float">
            <text:p>0,00077291666666666700</text:p>
          </table:table-cell>
          <table:table-cell table:formula="of:=[.D161]-[.D16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2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777777777777778" calcext:value-type="float">
            <text:p>0,00077777777777777800</text:p>
          </table:table-cell>
          <table:table-cell table:formula="of:=[.D162]-[.D161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2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782638888888889" calcext:value-type="float">
            <text:p>0,00078263888888888900</text:p>
          </table:table-cell>
          <table:table-cell table:formula="of:=[.D163]-[.D16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2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7875" calcext:value-type="float">
            <text:p>0,00078750000000000000</text:p>
          </table:table-cell>
          <table:table-cell table:formula="of:=[.D164]-[.D16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2" office:value-type="float" office:value="6846" calcext:value-type="float">
            <text:p>684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792361111111111" calcext:value-type="float">
            <text:p>0,00079236111111111100</text:p>
          </table:table-cell>
          <table:table-cell table:formula="of:=[.D165]-[.D16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2" office:value-type="float" office:value="6888" calcext:value-type="float">
            <text:p>688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797222222222222" calcext:value-type="float">
            <text:p>0,00079722222222222200</text:p>
          </table:table-cell>
          <table:table-cell table:formula="of:=[.D166]-[.D165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2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802083333333333" calcext:value-type="float">
            <text:p>0,00080208333333333300</text:p>
          </table:table-cell>
          <table:table-cell table:formula="of:=[.D167]-[.D16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2" office:value-type="float" office:value="6972" calcext:value-type="float">
            <text:p>697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806944444444444" calcext:value-type="float">
            <text:p>0,00080694444444444400</text:p>
          </table:table-cell>
          <table:table-cell table:formula="of:=[.D168]-[.D16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2" office:value-type="float" office:value="7014" calcext:value-type="float">
            <text:p>701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811805555555556" calcext:value-type="float">
            <text:p>0,00081180555555555600</text:p>
          </table:table-cell>
          <table:table-cell table:formula="of:=[.D169]-[.D168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2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816666666666667" calcext:value-type="float">
            <text:p>0,00081666666666666700</text:p>
          </table:table-cell>
          <table:table-cell table:formula="of:=[.D170]-[.D16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2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821527777777778" calcext:value-type="float">
            <text:p>0,00082152777777777800</text:p>
          </table:table-cell>
          <table:table-cell table:formula="of:=[.D171]-[.D17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2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826388888888889" calcext:value-type="float">
            <text:p>0,00082638888888888900</text:p>
          </table:table-cell>
          <table:table-cell table:formula="of:=[.D172]-[.D17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2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83125" calcext:value-type="float">
            <text:p>0,00083125000000000000</text:p>
          </table:table-cell>
          <table:table-cell table:formula="of:=[.D173]-[.D172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2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836111111111111" calcext:value-type="float">
            <text:p>0,00083611111111111100</text:p>
          </table:table-cell>
          <table:table-cell table:formula="of:=[.D174]-[.D17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2" office:value-type="float" office:value="7266" calcext:value-type="float">
            <text:p>726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840972222222222" calcext:value-type="float">
            <text:p>0,00084097222222222200</text:p>
          </table:table-cell>
          <table:table-cell table:formula="of:=[.D175]-[.D17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2" office:value-type="float" office:value="7308" calcext:value-type="float">
            <text:p>730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845833333333333" calcext:value-type="float">
            <text:p>0,00084583333333333300</text:p>
          </table:table-cell>
          <table:table-cell table:formula="of:=[.D176]-[.D17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2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850694444444444" calcext:value-type="float">
            <text:p>0,00085069444444444400</text:p>
          </table:table-cell>
          <table:table-cell table:formula="of:=[.D177]-[.D176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2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855555555555556" calcext:value-type="float">
            <text:p>0,00085555555555555600</text:p>
          </table:table-cell>
          <table:table-cell table:formula="of:=[.D178]-[.D17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2" office:value-type="float" office:value="7434" calcext:value-type="float">
            <text:p>743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860416666666667" calcext:value-type="float">
            <text:p>0,00086041666666666700</text:p>
          </table:table-cell>
          <table:table-cell table:formula="of:=[.D179]-[.D17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2" office:value-type="float" office:value="7476" calcext:value-type="float">
            <text:p>747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865277777777778" calcext:value-type="float">
            <text:p>0,00086527777777777800</text:p>
          </table:table-cell>
          <table:table-cell table:formula="of:=[.D180]-[.D179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2" office:value-type="float" office:value="7518" calcext:value-type="float">
            <text:p>751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870138888888889" calcext:value-type="float">
            <text:p>0,00087013888888888900</text:p>
          </table:table-cell>
          <table:table-cell table:formula="of:=[.D181]-[.D18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2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875" calcext:value-type="float">
            <text:p>0,00087500000000000000</text:p>
          </table:table-cell>
          <table:table-cell table:formula="of:=[.D182]-[.D18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2" office:value-type="float" office:value="7602" calcext:value-type="float">
            <text:p>760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879861111111111" calcext:value-type="float">
            <text:p>0,00087986111111111100</text:p>
          </table:table-cell>
          <table:table-cell table:formula="of:=[.D183]-[.D18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2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884722222222222" calcext:value-type="float">
            <text:p>0,00088472222222222200</text:p>
          </table:table-cell>
          <table:table-cell table:formula="of:=[.D184]-[.D183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2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889583333333333" calcext:value-type="float">
            <text:p>0,00088958333333333400</text:p>
          </table:table-cell>
          <table:table-cell table:formula="of:=[.D185]-[.D18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2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894444444444445" calcext:value-type="float">
            <text:p>0,00089444444444444500</text:p>
          </table:table-cell>
          <table:table-cell table:formula="of:=[.D186]-[.D18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2" office:value-type="float" office:value="7770" calcext:value-type="float">
            <text:p>777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899305555555556" calcext:value-type="float">
            <text:p>0,00089930555555555600</text:p>
          </table:table-cell>
          <table:table-cell table:formula="of:=[.D187]-[.D18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2" office:value-type="float" office:value="7812" calcext:value-type="float">
            <text:p>781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904166666666667" calcext:value-type="float">
            <text:p>0,00090416666666666700</text:p>
          </table:table-cell>
          <table:table-cell table:formula="of:=[.D188]-[.D187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2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909027777777778" calcext:value-type="float">
            <text:p>0,00090902777777777800</text:p>
          </table:table-cell>
          <table:table-cell table:formula="of:=[.D189]-[.D18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2" office:value-type="float" office:value="7896" calcext:value-type="float">
            <text:p>789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913888888888889" calcext:value-type="float">
            <text:p>0,00091388888888888900</text:p>
          </table:table-cell>
          <table:table-cell table:formula="of:=[.D190]-[.D18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2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91875" calcext:value-type="float">
            <text:p>0,00091875000000000000</text:p>
          </table:table-cell>
          <table:table-cell table:formula="of:=[.D191]-[.D190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2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923611111111111" calcext:value-type="float">
            <text:p>0,00092361111111111100</text:p>
          </table:table-cell>
          <table:table-cell table:formula="of:=[.D192]-[.D19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2" office:value-type="float" office:value="8022" calcext:value-type="float">
            <text:p>802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928472222222222" calcext:value-type="float">
            <text:p>0,00092847222222222200</text:p>
          </table:table-cell>
          <table:table-cell table:formula="of:=[.D193]-[.D19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2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933333333333333" calcext:value-type="float">
            <text:p>0,00093333333333333300</text:p>
          </table:table-cell>
          <table:table-cell table:formula="of:=[.D194]-[.D19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2" office:value-type="float" office:value="8106" calcext:value-type="float">
            <text:p>810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938194444444444" calcext:value-type="float">
            <text:p>0,00093819444444444500</text:p>
          </table:table-cell>
          <table:table-cell table:formula="of:=[.D195]-[.D194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2" office:value-type="float" office:value="8148" calcext:value-type="float">
            <text:p>814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943055555555556" calcext:value-type="float">
            <text:p>0,00094305555555555600</text:p>
          </table:table-cell>
          <table:table-cell table:formula="of:=[.D196]-[.D19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2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947916666666667" calcext:value-type="float">
            <text:p>0,00094791666666666700</text:p>
          </table:table-cell>
          <table:table-cell table:formula="of:=[.D197]-[.D19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2" office:value-type="float" office:value="8232" calcext:value-type="float">
            <text:p>823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952777777777778" calcext:value-type="float">
            <text:p>0,00095277777777777800</text:p>
          </table:table-cell>
          <table:table-cell table:formula="of:=[.D198]-[.D19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2" office:value-type="float" office:value="8274" calcext:value-type="float">
            <text:p>827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957638888888889" calcext:value-type="float">
            <text:p>0,00095763888888888900</text:p>
          </table:table-cell>
          <table:table-cell table:formula="of:=[.D199]-[.D198]" office:value-type="float" office:value="0.00000486111111111119" calcext:value-type="float">
            <text:p>0,000004861111111111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2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9625" calcext:value-type="float">
            <text:p>0,00096250000000000000</text:p>
          </table:table-cell>
          <table:table-cell table:formula="of:=[.D200]-[.D19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2" office:value-type="float" office:value="8358" calcext:value-type="float">
            <text:p>835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967361111111111" calcext:value-type="float">
            <text:p>0,00096736111111111100</text:p>
          </table:table-cell>
          <table:table-cell table:formula="of:=[.D201]-[.D20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2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972222222222222" calcext:value-type="float">
            <text:p>0,00097222222222222200</text:p>
          </table:table-cell>
          <table:table-cell table:formula="of:=[.D202]-[.D20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2" office:value-type="float" office:value="8442" calcext:value-type="float">
            <text:p>844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977083333333333" calcext:value-type="float">
            <text:p>0,00097708333333333300</text:p>
          </table:table-cell>
          <table:table-cell table:formula="of:=[.D203]-[.D20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2" office:value-type="float" office:value="8484" calcext:value-type="float">
            <text:p>848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981944444444444" calcext:value-type="float">
            <text:p>0,00098194444444444400</text:p>
          </table:table-cell>
          <table:table-cell table:formula="of:=[.D204]-[.D20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2" office:value-type="float" office:value="8526" calcext:value-type="float">
            <text:p>852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986805555555556" calcext:value-type="float">
            <text:p>0,00098680555555555600</text:p>
          </table:table-cell>
          <table:table-cell table:formula="of:=[.D205]-[.D20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2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991666666666667" calcext:value-type="float">
            <text:p>0,00099166666666666700</text:p>
          </table:table-cell>
          <table:table-cell table:formula="of:=[.D206]-[.D20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2" office:value-type="float" office:value="8610" calcext:value-type="float">
            <text:p>861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996527777777778" calcext:value-type="float">
            <text:p>0,00099652777777777800</text:p>
          </table:table-cell>
          <table:table-cell table:formula="of:=[.D207]-[.D20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2" office:value-type="float" office:value="8652" calcext:value-type="float">
            <text:p>865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00138888888889" calcext:value-type="float">
            <text:p>0,00100138888888889000</text:p>
          </table:table-cell>
          <table:table-cell table:formula="of:=[.D208]-[.D20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2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00625" calcext:value-type="float">
            <text:p>0,00100625000000000000</text:p>
          </table:table-cell>
          <table:table-cell table:formula="of:=[.D209]-[.D20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2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01111111111111" calcext:value-type="float">
            <text:p>0,00101111111111111000</text:p>
          </table:table-cell>
          <table:table-cell table:formula="of:=[.D210]-[.D20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2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01597222222222" calcext:value-type="float">
            <text:p>0,00101597222222222000</text:p>
          </table:table-cell>
          <table:table-cell table:formula="of:=[.D211]-[.D21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2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02083333333333" calcext:value-type="float">
            <text:p>0,00102083333333333000</text:p>
          </table:table-cell>
          <table:table-cell table:formula="of:=[.D212]-[.D21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2" office:value-type="float" office:value="8862" calcext:value-type="float">
            <text:p>886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02569444444444" calcext:value-type="float">
            <text:p>0,00102569444444444000</text:p>
          </table:table-cell>
          <table:table-cell table:formula="of:=[.D213]-[.D21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2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03055555555556" calcext:value-type="float">
            <text:p>0,00103055555555556000</text:p>
          </table:table-cell>
          <table:table-cell table:formula="of:=[.D214]-[.D21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2" office:value-type="float" office:value="8946" calcext:value-type="float">
            <text:p>894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03541666666667" calcext:value-type="float">
            <text:p>0,00103541666666667000</text:p>
          </table:table-cell>
          <table:table-cell table:formula="of:=[.D215]-[.D21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2" office:value-type="float" office:value="8988" calcext:value-type="float">
            <text:p>898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04027777777778" calcext:value-type="float">
            <text:p>0,00104027777777778000</text:p>
          </table:table-cell>
          <table:table-cell table:formula="of:=[.D216]-[.D21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2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04513888888889" calcext:value-type="float">
            <text:p>0,00104513888888889000</text:p>
          </table:table-cell>
          <table:table-cell table:formula="of:=[.D217]-[.D21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2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05" calcext:value-type="float">
            <text:p>0,00105000000000000000</text:p>
          </table:table-cell>
          <table:table-cell table:formula="of:=[.D218]-[.D21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2" office:value-type="float" office:value="9114" calcext:value-type="float">
            <text:p>911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05486111111111" calcext:value-type="float">
            <text:p>0,00105486111111111000</text:p>
          </table:table-cell>
          <table:table-cell table:formula="of:=[.D219]-[.D21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2" office:value-type="float" office:value="9156" calcext:value-type="float">
            <text:p>915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05972222222222" calcext:value-type="float">
            <text:p>0,00105972222222222000</text:p>
          </table:table-cell>
          <table:table-cell table:formula="of:=[.D220]-[.D21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2" office:value-type="float" office:value="9198" calcext:value-type="float">
            <text:p>919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06458333333333" calcext:value-type="float">
            <text:p>0,00106458333333333000</text:p>
          </table:table-cell>
          <table:table-cell table:formula="of:=[.D221]-[.D22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2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06944444444444" calcext:value-type="float">
            <text:p>0,00106944444444444000</text:p>
          </table:table-cell>
          <table:table-cell table:formula="of:=[.D222]-[.D22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2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07430555555556" calcext:value-type="float">
            <text:p>0,00107430555555556000</text:p>
          </table:table-cell>
          <table:table-cell table:formula="of:=[.D223]-[.D22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2" office:value-type="float" office:value="9324" calcext:value-type="float">
            <text:p>932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07916666666667" calcext:value-type="float">
            <text:p>0,00107916666666667000</text:p>
          </table:table-cell>
          <table:table-cell table:formula="of:=[.D224]-[.D22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2" office:value-type="float" office:value="9366" calcext:value-type="float">
            <text:p>936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08402777777778" calcext:value-type="float">
            <text:p>0,00108402777777778000</text:p>
          </table:table-cell>
          <table:table-cell table:formula="of:=[.D225]-[.D22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2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08888888888889" calcext:value-type="float">
            <text:p>0,00108888888888889000</text:p>
          </table:table-cell>
          <table:table-cell table:formula="of:=[.D226]-[.D22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2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09375" calcext:value-type="float">
            <text:p>0,00109375000000000000</text:p>
          </table:table-cell>
          <table:table-cell table:formula="of:=[.D227]-[.D22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2" office:value-type="float" office:value="9492" calcext:value-type="float">
            <text:p>949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09861111111111" calcext:value-type="float">
            <text:p>0,00109861111111111000</text:p>
          </table:table-cell>
          <table:table-cell table:formula="of:=[.D228]-[.D22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2" office:value-type="float" office:value="9534" calcext:value-type="float">
            <text:p>953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10347222222222" calcext:value-type="float">
            <text:p>0,00110347222222222000</text:p>
          </table:table-cell>
          <table:table-cell table:formula="of:=[.D229]-[.D22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2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10833333333333" calcext:value-type="float">
            <text:p>0,00110833333333333000</text:p>
          </table:table-cell>
          <table:table-cell table:formula="of:=[.D230]-[.D22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2" office:value-type="float" office:value="9618" calcext:value-type="float">
            <text:p>961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11319444444444" calcext:value-type="float">
            <text:p>0,00111319444444444000</text:p>
          </table:table-cell>
          <table:table-cell table:formula="of:=[.D231]-[.D23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2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11805555555556" calcext:value-type="float">
            <text:p>0,00111805555555556000</text:p>
          </table:table-cell>
          <table:table-cell table:formula="of:=[.D232]-[.D23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2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12291666666667" calcext:value-type="float">
            <text:p>0,00112291666666667000</text:p>
          </table:table-cell>
          <table:table-cell table:formula="of:=[.D233]-[.D23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2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12777777777778" calcext:value-type="float">
            <text:p>0,00112777777777778000</text:p>
          </table:table-cell>
          <table:table-cell table:formula="of:=[.D234]-[.D23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2" office:value-type="float" office:value="9786" calcext:value-type="float">
            <text:p>978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13263888888889" calcext:value-type="float">
            <text:p>0,00113263888888889000</text:p>
          </table:table-cell>
          <table:table-cell table:formula="of:=[.D235]-[.D23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2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1375" calcext:value-type="float">
            <text:p>0,00113750000000000000</text:p>
          </table:table-cell>
          <table:table-cell table:formula="of:=[.D236]-[.D23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2" office:value-type="float" office:value="9870" calcext:value-type="float">
            <text:p>987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14236111111111" calcext:value-type="float">
            <text:p>0,00114236111111111000</text:p>
          </table:table-cell>
          <table:table-cell table:formula="of:=[.D237]-[.D23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2" office:value-type="float" office:value="9912" calcext:value-type="float">
            <text:p>991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14722222222222" calcext:value-type="float">
            <text:p>0,00114722222222222000</text:p>
          </table:table-cell>
          <table:table-cell table:formula="of:=[.D238]-[.D23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2" office:value-type="float" office:value="9954" calcext:value-type="float">
            <text:p>995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15208333333333" calcext:value-type="float">
            <text:p>0,00115208333333333000</text:p>
          </table:table-cell>
          <table:table-cell table:formula="of:=[.D239]-[.D23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2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15694444444444" calcext:value-type="float">
            <text:p>0,00115694444444444000</text:p>
          </table:table-cell>
          <table:table-cell table:formula="of:=[.D240]-[.D23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2" office:value-type="float" office:value="10038" calcext:value-type="float">
            <text:p>1003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16180555555556" calcext:value-type="float">
            <text:p>0,00116180555555556000</text:p>
          </table:table-cell>
          <table:table-cell table:formula="of:=[.D241]-[.D24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2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16666666666667" calcext:value-type="float">
            <text:p>0,00116666666666667000</text:p>
          </table:table-cell>
          <table:table-cell table:formula="of:=[.D242]-[.D24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2" office:value-type="float" office:value="10122" calcext:value-type="float">
            <text:p>1012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17152777777778" calcext:value-type="float">
            <text:p>0,00117152777777778000</text:p>
          </table:table-cell>
          <table:table-cell table:formula="of:=[.D243]-[.D24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2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17638888888889" calcext:value-type="float">
            <text:p>0,00117638888888889000</text:p>
          </table:table-cell>
          <table:table-cell table:formula="of:=[.D244]-[.D24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2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18125" calcext:value-type="float">
            <text:p>0,00118125000000000000</text:p>
          </table:table-cell>
          <table:table-cell table:formula="of:=[.D245]-[.D24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2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18611111111111" calcext:value-type="float">
            <text:p>0,00118611111111111000</text:p>
          </table:table-cell>
          <table:table-cell table:formula="of:=[.D246]-[.D24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2" office:value-type="float" office:value="10290" calcext:value-type="float">
            <text:p>1029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19097222222222" calcext:value-type="float">
            <text:p>0,00119097222222222000</text:p>
          </table:table-cell>
          <table:table-cell table:formula="of:=[.D247]-[.D24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2" office:value-type="float" office:value="10332" calcext:value-type="float">
            <text:p>1033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19583333333333" calcext:value-type="float">
            <text:p>0,00119583333333333000</text:p>
          </table:table-cell>
          <table:table-cell table:formula="of:=[.D248]-[.D24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2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20069444444444" calcext:value-type="float">
            <text:p>0,00120069444444444000</text:p>
          </table:table-cell>
          <table:table-cell table:formula="of:=[.D249]-[.D24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2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20555555555556" calcext:value-type="float">
            <text:p>0,00120555555555556000</text:p>
          </table:table-cell>
          <table:table-cell table:formula="of:=[.D250]-[.D24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2" office:value-type="float" office:value="10458" calcext:value-type="float">
            <text:p>1045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21041666666667" calcext:value-type="float">
            <text:p>0,00121041666666667000</text:p>
          </table:table-cell>
          <table:table-cell table:formula="of:=[.D251]-[.D25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2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21527777777778" calcext:value-type="float">
            <text:p>0,00121527777777778000</text:p>
          </table:table-cell>
          <table:table-cell table:formula="of:=[.D252]-[.D25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2" office:value-type="float" office:value="10542" calcext:value-type="float">
            <text:p>1054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22013888888889" calcext:value-type="float">
            <text:p>0,00122013888888889000</text:p>
          </table:table-cell>
          <table:table-cell table:formula="of:=[.D253]-[.D25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2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225" calcext:value-type="float">
            <text:p>0,00122500000000000000</text:p>
          </table:table-cell>
          <table:table-cell table:formula="of:=[.D254]-[.D25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2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22986111111111" calcext:value-type="float">
            <text:p>0,00122986111111111000</text:p>
          </table:table-cell>
          <table:table-cell table:formula="of:=[.D255]-[.D25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2" office:value-type="float" office:value="10668" calcext:value-type="float">
            <text:p>1066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23472222222222" calcext:value-type="float">
            <text:p>0,00123472222222222000</text:p>
          </table:table-cell>
          <table:table-cell table:formula="of:=[.D256]-[.D25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2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23958333333333" calcext:value-type="float">
            <text:p>0,00123958333333333000</text:p>
          </table:table-cell>
          <table:table-cell table:formula="of:=[.D257]-[.D25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2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24444444444444" calcext:value-type="float">
            <text:p>0,00124444444444444000</text:p>
          </table:table-cell>
          <table:table-cell table:formula="of:=[.D258]-[.D25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2" office:value-type="float" office:value="10794" calcext:value-type="float">
            <text:p>1079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24930555555556" calcext:value-type="float">
            <text:p>0,00124930555555556000</text:p>
          </table:table-cell>
          <table:table-cell table:formula="of:=[.D259]-[.D25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2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25416666666667" calcext:value-type="float">
            <text:p>0,00125416666666667000</text:p>
          </table:table-cell>
          <table:table-cell table:formula="of:=[.D260]-[.D25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2" office:value-type="float" office:value="10878" calcext:value-type="float">
            <text:p>1087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25902777777778" calcext:value-type="float">
            <text:p>0,00125902777777778000</text:p>
          </table:table-cell>
          <table:table-cell table:formula="of:=[.D261]-[.D26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2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26388888888889" calcext:value-type="float">
            <text:p>0,00126388888888889000</text:p>
          </table:table-cell>
          <table:table-cell table:formula="of:=[.D262]-[.D26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2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26875" calcext:value-type="float">
            <text:p>0,00126875000000000000</text:p>
          </table:table-cell>
          <table:table-cell table:formula="of:=[.D263]-[.D26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2" office:value-type="float" office:value="11004" calcext:value-type="float">
            <text:p>1100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27361111111111" calcext:value-type="float">
            <text:p>0,00127361111111111000</text:p>
          </table:table-cell>
          <table:table-cell table:formula="of:=[.D264]-[.D26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2" office:value-type="float" office:value="11046" calcext:value-type="float">
            <text:p>1104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27847222222222" calcext:value-type="float">
            <text:p>0,00127847222222222000</text:p>
          </table:table-cell>
          <table:table-cell table:formula="of:=[.D265]-[.D26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2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28333333333333" calcext:value-type="float">
            <text:p>0,00128333333333333000</text:p>
          </table:table-cell>
          <table:table-cell table:formula="of:=[.D266]-[.D26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2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28819444444444" calcext:value-type="float">
            <text:p>0,00128819444444444000</text:p>
          </table:table-cell>
          <table:table-cell table:formula="of:=[.D267]-[.D26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2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29305555555556" calcext:value-type="float">
            <text:p>0,00129305555555556000</text:p>
          </table:table-cell>
          <table:table-cell table:formula="of:=[.D268]-[.D26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2" office:value-type="float" office:value="11214" calcext:value-type="float">
            <text:p>1121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29791666666667" calcext:value-type="float">
            <text:p>0,00129791666666667000</text:p>
          </table:table-cell>
          <table:table-cell table:formula="of:=[.D269]-[.D26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2" office:value-type="float" office:value="11256" calcext:value-type="float">
            <text:p>1125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30277777777778" calcext:value-type="float">
            <text:p>0,00130277777777778000</text:p>
          </table:table-cell>
          <table:table-cell table:formula="of:=[.D270]-[.D26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2" office:value-type="float" office:value="11298" calcext:value-type="float">
            <text:p>1129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30763888888889" calcext:value-type="float">
            <text:p>0,00130763888888889000</text:p>
          </table:table-cell>
          <table:table-cell table:formula="of:=[.D271]-[.D27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2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3125" calcext:value-type="float">
            <text:p>0,00131250000000000000</text:p>
          </table:table-cell>
          <table:table-cell table:formula="of:=[.D272]-[.D27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2" office:value-type="float" office:value="11382" calcext:value-type="float">
            <text:p>1138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31736111111111" calcext:value-type="float">
            <text:p>0,00131736111111111000</text:p>
          </table:table-cell>
          <table:table-cell table:formula="of:=[.D273]-[.D27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2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32222222222222" calcext:value-type="float">
            <text:p>0,00132222222222222000</text:p>
          </table:table-cell>
          <table:table-cell table:formula="of:=[.D274]-[.D27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2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32708333333333" calcext:value-type="float">
            <text:p>0,00132708333333333000</text:p>
          </table:table-cell>
          <table:table-cell table:formula="of:=[.D275]-[.D27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2" office:value-type="float" office:value="11508" calcext:value-type="float">
            <text:p>1150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33194444444444" calcext:value-type="float">
            <text:p>0,00133194444444444000</text:p>
          </table:table-cell>
          <table:table-cell table:formula="of:=[.D276]-[.D27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2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33680555555556" calcext:value-type="float">
            <text:p>0,00133680555555556000</text:p>
          </table:table-cell>
          <table:table-cell table:formula="of:=[.D277]-[.D27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2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34166666666667" calcext:value-type="float">
            <text:p>0,00134166666666667000</text:p>
          </table:table-cell>
          <table:table-cell table:formula="of:=[.D278]-[.D27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2" office:value-type="float" office:value="11634" calcext:value-type="float">
            <text:p>1163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34652777777778" calcext:value-type="float">
            <text:p>0,00134652777777778000</text:p>
          </table:table-cell>
          <table:table-cell table:formula="of:=[.D279]-[.D27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2" office:value-type="float" office:value="11676" calcext:value-type="float">
            <text:p>1167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35138888888889" calcext:value-type="float">
            <text:p>0,00135138888888889000</text:p>
          </table:table-cell>
          <table:table-cell table:formula="of:=[.D280]-[.D27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2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35625" calcext:value-type="float">
            <text:p>0,00135625000000000000</text:p>
          </table:table-cell>
          <table:table-cell table:formula="of:=[.D281]-[.D28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2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36111111111111" calcext:value-type="float">
            <text:p>0,00136111111111111000</text:p>
          </table:table-cell>
          <table:table-cell table:formula="of:=[.D282]-[.D28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2" office:value-type="float" office:value="11802" calcext:value-type="float">
            <text:p>1180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36597222222222" calcext:value-type="float">
            <text:p>0,00136597222222222000</text:p>
          </table:table-cell>
          <table:table-cell table:formula="of:=[.D283]-[.D28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2" office:value-type="float" office:value="11844" calcext:value-type="float">
            <text:p>1184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37083333333333" calcext:value-type="float">
            <text:p>0,00137083333333333000</text:p>
          </table:table-cell>
          <table:table-cell table:formula="of:=[.D284]-[.D28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2" office:value-type="float" office:value="11886" calcext:value-type="float">
            <text:p>1188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37569444444444" calcext:value-type="float">
            <text:p>0,00137569444444444000</text:p>
          </table:table-cell>
          <table:table-cell table:formula="of:=[.D285]-[.D28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2" office:value-type="float" office:value="11928" calcext:value-type="float">
            <text:p>1192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38055555555556" calcext:value-type="float">
            <text:p>0,00138055555555556000</text:p>
          </table:table-cell>
          <table:table-cell table:formula="of:=[.D286]-[.D28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2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38541666666667" calcext:value-type="float">
            <text:p>0,00138541666666667000</text:p>
          </table:table-cell>
          <table:table-cell table:formula="of:=[.D287]-[.D28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2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39027777777778" calcext:value-type="float">
            <text:p>0,00139027777777778000</text:p>
          </table:table-cell>
          <table:table-cell table:formula="of:=[.D288]-[.D28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2" office:value-type="float" office:value="12054" calcext:value-type="float">
            <text:p>1205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39513888888889" calcext:value-type="float">
            <text:p>0,00139513888888889000</text:p>
          </table:table-cell>
          <table:table-cell table:formula="of:=[.D289]-[.D28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2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4" calcext:value-type="float">
            <text:p>0,00140000000000000000</text:p>
          </table:table-cell>
          <table:table-cell table:formula="of:=[.D290]-[.D28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2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40486111111111" calcext:value-type="float">
            <text:p>0,00140486111111111000</text:p>
          </table:table-cell>
          <table:table-cell table:formula="of:=[.D291]-[.D29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2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40972222222222" calcext:value-type="float">
            <text:p>0,00140972222222222000</text:p>
          </table:table-cell>
          <table:table-cell table:formula="of:=[.D292]-[.D29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2" office:value-type="float" office:value="12222" calcext:value-type="float">
            <text:p>1222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41458333333333" calcext:value-type="float">
            <text:p>0,00141458333333333000</text:p>
          </table:table-cell>
          <table:table-cell table:formula="of:=[.D293]-[.D29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2" office:value-type="float" office:value="12264" calcext:value-type="float">
            <text:p>1226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41944444444444" calcext:value-type="float">
            <text:p>0,00141944444444444000</text:p>
          </table:table-cell>
          <table:table-cell table:formula="of:=[.D294]-[.D29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2" office:value-type="float" office:value="12306" calcext:value-type="float">
            <text:p>1230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42430555555556" calcext:value-type="float">
            <text:p>0,00142430555555556000</text:p>
          </table:table-cell>
          <table:table-cell table:formula="of:=[.D295]-[.D29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2" office:value-type="float" office:value="12348" calcext:value-type="float">
            <text:p>1234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42916666666667" calcext:value-type="float">
            <text:p>0,00142916666666667000</text:p>
          </table:table-cell>
          <table:table-cell table:formula="of:=[.D296]-[.D29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2" office:value-type="float" office:value="12390" calcext:value-type="float">
            <text:p>1239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43402777777778" calcext:value-type="float">
            <text:p>0,00143402777777778000</text:p>
          </table:table-cell>
          <table:table-cell table:formula="of:=[.D297]-[.D29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2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43888888888889" calcext:value-type="float">
            <text:p>0,00143888888888889000</text:p>
          </table:table-cell>
          <table:table-cell table:formula="of:=[.D298]-[.D29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2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44375" calcext:value-type="float">
            <text:p>0,00144375000000000000</text:p>
          </table:table-cell>
          <table:table-cell table:formula="of:=[.D299]-[.D29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2" office:value-type="float" office:value="12516" calcext:value-type="float">
            <text:p>1251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44861111111111" calcext:value-type="float">
            <text:p>0,00144861111111111000</text:p>
          </table:table-cell>
          <table:table-cell table:formula="of:=[.D300]-[.D29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2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45347222222222" calcext:value-type="float">
            <text:p>0,00145347222222222000</text:p>
          </table:table-cell>
          <table:table-cell table:formula="of:=[.D301]-[.D30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2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45833333333333" calcext:value-type="float">
            <text:p>0,00145833333333333000</text:p>
          </table:table-cell>
          <table:table-cell table:formula="of:=[.D302]-[.D30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2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46319444444444" calcext:value-type="float">
            <text:p>0,00146319444444444000</text:p>
          </table:table-cell>
          <table:table-cell table:formula="of:=[.D303]-[.D30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2" office:value-type="float" office:value="12684" calcext:value-type="float">
            <text:p>1268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46805555555556" calcext:value-type="float">
            <text:p>0,00146805555555556000</text:p>
          </table:table-cell>
          <table:table-cell table:formula="of:=[.D304]-[.D30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2" office:value-type="float" office:value="12726" calcext:value-type="float">
            <text:p>1272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47291666666667" calcext:value-type="float">
            <text:p>0,00147291666666667000</text:p>
          </table:table-cell>
          <table:table-cell table:formula="of:=[.D305]-[.D30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2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47777777777778" calcext:value-type="float">
            <text:p>0,00147777777777778000</text:p>
          </table:table-cell>
          <table:table-cell table:formula="of:=[.D306]-[.D30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2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48263888888889" calcext:value-type="float">
            <text:p>0,00148263888888889000</text:p>
          </table:table-cell>
          <table:table-cell table:formula="of:=[.D307]-[.D30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2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4875" calcext:value-type="float">
            <text:p>0,00148750000000000000</text:p>
          </table:table-cell>
          <table:table-cell table:formula="of:=[.D308]-[.D30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2" office:value-type="float" office:value="12894" calcext:value-type="float">
            <text:p>1289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49236111111111" calcext:value-type="float">
            <text:p>0,00149236111111111000</text:p>
          </table:table-cell>
          <table:table-cell table:formula="of:=[.D309]-[.D30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2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49722222222222" calcext:value-type="float">
            <text:p>0,00149722222222222000</text:p>
          </table:table-cell>
          <table:table-cell table:formula="of:=[.D310]-[.D30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2" office:value-type="float" office:value="12978" calcext:value-type="float">
            <text:p>1297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50208333333333" calcext:value-type="float">
            <text:p>0,00150208333333333000</text:p>
          </table:table-cell>
          <table:table-cell table:formula="of:=[.D311]-[.D31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2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50694444444444" calcext:value-type="float">
            <text:p>0,00150694444444444000</text:p>
          </table:table-cell>
          <table:table-cell table:formula="of:=[.D312]-[.D31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2" office:value-type="float" office:value="13062" calcext:value-type="float">
            <text:p>1306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51180555555556" calcext:value-type="float">
            <text:p>0,00151180555555556000</text:p>
          </table:table-cell>
          <table:table-cell table:formula="of:=[.D313]-[.D31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2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51666666666667" calcext:value-type="float">
            <text:p>0,00151666666666667000</text:p>
          </table:table-cell>
          <table:table-cell table:formula="of:=[.D314]-[.D31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2" office:value-type="float" office:value="13146" calcext:value-type="float">
            <text:p>1314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52152777777778" calcext:value-type="float">
            <text:p>0,00152152777777778000</text:p>
          </table:table-cell>
          <table:table-cell table:formula="of:=[.D315]-[.D31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2" office:value-type="float" office:value="13188" calcext:value-type="float">
            <text:p>1318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52638888888889" calcext:value-type="float">
            <text:p>0,00152638888888889000</text:p>
          </table:table-cell>
          <table:table-cell table:formula="of:=[.D316]-[.D31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2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53125" calcext:value-type="float">
            <text:p>0,00153125000000000000</text:p>
          </table:table-cell>
          <table:table-cell table:formula="of:=[.D317]-[.D31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2" office:value-type="float" office:value="13272" calcext:value-type="float">
            <text:p>1327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53611111111111" calcext:value-type="float">
            <text:p>0,00153611111111111000</text:p>
          </table:table-cell>
          <table:table-cell table:formula="of:=[.D318]-[.D31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2" office:value-type="float" office:value="13314" calcext:value-type="float">
            <text:p>1331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54097222222222" calcext:value-type="float">
            <text:p>0,00154097222222222000</text:p>
          </table:table-cell>
          <table:table-cell table:formula="of:=[.D319]-[.D31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2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54583333333333" calcext:value-type="float">
            <text:p>0,00154583333333333000</text:p>
          </table:table-cell>
          <table:table-cell table:formula="of:=[.D320]-[.D31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2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55069444444444" calcext:value-type="float">
            <text:p>0,00155069444444444000</text:p>
          </table:table-cell>
          <table:table-cell table:formula="of:=[.D321]-[.D32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2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55555555555556" calcext:value-type="float">
            <text:p>0,00155555555555556000</text:p>
          </table:table-cell>
          <table:table-cell table:formula="of:=[.D322]-[.D32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2" office:value-type="float" office:value="13482" calcext:value-type="float">
            <text:p>1348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56041666666667" calcext:value-type="float">
            <text:p>0,00156041666666667000</text:p>
          </table:table-cell>
          <table:table-cell table:formula="of:=[.D323]-[.D32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2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56527777777778" calcext:value-type="float">
            <text:p>0,00156527777777778000</text:p>
          </table:table-cell>
          <table:table-cell table:formula="of:=[.D324]-[.D32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2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57013888888889" calcext:value-type="float">
            <text:p>0,00157013888888889000</text:p>
          </table:table-cell>
          <table:table-cell table:formula="of:=[.D325]-[.D32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2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575" calcext:value-type="float">
            <text:p>0,00157500000000000000</text:p>
          </table:table-cell>
          <table:table-cell table:formula="of:=[.D326]-[.D32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2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57986111111111" calcext:value-type="float">
            <text:p>0,00157986111111111000</text:p>
          </table:table-cell>
          <table:table-cell table:formula="of:=[.D327]-[.D32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2" office:value-type="float" office:value="13692" calcext:value-type="float">
            <text:p>1369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58472222222222" calcext:value-type="float">
            <text:p>0,00158472222222222000</text:p>
          </table:table-cell>
          <table:table-cell table:formula="of:=[.D328]-[.D32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2" office:value-type="float" office:value="13734" calcext:value-type="float">
            <text:p>1373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58958333333333" calcext:value-type="float">
            <text:p>0,00158958333333333000</text:p>
          </table:table-cell>
          <table:table-cell table:formula="of:=[.D329]-[.D32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2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59444444444444" calcext:value-type="float">
            <text:p>0,00159444444444444000</text:p>
          </table:table-cell>
          <table:table-cell table:formula="of:=[.D330]-[.D32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2" office:value-type="float" office:value="13818" calcext:value-type="float">
            <text:p>1381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59930555555556" calcext:value-type="float">
            <text:p>0,00159930555555556000</text:p>
          </table:table-cell>
          <table:table-cell table:formula="of:=[.D331]-[.D33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2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60416666666667" calcext:value-type="float">
            <text:p>0,00160416666666667000</text:p>
          </table:table-cell>
          <table:table-cell table:formula="of:=[.D332]-[.D33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2" office:value-type="float" office:value="13902" calcext:value-type="float">
            <text:p>1390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60902777777778" calcext:value-type="float">
            <text:p>0,00160902777777778000</text:p>
          </table:table-cell>
          <table:table-cell table:formula="of:=[.D333]-[.D33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2" office:value-type="float" office:value="13944" calcext:value-type="float">
            <text:p>1394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61388888888889" calcext:value-type="float">
            <text:p>0,00161388888888889000</text:p>
          </table:table-cell>
          <table:table-cell table:formula="of:=[.D334]-[.D33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2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61875" calcext:value-type="float">
            <text:p>0,00161875000000000000</text:p>
          </table:table-cell>
          <table:table-cell table:formula="of:=[.D335]-[.D33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2" office:value-type="float" office:value="14028" calcext:value-type="float">
            <text:p>1402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62361111111111" calcext:value-type="float">
            <text:p>0,00162361111111111000</text:p>
          </table:table-cell>
          <table:table-cell table:formula="of:=[.D336]-[.D33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2" office:value-type="float" office:value="14070" calcext:value-type="float">
            <text:p>1407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62847222222222" calcext:value-type="float">
            <text:p>0,00162847222222222000</text:p>
          </table:table-cell>
          <table:table-cell table:formula="of:=[.D337]-[.D33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2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63333333333333" calcext:value-type="float">
            <text:p>0,00163333333333333000</text:p>
          </table:table-cell>
          <table:table-cell table:formula="of:=[.D338]-[.D33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2" office:value-type="float" office:value="14154" calcext:value-type="float">
            <text:p>14154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63819444444444" calcext:value-type="float">
            <text:p>0,00163819444444444000</text:p>
          </table:table-cell>
          <table:table-cell table:formula="of:=[.D339]-[.D33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2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64305555555556" calcext:value-type="float">
            <text:p>0,00164305555555556000</text:p>
          </table:table-cell>
          <table:table-cell table:formula="of:=[.D340]-[.D33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2" office:value-type="float" office:value="14238" calcext:value-type="float">
            <text:p>14238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64791666666667" calcext:value-type="float">
            <text:p>0,00164791666666667000</text:p>
          </table:table-cell>
          <table:table-cell table:formula="of:=[.D341]-[.D34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2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65277777777778" calcext:value-type="float">
            <text:p>0,00165277777777778000</text:p>
          </table:table-cell>
          <table:table-cell table:formula="of:=[.D342]-[.D34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2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65763888888889" calcext:value-type="float">
            <text:p>0,00165763888888889000</text:p>
          </table:table-cell>
          <table:table-cell table:formula="of:=[.D343]-[.D34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2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6625" calcext:value-type="float">
            <text:p>0,00166250000000000000</text:p>
          </table:table-cell>
          <table:table-cell table:formula="of:=[.D344]-[.D34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2" office:value-type="float" office:value="14406" calcext:value-type="float">
            <text:p>14406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66736111111111" calcext:value-type="float">
            <text:p>0,00166736111111111000</text:p>
          </table:table-cell>
          <table:table-cell table:formula="of:=[.D345]-[.D34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2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67222222222222" calcext:value-type="float">
            <text:p>0,00167222222222222000</text:p>
          </table:table-cell>
          <table:table-cell table:formula="of:=[.D346]-[.D34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2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67708333333333" calcext:value-type="float">
            <text:p>0,00167708333333333000</text:p>
          </table:table-cell>
          <table:table-cell table:formula="of:=[.D347]-[.D34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2" office:value-type="float" office:value="14532" calcext:value-type="float">
            <text:p>1453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68194444444444" calcext:value-type="float">
            <text:p>0,00168194444444444000</text:p>
          </table:table-cell>
          <table:table-cell table:formula="of:=[.D348]-[.D34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2" office:value-type="float" office:value="14574" calcext:value-type="float">
            <text:p>14574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68680555555556" calcext:value-type="float">
            <text:p>0,00168680555555556000</text:p>
          </table:table-cell>
          <table:table-cell table:formula="of:=[.D349]-[.D34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2" office:value-type="float" office:value="14616" calcext:value-type="float">
            <text:p>1461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69166666666667" calcext:value-type="float">
            <text:p>0,00169166666666667000</text:p>
          </table:table-cell>
          <table:table-cell table:formula="of:=[.D350]-[.D34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2" office:value-type="float" office:value="14658" calcext:value-type="float">
            <text:p>14658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69652777777778" calcext:value-type="float">
            <text:p>0,00169652777777778000</text:p>
          </table:table-cell>
          <table:table-cell table:formula="of:=[.D351]-[.D35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2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70138888888889" calcext:value-type="float">
            <text:p>0,00170138888888889000</text:p>
          </table:table-cell>
          <table:table-cell table:formula="of:=[.D352]-[.D35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2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70625" calcext:value-type="float">
            <text:p>0,00170625000000000000</text:p>
          </table:table-cell>
          <table:table-cell table:formula="of:=[.D353]-[.D35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2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71111111111111" calcext:value-type="float">
            <text:p>0,00171111111111111000</text:p>
          </table:table-cell>
          <table:table-cell table:formula="of:=[.D354]-[.D35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2" office:value-type="float" office:value="14826" calcext:value-type="float">
            <text:p>14826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71597222222222" calcext:value-type="float">
            <text:p>0,00171597222222222000</text:p>
          </table:table-cell>
          <table:table-cell table:formula="of:=[.D355]-[.D35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2" office:value-type="float" office:value="14868" calcext:value-type="float">
            <text:p>1486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72083333333333" calcext:value-type="float">
            <text:p>0,00172083333333333000</text:p>
          </table:table-cell>
          <table:table-cell table:formula="of:=[.D356]-[.D35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2" office:value-type="float" office:value="14910" calcext:value-type="float">
            <text:p>1491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72569444444444" calcext:value-type="float">
            <text:p>0,00172569444444444000</text:p>
          </table:table-cell>
          <table:table-cell table:formula="of:=[.D357]-[.D35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2" office:value-type="float" office:value="14952" calcext:value-type="float">
            <text:p>1495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73055555555556" calcext:value-type="float">
            <text:p>0,00173055555555556000</text:p>
          </table:table-cell>
          <table:table-cell table:formula="of:=[.D358]-[.D35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2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73541666666667" calcext:value-type="float">
            <text:p>0,00173541666666667000</text:p>
          </table:table-cell>
          <table:table-cell table:formula="of:=[.D359]-[.D35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2" office:value-type="float" office:value="15036" calcext:value-type="float">
            <text:p>1503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74027777777778" calcext:value-type="float">
            <text:p>0,00174027777777778000</text:p>
          </table:table-cell>
          <table:table-cell table:formula="of:=[.D360]-[.D35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2" office:value-type="float" office:value="15078" calcext:value-type="float">
            <text:p>15078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74513888888889" calcext:value-type="float">
            <text:p>0,00174513888888889000</text:p>
          </table:table-cell>
          <table:table-cell table:formula="of:=[.D361]-[.D36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2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75" calcext:value-type="float">
            <text:p>0,00175000000000000000</text:p>
          </table:table-cell>
          <table:table-cell table:formula="of:=[.D362]-[.D36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2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75486111111111" calcext:value-type="float">
            <text:p>0,00175486111111111000</text:p>
          </table:table-cell>
          <table:table-cell table:formula="of:=[.D363]-[.D36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2" office:value-type="float" office:value="15204" calcext:value-type="float">
            <text:p>1520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75972222222222" calcext:value-type="float">
            <text:p>0,00175972222222222000</text:p>
          </table:table-cell>
          <table:table-cell table:formula="of:=[.D364]-[.D36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2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76458333333333" calcext:value-type="float">
            <text:p>0,00176458333333333000</text:p>
          </table:table-cell>
          <table:table-cell table:formula="of:=[.D365]-[.D36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2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76944444444444" calcext:value-type="float">
            <text:p>0,00176944444444444000</text:p>
          </table:table-cell>
          <table:table-cell table:formula="of:=[.D366]-[.D36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2" office:value-type="float" office:value="15330" calcext:value-type="float">
            <text:p>1533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77430555555556" calcext:value-type="float">
            <text:p>0,00177430555555556000</text:p>
          </table:table-cell>
          <table:table-cell table:formula="of:=[.D367]-[.D36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2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77916666666667" calcext:value-type="float">
            <text:p>0,00177916666666667000</text:p>
          </table:table-cell>
          <table:table-cell table:formula="of:=[.D368]-[.D36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2" office:value-type="float" office:value="15414" calcext:value-type="float">
            <text:p>15414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78402777777778" calcext:value-type="float">
            <text:p>0,00178402777777778000</text:p>
          </table:table-cell>
          <table:table-cell table:formula="of:=[.D369]-[.D36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2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78888888888889" calcext:value-type="float">
            <text:p>0,00178888888888889000</text:p>
          </table:table-cell>
          <table:table-cell table:formula="of:=[.D370]-[.D36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2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79375" calcext:value-type="float">
            <text:p>0,00179375000000000000</text:p>
          </table:table-cell>
          <table:table-cell table:formula="of:=[.D371]-[.D37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2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79861111111111" calcext:value-type="float">
            <text:p>0,00179861111111111000</text:p>
          </table:table-cell>
          <table:table-cell table:formula="of:=[.D372]-[.D37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2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80347222222222" calcext:value-type="float">
            <text:p>0,00180347222222222000</text:p>
          </table:table-cell>
          <table:table-cell table:formula="of:=[.D373]-[.D37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2" office:value-type="float" office:value="15624" calcext:value-type="float">
            <text:p>1562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80833333333333" calcext:value-type="float">
            <text:p>0,00180833333333333000</text:p>
          </table:table-cell>
          <table:table-cell table:formula="of:=[.D374]-[.D37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2" office:value-type="float" office:value="15666" calcext:value-type="float">
            <text:p>15666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81319444444444" calcext:value-type="float">
            <text:p>0,00181319444444444000</text:p>
          </table:table-cell>
          <table:table-cell table:formula="of:=[.D375]-[.D37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2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81805555555556" calcext:value-type="float">
            <text:p>0,00181805555555556000</text:p>
          </table:table-cell>
          <table:table-cell table:formula="of:=[.D376]-[.D37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2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82291666666667" calcext:value-type="float">
            <text:p>0,00182291666666667000</text:p>
          </table:table-cell>
          <table:table-cell table:formula="of:=[.D377]-[.D37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2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82777777777778" calcext:value-type="float">
            <text:p>0,00182777777777778000</text:p>
          </table:table-cell>
          <table:table-cell table:formula="of:=[.D378]-[.D37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2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83263888888889" calcext:value-type="float">
            <text:p>0,00183263888888889000</text:p>
          </table:table-cell>
          <table:table-cell table:formula="of:=[.D379]-[.D37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2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8375" calcext:value-type="float">
            <text:p>0,00183750000000000000</text:p>
          </table:table-cell>
          <table:table-cell table:formula="of:=[.D380]-[.D37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2" office:value-type="float" office:value="15918" calcext:value-type="float">
            <text:p>15918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84236111111111" calcext:value-type="float">
            <text:p>0,00184236111111111000</text:p>
          </table:table-cell>
          <table:table-cell table:formula="of:=[.D381]-[.D38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2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84722222222222" calcext:value-type="float">
            <text:p>0,00184722222222222000</text:p>
          </table:table-cell>
          <table:table-cell table:formula="of:=[.D382]-[.D38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2" office:value-type="float" office:value="16002" calcext:value-type="float">
            <text:p>16002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85208333333333" calcext:value-type="float">
            <text:p>0,00185208333333333000</text:p>
          </table:table-cell>
          <table:table-cell table:formula="of:=[.D383]-[.D38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2" office:value-type="float" office:value="16044" calcext:value-type="float">
            <text:p>1604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85694444444444" calcext:value-type="float">
            <text:p>0,00185694444444444000</text:p>
          </table:table-cell>
          <table:table-cell table:formula="of:=[.D384]-[.D38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2" office:value-type="float" office:value="16086" calcext:value-type="float">
            <text:p>16086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86180555555556" calcext:value-type="float">
            <text:p>0,00186180555555556000</text:p>
          </table:table-cell>
          <table:table-cell table:formula="of:=[.D385]-[.D38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2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86666666666667" calcext:value-type="float">
            <text:p>0,00186666666666667000</text:p>
          </table:table-cell>
          <table:table-cell table:formula="of:=[.D386]-[.D385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2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87152777777778" calcext:value-type="float">
            <text:p>0,00187152777777778000</text:p>
          </table:table-cell>
          <table:table-cell table:formula="of:=[.D387]-[.D38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2" office:value-type="float" office:value="16212" calcext:value-type="float">
            <text:p>1621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87638888888889" calcext:value-type="float">
            <text:p>0,00187638888888889000</text:p>
          </table:table-cell>
          <table:table-cell table:formula="of:=[.D388]-[.D38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2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88125" calcext:value-type="float">
            <text:p>0,00188125000000000000</text:p>
          </table:table-cell>
          <table:table-cell table:formula="of:=[.D389]-[.D38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2" office:value-type="float" office:value="16296" calcext:value-type="float">
            <text:p>1629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88611111111111" calcext:value-type="float">
            <text:p>0,00188611111111111000</text:p>
          </table:table-cell>
          <table:table-cell table:formula="of:=[.D390]-[.D38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2" office:value-type="float" office:value="16338" calcext:value-type="float">
            <text:p>16338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89097222222222" calcext:value-type="float">
            <text:p>0,00189097222222222000</text:p>
          </table:table-cell>
          <table:table-cell table:formula="of:=[.D391]-[.D39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2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89583333333333" calcext:value-type="float">
            <text:p>0,00189583333333333000</text:p>
          </table:table-cell>
          <table:table-cell table:formula="of:=[.D392]-[.D39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2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90069444444444" calcext:value-type="float">
            <text:p>0,00190069444444444000</text:p>
          </table:table-cell>
          <table:table-cell table:formula="of:=[.D393]-[.D39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2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90555555555556" calcext:value-type="float">
            <text:p>0,00190555555555556000</text:p>
          </table:table-cell>
          <table:table-cell table:formula="of:=[.D394]-[.D393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2" office:value-type="float" office:value="16506" calcext:value-type="float">
            <text:p>16506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91041666666667" calcext:value-type="float">
            <text:p>0,00191041666666667000</text:p>
          </table:table-cell>
          <table:table-cell table:formula="of:=[.D395]-[.D394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2" office:value-type="float" office:value="16548" calcext:value-type="float">
            <text:p>1654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91527777777778" calcext:value-type="float">
            <text:p>0,00191527777777778000</text:p>
          </table:table-cell>
          <table:table-cell table:formula="of:=[.D396]-[.D39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2" office:value-type="float" office:value="16590" calcext:value-type="float">
            <text:p>1659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92013888888889" calcext:value-type="float">
            <text:p>0,00192013888888889000</text:p>
          </table:table-cell>
          <table:table-cell table:formula="of:=[.D397]-[.D396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2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925" calcext:value-type="float">
            <text:p>0,00192500000000000000</text:p>
          </table:table-cell>
          <table:table-cell table:formula="of:=[.D398]-[.D397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2" office:value-type="float" office:value="16674" calcext:value-type="float">
            <text:p>16674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92986111111111" calcext:value-type="float">
            <text:p>0,00192986111111111000</text:p>
          </table:table-cell>
          <table:table-cell table:formula="of:=[.D399]-[.D398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2" office:value-type="float" office:value="16716" calcext:value-type="float">
            <text:p>1671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93472222222222" calcext:value-type="float">
            <text:p>0,00193472222222222000</text:p>
          </table:table-cell>
          <table:table-cell table:formula="of:=[.D400]-[.D399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2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93958333333333" calcext:value-type="float">
            <text:p>0,00193958333333333000</text:p>
          </table:table-cell>
          <table:table-cell table:formula="of:=[.D401]-[.D400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2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94444444444444" calcext:value-type="float">
            <text:p>0,00194444444444444000</text:p>
          </table:table-cell>
          <table:table-cell table:formula="of:=[.D402]-[.D401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2" office:value-type="float" office:value="16842" calcext:value-type="float">
            <text:p>16842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94930555555556" calcext:value-type="float">
            <text:p>0,00194930555555556000</text:p>
          </table:table-cell>
          <table:table-cell table:formula="of:=[.D403]-[.D402]" office:value-type="float" office:value="0.00000486111111111108" calcext:value-type="float">
            <text:p>0,0000048611111111110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2" office:value-type="float" office:value="16884" calcext:value-type="float">
            <text:p>1688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95416666666667" calcext:value-type="float">
            <text:p>0,00195416666666667000</text:p>
          </table:table-cell>
          <table:table-cell table:formula="of:=[.D404]-[.D40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2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95902777777778" calcext:value-type="float">
            <text:p>0,00195902777777778000</text:p>
          </table:table-cell>
          <table:table-cell table:formula="of:=[.D405]-[.D40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2" office:value-type="float" office:value="16968" calcext:value-type="float">
            <text:p>1696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96388888888889" calcext:value-type="float">
            <text:p>0,00196388888888889000</text:p>
          </table:table-cell>
          <table:table-cell table:formula="of:=[.D406]-[.D40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2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96875" calcext:value-type="float">
            <text:p>0,00196875000000000000</text:p>
          </table:table-cell>
          <table:table-cell table:formula="of:=[.D407]-[.D40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2" office:value-type="float" office:value="17052" calcext:value-type="float">
            <text:p>1705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97361111111111" calcext:value-type="float">
            <text:p>0,00197361111111111000</text:p>
          </table:table-cell>
          <table:table-cell table:formula="of:=[.D408]-[.D40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2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97847222222222" calcext:value-type="float">
            <text:p>0,00197847222222222000</text:p>
          </table:table-cell>
          <table:table-cell table:formula="of:=[.D409]-[.D40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2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98333333333333" calcext:value-type="float">
            <text:p>0,00198333333333333000</text:p>
          </table:table-cell>
          <table:table-cell table:formula="of:=[.D410]-[.D40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2" office:value-type="float" office:value="17178" calcext:value-type="float">
            <text:p>17178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98819444444444" calcext:value-type="float">
            <text:p>0,00198819444444444000</text:p>
          </table:table-cell>
          <table:table-cell table:formula="of:=[.D411]-[.D41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2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99305555555556" calcext:value-type="float">
            <text:p>0,00199305555555556000</text:p>
          </table:table-cell>
          <table:table-cell table:formula="of:=[.D412]-[.D41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2" office:value-type="float" office:value="17262" calcext:value-type="float">
            <text:p>17262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99791666666667" calcext:value-type="float">
            <text:p>0,00199791666666667000</text:p>
          </table:table-cell>
          <table:table-cell table:formula="of:=[.D413]-[.D41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2" office:value-type="float" office:value="17304" calcext:value-type="float">
            <text:p>1730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00277777777778" calcext:value-type="float">
            <text:p>0,00200277777777778000</text:p>
          </table:table-cell>
          <table:table-cell table:formula="of:=[.D414]-[.D41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2" office:value-type="float" office:value="17346" calcext:value-type="float">
            <text:p>17346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00763888888889" calcext:value-type="float">
            <text:p>0,00200763888888889000</text:p>
          </table:table-cell>
          <table:table-cell table:formula="of:=[.D415]-[.D41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2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0125" calcext:value-type="float">
            <text:p>0,00201250000000000000</text:p>
          </table:table-cell>
          <table:table-cell table:formula="of:=[.D416]-[.D41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2" office:value-type="float" office:value="17430" calcext:value-type="float">
            <text:p>1743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01736111111111" calcext:value-type="float">
            <text:p>0,00201736111111111000</text:p>
          </table:table-cell>
          <table:table-cell table:formula="of:=[.D417]-[.D416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2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02222222222222" calcext:value-type="float">
            <text:p>0,00202222222222222000</text:p>
          </table:table-cell>
          <table:table-cell table:formula="of:=[.D418]-[.D41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2" office:value-type="float" office:value="17514" calcext:value-type="float">
            <text:p>17514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02708333333333" calcext:value-type="float">
            <text:p>0,00202708333333333000</text:p>
          </table:table-cell>
          <table:table-cell table:formula="of:=[.D419]-[.D41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2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03194444444444" calcext:value-type="float">
            <text:p>0,00203194444444444000</text:p>
          </table:table-cell>
          <table:table-cell table:formula="of:=[.D420]-[.D41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2" office:value-type="float" office:value="17598" calcext:value-type="float">
            <text:p>17598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03680555555556" calcext:value-type="float">
            <text:p>0,00203680555555556000</text:p>
          </table:table-cell>
          <table:table-cell table:formula="of:=[.D421]-[.D420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2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04166666666667" calcext:value-type="float">
            <text:p>0,00204166666666667000</text:p>
          </table:table-cell>
          <table:table-cell table:formula="of:=[.D422]-[.D42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2" office:value-type="float" office:value="17682" calcext:value-type="float">
            <text:p>17682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04652777777778" calcext:value-type="float">
            <text:p>0,00204652777777778000</text:p>
          </table:table-cell>
          <table:table-cell table:formula="of:=[.D423]-[.D42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2" office:value-type="float" office:value="17724" calcext:value-type="float">
            <text:p>1772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05138888888889" calcext:value-type="float">
            <text:p>0,00205138888888889000</text:p>
          </table:table-cell>
          <table:table-cell table:formula="of:=[.D424]-[.D423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2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05625" calcext:value-type="float">
            <text:p>0,00205625000000000000</text:p>
          </table:table-cell>
          <table:table-cell table:formula="of:=[.D425]-[.D42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2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06111111111111" calcext:value-type="float">
            <text:p>0,00206111111111111000</text:p>
          </table:table-cell>
          <table:table-cell table:formula="of:=[.D426]-[.D42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2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06597222222222" calcext:value-type="float">
            <text:p>0,00206597222222222000</text:p>
          </table:table-cell>
          <table:table-cell table:formula="of:=[.D427]-[.D42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2" office:value-type="float" office:value="17892" calcext:value-type="float">
            <text:p>1789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07083333333333" calcext:value-type="float">
            <text:p>0,00207083333333333000</text:p>
          </table:table-cell>
          <table:table-cell table:formula="of:=[.D428]-[.D42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2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07569444444444" calcext:value-type="float">
            <text:p>0,00207569444444444000</text:p>
          </table:table-cell>
          <table:table-cell table:formula="of:=[.D429]-[.D42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2" office:value-type="float" office:value="17976" calcext:value-type="float">
            <text:p>1797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08055555555556" calcext:value-type="float">
            <text:p>0,00208055555555556000</text:p>
          </table:table-cell>
          <table:table-cell table:formula="of:=[.D430]-[.D42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2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08541666666667" calcext:value-type="float">
            <text:p>0,00208541666666667000</text:p>
          </table:table-cell>
          <table:table-cell table:formula="of:=[.D431]-[.D430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2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09027777777778" calcext:value-type="float">
            <text:p>0,00209027777777778000</text:p>
          </table:table-cell>
          <table:table-cell table:formula="of:=[.D432]-[.D43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2" office:value-type="float" office:value="18102" calcext:value-type="float">
            <text:p>18102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09513888888889" calcext:value-type="float">
            <text:p>0,00209513888888889000</text:p>
          </table:table-cell>
          <table:table-cell table:formula="of:=[.D433]-[.D43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2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1" calcext:value-type="float">
            <text:p>0,00210000000000000000</text:p>
          </table:table-cell>
          <table:table-cell table:formula="of:=[.D434]-[.D43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2" office:value-type="float" office:value="18186" calcext:value-type="float">
            <text:p>18186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10486111111111" calcext:value-type="float">
            <text:p>0,00210486111111111000</text:p>
          </table:table-cell>
          <table:table-cell table:formula="of:=[.D435]-[.D43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2" office:value-type="float" office:value="18228" calcext:value-type="float">
            <text:p>1822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10972222222222" calcext:value-type="float">
            <text:p>0,00210972222222222000</text:p>
          </table:table-cell>
          <table:table-cell table:formula="of:=[.D436]-[.D43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2" office:value-type="float" office:value="18270" calcext:value-type="float">
            <text:p>1827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11458333333333" calcext:value-type="float">
            <text:p>0,00211458333333333000</text:p>
          </table:table-cell>
          <table:table-cell table:formula="of:=[.D437]-[.D43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2" office:value-type="float" office:value="18312" calcext:value-type="float">
            <text:p>1831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11944444444444" calcext:value-type="float">
            <text:p>0,00211944444444444000</text:p>
          </table:table-cell>
          <table:table-cell table:formula="of:=[.D438]-[.D43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2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12430555555556" calcext:value-type="float">
            <text:p>0,00212430555555556000</text:p>
          </table:table-cell>
          <table:table-cell table:formula="of:=[.D439]-[.D43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2" office:value-type="float" office:value="18396" calcext:value-type="float">
            <text:p>1839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12916666666667" calcext:value-type="float">
            <text:p>0,00212916666666667000</text:p>
          </table:table-cell>
          <table:table-cell table:formula="of:=[.D440]-[.D43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2" office:value-type="float" office:value="18438" calcext:value-type="float">
            <text:p>18438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13402777777778" calcext:value-type="float">
            <text:p>0,00213402777777778000</text:p>
          </table:table-cell>
          <table:table-cell table:formula="of:=[.D441]-[.D44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2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13888888888889" calcext:value-type="float">
            <text:p>0,00213888888888889000</text:p>
          </table:table-cell>
          <table:table-cell table:formula="of:=[.D442]-[.D44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2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14375" calcext:value-type="float">
            <text:p>0,00214375000000000000</text:p>
          </table:table-cell>
          <table:table-cell table:formula="of:=[.D443]-[.D44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2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14861111111111" calcext:value-type="float">
            <text:p>0,00214861111111111000</text:p>
          </table:table-cell>
          <table:table-cell table:formula="of:=[.D444]-[.D44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2" office:value-type="float" office:value="18606" calcext:value-type="float">
            <text:p>18606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15347222222222" calcext:value-type="float">
            <text:p>0,00215347222222222000</text:p>
          </table:table-cell>
          <table:table-cell table:formula="of:=[.D445]-[.D44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2" office:value-type="float" office:value="18648" calcext:value-type="float">
            <text:p>1864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15833333333333" calcext:value-type="float">
            <text:p>0,00215833333333333000</text:p>
          </table:table-cell>
          <table:table-cell table:formula="of:=[.D446]-[.D44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2" office:value-type="float" office:value="18690" calcext:value-type="float">
            <text:p>1869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16319444444444" calcext:value-type="float">
            <text:p>0,00216319444444444000</text:p>
          </table:table-cell>
          <table:table-cell table:formula="of:=[.D447]-[.D446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2" office:value-type="float" office:value="18732" calcext:value-type="float">
            <text:p>1873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16805555555556" calcext:value-type="float">
            <text:p>0,00216805555555556000</text:p>
          </table:table-cell>
          <table:table-cell table:formula="of:=[.D448]-[.D44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2" office:value-type="float" office:value="18774" calcext:value-type="float">
            <text:p>18774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17291666666667" calcext:value-type="float">
            <text:p>0,00217291666666667000</text:p>
          </table:table-cell>
          <table:table-cell table:formula="of:=[.D449]-[.D44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2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17777777777778" calcext:value-type="float">
            <text:p>0,00217777777777778000</text:p>
          </table:table-cell>
          <table:table-cell table:formula="of:=[.D450]-[.D44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2" office:value-type="float" office:value="18858" calcext:value-type="float">
            <text:p>18858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18263888888889" calcext:value-type="float">
            <text:p>0,00218263888888889000</text:p>
          </table:table-cell>
          <table:table-cell table:formula="of:=[.D451]-[.D45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2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1875" calcext:value-type="float">
            <text:p>0,00218750000000000000</text:p>
          </table:table-cell>
          <table:table-cell table:formula="of:=[.D452]-[.D45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2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19236111111111" calcext:value-type="float">
            <text:p>0,00219236111111111000</text:p>
          </table:table-cell>
          <table:table-cell table:formula="of:=[.D453]-[.D45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2" office:value-type="float" office:value="18984" calcext:value-type="float">
            <text:p>1898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19722222222222" calcext:value-type="float">
            <text:p>0,00219722222222222000</text:p>
          </table:table-cell>
          <table:table-cell table:formula="of:=[.D454]-[.D453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2" office:value-type="float" office:value="19026" calcext:value-type="float">
            <text:p>19026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20208333333333" calcext:value-type="float">
            <text:p>0,00220208333333333000</text:p>
          </table:table-cell>
          <table:table-cell table:formula="of:=[.D455]-[.D45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2" office:value-type="float" office:value="19068" calcext:value-type="float">
            <text:p>1906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20694444444444" calcext:value-type="float">
            <text:p>0,00220694444444444000</text:p>
          </table:table-cell>
          <table:table-cell table:formula="of:=[.D456]-[.D45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2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21180555555556" calcext:value-type="float">
            <text:p>0,00221180555555556000</text:p>
          </table:table-cell>
          <table:table-cell table:formula="of:=[.D457]-[.D45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2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21666666666667" calcext:value-type="float">
            <text:p>0,00221666666666667000</text:p>
          </table:table-cell>
          <table:table-cell table:formula="of:=[.D458]-[.D45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2" office:value-type="float" office:value="19194" calcext:value-type="float">
            <text:p>19194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22152777777778" calcext:value-type="float">
            <text:p>0,00222152777777778000</text:p>
          </table:table-cell>
          <table:table-cell table:formula="of:=[.D459]-[.D45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2" office:value-type="float" office:value="19236" calcext:value-type="float">
            <text:p>1923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22638888888889" calcext:value-type="float">
            <text:p>0,00222638888888889000</text:p>
          </table:table-cell>
          <table:table-cell table:formula="of:=[.D460]-[.D45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2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23125" calcext:value-type="float">
            <text:p>0,00223125000000000000</text:p>
          </table:table-cell>
          <table:table-cell table:formula="of:=[.D461]-[.D460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2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23611111111111" calcext:value-type="float">
            <text:p>0,00223611111111111000</text:p>
          </table:table-cell>
          <table:table-cell table:formula="of:=[.D462]-[.D46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2" office:value-type="float" office:value="19362" calcext:value-type="float">
            <text:p>19362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24097222222222" calcext:value-type="float">
            <text:p>0,00224097222222222000</text:p>
          </table:table-cell>
          <table:table-cell table:formula="of:=[.D463]-[.D46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2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24583333333333" calcext:value-type="float">
            <text:p>0,00224583333333333000</text:p>
          </table:table-cell>
          <table:table-cell table:formula="of:=[.D464]-[.D46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2" office:value-type="float" office:value="19446" calcext:value-type="float">
            <text:p>19446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25069444444444" calcext:value-type="float">
            <text:p>0,00225069444444444000</text:p>
          </table:table-cell>
          <table:table-cell table:formula="of:=[.D465]-[.D46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2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25555555555556" calcext:value-type="float">
            <text:p>0,00225555555555556000</text:p>
          </table:table-cell>
          <table:table-cell table:formula="of:=[.D466]-[.D46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2" office:value-type="float" office:value="19530" calcext:value-type="float">
            <text:p>1953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26041666666667" calcext:value-type="float">
            <text:p>0,00226041666666667000</text:p>
          </table:table-cell>
          <table:table-cell table:formula="of:=[.D467]-[.D46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2" office:value-type="float" office:value="19572" calcext:value-type="float">
            <text:p>19572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26527777777778" calcext:value-type="float">
            <text:p>0,00226527777777778000</text:p>
          </table:table-cell>
          <table:table-cell table:formula="of:=[.D468]-[.D46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2" office:value-type="float" office:value="19614" calcext:value-type="float">
            <text:p>19614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27013888888889" calcext:value-type="float">
            <text:p>0,00227013888888889000</text:p>
          </table:table-cell>
          <table:table-cell table:formula="of:=[.D469]-[.D46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2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275" calcext:value-type="float">
            <text:p>0,00227500000000000000</text:p>
          </table:table-cell>
          <table:table-cell table:formula="of:=[.D470]-[.D46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2" office:value-type="float" office:value="19698" calcext:value-type="float">
            <text:p>19698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27986111111111" calcext:value-type="float">
            <text:p>0,00227986111111111000</text:p>
          </table:table-cell>
          <table:table-cell table:formula="of:=[.D471]-[.D47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2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28472222222222" calcext:value-type="float">
            <text:p>0,00228472222222222000</text:p>
          </table:table-cell>
          <table:table-cell table:formula="of:=[.D472]-[.D47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2" office:value-type="float" office:value="19782" calcext:value-type="float">
            <text:p>19782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28958333333333" calcext:value-type="float">
            <text:p>0,00228958333333333000</text:p>
          </table:table-cell>
          <table:table-cell table:formula="of:=[.D473]-[.D47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2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29444444444444" calcext:value-type="float">
            <text:p>0,00229444444444444000</text:p>
          </table:table-cell>
          <table:table-cell table:formula="of:=[.D474]-[.D47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2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29930555555556" calcext:value-type="float">
            <text:p>0,00229930555555556000</text:p>
          </table:table-cell>
          <table:table-cell table:formula="of:=[.D475]-[.D47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2" office:value-type="float" office:value="19908" calcext:value-type="float">
            <text:p>19908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30416666666667" calcext:value-type="float">
            <text:p>0,00230416666666667000</text:p>
          </table:table-cell>
          <table:table-cell table:formula="of:=[.D476]-[.D47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2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30902777777778" calcext:value-type="float">
            <text:p>0,00230902777777778000</text:p>
          </table:table-cell>
          <table:table-cell table:formula="of:=[.D477]-[.D476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2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31388888888889" calcext:value-type="float">
            <text:p>0,00231388888888889000</text:p>
          </table:table-cell>
          <table:table-cell table:formula="of:=[.D478]-[.D47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2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31875" calcext:value-type="float">
            <text:p>0,00231875000000000000</text:p>
          </table:table-cell>
          <table:table-cell table:formula="of:=[.D479]-[.D47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2" office:value-type="float" office:value="20076" calcext:value-type="float">
            <text:p>20076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32361111111111" calcext:value-type="float">
            <text:p>0,00232361111111111000</text:p>
          </table:table-cell>
          <table:table-cell table:formula="of:=[.D480]-[.D47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2" office:value-type="float" office:value="20118" calcext:value-type="float">
            <text:p>20118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32847222222222" calcext:value-type="float">
            <text:p>0,00232847222222222000</text:p>
          </table:table-cell>
          <table:table-cell table:formula="of:=[.D481]-[.D48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2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33333333333333" calcext:value-type="float">
            <text:p>0,00233333333333333000</text:p>
          </table:table-cell>
          <table:table-cell table:formula="of:=[.D482]-[.D48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2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33819444444444" calcext:value-type="float">
            <text:p>0,00233819444444444000</text:p>
          </table:table-cell>
          <table:table-cell table:formula="of:=[.D483]-[.D48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2" office:value-type="float" office:value="20244" calcext:value-type="float">
            <text:p>20244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34305555555556" calcext:value-type="float">
            <text:p>0,00234305555555556000</text:p>
          </table:table-cell>
          <table:table-cell table:formula="of:=[.D484]-[.D483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2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34791666666667" calcext:value-type="float">
            <text:p>0,00234791666666667000</text:p>
          </table:table-cell>
          <table:table-cell table:formula="of:=[.D485]-[.D48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2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35277777777778" calcext:value-type="float">
            <text:p>0,00235277777777778000</text:p>
          </table:table-cell>
          <table:table-cell table:formula="of:=[.D486]-[.D48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2" office:value-type="float" office:value="20370" calcext:value-type="float">
            <text:p>2037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35763888888889" calcext:value-type="float">
            <text:p>0,00235763888888889000</text:p>
          </table:table-cell>
          <table:table-cell table:formula="of:=[.D487]-[.D48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2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3625" calcext:value-type="float">
            <text:p>0,00236250000000000000</text:p>
          </table:table-cell>
          <table:table-cell table:formula="of:=[.D488]-[.D48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2" office:value-type="float" office:value="20454" calcext:value-type="float">
            <text:p>20454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36736111111111" calcext:value-type="float">
            <text:p>0,00236736111111111000</text:p>
          </table:table-cell>
          <table:table-cell table:formula="of:=[.D489]-[.D48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2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37222222222222" calcext:value-type="float">
            <text:p>0,00237222222222222000</text:p>
          </table:table-cell>
          <table:table-cell table:formula="of:=[.D490]-[.D48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2" office:value-type="float" office:value="20538" calcext:value-type="float">
            <text:p>20538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37708333333333" calcext:value-type="float">
            <text:p>0,00237708333333333000</text:p>
          </table:table-cell>
          <table:table-cell table:formula="of:=[.D491]-[.D490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2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38194444444444" calcext:value-type="float">
            <text:p>0,00238194444444444000</text:p>
          </table:table-cell>
          <table:table-cell table:formula="of:=[.D492]-[.D49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2" office:value-type="float" office:value="20622" calcext:value-type="float">
            <text:p>20622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38680555555556" calcext:value-type="float">
            <text:p>0,00238680555555556000</text:p>
          </table:table-cell>
          <table:table-cell table:formula="of:=[.D493]-[.D49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2" office:value-type="float" office:value="20664" calcext:value-type="float">
            <text:p>20664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39166666666667" calcext:value-type="float">
            <text:p>0,00239166666666667000</text:p>
          </table:table-cell>
          <table:table-cell table:formula="of:=[.D494]-[.D49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2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39652777777778" calcext:value-type="float">
            <text:p>0,00239652777777778000</text:p>
          </table:table-cell>
          <table:table-cell table:formula="of:=[.D495]-[.D49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2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40138888888889" calcext:value-type="float">
            <text:p>0,00240138888888889000</text:p>
          </table:table-cell>
          <table:table-cell table:formula="of:=[.D496]-[.D49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2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40625" calcext:value-type="float">
            <text:p>0,00240625000000000000</text:p>
          </table:table-cell>
          <table:table-cell table:formula="of:=[.D497]-[.D49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2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41111111111111" calcext:value-type="float">
            <text:p>0,00241111111111111000</text:p>
          </table:table-cell>
          <table:table-cell table:formula="of:=[.D498]-[.D49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2" office:value-type="float" office:value="20874" calcext:value-type="float">
            <text:p>20874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41597222222222" calcext:value-type="float">
            <text:p>0,00241597222222222000</text:p>
          </table:table-cell>
          <table:table-cell table:formula="of:=[.D499]-[.D49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2" office:value-type="float" office:value="20916" calcext:value-type="float">
            <text:p>20916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42083333333333" calcext:value-type="float">
            <text:p>0,00242083333333333000</text:p>
          </table:table-cell>
          <table:table-cell table:formula="of:=[.D500]-[.D49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2" office:value-type="float" office:value="20958" calcext:value-type="float">
            <text:p>20958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42569444444444" calcext:value-type="float">
            <text:p>0,00242569444444444000</text:p>
          </table:table-cell>
          <table:table-cell table:formula="of:=[.D501]-[.D50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2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43055555555556" calcext:value-type="float">
            <text:p>0,00243055555555556000</text:p>
          </table:table-cell>
          <table:table-cell table:formula="of:=[.D502]-[.D50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2" office:value-type="float" office:value="21042" calcext:value-type="float">
            <text:p>21042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43541666666667" calcext:value-type="float">
            <text:p>0,00243541666666667000</text:p>
          </table:table-cell>
          <table:table-cell table:formula="of:=[.D503]-[.D50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2" office:value-type="float" office:value="21084" calcext:value-type="float">
            <text:p>21084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44027777777778" calcext:value-type="float">
            <text:p>0,00244027777777778000</text:p>
          </table:table-cell>
          <table:table-cell table:formula="of:=[.D504]-[.D50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2" office:value-type="float" office:value="21126" calcext:value-type="float">
            <text:p>21126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44513888888889" calcext:value-type="float">
            <text:p>0,00244513888888889000</text:p>
          </table:table-cell>
          <table:table-cell table:formula="of:=[.D505]-[.D50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2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45" calcext:value-type="float">
            <text:p>0,00245000000000000000</text:p>
          </table:table-cell>
          <table:table-cell table:formula="of:=[.D506]-[.D50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2" office:value-type="float" office:value="21210" calcext:value-type="float">
            <text:p>2121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45486111111111" calcext:value-type="float">
            <text:p>0,00245486111111111000</text:p>
          </table:table-cell>
          <table:table-cell table:formula="of:=[.D507]-[.D506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2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45972222222222" calcext:value-type="float">
            <text:p>0,00245972222222222000</text:p>
          </table:table-cell>
          <table:table-cell table:formula="of:=[.D508]-[.D50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2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46458333333333" calcext:value-type="float">
            <text:p>0,00246458333333333000</text:p>
          </table:table-cell>
          <table:table-cell table:formula="of:=[.D509]-[.D50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2" office:value-type="float" office:value="21336" calcext:value-type="float">
            <text:p>21336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46944444444444" calcext:value-type="float">
            <text:p>0,00246944444444444000</text:p>
          </table:table-cell>
          <table:table-cell table:formula="of:=[.D510]-[.D50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2" office:value-type="float" office:value="21378" calcext:value-type="float">
            <text:p>21378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47430555555556" calcext:value-type="float">
            <text:p>0,00247430555555556000</text:p>
          </table:table-cell>
          <table:table-cell table:formula="of:=[.D511]-[.D51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2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47916666666667" calcext:value-type="float">
            <text:p>0,00247916666666667000</text:p>
          </table:table-cell>
          <table:table-cell table:formula="of:=[.D512]-[.D51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2" office:value-type="float" office:value="21462" calcext:value-type="float">
            <text:p>21462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48402777777778" calcext:value-type="float">
            <text:p>0,00248402777777778000</text:p>
          </table:table-cell>
          <table:table-cell table:formula="of:=[.D513]-[.D51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2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48888888888889" calcext:value-type="float">
            <text:p>0,00248888888888889000</text:p>
          </table:table-cell>
          <table:table-cell table:formula="of:=[.D514]-[.D513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2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49375" calcext:value-type="float">
            <text:p>0,00249375000000000000</text:p>
          </table:table-cell>
          <table:table-cell table:formula="of:=[.D515]-[.D51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2" office:value-type="float" office:value="21588" calcext:value-type="float">
            <text:p>21588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49861111111111" calcext:value-type="float">
            <text:p>0,00249861111111111000</text:p>
          </table:table-cell>
          <table:table-cell table:formula="of:=[.D516]-[.D51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2" office:value-type="float" office:value="21630" calcext:value-type="float">
            <text:p>2163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50347222222222" calcext:value-type="float">
            <text:p>0,00250347222222222000</text:p>
          </table:table-cell>
          <table:table-cell table:formula="of:=[.D517]-[.D51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2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50833333333333" calcext:value-type="float">
            <text:p>0,00250833333333333000</text:p>
          </table:table-cell>
          <table:table-cell table:formula="of:=[.D518]-[.D51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2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51319444444444" calcext:value-type="float">
            <text:p>0,00251319444444444000</text:p>
          </table:table-cell>
          <table:table-cell table:formula="of:=[.D519]-[.D51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2" office:value-type="float" office:value="21756" calcext:value-type="float">
            <text:p>21756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51805555555556" calcext:value-type="float">
            <text:p>0,00251805555555556000</text:p>
          </table:table-cell>
          <table:table-cell table:formula="of:=[.D520]-[.D51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2" office:value-type="float" office:value="21798" calcext:value-type="float">
            <text:p>21798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52291666666667" calcext:value-type="float">
            <text:p>0,00252291666666667000</text:p>
          </table:table-cell>
          <table:table-cell table:formula="of:=[.D521]-[.D520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2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52777777777778" calcext:value-type="float">
            <text:p>0,00252777777777778000</text:p>
          </table:table-cell>
          <table:table-cell table:formula="of:=[.D522]-[.D52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2" office:value-type="float" office:value="21882" calcext:value-type="float">
            <text:p>21882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53263888888889" calcext:value-type="float">
            <text:p>0,00253263888888889000</text:p>
          </table:table-cell>
          <table:table-cell table:formula="of:=[.D523]-[.D52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42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5375" calcext:value-type="float">
            <text:p>0,00253750000000000000</text:p>
          </table:table-cell>
          <table:table-cell table:formula="of:=[.D524]-[.D52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42" office:value-type="float" office:value="21966" calcext:value-type="float">
            <text:p>21966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54236111111111" calcext:value-type="float">
            <text:p>0,00254236111111111000</text:p>
          </table:table-cell>
          <table:table-cell table:formula="of:=[.D525]-[.D52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42" office:value-type="float" office:value="22008" calcext:value-type="float">
            <text:p>22008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54722222222222" calcext:value-type="float">
            <text:p>0,00254722222222222000</text:p>
          </table:table-cell>
          <table:table-cell table:formula="of:=[.D526]-[.D52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42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55208333333333" calcext:value-type="float">
            <text:p>0,00255208333333333000</text:p>
          </table:table-cell>
          <table:table-cell table:formula="of:=[.D527]-[.D52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42" office:value-type="float" office:value="22092" calcext:value-type="float">
            <text:p>22092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55694444444444" calcext:value-type="float">
            <text:p>0,00255694444444444000</text:p>
          </table:table-cell>
          <table:table-cell table:formula="of:=[.D528]-[.D52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42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56180555555556" calcext:value-type="float">
            <text:p>0,00256180555555556000</text:p>
          </table:table-cell>
          <table:table-cell table:formula="of:=[.D529]-[.D52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42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56666666666667" calcext:value-type="float">
            <text:p>0,00256666666666667000</text:p>
          </table:table-cell>
          <table:table-cell table:formula="of:=[.D530]-[.D52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42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57152777777778" calcext:value-type="float">
            <text:p>0,00257152777777778000</text:p>
          </table:table-cell>
          <table:table-cell table:formula="of:=[.D531]-[.D53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42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57638888888889" calcext:value-type="float">
            <text:p>0,00257638888888889000</text:p>
          </table:table-cell>
          <table:table-cell table:formula="of:=[.D532]-[.D53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42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58125" calcext:value-type="float">
            <text:p>0,00258125000000000000</text:p>
          </table:table-cell>
          <table:table-cell table:formula="of:=[.D533]-[.D53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42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58611111111111" calcext:value-type="float">
            <text:p>0,00258611111111111000</text:p>
          </table:table-cell>
          <table:table-cell table:formula="of:=[.D534]-[.D53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42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59097222222222" calcext:value-type="float">
            <text:p>0,00259097222222222000</text:p>
          </table:table-cell>
          <table:table-cell table:formula="of:=[.D535]-[.D53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42" office:value-type="float" office:value="22428" calcext:value-type="float">
            <text:p>22428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59583333333333" calcext:value-type="float">
            <text:p>0,00259583333333333000</text:p>
          </table:table-cell>
          <table:table-cell table:formula="of:=[.D536]-[.D53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42" office:value-type="float" office:value="22470" calcext:value-type="float">
            <text:p>2247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60069444444444" calcext:value-type="float">
            <text:p>0,00260069444444444000</text:p>
          </table:table-cell>
          <table:table-cell table:formula="of:=[.D537]-[.D536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42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60555555555556" calcext:value-type="float">
            <text:p>0,00260555555555556000</text:p>
          </table:table-cell>
          <table:table-cell table:formula="of:=[.D538]-[.D53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42" office:value-type="float" office:value="22554" calcext:value-type="float">
            <text:p>22554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61041666666667" calcext:value-type="float">
            <text:p>0,00261041666666667000</text:p>
          </table:table-cell>
          <table:table-cell table:formula="of:=[.D539]-[.D53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42" office:value-type="float" office:value="22596" calcext:value-type="float">
            <text:p>22596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61527777777778" calcext:value-type="float">
            <text:p>0,00261527777777778000</text:p>
          </table:table-cell>
          <table:table-cell table:formula="of:=[.D540]-[.D53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42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62013888888889" calcext:value-type="float">
            <text:p>0,00262013888888889000</text:p>
          </table:table-cell>
          <table:table-cell table:formula="of:=[.D541]-[.D54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42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625" calcext:value-type="float">
            <text:p>0,00262500000000000000</text:p>
          </table:table-cell>
          <table:table-cell table:formula="of:=[.D542]-[.D54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42" office:value-type="float" office:value="22722" calcext:value-type="float">
            <text:p>22722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62986111111111" calcext:value-type="float">
            <text:p>0,00262986111111111000</text:p>
          </table:table-cell>
          <table:table-cell table:formula="of:=[.D543]-[.D542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42" office:value-type="float" office:value="22764" calcext:value-type="float">
            <text:p>22764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63472222222222" calcext:value-type="float">
            <text:p>0,00263472222222222000</text:p>
          </table:table-cell>
          <table:table-cell table:formula="of:=[.D544]-[.D543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42" office:value-type="float" office:value="22806" calcext:value-type="float">
            <text:p>22806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63958333333333" calcext:value-type="float">
            <text:p>0,00263958333333333000</text:p>
          </table:table-cell>
          <table:table-cell table:formula="of:=[.D545]-[.D54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42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64444444444444" calcext:value-type="float">
            <text:p>0,00264444444444444000</text:p>
          </table:table-cell>
          <table:table-cell table:formula="of:=[.D546]-[.D54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42" office:value-type="float" office:value="22890" calcext:value-type="float">
            <text:p>2289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64930555555556" calcext:value-type="float">
            <text:p>0,00264930555555556000</text:p>
          </table:table-cell>
          <table:table-cell table:formula="of:=[.D547]-[.D54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42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65416666666667" calcext:value-type="float">
            <text:p>0,00265416666666667000</text:p>
          </table:table-cell>
          <table:table-cell table:formula="of:=[.D548]-[.D54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42" office:value-type="float" office:value="22974" calcext:value-type="float">
            <text:p>22974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65902777777778" calcext:value-type="float">
            <text:p>0,00265902777777778000</text:p>
          </table:table-cell>
          <table:table-cell table:formula="of:=[.D549]-[.D548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42" office:value-type="float" office:value="23016" calcext:value-type="float">
            <text:p>23016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66388888888889" calcext:value-type="float">
            <text:p>0,00266388888888889000</text:p>
          </table:table-cell>
          <table:table-cell table:formula="of:=[.D550]-[.D549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42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66875" calcext:value-type="float">
            <text:p>0,00266875000000000000</text:p>
          </table:table-cell>
          <table:table-cell table:formula="of:=[.D551]-[.D550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42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67361111111111" calcext:value-type="float">
            <text:p>0,00267361111111111000</text:p>
          </table:table-cell>
          <table:table-cell table:formula="of:=[.D552]-[.D55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42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67847222222222" calcext:value-type="float">
            <text:p>0,00267847222222222000</text:p>
          </table:table-cell>
          <table:table-cell table:formula="of:=[.D553]-[.D55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42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68333333333333" calcext:value-type="float">
            <text:p>0,00268333333333333000</text:p>
          </table:table-cell>
          <table:table-cell table:formula="of:=[.D554]-[.D55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42" office:value-type="float" office:value="23226" calcext:value-type="float">
            <text:p>23226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68819444444444" calcext:value-type="float">
            <text:p>0,00268819444444444000</text:p>
          </table:table-cell>
          <table:table-cell table:formula="of:=[.D555]-[.D554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42" office:value-type="float" office:value="23268" calcext:value-type="float">
            <text:p>23268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69305555555556" calcext:value-type="float">
            <text:p>0,00269305555555556000</text:p>
          </table:table-cell>
          <table:table-cell table:formula="of:=[.D556]-[.D555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42" office:value-type="float" office:value="23310" calcext:value-type="float">
            <text:p>2331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69791666666667" calcext:value-type="float">
            <text:p>0,00269791666666667000</text:p>
          </table:table-cell>
          <table:table-cell table:formula="of:=[.D557]-[.D556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42" office:value-type="float" office:value="23352" calcext:value-type="float">
            <text:p>23352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70277777777778" calcext:value-type="float">
            <text:p>0,00270277777777778000</text:p>
          </table:table-cell>
          <table:table-cell table:formula="of:=[.D558]-[.D557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42" office:value-type="float" office:value="23394" calcext:value-type="float">
            <text:p>23394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70763888888889" calcext:value-type="float">
            <text:p>0,00270763888888889000</text:p>
          </table:table-cell>
          <table:table-cell table:formula="of:=[.D559]-[.D55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42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7125" calcext:value-type="float">
            <text:p>0,00271250000000000000</text:p>
          </table:table-cell>
          <table:table-cell table:formula="of:=[.D560]-[.D55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42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71736111111111" calcext:value-type="float">
            <text:p>0,00271736111111111000</text:p>
          </table:table-cell>
          <table:table-cell table:formula="of:=[.D561]-[.D56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42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72222222222222" calcext:value-type="float">
            <text:p>0,00272222222222222000</text:p>
          </table:table-cell>
          <table:table-cell table:formula="of:=[.D562]-[.D561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42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72708333333333" calcext:value-type="float">
            <text:p>0,00272708333333333000</text:p>
          </table:table-cell>
          <table:table-cell table:formula="of:=[.D563]-[.D562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42" office:value-type="float" office:value="23604" calcext:value-type="float">
            <text:p>23604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73194444444444" calcext:value-type="float">
            <text:p>0,00273194444444444000</text:p>
          </table:table-cell>
          <table:table-cell table:formula="of:=[.D564]-[.D563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42" office:value-type="float" office:value="23646" calcext:value-type="float">
            <text:p>23646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73680555555556" calcext:value-type="float">
            <text:p>0,00273680555555556000</text:p>
          </table:table-cell>
          <table:table-cell table:formula="of:=[.D565]-[.D564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42" office:value-type="float" office:value="23688" calcext:value-type="float">
            <text:p>23688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74166666666667" calcext:value-type="float">
            <text:p>0,00274166666666667000</text:p>
          </table:table-cell>
          <table:table-cell table:formula="of:=[.D566]-[.D565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42" office:value-type="float" office:value="23730" calcext:value-type="float">
            <text:p>2373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74652777777778" calcext:value-type="float">
            <text:p>0,00274652777777778000</text:p>
          </table:table-cell>
          <table:table-cell table:formula="of:=[.D567]-[.D566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42" office:value-type="float" office:value="23772" calcext:value-type="float">
            <text:p>23772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75138888888889" calcext:value-type="float">
            <text:p>0,00275138888888889000</text:p>
          </table:table-cell>
          <table:table-cell table:formula="of:=[.D568]-[.D567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42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75625" calcext:value-type="float">
            <text:p>0,00275625000000000000</text:p>
          </table:table-cell>
          <table:table-cell table:formula="of:=[.D569]-[.D568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42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76111111111111" calcext:value-type="float">
            <text:p>0,00276111111111111000</text:p>
          </table:table-cell>
          <table:table-cell table:formula="of:=[.D570]-[.D569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42" office:value-type="float" office:value="23898" calcext:value-type="float">
            <text:p>23898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76597222222222" calcext:value-type="float">
            <text:p>0,00276597222222222000</text:p>
          </table:table-cell>
          <table:table-cell table:formula="of:=[.D571]-[.D570]" office:value-type="float" office:value="0.0000048611111111113" calcext:value-type="float">
            <text:p>0,000004861111111111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42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77083333333333" calcext:value-type="float">
            <text:p>0,00277083333333333000</text:p>
          </table:table-cell>
          <table:table-cell table:formula="of:=[.D572]-[.D571]" office:value-type="float" office:value="0.00000486111111111087" calcext:value-type="float">
            <text:p>0,000004861111111110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42" office:value-type="float" office:value="23982" calcext:value-type="float">
            <text:p>23982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77569444444444" calcext:value-type="float">
            <text:p>0,00277569444444444000</text:p>
          </table:table-cell>
          <table:table-cell table:formula="of:=#REF!-[.D572]" office:value-type="string" office:string-value="" calcext:value-type="error">
            <text:p>#REF!</text:p>
          </table:table-cell>
        </table:table-row>
        <table:table-row table:style-name="ro1" table:number-rows-repeated="10480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6:58.762119311</meta:creation-date>
    <dc:date>2026-05-17T17:37:05.525452079</dc:date>
    <meta:editing-duration>PT8S</meta:editing-duration>
    <meta:editing-cycles>1</meta:editing-cycles>
    <meta:document-statistic meta:table-count="1" meta:cell-count="2860" meta:object-count="0"/>
    <meta:generator>LibreOffice/24.2.7.2$Linux_X86_64 LibreOffice_project/420$Build-2</meta:generator>
  </office:meta>
</office:document-meta>
</file>