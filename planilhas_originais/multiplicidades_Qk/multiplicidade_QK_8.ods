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9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8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0925925925925926" calcext:value-type="float">
            <text:p>0,00000092592592592593</text:p>
          </table:table-cell>
          <table:table-cell table:formula="of:=[.D3]-[.D2]" office:value-type="float" office:value="0.000000925925925925926" calcext:value-type="float">
            <text:p>0,000000925925925925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8" office:value-type="float" office:value="16" calcext:value-type="float">
            <text:p>1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185185185185185" calcext:value-type="float">
            <text:p>0,00000185185185185185</text:p>
          </table:table-cell>
          <table:table-cell table:formula="of:=[.D4]-[.D3]" office:value-type="float" office:value="0.000000925925925925926" calcext:value-type="float">
            <text:p>0,00000092592592592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8" office:value-type="float" office:value="24" calcext:value-type="float">
            <text:p>24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277777777777778" calcext:value-type="float">
            <text:p>0,00000277777777777778</text:p>
          </table:table-cell>
          <table:table-cell table:formula="of:=[.D5]-[.D4]" office:value-type="float" office:value="0.000000925925925925926" calcext:value-type="float">
            <text:p>0,000000925925925925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8" office:value-type="float" office:value="32" calcext:value-type="float">
            <text:p>3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037037037037037" calcext:value-type="float">
            <text:p>0,00000370370370370370</text:p>
          </table:table-cell>
          <table:table-cell table:formula="of:=[.D6]-[.D5]" office:value-type="float" office:value="0.000000925925925925926" calcext:value-type="float">
            <text:p>0,000000925925925925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8" office:value-type="float" office:value="40" calcext:value-type="float">
            <text:p>4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0462962962962963" calcext:value-type="float">
            <text:p>0,00000462962962962963</text:p>
          </table:table-cell>
          <table:table-cell table:formula="of:=[.D7]-[.D6]" office:value-type="float" office:value="0.000000925925925925926" calcext:value-type="float">
            <text:p>0,00000092592592592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8" office:value-type="float" office:value="48" calcext:value-type="float">
            <text:p>4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0555555555555556" calcext:value-type="float">
            <text:p>0,00000555555555555556</text:p>
          </table:table-cell>
          <table:table-cell table:formula="of:=[.D8]-[.D7]" office:value-type="float" office:value="0.000000925925925925925" calcext:value-type="float">
            <text:p>0,000000925925925925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8" office:value-type="float" office:value="56" calcext:value-type="float">
            <text:p>56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0648148148148148" calcext:value-type="float">
            <text:p>0,00000648148148148148</text:p>
          </table:table-cell>
          <table:table-cell table:formula="of:=[.D9]-[.D8]" office:value-type="float" office:value="0.000000925925925925926" calcext:value-type="float">
            <text:p>0,000000925925925925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8" office:value-type="float" office:value="64" calcext:value-type="float">
            <text:p>6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0740740740740741" calcext:value-type="float">
            <text:p>0,00000740740740740741</text:p>
          </table:table-cell>
          <table:table-cell table:formula="of:=[.D10]-[.D9]" office:value-type="float" office:value="0.000000925925925925926" calcext:value-type="float">
            <text:p>0,00000092592592592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8" office:value-type="float" office:value="72" calcext:value-type="float">
            <text:p>72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0833333333333333" calcext:value-type="float">
            <text:p>0,00000833333333333333</text:p>
          </table:table-cell>
          <table:table-cell table:formula="of:=[.D11]-[.D10]" office:value-type="float" office:value="0.000000925925925925925" calcext:value-type="float">
            <text:p>0,000000925925925925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8" office:value-type="float" office:value="80" calcext:value-type="float">
            <text:p>8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0925925925925926" calcext:value-type="float">
            <text:p>0,00000925925925925926</text:p>
          </table:table-cell>
          <table:table-cell table:formula="of:=[.D12]-[.D11]" office:value-type="float" office:value="0.000000925925925925925" calcext:value-type="float">
            <text:p>0,000000925925925925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8" office:value-type="float" office:value="88" calcext:value-type="float">
            <text:p>88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101851851851852" calcext:value-type="float">
            <text:p>0,00001018518518518520</text:p>
          </table:table-cell>
          <table:table-cell table:formula="of:=[.D13]-[.D12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8" office:value-type="float" office:value="96" calcext:value-type="float">
            <text:p>9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111111111111111" calcext:value-type="float">
            <text:p>0,00001111111111111110</text:p>
          </table:table-cell>
          <table:table-cell table:formula="of:=[.D14]-[.D13]" office:value-type="float" office:value="0.000000925925925925925" calcext:value-type="float">
            <text:p>0,000000925925925925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8" office:value-type="float" office:value="104" calcext:value-type="float">
            <text:p>104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12037037037037" calcext:value-type="float">
            <text:p>0,00001203703703703700</text:p>
          </table:table-cell>
          <table:table-cell table:formula="of:=[.D15]-[.D14]" office:value-type="float" office:value="0.000000925925925925925" calcext:value-type="float">
            <text:p>0,000000925925925925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8" office:value-type="float" office:value="112" calcext:value-type="float">
            <text:p>11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12962962962963" calcext:value-type="float">
            <text:p>0,00001296296296296300</text:p>
          </table:table-cell>
          <table:table-cell table:formula="of:=[.D16]-[.D15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8" office:value-type="float" office:value="120" calcext:value-type="float">
            <text:p>12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138888888888889" calcext:value-type="float">
            <text:p>0,00001388888888888890</text:p>
          </table:table-cell>
          <table:table-cell table:formula="of:=[.D17]-[.D16]" office:value-type="float" office:value="0.000000925925925925925" calcext:value-type="float">
            <text:p>0,000000925925925925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8" office:value-type="float" office:value="128" calcext:value-type="float">
            <text:p>12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148148148148148" calcext:value-type="float">
            <text:p>0,00001481481481481480</text:p>
          </table:table-cell>
          <table:table-cell table:formula="of:=[.D18]-[.D17]" office:value-type="float" office:value="0.000000925925925925925" calcext:value-type="float">
            <text:p>0,000000925925925925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8" office:value-type="float" office:value="136" calcext:value-type="float">
            <text:p>136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157407407407407" calcext:value-type="float">
            <text:p>0,00001574074074074070</text:p>
          </table:table-cell>
          <table:table-cell table:formula="of:=[.D19]-[.D18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8" office:value-type="float" office:value="144" calcext:value-type="float">
            <text:p>14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166666666666667" calcext:value-type="float">
            <text:p>0,00001666666666666670</text:p>
          </table:table-cell>
          <table:table-cell table:formula="of:=[.D20]-[.D19]" office:value-type="float" office:value="0.000000925925925925924" calcext:value-type="float">
            <text:p>0,000000925925925925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8" office:value-type="float" office:value="152" calcext:value-type="float">
            <text:p>152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175925925925926" calcext:value-type="float">
            <text:p>0,00001759259259259260</text:p>
          </table:table-cell>
          <table:table-cell table:formula="of:=[.D21]-[.D20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8" office:value-type="float" office:value="160" calcext:value-type="float">
            <text:p>1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185185185185185" calcext:value-type="float">
            <text:p>0,00001851851851851850</text:p>
          </table:table-cell>
          <table:table-cell table:formula="of:=[.D22]-[.D21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8" office:value-type="float" office:value="168" calcext:value-type="float">
            <text:p>168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194444444444444" calcext:value-type="float">
            <text:p>0,00001944444444444450</text:p>
          </table:table-cell>
          <table:table-cell table:formula="of:=[.D23]-[.D22]" office:value-type="float" office:value="0.000000925925925925924" calcext:value-type="float">
            <text:p>0,000000925925925925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8" office:value-type="float" office:value="176" calcext:value-type="float">
            <text:p>17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203703703703704" calcext:value-type="float">
            <text:p>0,00002037037037037040</text:p>
          </table:table-cell>
          <table:table-cell table:formula="of:=[.D24]-[.D23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8" office:value-type="float" office:value="184" calcext:value-type="float">
            <text:p>184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212962962962963" calcext:value-type="float">
            <text:p>0,00002129629629629630</text:p>
          </table:table-cell>
          <table:table-cell table:formula="of:=[.D25]-[.D24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8" office:value-type="float" office:value="192" calcext:value-type="float">
            <text:p>19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222222222222222" calcext:value-type="float">
            <text:p>0,00002222222222222220</text:p>
          </table:table-cell>
          <table:table-cell table:formula="of:=[.D26]-[.D25]" office:value-type="float" office:value="0.000000925925925925924" calcext:value-type="float">
            <text:p>0,000000925925925925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8" office:value-type="float" office:value="200" calcext:value-type="float">
            <text:p>2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231481481481481" calcext:value-type="float">
            <text:p>0,00002314814814814820</text:p>
          </table:table-cell>
          <table:table-cell table:formula="of:=[.D27]-[.D26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8" office:value-type="float" office:value="208" calcext:value-type="float">
            <text:p>20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240740740740741" calcext:value-type="float">
            <text:p>0,00002407407407407410</text:p>
          </table:table-cell>
          <table:table-cell table:formula="of:=[.D28]-[.D27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8" office:value-type="float" office:value="216" calcext:value-type="float">
            <text:p>216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25" calcext:value-type="float">
            <text:p>0,00002500000000000000</text:p>
          </table:table-cell>
          <table:table-cell table:formula="of:=[.D29]-[.D28]" office:value-type="float" office:value="0.000000925925925925924" calcext:value-type="float">
            <text:p>0,000000925925925925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8" office:value-type="float" office:value="224" calcext:value-type="float">
            <text:p>22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259259259259259" calcext:value-type="float">
            <text:p>0,00002592592592592590</text:p>
          </table:table-cell>
          <table:table-cell table:formula="of:=[.D30]-[.D29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8" office:value-type="float" office:value="232" calcext:value-type="float">
            <text:p>232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268518518518519" calcext:value-type="float">
            <text:p>0,00002685185185185190</text:p>
          </table:table-cell>
          <table:table-cell table:formula="of:=[.D31]-[.D30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8" office:value-type="float" office:value="240" calcext:value-type="float">
            <text:p>24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277777777777778" calcext:value-type="float">
            <text:p>0,00002777777777777780</text:p>
          </table:table-cell>
          <table:table-cell table:formula="of:=[.D32]-[.D31]" office:value-type="float" office:value="0.000000925925925925924" calcext:value-type="float">
            <text:p>0,000000925925925925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8" office:value-type="float" office:value="248" calcext:value-type="float">
            <text:p>248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287037037037037" calcext:value-type="float">
            <text:p>0,00002870370370370370</text:p>
          </table:table-cell>
          <table:table-cell table:formula="of:=[.D33]-[.D32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8" office:value-type="float" office:value="256" calcext:value-type="float">
            <text:p>25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296296296296296" calcext:value-type="float">
            <text:p>0,00002962962962962960</text:p>
          </table:table-cell>
          <table:table-cell table:formula="of:=[.D34]-[.D33]" office:value-type="float" office:value="0.000000925925925925924" calcext:value-type="float">
            <text:p>0,000000925925925925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8" office:value-type="float" office:value="264" calcext:value-type="float">
            <text:p>264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305555555555556" calcext:value-type="float">
            <text:p>0,00003055555555555560</text:p>
          </table:table-cell>
          <table:table-cell table:formula="of:=[.D35]-[.D34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8" office:value-type="float" office:value="272" calcext:value-type="float">
            <text:p>27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314814814814815" calcext:value-type="float">
            <text:p>0,00003148148148148150</text:p>
          </table:table-cell>
          <table:table-cell table:formula="of:=[.D36]-[.D35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8" office:value-type="float" office:value="280" calcext:value-type="float">
            <text:p>28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324074074074074" calcext:value-type="float">
            <text:p>0,00003240740740740740</text:p>
          </table:table-cell>
          <table:table-cell table:formula="of:=[.D37]-[.D36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8" office:value-type="float" office:value="288" calcext:value-type="float">
            <text:p>28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333333333333333" calcext:value-type="float">
            <text:p>0,00003333333333333330</text:p>
          </table:table-cell>
          <table:table-cell table:formula="of:=[.D38]-[.D37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8" office:value-type="float" office:value="296" calcext:value-type="float">
            <text:p>296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342592592592593" calcext:value-type="float">
            <text:p>0,00003425925925925930</text:p>
          </table:table-cell>
          <table:table-cell table:formula="of:=[.D39]-[.D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8" office:value-type="float" office:value="304" calcext:value-type="float">
            <text:p>30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0351851851851852" calcext:value-type="float">
            <text:p>0,00003518518518518520</text:p>
          </table:table-cell>
          <table:table-cell table:formula="of:=[.D40]-[.D39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8" office:value-type="float" office:value="312" calcext:value-type="float">
            <text:p>312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0361111111111111" calcext:value-type="float">
            <text:p>0,00003611111111111110</text:p>
          </table:table-cell>
          <table:table-cell table:formula="of:=[.D41]-[.D40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8" office:value-type="float" office:value="320" calcext:value-type="float">
            <text:p>3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037037037037037" calcext:value-type="float">
            <text:p>0,00003703703703703700</text:p>
          </table:table-cell>
          <table:table-cell table:formula="of:=[.D42]-[.D41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8" office:value-type="float" office:value="328" calcext:value-type="float">
            <text:p>328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037962962962963" calcext:value-type="float">
            <text:p>0,00003796296296296300</text:p>
          </table:table-cell>
          <table:table-cell table:formula="of:=[.D43]-[.D42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8" office:value-type="float" office:value="336" calcext:value-type="float">
            <text:p>33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0388888888888889" calcext:value-type="float">
            <text:p>0,00003888888888888890</text:p>
          </table:table-cell>
          <table:table-cell table:formula="of:=[.D44]-[.D43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8" office:value-type="float" office:value="344" calcext:value-type="float">
            <text:p>344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0398148148148148" calcext:value-type="float">
            <text:p>0,00003981481481481480</text:p>
          </table:table-cell>
          <table:table-cell table:formula="of:=[.D45]-[.D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8" office:value-type="float" office:value="352" calcext:value-type="float">
            <text:p>35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0407407407407407" calcext:value-type="float">
            <text:p>0,00004074074074074070</text:p>
          </table:table-cell>
          <table:table-cell table:formula="of:=[.D46]-[.D45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8" office:value-type="float" office:value="360" calcext:value-type="float">
            <text:p>36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0416666666666667" calcext:value-type="float">
            <text:p>0,00004166666666666670</text:p>
          </table:table-cell>
          <table:table-cell table:formula="of:=[.D47]-[.D46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8" office:value-type="float" office:value="368" calcext:value-type="float">
            <text:p>36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0425925925925926" calcext:value-type="float">
            <text:p>0,00004259259259259260</text:p>
          </table:table-cell>
          <table:table-cell table:formula="of:=[.D48]-[.D47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8" office:value-type="float" office:value="376" calcext:value-type="float">
            <text:p>376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0435185185185185" calcext:value-type="float">
            <text:p>0,00004351851851851850</text:p>
          </table:table-cell>
          <table:table-cell table:formula="of:=[.D49]-[.D48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8" office:value-type="float" office:value="384" calcext:value-type="float">
            <text:p>38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0444444444444444" calcext:value-type="float">
            <text:p>0,00004444444444444450</text:p>
          </table:table-cell>
          <table:table-cell table:formula="of:=[.D50]-[.D49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8" office:value-type="float" office:value="392" calcext:value-type="float">
            <text:p>392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0453703703703704" calcext:value-type="float">
            <text:p>0,00004537037037037040</text:p>
          </table:table-cell>
          <table:table-cell table:formula="of:=[.D51]-[.D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8" office:value-type="float" office:value="400" calcext:value-type="float">
            <text:p>4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0462962962962963" calcext:value-type="float">
            <text:p>0,00004629629629629630</text:p>
          </table:table-cell>
          <table:table-cell table:formula="of:=[.D52]-[.D51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8" office:value-type="float" office:value="408" calcext:value-type="float">
            <text:p>408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0472222222222222" calcext:value-type="float">
            <text:p>0,00004722222222222220</text:p>
          </table:table-cell>
          <table:table-cell table:formula="of:=[.D53]-[.D52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8" office:value-type="float" office:value="416" calcext:value-type="float">
            <text:p>41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0481481481481482" calcext:value-type="float">
            <text:p>0,00004814814814814820</text:p>
          </table:table-cell>
          <table:table-cell table:formula="of:=[.D54]-[.D53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8" office:value-type="float" office:value="424" calcext:value-type="float">
            <text:p>424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0490740740740741" calcext:value-type="float">
            <text:p>0,00004907407407407410</text:p>
          </table:table-cell>
          <table:table-cell table:formula="of:=[.D55]-[.D54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8" office:value-type="float" office:value="432" calcext:value-type="float">
            <text:p>43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05" calcext:value-type="float">
            <text:p>0,00005000000000000000</text:p>
          </table:table-cell>
          <table:table-cell table:formula="of:=[.D56]-[.D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8" office:value-type="float" office:value="440" calcext:value-type="float">
            <text:p>44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0509259259259259" calcext:value-type="float">
            <text:p>0,00005092592592592590</text:p>
          </table:table-cell>
          <table:table-cell table:formula="of:=[.D57]-[.D56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8" office:value-type="float" office:value="448" calcext:value-type="float">
            <text:p>44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0518518518518519" calcext:value-type="float">
            <text:p>0,00005185185185185190</text:p>
          </table:table-cell>
          <table:table-cell table:formula="of:=[.D58]-[.D57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8" office:value-type="float" office:value="456" calcext:value-type="float">
            <text:p>456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0527777777777778" calcext:value-type="float">
            <text:p>0,00005277777777777780</text:p>
          </table:table-cell>
          <table:table-cell table:formula="of:=[.D59]-[.D58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8" office:value-type="float" office:value="464" calcext:value-type="float">
            <text:p>46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0537037037037037" calcext:value-type="float">
            <text:p>0,00005370370370370370</text:p>
          </table:table-cell>
          <table:table-cell table:formula="of:=[.D60]-[.D59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8" office:value-type="float" office:value="472" calcext:value-type="float">
            <text:p>472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0546296296296296" calcext:value-type="float">
            <text:p>0,00005462962962962960</text:p>
          </table:table-cell>
          <table:table-cell table:formula="of:=[.D61]-[.D60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8" office:value-type="float" office:value="480" calcext:value-type="float">
            <text:p>4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0555555555555556" calcext:value-type="float">
            <text:p>0,00005555555555555560</text:p>
          </table:table-cell>
          <table:table-cell table:formula="of:=[.D62]-[.D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8" office:value-type="float" office:value="488" calcext:value-type="float">
            <text:p>488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0564814814814815" calcext:value-type="float">
            <text:p>0,00005648148148148150</text:p>
          </table:table-cell>
          <table:table-cell table:formula="of:=[.D63]-[.D62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8" office:value-type="float" office:value="496" calcext:value-type="float">
            <text:p>49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0574074074074074" calcext:value-type="float">
            <text:p>0,00005740740740740740</text:p>
          </table:table-cell>
          <table:table-cell table:formula="of:=[.D64]-[.D63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8" office:value-type="float" office:value="504" calcext:value-type="float">
            <text:p>504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0583333333333333" calcext:value-type="float">
            <text:p>0,00005833333333333330</text:p>
          </table:table-cell>
          <table:table-cell table:formula="of:=[.D65]-[.D64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8" office:value-type="float" office:value="512" calcext:value-type="float">
            <text:p>51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0592592592592593" calcext:value-type="float">
            <text:p>0,00005925925925925930</text:p>
          </table:table-cell>
          <table:table-cell table:formula="of:=[.D66]-[.D65]" office:value-type="float" office:value="0.000000925925925925927" calcext:value-type="float">
            <text:p>0,000000925925925925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8" office:value-type="float" office:value="520" calcext:value-type="float">
            <text:p>52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0601851851851852" calcext:value-type="float">
            <text:p>0,00006018518518518520</text:p>
          </table:table-cell>
          <table:table-cell table:formula="of:=[.D67]-[.D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8" office:value-type="float" office:value="528" calcext:value-type="float">
            <text:p>52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0611111111111111" calcext:value-type="float">
            <text:p>0,00006111111111111110</text:p>
          </table:table-cell>
          <table:table-cell table:formula="of:=[.D68]-[.D67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8" office:value-type="float" office:value="536" calcext:value-type="float">
            <text:p>536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062037037037037" calcext:value-type="float">
            <text:p>0,00006203703703703700</text:p>
          </table:table-cell>
          <table:table-cell table:formula="of:=[.D69]-[.D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8" office:value-type="float" office:value="544" calcext:value-type="float">
            <text:p>54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062962962962963" calcext:value-type="float">
            <text:p>0,00006296296296296300</text:p>
          </table:table-cell>
          <table:table-cell table:formula="of:=[.D70]-[.D69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8" office:value-type="float" office:value="552" calcext:value-type="float">
            <text:p>552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0638888888888889" calcext:value-type="float">
            <text:p>0,00006388888888888890</text:p>
          </table:table-cell>
          <table:table-cell table:formula="of:=[.D71]-[.D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8" office:value-type="float" office:value="560" calcext:value-type="float">
            <text:p>56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0648148148148148" calcext:value-type="float">
            <text:p>0,00006481481481481480</text:p>
          </table:table-cell>
          <table:table-cell table:formula="of:=[.D72]-[.D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8" office:value-type="float" office:value="568" calcext:value-type="float">
            <text:p>568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0657407407407407" calcext:value-type="float">
            <text:p>0,00006574074074074070</text:p>
          </table:table-cell>
          <table:table-cell table:formula="of:=[.D73]-[.D72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8" office:value-type="float" office:value="576" calcext:value-type="float">
            <text:p>57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0666666666666667" calcext:value-type="float">
            <text:p>0,00006666666666666670</text:p>
          </table:table-cell>
          <table:table-cell table:formula="of:=[.D74]-[.D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8" office:value-type="float" office:value="584" calcext:value-type="float">
            <text:p>584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0675925925925926" calcext:value-type="float">
            <text:p>0,00006759259259259260</text:p>
          </table:table-cell>
          <table:table-cell table:formula="of:=[.D75]-[.D74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8" office:value-type="float" office:value="592" calcext:value-type="float">
            <text:p>59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0685185185185185" calcext:value-type="float">
            <text:p>0,00006851851851851850</text:p>
          </table:table-cell>
          <table:table-cell table:formula="of:=[.D76]-[.D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8" office:value-type="float" office:value="600" calcext:value-type="float">
            <text:p>6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0694444444444444" calcext:value-type="float">
            <text:p>0,00006944444444444440</text:p>
          </table:table-cell>
          <table:table-cell table:formula="of:=[.D77]-[.D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8" office:value-type="float" office:value="608" calcext:value-type="float">
            <text:p>60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0703703703703704" calcext:value-type="float">
            <text:p>0,00007037037037037040</text:p>
          </table:table-cell>
          <table:table-cell table:formula="of:=[.D78]-[.D77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8" office:value-type="float" office:value="616" calcext:value-type="float">
            <text:p>616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0712962962962963" calcext:value-type="float">
            <text:p>0,00007129629629629630</text:p>
          </table:table-cell>
          <table:table-cell table:formula="of:=[.D79]-[.D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8" office:value-type="float" office:value="624" calcext:value-type="float">
            <text:p>62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0722222222222222" calcext:value-type="float">
            <text:p>0,00007222222222222220</text:p>
          </table:table-cell>
          <table:table-cell table:formula="of:=[.D80]-[.D79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8" office:value-type="float" office:value="632" calcext:value-type="float">
            <text:p>632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0731481481481482" calcext:value-type="float">
            <text:p>0,00007314814814814820</text:p>
          </table:table-cell>
          <table:table-cell table:formula="of:=[.D81]-[.D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8" office:value-type="float" office:value="640" calcext:value-type="float">
            <text:p>6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0740740740740741" calcext:value-type="float">
            <text:p>0,00007407407407407410</text:p>
          </table:table-cell>
          <table:table-cell table:formula="of:=[.D82]-[.D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8" office:value-type="float" office:value="648" calcext:value-type="float">
            <text:p>648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075" calcext:value-type="float">
            <text:p>0,00007500000000000000</text:p>
          </table:table-cell>
          <table:table-cell table:formula="of:=[.D83]-[.D82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8" office:value-type="float" office:value="656" calcext:value-type="float">
            <text:p>65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0759259259259259" calcext:value-type="float">
            <text:p>0,00007592592592592590</text:p>
          </table:table-cell>
          <table:table-cell table:formula="of:=[.D84]-[.D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8" office:value-type="float" office:value="664" calcext:value-type="float">
            <text:p>664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0768518518518519" calcext:value-type="float">
            <text:p>0,00007685185185185190</text:p>
          </table:table-cell>
          <table:table-cell table:formula="of:=[.D85]-[.D84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8" office:value-type="float" office:value="672" calcext:value-type="float">
            <text:p>67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0777777777777778" calcext:value-type="float">
            <text:p>0,00007777777777777780</text:p>
          </table:table-cell>
          <table:table-cell table:formula="of:=[.D86]-[.D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8" office:value-type="float" office:value="680" calcext:value-type="float">
            <text:p>68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0787037037037037" calcext:value-type="float">
            <text:p>0,00007870370370370370</text:p>
          </table:table-cell>
          <table:table-cell table:formula="of:=[.D87]-[.D86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8" office:value-type="float" office:value="688" calcext:value-type="float">
            <text:p>68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0796296296296296" calcext:value-type="float">
            <text:p>0,00007962962962962960</text:p>
          </table:table-cell>
          <table:table-cell table:formula="of:=[.D88]-[.D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8" office:value-type="float" office:value="696" calcext:value-type="float">
            <text:p>696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0805555555555556" calcext:value-type="float">
            <text:p>0,00008055555555555560</text:p>
          </table:table-cell>
          <table:table-cell table:formula="of:=[.D89]-[.D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8" office:value-type="float" office:value="704" calcext:value-type="float">
            <text:p>70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0814814814814815" calcext:value-type="float">
            <text:p>0,00008148148148148150</text:p>
          </table:table-cell>
          <table:table-cell table:formula="of:=[.D90]-[.D89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8" office:value-type="float" office:value="712" calcext:value-type="float">
            <text:p>712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0824074074074074" calcext:value-type="float">
            <text:p>0,00008240740740740740</text:p>
          </table:table-cell>
          <table:table-cell table:formula="of:=[.D91]-[.D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8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0833333333333333" calcext:value-type="float">
            <text:p>0,00008333333333333330</text:p>
          </table:table-cell>
          <table:table-cell table:formula="of:=[.D92]-[.D91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8" office:value-type="float" office:value="728" calcext:value-type="float">
            <text:p>728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0842592592592593" calcext:value-type="float">
            <text:p>0,00008425925925925930</text:p>
          </table:table-cell>
          <table:table-cell table:formula="of:=[.D93]-[.D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8" office:value-type="float" office:value="736" calcext:value-type="float">
            <text:p>73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0851851851851852" calcext:value-type="float">
            <text:p>0,00008518518518518520</text:p>
          </table:table-cell>
          <table:table-cell table:formula="of:=[.D94]-[.D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8" office:value-type="float" office:value="744" calcext:value-type="float">
            <text:p>744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0861111111111111" calcext:value-type="float">
            <text:p>0,00008611111111111110</text:p>
          </table:table-cell>
          <table:table-cell table:formula="of:=[.D95]-[.D94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8" office:value-type="float" office:value="752" calcext:value-type="float">
            <text:p>75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087037037037037" calcext:value-type="float">
            <text:p>0,00008703703703703700</text:p>
          </table:table-cell>
          <table:table-cell table:formula="of:=[.D96]-[.D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8" office:value-type="float" office:value="760" calcext:value-type="float">
            <text:p>76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087962962962963" calcext:value-type="float">
            <text:p>0,00008796296296296300</text:p>
          </table:table-cell>
          <table:table-cell table:formula="of:=[.D97]-[.D96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8" office:value-type="float" office:value="768" calcext:value-type="float">
            <text:p>76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0888888888888889" calcext:value-type="float">
            <text:p>0,00008888888888888890</text:p>
          </table:table-cell>
          <table:table-cell table:formula="of:=[.D98]-[.D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8" office:value-type="float" office:value="776" calcext:value-type="float">
            <text:p>776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0898148148148148" calcext:value-type="float">
            <text:p>0,00008981481481481480</text:p>
          </table:table-cell>
          <table:table-cell table:formula="of:=[.D99]-[.D98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8" office:value-type="float" office:value="784" calcext:value-type="float">
            <text:p>78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0907407407407408" calcext:value-type="float">
            <text:p>0,00009074074074074070</text:p>
          </table:table-cell>
          <table:table-cell table:formula="of:=[.D100]-[.D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8" office:value-type="float" office:value="792" calcext:value-type="float">
            <text:p>792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0916666666666667" calcext:value-type="float">
            <text:p>0,00009166666666666670</text:p>
          </table:table-cell>
          <table:table-cell table:formula="of:=[.D101]-[.D1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8" office:value-type="float" office:value="800" calcext:value-type="float">
            <text:p>8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0925925925925926" calcext:value-type="float">
            <text:p>0,00009259259259259260</text:p>
          </table:table-cell>
          <table:table-cell table:formula="of:=[.D102]-[.D101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8" office:value-type="float" office:value="808" calcext:value-type="float">
            <text:p>808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0935185185185185" calcext:value-type="float">
            <text:p>0,00009351851851851850</text:p>
          </table:table-cell>
          <table:table-cell table:formula="of:=[.D103]-[.D1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8" office:value-type="float" office:value="816" calcext:value-type="float">
            <text:p>81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0944444444444444" calcext:value-type="float">
            <text:p>0,00009444444444444440</text:p>
          </table:table-cell>
          <table:table-cell table:formula="of:=[.D104]-[.D103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8" office:value-type="float" office:value="824" calcext:value-type="float">
            <text:p>824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0953703703703704" calcext:value-type="float">
            <text:p>0,00009537037037037040</text:p>
          </table:table-cell>
          <table:table-cell table:formula="of:=[.D105]-[.D1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8" office:value-type="float" office:value="832" calcext:value-type="float">
            <text:p>83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0962962962962963" calcext:value-type="float">
            <text:p>0,00009629629629629630</text:p>
          </table:table-cell>
          <table:table-cell table:formula="of:=[.D106]-[.D1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8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0972222222222222" calcext:value-type="float">
            <text:p>0,00009722222222222220</text:p>
          </table:table-cell>
          <table:table-cell table:formula="of:=[.D107]-[.D106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8" office:value-type="float" office:value="848" calcext:value-type="float">
            <text:p>84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0981481481481482" calcext:value-type="float">
            <text:p>0,00009814814814814820</text:p>
          </table:table-cell>
          <table:table-cell table:formula="of:=[.D108]-[.D1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8" office:value-type="float" office:value="856" calcext:value-type="float">
            <text:p>856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0990740740740741" calcext:value-type="float">
            <text:p>0,00009907407407407410</text:p>
          </table:table-cell>
          <table:table-cell table:formula="of:=[.D109]-[.D108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8" office:value-type="float" office:value="864" calcext:value-type="float">
            <text:p>86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1" calcext:value-type="float">
            <text:p>0,00010000000000000000</text:p>
          </table:table-cell>
          <table:table-cell table:formula="of:=[.D110]-[.D1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8" office:value-type="float" office:value="872" calcext:value-type="float">
            <text:p>872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100925925925926" calcext:value-type="float">
            <text:p>0,00010092592592592600</text:p>
          </table:table-cell>
          <table:table-cell table:formula="of:=[.D111]-[.D1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8" office:value-type="float" office:value="880" calcext:value-type="float">
            <text:p>88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101851851851852" calcext:value-type="float">
            <text:p>0,00010185185185185200</text:p>
          </table:table-cell>
          <table:table-cell table:formula="of:=[.D112]-[.D111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8" office:value-type="float" office:value="888" calcext:value-type="float">
            <text:p>888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102777777777778" calcext:value-type="float">
            <text:p>0,00010277777777777800</text:p>
          </table:table-cell>
          <table:table-cell table:formula="of:=[.D113]-[.D1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8" office:value-type="float" office:value="896" calcext:value-type="float">
            <text:p>89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103703703703704" calcext:value-type="float">
            <text:p>0,00010370370370370400</text:p>
          </table:table-cell>
          <table:table-cell table:formula="of:=[.D114]-[.D113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8" office:value-type="float" office:value="904" calcext:value-type="float">
            <text:p>904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10462962962963" calcext:value-type="float">
            <text:p>0,00010462962962963000</text:p>
          </table:table-cell>
          <table:table-cell table:formula="of:=[.D115]-[.D1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8" office:value-type="float" office:value="912" calcext:value-type="float">
            <text:p>91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105555555555556" calcext:value-type="float">
            <text:p>0,00010555555555555600</text:p>
          </table:table-cell>
          <table:table-cell table:formula="of:=[.D116]-[.D115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8" office:value-type="float" office:value="920" calcext:value-type="float">
            <text:p>92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106481481481481" calcext:value-type="float">
            <text:p>0,00010648148148148100</text:p>
          </table:table-cell>
          <table:table-cell table:formula="of:=[.D117]-[.D1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8" office:value-type="float" office:value="928" calcext:value-type="float">
            <text:p>92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107407407407407" calcext:value-type="float">
            <text:p>0,00010740740740740700</text:p>
          </table:table-cell>
          <table:table-cell table:formula="of:=[.D118]-[.D1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8" office:value-type="float" office:value="936" calcext:value-type="float">
            <text:p>936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108333333333333" calcext:value-type="float">
            <text:p>0,00010833333333333300</text:p>
          </table:table-cell>
          <table:table-cell table:formula="of:=[.D119]-[.D118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8" office:value-type="float" office:value="944" calcext:value-type="float">
            <text:p>94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109259259259259" calcext:value-type="float">
            <text:p>0,00010925925925925900</text:p>
          </table:table-cell>
          <table:table-cell table:formula="of:=[.D120]-[.D1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8" office:value-type="float" office:value="952" calcext:value-type="float">
            <text:p>952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110185185185185" calcext:value-type="float">
            <text:p>0,00011018518518518500</text:p>
          </table:table-cell>
          <table:table-cell table:formula="of:=[.D121]-[.D120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8" office:value-type="float" office:value="960" calcext:value-type="float">
            <text:p>9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111111111111111" calcext:value-type="float">
            <text:p>0,00011111111111111100</text:p>
          </table:table-cell>
          <table:table-cell table:formula="of:=[.D122]-[.D1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8" office:value-type="float" office:value="968" calcext:value-type="float">
            <text:p>968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112037037037037" calcext:value-type="float">
            <text:p>0,00011203703703703700</text:p>
          </table:table-cell>
          <table:table-cell table:formula="of:=[.D123]-[.D1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8" office:value-type="float" office:value="976" calcext:value-type="float">
            <text:p>97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112962962962963" calcext:value-type="float">
            <text:p>0,00011296296296296300</text:p>
          </table:table-cell>
          <table:table-cell table:formula="of:=[.D124]-[.D123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8" office:value-type="float" office:value="984" calcext:value-type="float">
            <text:p>984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113888888888889" calcext:value-type="float">
            <text:p>0,00011388888888888900</text:p>
          </table:table-cell>
          <table:table-cell table:formula="of:=[.D125]-[.D1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8" office:value-type="float" office:value="992" calcext:value-type="float">
            <text:p>99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114814814814815" calcext:value-type="float">
            <text:p>0,00011481481481481500</text:p>
          </table:table-cell>
          <table:table-cell table:formula="of:=[.D126]-[.D125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8" office:value-type="float" office:value="1000" calcext:value-type="float">
            <text:p>10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115740740740741" calcext:value-type="float">
            <text:p>0,00011574074074074100</text:p>
          </table:table-cell>
          <table:table-cell table:formula="of:=[.D127]-[.D1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8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116666666666667" calcext:value-type="float">
            <text:p>0,00011666666666666700</text:p>
          </table:table-cell>
          <table:table-cell table:formula="of:=[.D128]-[.D127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8" office:value-type="float" office:value="1016" calcext:value-type="float">
            <text:p>1016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117592592592593" calcext:value-type="float">
            <text:p>0,00011759259259259300</text:p>
          </table:table-cell>
          <table:table-cell table:formula="of:=[.D129]-[.D1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8" office:value-type="float" office:value="1024" calcext:value-type="float">
            <text:p>102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118518518518519" calcext:value-type="float">
            <text:p>0,00011851851851851900</text:p>
          </table:table-cell>
          <table:table-cell table:formula="of:=[.D130]-[.D1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8" office:value-type="float" office:value="1032" calcext:value-type="float">
            <text:p>1032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119444444444444" calcext:value-type="float">
            <text:p>0,00011944444444444400</text:p>
          </table:table-cell>
          <table:table-cell table:formula="of:=[.D131]-[.D130]" office:value-type="float" office:value="0.000000925925925925934" calcext:value-type="float">
            <text:p>0,000000925925925925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8" office:value-type="float" office:value="1040" calcext:value-type="float">
            <text:p>104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12037037037037" calcext:value-type="float">
            <text:p>0,00012037037037037000</text:p>
          </table:table-cell>
          <table:table-cell table:formula="of:=[.D132]-[.D1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8" office:value-type="float" office:value="1048" calcext:value-type="float">
            <text:p>1048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121296296296296" calcext:value-type="float">
            <text:p>0,00012129629629629600</text:p>
          </table:table-cell>
          <table:table-cell table:formula="of:=[.D133]-[.D1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8" office:value-type="float" office:value="1056" calcext:value-type="float">
            <text:p>105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122222222222222" calcext:value-type="float">
            <text:p>0,00012222222222222200</text:p>
          </table:table-cell>
          <table:table-cell table:formula="of:=[.D134]-[.D1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8" office:value-type="float" office:value="1064" calcext:value-type="float">
            <text:p>1064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123148148148148" calcext:value-type="float">
            <text:p>0,00012314814814814800</text:p>
          </table:table-cell>
          <table:table-cell table:formula="of:=[.D135]-[.D134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8" office:value-type="float" office:value="1072" calcext:value-type="float">
            <text:p>107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124074074074074" calcext:value-type="float">
            <text:p>0,00012407407407407400</text:p>
          </table:table-cell>
          <table:table-cell table:formula="of:=[.D136]-[.D1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8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125" calcext:value-type="float">
            <text:p>0,00012500000000000000</text:p>
          </table:table-cell>
          <table:table-cell table:formula="of:=[.D137]-[.D1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8" office:value-type="float" office:value="1088" calcext:value-type="float">
            <text:p>108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125925925925926" calcext:value-type="float">
            <text:p>0,00012592592592592600</text:p>
          </table:table-cell>
          <table:table-cell table:formula="of:=[.D138]-[.D1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8" office:value-type="float" office:value="1096" calcext:value-type="float">
            <text:p>1096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126851851851852" calcext:value-type="float">
            <text:p>0,00012685185185185200</text:p>
          </table:table-cell>
          <table:table-cell table:formula="of:=[.D139]-[.D138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8" office:value-type="float" office:value="1104" calcext:value-type="float">
            <text:p>110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127777777777778" calcext:value-type="float">
            <text:p>0,00012777777777777800</text:p>
          </table:table-cell>
          <table:table-cell table:formula="of:=[.D140]-[.D1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8" office:value-type="float" office:value="1112" calcext:value-type="float">
            <text:p>1112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128703703703704" calcext:value-type="float">
            <text:p>0,00012870370370370400</text:p>
          </table:table-cell>
          <table:table-cell table:formula="of:=[.D141]-[.D1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8" office:value-type="float" office:value="1120" calcext:value-type="float">
            <text:p>11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12962962962963" calcext:value-type="float">
            <text:p>0,00012962962962963000</text:p>
          </table:table-cell>
          <table:table-cell table:formula="of:=[.D142]-[.D1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8" office:value-type="float" office:value="1128" calcext:value-type="float">
            <text:p>1128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130555555555556" calcext:value-type="float">
            <text:p>0,00013055555555555600</text:p>
          </table:table-cell>
          <table:table-cell table:formula="of:=[.D143]-[.D1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8" office:value-type="float" office:value="1136" calcext:value-type="float">
            <text:p>113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131481481481481" calcext:value-type="float">
            <text:p>0,00013148148148148100</text:p>
          </table:table-cell>
          <table:table-cell table:formula="of:=[.D144]-[.D143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8" office:value-type="float" office:value="1144" calcext:value-type="float">
            <text:p>1144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132407407407407" calcext:value-type="float">
            <text:p>0,00013240740740740700</text:p>
          </table:table-cell>
          <table:table-cell table:formula="of:=[.D145]-[.D1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8" office:value-type="float" office:value="1152" calcext:value-type="float">
            <text:p>115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133333333333333" calcext:value-type="float">
            <text:p>0,00013333333333333300</text:p>
          </table:table-cell>
          <table:table-cell table:formula="of:=[.D146]-[.D1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8" office:value-type="float" office:value="1160" calcext:value-type="float">
            <text:p>116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134259259259259" calcext:value-type="float">
            <text:p>0,00013425925925925900</text:p>
          </table:table-cell>
          <table:table-cell table:formula="of:=[.D147]-[.D1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8" office:value-type="float" office:value="1168" calcext:value-type="float">
            <text:p>116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135185185185185" calcext:value-type="float">
            <text:p>0,00013518518518518500</text:p>
          </table:table-cell>
          <table:table-cell table:formula="of:=[.D148]-[.D1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8" office:value-type="float" office:value="1176" calcext:value-type="float">
            <text:p>1176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136111111111111" calcext:value-type="float">
            <text:p>0,00013611111111111100</text:p>
          </table:table-cell>
          <table:table-cell table:formula="of:=[.D149]-[.D148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8" office:value-type="float" office:value="1184" calcext:value-type="float">
            <text:p>118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137037037037037" calcext:value-type="float">
            <text:p>0,00013703703703703700</text:p>
          </table:table-cell>
          <table:table-cell table:formula="of:=[.D150]-[.D1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8" office:value-type="float" office:value="1192" calcext:value-type="float">
            <text:p>1192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137962962962963" calcext:value-type="float">
            <text:p>0,00013796296296296300</text:p>
          </table:table-cell>
          <table:table-cell table:formula="of:=[.D151]-[.D1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8" office:value-type="float" office:value="1200" calcext:value-type="float">
            <text:p>12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138888888888889" calcext:value-type="float">
            <text:p>0,00013888888888888900</text:p>
          </table:table-cell>
          <table:table-cell table:formula="of:=[.D152]-[.D1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8" office:value-type="float" office:value="1208" calcext:value-type="float">
            <text:p>1208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139814814814815" calcext:value-type="float">
            <text:p>0,00013981481481481500</text:p>
          </table:table-cell>
          <table:table-cell table:formula="of:=[.D153]-[.D1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8" office:value-type="float" office:value="1216" calcext:value-type="float">
            <text:p>121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140740740740741" calcext:value-type="float">
            <text:p>0,00014074074074074100</text:p>
          </table:table-cell>
          <table:table-cell table:formula="of:=[.D154]-[.D153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8" office:value-type="float" office:value="1224" calcext:value-type="float">
            <text:p>1224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141666666666667" calcext:value-type="float">
            <text:p>0,00014166666666666700</text:p>
          </table:table-cell>
          <table:table-cell table:formula="of:=[.D155]-[.D1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8" office:value-type="float" office:value="1232" calcext:value-type="float">
            <text:p>123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142592592592593" calcext:value-type="float">
            <text:p>0,00014259259259259300</text:p>
          </table:table-cell>
          <table:table-cell table:formula="of:=[.D156]-[.D1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8" office:value-type="float" office:value="1240" calcext:value-type="float">
            <text:p>124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143518518518519" calcext:value-type="float">
            <text:p>0,00014351851851851900</text:p>
          </table:table-cell>
          <table:table-cell table:formula="of:=[.D157]-[.D1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8" office:value-type="float" office:value="1248" calcext:value-type="float">
            <text:p>124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144444444444444" calcext:value-type="float">
            <text:p>0,00014444444444444400</text:p>
          </table:table-cell>
          <table:table-cell table:formula="of:=[.D158]-[.D1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8" office:value-type="float" office:value="1256" calcext:value-type="float">
            <text:p>1256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14537037037037" calcext:value-type="float">
            <text:p>0,00014537037037037000</text:p>
          </table:table-cell>
          <table:table-cell table:formula="of:=[.D159]-[.D158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8" office:value-type="float" office:value="1264" calcext:value-type="float">
            <text:p>126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146296296296296" calcext:value-type="float">
            <text:p>0,00014629629629629600</text:p>
          </table:table-cell>
          <table:table-cell table:formula="of:=[.D160]-[.D1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8" office:value-type="float" office:value="1272" calcext:value-type="float">
            <text:p>1272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147222222222222" calcext:value-type="float">
            <text:p>0,00014722222222222200</text:p>
          </table:table-cell>
          <table:table-cell table:formula="of:=[.D161]-[.D1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8" office:value-type="float" office:value="1280" calcext:value-type="float">
            <text:p>12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148148148148148" calcext:value-type="float">
            <text:p>0,00014814814814814800</text:p>
          </table:table-cell>
          <table:table-cell table:formula="of:=[.D162]-[.D1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8" office:value-type="float" office:value="1288" calcext:value-type="float">
            <text:p>1288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149074074074074" calcext:value-type="float">
            <text:p>0,00014907407407407400</text:p>
          </table:table-cell>
          <table:table-cell table:formula="of:=[.D163]-[.D1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8" office:value-type="float" office:value="1296" calcext:value-type="float">
            <text:p>129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15" calcext:value-type="float">
            <text:p>0,00015000000000000000</text:p>
          </table:table-cell>
          <table:table-cell table:formula="of:=[.D164]-[.D163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8" office:value-type="float" office:value="1304" calcext:value-type="float">
            <text:p>1304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150925925925926" calcext:value-type="float">
            <text:p>0,00015092592592592600</text:p>
          </table:table-cell>
          <table:table-cell table:formula="of:=[.D165]-[.D1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8" office:value-type="float" office:value="1312" calcext:value-type="float">
            <text:p>131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151851851851852" calcext:value-type="float">
            <text:p>0,00015185185185185200</text:p>
          </table:table-cell>
          <table:table-cell table:formula="of:=[.D166]-[.D1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8" office:value-type="float" office:value="1320" calcext:value-type="float">
            <text:p>132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152777777777778" calcext:value-type="float">
            <text:p>0,00015277777777777800</text:p>
          </table:table-cell>
          <table:table-cell table:formula="of:=[.D167]-[.D1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8" office:value-type="float" office:value="1328" calcext:value-type="float">
            <text:p>132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153703703703704" calcext:value-type="float">
            <text:p>0,00015370370370370400</text:p>
          </table:table-cell>
          <table:table-cell table:formula="of:=[.D168]-[.D167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8" office:value-type="float" office:value="1336" calcext:value-type="float">
            <text:p>1336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15462962962963" calcext:value-type="float">
            <text:p>0,00015462962962963000</text:p>
          </table:table-cell>
          <table:table-cell table:formula="of:=[.D169]-[.D1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8" office:value-type="float" office:value="1344" calcext:value-type="float">
            <text:p>134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155555555555556" calcext:value-type="float">
            <text:p>0,00015555555555555600</text:p>
          </table:table-cell>
          <table:table-cell table:formula="of:=[.D170]-[.D1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8" office:value-type="float" office:value="1352" calcext:value-type="float">
            <text:p>1352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156481481481481" calcext:value-type="float">
            <text:p>0,00015648148148148100</text:p>
          </table:table-cell>
          <table:table-cell table:formula="of:=[.D171]-[.D1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8" office:value-type="float" office:value="1360" calcext:value-type="float">
            <text:p>136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157407407407407" calcext:value-type="float">
            <text:p>0,00015740740740740700</text:p>
          </table:table-cell>
          <table:table-cell table:formula="of:=[.D172]-[.D1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8" office:value-type="float" office:value="1368" calcext:value-type="float">
            <text:p>1368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158333333333333" calcext:value-type="float">
            <text:p>0,00015833333333333300</text:p>
          </table:table-cell>
          <table:table-cell table:formula="of:=[.D173]-[.D172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8" office:value-type="float" office:value="1376" calcext:value-type="float">
            <text:p>137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159259259259259" calcext:value-type="float">
            <text:p>0,00015925925925925900</text:p>
          </table:table-cell>
          <table:table-cell table:formula="of:=[.D174]-[.D1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8" office:value-type="float" office:value="1384" calcext:value-type="float">
            <text:p>1384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160185185185185" calcext:value-type="float">
            <text:p>0,00016018518518518500</text:p>
          </table:table-cell>
          <table:table-cell table:formula="of:=[.D175]-[.D1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8" office:value-type="float" office:value="1392" calcext:value-type="float">
            <text:p>139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161111111111111" calcext:value-type="float">
            <text:p>0,00016111111111111100</text:p>
          </table:table-cell>
          <table:table-cell table:formula="of:=[.D176]-[.D1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8" office:value-type="float" office:value="1400" calcext:value-type="float">
            <text:p>14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162037037037037" calcext:value-type="float">
            <text:p>0,00016203703703703700</text:p>
          </table:table-cell>
          <table:table-cell table:formula="of:=[.D177]-[.D1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8" office:value-type="float" office:value="1408" calcext:value-type="float">
            <text:p>140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162962962962963" calcext:value-type="float">
            <text:p>0,00016296296296296300</text:p>
          </table:table-cell>
          <table:table-cell table:formula="of:=[.D178]-[.D177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8" office:value-type="float" office:value="1416" calcext:value-type="float">
            <text:p>1416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163888888888889" calcext:value-type="float">
            <text:p>0,00016388888888888900</text:p>
          </table:table-cell>
          <table:table-cell table:formula="of:=[.D179]-[.D1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8" office:value-type="float" office:value="1424" calcext:value-type="float">
            <text:p>142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164814814814815" calcext:value-type="float">
            <text:p>0,00016481481481481500</text:p>
          </table:table-cell>
          <table:table-cell table:formula="of:=[.D180]-[.D1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8" office:value-type="float" office:value="1432" calcext:value-type="float">
            <text:p>1432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165740740740741" calcext:value-type="float">
            <text:p>0,00016574074074074100</text:p>
          </table:table-cell>
          <table:table-cell table:formula="of:=[.D181]-[.D1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8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166666666666667" calcext:value-type="float">
            <text:p>0,00016666666666666700</text:p>
          </table:table-cell>
          <table:table-cell table:formula="of:=[.D182]-[.D1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8" office:value-type="float" office:value="1448" calcext:value-type="float">
            <text:p>1448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167592592592593" calcext:value-type="float">
            <text:p>0,00016759259259259300</text:p>
          </table:table-cell>
          <table:table-cell table:formula="of:=[.D183]-[.D182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8" office:value-type="float" office:value="1456" calcext:value-type="float">
            <text:p>145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168518518518519" calcext:value-type="float">
            <text:p>0,00016851851851851900</text:p>
          </table:table-cell>
          <table:table-cell table:formula="of:=[.D184]-[.D1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8" office:value-type="float" office:value="1464" calcext:value-type="float">
            <text:p>1464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169444444444444" calcext:value-type="float">
            <text:p>0,00016944444444444400</text:p>
          </table:table-cell>
          <table:table-cell table:formula="of:=[.D185]-[.D1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8" office:value-type="float" office:value="1472" calcext:value-type="float">
            <text:p>147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17037037037037" calcext:value-type="float">
            <text:p>0,00017037037037037000</text:p>
          </table:table-cell>
          <table:table-cell table:formula="of:=[.D186]-[.D1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8" office:value-type="float" office:value="1480" calcext:value-type="float">
            <text:p>148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171296296296296" calcext:value-type="float">
            <text:p>0,00017129629629629600</text:p>
          </table:table-cell>
          <table:table-cell table:formula="of:=[.D187]-[.D1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8" office:value-type="float" office:value="1488" calcext:value-type="float">
            <text:p>148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172222222222222" calcext:value-type="float">
            <text:p>0,00017222222222222200</text:p>
          </table:table-cell>
          <table:table-cell table:formula="of:=[.D188]-[.D187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8" office:value-type="float" office:value="1496" calcext:value-type="float">
            <text:p>1496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173148148148148" calcext:value-type="float">
            <text:p>0,00017314814814814800</text:p>
          </table:table-cell>
          <table:table-cell table:formula="of:=[.D189]-[.D1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8" office:value-type="float" office:value="1504" calcext:value-type="float">
            <text:p>150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174074074074074" calcext:value-type="float">
            <text:p>0,00017407407407407400</text:p>
          </table:table-cell>
          <table:table-cell table:formula="of:=[.D190]-[.D1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8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175" calcext:value-type="float">
            <text:p>0,00017500000000000000</text:p>
          </table:table-cell>
          <table:table-cell table:formula="of:=[.D191]-[.D1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8" office:value-type="float" office:value="1520" calcext:value-type="float">
            <text:p>152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175925925925926" calcext:value-type="float">
            <text:p>0,00017592592592592600</text:p>
          </table:table-cell>
          <table:table-cell table:formula="of:=[.D192]-[.D1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8" office:value-type="float" office:value="1528" calcext:value-type="float">
            <text:p>1528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176851851851852" calcext:value-type="float">
            <text:p>0,00017685185185185200</text:p>
          </table:table-cell>
          <table:table-cell table:formula="of:=[.D193]-[.D192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8" office:value-type="float" office:value="1536" calcext:value-type="float">
            <text:p>153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177777777777778" calcext:value-type="float">
            <text:p>0,00017777777777777800</text:p>
          </table:table-cell>
          <table:table-cell table:formula="of:=[.D194]-[.D1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8" office:value-type="float" office:value="1544" calcext:value-type="float">
            <text:p>1544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178703703703704" calcext:value-type="float">
            <text:p>0,00017870370370370400</text:p>
          </table:table-cell>
          <table:table-cell table:formula="of:=[.D195]-[.D1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8" office:value-type="float" office:value="1552" calcext:value-type="float">
            <text:p>155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17962962962963" calcext:value-type="float">
            <text:p>0,00017962962962963000</text:p>
          </table:table-cell>
          <table:table-cell table:formula="of:=[.D196]-[.D1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8" office:value-type="float" office:value="1560" calcext:value-type="float">
            <text:p>156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180555555555556" calcext:value-type="float">
            <text:p>0,00018055555555555600</text:p>
          </table:table-cell>
          <table:table-cell table:formula="of:=[.D197]-[.D196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8" office:value-type="float" office:value="1568" calcext:value-type="float">
            <text:p>156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181481481481482" calcext:value-type="float">
            <text:p>0,00018148148148148100</text:p>
          </table:table-cell>
          <table:table-cell table:formula="of:=[.D198]-[.D1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8" office:value-type="float" office:value="1576" calcext:value-type="float">
            <text:p>1576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182407407407407" calcext:value-type="float">
            <text:p>0,00018240740740740700</text:p>
          </table:table-cell>
          <table:table-cell table:formula="of:=[.D199]-[.D1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8" office:value-type="float" office:value="1584" calcext:value-type="float">
            <text:p>158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183333333333333" calcext:value-type="float">
            <text:p>0,00018333333333333300</text:p>
          </table:table-cell>
          <table:table-cell table:formula="of:=[.D200]-[.D1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8" office:value-type="float" office:value="1592" calcext:value-type="float">
            <text:p>1592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184259259259259" calcext:value-type="float">
            <text:p>0,00018425925925925900</text:p>
          </table:table-cell>
          <table:table-cell table:formula="of:=[.D201]-[.D2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8" office:value-type="float" office:value="1600" calcext:value-type="float">
            <text:p>1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185185185185185" calcext:value-type="float">
            <text:p>0,00018518518518518500</text:p>
          </table:table-cell>
          <table:table-cell table:formula="of:=[.D202]-[.D201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8" office:value-type="float" office:value="1608" calcext:value-type="float">
            <text:p>1608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186111111111111" calcext:value-type="float">
            <text:p>0,00018611111111111100</text:p>
          </table:table-cell>
          <table:table-cell table:formula="of:=[.D203]-[.D2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8" office:value-type="float" office:value="1616" calcext:value-type="float">
            <text:p>161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187037037037037" calcext:value-type="float">
            <text:p>0,00018703703703703700</text:p>
          </table:table-cell>
          <table:table-cell table:formula="of:=[.D204]-[.D2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8" office:value-type="float" office:value="1624" calcext:value-type="float">
            <text:p>1624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187962962962963" calcext:value-type="float">
            <text:p>0,00018796296296296300</text:p>
          </table:table-cell>
          <table:table-cell table:formula="of:=[.D205]-[.D2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8" office:value-type="float" office:value="1632" calcext:value-type="float">
            <text:p>163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188888888888889" calcext:value-type="float">
            <text:p>0,00018888888888888900</text:p>
          </table:table-cell>
          <table:table-cell table:formula="of:=[.D206]-[.D2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8" office:value-type="float" office:value="1640" calcext:value-type="float">
            <text:p>164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189814814814815" calcext:value-type="float">
            <text:p>0,00018981481481481500</text:p>
          </table:table-cell>
          <table:table-cell table:formula="of:=[.D207]-[.D206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8" office:value-type="float" office:value="1648" calcext:value-type="float">
            <text:p>164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190740740740741" calcext:value-type="float">
            <text:p>0,00019074074074074100</text:p>
          </table:table-cell>
          <table:table-cell table:formula="of:=[.D208]-[.D2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8" office:value-type="float" office:value="1656" calcext:value-type="float">
            <text:p>1656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191666666666667" calcext:value-type="float">
            <text:p>0,00019166666666666700</text:p>
          </table:table-cell>
          <table:table-cell table:formula="of:=[.D209]-[.D2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8" office:value-type="float" office:value="1664" calcext:value-type="float">
            <text:p>166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192592592592593" calcext:value-type="float">
            <text:p>0,00019259259259259300</text:p>
          </table:table-cell>
          <table:table-cell table:formula="of:=[.D210]-[.D2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8" office:value-type="float" office:value="1672" calcext:value-type="float">
            <text:p>1672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193518518518519" calcext:value-type="float">
            <text:p>0,00019351851851851900</text:p>
          </table:table-cell>
          <table:table-cell table:formula="of:=[.D211]-[.D2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8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194444444444444" calcext:value-type="float">
            <text:p>0,00019444444444444400</text:p>
          </table:table-cell>
          <table:table-cell table:formula="of:=[.D212]-[.D211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8" office:value-type="float" office:value="1688" calcext:value-type="float">
            <text:p>1688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19537037037037" calcext:value-type="float">
            <text:p>0,00019537037037037000</text:p>
          </table:table-cell>
          <table:table-cell table:formula="of:=[.D213]-[.D2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8" office:value-type="float" office:value="1696" calcext:value-type="float">
            <text:p>169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196296296296296" calcext:value-type="float">
            <text:p>0,00019629629629629600</text:p>
          </table:table-cell>
          <table:table-cell table:formula="of:=[.D214]-[.D2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8" office:value-type="float" office:value="1704" calcext:value-type="float">
            <text:p>1704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197222222222222" calcext:value-type="float">
            <text:p>0,00019722222222222200</text:p>
          </table:table-cell>
          <table:table-cell table:formula="of:=[.D215]-[.D2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8" office:value-type="float" office:value="1712" calcext:value-type="float">
            <text:p>171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198148148148148" calcext:value-type="float">
            <text:p>0,00019814814814814800</text:p>
          </table:table-cell>
          <table:table-cell table:formula="of:=[.D216]-[.D2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8" office:value-type="float" office:value="1720" calcext:value-type="float">
            <text:p>172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199074074074074" calcext:value-type="float">
            <text:p>0,00019907407407407400</text:p>
          </table:table-cell>
          <table:table-cell table:formula="of:=[.D217]-[.D216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8" office:value-type="float" office:value="1728" calcext:value-type="float">
            <text:p>172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2" calcext:value-type="float">
            <text:p>0,00020000000000000000</text:p>
          </table:table-cell>
          <table:table-cell table:formula="of:=[.D218]-[.D2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8" office:value-type="float" office:value="1736" calcext:value-type="float">
            <text:p>1736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200925925925926" calcext:value-type="float">
            <text:p>0,00020092592592592600</text:p>
          </table:table-cell>
          <table:table-cell table:formula="of:=[.D219]-[.D2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8" office:value-type="float" office:value="1744" calcext:value-type="float">
            <text:p>174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201851851851852" calcext:value-type="float">
            <text:p>0,00020185185185185200</text:p>
          </table:table-cell>
          <table:table-cell table:formula="of:=[.D220]-[.D2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8" office:value-type="float" office:value="1752" calcext:value-type="float">
            <text:p>1752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202777777777778" calcext:value-type="float">
            <text:p>0,00020277777777777800</text:p>
          </table:table-cell>
          <table:table-cell table:formula="of:=[.D221]-[.D2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8" office:value-type="float" office:value="1760" calcext:value-type="float">
            <text:p>17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203703703703704" calcext:value-type="float">
            <text:p>0,00020370370370370400</text:p>
          </table:table-cell>
          <table:table-cell table:formula="of:=[.D222]-[.D221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8" office:value-type="float" office:value="1768" calcext:value-type="float">
            <text:p>1768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20462962962963" calcext:value-type="float">
            <text:p>0,00020462962962963000</text:p>
          </table:table-cell>
          <table:table-cell table:formula="of:=[.D223]-[.D2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8" office:value-type="float" office:value="1776" calcext:value-type="float">
            <text:p>177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205555555555556" calcext:value-type="float">
            <text:p>0,00020555555555555600</text:p>
          </table:table-cell>
          <table:table-cell table:formula="of:=[.D224]-[.D2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8" office:value-type="float" office:value="1784" calcext:value-type="float">
            <text:p>1784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206481481481481" calcext:value-type="float">
            <text:p>0,00020648148148148100</text:p>
          </table:table-cell>
          <table:table-cell table:formula="of:=[.D225]-[.D2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8" office:value-type="float" office:value="1792" calcext:value-type="float">
            <text:p>179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207407407407407" calcext:value-type="float">
            <text:p>0,00020740740740740700</text:p>
          </table:table-cell>
          <table:table-cell table:formula="of:=[.D226]-[.D225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8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208333333333333" calcext:value-type="float">
            <text:p>0,00020833333333333300</text:p>
          </table:table-cell>
          <table:table-cell table:formula="of:=[.D227]-[.D2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8" office:value-type="float" office:value="1808" calcext:value-type="float">
            <text:p>180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209259259259259" calcext:value-type="float">
            <text:p>0,00020925925925925900</text:p>
          </table:table-cell>
          <table:table-cell table:formula="of:=[.D228]-[.D2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8" office:value-type="float" office:value="1816" calcext:value-type="float">
            <text:p>1816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210185185185185" calcext:value-type="float">
            <text:p>0,00021018518518518500</text:p>
          </table:table-cell>
          <table:table-cell table:formula="of:=[.D229]-[.D2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8" office:value-type="float" office:value="1824" calcext:value-type="float">
            <text:p>182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211111111111111" calcext:value-type="float">
            <text:p>0,00021111111111111100</text:p>
          </table:table-cell>
          <table:table-cell table:formula="of:=[.D230]-[.D2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8" office:value-type="float" office:value="1832" calcext:value-type="float">
            <text:p>1832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212037037037037" calcext:value-type="float">
            <text:p>0,00021203703703703700</text:p>
          </table:table-cell>
          <table:table-cell table:formula="of:=[.D231]-[.D230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8" office:value-type="float" office:value="1840" calcext:value-type="float">
            <text:p>184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212962962962963" calcext:value-type="float">
            <text:p>0,00021296296296296300</text:p>
          </table:table-cell>
          <table:table-cell table:formula="of:=[.D232]-[.D2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8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213888888888889" calcext:value-type="float">
            <text:p>0,00021388888888888900</text:p>
          </table:table-cell>
          <table:table-cell table:formula="of:=[.D233]-[.D2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8" office:value-type="float" office:value="1856" calcext:value-type="float">
            <text:p>185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214814814814815" calcext:value-type="float">
            <text:p>0,00021481481481481500</text:p>
          </table:table-cell>
          <table:table-cell table:formula="of:=[.D234]-[.D2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8" office:value-type="float" office:value="1864" calcext:value-type="float">
            <text:p>1864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215740740740741" calcext:value-type="float">
            <text:p>0,00021574074074074100</text:p>
          </table:table-cell>
          <table:table-cell table:formula="of:=[.D235]-[.D2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8" office:value-type="float" office:value="1872" calcext:value-type="float">
            <text:p>187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216666666666667" calcext:value-type="float">
            <text:p>0,00021666666666666700</text:p>
          </table:table-cell>
          <table:table-cell table:formula="of:=[.D236]-[.D235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8" office:value-type="float" office:value="1880" calcext:value-type="float">
            <text:p>188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217592592592593" calcext:value-type="float">
            <text:p>0,00021759259259259300</text:p>
          </table:table-cell>
          <table:table-cell table:formula="of:=[.D237]-[.D2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8" office:value-type="float" office:value="1888" calcext:value-type="float">
            <text:p>188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218518518518519" calcext:value-type="float">
            <text:p>0,00021851851851851900</text:p>
          </table:table-cell>
          <table:table-cell table:formula="of:=[.D238]-[.D2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8" office:value-type="float" office:value="1896" calcext:value-type="float">
            <text:p>1896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219444444444444" calcext:value-type="float">
            <text:p>0,00021944444444444400</text:p>
          </table:table-cell>
          <table:table-cell table:formula="of:=[.D239]-[.D2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8" office:value-type="float" office:value="1904" calcext:value-type="float">
            <text:p>190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22037037037037" calcext:value-type="float">
            <text:p>0,00022037037037037000</text:p>
          </table:table-cell>
          <table:table-cell table:formula="of:=[.D240]-[.D2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8" office:value-type="float" office:value="1912" calcext:value-type="float">
            <text:p>1912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221296296296296" calcext:value-type="float">
            <text:p>0,00022129629629629600</text:p>
          </table:table-cell>
          <table:table-cell table:formula="of:=[.D241]-[.D240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8" office:value-type="float" office:value="1920" calcext:value-type="float">
            <text:p>19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222222222222222" calcext:value-type="float">
            <text:p>0,00022222222222222200</text:p>
          </table:table-cell>
          <table:table-cell table:formula="of:=[.D242]-[.D2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8" office:value-type="float" office:value="1928" calcext:value-type="float">
            <text:p>1928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223148148148148" calcext:value-type="float">
            <text:p>0,00022314814814814800</text:p>
          </table:table-cell>
          <table:table-cell table:formula="of:=[.D243]-[.D2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8" office:value-type="float" office:value="1936" calcext:value-type="float">
            <text:p>193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224074074074074" calcext:value-type="float">
            <text:p>0,00022407407407407400</text:p>
          </table:table-cell>
          <table:table-cell table:formula="of:=[.D244]-[.D2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8" office:value-type="float" office:value="1944" calcext:value-type="float">
            <text:p>1944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225" calcext:value-type="float">
            <text:p>0,00022500000000000000</text:p>
          </table:table-cell>
          <table:table-cell table:formula="of:=[.D245]-[.D2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8" office:value-type="float" office:value="1952" calcext:value-type="float">
            <text:p>195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225925925925926" calcext:value-type="float">
            <text:p>0,00022592592592592600</text:p>
          </table:table-cell>
          <table:table-cell table:formula="of:=[.D246]-[.D245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8" office:value-type="float" office:value="1960" calcext:value-type="float">
            <text:p>196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226851851851852" calcext:value-type="float">
            <text:p>0,00022685185185185200</text:p>
          </table:table-cell>
          <table:table-cell table:formula="of:=[.D247]-[.D2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8" office:value-type="float" office:value="1968" calcext:value-type="float">
            <text:p>196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227777777777778" calcext:value-type="float">
            <text:p>0,00022777777777777800</text:p>
          </table:table-cell>
          <table:table-cell table:formula="of:=[.D248]-[.D2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8" office:value-type="float" office:value="1976" calcext:value-type="float">
            <text:p>1976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228703703703704" calcext:value-type="float">
            <text:p>0,00022870370370370400</text:p>
          </table:table-cell>
          <table:table-cell table:formula="of:=[.D249]-[.D2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8" office:value-type="float" office:value="1984" calcext:value-type="float">
            <text:p>198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22962962962963" calcext:value-type="float">
            <text:p>0,00022962962962963000</text:p>
          </table:table-cell>
          <table:table-cell table:formula="of:=[.D250]-[.D2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8" office:value-type="float" office:value="1992" calcext:value-type="float">
            <text:p>1992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230555555555556" calcext:value-type="float">
            <text:p>0,00023055555555555600</text:p>
          </table:table-cell>
          <table:table-cell table:formula="of:=[.D251]-[.D250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8" office:value-type="float" office:value="2000" calcext:value-type="float">
            <text:p>2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231481481481482" calcext:value-type="float">
            <text:p>0,00023148148148148200</text:p>
          </table:table-cell>
          <table:table-cell table:formula="of:=[.D252]-[.D2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8" office:value-type="float" office:value="2008" calcext:value-type="float">
            <text:p>2008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232407407407407" calcext:value-type="float">
            <text:p>0,00023240740740740700</text:p>
          </table:table-cell>
          <table:table-cell table:formula="of:=[.D253]-[.D2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8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233333333333333" calcext:value-type="float">
            <text:p>0,00023333333333333300</text:p>
          </table:table-cell>
          <table:table-cell table:formula="of:=[.D254]-[.D2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8" office:value-type="float" office:value="2024" calcext:value-type="float">
            <text:p>2024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234259259259259" calcext:value-type="float">
            <text:p>0,00023425925925925900</text:p>
          </table:table-cell>
          <table:table-cell table:formula="of:=[.D255]-[.D254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8" office:value-type="float" office:value="2032" calcext:value-type="float">
            <text:p>203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235185185185185" calcext:value-type="float">
            <text:p>0,00023518518518518500</text:p>
          </table:table-cell>
          <table:table-cell table:formula="of:=[.D256]-[.D2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8" office:value-type="float" office:value="2040" calcext:value-type="float">
            <text:p>204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236111111111111" calcext:value-type="float">
            <text:p>0,00023611111111111100</text:p>
          </table:table-cell>
          <table:table-cell table:formula="of:=[.D257]-[.D2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8" office:value-type="float" office:value="2048" calcext:value-type="float">
            <text:p>204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237037037037037" calcext:value-type="float">
            <text:p>0,00023703703703703700</text:p>
          </table:table-cell>
          <table:table-cell table:formula="of:=[.D258]-[.D2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8" office:value-type="float" office:value="2056" calcext:value-type="float">
            <text:p>2056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237962962962963" calcext:value-type="float">
            <text:p>0,00023796296296296300</text:p>
          </table:table-cell>
          <table:table-cell table:formula="of:=[.D259]-[.D2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8" office:value-type="float" office:value="2064" calcext:value-type="float">
            <text:p>206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238888888888889" calcext:value-type="float">
            <text:p>0,00023888888888888900</text:p>
          </table:table-cell>
          <table:table-cell table:formula="of:=[.D260]-[.D259]" office:value-type="float" office:value="0.000000925925925925947" calcext:value-type="float">
            <text:p>0,0000009259259259259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8" office:value-type="float" office:value="2072" calcext:value-type="float">
            <text:p>2072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239814814814815" calcext:value-type="float">
            <text:p>0,00023981481481481500</text:p>
          </table:table-cell>
          <table:table-cell table:formula="of:=[.D261]-[.D2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8" office:value-type="float" office:value="2080" calcext:value-type="float">
            <text:p>20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240740740740741" calcext:value-type="float">
            <text:p>0,00024074074074074100</text:p>
          </table:table-cell>
          <table:table-cell table:formula="of:=[.D262]-[.D2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8" office:value-type="float" office:value="2088" calcext:value-type="float">
            <text:p>2088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241666666666667" calcext:value-type="float">
            <text:p>0,00024166666666666700</text:p>
          </table:table-cell>
          <table:table-cell table:formula="of:=[.D263]-[.D2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8" office:value-type="float" office:value="2096" calcext:value-type="float">
            <text:p>209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242592592592593" calcext:value-type="float">
            <text:p>0,00024259259259259300</text:p>
          </table:table-cell>
          <table:table-cell table:formula="of:=[.D264]-[.D2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8" office:value-type="float" office:value="2104" calcext:value-type="float">
            <text:p>2104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243518518518519" calcext:value-type="float">
            <text:p>0,00024351851851851900</text:p>
          </table:table-cell>
          <table:table-cell table:formula="of:=[.D265]-[.D2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8" office:value-type="float" office:value="2112" calcext:value-type="float">
            <text:p>211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244444444444444" calcext:value-type="float">
            <text:p>0,00024444444444444400</text:p>
          </table:table-cell>
          <table:table-cell table:formula="of:=[.D266]-[.D2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8" office:value-type="float" office:value="2120" calcext:value-type="float">
            <text:p>212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24537037037037" calcext:value-type="float">
            <text:p>0,00024537037037037000</text:p>
          </table:table-cell>
          <table:table-cell table:formula="of:=[.D267]-[.D2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8" office:value-type="float" office:value="2128" calcext:value-type="float">
            <text:p>212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246296296296296" calcext:value-type="float">
            <text:p>0,00024629629629629600</text:p>
          </table:table-cell>
          <table:table-cell table:formula="of:=[.D268]-[.D267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8" office:value-type="float" office:value="2136" calcext:value-type="float">
            <text:p>2136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247222222222222" calcext:value-type="float">
            <text:p>0,00024722222222222200</text:p>
          </table:table-cell>
          <table:table-cell table:formula="of:=[.D269]-[.D2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8" office:value-type="float" office:value="2144" calcext:value-type="float">
            <text:p>214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248148148148148" calcext:value-type="float">
            <text:p>0,00024814814814814800</text:p>
          </table:table-cell>
          <table:table-cell table:formula="of:=[.D270]-[.D2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8" office:value-type="float" office:value="2152" calcext:value-type="float">
            <text:p>2152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249074074074074" calcext:value-type="float">
            <text:p>0,00024907407407407400</text:p>
          </table:table-cell>
          <table:table-cell table:formula="of:=[.D271]-[.D2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8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25" calcext:value-type="float">
            <text:p>0,00025000000000000000</text:p>
          </table:table-cell>
          <table:table-cell table:formula="of:=[.D272]-[.D2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8" office:value-type="float" office:value="2168" calcext:value-type="float">
            <text:p>2168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250925925925926" calcext:value-type="float">
            <text:p>0,00025092592592592600</text:p>
          </table:table-cell>
          <table:table-cell table:formula="of:=[.D273]-[.D2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8" office:value-type="float" office:value="2176" calcext:value-type="float">
            <text:p>217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251851851851852" calcext:value-type="float">
            <text:p>0,00025185185185185200</text:p>
          </table:table-cell>
          <table:table-cell table:formula="of:=[.D274]-[.D2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8" office:value-type="float" office:value="2184" calcext:value-type="float">
            <text:p>2184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252777777777778" calcext:value-type="float">
            <text:p>0,00025277777777777800</text:p>
          </table:table-cell>
          <table:table-cell table:formula="of:=[.D275]-[.D2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8" office:value-type="float" office:value="2192" calcext:value-type="float">
            <text:p>2192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253703703703704" calcext:value-type="float">
            <text:p>0,00025370370370370400</text:p>
          </table:table-cell>
          <table:table-cell table:formula="of:=[.D276]-[.D2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8" office:value-type="float" office:value="2200" calcext:value-type="float">
            <text:p>22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25462962962963" calcext:value-type="float">
            <text:p>0,00025462962962963000</text:p>
          </table:table-cell>
          <table:table-cell table:formula="of:=[.D277]-[.D276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8" office:value-type="float" office:value="2208" calcext:value-type="float">
            <text:p>2208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255555555555556" calcext:value-type="float">
            <text:p>0,00025555555555555600</text:p>
          </table:table-cell>
          <table:table-cell table:formula="of:=[.D278]-[.D2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8" office:value-type="float" office:value="2216" calcext:value-type="float">
            <text:p>2216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256481481481482" calcext:value-type="float">
            <text:p>0,00025648148148148200</text:p>
          </table:table-cell>
          <table:table-cell table:formula="of:=[.D279]-[.D2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8" office:value-type="float" office:value="2224" calcext:value-type="float">
            <text:p>2224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257407407407407" calcext:value-type="float">
            <text:p>0,00025740740740740700</text:p>
          </table:table-cell>
          <table:table-cell table:formula="of:=[.D280]-[.D2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8" office:value-type="float" office:value="2232" calcext:value-type="float">
            <text:p>2232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258333333333333" calcext:value-type="float">
            <text:p>0,00025833333333333300</text:p>
          </table:table-cell>
          <table:table-cell table:formula="of:=[.D281]-[.D2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8" office:value-type="float" office:value="2240" calcext:value-type="float">
            <text:p>224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259259259259259" calcext:value-type="float">
            <text:p>0,00025925925925925900</text:p>
          </table:table-cell>
          <table:table-cell table:formula="of:=[.D282]-[.D2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8" office:value-type="float" office:value="2248" calcext:value-type="float">
            <text:p>2248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260185185185185" calcext:value-type="float">
            <text:p>0,00026018518518518500</text:p>
          </table:table-cell>
          <table:table-cell table:formula="of:=[.D283]-[.D2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8" office:value-type="float" office:value="2256" calcext:value-type="float">
            <text:p>2256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261111111111111" calcext:value-type="float">
            <text:p>0,00026111111111111100</text:p>
          </table:table-cell>
          <table:table-cell table:formula="of:=[.D284]-[.D2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8" office:value-type="float" office:value="2264" calcext:value-type="float">
            <text:p>2264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262037037037037" calcext:value-type="float">
            <text:p>0,00026203703703703700</text:p>
          </table:table-cell>
          <table:table-cell table:formula="of:=[.D285]-[.D2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8" office:value-type="float" office:value="2272" calcext:value-type="float">
            <text:p>2272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262962962962963" calcext:value-type="float">
            <text:p>0,00026296296296296300</text:p>
          </table:table-cell>
          <table:table-cell table:formula="of:=[.D286]-[.D2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8" office:value-type="float" office:value="2280" calcext:value-type="float">
            <text:p>228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263888888888889" calcext:value-type="float">
            <text:p>0,00026388888888888900</text:p>
          </table:table-cell>
          <table:table-cell table:formula="of:=[.D287]-[.D286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8" office:value-type="float" office:value="2288" calcext:value-type="float">
            <text:p>2288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264814814814815" calcext:value-type="float">
            <text:p>0,00026481481481481500</text:p>
          </table:table-cell>
          <table:table-cell table:formula="of:=[.D288]-[.D2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8" office:value-type="float" office:value="2296" calcext:value-type="float">
            <text:p>2296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265740740740741" calcext:value-type="float">
            <text:p>0,00026574074074074100</text:p>
          </table:table-cell>
          <table:table-cell table:formula="of:=[.D289]-[.D2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8" office:value-type="float" office:value="2304" calcext:value-type="float">
            <text:p>2304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266666666666667" calcext:value-type="float">
            <text:p>0,00026666666666666700</text:p>
          </table:table-cell>
          <table:table-cell table:formula="of:=[.D290]-[.D2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8" office:value-type="float" office:value="2312" calcext:value-type="float">
            <text:p>2312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267592592592593" calcext:value-type="float">
            <text:p>0,00026759259259259300</text:p>
          </table:table-cell>
          <table:table-cell table:formula="of:=[.D291]-[.D2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8" office:value-type="float" office:value="2320" calcext:value-type="float">
            <text:p>232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268518518518519" calcext:value-type="float">
            <text:p>0,00026851851851851900</text:p>
          </table:table-cell>
          <table:table-cell table:formula="of:=[.D292]-[.D2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8" office:value-type="float" office:value="2328" calcext:value-type="float">
            <text:p>2328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269444444444444" calcext:value-type="float">
            <text:p>0,00026944444444444400</text:p>
          </table:table-cell>
          <table:table-cell table:formula="of:=[.D293]-[.D2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8" office:value-type="float" office:value="2336" calcext:value-type="float">
            <text:p>2336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27037037037037" calcext:value-type="float">
            <text:p>0,00027037037037037000</text:p>
          </table:table-cell>
          <table:table-cell table:formula="of:=[.D294]-[.D2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8" office:value-type="float" office:value="2344" calcext:value-type="float">
            <text:p>2344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271296296296296" calcext:value-type="float">
            <text:p>0,00027129629629629600</text:p>
          </table:table-cell>
          <table:table-cell table:formula="of:=[.D295]-[.D2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8" office:value-type="float" office:value="2352" calcext:value-type="float">
            <text:p>2352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272222222222222" calcext:value-type="float">
            <text:p>0,00027222222222222200</text:p>
          </table:table-cell>
          <table:table-cell table:formula="of:=[.D296]-[.D2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8" office:value-type="float" office:value="2360" calcext:value-type="float">
            <text:p>236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273148148148148" calcext:value-type="float">
            <text:p>0,00027314814814814800</text:p>
          </table:table-cell>
          <table:table-cell table:formula="of:=[.D297]-[.D296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8" office:value-type="float" office:value="2368" calcext:value-type="float">
            <text:p>2368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274074074074074" calcext:value-type="float">
            <text:p>0,00027407407407407400</text:p>
          </table:table-cell>
          <table:table-cell table:formula="of:=[.D298]-[.D2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8" office:value-type="float" office:value="2376" calcext:value-type="float">
            <text:p>2376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275" calcext:value-type="float">
            <text:p>0,00027500000000000000</text:p>
          </table:table-cell>
          <table:table-cell table:formula="of:=[.D299]-[.D2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8" office:value-type="float" office:value="2384" calcext:value-type="float">
            <text:p>2384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275925925925926" calcext:value-type="float">
            <text:p>0,00027592592592592600</text:p>
          </table:table-cell>
          <table:table-cell table:formula="of:=[.D300]-[.D2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8" office:value-type="float" office:value="2392" calcext:value-type="float">
            <text:p>2392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276851851851852" calcext:value-type="float">
            <text:p>0,00027685185185185200</text:p>
          </table:table-cell>
          <table:table-cell table:formula="of:=[.D301]-[.D3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8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277777777777778" calcext:value-type="float">
            <text:p>0,00027777777777777800</text:p>
          </table:table-cell>
          <table:table-cell table:formula="of:=[.D302]-[.D3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8" office:value-type="float" office:value="2408" calcext:value-type="float">
            <text:p>2408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278703703703704" calcext:value-type="float">
            <text:p>0,00027870370370370400</text:p>
          </table:table-cell>
          <table:table-cell table:formula="of:=[.D303]-[.D3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8" office:value-type="float" office:value="2416" calcext:value-type="float">
            <text:p>2416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27962962962963" calcext:value-type="float">
            <text:p>0,00027962962962963000</text:p>
          </table:table-cell>
          <table:table-cell table:formula="of:=[.D304]-[.D3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8" office:value-type="float" office:value="2424" calcext:value-type="float">
            <text:p>2424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280555555555556" calcext:value-type="float">
            <text:p>0,00028055555555555600</text:p>
          </table:table-cell>
          <table:table-cell table:formula="of:=[.D305]-[.D3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8" office:value-type="float" office:value="2432" calcext:value-type="float">
            <text:p>2432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281481481481481" calcext:value-type="float">
            <text:p>0,00028148148148148100</text:p>
          </table:table-cell>
          <table:table-cell table:formula="of:=[.D306]-[.D305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8" office:value-type="float" office:value="2440" calcext:value-type="float">
            <text:p>244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282407407407407" calcext:value-type="float">
            <text:p>0,00028240740740740700</text:p>
          </table:table-cell>
          <table:table-cell table:formula="of:=[.D307]-[.D3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8" office:value-type="float" office:value="2448" calcext:value-type="float">
            <text:p>2448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283333333333333" calcext:value-type="float">
            <text:p>0,00028333333333333300</text:p>
          </table:table-cell>
          <table:table-cell table:formula="of:=[.D308]-[.D3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8" office:value-type="float" office:value="2456" calcext:value-type="float">
            <text:p>2456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284259259259259" calcext:value-type="float">
            <text:p>0,00028425925925925900</text:p>
          </table:table-cell>
          <table:table-cell table:formula="of:=[.D309]-[.D3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8" office:value-type="float" office:value="2464" calcext:value-type="float">
            <text:p>2464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285185185185185" calcext:value-type="float">
            <text:p>0,00028518518518518500</text:p>
          </table:table-cell>
          <table:table-cell table:formula="of:=[.D310]-[.D3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8" office:value-type="float" office:value="2472" calcext:value-type="float">
            <text:p>2472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286111111111111" calcext:value-type="float">
            <text:p>0,00028611111111111100</text:p>
          </table:table-cell>
          <table:table-cell table:formula="of:=[.D311]-[.D3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8" office:value-type="float" office:value="2480" calcext:value-type="float">
            <text:p>248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287037037037037" calcext:value-type="float">
            <text:p>0,00028703703703703700</text:p>
          </table:table-cell>
          <table:table-cell table:formula="of:=[.D312]-[.D3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8" office:value-type="float" office:value="2488" calcext:value-type="float">
            <text:p>2488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287962962962963" calcext:value-type="float">
            <text:p>0,00028796296296296300</text:p>
          </table:table-cell>
          <table:table-cell table:formula="of:=[.D313]-[.D3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8" office:value-type="float" office:value="2496" calcext:value-type="float">
            <text:p>2496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288888888888889" calcext:value-type="float">
            <text:p>0,00028888888888888900</text:p>
          </table:table-cell>
          <table:table-cell table:formula="of:=[.D314]-[.D3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8" office:value-type="float" office:value="2504" calcext:value-type="float">
            <text:p>2504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289814814814815" calcext:value-type="float">
            <text:p>0,00028981481481481500</text:p>
          </table:table-cell>
          <table:table-cell table:formula="of:=[.D315]-[.D3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8" office:value-type="float" office:value="2512" calcext:value-type="float">
            <text:p>2512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290740740740741" calcext:value-type="float">
            <text:p>0,00029074074074074100</text:p>
          </table:table-cell>
          <table:table-cell table:formula="of:=[.D316]-[.D315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8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291666666666667" calcext:value-type="float">
            <text:p>0,00029166666666666700</text:p>
          </table:table-cell>
          <table:table-cell table:formula="of:=[.D317]-[.D3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8" office:value-type="float" office:value="2528" calcext:value-type="float">
            <text:p>2528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292592592592593" calcext:value-type="float">
            <text:p>0,00029259259259259300</text:p>
          </table:table-cell>
          <table:table-cell table:formula="of:=[.D318]-[.D3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8" office:value-type="float" office:value="2536" calcext:value-type="float">
            <text:p>2536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293518518518519" calcext:value-type="float">
            <text:p>0,00029351851851851900</text:p>
          </table:table-cell>
          <table:table-cell table:formula="of:=[.D319]-[.D3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8" office:value-type="float" office:value="2544" calcext:value-type="float">
            <text:p>2544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294444444444444" calcext:value-type="float">
            <text:p>0,00029444444444444400</text:p>
          </table:table-cell>
          <table:table-cell table:formula="of:=[.D320]-[.D3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8" office:value-type="float" office:value="2552" calcext:value-type="float">
            <text:p>2552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29537037037037" calcext:value-type="float">
            <text:p>0,00029537037037037000</text:p>
          </table:table-cell>
          <table:table-cell table:formula="of:=[.D321]-[.D3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8" office:value-type="float" office:value="2560" calcext:value-type="float">
            <text:p>256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296296296296296" calcext:value-type="float">
            <text:p>0,00029629629629629600</text:p>
          </table:table-cell>
          <table:table-cell table:formula="of:=[.D322]-[.D3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8" office:value-type="float" office:value="2568" calcext:value-type="float">
            <text:p>2568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297222222222222" calcext:value-type="float">
            <text:p>0,00029722222222222200</text:p>
          </table:table-cell>
          <table:table-cell table:formula="of:=[.D323]-[.D3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8" office:value-type="float" office:value="2576" calcext:value-type="float">
            <text:p>2576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298148148148148" calcext:value-type="float">
            <text:p>0,00029814814814814800</text:p>
          </table:table-cell>
          <table:table-cell table:formula="of:=[.D324]-[.D3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8" office:value-type="float" office:value="2584" calcext:value-type="float">
            <text:p>2584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299074074074074" calcext:value-type="float">
            <text:p>0,00029907407407407400</text:p>
          </table:table-cell>
          <table:table-cell table:formula="of:=[.D325]-[.D3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8" office:value-type="float" office:value="2592" calcext:value-type="float">
            <text:p>2592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3" calcext:value-type="float">
            <text:p>0,00030000000000000000</text:p>
          </table:table-cell>
          <table:table-cell table:formula="of:=[.D326]-[.D325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8" office:value-type="float" office:value="2600" calcext:value-type="float">
            <text:p>26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300925925925926" calcext:value-type="float">
            <text:p>0,00030092592592592600</text:p>
          </table:table-cell>
          <table:table-cell table:formula="of:=[.D327]-[.D3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8" office:value-type="float" office:value="2608" calcext:value-type="float">
            <text:p>2608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301851851851852" calcext:value-type="float">
            <text:p>0,00030185185185185200</text:p>
          </table:table-cell>
          <table:table-cell table:formula="of:=[.D328]-[.D3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8" office:value-type="float" office:value="2616" calcext:value-type="float">
            <text:p>2616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302777777777778" calcext:value-type="float">
            <text:p>0,00030277777777777800</text:p>
          </table:table-cell>
          <table:table-cell table:formula="of:=[.D329]-[.D3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8" office:value-type="float" office:value="2624" calcext:value-type="float">
            <text:p>2624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303703703703704" calcext:value-type="float">
            <text:p>0,00030370370370370400</text:p>
          </table:table-cell>
          <table:table-cell table:formula="of:=[.D330]-[.D3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8" office:value-type="float" office:value="2632" calcext:value-type="float">
            <text:p>2632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30462962962963" calcext:value-type="float">
            <text:p>0,00030462962962963000</text:p>
          </table:table-cell>
          <table:table-cell table:formula="of:=[.D331]-[.D3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8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305555555555556" calcext:value-type="float">
            <text:p>0,00030555555555555600</text:p>
          </table:table-cell>
          <table:table-cell table:formula="of:=[.D332]-[.D3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8" office:value-type="float" office:value="2648" calcext:value-type="float">
            <text:p>2648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306481481481481" calcext:value-type="float">
            <text:p>0,00030648148148148100</text:p>
          </table:table-cell>
          <table:table-cell table:formula="of:=[.D333]-[.D3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8" office:value-type="float" office:value="2656" calcext:value-type="float">
            <text:p>2656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307407407407407" calcext:value-type="float">
            <text:p>0,00030740740740740700</text:p>
          </table:table-cell>
          <table:table-cell table:formula="of:=[.D334]-[.D3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8" office:value-type="float" office:value="2664" calcext:value-type="float">
            <text:p>2664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308333333333333" calcext:value-type="float">
            <text:p>0,00030833333333333300</text:p>
          </table:table-cell>
          <table:table-cell table:formula="of:=[.D335]-[.D334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8" office:value-type="float" office:value="2672" calcext:value-type="float">
            <text:p>2672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309259259259259" calcext:value-type="float">
            <text:p>0,00030925925925925900</text:p>
          </table:table-cell>
          <table:table-cell table:formula="of:=[.D336]-[.D3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8" office:value-type="float" office:value="2680" calcext:value-type="float">
            <text:p>268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310185185185185" calcext:value-type="float">
            <text:p>0,00031018518518518500</text:p>
          </table:table-cell>
          <table:table-cell table:formula="of:=[.D337]-[.D3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8" office:value-type="float" office:value="2688" calcext:value-type="float">
            <text:p>2688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311111111111111" calcext:value-type="float">
            <text:p>0,00031111111111111100</text:p>
          </table:table-cell>
          <table:table-cell table:formula="of:=[.D338]-[.D3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8" office:value-type="float" office:value="2696" calcext:value-type="float">
            <text:p>2696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312037037037037" calcext:value-type="float">
            <text:p>0,00031203703703703700</text:p>
          </table:table-cell>
          <table:table-cell table:formula="of:=[.D339]-[.D3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8" office:value-type="float" office:value="2704" calcext:value-type="float">
            <text:p>2704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312962962962963" calcext:value-type="float">
            <text:p>0,00031296296296296300</text:p>
          </table:table-cell>
          <table:table-cell table:formula="of:=[.D340]-[.D3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8" office:value-type="float" office:value="2712" calcext:value-type="float">
            <text:p>2712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313888888888889" calcext:value-type="float">
            <text:p>0,00031388888888888900</text:p>
          </table:table-cell>
          <table:table-cell table:formula="of:=[.D341]-[.D3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8" office:value-type="float" office:value="2720" calcext:value-type="float">
            <text:p>272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314814814814815" calcext:value-type="float">
            <text:p>0,00031481481481481500</text:p>
          </table:table-cell>
          <table:table-cell table:formula="of:=[.D342]-[.D3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8" office:value-type="float" office:value="2728" calcext:value-type="float">
            <text:p>2728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315740740740741" calcext:value-type="float">
            <text:p>0,00031574074074074100</text:p>
          </table:table-cell>
          <table:table-cell table:formula="of:=[.D343]-[.D3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8" office:value-type="float" office:value="2736" calcext:value-type="float">
            <text:p>2736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316666666666667" calcext:value-type="float">
            <text:p>0,00031666666666666700</text:p>
          </table:table-cell>
          <table:table-cell table:formula="of:=[.D344]-[.D3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8" office:value-type="float" office:value="2744" calcext:value-type="float">
            <text:p>2744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317592592592593" calcext:value-type="float">
            <text:p>0,00031759259259259300</text:p>
          </table:table-cell>
          <table:table-cell table:formula="of:=[.D345]-[.D344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8" office:value-type="float" office:value="2752" calcext:value-type="float">
            <text:p>2752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318518518518519" calcext:value-type="float">
            <text:p>0,00031851851851851900</text:p>
          </table:table-cell>
          <table:table-cell table:formula="of:=[.D346]-[.D3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8" office:value-type="float" office:value="2760" calcext:value-type="float">
            <text:p>276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319444444444444" calcext:value-type="float">
            <text:p>0,00031944444444444400</text:p>
          </table:table-cell>
          <table:table-cell table:formula="of:=[.D347]-[.D3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8" office:value-type="float" office:value="2768" calcext:value-type="float">
            <text:p>2768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32037037037037" calcext:value-type="float">
            <text:p>0,00032037037037037000</text:p>
          </table:table-cell>
          <table:table-cell table:formula="of:=[.D348]-[.D3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8" office:value-type="float" office:value="2776" calcext:value-type="float">
            <text:p>2776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321296296296296" calcext:value-type="float">
            <text:p>0,00032129629629629600</text:p>
          </table:table-cell>
          <table:table-cell table:formula="of:=[.D349]-[.D3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8" office:value-type="float" office:value="2784" calcext:value-type="float">
            <text:p>2784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322222222222222" calcext:value-type="float">
            <text:p>0,00032222222222222200</text:p>
          </table:table-cell>
          <table:table-cell table:formula="of:=[.D350]-[.D3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8" office:value-type="float" office:value="2792" calcext:value-type="float">
            <text:p>2792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323148148148148" calcext:value-type="float">
            <text:p>0,00032314814814814800</text:p>
          </table:table-cell>
          <table:table-cell table:formula="of:=[.D351]-[.D3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8" office:value-type="float" office:value="2800" calcext:value-type="float">
            <text:p>28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324074074074074" calcext:value-type="float">
            <text:p>0,00032407407407407400</text:p>
          </table:table-cell>
          <table:table-cell table:formula="of:=[.D352]-[.D3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8" office:value-type="float" office:value="2808" calcext:value-type="float">
            <text:p>2808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325" calcext:value-type="float">
            <text:p>0,00032500000000000000</text:p>
          </table:table-cell>
          <table:table-cell table:formula="of:=[.D353]-[.D3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8" office:value-type="float" office:value="2816" calcext:value-type="float">
            <text:p>2816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325925925925926" calcext:value-type="float">
            <text:p>0,00032592592592592600</text:p>
          </table:table-cell>
          <table:table-cell table:formula="of:=[.D354]-[.D3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8" office:value-type="float" office:value="2824" calcext:value-type="float">
            <text:p>2824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326851851851852" calcext:value-type="float">
            <text:p>0,00032685185185185200</text:p>
          </table:table-cell>
          <table:table-cell table:formula="of:=[.D355]-[.D354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8" office:value-type="float" office:value="2832" calcext:value-type="float">
            <text:p>2832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327777777777778" calcext:value-type="float">
            <text:p>0,00032777777777777800</text:p>
          </table:table-cell>
          <table:table-cell table:formula="of:=[.D356]-[.D3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8" office:value-type="float" office:value="2840" calcext:value-type="float">
            <text:p>284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328703703703704" calcext:value-type="float">
            <text:p>0,00032870370370370400</text:p>
          </table:table-cell>
          <table:table-cell table:formula="of:=[.D357]-[.D3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8" office:value-type="float" office:value="2848" calcext:value-type="float">
            <text:p>2848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32962962962963" calcext:value-type="float">
            <text:p>0,00032962962962963000</text:p>
          </table:table-cell>
          <table:table-cell table:formula="of:=[.D358]-[.D3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8" office:value-type="float" office:value="2856" calcext:value-type="float">
            <text:p>2856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330555555555556" calcext:value-type="float">
            <text:p>0,00033055555555555600</text:p>
          </table:table-cell>
          <table:table-cell table:formula="of:=[.D359]-[.D3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8" office:value-type="float" office:value="2864" calcext:value-type="float">
            <text:p>2864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331481481481482" calcext:value-type="float">
            <text:p>0,00033148148148148200</text:p>
          </table:table-cell>
          <table:table-cell table:formula="of:=[.D360]-[.D3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8" office:value-type="float" office:value="2872" calcext:value-type="float">
            <text:p>2872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332407407407407" calcext:value-type="float">
            <text:p>0,00033240740740740700</text:p>
          </table:table-cell>
          <table:table-cell table:formula="of:=[.D361]-[.D3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8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333333333333333" calcext:value-type="float">
            <text:p>0,00033333333333333300</text:p>
          </table:table-cell>
          <table:table-cell table:formula="of:=[.D362]-[.D3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8" office:value-type="float" office:value="2888" calcext:value-type="float">
            <text:p>2888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334259259259259" calcext:value-type="float">
            <text:p>0,00033425925925925900</text:p>
          </table:table-cell>
          <table:table-cell table:formula="of:=[.D363]-[.D3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8" office:value-type="float" office:value="2896" calcext:value-type="float">
            <text:p>2896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335185185185185" calcext:value-type="float">
            <text:p>0,00033518518518518500</text:p>
          </table:table-cell>
          <table:table-cell table:formula="of:=[.D364]-[.D363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8" office:value-type="float" office:value="2904" calcext:value-type="float">
            <text:p>2904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336111111111111" calcext:value-type="float">
            <text:p>0,00033611111111111100</text:p>
          </table:table-cell>
          <table:table-cell table:formula="of:=[.D365]-[.D3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8" office:value-type="float" office:value="2912" calcext:value-type="float">
            <text:p>2912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337037037037037" calcext:value-type="float">
            <text:p>0,00033703703703703700</text:p>
          </table:table-cell>
          <table:table-cell table:formula="of:=[.D366]-[.D3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8" office:value-type="float" office:value="2920" calcext:value-type="float">
            <text:p>292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337962962962963" calcext:value-type="float">
            <text:p>0,00033796296296296300</text:p>
          </table:table-cell>
          <table:table-cell table:formula="of:=[.D367]-[.D3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8" office:value-type="float" office:value="2928" calcext:value-type="float">
            <text:p>2928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338888888888889" calcext:value-type="float">
            <text:p>0,00033888888888888900</text:p>
          </table:table-cell>
          <table:table-cell table:formula="of:=[.D368]-[.D3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8" office:value-type="float" office:value="2936" calcext:value-type="float">
            <text:p>2936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339814814814815" calcext:value-type="float">
            <text:p>0,00033981481481481500</text:p>
          </table:table-cell>
          <table:table-cell table:formula="of:=[.D369]-[.D3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8" office:value-type="float" office:value="2944" calcext:value-type="float">
            <text:p>2944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340740740740741" calcext:value-type="float">
            <text:p>0,00034074074074074100</text:p>
          </table:table-cell>
          <table:table-cell table:formula="of:=[.D370]-[.D3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8" office:value-type="float" office:value="2952" calcext:value-type="float">
            <text:p>2952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341666666666667" calcext:value-type="float">
            <text:p>0,00034166666666666700</text:p>
          </table:table-cell>
          <table:table-cell table:formula="of:=[.D371]-[.D3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8" office:value-type="float" office:value="2960" calcext:value-type="float">
            <text:p>296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342592592592593" calcext:value-type="float">
            <text:p>0,00034259259259259300</text:p>
          </table:table-cell>
          <table:table-cell table:formula="of:=[.D372]-[.D3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8" office:value-type="float" office:value="2968" calcext:value-type="float">
            <text:p>2968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343518518518519" calcext:value-type="float">
            <text:p>0,00034351851851851900</text:p>
          </table:table-cell>
          <table:table-cell table:formula="of:=[.D373]-[.D3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8" office:value-type="float" office:value="2976" calcext:value-type="float">
            <text:p>2976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344444444444444" calcext:value-type="float">
            <text:p>0,00034444444444444400</text:p>
          </table:table-cell>
          <table:table-cell table:formula="of:=[.D374]-[.D373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8" office:value-type="float" office:value="2984" calcext:value-type="float">
            <text:p>2984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34537037037037" calcext:value-type="float">
            <text:p>0,00034537037037037000</text:p>
          </table:table-cell>
          <table:table-cell table:formula="of:=[.D375]-[.D3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8" office:value-type="float" office:value="2992" calcext:value-type="float">
            <text:p>2992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346296296296296" calcext:value-type="float">
            <text:p>0,00034629629629629600</text:p>
          </table:table-cell>
          <table:table-cell table:formula="of:=[.D376]-[.D3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8" office:value-type="float" office:value="3000" calcext:value-type="float">
            <text:p>300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347222222222222" calcext:value-type="float">
            <text:p>0,00034722222222222200</text:p>
          </table:table-cell>
          <table:table-cell table:formula="of:=[.D377]-[.D3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8" office:value-type="float" office:value="3008" calcext:value-type="float">
            <text:p>3008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0348148148148148" calcext:value-type="float">
            <text:p>0,00034814814814814800</text:p>
          </table:table-cell>
          <table:table-cell table:formula="of:=[.D378]-[.D3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8" office:value-type="float" office:value="3016" calcext:value-type="float">
            <text:p>3016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0349074074074074" calcext:value-type="float">
            <text:p>0,00034907407407407400</text:p>
          </table:table-cell>
          <table:table-cell table:formula="of:=[.D379]-[.D3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8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035" calcext:value-type="float">
            <text:p>0,00035000000000000000</text:p>
          </table:table-cell>
          <table:table-cell table:formula="of:=[.D380]-[.D3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8" office:value-type="float" office:value="3032" calcext:value-type="float">
            <text:p>3032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0350925925925926" calcext:value-type="float">
            <text:p>0,00035092592592592600</text:p>
          </table:table-cell>
          <table:table-cell table:formula="of:=[.D381]-[.D3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8" office:value-type="float" office:value="3040" calcext:value-type="float">
            <text:p>304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0351851851851852" calcext:value-type="float">
            <text:p>0,00035185185185185200</text:p>
          </table:table-cell>
          <table:table-cell table:formula="of:=[.D382]-[.D3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8" office:value-type="float" office:value="3048" calcext:value-type="float">
            <text:p>3048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0352777777777778" calcext:value-type="float">
            <text:p>0,00035277777777777800</text:p>
          </table:table-cell>
          <table:table-cell table:formula="of:=[.D383]-[.D3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8" office:value-type="float" office:value="3056" calcext:value-type="float">
            <text:p>3056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0353703703703704" calcext:value-type="float">
            <text:p>0,00035370370370370400</text:p>
          </table:table-cell>
          <table:table-cell table:formula="of:=[.D384]-[.D383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8" office:value-type="float" office:value="3064" calcext:value-type="float">
            <text:p>3064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035462962962963" calcext:value-type="float">
            <text:p>0,00035462962962963000</text:p>
          </table:table-cell>
          <table:table-cell table:formula="of:=[.D385]-[.D3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8" office:value-type="float" office:value="3072" calcext:value-type="float">
            <text:p>3072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0355555555555556" calcext:value-type="float">
            <text:p>0,00035555555555555600</text:p>
          </table:table-cell>
          <table:table-cell table:formula="of:=[.D386]-[.D3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8" office:value-type="float" office:value="3080" calcext:value-type="float">
            <text:p>308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0356481481481482" calcext:value-type="float">
            <text:p>0,00035648148148148200</text:p>
          </table:table-cell>
          <table:table-cell table:formula="of:=[.D387]-[.D3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8" office:value-type="float" office:value="3088" calcext:value-type="float">
            <text:p>3088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0357407407407407" calcext:value-type="float">
            <text:p>0,00035740740740740700</text:p>
          </table:table-cell>
          <table:table-cell table:formula="of:=[.D388]-[.D3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8" office:value-type="float" office:value="3096" calcext:value-type="float">
            <text:p>3096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0358333333333333" calcext:value-type="float">
            <text:p>0,00035833333333333300</text:p>
          </table:table-cell>
          <table:table-cell table:formula="of:=[.D389]-[.D3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8" office:value-type="float" office:value="3104" calcext:value-type="float">
            <text:p>3104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0359259259259259" calcext:value-type="float">
            <text:p>0,00035925925925925900</text:p>
          </table:table-cell>
          <table:table-cell table:formula="of:=[.D390]-[.D3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8" office:value-type="float" office:value="3112" calcext:value-type="float">
            <text:p>3112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0360185185185185" calcext:value-type="float">
            <text:p>0,00036018518518518500</text:p>
          </table:table-cell>
          <table:table-cell table:formula="of:=[.D391]-[.D3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8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0361111111111111" calcext:value-type="float">
            <text:p>0,00036111111111111100</text:p>
          </table:table-cell>
          <table:table-cell table:formula="of:=[.D392]-[.D3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8" office:value-type="float" office:value="3128" calcext:value-type="float">
            <text:p>3128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0362037037037037" calcext:value-type="float">
            <text:p>0,00036203703703703700</text:p>
          </table:table-cell>
          <table:table-cell table:formula="of:=[.D393]-[.D392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8" office:value-type="float" office:value="3136" calcext:value-type="float">
            <text:p>3136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0362962962962963" calcext:value-type="float">
            <text:p>0,00036296296296296300</text:p>
          </table:table-cell>
          <table:table-cell table:formula="of:=[.D394]-[.D3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8" office:value-type="float" office:value="3144" calcext:value-type="float">
            <text:p>3144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0363888888888889" calcext:value-type="float">
            <text:p>0,00036388888888888900</text:p>
          </table:table-cell>
          <table:table-cell table:formula="of:=[.D395]-[.D3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8" office:value-type="float" office:value="3152" calcext:value-type="float">
            <text:p>3152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0364814814814815" calcext:value-type="float">
            <text:p>0,00036481481481481500</text:p>
          </table:table-cell>
          <table:table-cell table:formula="of:=[.D396]-[.D3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8" office:value-type="float" office:value="3160" calcext:value-type="float">
            <text:p>316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0365740740740741" calcext:value-type="float">
            <text:p>0,00036574074074074100</text:p>
          </table:table-cell>
          <table:table-cell table:formula="of:=[.D397]-[.D3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8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0366666666666667" calcext:value-type="float">
            <text:p>0,00036666666666666700</text:p>
          </table:table-cell>
          <table:table-cell table:formula="of:=[.D398]-[.D3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8" office:value-type="float" office:value="3176" calcext:value-type="float">
            <text:p>3176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0367592592592593" calcext:value-type="float">
            <text:p>0,00036759259259259300</text:p>
          </table:table-cell>
          <table:table-cell table:formula="of:=[.D399]-[.D3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8" office:value-type="float" office:value="3184" calcext:value-type="float">
            <text:p>3184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0368518518518519" calcext:value-type="float">
            <text:p>0,00036851851851851800</text:p>
          </table:table-cell>
          <table:table-cell table:formula="of:=[.D400]-[.D3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8" office:value-type="float" office:value="3192" calcext:value-type="float">
            <text:p>3192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0369444444444444" calcext:value-type="float">
            <text:p>0,00036944444444444400</text:p>
          </table:table-cell>
          <table:table-cell table:formula="of:=[.D401]-[.D4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8" office:value-type="float" office:value="3200" calcext:value-type="float">
            <text:p>32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037037037037037" calcext:value-type="float">
            <text:p>0,00037037037037037000</text:p>
          </table:table-cell>
          <table:table-cell table:formula="of:=[.D402]-[.D4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8" office:value-type="float" office:value="3208" calcext:value-type="float">
            <text:p>3208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0371296296296296" calcext:value-type="float">
            <text:p>0,00037129629629629600</text:p>
          </table:table-cell>
          <table:table-cell table:formula="of:=[.D403]-[.D402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8" office:value-type="float" office:value="3216" calcext:value-type="float">
            <text:p>3216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0372222222222222" calcext:value-type="float">
            <text:p>0,00037222222222222200</text:p>
          </table:table-cell>
          <table:table-cell table:formula="of:=[.D404]-[.D4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8" office:value-type="float" office:value="3224" calcext:value-type="float">
            <text:p>3224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0373148148148148" calcext:value-type="float">
            <text:p>0,00037314814814814800</text:p>
          </table:table-cell>
          <table:table-cell table:formula="of:=[.D405]-[.D4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8" office:value-type="float" office:value="3232" calcext:value-type="float">
            <text:p>3232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0374074074074074" calcext:value-type="float">
            <text:p>0,00037407407407407400</text:p>
          </table:table-cell>
          <table:table-cell table:formula="of:=[.D406]-[.D4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8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0375" calcext:value-type="float">
            <text:p>0,00037500000000000000</text:p>
          </table:table-cell>
          <table:table-cell table:formula="of:=[.D407]-[.D4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8" office:value-type="float" office:value="3248" calcext:value-type="float">
            <text:p>3248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0375925925925926" calcext:value-type="float">
            <text:p>0,00037592592592592600</text:p>
          </table:table-cell>
          <table:table-cell table:formula="of:=[.D408]-[.D4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8" office:value-type="float" office:value="3256" calcext:value-type="float">
            <text:p>3256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0376851851851852" calcext:value-type="float">
            <text:p>0,00037685185185185200</text:p>
          </table:table-cell>
          <table:table-cell table:formula="of:=[.D409]-[.D4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8" office:value-type="float" office:value="3264" calcext:value-type="float">
            <text:p>3264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0377777777777778" calcext:value-type="float">
            <text:p>0,00037777777777777800</text:p>
          </table:table-cell>
          <table:table-cell table:formula="of:=[.D410]-[.D4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8" office:value-type="float" office:value="3272" calcext:value-type="float">
            <text:p>3272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0378703703703704" calcext:value-type="float">
            <text:p>0,00037870370370370400</text:p>
          </table:table-cell>
          <table:table-cell table:formula="of:=[.D411]-[.D4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8" office:value-type="float" office:value="3280" calcext:value-type="float">
            <text:p>328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037962962962963" calcext:value-type="float">
            <text:p>0,00037962962962963000</text:p>
          </table:table-cell>
          <table:table-cell table:formula="of:=[.D412]-[.D4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8" office:value-type="float" office:value="3288" calcext:value-type="float">
            <text:p>3288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0380555555555556" calcext:value-type="float">
            <text:p>0,00038055555555555600</text:p>
          </table:table-cell>
          <table:table-cell table:formula="of:=[.D413]-[.D412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8" office:value-type="float" office:value="3296" calcext:value-type="float">
            <text:p>3296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0381481481481482" calcext:value-type="float">
            <text:p>0,00038148148148148200</text:p>
          </table:table-cell>
          <table:table-cell table:formula="of:=[.D414]-[.D4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8" office:value-type="float" office:value="3304" calcext:value-type="float">
            <text:p>3304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0382407407407407" calcext:value-type="float">
            <text:p>0,00038240740740740700</text:p>
          </table:table-cell>
          <table:table-cell table:formula="of:=[.D415]-[.D4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8" office:value-type="float" office:value="3312" calcext:value-type="float">
            <text:p>3312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0383333333333333" calcext:value-type="float">
            <text:p>0,00038333333333333300</text:p>
          </table:table-cell>
          <table:table-cell table:formula="of:=[.D416]-[.D4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8" office:value-type="float" office:value="3320" calcext:value-type="float">
            <text:p>332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0384259259259259" calcext:value-type="float">
            <text:p>0,00038425925925925900</text:p>
          </table:table-cell>
          <table:table-cell table:formula="of:=[.D417]-[.D4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8" office:value-type="float" office:value="3328" calcext:value-type="float">
            <text:p>3328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0385185185185185" calcext:value-type="float">
            <text:p>0,00038518518518518500</text:p>
          </table:table-cell>
          <table:table-cell table:formula="of:=[.D418]-[.D4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8" office:value-type="float" office:value="3336" calcext:value-type="float">
            <text:p>3336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0386111111111111" calcext:value-type="float">
            <text:p>0,00038611111111111100</text:p>
          </table:table-cell>
          <table:table-cell table:formula="of:=[.D419]-[.D4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8" office:value-type="float" office:value="3344" calcext:value-type="float">
            <text:p>3344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0387037037037037" calcext:value-type="float">
            <text:p>0,00038703703703703700</text:p>
          </table:table-cell>
          <table:table-cell table:formula="of:=[.D420]-[.D4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8" office:value-type="float" office:value="3352" calcext:value-type="float">
            <text:p>3352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0387962962962963" calcext:value-type="float">
            <text:p>0,00038796296296296300</text:p>
          </table:table-cell>
          <table:table-cell table:formula="of:=[.D421]-[.D4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8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0388888888888889" calcext:value-type="float">
            <text:p>0,00038888888888888900</text:p>
          </table:table-cell>
          <table:table-cell table:formula="of:=[.D422]-[.D421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8" office:value-type="float" office:value="3368" calcext:value-type="float">
            <text:p>3368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0389814814814815" calcext:value-type="float">
            <text:p>0,00038981481481481500</text:p>
          </table:table-cell>
          <table:table-cell table:formula="of:=[.D423]-[.D4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8" office:value-type="float" office:value="3376" calcext:value-type="float">
            <text:p>3376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0390740740740741" calcext:value-type="float">
            <text:p>0,00039074074074074100</text:p>
          </table:table-cell>
          <table:table-cell table:formula="of:=[.D424]-[.D4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8" office:value-type="float" office:value="3384" calcext:value-type="float">
            <text:p>3384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0391666666666667" calcext:value-type="float">
            <text:p>0,00039166666666666700</text:p>
          </table:table-cell>
          <table:table-cell table:formula="of:=[.D425]-[.D4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8" office:value-type="float" office:value="3392" calcext:value-type="float">
            <text:p>3392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0392592592592593" calcext:value-type="float">
            <text:p>0,00039259259259259300</text:p>
          </table:table-cell>
          <table:table-cell table:formula="of:=[.D426]-[.D4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8" office:value-type="float" office:value="3400" calcext:value-type="float">
            <text:p>340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0393518518518519" calcext:value-type="float">
            <text:p>0,00039351851851851900</text:p>
          </table:table-cell>
          <table:table-cell table:formula="of:=[.D427]-[.D4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8" office:value-type="float" office:value="3408" calcext:value-type="float">
            <text:p>3408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0394444444444444" calcext:value-type="float">
            <text:p>0,00039444444444444500</text:p>
          </table:table-cell>
          <table:table-cell table:formula="of:=[.D428]-[.D4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8" office:value-type="float" office:value="3416" calcext:value-type="float">
            <text:p>3416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039537037037037" calcext:value-type="float">
            <text:p>0,00039537037037037000</text:p>
          </table:table-cell>
          <table:table-cell table:formula="of:=[.D429]-[.D4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8" office:value-type="float" office:value="3424" calcext:value-type="float">
            <text:p>3424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0396296296296296" calcext:value-type="float">
            <text:p>0,00039629629629629600</text:p>
          </table:table-cell>
          <table:table-cell table:formula="of:=[.D430]-[.D4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8" office:value-type="float" office:value="3432" calcext:value-type="float">
            <text:p>3432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0397222222222222" calcext:value-type="float">
            <text:p>0,00039722222222222200</text:p>
          </table:table-cell>
          <table:table-cell table:formula="of:=[.D431]-[.D4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8" office:value-type="float" office:value="3440" calcext:value-type="float">
            <text:p>344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0398148148148148" calcext:value-type="float">
            <text:p>0,00039814814814814800</text:p>
          </table:table-cell>
          <table:table-cell table:formula="of:=[.D432]-[.D431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8" office:value-type="float" office:value="3448" calcext:value-type="float">
            <text:p>3448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0399074074074074" calcext:value-type="float">
            <text:p>0,00039907407407407400</text:p>
          </table:table-cell>
          <table:table-cell table:formula="of:=[.D433]-[.D4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8" office:value-type="float" office:value="3456" calcext:value-type="float">
            <text:p>3456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04" calcext:value-type="float">
            <text:p>0,00040000000000000000</text:p>
          </table:table-cell>
          <table:table-cell table:formula="of:=[.D434]-[.D4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8" office:value-type="float" office:value="3464" calcext:value-type="float">
            <text:p>3464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0400925925925926" calcext:value-type="float">
            <text:p>0,00040092592592592600</text:p>
          </table:table-cell>
          <table:table-cell table:formula="of:=[.D435]-[.D4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8" office:value-type="float" office:value="3472" calcext:value-type="float">
            <text:p>3472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0401851851851852" calcext:value-type="float">
            <text:p>0,00040185185185185200</text:p>
          </table:table-cell>
          <table:table-cell table:formula="of:=[.D436]-[.D4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8" office:value-type="float" office:value="3480" calcext:value-type="float">
            <text:p>348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0402777777777778" calcext:value-type="float">
            <text:p>0,00040277777777777800</text:p>
          </table:table-cell>
          <table:table-cell table:formula="of:=[.D437]-[.D4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8" office:value-type="float" office:value="3488" calcext:value-type="float">
            <text:p>3488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0403703703703704" calcext:value-type="float">
            <text:p>0,00040370370370370400</text:p>
          </table:table-cell>
          <table:table-cell table:formula="of:=[.D438]-[.D4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8" office:value-type="float" office:value="3496" calcext:value-type="float">
            <text:p>3496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040462962962963" calcext:value-type="float">
            <text:p>0,00040462962962963000</text:p>
          </table:table-cell>
          <table:table-cell table:formula="of:=[.D439]-[.D4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8" office:value-type="float" office:value="3504" calcext:value-type="float">
            <text:p>3504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0405555555555556" calcext:value-type="float">
            <text:p>0,00040555555555555600</text:p>
          </table:table-cell>
          <table:table-cell table:formula="of:=[.D440]-[.D4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8" office:value-type="float" office:value="3512" calcext:value-type="float">
            <text:p>3512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0406481481481481" calcext:value-type="float">
            <text:p>0,00040648148148148100</text:p>
          </table:table-cell>
          <table:table-cell table:formula="of:=[.D441]-[.D4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8" office:value-type="float" office:value="3520" calcext:value-type="float">
            <text:p>352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0407407407407407" calcext:value-type="float">
            <text:p>0,00040740740740740700</text:p>
          </table:table-cell>
          <table:table-cell table:formula="of:=[.D442]-[.D441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8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0408333333333333" calcext:value-type="float">
            <text:p>0,00040833333333333300</text:p>
          </table:table-cell>
          <table:table-cell table:formula="of:=[.D443]-[.D4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8" office:value-type="float" office:value="3536" calcext:value-type="float">
            <text:p>3536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0409259259259259" calcext:value-type="float">
            <text:p>0,00040925925925925900</text:p>
          </table:table-cell>
          <table:table-cell table:formula="of:=[.D444]-[.D4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8" office:value-type="float" office:value="3544" calcext:value-type="float">
            <text:p>3544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0410185185185185" calcext:value-type="float">
            <text:p>0,00041018518518518500</text:p>
          </table:table-cell>
          <table:table-cell table:formula="of:=[.D445]-[.D4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8" office:value-type="float" office:value="3552" calcext:value-type="float">
            <text:p>3552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0411111111111111" calcext:value-type="float">
            <text:p>0,00041111111111111100</text:p>
          </table:table-cell>
          <table:table-cell table:formula="of:=[.D446]-[.D4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8" office:value-type="float" office:value="3560" calcext:value-type="float">
            <text:p>356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0412037037037037" calcext:value-type="float">
            <text:p>0,00041203703703703700</text:p>
          </table:table-cell>
          <table:table-cell table:formula="of:=[.D447]-[.D4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8" office:value-type="float" office:value="3568" calcext:value-type="float">
            <text:p>3568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0412962962962963" calcext:value-type="float">
            <text:p>0,00041296296296296300</text:p>
          </table:table-cell>
          <table:table-cell table:formula="of:=[.D448]-[.D4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8" office:value-type="float" office:value="3576" calcext:value-type="float">
            <text:p>3576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0413888888888889" calcext:value-type="float">
            <text:p>0,00041388888888888900</text:p>
          </table:table-cell>
          <table:table-cell table:formula="of:=[.D449]-[.D4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8" office:value-type="float" office:value="3584" calcext:value-type="float">
            <text:p>3584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0414814814814815" calcext:value-type="float">
            <text:p>0,00041481481481481500</text:p>
          </table:table-cell>
          <table:table-cell table:formula="of:=[.D450]-[.D4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8" office:value-type="float" office:value="3592" calcext:value-type="float">
            <text:p>3592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0415740740740741" calcext:value-type="float">
            <text:p>0,00041574074074074100</text:p>
          </table:table-cell>
          <table:table-cell table:formula="of:=[.D451]-[.D450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8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0416666666666667" calcext:value-type="float">
            <text:p>0,00041666666666666700</text:p>
          </table:table-cell>
          <table:table-cell table:formula="of:=[.D452]-[.D4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8" office:value-type="float" office:value="3608" calcext:value-type="float">
            <text:p>3608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0417592592592593" calcext:value-type="float">
            <text:p>0,00041759259259259300</text:p>
          </table:table-cell>
          <table:table-cell table:formula="of:=[.D453]-[.D4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8" office:value-type="float" office:value="3616" calcext:value-type="float">
            <text:p>3616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0418518518518519" calcext:value-type="float">
            <text:p>0,00041851851851851900</text:p>
          </table:table-cell>
          <table:table-cell table:formula="of:=[.D454]-[.D4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8" office:value-type="float" office:value="3624" calcext:value-type="float">
            <text:p>3624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0419444444444444" calcext:value-type="float">
            <text:p>0,00041944444444444400</text:p>
          </table:table-cell>
          <table:table-cell table:formula="of:=[.D455]-[.D4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8" office:value-type="float" office:value="3632" calcext:value-type="float">
            <text:p>3632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042037037037037" calcext:value-type="float">
            <text:p>0,00042037037037037000</text:p>
          </table:table-cell>
          <table:table-cell table:formula="of:=[.D456]-[.D4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8" office:value-type="float" office:value="3640" calcext:value-type="float">
            <text:p>364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0421296296296296" calcext:value-type="float">
            <text:p>0,00042129629629629600</text:p>
          </table:table-cell>
          <table:table-cell table:formula="of:=[.D457]-[.D4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8" office:value-type="float" office:value="3648" calcext:value-type="float">
            <text:p>3648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0422222222222222" calcext:value-type="float">
            <text:p>0,00042222222222222200</text:p>
          </table:table-cell>
          <table:table-cell table:formula="of:=[.D458]-[.D4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8" office:value-type="float" office:value="3656" calcext:value-type="float">
            <text:p>3656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0423148148148148" calcext:value-type="float">
            <text:p>0,00042314814814814800</text:p>
          </table:table-cell>
          <table:table-cell table:formula="of:=[.D459]-[.D4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8" office:value-type="float" office:value="3664" calcext:value-type="float">
            <text:p>3664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0424074074074074" calcext:value-type="float">
            <text:p>0,00042407407407407400</text:p>
          </table:table-cell>
          <table:table-cell table:formula="of:=[.D460]-[.D4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8" office:value-type="float" office:value="3672" calcext:value-type="float">
            <text:p>3672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0425" calcext:value-type="float">
            <text:p>0,00042500000000000000</text:p>
          </table:table-cell>
          <table:table-cell table:formula="of:=[.D461]-[.D460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8" office:value-type="float" office:value="3680" calcext:value-type="float">
            <text:p>368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0425925925925926" calcext:value-type="float">
            <text:p>0,00042592592592592600</text:p>
          </table:table-cell>
          <table:table-cell table:formula="of:=[.D462]-[.D4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8" office:value-type="float" office:value="3688" calcext:value-type="float">
            <text:p>3688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0426851851851852" calcext:value-type="float">
            <text:p>0,00042685185185185200</text:p>
          </table:table-cell>
          <table:table-cell table:formula="of:=[.D463]-[.D4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8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0427777777777778" calcext:value-type="float">
            <text:p>0,00042777777777777800</text:p>
          </table:table-cell>
          <table:table-cell table:formula="of:=[.D464]-[.D4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8" office:value-type="float" office:value="3704" calcext:value-type="float">
            <text:p>3704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0428703703703704" calcext:value-type="float">
            <text:p>0,00042870370370370400</text:p>
          </table:table-cell>
          <table:table-cell table:formula="of:=[.D465]-[.D4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8" office:value-type="float" office:value="3712" calcext:value-type="float">
            <text:p>3712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042962962962963" calcext:value-type="float">
            <text:p>0,00042962962962963000</text:p>
          </table:table-cell>
          <table:table-cell table:formula="of:=[.D466]-[.D4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8" office:value-type="float" office:value="3720" calcext:value-type="float">
            <text:p>372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0430555555555556" calcext:value-type="float">
            <text:p>0,00043055555555555600</text:p>
          </table:table-cell>
          <table:table-cell table:formula="of:=[.D467]-[.D4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8" office:value-type="float" office:value="3728" calcext:value-type="float">
            <text:p>3728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0431481481481481" calcext:value-type="float">
            <text:p>0,00043148148148148100</text:p>
          </table:table-cell>
          <table:table-cell table:formula="of:=[.D468]-[.D4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8" office:value-type="float" office:value="3736" calcext:value-type="float">
            <text:p>3736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0432407407407407" calcext:value-type="float">
            <text:p>0,00043240740740740700</text:p>
          </table:table-cell>
          <table:table-cell table:formula="of:=[.D469]-[.D4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8" office:value-type="float" office:value="3744" calcext:value-type="float">
            <text:p>3744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0433333333333333" calcext:value-type="float">
            <text:p>0,00043333333333333300</text:p>
          </table:table-cell>
          <table:table-cell table:formula="of:=[.D470]-[.D4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8" office:value-type="float" office:value="3752" calcext:value-type="float">
            <text:p>3752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0434259259259259" calcext:value-type="float">
            <text:p>0,00043425925925925900</text:p>
          </table:table-cell>
          <table:table-cell table:formula="of:=[.D471]-[.D470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8" office:value-type="float" office:value="3760" calcext:value-type="float">
            <text:p>376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0435185185185185" calcext:value-type="float">
            <text:p>0,00043518518518518500</text:p>
          </table:table-cell>
          <table:table-cell table:formula="of:=[.D472]-[.D4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8" office:value-type="float" office:value="3768" calcext:value-type="float">
            <text:p>3768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0436111111111111" calcext:value-type="float">
            <text:p>0,00043611111111111100</text:p>
          </table:table-cell>
          <table:table-cell table:formula="of:=[.D473]-[.D4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8" office:value-type="float" office:value="3776" calcext:value-type="float">
            <text:p>3776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0437037037037037" calcext:value-type="float">
            <text:p>0,00043703703703703700</text:p>
          </table:table-cell>
          <table:table-cell table:formula="of:=[.D474]-[.D4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8" office:value-type="float" office:value="3784" calcext:value-type="float">
            <text:p>3784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0437962962962963" calcext:value-type="float">
            <text:p>0,00043796296296296300</text:p>
          </table:table-cell>
          <table:table-cell table:formula="of:=[.D475]-[.D4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8" office:value-type="float" office:value="3792" calcext:value-type="float">
            <text:p>3792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0438888888888889" calcext:value-type="float">
            <text:p>0,00043888888888888900</text:p>
          </table:table-cell>
          <table:table-cell table:formula="of:=[.D476]-[.D4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8" office:value-type="float" office:value="3800" calcext:value-type="float">
            <text:p>380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0439814814814815" calcext:value-type="float">
            <text:p>0,00043981481481481500</text:p>
          </table:table-cell>
          <table:table-cell table:formula="of:=[.D477]-[.D4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8" office:value-type="float" office:value="3808" calcext:value-type="float">
            <text:p>3808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0440740740740741" calcext:value-type="float">
            <text:p>0,00044074074074074100</text:p>
          </table:table-cell>
          <table:table-cell table:formula="of:=[.D478]-[.D4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8" office:value-type="float" office:value="3816" calcext:value-type="float">
            <text:p>3816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0441666666666667" calcext:value-type="float">
            <text:p>0,00044166666666666700</text:p>
          </table:table-cell>
          <table:table-cell table:formula="of:=[.D479]-[.D4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8" office:value-type="float" office:value="3824" calcext:value-type="float">
            <text:p>3824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0442592592592593" calcext:value-type="float">
            <text:p>0,00044259259259259300</text:p>
          </table:table-cell>
          <table:table-cell table:formula="of:=[.D480]-[.D479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8" office:value-type="float" office:value="3832" calcext:value-type="float">
            <text:p>3832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0443518518518519" calcext:value-type="float">
            <text:p>0,00044351851851851900</text:p>
          </table:table-cell>
          <table:table-cell table:formula="of:=[.D481]-[.D4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8" office:value-type="float" office:value="3840" calcext:value-type="float">
            <text:p>384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0444444444444444" calcext:value-type="float">
            <text:p>0,00044444444444444400</text:p>
          </table:table-cell>
          <table:table-cell table:formula="of:=[.D482]-[.D4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8" office:value-type="float" office:value="3848" calcext:value-type="float">
            <text:p>3848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044537037037037" calcext:value-type="float">
            <text:p>0,00044537037037037000</text:p>
          </table:table-cell>
          <table:table-cell table:formula="of:=[.D483]-[.D4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8" office:value-type="float" office:value="3856" calcext:value-type="float">
            <text:p>3856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0446296296296296" calcext:value-type="float">
            <text:p>0,00044629629629629600</text:p>
          </table:table-cell>
          <table:table-cell table:formula="of:=[.D484]-[.D4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8" office:value-type="float" office:value="3864" calcext:value-type="float">
            <text:p>3864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0447222222222222" calcext:value-type="float">
            <text:p>0,00044722222222222200</text:p>
          </table:table-cell>
          <table:table-cell table:formula="of:=[.D485]-[.D4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8" office:value-type="float" office:value="3872" calcext:value-type="float">
            <text:p>3872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0448148148148148" calcext:value-type="float">
            <text:p>0,00044814814814814800</text:p>
          </table:table-cell>
          <table:table-cell table:formula="of:=[.D486]-[.D4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8" office:value-type="float" office:value="3880" calcext:value-type="float">
            <text:p>388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0449074074074074" calcext:value-type="float">
            <text:p>0,00044907407407407400</text:p>
          </table:table-cell>
          <table:table-cell table:formula="of:=[.D487]-[.D4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8" office:value-type="float" office:value="3888" calcext:value-type="float">
            <text:p>3888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045" calcext:value-type="float">
            <text:p>0,00045000000000000000</text:p>
          </table:table-cell>
          <table:table-cell table:formula="of:=[.D488]-[.D4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8" office:value-type="float" office:value="3896" calcext:value-type="float">
            <text:p>3896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0450925925925926" calcext:value-type="float">
            <text:p>0,00045092592592592600</text:p>
          </table:table-cell>
          <table:table-cell table:formula="of:=[.D489]-[.D4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8" office:value-type="float" office:value="3904" calcext:value-type="float">
            <text:p>3904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0451851851851852" calcext:value-type="float">
            <text:p>0,00045185185185185200</text:p>
          </table:table-cell>
          <table:table-cell table:formula="of:=[.D490]-[.D489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8" office:value-type="float" office:value="3912" calcext:value-type="float">
            <text:p>3912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0452777777777778" calcext:value-type="float">
            <text:p>0,00045277777777777800</text:p>
          </table:table-cell>
          <table:table-cell table:formula="of:=[.D491]-[.D4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8" office:value-type="float" office:value="3920" calcext:value-type="float">
            <text:p>392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0453703703703704" calcext:value-type="float">
            <text:p>0,00045370370370370400</text:p>
          </table:table-cell>
          <table:table-cell table:formula="of:=[.D492]-[.D4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8" office:value-type="float" office:value="3928" calcext:value-type="float">
            <text:p>3928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045462962962963" calcext:value-type="float">
            <text:p>0,00045462962962963000</text:p>
          </table:table-cell>
          <table:table-cell table:formula="of:=[.D493]-[.D4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8" office:value-type="float" office:value="3936" calcext:value-type="float">
            <text:p>3936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0455555555555556" calcext:value-type="float">
            <text:p>0,00045555555555555600</text:p>
          </table:table-cell>
          <table:table-cell table:formula="of:=[.D494]-[.D4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8" office:value-type="float" office:value="3944" calcext:value-type="float">
            <text:p>3944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0456481481481482" calcext:value-type="float">
            <text:p>0,00045648148148148200</text:p>
          </table:table-cell>
          <table:table-cell table:formula="of:=[.D495]-[.D4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8" office:value-type="float" office:value="3952" calcext:value-type="float">
            <text:p>3952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0457407407407407" calcext:value-type="float">
            <text:p>0,00045740740740740700</text:p>
          </table:table-cell>
          <table:table-cell table:formula="of:=[.D496]-[.D4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8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0458333333333333" calcext:value-type="float">
            <text:p>0,00045833333333333300</text:p>
          </table:table-cell>
          <table:table-cell table:formula="of:=[.D497]-[.D4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8" office:value-type="float" office:value="3968" calcext:value-type="float">
            <text:p>3968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0459259259259259" calcext:value-type="float">
            <text:p>0,00045925925925925900</text:p>
          </table:table-cell>
          <table:table-cell table:formula="of:=[.D498]-[.D4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8" office:value-type="float" office:value="3976" calcext:value-type="float">
            <text:p>3976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0460185185185185" calcext:value-type="float">
            <text:p>0,00046018518518518500</text:p>
          </table:table-cell>
          <table:table-cell table:formula="of:=[.D499]-[.D4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8" office:value-type="float" office:value="3984" calcext:value-type="float">
            <text:p>3984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0461111111111111" calcext:value-type="float">
            <text:p>0,00046111111111111100</text:p>
          </table:table-cell>
          <table:table-cell table:formula="of:=[.D500]-[.D499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8" office:value-type="float" office:value="3992" calcext:value-type="float">
            <text:p>3992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0462037037037037" calcext:value-type="float">
            <text:p>0,00046203703703703700</text:p>
          </table:table-cell>
          <table:table-cell table:formula="of:=[.D501]-[.D5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8" office:value-type="float" office:value="4000" calcext:value-type="float">
            <text:p>4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0462962962962963" calcext:value-type="float">
            <text:p>0,00046296296296296300</text:p>
          </table:table-cell>
          <table:table-cell table:formula="of:=[.D502]-[.D5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8" office:value-type="float" office:value="4008" calcext:value-type="float">
            <text:p>4008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0463888888888889" calcext:value-type="float">
            <text:p>0,00046388888888888900</text:p>
          </table:table-cell>
          <table:table-cell table:formula="of:=[.D503]-[.D5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8" office:value-type="float" office:value="4016" calcext:value-type="float">
            <text:p>4016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0464814814814815" calcext:value-type="float">
            <text:p>0,00046481481481481500</text:p>
          </table:table-cell>
          <table:table-cell table:formula="of:=[.D504]-[.D5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8" office:value-type="float" office:value="4024" calcext:value-type="float">
            <text:p>4024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0465740740740741" calcext:value-type="float">
            <text:p>0,00046574074074074100</text:p>
          </table:table-cell>
          <table:table-cell table:formula="of:=[.D505]-[.D5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8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0466666666666667" calcext:value-type="float">
            <text:p>0,00046666666666666700</text:p>
          </table:table-cell>
          <table:table-cell table:formula="of:=[.D506]-[.D5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8" office:value-type="float" office:value="4040" calcext:value-type="float">
            <text:p>404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0467592592592593" calcext:value-type="float">
            <text:p>0,00046759259259259300</text:p>
          </table:table-cell>
          <table:table-cell table:formula="of:=[.D507]-[.D5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8" office:value-type="float" office:value="4048" calcext:value-type="float">
            <text:p>4048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0468518518518519" calcext:value-type="float">
            <text:p>0,00046851851851851900</text:p>
          </table:table-cell>
          <table:table-cell table:formula="of:=[.D508]-[.D5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8" office:value-type="float" office:value="4056" calcext:value-type="float">
            <text:p>4056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0469444444444444" calcext:value-type="float">
            <text:p>0,00046944444444444400</text:p>
          </table:table-cell>
          <table:table-cell table:formula="of:=[.D509]-[.D508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8" office:value-type="float" office:value="4064" calcext:value-type="float">
            <text:p>4064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047037037037037" calcext:value-type="float">
            <text:p>0,00047037037037037000</text:p>
          </table:table-cell>
          <table:table-cell table:formula="of:=[.D510]-[.D5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8" office:value-type="float" office:value="4072" calcext:value-type="float">
            <text:p>4072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0471296296296296" calcext:value-type="float">
            <text:p>0,00047129629629629600</text:p>
          </table:table-cell>
          <table:table-cell table:formula="of:=[.D511]-[.D5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8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0472222222222222" calcext:value-type="float">
            <text:p>0,00047222222222222200</text:p>
          </table:table-cell>
          <table:table-cell table:formula="of:=[.D512]-[.D5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8" office:value-type="float" office:value="4088" calcext:value-type="float">
            <text:p>4088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0473148148148148" calcext:value-type="float">
            <text:p>0,00047314814814814800</text:p>
          </table:table-cell>
          <table:table-cell table:formula="of:=[.D513]-[.D5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8" office:value-type="float" office:value="4096" calcext:value-type="float">
            <text:p>4096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0474074074074074" calcext:value-type="float">
            <text:p>0,00047407407407407400</text:p>
          </table:table-cell>
          <table:table-cell table:formula="of:=[.D514]-[.D5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8" office:value-type="float" office:value="4104" calcext:value-type="float">
            <text:p>4104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0475" calcext:value-type="float">
            <text:p>0,00047500000000000000</text:p>
          </table:table-cell>
          <table:table-cell table:formula="of:=[.D515]-[.D5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8" office:value-type="float" office:value="4112" calcext:value-type="float">
            <text:p>4112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0475925925925926" calcext:value-type="float">
            <text:p>0,00047592592592592600</text:p>
          </table:table-cell>
          <table:table-cell table:formula="of:=[.D516]-[.D5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8" office:value-type="float" office:value="4120" calcext:value-type="float">
            <text:p>412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0476851851851852" calcext:value-type="float">
            <text:p>0,00047685185185185200</text:p>
          </table:table-cell>
          <table:table-cell table:formula="of:=[.D517]-[.D5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8" office:value-type="float" office:value="4128" calcext:value-type="float">
            <text:p>4128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0477777777777778" calcext:value-type="float">
            <text:p>0,00047777777777777800</text:p>
          </table:table-cell>
          <table:table-cell table:formula="of:=[.D518]-[.D5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8" office:value-type="float" office:value="4136" calcext:value-type="float">
            <text:p>4136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0478703703703704" calcext:value-type="float">
            <text:p>0,00047870370370370400</text:p>
          </table:table-cell>
          <table:table-cell table:formula="of:=[.D519]-[.D518]" office:value-type="float" office:value="0.000000925925925925975" calcext:value-type="float">
            <text:p>0,0000009259259259259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8" office:value-type="float" office:value="4144" calcext:value-type="float">
            <text:p>4144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047962962962963" calcext:value-type="float">
            <text:p>0,00047962962962963000</text:p>
          </table:table-cell>
          <table:table-cell table:formula="of:=[.D520]-[.D5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8" office:value-type="float" office:value="4152" calcext:value-type="float">
            <text:p>4152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0480555555555556" calcext:value-type="float">
            <text:p>0,00048055555555555600</text:p>
          </table:table-cell>
          <table:table-cell table:formula="of:=[.D521]-[.D5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8" office:value-type="float" office:value="4160" calcext:value-type="float">
            <text:p>416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0481481481481482" calcext:value-type="float">
            <text:p>0,00048148148148148200</text:p>
          </table:table-cell>
          <table:table-cell table:formula="of:=[.D522]-[.D5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8" office:value-type="float" office:value="4168" calcext:value-type="float">
            <text:p>4168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0482407407407407" calcext:value-type="float">
            <text:p>0,00048240740740740700</text:p>
          </table:table-cell>
          <table:table-cell table:formula="of:=[.D523]-[.D5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8" office:value-type="float" office:value="4176" calcext:value-type="float">
            <text:p>4176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0483333333333333" calcext:value-type="float">
            <text:p>0,00048333333333333300</text:p>
          </table:table-cell>
          <table:table-cell table:formula="of:=[.D524]-[.D5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8" office:value-type="float" office:value="4184" calcext:value-type="float">
            <text:p>4184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0484259259259259" calcext:value-type="float">
            <text:p>0,00048425925925925900</text:p>
          </table:table-cell>
          <table:table-cell table:formula="of:=[.D525]-[.D5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8" office:value-type="float" office:value="4192" calcext:value-type="float">
            <text:p>4192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0485185185185185" calcext:value-type="float">
            <text:p>0,00048518518518518500</text:p>
          </table:table-cell>
          <table:table-cell table:formula="of:=[.D526]-[.D5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8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0486111111111111" calcext:value-type="float">
            <text:p>0,00048611111111111100</text:p>
          </table:table-cell>
          <table:table-cell table:formula="of:=[.D527]-[.D5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8" office:value-type="float" office:value="4208" calcext:value-type="float">
            <text:p>4208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0487037037037037" calcext:value-type="float">
            <text:p>0,00048703703703703700</text:p>
          </table:table-cell>
          <table:table-cell table:formula="of:=[.D528]-[.D5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8" office:value-type="float" office:value="4216" calcext:value-type="float">
            <text:p>4216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0487962962962963" calcext:value-type="float">
            <text:p>0,00048796296296296300</text:p>
          </table:table-cell>
          <table:table-cell table:formula="of:=[.D529]-[.D5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8" office:value-type="float" office:value="4224" calcext:value-type="float">
            <text:p>4224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0488888888888889" calcext:value-type="float">
            <text:p>0,00048888888888888900</text:p>
          </table:table-cell>
          <table:table-cell table:formula="of:=[.D530]-[.D5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8" office:value-type="float" office:value="4232" calcext:value-type="float">
            <text:p>4232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0489814814814815" calcext:value-type="float">
            <text:p>0,00048981481481481500</text:p>
          </table:table-cell>
          <table:table-cell table:formula="of:=[.D531]-[.D5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8" office:value-type="float" office:value="4240" calcext:value-type="float">
            <text:p>424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0490740740740741" calcext:value-type="float">
            <text:p>0,00049074074074074100</text:p>
          </table:table-cell>
          <table:table-cell table:formula="of:=[.D532]-[.D5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8" office:value-type="float" office:value="4248" calcext:value-type="float">
            <text:p>4248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0491666666666667" calcext:value-type="float">
            <text:p>0,00049166666666666700</text:p>
          </table:table-cell>
          <table:table-cell table:formula="of:=[.D533]-[.D5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8" office:value-type="float" office:value="4256" calcext:value-type="float">
            <text:p>4256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0492592592592593" calcext:value-type="float">
            <text:p>0,00049259259259259300</text:p>
          </table:table-cell>
          <table:table-cell table:formula="of:=[.D534]-[.D533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8" office:value-type="float" office:value="4264" calcext:value-type="float">
            <text:p>4264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0493518518518519" calcext:value-type="float">
            <text:p>0,00049351851851851900</text:p>
          </table:table-cell>
          <table:table-cell table:formula="of:=[.D535]-[.D5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8" office:value-type="float" office:value="4272" calcext:value-type="float">
            <text:p>4272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0494444444444445" calcext:value-type="float">
            <text:p>0,00049444444444444500</text:p>
          </table:table-cell>
          <table:table-cell table:formula="of:=[.D536]-[.D5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8" office:value-type="float" office:value="4280" calcext:value-type="float">
            <text:p>428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049537037037037" calcext:value-type="float">
            <text:p>0,00049537037037037000</text:p>
          </table:table-cell>
          <table:table-cell table:formula="of:=[.D537]-[.D5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8" office:value-type="float" office:value="4288" calcext:value-type="float">
            <text:p>4288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0496296296296296" calcext:value-type="float">
            <text:p>0,00049629629629629600</text:p>
          </table:table-cell>
          <table:table-cell table:formula="of:=[.D538]-[.D5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8" office:value-type="float" office:value="4296" calcext:value-type="float">
            <text:p>4296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0497222222222222" calcext:value-type="float">
            <text:p>0,00049722222222222200</text:p>
          </table:table-cell>
          <table:table-cell table:formula="of:=[.D539]-[.D5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8" office:value-type="float" office:value="4304" calcext:value-type="float">
            <text:p>4304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0498148148148148" calcext:value-type="float">
            <text:p>0,00049814814814814800</text:p>
          </table:table-cell>
          <table:table-cell table:formula="of:=[.D540]-[.D5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8" office:value-type="float" office:value="4312" calcext:value-type="float">
            <text:p>4312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0499074074074074" calcext:value-type="float">
            <text:p>0,00049907407407407400</text:p>
          </table:table-cell>
          <table:table-cell table:formula="of:=[.D541]-[.D5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8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05" calcext:value-type="float">
            <text:p>0,00050000000000000000</text:p>
          </table:table-cell>
          <table:table-cell table:formula="of:=[.D542]-[.D5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8" office:value-type="float" office:value="4328" calcext:value-type="float">
            <text:p>4328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0500925925925926" calcext:value-type="float">
            <text:p>0,00050092592592592600</text:p>
          </table:table-cell>
          <table:table-cell table:formula="of:=[.D543]-[.D5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8" office:value-type="float" office:value="4336" calcext:value-type="float">
            <text:p>4336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0501851851851852" calcext:value-type="float">
            <text:p>0,00050185185185185200</text:p>
          </table:table-cell>
          <table:table-cell table:formula="of:=[.D544]-[.D5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8" office:value-type="float" office:value="4344" calcext:value-type="float">
            <text:p>4344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0502777777777778" calcext:value-type="float">
            <text:p>0,00050277777777777800</text:p>
          </table:table-cell>
          <table:table-cell table:formula="of:=[.D545]-[.D5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8" office:value-type="float" office:value="4352" calcext:value-type="float">
            <text:p>4352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0503703703703704" calcext:value-type="float">
            <text:p>0,00050370370370370400</text:p>
          </table:table-cell>
          <table:table-cell table:formula="of:=[.D546]-[.D5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8" office:value-type="float" office:value="4360" calcext:value-type="float">
            <text:p>436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050462962962963" calcext:value-type="float">
            <text:p>0,00050462962962963000</text:p>
          </table:table-cell>
          <table:table-cell table:formula="of:=[.D547]-[.D5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8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0505555555555556" calcext:value-type="float">
            <text:p>0,00050555555555555600</text:p>
          </table:table-cell>
          <table:table-cell table:formula="of:=[.D548]-[.D5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8" office:value-type="float" office:value="4376" calcext:value-type="float">
            <text:p>4376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0506481481481482" calcext:value-type="float">
            <text:p>0,00050648148148148200</text:p>
          </table:table-cell>
          <table:table-cell table:formula="of:=[.D549]-[.D5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8" office:value-type="float" office:value="4384" calcext:value-type="float">
            <text:p>4384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0507407407407407" calcext:value-type="float">
            <text:p>0,00050740740740740700</text:p>
          </table:table-cell>
          <table:table-cell table:formula="of:=[.D550]-[.D5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8" office:value-type="float" office:value="4392" calcext:value-type="float">
            <text:p>4392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0508333333333333" calcext:value-type="float">
            <text:p>0,00050833333333333300</text:p>
          </table:table-cell>
          <table:table-cell table:formula="of:=[.D551]-[.D5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8" office:value-type="float" office:value="4400" calcext:value-type="float">
            <text:p>44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0509259259259259" calcext:value-type="float">
            <text:p>0,00050925925925925900</text:p>
          </table:table-cell>
          <table:table-cell table:formula="of:=[.D552]-[.D5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8" office:value-type="float" office:value="4408" calcext:value-type="float">
            <text:p>4408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0510185185185185" calcext:value-type="float">
            <text:p>0,00051018518518518500</text:p>
          </table:table-cell>
          <table:table-cell table:formula="of:=[.D553]-[.D552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8" office:value-type="float" office:value="4416" calcext:value-type="float">
            <text:p>4416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0511111111111111" calcext:value-type="float">
            <text:p>0,00051111111111111100</text:p>
          </table:table-cell>
          <table:table-cell table:formula="of:=[.D554]-[.D5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8" office:value-type="float" office:value="4424" calcext:value-type="float">
            <text:p>4424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0512037037037037" calcext:value-type="float">
            <text:p>0,00051203703703703700</text:p>
          </table:table-cell>
          <table:table-cell table:formula="of:=[.D555]-[.D5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8" office:value-type="float" office:value="4432" calcext:value-type="float">
            <text:p>4432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0512962962962963" calcext:value-type="float">
            <text:p>0,00051296296296296300</text:p>
          </table:table-cell>
          <table:table-cell table:formula="of:=[.D556]-[.D5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8" office:value-type="float" office:value="4440" calcext:value-type="float">
            <text:p>444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0513888888888889" calcext:value-type="float">
            <text:p>0,00051388888888888900</text:p>
          </table:table-cell>
          <table:table-cell table:formula="of:=[.D557]-[.D5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8" office:value-type="float" office:value="4448" calcext:value-type="float">
            <text:p>4448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0514814814814815" calcext:value-type="float">
            <text:p>0,00051481481481481500</text:p>
          </table:table-cell>
          <table:table-cell table:formula="of:=[.D558]-[.D5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8" office:value-type="float" office:value="4456" calcext:value-type="float">
            <text:p>4456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0515740740740741" calcext:value-type="float">
            <text:p>0,00051574074074074100</text:p>
          </table:table-cell>
          <table:table-cell table:formula="of:=[.D559]-[.D5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8" office:value-type="float" office:value="4464" calcext:value-type="float">
            <text:p>4464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0516666666666667" calcext:value-type="float">
            <text:p>0,00051666666666666700</text:p>
          </table:table-cell>
          <table:table-cell table:formula="of:=[.D560]-[.D5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8" office:value-type="float" office:value="4472" calcext:value-type="float">
            <text:p>4472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0517592592592593" calcext:value-type="float">
            <text:p>0,00051759259259259300</text:p>
          </table:table-cell>
          <table:table-cell table:formula="of:=[.D561]-[.D5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8" office:value-type="float" office:value="4480" calcext:value-type="float">
            <text:p>448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0518518518518519" calcext:value-type="float">
            <text:p>0,00051851851851851900</text:p>
          </table:table-cell>
          <table:table-cell table:formula="of:=[.D562]-[.D5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8" office:value-type="float" office:value="4488" calcext:value-type="float">
            <text:p>4488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0519444444444444" calcext:value-type="float">
            <text:p>0,00051944444444444400</text:p>
          </table:table-cell>
          <table:table-cell table:formula="of:=[.D563]-[.D5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8" office:value-type="float" office:value="4496" calcext:value-type="float">
            <text:p>4496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052037037037037" calcext:value-type="float">
            <text:p>0,00052037037037037000</text:p>
          </table:table-cell>
          <table:table-cell table:formula="of:=[.D564]-[.D5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8" office:value-type="float" office:value="4504" calcext:value-type="float">
            <text:p>4504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0521296296296296" calcext:value-type="float">
            <text:p>0,00052129629629629600</text:p>
          </table:table-cell>
          <table:table-cell table:formula="of:=[.D565]-[.D5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8" office:value-type="float" office:value="4512" calcext:value-type="float">
            <text:p>4512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0522222222222222" calcext:value-type="float">
            <text:p>0,00052222222222222200</text:p>
          </table:table-cell>
          <table:table-cell table:formula="of:=[.D566]-[.D5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8" office:value-type="float" office:value="4520" calcext:value-type="float">
            <text:p>452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0523148148148148" calcext:value-type="float">
            <text:p>0,00052314814814814800</text:p>
          </table:table-cell>
          <table:table-cell table:formula="of:=[.D567]-[.D5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8" office:value-type="float" office:value="4528" calcext:value-type="float">
            <text:p>4528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0524074074074074" calcext:value-type="float">
            <text:p>0,00052407407407407400</text:p>
          </table:table-cell>
          <table:table-cell table:formula="of:=[.D568]-[.D5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8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0525" calcext:value-type="float">
            <text:p>0,00052500000000000000</text:p>
          </table:table-cell>
          <table:table-cell table:formula="of:=[.D569]-[.D5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8" office:value-type="float" office:value="4544" calcext:value-type="float">
            <text:p>4544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0525925925925926" calcext:value-type="float">
            <text:p>0,00052592592592592600</text:p>
          </table:table-cell>
          <table:table-cell table:formula="of:=[.D570]-[.D5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8" office:value-type="float" office:value="4552" calcext:value-type="float">
            <text:p>4552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0526851851851852" calcext:value-type="float">
            <text:p>0,00052685185185185200</text:p>
          </table:table-cell>
          <table:table-cell table:formula="of:=[.D571]-[.D5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8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0527777777777778" calcext:value-type="float">
            <text:p>0,00052777777777777800</text:p>
          </table:table-cell>
          <table:table-cell table:formula="of:=[.D572]-[.D571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8" office:value-type="float" office:value="4568" calcext:value-type="float">
            <text:p>4568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0528703703703704" calcext:value-type="float">
            <text:p>0,00052870370370370400</text:p>
          </table:table-cell>
          <table:table-cell table:formula="of:=[.D573]-[.D5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8" office:value-type="float" office:value="4576" calcext:value-type="float">
            <text:p>4576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052962962962963" calcext:value-type="float">
            <text:p>0,00052962962962963000</text:p>
          </table:table-cell>
          <table:table-cell table:formula="of:=[.D574]-[.D5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8" office:value-type="float" office:value="4584" calcext:value-type="float">
            <text:p>4584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0530555555555556" calcext:value-type="float">
            <text:p>0,00053055555555555600</text:p>
          </table:table-cell>
          <table:table-cell table:formula="of:=[.D575]-[.D5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8" office:value-type="float" office:value="4592" calcext:value-type="float">
            <text:p>4592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0531481481481482" calcext:value-type="float">
            <text:p>0,00053148148148148200</text:p>
          </table:table-cell>
          <table:table-cell table:formula="of:=[.D576]-[.D5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8" office:value-type="float" office:value="4600" calcext:value-type="float">
            <text:p>460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0532407407407407" calcext:value-type="float">
            <text:p>0,00053240740740740700</text:p>
          </table:table-cell>
          <table:table-cell table:formula="of:=[.D577]-[.D5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8" office:value-type="float" office:value="4608" calcext:value-type="float">
            <text:p>4608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0533333333333333" calcext:value-type="float">
            <text:p>0,00053333333333333300</text:p>
          </table:table-cell>
          <table:table-cell table:formula="of:=[.D578]-[.D5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8" office:value-type="float" office:value="4616" calcext:value-type="float">
            <text:p>4616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0534259259259259" calcext:value-type="float">
            <text:p>0,00053425925925925900</text:p>
          </table:table-cell>
          <table:table-cell table:formula="of:=[.D579]-[.D5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8" office:value-type="float" office:value="4624" calcext:value-type="float">
            <text:p>4624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0535185185185185" calcext:value-type="float">
            <text:p>0,00053518518518518500</text:p>
          </table:table-cell>
          <table:table-cell table:formula="of:=[.D580]-[.D5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8" office:value-type="float" office:value="4632" calcext:value-type="float">
            <text:p>4632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0536111111111111" calcext:value-type="float">
            <text:p>0,00053611111111111100</text:p>
          </table:table-cell>
          <table:table-cell table:formula="of:=[.D581]-[.D5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8" office:value-type="float" office:value="4640" calcext:value-type="float">
            <text:p>464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0537037037037037" calcext:value-type="float">
            <text:p>0,00053703703703703700</text:p>
          </table:table-cell>
          <table:table-cell table:formula="of:=[.D582]-[.D5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8" office:value-type="float" office:value="4648" calcext:value-type="float">
            <text:p>4648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0537962962962963" calcext:value-type="float">
            <text:p>0,00053796296296296300</text:p>
          </table:table-cell>
          <table:table-cell table:formula="of:=[.D583]-[.D5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8" office:value-type="float" office:value="4656" calcext:value-type="float">
            <text:p>4656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0538888888888889" calcext:value-type="float">
            <text:p>0,00053888888888888900</text:p>
          </table:table-cell>
          <table:table-cell table:formula="of:=[.D584]-[.D5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8" office:value-type="float" office:value="4664" calcext:value-type="float">
            <text:p>4664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0539814814814815" calcext:value-type="float">
            <text:p>0,00053981481481481500</text:p>
          </table:table-cell>
          <table:table-cell table:formula="of:=[.D585]-[.D5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8" office:value-type="float" office:value="4672" calcext:value-type="float">
            <text:p>4672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0540740740740741" calcext:value-type="float">
            <text:p>0,00054074074074074100</text:p>
          </table:table-cell>
          <table:table-cell table:formula="of:=[.D586]-[.D5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8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0541666666666667" calcext:value-type="float">
            <text:p>0,00054166666666666700</text:p>
          </table:table-cell>
          <table:table-cell table:formula="of:=[.D587]-[.D5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8" office:value-type="float" office:value="4688" calcext:value-type="float">
            <text:p>4688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0542592592592593" calcext:value-type="float">
            <text:p>0,00054259259259259300</text:p>
          </table:table-cell>
          <table:table-cell table:formula="of:=[.D588]-[.D5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8" office:value-type="float" office:value="4696" calcext:value-type="float">
            <text:p>4696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0543518518518519" calcext:value-type="float">
            <text:p>0,00054351851851851900</text:p>
          </table:table-cell>
          <table:table-cell table:formula="of:=[.D589]-[.D5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8" office:value-type="float" office:value="4704" calcext:value-type="float">
            <text:p>4704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0544444444444444" calcext:value-type="float">
            <text:p>0,00054444444444444400</text:p>
          </table:table-cell>
          <table:table-cell table:formula="of:=[.D590]-[.D5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8" office:value-type="float" office:value="4712" calcext:value-type="float">
            <text:p>4712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054537037037037" calcext:value-type="float">
            <text:p>0,00054537037037037000</text:p>
          </table:table-cell>
          <table:table-cell table:formula="of:=[.D591]-[.D5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8" office:value-type="float" office:value="4720" calcext:value-type="float">
            <text:p>472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0546296296296296" calcext:value-type="float">
            <text:p>0,00054629629629629600</text:p>
          </table:table-cell>
          <table:table-cell table:formula="of:=[.D592]-[.D591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8" office:value-type="float" office:value="4728" calcext:value-type="float">
            <text:p>4728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0547222222222222" calcext:value-type="float">
            <text:p>0,00054722222222222200</text:p>
          </table:table-cell>
          <table:table-cell table:formula="of:=[.D593]-[.D5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8" office:value-type="float" office:value="4736" calcext:value-type="float">
            <text:p>4736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0548148148148148" calcext:value-type="float">
            <text:p>0,00054814814814814800</text:p>
          </table:table-cell>
          <table:table-cell table:formula="of:=[.D594]-[.D5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8" office:value-type="float" office:value="4744" calcext:value-type="float">
            <text:p>4744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0549074074074074" calcext:value-type="float">
            <text:p>0,00054907407407407400</text:p>
          </table:table-cell>
          <table:table-cell table:formula="of:=[.D595]-[.D5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8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055" calcext:value-type="float">
            <text:p>0,00055000000000000000</text:p>
          </table:table-cell>
          <table:table-cell table:formula="of:=[.D596]-[.D5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8" office:value-type="float" office:value="4760" calcext:value-type="float">
            <text:p>476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0550925925925926" calcext:value-type="float">
            <text:p>0,00055092592592592600</text:p>
          </table:table-cell>
          <table:table-cell table:formula="of:=[.D597]-[.D5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8" office:value-type="float" office:value="4768" calcext:value-type="float">
            <text:p>4768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0551851851851852" calcext:value-type="float">
            <text:p>0,00055185185185185200</text:p>
          </table:table-cell>
          <table:table-cell table:formula="of:=[.D598]-[.D5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8" office:value-type="float" office:value="4776" calcext:value-type="float">
            <text:p>4776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0552777777777778" calcext:value-type="float">
            <text:p>0,00055277777777777800</text:p>
          </table:table-cell>
          <table:table-cell table:formula="of:=[.D599]-[.D5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8" office:value-type="float" office:value="4784" calcext:value-type="float">
            <text:p>4784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0553703703703704" calcext:value-type="float">
            <text:p>0,00055370370370370400</text:p>
          </table:table-cell>
          <table:table-cell table:formula="of:=[.D600]-[.D5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8" office:value-type="float" office:value="4792" calcext:value-type="float">
            <text:p>4792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055462962962963" calcext:value-type="float">
            <text:p>0,00055462962962963000</text:p>
          </table:table-cell>
          <table:table-cell table:formula="of:=[.D601]-[.D6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8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0555555555555556" calcext:value-type="float">
            <text:p>0,00055555555555555600</text:p>
          </table:table-cell>
          <table:table-cell table:formula="of:=[.D602]-[.D6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8" office:value-type="float" office:value="4808" calcext:value-type="float">
            <text:p>4808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0556481481481482" calcext:value-type="float">
            <text:p>0,00055648148148148200</text:p>
          </table:table-cell>
          <table:table-cell table:formula="of:=[.D603]-[.D6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8" office:value-type="float" office:value="4816" calcext:value-type="float">
            <text:p>4816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0557407407407407" calcext:value-type="float">
            <text:p>0,00055740740740740700</text:p>
          </table:table-cell>
          <table:table-cell table:formula="of:=[.D604]-[.D6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8" office:value-type="float" office:value="4824" calcext:value-type="float">
            <text:p>4824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0558333333333333" calcext:value-type="float">
            <text:p>0,00055833333333333300</text:p>
          </table:table-cell>
          <table:table-cell table:formula="of:=[.D605]-[.D6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8" office:value-type="float" office:value="4832" calcext:value-type="float">
            <text:p>4832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0559259259259259" calcext:value-type="float">
            <text:p>0,00055925925925925900</text:p>
          </table:table-cell>
          <table:table-cell table:formula="of:=[.D606]-[.D6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8" office:value-type="float" office:value="4840" calcext:value-type="float">
            <text:p>4840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0560185185185185" calcext:value-type="float">
            <text:p>0,00056018518518518500</text:p>
          </table:table-cell>
          <table:table-cell table:formula="of:=[.D607]-[.D6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8" office:value-type="float" office:value="4848" calcext:value-type="float">
            <text:p>4848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0561111111111111" calcext:value-type="float">
            <text:p>0,00056111111111111100</text:p>
          </table:table-cell>
          <table:table-cell table:formula="of:=[.D608]-[.D6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8" office:value-type="float" office:value="4856" calcext:value-type="float">
            <text:p>4856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0562037037037037" calcext:value-type="float">
            <text:p>0,00056203703703703700</text:p>
          </table:table-cell>
          <table:table-cell table:formula="of:=[.D609]-[.D6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8" office:value-type="float" office:value="4864" calcext:value-type="float">
            <text:p>4864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0562962962962963" calcext:value-type="float">
            <text:p>0,00056296296296296300</text:p>
          </table:table-cell>
          <table:table-cell table:formula="of:=[.D610]-[.D6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8" office:value-type="float" office:value="4872" calcext:value-type="float">
            <text:p>4872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0563888888888889" calcext:value-type="float">
            <text:p>0,00056388888888888900</text:p>
          </table:table-cell>
          <table:table-cell table:formula="of:=[.D611]-[.D610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8" office:value-type="float" office:value="4880" calcext:value-type="float">
            <text:p>488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0564814814814815" calcext:value-type="float">
            <text:p>0,00056481481481481500</text:p>
          </table:table-cell>
          <table:table-cell table:formula="of:=[.D612]-[.D6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8" office:value-type="float" office:value="4888" calcext:value-type="float">
            <text:p>4888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0565740740740741" calcext:value-type="float">
            <text:p>0,00056574074074074100</text:p>
          </table:table-cell>
          <table:table-cell table:formula="of:=[.D613]-[.D6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8" office:value-type="float" office:value="4896" calcext:value-type="float">
            <text:p>4896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0566666666666667" calcext:value-type="float">
            <text:p>0,00056666666666666700</text:p>
          </table:table-cell>
          <table:table-cell table:formula="of:=[.D614]-[.D6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8" office:value-type="float" office:value="4904" calcext:value-type="float">
            <text:p>4904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0567592592592593" calcext:value-type="float">
            <text:p>0,00056759259259259300</text:p>
          </table:table-cell>
          <table:table-cell table:formula="of:=[.D615]-[.D6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8" office:value-type="float" office:value="4912" calcext:value-type="float">
            <text:p>4912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0568518518518519" calcext:value-type="float">
            <text:p>0,00056851851851851900</text:p>
          </table:table-cell>
          <table:table-cell table:formula="of:=[.D616]-[.D6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8" office:value-type="float" office:value="4920" calcext:value-type="float">
            <text:p>4920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0569444444444445" calcext:value-type="float">
            <text:p>0,00056944444444444500</text:p>
          </table:table-cell>
          <table:table-cell table:formula="of:=[.D617]-[.D6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8" office:value-type="float" office:value="4928" calcext:value-type="float">
            <text:p>4928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057037037037037" calcext:value-type="float">
            <text:p>0,00057037037037037000</text:p>
          </table:table-cell>
          <table:table-cell table:formula="of:=[.D618]-[.D6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8" office:value-type="float" office:value="4936" calcext:value-type="float">
            <text:p>4936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0571296296296296" calcext:value-type="float">
            <text:p>0,00057129629629629600</text:p>
          </table:table-cell>
          <table:table-cell table:formula="of:=[.D619]-[.D6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8" office:value-type="float" office:value="4944" calcext:value-type="float">
            <text:p>4944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0572222222222222" calcext:value-type="float">
            <text:p>0,00057222222222222200</text:p>
          </table:table-cell>
          <table:table-cell table:formula="of:=[.D620]-[.D6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8" office:value-type="float" office:value="4952" calcext:value-type="float">
            <text:p>4952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0573148148148148" calcext:value-type="float">
            <text:p>0,00057314814814814800</text:p>
          </table:table-cell>
          <table:table-cell table:formula="of:=[.D621]-[.D6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8" office:value-type="float" office:value="4960" calcext:value-type="float">
            <text:p>496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0574074074074074" calcext:value-type="float">
            <text:p>0,00057407407407407400</text:p>
          </table:table-cell>
          <table:table-cell table:formula="of:=[.D622]-[.D6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8" office:value-type="float" office:value="4968" calcext:value-type="float">
            <text:p>4968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0575" calcext:value-type="float">
            <text:p>0,00057500000000000000</text:p>
          </table:table-cell>
          <table:table-cell table:formula="of:=[.D623]-[.D6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8" office:value-type="float" office:value="4976" calcext:value-type="float">
            <text:p>4976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0575925925925926" calcext:value-type="float">
            <text:p>0,00057592592592592600</text:p>
          </table:table-cell>
          <table:table-cell table:formula="of:=[.D624]-[.D6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8" office:value-type="float" office:value="4984" calcext:value-type="float">
            <text:p>4984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0576851851851852" calcext:value-type="float">
            <text:p>0,00057685185185185200</text:p>
          </table:table-cell>
          <table:table-cell table:formula="of:=[.D625]-[.D6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8" office:value-type="float" office:value="4992" calcext:value-type="float">
            <text:p>4992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0577777777777778" calcext:value-type="float">
            <text:p>0,00057777777777777800</text:p>
          </table:table-cell>
          <table:table-cell table:formula="of:=[.D626]-[.D6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8" office:value-type="float" office:value="5000" calcext:value-type="float">
            <text:p>5000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0578703703703704" calcext:value-type="float">
            <text:p>0,00057870370370370400</text:p>
          </table:table-cell>
          <table:table-cell table:formula="of:=[.D627]-[.D6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8" office:value-type="float" office:value="5008" calcext:value-type="float">
            <text:p>5008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057962962962963" calcext:value-type="float">
            <text:p>0,00057962962962963000</text:p>
          </table:table-cell>
          <table:table-cell table:formula="of:=[.D628]-[.D6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8" office:value-type="float" office:value="5016" calcext:value-type="float">
            <text:p>5016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0580555555555556" calcext:value-type="float">
            <text:p>0,00058055555555555600</text:p>
          </table:table-cell>
          <table:table-cell table:formula="of:=[.D629]-[.D6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8" office:value-type="float" office:value="5024" calcext:value-type="float">
            <text:p>5024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0581481481481481" calcext:value-type="float">
            <text:p>0,00058148148148148100</text:p>
          </table:table-cell>
          <table:table-cell table:formula="of:=[.D630]-[.D629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8" office:value-type="float" office:value="5032" calcext:value-type="float">
            <text:p>5032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0582407407407408" calcext:value-type="float">
            <text:p>0,00058240740740740800</text:p>
          </table:table-cell>
          <table:table-cell table:formula="of:=[.D631]-[.D6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8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0583333333333333" calcext:value-type="float">
            <text:p>0,00058333333333333300</text:p>
          </table:table-cell>
          <table:table-cell table:formula="of:=[.D632]-[.D6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8" office:value-type="float" office:value="5048" calcext:value-type="float">
            <text:p>5048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0584259259259259" calcext:value-type="float">
            <text:p>0,00058425925925925900</text:p>
          </table:table-cell>
          <table:table-cell table:formula="of:=[.D633]-[.D6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8" office:value-type="float" office:value="5056" calcext:value-type="float">
            <text:p>5056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0585185185185185" calcext:value-type="float">
            <text:p>0,00058518518518518500</text:p>
          </table:table-cell>
          <table:table-cell table:formula="of:=[.D634]-[.D6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8" office:value-type="float" office:value="5064" calcext:value-type="float">
            <text:p>5064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0586111111111111" calcext:value-type="float">
            <text:p>0,00058611111111111100</text:p>
          </table:table-cell>
          <table:table-cell table:formula="of:=[.D635]-[.D6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8" office:value-type="float" office:value="5072" calcext:value-type="float">
            <text:p>5072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0587037037037037" calcext:value-type="float">
            <text:p>0,00058703703703703700</text:p>
          </table:table-cell>
          <table:table-cell table:formula="of:=[.D636]-[.D6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8" office:value-type="float" office:value="5080" calcext:value-type="float">
            <text:p>5080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0587962962962963" calcext:value-type="float">
            <text:p>0,00058796296296296300</text:p>
          </table:table-cell>
          <table:table-cell table:formula="of:=[.D637]-[.D6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8" office:value-type="float" office:value="5088" calcext:value-type="float">
            <text:p>5088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0588888888888889" calcext:value-type="float">
            <text:p>0,00058888888888888900</text:p>
          </table:table-cell>
          <table:table-cell table:formula="of:=[.D638]-[.D6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8" office:value-type="float" office:value="5096" calcext:value-type="float">
            <text:p>5096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0589814814814815" calcext:value-type="float">
            <text:p>0,00058981481481481500</text:p>
          </table:table-cell>
          <table:table-cell table:formula="of:=[.D639]-[.D6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8" office:value-type="float" office:value="5104" calcext:value-type="float">
            <text:p>5104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0590740740740741" calcext:value-type="float">
            <text:p>0,00059074074074074100</text:p>
          </table:table-cell>
          <table:table-cell table:formula="of:=[.D640]-[.D6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8" office:value-type="float" office:value="5112" calcext:value-type="float">
            <text:p>5112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0591666666666667" calcext:value-type="float">
            <text:p>0,00059166666666666700</text:p>
          </table:table-cell>
          <table:table-cell table:formula="of:=[.D641]-[.D6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8" office:value-type="float" office:value="5120" calcext:value-type="float">
            <text:p>512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0592592592592593" calcext:value-type="float">
            <text:p>0,00059259259259259300</text:p>
          </table:table-cell>
          <table:table-cell table:formula="of:=[.D642]-[.D6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8" office:value-type="float" office:value="5128" calcext:value-type="float">
            <text:p>5128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0593518518518519" calcext:value-type="float">
            <text:p>0,00059351851851851900</text:p>
          </table:table-cell>
          <table:table-cell table:formula="of:=[.D643]-[.D6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8" office:value-type="float" office:value="5136" calcext:value-type="float">
            <text:p>5136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0594444444444444" calcext:value-type="float">
            <text:p>0,00059444444444444400</text:p>
          </table:table-cell>
          <table:table-cell table:formula="of:=[.D644]-[.D6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8" office:value-type="float" office:value="5144" calcext:value-type="float">
            <text:p>5144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059537037037037" calcext:value-type="float">
            <text:p>0,00059537037037037000</text:p>
          </table:table-cell>
          <table:table-cell table:formula="of:=[.D645]-[.D6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8" office:value-type="float" office:value="5152" calcext:value-type="float">
            <text:p>5152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0596296296296296" calcext:value-type="float">
            <text:p>0,00059629629629629600</text:p>
          </table:table-cell>
          <table:table-cell table:formula="of:=[.D646]-[.D6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8" office:value-type="float" office:value="5160" calcext:value-type="float">
            <text:p>5160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0597222222222222" calcext:value-type="float">
            <text:p>0,00059722222222222200</text:p>
          </table:table-cell>
          <table:table-cell table:formula="of:=[.D647]-[.D6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8" office:value-type="float" office:value="5168" calcext:value-type="float">
            <text:p>5168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0598148148148148" calcext:value-type="float">
            <text:p>0,00059814814814814800</text:p>
          </table:table-cell>
          <table:table-cell table:formula="of:=[.D648]-[.D6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8" office:value-type="float" office:value="5176" calcext:value-type="float">
            <text:p>5176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0599074074074074" calcext:value-type="float">
            <text:p>0,00059907407407407400</text:p>
          </table:table-cell>
          <table:table-cell table:formula="of:=[.D649]-[.D6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8" office:value-type="float" office:value="5184" calcext:value-type="float">
            <text:p>5184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06" calcext:value-type="float">
            <text:p>0,00060000000000000000</text:p>
          </table:table-cell>
          <table:table-cell table:formula="of:=[.D650]-[.D649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8" office:value-type="float" office:value="5192" calcext:value-type="float">
            <text:p>5192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0600925925925926" calcext:value-type="float">
            <text:p>0,00060092592592592600</text:p>
          </table:table-cell>
          <table:table-cell table:formula="of:=[.D651]-[.D6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8" office:value-type="float" office:value="5200" calcext:value-type="float">
            <text:p>520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0601851851851852" calcext:value-type="float">
            <text:p>0,00060185185185185200</text:p>
          </table:table-cell>
          <table:table-cell table:formula="of:=[.D652]-[.D6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8" office:value-type="float" office:value="5208" calcext:value-type="float">
            <text:p>5208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0602777777777778" calcext:value-type="float">
            <text:p>0,00060277777777777800</text:p>
          </table:table-cell>
          <table:table-cell table:formula="of:=[.D653]-[.D6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8" office:value-type="float" office:value="5216" calcext:value-type="float">
            <text:p>5216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0603703703703704" calcext:value-type="float">
            <text:p>0,00060370370370370400</text:p>
          </table:table-cell>
          <table:table-cell table:formula="of:=[.D654]-[.D6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8" office:value-type="float" office:value="5224" calcext:value-type="float">
            <text:p>5224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060462962962963" calcext:value-type="float">
            <text:p>0,00060462962962963000</text:p>
          </table:table-cell>
          <table:table-cell table:formula="of:=[.D655]-[.D6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8" office:value-type="float" office:value="5232" calcext:value-type="float">
            <text:p>5232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0605555555555556" calcext:value-type="float">
            <text:p>0,00060555555555555600</text:p>
          </table:table-cell>
          <table:table-cell table:formula="of:=[.D656]-[.D6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8" office:value-type="float" office:value="5240" calcext:value-type="float">
            <text:p>5240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0606481481481482" calcext:value-type="float">
            <text:p>0,00060648148148148200</text:p>
          </table:table-cell>
          <table:table-cell table:formula="of:=[.D657]-[.D6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8" office:value-type="float" office:value="5248" calcext:value-type="float">
            <text:p>5248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0607407407407407" calcext:value-type="float">
            <text:p>0,00060740740740740700</text:p>
          </table:table-cell>
          <table:table-cell table:formula="of:=[.D658]-[.D6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8" office:value-type="float" office:value="5256" calcext:value-type="float">
            <text:p>5256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0608333333333333" calcext:value-type="float">
            <text:p>0,00060833333333333300</text:p>
          </table:table-cell>
          <table:table-cell table:formula="of:=[.D659]-[.D6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8" office:value-type="float" office:value="5264" calcext:value-type="float">
            <text:p>5264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0609259259259259" calcext:value-type="float">
            <text:p>0,00060925925925925900</text:p>
          </table:table-cell>
          <table:table-cell table:formula="of:=[.D660]-[.D6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8" office:value-type="float" office:value="5272" calcext:value-type="float">
            <text:p>5272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0610185185185185" calcext:value-type="float">
            <text:p>0,00061018518518518500</text:p>
          </table:table-cell>
          <table:table-cell table:formula="of:=[.D661]-[.D6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8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0611111111111111" calcext:value-type="float">
            <text:p>0,00061111111111111100</text:p>
          </table:table-cell>
          <table:table-cell table:formula="of:=[.D662]-[.D6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8" office:value-type="float" office:value="5288" calcext:value-type="float">
            <text:p>5288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0612037037037037" calcext:value-type="float">
            <text:p>0,00061203703703703700</text:p>
          </table:table-cell>
          <table:table-cell table:formula="of:=[.D663]-[.D6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8" office:value-type="float" office:value="5296" calcext:value-type="float">
            <text:p>5296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0612962962962963" calcext:value-type="float">
            <text:p>0,00061296296296296300</text:p>
          </table:table-cell>
          <table:table-cell table:formula="of:=[.D664]-[.D6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8" office:value-type="float" office:value="5304" calcext:value-type="float">
            <text:p>5304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0613888888888889" calcext:value-type="float">
            <text:p>0,00061388888888888900</text:p>
          </table:table-cell>
          <table:table-cell table:formula="of:=[.D665]-[.D6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8" office:value-type="float" office:value="5312" calcext:value-type="float">
            <text:p>5312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0614814814814815" calcext:value-type="float">
            <text:p>0,00061481481481481500</text:p>
          </table:table-cell>
          <table:table-cell table:formula="of:=[.D666]-[.D6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8" office:value-type="float" office:value="5320" calcext:value-type="float">
            <text:p>5320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0615740740740741" calcext:value-type="float">
            <text:p>0,00061574074074074100</text:p>
          </table:table-cell>
          <table:table-cell table:formula="of:=[.D667]-[.D6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8" office:value-type="float" office:value="5328" calcext:value-type="float">
            <text:p>5328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0616666666666667" calcext:value-type="float">
            <text:p>0,00061666666666666700</text:p>
          </table:table-cell>
          <table:table-cell table:formula="of:=[.D668]-[.D6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8" office:value-type="float" office:value="5336" calcext:value-type="float">
            <text:p>5336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0617592592592593" calcext:value-type="float">
            <text:p>0,00061759259259259300</text:p>
          </table:table-cell>
          <table:table-cell table:formula="of:=[.D669]-[.D668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8" office:value-type="float" office:value="5344" calcext:value-type="float">
            <text:p>5344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0618518518518519" calcext:value-type="float">
            <text:p>0,00061851851851851900</text:p>
          </table:table-cell>
          <table:table-cell table:formula="of:=[.D670]-[.D6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8" office:value-type="float" office:value="5352" calcext:value-type="float">
            <text:p>5352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0619444444444445" calcext:value-type="float">
            <text:p>0,00061944444444444500</text:p>
          </table:table-cell>
          <table:table-cell table:formula="of:=[.D671]-[.D6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8" office:value-type="float" office:value="5360" calcext:value-type="float">
            <text:p>536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062037037037037" calcext:value-type="float">
            <text:p>0,00062037037037037000</text:p>
          </table:table-cell>
          <table:table-cell table:formula="of:=[.D672]-[.D6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8" office:value-type="float" office:value="5368" calcext:value-type="float">
            <text:p>5368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0621296296296296" calcext:value-type="float">
            <text:p>0,00062129629629629600</text:p>
          </table:table-cell>
          <table:table-cell table:formula="of:=[.D673]-[.D6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8" office:value-type="float" office:value="5376" calcext:value-type="float">
            <text:p>5376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0622222222222222" calcext:value-type="float">
            <text:p>0,00062222222222222200</text:p>
          </table:table-cell>
          <table:table-cell table:formula="of:=[.D674]-[.D6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8" office:value-type="float" office:value="5384" calcext:value-type="float">
            <text:p>5384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0623148148148148" calcext:value-type="float">
            <text:p>0,00062314814814814800</text:p>
          </table:table-cell>
          <table:table-cell table:formula="of:=[.D675]-[.D6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8" office:value-type="float" office:value="5392" calcext:value-type="float">
            <text:p>5392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0624074074074074" calcext:value-type="float">
            <text:p>0,00062407407407407400</text:p>
          </table:table-cell>
          <table:table-cell table:formula="of:=[.D676]-[.D6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8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0625" calcext:value-type="float">
            <text:p>0,00062500000000000000</text:p>
          </table:table-cell>
          <table:table-cell table:formula="of:=[.D677]-[.D6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8" office:value-type="float" office:value="5408" calcext:value-type="float">
            <text:p>5408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0625925925925926" calcext:value-type="float">
            <text:p>0,00062592592592592600</text:p>
          </table:table-cell>
          <table:table-cell table:formula="of:=[.D678]-[.D6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8" office:value-type="float" office:value="5416" calcext:value-type="float">
            <text:p>5416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0626851851851852" calcext:value-type="float">
            <text:p>0,00062685185185185200</text:p>
          </table:table-cell>
          <table:table-cell table:formula="of:=[.D679]-[.D6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8" office:value-type="float" office:value="5424" calcext:value-type="float">
            <text:p>5424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0627777777777778" calcext:value-type="float">
            <text:p>0,00062777777777777800</text:p>
          </table:table-cell>
          <table:table-cell table:formula="of:=[.D680]-[.D6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8" office:value-type="float" office:value="5432" calcext:value-type="float">
            <text:p>5432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0628703703703704" calcext:value-type="float">
            <text:p>0,00062870370370370400</text:p>
          </table:table-cell>
          <table:table-cell table:formula="of:=[.D681]-[.D6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8" office:value-type="float" office:value="5440" calcext:value-type="float">
            <text:p>544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062962962962963" calcext:value-type="float">
            <text:p>0,00062962962962963000</text:p>
          </table:table-cell>
          <table:table-cell table:formula="of:=[.D682]-[.D6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8" office:value-type="float" office:value="5448" calcext:value-type="float">
            <text:p>5448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0630555555555556" calcext:value-type="float">
            <text:p>0,00063055555555555600</text:p>
          </table:table-cell>
          <table:table-cell table:formula="of:=[.D683]-[.D6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8" office:value-type="float" office:value="5456" calcext:value-type="float">
            <text:p>5456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0631481481481482" calcext:value-type="float">
            <text:p>0,00063148148148148200</text:p>
          </table:table-cell>
          <table:table-cell table:formula="of:=[.D684]-[.D6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8" office:value-type="float" office:value="5464" calcext:value-type="float">
            <text:p>5464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0632407407407407" calcext:value-type="float">
            <text:p>0,00063240740740740700</text:p>
          </table:table-cell>
          <table:table-cell table:formula="of:=[.D685]-[.D6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8" office:value-type="float" office:value="5472" calcext:value-type="float">
            <text:p>5472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0633333333333333" calcext:value-type="float">
            <text:p>0,00063333333333333300</text:p>
          </table:table-cell>
          <table:table-cell table:formula="of:=[.D686]-[.D6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8" office:value-type="float" office:value="5480" calcext:value-type="float">
            <text:p>5480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0634259259259259" calcext:value-type="float">
            <text:p>0,00063425925925925900</text:p>
          </table:table-cell>
          <table:table-cell table:formula="of:=[.D687]-[.D6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8" office:value-type="float" office:value="5488" calcext:value-type="float">
            <text:p>5488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0635185185185185" calcext:value-type="float">
            <text:p>0,00063518518518518500</text:p>
          </table:table-cell>
          <table:table-cell table:formula="of:=[.D688]-[.D687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8" office:value-type="float" office:value="5496" calcext:value-type="float">
            <text:p>5496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0636111111111111" calcext:value-type="float">
            <text:p>0,00063611111111111100</text:p>
          </table:table-cell>
          <table:table-cell table:formula="of:=[.D689]-[.D6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8" office:value-type="float" office:value="5504" calcext:value-type="float">
            <text:p>5504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0637037037037037" calcext:value-type="float">
            <text:p>0,00063703703703703700</text:p>
          </table:table-cell>
          <table:table-cell table:formula="of:=[.D690]-[.D6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8" office:value-type="float" office:value="5512" calcext:value-type="float">
            <text:p>5512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0637962962962963" calcext:value-type="float">
            <text:p>0,00063796296296296300</text:p>
          </table:table-cell>
          <table:table-cell table:formula="of:=[.D691]-[.D6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8" office:value-type="float" office:value="5520" calcext:value-type="float">
            <text:p>552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0638888888888889" calcext:value-type="float">
            <text:p>0,00063888888888888900</text:p>
          </table:table-cell>
          <table:table-cell table:formula="of:=[.D692]-[.D6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8" office:value-type="float" office:value="5528" calcext:value-type="float">
            <text:p>5528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0639814814814815" calcext:value-type="float">
            <text:p>0,00063981481481481500</text:p>
          </table:table-cell>
          <table:table-cell table:formula="of:=[.D693]-[.D6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8" office:value-type="float" office:value="5536" calcext:value-type="float">
            <text:p>5536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0640740740740741" calcext:value-type="float">
            <text:p>0,00064074074074074100</text:p>
          </table:table-cell>
          <table:table-cell table:formula="of:=[.D694]-[.D6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8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0641666666666667" calcext:value-type="float">
            <text:p>0,00064166666666666700</text:p>
          </table:table-cell>
          <table:table-cell table:formula="of:=[.D695]-[.D6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8" office:value-type="float" office:value="5552" calcext:value-type="float">
            <text:p>5552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0642592592592593" calcext:value-type="float">
            <text:p>0,00064259259259259300</text:p>
          </table:table-cell>
          <table:table-cell table:formula="of:=[.D696]-[.D6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8" office:value-type="float" office:value="5560" calcext:value-type="float">
            <text:p>5560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0643518518518519" calcext:value-type="float">
            <text:p>0,00064351851851851900</text:p>
          </table:table-cell>
          <table:table-cell table:formula="of:=[.D697]-[.D6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8" office:value-type="float" office:value="5568" calcext:value-type="float">
            <text:p>5568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0644444444444444" calcext:value-type="float">
            <text:p>0,00064444444444444400</text:p>
          </table:table-cell>
          <table:table-cell table:formula="of:=[.D698]-[.D6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8" office:value-type="float" office:value="5576" calcext:value-type="float">
            <text:p>5576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064537037037037" calcext:value-type="float">
            <text:p>0,00064537037037037000</text:p>
          </table:table-cell>
          <table:table-cell table:formula="of:=[.D699]-[.D6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8" office:value-type="float" office:value="5584" calcext:value-type="float">
            <text:p>5584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0646296296296296" calcext:value-type="float">
            <text:p>0,00064629629629629600</text:p>
          </table:table-cell>
          <table:table-cell table:formula="of:=[.D700]-[.D6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8" office:value-type="float" office:value="5592" calcext:value-type="float">
            <text:p>5592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0647222222222222" calcext:value-type="float">
            <text:p>0,00064722222222222200</text:p>
          </table:table-cell>
          <table:table-cell table:formula="of:=[.D701]-[.D7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8" office:value-type="float" office:value="5600" calcext:value-type="float">
            <text:p>56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0648148148148148" calcext:value-type="float">
            <text:p>0,00064814814814814800</text:p>
          </table:table-cell>
          <table:table-cell table:formula="of:=[.D702]-[.D7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8" office:value-type="float" office:value="5608" calcext:value-type="float">
            <text:p>5608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0649074074074074" calcext:value-type="float">
            <text:p>0,00064907407407407400</text:p>
          </table:table-cell>
          <table:table-cell table:formula="of:=[.D703]-[.D7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8" office:value-type="float" office:value="5616" calcext:value-type="float">
            <text:p>5616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065" calcext:value-type="float">
            <text:p>0,00065000000000000000</text:p>
          </table:table-cell>
          <table:table-cell table:formula="of:=[.D704]-[.D7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8" office:value-type="float" office:value="5624" calcext:value-type="float">
            <text:p>5624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0650925925925926" calcext:value-type="float">
            <text:p>0,00065092592592592600</text:p>
          </table:table-cell>
          <table:table-cell table:formula="of:=[.D705]-[.D7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8" office:value-type="float" office:value="5632" calcext:value-type="float">
            <text:p>5632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0651851851851852" calcext:value-type="float">
            <text:p>0,00065185185185185200</text:p>
          </table:table-cell>
          <table:table-cell table:formula="of:=[.D706]-[.D7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8" office:value-type="float" office:value="5640" calcext:value-type="float">
            <text:p>5640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0652777777777778" calcext:value-type="float">
            <text:p>0,00065277777777777800</text:p>
          </table:table-cell>
          <table:table-cell table:formula="of:=[.D707]-[.D7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8" office:value-type="float" office:value="5648" calcext:value-type="float">
            <text:p>5648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0653703703703704" calcext:value-type="float">
            <text:p>0,00065370370370370400</text:p>
          </table:table-cell>
          <table:table-cell table:formula="of:=[.D708]-[.D707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8" office:value-type="float" office:value="5656" calcext:value-type="float">
            <text:p>5656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065462962962963" calcext:value-type="float">
            <text:p>0,00065462962962963000</text:p>
          </table:table-cell>
          <table:table-cell table:formula="of:=[.D709]-[.D7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8" office:value-type="float" office:value="5664" calcext:value-type="float">
            <text:p>5664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0655555555555556" calcext:value-type="float">
            <text:p>0,00065555555555555600</text:p>
          </table:table-cell>
          <table:table-cell table:formula="of:=[.D710]-[.D7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8" office:value-type="float" office:value="5672" calcext:value-type="float">
            <text:p>5672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0656481481481482" calcext:value-type="float">
            <text:p>0,00065648148148148200</text:p>
          </table:table-cell>
          <table:table-cell table:formula="of:=[.D711]-[.D7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8" office:value-type="float" office:value="5680" calcext:value-type="float">
            <text:p>568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0657407407407407" calcext:value-type="float">
            <text:p>0,00065740740740740700</text:p>
          </table:table-cell>
          <table:table-cell table:formula="of:=[.D712]-[.D7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8" office:value-type="float" office:value="5688" calcext:value-type="float">
            <text:p>5688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0658333333333333" calcext:value-type="float">
            <text:p>0,00065833333333333300</text:p>
          </table:table-cell>
          <table:table-cell table:formula="of:=[.D713]-[.D7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8" office:value-type="float" office:value="5696" calcext:value-type="float">
            <text:p>5696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0659259259259259" calcext:value-type="float">
            <text:p>0,00065925925925925900</text:p>
          </table:table-cell>
          <table:table-cell table:formula="of:=[.D714]-[.D7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8" office:value-type="float" office:value="5704" calcext:value-type="float">
            <text:p>5704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0660185185185185" calcext:value-type="float">
            <text:p>0,00066018518518518500</text:p>
          </table:table-cell>
          <table:table-cell table:formula="of:=[.D715]-[.D7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8" office:value-type="float" office:value="5712" calcext:value-type="float">
            <text:p>5712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0661111111111111" calcext:value-type="float">
            <text:p>0,00066111111111111100</text:p>
          </table:table-cell>
          <table:table-cell table:formula="of:=[.D716]-[.D7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8" office:value-type="float" office:value="5720" calcext:value-type="float">
            <text:p>5720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0662037037037037" calcext:value-type="float">
            <text:p>0,00066203703703703700</text:p>
          </table:table-cell>
          <table:table-cell table:formula="of:=[.D717]-[.D7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8" office:value-type="float" office:value="5728" calcext:value-type="float">
            <text:p>5728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0662962962962963" calcext:value-type="float">
            <text:p>0,00066296296296296300</text:p>
          </table:table-cell>
          <table:table-cell table:formula="of:=[.D718]-[.D7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8" office:value-type="float" office:value="5736" calcext:value-type="float">
            <text:p>5736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0663888888888889" calcext:value-type="float">
            <text:p>0,00066388888888888900</text:p>
          </table:table-cell>
          <table:table-cell table:formula="of:=[.D719]-[.D7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8" office:value-type="float" office:value="5744" calcext:value-type="float">
            <text:p>5744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0664814814814815" calcext:value-type="float">
            <text:p>0,00066481481481481500</text:p>
          </table:table-cell>
          <table:table-cell table:formula="of:=[.D720]-[.D7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8" office:value-type="float" office:value="5752" calcext:value-type="float">
            <text:p>5752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0665740740740741" calcext:value-type="float">
            <text:p>0,00066574074074074100</text:p>
          </table:table-cell>
          <table:table-cell table:formula="of:=[.D721]-[.D7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8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0666666666666667" calcext:value-type="float">
            <text:p>0,00066666666666666700</text:p>
          </table:table-cell>
          <table:table-cell table:formula="of:=[.D722]-[.D7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8" office:value-type="float" office:value="5768" calcext:value-type="float">
            <text:p>5768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0667592592592593" calcext:value-type="float">
            <text:p>0,00066759259259259300</text:p>
          </table:table-cell>
          <table:table-cell table:formula="of:=[.D723]-[.D7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8" office:value-type="float" office:value="5776" calcext:value-type="float">
            <text:p>5776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0668518518518519" calcext:value-type="float">
            <text:p>0,00066851851851851900</text:p>
          </table:table-cell>
          <table:table-cell table:formula="of:=[.D724]-[.D7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8" office:value-type="float" office:value="5784" calcext:value-type="float">
            <text:p>5784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0669444444444444" calcext:value-type="float">
            <text:p>0,00066944444444444400</text:p>
          </table:table-cell>
          <table:table-cell table:formula="of:=[.D725]-[.D7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8" office:value-type="float" office:value="5792" calcext:value-type="float">
            <text:p>5792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067037037037037" calcext:value-type="float">
            <text:p>0,00067037037037037000</text:p>
          </table:table-cell>
          <table:table-cell table:formula="of:=[.D726]-[.D7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8" office:value-type="float" office:value="5800" calcext:value-type="float">
            <text:p>5800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0671296296296296" calcext:value-type="float">
            <text:p>0,00067129629629629600</text:p>
          </table:table-cell>
          <table:table-cell table:formula="of:=[.D727]-[.D726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8" office:value-type="float" office:value="5808" calcext:value-type="float">
            <text:p>5808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0672222222222222" calcext:value-type="float">
            <text:p>0,00067222222222222200</text:p>
          </table:table-cell>
          <table:table-cell table:formula="of:=[.D728]-[.D7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8" office:value-type="float" office:value="5816" calcext:value-type="float">
            <text:p>5816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0673148148148148" calcext:value-type="float">
            <text:p>0,00067314814814814800</text:p>
          </table:table-cell>
          <table:table-cell table:formula="of:=[.D729]-[.D7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8" office:value-type="float" office:value="5824" calcext:value-type="float">
            <text:p>5824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0674074074074074" calcext:value-type="float">
            <text:p>0,00067407407407407400</text:p>
          </table:table-cell>
          <table:table-cell table:formula="of:=[.D730]-[.D7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8" office:value-type="float" office:value="5832" calcext:value-type="float">
            <text:p>5832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0675" calcext:value-type="float">
            <text:p>0,00067500000000000000</text:p>
          </table:table-cell>
          <table:table-cell table:formula="of:=[.D731]-[.D7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8" office:value-type="float" office:value="5840" calcext:value-type="float">
            <text:p>584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0675925925925926" calcext:value-type="float">
            <text:p>0,00067592592592592600</text:p>
          </table:table-cell>
          <table:table-cell table:formula="of:=[.D732]-[.D7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8" office:value-type="float" office:value="5848" calcext:value-type="float">
            <text:p>5848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0676851851851852" calcext:value-type="float">
            <text:p>0,00067685185185185200</text:p>
          </table:table-cell>
          <table:table-cell table:formula="of:=[.D733]-[.D7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8" office:value-type="float" office:value="5856" calcext:value-type="float">
            <text:p>5856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0677777777777778" calcext:value-type="float">
            <text:p>0,00067777777777777800</text:p>
          </table:table-cell>
          <table:table-cell table:formula="of:=[.D734]-[.D7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8" office:value-type="float" office:value="5864" calcext:value-type="float">
            <text:p>5864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0678703703703704" calcext:value-type="float">
            <text:p>0,00067870370370370400</text:p>
          </table:table-cell>
          <table:table-cell table:formula="of:=[.D735]-[.D7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8" office:value-type="float" office:value="5872" calcext:value-type="float">
            <text:p>5872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067962962962963" calcext:value-type="float">
            <text:p>0,00067962962962963000</text:p>
          </table:table-cell>
          <table:table-cell table:formula="of:=[.D736]-[.D7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8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0680555555555556" calcext:value-type="float">
            <text:p>0,00068055555555555600</text:p>
          </table:table-cell>
          <table:table-cell table:formula="of:=[.D737]-[.D7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8" office:value-type="float" office:value="5888" calcext:value-type="float">
            <text:p>5888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0681481481481482" calcext:value-type="float">
            <text:p>0,00068148148148148200</text:p>
          </table:table-cell>
          <table:table-cell table:formula="of:=[.D738]-[.D7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8" office:value-type="float" office:value="5896" calcext:value-type="float">
            <text:p>5896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0682407407407407" calcext:value-type="float">
            <text:p>0,00068240740740740700</text:p>
          </table:table-cell>
          <table:table-cell table:formula="of:=[.D739]-[.D7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8" office:value-type="float" office:value="5904" calcext:value-type="float">
            <text:p>5904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0683333333333333" calcext:value-type="float">
            <text:p>0,00068333333333333300</text:p>
          </table:table-cell>
          <table:table-cell table:formula="of:=[.D740]-[.D7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8" office:value-type="float" office:value="5912" calcext:value-type="float">
            <text:p>5912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0684259259259259" calcext:value-type="float">
            <text:p>0,00068425925925925900</text:p>
          </table:table-cell>
          <table:table-cell table:formula="of:=[.D741]-[.D7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8" office:value-type="float" office:value="5920" calcext:value-type="float">
            <text:p>592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0685185185185185" calcext:value-type="float">
            <text:p>0,00068518518518518500</text:p>
          </table:table-cell>
          <table:table-cell table:formula="of:=[.D742]-[.D7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8" office:value-type="float" office:value="5928" calcext:value-type="float">
            <text:p>5928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0686111111111111" calcext:value-type="float">
            <text:p>0,00068611111111111100</text:p>
          </table:table-cell>
          <table:table-cell table:formula="of:=[.D743]-[.D7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8" office:value-type="float" office:value="5936" calcext:value-type="float">
            <text:p>5936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0687037037037037" calcext:value-type="float">
            <text:p>0,00068703703703703700</text:p>
          </table:table-cell>
          <table:table-cell table:formula="of:=[.D744]-[.D7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8" office:value-type="float" office:value="5944" calcext:value-type="float">
            <text:p>5944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0687962962962963" calcext:value-type="float">
            <text:p>0,00068796296296296300</text:p>
          </table:table-cell>
          <table:table-cell table:formula="of:=[.D745]-[.D7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8" office:value-type="float" office:value="5952" calcext:value-type="float">
            <text:p>5952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0688888888888889" calcext:value-type="float">
            <text:p>0,00068888888888888900</text:p>
          </table:table-cell>
          <table:table-cell table:formula="of:=[.D746]-[.D7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8" office:value-type="float" office:value="5960" calcext:value-type="float">
            <text:p>5960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0689814814814815" calcext:value-type="float">
            <text:p>0,00068981481481481500</text:p>
          </table:table-cell>
          <table:table-cell table:formula="of:=[.D747]-[.D746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8" office:value-type="float" office:value="5968" calcext:value-type="float">
            <text:p>5968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0690740740740741" calcext:value-type="float">
            <text:p>0,00069074074074074100</text:p>
          </table:table-cell>
          <table:table-cell table:formula="of:=[.D748]-[.D7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8" office:value-type="float" office:value="5976" calcext:value-type="float">
            <text:p>5976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0691666666666667" calcext:value-type="float">
            <text:p>0,00069166666666666700</text:p>
          </table:table-cell>
          <table:table-cell table:formula="of:=[.D749]-[.D7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8" office:value-type="float" office:value="5984" calcext:value-type="float">
            <text:p>5984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0692592592592593" calcext:value-type="float">
            <text:p>0,00069259259259259300</text:p>
          </table:table-cell>
          <table:table-cell table:formula="of:=[.D750]-[.D7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8" office:value-type="float" office:value="5992" calcext:value-type="float">
            <text:p>5992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0693518518518519" calcext:value-type="float">
            <text:p>0,00069351851851851900</text:p>
          </table:table-cell>
          <table:table-cell table:formula="of:=[.D751]-[.D7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8" office:value-type="float" office:value="6000" calcext:value-type="float">
            <text:p>600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0694444444444445" calcext:value-type="float">
            <text:p>0,00069444444444444500</text:p>
          </table:table-cell>
          <table:table-cell table:formula="of:=[.D752]-[.D7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8" office:value-type="float" office:value="6008" calcext:value-type="float">
            <text:p>6008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069537037037037" calcext:value-type="float">
            <text:p>0,00069537037037037000</text:p>
          </table:table-cell>
          <table:table-cell table:formula="of:=[.D753]-[.D7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8" office:value-type="float" office:value="6016" calcext:value-type="float">
            <text:p>6016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0696296296296296" calcext:value-type="float">
            <text:p>0,00069629629629629600</text:p>
          </table:table-cell>
          <table:table-cell table:formula="of:=[.D754]-[.D7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8" office:value-type="float" office:value="6024" calcext:value-type="float">
            <text:p>6024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0697222222222222" calcext:value-type="float">
            <text:p>0,00069722222222222200</text:p>
          </table:table-cell>
          <table:table-cell table:formula="of:=[.D755]-[.D7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8" office:value-type="float" office:value="6032" calcext:value-type="float">
            <text:p>6032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0698148148148148" calcext:value-type="float">
            <text:p>0,00069814814814814800</text:p>
          </table:table-cell>
          <table:table-cell table:formula="of:=[.D756]-[.D7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8" office:value-type="float" office:value="6040" calcext:value-type="float">
            <text:p>6040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0699074074074074" calcext:value-type="float">
            <text:p>0,00069907407407407400</text:p>
          </table:table-cell>
          <table:table-cell table:formula="of:=[.D757]-[.D7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8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07" calcext:value-type="float">
            <text:p>0,00070000000000000000</text:p>
          </table:table-cell>
          <table:table-cell table:formula="of:=[.D758]-[.D7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8" office:value-type="float" office:value="6056" calcext:value-type="float">
            <text:p>6056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0700925925925926" calcext:value-type="float">
            <text:p>0,00070092592592592600</text:p>
          </table:table-cell>
          <table:table-cell table:formula="of:=[.D759]-[.D7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8" office:value-type="float" office:value="6064" calcext:value-type="float">
            <text:p>6064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0701851851851852" calcext:value-type="float">
            <text:p>0,00070185185185185200</text:p>
          </table:table-cell>
          <table:table-cell table:formula="of:=[.D760]-[.D7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8" office:value-type="float" office:value="6072" calcext:value-type="float">
            <text:p>6072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0702777777777778" calcext:value-type="float">
            <text:p>0,00070277777777777800</text:p>
          </table:table-cell>
          <table:table-cell table:formula="of:=[.D761]-[.D7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8" office:value-type="float" office:value="6080" calcext:value-type="float">
            <text:p>608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0703703703703704" calcext:value-type="float">
            <text:p>0,00070370370370370400</text:p>
          </table:table-cell>
          <table:table-cell table:formula="of:=[.D762]-[.D7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8" office:value-type="float" office:value="6088" calcext:value-type="float">
            <text:p>6088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070462962962963" calcext:value-type="float">
            <text:p>0,00070462962962963000</text:p>
          </table:table-cell>
          <table:table-cell table:formula="of:=[.D763]-[.D7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8" office:value-type="float" office:value="6096" calcext:value-type="float">
            <text:p>6096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0705555555555556" calcext:value-type="float">
            <text:p>0,00070555555555555600</text:p>
          </table:table-cell>
          <table:table-cell table:formula="of:=[.D764]-[.D7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8" office:value-type="float" office:value="6104" calcext:value-type="float">
            <text:p>6104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0706481481481481" calcext:value-type="float">
            <text:p>0,00070648148148148100</text:p>
          </table:table-cell>
          <table:table-cell table:formula="of:=[.D765]-[.D7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8" office:value-type="float" office:value="6112" calcext:value-type="float">
            <text:p>6112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0707407407407407" calcext:value-type="float">
            <text:p>0,00070740740740740700</text:p>
          </table:table-cell>
          <table:table-cell table:formula="of:=[.D766]-[.D765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8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0708333333333333" calcext:value-type="float">
            <text:p>0,00070833333333333300</text:p>
          </table:table-cell>
          <table:table-cell table:formula="of:=[.D767]-[.D7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8" office:value-type="float" office:value="6128" calcext:value-type="float">
            <text:p>6128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0709259259259259" calcext:value-type="float">
            <text:p>0,00070925925925925900</text:p>
          </table:table-cell>
          <table:table-cell table:formula="of:=[.D768]-[.D7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8" office:value-type="float" office:value="6136" calcext:value-type="float">
            <text:p>6136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0710185185185185" calcext:value-type="float">
            <text:p>0,00071018518518518500</text:p>
          </table:table-cell>
          <table:table-cell table:formula="of:=[.D769]-[.D7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8" office:value-type="float" office:value="6144" calcext:value-type="float">
            <text:p>6144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0711111111111111" calcext:value-type="float">
            <text:p>0,00071111111111111100</text:p>
          </table:table-cell>
          <table:table-cell table:formula="of:=[.D770]-[.D7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8" office:value-type="float" office:value="6152" calcext:value-type="float">
            <text:p>6152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0712037037037037" calcext:value-type="float">
            <text:p>0,00071203703703703700</text:p>
          </table:table-cell>
          <table:table-cell table:formula="of:=[.D771]-[.D7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8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0712962962962963" calcext:value-type="float">
            <text:p>0,00071296296296296300</text:p>
          </table:table-cell>
          <table:table-cell table:formula="of:=[.D772]-[.D7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8" office:value-type="float" office:value="6168" calcext:value-type="float">
            <text:p>6168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0713888888888889" calcext:value-type="float">
            <text:p>0,00071388888888888900</text:p>
          </table:table-cell>
          <table:table-cell table:formula="of:=[.D773]-[.D7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8" office:value-type="float" office:value="6176" calcext:value-type="float">
            <text:p>6176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0714814814814815" calcext:value-type="float">
            <text:p>0,00071481481481481500</text:p>
          </table:table-cell>
          <table:table-cell table:formula="of:=[.D774]-[.D7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8" office:value-type="float" office:value="6184" calcext:value-type="float">
            <text:p>6184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0715740740740741" calcext:value-type="float">
            <text:p>0,00071574074074074100</text:p>
          </table:table-cell>
          <table:table-cell table:formula="of:=[.D775]-[.D7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8" office:value-type="float" office:value="6192" calcext:value-type="float">
            <text:p>6192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0716666666666667" calcext:value-type="float">
            <text:p>0,00071666666666666700</text:p>
          </table:table-cell>
          <table:table-cell table:formula="of:=[.D776]-[.D7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8" office:value-type="float" office:value="6200" calcext:value-type="float">
            <text:p>6200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0717592592592593" calcext:value-type="float">
            <text:p>0,00071759259259259300</text:p>
          </table:table-cell>
          <table:table-cell table:formula="of:=[.D777]-[.D7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8" office:value-type="float" office:value="6208" calcext:value-type="float">
            <text:p>6208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0718518518518519" calcext:value-type="float">
            <text:p>0,00071851851851851900</text:p>
          </table:table-cell>
          <table:table-cell table:formula="of:=[.D778]-[.D7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8" office:value-type="float" office:value="6216" calcext:value-type="float">
            <text:p>6216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0719444444444444" calcext:value-type="float">
            <text:p>0,00071944444444444400</text:p>
          </table:table-cell>
          <table:table-cell table:formula="of:=[.D779]-[.D7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8" office:value-type="float" office:value="6224" calcext:value-type="float">
            <text:p>6224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072037037037037" calcext:value-type="float">
            <text:p>0,00072037037037037000</text:p>
          </table:table-cell>
          <table:table-cell table:formula="of:=[.D780]-[.D7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8" office:value-type="float" office:value="6232" calcext:value-type="float">
            <text:p>6232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0721296296296296" calcext:value-type="float">
            <text:p>0,00072129629629629600</text:p>
          </table:table-cell>
          <table:table-cell table:formula="of:=[.D781]-[.D7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8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0722222222222222" calcext:value-type="float">
            <text:p>0,00072222222222222200</text:p>
          </table:table-cell>
          <table:table-cell table:formula="of:=[.D782]-[.D7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8" office:value-type="float" office:value="6248" calcext:value-type="float">
            <text:p>6248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0723148148148148" calcext:value-type="float">
            <text:p>0,00072314814814814800</text:p>
          </table:table-cell>
          <table:table-cell table:formula="of:=[.D783]-[.D7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8" office:value-type="float" office:value="6256" calcext:value-type="float">
            <text:p>6256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0724074074074074" calcext:value-type="float">
            <text:p>0,00072407407407407400</text:p>
          </table:table-cell>
          <table:table-cell table:formula="of:=[.D784]-[.D7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8" office:value-type="float" office:value="6264" calcext:value-type="float">
            <text:p>6264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0725" calcext:value-type="float">
            <text:p>0,00072500000000000000</text:p>
          </table:table-cell>
          <table:table-cell table:formula="of:=[.D785]-[.D784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8" office:value-type="float" office:value="6272" calcext:value-type="float">
            <text:p>6272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0725925925925926" calcext:value-type="float">
            <text:p>0,00072592592592592600</text:p>
          </table:table-cell>
          <table:table-cell table:formula="of:=[.D786]-[.D7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8" office:value-type="float" office:value="6280" calcext:value-type="float">
            <text:p>6280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0726851851851852" calcext:value-type="float">
            <text:p>0,00072685185185185200</text:p>
          </table:table-cell>
          <table:table-cell table:formula="of:=[.D787]-[.D7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8" office:value-type="float" office:value="6288" calcext:value-type="float">
            <text:p>6288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0727777777777778" calcext:value-type="float">
            <text:p>0,00072777777777777800</text:p>
          </table:table-cell>
          <table:table-cell table:formula="of:=[.D788]-[.D7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8" office:value-type="float" office:value="6296" calcext:value-type="float">
            <text:p>6296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0728703703703704" calcext:value-type="float">
            <text:p>0,00072870370370370400</text:p>
          </table:table-cell>
          <table:table-cell table:formula="of:=[.D789]-[.D7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8" office:value-type="float" office:value="6304" calcext:value-type="float">
            <text:p>6304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072962962962963" calcext:value-type="float">
            <text:p>0,00072962962962963000</text:p>
          </table:table-cell>
          <table:table-cell table:formula="of:=[.D790]-[.D7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8" office:value-type="float" office:value="6312" calcext:value-type="float">
            <text:p>6312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0730555555555556" calcext:value-type="float">
            <text:p>0,00073055555555555600</text:p>
          </table:table-cell>
          <table:table-cell table:formula="of:=[.D791]-[.D7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8" office:value-type="float" office:value="6320" calcext:value-type="float">
            <text:p>632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0731481481481482" calcext:value-type="float">
            <text:p>0,00073148148148148100</text:p>
          </table:table-cell>
          <table:table-cell table:formula="of:=[.D792]-[.D7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8" office:value-type="float" office:value="6328" calcext:value-type="float">
            <text:p>6328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0732407407407407" calcext:value-type="float">
            <text:p>0,00073240740740740700</text:p>
          </table:table-cell>
          <table:table-cell table:formula="of:=[.D793]-[.D7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8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0733333333333333" calcext:value-type="float">
            <text:p>0,00073333333333333300</text:p>
          </table:table-cell>
          <table:table-cell table:formula="of:=[.D794]-[.D7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8" office:value-type="float" office:value="6344" calcext:value-type="float">
            <text:p>6344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0734259259259259" calcext:value-type="float">
            <text:p>0,00073425925925925900</text:p>
          </table:table-cell>
          <table:table-cell table:formula="of:=[.D795]-[.D7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8" office:value-type="float" office:value="6352" calcext:value-type="float">
            <text:p>6352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0735185185185185" calcext:value-type="float">
            <text:p>0,00073518518518518500</text:p>
          </table:table-cell>
          <table:table-cell table:formula="of:=[.D796]-[.D7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8" office:value-type="float" office:value="6360" calcext:value-type="float">
            <text:p>6360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0736111111111111" calcext:value-type="float">
            <text:p>0,00073611111111111100</text:p>
          </table:table-cell>
          <table:table-cell table:formula="of:=[.D797]-[.D7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8" office:value-type="float" office:value="6368" calcext:value-type="float">
            <text:p>6368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0737037037037037" calcext:value-type="float">
            <text:p>0,00073703703703703700</text:p>
          </table:table-cell>
          <table:table-cell table:formula="of:=[.D798]-[.D7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8" office:value-type="float" office:value="6376" calcext:value-type="float">
            <text:p>6376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0737962962962963" calcext:value-type="float">
            <text:p>0,00073796296296296300</text:p>
          </table:table-cell>
          <table:table-cell table:formula="of:=[.D799]-[.D7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8" office:value-type="float" office:value="6384" calcext:value-type="float">
            <text:p>6384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0738888888888889" calcext:value-type="float">
            <text:p>0,00073888888888888900</text:p>
          </table:table-cell>
          <table:table-cell table:formula="of:=[.D800]-[.D7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8" office:value-type="float" office:value="6392" calcext:value-type="float">
            <text:p>6392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0739814814814815" calcext:value-type="float">
            <text:p>0,00073981481481481500</text:p>
          </table:table-cell>
          <table:table-cell table:formula="of:=[.D801]-[.D8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8" office:value-type="float" office:value="6400" calcext:value-type="float">
            <text:p>64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0740740740740741" calcext:value-type="float">
            <text:p>0,00074074074074074100</text:p>
          </table:table-cell>
          <table:table-cell table:formula="of:=[.D802]-[.D8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8" office:value-type="float" office:value="6408" calcext:value-type="float">
            <text:p>6408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0741666666666667" calcext:value-type="float">
            <text:p>0,00074166666666666700</text:p>
          </table:table-cell>
          <table:table-cell table:formula="of:=[.D803]-[.D8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8" office:value-type="float" office:value="6416" calcext:value-type="float">
            <text:p>6416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0742592592592593" calcext:value-type="float">
            <text:p>0,00074259259259259200</text:p>
          </table:table-cell>
          <table:table-cell table:formula="of:=[.D804]-[.D8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8" office:value-type="float" office:value="6424" calcext:value-type="float">
            <text:p>6424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0743518518518519" calcext:value-type="float">
            <text:p>0,00074351851851851800</text:p>
          </table:table-cell>
          <table:table-cell table:formula="of:=[.D805]-[.D804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8" office:value-type="float" office:value="6432" calcext:value-type="float">
            <text:p>6432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0744444444444445" calcext:value-type="float">
            <text:p>0,00074444444444444500</text:p>
          </table:table-cell>
          <table:table-cell table:formula="of:=[.D806]-[.D8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8" office:value-type="float" office:value="6440" calcext:value-type="float">
            <text:p>6440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074537037037037" calcext:value-type="float">
            <text:p>0,00074537037037037000</text:p>
          </table:table-cell>
          <table:table-cell table:formula="of:=[.D807]-[.D8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8" office:value-type="float" office:value="6448" calcext:value-type="float">
            <text:p>6448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0746296296296296" calcext:value-type="float">
            <text:p>0,00074629629629629600</text:p>
          </table:table-cell>
          <table:table-cell table:formula="of:=[.D808]-[.D8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8" office:value-type="float" office:value="6456" calcext:value-type="float">
            <text:p>6456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0747222222222222" calcext:value-type="float">
            <text:p>0,00074722222222222200</text:p>
          </table:table-cell>
          <table:table-cell table:formula="of:=[.D809]-[.D8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8" office:value-type="float" office:value="6464" calcext:value-type="float">
            <text:p>6464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0748148148148148" calcext:value-type="float">
            <text:p>0,00074814814814814800</text:p>
          </table:table-cell>
          <table:table-cell table:formula="of:=[.D810]-[.D8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8" office:value-type="float" office:value="6472" calcext:value-type="float">
            <text:p>6472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0749074074074074" calcext:value-type="float">
            <text:p>0,00074907407407407400</text:p>
          </table:table-cell>
          <table:table-cell table:formula="of:=[.D811]-[.D8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8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075" calcext:value-type="float">
            <text:p>0,00075000000000000000</text:p>
          </table:table-cell>
          <table:table-cell table:formula="of:=[.D812]-[.D8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8" office:value-type="float" office:value="6488" calcext:value-type="float">
            <text:p>6488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0750925925925926" calcext:value-type="float">
            <text:p>0,00075092592592592600</text:p>
          </table:table-cell>
          <table:table-cell table:formula="of:=[.D813]-[.D8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8" office:value-type="float" office:value="6496" calcext:value-type="float">
            <text:p>6496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0751851851851852" calcext:value-type="float">
            <text:p>0,00075185185185185200</text:p>
          </table:table-cell>
          <table:table-cell table:formula="of:=[.D814]-[.D8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8" office:value-type="float" office:value="6504" calcext:value-type="float">
            <text:p>6504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0752777777777778" calcext:value-type="float">
            <text:p>0,00075277777777777800</text:p>
          </table:table-cell>
          <table:table-cell table:formula="of:=[.D815]-[.D8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8" office:value-type="float" office:value="6512" calcext:value-type="float">
            <text:p>6512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0753703703703704" calcext:value-type="float">
            <text:p>0,00075370370370370400</text:p>
          </table:table-cell>
          <table:table-cell table:formula="of:=[.D816]-[.D8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8" office:value-type="float" office:value="6520" calcext:value-type="float">
            <text:p>6520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075462962962963" calcext:value-type="float">
            <text:p>0,00075462962962963000</text:p>
          </table:table-cell>
          <table:table-cell table:formula="of:=[.D817]-[.D8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8" office:value-type="float" office:value="6528" calcext:value-type="float">
            <text:p>6528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0755555555555556" calcext:value-type="float">
            <text:p>0,00075555555555555600</text:p>
          </table:table-cell>
          <table:table-cell table:formula="of:=[.D818]-[.D8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8" office:value-type="float" office:value="6536" calcext:value-type="float">
            <text:p>6536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0756481481481482" calcext:value-type="float">
            <text:p>0,00075648148148148200</text:p>
          </table:table-cell>
          <table:table-cell table:formula="of:=[.D819]-[.D8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8" office:value-type="float" office:value="6544" calcext:value-type="float">
            <text:p>6544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0757407407407407" calcext:value-type="float">
            <text:p>0,00075740740740740700</text:p>
          </table:table-cell>
          <table:table-cell table:formula="of:=[.D820]-[.D8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8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0758333333333333" calcext:value-type="float">
            <text:p>0,00075833333333333300</text:p>
          </table:table-cell>
          <table:table-cell table:formula="of:=[.D821]-[.D8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8" office:value-type="float" office:value="6560" calcext:value-type="float">
            <text:p>656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0759259259259259" calcext:value-type="float">
            <text:p>0,00075925925925925900</text:p>
          </table:table-cell>
          <table:table-cell table:formula="of:=[.D822]-[.D8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8" office:value-type="float" office:value="6568" calcext:value-type="float">
            <text:p>6568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0760185185185185" calcext:value-type="float">
            <text:p>0,00076018518518518500</text:p>
          </table:table-cell>
          <table:table-cell table:formula="of:=[.D823]-[.D8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8" office:value-type="float" office:value="6576" calcext:value-type="float">
            <text:p>6576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0761111111111111" calcext:value-type="float">
            <text:p>0,00076111111111111100</text:p>
          </table:table-cell>
          <table:table-cell table:formula="of:=[.D824]-[.D823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8" office:value-type="float" office:value="6584" calcext:value-type="float">
            <text:p>6584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0762037037037037" calcext:value-type="float">
            <text:p>0,00076203703703703700</text:p>
          </table:table-cell>
          <table:table-cell table:formula="of:=[.D825]-[.D8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8" office:value-type="float" office:value="6592" calcext:value-type="float">
            <text:p>6592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0762962962962963" calcext:value-type="float">
            <text:p>0,00076296296296296300</text:p>
          </table:table-cell>
          <table:table-cell table:formula="of:=[.D826]-[.D8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8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0763888888888889" calcext:value-type="float">
            <text:p>0,00076388888888888900</text:p>
          </table:table-cell>
          <table:table-cell table:formula="of:=[.D827]-[.D8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8" office:value-type="float" office:value="6608" calcext:value-type="float">
            <text:p>6608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0764814814814815" calcext:value-type="float">
            <text:p>0,00076481481481481500</text:p>
          </table:table-cell>
          <table:table-cell table:formula="of:=[.D828]-[.D8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8" office:value-type="float" office:value="6616" calcext:value-type="float">
            <text:p>6616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0765740740740741" calcext:value-type="float">
            <text:p>0,00076574074074074100</text:p>
          </table:table-cell>
          <table:table-cell table:formula="of:=[.D829]-[.D8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8" office:value-type="float" office:value="6624" calcext:value-type="float">
            <text:p>6624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0766666666666667" calcext:value-type="float">
            <text:p>0,00076666666666666700</text:p>
          </table:table-cell>
          <table:table-cell table:formula="of:=[.D830]-[.D8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8" office:value-type="float" office:value="6632" calcext:value-type="float">
            <text:p>6632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0767592592592593" calcext:value-type="float">
            <text:p>0,00076759259259259300</text:p>
          </table:table-cell>
          <table:table-cell table:formula="of:=[.D831]-[.D8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8" office:value-type="float" office:value="6640" calcext:value-type="float">
            <text:p>664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0768518518518519" calcext:value-type="float">
            <text:p>0,00076851851851851900</text:p>
          </table:table-cell>
          <table:table-cell table:formula="of:=[.D832]-[.D8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8" office:value-type="float" office:value="6648" calcext:value-type="float">
            <text:p>6648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0769444444444445" calcext:value-type="float">
            <text:p>0,00076944444444444500</text:p>
          </table:table-cell>
          <table:table-cell table:formula="of:=[.D833]-[.D8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8" office:value-type="float" office:value="6656" calcext:value-type="float">
            <text:p>6656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077037037037037" calcext:value-type="float">
            <text:p>0,00077037037037037000</text:p>
          </table:table-cell>
          <table:table-cell table:formula="of:=[.D834]-[.D8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8" office:value-type="float" office:value="6664" calcext:value-type="float">
            <text:p>6664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0771296296296296" calcext:value-type="float">
            <text:p>0,00077129629629629600</text:p>
          </table:table-cell>
          <table:table-cell table:formula="of:=[.D835]-[.D8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8" office:value-type="float" office:value="6672" calcext:value-type="float">
            <text:p>6672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0772222222222222" calcext:value-type="float">
            <text:p>0,00077222222222222200</text:p>
          </table:table-cell>
          <table:table-cell table:formula="of:=[.D836]-[.D8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8" office:value-type="float" office:value="6680" calcext:value-type="float">
            <text:p>6680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0773148148148148" calcext:value-type="float">
            <text:p>0,00077314814814814800</text:p>
          </table:table-cell>
          <table:table-cell table:formula="of:=[.D837]-[.D8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8" office:value-type="float" office:value="6688" calcext:value-type="float">
            <text:p>6688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0774074074074074" calcext:value-type="float">
            <text:p>0,00077407407407407400</text:p>
          </table:table-cell>
          <table:table-cell table:formula="of:=[.D838]-[.D8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8" office:value-type="float" office:value="6696" calcext:value-type="float">
            <text:p>6696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0775" calcext:value-type="float">
            <text:p>0,00077500000000000000</text:p>
          </table:table-cell>
          <table:table-cell table:formula="of:=[.D839]-[.D8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8" office:value-type="float" office:value="6704" calcext:value-type="float">
            <text:p>6704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0775925925925926" calcext:value-type="float">
            <text:p>0,00077592592592592600</text:p>
          </table:table-cell>
          <table:table-cell table:formula="of:=[.D840]-[.D8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8" office:value-type="float" office:value="6712" calcext:value-type="float">
            <text:p>6712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0776851851851852" calcext:value-type="float">
            <text:p>0,00077685185185185200</text:p>
          </table:table-cell>
          <table:table-cell table:formula="of:=[.D841]-[.D8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8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0777777777777778" calcext:value-type="float">
            <text:p>0,00077777777777777800</text:p>
          </table:table-cell>
          <table:table-cell table:formula="of:=[.D842]-[.D8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8" office:value-type="float" office:value="6728" calcext:value-type="float">
            <text:p>6728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0778703703703704" calcext:value-type="float">
            <text:p>0,00077870370370370400</text:p>
          </table:table-cell>
          <table:table-cell table:formula="of:=[.D843]-[.D842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8" office:value-type="float" office:value="6736" calcext:value-type="float">
            <text:p>6736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077962962962963" calcext:value-type="float">
            <text:p>0,00077962962962963000</text:p>
          </table:table-cell>
          <table:table-cell table:formula="of:=[.D844]-[.D8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8" office:value-type="float" office:value="6744" calcext:value-type="float">
            <text:p>6744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0780555555555556" calcext:value-type="float">
            <text:p>0,00078055555555555600</text:p>
          </table:table-cell>
          <table:table-cell table:formula="of:=[.D845]-[.D8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8" office:value-type="float" office:value="6752" calcext:value-type="float">
            <text:p>6752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0781481481481482" calcext:value-type="float">
            <text:p>0,00078148148148148200</text:p>
          </table:table-cell>
          <table:table-cell table:formula="of:=[.D846]-[.D8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8" office:value-type="float" office:value="6760" calcext:value-type="float">
            <text:p>6760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0782407407407407" calcext:value-type="float">
            <text:p>0,00078240740740740800</text:p>
          </table:table-cell>
          <table:table-cell table:formula="of:=[.D847]-[.D8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8" office:value-type="float" office:value="6768" calcext:value-type="float">
            <text:p>6768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0783333333333333" calcext:value-type="float">
            <text:p>0,00078333333333333400</text:p>
          </table:table-cell>
          <table:table-cell table:formula="of:=[.D848]-[.D8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8" office:value-type="float" office:value="6776" calcext:value-type="float">
            <text:p>6776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0784259259259259" calcext:value-type="float">
            <text:p>0,00078425925925925900</text:p>
          </table:table-cell>
          <table:table-cell table:formula="of:=[.D849]-[.D8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8" office:value-type="float" office:value="6784" calcext:value-type="float">
            <text:p>6784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0785185185185185" calcext:value-type="float">
            <text:p>0,00078518518518518500</text:p>
          </table:table-cell>
          <table:table-cell table:formula="of:=[.D850]-[.D8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8" office:value-type="float" office:value="6792" calcext:value-type="float">
            <text:p>6792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0786111111111111" calcext:value-type="float">
            <text:p>0,00078611111111111100</text:p>
          </table:table-cell>
          <table:table-cell table:formula="of:=[.D851]-[.D8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8" office:value-type="float" office:value="6800" calcext:value-type="float">
            <text:p>680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0787037037037037" calcext:value-type="float">
            <text:p>0,00078703703703703700</text:p>
          </table:table-cell>
          <table:table-cell table:formula="of:=[.D852]-[.D8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8" office:value-type="float" office:value="6808" calcext:value-type="float">
            <text:p>6808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0787962962962963" calcext:value-type="float">
            <text:p>0,00078796296296296300</text:p>
          </table:table-cell>
          <table:table-cell table:formula="of:=[.D853]-[.D8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8" office:value-type="float" office:value="6816" calcext:value-type="float">
            <text:p>6816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0788888888888889" calcext:value-type="float">
            <text:p>0,00078888888888888900</text:p>
          </table:table-cell>
          <table:table-cell table:formula="of:=[.D854]-[.D8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8" office:value-type="float" office:value="6824" calcext:value-type="float">
            <text:p>6824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0789814814814815" calcext:value-type="float">
            <text:p>0,00078981481481481500</text:p>
          </table:table-cell>
          <table:table-cell table:formula="of:=[.D855]-[.D8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8" office:value-type="float" office:value="6832" calcext:value-type="float">
            <text:p>6832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0790740740740741" calcext:value-type="float">
            <text:p>0,00079074074074074100</text:p>
          </table:table-cell>
          <table:table-cell table:formula="of:=[.D856]-[.D8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8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0791666666666667" calcext:value-type="float">
            <text:p>0,00079166666666666700</text:p>
          </table:table-cell>
          <table:table-cell table:formula="of:=[.D857]-[.D8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8" office:value-type="float" office:value="6848" calcext:value-type="float">
            <text:p>6848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0792592592592593" calcext:value-type="float">
            <text:p>0,00079259259259259300</text:p>
          </table:table-cell>
          <table:table-cell table:formula="of:=[.D858]-[.D8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8" office:value-type="float" office:value="6856" calcext:value-type="float">
            <text:p>6856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0793518518518519" calcext:value-type="float">
            <text:p>0,00079351851851851900</text:p>
          </table:table-cell>
          <table:table-cell table:formula="of:=[.D859]-[.D8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8" office:value-type="float" office:value="6864" calcext:value-type="float">
            <text:p>6864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0794444444444444" calcext:value-type="float">
            <text:p>0,00079444444444444500</text:p>
          </table:table-cell>
          <table:table-cell table:formula="of:=[.D860]-[.D8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8" office:value-type="float" office:value="6872" calcext:value-type="float">
            <text:p>6872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079537037037037" calcext:value-type="float">
            <text:p>0,00079537037037037000</text:p>
          </table:table-cell>
          <table:table-cell table:formula="of:=[.D861]-[.D8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8" office:value-type="float" office:value="6880" calcext:value-type="float">
            <text:p>688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0796296296296296" calcext:value-type="float">
            <text:p>0,00079629629629629600</text:p>
          </table:table-cell>
          <table:table-cell table:formula="of:=[.D862]-[.D8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8" office:value-type="float" office:value="6888" calcext:value-type="float">
            <text:p>6888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0797222222222222" calcext:value-type="float">
            <text:p>0,00079722222222222200</text:p>
          </table:table-cell>
          <table:table-cell table:formula="of:=[.D863]-[.D862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8" office:value-type="float" office:value="6896" calcext:value-type="float">
            <text:p>6896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0798148148148148" calcext:value-type="float">
            <text:p>0,00079814814814814800</text:p>
          </table:table-cell>
          <table:table-cell table:formula="of:=[.D864]-[.D8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8" office:value-type="float" office:value="6904" calcext:value-type="float">
            <text:p>6904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0799074074074074" calcext:value-type="float">
            <text:p>0,00079907407407407400</text:p>
          </table:table-cell>
          <table:table-cell table:formula="of:=[.D865]-[.D8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8" office:value-type="float" office:value="6912" calcext:value-type="float">
            <text:p>6912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08" calcext:value-type="float">
            <text:p>0,00080000000000000000</text:p>
          </table:table-cell>
          <table:table-cell table:formula="of:=[.D866]-[.D8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8" office:value-type="float" office:value="6920" calcext:value-type="float">
            <text:p>6920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0800925925925926" calcext:value-type="float">
            <text:p>0,00080092592592592600</text:p>
          </table:table-cell>
          <table:table-cell table:formula="of:=[.D867]-[.D8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8" office:value-type="float" office:value="6928" calcext:value-type="float">
            <text:p>6928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0801851851851852" calcext:value-type="float">
            <text:p>0,00080185185185185200</text:p>
          </table:table-cell>
          <table:table-cell table:formula="of:=[.D868]-[.D8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8" office:value-type="float" office:value="6936" calcext:value-type="float">
            <text:p>6936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0802777777777778" calcext:value-type="float">
            <text:p>0,00080277777777777800</text:p>
          </table:table-cell>
          <table:table-cell table:formula="of:=[.D869]-[.D8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8" office:value-type="float" office:value="6944" calcext:value-type="float">
            <text:p>6944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0803703703703704" calcext:value-type="float">
            <text:p>0,00080370370370370400</text:p>
          </table:table-cell>
          <table:table-cell table:formula="of:=[.D870]-[.D8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8" office:value-type="float" office:value="6952" calcext:value-type="float">
            <text:p>6952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080462962962963" calcext:value-type="float">
            <text:p>0,00080462962962963000</text:p>
          </table:table-cell>
          <table:table-cell table:formula="of:=[.D871]-[.D8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8" office:value-type="float" office:value="6960" calcext:value-type="float">
            <text:p>696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0805555555555556" calcext:value-type="float">
            <text:p>0,00080555555555555600</text:p>
          </table:table-cell>
          <table:table-cell table:formula="of:=[.D872]-[.D8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8" office:value-type="float" office:value="6968" calcext:value-type="float">
            <text:p>6968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0806481481481482" calcext:value-type="float">
            <text:p>0,00080648148148148200</text:p>
          </table:table-cell>
          <table:table-cell table:formula="of:=[.D873]-[.D8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8" office:value-type="float" office:value="6976" calcext:value-type="float">
            <text:p>6976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0807407407407407" calcext:value-type="float">
            <text:p>0,00080740740740740700</text:p>
          </table:table-cell>
          <table:table-cell table:formula="of:=[.D874]-[.D8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8" office:value-type="float" office:value="6984" calcext:value-type="float">
            <text:p>6984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0808333333333333" calcext:value-type="float">
            <text:p>0,00080833333333333300</text:p>
          </table:table-cell>
          <table:table-cell table:formula="of:=[.D875]-[.D8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8" office:value-type="float" office:value="6992" calcext:value-type="float">
            <text:p>6992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0809259259259259" calcext:value-type="float">
            <text:p>0,00080925925925925900</text:p>
          </table:table-cell>
          <table:table-cell table:formula="of:=[.D876]-[.D8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8" office:value-type="float" office:value="7000" calcext:value-type="float">
            <text:p>7000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0810185185185185" calcext:value-type="float">
            <text:p>0,00081018518518518500</text:p>
          </table:table-cell>
          <table:table-cell table:formula="of:=[.D877]-[.D8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8" office:value-type="float" office:value="7008" calcext:value-type="float">
            <text:p>7008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0811111111111111" calcext:value-type="float">
            <text:p>0,00081111111111111100</text:p>
          </table:table-cell>
          <table:table-cell table:formula="of:=[.D878]-[.D8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8" office:value-type="float" office:value="7016" calcext:value-type="float">
            <text:p>7016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0812037037037037" calcext:value-type="float">
            <text:p>0,00081203703703703700</text:p>
          </table:table-cell>
          <table:table-cell table:formula="of:=[.D879]-[.D8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8" office:value-type="float" office:value="7024" calcext:value-type="float">
            <text:p>7024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0812962962962963" calcext:value-type="float">
            <text:p>0,00081296296296296300</text:p>
          </table:table-cell>
          <table:table-cell table:formula="of:=[.D880]-[.D8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8" office:value-type="float" office:value="7032" calcext:value-type="float">
            <text:p>7032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0813888888888889" calcext:value-type="float">
            <text:p>0,00081388888888888900</text:p>
          </table:table-cell>
          <table:table-cell table:formula="of:=[.D881]-[.D8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8" office:value-type="float" office:value="7040" calcext:value-type="float">
            <text:p>704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0814814814814815" calcext:value-type="float">
            <text:p>0,00081481481481481500</text:p>
          </table:table-cell>
          <table:table-cell table:formula="of:=[.D882]-[.D881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8" office:value-type="float" office:value="7048" calcext:value-type="float">
            <text:p>7048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0815740740740741" calcext:value-type="float">
            <text:p>0,00081574074074074100</text:p>
          </table:table-cell>
          <table:table-cell table:formula="of:=[.D883]-[.D8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8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0816666666666667" calcext:value-type="float">
            <text:p>0,00081666666666666700</text:p>
          </table:table-cell>
          <table:table-cell table:formula="of:=[.D884]-[.D8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8" office:value-type="float" office:value="7064" calcext:value-type="float">
            <text:p>7064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0817592592592593" calcext:value-type="float">
            <text:p>0,00081759259259259300</text:p>
          </table:table-cell>
          <table:table-cell table:formula="of:=[.D885]-[.D8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8" office:value-type="float" office:value="7072" calcext:value-type="float">
            <text:p>7072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0818518518518519" calcext:value-type="float">
            <text:p>0,00081851851851851900</text:p>
          </table:table-cell>
          <table:table-cell table:formula="of:=[.D886]-[.D8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8" office:value-type="float" office:value="7080" calcext:value-type="float">
            <text:p>7080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0819444444444445" calcext:value-type="float">
            <text:p>0,00081944444444444500</text:p>
          </table:table-cell>
          <table:table-cell table:formula="of:=[.D887]-[.D8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8" office:value-type="float" office:value="7088" calcext:value-type="float">
            <text:p>7088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082037037037037" calcext:value-type="float">
            <text:p>0,00082037037037037000</text:p>
          </table:table-cell>
          <table:table-cell table:formula="of:=[.D888]-[.D8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8" office:value-type="float" office:value="7096" calcext:value-type="float">
            <text:p>7096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0821296296296296" calcext:value-type="float">
            <text:p>0,00082129629629629600</text:p>
          </table:table-cell>
          <table:table-cell table:formula="of:=[.D889]-[.D8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8" office:value-type="float" office:value="7104" calcext:value-type="float">
            <text:p>7104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0822222222222222" calcext:value-type="float">
            <text:p>0,00082222222222222200</text:p>
          </table:table-cell>
          <table:table-cell table:formula="of:=[.D890]-[.D8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8" office:value-type="float" office:value="7112" calcext:value-type="float">
            <text:p>7112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0823148148148148" calcext:value-type="float">
            <text:p>0,00082314814814814800</text:p>
          </table:table-cell>
          <table:table-cell table:formula="of:=[.D891]-[.D8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8" office:value-type="float" office:value="7120" calcext:value-type="float">
            <text:p>712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0824074074074074" calcext:value-type="float">
            <text:p>0,00082407407407407400</text:p>
          </table:table-cell>
          <table:table-cell table:formula="of:=[.D892]-[.D8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8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0825" calcext:value-type="float">
            <text:p>0,00082500000000000000</text:p>
          </table:table-cell>
          <table:table-cell table:formula="of:=[.D893]-[.D8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8" office:value-type="float" office:value="7136" calcext:value-type="float">
            <text:p>7136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0825925925925926" calcext:value-type="float">
            <text:p>0,00082592592592592600</text:p>
          </table:table-cell>
          <table:table-cell table:formula="of:=[.D894]-[.D8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8" office:value-type="float" office:value="7144" calcext:value-type="float">
            <text:p>7144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0826851851851852" calcext:value-type="float">
            <text:p>0,00082685185185185200</text:p>
          </table:table-cell>
          <table:table-cell table:formula="of:=[.D895]-[.D8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8" office:value-type="float" office:value="7152" calcext:value-type="float">
            <text:p>7152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0827777777777778" calcext:value-type="float">
            <text:p>0,00082777777777777800</text:p>
          </table:table-cell>
          <table:table-cell table:formula="of:=[.D896]-[.D8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8" office:value-type="float" office:value="7160" calcext:value-type="float">
            <text:p>7160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0828703703703704" calcext:value-type="float">
            <text:p>0,00082870370370370400</text:p>
          </table:table-cell>
          <table:table-cell table:formula="of:=[.D897]-[.D8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8" office:value-type="float" office:value="7168" calcext:value-type="float">
            <text:p>7168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082962962962963" calcext:value-type="float">
            <text:p>0,00082962962962963000</text:p>
          </table:table-cell>
          <table:table-cell table:formula="of:=[.D898]-[.D8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8" office:value-type="float" office:value="7176" calcext:value-type="float">
            <text:p>7176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0830555555555556" calcext:value-type="float">
            <text:p>0,00083055555555555600</text:p>
          </table:table-cell>
          <table:table-cell table:formula="of:=[.D899]-[.D8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8" office:value-type="float" office:value="7184" calcext:value-type="float">
            <text:p>7184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0831481481481481" calcext:value-type="float">
            <text:p>0,00083148148148148100</text:p>
          </table:table-cell>
          <table:table-cell table:formula="of:=[.D900]-[.D8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8" office:value-type="float" office:value="7192" calcext:value-type="float">
            <text:p>7192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0832407407407407" calcext:value-type="float">
            <text:p>0,00083240740740740700</text:p>
          </table:table-cell>
          <table:table-cell table:formula="of:=[.D901]-[.D900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8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0833333333333333" calcext:value-type="float">
            <text:p>0,00083333333333333300</text:p>
          </table:table-cell>
          <table:table-cell table:formula="of:=[.D902]-[.D9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8" office:value-type="float" office:value="7208" calcext:value-type="float">
            <text:p>7208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0834259259259259" calcext:value-type="float">
            <text:p>0,00083425925925925900</text:p>
          </table:table-cell>
          <table:table-cell table:formula="of:=[.D903]-[.D9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8" office:value-type="float" office:value="7216" calcext:value-type="float">
            <text:p>7216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0835185185185185" calcext:value-type="float">
            <text:p>0,00083518518518518500</text:p>
          </table:table-cell>
          <table:table-cell table:formula="of:=[.D904]-[.D9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8" office:value-type="float" office:value="7224" calcext:value-type="float">
            <text:p>7224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0836111111111111" calcext:value-type="float">
            <text:p>0,00083611111111111100</text:p>
          </table:table-cell>
          <table:table-cell table:formula="of:=[.D905]-[.D9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8" office:value-type="float" office:value="7232" calcext:value-type="float">
            <text:p>7232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0837037037037037" calcext:value-type="float">
            <text:p>0,00083703703703703700</text:p>
          </table:table-cell>
          <table:table-cell table:formula="of:=[.D906]-[.D9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8" office:value-type="float" office:value="7240" calcext:value-type="float">
            <text:p>7240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0837962962962963" calcext:value-type="float">
            <text:p>0,00083796296296296300</text:p>
          </table:table-cell>
          <table:table-cell table:formula="of:=[.D907]-[.D9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8" office:value-type="float" office:value="7248" calcext:value-type="float">
            <text:p>7248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0838888888888889" calcext:value-type="float">
            <text:p>0,00083888888888888900</text:p>
          </table:table-cell>
          <table:table-cell table:formula="of:=[.D908]-[.D9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8" office:value-type="float" office:value="7256" calcext:value-type="float">
            <text:p>7256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0839814814814815" calcext:value-type="float">
            <text:p>0,00083981481481481500</text:p>
          </table:table-cell>
          <table:table-cell table:formula="of:=[.D909]-[.D9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8" office:value-type="float" office:value="7264" calcext:value-type="float">
            <text:p>7264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0840740740740741" calcext:value-type="float">
            <text:p>0,00084074074074074100</text:p>
          </table:table-cell>
          <table:table-cell table:formula="of:=[.D910]-[.D9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8" office:value-type="float" office:value="7272" calcext:value-type="float">
            <text:p>7272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0841666666666667" calcext:value-type="float">
            <text:p>0,00084166666666666700</text:p>
          </table:table-cell>
          <table:table-cell table:formula="of:=[.D911]-[.D9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8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0842592592592593" calcext:value-type="float">
            <text:p>0,00084259259259259300</text:p>
          </table:table-cell>
          <table:table-cell table:formula="of:=[.D912]-[.D9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8" office:value-type="float" office:value="7288" calcext:value-type="float">
            <text:p>7288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0843518518518519" calcext:value-type="float">
            <text:p>0,00084351851851851900</text:p>
          </table:table-cell>
          <table:table-cell table:formula="of:=[.D913]-[.D9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8" office:value-type="float" office:value="7296" calcext:value-type="float">
            <text:p>7296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0844444444444444" calcext:value-type="float">
            <text:p>0,00084444444444444400</text:p>
          </table:table-cell>
          <table:table-cell table:formula="of:=[.D914]-[.D9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8" office:value-type="float" office:value="7304" calcext:value-type="float">
            <text:p>7304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084537037037037" calcext:value-type="float">
            <text:p>0,00084537037037037000</text:p>
          </table:table-cell>
          <table:table-cell table:formula="of:=[.D915]-[.D9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8" office:value-type="float" office:value="7312" calcext:value-type="float">
            <text:p>7312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0846296296296296" calcext:value-type="float">
            <text:p>0,00084629629629629600</text:p>
          </table:table-cell>
          <table:table-cell table:formula="of:=[.D916]-[.D9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8" office:value-type="float" office:value="7320" calcext:value-type="float">
            <text:p>7320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0847222222222222" calcext:value-type="float">
            <text:p>0,00084722222222222200</text:p>
          </table:table-cell>
          <table:table-cell table:formula="of:=[.D917]-[.D9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8" office:value-type="float" office:value="7328" calcext:value-type="float">
            <text:p>7328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0848148148148148" calcext:value-type="float">
            <text:p>0,00084814814814814800</text:p>
          </table:table-cell>
          <table:table-cell table:formula="of:=[.D918]-[.D9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8" office:value-type="float" office:value="7336" calcext:value-type="float">
            <text:p>7336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0849074074074074" calcext:value-type="float">
            <text:p>0,00084907407407407400</text:p>
          </table:table-cell>
          <table:table-cell table:formula="of:=[.D919]-[.D9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8" office:value-type="float" office:value="7344" calcext:value-type="float">
            <text:p>7344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085" calcext:value-type="float">
            <text:p>0,00085000000000000000</text:p>
          </table:table-cell>
          <table:table-cell table:formula="of:=[.D920]-[.D9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8" office:value-type="float" office:value="7352" calcext:value-type="float">
            <text:p>7352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0850925925925926" calcext:value-type="float">
            <text:p>0,00085092592592592600</text:p>
          </table:table-cell>
          <table:table-cell table:formula="of:=[.D921]-[.D920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8" office:value-type="float" office:value="7360" calcext:value-type="float">
            <text:p>736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0851851851851852" calcext:value-type="float">
            <text:p>0,00085185185185185200</text:p>
          </table:table-cell>
          <table:table-cell table:formula="of:=[.D922]-[.D9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8" office:value-type="float" office:value="7368" calcext:value-type="float">
            <text:p>7368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0852777777777778" calcext:value-type="float">
            <text:p>0,00085277777777777800</text:p>
          </table:table-cell>
          <table:table-cell table:formula="of:=[.D923]-[.D9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8" office:value-type="float" office:value="7376" calcext:value-type="float">
            <text:p>7376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0853703703703704" calcext:value-type="float">
            <text:p>0,00085370370370370400</text:p>
          </table:table-cell>
          <table:table-cell table:formula="of:=[.D924]-[.D9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8" office:value-type="float" office:value="7384" calcext:value-type="float">
            <text:p>7384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085462962962963" calcext:value-type="float">
            <text:p>0,00085462962962963000</text:p>
          </table:table-cell>
          <table:table-cell table:formula="of:=[.D925]-[.D9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8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0855555555555556" calcext:value-type="float">
            <text:p>0,00085555555555555600</text:p>
          </table:table-cell>
          <table:table-cell table:formula="of:=[.D926]-[.D9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8" office:value-type="float" office:value="7400" calcext:value-type="float">
            <text:p>7400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0856481481481482" calcext:value-type="float">
            <text:p>0,00085648148148148100</text:p>
          </table:table-cell>
          <table:table-cell table:formula="of:=[.D927]-[.D9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8" office:value-type="float" office:value="7408" calcext:value-type="float">
            <text:p>7408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0857407407407407" calcext:value-type="float">
            <text:p>0,00085740740740740700</text:p>
          </table:table-cell>
          <table:table-cell table:formula="of:=[.D928]-[.D9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8" office:value-type="float" office:value="7416" calcext:value-type="float">
            <text:p>7416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0858333333333333" calcext:value-type="float">
            <text:p>0,00085833333333333300</text:p>
          </table:table-cell>
          <table:table-cell table:formula="of:=[.D929]-[.D9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8" office:value-type="float" office:value="7424" calcext:value-type="float">
            <text:p>7424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0859259259259259" calcext:value-type="float">
            <text:p>0,00085925925925925900</text:p>
          </table:table-cell>
          <table:table-cell table:formula="of:=[.D930]-[.D9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8" office:value-type="float" office:value="7432" calcext:value-type="float">
            <text:p>7432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0860185185185185" calcext:value-type="float">
            <text:p>0,00086018518518518500</text:p>
          </table:table-cell>
          <table:table-cell table:formula="of:=[.D931]-[.D9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8" office:value-type="float" office:value="7440" calcext:value-type="float">
            <text:p>744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0861111111111111" calcext:value-type="float">
            <text:p>0,00086111111111111100</text:p>
          </table:table-cell>
          <table:table-cell table:formula="of:=[.D932]-[.D9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8" office:value-type="float" office:value="7448" calcext:value-type="float">
            <text:p>7448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0862037037037037" calcext:value-type="float">
            <text:p>0,00086203703703703700</text:p>
          </table:table-cell>
          <table:table-cell table:formula="of:=[.D933]-[.D9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8" office:value-type="float" office:value="7456" calcext:value-type="float">
            <text:p>7456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0862962962962963" calcext:value-type="float">
            <text:p>0,00086296296296296300</text:p>
          </table:table-cell>
          <table:table-cell table:formula="of:=[.D934]-[.D9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8" office:value-type="float" office:value="7464" calcext:value-type="float">
            <text:p>7464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0863888888888889" calcext:value-type="float">
            <text:p>0,00086388888888888900</text:p>
          </table:table-cell>
          <table:table-cell table:formula="of:=[.D935]-[.D9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8" office:value-type="float" office:value="7472" calcext:value-type="float">
            <text:p>7472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0864814814814815" calcext:value-type="float">
            <text:p>0,00086481481481481500</text:p>
          </table:table-cell>
          <table:table-cell table:formula="of:=[.D936]-[.D9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8" office:value-type="float" office:value="7480" calcext:value-type="float">
            <text:p>7480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0865740740740741" calcext:value-type="float">
            <text:p>0,00086574074074074100</text:p>
          </table:table-cell>
          <table:table-cell table:formula="of:=[.D937]-[.D9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8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0866666666666667" calcext:value-type="float">
            <text:p>0,00086666666666666700</text:p>
          </table:table-cell>
          <table:table-cell table:formula="of:=[.D938]-[.D9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8" office:value-type="float" office:value="7496" calcext:value-type="float">
            <text:p>7496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0867592592592593" calcext:value-type="float">
            <text:p>0,00086759259259259200</text:p>
          </table:table-cell>
          <table:table-cell table:formula="of:=[.D939]-[.D9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8" office:value-type="float" office:value="7504" calcext:value-type="float">
            <text:p>7504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0868518518518519" calcext:value-type="float">
            <text:p>0,00086851851851851800</text:p>
          </table:table-cell>
          <table:table-cell table:formula="of:=[.D940]-[.D939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8" office:value-type="float" office:value="7512" calcext:value-type="float">
            <text:p>7512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0869444444444445" calcext:value-type="float">
            <text:p>0,00086944444444444500</text:p>
          </table:table-cell>
          <table:table-cell table:formula="of:=[.D941]-[.D9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8" office:value-type="float" office:value="7520" calcext:value-type="float">
            <text:p>752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087037037037037" calcext:value-type="float">
            <text:p>0,00087037037037037000</text:p>
          </table:table-cell>
          <table:table-cell table:formula="of:=[.D942]-[.D9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8" office:value-type="float" office:value="7528" calcext:value-type="float">
            <text:p>7528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0871296296296296" calcext:value-type="float">
            <text:p>0,00087129629629629600</text:p>
          </table:table-cell>
          <table:table-cell table:formula="of:=[.D943]-[.D9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8" office:value-type="float" office:value="7536" calcext:value-type="float">
            <text:p>7536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0872222222222222" calcext:value-type="float">
            <text:p>0,00087222222222222200</text:p>
          </table:table-cell>
          <table:table-cell table:formula="of:=[.D944]-[.D9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8" office:value-type="float" office:value="7544" calcext:value-type="float">
            <text:p>7544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0873148148148148" calcext:value-type="float">
            <text:p>0,00087314814814814800</text:p>
          </table:table-cell>
          <table:table-cell table:formula="of:=[.D945]-[.D9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8" office:value-type="float" office:value="7552" calcext:value-type="float">
            <text:p>7552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0874074074074074" calcext:value-type="float">
            <text:p>0,00087407407407407400</text:p>
          </table:table-cell>
          <table:table-cell table:formula="of:=[.D946]-[.D9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8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0875" calcext:value-type="float">
            <text:p>0,00087500000000000000</text:p>
          </table:table-cell>
          <table:table-cell table:formula="of:=[.D947]-[.D9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8" office:value-type="float" office:value="7568" calcext:value-type="float">
            <text:p>7568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0875925925925926" calcext:value-type="float">
            <text:p>0,00087592592592592600</text:p>
          </table:table-cell>
          <table:table-cell table:formula="of:=[.D948]-[.D9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8" office:value-type="float" office:value="7576" calcext:value-type="float">
            <text:p>7576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0876851851851852" calcext:value-type="float">
            <text:p>0,00087685185185185200</text:p>
          </table:table-cell>
          <table:table-cell table:formula="of:=[.D949]-[.D9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8" office:value-type="float" office:value="7584" calcext:value-type="float">
            <text:p>7584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0877777777777778" calcext:value-type="float">
            <text:p>0,00087777777777777800</text:p>
          </table:table-cell>
          <table:table-cell table:formula="of:=[.D950]-[.D9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8" office:value-type="float" office:value="7592" calcext:value-type="float">
            <text:p>7592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0878703703703704" calcext:value-type="float">
            <text:p>0,00087870370370370400</text:p>
          </table:table-cell>
          <table:table-cell table:formula="of:=[.D951]-[.D9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8" office:value-type="float" office:value="7600" calcext:value-type="float">
            <text:p>760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087962962962963" calcext:value-type="float">
            <text:p>0,00087962962962963000</text:p>
          </table:table-cell>
          <table:table-cell table:formula="of:=[.D952]-[.D9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8" office:value-type="float" office:value="7608" calcext:value-type="float">
            <text:p>7608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0880555555555556" calcext:value-type="float">
            <text:p>0,00088055555555555600</text:p>
          </table:table-cell>
          <table:table-cell table:formula="of:=[.D953]-[.D9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8" office:value-type="float" office:value="7616" calcext:value-type="float">
            <text:p>7616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0881481481481482" calcext:value-type="float">
            <text:p>0,00088148148148148200</text:p>
          </table:table-cell>
          <table:table-cell table:formula="of:=[.D954]-[.D9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8" office:value-type="float" office:value="7624" calcext:value-type="float">
            <text:p>7624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0882407407407407" calcext:value-type="float">
            <text:p>0,00088240740740740700</text:p>
          </table:table-cell>
          <table:table-cell table:formula="of:=[.D955]-[.D9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8" office:value-type="float" office:value="7632" calcext:value-type="float">
            <text:p>7632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0883333333333333" calcext:value-type="float">
            <text:p>0,00088333333333333300</text:p>
          </table:table-cell>
          <table:table-cell table:formula="of:=[.D956]-[.D9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8" office:value-type="float" office:value="7640" calcext:value-type="float">
            <text:p>7640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0884259259259259" calcext:value-type="float">
            <text:p>0,00088425925925925900</text:p>
          </table:table-cell>
          <table:table-cell table:formula="of:=[.D957]-[.D9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8" office:value-type="float" office:value="7648" calcext:value-type="float">
            <text:p>7648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0885185185185185" calcext:value-type="float">
            <text:p>0,00088518518518518500</text:p>
          </table:table-cell>
          <table:table-cell table:formula="of:=[.D958]-[.D9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8" office:value-type="float" office:value="7656" calcext:value-type="float">
            <text:p>7656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0886111111111111" calcext:value-type="float">
            <text:p>0,00088611111111111100</text:p>
          </table:table-cell>
          <table:table-cell table:formula="of:=[.D959]-[.D958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8" office:value-type="float" office:value="7664" calcext:value-type="float">
            <text:p>7664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0887037037037037" calcext:value-type="float">
            <text:p>0,00088703703703703700</text:p>
          </table:table-cell>
          <table:table-cell table:formula="of:=[.D960]-[.D9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8" office:value-type="float" office:value="7672" calcext:value-type="float">
            <text:p>7672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0887962962962963" calcext:value-type="float">
            <text:p>0,00088796296296296300</text:p>
          </table:table-cell>
          <table:table-cell table:formula="of:=[.D961]-[.D9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8" office:value-type="float" office:value="7680" calcext:value-type="float">
            <text:p>768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0888888888888889" calcext:value-type="float">
            <text:p>0,00088888888888888900</text:p>
          </table:table-cell>
          <table:table-cell table:formula="of:=[.D962]-[.D9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8" office:value-type="float" office:value="7688" calcext:value-type="float">
            <text:p>7688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0889814814814815" calcext:value-type="float">
            <text:p>0,00088981481481481500</text:p>
          </table:table-cell>
          <table:table-cell table:formula="of:=[.D963]-[.D9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8" office:value-type="float" office:value="7696" calcext:value-type="float">
            <text:p>7696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0890740740740741" calcext:value-type="float">
            <text:p>0,00089074074074074100</text:p>
          </table:table-cell>
          <table:table-cell table:formula="of:=[.D964]-[.D9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8" office:value-type="float" office:value="7704" calcext:value-type="float">
            <text:p>7704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0891666666666667" calcext:value-type="float">
            <text:p>0,00089166666666666700</text:p>
          </table:table-cell>
          <table:table-cell table:formula="of:=[.D965]-[.D9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8" office:value-type="float" office:value="7712" calcext:value-type="float">
            <text:p>7712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0892592592592593" calcext:value-type="float">
            <text:p>0,00089259259259259300</text:p>
          </table:table-cell>
          <table:table-cell table:formula="of:=[.D966]-[.D9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8" office:value-type="float" office:value="7720" calcext:value-type="float">
            <text:p>7720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0893518518518519" calcext:value-type="float">
            <text:p>0,00089351851851851900</text:p>
          </table:table-cell>
          <table:table-cell table:formula="of:=[.D967]-[.D9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8" office:value-type="float" office:value="7728" calcext:value-type="float">
            <text:p>7728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0894444444444445" calcext:value-type="float">
            <text:p>0,00089444444444444500</text:p>
          </table:table-cell>
          <table:table-cell table:formula="of:=[.D968]-[.D9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8" office:value-type="float" office:value="7736" calcext:value-type="float">
            <text:p>7736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089537037037037" calcext:value-type="float">
            <text:p>0,00089537037037037000</text:p>
          </table:table-cell>
          <table:table-cell table:formula="of:=[.D969]-[.D9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8" office:value-type="float" office:value="7744" calcext:value-type="float">
            <text:p>7744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0896296296296296" calcext:value-type="float">
            <text:p>0,00089629629629629600</text:p>
          </table:table-cell>
          <table:table-cell table:formula="of:=[.D970]-[.D9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8" office:value-type="float" office:value="7752" calcext:value-type="float">
            <text:p>7752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0897222222222222" calcext:value-type="float">
            <text:p>0,00089722222222222200</text:p>
          </table:table-cell>
          <table:table-cell table:formula="of:=[.D971]-[.D9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8" office:value-type="float" office:value="7760" calcext:value-type="float">
            <text:p>776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0898148148148148" calcext:value-type="float">
            <text:p>0,00089814814814814800</text:p>
          </table:table-cell>
          <table:table-cell table:formula="of:=[.D972]-[.D9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8" office:value-type="float" office:value="7768" calcext:value-type="float">
            <text:p>7768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0899074074074074" calcext:value-type="float">
            <text:p>0,00089907407407407400</text:p>
          </table:table-cell>
          <table:table-cell table:formula="of:=[.D973]-[.D9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8" office:value-type="float" office:value="7776" calcext:value-type="float">
            <text:p>7776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09" calcext:value-type="float">
            <text:p>0,00090000000000000000</text:p>
          </table:table-cell>
          <table:table-cell table:formula="of:=[.D974]-[.D9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8" office:value-type="float" office:value="7784" calcext:value-type="float">
            <text:p>7784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0900925925925926" calcext:value-type="float">
            <text:p>0,00090092592592592600</text:p>
          </table:table-cell>
          <table:table-cell table:formula="of:=[.D975]-[.D9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8" office:value-type="float" office:value="7792" calcext:value-type="float">
            <text:p>7792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0901851851851852" calcext:value-type="float">
            <text:p>0,00090185185185185200</text:p>
          </table:table-cell>
          <table:table-cell table:formula="of:=[.D976]-[.D9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8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0902777777777778" calcext:value-type="float">
            <text:p>0,00090277777777777800</text:p>
          </table:table-cell>
          <table:table-cell table:formula="of:=[.D977]-[.D9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8" office:value-type="float" office:value="7808" calcext:value-type="float">
            <text:p>7808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0903703703703704" calcext:value-type="float">
            <text:p>0,00090370370370370400</text:p>
          </table:table-cell>
          <table:table-cell table:formula="of:=[.D978]-[.D9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8" office:value-type="float" office:value="7816" calcext:value-type="float">
            <text:p>7816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090462962962963" calcext:value-type="float">
            <text:p>0,00090462962962963000</text:p>
          </table:table-cell>
          <table:table-cell table:formula="of:=[.D979]-[.D978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8" office:value-type="float" office:value="7824" calcext:value-type="float">
            <text:p>7824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0905555555555556" calcext:value-type="float">
            <text:p>0,00090555555555555600</text:p>
          </table:table-cell>
          <table:table-cell table:formula="of:=[.D980]-[.D9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8" office:value-type="float" office:value="7832" calcext:value-type="float">
            <text:p>7832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0906481481481482" calcext:value-type="float">
            <text:p>0,00090648148148148200</text:p>
          </table:table-cell>
          <table:table-cell table:formula="of:=[.D981]-[.D9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8" office:value-type="float" office:value="7840" calcext:value-type="float">
            <text:p>784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0907407407407407" calcext:value-type="float">
            <text:p>0,00090740740740740800</text:p>
          </table:table-cell>
          <table:table-cell table:formula="of:=[.D982]-[.D9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8" office:value-type="float" office:value="7848" calcext:value-type="float">
            <text:p>7848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0908333333333333" calcext:value-type="float">
            <text:p>0,00090833333333333400</text:p>
          </table:table-cell>
          <table:table-cell table:formula="of:=[.D983]-[.D9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8" office:value-type="float" office:value="7856" calcext:value-type="float">
            <text:p>7856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0909259259259259" calcext:value-type="float">
            <text:p>0,00090925925925925900</text:p>
          </table:table-cell>
          <table:table-cell table:formula="of:=[.D984]-[.D9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8" office:value-type="float" office:value="7864" calcext:value-type="float">
            <text:p>7864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0910185185185185" calcext:value-type="float">
            <text:p>0,00091018518518518500</text:p>
          </table:table-cell>
          <table:table-cell table:formula="of:=[.D985]-[.D9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8" office:value-type="float" office:value="7872" calcext:value-type="float">
            <text:p>7872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0911111111111111" calcext:value-type="float">
            <text:p>0,00091111111111111100</text:p>
          </table:table-cell>
          <table:table-cell table:formula="of:=[.D986]-[.D9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8" office:value-type="float" office:value="7880" calcext:value-type="float">
            <text:p>7880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0912037037037037" calcext:value-type="float">
            <text:p>0,00091203703703703700</text:p>
          </table:table-cell>
          <table:table-cell table:formula="of:=[.D987]-[.D9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8" office:value-type="float" office:value="7888" calcext:value-type="float">
            <text:p>7888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0912962962962963" calcext:value-type="float">
            <text:p>0,00091296296296296300</text:p>
          </table:table-cell>
          <table:table-cell table:formula="of:=[.D988]-[.D9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8" office:value-type="float" office:value="7896" calcext:value-type="float">
            <text:p>7896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0913888888888889" calcext:value-type="float">
            <text:p>0,00091388888888888900</text:p>
          </table:table-cell>
          <table:table-cell table:formula="of:=[.D989]-[.D9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8" office:value-type="float" office:value="7904" calcext:value-type="float">
            <text:p>7904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0914814814814815" calcext:value-type="float">
            <text:p>0,00091481481481481500</text:p>
          </table:table-cell>
          <table:table-cell table:formula="of:=[.D990]-[.D9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8" office:value-type="float" office:value="7912" calcext:value-type="float">
            <text:p>7912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0915740740740741" calcext:value-type="float">
            <text:p>0,00091574074074074100</text:p>
          </table:table-cell>
          <table:table-cell table:formula="of:=[.D991]-[.D9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8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0916666666666667" calcext:value-type="float">
            <text:p>0,00091666666666666700</text:p>
          </table:table-cell>
          <table:table-cell table:formula="of:=[.D992]-[.D9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8" office:value-type="float" office:value="7928" calcext:value-type="float">
            <text:p>7928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0917592592592593" calcext:value-type="float">
            <text:p>0,00091759259259259300</text:p>
          </table:table-cell>
          <table:table-cell table:formula="of:=[.D993]-[.D9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8" office:value-type="float" office:value="7936" calcext:value-type="float">
            <text:p>7936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0918518518518519" calcext:value-type="float">
            <text:p>0,00091851851851851900</text:p>
          </table:table-cell>
          <table:table-cell table:formula="of:=[.D994]-[.D9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8" office:value-type="float" office:value="7944" calcext:value-type="float">
            <text:p>7944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0919444444444444" calcext:value-type="float">
            <text:p>0,00091944444444444500</text:p>
          </table:table-cell>
          <table:table-cell table:formula="of:=[.D995]-[.D9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8" office:value-type="float" office:value="7952" calcext:value-type="float">
            <text:p>7952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092037037037037" calcext:value-type="float">
            <text:p>0,00092037037037037000</text:p>
          </table:table-cell>
          <table:table-cell table:formula="of:=[.D996]-[.D9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8" office:value-type="float" office:value="7960" calcext:value-type="float">
            <text:p>7960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0921296296296296" calcext:value-type="float">
            <text:p>0,00092129629629629600</text:p>
          </table:table-cell>
          <table:table-cell table:formula="of:=[.D997]-[.D9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8" office:value-type="float" office:value="7968" calcext:value-type="float">
            <text:p>7968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0922222222222222" calcext:value-type="float">
            <text:p>0,00092222222222222200</text:p>
          </table:table-cell>
          <table:table-cell table:formula="of:=[.D998]-[.D997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8" office:value-type="float" office:value="7976" calcext:value-type="float">
            <text:p>7976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0923148148148148" calcext:value-type="float">
            <text:p>0,00092314814814814800</text:p>
          </table:table-cell>
          <table:table-cell table:formula="of:=[.D999]-[.D9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8" office:value-type="float" office:value="7984" calcext:value-type="float">
            <text:p>7984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0924074074074074" calcext:value-type="float">
            <text:p>0,00092407407407407400</text:p>
          </table:table-cell>
          <table:table-cell table:formula="of:=[.D1000]-[.D9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8" office:value-type="float" office:value="7992" calcext:value-type="float">
            <text:p>7992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0925" calcext:value-type="float">
            <text:p>0,00092500000000000000</text:p>
          </table:table-cell>
          <table:table-cell table:formula="of:=[.D1001]-[.D10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8" office:value-type="float" office:value="8000" calcext:value-type="float">
            <text:p>8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0925925925925926" calcext:value-type="float">
            <text:p>0,00092592592592592600</text:p>
          </table:table-cell>
          <table:table-cell table:formula="of:=[.D1002]-[.D10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8" office:value-type="float" office:value="8008" calcext:value-type="float">
            <text:p>8008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0926851851851852" calcext:value-type="float">
            <text:p>0,00092685185185185200</text:p>
          </table:table-cell>
          <table:table-cell table:formula="of:=[.D1003]-[.D10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8" office:value-type="float" office:value="8016" calcext:value-type="float">
            <text:p>8016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0927777777777778" calcext:value-type="float">
            <text:p>0,00092777777777777800</text:p>
          </table:table-cell>
          <table:table-cell table:formula="of:=[.D1004]-[.D10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8" office:value-type="float" office:value="8024" calcext:value-type="float">
            <text:p>8024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0928703703703704" calcext:value-type="float">
            <text:p>0,00092870370370370400</text:p>
          </table:table-cell>
          <table:table-cell table:formula="of:=[.D1005]-[.D10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8" office:value-type="float" office:value="8032" calcext:value-type="float">
            <text:p>8032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092962962962963" calcext:value-type="float">
            <text:p>0,00092962962962963000</text:p>
          </table:table-cell>
          <table:table-cell table:formula="of:=[.D1006]-[.D10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8" office:value-type="float" office:value="8040" calcext:value-type="float">
            <text:p>8040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0930555555555556" calcext:value-type="float">
            <text:p>0,00093055555555555600</text:p>
          </table:table-cell>
          <table:table-cell table:formula="of:=[.D1007]-[.D10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8" office:value-type="float" office:value="8048" calcext:value-type="float">
            <text:p>8048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0931481481481482" calcext:value-type="float">
            <text:p>0,00093148148148148200</text:p>
          </table:table-cell>
          <table:table-cell table:formula="of:=[.D1008]-[.D10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8" office:value-type="float" office:value="8056" calcext:value-type="float">
            <text:p>8056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0932407407407407" calcext:value-type="float">
            <text:p>0,00093240740740740700</text:p>
          </table:table-cell>
          <table:table-cell table:formula="of:=[.D1009]-[.D10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8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0933333333333333" calcext:value-type="float">
            <text:p>0,00093333333333333300</text:p>
          </table:table-cell>
          <table:table-cell table:formula="of:=[.D1010]-[.D10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8" office:value-type="float" office:value="8072" calcext:value-type="float">
            <text:p>8072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0934259259259259" calcext:value-type="float">
            <text:p>0,00093425925925925900</text:p>
          </table:table-cell>
          <table:table-cell table:formula="of:=[.D1011]-[.D10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8" office:value-type="float" office:value="8080" calcext:value-type="float">
            <text:p>808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0935185185185185" calcext:value-type="float">
            <text:p>0,00093518518518518500</text:p>
          </table:table-cell>
          <table:table-cell table:formula="of:=[.D1012]-[.D10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8" office:value-type="float" office:value="8088" calcext:value-type="float">
            <text:p>8088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0936111111111111" calcext:value-type="float">
            <text:p>0,00093611111111111100</text:p>
          </table:table-cell>
          <table:table-cell table:formula="of:=[.D1013]-[.D10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8" office:value-type="float" office:value="8096" calcext:value-type="float">
            <text:p>8096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0937037037037037" calcext:value-type="float">
            <text:p>0,00093703703703703700</text:p>
          </table:table-cell>
          <table:table-cell table:formula="of:=[.D1014]-[.D10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8" office:value-type="float" office:value="8104" calcext:value-type="float">
            <text:p>8104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0937962962962963" calcext:value-type="float">
            <text:p>0,00093796296296296300</text:p>
          </table:table-cell>
          <table:table-cell table:formula="of:=[.D1015]-[.D10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8" office:value-type="float" office:value="8112" calcext:value-type="float">
            <text:p>8112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0938888888888889" calcext:value-type="float">
            <text:p>0,00093888888888888900</text:p>
          </table:table-cell>
          <table:table-cell table:formula="of:=[.D1016]-[.D10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8" office:value-type="float" office:value="8120" calcext:value-type="float">
            <text:p>8120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0939814814814815" calcext:value-type="float">
            <text:p>0,00093981481481481500</text:p>
          </table:table-cell>
          <table:table-cell table:formula="of:=[.D1017]-[.D1016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8" office:value-type="float" office:value="8128" calcext:value-type="float">
            <text:p>8128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0940740740740741" calcext:value-type="float">
            <text:p>0,00094074074074074100</text:p>
          </table:table-cell>
          <table:table-cell table:formula="of:=[.D1018]-[.D10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8" office:value-type="float" office:value="8136" calcext:value-type="float">
            <text:p>8136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0941666666666667" calcext:value-type="float">
            <text:p>0,00094166666666666700</text:p>
          </table:table-cell>
          <table:table-cell table:formula="of:=[.D1019]-[.D10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8" office:value-type="float" office:value="8144" calcext:value-type="float">
            <text:p>8144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0942592592592593" calcext:value-type="float">
            <text:p>0,00094259259259259300</text:p>
          </table:table-cell>
          <table:table-cell table:formula="of:=[.D1020]-[.D10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8" office:value-type="float" office:value="8152" calcext:value-type="float">
            <text:p>8152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0943518518518519" calcext:value-type="float">
            <text:p>0,00094351851851851900</text:p>
          </table:table-cell>
          <table:table-cell table:formula="of:=[.D1021]-[.D10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8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0944444444444445" calcext:value-type="float">
            <text:p>0,00094444444444444500</text:p>
          </table:table-cell>
          <table:table-cell table:formula="of:=[.D1022]-[.D10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8" office:value-type="float" office:value="8168" calcext:value-type="float">
            <text:p>8168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094537037037037" calcext:value-type="float">
            <text:p>0,00094537037037037000</text:p>
          </table:table-cell>
          <table:table-cell table:formula="of:=[.D1023]-[.D10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8" office:value-type="float" office:value="8176" calcext:value-type="float">
            <text:p>8176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0946296296296296" calcext:value-type="float">
            <text:p>0,00094629629629629600</text:p>
          </table:table-cell>
          <table:table-cell table:formula="of:=[.D1024]-[.D10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8" office:value-type="float" office:value="8184" calcext:value-type="float">
            <text:p>8184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0947222222222222" calcext:value-type="float">
            <text:p>0,00094722222222222200</text:p>
          </table:table-cell>
          <table:table-cell table:formula="of:=[.D1025]-[.D10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8" office:value-type="float" office:value="8192" calcext:value-type="float">
            <text:p>8192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0948148148148148" calcext:value-type="float">
            <text:p>0,00094814814814814800</text:p>
          </table:table-cell>
          <table:table-cell table:formula="of:=[.D1026]-[.D10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8" office:value-type="float" office:value="8200" calcext:value-type="float">
            <text:p>8200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0949074074074074" calcext:value-type="float">
            <text:p>0,00094907407407407400</text:p>
          </table:table-cell>
          <table:table-cell table:formula="of:=[.D1027]-[.D10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8" office:value-type="float" office:value="8208" calcext:value-type="float">
            <text:p>8208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095" calcext:value-type="float">
            <text:p>0,00095000000000000000</text:p>
          </table:table-cell>
          <table:table-cell table:formula="of:=[.D1028]-[.D10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8" office:value-type="float" office:value="8216" calcext:value-type="float">
            <text:p>8216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0950925925925926" calcext:value-type="float">
            <text:p>0,00095092592592592600</text:p>
          </table:table-cell>
          <table:table-cell table:formula="of:=[.D1029]-[.D10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8" office:value-type="float" office:value="8224" calcext:value-type="float">
            <text:p>8224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0951851851851852" calcext:value-type="float">
            <text:p>0,00095185185185185200</text:p>
          </table:table-cell>
          <table:table-cell table:formula="of:=[.D1030]-[.D10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8" office:value-type="float" office:value="8232" calcext:value-type="float">
            <text:p>8232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0952777777777778" calcext:value-type="float">
            <text:p>0,00095277777777777800</text:p>
          </table:table-cell>
          <table:table-cell table:formula="of:=[.D1031]-[.D10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8" office:value-type="float" office:value="8240" calcext:value-type="float">
            <text:p>824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0953703703703704" calcext:value-type="float">
            <text:p>0,00095370370370370400</text:p>
          </table:table-cell>
          <table:table-cell table:formula="of:=[.D1032]-[.D10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8" office:value-type="float" office:value="8248" calcext:value-type="float">
            <text:p>8248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095462962962963" calcext:value-type="float">
            <text:p>0,00095462962962963000</text:p>
          </table:table-cell>
          <table:table-cell table:formula="of:=[.D1033]-[.D10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8" office:value-type="float" office:value="8256" calcext:value-type="float">
            <text:p>8256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0955555555555556" calcext:value-type="float">
            <text:p>0,00095555555555555600</text:p>
          </table:table-cell>
          <table:table-cell table:formula="of:=[.D1034]-[.D10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8" office:value-type="float" office:value="8264" calcext:value-type="float">
            <text:p>8264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0956481481481481" calcext:value-type="float">
            <text:p>0,00095648148148148100</text:p>
          </table:table-cell>
          <table:table-cell table:formula="of:=[.D1035]-[.D10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8" office:value-type="float" office:value="8272" calcext:value-type="float">
            <text:p>8272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0957407407407407" calcext:value-type="float">
            <text:p>0,00095740740740740700</text:p>
          </table:table-cell>
          <table:table-cell table:formula="of:=[.D1036]-[.D10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8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0958333333333333" calcext:value-type="float">
            <text:p>0,00095833333333333300</text:p>
          </table:table-cell>
          <table:table-cell table:formula="of:=[.D1037]-[.D1036]" office:value-type="float" office:value="0.000000925925925926029" calcext:value-type="float">
            <text:p>0,0000009259259259260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8" office:value-type="float" office:value="8288" calcext:value-type="float">
            <text:p>8288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0959259259259259" calcext:value-type="float">
            <text:p>0,00095925925925925900</text:p>
          </table:table-cell>
          <table:table-cell table:formula="of:=[.D1038]-[.D10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8" office:value-type="float" office:value="8296" calcext:value-type="float">
            <text:p>8296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0960185185185185" calcext:value-type="float">
            <text:p>0,00096018518518518500</text:p>
          </table:table-cell>
          <table:table-cell table:formula="of:=[.D1039]-[.D10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8" office:value-type="float" office:value="8304" calcext:value-type="float">
            <text:p>8304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0961111111111111" calcext:value-type="float">
            <text:p>0,00096111111111111100</text:p>
          </table:table-cell>
          <table:table-cell table:formula="of:=[.D1040]-[.D10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8" office:value-type="float" office:value="8312" calcext:value-type="float">
            <text:p>8312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0962037037037037" calcext:value-type="float">
            <text:p>0,00096203703703703700</text:p>
          </table:table-cell>
          <table:table-cell table:formula="of:=[.D1041]-[.D10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8" office:value-type="float" office:value="8320" calcext:value-type="float">
            <text:p>832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0962962962962963" calcext:value-type="float">
            <text:p>0,00096296296296296300</text:p>
          </table:table-cell>
          <table:table-cell table:formula="of:=[.D1042]-[.D10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8" office:value-type="float" office:value="8328" calcext:value-type="float">
            <text:p>8328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0963888888888889" calcext:value-type="float">
            <text:p>0,00096388888888888900</text:p>
          </table:table-cell>
          <table:table-cell table:formula="of:=[.D1043]-[.D10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8" office:value-type="float" office:value="8336" calcext:value-type="float">
            <text:p>8336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0964814814814815" calcext:value-type="float">
            <text:p>0,00096481481481481500</text:p>
          </table:table-cell>
          <table:table-cell table:formula="of:=[.D1044]-[.D10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8" office:value-type="float" office:value="8344" calcext:value-type="float">
            <text:p>8344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0965740740740741" calcext:value-type="float">
            <text:p>0,00096574074074074100</text:p>
          </table:table-cell>
          <table:table-cell table:formula="of:=[.D1045]-[.D10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8" office:value-type="float" office:value="8352" calcext:value-type="float">
            <text:p>8352</text:p>
          </table:table-cell>
          <table:table-cell office:value-type="float" office:value="8640000" calcext:value-type="float">
            <text:p>8640000</text:p>
          </table:table-cell>
          <table:table-cell table:formula="of:=[.B1045]/[.C1045]" office:value-type="float" office:value="0.000966666666666667" calcext:value-type="float">
            <text:p>0,00096666666666666700</text:p>
          </table:table-cell>
          <table:table-cell table:formula="of:=[.D1046]-[.D10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8" office:value-type="float" office:value="8360" calcext:value-type="float">
            <text:p>8360</text:p>
          </table:table-cell>
          <table:table-cell office:value-type="float" office:value="8640000" calcext:value-type="float">
            <text:p>8640000</text:p>
          </table:table-cell>
          <table:table-cell table:formula="of:=[.B1046]/[.C1046]" office:value-type="float" office:value="0.000967592592592593" calcext:value-type="float">
            <text:p>0,00096759259259259300</text:p>
          </table:table-cell>
          <table:table-cell table:formula="of:=[.D1047]-[.D10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8" office:value-type="float" office:value="8368" calcext:value-type="float">
            <text:p>8368</text:p>
          </table:table-cell>
          <table:table-cell office:value-type="float" office:value="8640000" calcext:value-type="float">
            <text:p>8640000</text:p>
          </table:table-cell>
          <table:table-cell table:formula="of:=[.B1047]/[.C1047]" office:value-type="float" office:value="0.000968518518518519" calcext:value-type="float">
            <text:p>0,00096851851851851900</text:p>
          </table:table-cell>
          <table:table-cell table:formula="of:=[.D1048]-[.D10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8" office:value-type="float" office:value="8376" calcext:value-type="float">
            <text:p>8376</text:p>
          </table:table-cell>
          <table:table-cell office:value-type="float" office:value="8640000" calcext:value-type="float">
            <text:p>8640000</text:p>
          </table:table-cell>
          <table:table-cell table:formula="of:=[.B1048]/[.C1048]" office:value-type="float" office:value="0.000969444444444444" calcext:value-type="float">
            <text:p>0,00096944444444444400</text:p>
          </table:table-cell>
          <table:table-cell table:formula="of:=[.D1049]-[.D10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8" office:value-type="float" office:value="8384" calcext:value-type="float">
            <text:p>8384</text:p>
          </table:table-cell>
          <table:table-cell office:value-type="float" office:value="8640000" calcext:value-type="float">
            <text:p>8640000</text:p>
          </table:table-cell>
          <table:table-cell table:formula="of:=[.B1049]/[.C1049]" office:value-type="float" office:value="0.00097037037037037" calcext:value-type="float">
            <text:p>0,00097037037037037000</text:p>
          </table:table-cell>
          <table:table-cell table:formula="of:=[.D1050]-[.D10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8" office:value-type="float" office:value="8392" calcext:value-type="float">
            <text:p>8392</text:p>
          </table:table-cell>
          <table:table-cell office:value-type="float" office:value="8640000" calcext:value-type="float">
            <text:p>8640000</text:p>
          </table:table-cell>
          <table:table-cell table:formula="of:=[.B1050]/[.C1050]" office:value-type="float" office:value="0.000971296296296296" calcext:value-type="float">
            <text:p>0,00097129629629629600</text:p>
          </table:table-cell>
          <table:table-cell table:formula="of:=[.D1051]-[.D10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8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1051]/[.C1051]" office:value-type="float" office:value="0.000972222222222222" calcext:value-type="float">
            <text:p>0,00097222222222222200</text:p>
          </table:table-cell>
          <table:table-cell table:formula="of:=[.D1052]-[.D10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8" office:value-type="float" office:value="8408" calcext:value-type="float">
            <text:p>8408</text:p>
          </table:table-cell>
          <table:table-cell office:value-type="float" office:value="8640000" calcext:value-type="float">
            <text:p>8640000</text:p>
          </table:table-cell>
          <table:table-cell table:formula="of:=[.B1052]/[.C1052]" office:value-type="float" office:value="0.000973148148148148" calcext:value-type="float">
            <text:p>0,00097314814814814800</text:p>
          </table:table-cell>
          <table:table-cell table:formula="of:=[.D1053]-[.D10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8" office:value-type="float" office:value="8416" calcext:value-type="float">
            <text:p>8416</text:p>
          </table:table-cell>
          <table:table-cell office:value-type="float" office:value="8640000" calcext:value-type="float">
            <text:p>8640000</text:p>
          </table:table-cell>
          <table:table-cell table:formula="of:=[.B1053]/[.C1053]" office:value-type="float" office:value="0.000974074074074074" calcext:value-type="float">
            <text:p>0,00097407407407407400</text:p>
          </table:table-cell>
          <table:table-cell table:formula="of:=[.D1054]-[.D10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8" office:value-type="float" office:value="8424" calcext:value-type="float">
            <text:p>8424</text:p>
          </table:table-cell>
          <table:table-cell office:value-type="float" office:value="8640000" calcext:value-type="float">
            <text:p>8640000</text:p>
          </table:table-cell>
          <table:table-cell table:formula="of:=[.B1054]/[.C1054]" office:value-type="float" office:value="0.000975" calcext:value-type="float">
            <text:p>0,00097500000000000000</text:p>
          </table:table-cell>
          <table:table-cell table:formula="of:=[.D1055]-[.D10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8" office:value-type="float" office:value="8432" calcext:value-type="float">
            <text:p>8432</text:p>
          </table:table-cell>
          <table:table-cell office:value-type="float" office:value="8640000" calcext:value-type="float">
            <text:p>8640000</text:p>
          </table:table-cell>
          <table:table-cell table:formula="of:=[.B1055]/[.C1055]" office:value-type="float" office:value="0.000975925925925926" calcext:value-type="float">
            <text:p>0,00097592592592592600</text:p>
          </table:table-cell>
          <table:table-cell table:formula="of:=[.D1056]-[.D10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8" office:value-type="float" office:value="8440" calcext:value-type="float">
            <text:p>8440</text:p>
          </table:table-cell>
          <table:table-cell office:value-type="float" office:value="8640000" calcext:value-type="float">
            <text:p>8640000</text:p>
          </table:table-cell>
          <table:table-cell table:formula="of:=[.B1056]/[.C1056]" office:value-type="float" office:value="0.000976851851851852" calcext:value-type="float">
            <text:p>0,00097685185185185200</text:p>
          </table:table-cell>
          <table:table-cell table:formula="of:=[.D1057]-[.D10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8" office:value-type="float" office:value="8448" calcext:value-type="float">
            <text:p>8448</text:p>
          </table:table-cell>
          <table:table-cell office:value-type="float" office:value="8640000" calcext:value-type="float">
            <text:p>8640000</text:p>
          </table:table-cell>
          <table:table-cell table:formula="of:=[.B1057]/[.C1057]" office:value-type="float" office:value="0.000977777777777778" calcext:value-type="float">
            <text:p>0,00097777777777777800</text:p>
          </table:table-cell>
          <table:table-cell table:formula="of:=[.D1058]-[.D10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8" office:value-type="float" office:value="8456" calcext:value-type="float">
            <text:p>8456</text:p>
          </table:table-cell>
          <table:table-cell office:value-type="float" office:value="8640000" calcext:value-type="float">
            <text:p>8640000</text:p>
          </table:table-cell>
          <table:table-cell table:formula="of:=[.B1058]/[.C1058]" office:value-type="float" office:value="0.000978703703703704" calcext:value-type="float">
            <text:p>0,00097870370370370400</text:p>
          </table:table-cell>
          <table:table-cell table:formula="of:=[.D1059]-[.D10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8" office:value-type="float" office:value="8464" calcext:value-type="float">
            <text:p>8464</text:p>
          </table:table-cell>
          <table:table-cell office:value-type="float" office:value="8640000" calcext:value-type="float">
            <text:p>8640000</text:p>
          </table:table-cell>
          <table:table-cell table:formula="of:=[.B1059]/[.C1059]" office:value-type="float" office:value="0.00097962962962963" calcext:value-type="float">
            <text:p>0,00097962962962963000</text:p>
          </table:table-cell>
          <table:table-cell table:formula="of:=[.D1060]-[.D10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8" office:value-type="float" office:value="8472" calcext:value-type="float">
            <text:p>8472</text:p>
          </table:table-cell>
          <table:table-cell office:value-type="float" office:value="8640000" calcext:value-type="float">
            <text:p>8640000</text:p>
          </table:table-cell>
          <table:table-cell table:formula="of:=[.B1060]/[.C1060]" office:value-type="float" office:value="0.000980555555555556" calcext:value-type="float">
            <text:p>0,00098055555555555600</text:p>
          </table:table-cell>
          <table:table-cell table:formula="of:=[.D1061]-[.D10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8" office:value-type="float" office:value="8480" calcext:value-type="float">
            <text:p>8480</text:p>
          </table:table-cell>
          <table:table-cell office:value-type="float" office:value="8640000" calcext:value-type="float">
            <text:p>8640000</text:p>
          </table:table-cell>
          <table:table-cell table:formula="of:=[.B1061]/[.C1061]" office:value-type="float" office:value="0.000981481481481481" calcext:value-type="float">
            <text:p>0,00098148148148148100</text:p>
          </table:table-cell>
          <table:table-cell table:formula="of:=[.D1062]-[.D10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8" office:value-type="float" office:value="8488" calcext:value-type="float">
            <text:p>8488</text:p>
          </table:table-cell>
          <table:table-cell office:value-type="float" office:value="8640000" calcext:value-type="float">
            <text:p>8640000</text:p>
          </table:table-cell>
          <table:table-cell table:formula="of:=[.B1062]/[.C1062]" office:value-type="float" office:value="0.000982407407407407" calcext:value-type="float">
            <text:p>0,00098240740740740700</text:p>
          </table:table-cell>
          <table:table-cell table:formula="of:=[.D1063]-[.D10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8" office:value-type="float" office:value="8496" calcext:value-type="float">
            <text:p>8496</text:p>
          </table:table-cell>
          <table:table-cell office:value-type="float" office:value="8640000" calcext:value-type="float">
            <text:p>8640000</text:p>
          </table:table-cell>
          <table:table-cell table:formula="of:=[.B1063]/[.C1063]" office:value-type="float" office:value="0.000983333333333333" calcext:value-type="float">
            <text:p>0,00098333333333333300</text:p>
          </table:table-cell>
          <table:table-cell table:formula="of:=[.D1064]-[.D10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8" office:value-type="float" office:value="8504" calcext:value-type="float">
            <text:p>8504</text:p>
          </table:table-cell>
          <table:table-cell office:value-type="float" office:value="8640000" calcext:value-type="float">
            <text:p>8640000</text:p>
          </table:table-cell>
          <table:table-cell table:formula="of:=[.B1064]/[.C1064]" office:value-type="float" office:value="0.000984259259259259" calcext:value-type="float">
            <text:p>0,00098425925925925900</text:p>
          </table:table-cell>
          <table:table-cell table:formula="of:=[.D1065]-[.D10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8" office:value-type="float" office:value="8512" calcext:value-type="float">
            <text:p>8512</text:p>
          </table:table-cell>
          <table:table-cell office:value-type="float" office:value="8640000" calcext:value-type="float">
            <text:p>8640000</text:p>
          </table:table-cell>
          <table:table-cell table:formula="of:=[.B1065]/[.C1065]" office:value-type="float" office:value="0.000985185185185185" calcext:value-type="float">
            <text:p>0,00098518518518518500</text:p>
          </table:table-cell>
          <table:table-cell table:formula="of:=[.D1066]-[.D1065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8" office:value-type="float" office:value="8520" calcext:value-type="float">
            <text:p>8520</text:p>
          </table:table-cell>
          <table:table-cell office:value-type="float" office:value="8640000" calcext:value-type="float">
            <text:p>8640000</text:p>
          </table:table-cell>
          <table:table-cell table:formula="of:=[.B1066]/[.C1066]" office:value-type="float" office:value="0.000986111111111111" calcext:value-type="float">
            <text:p>0,00098611111111111100</text:p>
          </table:table-cell>
          <table:table-cell table:formula="of:=[.D1067]-[.D10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8" office:value-type="float" office:value="8528" calcext:value-type="float">
            <text:p>8528</text:p>
          </table:table-cell>
          <table:table-cell office:value-type="float" office:value="8640000" calcext:value-type="float">
            <text:p>8640000</text:p>
          </table:table-cell>
          <table:table-cell table:formula="of:=[.B1067]/[.C1067]" office:value-type="float" office:value="0.000987037037037037" calcext:value-type="float">
            <text:p>0,00098703703703703700</text:p>
          </table:table-cell>
          <table:table-cell table:formula="of:=[.D1068]-[.D10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8" office:value-type="float" office:value="8536" calcext:value-type="float">
            <text:p>8536</text:p>
          </table:table-cell>
          <table:table-cell office:value-type="float" office:value="8640000" calcext:value-type="float">
            <text:p>8640000</text:p>
          </table:table-cell>
          <table:table-cell table:formula="of:=[.B1068]/[.C1068]" office:value-type="float" office:value="0.000987962962962963" calcext:value-type="float">
            <text:p>0,00098796296296296300</text:p>
          </table:table-cell>
          <table:table-cell table:formula="of:=[.D1069]-[.D10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8" office:value-type="float" office:value="8544" calcext:value-type="float">
            <text:p>8544</text:p>
          </table:table-cell>
          <table:table-cell office:value-type="float" office:value="8640000" calcext:value-type="float">
            <text:p>8640000</text:p>
          </table:table-cell>
          <table:table-cell table:formula="of:=[.B1069]/[.C1069]" office:value-type="float" office:value="0.000988888888888889" calcext:value-type="float">
            <text:p>0,00098888888888888900</text:p>
          </table:table-cell>
          <table:table-cell table:formula="of:=[.D1070]-[.D10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8" office:value-type="float" office:value="8552" calcext:value-type="float">
            <text:p>8552</text:p>
          </table:table-cell>
          <table:table-cell office:value-type="float" office:value="8640000" calcext:value-type="float">
            <text:p>8640000</text:p>
          </table:table-cell>
          <table:table-cell table:formula="of:=[.B1070]/[.C1070]" office:value-type="float" office:value="0.000989814814814815" calcext:value-type="float">
            <text:p>0,00098981481481481500</text:p>
          </table:table-cell>
          <table:table-cell table:formula="of:=[.D1071]-[.D10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8" office:value-type="float" office:value="8560" calcext:value-type="float">
            <text:p>8560</text:p>
          </table:table-cell>
          <table:table-cell office:value-type="float" office:value="8640000" calcext:value-type="float">
            <text:p>8640000</text:p>
          </table:table-cell>
          <table:table-cell table:formula="of:=[.B1071]/[.C1071]" office:value-type="float" office:value="0.000990740740740741" calcext:value-type="float">
            <text:p>0,00099074074074074100</text:p>
          </table:table-cell>
          <table:table-cell table:formula="of:=[.D1072]-[.D10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8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1072]/[.C1072]" office:value-type="float" office:value="0.000991666666666667" calcext:value-type="float">
            <text:p>0,00099166666666666700</text:p>
          </table:table-cell>
          <table:table-cell table:formula="of:=[.D1073]-[.D10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8" office:value-type="float" office:value="8576" calcext:value-type="float">
            <text:p>8576</text:p>
          </table:table-cell>
          <table:table-cell office:value-type="float" office:value="8640000" calcext:value-type="float">
            <text:p>8640000</text:p>
          </table:table-cell>
          <table:table-cell table:formula="of:=[.B1073]/[.C1073]" office:value-type="float" office:value="0.000992592592592593" calcext:value-type="float">
            <text:p>0,00099259259259259300</text:p>
          </table:table-cell>
          <table:table-cell table:formula="of:=[.D1074]-[.D10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8" office:value-type="float" office:value="8584" calcext:value-type="float">
            <text:p>8584</text:p>
          </table:table-cell>
          <table:table-cell office:value-type="float" office:value="8640000" calcext:value-type="float">
            <text:p>8640000</text:p>
          </table:table-cell>
          <table:table-cell table:formula="of:=[.B1074]/[.C1074]" office:value-type="float" office:value="0.000993518518518519" calcext:value-type="float">
            <text:p>0,00099351851851851900</text:p>
          </table:table-cell>
          <table:table-cell table:formula="of:=[.D1075]-[.D10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8" office:value-type="float" office:value="8592" calcext:value-type="float">
            <text:p>8592</text:p>
          </table:table-cell>
          <table:table-cell office:value-type="float" office:value="8640000" calcext:value-type="float">
            <text:p>8640000</text:p>
          </table:table-cell>
          <table:table-cell table:formula="of:=[.B1075]/[.C1075]" office:value-type="float" office:value="0.000994444444444445" calcext:value-type="float">
            <text:p>0,00099444444444444500</text:p>
          </table:table-cell>
          <table:table-cell table:formula="of:=[.D1076]-[.D10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8" office:value-type="float" office:value="8600" calcext:value-type="float">
            <text:p>8600</text:p>
          </table:table-cell>
          <table:table-cell office:value-type="float" office:value="8640000" calcext:value-type="float">
            <text:p>8640000</text:p>
          </table:table-cell>
          <table:table-cell table:formula="of:=[.B1076]/[.C1076]" office:value-type="float" office:value="0.00099537037037037" calcext:value-type="float">
            <text:p>0,00099537037037037000</text:p>
          </table:table-cell>
          <table:table-cell table:formula="of:=[.D1077]-[.D10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8" office:value-type="float" office:value="8608" calcext:value-type="float">
            <text:p>8608</text:p>
          </table:table-cell>
          <table:table-cell office:value-type="float" office:value="8640000" calcext:value-type="float">
            <text:p>8640000</text:p>
          </table:table-cell>
          <table:table-cell table:formula="of:=[.B1077]/[.C1077]" office:value-type="float" office:value="0.000996296296296296" calcext:value-type="float">
            <text:p>0,00099629629629629600</text:p>
          </table:table-cell>
          <table:table-cell table:formula="of:=[.D1078]-[.D10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8" office:value-type="float" office:value="8616" calcext:value-type="float">
            <text:p>8616</text:p>
          </table:table-cell>
          <table:table-cell office:value-type="float" office:value="8640000" calcext:value-type="float">
            <text:p>8640000</text:p>
          </table:table-cell>
          <table:table-cell table:formula="of:=[.B1078]/[.C1078]" office:value-type="float" office:value="0.000997222222222222" calcext:value-type="float">
            <text:p>0,00099722222222222200</text:p>
          </table:table-cell>
          <table:table-cell table:formula="of:=[.D1079]-[.D10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8" office:value-type="float" office:value="8624" calcext:value-type="float">
            <text:p>8624</text:p>
          </table:table-cell>
          <table:table-cell office:value-type="float" office:value="8640000" calcext:value-type="float">
            <text:p>8640000</text:p>
          </table:table-cell>
          <table:table-cell table:formula="of:=[.B1079]/[.C1079]" office:value-type="float" office:value="0.000998148148148148" calcext:value-type="float">
            <text:p>0,00099814814814814800</text:p>
          </table:table-cell>
          <table:table-cell table:formula="of:=[.D1080]-[.D10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8" office:value-type="float" office:value="8632" calcext:value-type="float">
            <text:p>8632</text:p>
          </table:table-cell>
          <table:table-cell office:value-type="float" office:value="8640000" calcext:value-type="float">
            <text:p>8640000</text:p>
          </table:table-cell>
          <table:table-cell table:formula="of:=[.B1080]/[.C1080]" office:value-type="float" office:value="0.000999074074074074" calcext:value-type="float">
            <text:p>0,00099907407407407400</text:p>
          </table:table-cell>
          <table:table-cell table:formula="of:=[.D1081]-[.D10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8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1081]/[.C1081]" office:value-type="float" office:value="0.001" calcext:value-type="float">
            <text:p>0,00100000000000000000</text:p>
          </table:table-cell>
          <table:table-cell table:formula="of:=[.D1082]-[.D10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8" office:value-type="float" office:value="8648" calcext:value-type="float">
            <text:p>8648</text:p>
          </table:table-cell>
          <table:table-cell office:value-type="float" office:value="8640000" calcext:value-type="float">
            <text:p>8640000</text:p>
          </table:table-cell>
          <table:table-cell table:formula="of:=[.B1082]/[.C1082]" office:value-type="float" office:value="0.00100092592592593" calcext:value-type="float">
            <text:p>0,00100092592592593000</text:p>
          </table:table-cell>
          <table:table-cell table:formula="of:=[.D1083]-[.D10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8" office:value-type="float" office:value="8656" calcext:value-type="float">
            <text:p>8656</text:p>
          </table:table-cell>
          <table:table-cell office:value-type="float" office:value="8640000" calcext:value-type="float">
            <text:p>8640000</text:p>
          </table:table-cell>
          <table:table-cell table:formula="of:=[.B1083]/[.C1083]" office:value-type="float" office:value="0.00100185185185185" calcext:value-type="float">
            <text:p>0,00100185185185185000</text:p>
          </table:table-cell>
          <table:table-cell table:formula="of:=[.D1084]-[.D10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8" office:value-type="float" office:value="8664" calcext:value-type="float">
            <text:p>8664</text:p>
          </table:table-cell>
          <table:table-cell office:value-type="float" office:value="8640000" calcext:value-type="float">
            <text:p>8640000</text:p>
          </table:table-cell>
          <table:table-cell table:formula="of:=[.B1084]/[.C1084]" office:value-type="float" office:value="0.00100277777777778" calcext:value-type="float">
            <text:p>0,00100277777777778000</text:p>
          </table:table-cell>
          <table:table-cell table:formula="of:=[.D1085]-[.D10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8" office:value-type="float" office:value="8672" calcext:value-type="float">
            <text:p>8672</text:p>
          </table:table-cell>
          <table:table-cell office:value-type="float" office:value="8640000" calcext:value-type="float">
            <text:p>8640000</text:p>
          </table:table-cell>
          <table:table-cell table:formula="of:=[.B1085]/[.C1085]" office:value-type="float" office:value="0.0010037037037037" calcext:value-type="float">
            <text:p>0,00100370370370370000</text:p>
          </table:table-cell>
          <table:table-cell table:formula="of:=[.D1086]-[.D10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8" office:value-type="float" office:value="8680" calcext:value-type="float">
            <text:p>8680</text:p>
          </table:table-cell>
          <table:table-cell office:value-type="float" office:value="8640000" calcext:value-type="float">
            <text:p>8640000</text:p>
          </table:table-cell>
          <table:table-cell table:formula="of:=[.B1086]/[.C1086]" office:value-type="float" office:value="0.00100462962962963" calcext:value-type="float">
            <text:p>0,00100462962962963000</text:p>
          </table:table-cell>
          <table:table-cell table:formula="of:=[.D1087]-[.D10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8" office:value-type="float" office:value="8688" calcext:value-type="float">
            <text:p>8688</text:p>
          </table:table-cell>
          <table:table-cell office:value-type="float" office:value="8640000" calcext:value-type="float">
            <text:p>8640000</text:p>
          </table:table-cell>
          <table:table-cell table:formula="of:=[.B1087]/[.C1087]" office:value-type="float" office:value="0.00100555555555556" calcext:value-type="float">
            <text:p>0,00100555555555556000</text:p>
          </table:table-cell>
          <table:table-cell table:formula="of:=[.D1088]-[.D10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8" office:value-type="float" office:value="8696" calcext:value-type="float">
            <text:p>8696</text:p>
          </table:table-cell>
          <table:table-cell office:value-type="float" office:value="8640000" calcext:value-type="float">
            <text:p>8640000</text:p>
          </table:table-cell>
          <table:table-cell table:formula="of:=[.B1088]/[.C1088]" office:value-type="float" office:value="0.00100648148148148" calcext:value-type="float">
            <text:p>0,00100648148148148000</text:p>
          </table:table-cell>
          <table:table-cell table:formula="of:=[.D1089]-[.D10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8" office:value-type="float" office:value="8704" calcext:value-type="float">
            <text:p>8704</text:p>
          </table:table-cell>
          <table:table-cell office:value-type="float" office:value="8640000" calcext:value-type="float">
            <text:p>8640000</text:p>
          </table:table-cell>
          <table:table-cell table:formula="of:=[.B1089]/[.C1089]" office:value-type="float" office:value="0.00100740740740741" calcext:value-type="float">
            <text:p>0,00100740740740741000</text:p>
          </table:table-cell>
          <table:table-cell table:formula="of:=[.D1090]-[.D10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8" office:value-type="float" office:value="8712" calcext:value-type="float">
            <text:p>8712</text:p>
          </table:table-cell>
          <table:table-cell office:value-type="float" office:value="8640000" calcext:value-type="float">
            <text:p>8640000</text:p>
          </table:table-cell>
          <table:table-cell table:formula="of:=[.B1090]/[.C1090]" office:value-type="float" office:value="0.00100833333333333" calcext:value-type="float">
            <text:p>0,00100833333333333000</text:p>
          </table:table-cell>
          <table:table-cell table:formula="of:=[.D1091]-[.D10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8" office:value-type="float" office:value="8720" calcext:value-type="float">
            <text:p>8720</text:p>
          </table:table-cell>
          <table:table-cell office:value-type="float" office:value="8640000" calcext:value-type="float">
            <text:p>8640000</text:p>
          </table:table-cell>
          <table:table-cell table:formula="of:=[.B1091]/[.C1091]" office:value-type="float" office:value="0.00100925925925926" calcext:value-type="float">
            <text:p>0,00100925925925926000</text:p>
          </table:table-cell>
          <table:table-cell table:formula="of:=[.D1092]-[.D10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1]+8" office:value-type="float" office:value="8728" calcext:value-type="float">
            <text:p>8728</text:p>
          </table:table-cell>
          <table:table-cell office:value-type="float" office:value="8640000" calcext:value-type="float">
            <text:p>8640000</text:p>
          </table:table-cell>
          <table:table-cell table:formula="of:=[.B1092]/[.C1092]" office:value-type="float" office:value="0.00101018518518519" calcext:value-type="float">
            <text:p>0,00101018518518519000</text:p>
          </table:table-cell>
          <table:table-cell table:formula="of:=[.D1093]-[.D10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092]+8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1093]/[.C1093]" office:value-type="float" office:value="0.00101111111111111" calcext:value-type="float">
            <text:p>0,00101111111111111000</text:p>
          </table:table-cell>
          <table:table-cell table:formula="of:=[.D1094]-[.D10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1093]+8" office:value-type="float" office:value="8744" calcext:value-type="float">
            <text:p>8744</text:p>
          </table:table-cell>
          <table:table-cell office:value-type="float" office:value="8640000" calcext:value-type="float">
            <text:p>8640000</text:p>
          </table:table-cell>
          <table:table-cell table:formula="of:=[.B1094]/[.C1094]" office:value-type="float" office:value="0.00101203703703704" calcext:value-type="float">
            <text:p>0,00101203703703704000</text:p>
          </table:table-cell>
          <table:table-cell table:formula="of:=[.D1095]-[.D10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1094]+8" office:value-type="float" office:value="8752" calcext:value-type="float">
            <text:p>8752</text:p>
          </table:table-cell>
          <table:table-cell office:value-type="float" office:value="8640000" calcext:value-type="float">
            <text:p>8640000</text:p>
          </table:table-cell>
          <table:table-cell table:formula="of:=[.B1095]/[.C1095]" office:value-type="float" office:value="0.00101296296296296" calcext:value-type="float">
            <text:p>0,00101296296296296000</text:p>
          </table:table-cell>
          <table:table-cell table:formula="of:=[.D1096]-[.D10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095]+8" office:value-type="float" office:value="8760" calcext:value-type="float">
            <text:p>8760</text:p>
          </table:table-cell>
          <table:table-cell office:value-type="float" office:value="8640000" calcext:value-type="float">
            <text:p>8640000</text:p>
          </table:table-cell>
          <table:table-cell table:formula="of:=[.B1096]/[.C1096]" office:value-type="float" office:value="0.00101388888888889" calcext:value-type="float">
            <text:p>0,00101388888888889000</text:p>
          </table:table-cell>
          <table:table-cell table:formula="of:=[.D1097]-[.D10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1096]+8" office:value-type="float" office:value="8768" calcext:value-type="float">
            <text:p>8768</text:p>
          </table:table-cell>
          <table:table-cell office:value-type="float" office:value="8640000" calcext:value-type="float">
            <text:p>8640000</text:p>
          </table:table-cell>
          <table:table-cell table:formula="of:=[.B1097]/[.C1097]" office:value-type="float" office:value="0.00101481481481481" calcext:value-type="float">
            <text:p>0,00101481481481481000</text:p>
          </table:table-cell>
          <table:table-cell table:formula="of:=[.D1098]-[.D10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1097]+8" office:value-type="float" office:value="8776" calcext:value-type="float">
            <text:p>8776</text:p>
          </table:table-cell>
          <table:table-cell office:value-type="float" office:value="8640000" calcext:value-type="float">
            <text:p>8640000</text:p>
          </table:table-cell>
          <table:table-cell table:formula="of:=[.B1098]/[.C1098]" office:value-type="float" office:value="0.00101574074074074" calcext:value-type="float">
            <text:p>0,00101574074074074000</text:p>
          </table:table-cell>
          <table:table-cell table:formula="of:=[.D1099]-[.D10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1098]+8" office:value-type="float" office:value="8784" calcext:value-type="float">
            <text:p>8784</text:p>
          </table:table-cell>
          <table:table-cell office:value-type="float" office:value="8640000" calcext:value-type="float">
            <text:p>8640000</text:p>
          </table:table-cell>
          <table:table-cell table:formula="of:=[.B1099]/[.C1099]" office:value-type="float" office:value="0.00101666666666667" calcext:value-type="float">
            <text:p>0,00101666666666667000</text:p>
          </table:table-cell>
          <table:table-cell table:formula="of:=[.D1100]-[.D10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099]+8" office:value-type="float" office:value="8792" calcext:value-type="float">
            <text:p>8792</text:p>
          </table:table-cell>
          <table:table-cell office:value-type="float" office:value="8640000" calcext:value-type="float">
            <text:p>8640000</text:p>
          </table:table-cell>
          <table:table-cell table:formula="of:=[.B1100]/[.C1100]" office:value-type="float" office:value="0.00101759259259259" calcext:value-type="float">
            <text:p>0,00101759259259259000</text:p>
          </table:table-cell>
          <table:table-cell table:formula="of:=[.D1101]-[.D11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1100]+8" office:value-type="float" office:value="8800" calcext:value-type="float">
            <text:p>8800</text:p>
          </table:table-cell>
          <table:table-cell office:value-type="float" office:value="8640000" calcext:value-type="float">
            <text:p>8640000</text:p>
          </table:table-cell>
          <table:table-cell table:formula="of:=[.B1101]/[.C1101]" office:value-type="float" office:value="0.00101851851851852" calcext:value-type="float">
            <text:p>0,00101851851851852000</text:p>
          </table:table-cell>
          <table:table-cell table:formula="of:=[.D1102]-[.D11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101]+8" office:value-type="float" office:value="8808" calcext:value-type="float">
            <text:p>8808</text:p>
          </table:table-cell>
          <table:table-cell office:value-type="float" office:value="8640000" calcext:value-type="float">
            <text:p>8640000</text:p>
          </table:table-cell>
          <table:table-cell table:formula="of:=[.B1102]/[.C1102]" office:value-type="float" office:value="0.00101944444444444" calcext:value-type="float">
            <text:p>0,00101944444444444000</text:p>
          </table:table-cell>
          <table:table-cell table:formula="of:=[.D1103]-[.D11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1102]+8" office:value-type="float" office:value="8816" calcext:value-type="float">
            <text:p>8816</text:p>
          </table:table-cell>
          <table:table-cell office:value-type="float" office:value="8640000" calcext:value-type="float">
            <text:p>8640000</text:p>
          </table:table-cell>
          <table:table-cell table:formula="of:=[.B1103]/[.C1103]" office:value-type="float" office:value="0.00102037037037037" calcext:value-type="float">
            <text:p>0,00102037037037037000</text:p>
          </table:table-cell>
          <table:table-cell table:formula="of:=[.D1104]-[.D11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1103]+8" office:value-type="float" office:value="8824" calcext:value-type="float">
            <text:p>8824</text:p>
          </table:table-cell>
          <table:table-cell office:value-type="float" office:value="8640000" calcext:value-type="float">
            <text:p>8640000</text:p>
          </table:table-cell>
          <table:table-cell table:formula="of:=[.B1104]/[.C1104]" office:value-type="float" office:value="0.0010212962962963" calcext:value-type="float">
            <text:p>0,00102129629629630000</text:p>
          </table:table-cell>
          <table:table-cell table:formula="of:=[.D1105]-[.D1104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1104]+8" office:value-type="float" office:value="8832" calcext:value-type="float">
            <text:p>8832</text:p>
          </table:table-cell>
          <table:table-cell office:value-type="float" office:value="8640000" calcext:value-type="float">
            <text:p>8640000</text:p>
          </table:table-cell>
          <table:table-cell table:formula="of:=[.B1105]/[.C1105]" office:value-type="float" office:value="0.00102222222222222" calcext:value-type="float">
            <text:p>0,00102222222222222000</text:p>
          </table:table-cell>
          <table:table-cell table:formula="of:=[.D1106]-[.D11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1105]+8" office:value-type="float" office:value="8840" calcext:value-type="float">
            <text:p>8840</text:p>
          </table:table-cell>
          <table:table-cell office:value-type="float" office:value="8640000" calcext:value-type="float">
            <text:p>8640000</text:p>
          </table:table-cell>
          <table:table-cell table:formula="of:=[.B1106]/[.C1106]" office:value-type="float" office:value="0.00102314814814815" calcext:value-type="float">
            <text:p>0,00102314814814815000</text:p>
          </table:table-cell>
          <table:table-cell table:formula="of:=[.D1107]-[.D11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1106]+8" office:value-type="float" office:value="8848" calcext:value-type="float">
            <text:p>8848</text:p>
          </table:table-cell>
          <table:table-cell office:value-type="float" office:value="8640000" calcext:value-type="float">
            <text:p>8640000</text:p>
          </table:table-cell>
          <table:table-cell table:formula="of:=[.B1107]/[.C1107]" office:value-type="float" office:value="0.00102407407407407" calcext:value-type="float">
            <text:p>0,00102407407407407000</text:p>
          </table:table-cell>
          <table:table-cell table:formula="of:=[.D1108]-[.D11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1107]+8" office:value-type="float" office:value="8856" calcext:value-type="float">
            <text:p>8856</text:p>
          </table:table-cell>
          <table:table-cell office:value-type="float" office:value="8640000" calcext:value-type="float">
            <text:p>8640000</text:p>
          </table:table-cell>
          <table:table-cell table:formula="of:=[.B1108]/[.C1108]" office:value-type="float" office:value="0.001025" calcext:value-type="float">
            <text:p>0,00102500000000000000</text:p>
          </table:table-cell>
          <table:table-cell table:formula="of:=[.D1109]-[.D11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1108]+8" office:value-type="float" office:value="8864" calcext:value-type="float">
            <text:p>8864</text:p>
          </table:table-cell>
          <table:table-cell office:value-type="float" office:value="8640000" calcext:value-type="float">
            <text:p>8640000</text:p>
          </table:table-cell>
          <table:table-cell table:formula="of:=[.B1109]/[.C1109]" office:value-type="float" office:value="0.00102592592592593" calcext:value-type="float">
            <text:p>0,00102592592592593000</text:p>
          </table:table-cell>
          <table:table-cell table:formula="of:=[.D1110]-[.D11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1109]+8" office:value-type="float" office:value="8872" calcext:value-type="float">
            <text:p>8872</text:p>
          </table:table-cell>
          <table:table-cell office:value-type="float" office:value="8640000" calcext:value-type="float">
            <text:p>8640000</text:p>
          </table:table-cell>
          <table:table-cell table:formula="of:=[.B1110]/[.C1110]" office:value-type="float" office:value="0.00102685185185185" calcext:value-type="float">
            <text:p>0,00102685185185185000</text:p>
          </table:table-cell>
          <table:table-cell table:formula="of:=[.D1111]-[.D11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1110]+8" office:value-type="float" office:value="8880" calcext:value-type="float">
            <text:p>8880</text:p>
          </table:table-cell>
          <table:table-cell office:value-type="float" office:value="8640000" calcext:value-type="float">
            <text:p>8640000</text:p>
          </table:table-cell>
          <table:table-cell table:formula="of:=[.B1111]/[.C1111]" office:value-type="float" office:value="0.00102777777777778" calcext:value-type="float">
            <text:p>0,00102777777777778000</text:p>
          </table:table-cell>
          <table:table-cell table:formula="of:=[.D1112]-[.D11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1111]+8" office:value-type="float" office:value="8888" calcext:value-type="float">
            <text:p>8888</text:p>
          </table:table-cell>
          <table:table-cell office:value-type="float" office:value="8640000" calcext:value-type="float">
            <text:p>8640000</text:p>
          </table:table-cell>
          <table:table-cell table:formula="of:=[.B1112]/[.C1112]" office:value-type="float" office:value="0.0010287037037037" calcext:value-type="float">
            <text:p>0,00102870370370370000</text:p>
          </table:table-cell>
          <table:table-cell table:formula="of:=[.D1113]-[.D11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1112]+8" office:value-type="float" office:value="8896" calcext:value-type="float">
            <text:p>8896</text:p>
          </table:table-cell>
          <table:table-cell office:value-type="float" office:value="8640000" calcext:value-type="float">
            <text:p>8640000</text:p>
          </table:table-cell>
          <table:table-cell table:formula="of:=[.B1113]/[.C1113]" office:value-type="float" office:value="0.00102962962962963" calcext:value-type="float">
            <text:p>0,00102962962962963000</text:p>
          </table:table-cell>
          <table:table-cell table:formula="of:=[.D1114]-[.D11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1113]+8" office:value-type="float" office:value="8904" calcext:value-type="float">
            <text:p>8904</text:p>
          </table:table-cell>
          <table:table-cell office:value-type="float" office:value="8640000" calcext:value-type="float">
            <text:p>8640000</text:p>
          </table:table-cell>
          <table:table-cell table:formula="of:=[.B1114]/[.C1114]" office:value-type="float" office:value="0.00103055555555556" calcext:value-type="float">
            <text:p>0,00103055555555556000</text:p>
          </table:table-cell>
          <table:table-cell table:formula="of:=[.D1115]-[.D11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1114]+8" office:value-type="float" office:value="8912" calcext:value-type="float">
            <text:p>8912</text:p>
          </table:table-cell>
          <table:table-cell office:value-type="float" office:value="8640000" calcext:value-type="float">
            <text:p>8640000</text:p>
          </table:table-cell>
          <table:table-cell table:formula="of:=[.B1115]/[.C1115]" office:value-type="float" office:value="0.00103148148148148" calcext:value-type="float">
            <text:p>0,00103148148148148000</text:p>
          </table:table-cell>
          <table:table-cell table:formula="of:=[.D1116]-[.D11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1115]+8" office:value-type="float" office:value="8920" calcext:value-type="float">
            <text:p>8920</text:p>
          </table:table-cell>
          <table:table-cell office:value-type="float" office:value="8640000" calcext:value-type="float">
            <text:p>8640000</text:p>
          </table:table-cell>
          <table:table-cell table:formula="of:=[.B1116]/[.C1116]" office:value-type="float" office:value="0.00103240740740741" calcext:value-type="float">
            <text:p>0,00103240740740741000</text:p>
          </table:table-cell>
          <table:table-cell table:formula="of:=[.D1117]-[.D11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1116]+8" office:value-type="float" office:value="8928" calcext:value-type="float">
            <text:p>8928</text:p>
          </table:table-cell>
          <table:table-cell office:value-type="float" office:value="8640000" calcext:value-type="float">
            <text:p>8640000</text:p>
          </table:table-cell>
          <table:table-cell table:formula="of:=[.B1117]/[.C1117]" office:value-type="float" office:value="0.00103333333333333" calcext:value-type="float">
            <text:p>0,00103333333333333000</text:p>
          </table:table-cell>
          <table:table-cell table:formula="of:=[.D1118]-[.D11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1117]+8" office:value-type="float" office:value="8936" calcext:value-type="float">
            <text:p>8936</text:p>
          </table:table-cell>
          <table:table-cell office:value-type="float" office:value="8640000" calcext:value-type="float">
            <text:p>8640000</text:p>
          </table:table-cell>
          <table:table-cell table:formula="of:=[.B1118]/[.C1118]" office:value-type="float" office:value="0.00103425925925926" calcext:value-type="float">
            <text:p>0,00103425925925926000</text:p>
          </table:table-cell>
          <table:table-cell table:formula="of:=[.D1119]-[.D11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1118]+8" office:value-type="float" office:value="8944" calcext:value-type="float">
            <text:p>8944</text:p>
          </table:table-cell>
          <table:table-cell office:value-type="float" office:value="8640000" calcext:value-type="float">
            <text:p>8640000</text:p>
          </table:table-cell>
          <table:table-cell table:formula="of:=[.B1119]/[.C1119]" office:value-type="float" office:value="0.00103518518518519" calcext:value-type="float">
            <text:p>0,00103518518518519000</text:p>
          </table:table-cell>
          <table:table-cell table:formula="of:=[.D1120]-[.D11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1119]+8" office:value-type="float" office:value="8952" calcext:value-type="float">
            <text:p>8952</text:p>
          </table:table-cell>
          <table:table-cell office:value-type="float" office:value="8640000" calcext:value-type="float">
            <text:p>8640000</text:p>
          </table:table-cell>
          <table:table-cell table:formula="of:=[.B1120]/[.C1120]" office:value-type="float" office:value="0.00103611111111111" calcext:value-type="float">
            <text:p>0,00103611111111111000</text:p>
          </table:table-cell>
          <table:table-cell table:formula="of:=[.D1121]-[.D11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1120]+8" office:value-type="float" office:value="8960" calcext:value-type="float">
            <text:p>8960</text:p>
          </table:table-cell>
          <table:table-cell office:value-type="float" office:value="8640000" calcext:value-type="float">
            <text:p>8640000</text:p>
          </table:table-cell>
          <table:table-cell table:formula="of:=[.B1121]/[.C1121]" office:value-type="float" office:value="0.00103703703703704" calcext:value-type="float">
            <text:p>0,00103703703703704000</text:p>
          </table:table-cell>
          <table:table-cell table:formula="of:=[.D1122]-[.D11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1121]+8" office:value-type="float" office:value="8968" calcext:value-type="float">
            <text:p>8968</text:p>
          </table:table-cell>
          <table:table-cell office:value-type="float" office:value="8640000" calcext:value-type="float">
            <text:p>8640000</text:p>
          </table:table-cell>
          <table:table-cell table:formula="of:=[.B1122]/[.C1122]" office:value-type="float" office:value="0.00103796296296296" calcext:value-type="float">
            <text:p>0,00103796296296296000</text:p>
          </table:table-cell>
          <table:table-cell table:formula="of:=[.D1123]-[.D11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1122]+8" office:value-type="float" office:value="8976" calcext:value-type="float">
            <text:p>8976</text:p>
          </table:table-cell>
          <table:table-cell office:value-type="float" office:value="8640000" calcext:value-type="float">
            <text:p>8640000</text:p>
          </table:table-cell>
          <table:table-cell table:formula="of:=[.B1123]/[.C1123]" office:value-type="float" office:value="0.00103888888888889" calcext:value-type="float">
            <text:p>0,00103888888888889000</text:p>
          </table:table-cell>
          <table:table-cell table:formula="of:=[.D1124]-[.D11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1123]+8" office:value-type="float" office:value="8984" calcext:value-type="float">
            <text:p>8984</text:p>
          </table:table-cell>
          <table:table-cell office:value-type="float" office:value="8640000" calcext:value-type="float">
            <text:p>8640000</text:p>
          </table:table-cell>
          <table:table-cell table:formula="of:=[.B1124]/[.C1124]" office:value-type="float" office:value="0.00103981481481481" calcext:value-type="float">
            <text:p>0,00103981481481481000</text:p>
          </table:table-cell>
          <table:table-cell table:formula="of:=[.D1125]-[.D11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1124]+8" office:value-type="float" office:value="8992" calcext:value-type="float">
            <text:p>8992</text:p>
          </table:table-cell>
          <table:table-cell office:value-type="float" office:value="8640000" calcext:value-type="float">
            <text:p>8640000</text:p>
          </table:table-cell>
          <table:table-cell table:formula="of:=[.B1125]/[.C1125]" office:value-type="float" office:value="0.00104074074074074" calcext:value-type="float">
            <text:p>0,00104074074074074000</text:p>
          </table:table-cell>
          <table:table-cell table:formula="of:=[.D1126]-[.D11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1125]+8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1126]/[.C1126]" office:value-type="float" office:value="0.00104166666666667" calcext:value-type="float">
            <text:p>0,00104166666666667000</text:p>
          </table:table-cell>
          <table:table-cell table:formula="of:=[.D1127]-[.D11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1126]+8" office:value-type="float" office:value="9008" calcext:value-type="float">
            <text:p>9008</text:p>
          </table:table-cell>
          <table:table-cell office:value-type="float" office:value="8640000" calcext:value-type="float">
            <text:p>8640000</text:p>
          </table:table-cell>
          <table:table-cell table:formula="of:=[.B1127]/[.C1127]" office:value-type="float" office:value="0.00104259259259259" calcext:value-type="float">
            <text:p>0,00104259259259259000</text:p>
          </table:table-cell>
          <table:table-cell table:formula="of:=[.D1128]-[.D11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1127]+8" office:value-type="float" office:value="9016" calcext:value-type="float">
            <text:p>9016</text:p>
          </table:table-cell>
          <table:table-cell office:value-type="float" office:value="8640000" calcext:value-type="float">
            <text:p>8640000</text:p>
          </table:table-cell>
          <table:table-cell table:formula="of:=[.B1128]/[.C1128]" office:value-type="float" office:value="0.00104351851851852" calcext:value-type="float">
            <text:p>0,00104351851851852000</text:p>
          </table:table-cell>
          <table:table-cell table:formula="of:=[.D1129]-[.D11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1128]+8" office:value-type="float" office:value="9024" calcext:value-type="float">
            <text:p>9024</text:p>
          </table:table-cell>
          <table:table-cell office:value-type="float" office:value="8640000" calcext:value-type="float">
            <text:p>8640000</text:p>
          </table:table-cell>
          <table:table-cell table:formula="of:=[.B1129]/[.C1129]" office:value-type="float" office:value="0.00104444444444444" calcext:value-type="float">
            <text:p>0,00104444444444444000</text:p>
          </table:table-cell>
          <table:table-cell table:formula="of:=[.D1130]-[.D11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1129]+8" office:value-type="float" office:value="9032" calcext:value-type="float">
            <text:p>9032</text:p>
          </table:table-cell>
          <table:table-cell office:value-type="float" office:value="8640000" calcext:value-type="float">
            <text:p>8640000</text:p>
          </table:table-cell>
          <table:table-cell table:formula="of:=[.B1130]/[.C1130]" office:value-type="float" office:value="0.00104537037037037" calcext:value-type="float">
            <text:p>0,00104537037037037000</text:p>
          </table:table-cell>
          <table:table-cell table:formula="of:=[.D1131]-[.D11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1130]+8" office:value-type="float" office:value="9040" calcext:value-type="float">
            <text:p>9040</text:p>
          </table:table-cell>
          <table:table-cell office:value-type="float" office:value="8640000" calcext:value-type="float">
            <text:p>8640000</text:p>
          </table:table-cell>
          <table:table-cell table:formula="of:=[.B1131]/[.C1131]" office:value-type="float" office:value="0.0010462962962963" calcext:value-type="float">
            <text:p>0,00104629629629630000</text:p>
          </table:table-cell>
          <table:table-cell table:formula="of:=[.D1132]-[.D11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1131]+8" office:value-type="float" office:value="9048" calcext:value-type="float">
            <text:p>9048</text:p>
          </table:table-cell>
          <table:table-cell office:value-type="float" office:value="8640000" calcext:value-type="float">
            <text:p>8640000</text:p>
          </table:table-cell>
          <table:table-cell table:formula="of:=[.B1132]/[.C1132]" office:value-type="float" office:value="0.00104722222222222" calcext:value-type="float">
            <text:p>0,00104722222222222000</text:p>
          </table:table-cell>
          <table:table-cell table:formula="of:=[.D1133]-[.D11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1132]+8" office:value-type="float" office:value="9056" calcext:value-type="float">
            <text:p>9056</text:p>
          </table:table-cell>
          <table:table-cell office:value-type="float" office:value="8640000" calcext:value-type="float">
            <text:p>8640000</text:p>
          </table:table-cell>
          <table:table-cell table:formula="of:=[.B1133]/[.C1133]" office:value-type="float" office:value="0.00104814814814815" calcext:value-type="float">
            <text:p>0,00104814814814815000</text:p>
          </table:table-cell>
          <table:table-cell table:formula="of:=[.D1134]-[.D11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1133]+8" office:value-type="float" office:value="9064" calcext:value-type="float">
            <text:p>9064</text:p>
          </table:table-cell>
          <table:table-cell office:value-type="float" office:value="8640000" calcext:value-type="float">
            <text:p>8640000</text:p>
          </table:table-cell>
          <table:table-cell table:formula="of:=[.B1134]/[.C1134]" office:value-type="float" office:value="0.00104907407407407" calcext:value-type="float">
            <text:p>0,00104907407407407000</text:p>
          </table:table-cell>
          <table:table-cell table:formula="of:=[.D1135]-[.D11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1134]+8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1135]/[.C1135]" office:value-type="float" office:value="0.00105" calcext:value-type="float">
            <text:p>0,00105000000000000000</text:p>
          </table:table-cell>
          <table:table-cell table:formula="of:=[.D1136]-[.D11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1135]+8" office:value-type="float" office:value="9080" calcext:value-type="float">
            <text:p>9080</text:p>
          </table:table-cell>
          <table:table-cell office:value-type="float" office:value="8640000" calcext:value-type="float">
            <text:p>8640000</text:p>
          </table:table-cell>
          <table:table-cell table:formula="of:=[.B1136]/[.C1136]" office:value-type="float" office:value="0.00105092592592593" calcext:value-type="float">
            <text:p>0,00105092592592593000</text:p>
          </table:table-cell>
          <table:table-cell table:formula="of:=[.D1137]-[.D11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1136]+8" office:value-type="float" office:value="9088" calcext:value-type="float">
            <text:p>9088</text:p>
          </table:table-cell>
          <table:table-cell office:value-type="float" office:value="8640000" calcext:value-type="float">
            <text:p>8640000</text:p>
          </table:table-cell>
          <table:table-cell table:formula="of:=[.B1137]/[.C1137]" office:value-type="float" office:value="0.00105185185185185" calcext:value-type="float">
            <text:p>0,00105185185185185000</text:p>
          </table:table-cell>
          <table:table-cell table:formula="of:=[.D1138]-[.D11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1137]+8" office:value-type="float" office:value="9096" calcext:value-type="float">
            <text:p>9096</text:p>
          </table:table-cell>
          <table:table-cell office:value-type="float" office:value="8640000" calcext:value-type="float">
            <text:p>8640000</text:p>
          </table:table-cell>
          <table:table-cell table:formula="of:=[.B1138]/[.C1138]" office:value-type="float" office:value="0.00105277777777778" calcext:value-type="float">
            <text:p>0,00105277777777778000</text:p>
          </table:table-cell>
          <table:table-cell table:formula="of:=[.D1139]-[.D11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1138]+8" office:value-type="float" office:value="9104" calcext:value-type="float">
            <text:p>9104</text:p>
          </table:table-cell>
          <table:table-cell office:value-type="float" office:value="8640000" calcext:value-type="float">
            <text:p>8640000</text:p>
          </table:table-cell>
          <table:table-cell table:formula="of:=[.B1139]/[.C1139]" office:value-type="float" office:value="0.0010537037037037" calcext:value-type="float">
            <text:p>0,00105370370370370000</text:p>
          </table:table-cell>
          <table:table-cell table:formula="of:=[.D1140]-[.D11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1139]+8" office:value-type="float" office:value="9112" calcext:value-type="float">
            <text:p>9112</text:p>
          </table:table-cell>
          <table:table-cell office:value-type="float" office:value="8640000" calcext:value-type="float">
            <text:p>8640000</text:p>
          </table:table-cell>
          <table:table-cell table:formula="of:=[.B1140]/[.C1140]" office:value-type="float" office:value="0.00105462962962963" calcext:value-type="float">
            <text:p>0,00105462962962963000</text:p>
          </table:table-cell>
          <table:table-cell table:formula="of:=[.D1141]-[.D11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1140]+8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1141]/[.C1141]" office:value-type="float" office:value="0.00105555555555556" calcext:value-type="float">
            <text:p>0,00105555555555556000</text:p>
          </table:table-cell>
          <table:table-cell table:formula="of:=[.D1142]-[.D11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1141]+8" office:value-type="float" office:value="9128" calcext:value-type="float">
            <text:p>9128</text:p>
          </table:table-cell>
          <table:table-cell office:value-type="float" office:value="8640000" calcext:value-type="float">
            <text:p>8640000</text:p>
          </table:table-cell>
          <table:table-cell table:formula="of:=[.B1142]/[.C1142]" office:value-type="float" office:value="0.00105648148148148" calcext:value-type="float">
            <text:p>0,00105648148148148000</text:p>
          </table:table-cell>
          <table:table-cell table:formula="of:=[.D1143]-[.D1142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1142]+8" office:value-type="float" office:value="9136" calcext:value-type="float">
            <text:p>9136</text:p>
          </table:table-cell>
          <table:table-cell office:value-type="float" office:value="8640000" calcext:value-type="float">
            <text:p>8640000</text:p>
          </table:table-cell>
          <table:table-cell table:formula="of:=[.B1143]/[.C1143]" office:value-type="float" office:value="0.00105740740740741" calcext:value-type="float">
            <text:p>0,00105740740740741000</text:p>
          </table:table-cell>
          <table:table-cell table:formula="of:=[.D1144]-[.D11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B1143]+8" office:value-type="float" office:value="9144" calcext:value-type="float">
            <text:p>9144</text:p>
          </table:table-cell>
          <table:table-cell office:value-type="float" office:value="8640000" calcext:value-type="float">
            <text:p>8640000</text:p>
          </table:table-cell>
          <table:table-cell table:formula="of:=[.B1144]/[.C1144]" office:value-type="float" office:value="0.00105833333333333" calcext:value-type="float">
            <text:p>0,00105833333333333000</text:p>
          </table:table-cell>
          <table:table-cell table:formula="of:=[.D1145]-[.D11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B1144]+8" office:value-type="float" office:value="9152" calcext:value-type="float">
            <text:p>9152</text:p>
          </table:table-cell>
          <table:table-cell office:value-type="float" office:value="8640000" calcext:value-type="float">
            <text:p>8640000</text:p>
          </table:table-cell>
          <table:table-cell table:formula="of:=[.B1145]/[.C1145]" office:value-type="float" office:value="0.00105925925925926" calcext:value-type="float">
            <text:p>0,00105925925925926000</text:p>
          </table:table-cell>
          <table:table-cell table:formula="of:=[.D1146]-[.D11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B1145]+8" office:value-type="float" office:value="9160" calcext:value-type="float">
            <text:p>9160</text:p>
          </table:table-cell>
          <table:table-cell office:value-type="float" office:value="8640000" calcext:value-type="float">
            <text:p>8640000</text:p>
          </table:table-cell>
          <table:table-cell table:formula="of:=[.B1146]/[.C1146]" office:value-type="float" office:value="0.00106018518518519" calcext:value-type="float">
            <text:p>0,00106018518518519000</text:p>
          </table:table-cell>
          <table:table-cell table:formula="of:=[.D1147]-[.D11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B1146]+8" office:value-type="float" office:value="9168" calcext:value-type="float">
            <text:p>9168</text:p>
          </table:table-cell>
          <table:table-cell office:value-type="float" office:value="8640000" calcext:value-type="float">
            <text:p>8640000</text:p>
          </table:table-cell>
          <table:table-cell table:formula="of:=[.B1147]/[.C1147]" office:value-type="float" office:value="0.00106111111111111" calcext:value-type="float">
            <text:p>0,00106111111111111000</text:p>
          </table:table-cell>
          <table:table-cell table:formula="of:=[.D1148]-[.D11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1147]+8" office:value-type="float" office:value="9176" calcext:value-type="float">
            <text:p>9176</text:p>
          </table:table-cell>
          <table:table-cell office:value-type="float" office:value="8640000" calcext:value-type="float">
            <text:p>8640000</text:p>
          </table:table-cell>
          <table:table-cell table:formula="of:=[.B1148]/[.C1148]" office:value-type="float" office:value="0.00106203703703704" calcext:value-type="float">
            <text:p>0,00106203703703704000</text:p>
          </table:table-cell>
          <table:table-cell table:formula="of:=[.D1149]-[.D11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1148]+8" office:value-type="float" office:value="9184" calcext:value-type="float">
            <text:p>9184</text:p>
          </table:table-cell>
          <table:table-cell office:value-type="float" office:value="8640000" calcext:value-type="float">
            <text:p>8640000</text:p>
          </table:table-cell>
          <table:table-cell table:formula="of:=[.B1149]/[.C1149]" office:value-type="float" office:value="0.00106296296296296" calcext:value-type="float">
            <text:p>0,00106296296296296000</text:p>
          </table:table-cell>
          <table:table-cell table:formula="of:=[.D1150]-[.D11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B1149]+8" office:value-type="float" office:value="9192" calcext:value-type="float">
            <text:p>9192</text:p>
          </table:table-cell>
          <table:table-cell office:value-type="float" office:value="8640000" calcext:value-type="float">
            <text:p>8640000</text:p>
          </table:table-cell>
          <table:table-cell table:formula="of:=[.B1150]/[.C1150]" office:value-type="float" office:value="0.00106388888888889" calcext:value-type="float">
            <text:p>0,00106388888888889000</text:p>
          </table:table-cell>
          <table:table-cell table:formula="of:=[.D1151]-[.D11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1150]+8" office:value-type="float" office:value="9200" calcext:value-type="float">
            <text:p>9200</text:p>
          </table:table-cell>
          <table:table-cell office:value-type="float" office:value="8640000" calcext:value-type="float">
            <text:p>8640000</text:p>
          </table:table-cell>
          <table:table-cell table:formula="of:=[.B1151]/[.C1151]" office:value-type="float" office:value="0.00106481481481481" calcext:value-type="float">
            <text:p>0,00106481481481481000</text:p>
          </table:table-cell>
          <table:table-cell table:formula="of:=[.D1152]-[.D11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B1151]+8" office:value-type="float" office:value="9208" calcext:value-type="float">
            <text:p>9208</text:p>
          </table:table-cell>
          <table:table-cell office:value-type="float" office:value="8640000" calcext:value-type="float">
            <text:p>8640000</text:p>
          </table:table-cell>
          <table:table-cell table:formula="of:=[.B1152]/[.C1152]" office:value-type="float" office:value="0.00106574074074074" calcext:value-type="float">
            <text:p>0,00106574074074074000</text:p>
          </table:table-cell>
          <table:table-cell table:formula="of:=[.D1153]-[.D11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B1152]+8" office:value-type="float" office:value="9216" calcext:value-type="float">
            <text:p>9216</text:p>
          </table:table-cell>
          <table:table-cell office:value-type="float" office:value="8640000" calcext:value-type="float">
            <text:p>8640000</text:p>
          </table:table-cell>
          <table:table-cell table:formula="of:=[.B1153]/[.C1153]" office:value-type="float" office:value="0.00106666666666667" calcext:value-type="float">
            <text:p>0,00106666666666667000</text:p>
          </table:table-cell>
          <table:table-cell table:formula="of:=[.D1154]-[.D11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B1153]+8" office:value-type="float" office:value="9224" calcext:value-type="float">
            <text:p>9224</text:p>
          </table:table-cell>
          <table:table-cell office:value-type="float" office:value="8640000" calcext:value-type="float">
            <text:p>8640000</text:p>
          </table:table-cell>
          <table:table-cell table:formula="of:=[.B1154]/[.C1154]" office:value-type="float" office:value="0.00106759259259259" calcext:value-type="float">
            <text:p>0,00106759259259259000</text:p>
          </table:table-cell>
          <table:table-cell table:formula="of:=[.D1155]-[.D11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B1154]+8" office:value-type="float" office:value="9232" calcext:value-type="float">
            <text:p>9232</text:p>
          </table:table-cell>
          <table:table-cell office:value-type="float" office:value="8640000" calcext:value-type="float">
            <text:p>8640000</text:p>
          </table:table-cell>
          <table:table-cell table:formula="of:=[.B1155]/[.C1155]" office:value-type="float" office:value="0.00106851851851852" calcext:value-type="float">
            <text:p>0,00106851851851852000</text:p>
          </table:table-cell>
          <table:table-cell table:formula="of:=[.D1156]-[.D11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B1155]+8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1156]/[.C1156]" office:value-type="float" office:value="0.00106944444444444" calcext:value-type="float">
            <text:p>0,00106944444444444000</text:p>
          </table:table-cell>
          <table:table-cell table:formula="of:=[.D1157]-[.D11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B1156]+8" office:value-type="float" office:value="9248" calcext:value-type="float">
            <text:p>9248</text:p>
          </table:table-cell>
          <table:table-cell office:value-type="float" office:value="8640000" calcext:value-type="float">
            <text:p>8640000</text:p>
          </table:table-cell>
          <table:table-cell table:formula="of:=[.B1157]/[.C1157]" office:value-type="float" office:value="0.00107037037037037" calcext:value-type="float">
            <text:p>0,00107037037037037000</text:p>
          </table:table-cell>
          <table:table-cell table:formula="of:=[.D1158]-[.D11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B1157]+8" office:value-type="float" office:value="9256" calcext:value-type="float">
            <text:p>9256</text:p>
          </table:table-cell>
          <table:table-cell office:value-type="float" office:value="8640000" calcext:value-type="float">
            <text:p>8640000</text:p>
          </table:table-cell>
          <table:table-cell table:formula="of:=[.B1158]/[.C1158]" office:value-type="float" office:value="0.0010712962962963" calcext:value-type="float">
            <text:p>0,00107129629629630000</text:p>
          </table:table-cell>
          <table:table-cell table:formula="of:=[.D1159]-[.D11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B1158]+8" office:value-type="float" office:value="9264" calcext:value-type="float">
            <text:p>9264</text:p>
          </table:table-cell>
          <table:table-cell office:value-type="float" office:value="8640000" calcext:value-type="float">
            <text:p>8640000</text:p>
          </table:table-cell>
          <table:table-cell table:formula="of:=[.B1159]/[.C1159]" office:value-type="float" office:value="0.00107222222222222" calcext:value-type="float">
            <text:p>0,00107222222222222000</text:p>
          </table:table-cell>
          <table:table-cell table:formula="of:=[.D1160]-[.D11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B1159]+8" office:value-type="float" office:value="9272" calcext:value-type="float">
            <text:p>9272</text:p>
          </table:table-cell>
          <table:table-cell office:value-type="float" office:value="8640000" calcext:value-type="float">
            <text:p>8640000</text:p>
          </table:table-cell>
          <table:table-cell table:formula="of:=[.B1160]/[.C1160]" office:value-type="float" office:value="0.00107314814814815" calcext:value-type="float">
            <text:p>0,00107314814814815000</text:p>
          </table:table-cell>
          <table:table-cell table:formula="of:=[.D1161]-[.D11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B1160]+8" office:value-type="float" office:value="9280" calcext:value-type="float">
            <text:p>9280</text:p>
          </table:table-cell>
          <table:table-cell office:value-type="float" office:value="8640000" calcext:value-type="float">
            <text:p>8640000</text:p>
          </table:table-cell>
          <table:table-cell table:formula="of:=[.B1161]/[.C1161]" office:value-type="float" office:value="0.00107407407407407" calcext:value-type="float">
            <text:p>0,00107407407407407000</text:p>
          </table:table-cell>
          <table:table-cell table:formula="of:=[.D1162]-[.D11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B1161]+8" office:value-type="float" office:value="9288" calcext:value-type="float">
            <text:p>9288</text:p>
          </table:table-cell>
          <table:table-cell office:value-type="float" office:value="8640000" calcext:value-type="float">
            <text:p>8640000</text:p>
          </table:table-cell>
          <table:table-cell table:formula="of:=[.B1162]/[.C1162]" office:value-type="float" office:value="0.001075" calcext:value-type="float">
            <text:p>0,00107500000000000000</text:p>
          </table:table-cell>
          <table:table-cell table:formula="of:=[.D1163]-[.D11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B1162]+8" office:value-type="float" office:value="9296" calcext:value-type="float">
            <text:p>9296</text:p>
          </table:table-cell>
          <table:table-cell office:value-type="float" office:value="8640000" calcext:value-type="float">
            <text:p>8640000</text:p>
          </table:table-cell>
          <table:table-cell table:formula="of:=[.B1163]/[.C1163]" office:value-type="float" office:value="0.00107592592592593" calcext:value-type="float">
            <text:p>0,00107592592592593000</text:p>
          </table:table-cell>
          <table:table-cell table:formula="of:=[.D1164]-[.D11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B1163]+8" office:value-type="float" office:value="9304" calcext:value-type="float">
            <text:p>9304</text:p>
          </table:table-cell>
          <table:table-cell office:value-type="float" office:value="8640000" calcext:value-type="float">
            <text:p>8640000</text:p>
          </table:table-cell>
          <table:table-cell table:formula="of:=[.B1164]/[.C1164]" office:value-type="float" office:value="0.00107685185185185" calcext:value-type="float">
            <text:p>0,00107685185185185000</text:p>
          </table:table-cell>
          <table:table-cell table:formula="of:=[.D1165]-[.D11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1164]+8" office:value-type="float" office:value="9312" calcext:value-type="float">
            <text:p>9312</text:p>
          </table:table-cell>
          <table:table-cell office:value-type="float" office:value="8640000" calcext:value-type="float">
            <text:p>8640000</text:p>
          </table:table-cell>
          <table:table-cell table:formula="of:=[.B1165]/[.C1165]" office:value-type="float" office:value="0.00107777777777778" calcext:value-type="float">
            <text:p>0,00107777777777778000</text:p>
          </table:table-cell>
          <table:table-cell table:formula="of:=[.D1166]-[.D11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B1165]+8" office:value-type="float" office:value="9320" calcext:value-type="float">
            <text:p>9320</text:p>
          </table:table-cell>
          <table:table-cell office:value-type="float" office:value="8640000" calcext:value-type="float">
            <text:p>8640000</text:p>
          </table:table-cell>
          <table:table-cell table:formula="of:=[.B1166]/[.C1166]" office:value-type="float" office:value="0.0010787037037037" calcext:value-type="float">
            <text:p>0,00107870370370370000</text:p>
          </table:table-cell>
          <table:table-cell table:formula="of:=[.D1167]-[.D11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B1166]+8" office:value-type="float" office:value="9328" calcext:value-type="float">
            <text:p>9328</text:p>
          </table:table-cell>
          <table:table-cell office:value-type="float" office:value="8640000" calcext:value-type="float">
            <text:p>8640000</text:p>
          </table:table-cell>
          <table:table-cell table:formula="of:=[.B1167]/[.C1167]" office:value-type="float" office:value="0.00107962962962963" calcext:value-type="float">
            <text:p>0,00107962962962963000</text:p>
          </table:table-cell>
          <table:table-cell table:formula="of:=[.D1168]-[.D11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B1167]+8" office:value-type="float" office:value="9336" calcext:value-type="float">
            <text:p>9336</text:p>
          </table:table-cell>
          <table:table-cell office:value-type="float" office:value="8640000" calcext:value-type="float">
            <text:p>8640000</text:p>
          </table:table-cell>
          <table:table-cell table:formula="of:=[.B1168]/[.C1168]" office:value-type="float" office:value="0.00108055555555556" calcext:value-type="float">
            <text:p>0,00108055555555556000</text:p>
          </table:table-cell>
          <table:table-cell table:formula="of:=[.D1169]-[.D11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B1168]+8" office:value-type="float" office:value="9344" calcext:value-type="float">
            <text:p>9344</text:p>
          </table:table-cell>
          <table:table-cell office:value-type="float" office:value="8640000" calcext:value-type="float">
            <text:p>8640000</text:p>
          </table:table-cell>
          <table:table-cell table:formula="of:=[.B1169]/[.C1169]" office:value-type="float" office:value="0.00108148148148148" calcext:value-type="float">
            <text:p>0,00108148148148148000</text:p>
          </table:table-cell>
          <table:table-cell table:formula="of:=[.D1170]-[.D11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B1169]+8" office:value-type="float" office:value="9352" calcext:value-type="float">
            <text:p>9352</text:p>
          </table:table-cell>
          <table:table-cell office:value-type="float" office:value="8640000" calcext:value-type="float">
            <text:p>8640000</text:p>
          </table:table-cell>
          <table:table-cell table:formula="of:=[.B1170]/[.C1170]" office:value-type="float" office:value="0.00108240740740741" calcext:value-type="float">
            <text:p>0,00108240740740741000</text:p>
          </table:table-cell>
          <table:table-cell table:formula="of:=[.D1171]-[.D11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B1170]+8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1171]/[.C1171]" office:value-type="float" office:value="0.00108333333333333" calcext:value-type="float">
            <text:p>0,00108333333333333000</text:p>
          </table:table-cell>
          <table:table-cell table:formula="of:=[.D1172]-[.D11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B1171]+8" office:value-type="float" office:value="9368" calcext:value-type="float">
            <text:p>9368</text:p>
          </table:table-cell>
          <table:table-cell office:value-type="float" office:value="8640000" calcext:value-type="float">
            <text:p>8640000</text:p>
          </table:table-cell>
          <table:table-cell table:formula="of:=[.B1172]/[.C1172]" office:value-type="float" office:value="0.00108425925925926" calcext:value-type="float">
            <text:p>0,00108425925925926000</text:p>
          </table:table-cell>
          <table:table-cell table:formula="of:=[.D1173]-[.D11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B1172]+8" office:value-type="float" office:value="9376" calcext:value-type="float">
            <text:p>9376</text:p>
          </table:table-cell>
          <table:table-cell office:value-type="float" office:value="8640000" calcext:value-type="float">
            <text:p>8640000</text:p>
          </table:table-cell>
          <table:table-cell table:formula="of:=[.B1173]/[.C1173]" office:value-type="float" office:value="0.00108518518518519" calcext:value-type="float">
            <text:p>0,00108518518518519000</text:p>
          </table:table-cell>
          <table:table-cell table:formula="of:=[.D1174]-[.D11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B1173]+8" office:value-type="float" office:value="9384" calcext:value-type="float">
            <text:p>9384</text:p>
          </table:table-cell>
          <table:table-cell office:value-type="float" office:value="8640000" calcext:value-type="float">
            <text:p>8640000</text:p>
          </table:table-cell>
          <table:table-cell table:formula="of:=[.B1174]/[.C1174]" office:value-type="float" office:value="0.00108611111111111" calcext:value-type="float">
            <text:p>0,00108611111111111000</text:p>
          </table:table-cell>
          <table:table-cell table:formula="of:=[.D1175]-[.D11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B1174]+8" office:value-type="float" office:value="9392" calcext:value-type="float">
            <text:p>9392</text:p>
          </table:table-cell>
          <table:table-cell office:value-type="float" office:value="8640000" calcext:value-type="float">
            <text:p>8640000</text:p>
          </table:table-cell>
          <table:table-cell table:formula="of:=[.B1175]/[.C1175]" office:value-type="float" office:value="0.00108703703703704" calcext:value-type="float">
            <text:p>0,00108703703703704000</text:p>
          </table:table-cell>
          <table:table-cell table:formula="of:=[.D1176]-[.D11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B1175]+8" office:value-type="float" office:value="9400" calcext:value-type="float">
            <text:p>9400</text:p>
          </table:table-cell>
          <table:table-cell office:value-type="float" office:value="8640000" calcext:value-type="float">
            <text:p>8640000</text:p>
          </table:table-cell>
          <table:table-cell table:formula="of:=[.B1176]/[.C1176]" office:value-type="float" office:value="0.00108796296296296" calcext:value-type="float">
            <text:p>0,00108796296296296000</text:p>
          </table:table-cell>
          <table:table-cell table:formula="of:=[.D1177]-[.D11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B1176]+8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1177]/[.C1177]" office:value-type="float" office:value="0.00108888888888889" calcext:value-type="float">
            <text:p>0,00108888888888889000</text:p>
          </table:table-cell>
          <table:table-cell table:formula="of:=[.D1178]-[.D11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B1177]+8" office:value-type="float" office:value="9416" calcext:value-type="float">
            <text:p>9416</text:p>
          </table:table-cell>
          <table:table-cell office:value-type="float" office:value="8640000" calcext:value-type="float">
            <text:p>8640000</text:p>
          </table:table-cell>
          <table:table-cell table:formula="of:=[.B1178]/[.C1178]" office:value-type="float" office:value="0.00108981481481481" calcext:value-type="float">
            <text:p>0,00108981481481481000</text:p>
          </table:table-cell>
          <table:table-cell table:formula="of:=[.D1179]-[.D11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B1178]+8" office:value-type="float" office:value="9424" calcext:value-type="float">
            <text:p>9424</text:p>
          </table:table-cell>
          <table:table-cell office:value-type="float" office:value="8640000" calcext:value-type="float">
            <text:p>8640000</text:p>
          </table:table-cell>
          <table:table-cell table:formula="of:=[.B1179]/[.C1179]" office:value-type="float" office:value="0.00109074074074074" calcext:value-type="float">
            <text:p>0,00109074074074074000</text:p>
          </table:table-cell>
          <table:table-cell table:formula="of:=[.D1180]-[.D11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B1179]+8" office:value-type="float" office:value="9432" calcext:value-type="float">
            <text:p>9432</text:p>
          </table:table-cell>
          <table:table-cell office:value-type="float" office:value="8640000" calcext:value-type="float">
            <text:p>8640000</text:p>
          </table:table-cell>
          <table:table-cell table:formula="of:=[.B1180]/[.C1180]" office:value-type="float" office:value="0.00109166666666667" calcext:value-type="float">
            <text:p>0,00109166666666667000</text:p>
          </table:table-cell>
          <table:table-cell table:formula="of:=[.D1181]-[.D11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B1180]+8" office:value-type="float" office:value="9440" calcext:value-type="float">
            <text:p>9440</text:p>
          </table:table-cell>
          <table:table-cell office:value-type="float" office:value="8640000" calcext:value-type="float">
            <text:p>8640000</text:p>
          </table:table-cell>
          <table:table-cell table:formula="of:=[.B1181]/[.C1181]" office:value-type="float" office:value="0.00109259259259259" calcext:value-type="float">
            <text:p>0,00109259259259259000</text:p>
          </table:table-cell>
          <table:table-cell table:formula="of:=[.D1182]-[.D1181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B1181]+8" office:value-type="float" office:value="9448" calcext:value-type="float">
            <text:p>9448</text:p>
          </table:table-cell>
          <table:table-cell office:value-type="float" office:value="8640000" calcext:value-type="float">
            <text:p>8640000</text:p>
          </table:table-cell>
          <table:table-cell table:formula="of:=[.B1182]/[.C1182]" office:value-type="float" office:value="0.00109351851851852" calcext:value-type="float">
            <text:p>0,00109351851851852000</text:p>
          </table:table-cell>
          <table:table-cell table:formula="of:=[.D1183]-[.D11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B1182]+8" office:value-type="float" office:value="9456" calcext:value-type="float">
            <text:p>9456</text:p>
          </table:table-cell>
          <table:table-cell office:value-type="float" office:value="8640000" calcext:value-type="float">
            <text:p>8640000</text:p>
          </table:table-cell>
          <table:table-cell table:formula="of:=[.B1183]/[.C1183]" office:value-type="float" office:value="0.00109444444444444" calcext:value-type="float">
            <text:p>0,00109444444444444000</text:p>
          </table:table-cell>
          <table:table-cell table:formula="of:=[.D1184]-[.D11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B1183]+8" office:value-type="float" office:value="9464" calcext:value-type="float">
            <text:p>9464</text:p>
          </table:table-cell>
          <table:table-cell office:value-type="float" office:value="8640000" calcext:value-type="float">
            <text:p>8640000</text:p>
          </table:table-cell>
          <table:table-cell table:formula="of:=[.B1184]/[.C1184]" office:value-type="float" office:value="0.00109537037037037" calcext:value-type="float">
            <text:p>0,00109537037037037000</text:p>
          </table:table-cell>
          <table:table-cell table:formula="of:=[.D1185]-[.D11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1184]+8" office:value-type="float" office:value="9472" calcext:value-type="float">
            <text:p>9472</text:p>
          </table:table-cell>
          <table:table-cell office:value-type="float" office:value="8640000" calcext:value-type="float">
            <text:p>8640000</text:p>
          </table:table-cell>
          <table:table-cell table:formula="of:=[.B1185]/[.C1185]" office:value-type="float" office:value="0.0010962962962963" calcext:value-type="float">
            <text:p>0,00109629629629630000</text:p>
          </table:table-cell>
          <table:table-cell table:formula="of:=[.D1186]-[.D11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B1185]+8" office:value-type="float" office:value="9480" calcext:value-type="float">
            <text:p>9480</text:p>
          </table:table-cell>
          <table:table-cell office:value-type="float" office:value="8640000" calcext:value-type="float">
            <text:p>8640000</text:p>
          </table:table-cell>
          <table:table-cell table:formula="of:=[.B1186]/[.C1186]" office:value-type="float" office:value="0.00109722222222222" calcext:value-type="float">
            <text:p>0,00109722222222222000</text:p>
          </table:table-cell>
          <table:table-cell table:formula="of:=[.D1187]-[.D11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B1186]+8" office:value-type="float" office:value="9488" calcext:value-type="float">
            <text:p>9488</text:p>
          </table:table-cell>
          <table:table-cell office:value-type="float" office:value="8640000" calcext:value-type="float">
            <text:p>8640000</text:p>
          </table:table-cell>
          <table:table-cell table:formula="of:=[.B1187]/[.C1187]" office:value-type="float" office:value="0.00109814814814815" calcext:value-type="float">
            <text:p>0,00109814814814815000</text:p>
          </table:table-cell>
          <table:table-cell table:formula="of:=[.D1188]-[.D11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B1187]+8" office:value-type="float" office:value="9496" calcext:value-type="float">
            <text:p>9496</text:p>
          </table:table-cell>
          <table:table-cell office:value-type="float" office:value="8640000" calcext:value-type="float">
            <text:p>8640000</text:p>
          </table:table-cell>
          <table:table-cell table:formula="of:=[.B1188]/[.C1188]" office:value-type="float" office:value="0.00109907407407407" calcext:value-type="float">
            <text:p>0,00109907407407407000</text:p>
          </table:table-cell>
          <table:table-cell table:formula="of:=[.D1189]-[.D11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B1188]+8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1189]/[.C1189]" office:value-type="float" office:value="0.0011" calcext:value-type="float">
            <text:p>0,00110000000000000000</text:p>
          </table:table-cell>
          <table:table-cell table:formula="of:=[.D1190]-[.D11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B1189]+8" office:value-type="float" office:value="9512" calcext:value-type="float">
            <text:p>9512</text:p>
          </table:table-cell>
          <table:table-cell office:value-type="float" office:value="8640000" calcext:value-type="float">
            <text:p>8640000</text:p>
          </table:table-cell>
          <table:table-cell table:formula="of:=[.B1190]/[.C1190]" office:value-type="float" office:value="0.00110092592592593" calcext:value-type="float">
            <text:p>0,00110092592592593000</text:p>
          </table:table-cell>
          <table:table-cell table:formula="of:=[.D1191]-[.D11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B1190]+8" office:value-type="float" office:value="9520" calcext:value-type="float">
            <text:p>9520</text:p>
          </table:table-cell>
          <table:table-cell office:value-type="float" office:value="8640000" calcext:value-type="float">
            <text:p>8640000</text:p>
          </table:table-cell>
          <table:table-cell table:formula="of:=[.B1191]/[.C1191]" office:value-type="float" office:value="0.00110185185185185" calcext:value-type="float">
            <text:p>0,00110185185185185000</text:p>
          </table:table-cell>
          <table:table-cell table:formula="of:=[.D1192]-[.D11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B1191]+8" office:value-type="float" office:value="9528" calcext:value-type="float">
            <text:p>9528</text:p>
          </table:table-cell>
          <table:table-cell office:value-type="float" office:value="8640000" calcext:value-type="float">
            <text:p>8640000</text:p>
          </table:table-cell>
          <table:table-cell table:formula="of:=[.B1192]/[.C1192]" office:value-type="float" office:value="0.00110277777777778" calcext:value-type="float">
            <text:p>0,00110277777777778000</text:p>
          </table:table-cell>
          <table:table-cell table:formula="of:=[.D1193]-[.D11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B1192]+8" office:value-type="float" office:value="9536" calcext:value-type="float">
            <text:p>9536</text:p>
          </table:table-cell>
          <table:table-cell office:value-type="float" office:value="8640000" calcext:value-type="float">
            <text:p>8640000</text:p>
          </table:table-cell>
          <table:table-cell table:formula="of:=[.B1193]/[.C1193]" office:value-type="float" office:value="0.0011037037037037" calcext:value-type="float">
            <text:p>0,00110370370370370000</text:p>
          </table:table-cell>
          <table:table-cell table:formula="of:=[.D1194]-[.D11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B1193]+8" office:value-type="float" office:value="9544" calcext:value-type="float">
            <text:p>9544</text:p>
          </table:table-cell>
          <table:table-cell office:value-type="float" office:value="8640000" calcext:value-type="float">
            <text:p>8640000</text:p>
          </table:table-cell>
          <table:table-cell table:formula="of:=[.B1194]/[.C1194]" office:value-type="float" office:value="0.00110462962962963" calcext:value-type="float">
            <text:p>0,00110462962962963000</text:p>
          </table:table-cell>
          <table:table-cell table:formula="of:=[.D1195]-[.D11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B1194]+8" office:value-type="float" office:value="9552" calcext:value-type="float">
            <text:p>9552</text:p>
          </table:table-cell>
          <table:table-cell office:value-type="float" office:value="8640000" calcext:value-type="float">
            <text:p>8640000</text:p>
          </table:table-cell>
          <table:table-cell table:formula="of:=[.B1195]/[.C1195]" office:value-type="float" office:value="0.00110555555555556" calcext:value-type="float">
            <text:p>0,00110555555555556000</text:p>
          </table:table-cell>
          <table:table-cell table:formula="of:=[.D1196]-[.D11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B1195]+8" office:value-type="float" office:value="9560" calcext:value-type="float">
            <text:p>9560</text:p>
          </table:table-cell>
          <table:table-cell office:value-type="float" office:value="8640000" calcext:value-type="float">
            <text:p>8640000</text:p>
          </table:table-cell>
          <table:table-cell table:formula="of:=[.B1196]/[.C1196]" office:value-type="float" office:value="0.00110648148148148" calcext:value-type="float">
            <text:p>0,00110648148148148000</text:p>
          </table:table-cell>
          <table:table-cell table:formula="of:=[.D1197]-[.D11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B1196]+8" office:value-type="float" office:value="9568" calcext:value-type="float">
            <text:p>9568</text:p>
          </table:table-cell>
          <table:table-cell office:value-type="float" office:value="8640000" calcext:value-type="float">
            <text:p>8640000</text:p>
          </table:table-cell>
          <table:table-cell table:formula="of:=[.B1197]/[.C1197]" office:value-type="float" office:value="0.00110740740740741" calcext:value-type="float">
            <text:p>0,00110740740740741000</text:p>
          </table:table-cell>
          <table:table-cell table:formula="of:=[.D1198]-[.D11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B1197]+8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1198]/[.C1198]" office:value-type="float" office:value="0.00110833333333333" calcext:value-type="float">
            <text:p>0,00110833333333333000</text:p>
          </table:table-cell>
          <table:table-cell table:formula="of:=[.D1199]-[.D11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B1198]+8" office:value-type="float" office:value="9584" calcext:value-type="float">
            <text:p>9584</text:p>
          </table:table-cell>
          <table:table-cell office:value-type="float" office:value="8640000" calcext:value-type="float">
            <text:p>8640000</text:p>
          </table:table-cell>
          <table:table-cell table:formula="of:=[.B1199]/[.C1199]" office:value-type="float" office:value="0.00110925925925926" calcext:value-type="float">
            <text:p>0,00110925925925926000</text:p>
          </table:table-cell>
          <table:table-cell table:formula="of:=[.D1200]-[.D11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B1199]+8" office:value-type="float" office:value="9592" calcext:value-type="float">
            <text:p>9592</text:p>
          </table:table-cell>
          <table:table-cell office:value-type="float" office:value="8640000" calcext:value-type="float">
            <text:p>8640000</text:p>
          </table:table-cell>
          <table:table-cell table:formula="of:=[.B1200]/[.C1200]" office:value-type="float" office:value="0.00111018518518519" calcext:value-type="float">
            <text:p>0,00111018518518519000</text:p>
          </table:table-cell>
          <table:table-cell table:formula="of:=[.D1201]-[.D12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1200]+8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1201]/[.C1201]" office:value-type="float" office:value="0.00111111111111111" calcext:value-type="float">
            <text:p>0,00111111111111111000</text:p>
          </table:table-cell>
          <table:table-cell table:formula="of:=[.D1202]-[.D12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B1201]+8" office:value-type="float" office:value="9608" calcext:value-type="float">
            <text:p>9608</text:p>
          </table:table-cell>
          <table:table-cell office:value-type="float" office:value="8640000" calcext:value-type="float">
            <text:p>8640000</text:p>
          </table:table-cell>
          <table:table-cell table:formula="of:=[.B1202]/[.C1202]" office:value-type="float" office:value="0.00111203703703704" calcext:value-type="float">
            <text:p>0,00111203703703704000</text:p>
          </table:table-cell>
          <table:table-cell table:formula="of:=[.D1203]-[.D12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B1202]+8" office:value-type="float" office:value="9616" calcext:value-type="float">
            <text:p>9616</text:p>
          </table:table-cell>
          <table:table-cell office:value-type="float" office:value="8640000" calcext:value-type="float">
            <text:p>8640000</text:p>
          </table:table-cell>
          <table:table-cell table:formula="of:=[.B1203]/[.C1203]" office:value-type="float" office:value="0.00111296296296296" calcext:value-type="float">
            <text:p>0,00111296296296296000</text:p>
          </table:table-cell>
          <table:table-cell table:formula="of:=[.D1204]-[.D12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B1203]+8" office:value-type="float" office:value="9624" calcext:value-type="float">
            <text:p>9624</text:p>
          </table:table-cell>
          <table:table-cell office:value-type="float" office:value="8640000" calcext:value-type="float">
            <text:p>8640000</text:p>
          </table:table-cell>
          <table:table-cell table:formula="of:=[.B1204]/[.C1204]" office:value-type="float" office:value="0.00111388888888889" calcext:value-type="float">
            <text:p>0,00111388888888889000</text:p>
          </table:table-cell>
          <table:table-cell table:formula="of:=[.D1205]-[.D12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B1204]+8" office:value-type="float" office:value="9632" calcext:value-type="float">
            <text:p>9632</text:p>
          </table:table-cell>
          <table:table-cell office:value-type="float" office:value="8640000" calcext:value-type="float">
            <text:p>8640000</text:p>
          </table:table-cell>
          <table:table-cell table:formula="of:=[.B1205]/[.C1205]" office:value-type="float" office:value="0.00111481481481481" calcext:value-type="float">
            <text:p>0,00111481481481481000</text:p>
          </table:table-cell>
          <table:table-cell table:formula="of:=[.D1206]-[.D12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B1205]+8" office:value-type="float" office:value="9640" calcext:value-type="float">
            <text:p>9640</text:p>
          </table:table-cell>
          <table:table-cell office:value-type="float" office:value="8640000" calcext:value-type="float">
            <text:p>8640000</text:p>
          </table:table-cell>
          <table:table-cell table:formula="of:=[.B1206]/[.C1206]" office:value-type="float" office:value="0.00111574074074074" calcext:value-type="float">
            <text:p>0,00111574074074074000</text:p>
          </table:table-cell>
          <table:table-cell table:formula="of:=[.D1207]-[.D12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B1206]+8" office:value-type="float" office:value="9648" calcext:value-type="float">
            <text:p>9648</text:p>
          </table:table-cell>
          <table:table-cell office:value-type="float" office:value="8640000" calcext:value-type="float">
            <text:p>8640000</text:p>
          </table:table-cell>
          <table:table-cell table:formula="of:=[.B1207]/[.C1207]" office:value-type="float" office:value="0.00111666666666667" calcext:value-type="float">
            <text:p>0,00111666666666667000</text:p>
          </table:table-cell>
          <table:table-cell table:formula="of:=[.D1208]-[.D12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B1207]+8" office:value-type="float" office:value="9656" calcext:value-type="float">
            <text:p>9656</text:p>
          </table:table-cell>
          <table:table-cell office:value-type="float" office:value="8640000" calcext:value-type="float">
            <text:p>8640000</text:p>
          </table:table-cell>
          <table:table-cell table:formula="of:=[.B1208]/[.C1208]" office:value-type="float" office:value="0.00111759259259259" calcext:value-type="float">
            <text:p>0,00111759259259259000</text:p>
          </table:table-cell>
          <table:table-cell table:formula="of:=[.D1209]-[.D12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B1208]+8" office:value-type="float" office:value="9664" calcext:value-type="float">
            <text:p>9664</text:p>
          </table:table-cell>
          <table:table-cell office:value-type="float" office:value="8640000" calcext:value-type="float">
            <text:p>8640000</text:p>
          </table:table-cell>
          <table:table-cell table:formula="of:=[.B1209]/[.C1209]" office:value-type="float" office:value="0.00111851851851852" calcext:value-type="float">
            <text:p>0,00111851851851852000</text:p>
          </table:table-cell>
          <table:table-cell table:formula="of:=[.D1210]-[.D12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B1209]+8" office:value-type="float" office:value="9672" calcext:value-type="float">
            <text:p>9672</text:p>
          </table:table-cell>
          <table:table-cell office:value-type="float" office:value="8640000" calcext:value-type="float">
            <text:p>8640000</text:p>
          </table:table-cell>
          <table:table-cell table:formula="of:=[.B1210]/[.C1210]" office:value-type="float" office:value="0.00111944444444444" calcext:value-type="float">
            <text:p>0,00111944444444444000</text:p>
          </table:table-cell>
          <table:table-cell table:formula="of:=[.D1211]-[.D12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B1210]+8" office:value-type="float" office:value="9680" calcext:value-type="float">
            <text:p>9680</text:p>
          </table:table-cell>
          <table:table-cell office:value-type="float" office:value="8640000" calcext:value-type="float">
            <text:p>8640000</text:p>
          </table:table-cell>
          <table:table-cell table:formula="of:=[.B1211]/[.C1211]" office:value-type="float" office:value="0.00112037037037037" calcext:value-type="float">
            <text:p>0,00112037037037037000</text:p>
          </table:table-cell>
          <table:table-cell table:formula="of:=[.D1212]-[.D12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B1211]+8" office:value-type="float" office:value="9688" calcext:value-type="float">
            <text:p>9688</text:p>
          </table:table-cell>
          <table:table-cell office:value-type="float" office:value="8640000" calcext:value-type="float">
            <text:p>8640000</text:p>
          </table:table-cell>
          <table:table-cell table:formula="of:=[.B1212]/[.C1212]" office:value-type="float" office:value="0.0011212962962963" calcext:value-type="float">
            <text:p>0,00112129629629630000</text:p>
          </table:table-cell>
          <table:table-cell table:formula="of:=[.D1213]-[.D12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B1212]+8" office:value-type="float" office:value="9696" calcext:value-type="float">
            <text:p>9696</text:p>
          </table:table-cell>
          <table:table-cell office:value-type="float" office:value="8640000" calcext:value-type="float">
            <text:p>8640000</text:p>
          </table:table-cell>
          <table:table-cell table:formula="of:=[.B1213]/[.C1213]" office:value-type="float" office:value="0.00112222222222222" calcext:value-type="float">
            <text:p>0,00112222222222222000</text:p>
          </table:table-cell>
          <table:table-cell table:formula="of:=[.D1214]-[.D12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B1213]+8" office:value-type="float" office:value="9704" calcext:value-type="float">
            <text:p>9704</text:p>
          </table:table-cell>
          <table:table-cell office:value-type="float" office:value="8640000" calcext:value-type="float">
            <text:p>8640000</text:p>
          </table:table-cell>
          <table:table-cell table:formula="of:=[.B1214]/[.C1214]" office:value-type="float" office:value="0.00112314814814815" calcext:value-type="float">
            <text:p>0,00112314814814815000</text:p>
          </table:table-cell>
          <table:table-cell table:formula="of:=[.D1215]-[.D12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B1214]+8" office:value-type="float" office:value="9712" calcext:value-type="float">
            <text:p>9712</text:p>
          </table:table-cell>
          <table:table-cell office:value-type="float" office:value="8640000" calcext:value-type="float">
            <text:p>8640000</text:p>
          </table:table-cell>
          <table:table-cell table:formula="of:=[.B1215]/[.C1215]" office:value-type="float" office:value="0.00112407407407407" calcext:value-type="float">
            <text:p>0,00112407407407407000</text:p>
          </table:table-cell>
          <table:table-cell table:formula="of:=[.D1216]-[.D12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B1215]+8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1216]/[.C1216]" office:value-type="float" office:value="0.001125" calcext:value-type="float">
            <text:p>0,00112500000000000000</text:p>
          </table:table-cell>
          <table:table-cell table:formula="of:=[.D1217]-[.D12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B1216]+8" office:value-type="float" office:value="9728" calcext:value-type="float">
            <text:p>9728</text:p>
          </table:table-cell>
          <table:table-cell office:value-type="float" office:value="8640000" calcext:value-type="float">
            <text:p>8640000</text:p>
          </table:table-cell>
          <table:table-cell table:formula="of:=[.B1217]/[.C1217]" office:value-type="float" office:value="0.00112592592592593" calcext:value-type="float">
            <text:p>0,00112592592592593000</text:p>
          </table:table-cell>
          <table:table-cell table:formula="of:=[.D1218]-[.D12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B1217]+8" office:value-type="float" office:value="9736" calcext:value-type="float">
            <text:p>9736</text:p>
          </table:table-cell>
          <table:table-cell office:value-type="float" office:value="8640000" calcext:value-type="float">
            <text:p>8640000</text:p>
          </table:table-cell>
          <table:table-cell table:formula="of:=[.B1218]/[.C1218]" office:value-type="float" office:value="0.00112685185185185" calcext:value-type="float">
            <text:p>0,00112685185185185000</text:p>
          </table:table-cell>
          <table:table-cell table:formula="of:=[.D1219]-[.D12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B1218]+8" office:value-type="float" office:value="9744" calcext:value-type="float">
            <text:p>9744</text:p>
          </table:table-cell>
          <table:table-cell office:value-type="float" office:value="8640000" calcext:value-type="float">
            <text:p>8640000</text:p>
          </table:table-cell>
          <table:table-cell table:formula="of:=[.B1219]/[.C1219]" office:value-type="float" office:value="0.00112777777777778" calcext:value-type="float">
            <text:p>0,00112777777777778000</text:p>
          </table:table-cell>
          <table:table-cell table:formula="of:=[.D1220]-[.D12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B1219]+8" office:value-type="float" office:value="9752" calcext:value-type="float">
            <text:p>9752</text:p>
          </table:table-cell>
          <table:table-cell office:value-type="float" office:value="8640000" calcext:value-type="float">
            <text:p>8640000</text:p>
          </table:table-cell>
          <table:table-cell table:formula="of:=[.B1220]/[.C1220]" office:value-type="float" office:value="0.0011287037037037" calcext:value-type="float">
            <text:p>0,00112870370370370000</text:p>
          </table:table-cell>
          <table:table-cell table:formula="of:=[.D1221]-[.D1220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B1220]+8" office:value-type="float" office:value="9760" calcext:value-type="float">
            <text:p>9760</text:p>
          </table:table-cell>
          <table:table-cell office:value-type="float" office:value="8640000" calcext:value-type="float">
            <text:p>8640000</text:p>
          </table:table-cell>
          <table:table-cell table:formula="of:=[.B1221]/[.C1221]" office:value-type="float" office:value="0.00112962962962963" calcext:value-type="float">
            <text:p>0,00112962962962963000</text:p>
          </table:table-cell>
          <table:table-cell table:formula="of:=[.D1222]-[.D12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1221]+8" office:value-type="float" office:value="9768" calcext:value-type="float">
            <text:p>9768</text:p>
          </table:table-cell>
          <table:table-cell office:value-type="float" office:value="8640000" calcext:value-type="float">
            <text:p>8640000</text:p>
          </table:table-cell>
          <table:table-cell table:formula="of:=[.B1222]/[.C1222]" office:value-type="float" office:value="0.00113055555555556" calcext:value-type="float">
            <text:p>0,00113055555555556000</text:p>
          </table:table-cell>
          <table:table-cell table:formula="of:=[.D1223]-[.D12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B1222]+8" office:value-type="float" office:value="9776" calcext:value-type="float">
            <text:p>9776</text:p>
          </table:table-cell>
          <table:table-cell office:value-type="float" office:value="8640000" calcext:value-type="float">
            <text:p>8640000</text:p>
          </table:table-cell>
          <table:table-cell table:formula="of:=[.B1223]/[.C1223]" office:value-type="float" office:value="0.00113148148148148" calcext:value-type="float">
            <text:p>0,00113148148148148000</text:p>
          </table:table-cell>
          <table:table-cell table:formula="of:=[.D1224]-[.D12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B1223]+8" office:value-type="float" office:value="9784" calcext:value-type="float">
            <text:p>9784</text:p>
          </table:table-cell>
          <table:table-cell office:value-type="float" office:value="8640000" calcext:value-type="float">
            <text:p>8640000</text:p>
          </table:table-cell>
          <table:table-cell table:formula="of:=[.B1224]/[.C1224]" office:value-type="float" office:value="0.00113240740740741" calcext:value-type="float">
            <text:p>0,00113240740740741000</text:p>
          </table:table-cell>
          <table:table-cell table:formula="of:=[.D1225]-[.D12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B1224]+8" office:value-type="float" office:value="9792" calcext:value-type="float">
            <text:p>9792</text:p>
          </table:table-cell>
          <table:table-cell office:value-type="float" office:value="8640000" calcext:value-type="float">
            <text:p>8640000</text:p>
          </table:table-cell>
          <table:table-cell table:formula="of:=[.B1225]/[.C1225]" office:value-type="float" office:value="0.00113333333333333" calcext:value-type="float">
            <text:p>0,00113333333333333000</text:p>
          </table:table-cell>
          <table:table-cell table:formula="of:=[.D1226]-[.D12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B1225]+8" office:value-type="float" office:value="9800" calcext:value-type="float">
            <text:p>9800</text:p>
          </table:table-cell>
          <table:table-cell office:value-type="float" office:value="8640000" calcext:value-type="float">
            <text:p>8640000</text:p>
          </table:table-cell>
          <table:table-cell table:formula="of:=[.B1226]/[.C1226]" office:value-type="float" office:value="0.00113425925925926" calcext:value-type="float">
            <text:p>0,00113425925925926000</text:p>
          </table:table-cell>
          <table:table-cell table:formula="of:=[.D1227]-[.D12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B1226]+8" office:value-type="float" office:value="9808" calcext:value-type="float">
            <text:p>9808</text:p>
          </table:table-cell>
          <table:table-cell office:value-type="float" office:value="8640000" calcext:value-type="float">
            <text:p>8640000</text:p>
          </table:table-cell>
          <table:table-cell table:formula="of:=[.B1227]/[.C1227]" office:value-type="float" office:value="0.00113518518518519" calcext:value-type="float">
            <text:p>0,00113518518518519000</text:p>
          </table:table-cell>
          <table:table-cell table:formula="of:=[.D1228]-[.D12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B1227]+8" office:value-type="float" office:value="9816" calcext:value-type="float">
            <text:p>9816</text:p>
          </table:table-cell>
          <table:table-cell office:value-type="float" office:value="8640000" calcext:value-type="float">
            <text:p>8640000</text:p>
          </table:table-cell>
          <table:table-cell table:formula="of:=[.B1228]/[.C1228]" office:value-type="float" office:value="0.00113611111111111" calcext:value-type="float">
            <text:p>0,00113611111111111000</text:p>
          </table:table-cell>
          <table:table-cell table:formula="of:=[.D1229]-[.D12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B1228]+8" office:value-type="float" office:value="9824" calcext:value-type="float">
            <text:p>9824</text:p>
          </table:table-cell>
          <table:table-cell office:value-type="float" office:value="8640000" calcext:value-type="float">
            <text:p>8640000</text:p>
          </table:table-cell>
          <table:table-cell table:formula="of:=[.B1229]/[.C1229]" office:value-type="float" office:value="0.00113703703703704" calcext:value-type="float">
            <text:p>0,00113703703703704000</text:p>
          </table:table-cell>
          <table:table-cell table:formula="of:=[.D1230]-[.D12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B1229]+8" office:value-type="float" office:value="9832" calcext:value-type="float">
            <text:p>9832</text:p>
          </table:table-cell>
          <table:table-cell office:value-type="float" office:value="8640000" calcext:value-type="float">
            <text:p>8640000</text:p>
          </table:table-cell>
          <table:table-cell table:formula="of:=[.B1230]/[.C1230]" office:value-type="float" office:value="0.00113796296296296" calcext:value-type="float">
            <text:p>0,00113796296296296000</text:p>
          </table:table-cell>
          <table:table-cell table:formula="of:=[.D1231]-[.D12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B1230]+8" office:value-type="float" office:value="9840" calcext:value-type="float">
            <text:p>9840</text:p>
          </table:table-cell>
          <table:table-cell office:value-type="float" office:value="8640000" calcext:value-type="float">
            <text:p>8640000</text:p>
          </table:table-cell>
          <table:table-cell table:formula="of:=[.B1231]/[.C1231]" office:value-type="float" office:value="0.00113888888888889" calcext:value-type="float">
            <text:p>0,00113888888888889000</text:p>
          </table:table-cell>
          <table:table-cell table:formula="of:=[.D1232]-[.D12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B1231]+8" office:value-type="float" office:value="9848" calcext:value-type="float">
            <text:p>9848</text:p>
          </table:table-cell>
          <table:table-cell office:value-type="float" office:value="8640000" calcext:value-type="float">
            <text:p>8640000</text:p>
          </table:table-cell>
          <table:table-cell table:formula="of:=[.B1232]/[.C1232]" office:value-type="float" office:value="0.00113981481481481" calcext:value-type="float">
            <text:p>0,00113981481481481000</text:p>
          </table:table-cell>
          <table:table-cell table:formula="of:=[.D1233]-[.D12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B1232]+8" office:value-type="float" office:value="9856" calcext:value-type="float">
            <text:p>9856</text:p>
          </table:table-cell>
          <table:table-cell office:value-type="float" office:value="8640000" calcext:value-type="float">
            <text:p>8640000</text:p>
          </table:table-cell>
          <table:table-cell table:formula="of:=[.B1233]/[.C1233]" office:value-type="float" office:value="0.00114074074074074" calcext:value-type="float">
            <text:p>0,00114074074074074000</text:p>
          </table:table-cell>
          <table:table-cell table:formula="of:=[.D1234]-[.D12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B1233]+8" office:value-type="float" office:value="9864" calcext:value-type="float">
            <text:p>9864</text:p>
          </table:table-cell>
          <table:table-cell office:value-type="float" office:value="8640000" calcext:value-type="float">
            <text:p>8640000</text:p>
          </table:table-cell>
          <table:table-cell table:formula="of:=[.B1234]/[.C1234]" office:value-type="float" office:value="0.00114166666666667" calcext:value-type="float">
            <text:p>0,00114166666666667000</text:p>
          </table:table-cell>
          <table:table-cell table:formula="of:=[.D1235]-[.D12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B1234]+8" office:value-type="float" office:value="9872" calcext:value-type="float">
            <text:p>9872</text:p>
          </table:table-cell>
          <table:table-cell office:value-type="float" office:value="8640000" calcext:value-type="float">
            <text:p>8640000</text:p>
          </table:table-cell>
          <table:table-cell table:formula="of:=[.B1235]/[.C1235]" office:value-type="float" office:value="0.00114259259259259" calcext:value-type="float">
            <text:p>0,00114259259259259000</text:p>
          </table:table-cell>
          <table:table-cell table:formula="of:=[.D1236]-[.D12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B1235]+8" office:value-type="float" office:value="9880" calcext:value-type="float">
            <text:p>9880</text:p>
          </table:table-cell>
          <table:table-cell office:value-type="float" office:value="8640000" calcext:value-type="float">
            <text:p>8640000</text:p>
          </table:table-cell>
          <table:table-cell table:formula="of:=[.B1236]/[.C1236]" office:value-type="float" office:value="0.00114351851851852" calcext:value-type="float">
            <text:p>0,00114351851851852000</text:p>
          </table:table-cell>
          <table:table-cell table:formula="of:=[.D1237]-[.D12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B1236]+8" office:value-type="float" office:value="9888" calcext:value-type="float">
            <text:p>9888</text:p>
          </table:table-cell>
          <table:table-cell office:value-type="float" office:value="8640000" calcext:value-type="float">
            <text:p>8640000</text:p>
          </table:table-cell>
          <table:table-cell table:formula="of:=[.B1237]/[.C1237]" office:value-type="float" office:value="0.00114444444444444" calcext:value-type="float">
            <text:p>0,00114444444444444000</text:p>
          </table:table-cell>
          <table:table-cell table:formula="of:=[.D1238]-[.D12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B1237]+8" office:value-type="float" office:value="9896" calcext:value-type="float">
            <text:p>9896</text:p>
          </table:table-cell>
          <table:table-cell office:value-type="float" office:value="8640000" calcext:value-type="float">
            <text:p>8640000</text:p>
          </table:table-cell>
          <table:table-cell table:formula="of:=[.B1238]/[.C1238]" office:value-type="float" office:value="0.00114537037037037" calcext:value-type="float">
            <text:p>0,00114537037037037000</text:p>
          </table:table-cell>
          <table:table-cell table:formula="of:=[.D1239]-[.D12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B1238]+8" office:value-type="float" office:value="9904" calcext:value-type="float">
            <text:p>9904</text:p>
          </table:table-cell>
          <table:table-cell office:value-type="float" office:value="8640000" calcext:value-type="float">
            <text:p>8640000</text:p>
          </table:table-cell>
          <table:table-cell table:formula="of:=[.B1239]/[.C1239]" office:value-type="float" office:value="0.0011462962962963" calcext:value-type="float">
            <text:p>0,00114629629629630000</text:p>
          </table:table-cell>
          <table:table-cell table:formula="of:=[.D1240]-[.D12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B1239]+8" office:value-type="float" office:value="9912" calcext:value-type="float">
            <text:p>9912</text:p>
          </table:table-cell>
          <table:table-cell office:value-type="float" office:value="8640000" calcext:value-type="float">
            <text:p>8640000</text:p>
          </table:table-cell>
          <table:table-cell table:formula="of:=[.B1240]/[.C1240]" office:value-type="float" office:value="0.00114722222222222" calcext:value-type="float">
            <text:p>0,00114722222222222000</text:p>
          </table:table-cell>
          <table:table-cell table:formula="of:=[.D1241]-[.D12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B1240]+8" office:value-type="float" office:value="9920" calcext:value-type="float">
            <text:p>9920</text:p>
          </table:table-cell>
          <table:table-cell office:value-type="float" office:value="8640000" calcext:value-type="float">
            <text:p>8640000</text:p>
          </table:table-cell>
          <table:table-cell table:formula="of:=[.B1241]/[.C1241]" office:value-type="float" office:value="0.00114814814814815" calcext:value-type="float">
            <text:p>0,00114814814814815000</text:p>
          </table:table-cell>
          <table:table-cell table:formula="of:=[.D1242]-[.D12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B1241]+8" office:value-type="float" office:value="9928" calcext:value-type="float">
            <text:p>9928</text:p>
          </table:table-cell>
          <table:table-cell office:value-type="float" office:value="8640000" calcext:value-type="float">
            <text:p>8640000</text:p>
          </table:table-cell>
          <table:table-cell table:formula="of:=[.B1242]/[.C1242]" office:value-type="float" office:value="0.00114907407407407" calcext:value-type="float">
            <text:p>0,00114907407407407000</text:p>
          </table:table-cell>
          <table:table-cell table:formula="of:=[.D1243]-[.D12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B1242]+8" office:value-type="float" office:value="9936" calcext:value-type="float">
            <text:p>9936</text:p>
          </table:table-cell>
          <table:table-cell office:value-type="float" office:value="8640000" calcext:value-type="float">
            <text:p>8640000</text:p>
          </table:table-cell>
          <table:table-cell table:formula="of:=[.B1243]/[.C1243]" office:value-type="float" office:value="0.00115" calcext:value-type="float">
            <text:p>0,00115000000000000000</text:p>
          </table:table-cell>
          <table:table-cell table:formula="of:=[.D1244]-[.D12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B1243]+8" office:value-type="float" office:value="9944" calcext:value-type="float">
            <text:p>9944</text:p>
          </table:table-cell>
          <table:table-cell office:value-type="float" office:value="8640000" calcext:value-type="float">
            <text:p>8640000</text:p>
          </table:table-cell>
          <table:table-cell table:formula="of:=[.B1244]/[.C1244]" office:value-type="float" office:value="0.00115092592592593" calcext:value-type="float">
            <text:p>0,00115092592592593000</text:p>
          </table:table-cell>
          <table:table-cell table:formula="of:=[.D1245]-[.D12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B1244]+8" office:value-type="float" office:value="9952" calcext:value-type="float">
            <text:p>9952</text:p>
          </table:table-cell>
          <table:table-cell office:value-type="float" office:value="8640000" calcext:value-type="float">
            <text:p>8640000</text:p>
          </table:table-cell>
          <table:table-cell table:formula="of:=[.B1245]/[.C1245]" office:value-type="float" office:value="0.00115185185185185" calcext:value-type="float">
            <text:p>0,00115185185185185000</text:p>
          </table:table-cell>
          <table:table-cell table:formula="of:=[.D1246]-[.D12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B1245]+8" office:value-type="float" office:value="9960" calcext:value-type="float">
            <text:p>9960</text:p>
          </table:table-cell>
          <table:table-cell office:value-type="float" office:value="8640000" calcext:value-type="float">
            <text:p>8640000</text:p>
          </table:table-cell>
          <table:table-cell table:formula="of:=[.B1246]/[.C1246]" office:value-type="float" office:value="0.00115277777777778" calcext:value-type="float">
            <text:p>0,00115277777777778000</text:p>
          </table:table-cell>
          <table:table-cell table:formula="of:=[.D1247]-[.D12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B1246]+8" office:value-type="float" office:value="9968" calcext:value-type="float">
            <text:p>9968</text:p>
          </table:table-cell>
          <table:table-cell office:value-type="float" office:value="8640000" calcext:value-type="float">
            <text:p>8640000</text:p>
          </table:table-cell>
          <table:table-cell table:formula="of:=[.B1247]/[.C1247]" office:value-type="float" office:value="0.0011537037037037" calcext:value-type="float">
            <text:p>0,00115370370370370000</text:p>
          </table:table-cell>
          <table:table-cell table:formula="of:=[.D1248]-[.D12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B1247]+8" office:value-type="float" office:value="9976" calcext:value-type="float">
            <text:p>9976</text:p>
          </table:table-cell>
          <table:table-cell office:value-type="float" office:value="8640000" calcext:value-type="float">
            <text:p>8640000</text:p>
          </table:table-cell>
          <table:table-cell table:formula="of:=[.B1248]/[.C1248]" office:value-type="float" office:value="0.00115462962962963" calcext:value-type="float">
            <text:p>0,00115462962962963000</text:p>
          </table:table-cell>
          <table:table-cell table:formula="of:=[.D1249]-[.D12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B1248]+8" office:value-type="float" office:value="9984" calcext:value-type="float">
            <text:p>9984</text:p>
          </table:table-cell>
          <table:table-cell office:value-type="float" office:value="8640000" calcext:value-type="float">
            <text:p>8640000</text:p>
          </table:table-cell>
          <table:table-cell table:formula="of:=[.B1249]/[.C1249]" office:value-type="float" office:value="0.00115555555555556" calcext:value-type="float">
            <text:p>0,00115555555555556000</text:p>
          </table:table-cell>
          <table:table-cell table:formula="of:=[.D1250]-[.D12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B1249]+8" office:value-type="float" office:value="9992" calcext:value-type="float">
            <text:p>9992</text:p>
          </table:table-cell>
          <table:table-cell office:value-type="float" office:value="8640000" calcext:value-type="float">
            <text:p>8640000</text:p>
          </table:table-cell>
          <table:table-cell table:formula="of:=[.B1250]/[.C1250]" office:value-type="float" office:value="0.00115648148148148" calcext:value-type="float">
            <text:p>0,00115648148148148000</text:p>
          </table:table-cell>
          <table:table-cell table:formula="of:=[.D1251]-[.D12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1250]+8" office:value-type="float" office:value="10000" calcext:value-type="float">
            <text:p>10000</text:p>
          </table:table-cell>
          <table:table-cell office:value-type="float" office:value="8640000" calcext:value-type="float">
            <text:p>8640000</text:p>
          </table:table-cell>
          <table:table-cell table:formula="of:=[.B1251]/[.C1251]" office:value-type="float" office:value="0.00115740740740741" calcext:value-type="float">
            <text:p>0,00115740740740741000</text:p>
          </table:table-cell>
          <table:table-cell table:formula="of:=[.D1252]-[.D12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B1251]+8" office:value-type="float" office:value="10008" calcext:value-type="float">
            <text:p>10008</text:p>
          </table:table-cell>
          <table:table-cell office:value-type="float" office:value="8640000" calcext:value-type="float">
            <text:p>8640000</text:p>
          </table:table-cell>
          <table:table-cell table:formula="of:=[.B1252]/[.C1252]" office:value-type="float" office:value="0.00115833333333333" calcext:value-type="float">
            <text:p>0,00115833333333333000</text:p>
          </table:table-cell>
          <table:table-cell table:formula="of:=[.D1253]-[.D12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B1252]+8" office:value-type="float" office:value="10016" calcext:value-type="float">
            <text:p>10016</text:p>
          </table:table-cell>
          <table:table-cell office:value-type="float" office:value="8640000" calcext:value-type="float">
            <text:p>8640000</text:p>
          </table:table-cell>
          <table:table-cell table:formula="of:=[.B1253]/[.C1253]" office:value-type="float" office:value="0.00115925925925926" calcext:value-type="float">
            <text:p>0,00115925925925926000</text:p>
          </table:table-cell>
          <table:table-cell table:formula="of:=[.D1254]-[.D12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B1253]+8" office:value-type="float" office:value="10024" calcext:value-type="float">
            <text:p>10024</text:p>
          </table:table-cell>
          <table:table-cell office:value-type="float" office:value="8640000" calcext:value-type="float">
            <text:p>8640000</text:p>
          </table:table-cell>
          <table:table-cell table:formula="of:=[.B1254]/[.C1254]" office:value-type="float" office:value="0.00116018518518519" calcext:value-type="float">
            <text:p>0,00116018518518519000</text:p>
          </table:table-cell>
          <table:table-cell table:formula="of:=[.D1255]-[.D12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B1254]+8" office:value-type="float" office:value="10032" calcext:value-type="float">
            <text:p>10032</text:p>
          </table:table-cell>
          <table:table-cell office:value-type="float" office:value="8640000" calcext:value-type="float">
            <text:p>8640000</text:p>
          </table:table-cell>
          <table:table-cell table:formula="of:=[.B1255]/[.C1255]" office:value-type="float" office:value="0.00116111111111111" calcext:value-type="float">
            <text:p>0,00116111111111111000</text:p>
          </table:table-cell>
          <table:table-cell table:formula="of:=[.D1256]-[.D12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B1255]+8" office:value-type="float" office:value="10040" calcext:value-type="float">
            <text:p>10040</text:p>
          </table:table-cell>
          <table:table-cell office:value-type="float" office:value="8640000" calcext:value-type="float">
            <text:p>8640000</text:p>
          </table:table-cell>
          <table:table-cell table:formula="of:=[.B1256]/[.C1256]" office:value-type="float" office:value="0.00116203703703704" calcext:value-type="float">
            <text:p>0,00116203703703704000</text:p>
          </table:table-cell>
          <table:table-cell table:formula="of:=[.D1257]-[.D12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B1256]+8" office:value-type="float" office:value="10048" calcext:value-type="float">
            <text:p>10048</text:p>
          </table:table-cell>
          <table:table-cell office:value-type="float" office:value="8640000" calcext:value-type="float">
            <text:p>8640000</text:p>
          </table:table-cell>
          <table:table-cell table:formula="of:=[.B1257]/[.C1257]" office:value-type="float" office:value="0.00116296296296296" calcext:value-type="float">
            <text:p>0,00116296296296296000</text:p>
          </table:table-cell>
          <table:table-cell table:formula="of:=[.D1258]-[.D12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B1257]+8" office:value-type="float" office:value="10056" calcext:value-type="float">
            <text:p>10056</text:p>
          </table:table-cell>
          <table:table-cell office:value-type="float" office:value="8640000" calcext:value-type="float">
            <text:p>8640000</text:p>
          </table:table-cell>
          <table:table-cell table:formula="of:=[.B1258]/[.C1258]" office:value-type="float" office:value="0.00116388888888889" calcext:value-type="float">
            <text:p>0,00116388888888889000</text:p>
          </table:table-cell>
          <table:table-cell table:formula="of:=[.D1259]-[.D1258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B1258]+8" office:value-type="float" office:value="10064" calcext:value-type="float">
            <text:p>10064</text:p>
          </table:table-cell>
          <table:table-cell office:value-type="float" office:value="8640000" calcext:value-type="float">
            <text:p>8640000</text:p>
          </table:table-cell>
          <table:table-cell table:formula="of:=[.B1259]/[.C1259]" office:value-type="float" office:value="0.00116481481481482" calcext:value-type="float">
            <text:p>0,00116481481481482000</text:p>
          </table:table-cell>
          <table:table-cell table:formula="of:=[.D1260]-[.D12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B1259]+8" office:value-type="float" office:value="10072" calcext:value-type="float">
            <text:p>10072</text:p>
          </table:table-cell>
          <table:table-cell office:value-type="float" office:value="8640000" calcext:value-type="float">
            <text:p>8640000</text:p>
          </table:table-cell>
          <table:table-cell table:formula="of:=[.B1260]/[.C1260]" office:value-type="float" office:value="0.00116574074074074" calcext:value-type="float">
            <text:p>0,00116574074074074000</text:p>
          </table:table-cell>
          <table:table-cell table:formula="of:=[.D1261]-[.D12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B1260]+8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1261]/[.C1261]" office:value-type="float" office:value="0.00116666666666667" calcext:value-type="float">
            <text:p>0,00116666666666667000</text:p>
          </table:table-cell>
          <table:table-cell table:formula="of:=[.D1262]-[.D12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B1261]+8" office:value-type="float" office:value="10088" calcext:value-type="float">
            <text:p>10088</text:p>
          </table:table-cell>
          <table:table-cell office:value-type="float" office:value="8640000" calcext:value-type="float">
            <text:p>8640000</text:p>
          </table:table-cell>
          <table:table-cell table:formula="of:=[.B1262]/[.C1262]" office:value-type="float" office:value="0.00116759259259259" calcext:value-type="float">
            <text:p>0,00116759259259259000</text:p>
          </table:table-cell>
          <table:table-cell table:formula="of:=[.D1263]-[.D12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B1262]+8" office:value-type="float" office:value="10096" calcext:value-type="float">
            <text:p>10096</text:p>
          </table:table-cell>
          <table:table-cell office:value-type="float" office:value="8640000" calcext:value-type="float">
            <text:p>8640000</text:p>
          </table:table-cell>
          <table:table-cell table:formula="of:=[.B1263]/[.C1263]" office:value-type="float" office:value="0.00116851851851852" calcext:value-type="float">
            <text:p>0,00116851851851852000</text:p>
          </table:table-cell>
          <table:table-cell table:formula="of:=[.D1264]-[.D12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B1263]+8" office:value-type="float" office:value="10104" calcext:value-type="float">
            <text:p>10104</text:p>
          </table:table-cell>
          <table:table-cell office:value-type="float" office:value="8640000" calcext:value-type="float">
            <text:p>8640000</text:p>
          </table:table-cell>
          <table:table-cell table:formula="of:=[.B1264]/[.C1264]" office:value-type="float" office:value="0.00116944444444444" calcext:value-type="float">
            <text:p>0,00116944444444444000</text:p>
          </table:table-cell>
          <table:table-cell table:formula="of:=[.D1265]-[.D12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B1264]+8" office:value-type="float" office:value="10112" calcext:value-type="float">
            <text:p>10112</text:p>
          </table:table-cell>
          <table:table-cell office:value-type="float" office:value="8640000" calcext:value-type="float">
            <text:p>8640000</text:p>
          </table:table-cell>
          <table:table-cell table:formula="of:=[.B1265]/[.C1265]" office:value-type="float" office:value="0.00117037037037037" calcext:value-type="float">
            <text:p>0,00117037037037037000</text:p>
          </table:table-cell>
          <table:table-cell table:formula="of:=[.D1266]-[.D12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B1265]+8" office:value-type="float" office:value="10120" calcext:value-type="float">
            <text:p>10120</text:p>
          </table:table-cell>
          <table:table-cell office:value-type="float" office:value="8640000" calcext:value-type="float">
            <text:p>8640000</text:p>
          </table:table-cell>
          <table:table-cell table:formula="of:=[.B1266]/[.C1266]" office:value-type="float" office:value="0.0011712962962963" calcext:value-type="float">
            <text:p>0,00117129629629630000</text:p>
          </table:table-cell>
          <table:table-cell table:formula="of:=[.D1267]-[.D12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B1266]+8" office:value-type="float" office:value="10128" calcext:value-type="float">
            <text:p>10128</text:p>
          </table:table-cell>
          <table:table-cell office:value-type="float" office:value="8640000" calcext:value-type="float">
            <text:p>8640000</text:p>
          </table:table-cell>
          <table:table-cell table:formula="of:=[.B1267]/[.C1267]" office:value-type="float" office:value="0.00117222222222222" calcext:value-type="float">
            <text:p>0,00117222222222222000</text:p>
          </table:table-cell>
          <table:table-cell table:formula="of:=[.D1268]-[.D12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B1267]+8" office:value-type="float" office:value="10136" calcext:value-type="float">
            <text:p>10136</text:p>
          </table:table-cell>
          <table:table-cell office:value-type="float" office:value="8640000" calcext:value-type="float">
            <text:p>8640000</text:p>
          </table:table-cell>
          <table:table-cell table:formula="of:=[.B1268]/[.C1268]" office:value-type="float" office:value="0.00117314814814815" calcext:value-type="float">
            <text:p>0,00117314814814815000</text:p>
          </table:table-cell>
          <table:table-cell table:formula="of:=[.D1269]-[.D12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B1268]+8" office:value-type="float" office:value="10144" calcext:value-type="float">
            <text:p>10144</text:p>
          </table:table-cell>
          <table:table-cell office:value-type="float" office:value="8640000" calcext:value-type="float">
            <text:p>8640000</text:p>
          </table:table-cell>
          <table:table-cell table:formula="of:=[.B1269]/[.C1269]" office:value-type="float" office:value="0.00117407407407407" calcext:value-type="float">
            <text:p>0,00117407407407407000</text:p>
          </table:table-cell>
          <table:table-cell table:formula="of:=[.D1270]-[.D12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B1269]+8" office:value-type="float" office:value="10152" calcext:value-type="float">
            <text:p>10152</text:p>
          </table:table-cell>
          <table:table-cell office:value-type="float" office:value="8640000" calcext:value-type="float">
            <text:p>8640000</text:p>
          </table:table-cell>
          <table:table-cell table:formula="of:=[.B1270]/[.C1270]" office:value-type="float" office:value="0.001175" calcext:value-type="float">
            <text:p>0,00117500000000000000</text:p>
          </table:table-cell>
          <table:table-cell table:formula="of:=[.D1271]-[.D12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B1270]+8" office:value-type="float" office:value="10160" calcext:value-type="float">
            <text:p>10160</text:p>
          </table:table-cell>
          <table:table-cell office:value-type="float" office:value="8640000" calcext:value-type="float">
            <text:p>8640000</text:p>
          </table:table-cell>
          <table:table-cell table:formula="of:=[.B1271]/[.C1271]" office:value-type="float" office:value="0.00117592592592593" calcext:value-type="float">
            <text:p>0,00117592592592593000</text:p>
          </table:table-cell>
          <table:table-cell table:formula="of:=[.D1272]-[.D12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B1271]+8" office:value-type="float" office:value="10168" calcext:value-type="float">
            <text:p>10168</text:p>
          </table:table-cell>
          <table:table-cell office:value-type="float" office:value="8640000" calcext:value-type="float">
            <text:p>8640000</text:p>
          </table:table-cell>
          <table:table-cell table:formula="of:=[.B1272]/[.C1272]" office:value-type="float" office:value="0.00117685185185185" calcext:value-type="float">
            <text:p>0,00117685185185185000</text:p>
          </table:table-cell>
          <table:table-cell table:formula="of:=[.D1273]-[.D12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B1272]+8" office:value-type="float" office:value="10176" calcext:value-type="float">
            <text:p>10176</text:p>
          </table:table-cell>
          <table:table-cell office:value-type="float" office:value="8640000" calcext:value-type="float">
            <text:p>8640000</text:p>
          </table:table-cell>
          <table:table-cell table:formula="of:=[.B1273]/[.C1273]" office:value-type="float" office:value="0.00117777777777778" calcext:value-type="float">
            <text:p>0,00117777777777778000</text:p>
          </table:table-cell>
          <table:table-cell table:formula="of:=[.D1274]-[.D12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B1273]+8" office:value-type="float" office:value="10184" calcext:value-type="float">
            <text:p>10184</text:p>
          </table:table-cell>
          <table:table-cell office:value-type="float" office:value="8640000" calcext:value-type="float">
            <text:p>8640000</text:p>
          </table:table-cell>
          <table:table-cell table:formula="of:=[.B1274]/[.C1274]" office:value-type="float" office:value="0.0011787037037037" calcext:value-type="float">
            <text:p>0,00117870370370370000</text:p>
          </table:table-cell>
          <table:table-cell table:formula="of:=[.D1275]-[.D12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B1274]+8" office:value-type="float" office:value="10192" calcext:value-type="float">
            <text:p>10192</text:p>
          </table:table-cell>
          <table:table-cell office:value-type="float" office:value="8640000" calcext:value-type="float">
            <text:p>8640000</text:p>
          </table:table-cell>
          <table:table-cell table:formula="of:=[.B1275]/[.C1275]" office:value-type="float" office:value="0.00117962962962963" calcext:value-type="float">
            <text:p>0,00117962962962963000</text:p>
          </table:table-cell>
          <table:table-cell table:formula="of:=[.D1276]-[.D12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B1275]+8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1276]/[.C1276]" office:value-type="float" office:value="0.00118055555555556" calcext:value-type="float">
            <text:p>0,00118055555555556000</text:p>
          </table:table-cell>
          <table:table-cell table:formula="of:=[.D1277]-[.D12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B1276]+8" office:value-type="float" office:value="10208" calcext:value-type="float">
            <text:p>10208</text:p>
          </table:table-cell>
          <table:table-cell office:value-type="float" office:value="8640000" calcext:value-type="float">
            <text:p>8640000</text:p>
          </table:table-cell>
          <table:table-cell table:formula="of:=[.B1277]/[.C1277]" office:value-type="float" office:value="0.00118148148148148" calcext:value-type="float">
            <text:p>0,00118148148148148000</text:p>
          </table:table-cell>
          <table:table-cell table:formula="of:=[.D1278]-[.D12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B1277]+8" office:value-type="float" office:value="10216" calcext:value-type="float">
            <text:p>10216</text:p>
          </table:table-cell>
          <table:table-cell office:value-type="float" office:value="8640000" calcext:value-type="float">
            <text:p>8640000</text:p>
          </table:table-cell>
          <table:table-cell table:formula="of:=[.B1278]/[.C1278]" office:value-type="float" office:value="0.00118240740740741" calcext:value-type="float">
            <text:p>0,00118240740740741000</text:p>
          </table:table-cell>
          <table:table-cell table:formula="of:=[.D1279]-[.D12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B1278]+8" office:value-type="float" office:value="10224" calcext:value-type="float">
            <text:p>10224</text:p>
          </table:table-cell>
          <table:table-cell office:value-type="float" office:value="8640000" calcext:value-type="float">
            <text:p>8640000</text:p>
          </table:table-cell>
          <table:table-cell table:formula="of:=[.B1279]/[.C1279]" office:value-type="float" office:value="0.00118333333333333" calcext:value-type="float">
            <text:p>0,00118333333333333000</text:p>
          </table:table-cell>
          <table:table-cell table:formula="of:=[.D1280]-[.D12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B1279]+8" office:value-type="float" office:value="10232" calcext:value-type="float">
            <text:p>10232</text:p>
          </table:table-cell>
          <table:table-cell office:value-type="float" office:value="8640000" calcext:value-type="float">
            <text:p>8640000</text:p>
          </table:table-cell>
          <table:table-cell table:formula="of:=[.B1280]/[.C1280]" office:value-type="float" office:value="0.00118425925925926" calcext:value-type="float">
            <text:p>0,00118425925925926000</text:p>
          </table:table-cell>
          <table:table-cell table:formula="of:=[.D1281]-[.D12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B1280]+8" office:value-type="float" office:value="10240" calcext:value-type="float">
            <text:p>10240</text:p>
          </table:table-cell>
          <table:table-cell office:value-type="float" office:value="8640000" calcext:value-type="float">
            <text:p>8640000</text:p>
          </table:table-cell>
          <table:table-cell table:formula="of:=[.B1281]/[.C1281]" office:value-type="float" office:value="0.00118518518518519" calcext:value-type="float">
            <text:p>0,00118518518518519000</text:p>
          </table:table-cell>
          <table:table-cell table:formula="of:=[.D1282]-[.D12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B1281]+8" office:value-type="float" office:value="10248" calcext:value-type="float">
            <text:p>10248</text:p>
          </table:table-cell>
          <table:table-cell office:value-type="float" office:value="8640000" calcext:value-type="float">
            <text:p>8640000</text:p>
          </table:table-cell>
          <table:table-cell table:formula="of:=[.B1282]/[.C1282]" office:value-type="float" office:value="0.00118611111111111" calcext:value-type="float">
            <text:p>0,00118611111111111000</text:p>
          </table:table-cell>
          <table:table-cell table:formula="of:=[.D1283]-[.D12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B1282]+8" office:value-type="float" office:value="10256" calcext:value-type="float">
            <text:p>10256</text:p>
          </table:table-cell>
          <table:table-cell office:value-type="float" office:value="8640000" calcext:value-type="float">
            <text:p>8640000</text:p>
          </table:table-cell>
          <table:table-cell table:formula="of:=[.B1283]/[.C1283]" office:value-type="float" office:value="0.00118703703703704" calcext:value-type="float">
            <text:p>0,00118703703703704000</text:p>
          </table:table-cell>
          <table:table-cell table:formula="of:=[.D1284]-[.D12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B1283]+8" office:value-type="float" office:value="10264" calcext:value-type="float">
            <text:p>10264</text:p>
          </table:table-cell>
          <table:table-cell office:value-type="float" office:value="8640000" calcext:value-type="float">
            <text:p>8640000</text:p>
          </table:table-cell>
          <table:table-cell table:formula="of:=[.B1284]/[.C1284]" office:value-type="float" office:value="0.00118796296296296" calcext:value-type="float">
            <text:p>0,00118796296296296000</text:p>
          </table:table-cell>
          <table:table-cell table:formula="of:=[.D1285]-[.D12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B1284]+8" office:value-type="float" office:value="10272" calcext:value-type="float">
            <text:p>10272</text:p>
          </table:table-cell>
          <table:table-cell office:value-type="float" office:value="8640000" calcext:value-type="float">
            <text:p>8640000</text:p>
          </table:table-cell>
          <table:table-cell table:formula="of:=[.B1285]/[.C1285]" office:value-type="float" office:value="0.00118888888888889" calcext:value-type="float">
            <text:p>0,00118888888888889000</text:p>
          </table:table-cell>
          <table:table-cell table:formula="of:=[.D1286]-[.D12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B1285]+8" office:value-type="float" office:value="10280" calcext:value-type="float">
            <text:p>10280</text:p>
          </table:table-cell>
          <table:table-cell office:value-type="float" office:value="8640000" calcext:value-type="float">
            <text:p>8640000</text:p>
          </table:table-cell>
          <table:table-cell table:formula="of:=[.B1286]/[.C1286]" office:value-type="float" office:value="0.00118981481481481" calcext:value-type="float">
            <text:p>0,00118981481481481000</text:p>
          </table:table-cell>
          <table:table-cell table:formula="of:=[.D1287]-[.D12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B1286]+8" office:value-type="float" office:value="10288" calcext:value-type="float">
            <text:p>10288</text:p>
          </table:table-cell>
          <table:table-cell office:value-type="float" office:value="8640000" calcext:value-type="float">
            <text:p>8640000</text:p>
          </table:table-cell>
          <table:table-cell table:formula="of:=[.B1287]/[.C1287]" office:value-type="float" office:value="0.00119074074074074" calcext:value-type="float">
            <text:p>0,00119074074074074000</text:p>
          </table:table-cell>
          <table:table-cell table:formula="of:=[.D1288]-[.D12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B1287]+8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1288]/[.C1288]" office:value-type="float" office:value="0.00119166666666667" calcext:value-type="float">
            <text:p>0,00119166666666667000</text:p>
          </table:table-cell>
          <table:table-cell table:formula="of:=[.D1289]-[.D12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B1288]+8" office:value-type="float" office:value="10304" calcext:value-type="float">
            <text:p>10304</text:p>
          </table:table-cell>
          <table:table-cell office:value-type="float" office:value="8640000" calcext:value-type="float">
            <text:p>8640000</text:p>
          </table:table-cell>
          <table:table-cell table:formula="of:=[.B1289]/[.C1289]" office:value-type="float" office:value="0.00119259259259259" calcext:value-type="float">
            <text:p>0,00119259259259259000</text:p>
          </table:table-cell>
          <table:table-cell table:formula="of:=[.D1290]-[.D12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B1289]+8" office:value-type="float" office:value="10312" calcext:value-type="float">
            <text:p>10312</text:p>
          </table:table-cell>
          <table:table-cell office:value-type="float" office:value="8640000" calcext:value-type="float">
            <text:p>8640000</text:p>
          </table:table-cell>
          <table:table-cell table:formula="of:=[.B1290]/[.C1290]" office:value-type="float" office:value="0.00119351851851852" calcext:value-type="float">
            <text:p>0,00119351851851852000</text:p>
          </table:table-cell>
          <table:table-cell table:formula="of:=[.D1291]-[.D12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B1290]+8" office:value-type="float" office:value="10320" calcext:value-type="float">
            <text:p>10320</text:p>
          </table:table-cell>
          <table:table-cell office:value-type="float" office:value="8640000" calcext:value-type="float">
            <text:p>8640000</text:p>
          </table:table-cell>
          <table:table-cell table:formula="of:=[.B1291]/[.C1291]" office:value-type="float" office:value="0.00119444444444444" calcext:value-type="float">
            <text:p>0,00119444444444444000</text:p>
          </table:table-cell>
          <table:table-cell table:formula="of:=[.D1292]-[.D12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B1291]+8" office:value-type="float" office:value="10328" calcext:value-type="float">
            <text:p>10328</text:p>
          </table:table-cell>
          <table:table-cell office:value-type="float" office:value="8640000" calcext:value-type="float">
            <text:p>8640000</text:p>
          </table:table-cell>
          <table:table-cell table:formula="of:=[.B1292]/[.C1292]" office:value-type="float" office:value="0.00119537037037037" calcext:value-type="float">
            <text:p>0,00119537037037037000</text:p>
          </table:table-cell>
          <table:table-cell table:formula="of:=[.D1293]-[.D12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B1292]+8" office:value-type="float" office:value="10336" calcext:value-type="float">
            <text:p>10336</text:p>
          </table:table-cell>
          <table:table-cell office:value-type="float" office:value="8640000" calcext:value-type="float">
            <text:p>8640000</text:p>
          </table:table-cell>
          <table:table-cell table:formula="of:=[.B1293]/[.C1293]" office:value-type="float" office:value="0.0011962962962963" calcext:value-type="float">
            <text:p>0,00119629629629630000</text:p>
          </table:table-cell>
          <table:table-cell table:formula="of:=[.D1294]-[.D12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B1293]+8" office:value-type="float" office:value="10344" calcext:value-type="float">
            <text:p>10344</text:p>
          </table:table-cell>
          <table:table-cell office:value-type="float" office:value="8640000" calcext:value-type="float">
            <text:p>8640000</text:p>
          </table:table-cell>
          <table:table-cell table:formula="of:=[.B1294]/[.C1294]" office:value-type="float" office:value="0.00119722222222222" calcext:value-type="float">
            <text:p>0,00119722222222222000</text:p>
          </table:table-cell>
          <table:table-cell table:formula="of:=[.D1295]-[.D12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B1294]+8" office:value-type="float" office:value="10352" calcext:value-type="float">
            <text:p>10352</text:p>
          </table:table-cell>
          <table:table-cell office:value-type="float" office:value="8640000" calcext:value-type="float">
            <text:p>8640000</text:p>
          </table:table-cell>
          <table:table-cell table:formula="of:=[.B1295]/[.C1295]" office:value-type="float" office:value="0.00119814814814815" calcext:value-type="float">
            <text:p>0,00119814814814815000</text:p>
          </table:table-cell>
          <table:table-cell table:formula="of:=[.D1296]-[.D12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B1295]+8" office:value-type="float" office:value="10360" calcext:value-type="float">
            <text:p>10360</text:p>
          </table:table-cell>
          <table:table-cell office:value-type="float" office:value="8640000" calcext:value-type="float">
            <text:p>8640000</text:p>
          </table:table-cell>
          <table:table-cell table:formula="of:=[.B1296]/[.C1296]" office:value-type="float" office:value="0.00119907407407407" calcext:value-type="float">
            <text:p>0,00119907407407407000</text:p>
          </table:table-cell>
          <table:table-cell table:formula="of:=[.D1297]-[.D12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B1296]+8" office:value-type="float" office:value="10368" calcext:value-type="float">
            <text:p>10368</text:p>
          </table:table-cell>
          <table:table-cell office:value-type="float" office:value="8640000" calcext:value-type="float">
            <text:p>8640000</text:p>
          </table:table-cell>
          <table:table-cell table:formula="of:=[.B1297]/[.C1297]" office:value-type="float" office:value="0.0012" calcext:value-type="float">
            <text:p>0,00120000000000000000</text:p>
          </table:table-cell>
          <table:table-cell table:formula="of:=[.D1298]-[.D1297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B1297]+8" office:value-type="float" office:value="10376" calcext:value-type="float">
            <text:p>10376</text:p>
          </table:table-cell>
          <table:table-cell office:value-type="float" office:value="8640000" calcext:value-type="float">
            <text:p>8640000</text:p>
          </table:table-cell>
          <table:table-cell table:formula="of:=[.B1298]/[.C1298]" office:value-type="float" office:value="0.00120092592592593" calcext:value-type="float">
            <text:p>0,00120092592592593000</text:p>
          </table:table-cell>
          <table:table-cell table:formula="of:=[.D1299]-[.D12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B1298]+8" office:value-type="float" office:value="10384" calcext:value-type="float">
            <text:p>10384</text:p>
          </table:table-cell>
          <table:table-cell office:value-type="float" office:value="8640000" calcext:value-type="float">
            <text:p>8640000</text:p>
          </table:table-cell>
          <table:table-cell table:formula="of:=[.B1299]/[.C1299]" office:value-type="float" office:value="0.00120185185185185" calcext:value-type="float">
            <text:p>0,00120185185185185000</text:p>
          </table:table-cell>
          <table:table-cell table:formula="of:=[.D1300]-[.D12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B1299]+8" office:value-type="float" office:value="10392" calcext:value-type="float">
            <text:p>10392</text:p>
          </table:table-cell>
          <table:table-cell office:value-type="float" office:value="8640000" calcext:value-type="float">
            <text:p>8640000</text:p>
          </table:table-cell>
          <table:table-cell table:formula="of:=[.B1300]/[.C1300]" office:value-type="float" office:value="0.00120277777777778" calcext:value-type="float">
            <text:p>0,00120277777777778000</text:p>
          </table:table-cell>
          <table:table-cell table:formula="of:=[.D1301]-[.D13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B1300]+8" office:value-type="float" office:value="10400" calcext:value-type="float">
            <text:p>10400</text:p>
          </table:table-cell>
          <table:table-cell office:value-type="float" office:value="8640000" calcext:value-type="float">
            <text:p>8640000</text:p>
          </table:table-cell>
          <table:table-cell table:formula="of:=[.B1301]/[.C1301]" office:value-type="float" office:value="0.0012037037037037" calcext:value-type="float">
            <text:p>0,00120370370370370000</text:p>
          </table:table-cell>
          <table:table-cell table:formula="of:=[.D1302]-[.D13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B1301]+8" office:value-type="float" office:value="10408" calcext:value-type="float">
            <text:p>10408</text:p>
          </table:table-cell>
          <table:table-cell office:value-type="float" office:value="8640000" calcext:value-type="float">
            <text:p>8640000</text:p>
          </table:table-cell>
          <table:table-cell table:formula="of:=[.B1302]/[.C1302]" office:value-type="float" office:value="0.00120462962962963" calcext:value-type="float">
            <text:p>0,00120462962962963000</text:p>
          </table:table-cell>
          <table:table-cell table:formula="of:=[.D1303]-[.D13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B1302]+8" office:value-type="float" office:value="10416" calcext:value-type="float">
            <text:p>10416</text:p>
          </table:table-cell>
          <table:table-cell office:value-type="float" office:value="8640000" calcext:value-type="float">
            <text:p>8640000</text:p>
          </table:table-cell>
          <table:table-cell table:formula="of:=[.B1303]/[.C1303]" office:value-type="float" office:value="0.00120555555555556" calcext:value-type="float">
            <text:p>0,00120555555555556000</text:p>
          </table:table-cell>
          <table:table-cell table:formula="of:=[.D1304]-[.D13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B1303]+8" office:value-type="float" office:value="10424" calcext:value-type="float">
            <text:p>10424</text:p>
          </table:table-cell>
          <table:table-cell office:value-type="float" office:value="8640000" calcext:value-type="float">
            <text:p>8640000</text:p>
          </table:table-cell>
          <table:table-cell table:formula="of:=[.B1304]/[.C1304]" office:value-type="float" office:value="0.00120648148148148" calcext:value-type="float">
            <text:p>0,00120648148148148000</text:p>
          </table:table-cell>
          <table:table-cell table:formula="of:=[.D1305]-[.D13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B1304]+8" office:value-type="float" office:value="10432" calcext:value-type="float">
            <text:p>10432</text:p>
          </table:table-cell>
          <table:table-cell office:value-type="float" office:value="8640000" calcext:value-type="float">
            <text:p>8640000</text:p>
          </table:table-cell>
          <table:table-cell table:formula="of:=[.B1305]/[.C1305]" office:value-type="float" office:value="0.00120740740740741" calcext:value-type="float">
            <text:p>0,00120740740740741000</text:p>
          </table:table-cell>
          <table:table-cell table:formula="of:=[.D1306]-[.D13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B1305]+8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1306]/[.C1306]" office:value-type="float" office:value="0.00120833333333333" calcext:value-type="float">
            <text:p>0,00120833333333333000</text:p>
          </table:table-cell>
          <table:table-cell table:formula="of:=[.D1307]-[.D13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B1306]+8" office:value-type="float" office:value="10448" calcext:value-type="float">
            <text:p>10448</text:p>
          </table:table-cell>
          <table:table-cell office:value-type="float" office:value="8640000" calcext:value-type="float">
            <text:p>8640000</text:p>
          </table:table-cell>
          <table:table-cell table:formula="of:=[.B1307]/[.C1307]" office:value-type="float" office:value="0.00120925925925926" calcext:value-type="float">
            <text:p>0,00120925925925926000</text:p>
          </table:table-cell>
          <table:table-cell table:formula="of:=[.D1308]-[.D13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B1307]+8" office:value-type="float" office:value="10456" calcext:value-type="float">
            <text:p>10456</text:p>
          </table:table-cell>
          <table:table-cell office:value-type="float" office:value="8640000" calcext:value-type="float">
            <text:p>8640000</text:p>
          </table:table-cell>
          <table:table-cell table:formula="of:=[.B1308]/[.C1308]" office:value-type="float" office:value="0.00121018518518519" calcext:value-type="float">
            <text:p>0,00121018518518519000</text:p>
          </table:table-cell>
          <table:table-cell table:formula="of:=[.D1309]-[.D13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B1308]+8" office:value-type="float" office:value="10464" calcext:value-type="float">
            <text:p>10464</text:p>
          </table:table-cell>
          <table:table-cell office:value-type="float" office:value="8640000" calcext:value-type="float">
            <text:p>8640000</text:p>
          </table:table-cell>
          <table:table-cell table:formula="of:=[.B1309]/[.C1309]" office:value-type="float" office:value="0.00121111111111111" calcext:value-type="float">
            <text:p>0,00121111111111111000</text:p>
          </table:table-cell>
          <table:table-cell table:formula="of:=[.D1310]-[.D13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B1309]+8" office:value-type="float" office:value="10472" calcext:value-type="float">
            <text:p>10472</text:p>
          </table:table-cell>
          <table:table-cell office:value-type="float" office:value="8640000" calcext:value-type="float">
            <text:p>8640000</text:p>
          </table:table-cell>
          <table:table-cell table:formula="of:=[.B1310]/[.C1310]" office:value-type="float" office:value="0.00121203703703704" calcext:value-type="float">
            <text:p>0,00121203703703704000</text:p>
          </table:table-cell>
          <table:table-cell table:formula="of:=[.D1311]-[.D13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B1310]+8" office:value-type="float" office:value="10480" calcext:value-type="float">
            <text:p>10480</text:p>
          </table:table-cell>
          <table:table-cell office:value-type="float" office:value="8640000" calcext:value-type="float">
            <text:p>8640000</text:p>
          </table:table-cell>
          <table:table-cell table:formula="of:=[.B1311]/[.C1311]" office:value-type="float" office:value="0.00121296296296296" calcext:value-type="float">
            <text:p>0,00121296296296296000</text:p>
          </table:table-cell>
          <table:table-cell table:formula="of:=[.D1312]-[.D13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B1311]+8" office:value-type="float" office:value="10488" calcext:value-type="float">
            <text:p>10488</text:p>
          </table:table-cell>
          <table:table-cell office:value-type="float" office:value="8640000" calcext:value-type="float">
            <text:p>8640000</text:p>
          </table:table-cell>
          <table:table-cell table:formula="of:=[.B1312]/[.C1312]" office:value-type="float" office:value="0.00121388888888889" calcext:value-type="float">
            <text:p>0,00121388888888889000</text:p>
          </table:table-cell>
          <table:table-cell table:formula="of:=[.D1313]-[.D13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B1312]+8" office:value-type="float" office:value="10496" calcext:value-type="float">
            <text:p>10496</text:p>
          </table:table-cell>
          <table:table-cell office:value-type="float" office:value="8640000" calcext:value-type="float">
            <text:p>8640000</text:p>
          </table:table-cell>
          <table:table-cell table:formula="of:=[.B1313]/[.C1313]" office:value-type="float" office:value="0.00121481481481481" calcext:value-type="float">
            <text:p>0,00121481481481481000</text:p>
          </table:table-cell>
          <table:table-cell table:formula="of:=[.D1314]-[.D13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B1313]+8" office:value-type="float" office:value="10504" calcext:value-type="float">
            <text:p>10504</text:p>
          </table:table-cell>
          <table:table-cell office:value-type="float" office:value="8640000" calcext:value-type="float">
            <text:p>8640000</text:p>
          </table:table-cell>
          <table:table-cell table:formula="of:=[.B1314]/[.C1314]" office:value-type="float" office:value="0.00121574074074074" calcext:value-type="float">
            <text:p>0,00121574074074074000</text:p>
          </table:table-cell>
          <table:table-cell table:formula="of:=[.D1315]-[.D13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B1314]+8" office:value-type="float" office:value="10512" calcext:value-type="float">
            <text:p>10512</text:p>
          </table:table-cell>
          <table:table-cell office:value-type="float" office:value="8640000" calcext:value-type="float">
            <text:p>8640000</text:p>
          </table:table-cell>
          <table:table-cell table:formula="of:=[.B1315]/[.C1315]" office:value-type="float" office:value="0.00121666666666667" calcext:value-type="float">
            <text:p>0,00121666666666667000</text:p>
          </table:table-cell>
          <table:table-cell table:formula="of:=[.D1316]-[.D13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B1315]+8" office:value-type="float" office:value="10520" calcext:value-type="float">
            <text:p>10520</text:p>
          </table:table-cell>
          <table:table-cell office:value-type="float" office:value="8640000" calcext:value-type="float">
            <text:p>8640000</text:p>
          </table:table-cell>
          <table:table-cell table:formula="of:=[.B1316]/[.C1316]" office:value-type="float" office:value="0.00121759259259259" calcext:value-type="float">
            <text:p>0,00121759259259259000</text:p>
          </table:table-cell>
          <table:table-cell table:formula="of:=[.D1317]-[.D13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B1316]+8" office:value-type="float" office:value="10528" calcext:value-type="float">
            <text:p>10528</text:p>
          </table:table-cell>
          <table:table-cell office:value-type="float" office:value="8640000" calcext:value-type="float">
            <text:p>8640000</text:p>
          </table:table-cell>
          <table:table-cell table:formula="of:=[.B1317]/[.C1317]" office:value-type="float" office:value="0.00121851851851852" calcext:value-type="float">
            <text:p>0,00121851851851852000</text:p>
          </table:table-cell>
          <table:table-cell table:formula="of:=[.D1318]-[.D13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B1317]+8" office:value-type="float" office:value="10536" calcext:value-type="float">
            <text:p>10536</text:p>
          </table:table-cell>
          <table:table-cell office:value-type="float" office:value="8640000" calcext:value-type="float">
            <text:p>8640000</text:p>
          </table:table-cell>
          <table:table-cell table:formula="of:=[.B1318]/[.C1318]" office:value-type="float" office:value="0.00121944444444444" calcext:value-type="float">
            <text:p>0,00121944444444444000</text:p>
          </table:table-cell>
          <table:table-cell table:formula="of:=[.D1319]-[.D13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B1318]+8" office:value-type="float" office:value="10544" calcext:value-type="float">
            <text:p>10544</text:p>
          </table:table-cell>
          <table:table-cell office:value-type="float" office:value="8640000" calcext:value-type="float">
            <text:p>8640000</text:p>
          </table:table-cell>
          <table:table-cell table:formula="of:=[.B1319]/[.C1319]" office:value-type="float" office:value="0.00122037037037037" calcext:value-type="float">
            <text:p>0,00122037037037037000</text:p>
          </table:table-cell>
          <table:table-cell table:formula="of:=[.D1320]-[.D13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B1319]+8" office:value-type="float" office:value="10552" calcext:value-type="float">
            <text:p>10552</text:p>
          </table:table-cell>
          <table:table-cell office:value-type="float" office:value="8640000" calcext:value-type="float">
            <text:p>8640000</text:p>
          </table:table-cell>
          <table:table-cell table:formula="of:=[.B1320]/[.C1320]" office:value-type="float" office:value="0.0012212962962963" calcext:value-type="float">
            <text:p>0,00122129629629630000</text:p>
          </table:table-cell>
          <table:table-cell table:formula="of:=[.D1321]-[.D13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B1320]+8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1321]/[.C1321]" office:value-type="float" office:value="0.00122222222222222" calcext:value-type="float">
            <text:p>0,00122222222222222000</text:p>
          </table:table-cell>
          <table:table-cell table:formula="of:=[.D1322]-[.D13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B1321]+8" office:value-type="float" office:value="10568" calcext:value-type="float">
            <text:p>10568</text:p>
          </table:table-cell>
          <table:table-cell office:value-type="float" office:value="8640000" calcext:value-type="float">
            <text:p>8640000</text:p>
          </table:table-cell>
          <table:table-cell table:formula="of:=[.B1322]/[.C1322]" office:value-type="float" office:value="0.00122314814814815" calcext:value-type="float">
            <text:p>0,00122314814814815000</text:p>
          </table:table-cell>
          <table:table-cell table:formula="of:=[.D1323]-[.D13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B1322]+8" office:value-type="float" office:value="10576" calcext:value-type="float">
            <text:p>10576</text:p>
          </table:table-cell>
          <table:table-cell office:value-type="float" office:value="8640000" calcext:value-type="float">
            <text:p>8640000</text:p>
          </table:table-cell>
          <table:table-cell table:formula="of:=[.B1323]/[.C1323]" office:value-type="float" office:value="0.00122407407407407" calcext:value-type="float">
            <text:p>0,00122407407407407000</text:p>
          </table:table-cell>
          <table:table-cell table:formula="of:=[.D1324]-[.D13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B1323]+8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1324]/[.C1324]" office:value-type="float" office:value="0.001225" calcext:value-type="float">
            <text:p>0,00122500000000000000</text:p>
          </table:table-cell>
          <table:table-cell table:formula="of:=[.D1325]-[.D13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B1324]+8" office:value-type="float" office:value="10592" calcext:value-type="float">
            <text:p>10592</text:p>
          </table:table-cell>
          <table:table-cell office:value-type="float" office:value="8640000" calcext:value-type="float">
            <text:p>8640000</text:p>
          </table:table-cell>
          <table:table-cell table:formula="of:=[.B1325]/[.C1325]" office:value-type="float" office:value="0.00122592592592593" calcext:value-type="float">
            <text:p>0,00122592592592593000</text:p>
          </table:table-cell>
          <table:table-cell table:formula="of:=[.D1326]-[.D13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B1325]+8" office:value-type="float" office:value="10600" calcext:value-type="float">
            <text:p>10600</text:p>
          </table:table-cell>
          <table:table-cell office:value-type="float" office:value="8640000" calcext:value-type="float">
            <text:p>8640000</text:p>
          </table:table-cell>
          <table:table-cell table:formula="of:=[.B1326]/[.C1326]" office:value-type="float" office:value="0.00122685185185185" calcext:value-type="float">
            <text:p>0,00122685185185185000</text:p>
          </table:table-cell>
          <table:table-cell table:formula="of:=[.D1327]-[.D13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B1326]+8" office:value-type="float" office:value="10608" calcext:value-type="float">
            <text:p>10608</text:p>
          </table:table-cell>
          <table:table-cell office:value-type="float" office:value="8640000" calcext:value-type="float">
            <text:p>8640000</text:p>
          </table:table-cell>
          <table:table-cell table:formula="of:=[.B1327]/[.C1327]" office:value-type="float" office:value="0.00122777777777778" calcext:value-type="float">
            <text:p>0,00122777777777778000</text:p>
          </table:table-cell>
          <table:table-cell table:formula="of:=[.D1328]-[.D13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B1327]+8" office:value-type="float" office:value="10616" calcext:value-type="float">
            <text:p>10616</text:p>
          </table:table-cell>
          <table:table-cell office:value-type="float" office:value="8640000" calcext:value-type="float">
            <text:p>8640000</text:p>
          </table:table-cell>
          <table:table-cell table:formula="of:=[.B1328]/[.C1328]" office:value-type="float" office:value="0.0012287037037037" calcext:value-type="float">
            <text:p>0,00122870370370370000</text:p>
          </table:table-cell>
          <table:table-cell table:formula="of:=[.D1329]-[.D13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B1328]+8" office:value-type="float" office:value="10624" calcext:value-type="float">
            <text:p>10624</text:p>
          </table:table-cell>
          <table:table-cell office:value-type="float" office:value="8640000" calcext:value-type="float">
            <text:p>8640000</text:p>
          </table:table-cell>
          <table:table-cell table:formula="of:=[.B1329]/[.C1329]" office:value-type="float" office:value="0.00122962962962963" calcext:value-type="float">
            <text:p>0,00122962962962963000</text:p>
          </table:table-cell>
          <table:table-cell table:formula="of:=[.D1330]-[.D13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B1329]+8" office:value-type="float" office:value="10632" calcext:value-type="float">
            <text:p>10632</text:p>
          </table:table-cell>
          <table:table-cell office:value-type="float" office:value="8640000" calcext:value-type="float">
            <text:p>8640000</text:p>
          </table:table-cell>
          <table:table-cell table:formula="of:=[.B1330]/[.C1330]" office:value-type="float" office:value="0.00123055555555556" calcext:value-type="float">
            <text:p>0,00123055555555556000</text:p>
          </table:table-cell>
          <table:table-cell table:formula="of:=[.D1331]-[.D13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B1330]+8" office:value-type="float" office:value="10640" calcext:value-type="float">
            <text:p>10640</text:p>
          </table:table-cell>
          <table:table-cell office:value-type="float" office:value="8640000" calcext:value-type="float">
            <text:p>8640000</text:p>
          </table:table-cell>
          <table:table-cell table:formula="of:=[.B1331]/[.C1331]" office:value-type="float" office:value="0.00123148148148148" calcext:value-type="float">
            <text:p>0,00123148148148148000</text:p>
          </table:table-cell>
          <table:table-cell table:formula="of:=[.D1332]-[.D13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B1331]+8" office:value-type="float" office:value="10648" calcext:value-type="float">
            <text:p>10648</text:p>
          </table:table-cell>
          <table:table-cell office:value-type="float" office:value="8640000" calcext:value-type="float">
            <text:p>8640000</text:p>
          </table:table-cell>
          <table:table-cell table:formula="of:=[.B1332]/[.C1332]" office:value-type="float" office:value="0.00123240740740741" calcext:value-type="float">
            <text:p>0,00123240740740741000</text:p>
          </table:table-cell>
          <table:table-cell table:formula="of:=[.D1333]-[.D13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B1332]+8" office:value-type="float" office:value="10656" calcext:value-type="float">
            <text:p>10656</text:p>
          </table:table-cell>
          <table:table-cell office:value-type="float" office:value="8640000" calcext:value-type="float">
            <text:p>8640000</text:p>
          </table:table-cell>
          <table:table-cell table:formula="of:=[.B1333]/[.C1333]" office:value-type="float" office:value="0.00123333333333333" calcext:value-type="float">
            <text:p>0,00123333333333333000</text:p>
          </table:table-cell>
          <table:table-cell table:formula="of:=[.D1334]-[.D13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B1333]+8" office:value-type="float" office:value="10664" calcext:value-type="float">
            <text:p>10664</text:p>
          </table:table-cell>
          <table:table-cell office:value-type="float" office:value="8640000" calcext:value-type="float">
            <text:p>8640000</text:p>
          </table:table-cell>
          <table:table-cell table:formula="of:=[.B1334]/[.C1334]" office:value-type="float" office:value="0.00123425925925926" calcext:value-type="float">
            <text:p>0,00123425925925926000</text:p>
          </table:table-cell>
          <table:table-cell table:formula="of:=[.D1335]-[.D13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B1334]+8" office:value-type="float" office:value="10672" calcext:value-type="float">
            <text:p>10672</text:p>
          </table:table-cell>
          <table:table-cell office:value-type="float" office:value="8640000" calcext:value-type="float">
            <text:p>8640000</text:p>
          </table:table-cell>
          <table:table-cell table:formula="of:=[.B1335]/[.C1335]" office:value-type="float" office:value="0.00123518518518519" calcext:value-type="float">
            <text:p>0,00123518518518519000</text:p>
          </table:table-cell>
          <table:table-cell table:formula="of:=[.D1336]-[.D13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B1335]+8" office:value-type="float" office:value="10680" calcext:value-type="float">
            <text:p>10680</text:p>
          </table:table-cell>
          <table:table-cell office:value-type="float" office:value="8640000" calcext:value-type="float">
            <text:p>8640000</text:p>
          </table:table-cell>
          <table:table-cell table:formula="of:=[.B1336]/[.C1336]" office:value-type="float" office:value="0.00123611111111111" calcext:value-type="float">
            <text:p>0,00123611111111111000</text:p>
          </table:table-cell>
          <table:table-cell table:formula="of:=[.D1337]-[.D1336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B1336]+8" office:value-type="float" office:value="10688" calcext:value-type="float">
            <text:p>10688</text:p>
          </table:table-cell>
          <table:table-cell office:value-type="float" office:value="8640000" calcext:value-type="float">
            <text:p>8640000</text:p>
          </table:table-cell>
          <table:table-cell table:formula="of:=[.B1337]/[.C1337]" office:value-type="float" office:value="0.00123703703703704" calcext:value-type="float">
            <text:p>0,00123703703703704000</text:p>
          </table:table-cell>
          <table:table-cell table:formula="of:=[.D1338]-[.D13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B1337]+8" office:value-type="float" office:value="10696" calcext:value-type="float">
            <text:p>10696</text:p>
          </table:table-cell>
          <table:table-cell office:value-type="float" office:value="8640000" calcext:value-type="float">
            <text:p>8640000</text:p>
          </table:table-cell>
          <table:table-cell table:formula="of:=[.B1338]/[.C1338]" office:value-type="float" office:value="0.00123796296296296" calcext:value-type="float">
            <text:p>0,00123796296296296000</text:p>
          </table:table-cell>
          <table:table-cell table:formula="of:=[.D1339]-[.D13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B1338]+8" office:value-type="float" office:value="10704" calcext:value-type="float">
            <text:p>10704</text:p>
          </table:table-cell>
          <table:table-cell office:value-type="float" office:value="8640000" calcext:value-type="float">
            <text:p>8640000</text:p>
          </table:table-cell>
          <table:table-cell table:formula="of:=[.B1339]/[.C1339]" office:value-type="float" office:value="0.00123888888888889" calcext:value-type="float">
            <text:p>0,00123888888888889000</text:p>
          </table:table-cell>
          <table:table-cell table:formula="of:=[.D1340]-[.D13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B1339]+8" office:value-type="float" office:value="10712" calcext:value-type="float">
            <text:p>10712</text:p>
          </table:table-cell>
          <table:table-cell office:value-type="float" office:value="8640000" calcext:value-type="float">
            <text:p>8640000</text:p>
          </table:table-cell>
          <table:table-cell table:formula="of:=[.B1340]/[.C1340]" office:value-type="float" office:value="0.00123981481481482" calcext:value-type="float">
            <text:p>0,00123981481481482000</text:p>
          </table:table-cell>
          <table:table-cell table:formula="of:=[.D1341]-[.D13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B1340]+8" office:value-type="float" office:value="10720" calcext:value-type="float">
            <text:p>10720</text:p>
          </table:table-cell>
          <table:table-cell office:value-type="float" office:value="8640000" calcext:value-type="float">
            <text:p>8640000</text:p>
          </table:table-cell>
          <table:table-cell table:formula="of:=[.B1341]/[.C1341]" office:value-type="float" office:value="0.00124074074074074" calcext:value-type="float">
            <text:p>0,00124074074074074000</text:p>
          </table:table-cell>
          <table:table-cell table:formula="of:=[.D1342]-[.D13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B1341]+8" office:value-type="float" office:value="10728" calcext:value-type="float">
            <text:p>10728</text:p>
          </table:table-cell>
          <table:table-cell office:value-type="float" office:value="8640000" calcext:value-type="float">
            <text:p>8640000</text:p>
          </table:table-cell>
          <table:table-cell table:formula="of:=[.B1342]/[.C1342]" office:value-type="float" office:value="0.00124166666666667" calcext:value-type="float">
            <text:p>0,00124166666666667000</text:p>
          </table:table-cell>
          <table:table-cell table:formula="of:=[.D1343]-[.D13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B1342]+8" office:value-type="float" office:value="10736" calcext:value-type="float">
            <text:p>10736</text:p>
          </table:table-cell>
          <table:table-cell office:value-type="float" office:value="8640000" calcext:value-type="float">
            <text:p>8640000</text:p>
          </table:table-cell>
          <table:table-cell table:formula="of:=[.B1343]/[.C1343]" office:value-type="float" office:value="0.00124259259259259" calcext:value-type="float">
            <text:p>0,00124259259259259000</text:p>
          </table:table-cell>
          <table:table-cell table:formula="of:=[.D1344]-[.D13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B1343]+8" office:value-type="float" office:value="10744" calcext:value-type="float">
            <text:p>10744</text:p>
          </table:table-cell>
          <table:table-cell office:value-type="float" office:value="8640000" calcext:value-type="float">
            <text:p>8640000</text:p>
          </table:table-cell>
          <table:table-cell table:formula="of:=[.B1344]/[.C1344]" office:value-type="float" office:value="0.00124351851851852" calcext:value-type="float">
            <text:p>0,00124351851851852000</text:p>
          </table:table-cell>
          <table:table-cell table:formula="of:=[.D1345]-[.D13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B1344]+8" office:value-type="float" office:value="10752" calcext:value-type="float">
            <text:p>10752</text:p>
          </table:table-cell>
          <table:table-cell office:value-type="float" office:value="8640000" calcext:value-type="float">
            <text:p>8640000</text:p>
          </table:table-cell>
          <table:table-cell table:formula="of:=[.B1345]/[.C1345]" office:value-type="float" office:value="0.00124444444444444" calcext:value-type="float">
            <text:p>0,00124444444444444000</text:p>
          </table:table-cell>
          <table:table-cell table:formula="of:=[.D1346]-[.D13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B1345]+8" office:value-type="float" office:value="10760" calcext:value-type="float">
            <text:p>10760</text:p>
          </table:table-cell>
          <table:table-cell office:value-type="float" office:value="8640000" calcext:value-type="float">
            <text:p>8640000</text:p>
          </table:table-cell>
          <table:table-cell table:formula="of:=[.B1346]/[.C1346]" office:value-type="float" office:value="0.00124537037037037" calcext:value-type="float">
            <text:p>0,00124537037037037000</text:p>
          </table:table-cell>
          <table:table-cell table:formula="of:=[.D1347]-[.D13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B1346]+8" office:value-type="float" office:value="10768" calcext:value-type="float">
            <text:p>10768</text:p>
          </table:table-cell>
          <table:table-cell office:value-type="float" office:value="8640000" calcext:value-type="float">
            <text:p>8640000</text:p>
          </table:table-cell>
          <table:table-cell table:formula="of:=[.B1347]/[.C1347]" office:value-type="float" office:value="0.0012462962962963" calcext:value-type="float">
            <text:p>0,00124629629629630000</text:p>
          </table:table-cell>
          <table:table-cell table:formula="of:=[.D1348]-[.D13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B1347]+8" office:value-type="float" office:value="10776" calcext:value-type="float">
            <text:p>10776</text:p>
          </table:table-cell>
          <table:table-cell office:value-type="float" office:value="8640000" calcext:value-type="float">
            <text:p>8640000</text:p>
          </table:table-cell>
          <table:table-cell table:formula="of:=[.B1348]/[.C1348]" office:value-type="float" office:value="0.00124722222222222" calcext:value-type="float">
            <text:p>0,00124722222222222000</text:p>
          </table:table-cell>
          <table:table-cell table:formula="of:=[.D1349]-[.D13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B1348]+8" office:value-type="float" office:value="10784" calcext:value-type="float">
            <text:p>10784</text:p>
          </table:table-cell>
          <table:table-cell office:value-type="float" office:value="8640000" calcext:value-type="float">
            <text:p>8640000</text:p>
          </table:table-cell>
          <table:table-cell table:formula="of:=[.B1349]/[.C1349]" office:value-type="float" office:value="0.00124814814814815" calcext:value-type="float">
            <text:p>0,00124814814814815000</text:p>
          </table:table-cell>
          <table:table-cell table:formula="of:=[.D1350]-[.D13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B1349]+8" office:value-type="float" office:value="10792" calcext:value-type="float">
            <text:p>10792</text:p>
          </table:table-cell>
          <table:table-cell office:value-type="float" office:value="8640000" calcext:value-type="float">
            <text:p>8640000</text:p>
          </table:table-cell>
          <table:table-cell table:formula="of:=[.B1350]/[.C1350]" office:value-type="float" office:value="0.00124907407407407" calcext:value-type="float">
            <text:p>0,00124907407407407000</text:p>
          </table:table-cell>
          <table:table-cell table:formula="of:=[.D1351]-[.D13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B1350]+8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1351]/[.C1351]" office:value-type="float" office:value="0.00125" calcext:value-type="float">
            <text:p>0,00125000000000000000</text:p>
          </table:table-cell>
          <table:table-cell table:formula="of:=[.D1352]-[.D13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B1351]+8" office:value-type="float" office:value="10808" calcext:value-type="float">
            <text:p>10808</text:p>
          </table:table-cell>
          <table:table-cell office:value-type="float" office:value="8640000" calcext:value-type="float">
            <text:p>8640000</text:p>
          </table:table-cell>
          <table:table-cell table:formula="of:=[.B1352]/[.C1352]" office:value-type="float" office:value="0.00125092592592593" calcext:value-type="float">
            <text:p>0,00125092592592593000</text:p>
          </table:table-cell>
          <table:table-cell table:formula="of:=[.D1353]-[.D13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B1352]+8" office:value-type="float" office:value="10816" calcext:value-type="float">
            <text:p>10816</text:p>
          </table:table-cell>
          <table:table-cell office:value-type="float" office:value="8640000" calcext:value-type="float">
            <text:p>8640000</text:p>
          </table:table-cell>
          <table:table-cell table:formula="of:=[.B1353]/[.C1353]" office:value-type="float" office:value="0.00125185185185185" calcext:value-type="float">
            <text:p>0,00125185185185185000</text:p>
          </table:table-cell>
          <table:table-cell table:formula="of:=[.D1354]-[.D13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B1353]+8" office:value-type="float" office:value="10824" calcext:value-type="float">
            <text:p>10824</text:p>
          </table:table-cell>
          <table:table-cell office:value-type="float" office:value="8640000" calcext:value-type="float">
            <text:p>8640000</text:p>
          </table:table-cell>
          <table:table-cell table:formula="of:=[.B1354]/[.C1354]" office:value-type="float" office:value="0.00125277777777778" calcext:value-type="float">
            <text:p>0,00125277777777778000</text:p>
          </table:table-cell>
          <table:table-cell table:formula="of:=[.D1355]-[.D13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B1354]+8" office:value-type="float" office:value="10832" calcext:value-type="float">
            <text:p>10832</text:p>
          </table:table-cell>
          <table:table-cell office:value-type="float" office:value="8640000" calcext:value-type="float">
            <text:p>8640000</text:p>
          </table:table-cell>
          <table:table-cell table:formula="of:=[.B1355]/[.C1355]" office:value-type="float" office:value="0.0012537037037037" calcext:value-type="float">
            <text:p>0,00125370370370370000</text:p>
          </table:table-cell>
          <table:table-cell table:formula="of:=[.D1356]-[.D13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B1355]+8" office:value-type="float" office:value="10840" calcext:value-type="float">
            <text:p>10840</text:p>
          </table:table-cell>
          <table:table-cell office:value-type="float" office:value="8640000" calcext:value-type="float">
            <text:p>8640000</text:p>
          </table:table-cell>
          <table:table-cell table:formula="of:=[.B1356]/[.C1356]" office:value-type="float" office:value="0.00125462962962963" calcext:value-type="float">
            <text:p>0,00125462962962963000</text:p>
          </table:table-cell>
          <table:table-cell table:formula="of:=[.D1357]-[.D13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B1356]+8" office:value-type="float" office:value="10848" calcext:value-type="float">
            <text:p>10848</text:p>
          </table:table-cell>
          <table:table-cell office:value-type="float" office:value="8640000" calcext:value-type="float">
            <text:p>8640000</text:p>
          </table:table-cell>
          <table:table-cell table:formula="of:=[.B1357]/[.C1357]" office:value-type="float" office:value="0.00125555555555556" calcext:value-type="float">
            <text:p>0,00125555555555556000</text:p>
          </table:table-cell>
          <table:table-cell table:formula="of:=[.D1358]-[.D13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B1357]+8" office:value-type="float" office:value="10856" calcext:value-type="float">
            <text:p>10856</text:p>
          </table:table-cell>
          <table:table-cell office:value-type="float" office:value="8640000" calcext:value-type="float">
            <text:p>8640000</text:p>
          </table:table-cell>
          <table:table-cell table:formula="of:=[.B1358]/[.C1358]" office:value-type="float" office:value="0.00125648148148148" calcext:value-type="float">
            <text:p>0,00125648148148148000</text:p>
          </table:table-cell>
          <table:table-cell table:formula="of:=[.D1359]-[.D13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B1358]+8" office:value-type="float" office:value="10864" calcext:value-type="float">
            <text:p>10864</text:p>
          </table:table-cell>
          <table:table-cell office:value-type="float" office:value="8640000" calcext:value-type="float">
            <text:p>8640000</text:p>
          </table:table-cell>
          <table:table-cell table:formula="of:=[.B1359]/[.C1359]" office:value-type="float" office:value="0.00125740740740741" calcext:value-type="float">
            <text:p>0,00125740740740741000</text:p>
          </table:table-cell>
          <table:table-cell table:formula="of:=[.D1360]-[.D13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B1359]+8" office:value-type="float" office:value="10872" calcext:value-type="float">
            <text:p>10872</text:p>
          </table:table-cell>
          <table:table-cell office:value-type="float" office:value="8640000" calcext:value-type="float">
            <text:p>8640000</text:p>
          </table:table-cell>
          <table:table-cell table:formula="of:=[.B1360]/[.C1360]" office:value-type="float" office:value="0.00125833333333333" calcext:value-type="float">
            <text:p>0,00125833333333333000</text:p>
          </table:table-cell>
          <table:table-cell table:formula="of:=[.D1361]-[.D13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B1360]+8" office:value-type="float" office:value="10880" calcext:value-type="float">
            <text:p>10880</text:p>
          </table:table-cell>
          <table:table-cell office:value-type="float" office:value="8640000" calcext:value-type="float">
            <text:p>8640000</text:p>
          </table:table-cell>
          <table:table-cell table:formula="of:=[.B1361]/[.C1361]" office:value-type="float" office:value="0.00125925925925926" calcext:value-type="float">
            <text:p>0,00125925925925926000</text:p>
          </table:table-cell>
          <table:table-cell table:formula="of:=[.D1362]-[.D13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B1361]+8" office:value-type="float" office:value="10888" calcext:value-type="float">
            <text:p>10888</text:p>
          </table:table-cell>
          <table:table-cell office:value-type="float" office:value="8640000" calcext:value-type="float">
            <text:p>8640000</text:p>
          </table:table-cell>
          <table:table-cell table:formula="of:=[.B1362]/[.C1362]" office:value-type="float" office:value="0.00126018518518519" calcext:value-type="float">
            <text:p>0,00126018518518519000</text:p>
          </table:table-cell>
          <table:table-cell table:formula="of:=[.D1363]-[.D13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B1362]+8" office:value-type="float" office:value="10896" calcext:value-type="float">
            <text:p>10896</text:p>
          </table:table-cell>
          <table:table-cell office:value-type="float" office:value="8640000" calcext:value-type="float">
            <text:p>8640000</text:p>
          </table:table-cell>
          <table:table-cell table:formula="of:=[.B1363]/[.C1363]" office:value-type="float" office:value="0.00126111111111111" calcext:value-type="float">
            <text:p>0,00126111111111111000</text:p>
          </table:table-cell>
          <table:table-cell table:formula="of:=[.D1364]-[.D13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B1363]+8" office:value-type="float" office:value="10904" calcext:value-type="float">
            <text:p>10904</text:p>
          </table:table-cell>
          <table:table-cell office:value-type="float" office:value="8640000" calcext:value-type="float">
            <text:p>8640000</text:p>
          </table:table-cell>
          <table:table-cell table:formula="of:=[.B1364]/[.C1364]" office:value-type="float" office:value="0.00126203703703704" calcext:value-type="float">
            <text:p>0,00126203703703704000</text:p>
          </table:table-cell>
          <table:table-cell table:formula="of:=[.D1365]-[.D13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B1364]+8" office:value-type="float" office:value="10912" calcext:value-type="float">
            <text:p>10912</text:p>
          </table:table-cell>
          <table:table-cell office:value-type="float" office:value="8640000" calcext:value-type="float">
            <text:p>8640000</text:p>
          </table:table-cell>
          <table:table-cell table:formula="of:=[.B1365]/[.C1365]" office:value-type="float" office:value="0.00126296296296296" calcext:value-type="float">
            <text:p>0,00126296296296296000</text:p>
          </table:table-cell>
          <table:table-cell table:formula="of:=[.D1366]-[.D13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B1365]+8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1366]/[.C1366]" office:value-type="float" office:value="0.00126388888888889" calcext:value-type="float">
            <text:p>0,00126388888888889000</text:p>
          </table:table-cell>
          <table:table-cell table:formula="of:=[.D1367]-[.D13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B1366]+8" office:value-type="float" office:value="10928" calcext:value-type="float">
            <text:p>10928</text:p>
          </table:table-cell>
          <table:table-cell office:value-type="float" office:value="8640000" calcext:value-type="float">
            <text:p>8640000</text:p>
          </table:table-cell>
          <table:table-cell table:formula="of:=[.B1367]/[.C1367]" office:value-type="float" office:value="0.00126481481481481" calcext:value-type="float">
            <text:p>0,00126481481481481000</text:p>
          </table:table-cell>
          <table:table-cell table:formula="of:=[.D1368]-[.D13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B1367]+8" office:value-type="float" office:value="10936" calcext:value-type="float">
            <text:p>10936</text:p>
          </table:table-cell>
          <table:table-cell office:value-type="float" office:value="8640000" calcext:value-type="float">
            <text:p>8640000</text:p>
          </table:table-cell>
          <table:table-cell table:formula="of:=[.B1368]/[.C1368]" office:value-type="float" office:value="0.00126574074074074" calcext:value-type="float">
            <text:p>0,00126574074074074000</text:p>
          </table:table-cell>
          <table:table-cell table:formula="of:=[.D1369]-[.D13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B1368]+8" office:value-type="float" office:value="10944" calcext:value-type="float">
            <text:p>10944</text:p>
          </table:table-cell>
          <table:table-cell office:value-type="float" office:value="8640000" calcext:value-type="float">
            <text:p>8640000</text:p>
          </table:table-cell>
          <table:table-cell table:formula="of:=[.B1369]/[.C1369]" office:value-type="float" office:value="0.00126666666666667" calcext:value-type="float">
            <text:p>0,00126666666666667000</text:p>
          </table:table-cell>
          <table:table-cell table:formula="of:=[.D1370]-[.D13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B1369]+8" office:value-type="float" office:value="10952" calcext:value-type="float">
            <text:p>10952</text:p>
          </table:table-cell>
          <table:table-cell office:value-type="float" office:value="8640000" calcext:value-type="float">
            <text:p>8640000</text:p>
          </table:table-cell>
          <table:table-cell table:formula="of:=[.B1370]/[.C1370]" office:value-type="float" office:value="0.00126759259259259" calcext:value-type="float">
            <text:p>0,00126759259259259000</text:p>
          </table:table-cell>
          <table:table-cell table:formula="of:=[.D1371]-[.D13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B1370]+8" office:value-type="float" office:value="10960" calcext:value-type="float">
            <text:p>10960</text:p>
          </table:table-cell>
          <table:table-cell office:value-type="float" office:value="8640000" calcext:value-type="float">
            <text:p>8640000</text:p>
          </table:table-cell>
          <table:table-cell table:formula="of:=[.B1371]/[.C1371]" office:value-type="float" office:value="0.00126851851851852" calcext:value-type="float">
            <text:p>0,00126851851851852000</text:p>
          </table:table-cell>
          <table:table-cell table:formula="of:=[.D1372]-[.D13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B1371]+8" office:value-type="float" office:value="10968" calcext:value-type="float">
            <text:p>10968</text:p>
          </table:table-cell>
          <table:table-cell office:value-type="float" office:value="8640000" calcext:value-type="float">
            <text:p>8640000</text:p>
          </table:table-cell>
          <table:table-cell table:formula="of:=[.B1372]/[.C1372]" office:value-type="float" office:value="0.00126944444444444" calcext:value-type="float">
            <text:p>0,00126944444444444000</text:p>
          </table:table-cell>
          <table:table-cell table:formula="of:=[.D1373]-[.D13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B1372]+8" office:value-type="float" office:value="10976" calcext:value-type="float">
            <text:p>10976</text:p>
          </table:table-cell>
          <table:table-cell office:value-type="float" office:value="8640000" calcext:value-type="float">
            <text:p>8640000</text:p>
          </table:table-cell>
          <table:table-cell table:formula="of:=[.B1373]/[.C1373]" office:value-type="float" office:value="0.00127037037037037" calcext:value-type="float">
            <text:p>0,00127037037037037000</text:p>
          </table:table-cell>
          <table:table-cell table:formula="of:=[.D1374]-[.D13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B1373]+8" office:value-type="float" office:value="10984" calcext:value-type="float">
            <text:p>10984</text:p>
          </table:table-cell>
          <table:table-cell office:value-type="float" office:value="8640000" calcext:value-type="float">
            <text:p>8640000</text:p>
          </table:table-cell>
          <table:table-cell table:formula="of:=[.B1374]/[.C1374]" office:value-type="float" office:value="0.0012712962962963" calcext:value-type="float">
            <text:p>0,00127129629629630000</text:p>
          </table:table-cell>
          <table:table-cell table:formula="of:=[.D1375]-[.D1374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B1374]+8" office:value-type="float" office:value="10992" calcext:value-type="float">
            <text:p>10992</text:p>
          </table:table-cell>
          <table:table-cell office:value-type="float" office:value="8640000" calcext:value-type="float">
            <text:p>8640000</text:p>
          </table:table-cell>
          <table:table-cell table:formula="of:=[.B1375]/[.C1375]" office:value-type="float" office:value="0.00127222222222222" calcext:value-type="float">
            <text:p>0,00127222222222222000</text:p>
          </table:table-cell>
          <table:table-cell table:formula="of:=[.D1376]-[.D13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B1375]+8" office:value-type="float" office:value="11000" calcext:value-type="float">
            <text:p>11000</text:p>
          </table:table-cell>
          <table:table-cell office:value-type="float" office:value="8640000" calcext:value-type="float">
            <text:p>8640000</text:p>
          </table:table-cell>
          <table:table-cell table:formula="of:=[.B1376]/[.C1376]" office:value-type="float" office:value="0.00127314814814815" calcext:value-type="float">
            <text:p>0,00127314814814815000</text:p>
          </table:table-cell>
          <table:table-cell table:formula="of:=[.D1377]-[.D13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B1376]+8" office:value-type="float" office:value="11008" calcext:value-type="float">
            <text:p>11008</text:p>
          </table:table-cell>
          <table:table-cell office:value-type="float" office:value="8640000" calcext:value-type="float">
            <text:p>8640000</text:p>
          </table:table-cell>
          <table:table-cell table:formula="of:=[.B1377]/[.C1377]" office:value-type="float" office:value="0.00127407407407407" calcext:value-type="float">
            <text:p>0,00127407407407407000</text:p>
          </table:table-cell>
          <table:table-cell table:formula="of:=[.D1378]-[.D13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B1377]+8" office:value-type="float" office:value="11016" calcext:value-type="float">
            <text:p>11016</text:p>
          </table:table-cell>
          <table:table-cell office:value-type="float" office:value="8640000" calcext:value-type="float">
            <text:p>8640000</text:p>
          </table:table-cell>
          <table:table-cell table:formula="of:=[.B1378]/[.C1378]" office:value-type="float" office:value="0.001275" calcext:value-type="float">
            <text:p>0,00127500000000000000</text:p>
          </table:table-cell>
          <table:table-cell table:formula="of:=[.D1379]-[.D13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B1378]+8" office:value-type="float" office:value="11024" calcext:value-type="float">
            <text:p>11024</text:p>
          </table:table-cell>
          <table:table-cell office:value-type="float" office:value="8640000" calcext:value-type="float">
            <text:p>8640000</text:p>
          </table:table-cell>
          <table:table-cell table:formula="of:=[.B1379]/[.C1379]" office:value-type="float" office:value="0.00127592592592593" calcext:value-type="float">
            <text:p>0,00127592592592593000</text:p>
          </table:table-cell>
          <table:table-cell table:formula="of:=[.D1380]-[.D13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B1379]+8" office:value-type="float" office:value="11032" calcext:value-type="float">
            <text:p>11032</text:p>
          </table:table-cell>
          <table:table-cell office:value-type="float" office:value="8640000" calcext:value-type="float">
            <text:p>8640000</text:p>
          </table:table-cell>
          <table:table-cell table:formula="of:=[.B1380]/[.C1380]" office:value-type="float" office:value="0.00127685185185185" calcext:value-type="float">
            <text:p>0,00127685185185185000</text:p>
          </table:table-cell>
          <table:table-cell table:formula="of:=[.D1381]-[.D13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B1380]+8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1381]/[.C1381]" office:value-type="float" office:value="0.00127777777777778" calcext:value-type="float">
            <text:p>0,00127777777777778000</text:p>
          </table:table-cell>
          <table:table-cell table:formula="of:=[.D1382]-[.D13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B1381]+8" office:value-type="float" office:value="11048" calcext:value-type="float">
            <text:p>11048</text:p>
          </table:table-cell>
          <table:table-cell office:value-type="float" office:value="8640000" calcext:value-type="float">
            <text:p>8640000</text:p>
          </table:table-cell>
          <table:table-cell table:formula="of:=[.B1382]/[.C1382]" office:value-type="float" office:value="0.0012787037037037" calcext:value-type="float">
            <text:p>0,00127870370370370000</text:p>
          </table:table-cell>
          <table:table-cell table:formula="of:=[.D1383]-[.D13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B1382]+8" office:value-type="float" office:value="11056" calcext:value-type="float">
            <text:p>11056</text:p>
          </table:table-cell>
          <table:table-cell office:value-type="float" office:value="8640000" calcext:value-type="float">
            <text:p>8640000</text:p>
          </table:table-cell>
          <table:table-cell table:formula="of:=[.B1383]/[.C1383]" office:value-type="float" office:value="0.00127962962962963" calcext:value-type="float">
            <text:p>0,00127962962962963000</text:p>
          </table:table-cell>
          <table:table-cell table:formula="of:=[.D1384]-[.D13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B1383]+8" office:value-type="float" office:value="11064" calcext:value-type="float">
            <text:p>11064</text:p>
          </table:table-cell>
          <table:table-cell office:value-type="float" office:value="8640000" calcext:value-type="float">
            <text:p>8640000</text:p>
          </table:table-cell>
          <table:table-cell table:formula="of:=[.B1384]/[.C1384]" office:value-type="float" office:value="0.00128055555555556" calcext:value-type="float">
            <text:p>0,00128055555555556000</text:p>
          </table:table-cell>
          <table:table-cell table:formula="of:=[.D1385]-[.D13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B1384]+8" office:value-type="float" office:value="11072" calcext:value-type="float">
            <text:p>11072</text:p>
          </table:table-cell>
          <table:table-cell office:value-type="float" office:value="8640000" calcext:value-type="float">
            <text:p>8640000</text:p>
          </table:table-cell>
          <table:table-cell table:formula="of:=[.B1385]/[.C1385]" office:value-type="float" office:value="0.00128148148148148" calcext:value-type="float">
            <text:p>0,00128148148148148000</text:p>
          </table:table-cell>
          <table:table-cell table:formula="of:=[.D1386]-[.D13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B1385]+8" office:value-type="float" office:value="11080" calcext:value-type="float">
            <text:p>11080</text:p>
          </table:table-cell>
          <table:table-cell office:value-type="float" office:value="8640000" calcext:value-type="float">
            <text:p>8640000</text:p>
          </table:table-cell>
          <table:table-cell table:formula="of:=[.B1386]/[.C1386]" office:value-type="float" office:value="0.00128240740740741" calcext:value-type="float">
            <text:p>0,00128240740740741000</text:p>
          </table:table-cell>
          <table:table-cell table:formula="of:=[.D1387]-[.D13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B1386]+8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1387]/[.C1387]" office:value-type="float" office:value="0.00128333333333333" calcext:value-type="float">
            <text:p>0,00128333333333333000</text:p>
          </table:table-cell>
          <table:table-cell table:formula="of:=[.D1388]-[.D13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B1387]+8" office:value-type="float" office:value="11096" calcext:value-type="float">
            <text:p>11096</text:p>
          </table:table-cell>
          <table:table-cell office:value-type="float" office:value="8640000" calcext:value-type="float">
            <text:p>8640000</text:p>
          </table:table-cell>
          <table:table-cell table:formula="of:=[.B1388]/[.C1388]" office:value-type="float" office:value="0.00128425925925926" calcext:value-type="float">
            <text:p>0,00128425925925926000</text:p>
          </table:table-cell>
          <table:table-cell table:formula="of:=[.D1389]-[.D13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B1388]+8" office:value-type="float" office:value="11104" calcext:value-type="float">
            <text:p>11104</text:p>
          </table:table-cell>
          <table:table-cell office:value-type="float" office:value="8640000" calcext:value-type="float">
            <text:p>8640000</text:p>
          </table:table-cell>
          <table:table-cell table:formula="of:=[.B1389]/[.C1389]" office:value-type="float" office:value="0.00128518518518519" calcext:value-type="float">
            <text:p>0,00128518518518519000</text:p>
          </table:table-cell>
          <table:table-cell table:formula="of:=[.D1390]-[.D13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B1389]+8" office:value-type="float" office:value="11112" calcext:value-type="float">
            <text:p>11112</text:p>
          </table:table-cell>
          <table:table-cell office:value-type="float" office:value="8640000" calcext:value-type="float">
            <text:p>8640000</text:p>
          </table:table-cell>
          <table:table-cell table:formula="of:=[.B1390]/[.C1390]" office:value-type="float" office:value="0.00128611111111111" calcext:value-type="float">
            <text:p>0,00128611111111111000</text:p>
          </table:table-cell>
          <table:table-cell table:formula="of:=[.D1391]-[.D13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B1390]+8" office:value-type="float" office:value="11120" calcext:value-type="float">
            <text:p>11120</text:p>
          </table:table-cell>
          <table:table-cell office:value-type="float" office:value="8640000" calcext:value-type="float">
            <text:p>8640000</text:p>
          </table:table-cell>
          <table:table-cell table:formula="of:=[.B1391]/[.C1391]" office:value-type="float" office:value="0.00128703703703704" calcext:value-type="float">
            <text:p>0,00128703703703704000</text:p>
          </table:table-cell>
          <table:table-cell table:formula="of:=[.D1392]-[.D13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B1391]+8" office:value-type="float" office:value="11128" calcext:value-type="float">
            <text:p>11128</text:p>
          </table:table-cell>
          <table:table-cell office:value-type="float" office:value="8640000" calcext:value-type="float">
            <text:p>8640000</text:p>
          </table:table-cell>
          <table:table-cell table:formula="of:=[.B1392]/[.C1392]" office:value-type="float" office:value="0.00128796296296296" calcext:value-type="float">
            <text:p>0,00128796296296296000</text:p>
          </table:table-cell>
          <table:table-cell table:formula="of:=[.D1393]-[.D13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B1392]+8" office:value-type="float" office:value="11136" calcext:value-type="float">
            <text:p>11136</text:p>
          </table:table-cell>
          <table:table-cell office:value-type="float" office:value="8640000" calcext:value-type="float">
            <text:p>8640000</text:p>
          </table:table-cell>
          <table:table-cell table:formula="of:=[.B1393]/[.C1393]" office:value-type="float" office:value="0.00128888888888889" calcext:value-type="float">
            <text:p>0,00128888888888889000</text:p>
          </table:table-cell>
          <table:table-cell table:formula="of:=[.D1394]-[.D13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B1393]+8" office:value-type="float" office:value="11144" calcext:value-type="float">
            <text:p>11144</text:p>
          </table:table-cell>
          <table:table-cell office:value-type="float" office:value="8640000" calcext:value-type="float">
            <text:p>8640000</text:p>
          </table:table-cell>
          <table:table-cell table:formula="of:=[.B1394]/[.C1394]" office:value-type="float" office:value="0.00128981481481481" calcext:value-type="float">
            <text:p>0,00128981481481481000</text:p>
          </table:table-cell>
          <table:table-cell table:formula="of:=[.D1395]-[.D13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B1394]+8" office:value-type="float" office:value="11152" calcext:value-type="float">
            <text:p>11152</text:p>
          </table:table-cell>
          <table:table-cell office:value-type="float" office:value="8640000" calcext:value-type="float">
            <text:p>8640000</text:p>
          </table:table-cell>
          <table:table-cell table:formula="of:=[.B1395]/[.C1395]" office:value-type="float" office:value="0.00129074074074074" calcext:value-type="float">
            <text:p>0,00129074074074074000</text:p>
          </table:table-cell>
          <table:table-cell table:formula="of:=[.D1396]-[.D13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B1395]+8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1396]/[.C1396]" office:value-type="float" office:value="0.00129166666666667" calcext:value-type="float">
            <text:p>0,00129166666666667000</text:p>
          </table:table-cell>
          <table:table-cell table:formula="of:=[.D1397]-[.D13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B1396]+8" office:value-type="float" office:value="11168" calcext:value-type="float">
            <text:p>11168</text:p>
          </table:table-cell>
          <table:table-cell office:value-type="float" office:value="8640000" calcext:value-type="float">
            <text:p>8640000</text:p>
          </table:table-cell>
          <table:table-cell table:formula="of:=[.B1397]/[.C1397]" office:value-type="float" office:value="0.00129259259259259" calcext:value-type="float">
            <text:p>0,00129259259259259000</text:p>
          </table:table-cell>
          <table:table-cell table:formula="of:=[.D1398]-[.D13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B1397]+8" office:value-type="float" office:value="11176" calcext:value-type="float">
            <text:p>11176</text:p>
          </table:table-cell>
          <table:table-cell office:value-type="float" office:value="8640000" calcext:value-type="float">
            <text:p>8640000</text:p>
          </table:table-cell>
          <table:table-cell table:formula="of:=[.B1398]/[.C1398]" office:value-type="float" office:value="0.00129351851851852" calcext:value-type="float">
            <text:p>0,00129351851851852000</text:p>
          </table:table-cell>
          <table:table-cell table:formula="of:=[.D1399]-[.D13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B1398]+8" office:value-type="float" office:value="11184" calcext:value-type="float">
            <text:p>11184</text:p>
          </table:table-cell>
          <table:table-cell office:value-type="float" office:value="8640000" calcext:value-type="float">
            <text:p>8640000</text:p>
          </table:table-cell>
          <table:table-cell table:formula="of:=[.B1399]/[.C1399]" office:value-type="float" office:value="0.00129444444444444" calcext:value-type="float">
            <text:p>0,00129444444444444000</text:p>
          </table:table-cell>
          <table:table-cell table:formula="of:=[.D1400]-[.D13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B1399]+8" office:value-type="float" office:value="11192" calcext:value-type="float">
            <text:p>11192</text:p>
          </table:table-cell>
          <table:table-cell office:value-type="float" office:value="8640000" calcext:value-type="float">
            <text:p>8640000</text:p>
          </table:table-cell>
          <table:table-cell table:formula="of:=[.B1400]/[.C1400]" office:value-type="float" office:value="0.00129537037037037" calcext:value-type="float">
            <text:p>0,00129537037037037000</text:p>
          </table:table-cell>
          <table:table-cell table:formula="of:=[.D1401]-[.D14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B1400]+8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1401]/[.C1401]" office:value-type="float" office:value="0.0012962962962963" calcext:value-type="float">
            <text:p>0,00129629629629630000</text:p>
          </table:table-cell>
          <table:table-cell table:formula="of:=[.D1402]-[.D14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B1401]+8" office:value-type="float" office:value="11208" calcext:value-type="float">
            <text:p>11208</text:p>
          </table:table-cell>
          <table:table-cell office:value-type="float" office:value="8640000" calcext:value-type="float">
            <text:p>8640000</text:p>
          </table:table-cell>
          <table:table-cell table:formula="of:=[.B1402]/[.C1402]" office:value-type="float" office:value="0.00129722222222222" calcext:value-type="float">
            <text:p>0,00129722222222222000</text:p>
          </table:table-cell>
          <table:table-cell table:formula="of:=[.D1403]-[.D14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B1402]+8" office:value-type="float" office:value="11216" calcext:value-type="float">
            <text:p>11216</text:p>
          </table:table-cell>
          <table:table-cell office:value-type="float" office:value="8640000" calcext:value-type="float">
            <text:p>8640000</text:p>
          </table:table-cell>
          <table:table-cell table:formula="of:=[.B1403]/[.C1403]" office:value-type="float" office:value="0.00129814814814815" calcext:value-type="float">
            <text:p>0,00129814814814815000</text:p>
          </table:table-cell>
          <table:table-cell table:formula="of:=[.D1404]-[.D14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B1403]+8" office:value-type="float" office:value="11224" calcext:value-type="float">
            <text:p>11224</text:p>
          </table:table-cell>
          <table:table-cell office:value-type="float" office:value="8640000" calcext:value-type="float">
            <text:p>8640000</text:p>
          </table:table-cell>
          <table:table-cell table:formula="of:=[.B1404]/[.C1404]" office:value-type="float" office:value="0.00129907407407407" calcext:value-type="float">
            <text:p>0,00129907407407407000</text:p>
          </table:table-cell>
          <table:table-cell table:formula="of:=[.D1405]-[.D14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B1404]+8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1405]/[.C1405]" office:value-type="float" office:value="0.0013" calcext:value-type="float">
            <text:p>0,00130000000000000000</text:p>
          </table:table-cell>
          <table:table-cell table:formula="of:=[.D1406]-[.D14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B1405]+8" office:value-type="float" office:value="11240" calcext:value-type="float">
            <text:p>11240</text:p>
          </table:table-cell>
          <table:table-cell office:value-type="float" office:value="8640000" calcext:value-type="float">
            <text:p>8640000</text:p>
          </table:table-cell>
          <table:table-cell table:formula="of:=[.B1406]/[.C1406]" office:value-type="float" office:value="0.00130092592592593" calcext:value-type="float">
            <text:p>0,00130092592592593000</text:p>
          </table:table-cell>
          <table:table-cell table:formula="of:=[.D1407]-[.D14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B1406]+8" office:value-type="float" office:value="11248" calcext:value-type="float">
            <text:p>11248</text:p>
          </table:table-cell>
          <table:table-cell office:value-type="float" office:value="8640000" calcext:value-type="float">
            <text:p>8640000</text:p>
          </table:table-cell>
          <table:table-cell table:formula="of:=[.B1407]/[.C1407]" office:value-type="float" office:value="0.00130185185185185" calcext:value-type="float">
            <text:p>0,00130185185185185000</text:p>
          </table:table-cell>
          <table:table-cell table:formula="of:=[.D1408]-[.D14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B1407]+8" office:value-type="float" office:value="11256" calcext:value-type="float">
            <text:p>11256</text:p>
          </table:table-cell>
          <table:table-cell office:value-type="float" office:value="8640000" calcext:value-type="float">
            <text:p>8640000</text:p>
          </table:table-cell>
          <table:table-cell table:formula="of:=[.B1408]/[.C1408]" office:value-type="float" office:value="0.00130277777777778" calcext:value-type="float">
            <text:p>0,00130277777777778000</text:p>
          </table:table-cell>
          <table:table-cell table:formula="of:=[.D1409]-[.D14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B1408]+8" office:value-type="float" office:value="11264" calcext:value-type="float">
            <text:p>11264</text:p>
          </table:table-cell>
          <table:table-cell office:value-type="float" office:value="8640000" calcext:value-type="float">
            <text:p>8640000</text:p>
          </table:table-cell>
          <table:table-cell table:formula="of:=[.B1409]/[.C1409]" office:value-type="float" office:value="0.0013037037037037" calcext:value-type="float">
            <text:p>0,00130370370370370000</text:p>
          </table:table-cell>
          <table:table-cell table:formula="of:=[.D1410]-[.D14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B1409]+8" office:value-type="float" office:value="11272" calcext:value-type="float">
            <text:p>11272</text:p>
          </table:table-cell>
          <table:table-cell office:value-type="float" office:value="8640000" calcext:value-type="float">
            <text:p>8640000</text:p>
          </table:table-cell>
          <table:table-cell table:formula="of:=[.B1410]/[.C1410]" office:value-type="float" office:value="0.00130462962962963" calcext:value-type="float">
            <text:p>0,00130462962962963000</text:p>
          </table:table-cell>
          <table:table-cell table:formula="of:=[.D1411]-[.D14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B1410]+8" office:value-type="float" office:value="11280" calcext:value-type="float">
            <text:p>11280</text:p>
          </table:table-cell>
          <table:table-cell office:value-type="float" office:value="8640000" calcext:value-type="float">
            <text:p>8640000</text:p>
          </table:table-cell>
          <table:table-cell table:formula="of:=[.B1411]/[.C1411]" office:value-type="float" office:value="0.00130555555555556" calcext:value-type="float">
            <text:p>0,00130555555555556000</text:p>
          </table:table-cell>
          <table:table-cell table:formula="of:=[.D1412]-[.D14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B1411]+8" office:value-type="float" office:value="11288" calcext:value-type="float">
            <text:p>11288</text:p>
          </table:table-cell>
          <table:table-cell office:value-type="float" office:value="8640000" calcext:value-type="float">
            <text:p>8640000</text:p>
          </table:table-cell>
          <table:table-cell table:formula="of:=[.B1412]/[.C1412]" office:value-type="float" office:value="0.00130648148148148" calcext:value-type="float">
            <text:p>0,00130648148148148000</text:p>
          </table:table-cell>
          <table:table-cell table:formula="of:=[.D1413]-[.D14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B1412]+8" office:value-type="float" office:value="11296" calcext:value-type="float">
            <text:p>11296</text:p>
          </table:table-cell>
          <table:table-cell office:value-type="float" office:value="8640000" calcext:value-type="float">
            <text:p>8640000</text:p>
          </table:table-cell>
          <table:table-cell table:formula="of:=[.B1413]/[.C1413]" office:value-type="float" office:value="0.00130740740740741" calcext:value-type="float">
            <text:p>0,00130740740740741000</text:p>
          </table:table-cell>
          <table:table-cell table:formula="of:=[.D1414]-[.D1413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B1413]+8" office:value-type="float" office:value="11304" calcext:value-type="float">
            <text:p>11304</text:p>
          </table:table-cell>
          <table:table-cell office:value-type="float" office:value="8640000" calcext:value-type="float">
            <text:p>8640000</text:p>
          </table:table-cell>
          <table:table-cell table:formula="of:=[.B1414]/[.C1414]" office:value-type="float" office:value="0.00130833333333333" calcext:value-type="float">
            <text:p>0,00130833333333333000</text:p>
          </table:table-cell>
          <table:table-cell table:formula="of:=[.D1415]-[.D14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B1414]+8" office:value-type="float" office:value="11312" calcext:value-type="float">
            <text:p>11312</text:p>
          </table:table-cell>
          <table:table-cell office:value-type="float" office:value="8640000" calcext:value-type="float">
            <text:p>8640000</text:p>
          </table:table-cell>
          <table:table-cell table:formula="of:=[.B1415]/[.C1415]" office:value-type="float" office:value="0.00130925925925926" calcext:value-type="float">
            <text:p>0,00130925925925926000</text:p>
          </table:table-cell>
          <table:table-cell table:formula="of:=[.D1416]-[.D14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B1415]+8" office:value-type="float" office:value="11320" calcext:value-type="float">
            <text:p>11320</text:p>
          </table:table-cell>
          <table:table-cell office:value-type="float" office:value="8640000" calcext:value-type="float">
            <text:p>8640000</text:p>
          </table:table-cell>
          <table:table-cell table:formula="of:=[.B1416]/[.C1416]" office:value-type="float" office:value="0.00131018518518519" calcext:value-type="float">
            <text:p>0,00131018518518519000</text:p>
          </table:table-cell>
          <table:table-cell table:formula="of:=[.D1417]-[.D14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B1416]+8" office:value-type="float" office:value="11328" calcext:value-type="float">
            <text:p>11328</text:p>
          </table:table-cell>
          <table:table-cell office:value-type="float" office:value="8640000" calcext:value-type="float">
            <text:p>8640000</text:p>
          </table:table-cell>
          <table:table-cell table:formula="of:=[.B1417]/[.C1417]" office:value-type="float" office:value="0.00131111111111111" calcext:value-type="float">
            <text:p>0,00131111111111111000</text:p>
          </table:table-cell>
          <table:table-cell table:formula="of:=[.D1418]-[.D14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B1417]+8" office:value-type="float" office:value="11336" calcext:value-type="float">
            <text:p>11336</text:p>
          </table:table-cell>
          <table:table-cell office:value-type="float" office:value="8640000" calcext:value-type="float">
            <text:p>8640000</text:p>
          </table:table-cell>
          <table:table-cell table:formula="of:=[.B1418]/[.C1418]" office:value-type="float" office:value="0.00131203703703704" calcext:value-type="float">
            <text:p>0,00131203703703704000</text:p>
          </table:table-cell>
          <table:table-cell table:formula="of:=[.D1419]-[.D14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B1418]+8" office:value-type="float" office:value="11344" calcext:value-type="float">
            <text:p>11344</text:p>
          </table:table-cell>
          <table:table-cell office:value-type="float" office:value="8640000" calcext:value-type="float">
            <text:p>8640000</text:p>
          </table:table-cell>
          <table:table-cell table:formula="of:=[.B1419]/[.C1419]" office:value-type="float" office:value="0.00131296296296296" calcext:value-type="float">
            <text:p>0,00131296296296296000</text:p>
          </table:table-cell>
          <table:table-cell table:formula="of:=[.D1420]-[.D14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B1419]+8" office:value-type="float" office:value="11352" calcext:value-type="float">
            <text:p>11352</text:p>
          </table:table-cell>
          <table:table-cell office:value-type="float" office:value="8640000" calcext:value-type="float">
            <text:p>8640000</text:p>
          </table:table-cell>
          <table:table-cell table:formula="of:=[.B1420]/[.C1420]" office:value-type="float" office:value="0.00131388888888889" calcext:value-type="float">
            <text:p>0,00131388888888889000</text:p>
          </table:table-cell>
          <table:table-cell table:formula="of:=[.D1421]-[.D14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B1420]+8" office:value-type="float" office:value="11360" calcext:value-type="float">
            <text:p>11360</text:p>
          </table:table-cell>
          <table:table-cell office:value-type="float" office:value="8640000" calcext:value-type="float">
            <text:p>8640000</text:p>
          </table:table-cell>
          <table:table-cell table:formula="of:=[.B1421]/[.C1421]" office:value-type="float" office:value="0.00131481481481481" calcext:value-type="float">
            <text:p>0,00131481481481481000</text:p>
          </table:table-cell>
          <table:table-cell table:formula="of:=[.D1422]-[.D14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B1421]+8" office:value-type="float" office:value="11368" calcext:value-type="float">
            <text:p>11368</text:p>
          </table:table-cell>
          <table:table-cell office:value-type="float" office:value="8640000" calcext:value-type="float">
            <text:p>8640000</text:p>
          </table:table-cell>
          <table:table-cell table:formula="of:=[.B1422]/[.C1422]" office:value-type="float" office:value="0.00131574074074074" calcext:value-type="float">
            <text:p>0,00131574074074074000</text:p>
          </table:table-cell>
          <table:table-cell table:formula="of:=[.D1423]-[.D14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B1422]+8" office:value-type="float" office:value="11376" calcext:value-type="float">
            <text:p>11376</text:p>
          </table:table-cell>
          <table:table-cell office:value-type="float" office:value="8640000" calcext:value-type="float">
            <text:p>8640000</text:p>
          </table:table-cell>
          <table:table-cell table:formula="of:=[.B1423]/[.C1423]" office:value-type="float" office:value="0.00131666666666667" calcext:value-type="float">
            <text:p>0,00131666666666667000</text:p>
          </table:table-cell>
          <table:table-cell table:formula="of:=[.D1424]-[.D14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B1423]+8" office:value-type="float" office:value="11384" calcext:value-type="float">
            <text:p>11384</text:p>
          </table:table-cell>
          <table:table-cell office:value-type="float" office:value="8640000" calcext:value-type="float">
            <text:p>8640000</text:p>
          </table:table-cell>
          <table:table-cell table:formula="of:=[.B1424]/[.C1424]" office:value-type="float" office:value="0.00131759259259259" calcext:value-type="float">
            <text:p>0,00131759259259259000</text:p>
          </table:table-cell>
          <table:table-cell table:formula="of:=[.D1425]-[.D14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B1424]+8" office:value-type="float" office:value="11392" calcext:value-type="float">
            <text:p>11392</text:p>
          </table:table-cell>
          <table:table-cell office:value-type="float" office:value="8640000" calcext:value-type="float">
            <text:p>8640000</text:p>
          </table:table-cell>
          <table:table-cell table:formula="of:=[.B1425]/[.C1425]" office:value-type="float" office:value="0.00131851851851852" calcext:value-type="float">
            <text:p>0,00131851851851852000</text:p>
          </table:table-cell>
          <table:table-cell table:formula="of:=[.D1426]-[.D14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B1425]+8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1426]/[.C1426]" office:value-type="float" office:value="0.00131944444444444" calcext:value-type="float">
            <text:p>0,00131944444444444000</text:p>
          </table:table-cell>
          <table:table-cell table:formula="of:=[.D1427]-[.D14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B1426]+8" office:value-type="float" office:value="11408" calcext:value-type="float">
            <text:p>11408</text:p>
          </table:table-cell>
          <table:table-cell office:value-type="float" office:value="8640000" calcext:value-type="float">
            <text:p>8640000</text:p>
          </table:table-cell>
          <table:table-cell table:formula="of:=[.B1427]/[.C1427]" office:value-type="float" office:value="0.00132037037037037" calcext:value-type="float">
            <text:p>0,00132037037037037000</text:p>
          </table:table-cell>
          <table:table-cell table:formula="of:=[.D1428]-[.D14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B1427]+8" office:value-type="float" office:value="11416" calcext:value-type="float">
            <text:p>11416</text:p>
          </table:table-cell>
          <table:table-cell office:value-type="float" office:value="8640000" calcext:value-type="float">
            <text:p>8640000</text:p>
          </table:table-cell>
          <table:table-cell table:formula="of:=[.B1428]/[.C1428]" office:value-type="float" office:value="0.0013212962962963" calcext:value-type="float">
            <text:p>0,00132129629629630000</text:p>
          </table:table-cell>
          <table:table-cell table:formula="of:=[.D1429]-[.D14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B1428]+8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1429]/[.C1429]" office:value-type="float" office:value="0.00132222222222222" calcext:value-type="float">
            <text:p>0,00132222222222222000</text:p>
          </table:table-cell>
          <table:table-cell table:formula="of:=[.D1430]-[.D14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B1429]+8" office:value-type="float" office:value="11432" calcext:value-type="float">
            <text:p>11432</text:p>
          </table:table-cell>
          <table:table-cell office:value-type="float" office:value="8640000" calcext:value-type="float">
            <text:p>8640000</text:p>
          </table:table-cell>
          <table:table-cell table:formula="of:=[.B1430]/[.C1430]" office:value-type="float" office:value="0.00132314814814815" calcext:value-type="float">
            <text:p>0,00132314814814815000</text:p>
          </table:table-cell>
          <table:table-cell table:formula="of:=[.D1431]-[.D14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B1430]+8" office:value-type="float" office:value="11440" calcext:value-type="float">
            <text:p>11440</text:p>
          </table:table-cell>
          <table:table-cell office:value-type="float" office:value="8640000" calcext:value-type="float">
            <text:p>8640000</text:p>
          </table:table-cell>
          <table:table-cell table:formula="of:=[.B1431]/[.C1431]" office:value-type="float" office:value="0.00132407407407407" calcext:value-type="float">
            <text:p>0,00132407407407407000</text:p>
          </table:table-cell>
          <table:table-cell table:formula="of:=[.D1432]-[.D14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B1431]+8" office:value-type="float" office:value="11448" calcext:value-type="float">
            <text:p>11448</text:p>
          </table:table-cell>
          <table:table-cell office:value-type="float" office:value="8640000" calcext:value-type="float">
            <text:p>8640000</text:p>
          </table:table-cell>
          <table:table-cell table:formula="of:=[.B1432]/[.C1432]" office:value-type="float" office:value="0.001325" calcext:value-type="float">
            <text:p>0,00132500000000000000</text:p>
          </table:table-cell>
          <table:table-cell table:formula="of:=[.D1433]-[.D14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B1432]+8" office:value-type="float" office:value="11456" calcext:value-type="float">
            <text:p>11456</text:p>
          </table:table-cell>
          <table:table-cell office:value-type="float" office:value="8640000" calcext:value-type="float">
            <text:p>8640000</text:p>
          </table:table-cell>
          <table:table-cell table:formula="of:=[.B1433]/[.C1433]" office:value-type="float" office:value="0.00132592592592593" calcext:value-type="float">
            <text:p>0,00132592592592593000</text:p>
          </table:table-cell>
          <table:table-cell table:formula="of:=[.D1434]-[.D14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B1433]+8" office:value-type="float" office:value="11464" calcext:value-type="float">
            <text:p>11464</text:p>
          </table:table-cell>
          <table:table-cell office:value-type="float" office:value="8640000" calcext:value-type="float">
            <text:p>8640000</text:p>
          </table:table-cell>
          <table:table-cell table:formula="of:=[.B1434]/[.C1434]" office:value-type="float" office:value="0.00132685185185185" calcext:value-type="float">
            <text:p>0,00132685185185185000</text:p>
          </table:table-cell>
          <table:table-cell table:formula="of:=[.D1435]-[.D14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B1434]+8" office:value-type="float" office:value="11472" calcext:value-type="float">
            <text:p>11472</text:p>
          </table:table-cell>
          <table:table-cell office:value-type="float" office:value="8640000" calcext:value-type="float">
            <text:p>8640000</text:p>
          </table:table-cell>
          <table:table-cell table:formula="of:=[.B1435]/[.C1435]" office:value-type="float" office:value="0.00132777777777778" calcext:value-type="float">
            <text:p>0,00132777777777778000</text:p>
          </table:table-cell>
          <table:table-cell table:formula="of:=[.D1436]-[.D14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B1435]+8" office:value-type="float" office:value="11480" calcext:value-type="float">
            <text:p>11480</text:p>
          </table:table-cell>
          <table:table-cell office:value-type="float" office:value="8640000" calcext:value-type="float">
            <text:p>8640000</text:p>
          </table:table-cell>
          <table:table-cell table:formula="of:=[.B1436]/[.C1436]" office:value-type="float" office:value="0.0013287037037037" calcext:value-type="float">
            <text:p>0,00132870370370370000</text:p>
          </table:table-cell>
          <table:table-cell table:formula="of:=[.D1437]-[.D14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B1436]+8" office:value-type="float" office:value="11488" calcext:value-type="float">
            <text:p>11488</text:p>
          </table:table-cell>
          <table:table-cell office:value-type="float" office:value="8640000" calcext:value-type="float">
            <text:p>8640000</text:p>
          </table:table-cell>
          <table:table-cell table:formula="of:=[.B1437]/[.C1437]" office:value-type="float" office:value="0.00132962962962963" calcext:value-type="float">
            <text:p>0,00132962962962963000</text:p>
          </table:table-cell>
          <table:table-cell table:formula="of:=[.D1438]-[.D14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B1437]+8" office:value-type="float" office:value="11496" calcext:value-type="float">
            <text:p>11496</text:p>
          </table:table-cell>
          <table:table-cell office:value-type="float" office:value="8640000" calcext:value-type="float">
            <text:p>8640000</text:p>
          </table:table-cell>
          <table:table-cell table:formula="of:=[.B1438]/[.C1438]" office:value-type="float" office:value="0.00133055555555556" calcext:value-type="float">
            <text:p>0,00133055555555556000</text:p>
          </table:table-cell>
          <table:table-cell table:formula="of:=[.D1439]-[.D14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B1438]+8" office:value-type="float" office:value="11504" calcext:value-type="float">
            <text:p>11504</text:p>
          </table:table-cell>
          <table:table-cell office:value-type="float" office:value="8640000" calcext:value-type="float">
            <text:p>8640000</text:p>
          </table:table-cell>
          <table:table-cell table:formula="of:=[.B1439]/[.C1439]" office:value-type="float" office:value="0.00133148148148148" calcext:value-type="float">
            <text:p>0,00133148148148148000</text:p>
          </table:table-cell>
          <table:table-cell table:formula="of:=[.D1440]-[.D14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B1439]+8" office:value-type="float" office:value="11512" calcext:value-type="float">
            <text:p>11512</text:p>
          </table:table-cell>
          <table:table-cell office:value-type="float" office:value="8640000" calcext:value-type="float">
            <text:p>8640000</text:p>
          </table:table-cell>
          <table:table-cell table:formula="of:=[.B1440]/[.C1440]" office:value-type="float" office:value="0.00133240740740741" calcext:value-type="float">
            <text:p>0,00133240740740741000</text:p>
          </table:table-cell>
          <table:table-cell table:formula="of:=[.D1441]-[.D14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B1440]+8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1441]/[.C1441]" office:value-type="float" office:value="0.00133333333333333" calcext:value-type="float">
            <text:p>0,00133333333333333000</text:p>
          </table:table-cell>
          <table:table-cell table:formula="of:=[.D1442]-[.D14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B1441]+8" office:value-type="float" office:value="11528" calcext:value-type="float">
            <text:p>11528</text:p>
          </table:table-cell>
          <table:table-cell office:value-type="float" office:value="8640000" calcext:value-type="float">
            <text:p>8640000</text:p>
          </table:table-cell>
          <table:table-cell table:formula="of:=[.B1442]/[.C1442]" office:value-type="float" office:value="0.00133425925925926" calcext:value-type="float">
            <text:p>0,00133425925925926000</text:p>
          </table:table-cell>
          <table:table-cell table:formula="of:=[.D1443]-[.D14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B1442]+8" office:value-type="float" office:value="11536" calcext:value-type="float">
            <text:p>11536</text:p>
          </table:table-cell>
          <table:table-cell office:value-type="float" office:value="8640000" calcext:value-type="float">
            <text:p>8640000</text:p>
          </table:table-cell>
          <table:table-cell table:formula="of:=[.B1443]/[.C1443]" office:value-type="float" office:value="0.00133518518518519" calcext:value-type="float">
            <text:p>0,00133518518518519000</text:p>
          </table:table-cell>
          <table:table-cell table:formula="of:=[.D1444]-[.D14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B1443]+8" office:value-type="float" office:value="11544" calcext:value-type="float">
            <text:p>11544</text:p>
          </table:table-cell>
          <table:table-cell office:value-type="float" office:value="8640000" calcext:value-type="float">
            <text:p>8640000</text:p>
          </table:table-cell>
          <table:table-cell table:formula="of:=[.B1444]/[.C1444]" office:value-type="float" office:value="0.00133611111111111" calcext:value-type="float">
            <text:p>0,00133611111111111000</text:p>
          </table:table-cell>
          <table:table-cell table:formula="of:=[.D1445]-[.D14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B1444]+8" office:value-type="float" office:value="11552" calcext:value-type="float">
            <text:p>11552</text:p>
          </table:table-cell>
          <table:table-cell office:value-type="float" office:value="8640000" calcext:value-type="float">
            <text:p>8640000</text:p>
          </table:table-cell>
          <table:table-cell table:formula="of:=[.B1445]/[.C1445]" office:value-type="float" office:value="0.00133703703703704" calcext:value-type="float">
            <text:p>0,00133703703703704000</text:p>
          </table:table-cell>
          <table:table-cell table:formula="of:=[.D1446]-[.D14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B1445]+8" office:value-type="float" office:value="11560" calcext:value-type="float">
            <text:p>11560</text:p>
          </table:table-cell>
          <table:table-cell office:value-type="float" office:value="8640000" calcext:value-type="float">
            <text:p>8640000</text:p>
          </table:table-cell>
          <table:table-cell table:formula="of:=[.B1446]/[.C1446]" office:value-type="float" office:value="0.00133796296296296" calcext:value-type="float">
            <text:p>0,00133796296296296000</text:p>
          </table:table-cell>
          <table:table-cell table:formula="of:=[.D1447]-[.D14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B1446]+8" office:value-type="float" office:value="11568" calcext:value-type="float">
            <text:p>11568</text:p>
          </table:table-cell>
          <table:table-cell office:value-type="float" office:value="8640000" calcext:value-type="float">
            <text:p>8640000</text:p>
          </table:table-cell>
          <table:table-cell table:formula="of:=[.B1447]/[.C1447]" office:value-type="float" office:value="0.00133888888888889" calcext:value-type="float">
            <text:p>0,00133888888888889000</text:p>
          </table:table-cell>
          <table:table-cell table:formula="of:=[.D1448]-[.D14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B1447]+8" office:value-type="float" office:value="11576" calcext:value-type="float">
            <text:p>11576</text:p>
          </table:table-cell>
          <table:table-cell office:value-type="float" office:value="8640000" calcext:value-type="float">
            <text:p>8640000</text:p>
          </table:table-cell>
          <table:table-cell table:formula="of:=[.B1448]/[.C1448]" office:value-type="float" office:value="0.00133981481481481" calcext:value-type="float">
            <text:p>0,00133981481481481000</text:p>
          </table:table-cell>
          <table:table-cell table:formula="of:=[.D1449]-[.D14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B1448]+8" office:value-type="float" office:value="11584" calcext:value-type="float">
            <text:p>11584</text:p>
          </table:table-cell>
          <table:table-cell office:value-type="float" office:value="8640000" calcext:value-type="float">
            <text:p>8640000</text:p>
          </table:table-cell>
          <table:table-cell table:formula="of:=[.B1449]/[.C1449]" office:value-type="float" office:value="0.00134074074074074" calcext:value-type="float">
            <text:p>0,00134074074074074000</text:p>
          </table:table-cell>
          <table:table-cell table:formula="of:=[.D1450]-[.D14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B1449]+8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1450]/[.C1450]" office:value-type="float" office:value="0.00134166666666667" calcext:value-type="float">
            <text:p>0,00134166666666667000</text:p>
          </table:table-cell>
          <table:table-cell table:formula="of:=[.D1451]-[.D14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B1450]+8" office:value-type="float" office:value="11600" calcext:value-type="float">
            <text:p>11600</text:p>
          </table:table-cell>
          <table:table-cell office:value-type="float" office:value="8640000" calcext:value-type="float">
            <text:p>8640000</text:p>
          </table:table-cell>
          <table:table-cell table:formula="of:=[.B1451]/[.C1451]" office:value-type="float" office:value="0.00134259259259259" calcext:value-type="float">
            <text:p>0,00134259259259259000</text:p>
          </table:table-cell>
          <table:table-cell table:formula="of:=[.D1452]-[.D14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B1451]+8" office:value-type="float" office:value="11608" calcext:value-type="float">
            <text:p>11608</text:p>
          </table:table-cell>
          <table:table-cell office:value-type="float" office:value="8640000" calcext:value-type="float">
            <text:p>8640000</text:p>
          </table:table-cell>
          <table:table-cell table:formula="of:=[.B1452]/[.C1452]" office:value-type="float" office:value="0.00134351851851852" calcext:value-type="float">
            <text:p>0,00134351851851852000</text:p>
          </table:table-cell>
          <table:table-cell table:formula="of:=[.D1453]-[.D1452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B1452]+8" office:value-type="float" office:value="11616" calcext:value-type="float">
            <text:p>11616</text:p>
          </table:table-cell>
          <table:table-cell office:value-type="float" office:value="8640000" calcext:value-type="float">
            <text:p>8640000</text:p>
          </table:table-cell>
          <table:table-cell table:formula="of:=[.B1453]/[.C1453]" office:value-type="float" office:value="0.00134444444444444" calcext:value-type="float">
            <text:p>0,00134444444444444000</text:p>
          </table:table-cell>
          <table:table-cell table:formula="of:=[.D1454]-[.D14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B1453]+8" office:value-type="float" office:value="11624" calcext:value-type="float">
            <text:p>11624</text:p>
          </table:table-cell>
          <table:table-cell office:value-type="float" office:value="8640000" calcext:value-type="float">
            <text:p>8640000</text:p>
          </table:table-cell>
          <table:table-cell table:formula="of:=[.B1454]/[.C1454]" office:value-type="float" office:value="0.00134537037037037" calcext:value-type="float">
            <text:p>0,00134537037037037000</text:p>
          </table:table-cell>
          <table:table-cell table:formula="of:=[.D1455]-[.D14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B1454]+8" office:value-type="float" office:value="11632" calcext:value-type="float">
            <text:p>11632</text:p>
          </table:table-cell>
          <table:table-cell office:value-type="float" office:value="8640000" calcext:value-type="float">
            <text:p>8640000</text:p>
          </table:table-cell>
          <table:table-cell table:formula="of:=[.B1455]/[.C1455]" office:value-type="float" office:value="0.0013462962962963" calcext:value-type="float">
            <text:p>0,00134629629629630000</text:p>
          </table:table-cell>
          <table:table-cell table:formula="of:=[.D1456]-[.D14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B1455]+8" office:value-type="float" office:value="11640" calcext:value-type="float">
            <text:p>11640</text:p>
          </table:table-cell>
          <table:table-cell office:value-type="float" office:value="8640000" calcext:value-type="float">
            <text:p>8640000</text:p>
          </table:table-cell>
          <table:table-cell table:formula="of:=[.B1456]/[.C1456]" office:value-type="float" office:value="0.00134722222222222" calcext:value-type="float">
            <text:p>0,00134722222222222000</text:p>
          </table:table-cell>
          <table:table-cell table:formula="of:=[.D1457]-[.D14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B1456]+8" office:value-type="float" office:value="11648" calcext:value-type="float">
            <text:p>11648</text:p>
          </table:table-cell>
          <table:table-cell office:value-type="float" office:value="8640000" calcext:value-type="float">
            <text:p>8640000</text:p>
          </table:table-cell>
          <table:table-cell table:formula="of:=[.B1457]/[.C1457]" office:value-type="float" office:value="0.00134814814814815" calcext:value-type="float">
            <text:p>0,00134814814814815000</text:p>
          </table:table-cell>
          <table:table-cell table:formula="of:=[.D1458]-[.D14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B1457]+8" office:value-type="float" office:value="11656" calcext:value-type="float">
            <text:p>11656</text:p>
          </table:table-cell>
          <table:table-cell office:value-type="float" office:value="8640000" calcext:value-type="float">
            <text:p>8640000</text:p>
          </table:table-cell>
          <table:table-cell table:formula="of:=[.B1458]/[.C1458]" office:value-type="float" office:value="0.00134907407407407" calcext:value-type="float">
            <text:p>0,00134907407407407000</text:p>
          </table:table-cell>
          <table:table-cell table:formula="of:=[.D1459]-[.D14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B1458]+8" office:value-type="float" office:value="11664" calcext:value-type="float">
            <text:p>11664</text:p>
          </table:table-cell>
          <table:table-cell office:value-type="float" office:value="8640000" calcext:value-type="float">
            <text:p>8640000</text:p>
          </table:table-cell>
          <table:table-cell table:formula="of:=[.B1459]/[.C1459]" office:value-type="float" office:value="0.00135" calcext:value-type="float">
            <text:p>0,00135000000000000000</text:p>
          </table:table-cell>
          <table:table-cell table:formula="of:=[.D1460]-[.D14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B1459]+8" office:value-type="float" office:value="11672" calcext:value-type="float">
            <text:p>11672</text:p>
          </table:table-cell>
          <table:table-cell office:value-type="float" office:value="8640000" calcext:value-type="float">
            <text:p>8640000</text:p>
          </table:table-cell>
          <table:table-cell table:formula="of:=[.B1460]/[.C1460]" office:value-type="float" office:value="0.00135092592592593" calcext:value-type="float">
            <text:p>0,00135092592592593000</text:p>
          </table:table-cell>
          <table:table-cell table:formula="of:=[.D1461]-[.D14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B1460]+8" office:value-type="float" office:value="11680" calcext:value-type="float">
            <text:p>11680</text:p>
          </table:table-cell>
          <table:table-cell office:value-type="float" office:value="8640000" calcext:value-type="float">
            <text:p>8640000</text:p>
          </table:table-cell>
          <table:table-cell table:formula="of:=[.B1461]/[.C1461]" office:value-type="float" office:value="0.00135185185185185" calcext:value-type="float">
            <text:p>0,00135185185185185000</text:p>
          </table:table-cell>
          <table:table-cell table:formula="of:=[.D1462]-[.D14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B1461]+8" office:value-type="float" office:value="11688" calcext:value-type="float">
            <text:p>11688</text:p>
          </table:table-cell>
          <table:table-cell office:value-type="float" office:value="8640000" calcext:value-type="float">
            <text:p>8640000</text:p>
          </table:table-cell>
          <table:table-cell table:formula="of:=[.B1462]/[.C1462]" office:value-type="float" office:value="0.00135277777777778" calcext:value-type="float">
            <text:p>0,00135277777777778000</text:p>
          </table:table-cell>
          <table:table-cell table:formula="of:=[.D1463]-[.D14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B1462]+8" office:value-type="float" office:value="11696" calcext:value-type="float">
            <text:p>11696</text:p>
          </table:table-cell>
          <table:table-cell office:value-type="float" office:value="8640000" calcext:value-type="float">
            <text:p>8640000</text:p>
          </table:table-cell>
          <table:table-cell table:formula="of:=[.B1463]/[.C1463]" office:value-type="float" office:value="0.0013537037037037" calcext:value-type="float">
            <text:p>0,00135370370370370000</text:p>
          </table:table-cell>
          <table:table-cell table:formula="of:=[.D1464]-[.D14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B1463]+8" office:value-type="float" office:value="11704" calcext:value-type="float">
            <text:p>11704</text:p>
          </table:table-cell>
          <table:table-cell office:value-type="float" office:value="8640000" calcext:value-type="float">
            <text:p>8640000</text:p>
          </table:table-cell>
          <table:table-cell table:formula="of:=[.B1464]/[.C1464]" office:value-type="float" office:value="0.00135462962962963" calcext:value-type="float">
            <text:p>0,00135462962962963000</text:p>
          </table:table-cell>
          <table:table-cell table:formula="of:=[.D1465]-[.D14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B1464]+8" office:value-type="float" office:value="11712" calcext:value-type="float">
            <text:p>11712</text:p>
          </table:table-cell>
          <table:table-cell office:value-type="float" office:value="8640000" calcext:value-type="float">
            <text:p>8640000</text:p>
          </table:table-cell>
          <table:table-cell table:formula="of:=[.B1465]/[.C1465]" office:value-type="float" office:value="0.00135555555555556" calcext:value-type="float">
            <text:p>0,00135555555555556000</text:p>
          </table:table-cell>
          <table:table-cell table:formula="of:=[.D1466]-[.D14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B1465]+8" office:value-type="float" office:value="11720" calcext:value-type="float">
            <text:p>11720</text:p>
          </table:table-cell>
          <table:table-cell office:value-type="float" office:value="8640000" calcext:value-type="float">
            <text:p>8640000</text:p>
          </table:table-cell>
          <table:table-cell table:formula="of:=[.B1466]/[.C1466]" office:value-type="float" office:value="0.00135648148148148" calcext:value-type="float">
            <text:p>0,00135648148148148000</text:p>
          </table:table-cell>
          <table:table-cell table:formula="of:=[.D1467]-[.D14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B1466]+8" office:value-type="float" office:value="11728" calcext:value-type="float">
            <text:p>11728</text:p>
          </table:table-cell>
          <table:table-cell office:value-type="float" office:value="8640000" calcext:value-type="float">
            <text:p>8640000</text:p>
          </table:table-cell>
          <table:table-cell table:formula="of:=[.B1467]/[.C1467]" office:value-type="float" office:value="0.00135740740740741" calcext:value-type="float">
            <text:p>0,00135740740740741000</text:p>
          </table:table-cell>
          <table:table-cell table:formula="of:=[.D1468]-[.D14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B1467]+8" office:value-type="float" office:value="11736" calcext:value-type="float">
            <text:p>11736</text:p>
          </table:table-cell>
          <table:table-cell office:value-type="float" office:value="8640000" calcext:value-type="float">
            <text:p>8640000</text:p>
          </table:table-cell>
          <table:table-cell table:formula="of:=[.B1468]/[.C1468]" office:value-type="float" office:value="0.00135833333333333" calcext:value-type="float">
            <text:p>0,00135833333333333000</text:p>
          </table:table-cell>
          <table:table-cell table:formula="of:=[.D1469]-[.D14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B1468]+8" office:value-type="float" office:value="11744" calcext:value-type="float">
            <text:p>11744</text:p>
          </table:table-cell>
          <table:table-cell office:value-type="float" office:value="8640000" calcext:value-type="float">
            <text:p>8640000</text:p>
          </table:table-cell>
          <table:table-cell table:formula="of:=[.B1469]/[.C1469]" office:value-type="float" office:value="0.00135925925925926" calcext:value-type="float">
            <text:p>0,00135925925925926000</text:p>
          </table:table-cell>
          <table:table-cell table:formula="of:=[.D1470]-[.D14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B1469]+8" office:value-type="float" office:value="11752" calcext:value-type="float">
            <text:p>11752</text:p>
          </table:table-cell>
          <table:table-cell office:value-type="float" office:value="8640000" calcext:value-type="float">
            <text:p>8640000</text:p>
          </table:table-cell>
          <table:table-cell table:formula="of:=[.B1470]/[.C1470]" office:value-type="float" office:value="0.00136018518518519" calcext:value-type="float">
            <text:p>0,00136018518518519000</text:p>
          </table:table-cell>
          <table:table-cell table:formula="of:=[.D1471]-[.D14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B1470]+8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1471]/[.C1471]" office:value-type="float" office:value="0.00136111111111111" calcext:value-type="float">
            <text:p>0,00136111111111111000</text:p>
          </table:table-cell>
          <table:table-cell table:formula="of:=[.D1472]-[.D14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B1471]+8" office:value-type="float" office:value="11768" calcext:value-type="float">
            <text:p>11768</text:p>
          </table:table-cell>
          <table:table-cell office:value-type="float" office:value="8640000" calcext:value-type="float">
            <text:p>8640000</text:p>
          </table:table-cell>
          <table:table-cell table:formula="of:=[.B1472]/[.C1472]" office:value-type="float" office:value="0.00136203703703704" calcext:value-type="float">
            <text:p>0,00136203703703704000</text:p>
          </table:table-cell>
          <table:table-cell table:formula="of:=[.D1473]-[.D14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B1472]+8" office:value-type="float" office:value="11776" calcext:value-type="float">
            <text:p>11776</text:p>
          </table:table-cell>
          <table:table-cell office:value-type="float" office:value="8640000" calcext:value-type="float">
            <text:p>8640000</text:p>
          </table:table-cell>
          <table:table-cell table:formula="of:=[.B1473]/[.C1473]" office:value-type="float" office:value="0.00136296296296296" calcext:value-type="float">
            <text:p>0,00136296296296296000</text:p>
          </table:table-cell>
          <table:table-cell table:formula="of:=[.D1474]-[.D14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B1473]+8" office:value-type="float" office:value="11784" calcext:value-type="float">
            <text:p>11784</text:p>
          </table:table-cell>
          <table:table-cell office:value-type="float" office:value="8640000" calcext:value-type="float">
            <text:p>8640000</text:p>
          </table:table-cell>
          <table:table-cell table:formula="of:=[.B1474]/[.C1474]" office:value-type="float" office:value="0.00136388888888889" calcext:value-type="float">
            <text:p>0,00136388888888889000</text:p>
          </table:table-cell>
          <table:table-cell table:formula="of:=[.D1475]-[.D14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B1474]+8" office:value-type="float" office:value="11792" calcext:value-type="float">
            <text:p>11792</text:p>
          </table:table-cell>
          <table:table-cell office:value-type="float" office:value="8640000" calcext:value-type="float">
            <text:p>8640000</text:p>
          </table:table-cell>
          <table:table-cell table:formula="of:=[.B1475]/[.C1475]" office:value-type="float" office:value="0.00136481481481481" calcext:value-type="float">
            <text:p>0,00136481481481481000</text:p>
          </table:table-cell>
          <table:table-cell table:formula="of:=[.D1476]-[.D14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B1475]+8" office:value-type="float" office:value="11800" calcext:value-type="float">
            <text:p>11800</text:p>
          </table:table-cell>
          <table:table-cell office:value-type="float" office:value="8640000" calcext:value-type="float">
            <text:p>8640000</text:p>
          </table:table-cell>
          <table:table-cell table:formula="of:=[.B1476]/[.C1476]" office:value-type="float" office:value="0.00136574074074074" calcext:value-type="float">
            <text:p>0,00136574074074074000</text:p>
          </table:table-cell>
          <table:table-cell table:formula="of:=[.D1477]-[.D14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B1476]+8" office:value-type="float" office:value="11808" calcext:value-type="float">
            <text:p>11808</text:p>
          </table:table-cell>
          <table:table-cell office:value-type="float" office:value="8640000" calcext:value-type="float">
            <text:p>8640000</text:p>
          </table:table-cell>
          <table:table-cell table:formula="of:=[.B1477]/[.C1477]" office:value-type="float" office:value="0.00136666666666667" calcext:value-type="float">
            <text:p>0,00136666666666667000</text:p>
          </table:table-cell>
          <table:table-cell table:formula="of:=[.D1478]-[.D14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B1477]+8" office:value-type="float" office:value="11816" calcext:value-type="float">
            <text:p>11816</text:p>
          </table:table-cell>
          <table:table-cell office:value-type="float" office:value="8640000" calcext:value-type="float">
            <text:p>8640000</text:p>
          </table:table-cell>
          <table:table-cell table:formula="of:=[.B1478]/[.C1478]" office:value-type="float" office:value="0.00136759259259259" calcext:value-type="float">
            <text:p>0,00136759259259259000</text:p>
          </table:table-cell>
          <table:table-cell table:formula="of:=[.D1479]-[.D14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B1478]+8" office:value-type="float" office:value="11824" calcext:value-type="float">
            <text:p>11824</text:p>
          </table:table-cell>
          <table:table-cell office:value-type="float" office:value="8640000" calcext:value-type="float">
            <text:p>8640000</text:p>
          </table:table-cell>
          <table:table-cell table:formula="of:=[.B1479]/[.C1479]" office:value-type="float" office:value="0.00136851851851852" calcext:value-type="float">
            <text:p>0,00136851851851852000</text:p>
          </table:table-cell>
          <table:table-cell table:formula="of:=[.D1480]-[.D14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B1479]+8" office:value-type="float" office:value="11832" calcext:value-type="float">
            <text:p>11832</text:p>
          </table:table-cell>
          <table:table-cell office:value-type="float" office:value="8640000" calcext:value-type="float">
            <text:p>8640000</text:p>
          </table:table-cell>
          <table:table-cell table:formula="of:=[.B1480]/[.C1480]" office:value-type="float" office:value="0.00136944444444444" calcext:value-type="float">
            <text:p>0,00136944444444444000</text:p>
          </table:table-cell>
          <table:table-cell table:formula="of:=[.D1481]-[.D14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B1480]+8" office:value-type="float" office:value="11840" calcext:value-type="float">
            <text:p>11840</text:p>
          </table:table-cell>
          <table:table-cell office:value-type="float" office:value="8640000" calcext:value-type="float">
            <text:p>8640000</text:p>
          </table:table-cell>
          <table:table-cell table:formula="of:=[.B1481]/[.C1481]" office:value-type="float" office:value="0.00137037037037037" calcext:value-type="float">
            <text:p>0,00137037037037037000</text:p>
          </table:table-cell>
          <table:table-cell table:formula="of:=[.D1482]-[.D14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B1481]+8" office:value-type="float" office:value="11848" calcext:value-type="float">
            <text:p>11848</text:p>
          </table:table-cell>
          <table:table-cell office:value-type="float" office:value="8640000" calcext:value-type="float">
            <text:p>8640000</text:p>
          </table:table-cell>
          <table:table-cell table:formula="of:=[.B1482]/[.C1482]" office:value-type="float" office:value="0.0013712962962963" calcext:value-type="float">
            <text:p>0,00137129629629630000</text:p>
          </table:table-cell>
          <table:table-cell table:formula="of:=[.D1483]-[.D14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B1482]+8" office:value-type="float" office:value="11856" calcext:value-type="float">
            <text:p>11856</text:p>
          </table:table-cell>
          <table:table-cell office:value-type="float" office:value="8640000" calcext:value-type="float">
            <text:p>8640000</text:p>
          </table:table-cell>
          <table:table-cell table:formula="of:=[.B1483]/[.C1483]" office:value-type="float" office:value="0.00137222222222222" calcext:value-type="float">
            <text:p>0,00137222222222222000</text:p>
          </table:table-cell>
          <table:table-cell table:formula="of:=[.D1484]-[.D14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B1483]+8" office:value-type="float" office:value="11864" calcext:value-type="float">
            <text:p>11864</text:p>
          </table:table-cell>
          <table:table-cell office:value-type="float" office:value="8640000" calcext:value-type="float">
            <text:p>8640000</text:p>
          </table:table-cell>
          <table:table-cell table:formula="of:=[.B1484]/[.C1484]" office:value-type="float" office:value="0.00137314814814815" calcext:value-type="float">
            <text:p>0,00137314814814815000</text:p>
          </table:table-cell>
          <table:table-cell table:formula="of:=[.D1485]-[.D14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B1484]+8" office:value-type="float" office:value="11872" calcext:value-type="float">
            <text:p>11872</text:p>
          </table:table-cell>
          <table:table-cell office:value-type="float" office:value="8640000" calcext:value-type="float">
            <text:p>8640000</text:p>
          </table:table-cell>
          <table:table-cell table:formula="of:=[.B1485]/[.C1485]" office:value-type="float" office:value="0.00137407407407407" calcext:value-type="float">
            <text:p>0,00137407407407407000</text:p>
          </table:table-cell>
          <table:table-cell table:formula="of:=[.D1486]-[.D14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B1485]+8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1486]/[.C1486]" office:value-type="float" office:value="0.001375" calcext:value-type="float">
            <text:p>0,00137500000000000000</text:p>
          </table:table-cell>
          <table:table-cell table:formula="of:=[.D1487]-[.D14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B1486]+8" office:value-type="float" office:value="11888" calcext:value-type="float">
            <text:p>11888</text:p>
          </table:table-cell>
          <table:table-cell office:value-type="float" office:value="8640000" calcext:value-type="float">
            <text:p>8640000</text:p>
          </table:table-cell>
          <table:table-cell table:formula="of:=[.B1487]/[.C1487]" office:value-type="float" office:value="0.00137592592592593" calcext:value-type="float">
            <text:p>0,00137592592592593000</text:p>
          </table:table-cell>
          <table:table-cell table:formula="of:=[.D1488]-[.D14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B1487]+8" office:value-type="float" office:value="11896" calcext:value-type="float">
            <text:p>11896</text:p>
          </table:table-cell>
          <table:table-cell office:value-type="float" office:value="8640000" calcext:value-type="float">
            <text:p>8640000</text:p>
          </table:table-cell>
          <table:table-cell table:formula="of:=[.B1488]/[.C1488]" office:value-type="float" office:value="0.00137685185185185" calcext:value-type="float">
            <text:p>0,00137685185185185000</text:p>
          </table:table-cell>
          <table:table-cell table:formula="of:=[.D1489]-[.D14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B1488]+8" office:value-type="float" office:value="11904" calcext:value-type="float">
            <text:p>11904</text:p>
          </table:table-cell>
          <table:table-cell office:value-type="float" office:value="8640000" calcext:value-type="float">
            <text:p>8640000</text:p>
          </table:table-cell>
          <table:table-cell table:formula="of:=[.B1489]/[.C1489]" office:value-type="float" office:value="0.00137777777777778" calcext:value-type="float">
            <text:p>0,00137777777777778000</text:p>
          </table:table-cell>
          <table:table-cell table:formula="of:=[.D1490]-[.D14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B1489]+8" office:value-type="float" office:value="11912" calcext:value-type="float">
            <text:p>11912</text:p>
          </table:table-cell>
          <table:table-cell office:value-type="float" office:value="8640000" calcext:value-type="float">
            <text:p>8640000</text:p>
          </table:table-cell>
          <table:table-cell table:formula="of:=[.B1490]/[.C1490]" office:value-type="float" office:value="0.0013787037037037" calcext:value-type="float">
            <text:p>0,00137870370370370000</text:p>
          </table:table-cell>
          <table:table-cell table:formula="of:=[.D1491]-[.D14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B1490]+8" office:value-type="float" office:value="11920" calcext:value-type="float">
            <text:p>11920</text:p>
          </table:table-cell>
          <table:table-cell office:value-type="float" office:value="8640000" calcext:value-type="float">
            <text:p>8640000</text:p>
          </table:table-cell>
          <table:table-cell table:formula="of:=[.B1491]/[.C1491]" office:value-type="float" office:value="0.00137962962962963" calcext:value-type="float">
            <text:p>0,00137962962962963000</text:p>
          </table:table-cell>
          <table:table-cell table:formula="of:=[.D1492]-[.D1491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B1491]+8" office:value-type="float" office:value="11928" calcext:value-type="float">
            <text:p>11928</text:p>
          </table:table-cell>
          <table:table-cell office:value-type="float" office:value="8640000" calcext:value-type="float">
            <text:p>8640000</text:p>
          </table:table-cell>
          <table:table-cell table:formula="of:=[.B1492]/[.C1492]" office:value-type="float" office:value="0.00138055555555556" calcext:value-type="float">
            <text:p>0,00138055555555556000</text:p>
          </table:table-cell>
          <table:table-cell table:formula="of:=[.D1493]-[.D14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B1492]+8" office:value-type="float" office:value="11936" calcext:value-type="float">
            <text:p>11936</text:p>
          </table:table-cell>
          <table:table-cell office:value-type="float" office:value="8640000" calcext:value-type="float">
            <text:p>8640000</text:p>
          </table:table-cell>
          <table:table-cell table:formula="of:=[.B1493]/[.C1493]" office:value-type="float" office:value="0.00138148148148148" calcext:value-type="float">
            <text:p>0,00138148148148148000</text:p>
          </table:table-cell>
          <table:table-cell table:formula="of:=[.D1494]-[.D14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B1493]+8" office:value-type="float" office:value="11944" calcext:value-type="float">
            <text:p>11944</text:p>
          </table:table-cell>
          <table:table-cell office:value-type="float" office:value="8640000" calcext:value-type="float">
            <text:p>8640000</text:p>
          </table:table-cell>
          <table:table-cell table:formula="of:=[.B1494]/[.C1494]" office:value-type="float" office:value="0.00138240740740741" calcext:value-type="float">
            <text:p>0,00138240740740741000</text:p>
          </table:table-cell>
          <table:table-cell table:formula="of:=[.D1495]-[.D14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B1494]+8" office:value-type="float" office:value="11952" calcext:value-type="float">
            <text:p>11952</text:p>
          </table:table-cell>
          <table:table-cell office:value-type="float" office:value="8640000" calcext:value-type="float">
            <text:p>8640000</text:p>
          </table:table-cell>
          <table:table-cell table:formula="of:=[.B1495]/[.C1495]" office:value-type="float" office:value="0.00138333333333333" calcext:value-type="float">
            <text:p>0,00138333333333333000</text:p>
          </table:table-cell>
          <table:table-cell table:formula="of:=[.D1496]-[.D14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B1495]+8" office:value-type="float" office:value="11960" calcext:value-type="float">
            <text:p>11960</text:p>
          </table:table-cell>
          <table:table-cell office:value-type="float" office:value="8640000" calcext:value-type="float">
            <text:p>8640000</text:p>
          </table:table-cell>
          <table:table-cell table:formula="of:=[.B1496]/[.C1496]" office:value-type="float" office:value="0.00138425925925926" calcext:value-type="float">
            <text:p>0,00138425925925926000</text:p>
          </table:table-cell>
          <table:table-cell table:formula="of:=[.D1497]-[.D14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B1496]+8" office:value-type="float" office:value="11968" calcext:value-type="float">
            <text:p>11968</text:p>
          </table:table-cell>
          <table:table-cell office:value-type="float" office:value="8640000" calcext:value-type="float">
            <text:p>8640000</text:p>
          </table:table-cell>
          <table:table-cell table:formula="of:=[.B1497]/[.C1497]" office:value-type="float" office:value="0.00138518518518519" calcext:value-type="float">
            <text:p>0,00138518518518519000</text:p>
          </table:table-cell>
          <table:table-cell table:formula="of:=[.D1498]-[.D14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B1497]+8" office:value-type="float" office:value="11976" calcext:value-type="float">
            <text:p>11976</text:p>
          </table:table-cell>
          <table:table-cell office:value-type="float" office:value="8640000" calcext:value-type="float">
            <text:p>8640000</text:p>
          </table:table-cell>
          <table:table-cell table:formula="of:=[.B1498]/[.C1498]" office:value-type="float" office:value="0.00138611111111111" calcext:value-type="float">
            <text:p>0,00138611111111111000</text:p>
          </table:table-cell>
          <table:table-cell table:formula="of:=[.D1499]-[.D14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B1498]+8" office:value-type="float" office:value="11984" calcext:value-type="float">
            <text:p>11984</text:p>
          </table:table-cell>
          <table:table-cell office:value-type="float" office:value="8640000" calcext:value-type="float">
            <text:p>8640000</text:p>
          </table:table-cell>
          <table:table-cell table:formula="of:=[.B1499]/[.C1499]" office:value-type="float" office:value="0.00138703703703704" calcext:value-type="float">
            <text:p>0,00138703703703704000</text:p>
          </table:table-cell>
          <table:table-cell table:formula="of:=[.D1500]-[.D14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B1499]+8" office:value-type="float" office:value="11992" calcext:value-type="float">
            <text:p>11992</text:p>
          </table:table-cell>
          <table:table-cell office:value-type="float" office:value="8640000" calcext:value-type="float">
            <text:p>8640000</text:p>
          </table:table-cell>
          <table:table-cell table:formula="of:=[.B1500]/[.C1500]" office:value-type="float" office:value="0.00138796296296296" calcext:value-type="float">
            <text:p>0,00138796296296296000</text:p>
          </table:table-cell>
          <table:table-cell table:formula="of:=[.D1501]-[.D15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1500]+8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1501]/[.C1501]" office:value-type="float" office:value="0.00138888888888889" calcext:value-type="float">
            <text:p>0,00138888888888889000</text:p>
          </table:table-cell>
          <table:table-cell table:formula="of:=[.D1502]-[.D15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[.B1501]+8" office:value-type="float" office:value="12008" calcext:value-type="float">
            <text:p>12008</text:p>
          </table:table-cell>
          <table:table-cell office:value-type="float" office:value="8640000" calcext:value-type="float">
            <text:p>8640000</text:p>
          </table:table-cell>
          <table:table-cell table:formula="of:=[.B1502]/[.C1502]" office:value-type="float" office:value="0.00138981481481481" calcext:value-type="float">
            <text:p>0,00138981481481481000</text:p>
          </table:table-cell>
          <table:table-cell table:formula="of:=[.D1503]-[.D15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B1502]+8" office:value-type="float" office:value="12016" calcext:value-type="float">
            <text:p>12016</text:p>
          </table:table-cell>
          <table:table-cell office:value-type="float" office:value="8640000" calcext:value-type="float">
            <text:p>8640000</text:p>
          </table:table-cell>
          <table:table-cell table:formula="of:=[.B1503]/[.C1503]" office:value-type="float" office:value="0.00139074074074074" calcext:value-type="float">
            <text:p>0,00139074074074074000</text:p>
          </table:table-cell>
          <table:table-cell table:formula="of:=[.D1504]-[.D15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[.B1503]+8" office:value-type="float" office:value="12024" calcext:value-type="float">
            <text:p>12024</text:p>
          </table:table-cell>
          <table:table-cell office:value-type="float" office:value="8640000" calcext:value-type="float">
            <text:p>8640000</text:p>
          </table:table-cell>
          <table:table-cell table:formula="of:=[.B1504]/[.C1504]" office:value-type="float" office:value="0.00139166666666667" calcext:value-type="float">
            <text:p>0,00139166666666667000</text:p>
          </table:table-cell>
          <table:table-cell table:formula="of:=[.D1505]-[.D15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B1504]+8" office:value-type="float" office:value="12032" calcext:value-type="float">
            <text:p>12032</text:p>
          </table:table-cell>
          <table:table-cell office:value-type="float" office:value="8640000" calcext:value-type="float">
            <text:p>8640000</text:p>
          </table:table-cell>
          <table:table-cell table:formula="of:=[.B1505]/[.C1505]" office:value-type="float" office:value="0.00139259259259259" calcext:value-type="float">
            <text:p>0,00139259259259259000</text:p>
          </table:table-cell>
          <table:table-cell table:formula="of:=[.D1506]-[.D15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[.B1505]+8" office:value-type="float" office:value="12040" calcext:value-type="float">
            <text:p>12040</text:p>
          </table:table-cell>
          <table:table-cell office:value-type="float" office:value="8640000" calcext:value-type="float">
            <text:p>8640000</text:p>
          </table:table-cell>
          <table:table-cell table:formula="of:=[.B1506]/[.C1506]" office:value-type="float" office:value="0.00139351851851852" calcext:value-type="float">
            <text:p>0,00139351851851852000</text:p>
          </table:table-cell>
          <table:table-cell table:formula="of:=[.D1507]-[.D15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B1506]+8" office:value-type="float" office:value="12048" calcext:value-type="float">
            <text:p>12048</text:p>
          </table:table-cell>
          <table:table-cell office:value-type="float" office:value="8640000" calcext:value-type="float">
            <text:p>8640000</text:p>
          </table:table-cell>
          <table:table-cell table:formula="of:=[.B1507]/[.C1507]" office:value-type="float" office:value="0.00139444444444444" calcext:value-type="float">
            <text:p>0,00139444444444444000</text:p>
          </table:table-cell>
          <table:table-cell table:formula="of:=[.D1508]-[.D15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B1507]+8" office:value-type="float" office:value="12056" calcext:value-type="float">
            <text:p>12056</text:p>
          </table:table-cell>
          <table:table-cell office:value-type="float" office:value="8640000" calcext:value-type="float">
            <text:p>8640000</text:p>
          </table:table-cell>
          <table:table-cell table:formula="of:=[.B1508]/[.C1508]" office:value-type="float" office:value="0.00139537037037037" calcext:value-type="float">
            <text:p>0,00139537037037037000</text:p>
          </table:table-cell>
          <table:table-cell table:formula="of:=[.D1509]-[.D15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B1508]+8" office:value-type="float" office:value="12064" calcext:value-type="float">
            <text:p>12064</text:p>
          </table:table-cell>
          <table:table-cell office:value-type="float" office:value="8640000" calcext:value-type="float">
            <text:p>8640000</text:p>
          </table:table-cell>
          <table:table-cell table:formula="of:=[.B1509]/[.C1509]" office:value-type="float" office:value="0.0013962962962963" calcext:value-type="float">
            <text:p>0,00139629629629630000</text:p>
          </table:table-cell>
          <table:table-cell table:formula="of:=[.D1510]-[.D15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B1509]+8" office:value-type="float" office:value="12072" calcext:value-type="float">
            <text:p>12072</text:p>
          </table:table-cell>
          <table:table-cell office:value-type="float" office:value="8640000" calcext:value-type="float">
            <text:p>8640000</text:p>
          </table:table-cell>
          <table:table-cell table:formula="of:=[.B1510]/[.C1510]" office:value-type="float" office:value="0.00139722222222222" calcext:value-type="float">
            <text:p>0,00139722222222222000</text:p>
          </table:table-cell>
          <table:table-cell table:formula="of:=[.D1511]-[.D15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B1510]+8" office:value-type="float" office:value="12080" calcext:value-type="float">
            <text:p>12080</text:p>
          </table:table-cell>
          <table:table-cell office:value-type="float" office:value="8640000" calcext:value-type="float">
            <text:p>8640000</text:p>
          </table:table-cell>
          <table:table-cell table:formula="of:=[.B1511]/[.C1511]" office:value-type="float" office:value="0.00139814814814815" calcext:value-type="float">
            <text:p>0,00139814814814815000</text:p>
          </table:table-cell>
          <table:table-cell table:formula="of:=[.D1512]-[.D15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B1511]+8" office:value-type="float" office:value="12088" calcext:value-type="float">
            <text:p>12088</text:p>
          </table:table-cell>
          <table:table-cell office:value-type="float" office:value="8640000" calcext:value-type="float">
            <text:p>8640000</text:p>
          </table:table-cell>
          <table:table-cell table:formula="of:=[.B1512]/[.C1512]" office:value-type="float" office:value="0.00139907407407407" calcext:value-type="float">
            <text:p>0,00139907407407407000</text:p>
          </table:table-cell>
          <table:table-cell table:formula="of:=[.D1513]-[.D15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B1512]+8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1513]/[.C1513]" office:value-type="float" office:value="0.0014" calcext:value-type="float">
            <text:p>0,00140000000000000000</text:p>
          </table:table-cell>
          <table:table-cell table:formula="of:=[.D1514]-[.D15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B1513]+8" office:value-type="float" office:value="12104" calcext:value-type="float">
            <text:p>12104</text:p>
          </table:table-cell>
          <table:table-cell office:value-type="float" office:value="8640000" calcext:value-type="float">
            <text:p>8640000</text:p>
          </table:table-cell>
          <table:table-cell table:formula="of:=[.B1514]/[.C1514]" office:value-type="float" office:value="0.00140092592592593" calcext:value-type="float">
            <text:p>0,00140092592592593000</text:p>
          </table:table-cell>
          <table:table-cell table:formula="of:=[.D1515]-[.D15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B1514]+8" office:value-type="float" office:value="12112" calcext:value-type="float">
            <text:p>12112</text:p>
          </table:table-cell>
          <table:table-cell office:value-type="float" office:value="8640000" calcext:value-type="float">
            <text:p>8640000</text:p>
          </table:table-cell>
          <table:table-cell table:formula="of:=[.B1515]/[.C1515]" office:value-type="float" office:value="0.00140185185185185" calcext:value-type="float">
            <text:p>0,00140185185185185000</text:p>
          </table:table-cell>
          <table:table-cell table:formula="of:=[.D1516]-[.D15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B1515]+8" office:value-type="float" office:value="12120" calcext:value-type="float">
            <text:p>12120</text:p>
          </table:table-cell>
          <table:table-cell office:value-type="float" office:value="8640000" calcext:value-type="float">
            <text:p>8640000</text:p>
          </table:table-cell>
          <table:table-cell table:formula="of:=[.B1516]/[.C1516]" office:value-type="float" office:value="0.00140277777777778" calcext:value-type="float">
            <text:p>0,00140277777777778000</text:p>
          </table:table-cell>
          <table:table-cell table:formula="of:=[.D1517]-[.D15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B1516]+8" office:value-type="float" office:value="12128" calcext:value-type="float">
            <text:p>12128</text:p>
          </table:table-cell>
          <table:table-cell office:value-type="float" office:value="8640000" calcext:value-type="float">
            <text:p>8640000</text:p>
          </table:table-cell>
          <table:table-cell table:formula="of:=[.B1517]/[.C1517]" office:value-type="float" office:value="0.0014037037037037" calcext:value-type="float">
            <text:p>0,00140370370370370000</text:p>
          </table:table-cell>
          <table:table-cell table:formula="of:=[.D1518]-[.D15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B1517]+8" office:value-type="float" office:value="12136" calcext:value-type="float">
            <text:p>12136</text:p>
          </table:table-cell>
          <table:table-cell office:value-type="float" office:value="8640000" calcext:value-type="float">
            <text:p>8640000</text:p>
          </table:table-cell>
          <table:table-cell table:formula="of:=[.B1518]/[.C1518]" office:value-type="float" office:value="0.00140462962962963" calcext:value-type="float">
            <text:p>0,00140462962962963000</text:p>
          </table:table-cell>
          <table:table-cell table:formula="of:=[.D1519]-[.D15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B1518]+8" office:value-type="float" office:value="12144" calcext:value-type="float">
            <text:p>12144</text:p>
          </table:table-cell>
          <table:table-cell office:value-type="float" office:value="8640000" calcext:value-type="float">
            <text:p>8640000</text:p>
          </table:table-cell>
          <table:table-cell table:formula="of:=[.B1519]/[.C1519]" office:value-type="float" office:value="0.00140555555555556" calcext:value-type="float">
            <text:p>0,00140555555555556000</text:p>
          </table:table-cell>
          <table:table-cell table:formula="of:=[.D1520]-[.D15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B1519]+8" office:value-type="float" office:value="12152" calcext:value-type="float">
            <text:p>12152</text:p>
          </table:table-cell>
          <table:table-cell office:value-type="float" office:value="8640000" calcext:value-type="float">
            <text:p>8640000</text:p>
          </table:table-cell>
          <table:table-cell table:formula="of:=[.B1520]/[.C1520]" office:value-type="float" office:value="0.00140648148148148" calcext:value-type="float">
            <text:p>0,00140648148148148000</text:p>
          </table:table-cell>
          <table:table-cell table:formula="of:=[.D1521]-[.D15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B1520]+8" office:value-type="float" office:value="12160" calcext:value-type="float">
            <text:p>12160</text:p>
          </table:table-cell>
          <table:table-cell office:value-type="float" office:value="8640000" calcext:value-type="float">
            <text:p>8640000</text:p>
          </table:table-cell>
          <table:table-cell table:formula="of:=[.B1521]/[.C1521]" office:value-type="float" office:value="0.00140740740740741" calcext:value-type="float">
            <text:p>0,00140740740740741000</text:p>
          </table:table-cell>
          <table:table-cell table:formula="of:=[.D1522]-[.D15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B1521]+8" office:value-type="float" office:value="12168" calcext:value-type="float">
            <text:p>12168</text:p>
          </table:table-cell>
          <table:table-cell office:value-type="float" office:value="8640000" calcext:value-type="float">
            <text:p>8640000</text:p>
          </table:table-cell>
          <table:table-cell table:formula="of:=[.B1522]/[.C1522]" office:value-type="float" office:value="0.00140833333333333" calcext:value-type="float">
            <text:p>0,00140833333333333000</text:p>
          </table:table-cell>
          <table:table-cell table:formula="of:=[.D1523]-[.D15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B1522]+8" office:value-type="float" office:value="12176" calcext:value-type="float">
            <text:p>12176</text:p>
          </table:table-cell>
          <table:table-cell office:value-type="float" office:value="8640000" calcext:value-type="float">
            <text:p>8640000</text:p>
          </table:table-cell>
          <table:table-cell table:formula="of:=[.B1523]/[.C1523]" office:value-type="float" office:value="0.00140925925925926" calcext:value-type="float">
            <text:p>0,00140925925925926000</text:p>
          </table:table-cell>
          <table:table-cell table:formula="of:=[.D1524]-[.D15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B1523]+8" office:value-type="float" office:value="12184" calcext:value-type="float">
            <text:p>12184</text:p>
          </table:table-cell>
          <table:table-cell office:value-type="float" office:value="8640000" calcext:value-type="float">
            <text:p>8640000</text:p>
          </table:table-cell>
          <table:table-cell table:formula="of:=[.B1524]/[.C1524]" office:value-type="float" office:value="0.00141018518518519" calcext:value-type="float">
            <text:p>0,00141018518518519000</text:p>
          </table:table-cell>
          <table:table-cell table:formula="of:=[.D1525]-[.D15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B1524]+8" office:value-type="float" office:value="12192" calcext:value-type="float">
            <text:p>12192</text:p>
          </table:table-cell>
          <table:table-cell office:value-type="float" office:value="8640000" calcext:value-type="float">
            <text:p>8640000</text:p>
          </table:table-cell>
          <table:table-cell table:formula="of:=[.B1525]/[.C1525]" office:value-type="float" office:value="0.00141111111111111" calcext:value-type="float">
            <text:p>0,00141111111111111000</text:p>
          </table:table-cell>
          <table:table-cell table:formula="of:=[.D1526]-[.D15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B1525]+8" office:value-type="float" office:value="12200" calcext:value-type="float">
            <text:p>12200</text:p>
          </table:table-cell>
          <table:table-cell office:value-type="float" office:value="8640000" calcext:value-type="float">
            <text:p>8640000</text:p>
          </table:table-cell>
          <table:table-cell table:formula="of:=[.B1526]/[.C1526]" office:value-type="float" office:value="0.00141203703703704" calcext:value-type="float">
            <text:p>0,00141203703703704000</text:p>
          </table:table-cell>
          <table:table-cell table:formula="of:=[.D1527]-[.D15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B1526]+8" office:value-type="float" office:value="12208" calcext:value-type="float">
            <text:p>12208</text:p>
          </table:table-cell>
          <table:table-cell office:value-type="float" office:value="8640000" calcext:value-type="float">
            <text:p>8640000</text:p>
          </table:table-cell>
          <table:table-cell table:formula="of:=[.B1527]/[.C1527]" office:value-type="float" office:value="0.00141296296296296" calcext:value-type="float">
            <text:p>0,00141296296296296000</text:p>
          </table:table-cell>
          <table:table-cell table:formula="of:=[.D1528]-[.D15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B1527]+8" office:value-type="float" office:value="12216" calcext:value-type="float">
            <text:p>12216</text:p>
          </table:table-cell>
          <table:table-cell office:value-type="float" office:value="8640000" calcext:value-type="float">
            <text:p>8640000</text:p>
          </table:table-cell>
          <table:table-cell table:formula="of:=[.B1528]/[.C1528]" office:value-type="float" office:value="0.00141388888888889" calcext:value-type="float">
            <text:p>0,00141388888888889000</text:p>
          </table:table-cell>
          <table:table-cell table:formula="of:=[.D1529]-[.D15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B1528]+8" office:value-type="float" office:value="12224" calcext:value-type="float">
            <text:p>12224</text:p>
          </table:table-cell>
          <table:table-cell office:value-type="float" office:value="8640000" calcext:value-type="float">
            <text:p>8640000</text:p>
          </table:table-cell>
          <table:table-cell table:formula="of:=[.B1529]/[.C1529]" office:value-type="float" office:value="0.00141481481481481" calcext:value-type="float">
            <text:p>0,00141481481481481000</text:p>
          </table:table-cell>
          <table:table-cell table:formula="of:=[.D1530]-[.D1529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B1529]+8" office:value-type="float" office:value="12232" calcext:value-type="float">
            <text:p>12232</text:p>
          </table:table-cell>
          <table:table-cell office:value-type="float" office:value="8640000" calcext:value-type="float">
            <text:p>8640000</text:p>
          </table:table-cell>
          <table:table-cell table:formula="of:=[.B1530]/[.C1530]" office:value-type="float" office:value="0.00141574074074074" calcext:value-type="float">
            <text:p>0,00141574074074074000</text:p>
          </table:table-cell>
          <table:table-cell table:formula="of:=[.D1531]-[.D15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B1530]+8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1531]/[.C1531]" office:value-type="float" office:value="0.00141666666666667" calcext:value-type="float">
            <text:p>0,00141666666666667000</text:p>
          </table:table-cell>
          <table:table-cell table:formula="of:=[.D1532]-[.D15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B1531]+8" office:value-type="float" office:value="12248" calcext:value-type="float">
            <text:p>12248</text:p>
          </table:table-cell>
          <table:table-cell office:value-type="float" office:value="8640000" calcext:value-type="float">
            <text:p>8640000</text:p>
          </table:table-cell>
          <table:table-cell table:formula="of:=[.B1532]/[.C1532]" office:value-type="float" office:value="0.00141759259259259" calcext:value-type="float">
            <text:p>0,00141759259259259000</text:p>
          </table:table-cell>
          <table:table-cell table:formula="of:=[.D1533]-[.D15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B1532]+8" office:value-type="float" office:value="12256" calcext:value-type="float">
            <text:p>12256</text:p>
          </table:table-cell>
          <table:table-cell office:value-type="float" office:value="8640000" calcext:value-type="float">
            <text:p>8640000</text:p>
          </table:table-cell>
          <table:table-cell table:formula="of:=[.B1533]/[.C1533]" office:value-type="float" office:value="0.00141851851851852" calcext:value-type="float">
            <text:p>0,00141851851851852000</text:p>
          </table:table-cell>
          <table:table-cell table:formula="of:=[.D1534]-[.D15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B1533]+8" office:value-type="float" office:value="12264" calcext:value-type="float">
            <text:p>12264</text:p>
          </table:table-cell>
          <table:table-cell office:value-type="float" office:value="8640000" calcext:value-type="float">
            <text:p>8640000</text:p>
          </table:table-cell>
          <table:table-cell table:formula="of:=[.B1534]/[.C1534]" office:value-type="float" office:value="0.00141944444444444" calcext:value-type="float">
            <text:p>0,00141944444444444000</text:p>
          </table:table-cell>
          <table:table-cell table:formula="of:=[.D1535]-[.D15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B1534]+8" office:value-type="float" office:value="12272" calcext:value-type="float">
            <text:p>12272</text:p>
          </table:table-cell>
          <table:table-cell office:value-type="float" office:value="8640000" calcext:value-type="float">
            <text:p>8640000</text:p>
          </table:table-cell>
          <table:table-cell table:formula="of:=[.B1535]/[.C1535]" office:value-type="float" office:value="0.00142037037037037" calcext:value-type="float">
            <text:p>0,00142037037037037000</text:p>
          </table:table-cell>
          <table:table-cell table:formula="of:=[.D1536]-[.D15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B1535]+8" office:value-type="float" office:value="12280" calcext:value-type="float">
            <text:p>12280</text:p>
          </table:table-cell>
          <table:table-cell office:value-type="float" office:value="8640000" calcext:value-type="float">
            <text:p>8640000</text:p>
          </table:table-cell>
          <table:table-cell table:formula="of:=[.B1536]/[.C1536]" office:value-type="float" office:value="0.0014212962962963" calcext:value-type="float">
            <text:p>0,00142129629629630000</text:p>
          </table:table-cell>
          <table:table-cell table:formula="of:=[.D1537]-[.D15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B1536]+8" office:value-type="float" office:value="12288" calcext:value-type="float">
            <text:p>12288</text:p>
          </table:table-cell>
          <table:table-cell office:value-type="float" office:value="8640000" calcext:value-type="float">
            <text:p>8640000</text:p>
          </table:table-cell>
          <table:table-cell table:formula="of:=[.B1537]/[.C1537]" office:value-type="float" office:value="0.00142222222222222" calcext:value-type="float">
            <text:p>0,00142222222222222000</text:p>
          </table:table-cell>
          <table:table-cell table:formula="of:=[.D1538]-[.D15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B1537]+8" office:value-type="float" office:value="12296" calcext:value-type="float">
            <text:p>12296</text:p>
          </table:table-cell>
          <table:table-cell office:value-type="float" office:value="8640000" calcext:value-type="float">
            <text:p>8640000</text:p>
          </table:table-cell>
          <table:table-cell table:formula="of:=[.B1538]/[.C1538]" office:value-type="float" office:value="0.00142314814814815" calcext:value-type="float">
            <text:p>0,00142314814814815000</text:p>
          </table:table-cell>
          <table:table-cell table:formula="of:=[.D1539]-[.D15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[.B1538]+8" office:value-type="float" office:value="12304" calcext:value-type="float">
            <text:p>12304</text:p>
          </table:table-cell>
          <table:table-cell office:value-type="float" office:value="8640000" calcext:value-type="float">
            <text:p>8640000</text:p>
          </table:table-cell>
          <table:table-cell table:formula="of:=[.B1539]/[.C1539]" office:value-type="float" office:value="0.00142407407407407" calcext:value-type="float">
            <text:p>0,00142407407407407000</text:p>
          </table:table-cell>
          <table:table-cell table:formula="of:=[.D1540]-[.D15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B1539]+8" office:value-type="float" office:value="12312" calcext:value-type="float">
            <text:p>12312</text:p>
          </table:table-cell>
          <table:table-cell office:value-type="float" office:value="8640000" calcext:value-type="float">
            <text:p>8640000</text:p>
          </table:table-cell>
          <table:table-cell table:formula="of:=[.B1540]/[.C1540]" office:value-type="float" office:value="0.001425" calcext:value-type="float">
            <text:p>0,00142500000000000000</text:p>
          </table:table-cell>
          <table:table-cell table:formula="of:=[.D1541]-[.D15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B1540]+8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1541]/[.C1541]" office:value-type="float" office:value="0.00142592592592593" calcext:value-type="float">
            <text:p>0,00142592592592593000</text:p>
          </table:table-cell>
          <table:table-cell table:formula="of:=[.D1542]-[.D15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[.B1541]+8" office:value-type="float" office:value="12328" calcext:value-type="float">
            <text:p>12328</text:p>
          </table:table-cell>
          <table:table-cell office:value-type="float" office:value="8640000" calcext:value-type="float">
            <text:p>8640000</text:p>
          </table:table-cell>
          <table:table-cell table:formula="of:=[.B1542]/[.C1542]" office:value-type="float" office:value="0.00142685185185185" calcext:value-type="float">
            <text:p>0,00142685185185185000</text:p>
          </table:table-cell>
          <table:table-cell table:formula="of:=[.D1543]-[.D15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[.B1542]+8" office:value-type="float" office:value="12336" calcext:value-type="float">
            <text:p>12336</text:p>
          </table:table-cell>
          <table:table-cell office:value-type="float" office:value="8640000" calcext:value-type="float">
            <text:p>8640000</text:p>
          </table:table-cell>
          <table:table-cell table:formula="of:=[.B1543]/[.C1543]" office:value-type="float" office:value="0.00142777777777778" calcext:value-type="float">
            <text:p>0,00142777777777778000</text:p>
          </table:table-cell>
          <table:table-cell table:formula="of:=[.D1544]-[.D15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B1543]+8" office:value-type="float" office:value="12344" calcext:value-type="float">
            <text:p>12344</text:p>
          </table:table-cell>
          <table:table-cell office:value-type="float" office:value="8640000" calcext:value-type="float">
            <text:p>8640000</text:p>
          </table:table-cell>
          <table:table-cell table:formula="of:=[.B1544]/[.C1544]" office:value-type="float" office:value="0.0014287037037037" calcext:value-type="float">
            <text:p>0,00142870370370370000</text:p>
          </table:table-cell>
          <table:table-cell table:formula="of:=[.D1545]-[.D15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B1544]+8" office:value-type="float" office:value="12352" calcext:value-type="float">
            <text:p>12352</text:p>
          </table:table-cell>
          <table:table-cell office:value-type="float" office:value="8640000" calcext:value-type="float">
            <text:p>8640000</text:p>
          </table:table-cell>
          <table:table-cell table:formula="of:=[.B1545]/[.C1545]" office:value-type="float" office:value="0.00142962962962963" calcext:value-type="float">
            <text:p>0,00142962962962963000</text:p>
          </table:table-cell>
          <table:table-cell table:formula="of:=[.D1546]-[.D15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B1545]+8" office:value-type="float" office:value="12360" calcext:value-type="float">
            <text:p>12360</text:p>
          </table:table-cell>
          <table:table-cell office:value-type="float" office:value="8640000" calcext:value-type="float">
            <text:p>8640000</text:p>
          </table:table-cell>
          <table:table-cell table:formula="of:=[.B1546]/[.C1546]" office:value-type="float" office:value="0.00143055555555556" calcext:value-type="float">
            <text:p>0,00143055555555556000</text:p>
          </table:table-cell>
          <table:table-cell table:formula="of:=[.D1547]-[.D15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B1546]+8" office:value-type="float" office:value="12368" calcext:value-type="float">
            <text:p>12368</text:p>
          </table:table-cell>
          <table:table-cell office:value-type="float" office:value="8640000" calcext:value-type="float">
            <text:p>8640000</text:p>
          </table:table-cell>
          <table:table-cell table:formula="of:=[.B1547]/[.C1547]" office:value-type="float" office:value="0.00143148148148148" calcext:value-type="float">
            <text:p>0,00143148148148148000</text:p>
          </table:table-cell>
          <table:table-cell table:formula="of:=[.D1548]-[.D15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B1547]+8" office:value-type="float" office:value="12376" calcext:value-type="float">
            <text:p>12376</text:p>
          </table:table-cell>
          <table:table-cell office:value-type="float" office:value="8640000" calcext:value-type="float">
            <text:p>8640000</text:p>
          </table:table-cell>
          <table:table-cell table:formula="of:=[.B1548]/[.C1548]" office:value-type="float" office:value="0.00143240740740741" calcext:value-type="float">
            <text:p>0,00143240740740741000</text:p>
          </table:table-cell>
          <table:table-cell table:formula="of:=[.D1549]-[.D15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B1548]+8" office:value-type="float" office:value="12384" calcext:value-type="float">
            <text:p>12384</text:p>
          </table:table-cell>
          <table:table-cell office:value-type="float" office:value="8640000" calcext:value-type="float">
            <text:p>8640000</text:p>
          </table:table-cell>
          <table:table-cell table:formula="of:=[.B1549]/[.C1549]" office:value-type="float" office:value="0.00143333333333333" calcext:value-type="float">
            <text:p>0,00143333333333333000</text:p>
          </table:table-cell>
          <table:table-cell table:formula="of:=[.D1550]-[.D15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B1549]+8" office:value-type="float" office:value="12392" calcext:value-type="float">
            <text:p>12392</text:p>
          </table:table-cell>
          <table:table-cell office:value-type="float" office:value="8640000" calcext:value-type="float">
            <text:p>8640000</text:p>
          </table:table-cell>
          <table:table-cell table:formula="of:=[.B1550]/[.C1550]" office:value-type="float" office:value="0.00143425925925926" calcext:value-type="float">
            <text:p>0,00143425925925926000</text:p>
          </table:table-cell>
          <table:table-cell table:formula="of:=[.D1551]-[.D15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B1550]+8" office:value-type="float" office:value="12400" calcext:value-type="float">
            <text:p>12400</text:p>
          </table:table-cell>
          <table:table-cell office:value-type="float" office:value="8640000" calcext:value-type="float">
            <text:p>8640000</text:p>
          </table:table-cell>
          <table:table-cell table:formula="of:=[.B1551]/[.C1551]" office:value-type="float" office:value="0.00143518518518519" calcext:value-type="float">
            <text:p>0,00143518518518519000</text:p>
          </table:table-cell>
          <table:table-cell table:formula="of:=[.D1552]-[.D15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B1551]+8" office:value-type="float" office:value="12408" calcext:value-type="float">
            <text:p>12408</text:p>
          </table:table-cell>
          <table:table-cell office:value-type="float" office:value="8640000" calcext:value-type="float">
            <text:p>8640000</text:p>
          </table:table-cell>
          <table:table-cell table:formula="of:=[.B1552]/[.C1552]" office:value-type="float" office:value="0.00143611111111111" calcext:value-type="float">
            <text:p>0,00143611111111111000</text:p>
          </table:table-cell>
          <table:table-cell table:formula="of:=[.D1553]-[.D15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B1552]+8" office:value-type="float" office:value="12416" calcext:value-type="float">
            <text:p>12416</text:p>
          </table:table-cell>
          <table:table-cell office:value-type="float" office:value="8640000" calcext:value-type="float">
            <text:p>8640000</text:p>
          </table:table-cell>
          <table:table-cell table:formula="of:=[.B1553]/[.C1553]" office:value-type="float" office:value="0.00143703703703704" calcext:value-type="float">
            <text:p>0,00143703703703704000</text:p>
          </table:table-cell>
          <table:table-cell table:formula="of:=[.D1554]-[.D15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B1553]+8" office:value-type="float" office:value="12424" calcext:value-type="float">
            <text:p>12424</text:p>
          </table:table-cell>
          <table:table-cell office:value-type="float" office:value="8640000" calcext:value-type="float">
            <text:p>8640000</text:p>
          </table:table-cell>
          <table:table-cell table:formula="of:=[.B1554]/[.C1554]" office:value-type="float" office:value="0.00143796296296296" calcext:value-type="float">
            <text:p>0,00143796296296296000</text:p>
          </table:table-cell>
          <table:table-cell table:formula="of:=[.D1555]-[.D15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B1554]+8" office:value-type="float" office:value="12432" calcext:value-type="float">
            <text:p>12432</text:p>
          </table:table-cell>
          <table:table-cell office:value-type="float" office:value="8640000" calcext:value-type="float">
            <text:p>8640000</text:p>
          </table:table-cell>
          <table:table-cell table:formula="of:=[.B1555]/[.C1555]" office:value-type="float" office:value="0.00143888888888889" calcext:value-type="float">
            <text:p>0,00143888888888889000</text:p>
          </table:table-cell>
          <table:table-cell table:formula="of:=[.D1556]-[.D15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[.B1555]+8" office:value-type="float" office:value="12440" calcext:value-type="float">
            <text:p>12440</text:p>
          </table:table-cell>
          <table:table-cell office:value-type="float" office:value="8640000" calcext:value-type="float">
            <text:p>8640000</text:p>
          </table:table-cell>
          <table:table-cell table:formula="of:=[.B1556]/[.C1556]" office:value-type="float" office:value="0.00143981481481481" calcext:value-type="float">
            <text:p>0,00143981481481481000</text:p>
          </table:table-cell>
          <table:table-cell table:formula="of:=[.D1557]-[.D15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B1556]+8" office:value-type="float" office:value="12448" calcext:value-type="float">
            <text:p>12448</text:p>
          </table:table-cell>
          <table:table-cell office:value-type="float" office:value="8640000" calcext:value-type="float">
            <text:p>8640000</text:p>
          </table:table-cell>
          <table:table-cell table:formula="of:=[.B1557]/[.C1557]" office:value-type="float" office:value="0.00144074074074074" calcext:value-type="float">
            <text:p>0,00144074074074074000</text:p>
          </table:table-cell>
          <table:table-cell table:formula="of:=[.D1558]-[.D15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B1557]+8" office:value-type="float" office:value="12456" calcext:value-type="float">
            <text:p>12456</text:p>
          </table:table-cell>
          <table:table-cell office:value-type="float" office:value="8640000" calcext:value-type="float">
            <text:p>8640000</text:p>
          </table:table-cell>
          <table:table-cell table:formula="of:=[.B1558]/[.C1558]" office:value-type="float" office:value="0.00144166666666667" calcext:value-type="float">
            <text:p>0,00144166666666667000</text:p>
          </table:table-cell>
          <table:table-cell table:formula="of:=[.D1559]-[.D15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B1558]+8" office:value-type="float" office:value="12464" calcext:value-type="float">
            <text:p>12464</text:p>
          </table:table-cell>
          <table:table-cell office:value-type="float" office:value="8640000" calcext:value-type="float">
            <text:p>8640000</text:p>
          </table:table-cell>
          <table:table-cell table:formula="of:=[.B1559]/[.C1559]" office:value-type="float" office:value="0.00144259259259259" calcext:value-type="float">
            <text:p>0,00144259259259259000</text:p>
          </table:table-cell>
          <table:table-cell table:formula="of:=[.D1560]-[.D15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B1559]+8" office:value-type="float" office:value="12472" calcext:value-type="float">
            <text:p>12472</text:p>
          </table:table-cell>
          <table:table-cell office:value-type="float" office:value="8640000" calcext:value-type="float">
            <text:p>8640000</text:p>
          </table:table-cell>
          <table:table-cell table:formula="of:=[.B1560]/[.C1560]" office:value-type="float" office:value="0.00144351851851852" calcext:value-type="float">
            <text:p>0,00144351851851852000</text:p>
          </table:table-cell>
          <table:table-cell table:formula="of:=[.D1561]-[.D15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B1560]+8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1561]/[.C1561]" office:value-type="float" office:value="0.00144444444444444" calcext:value-type="float">
            <text:p>0,00144444444444444000</text:p>
          </table:table-cell>
          <table:table-cell table:formula="of:=[.D1562]-[.D15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B1561]+8" office:value-type="float" office:value="12488" calcext:value-type="float">
            <text:p>12488</text:p>
          </table:table-cell>
          <table:table-cell office:value-type="float" office:value="8640000" calcext:value-type="float">
            <text:p>8640000</text:p>
          </table:table-cell>
          <table:table-cell table:formula="of:=[.B1562]/[.C1562]" office:value-type="float" office:value="0.00144537037037037" calcext:value-type="float">
            <text:p>0,00144537037037037000</text:p>
          </table:table-cell>
          <table:table-cell table:formula="of:=[.D1563]-[.D15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B1562]+8" office:value-type="float" office:value="12496" calcext:value-type="float">
            <text:p>12496</text:p>
          </table:table-cell>
          <table:table-cell office:value-type="float" office:value="8640000" calcext:value-type="float">
            <text:p>8640000</text:p>
          </table:table-cell>
          <table:table-cell table:formula="of:=[.B1563]/[.C1563]" office:value-type="float" office:value="0.0014462962962963" calcext:value-type="float">
            <text:p>0,00144629629629630000</text:p>
          </table:table-cell>
          <table:table-cell table:formula="of:=[.D1564]-[.D15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B1563]+8" office:value-type="float" office:value="12504" calcext:value-type="float">
            <text:p>12504</text:p>
          </table:table-cell>
          <table:table-cell office:value-type="float" office:value="8640000" calcext:value-type="float">
            <text:p>8640000</text:p>
          </table:table-cell>
          <table:table-cell table:formula="of:=[.B1564]/[.C1564]" office:value-type="float" office:value="0.00144722222222222" calcext:value-type="float">
            <text:p>0,00144722222222222000</text:p>
          </table:table-cell>
          <table:table-cell table:formula="of:=[.D1565]-[.D15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B1564]+8" office:value-type="float" office:value="12512" calcext:value-type="float">
            <text:p>12512</text:p>
          </table:table-cell>
          <table:table-cell office:value-type="float" office:value="8640000" calcext:value-type="float">
            <text:p>8640000</text:p>
          </table:table-cell>
          <table:table-cell table:formula="of:=[.B1565]/[.C1565]" office:value-type="float" office:value="0.00144814814814815" calcext:value-type="float">
            <text:p>0,00144814814814815000</text:p>
          </table:table-cell>
          <table:table-cell table:formula="of:=[.D1566]-[.D15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B1565]+8" office:value-type="float" office:value="12520" calcext:value-type="float">
            <text:p>12520</text:p>
          </table:table-cell>
          <table:table-cell office:value-type="float" office:value="8640000" calcext:value-type="float">
            <text:p>8640000</text:p>
          </table:table-cell>
          <table:table-cell table:formula="of:=[.B1566]/[.C1566]" office:value-type="float" office:value="0.00144907407407407" calcext:value-type="float">
            <text:p>0,00144907407407407000</text:p>
          </table:table-cell>
          <table:table-cell table:formula="of:=[.D1567]-[.D15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B1566]+8" office:value-type="float" office:value="12528" calcext:value-type="float">
            <text:p>12528</text:p>
          </table:table-cell>
          <table:table-cell office:value-type="float" office:value="8640000" calcext:value-type="float">
            <text:p>8640000</text:p>
          </table:table-cell>
          <table:table-cell table:formula="of:=[.B1567]/[.C1567]" office:value-type="float" office:value="0.00145" calcext:value-type="float">
            <text:p>0,00145000000000000000</text:p>
          </table:table-cell>
          <table:table-cell table:formula="of:=[.D1568]-[.D15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B1567]+8" office:value-type="float" office:value="12536" calcext:value-type="float">
            <text:p>12536</text:p>
          </table:table-cell>
          <table:table-cell office:value-type="float" office:value="8640000" calcext:value-type="float">
            <text:p>8640000</text:p>
          </table:table-cell>
          <table:table-cell table:formula="of:=[.B1568]/[.C1568]" office:value-type="float" office:value="0.00145092592592593" calcext:value-type="float">
            <text:p>0,00145092592592593000</text:p>
          </table:table-cell>
          <table:table-cell table:formula="of:=[.D1569]-[.D1568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B1568]+8" office:value-type="float" office:value="12544" calcext:value-type="float">
            <text:p>12544</text:p>
          </table:table-cell>
          <table:table-cell office:value-type="float" office:value="8640000" calcext:value-type="float">
            <text:p>8640000</text:p>
          </table:table-cell>
          <table:table-cell table:formula="of:=[.B1569]/[.C1569]" office:value-type="float" office:value="0.00145185185185185" calcext:value-type="float">
            <text:p>0,00145185185185185000</text:p>
          </table:table-cell>
          <table:table-cell table:formula="of:=[.D1570]-[.D15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B1569]+8" office:value-type="float" office:value="12552" calcext:value-type="float">
            <text:p>12552</text:p>
          </table:table-cell>
          <table:table-cell office:value-type="float" office:value="8640000" calcext:value-type="float">
            <text:p>8640000</text:p>
          </table:table-cell>
          <table:table-cell table:formula="of:=[.B1570]/[.C1570]" office:value-type="float" office:value="0.00145277777777778" calcext:value-type="float">
            <text:p>0,00145277777777778000</text:p>
          </table:table-cell>
          <table:table-cell table:formula="of:=[.D1571]-[.D15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B1570]+8" office:value-type="float" office:value="12560" calcext:value-type="float">
            <text:p>12560</text:p>
          </table:table-cell>
          <table:table-cell office:value-type="float" office:value="8640000" calcext:value-type="float">
            <text:p>8640000</text:p>
          </table:table-cell>
          <table:table-cell table:formula="of:=[.B1571]/[.C1571]" office:value-type="float" office:value="0.0014537037037037" calcext:value-type="float">
            <text:p>0,00145370370370370000</text:p>
          </table:table-cell>
          <table:table-cell table:formula="of:=[.D1572]-[.D15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B1571]+8" office:value-type="float" office:value="12568" calcext:value-type="float">
            <text:p>12568</text:p>
          </table:table-cell>
          <table:table-cell office:value-type="float" office:value="8640000" calcext:value-type="float">
            <text:p>8640000</text:p>
          </table:table-cell>
          <table:table-cell table:formula="of:=[.B1572]/[.C1572]" office:value-type="float" office:value="0.00145462962962963" calcext:value-type="float">
            <text:p>0,00145462962962963000</text:p>
          </table:table-cell>
          <table:table-cell table:formula="of:=[.D1573]-[.D15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B1572]+8" office:value-type="float" office:value="12576" calcext:value-type="float">
            <text:p>12576</text:p>
          </table:table-cell>
          <table:table-cell office:value-type="float" office:value="8640000" calcext:value-type="float">
            <text:p>8640000</text:p>
          </table:table-cell>
          <table:table-cell table:formula="of:=[.B1573]/[.C1573]" office:value-type="float" office:value="0.00145555555555556" calcext:value-type="float">
            <text:p>0,00145555555555556000</text:p>
          </table:table-cell>
          <table:table-cell table:formula="of:=[.D1574]-[.D15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B1573]+8" office:value-type="float" office:value="12584" calcext:value-type="float">
            <text:p>12584</text:p>
          </table:table-cell>
          <table:table-cell office:value-type="float" office:value="8640000" calcext:value-type="float">
            <text:p>8640000</text:p>
          </table:table-cell>
          <table:table-cell table:formula="of:=[.B1574]/[.C1574]" office:value-type="float" office:value="0.00145648148148148" calcext:value-type="float">
            <text:p>0,00145648148148148000</text:p>
          </table:table-cell>
          <table:table-cell table:formula="of:=[.D1575]-[.D15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B1574]+8" office:value-type="float" office:value="12592" calcext:value-type="float">
            <text:p>12592</text:p>
          </table:table-cell>
          <table:table-cell office:value-type="float" office:value="8640000" calcext:value-type="float">
            <text:p>8640000</text:p>
          </table:table-cell>
          <table:table-cell table:formula="of:=[.B1575]/[.C1575]" office:value-type="float" office:value="0.00145740740740741" calcext:value-type="float">
            <text:p>0,00145740740740741000</text:p>
          </table:table-cell>
          <table:table-cell table:formula="of:=[.D1576]-[.D15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B1575]+8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1576]/[.C1576]" office:value-type="float" office:value="0.00145833333333333" calcext:value-type="float">
            <text:p>0,00145833333333333000</text:p>
          </table:table-cell>
          <table:table-cell table:formula="of:=[.D1577]-[.D15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[.B1576]+8" office:value-type="float" office:value="12608" calcext:value-type="float">
            <text:p>12608</text:p>
          </table:table-cell>
          <table:table-cell office:value-type="float" office:value="8640000" calcext:value-type="float">
            <text:p>8640000</text:p>
          </table:table-cell>
          <table:table-cell table:formula="of:=[.B1577]/[.C1577]" office:value-type="float" office:value="0.00145925925925926" calcext:value-type="float">
            <text:p>0,00145925925925926000</text:p>
          </table:table-cell>
          <table:table-cell table:formula="of:=[.D1578]-[.D15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B1577]+8" office:value-type="float" office:value="12616" calcext:value-type="float">
            <text:p>12616</text:p>
          </table:table-cell>
          <table:table-cell office:value-type="float" office:value="8640000" calcext:value-type="float">
            <text:p>8640000</text:p>
          </table:table-cell>
          <table:table-cell table:formula="of:=[.B1578]/[.C1578]" office:value-type="float" office:value="0.00146018518518519" calcext:value-type="float">
            <text:p>0,00146018518518519000</text:p>
          </table:table-cell>
          <table:table-cell table:formula="of:=[.D1579]-[.D15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B1578]+8" office:value-type="float" office:value="12624" calcext:value-type="float">
            <text:p>12624</text:p>
          </table:table-cell>
          <table:table-cell office:value-type="float" office:value="8640000" calcext:value-type="float">
            <text:p>8640000</text:p>
          </table:table-cell>
          <table:table-cell table:formula="of:=[.B1579]/[.C1579]" office:value-type="float" office:value="0.00146111111111111" calcext:value-type="float">
            <text:p>0,00146111111111111000</text:p>
          </table:table-cell>
          <table:table-cell table:formula="of:=[.D1580]-[.D15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B1579]+8" office:value-type="float" office:value="12632" calcext:value-type="float">
            <text:p>12632</text:p>
          </table:table-cell>
          <table:table-cell office:value-type="float" office:value="8640000" calcext:value-type="float">
            <text:p>8640000</text:p>
          </table:table-cell>
          <table:table-cell table:formula="of:=[.B1580]/[.C1580]" office:value-type="float" office:value="0.00146203703703704" calcext:value-type="float">
            <text:p>0,00146203703703704000</text:p>
          </table:table-cell>
          <table:table-cell table:formula="of:=[.D1581]-[.D15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B1580]+8" office:value-type="float" office:value="12640" calcext:value-type="float">
            <text:p>12640</text:p>
          </table:table-cell>
          <table:table-cell office:value-type="float" office:value="8640000" calcext:value-type="float">
            <text:p>8640000</text:p>
          </table:table-cell>
          <table:table-cell table:formula="of:=[.B1581]/[.C1581]" office:value-type="float" office:value="0.00146296296296296" calcext:value-type="float">
            <text:p>0,00146296296296296000</text:p>
          </table:table-cell>
          <table:table-cell table:formula="of:=[.D1582]-[.D15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B1581]+8" office:value-type="float" office:value="12648" calcext:value-type="float">
            <text:p>12648</text:p>
          </table:table-cell>
          <table:table-cell office:value-type="float" office:value="8640000" calcext:value-type="float">
            <text:p>8640000</text:p>
          </table:table-cell>
          <table:table-cell table:formula="of:=[.B1582]/[.C1582]" office:value-type="float" office:value="0.00146388888888889" calcext:value-type="float">
            <text:p>0,00146388888888889000</text:p>
          </table:table-cell>
          <table:table-cell table:formula="of:=[.D1583]-[.D15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[.B1582]+8" office:value-type="float" office:value="12656" calcext:value-type="float">
            <text:p>12656</text:p>
          </table:table-cell>
          <table:table-cell office:value-type="float" office:value="8640000" calcext:value-type="float">
            <text:p>8640000</text:p>
          </table:table-cell>
          <table:table-cell table:formula="of:=[.B1583]/[.C1583]" office:value-type="float" office:value="0.00146481481481481" calcext:value-type="float">
            <text:p>0,00146481481481481000</text:p>
          </table:table-cell>
          <table:table-cell table:formula="of:=[.D1584]-[.D15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B1583]+8" office:value-type="float" office:value="12664" calcext:value-type="float">
            <text:p>12664</text:p>
          </table:table-cell>
          <table:table-cell office:value-type="float" office:value="8640000" calcext:value-type="float">
            <text:p>8640000</text:p>
          </table:table-cell>
          <table:table-cell table:formula="of:=[.B1584]/[.C1584]" office:value-type="float" office:value="0.00146574074074074" calcext:value-type="float">
            <text:p>0,00146574074074074000</text:p>
          </table:table-cell>
          <table:table-cell table:formula="of:=[.D1585]-[.D15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B1584]+8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1585]/[.C1585]" office:value-type="float" office:value="0.00146666666666667" calcext:value-type="float">
            <text:p>0,00146666666666667000</text:p>
          </table:table-cell>
          <table:table-cell table:formula="of:=[.D1586]-[.D15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B1585]+8" office:value-type="float" office:value="12680" calcext:value-type="float">
            <text:p>12680</text:p>
          </table:table-cell>
          <table:table-cell office:value-type="float" office:value="8640000" calcext:value-type="float">
            <text:p>8640000</text:p>
          </table:table-cell>
          <table:table-cell table:formula="of:=[.B1586]/[.C1586]" office:value-type="float" office:value="0.00146759259259259" calcext:value-type="float">
            <text:p>0,00146759259259259000</text:p>
          </table:table-cell>
          <table:table-cell table:formula="of:=[.D1587]-[.D15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B1586]+8" office:value-type="float" office:value="12688" calcext:value-type="float">
            <text:p>12688</text:p>
          </table:table-cell>
          <table:table-cell office:value-type="float" office:value="8640000" calcext:value-type="float">
            <text:p>8640000</text:p>
          </table:table-cell>
          <table:table-cell table:formula="of:=[.B1587]/[.C1587]" office:value-type="float" office:value="0.00146851851851852" calcext:value-type="float">
            <text:p>0,00146851851851852000</text:p>
          </table:table-cell>
          <table:table-cell table:formula="of:=[.D1588]-[.D15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B1587]+8" office:value-type="float" office:value="12696" calcext:value-type="float">
            <text:p>12696</text:p>
          </table:table-cell>
          <table:table-cell office:value-type="float" office:value="8640000" calcext:value-type="float">
            <text:p>8640000</text:p>
          </table:table-cell>
          <table:table-cell table:formula="of:=[.B1588]/[.C1588]" office:value-type="float" office:value="0.00146944444444444" calcext:value-type="float">
            <text:p>0,00146944444444444000</text:p>
          </table:table-cell>
          <table:table-cell table:formula="of:=[.D1589]-[.D15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B1588]+8" office:value-type="float" office:value="12704" calcext:value-type="float">
            <text:p>12704</text:p>
          </table:table-cell>
          <table:table-cell office:value-type="float" office:value="8640000" calcext:value-type="float">
            <text:p>8640000</text:p>
          </table:table-cell>
          <table:table-cell table:formula="of:=[.B1589]/[.C1589]" office:value-type="float" office:value="0.00147037037037037" calcext:value-type="float">
            <text:p>0,00147037037037037000</text:p>
          </table:table-cell>
          <table:table-cell table:formula="of:=[.D1590]-[.D15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B1589]+8" office:value-type="float" office:value="12712" calcext:value-type="float">
            <text:p>12712</text:p>
          </table:table-cell>
          <table:table-cell office:value-type="float" office:value="8640000" calcext:value-type="float">
            <text:p>8640000</text:p>
          </table:table-cell>
          <table:table-cell table:formula="of:=[.B1590]/[.C1590]" office:value-type="float" office:value="0.0014712962962963" calcext:value-type="float">
            <text:p>0,00147129629629630000</text:p>
          </table:table-cell>
          <table:table-cell table:formula="of:=[.D1591]-[.D15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B1590]+8" office:value-type="float" office:value="12720" calcext:value-type="float">
            <text:p>12720</text:p>
          </table:table-cell>
          <table:table-cell office:value-type="float" office:value="8640000" calcext:value-type="float">
            <text:p>8640000</text:p>
          </table:table-cell>
          <table:table-cell table:formula="of:=[.B1591]/[.C1591]" office:value-type="float" office:value="0.00147222222222222" calcext:value-type="float">
            <text:p>0,00147222222222222000</text:p>
          </table:table-cell>
          <table:table-cell table:formula="of:=[.D1592]-[.D15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B1591]+8" office:value-type="float" office:value="12728" calcext:value-type="float">
            <text:p>12728</text:p>
          </table:table-cell>
          <table:table-cell office:value-type="float" office:value="8640000" calcext:value-type="float">
            <text:p>8640000</text:p>
          </table:table-cell>
          <table:table-cell table:formula="of:=[.B1592]/[.C1592]" office:value-type="float" office:value="0.00147314814814815" calcext:value-type="float">
            <text:p>0,00147314814814815000</text:p>
          </table:table-cell>
          <table:table-cell table:formula="of:=[.D1593]-[.D15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B1592]+8" office:value-type="float" office:value="12736" calcext:value-type="float">
            <text:p>12736</text:p>
          </table:table-cell>
          <table:table-cell office:value-type="float" office:value="8640000" calcext:value-type="float">
            <text:p>8640000</text:p>
          </table:table-cell>
          <table:table-cell table:formula="of:=[.B1593]/[.C1593]" office:value-type="float" office:value="0.00147407407407407" calcext:value-type="float">
            <text:p>0,00147407407407407000</text:p>
          </table:table-cell>
          <table:table-cell table:formula="of:=[.D1594]-[.D15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B1593]+8" office:value-type="float" office:value="12744" calcext:value-type="float">
            <text:p>12744</text:p>
          </table:table-cell>
          <table:table-cell office:value-type="float" office:value="8640000" calcext:value-type="float">
            <text:p>8640000</text:p>
          </table:table-cell>
          <table:table-cell table:formula="of:=[.B1594]/[.C1594]" office:value-type="float" office:value="0.001475" calcext:value-type="float">
            <text:p>0,00147500000000000000</text:p>
          </table:table-cell>
          <table:table-cell table:formula="of:=[.D1595]-[.D15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B1594]+8" office:value-type="float" office:value="12752" calcext:value-type="float">
            <text:p>12752</text:p>
          </table:table-cell>
          <table:table-cell office:value-type="float" office:value="8640000" calcext:value-type="float">
            <text:p>8640000</text:p>
          </table:table-cell>
          <table:table-cell table:formula="of:=[.B1595]/[.C1595]" office:value-type="float" office:value="0.00147592592592593" calcext:value-type="float">
            <text:p>0,00147592592592593000</text:p>
          </table:table-cell>
          <table:table-cell table:formula="of:=[.D1596]-[.D15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B1595]+8" office:value-type="float" office:value="12760" calcext:value-type="float">
            <text:p>12760</text:p>
          </table:table-cell>
          <table:table-cell office:value-type="float" office:value="8640000" calcext:value-type="float">
            <text:p>8640000</text:p>
          </table:table-cell>
          <table:table-cell table:formula="of:=[.B1596]/[.C1596]" office:value-type="float" office:value="0.00147685185185185" calcext:value-type="float">
            <text:p>0,00147685185185185000</text:p>
          </table:table-cell>
          <table:table-cell table:formula="of:=[.D1597]-[.D15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B1596]+8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1597]/[.C1597]" office:value-type="float" office:value="0.00147777777777778" calcext:value-type="float">
            <text:p>0,00147777777777778000</text:p>
          </table:table-cell>
          <table:table-cell table:formula="of:=[.D1598]-[.D15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B1597]+8" office:value-type="float" office:value="12776" calcext:value-type="float">
            <text:p>12776</text:p>
          </table:table-cell>
          <table:table-cell office:value-type="float" office:value="8640000" calcext:value-type="float">
            <text:p>8640000</text:p>
          </table:table-cell>
          <table:table-cell table:formula="of:=[.B1598]/[.C1598]" office:value-type="float" office:value="0.0014787037037037" calcext:value-type="float">
            <text:p>0,00147870370370370000</text:p>
          </table:table-cell>
          <table:table-cell table:formula="of:=[.D1599]-[.D15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B1598]+8" office:value-type="float" office:value="12784" calcext:value-type="float">
            <text:p>12784</text:p>
          </table:table-cell>
          <table:table-cell office:value-type="float" office:value="8640000" calcext:value-type="float">
            <text:p>8640000</text:p>
          </table:table-cell>
          <table:table-cell table:formula="of:=[.B1599]/[.C1599]" office:value-type="float" office:value="0.00147962962962963" calcext:value-type="float">
            <text:p>0,00147962962962963000</text:p>
          </table:table-cell>
          <table:table-cell table:formula="of:=[.D1600]-[.D15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B1599]+8" office:value-type="float" office:value="12792" calcext:value-type="float">
            <text:p>12792</text:p>
          </table:table-cell>
          <table:table-cell office:value-type="float" office:value="8640000" calcext:value-type="float">
            <text:p>8640000</text:p>
          </table:table-cell>
          <table:table-cell table:formula="of:=[.B1600]/[.C1600]" office:value-type="float" office:value="0.00148055555555556" calcext:value-type="float">
            <text:p>0,00148055555555556000</text:p>
          </table:table-cell>
          <table:table-cell table:formula="of:=[.D1601]-[.D16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B1600]+8" office:value-type="float" office:value="12800" calcext:value-type="float">
            <text:p>12800</text:p>
          </table:table-cell>
          <table:table-cell office:value-type="float" office:value="8640000" calcext:value-type="float">
            <text:p>8640000</text:p>
          </table:table-cell>
          <table:table-cell table:formula="of:=[.B1601]/[.C1601]" office:value-type="float" office:value="0.00148148148148148" calcext:value-type="float">
            <text:p>0,00148148148148148000</text:p>
          </table:table-cell>
          <table:table-cell table:formula="of:=[.D1602]-[.D16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B1601]+8" office:value-type="float" office:value="12808" calcext:value-type="float">
            <text:p>12808</text:p>
          </table:table-cell>
          <table:table-cell office:value-type="float" office:value="8640000" calcext:value-type="float">
            <text:p>8640000</text:p>
          </table:table-cell>
          <table:table-cell table:formula="of:=[.B1602]/[.C1602]" office:value-type="float" office:value="0.00148240740740741" calcext:value-type="float">
            <text:p>0,00148240740740741000</text:p>
          </table:table-cell>
          <table:table-cell table:formula="of:=[.D1603]-[.D16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[.B1602]+8" office:value-type="float" office:value="12816" calcext:value-type="float">
            <text:p>12816</text:p>
          </table:table-cell>
          <table:table-cell office:value-type="float" office:value="8640000" calcext:value-type="float">
            <text:p>8640000</text:p>
          </table:table-cell>
          <table:table-cell table:formula="of:=[.B1603]/[.C1603]" office:value-type="float" office:value="0.00148333333333333" calcext:value-type="float">
            <text:p>0,00148333333333333000</text:p>
          </table:table-cell>
          <table:table-cell table:formula="of:=[.D1604]-[.D16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B1603]+8" office:value-type="float" office:value="12824" calcext:value-type="float">
            <text:p>12824</text:p>
          </table:table-cell>
          <table:table-cell office:value-type="float" office:value="8640000" calcext:value-type="float">
            <text:p>8640000</text:p>
          </table:table-cell>
          <table:table-cell table:formula="of:=[.B1604]/[.C1604]" office:value-type="float" office:value="0.00148425925925926" calcext:value-type="float">
            <text:p>0,00148425925925926000</text:p>
          </table:table-cell>
          <table:table-cell table:formula="of:=[.D1605]-[.D16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[.B1604]+8" office:value-type="float" office:value="12832" calcext:value-type="float">
            <text:p>12832</text:p>
          </table:table-cell>
          <table:table-cell office:value-type="float" office:value="8640000" calcext:value-type="float">
            <text:p>8640000</text:p>
          </table:table-cell>
          <table:table-cell table:formula="of:=[.B1605]/[.C1605]" office:value-type="float" office:value="0.00148518518518519" calcext:value-type="float">
            <text:p>0,00148518518518518000</text:p>
          </table:table-cell>
          <table:table-cell table:formula="of:=[.D1606]-[.D16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[.B1605]+8" office:value-type="float" office:value="12840" calcext:value-type="float">
            <text:p>12840</text:p>
          </table:table-cell>
          <table:table-cell office:value-type="float" office:value="8640000" calcext:value-type="float">
            <text:p>8640000</text:p>
          </table:table-cell>
          <table:table-cell table:formula="of:=[.B1606]/[.C1606]" office:value-type="float" office:value="0.00148611111111111" calcext:value-type="float">
            <text:p>0,00148611111111111000</text:p>
          </table:table-cell>
          <table:table-cell table:formula="of:=[.D1607]-[.D16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[.B1606]+8" office:value-type="float" office:value="12848" calcext:value-type="float">
            <text:p>12848</text:p>
          </table:table-cell>
          <table:table-cell office:value-type="float" office:value="8640000" calcext:value-type="float">
            <text:p>8640000</text:p>
          </table:table-cell>
          <table:table-cell table:formula="of:=[.B1607]/[.C1607]" office:value-type="float" office:value="0.00148703703703704" calcext:value-type="float">
            <text:p>0,00148703703703704000</text:p>
          </table:table-cell>
          <table:table-cell table:formula="of:=[.D1608]-[.D1607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B1607]+8" office:value-type="float" office:value="12856" calcext:value-type="float">
            <text:p>12856</text:p>
          </table:table-cell>
          <table:table-cell office:value-type="float" office:value="8640000" calcext:value-type="float">
            <text:p>8640000</text:p>
          </table:table-cell>
          <table:table-cell table:formula="of:=[.B1608]/[.C1608]" office:value-type="float" office:value="0.00148796296296296" calcext:value-type="float">
            <text:p>0,00148796296296296000</text:p>
          </table:table-cell>
          <table:table-cell table:formula="of:=[.D1609]-[.D16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[.B1608]+8" office:value-type="float" office:value="12864" calcext:value-type="float">
            <text:p>12864</text:p>
          </table:table-cell>
          <table:table-cell office:value-type="float" office:value="8640000" calcext:value-type="float">
            <text:p>8640000</text:p>
          </table:table-cell>
          <table:table-cell table:formula="of:=[.B1609]/[.C1609]" office:value-type="float" office:value="0.00148888888888889" calcext:value-type="float">
            <text:p>0,00148888888888889000</text:p>
          </table:table-cell>
          <table:table-cell table:formula="of:=[.D1610]-[.D16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B1609]+8" office:value-type="float" office:value="12872" calcext:value-type="float">
            <text:p>12872</text:p>
          </table:table-cell>
          <table:table-cell office:value-type="float" office:value="8640000" calcext:value-type="float">
            <text:p>8640000</text:p>
          </table:table-cell>
          <table:table-cell table:formula="of:=[.B1610]/[.C1610]" office:value-type="float" office:value="0.00148981481481482" calcext:value-type="float">
            <text:p>0,00148981481481482000</text:p>
          </table:table-cell>
          <table:table-cell table:formula="of:=[.D1611]-[.D16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[.B1610]+8" office:value-type="float" office:value="12880" calcext:value-type="float">
            <text:p>12880</text:p>
          </table:table-cell>
          <table:table-cell office:value-type="float" office:value="8640000" calcext:value-type="float">
            <text:p>8640000</text:p>
          </table:table-cell>
          <table:table-cell table:formula="of:=[.B1611]/[.C1611]" office:value-type="float" office:value="0.00149074074074074" calcext:value-type="float">
            <text:p>0,00149074074074074000</text:p>
          </table:table-cell>
          <table:table-cell table:formula="of:=[.D1612]-[.D16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B1611]+8" office:value-type="float" office:value="12888" calcext:value-type="float">
            <text:p>12888</text:p>
          </table:table-cell>
          <table:table-cell office:value-type="float" office:value="8640000" calcext:value-type="float">
            <text:p>8640000</text:p>
          </table:table-cell>
          <table:table-cell table:formula="of:=[.B1612]/[.C1612]" office:value-type="float" office:value="0.00149166666666667" calcext:value-type="float">
            <text:p>0,00149166666666667000</text:p>
          </table:table-cell>
          <table:table-cell table:formula="of:=[.D1613]-[.D16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[.B1612]+8" office:value-type="float" office:value="12896" calcext:value-type="float">
            <text:p>12896</text:p>
          </table:table-cell>
          <table:table-cell office:value-type="float" office:value="8640000" calcext:value-type="float">
            <text:p>8640000</text:p>
          </table:table-cell>
          <table:table-cell table:formula="of:=[.B1613]/[.C1613]" office:value-type="float" office:value="0.00149259259259259" calcext:value-type="float">
            <text:p>0,00149259259259259000</text:p>
          </table:table-cell>
          <table:table-cell table:formula="of:=[.D1614]-[.D16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B1613]+8" office:value-type="float" office:value="12904" calcext:value-type="float">
            <text:p>12904</text:p>
          </table:table-cell>
          <table:table-cell office:value-type="float" office:value="8640000" calcext:value-type="float">
            <text:p>8640000</text:p>
          </table:table-cell>
          <table:table-cell table:formula="of:=[.B1614]/[.C1614]" office:value-type="float" office:value="0.00149351851851852" calcext:value-type="float">
            <text:p>0,00149351851851852000</text:p>
          </table:table-cell>
          <table:table-cell table:formula="of:=[.D1615]-[.D16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B1614]+8" office:value-type="float" office:value="12912" calcext:value-type="float">
            <text:p>12912</text:p>
          </table:table-cell>
          <table:table-cell office:value-type="float" office:value="8640000" calcext:value-type="float">
            <text:p>8640000</text:p>
          </table:table-cell>
          <table:table-cell table:formula="of:=[.B1615]/[.C1615]" office:value-type="float" office:value="0.00149444444444444" calcext:value-type="float">
            <text:p>0,00149444444444444000</text:p>
          </table:table-cell>
          <table:table-cell table:formula="of:=[.D1616]-[.D16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B1615]+8" office:value-type="float" office:value="12920" calcext:value-type="float">
            <text:p>12920</text:p>
          </table:table-cell>
          <table:table-cell office:value-type="float" office:value="8640000" calcext:value-type="float">
            <text:p>8640000</text:p>
          </table:table-cell>
          <table:table-cell table:formula="of:=[.B1616]/[.C1616]" office:value-type="float" office:value="0.00149537037037037" calcext:value-type="float">
            <text:p>0,00149537037037037000</text:p>
          </table:table-cell>
          <table:table-cell table:formula="of:=[.D1617]-[.D16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[.B1616]+8" office:value-type="float" office:value="12928" calcext:value-type="float">
            <text:p>12928</text:p>
          </table:table-cell>
          <table:table-cell office:value-type="float" office:value="8640000" calcext:value-type="float">
            <text:p>8640000</text:p>
          </table:table-cell>
          <table:table-cell table:formula="of:=[.B1617]/[.C1617]" office:value-type="float" office:value="0.0014962962962963" calcext:value-type="float">
            <text:p>0,00149629629629630000</text:p>
          </table:table-cell>
          <table:table-cell table:formula="of:=[.D1618]-[.D16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B1617]+8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1618]/[.C1618]" office:value-type="float" office:value="0.00149722222222222" calcext:value-type="float">
            <text:p>0,00149722222222222000</text:p>
          </table:table-cell>
          <table:table-cell table:formula="of:=[.D1619]-[.D16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B1618]+8" office:value-type="float" office:value="12944" calcext:value-type="float">
            <text:p>12944</text:p>
          </table:table-cell>
          <table:table-cell office:value-type="float" office:value="8640000" calcext:value-type="float">
            <text:p>8640000</text:p>
          </table:table-cell>
          <table:table-cell table:formula="of:=[.B1619]/[.C1619]" office:value-type="float" office:value="0.00149814814814815" calcext:value-type="float">
            <text:p>0,00149814814814815000</text:p>
          </table:table-cell>
          <table:table-cell table:formula="of:=[.D1620]-[.D16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B1619]+8" office:value-type="float" office:value="12952" calcext:value-type="float">
            <text:p>12952</text:p>
          </table:table-cell>
          <table:table-cell office:value-type="float" office:value="8640000" calcext:value-type="float">
            <text:p>8640000</text:p>
          </table:table-cell>
          <table:table-cell table:formula="of:=[.B1620]/[.C1620]" office:value-type="float" office:value="0.00149907407407407" calcext:value-type="float">
            <text:p>0,00149907407407407000</text:p>
          </table:table-cell>
          <table:table-cell table:formula="of:=[.D1621]-[.D16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B1620]+8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1621]/[.C1621]" office:value-type="float" office:value="0.0015" calcext:value-type="float">
            <text:p>0,00150000000000000000</text:p>
          </table:table-cell>
          <table:table-cell table:formula="of:=[.D1622]-[.D16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B1621]+8" office:value-type="float" office:value="12968" calcext:value-type="float">
            <text:p>12968</text:p>
          </table:table-cell>
          <table:table-cell office:value-type="float" office:value="8640000" calcext:value-type="float">
            <text:p>8640000</text:p>
          </table:table-cell>
          <table:table-cell table:formula="of:=[.B1622]/[.C1622]" office:value-type="float" office:value="0.00150092592592593" calcext:value-type="float">
            <text:p>0,00150092592592593000</text:p>
          </table:table-cell>
          <table:table-cell table:formula="of:=[.D1623]-[.D16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[.B1622]+8" office:value-type="float" office:value="12976" calcext:value-type="float">
            <text:p>12976</text:p>
          </table:table-cell>
          <table:table-cell office:value-type="float" office:value="8640000" calcext:value-type="float">
            <text:p>8640000</text:p>
          </table:table-cell>
          <table:table-cell table:formula="of:=[.B1623]/[.C1623]" office:value-type="float" office:value="0.00150185185185185" calcext:value-type="float">
            <text:p>0,00150185185185185000</text:p>
          </table:table-cell>
          <table:table-cell table:formula="of:=[.D1624]-[.D16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[.B1623]+8" office:value-type="float" office:value="12984" calcext:value-type="float">
            <text:p>12984</text:p>
          </table:table-cell>
          <table:table-cell office:value-type="float" office:value="8640000" calcext:value-type="float">
            <text:p>8640000</text:p>
          </table:table-cell>
          <table:table-cell table:formula="of:=[.B1624]/[.C1624]" office:value-type="float" office:value="0.00150277777777778" calcext:value-type="float">
            <text:p>0,00150277777777778000</text:p>
          </table:table-cell>
          <table:table-cell table:formula="of:=[.D1625]-[.D16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[.B1624]+8" office:value-type="float" office:value="12992" calcext:value-type="float">
            <text:p>12992</text:p>
          </table:table-cell>
          <table:table-cell office:value-type="float" office:value="8640000" calcext:value-type="float">
            <text:p>8640000</text:p>
          </table:table-cell>
          <table:table-cell table:formula="of:=[.B1625]/[.C1625]" office:value-type="float" office:value="0.0015037037037037" calcext:value-type="float">
            <text:p>0,00150370370370370000</text:p>
          </table:table-cell>
          <table:table-cell table:formula="of:=[.D1626]-[.D16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.B1625]+8" office:value-type="float" office:value="13000" calcext:value-type="float">
            <text:p>13000</text:p>
          </table:table-cell>
          <table:table-cell office:value-type="float" office:value="8640000" calcext:value-type="float">
            <text:p>8640000</text:p>
          </table:table-cell>
          <table:table-cell table:formula="of:=[.B1626]/[.C1626]" office:value-type="float" office:value="0.00150462962962963" calcext:value-type="float">
            <text:p>0,00150462962962963000</text:p>
          </table:table-cell>
          <table:table-cell table:formula="of:=[.D1627]-[.D16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[.B1626]+8" office:value-type="float" office:value="13008" calcext:value-type="float">
            <text:p>13008</text:p>
          </table:table-cell>
          <table:table-cell office:value-type="float" office:value="8640000" calcext:value-type="float">
            <text:p>8640000</text:p>
          </table:table-cell>
          <table:table-cell table:formula="of:=[.B1627]/[.C1627]" office:value-type="float" office:value="0.00150555555555556" calcext:value-type="float">
            <text:p>0,00150555555555556000</text:p>
          </table:table-cell>
          <table:table-cell table:formula="of:=[.D1628]-[.D16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B1627]+8" office:value-type="float" office:value="13016" calcext:value-type="float">
            <text:p>13016</text:p>
          </table:table-cell>
          <table:table-cell office:value-type="float" office:value="8640000" calcext:value-type="float">
            <text:p>8640000</text:p>
          </table:table-cell>
          <table:table-cell table:formula="of:=[.B1628]/[.C1628]" office:value-type="float" office:value="0.00150648148148148" calcext:value-type="float">
            <text:p>0,00150648148148148000</text:p>
          </table:table-cell>
          <table:table-cell table:formula="of:=[.D1629]-[.D16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[.B1628]+8" office:value-type="float" office:value="13024" calcext:value-type="float">
            <text:p>13024</text:p>
          </table:table-cell>
          <table:table-cell office:value-type="float" office:value="8640000" calcext:value-type="float">
            <text:p>8640000</text:p>
          </table:table-cell>
          <table:table-cell table:formula="of:=[.B1629]/[.C1629]" office:value-type="float" office:value="0.00150740740740741" calcext:value-type="float">
            <text:p>0,00150740740740741000</text:p>
          </table:table-cell>
          <table:table-cell table:formula="of:=[.D1630]-[.D16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B1629]+8" office:value-type="float" office:value="13032" calcext:value-type="float">
            <text:p>13032</text:p>
          </table:table-cell>
          <table:table-cell office:value-type="float" office:value="8640000" calcext:value-type="float">
            <text:p>8640000</text:p>
          </table:table-cell>
          <table:table-cell table:formula="of:=[.B1630]/[.C1630]" office:value-type="float" office:value="0.00150833333333333" calcext:value-type="float">
            <text:p>0,00150833333333333000</text:p>
          </table:table-cell>
          <table:table-cell table:formula="of:=[.D1631]-[.D16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B1630]+8" office:value-type="float" office:value="13040" calcext:value-type="float">
            <text:p>13040</text:p>
          </table:table-cell>
          <table:table-cell office:value-type="float" office:value="8640000" calcext:value-type="float">
            <text:p>8640000</text:p>
          </table:table-cell>
          <table:table-cell table:formula="of:=[.B1631]/[.C1631]" office:value-type="float" office:value="0.00150925925925926" calcext:value-type="float">
            <text:p>0,00150925925925926000</text:p>
          </table:table-cell>
          <table:table-cell table:formula="of:=[.D1632]-[.D16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[.B1631]+8" office:value-type="float" office:value="13048" calcext:value-type="float">
            <text:p>13048</text:p>
          </table:table-cell>
          <table:table-cell office:value-type="float" office:value="8640000" calcext:value-type="float">
            <text:p>8640000</text:p>
          </table:table-cell>
          <table:table-cell table:formula="of:=[.B1632]/[.C1632]" office:value-type="float" office:value="0.00151018518518519" calcext:value-type="float">
            <text:p>0,00151018518518519000</text:p>
          </table:table-cell>
          <table:table-cell table:formula="of:=[.D1633]-[.D16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[.B1632]+8" office:value-type="float" office:value="13056" calcext:value-type="float">
            <text:p>13056</text:p>
          </table:table-cell>
          <table:table-cell office:value-type="float" office:value="8640000" calcext:value-type="float">
            <text:p>8640000</text:p>
          </table:table-cell>
          <table:table-cell table:formula="of:=[.B1633]/[.C1633]" office:value-type="float" office:value="0.00151111111111111" calcext:value-type="float">
            <text:p>0,00151111111111111000</text:p>
          </table:table-cell>
          <table:table-cell table:formula="of:=[.D1634]-[.D16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B1633]+8" office:value-type="float" office:value="13064" calcext:value-type="float">
            <text:p>13064</text:p>
          </table:table-cell>
          <table:table-cell office:value-type="float" office:value="8640000" calcext:value-type="float">
            <text:p>8640000</text:p>
          </table:table-cell>
          <table:table-cell table:formula="of:=[.B1634]/[.C1634]" office:value-type="float" office:value="0.00151203703703704" calcext:value-type="float">
            <text:p>0,00151203703703704000</text:p>
          </table:table-cell>
          <table:table-cell table:formula="of:=[.D1635]-[.D16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B1634]+8" office:value-type="float" office:value="13072" calcext:value-type="float">
            <text:p>13072</text:p>
          </table:table-cell>
          <table:table-cell office:value-type="float" office:value="8640000" calcext:value-type="float">
            <text:p>8640000</text:p>
          </table:table-cell>
          <table:table-cell table:formula="of:=[.B1635]/[.C1635]" office:value-type="float" office:value="0.00151296296296296" calcext:value-type="float">
            <text:p>0,00151296296296296000</text:p>
          </table:table-cell>
          <table:table-cell table:formula="of:=[.D1636]-[.D16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[.B1635]+8" office:value-type="float" office:value="13080" calcext:value-type="float">
            <text:p>13080</text:p>
          </table:table-cell>
          <table:table-cell office:value-type="float" office:value="8640000" calcext:value-type="float">
            <text:p>8640000</text:p>
          </table:table-cell>
          <table:table-cell table:formula="of:=[.B1636]/[.C1636]" office:value-type="float" office:value="0.00151388888888889" calcext:value-type="float">
            <text:p>0,00151388888888889000</text:p>
          </table:table-cell>
          <table:table-cell table:formula="of:=[.D1637]-[.D16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[.B1636]+8" office:value-type="float" office:value="13088" calcext:value-type="float">
            <text:p>13088</text:p>
          </table:table-cell>
          <table:table-cell office:value-type="float" office:value="8640000" calcext:value-type="float">
            <text:p>8640000</text:p>
          </table:table-cell>
          <table:table-cell table:formula="of:=[.B1637]/[.C1637]" office:value-type="float" office:value="0.00151481481481481" calcext:value-type="float">
            <text:p>0,00151481481481481000</text:p>
          </table:table-cell>
          <table:table-cell table:formula="of:=[.D1638]-[.D16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B1637]+8" office:value-type="float" office:value="13096" calcext:value-type="float">
            <text:p>13096</text:p>
          </table:table-cell>
          <table:table-cell office:value-type="float" office:value="8640000" calcext:value-type="float">
            <text:p>8640000</text:p>
          </table:table-cell>
          <table:table-cell table:formula="of:=[.B1638]/[.C1638]" office:value-type="float" office:value="0.00151574074074074" calcext:value-type="float">
            <text:p>0,00151574074074074000</text:p>
          </table:table-cell>
          <table:table-cell table:formula="of:=[.D1639]-[.D16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[.B1638]+8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1639]/[.C1639]" office:value-type="float" office:value="0.00151666666666667" calcext:value-type="float">
            <text:p>0,00151666666666667000</text:p>
          </table:table-cell>
          <table:table-cell table:formula="of:=[.D1640]-[.D16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[.B1639]+8" office:value-type="float" office:value="13112" calcext:value-type="float">
            <text:p>13112</text:p>
          </table:table-cell>
          <table:table-cell office:value-type="float" office:value="8640000" calcext:value-type="float">
            <text:p>8640000</text:p>
          </table:table-cell>
          <table:table-cell table:formula="of:=[.B1640]/[.C1640]" office:value-type="float" office:value="0.00151759259259259" calcext:value-type="float">
            <text:p>0,00151759259259259000</text:p>
          </table:table-cell>
          <table:table-cell table:formula="of:=[.D1641]-[.D16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B1640]+8" office:value-type="float" office:value="13120" calcext:value-type="float">
            <text:p>13120</text:p>
          </table:table-cell>
          <table:table-cell office:value-type="float" office:value="8640000" calcext:value-type="float">
            <text:p>8640000</text:p>
          </table:table-cell>
          <table:table-cell table:formula="of:=[.B1641]/[.C1641]" office:value-type="float" office:value="0.00151851851851852" calcext:value-type="float">
            <text:p>0,00151851851851852000</text:p>
          </table:table-cell>
          <table:table-cell table:formula="of:=[.D1642]-[.D16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[.B1641]+8" office:value-type="float" office:value="13128" calcext:value-type="float">
            <text:p>13128</text:p>
          </table:table-cell>
          <table:table-cell office:value-type="float" office:value="8640000" calcext:value-type="float">
            <text:p>8640000</text:p>
          </table:table-cell>
          <table:table-cell table:formula="of:=[.B1642]/[.C1642]" office:value-type="float" office:value="0.00151944444444444" calcext:value-type="float">
            <text:p>0,00151944444444444000</text:p>
          </table:table-cell>
          <table:table-cell table:formula="of:=[.D1643]-[.D16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[.B1642]+8" office:value-type="float" office:value="13136" calcext:value-type="float">
            <text:p>13136</text:p>
          </table:table-cell>
          <table:table-cell office:value-type="float" office:value="8640000" calcext:value-type="float">
            <text:p>8640000</text:p>
          </table:table-cell>
          <table:table-cell table:formula="of:=[.B1643]/[.C1643]" office:value-type="float" office:value="0.00152037037037037" calcext:value-type="float">
            <text:p>0,00152037037037037000</text:p>
          </table:table-cell>
          <table:table-cell table:formula="of:=[.D1644]-[.D16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[.B1643]+8" office:value-type="float" office:value="13144" calcext:value-type="float">
            <text:p>13144</text:p>
          </table:table-cell>
          <table:table-cell office:value-type="float" office:value="8640000" calcext:value-type="float">
            <text:p>8640000</text:p>
          </table:table-cell>
          <table:table-cell table:formula="of:=[.B1644]/[.C1644]" office:value-type="float" office:value="0.0015212962962963" calcext:value-type="float">
            <text:p>0,00152129629629630000</text:p>
          </table:table-cell>
          <table:table-cell table:formula="of:=[.D1645]-[.D16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[.B1644]+8" office:value-type="float" office:value="13152" calcext:value-type="float">
            <text:p>13152</text:p>
          </table:table-cell>
          <table:table-cell office:value-type="float" office:value="8640000" calcext:value-type="float">
            <text:p>8640000</text:p>
          </table:table-cell>
          <table:table-cell table:formula="of:=[.B1645]/[.C1645]" office:value-type="float" office:value="0.00152222222222222" calcext:value-type="float">
            <text:p>0,00152222222222222000</text:p>
          </table:table-cell>
          <table:table-cell table:formula="of:=[.D1646]-[.D1645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B1645]+8" office:value-type="float" office:value="13160" calcext:value-type="float">
            <text:p>13160</text:p>
          </table:table-cell>
          <table:table-cell office:value-type="float" office:value="8640000" calcext:value-type="float">
            <text:p>8640000</text:p>
          </table:table-cell>
          <table:table-cell table:formula="of:=[.B1646]/[.C1646]" office:value-type="float" office:value="0.00152314814814815" calcext:value-type="float">
            <text:p>0,00152314814814815000</text:p>
          </table:table-cell>
          <table:table-cell table:formula="of:=[.D1647]-[.D16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[.B1646]+8" office:value-type="float" office:value="13168" calcext:value-type="float">
            <text:p>13168</text:p>
          </table:table-cell>
          <table:table-cell office:value-type="float" office:value="8640000" calcext:value-type="float">
            <text:p>8640000</text:p>
          </table:table-cell>
          <table:table-cell table:formula="of:=[.B1647]/[.C1647]" office:value-type="float" office:value="0.00152407407407407" calcext:value-type="float">
            <text:p>0,00152407407407407000</text:p>
          </table:table-cell>
          <table:table-cell table:formula="of:=[.D1648]-[.D16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[.B1647]+8" office:value-type="float" office:value="13176" calcext:value-type="float">
            <text:p>13176</text:p>
          </table:table-cell>
          <table:table-cell office:value-type="float" office:value="8640000" calcext:value-type="float">
            <text:p>8640000</text:p>
          </table:table-cell>
          <table:table-cell table:formula="of:=[.B1648]/[.C1648]" office:value-type="float" office:value="0.001525" calcext:value-type="float">
            <text:p>0,00152500000000000000</text:p>
          </table:table-cell>
          <table:table-cell table:formula="of:=[.D1649]-[.D16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[.B1648]+8" office:value-type="float" office:value="13184" calcext:value-type="float">
            <text:p>13184</text:p>
          </table:table-cell>
          <table:table-cell office:value-type="float" office:value="8640000" calcext:value-type="float">
            <text:p>8640000</text:p>
          </table:table-cell>
          <table:table-cell table:formula="of:=[.B1649]/[.C1649]" office:value-type="float" office:value="0.00152592592592593" calcext:value-type="float">
            <text:p>0,00152592592592593000</text:p>
          </table:table-cell>
          <table:table-cell table:formula="of:=[.D1650]-[.D16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B1649]+8" office:value-type="float" office:value="13192" calcext:value-type="float">
            <text:p>13192</text:p>
          </table:table-cell>
          <table:table-cell office:value-type="float" office:value="8640000" calcext:value-type="float">
            <text:p>8640000</text:p>
          </table:table-cell>
          <table:table-cell table:formula="of:=[.B1650]/[.C1650]" office:value-type="float" office:value="0.00152685185185185" calcext:value-type="float">
            <text:p>0,00152685185185185000</text:p>
          </table:table-cell>
          <table:table-cell table:formula="of:=[.D1651]-[.D16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B1650]+8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1651]/[.C1651]" office:value-type="float" office:value="0.00152777777777778" calcext:value-type="float">
            <text:p>0,00152777777777778000</text:p>
          </table:table-cell>
          <table:table-cell table:formula="of:=[.D1652]-[.D16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[.B1651]+8" office:value-type="float" office:value="13208" calcext:value-type="float">
            <text:p>13208</text:p>
          </table:table-cell>
          <table:table-cell office:value-type="float" office:value="8640000" calcext:value-type="float">
            <text:p>8640000</text:p>
          </table:table-cell>
          <table:table-cell table:formula="of:=[.B1652]/[.C1652]" office:value-type="float" office:value="0.0015287037037037" calcext:value-type="float">
            <text:p>0,00152870370370370000</text:p>
          </table:table-cell>
          <table:table-cell table:formula="of:=[.D1653]-[.D16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B1652]+8" office:value-type="float" office:value="13216" calcext:value-type="float">
            <text:p>13216</text:p>
          </table:table-cell>
          <table:table-cell office:value-type="float" office:value="8640000" calcext:value-type="float">
            <text:p>8640000</text:p>
          </table:table-cell>
          <table:table-cell table:formula="of:=[.B1653]/[.C1653]" office:value-type="float" office:value="0.00152962962962963" calcext:value-type="float">
            <text:p>0,00152962962962963000</text:p>
          </table:table-cell>
          <table:table-cell table:formula="of:=[.D1654]-[.D16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[.B1653]+8" office:value-type="float" office:value="13224" calcext:value-type="float">
            <text:p>13224</text:p>
          </table:table-cell>
          <table:table-cell office:value-type="float" office:value="8640000" calcext:value-type="float">
            <text:p>8640000</text:p>
          </table:table-cell>
          <table:table-cell table:formula="of:=[.B1654]/[.C1654]" office:value-type="float" office:value="0.00153055555555556" calcext:value-type="float">
            <text:p>0,00153055555555556000</text:p>
          </table:table-cell>
          <table:table-cell table:formula="of:=[.D1655]-[.D16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[.B1654]+8" office:value-type="float" office:value="13232" calcext:value-type="float">
            <text:p>13232</text:p>
          </table:table-cell>
          <table:table-cell office:value-type="float" office:value="8640000" calcext:value-type="float">
            <text:p>8640000</text:p>
          </table:table-cell>
          <table:table-cell table:formula="of:=[.B1655]/[.C1655]" office:value-type="float" office:value="0.00153148148148148" calcext:value-type="float">
            <text:p>0,00153148148148148000</text:p>
          </table:table-cell>
          <table:table-cell table:formula="of:=[.D1656]-[.D16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[.B1655]+8" office:value-type="float" office:value="13240" calcext:value-type="float">
            <text:p>13240</text:p>
          </table:table-cell>
          <table:table-cell office:value-type="float" office:value="8640000" calcext:value-type="float">
            <text:p>8640000</text:p>
          </table:table-cell>
          <table:table-cell table:formula="of:=[.B1656]/[.C1656]" office:value-type="float" office:value="0.00153240740740741" calcext:value-type="float">
            <text:p>0,00153240740740741000</text:p>
          </table:table-cell>
          <table:table-cell table:formula="of:=[.D1657]-[.D16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[.B1656]+8" office:value-type="float" office:value="13248" calcext:value-type="float">
            <text:p>13248</text:p>
          </table:table-cell>
          <table:table-cell office:value-type="float" office:value="8640000" calcext:value-type="float">
            <text:p>8640000</text:p>
          </table:table-cell>
          <table:table-cell table:formula="of:=[.B1657]/[.C1657]" office:value-type="float" office:value="0.00153333333333333" calcext:value-type="float">
            <text:p>0,00153333333333333000</text:p>
          </table:table-cell>
          <table:table-cell table:formula="of:=[.D1658]-[.D16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[.B1657]+8" office:value-type="float" office:value="13256" calcext:value-type="float">
            <text:p>13256</text:p>
          </table:table-cell>
          <table:table-cell office:value-type="float" office:value="8640000" calcext:value-type="float">
            <text:p>8640000</text:p>
          </table:table-cell>
          <table:table-cell table:formula="of:=[.B1658]/[.C1658]" office:value-type="float" office:value="0.00153425925925926" calcext:value-type="float">
            <text:p>0,00153425925925926000</text:p>
          </table:table-cell>
          <table:table-cell table:formula="of:=[.D1659]-[.D16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[.B1658]+8" office:value-type="float" office:value="13264" calcext:value-type="float">
            <text:p>13264</text:p>
          </table:table-cell>
          <table:table-cell office:value-type="float" office:value="8640000" calcext:value-type="float">
            <text:p>8640000</text:p>
          </table:table-cell>
          <table:table-cell table:formula="of:=[.B1659]/[.C1659]" office:value-type="float" office:value="0.00153518518518519" calcext:value-type="float">
            <text:p>0,00153518518518519000</text:p>
          </table:table-cell>
          <table:table-cell table:formula="of:=[.D1660]-[.D16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[.B1659]+8" office:value-type="float" office:value="13272" calcext:value-type="float">
            <text:p>13272</text:p>
          </table:table-cell>
          <table:table-cell office:value-type="float" office:value="8640000" calcext:value-type="float">
            <text:p>8640000</text:p>
          </table:table-cell>
          <table:table-cell table:formula="of:=[.B1660]/[.C1660]" office:value-type="float" office:value="0.00153611111111111" calcext:value-type="float">
            <text:p>0,00153611111111111000</text:p>
          </table:table-cell>
          <table:table-cell table:formula="of:=[.D1661]-[.D16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B1660]+8" office:value-type="float" office:value="13280" calcext:value-type="float">
            <text:p>13280</text:p>
          </table:table-cell>
          <table:table-cell office:value-type="float" office:value="8640000" calcext:value-type="float">
            <text:p>8640000</text:p>
          </table:table-cell>
          <table:table-cell table:formula="of:=[.B1661]/[.C1661]" office:value-type="float" office:value="0.00153703703703704" calcext:value-type="float">
            <text:p>0,00153703703703704000</text:p>
          </table:table-cell>
          <table:table-cell table:formula="of:=[.D1662]-[.D16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[.B1661]+8" office:value-type="float" office:value="13288" calcext:value-type="float">
            <text:p>13288</text:p>
          </table:table-cell>
          <table:table-cell office:value-type="float" office:value="8640000" calcext:value-type="float">
            <text:p>8640000</text:p>
          </table:table-cell>
          <table:table-cell table:formula="of:=[.B1662]/[.C1662]" office:value-type="float" office:value="0.00153796296296296" calcext:value-type="float">
            <text:p>0,00153796296296296000</text:p>
          </table:table-cell>
          <table:table-cell table:formula="of:=[.D1663]-[.D16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[.B1662]+8" office:value-type="float" office:value="13296" calcext:value-type="float">
            <text:p>13296</text:p>
          </table:table-cell>
          <table:table-cell office:value-type="float" office:value="8640000" calcext:value-type="float">
            <text:p>8640000</text:p>
          </table:table-cell>
          <table:table-cell table:formula="of:=[.B1663]/[.C1663]" office:value-type="float" office:value="0.00153888888888889" calcext:value-type="float">
            <text:p>0,00153888888888889000</text:p>
          </table:table-cell>
          <table:table-cell table:formula="of:=[.D1664]-[.D16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B1663]+8" office:value-type="float" office:value="13304" calcext:value-type="float">
            <text:p>13304</text:p>
          </table:table-cell>
          <table:table-cell office:value-type="float" office:value="8640000" calcext:value-type="float">
            <text:p>8640000</text:p>
          </table:table-cell>
          <table:table-cell table:formula="of:=[.B1664]/[.C1664]" office:value-type="float" office:value="0.00153981481481481" calcext:value-type="float">
            <text:p>0,00153981481481481000</text:p>
          </table:table-cell>
          <table:table-cell table:formula="of:=[.D1665]-[.D16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[.B1664]+8" office:value-type="float" office:value="13312" calcext:value-type="float">
            <text:p>13312</text:p>
          </table:table-cell>
          <table:table-cell office:value-type="float" office:value="8640000" calcext:value-type="float">
            <text:p>8640000</text:p>
          </table:table-cell>
          <table:table-cell table:formula="of:=[.B1665]/[.C1665]" office:value-type="float" office:value="0.00154074074074074" calcext:value-type="float">
            <text:p>0,00154074074074074000</text:p>
          </table:table-cell>
          <table:table-cell table:formula="of:=[.D1666]-[.D16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[.B1665]+8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1666]/[.C1666]" office:value-type="float" office:value="0.00154166666666667" calcext:value-type="float">
            <text:p>0,00154166666666667000</text:p>
          </table:table-cell>
          <table:table-cell table:formula="of:=[.D1667]-[.D16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[.B1666]+8" office:value-type="float" office:value="13328" calcext:value-type="float">
            <text:p>13328</text:p>
          </table:table-cell>
          <table:table-cell office:value-type="float" office:value="8640000" calcext:value-type="float">
            <text:p>8640000</text:p>
          </table:table-cell>
          <table:table-cell table:formula="of:=[.B1667]/[.C1667]" office:value-type="float" office:value="0.00154259259259259" calcext:value-type="float">
            <text:p>0,00154259259259259000</text:p>
          </table:table-cell>
          <table:table-cell table:formula="of:=[.D1668]-[.D16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B1667]+8" office:value-type="float" office:value="13336" calcext:value-type="float">
            <text:p>13336</text:p>
          </table:table-cell>
          <table:table-cell office:value-type="float" office:value="8640000" calcext:value-type="float">
            <text:p>8640000</text:p>
          </table:table-cell>
          <table:table-cell table:formula="of:=[.B1668]/[.C1668]" office:value-type="float" office:value="0.00154351851851852" calcext:value-type="float">
            <text:p>0,00154351851851852000</text:p>
          </table:table-cell>
          <table:table-cell table:formula="of:=[.D1669]-[.D16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[.B1668]+8" office:value-type="float" office:value="13344" calcext:value-type="float">
            <text:p>13344</text:p>
          </table:table-cell>
          <table:table-cell office:value-type="float" office:value="8640000" calcext:value-type="float">
            <text:p>8640000</text:p>
          </table:table-cell>
          <table:table-cell table:formula="of:=[.B1669]/[.C1669]" office:value-type="float" office:value="0.00154444444444444" calcext:value-type="float">
            <text:p>0,00154444444444444000</text:p>
          </table:table-cell>
          <table:table-cell table:formula="of:=[.D1670]-[.D16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[.B1669]+8" office:value-type="float" office:value="13352" calcext:value-type="float">
            <text:p>13352</text:p>
          </table:table-cell>
          <table:table-cell office:value-type="float" office:value="8640000" calcext:value-type="float">
            <text:p>8640000</text:p>
          </table:table-cell>
          <table:table-cell table:formula="of:=[.B1670]/[.C1670]" office:value-type="float" office:value="0.00154537037037037" calcext:value-type="float">
            <text:p>0,00154537037037037000</text:p>
          </table:table-cell>
          <table:table-cell table:formula="of:=[.D1671]-[.D16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B1670]+8" office:value-type="float" office:value="13360" calcext:value-type="float">
            <text:p>13360</text:p>
          </table:table-cell>
          <table:table-cell office:value-type="float" office:value="8640000" calcext:value-type="float">
            <text:p>8640000</text:p>
          </table:table-cell>
          <table:table-cell table:formula="of:=[.B1671]/[.C1671]" office:value-type="float" office:value="0.0015462962962963" calcext:value-type="float">
            <text:p>0,00154629629629630000</text:p>
          </table:table-cell>
          <table:table-cell table:formula="of:=[.D1672]-[.D16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B1671]+8" office:value-type="float" office:value="13368" calcext:value-type="float">
            <text:p>13368</text:p>
          </table:table-cell>
          <table:table-cell office:value-type="float" office:value="8640000" calcext:value-type="float">
            <text:p>8640000</text:p>
          </table:table-cell>
          <table:table-cell table:formula="of:=[.B1672]/[.C1672]" office:value-type="float" office:value="0.00154722222222222" calcext:value-type="float">
            <text:p>0,00154722222222222000</text:p>
          </table:table-cell>
          <table:table-cell table:formula="of:=[.D1673]-[.D16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[.B1672]+8" office:value-type="float" office:value="13376" calcext:value-type="float">
            <text:p>13376</text:p>
          </table:table-cell>
          <table:table-cell office:value-type="float" office:value="8640000" calcext:value-type="float">
            <text:p>8640000</text:p>
          </table:table-cell>
          <table:table-cell table:formula="of:=[.B1673]/[.C1673]" office:value-type="float" office:value="0.00154814814814815" calcext:value-type="float">
            <text:p>0,00154814814814815000</text:p>
          </table:table-cell>
          <table:table-cell table:formula="of:=[.D1674]-[.D16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B1673]+8" office:value-type="float" office:value="13384" calcext:value-type="float">
            <text:p>13384</text:p>
          </table:table-cell>
          <table:table-cell office:value-type="float" office:value="8640000" calcext:value-type="float">
            <text:p>8640000</text:p>
          </table:table-cell>
          <table:table-cell table:formula="of:=[.B1674]/[.C1674]" office:value-type="float" office:value="0.00154907407407407" calcext:value-type="float">
            <text:p>0,00154907407407407000</text:p>
          </table:table-cell>
          <table:table-cell table:formula="of:=[.D1675]-[.D16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B1674]+8" office:value-type="float" office:value="13392" calcext:value-type="float">
            <text:p>13392</text:p>
          </table:table-cell>
          <table:table-cell office:value-type="float" office:value="8640000" calcext:value-type="float">
            <text:p>8640000</text:p>
          </table:table-cell>
          <table:table-cell table:formula="of:=[.B1675]/[.C1675]" office:value-type="float" office:value="0.00155" calcext:value-type="float">
            <text:p>0,00155000000000000000</text:p>
          </table:table-cell>
          <table:table-cell table:formula="of:=[.D1676]-[.D16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B1675]+8" office:value-type="float" office:value="13400" calcext:value-type="float">
            <text:p>13400</text:p>
          </table:table-cell>
          <table:table-cell office:value-type="float" office:value="8640000" calcext:value-type="float">
            <text:p>8640000</text:p>
          </table:table-cell>
          <table:table-cell table:formula="of:=[.B1676]/[.C1676]" office:value-type="float" office:value="0.00155092592592593" calcext:value-type="float">
            <text:p>0,00155092592592593000</text:p>
          </table:table-cell>
          <table:table-cell table:formula="of:=[.D1677]-[.D16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[.B1676]+8" office:value-type="float" office:value="13408" calcext:value-type="float">
            <text:p>13408</text:p>
          </table:table-cell>
          <table:table-cell office:value-type="float" office:value="8640000" calcext:value-type="float">
            <text:p>8640000</text:p>
          </table:table-cell>
          <table:table-cell table:formula="of:=[.B1677]/[.C1677]" office:value-type="float" office:value="0.00155185185185185" calcext:value-type="float">
            <text:p>0,00155185185185185000</text:p>
          </table:table-cell>
          <table:table-cell table:formula="of:=[.D1678]-[.D16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[.B1677]+8" office:value-type="float" office:value="13416" calcext:value-type="float">
            <text:p>13416</text:p>
          </table:table-cell>
          <table:table-cell office:value-type="float" office:value="8640000" calcext:value-type="float">
            <text:p>8640000</text:p>
          </table:table-cell>
          <table:table-cell table:formula="of:=[.B1678]/[.C1678]" office:value-type="float" office:value="0.00155277777777778" calcext:value-type="float">
            <text:p>0,00155277777777778000</text:p>
          </table:table-cell>
          <table:table-cell table:formula="of:=[.D1679]-[.D16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[.B1678]+8" office:value-type="float" office:value="13424" calcext:value-type="float">
            <text:p>13424</text:p>
          </table:table-cell>
          <table:table-cell office:value-type="float" office:value="8640000" calcext:value-type="float">
            <text:p>8640000</text:p>
          </table:table-cell>
          <table:table-cell table:formula="of:=[.B1679]/[.C1679]" office:value-type="float" office:value="0.0015537037037037" calcext:value-type="float">
            <text:p>0,00155370370370370000</text:p>
          </table:table-cell>
          <table:table-cell table:formula="of:=[.D1680]-[.D16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[.B1679]+8" office:value-type="float" office:value="13432" calcext:value-type="float">
            <text:p>13432</text:p>
          </table:table-cell>
          <table:table-cell office:value-type="float" office:value="8640000" calcext:value-type="float">
            <text:p>8640000</text:p>
          </table:table-cell>
          <table:table-cell table:formula="of:=[.B1680]/[.C1680]" office:value-type="float" office:value="0.00155462962962963" calcext:value-type="float">
            <text:p>0,00155462962962963000</text:p>
          </table:table-cell>
          <table:table-cell table:formula="of:=[.D1681]-[.D16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B1680]+8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1681]/[.C1681]" office:value-type="float" office:value="0.00155555555555556" calcext:value-type="float">
            <text:p>0,00155555555555556000</text:p>
          </table:table-cell>
          <table:table-cell table:formula="of:=[.D1682]-[.D16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B1681]+8" office:value-type="float" office:value="13448" calcext:value-type="float">
            <text:p>13448</text:p>
          </table:table-cell>
          <table:table-cell office:value-type="float" office:value="8640000" calcext:value-type="float">
            <text:p>8640000</text:p>
          </table:table-cell>
          <table:table-cell table:formula="of:=[.B1682]/[.C1682]" office:value-type="float" office:value="0.00155648148148148" calcext:value-type="float">
            <text:p>0,00155648148148148000</text:p>
          </table:table-cell>
          <table:table-cell table:formula="of:=[.D1683]-[.D16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[.B1682]+8" office:value-type="float" office:value="13456" calcext:value-type="float">
            <text:p>13456</text:p>
          </table:table-cell>
          <table:table-cell office:value-type="float" office:value="8640000" calcext:value-type="float">
            <text:p>8640000</text:p>
          </table:table-cell>
          <table:table-cell table:formula="of:=[.B1683]/[.C1683]" office:value-type="float" office:value="0.00155740740740741" calcext:value-type="float">
            <text:p>0,00155740740740741000</text:p>
          </table:table-cell>
          <table:table-cell table:formula="of:=[.D1684]-[.D16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[.B1683]+8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1684]/[.C1684]" office:value-type="float" office:value="0.00155833333333333" calcext:value-type="float">
            <text:p>0,00155833333333333000</text:p>
          </table:table-cell>
          <table:table-cell table:formula="of:=[.D1685]-[.D1684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B1684]+8" office:value-type="float" office:value="13472" calcext:value-type="float">
            <text:p>13472</text:p>
          </table:table-cell>
          <table:table-cell office:value-type="float" office:value="8640000" calcext:value-type="float">
            <text:p>8640000</text:p>
          </table:table-cell>
          <table:table-cell table:formula="of:=[.B1685]/[.C1685]" office:value-type="float" office:value="0.00155925925925926" calcext:value-type="float">
            <text:p>0,00155925925925926000</text:p>
          </table:table-cell>
          <table:table-cell table:formula="of:=[.D1686]-[.D16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[.B1685]+8" office:value-type="float" office:value="13480" calcext:value-type="float">
            <text:p>13480</text:p>
          </table:table-cell>
          <table:table-cell office:value-type="float" office:value="8640000" calcext:value-type="float">
            <text:p>8640000</text:p>
          </table:table-cell>
          <table:table-cell table:formula="of:=[.B1686]/[.C1686]" office:value-type="float" office:value="0.00156018518518519" calcext:value-type="float">
            <text:p>0,00156018518518519000</text:p>
          </table:table-cell>
          <table:table-cell table:formula="of:=[.D1687]-[.D16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[.B1686]+8" office:value-type="float" office:value="13488" calcext:value-type="float">
            <text:p>13488</text:p>
          </table:table-cell>
          <table:table-cell office:value-type="float" office:value="8640000" calcext:value-type="float">
            <text:p>8640000</text:p>
          </table:table-cell>
          <table:table-cell table:formula="of:=[.B1687]/[.C1687]" office:value-type="float" office:value="0.00156111111111111" calcext:value-type="float">
            <text:p>0,00156111111111111000</text:p>
          </table:table-cell>
          <table:table-cell table:formula="of:=[.D1688]-[.D16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[.B1687]+8" office:value-type="float" office:value="13496" calcext:value-type="float">
            <text:p>13496</text:p>
          </table:table-cell>
          <table:table-cell office:value-type="float" office:value="8640000" calcext:value-type="float">
            <text:p>8640000</text:p>
          </table:table-cell>
          <table:table-cell table:formula="of:=[.B1688]/[.C1688]" office:value-type="float" office:value="0.00156203703703704" calcext:value-type="float">
            <text:p>0,00156203703703704000</text:p>
          </table:table-cell>
          <table:table-cell table:formula="of:=[.D1689]-[.D16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[.B1688]+8" office:value-type="float" office:value="13504" calcext:value-type="float">
            <text:p>13504</text:p>
          </table:table-cell>
          <table:table-cell office:value-type="float" office:value="8640000" calcext:value-type="float">
            <text:p>8640000</text:p>
          </table:table-cell>
          <table:table-cell table:formula="of:=[.B1689]/[.C1689]" office:value-type="float" office:value="0.00156296296296296" calcext:value-type="float">
            <text:p>0,00156296296296296000</text:p>
          </table:table-cell>
          <table:table-cell table:formula="of:=[.D1690]-[.D16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[.B1689]+8" office:value-type="float" office:value="13512" calcext:value-type="float">
            <text:p>13512</text:p>
          </table:table-cell>
          <table:table-cell office:value-type="float" office:value="8640000" calcext:value-type="float">
            <text:p>8640000</text:p>
          </table:table-cell>
          <table:table-cell table:formula="of:=[.B1690]/[.C1690]" office:value-type="float" office:value="0.00156388888888889" calcext:value-type="float">
            <text:p>0,00156388888888889000</text:p>
          </table:table-cell>
          <table:table-cell table:formula="of:=[.D1691]-[.D16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B1690]+8" office:value-type="float" office:value="13520" calcext:value-type="float">
            <text:p>13520</text:p>
          </table:table-cell>
          <table:table-cell office:value-type="float" office:value="8640000" calcext:value-type="float">
            <text:p>8640000</text:p>
          </table:table-cell>
          <table:table-cell table:formula="of:=[.B1691]/[.C1691]" office:value-type="float" office:value="0.00156481481481481" calcext:value-type="float">
            <text:p>0,00156481481481482000</text:p>
          </table:table-cell>
          <table:table-cell table:formula="of:=[.D1692]-[.D16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[.B1691]+8" office:value-type="float" office:value="13528" calcext:value-type="float">
            <text:p>13528</text:p>
          </table:table-cell>
          <table:table-cell office:value-type="float" office:value="8640000" calcext:value-type="float">
            <text:p>8640000</text:p>
          </table:table-cell>
          <table:table-cell table:formula="of:=[.B1692]/[.C1692]" office:value-type="float" office:value="0.00156574074074074" calcext:value-type="float">
            <text:p>0,00156574074074074000</text:p>
          </table:table-cell>
          <table:table-cell table:formula="of:=[.D1693]-[.D16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[.B1692]+8" office:value-type="float" office:value="13536" calcext:value-type="float">
            <text:p>13536</text:p>
          </table:table-cell>
          <table:table-cell office:value-type="float" office:value="8640000" calcext:value-type="float">
            <text:p>8640000</text:p>
          </table:table-cell>
          <table:table-cell table:formula="of:=[.B1693]/[.C1693]" office:value-type="float" office:value="0.00156666666666667" calcext:value-type="float">
            <text:p>0,00156666666666667000</text:p>
          </table:table-cell>
          <table:table-cell table:formula="of:=[.D1694]-[.D16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[.B1693]+8" office:value-type="float" office:value="13544" calcext:value-type="float">
            <text:p>13544</text:p>
          </table:table-cell>
          <table:table-cell office:value-type="float" office:value="8640000" calcext:value-type="float">
            <text:p>8640000</text:p>
          </table:table-cell>
          <table:table-cell table:formula="of:=[.B1694]/[.C1694]" office:value-type="float" office:value="0.00156759259259259" calcext:value-type="float">
            <text:p>0,00156759259259259000</text:p>
          </table:table-cell>
          <table:table-cell table:formula="of:=[.D1695]-[.D16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[.B1694]+8" office:value-type="float" office:value="13552" calcext:value-type="float">
            <text:p>13552</text:p>
          </table:table-cell>
          <table:table-cell office:value-type="float" office:value="8640000" calcext:value-type="float">
            <text:p>8640000</text:p>
          </table:table-cell>
          <table:table-cell table:formula="of:=[.B1695]/[.C1695]" office:value-type="float" office:value="0.00156851851851852" calcext:value-type="float">
            <text:p>0,00156851851851852000</text:p>
          </table:table-cell>
          <table:table-cell table:formula="of:=[.D1696]-[.D16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[.B1695]+8" office:value-type="float" office:value="13560" calcext:value-type="float">
            <text:p>13560</text:p>
          </table:table-cell>
          <table:table-cell office:value-type="float" office:value="8640000" calcext:value-type="float">
            <text:p>8640000</text:p>
          </table:table-cell>
          <table:table-cell table:formula="of:=[.B1696]/[.C1696]" office:value-type="float" office:value="0.00156944444444444" calcext:value-type="float">
            <text:p>0,00156944444444444000</text:p>
          </table:table-cell>
          <table:table-cell table:formula="of:=[.D1697]-[.D16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[.B1696]+8" office:value-type="float" office:value="13568" calcext:value-type="float">
            <text:p>13568</text:p>
          </table:table-cell>
          <table:table-cell office:value-type="float" office:value="8640000" calcext:value-type="float">
            <text:p>8640000</text:p>
          </table:table-cell>
          <table:table-cell table:formula="of:=[.B1697]/[.C1697]" office:value-type="float" office:value="0.00157037037037037" calcext:value-type="float">
            <text:p>0,00157037037037037000</text:p>
          </table:table-cell>
          <table:table-cell table:formula="of:=[.D1698]-[.D16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[.B1697]+8" office:value-type="float" office:value="13576" calcext:value-type="float">
            <text:p>13576</text:p>
          </table:table-cell>
          <table:table-cell office:value-type="float" office:value="8640000" calcext:value-type="float">
            <text:p>8640000</text:p>
          </table:table-cell>
          <table:table-cell table:formula="of:=[.B1698]/[.C1698]" office:value-type="float" office:value="0.0015712962962963" calcext:value-type="float">
            <text:p>0,00157129629629630000</text:p>
          </table:table-cell>
          <table:table-cell table:formula="of:=[.D1699]-[.D16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B1698]+8" office:value-type="float" office:value="13584" calcext:value-type="float">
            <text:p>13584</text:p>
          </table:table-cell>
          <table:table-cell office:value-type="float" office:value="8640000" calcext:value-type="float">
            <text:p>8640000</text:p>
          </table:table-cell>
          <table:table-cell table:formula="of:=[.B1699]/[.C1699]" office:value-type="float" office:value="0.00157222222222222" calcext:value-type="float">
            <text:p>0,00157222222222222000</text:p>
          </table:table-cell>
          <table:table-cell table:formula="of:=[.D1700]-[.D16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B1699]+8" office:value-type="float" office:value="13592" calcext:value-type="float">
            <text:p>13592</text:p>
          </table:table-cell>
          <table:table-cell office:value-type="float" office:value="8640000" calcext:value-type="float">
            <text:p>8640000</text:p>
          </table:table-cell>
          <table:table-cell table:formula="of:=[.B1700]/[.C1700]" office:value-type="float" office:value="0.00157314814814815" calcext:value-type="float">
            <text:p>0,00157314814814815000</text:p>
          </table:table-cell>
          <table:table-cell table:formula="of:=[.D1701]-[.D17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B1700]+8" office:value-type="float" office:value="13600" calcext:value-type="float">
            <text:p>13600</text:p>
          </table:table-cell>
          <table:table-cell office:value-type="float" office:value="8640000" calcext:value-type="float">
            <text:p>8640000</text:p>
          </table:table-cell>
          <table:table-cell table:formula="of:=[.B1701]/[.C1701]" office:value-type="float" office:value="0.00157407407407407" calcext:value-type="float">
            <text:p>0,00157407407407407000</text:p>
          </table:table-cell>
          <table:table-cell table:formula="of:=[.D1702]-[.D17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[.B1701]+8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1702]/[.C1702]" office:value-type="float" office:value="0.001575" calcext:value-type="float">
            <text:p>0,00157500000000000000</text:p>
          </table:table-cell>
          <table:table-cell table:formula="of:=[.D1703]-[.D17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[.B1702]+8" office:value-type="float" office:value="13616" calcext:value-type="float">
            <text:p>13616</text:p>
          </table:table-cell>
          <table:table-cell office:value-type="float" office:value="8640000" calcext:value-type="float">
            <text:p>8640000</text:p>
          </table:table-cell>
          <table:table-cell table:formula="of:=[.B1703]/[.C1703]" office:value-type="float" office:value="0.00157592592592593" calcext:value-type="float">
            <text:p>0,00157592592592593000</text:p>
          </table:table-cell>
          <table:table-cell table:formula="of:=[.D1704]-[.D17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B1703]+8" office:value-type="float" office:value="13624" calcext:value-type="float">
            <text:p>13624</text:p>
          </table:table-cell>
          <table:table-cell office:value-type="float" office:value="8640000" calcext:value-type="float">
            <text:p>8640000</text:p>
          </table:table-cell>
          <table:table-cell table:formula="of:=[.B1704]/[.C1704]" office:value-type="float" office:value="0.00157685185185185" calcext:value-type="float">
            <text:p>0,00157685185185185000</text:p>
          </table:table-cell>
          <table:table-cell table:formula="of:=[.D1705]-[.D17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[.B1704]+8" office:value-type="float" office:value="13632" calcext:value-type="float">
            <text:p>13632</text:p>
          </table:table-cell>
          <table:table-cell office:value-type="float" office:value="8640000" calcext:value-type="float">
            <text:p>8640000</text:p>
          </table:table-cell>
          <table:table-cell table:formula="of:=[.B1705]/[.C1705]" office:value-type="float" office:value="0.00157777777777778" calcext:value-type="float">
            <text:p>0,00157777777777778000</text:p>
          </table:table-cell>
          <table:table-cell table:formula="of:=[.D1706]-[.D17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[.B1705]+8" office:value-type="float" office:value="13640" calcext:value-type="float">
            <text:p>13640</text:p>
          </table:table-cell>
          <table:table-cell office:value-type="float" office:value="8640000" calcext:value-type="float">
            <text:p>8640000</text:p>
          </table:table-cell>
          <table:table-cell table:formula="of:=[.B1706]/[.C1706]" office:value-type="float" office:value="0.0015787037037037" calcext:value-type="float">
            <text:p>0,00157870370370370000</text:p>
          </table:table-cell>
          <table:table-cell table:formula="of:=[.D1707]-[.D17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[.B1706]+8" office:value-type="float" office:value="13648" calcext:value-type="float">
            <text:p>13648</text:p>
          </table:table-cell>
          <table:table-cell office:value-type="float" office:value="8640000" calcext:value-type="float">
            <text:p>8640000</text:p>
          </table:table-cell>
          <table:table-cell table:formula="of:=[.B1707]/[.C1707]" office:value-type="float" office:value="0.00157962962962963" calcext:value-type="float">
            <text:p>0,00157962962962963000</text:p>
          </table:table-cell>
          <table:table-cell table:formula="of:=[.D1708]-[.D17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[.B1707]+8" office:value-type="float" office:value="13656" calcext:value-type="float">
            <text:p>13656</text:p>
          </table:table-cell>
          <table:table-cell office:value-type="float" office:value="8640000" calcext:value-type="float">
            <text:p>8640000</text:p>
          </table:table-cell>
          <table:table-cell table:formula="of:=[.B1708]/[.C1708]" office:value-type="float" office:value="0.00158055555555556" calcext:value-type="float">
            <text:p>0,00158055555555556000</text:p>
          </table:table-cell>
          <table:table-cell table:formula="of:=[.D1709]-[.D17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[.B1708]+8" office:value-type="float" office:value="13664" calcext:value-type="float">
            <text:p>13664</text:p>
          </table:table-cell>
          <table:table-cell office:value-type="float" office:value="8640000" calcext:value-type="float">
            <text:p>8640000</text:p>
          </table:table-cell>
          <table:table-cell table:formula="of:=[.B1709]/[.C1709]" office:value-type="float" office:value="0.00158148148148148" calcext:value-type="float">
            <text:p>0,00158148148148148000</text:p>
          </table:table-cell>
          <table:table-cell table:formula="of:=[.D1710]-[.D17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B1709]+8" office:value-type="float" office:value="13672" calcext:value-type="float">
            <text:p>13672</text:p>
          </table:table-cell>
          <table:table-cell office:value-type="float" office:value="8640000" calcext:value-type="float">
            <text:p>8640000</text:p>
          </table:table-cell>
          <table:table-cell table:formula="of:=[.B1710]/[.C1710]" office:value-type="float" office:value="0.00158240740740741" calcext:value-type="float">
            <text:p>0,00158240740740741000</text:p>
          </table:table-cell>
          <table:table-cell table:formula="of:=[.D1711]-[.D17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[.B1710]+8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1711]/[.C1711]" office:value-type="float" office:value="0.00158333333333333" calcext:value-type="float">
            <text:p>0,00158333333333333000</text:p>
          </table:table-cell>
          <table:table-cell table:formula="of:=[.D1712]-[.D17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[.B1711]+8" office:value-type="float" office:value="13688" calcext:value-type="float">
            <text:p>13688</text:p>
          </table:table-cell>
          <table:table-cell office:value-type="float" office:value="8640000" calcext:value-type="float">
            <text:p>8640000</text:p>
          </table:table-cell>
          <table:table-cell table:formula="of:=[.B1712]/[.C1712]" office:value-type="float" office:value="0.00158425925925926" calcext:value-type="float">
            <text:p>0,00158425925925926000</text:p>
          </table:table-cell>
          <table:table-cell table:formula="of:=[.D1713]-[.D17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[.B1712]+8" office:value-type="float" office:value="13696" calcext:value-type="float">
            <text:p>13696</text:p>
          </table:table-cell>
          <table:table-cell office:value-type="float" office:value="8640000" calcext:value-type="float">
            <text:p>8640000</text:p>
          </table:table-cell>
          <table:table-cell table:formula="of:=[.B1713]/[.C1713]" office:value-type="float" office:value="0.00158518518518519" calcext:value-type="float">
            <text:p>0,00158518518518519000</text:p>
          </table:table-cell>
          <table:table-cell table:formula="of:=[.D1714]-[.D17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[.B1713]+8" office:value-type="float" office:value="13704" calcext:value-type="float">
            <text:p>13704</text:p>
          </table:table-cell>
          <table:table-cell office:value-type="float" office:value="8640000" calcext:value-type="float">
            <text:p>8640000</text:p>
          </table:table-cell>
          <table:table-cell table:formula="of:=[.B1714]/[.C1714]" office:value-type="float" office:value="0.00158611111111111" calcext:value-type="float">
            <text:p>0,00158611111111111000</text:p>
          </table:table-cell>
          <table:table-cell table:formula="of:=[.D1715]-[.D17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[.B1714]+8" office:value-type="float" office:value="13712" calcext:value-type="float">
            <text:p>13712</text:p>
          </table:table-cell>
          <table:table-cell office:value-type="float" office:value="8640000" calcext:value-type="float">
            <text:p>8640000</text:p>
          </table:table-cell>
          <table:table-cell table:formula="of:=[.B1715]/[.C1715]" office:value-type="float" office:value="0.00158703703703704" calcext:value-type="float">
            <text:p>0,00158703703703704000</text:p>
          </table:table-cell>
          <table:table-cell table:formula="of:=[.D1716]-[.D17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[.B1715]+8" office:value-type="float" office:value="13720" calcext:value-type="float">
            <text:p>13720</text:p>
          </table:table-cell>
          <table:table-cell office:value-type="float" office:value="8640000" calcext:value-type="float">
            <text:p>8640000</text:p>
          </table:table-cell>
          <table:table-cell table:formula="of:=[.B1716]/[.C1716]" office:value-type="float" office:value="0.00158796296296296" calcext:value-type="float">
            <text:p>0,00158796296296296000</text:p>
          </table:table-cell>
          <table:table-cell table:formula="of:=[.D1717]-[.D17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[.B1716]+8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1717]/[.C1717]" office:value-type="float" office:value="0.00158888888888889" calcext:value-type="float">
            <text:p>0,00158888888888889000</text:p>
          </table:table-cell>
          <table:table-cell table:formula="of:=[.D1718]-[.D17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[.B1717]+8" office:value-type="float" office:value="13736" calcext:value-type="float">
            <text:p>13736</text:p>
          </table:table-cell>
          <table:table-cell office:value-type="float" office:value="8640000" calcext:value-type="float">
            <text:p>8640000</text:p>
          </table:table-cell>
          <table:table-cell table:formula="of:=[.B1718]/[.C1718]" office:value-type="float" office:value="0.00158981481481481" calcext:value-type="float">
            <text:p>0,00158981481481481000</text:p>
          </table:table-cell>
          <table:table-cell table:formula="of:=[.D1719]-[.D17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[.B1718]+8" office:value-type="float" office:value="13744" calcext:value-type="float">
            <text:p>13744</text:p>
          </table:table-cell>
          <table:table-cell office:value-type="float" office:value="8640000" calcext:value-type="float">
            <text:p>8640000</text:p>
          </table:table-cell>
          <table:table-cell table:formula="of:=[.B1719]/[.C1719]" office:value-type="float" office:value="0.00159074074074074" calcext:value-type="float">
            <text:p>0,00159074074074074000</text:p>
          </table:table-cell>
          <table:table-cell table:formula="of:=[.D1720]-[.D17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[.B1719]+8" office:value-type="float" office:value="13752" calcext:value-type="float">
            <text:p>13752</text:p>
          </table:table-cell>
          <table:table-cell office:value-type="float" office:value="8640000" calcext:value-type="float">
            <text:p>8640000</text:p>
          </table:table-cell>
          <table:table-cell table:formula="of:=[.B1720]/[.C1720]" office:value-type="float" office:value="0.00159166666666667" calcext:value-type="float">
            <text:p>0,00159166666666667000</text:p>
          </table:table-cell>
          <table:table-cell table:formula="of:=[.D1721]-[.D17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[.B1720]+8" office:value-type="float" office:value="13760" calcext:value-type="float">
            <text:p>13760</text:p>
          </table:table-cell>
          <table:table-cell office:value-type="float" office:value="8640000" calcext:value-type="float">
            <text:p>8640000</text:p>
          </table:table-cell>
          <table:table-cell table:formula="of:=[.B1721]/[.C1721]" office:value-type="float" office:value="0.00159259259259259" calcext:value-type="float">
            <text:p>0,00159259259259259000</text:p>
          </table:table-cell>
          <table:table-cell table:formula="of:=[.D1722]-[.D17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[.B1721]+8" office:value-type="float" office:value="13768" calcext:value-type="float">
            <text:p>13768</text:p>
          </table:table-cell>
          <table:table-cell office:value-type="float" office:value="8640000" calcext:value-type="float">
            <text:p>8640000</text:p>
          </table:table-cell>
          <table:table-cell table:formula="of:=[.B1722]/[.C1722]" office:value-type="float" office:value="0.00159351851851852" calcext:value-type="float">
            <text:p>0,00159351851851852000</text:p>
          </table:table-cell>
          <table:table-cell table:formula="of:=[.D1723]-[.D17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[.B1722]+8" office:value-type="float" office:value="13776" calcext:value-type="float">
            <text:p>13776</text:p>
          </table:table-cell>
          <table:table-cell office:value-type="float" office:value="8640000" calcext:value-type="float">
            <text:p>8640000</text:p>
          </table:table-cell>
          <table:table-cell table:formula="of:=[.B1723]/[.C1723]" office:value-type="float" office:value="0.00159444444444444" calcext:value-type="float">
            <text:p>0,00159444444444444000</text:p>
          </table:table-cell>
          <table:table-cell table:formula="of:=[.D1724]-[.D1723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[.B1723]+8" office:value-type="float" office:value="13784" calcext:value-type="float">
            <text:p>13784</text:p>
          </table:table-cell>
          <table:table-cell office:value-type="float" office:value="8640000" calcext:value-type="float">
            <text:p>8640000</text:p>
          </table:table-cell>
          <table:table-cell table:formula="of:=[.B1724]/[.C1724]" office:value-type="float" office:value="0.00159537037037037" calcext:value-type="float">
            <text:p>0,00159537037037037000</text:p>
          </table:table-cell>
          <table:table-cell table:formula="of:=[.D1725]-[.D17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[.B1724]+8" office:value-type="float" office:value="13792" calcext:value-type="float">
            <text:p>13792</text:p>
          </table:table-cell>
          <table:table-cell office:value-type="float" office:value="8640000" calcext:value-type="float">
            <text:p>8640000</text:p>
          </table:table-cell>
          <table:table-cell table:formula="of:=[.B1725]/[.C1725]" office:value-type="float" office:value="0.0015962962962963" calcext:value-type="float">
            <text:p>0,00159629629629630000</text:p>
          </table:table-cell>
          <table:table-cell table:formula="of:=[.D1726]-[.D17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[.B1725]+8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1726]/[.C1726]" office:value-type="float" office:value="0.00159722222222222" calcext:value-type="float">
            <text:p>0,00159722222222222000</text:p>
          </table:table-cell>
          <table:table-cell table:formula="of:=[.D1727]-[.D17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[.B1726]+8" office:value-type="float" office:value="13808" calcext:value-type="float">
            <text:p>13808</text:p>
          </table:table-cell>
          <table:table-cell office:value-type="float" office:value="8640000" calcext:value-type="float">
            <text:p>8640000</text:p>
          </table:table-cell>
          <table:table-cell table:formula="of:=[.B1727]/[.C1727]" office:value-type="float" office:value="0.00159814814814815" calcext:value-type="float">
            <text:p>0,00159814814814815000</text:p>
          </table:table-cell>
          <table:table-cell table:formula="of:=[.D1728]-[.D17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[.B1727]+8" office:value-type="float" office:value="13816" calcext:value-type="float">
            <text:p>13816</text:p>
          </table:table-cell>
          <table:table-cell office:value-type="float" office:value="8640000" calcext:value-type="float">
            <text:p>8640000</text:p>
          </table:table-cell>
          <table:table-cell table:formula="of:=[.B1728]/[.C1728]" office:value-type="float" office:value="0.00159907407407407" calcext:value-type="float">
            <text:p>0,00159907407407407000</text:p>
          </table:table-cell>
          <table:table-cell table:formula="of:=[.D1729]-[.D17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[.B1728]+8" office:value-type="float" office:value="13824" calcext:value-type="float">
            <text:p>13824</text:p>
          </table:table-cell>
          <table:table-cell office:value-type="float" office:value="8640000" calcext:value-type="float">
            <text:p>8640000</text:p>
          </table:table-cell>
          <table:table-cell table:formula="of:=[.B1729]/[.C1729]" office:value-type="float" office:value="0.0016" calcext:value-type="float">
            <text:p>0,00160000000000000000</text:p>
          </table:table-cell>
          <table:table-cell table:formula="of:=[.D1730]-[.D17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[.B1729]+8" office:value-type="float" office:value="13832" calcext:value-type="float">
            <text:p>13832</text:p>
          </table:table-cell>
          <table:table-cell office:value-type="float" office:value="8640000" calcext:value-type="float">
            <text:p>8640000</text:p>
          </table:table-cell>
          <table:table-cell table:formula="of:=[.B1730]/[.C1730]" office:value-type="float" office:value="0.00160092592592593" calcext:value-type="float">
            <text:p>0,00160092592592593000</text:p>
          </table:table-cell>
          <table:table-cell table:formula="of:=[.D1731]-[.D17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[.B1730]+8" office:value-type="float" office:value="13840" calcext:value-type="float">
            <text:p>13840</text:p>
          </table:table-cell>
          <table:table-cell office:value-type="float" office:value="8640000" calcext:value-type="float">
            <text:p>8640000</text:p>
          </table:table-cell>
          <table:table-cell table:formula="of:=[.B1731]/[.C1731]" office:value-type="float" office:value="0.00160185185185185" calcext:value-type="float">
            <text:p>0,00160185185185185000</text:p>
          </table:table-cell>
          <table:table-cell table:formula="of:=[.D1732]-[.D17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[.B1731]+8" office:value-type="float" office:value="13848" calcext:value-type="float">
            <text:p>13848</text:p>
          </table:table-cell>
          <table:table-cell office:value-type="float" office:value="8640000" calcext:value-type="float">
            <text:p>8640000</text:p>
          </table:table-cell>
          <table:table-cell table:formula="of:=[.B1732]/[.C1732]" office:value-type="float" office:value="0.00160277777777778" calcext:value-type="float">
            <text:p>0,00160277777777778000</text:p>
          </table:table-cell>
          <table:table-cell table:formula="of:=[.D1733]-[.D17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[.B1732]+8" office:value-type="float" office:value="13856" calcext:value-type="float">
            <text:p>13856</text:p>
          </table:table-cell>
          <table:table-cell office:value-type="float" office:value="8640000" calcext:value-type="float">
            <text:p>8640000</text:p>
          </table:table-cell>
          <table:table-cell table:formula="of:=[.B1733]/[.C1733]" office:value-type="float" office:value="0.0016037037037037" calcext:value-type="float">
            <text:p>0,00160370370370370000</text:p>
          </table:table-cell>
          <table:table-cell table:formula="of:=[.D1734]-[.D17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[.B1733]+8" office:value-type="float" office:value="13864" calcext:value-type="float">
            <text:p>13864</text:p>
          </table:table-cell>
          <table:table-cell office:value-type="float" office:value="8640000" calcext:value-type="float">
            <text:p>8640000</text:p>
          </table:table-cell>
          <table:table-cell table:formula="of:=[.B1734]/[.C1734]" office:value-type="float" office:value="0.00160462962962963" calcext:value-type="float">
            <text:p>0,00160462962962963000</text:p>
          </table:table-cell>
          <table:table-cell table:formula="of:=[.D1735]-[.D17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[.B1734]+8" office:value-type="float" office:value="13872" calcext:value-type="float">
            <text:p>13872</text:p>
          </table:table-cell>
          <table:table-cell office:value-type="float" office:value="8640000" calcext:value-type="float">
            <text:p>8640000</text:p>
          </table:table-cell>
          <table:table-cell table:formula="of:=[.B1735]/[.C1735]" office:value-type="float" office:value="0.00160555555555556" calcext:value-type="float">
            <text:p>0,00160555555555556000</text:p>
          </table:table-cell>
          <table:table-cell table:formula="of:=[.D1736]-[.D17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[.B1735]+8" office:value-type="float" office:value="13880" calcext:value-type="float">
            <text:p>13880</text:p>
          </table:table-cell>
          <table:table-cell office:value-type="float" office:value="8640000" calcext:value-type="float">
            <text:p>8640000</text:p>
          </table:table-cell>
          <table:table-cell table:formula="of:=[.B1736]/[.C1736]" office:value-type="float" office:value="0.00160648148148148" calcext:value-type="float">
            <text:p>0,00160648148148148000</text:p>
          </table:table-cell>
          <table:table-cell table:formula="of:=[.D1737]-[.D17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[.B1736]+8" office:value-type="float" office:value="13888" calcext:value-type="float">
            <text:p>13888</text:p>
          </table:table-cell>
          <table:table-cell office:value-type="float" office:value="8640000" calcext:value-type="float">
            <text:p>8640000</text:p>
          </table:table-cell>
          <table:table-cell table:formula="of:=[.B1737]/[.C1737]" office:value-type="float" office:value="0.00160740740740741" calcext:value-type="float">
            <text:p>0,00160740740740741000</text:p>
          </table:table-cell>
          <table:table-cell table:formula="of:=[.D1738]-[.D17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[.B1737]+8" office:value-type="float" office:value="13896" calcext:value-type="float">
            <text:p>13896</text:p>
          </table:table-cell>
          <table:table-cell office:value-type="float" office:value="8640000" calcext:value-type="float">
            <text:p>8640000</text:p>
          </table:table-cell>
          <table:table-cell table:formula="of:=[.B1738]/[.C1738]" office:value-type="float" office:value="0.00160833333333333" calcext:value-type="float">
            <text:p>0,00160833333333333000</text:p>
          </table:table-cell>
          <table:table-cell table:formula="of:=[.D1739]-[.D17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B1738]+8" office:value-type="float" office:value="13904" calcext:value-type="float">
            <text:p>13904</text:p>
          </table:table-cell>
          <table:table-cell office:value-type="float" office:value="8640000" calcext:value-type="float">
            <text:p>8640000</text:p>
          </table:table-cell>
          <table:table-cell table:formula="of:=[.B1739]/[.C1739]" office:value-type="float" office:value="0.00160925925925926" calcext:value-type="float">
            <text:p>0,00160925925925926000</text:p>
          </table:table-cell>
          <table:table-cell table:formula="of:=[.D1740]-[.D17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[.B1739]+8" office:value-type="float" office:value="13912" calcext:value-type="float">
            <text:p>13912</text:p>
          </table:table-cell>
          <table:table-cell office:value-type="float" office:value="8640000" calcext:value-type="float">
            <text:p>8640000</text:p>
          </table:table-cell>
          <table:table-cell table:formula="of:=[.B1740]/[.C1740]" office:value-type="float" office:value="0.00161018518518519" calcext:value-type="float">
            <text:p>0,00161018518518519000</text:p>
          </table:table-cell>
          <table:table-cell table:formula="of:=[.D1741]-[.D17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[.B1740]+8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1741]/[.C1741]" office:value-type="float" office:value="0.00161111111111111" calcext:value-type="float">
            <text:p>0,00161111111111111000</text:p>
          </table:table-cell>
          <table:table-cell table:formula="of:=[.D1742]-[.D17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[.B1741]+8" office:value-type="float" office:value="13928" calcext:value-type="float">
            <text:p>13928</text:p>
          </table:table-cell>
          <table:table-cell office:value-type="float" office:value="8640000" calcext:value-type="float">
            <text:p>8640000</text:p>
          </table:table-cell>
          <table:table-cell table:formula="of:=[.B1742]/[.C1742]" office:value-type="float" office:value="0.00161203703703704" calcext:value-type="float">
            <text:p>0,00161203703703704000</text:p>
          </table:table-cell>
          <table:table-cell table:formula="of:=[.D1743]-[.D17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[.B1742]+8" office:value-type="float" office:value="13936" calcext:value-type="float">
            <text:p>13936</text:p>
          </table:table-cell>
          <table:table-cell office:value-type="float" office:value="8640000" calcext:value-type="float">
            <text:p>8640000</text:p>
          </table:table-cell>
          <table:table-cell table:formula="of:=[.B1743]/[.C1743]" office:value-type="float" office:value="0.00161296296296296" calcext:value-type="float">
            <text:p>0,00161296296296296000</text:p>
          </table:table-cell>
          <table:table-cell table:formula="of:=[.D1744]-[.D17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[.B1743]+8" office:value-type="float" office:value="13944" calcext:value-type="float">
            <text:p>13944</text:p>
          </table:table-cell>
          <table:table-cell office:value-type="float" office:value="8640000" calcext:value-type="float">
            <text:p>8640000</text:p>
          </table:table-cell>
          <table:table-cell table:formula="of:=[.B1744]/[.C1744]" office:value-type="float" office:value="0.00161388888888889" calcext:value-type="float">
            <text:p>0,00161388888888889000</text:p>
          </table:table-cell>
          <table:table-cell table:formula="of:=[.D1745]-[.D17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[.B1744]+8" office:value-type="float" office:value="13952" calcext:value-type="float">
            <text:p>13952</text:p>
          </table:table-cell>
          <table:table-cell office:value-type="float" office:value="8640000" calcext:value-type="float">
            <text:p>8640000</text:p>
          </table:table-cell>
          <table:table-cell table:formula="of:=[.B1745]/[.C1745]" office:value-type="float" office:value="0.00161481481481481" calcext:value-type="float">
            <text:p>0,00161481481481481000</text:p>
          </table:table-cell>
          <table:table-cell table:formula="of:=[.D1746]-[.D17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[.B1745]+8" office:value-type="float" office:value="13960" calcext:value-type="float">
            <text:p>13960</text:p>
          </table:table-cell>
          <table:table-cell office:value-type="float" office:value="8640000" calcext:value-type="float">
            <text:p>8640000</text:p>
          </table:table-cell>
          <table:table-cell table:formula="of:=[.B1746]/[.C1746]" office:value-type="float" office:value="0.00161574074074074" calcext:value-type="float">
            <text:p>0,00161574074074074000</text:p>
          </table:table-cell>
          <table:table-cell table:formula="of:=[.D1747]-[.D17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[.B1746]+8" office:value-type="float" office:value="13968" calcext:value-type="float">
            <text:p>13968</text:p>
          </table:table-cell>
          <table:table-cell office:value-type="float" office:value="8640000" calcext:value-type="float">
            <text:p>8640000</text:p>
          </table:table-cell>
          <table:table-cell table:formula="of:=[.B1747]/[.C1747]" office:value-type="float" office:value="0.00161666666666667" calcext:value-type="float">
            <text:p>0,00161666666666667000</text:p>
          </table:table-cell>
          <table:table-cell table:formula="of:=[.D1748]-[.D17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[.B1747]+8" office:value-type="float" office:value="13976" calcext:value-type="float">
            <text:p>13976</text:p>
          </table:table-cell>
          <table:table-cell office:value-type="float" office:value="8640000" calcext:value-type="float">
            <text:p>8640000</text:p>
          </table:table-cell>
          <table:table-cell table:formula="of:=[.B1748]/[.C1748]" office:value-type="float" office:value="0.00161759259259259" calcext:value-type="float">
            <text:p>0,00161759259259259000</text:p>
          </table:table-cell>
          <table:table-cell table:formula="of:=[.D1749]-[.D17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[.B1748]+8" office:value-type="float" office:value="13984" calcext:value-type="float">
            <text:p>13984</text:p>
          </table:table-cell>
          <table:table-cell office:value-type="float" office:value="8640000" calcext:value-type="float">
            <text:p>8640000</text:p>
          </table:table-cell>
          <table:table-cell table:formula="of:=[.B1749]/[.C1749]" office:value-type="float" office:value="0.00161851851851852" calcext:value-type="float">
            <text:p>0,00161851851851852000</text:p>
          </table:table-cell>
          <table:table-cell table:formula="of:=[.D1750]-[.D17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[.B1749]+8" office:value-type="float" office:value="13992" calcext:value-type="float">
            <text:p>13992</text:p>
          </table:table-cell>
          <table:table-cell office:value-type="float" office:value="8640000" calcext:value-type="float">
            <text:p>8640000</text:p>
          </table:table-cell>
          <table:table-cell table:formula="of:=[.B1750]/[.C1750]" office:value-type="float" office:value="0.00161944444444444" calcext:value-type="float">
            <text:p>0,00161944444444444000</text:p>
          </table:table-cell>
          <table:table-cell table:formula="of:=[.D1751]-[.D17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B1750]+8" office:value-type="float" office:value="14000" calcext:value-type="float">
            <text:p>14000</text:p>
          </table:table-cell>
          <table:table-cell office:value-type="float" office:value="8640000" calcext:value-type="float">
            <text:p>8640000</text:p>
          </table:table-cell>
          <table:table-cell table:formula="of:=[.B1751]/[.C1751]" office:value-type="float" office:value="0.00162037037037037" calcext:value-type="float">
            <text:p>0,00162037037037037000</text:p>
          </table:table-cell>
          <table:table-cell table:formula="of:=[.D1752]-[.D17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[.B1751]+8" office:value-type="float" office:value="14008" calcext:value-type="float">
            <text:p>14008</text:p>
          </table:table-cell>
          <table:table-cell office:value-type="float" office:value="8640000" calcext:value-type="float">
            <text:p>8640000</text:p>
          </table:table-cell>
          <table:table-cell table:formula="of:=[.B1752]/[.C1752]" office:value-type="float" office:value="0.0016212962962963" calcext:value-type="float">
            <text:p>0,00162129629629630000</text:p>
          </table:table-cell>
          <table:table-cell table:formula="of:=[.D1753]-[.D17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[.B1752]+8" office:value-type="float" office:value="14016" calcext:value-type="float">
            <text:p>14016</text:p>
          </table:table-cell>
          <table:table-cell office:value-type="float" office:value="8640000" calcext:value-type="float">
            <text:p>8640000</text:p>
          </table:table-cell>
          <table:table-cell table:formula="of:=[.B1753]/[.C1753]" office:value-type="float" office:value="0.00162222222222222" calcext:value-type="float">
            <text:p>0,00162222222222222000</text:p>
          </table:table-cell>
          <table:table-cell table:formula="of:=[.D1754]-[.D17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[.B1753]+8" office:value-type="float" office:value="14024" calcext:value-type="float">
            <text:p>14024</text:p>
          </table:table-cell>
          <table:table-cell office:value-type="float" office:value="8640000" calcext:value-type="float">
            <text:p>8640000</text:p>
          </table:table-cell>
          <table:table-cell table:formula="of:=[.B1754]/[.C1754]" office:value-type="float" office:value="0.00162314814814815" calcext:value-type="float">
            <text:p>0,00162314814814815000</text:p>
          </table:table-cell>
          <table:table-cell table:formula="of:=[.D1755]-[.D17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[.B1754]+8" office:value-type="float" office:value="14032" calcext:value-type="float">
            <text:p>14032</text:p>
          </table:table-cell>
          <table:table-cell office:value-type="float" office:value="8640000" calcext:value-type="float">
            <text:p>8640000</text:p>
          </table:table-cell>
          <table:table-cell table:formula="of:=[.B1755]/[.C1755]" office:value-type="float" office:value="0.00162407407407407" calcext:value-type="float">
            <text:p>0,00162407407407407000</text:p>
          </table:table-cell>
          <table:table-cell table:formula="of:=[.D1756]-[.D17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[.B1755]+8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1756]/[.C1756]" office:value-type="float" office:value="0.001625" calcext:value-type="float">
            <text:p>0,00162500000000000000</text:p>
          </table:table-cell>
          <table:table-cell table:formula="of:=[.D1757]-[.D17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[.B1756]+8" office:value-type="float" office:value="14048" calcext:value-type="float">
            <text:p>14048</text:p>
          </table:table-cell>
          <table:table-cell office:value-type="float" office:value="8640000" calcext:value-type="float">
            <text:p>8640000</text:p>
          </table:table-cell>
          <table:table-cell table:formula="of:=[.B1757]/[.C1757]" office:value-type="float" office:value="0.00162592592592593" calcext:value-type="float">
            <text:p>0,00162592592592593000</text:p>
          </table:table-cell>
          <table:table-cell table:formula="of:=[.D1758]-[.D17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[.B1757]+8" office:value-type="float" office:value="14056" calcext:value-type="float">
            <text:p>14056</text:p>
          </table:table-cell>
          <table:table-cell office:value-type="float" office:value="8640000" calcext:value-type="float">
            <text:p>8640000</text:p>
          </table:table-cell>
          <table:table-cell table:formula="of:=[.B1758]/[.C1758]" office:value-type="float" office:value="0.00162685185185185" calcext:value-type="float">
            <text:p>0,00162685185185185000</text:p>
          </table:table-cell>
          <table:table-cell table:formula="of:=[.D1759]-[.D17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[.B1758]+8" office:value-type="float" office:value="14064" calcext:value-type="float">
            <text:p>14064</text:p>
          </table:table-cell>
          <table:table-cell office:value-type="float" office:value="8640000" calcext:value-type="float">
            <text:p>8640000</text:p>
          </table:table-cell>
          <table:table-cell table:formula="of:=[.B1759]/[.C1759]" office:value-type="float" office:value="0.00162777777777778" calcext:value-type="float">
            <text:p>0,00162777777777778000</text:p>
          </table:table-cell>
          <table:table-cell table:formula="of:=[.D1760]-[.D17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[.B1759]+8" office:value-type="float" office:value="14072" calcext:value-type="float">
            <text:p>14072</text:p>
          </table:table-cell>
          <table:table-cell office:value-type="float" office:value="8640000" calcext:value-type="float">
            <text:p>8640000</text:p>
          </table:table-cell>
          <table:table-cell table:formula="of:=[.B1760]/[.C1760]" office:value-type="float" office:value="0.0016287037037037" calcext:value-type="float">
            <text:p>0,00162870370370370000</text:p>
          </table:table-cell>
          <table:table-cell table:formula="of:=[.D1761]-[.D17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[.B1760]+8" office:value-type="float" office:value="14080" calcext:value-type="float">
            <text:p>14080</text:p>
          </table:table-cell>
          <table:table-cell office:value-type="float" office:value="8640000" calcext:value-type="float">
            <text:p>8640000</text:p>
          </table:table-cell>
          <table:table-cell table:formula="of:=[.B1761]/[.C1761]" office:value-type="float" office:value="0.00162962962962963" calcext:value-type="float">
            <text:p>0,00162962962962963000</text:p>
          </table:table-cell>
          <table:table-cell table:formula="of:=[.D1762]-[.D17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B1761]+8" office:value-type="float" office:value="14088" calcext:value-type="float">
            <text:p>14088</text:p>
          </table:table-cell>
          <table:table-cell office:value-type="float" office:value="8640000" calcext:value-type="float">
            <text:p>8640000</text:p>
          </table:table-cell>
          <table:table-cell table:formula="of:=[.B1762]/[.C1762]" office:value-type="float" office:value="0.00163055555555556" calcext:value-type="float">
            <text:p>0,00163055555555556000</text:p>
          </table:table-cell>
          <table:table-cell table:formula="of:=[.D1763]-[.D1762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[.B1762]+8" office:value-type="float" office:value="14096" calcext:value-type="float">
            <text:p>14096</text:p>
          </table:table-cell>
          <table:table-cell office:value-type="float" office:value="8640000" calcext:value-type="float">
            <text:p>8640000</text:p>
          </table:table-cell>
          <table:table-cell table:formula="of:=[.B1763]/[.C1763]" office:value-type="float" office:value="0.00163148148148148" calcext:value-type="float">
            <text:p>0,00163148148148148000</text:p>
          </table:table-cell>
          <table:table-cell table:formula="of:=[.D1764]-[.D17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B1763]+8" office:value-type="float" office:value="14104" calcext:value-type="float">
            <text:p>14104</text:p>
          </table:table-cell>
          <table:table-cell office:value-type="float" office:value="8640000" calcext:value-type="float">
            <text:p>8640000</text:p>
          </table:table-cell>
          <table:table-cell table:formula="of:=[.B1764]/[.C1764]" office:value-type="float" office:value="0.00163240740740741" calcext:value-type="float">
            <text:p>0,00163240740740741000</text:p>
          </table:table-cell>
          <table:table-cell table:formula="of:=[.D1765]-[.D17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[.B1764]+8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1765]/[.C1765]" office:value-type="float" office:value="0.00163333333333333" calcext:value-type="float">
            <text:p>0,00163333333333333000</text:p>
          </table:table-cell>
          <table:table-cell table:formula="of:=[.D1766]-[.D17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[.B1765]+8" office:value-type="float" office:value="14120" calcext:value-type="float">
            <text:p>14120</text:p>
          </table:table-cell>
          <table:table-cell office:value-type="float" office:value="8640000" calcext:value-type="float">
            <text:p>8640000</text:p>
          </table:table-cell>
          <table:table-cell table:formula="of:=[.B1766]/[.C1766]" office:value-type="float" office:value="0.00163425925925926" calcext:value-type="float">
            <text:p>0,00163425925925926000</text:p>
          </table:table-cell>
          <table:table-cell table:formula="of:=[.D1767]-[.D17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[.B1766]+8" office:value-type="float" office:value="14128" calcext:value-type="float">
            <text:p>14128</text:p>
          </table:table-cell>
          <table:table-cell office:value-type="float" office:value="8640000" calcext:value-type="float">
            <text:p>8640000</text:p>
          </table:table-cell>
          <table:table-cell table:formula="of:=[.B1767]/[.C1767]" office:value-type="float" office:value="0.00163518518518519" calcext:value-type="float">
            <text:p>0,00163518518518519000</text:p>
          </table:table-cell>
          <table:table-cell table:formula="of:=[.D1768]-[.D17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[.B1767]+8" office:value-type="float" office:value="14136" calcext:value-type="float">
            <text:p>14136</text:p>
          </table:table-cell>
          <table:table-cell office:value-type="float" office:value="8640000" calcext:value-type="float">
            <text:p>8640000</text:p>
          </table:table-cell>
          <table:table-cell table:formula="of:=[.B1768]/[.C1768]" office:value-type="float" office:value="0.00163611111111111" calcext:value-type="float">
            <text:p>0,00163611111111111000</text:p>
          </table:table-cell>
          <table:table-cell table:formula="of:=[.D1769]-[.D17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[.B1768]+8" office:value-type="float" office:value="14144" calcext:value-type="float">
            <text:p>14144</text:p>
          </table:table-cell>
          <table:table-cell office:value-type="float" office:value="8640000" calcext:value-type="float">
            <text:p>8640000</text:p>
          </table:table-cell>
          <table:table-cell table:formula="of:=[.B1769]/[.C1769]" office:value-type="float" office:value="0.00163703703703704" calcext:value-type="float">
            <text:p>0,00163703703703704000</text:p>
          </table:table-cell>
          <table:table-cell table:formula="of:=[.D1770]-[.D17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[.B1769]+8" office:value-type="float" office:value="14152" calcext:value-type="float">
            <text:p>14152</text:p>
          </table:table-cell>
          <table:table-cell office:value-type="float" office:value="8640000" calcext:value-type="float">
            <text:p>8640000</text:p>
          </table:table-cell>
          <table:table-cell table:formula="of:=[.B1770]/[.C1770]" office:value-type="float" office:value="0.00163796296296296" calcext:value-type="float">
            <text:p>0,00163796296296296000</text:p>
          </table:table-cell>
          <table:table-cell table:formula="of:=[.D1771]-[.D17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[.B1770]+8" office:value-type="float" office:value="14160" calcext:value-type="float">
            <text:p>14160</text:p>
          </table:table-cell>
          <table:table-cell office:value-type="float" office:value="8640000" calcext:value-type="float">
            <text:p>8640000</text:p>
          </table:table-cell>
          <table:table-cell table:formula="of:=[.B1771]/[.C1771]" office:value-type="float" office:value="0.00163888888888889" calcext:value-type="float">
            <text:p>0,00163888888888889000</text:p>
          </table:table-cell>
          <table:table-cell table:formula="of:=[.D1772]-[.D17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[.B1771]+8" office:value-type="float" office:value="14168" calcext:value-type="float">
            <text:p>14168</text:p>
          </table:table-cell>
          <table:table-cell office:value-type="float" office:value="8640000" calcext:value-type="float">
            <text:p>8640000</text:p>
          </table:table-cell>
          <table:table-cell table:formula="of:=[.B1772]/[.C1772]" office:value-type="float" office:value="0.00163981481481481" calcext:value-type="float">
            <text:p>0,00163981481481481000</text:p>
          </table:table-cell>
          <table:table-cell table:formula="of:=[.D1773]-[.D17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[.B1772]+8" office:value-type="float" office:value="14176" calcext:value-type="float">
            <text:p>14176</text:p>
          </table:table-cell>
          <table:table-cell office:value-type="float" office:value="8640000" calcext:value-type="float">
            <text:p>8640000</text:p>
          </table:table-cell>
          <table:table-cell table:formula="of:=[.B1773]/[.C1773]" office:value-type="float" office:value="0.00164074074074074" calcext:value-type="float">
            <text:p>0,00164074074074074000</text:p>
          </table:table-cell>
          <table:table-cell table:formula="of:=[.D1774]-[.D17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[.B1773]+8" office:value-type="float" office:value="14184" calcext:value-type="float">
            <text:p>14184</text:p>
          </table:table-cell>
          <table:table-cell office:value-type="float" office:value="8640000" calcext:value-type="float">
            <text:p>8640000</text:p>
          </table:table-cell>
          <table:table-cell table:formula="of:=[.B1774]/[.C1774]" office:value-type="float" office:value="0.00164166666666667" calcext:value-type="float">
            <text:p>0,00164166666666667000</text:p>
          </table:table-cell>
          <table:table-cell table:formula="of:=[.D1775]-[.D17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[.B1774]+8" office:value-type="float" office:value="14192" calcext:value-type="float">
            <text:p>14192</text:p>
          </table:table-cell>
          <table:table-cell office:value-type="float" office:value="8640000" calcext:value-type="float">
            <text:p>8640000</text:p>
          </table:table-cell>
          <table:table-cell table:formula="of:=[.B1775]/[.C1775]" office:value-type="float" office:value="0.00164259259259259" calcext:value-type="float">
            <text:p>0,00164259259259259000</text:p>
          </table:table-cell>
          <table:table-cell table:formula="of:=[.D1776]-[.D17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B1775]+8" office:value-type="float" office:value="14200" calcext:value-type="float">
            <text:p>14200</text:p>
          </table:table-cell>
          <table:table-cell office:value-type="float" office:value="8640000" calcext:value-type="float">
            <text:p>8640000</text:p>
          </table:table-cell>
          <table:table-cell table:formula="of:=[.B1776]/[.C1776]" office:value-type="float" office:value="0.00164351851851852" calcext:value-type="float">
            <text:p>0,00164351851851852000</text:p>
          </table:table-cell>
          <table:table-cell table:formula="of:=[.D1777]-[.D17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[.B1776]+8" office:value-type="float" office:value="14208" calcext:value-type="float">
            <text:p>14208</text:p>
          </table:table-cell>
          <table:table-cell office:value-type="float" office:value="8640000" calcext:value-type="float">
            <text:p>8640000</text:p>
          </table:table-cell>
          <table:table-cell table:formula="of:=[.B1777]/[.C1777]" office:value-type="float" office:value="0.00164444444444444" calcext:value-type="float">
            <text:p>0,00164444444444444000</text:p>
          </table:table-cell>
          <table:table-cell table:formula="of:=[.D1778]-[.D17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[.B1777]+8" office:value-type="float" office:value="14216" calcext:value-type="float">
            <text:p>14216</text:p>
          </table:table-cell>
          <table:table-cell office:value-type="float" office:value="8640000" calcext:value-type="float">
            <text:p>8640000</text:p>
          </table:table-cell>
          <table:table-cell table:formula="of:=[.B1778]/[.C1778]" office:value-type="float" office:value="0.00164537037037037" calcext:value-type="float">
            <text:p>0,00164537037037037000</text:p>
          </table:table-cell>
          <table:table-cell table:formula="of:=[.D1779]-[.D17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[.B1778]+8" office:value-type="float" office:value="14224" calcext:value-type="float">
            <text:p>14224</text:p>
          </table:table-cell>
          <table:table-cell office:value-type="float" office:value="8640000" calcext:value-type="float">
            <text:p>8640000</text:p>
          </table:table-cell>
          <table:table-cell table:formula="of:=[.B1779]/[.C1779]" office:value-type="float" office:value="0.0016462962962963" calcext:value-type="float">
            <text:p>0,00164629629629630000</text:p>
          </table:table-cell>
          <table:table-cell table:formula="of:=[.D1780]-[.D17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[.B1779]+8" office:value-type="float" office:value="14232" calcext:value-type="float">
            <text:p>14232</text:p>
          </table:table-cell>
          <table:table-cell office:value-type="float" office:value="8640000" calcext:value-type="float">
            <text:p>8640000</text:p>
          </table:table-cell>
          <table:table-cell table:formula="of:=[.B1780]/[.C1780]" office:value-type="float" office:value="0.00164722222222222" calcext:value-type="float">
            <text:p>0,00164722222222222000</text:p>
          </table:table-cell>
          <table:table-cell table:formula="of:=[.D1781]-[.D17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[.B1780]+8" office:value-type="float" office:value="14240" calcext:value-type="float">
            <text:p>14240</text:p>
          </table:table-cell>
          <table:table-cell office:value-type="float" office:value="8640000" calcext:value-type="float">
            <text:p>8640000</text:p>
          </table:table-cell>
          <table:table-cell table:formula="of:=[.B1781]/[.C1781]" office:value-type="float" office:value="0.00164814814814815" calcext:value-type="float">
            <text:p>0,00164814814814815000</text:p>
          </table:table-cell>
          <table:table-cell table:formula="of:=[.D1782]-[.D17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[.B1781]+8" office:value-type="float" office:value="14248" calcext:value-type="float">
            <text:p>14248</text:p>
          </table:table-cell>
          <table:table-cell office:value-type="float" office:value="8640000" calcext:value-type="float">
            <text:p>8640000</text:p>
          </table:table-cell>
          <table:table-cell table:formula="of:=[.B1782]/[.C1782]" office:value-type="float" office:value="0.00164907407407407" calcext:value-type="float">
            <text:p>0,00164907407407407000</text:p>
          </table:table-cell>
          <table:table-cell table:formula="of:=[.D1783]-[.D17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[.B1782]+8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1783]/[.C1783]" office:value-type="float" office:value="0.00165" calcext:value-type="float">
            <text:p>0,00165000000000000000</text:p>
          </table:table-cell>
          <table:table-cell table:formula="of:=[.D1784]-[.D17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[.B1783]+8" office:value-type="float" office:value="14264" calcext:value-type="float">
            <text:p>14264</text:p>
          </table:table-cell>
          <table:table-cell office:value-type="float" office:value="8640000" calcext:value-type="float">
            <text:p>8640000</text:p>
          </table:table-cell>
          <table:table-cell table:formula="of:=[.B1784]/[.C1784]" office:value-type="float" office:value="0.00165092592592593" calcext:value-type="float">
            <text:p>0,00165092592592593000</text:p>
          </table:table-cell>
          <table:table-cell table:formula="of:=[.D1785]-[.D17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[.B1784]+8" office:value-type="float" office:value="14272" calcext:value-type="float">
            <text:p>14272</text:p>
          </table:table-cell>
          <table:table-cell office:value-type="float" office:value="8640000" calcext:value-type="float">
            <text:p>8640000</text:p>
          </table:table-cell>
          <table:table-cell table:formula="of:=[.B1785]/[.C1785]" office:value-type="float" office:value="0.00165185185185185" calcext:value-type="float">
            <text:p>0,00165185185185185000</text:p>
          </table:table-cell>
          <table:table-cell table:formula="of:=[.D1786]-[.D17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[.B1785]+8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1786]/[.C1786]" office:value-type="float" office:value="0.00165277777777778" calcext:value-type="float">
            <text:p>0,00165277777777778000</text:p>
          </table:table-cell>
          <table:table-cell table:formula="of:=[.D1787]-[.D17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[.B1786]+8" office:value-type="float" office:value="14288" calcext:value-type="float">
            <text:p>14288</text:p>
          </table:table-cell>
          <table:table-cell office:value-type="float" office:value="8640000" calcext:value-type="float">
            <text:p>8640000</text:p>
          </table:table-cell>
          <table:table-cell table:formula="of:=[.B1787]/[.C1787]" office:value-type="float" office:value="0.0016537037037037" calcext:value-type="float">
            <text:p>0,00165370370370370000</text:p>
          </table:table-cell>
          <table:table-cell table:formula="of:=[.D1788]-[.D17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[.B1787]+8" office:value-type="float" office:value="14296" calcext:value-type="float">
            <text:p>14296</text:p>
          </table:table-cell>
          <table:table-cell office:value-type="float" office:value="8640000" calcext:value-type="float">
            <text:p>8640000</text:p>
          </table:table-cell>
          <table:table-cell table:formula="of:=[.B1788]/[.C1788]" office:value-type="float" office:value="0.00165462962962963" calcext:value-type="float">
            <text:p>0,00165462962962963000</text:p>
          </table:table-cell>
          <table:table-cell table:formula="of:=[.D1789]-[.D17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[.B1788]+8" office:value-type="float" office:value="14304" calcext:value-type="float">
            <text:p>14304</text:p>
          </table:table-cell>
          <table:table-cell office:value-type="float" office:value="8640000" calcext:value-type="float">
            <text:p>8640000</text:p>
          </table:table-cell>
          <table:table-cell table:formula="of:=[.B1789]/[.C1789]" office:value-type="float" office:value="0.00165555555555556" calcext:value-type="float">
            <text:p>0,00165555555555556000</text:p>
          </table:table-cell>
          <table:table-cell table:formula="of:=[.D1790]-[.D17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[.B1789]+8" office:value-type="float" office:value="14312" calcext:value-type="float">
            <text:p>14312</text:p>
          </table:table-cell>
          <table:table-cell office:value-type="float" office:value="8640000" calcext:value-type="float">
            <text:p>8640000</text:p>
          </table:table-cell>
          <table:table-cell table:formula="of:=[.B1790]/[.C1790]" office:value-type="float" office:value="0.00165648148148148" calcext:value-type="float">
            <text:p>0,00165648148148148000</text:p>
          </table:table-cell>
          <table:table-cell table:formula="of:=[.D1791]-[.D17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B1790]+8" office:value-type="float" office:value="14320" calcext:value-type="float">
            <text:p>14320</text:p>
          </table:table-cell>
          <table:table-cell office:value-type="float" office:value="8640000" calcext:value-type="float">
            <text:p>8640000</text:p>
          </table:table-cell>
          <table:table-cell table:formula="of:=[.B1791]/[.C1791]" office:value-type="float" office:value="0.00165740740740741" calcext:value-type="float">
            <text:p>0,00165740740740741000</text:p>
          </table:table-cell>
          <table:table-cell table:formula="of:=[.D1792]-[.D17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[.B1791]+8" office:value-type="float" office:value="14328" calcext:value-type="float">
            <text:p>14328</text:p>
          </table:table-cell>
          <table:table-cell office:value-type="float" office:value="8640000" calcext:value-type="float">
            <text:p>8640000</text:p>
          </table:table-cell>
          <table:table-cell table:formula="of:=[.B1792]/[.C1792]" office:value-type="float" office:value="0.00165833333333333" calcext:value-type="float">
            <text:p>0,00165833333333333000</text:p>
          </table:table-cell>
          <table:table-cell table:formula="of:=[.D1793]-[.D17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[.B1792]+8" office:value-type="float" office:value="14336" calcext:value-type="float">
            <text:p>14336</text:p>
          </table:table-cell>
          <table:table-cell office:value-type="float" office:value="8640000" calcext:value-type="float">
            <text:p>8640000</text:p>
          </table:table-cell>
          <table:table-cell table:formula="of:=[.B1793]/[.C1793]" office:value-type="float" office:value="0.00165925925925926" calcext:value-type="float">
            <text:p>0,00165925925925926000</text:p>
          </table:table-cell>
          <table:table-cell table:formula="of:=[.D1794]-[.D17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[.B1793]+8" office:value-type="float" office:value="14344" calcext:value-type="float">
            <text:p>14344</text:p>
          </table:table-cell>
          <table:table-cell office:value-type="float" office:value="8640000" calcext:value-type="float">
            <text:p>8640000</text:p>
          </table:table-cell>
          <table:table-cell table:formula="of:=[.B1794]/[.C1794]" office:value-type="float" office:value="0.00166018518518519" calcext:value-type="float">
            <text:p>0,00166018518518519000</text:p>
          </table:table-cell>
          <table:table-cell table:formula="of:=[.D1795]-[.D17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[.B1794]+8" office:value-type="float" office:value="14352" calcext:value-type="float">
            <text:p>14352</text:p>
          </table:table-cell>
          <table:table-cell office:value-type="float" office:value="8640000" calcext:value-type="float">
            <text:p>8640000</text:p>
          </table:table-cell>
          <table:table-cell table:formula="of:=[.B1795]/[.C1795]" office:value-type="float" office:value="0.00166111111111111" calcext:value-type="float">
            <text:p>0,00166111111111111000</text:p>
          </table:table-cell>
          <table:table-cell table:formula="of:=[.D1796]-[.D17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[.B1795]+8" office:value-type="float" office:value="14360" calcext:value-type="float">
            <text:p>14360</text:p>
          </table:table-cell>
          <table:table-cell office:value-type="float" office:value="8640000" calcext:value-type="float">
            <text:p>8640000</text:p>
          </table:table-cell>
          <table:table-cell table:formula="of:=[.B1796]/[.C1796]" office:value-type="float" office:value="0.00166203703703704" calcext:value-type="float">
            <text:p>0,00166203703703704000</text:p>
          </table:table-cell>
          <table:table-cell table:formula="of:=[.D1797]-[.D17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[.B1796]+8" office:value-type="float" office:value="14368" calcext:value-type="float">
            <text:p>14368</text:p>
          </table:table-cell>
          <table:table-cell office:value-type="float" office:value="8640000" calcext:value-type="float">
            <text:p>8640000</text:p>
          </table:table-cell>
          <table:table-cell table:formula="of:=[.B1797]/[.C1797]" office:value-type="float" office:value="0.00166296296296296" calcext:value-type="float">
            <text:p>0,00166296296296296000</text:p>
          </table:table-cell>
          <table:table-cell table:formula="of:=[.D1798]-[.D17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[.B1797]+8" office:value-type="float" office:value="14376" calcext:value-type="float">
            <text:p>14376</text:p>
          </table:table-cell>
          <table:table-cell office:value-type="float" office:value="8640000" calcext:value-type="float">
            <text:p>8640000</text:p>
          </table:table-cell>
          <table:table-cell table:formula="of:=[.B1798]/[.C1798]" office:value-type="float" office:value="0.00166388888888889" calcext:value-type="float">
            <text:p>0,00166388888888889000</text:p>
          </table:table-cell>
          <table:table-cell table:formula="of:=[.D1799]-[.D17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[.B1798]+8" office:value-type="float" office:value="14384" calcext:value-type="float">
            <text:p>14384</text:p>
          </table:table-cell>
          <table:table-cell office:value-type="float" office:value="8640000" calcext:value-type="float">
            <text:p>8640000</text:p>
          </table:table-cell>
          <table:table-cell table:formula="of:=[.B1799]/[.C1799]" office:value-type="float" office:value="0.00166481481481481" calcext:value-type="float">
            <text:p>0,00166481481481481000</text:p>
          </table:table-cell>
          <table:table-cell table:formula="of:=[.D1800]-[.D17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[.B1799]+8" office:value-type="float" office:value="14392" calcext:value-type="float">
            <text:p>14392</text:p>
          </table:table-cell>
          <table:table-cell office:value-type="float" office:value="8640000" calcext:value-type="float">
            <text:p>8640000</text:p>
          </table:table-cell>
          <table:table-cell table:formula="of:=[.B1800]/[.C1800]" office:value-type="float" office:value="0.00166574074074074" calcext:value-type="float">
            <text:p>0,00166574074074074000</text:p>
          </table:table-cell>
          <table:table-cell table:formula="of:=[.D1801]-[.D1800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B1800]+8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1801]/[.C1801]" office:value-type="float" office:value="0.00166666666666667" calcext:value-type="float">
            <text:p>0,00166666666666667000</text:p>
          </table:table-cell>
          <table:table-cell table:formula="of:=[.D1802]-[.D18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[.B1801]+8" office:value-type="float" office:value="14408" calcext:value-type="float">
            <text:p>14408</text:p>
          </table:table-cell>
          <table:table-cell office:value-type="float" office:value="8640000" calcext:value-type="float">
            <text:p>8640000</text:p>
          </table:table-cell>
          <table:table-cell table:formula="of:=[.B1802]/[.C1802]" office:value-type="float" office:value="0.00166759259259259" calcext:value-type="float">
            <text:p>0,00166759259259259000</text:p>
          </table:table-cell>
          <table:table-cell table:formula="of:=[.D1803]-[.D18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B1802]+8" office:value-type="float" office:value="14416" calcext:value-type="float">
            <text:p>14416</text:p>
          </table:table-cell>
          <table:table-cell office:value-type="float" office:value="8640000" calcext:value-type="float">
            <text:p>8640000</text:p>
          </table:table-cell>
          <table:table-cell table:formula="of:=[.B1803]/[.C1803]" office:value-type="float" office:value="0.00166851851851852" calcext:value-type="float">
            <text:p>0,00166851851851852000</text:p>
          </table:table-cell>
          <table:table-cell table:formula="of:=[.D1804]-[.D18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[.B1803]+8" office:value-type="float" office:value="14424" calcext:value-type="float">
            <text:p>14424</text:p>
          </table:table-cell>
          <table:table-cell office:value-type="float" office:value="8640000" calcext:value-type="float">
            <text:p>8640000</text:p>
          </table:table-cell>
          <table:table-cell table:formula="of:=[.B1804]/[.C1804]" office:value-type="float" office:value="0.00166944444444444" calcext:value-type="float">
            <text:p>0,00166944444444444000</text:p>
          </table:table-cell>
          <table:table-cell table:formula="of:=[.D1805]-[.D18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[.B1804]+8" office:value-type="float" office:value="14432" calcext:value-type="float">
            <text:p>14432</text:p>
          </table:table-cell>
          <table:table-cell office:value-type="float" office:value="8640000" calcext:value-type="float">
            <text:p>8640000</text:p>
          </table:table-cell>
          <table:table-cell table:formula="of:=[.B1805]/[.C1805]" office:value-type="float" office:value="0.00167037037037037" calcext:value-type="float">
            <text:p>0,00167037037037037000</text:p>
          </table:table-cell>
          <table:table-cell table:formula="of:=[.D1806]-[.D18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[.B1805]+8" office:value-type="float" office:value="14440" calcext:value-type="float">
            <text:p>14440</text:p>
          </table:table-cell>
          <table:table-cell office:value-type="float" office:value="8640000" calcext:value-type="float">
            <text:p>8640000</text:p>
          </table:table-cell>
          <table:table-cell table:formula="of:=[.B1806]/[.C1806]" office:value-type="float" office:value="0.0016712962962963" calcext:value-type="float">
            <text:p>0,00167129629629630000</text:p>
          </table:table-cell>
          <table:table-cell table:formula="of:=[.D1807]-[.D18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[.B1806]+8" office:value-type="float" office:value="14448" calcext:value-type="float">
            <text:p>14448</text:p>
          </table:table-cell>
          <table:table-cell office:value-type="float" office:value="8640000" calcext:value-type="float">
            <text:p>8640000</text:p>
          </table:table-cell>
          <table:table-cell table:formula="of:=[.B1807]/[.C1807]" office:value-type="float" office:value="0.00167222222222222" calcext:value-type="float">
            <text:p>0,00167222222222222000</text:p>
          </table:table-cell>
          <table:table-cell table:formula="of:=[.D1808]-[.D18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[.B1807]+8" office:value-type="float" office:value="14456" calcext:value-type="float">
            <text:p>14456</text:p>
          </table:table-cell>
          <table:table-cell office:value-type="float" office:value="8640000" calcext:value-type="float">
            <text:p>8640000</text:p>
          </table:table-cell>
          <table:table-cell table:formula="of:=[.B1808]/[.C1808]" office:value-type="float" office:value="0.00167314814814815" calcext:value-type="float">
            <text:p>0,00167314814814815000</text:p>
          </table:table-cell>
          <table:table-cell table:formula="of:=[.D1809]-[.D18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[.B1808]+8" office:value-type="float" office:value="14464" calcext:value-type="float">
            <text:p>14464</text:p>
          </table:table-cell>
          <table:table-cell office:value-type="float" office:value="8640000" calcext:value-type="float">
            <text:p>8640000</text:p>
          </table:table-cell>
          <table:table-cell table:formula="of:=[.B1809]/[.C1809]" office:value-type="float" office:value="0.00167407407407407" calcext:value-type="float">
            <text:p>0,00167407407407407000</text:p>
          </table:table-cell>
          <table:table-cell table:formula="of:=[.D1810]-[.D18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[.B1809]+8" office:value-type="float" office:value="14472" calcext:value-type="float">
            <text:p>14472</text:p>
          </table:table-cell>
          <table:table-cell office:value-type="float" office:value="8640000" calcext:value-type="float">
            <text:p>8640000</text:p>
          </table:table-cell>
          <table:table-cell table:formula="of:=[.B1810]/[.C1810]" office:value-type="float" office:value="0.001675" calcext:value-type="float">
            <text:p>0,00167500000000000000</text:p>
          </table:table-cell>
          <table:table-cell table:formula="of:=[.D1811]-[.D18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[.B1810]+8" office:value-type="float" office:value="14480" calcext:value-type="float">
            <text:p>14480</text:p>
          </table:table-cell>
          <table:table-cell office:value-type="float" office:value="8640000" calcext:value-type="float">
            <text:p>8640000</text:p>
          </table:table-cell>
          <table:table-cell table:formula="of:=[.B1811]/[.C1811]" office:value-type="float" office:value="0.00167592592592593" calcext:value-type="float">
            <text:p>0,00167592592592593000</text:p>
          </table:table-cell>
          <table:table-cell table:formula="of:=[.D1812]-[.D18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.B1811]+8" office:value-type="float" office:value="14488" calcext:value-type="float">
            <text:p>14488</text:p>
          </table:table-cell>
          <table:table-cell office:value-type="float" office:value="8640000" calcext:value-type="float">
            <text:p>8640000</text:p>
          </table:table-cell>
          <table:table-cell table:formula="of:=[.B1812]/[.C1812]" office:value-type="float" office:value="0.00167685185185185" calcext:value-type="float">
            <text:p>0,00167685185185185000</text:p>
          </table:table-cell>
          <table:table-cell table:formula="of:=[.D1813]-[.D18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[.B1812]+8" office:value-type="float" office:value="14496" calcext:value-type="float">
            <text:p>14496</text:p>
          </table:table-cell>
          <table:table-cell office:value-type="float" office:value="8640000" calcext:value-type="float">
            <text:p>8640000</text:p>
          </table:table-cell>
          <table:table-cell table:formula="of:=[.B1813]/[.C1813]" office:value-type="float" office:value="0.00167777777777778" calcext:value-type="float">
            <text:p>0,00167777777777778000</text:p>
          </table:table-cell>
          <table:table-cell table:formula="of:=[.D1814]-[.D18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[.B1813]+8" office:value-type="float" office:value="14504" calcext:value-type="float">
            <text:p>14504</text:p>
          </table:table-cell>
          <table:table-cell office:value-type="float" office:value="8640000" calcext:value-type="float">
            <text:p>8640000</text:p>
          </table:table-cell>
          <table:table-cell table:formula="of:=[.B1814]/[.C1814]" office:value-type="float" office:value="0.0016787037037037" calcext:value-type="float">
            <text:p>0,00167870370370370000</text:p>
          </table:table-cell>
          <table:table-cell table:formula="of:=[.D1815]-[.D18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[.B1814]+8" office:value-type="float" office:value="14512" calcext:value-type="float">
            <text:p>14512</text:p>
          </table:table-cell>
          <table:table-cell office:value-type="float" office:value="8640000" calcext:value-type="float">
            <text:p>8640000</text:p>
          </table:table-cell>
          <table:table-cell table:formula="of:=[.B1815]/[.C1815]" office:value-type="float" office:value="0.00167962962962963" calcext:value-type="float">
            <text:p>0,00167962962962963000</text:p>
          </table:table-cell>
          <table:table-cell table:formula="of:=[.D1816]-[.D18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[.B1815]+8" office:value-type="float" office:value="14520" calcext:value-type="float">
            <text:p>14520</text:p>
          </table:table-cell>
          <table:table-cell office:value-type="float" office:value="8640000" calcext:value-type="float">
            <text:p>8640000</text:p>
          </table:table-cell>
          <table:table-cell table:formula="of:=[.B1816]/[.C1816]" office:value-type="float" office:value="0.00168055555555556" calcext:value-type="float">
            <text:p>0,00168055555555556000</text:p>
          </table:table-cell>
          <table:table-cell table:formula="of:=[.D1817]-[.D18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[.B1816]+8" office:value-type="float" office:value="14528" calcext:value-type="float">
            <text:p>14528</text:p>
          </table:table-cell>
          <table:table-cell office:value-type="float" office:value="8640000" calcext:value-type="float">
            <text:p>8640000</text:p>
          </table:table-cell>
          <table:table-cell table:formula="of:=[.B1817]/[.C1817]" office:value-type="float" office:value="0.00168148148148148" calcext:value-type="float">
            <text:p>0,00168148148148148000</text:p>
          </table:table-cell>
          <table:table-cell table:formula="of:=[.D1818]-[.D18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.B1817]+8" office:value-type="float" office:value="14536" calcext:value-type="float">
            <text:p>14536</text:p>
          </table:table-cell>
          <table:table-cell office:value-type="float" office:value="8640000" calcext:value-type="float">
            <text:p>8640000</text:p>
          </table:table-cell>
          <table:table-cell table:formula="of:=[.B1818]/[.C1818]" office:value-type="float" office:value="0.00168240740740741" calcext:value-type="float">
            <text:p>0,00168240740740741000</text:p>
          </table:table-cell>
          <table:table-cell table:formula="of:=[.D1819]-[.D18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B1818]+8" office:value-type="float" office:value="14544" calcext:value-type="float">
            <text:p>14544</text:p>
          </table:table-cell>
          <table:table-cell office:value-type="float" office:value="8640000" calcext:value-type="float">
            <text:p>8640000</text:p>
          </table:table-cell>
          <table:table-cell table:formula="of:=[.B1819]/[.C1819]" office:value-type="float" office:value="0.00168333333333333" calcext:value-type="float">
            <text:p>0,00168333333333333000</text:p>
          </table:table-cell>
          <table:table-cell table:formula="of:=[.D1820]-[.D18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B1819]+8" office:value-type="float" office:value="14552" calcext:value-type="float">
            <text:p>14552</text:p>
          </table:table-cell>
          <table:table-cell office:value-type="float" office:value="8640000" calcext:value-type="float">
            <text:p>8640000</text:p>
          </table:table-cell>
          <table:table-cell table:formula="of:=[.B1820]/[.C1820]" office:value-type="float" office:value="0.00168425925925926" calcext:value-type="float">
            <text:p>0,00168425925925926000</text:p>
          </table:table-cell>
          <table:table-cell table:formula="of:=[.D1821]-[.D18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[.B1820]+8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1821]/[.C1821]" office:value-type="float" office:value="0.00168518518518519" calcext:value-type="float">
            <text:p>0,00168518518518519000</text:p>
          </table:table-cell>
          <table:table-cell table:formula="of:=[.D1822]-[.D18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[.B1821]+8" office:value-type="float" office:value="14568" calcext:value-type="float">
            <text:p>14568</text:p>
          </table:table-cell>
          <table:table-cell office:value-type="float" office:value="8640000" calcext:value-type="float">
            <text:p>8640000</text:p>
          </table:table-cell>
          <table:table-cell table:formula="of:=[.B1822]/[.C1822]" office:value-type="float" office:value="0.00168611111111111" calcext:value-type="float">
            <text:p>0,00168611111111111000</text:p>
          </table:table-cell>
          <table:table-cell table:formula="of:=[.D1823]-[.D18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[.B1822]+8" office:value-type="float" office:value="14576" calcext:value-type="float">
            <text:p>14576</text:p>
          </table:table-cell>
          <table:table-cell office:value-type="float" office:value="8640000" calcext:value-type="float">
            <text:p>8640000</text:p>
          </table:table-cell>
          <table:table-cell table:formula="of:=[.B1823]/[.C1823]" office:value-type="float" office:value="0.00168703703703704" calcext:value-type="float">
            <text:p>0,00168703703703704000</text:p>
          </table:table-cell>
          <table:table-cell table:formula="of:=[.D1824]-[.D18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[.B1823]+8" office:value-type="float" office:value="14584" calcext:value-type="float">
            <text:p>14584</text:p>
          </table:table-cell>
          <table:table-cell office:value-type="float" office:value="8640000" calcext:value-type="float">
            <text:p>8640000</text:p>
          </table:table-cell>
          <table:table-cell table:formula="of:=[.B1824]/[.C1824]" office:value-type="float" office:value="0.00168796296296296" calcext:value-type="float">
            <text:p>0,00168796296296296000</text:p>
          </table:table-cell>
          <table:table-cell table:formula="of:=[.D1825]-[.D18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[.B1824]+8" office:value-type="float" office:value="14592" calcext:value-type="float">
            <text:p>14592</text:p>
          </table:table-cell>
          <table:table-cell office:value-type="float" office:value="8640000" calcext:value-type="float">
            <text:p>8640000</text:p>
          </table:table-cell>
          <table:table-cell table:formula="of:=[.B1825]/[.C1825]" office:value-type="float" office:value="0.00168888888888889" calcext:value-type="float">
            <text:p>0,00168888888888889000</text:p>
          </table:table-cell>
          <table:table-cell table:formula="of:=[.D1826]-[.D18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.B1825]+8" office:value-type="float" office:value="14600" calcext:value-type="float">
            <text:p>14600</text:p>
          </table:table-cell>
          <table:table-cell office:value-type="float" office:value="8640000" calcext:value-type="float">
            <text:p>8640000</text:p>
          </table:table-cell>
          <table:table-cell table:formula="of:=[.B1826]/[.C1826]" office:value-type="float" office:value="0.00168981481481481" calcext:value-type="float">
            <text:p>0,00168981481481481000</text:p>
          </table:table-cell>
          <table:table-cell table:formula="of:=[.D1827]-[.D18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[.B1826]+8" office:value-type="float" office:value="14608" calcext:value-type="float">
            <text:p>14608</text:p>
          </table:table-cell>
          <table:table-cell office:value-type="float" office:value="8640000" calcext:value-type="float">
            <text:p>8640000</text:p>
          </table:table-cell>
          <table:table-cell table:formula="of:=[.B1827]/[.C1827]" office:value-type="float" office:value="0.00169074074074074" calcext:value-type="float">
            <text:p>0,00169074074074074000</text:p>
          </table:table-cell>
          <table:table-cell table:formula="of:=[.D1828]-[.D18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[.B1827]+8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1828]/[.C1828]" office:value-type="float" office:value="0.00169166666666667" calcext:value-type="float">
            <text:p>0,00169166666666667000</text:p>
          </table:table-cell>
          <table:table-cell table:formula="of:=[.D1829]-[.D18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[.B1828]+8" office:value-type="float" office:value="14624" calcext:value-type="float">
            <text:p>14624</text:p>
          </table:table-cell>
          <table:table-cell office:value-type="float" office:value="8640000" calcext:value-type="float">
            <text:p>8640000</text:p>
          </table:table-cell>
          <table:table-cell table:formula="of:=[.B1829]/[.C1829]" office:value-type="float" office:value="0.00169259259259259" calcext:value-type="float">
            <text:p>0,00169259259259259000</text:p>
          </table:table-cell>
          <table:table-cell table:formula="of:=[.D1830]-[.D18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[.B1829]+8" office:value-type="float" office:value="14632" calcext:value-type="float">
            <text:p>14632</text:p>
          </table:table-cell>
          <table:table-cell office:value-type="float" office:value="8640000" calcext:value-type="float">
            <text:p>8640000</text:p>
          </table:table-cell>
          <table:table-cell table:formula="of:=[.B1830]/[.C1830]" office:value-type="float" office:value="0.00169351851851852" calcext:value-type="float">
            <text:p>0,00169351851851852000</text:p>
          </table:table-cell>
          <table:table-cell table:formula="of:=[.D1831]-[.D18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[.B1830]+8" office:value-type="float" office:value="14640" calcext:value-type="float">
            <text:p>14640</text:p>
          </table:table-cell>
          <table:table-cell office:value-type="float" office:value="8640000" calcext:value-type="float">
            <text:p>8640000</text:p>
          </table:table-cell>
          <table:table-cell table:formula="of:=[.B1831]/[.C1831]" office:value-type="float" office:value="0.00169444444444444" calcext:value-type="float">
            <text:p>0,00169444444444444000</text:p>
          </table:table-cell>
          <table:table-cell table:formula="of:=[.D1832]-[.D18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.B1831]+8" office:value-type="float" office:value="14648" calcext:value-type="float">
            <text:p>14648</text:p>
          </table:table-cell>
          <table:table-cell office:value-type="float" office:value="8640000" calcext:value-type="float">
            <text:p>8640000</text:p>
          </table:table-cell>
          <table:table-cell table:formula="of:=[.B1832]/[.C1832]" office:value-type="float" office:value="0.00169537037037037" calcext:value-type="float">
            <text:p>0,00169537037037037000</text:p>
          </table:table-cell>
          <table:table-cell table:formula="of:=[.D1833]-[.D18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[.B1832]+8" office:value-type="float" office:value="14656" calcext:value-type="float">
            <text:p>14656</text:p>
          </table:table-cell>
          <table:table-cell office:value-type="float" office:value="8640000" calcext:value-type="float">
            <text:p>8640000</text:p>
          </table:table-cell>
          <table:table-cell table:formula="of:=[.B1833]/[.C1833]" office:value-type="float" office:value="0.0016962962962963" calcext:value-type="float">
            <text:p>0,00169629629629630000</text:p>
          </table:table-cell>
          <table:table-cell table:formula="of:=[.D1834]-[.D18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[.B1833]+8" office:value-type="float" office:value="14664" calcext:value-type="float">
            <text:p>14664</text:p>
          </table:table-cell>
          <table:table-cell office:value-type="float" office:value="8640000" calcext:value-type="float">
            <text:p>8640000</text:p>
          </table:table-cell>
          <table:table-cell table:formula="of:=[.B1834]/[.C1834]" office:value-type="float" office:value="0.00169722222222222" calcext:value-type="float">
            <text:p>0,00169722222222222000</text:p>
          </table:table-cell>
          <table:table-cell table:formula="of:=[.D1835]-[.D18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[.B1834]+8" office:value-type="float" office:value="14672" calcext:value-type="float">
            <text:p>14672</text:p>
          </table:table-cell>
          <table:table-cell office:value-type="float" office:value="8640000" calcext:value-type="float">
            <text:p>8640000</text:p>
          </table:table-cell>
          <table:table-cell table:formula="of:=[.B1835]/[.C1835]" office:value-type="float" office:value="0.00169814814814815" calcext:value-type="float">
            <text:p>0,00169814814814815000</text:p>
          </table:table-cell>
          <table:table-cell table:formula="of:=[.D1836]-[.D18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[.B1835]+8" office:value-type="float" office:value="14680" calcext:value-type="float">
            <text:p>14680</text:p>
          </table:table-cell>
          <table:table-cell office:value-type="float" office:value="8640000" calcext:value-type="float">
            <text:p>8640000</text:p>
          </table:table-cell>
          <table:table-cell table:formula="of:=[.B1836]/[.C1836]" office:value-type="float" office:value="0.00169907407407407" calcext:value-type="float">
            <text:p>0,00169907407407407000</text:p>
          </table:table-cell>
          <table:table-cell table:formula="of:=[.D1837]-[.D18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[.B1836]+8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1837]/[.C1837]" office:value-type="float" office:value="0.0017" calcext:value-type="float">
            <text:p>0,00170000000000000000</text:p>
          </table:table-cell>
          <table:table-cell table:formula="of:=[.D1838]-[.D18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[.B1837]+8" office:value-type="float" office:value="14696" calcext:value-type="float">
            <text:p>14696</text:p>
          </table:table-cell>
          <table:table-cell office:value-type="float" office:value="8640000" calcext:value-type="float">
            <text:p>8640000</text:p>
          </table:table-cell>
          <table:table-cell table:formula="of:=[.B1838]/[.C1838]" office:value-type="float" office:value="0.00170092592592593" calcext:value-type="float">
            <text:p>0,00170092592592593000</text:p>
          </table:table-cell>
          <table:table-cell table:formula="of:=[.D1839]-[.D18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[.B1838]+8" office:value-type="float" office:value="14704" calcext:value-type="float">
            <text:p>14704</text:p>
          </table:table-cell>
          <table:table-cell office:value-type="float" office:value="8640000" calcext:value-type="float">
            <text:p>8640000</text:p>
          </table:table-cell>
          <table:table-cell table:formula="of:=[.B1839]/[.C1839]" office:value-type="float" office:value="0.00170185185185185" calcext:value-type="float">
            <text:p>0,00170185185185185000</text:p>
          </table:table-cell>
          <table:table-cell table:formula="of:=[.D1840]-[.D1839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[.B1839]+8" office:value-type="float" office:value="14712" calcext:value-type="float">
            <text:p>14712</text:p>
          </table:table-cell>
          <table:table-cell office:value-type="float" office:value="8640000" calcext:value-type="float">
            <text:p>8640000</text:p>
          </table:table-cell>
          <table:table-cell table:formula="of:=[.B1840]/[.C1840]" office:value-type="float" office:value="0.00170277777777778" calcext:value-type="float">
            <text:p>0,00170277777777778000</text:p>
          </table:table-cell>
          <table:table-cell table:formula="of:=[.D1841]-[.D18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[.B1840]+8" office:value-type="float" office:value="14720" calcext:value-type="float">
            <text:p>14720</text:p>
          </table:table-cell>
          <table:table-cell office:value-type="float" office:value="8640000" calcext:value-type="float">
            <text:p>8640000</text:p>
          </table:table-cell>
          <table:table-cell table:formula="of:=[.B1841]/[.C1841]" office:value-type="float" office:value="0.0017037037037037" calcext:value-type="float">
            <text:p>0,00170370370370370000</text:p>
          </table:table-cell>
          <table:table-cell table:formula="of:=[.D1842]-[.D18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[.B1841]+8" office:value-type="float" office:value="14728" calcext:value-type="float">
            <text:p>14728</text:p>
          </table:table-cell>
          <table:table-cell office:value-type="float" office:value="8640000" calcext:value-type="float">
            <text:p>8640000</text:p>
          </table:table-cell>
          <table:table-cell table:formula="of:=[.B1842]/[.C1842]" office:value-type="float" office:value="0.00170462962962963" calcext:value-type="float">
            <text:p>0,00170462962962963000</text:p>
          </table:table-cell>
          <table:table-cell table:formula="of:=[.D1843]-[.D18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[.B1842]+8" office:value-type="float" office:value="14736" calcext:value-type="float">
            <text:p>14736</text:p>
          </table:table-cell>
          <table:table-cell office:value-type="float" office:value="8640000" calcext:value-type="float">
            <text:p>8640000</text:p>
          </table:table-cell>
          <table:table-cell table:formula="of:=[.B1843]/[.C1843]" office:value-type="float" office:value="0.00170555555555556" calcext:value-type="float">
            <text:p>0,00170555555555556000</text:p>
          </table:table-cell>
          <table:table-cell table:formula="of:=[.D1844]-[.D18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[.B1843]+8" office:value-type="float" office:value="14744" calcext:value-type="float">
            <text:p>14744</text:p>
          </table:table-cell>
          <table:table-cell office:value-type="float" office:value="8640000" calcext:value-type="float">
            <text:p>8640000</text:p>
          </table:table-cell>
          <table:table-cell table:formula="of:=[.B1844]/[.C1844]" office:value-type="float" office:value="0.00170648148148148" calcext:value-type="float">
            <text:p>0,00170648148148148000</text:p>
          </table:table-cell>
          <table:table-cell table:formula="of:=[.D1845]-[.D18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[.B1844]+8" office:value-type="float" office:value="14752" calcext:value-type="float">
            <text:p>14752</text:p>
          </table:table-cell>
          <table:table-cell office:value-type="float" office:value="8640000" calcext:value-type="float">
            <text:p>8640000</text:p>
          </table:table-cell>
          <table:table-cell table:formula="of:=[.B1845]/[.C1845]" office:value-type="float" office:value="0.00170740740740741" calcext:value-type="float">
            <text:p>0,00170740740740741000</text:p>
          </table:table-cell>
          <table:table-cell table:formula="of:=[.D1846]-[.D18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[.B1845]+8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1846]/[.C1846]" office:value-type="float" office:value="0.00170833333333333" calcext:value-type="float">
            <text:p>0,00170833333333333000</text:p>
          </table:table-cell>
          <table:table-cell table:formula="of:=[.D1847]-[.D18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[.B1846]+8" office:value-type="float" office:value="14768" calcext:value-type="float">
            <text:p>14768</text:p>
          </table:table-cell>
          <table:table-cell office:value-type="float" office:value="8640000" calcext:value-type="float">
            <text:p>8640000</text:p>
          </table:table-cell>
          <table:table-cell table:formula="of:=[.B1847]/[.C1847]" office:value-type="float" office:value="0.00170925925925926" calcext:value-type="float">
            <text:p>0,00170925925925926000</text:p>
          </table:table-cell>
          <table:table-cell table:formula="of:=[.D1848]-[.D18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[.B1847]+8" office:value-type="float" office:value="14776" calcext:value-type="float">
            <text:p>14776</text:p>
          </table:table-cell>
          <table:table-cell office:value-type="float" office:value="8640000" calcext:value-type="float">
            <text:p>8640000</text:p>
          </table:table-cell>
          <table:table-cell table:formula="of:=[.B1848]/[.C1848]" office:value-type="float" office:value="0.00171018518518519" calcext:value-type="float">
            <text:p>0,00171018518518519000</text:p>
          </table:table-cell>
          <table:table-cell table:formula="of:=[.D1849]-[.D18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[.B1848]+8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1849]/[.C1849]" office:value-type="float" office:value="0.00171111111111111" calcext:value-type="float">
            <text:p>0,00171111111111111000</text:p>
          </table:table-cell>
          <table:table-cell table:formula="of:=[.D1850]-[.D18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[.B1849]+8" office:value-type="float" office:value="14792" calcext:value-type="float">
            <text:p>14792</text:p>
          </table:table-cell>
          <table:table-cell office:value-type="float" office:value="8640000" calcext:value-type="float">
            <text:p>8640000</text:p>
          </table:table-cell>
          <table:table-cell table:formula="of:=[.B1850]/[.C1850]" office:value-type="float" office:value="0.00171203703703704" calcext:value-type="float">
            <text:p>0,00171203703703704000</text:p>
          </table:table-cell>
          <table:table-cell table:formula="of:=[.D1851]-[.D18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.B1850]+8" office:value-type="float" office:value="14800" calcext:value-type="float">
            <text:p>14800</text:p>
          </table:table-cell>
          <table:table-cell office:value-type="float" office:value="8640000" calcext:value-type="float">
            <text:p>8640000</text:p>
          </table:table-cell>
          <table:table-cell table:formula="of:=[.B1851]/[.C1851]" office:value-type="float" office:value="0.00171296296296296" calcext:value-type="float">
            <text:p>0,00171296296296296000</text:p>
          </table:table-cell>
          <table:table-cell table:formula="of:=[.D1852]-[.D18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[.B1851]+8" office:value-type="float" office:value="14808" calcext:value-type="float">
            <text:p>14808</text:p>
          </table:table-cell>
          <table:table-cell office:value-type="float" office:value="8640000" calcext:value-type="float">
            <text:p>8640000</text:p>
          </table:table-cell>
          <table:table-cell table:formula="of:=[.B1852]/[.C1852]" office:value-type="float" office:value="0.00171388888888889" calcext:value-type="float">
            <text:p>0,00171388888888889000</text:p>
          </table:table-cell>
          <table:table-cell table:formula="of:=[.D1853]-[.D18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.B1852]+8" office:value-type="float" office:value="14816" calcext:value-type="float">
            <text:p>14816</text:p>
          </table:table-cell>
          <table:table-cell office:value-type="float" office:value="8640000" calcext:value-type="float">
            <text:p>8640000</text:p>
          </table:table-cell>
          <table:table-cell table:formula="of:=[.B1853]/[.C1853]" office:value-type="float" office:value="0.00171481481481481" calcext:value-type="float">
            <text:p>0,00171481481481481000</text:p>
          </table:table-cell>
          <table:table-cell table:formula="of:=[.D1854]-[.D18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[.B1853]+8" office:value-type="float" office:value="14824" calcext:value-type="float">
            <text:p>14824</text:p>
          </table:table-cell>
          <table:table-cell office:value-type="float" office:value="8640000" calcext:value-type="float">
            <text:p>8640000</text:p>
          </table:table-cell>
          <table:table-cell table:formula="of:=[.B1854]/[.C1854]" office:value-type="float" office:value="0.00171574074074074" calcext:value-type="float">
            <text:p>0,00171574074074074000</text:p>
          </table:table-cell>
          <table:table-cell table:formula="of:=[.D1855]-[.D18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[.B1854]+8" office:value-type="float" office:value="14832" calcext:value-type="float">
            <text:p>14832</text:p>
          </table:table-cell>
          <table:table-cell office:value-type="float" office:value="8640000" calcext:value-type="float">
            <text:p>8640000</text:p>
          </table:table-cell>
          <table:table-cell table:formula="of:=[.B1855]/[.C1855]" office:value-type="float" office:value="0.00171666666666667" calcext:value-type="float">
            <text:p>0,00171666666666667000</text:p>
          </table:table-cell>
          <table:table-cell table:formula="of:=[.D1856]-[.D18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[.B1855]+8" office:value-type="float" office:value="14840" calcext:value-type="float">
            <text:p>14840</text:p>
          </table:table-cell>
          <table:table-cell office:value-type="float" office:value="8640000" calcext:value-type="float">
            <text:p>8640000</text:p>
          </table:table-cell>
          <table:table-cell table:formula="of:=[.B1856]/[.C1856]" office:value-type="float" office:value="0.00171759259259259" calcext:value-type="float">
            <text:p>0,00171759259259259000</text:p>
          </table:table-cell>
          <table:table-cell table:formula="of:=[.D1857]-[.D18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[.B1856]+8" office:value-type="float" office:value="14848" calcext:value-type="float">
            <text:p>14848</text:p>
          </table:table-cell>
          <table:table-cell office:value-type="float" office:value="8640000" calcext:value-type="float">
            <text:p>8640000</text:p>
          </table:table-cell>
          <table:table-cell table:formula="of:=[.B1857]/[.C1857]" office:value-type="float" office:value="0.00171851851851852" calcext:value-type="float">
            <text:p>0,00171851851851852000</text:p>
          </table:table-cell>
          <table:table-cell table:formula="of:=[.D1858]-[.D18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[.B1857]+8" office:value-type="float" office:value="14856" calcext:value-type="float">
            <text:p>14856</text:p>
          </table:table-cell>
          <table:table-cell office:value-type="float" office:value="8640000" calcext:value-type="float">
            <text:p>8640000</text:p>
          </table:table-cell>
          <table:table-cell table:formula="of:=[.B1858]/[.C1858]" office:value-type="float" office:value="0.00171944444444444" calcext:value-type="float">
            <text:p>0,00171944444444444000</text:p>
          </table:table-cell>
          <table:table-cell table:formula="of:=[.D1859]-[.D18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[.B1858]+8" office:value-type="float" office:value="14864" calcext:value-type="float">
            <text:p>14864</text:p>
          </table:table-cell>
          <table:table-cell office:value-type="float" office:value="8640000" calcext:value-type="float">
            <text:p>8640000</text:p>
          </table:table-cell>
          <table:table-cell table:formula="of:=[.B1859]/[.C1859]" office:value-type="float" office:value="0.00172037037037037" calcext:value-type="float">
            <text:p>0,00172037037037037000</text:p>
          </table:table-cell>
          <table:table-cell table:formula="of:=[.D1860]-[.D18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[.B1859]+8" office:value-type="float" office:value="14872" calcext:value-type="float">
            <text:p>14872</text:p>
          </table:table-cell>
          <table:table-cell office:value-type="float" office:value="8640000" calcext:value-type="float">
            <text:p>8640000</text:p>
          </table:table-cell>
          <table:table-cell table:formula="of:=[.B1860]/[.C1860]" office:value-type="float" office:value="0.0017212962962963" calcext:value-type="float">
            <text:p>0,00172129629629630000</text:p>
          </table:table-cell>
          <table:table-cell table:formula="of:=[.D1861]-[.D18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[.B1860]+8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1861]/[.C1861]" office:value-type="float" office:value="0.00172222222222222" calcext:value-type="float">
            <text:p>0,00172222222222222000</text:p>
          </table:table-cell>
          <table:table-cell table:formula="of:=[.D1862]-[.D18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[.B1861]+8" office:value-type="float" office:value="14888" calcext:value-type="float">
            <text:p>14888</text:p>
          </table:table-cell>
          <table:table-cell office:value-type="float" office:value="8640000" calcext:value-type="float">
            <text:p>8640000</text:p>
          </table:table-cell>
          <table:table-cell table:formula="of:=[.B1862]/[.C1862]" office:value-type="float" office:value="0.00172314814814815" calcext:value-type="float">
            <text:p>0,00172314814814815000</text:p>
          </table:table-cell>
          <table:table-cell table:formula="of:=[.D1863]-[.D18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[.B1862]+8" office:value-type="float" office:value="14896" calcext:value-type="float">
            <text:p>14896</text:p>
          </table:table-cell>
          <table:table-cell office:value-type="float" office:value="8640000" calcext:value-type="float">
            <text:p>8640000</text:p>
          </table:table-cell>
          <table:table-cell table:formula="of:=[.B1863]/[.C1863]" office:value-type="float" office:value="0.00172407407407407" calcext:value-type="float">
            <text:p>0,00172407407407407000</text:p>
          </table:table-cell>
          <table:table-cell table:formula="of:=[.D1864]-[.D18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[.B1863]+8" office:value-type="float" office:value="14904" calcext:value-type="float">
            <text:p>14904</text:p>
          </table:table-cell>
          <table:table-cell office:value-type="float" office:value="8640000" calcext:value-type="float">
            <text:p>8640000</text:p>
          </table:table-cell>
          <table:table-cell table:formula="of:=[.B1864]/[.C1864]" office:value-type="float" office:value="0.001725" calcext:value-type="float">
            <text:p>0,00172500000000000000</text:p>
          </table:table-cell>
          <table:table-cell table:formula="of:=[.D1865]-[.D18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[.B1864]+8" office:value-type="float" office:value="14912" calcext:value-type="float">
            <text:p>14912</text:p>
          </table:table-cell>
          <table:table-cell office:value-type="float" office:value="8640000" calcext:value-type="float">
            <text:p>8640000</text:p>
          </table:table-cell>
          <table:table-cell table:formula="of:=[.B1865]/[.C1865]" office:value-type="float" office:value="0.00172592592592593" calcext:value-type="float">
            <text:p>0,00172592592592593000</text:p>
          </table:table-cell>
          <table:table-cell table:formula="of:=[.D1866]-[.D18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[.B1865]+8" office:value-type="float" office:value="14920" calcext:value-type="float">
            <text:p>14920</text:p>
          </table:table-cell>
          <table:table-cell office:value-type="float" office:value="8640000" calcext:value-type="float">
            <text:p>8640000</text:p>
          </table:table-cell>
          <table:table-cell table:formula="of:=[.B1866]/[.C1866]" office:value-type="float" office:value="0.00172685185185185" calcext:value-type="float">
            <text:p>0,00172685185185185000</text:p>
          </table:table-cell>
          <table:table-cell table:formula="of:=[.D1867]-[.D18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[.B1866]+8" office:value-type="float" office:value="14928" calcext:value-type="float">
            <text:p>14928</text:p>
          </table:table-cell>
          <table:table-cell office:value-type="float" office:value="8640000" calcext:value-type="float">
            <text:p>8640000</text:p>
          </table:table-cell>
          <table:table-cell table:formula="of:=[.B1867]/[.C1867]" office:value-type="float" office:value="0.00172777777777778" calcext:value-type="float">
            <text:p>0,00172777777777778000</text:p>
          </table:table-cell>
          <table:table-cell table:formula="of:=[.D1868]-[.D18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[.B1867]+8" office:value-type="float" office:value="14936" calcext:value-type="float">
            <text:p>14936</text:p>
          </table:table-cell>
          <table:table-cell office:value-type="float" office:value="8640000" calcext:value-type="float">
            <text:p>8640000</text:p>
          </table:table-cell>
          <table:table-cell table:formula="of:=[.B1868]/[.C1868]" office:value-type="float" office:value="0.0017287037037037" calcext:value-type="float">
            <text:p>0,00172870370370370000</text:p>
          </table:table-cell>
          <table:table-cell table:formula="of:=[.D1869]-[.D18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[.B1868]+8" office:value-type="float" office:value="14944" calcext:value-type="float">
            <text:p>14944</text:p>
          </table:table-cell>
          <table:table-cell office:value-type="float" office:value="8640000" calcext:value-type="float">
            <text:p>8640000</text:p>
          </table:table-cell>
          <table:table-cell table:formula="of:=[.B1869]/[.C1869]" office:value-type="float" office:value="0.00172962962962963" calcext:value-type="float">
            <text:p>0,00172962962962963000</text:p>
          </table:table-cell>
          <table:table-cell table:formula="of:=[.D1870]-[.D18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[.B1869]+8" office:value-type="float" office:value="14952" calcext:value-type="float">
            <text:p>14952</text:p>
          </table:table-cell>
          <table:table-cell office:value-type="float" office:value="8640000" calcext:value-type="float">
            <text:p>8640000</text:p>
          </table:table-cell>
          <table:table-cell table:formula="of:=[.B1870]/[.C1870]" office:value-type="float" office:value="0.00173055555555556" calcext:value-type="float">
            <text:p>0,00173055555555556000</text:p>
          </table:table-cell>
          <table:table-cell table:formula="of:=[.D1871]-[.D18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[.B1870]+8" office:value-type="float" office:value="14960" calcext:value-type="float">
            <text:p>14960</text:p>
          </table:table-cell>
          <table:table-cell office:value-type="float" office:value="8640000" calcext:value-type="float">
            <text:p>8640000</text:p>
          </table:table-cell>
          <table:table-cell table:formula="of:=[.B1871]/[.C1871]" office:value-type="float" office:value="0.00173148148148148" calcext:value-type="float">
            <text:p>0,00173148148148148000</text:p>
          </table:table-cell>
          <table:table-cell table:formula="of:=[.D1872]-[.D18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[.B1871]+8" office:value-type="float" office:value="14968" calcext:value-type="float">
            <text:p>14968</text:p>
          </table:table-cell>
          <table:table-cell office:value-type="float" office:value="8640000" calcext:value-type="float">
            <text:p>8640000</text:p>
          </table:table-cell>
          <table:table-cell table:formula="of:=[.B1872]/[.C1872]" office:value-type="float" office:value="0.00173240740740741" calcext:value-type="float">
            <text:p>0,00173240740740741000</text:p>
          </table:table-cell>
          <table:table-cell table:formula="of:=[.D1873]-[.D18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[.B1872]+8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1873]/[.C1873]" office:value-type="float" office:value="0.00173333333333333" calcext:value-type="float">
            <text:p>0,00173333333333333000</text:p>
          </table:table-cell>
          <table:table-cell table:formula="of:=[.D1874]-[.D18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[.B1873]+8" office:value-type="float" office:value="14984" calcext:value-type="float">
            <text:p>14984</text:p>
          </table:table-cell>
          <table:table-cell office:value-type="float" office:value="8640000" calcext:value-type="float">
            <text:p>8640000</text:p>
          </table:table-cell>
          <table:table-cell table:formula="of:=[.B1874]/[.C1874]" office:value-type="float" office:value="0.00173425925925926" calcext:value-type="float">
            <text:p>0,00173425925925926000</text:p>
          </table:table-cell>
          <table:table-cell table:formula="of:=[.D1875]-[.D18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[.B1874]+8" office:value-type="float" office:value="14992" calcext:value-type="float">
            <text:p>14992</text:p>
          </table:table-cell>
          <table:table-cell office:value-type="float" office:value="8640000" calcext:value-type="float">
            <text:p>8640000</text:p>
          </table:table-cell>
          <table:table-cell table:formula="of:=[.B1875]/[.C1875]" office:value-type="float" office:value="0.00173518518518519" calcext:value-type="float">
            <text:p>0,00173518518518518000</text:p>
          </table:table-cell>
          <table:table-cell table:formula="of:=[.D1876]-[.D18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[.B1875]+8" office:value-type="float" office:value="15000" calcext:value-type="float">
            <text:p>15000</text:p>
          </table:table-cell>
          <table:table-cell office:value-type="float" office:value="8640000" calcext:value-type="float">
            <text:p>8640000</text:p>
          </table:table-cell>
          <table:table-cell table:formula="of:=[.B1876]/[.C1876]" office:value-type="float" office:value="0.00173611111111111" calcext:value-type="float">
            <text:p>0,00173611111111111000</text:p>
          </table:table-cell>
          <table:table-cell table:formula="of:=[.D1877]-[.D18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[.B1876]+8" office:value-type="float" office:value="15008" calcext:value-type="float">
            <text:p>15008</text:p>
          </table:table-cell>
          <table:table-cell office:value-type="float" office:value="8640000" calcext:value-type="float">
            <text:p>8640000</text:p>
          </table:table-cell>
          <table:table-cell table:formula="of:=[.B1877]/[.C1877]" office:value-type="float" office:value="0.00173703703703704" calcext:value-type="float">
            <text:p>0,00173703703703704000</text:p>
          </table:table-cell>
          <table:table-cell table:formula="of:=[.D1878]-[.D18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[.B1877]+8" office:value-type="float" office:value="15016" calcext:value-type="float">
            <text:p>15016</text:p>
          </table:table-cell>
          <table:table-cell office:value-type="float" office:value="8640000" calcext:value-type="float">
            <text:p>8640000</text:p>
          </table:table-cell>
          <table:table-cell table:formula="of:=[.B1878]/[.C1878]" office:value-type="float" office:value="0.00173796296296296" calcext:value-type="float">
            <text:p>0,00173796296296296000</text:p>
          </table:table-cell>
          <table:table-cell table:formula="of:=[.D1879]-[.D1878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[.B1878]+8" office:value-type="float" office:value="15024" calcext:value-type="float">
            <text:p>15024</text:p>
          </table:table-cell>
          <table:table-cell office:value-type="float" office:value="8640000" calcext:value-type="float">
            <text:p>8640000</text:p>
          </table:table-cell>
          <table:table-cell table:formula="of:=[.B1879]/[.C1879]" office:value-type="float" office:value="0.00173888888888889" calcext:value-type="float">
            <text:p>0,00173888888888889000</text:p>
          </table:table-cell>
          <table:table-cell table:formula="of:=[.D1880]-[.D18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[.B1879]+8" office:value-type="float" office:value="15032" calcext:value-type="float">
            <text:p>15032</text:p>
          </table:table-cell>
          <table:table-cell office:value-type="float" office:value="8640000" calcext:value-type="float">
            <text:p>8640000</text:p>
          </table:table-cell>
          <table:table-cell table:formula="of:=[.B1880]/[.C1880]" office:value-type="float" office:value="0.00173981481481482" calcext:value-type="float">
            <text:p>0,00173981481481482000</text:p>
          </table:table-cell>
          <table:table-cell table:formula="of:=[.D1881]-[.D18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[.B1880]+8" office:value-type="float" office:value="15040" calcext:value-type="float">
            <text:p>15040</text:p>
          </table:table-cell>
          <table:table-cell office:value-type="float" office:value="8640000" calcext:value-type="float">
            <text:p>8640000</text:p>
          </table:table-cell>
          <table:table-cell table:formula="of:=[.B1881]/[.C1881]" office:value-type="float" office:value="0.00174074074074074" calcext:value-type="float">
            <text:p>0,00174074074074074000</text:p>
          </table:table-cell>
          <table:table-cell table:formula="of:=[.D1882]-[.D18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[.B1881]+8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1882]/[.C1882]" office:value-type="float" office:value="0.00174166666666667" calcext:value-type="float">
            <text:p>0,00174166666666667000</text:p>
          </table:table-cell>
          <table:table-cell table:formula="of:=[.D1883]-[.D18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[.B1882]+8" office:value-type="float" office:value="15056" calcext:value-type="float">
            <text:p>15056</text:p>
          </table:table-cell>
          <table:table-cell office:value-type="float" office:value="8640000" calcext:value-type="float">
            <text:p>8640000</text:p>
          </table:table-cell>
          <table:table-cell table:formula="of:=[.B1883]/[.C1883]" office:value-type="float" office:value="0.00174259259259259" calcext:value-type="float">
            <text:p>0,00174259259259259000</text:p>
          </table:table-cell>
          <table:table-cell table:formula="of:=[.D1884]-[.D18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[.B1883]+8" office:value-type="float" office:value="15064" calcext:value-type="float">
            <text:p>15064</text:p>
          </table:table-cell>
          <table:table-cell office:value-type="float" office:value="8640000" calcext:value-type="float">
            <text:p>8640000</text:p>
          </table:table-cell>
          <table:table-cell table:formula="of:=[.B1884]/[.C1884]" office:value-type="float" office:value="0.00174351851851852" calcext:value-type="float">
            <text:p>0,00174351851851852000</text:p>
          </table:table-cell>
          <table:table-cell table:formula="of:=[.D1885]-[.D18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[.B1884]+8" office:value-type="float" office:value="15072" calcext:value-type="float">
            <text:p>15072</text:p>
          </table:table-cell>
          <table:table-cell office:value-type="float" office:value="8640000" calcext:value-type="float">
            <text:p>8640000</text:p>
          </table:table-cell>
          <table:table-cell table:formula="of:=[.B1885]/[.C1885]" office:value-type="float" office:value="0.00174444444444444" calcext:value-type="float">
            <text:p>0,00174444444444444000</text:p>
          </table:table-cell>
          <table:table-cell table:formula="of:=[.D1886]-[.D18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[.B1885]+8" office:value-type="float" office:value="15080" calcext:value-type="float">
            <text:p>15080</text:p>
          </table:table-cell>
          <table:table-cell office:value-type="float" office:value="8640000" calcext:value-type="float">
            <text:p>8640000</text:p>
          </table:table-cell>
          <table:table-cell table:formula="of:=[.B1886]/[.C1886]" office:value-type="float" office:value="0.00174537037037037" calcext:value-type="float">
            <text:p>0,00174537037037037000</text:p>
          </table:table-cell>
          <table:table-cell table:formula="of:=[.D1887]-[.D18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[.B1886]+8" office:value-type="float" office:value="15088" calcext:value-type="float">
            <text:p>15088</text:p>
          </table:table-cell>
          <table:table-cell office:value-type="float" office:value="8640000" calcext:value-type="float">
            <text:p>8640000</text:p>
          </table:table-cell>
          <table:table-cell table:formula="of:=[.B1887]/[.C1887]" office:value-type="float" office:value="0.0017462962962963" calcext:value-type="float">
            <text:p>0,00174629629629630000</text:p>
          </table:table-cell>
          <table:table-cell table:formula="of:=[.D1888]-[.D18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[.B1887]+8" office:value-type="float" office:value="15096" calcext:value-type="float">
            <text:p>15096</text:p>
          </table:table-cell>
          <table:table-cell office:value-type="float" office:value="8640000" calcext:value-type="float">
            <text:p>8640000</text:p>
          </table:table-cell>
          <table:table-cell table:formula="of:=[.B1888]/[.C1888]" office:value-type="float" office:value="0.00174722222222222" calcext:value-type="float">
            <text:p>0,00174722222222222000</text:p>
          </table:table-cell>
          <table:table-cell table:formula="of:=[.D1889]-[.D18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[.B1888]+8" office:value-type="float" office:value="15104" calcext:value-type="float">
            <text:p>15104</text:p>
          </table:table-cell>
          <table:table-cell office:value-type="float" office:value="8640000" calcext:value-type="float">
            <text:p>8640000</text:p>
          </table:table-cell>
          <table:table-cell table:formula="of:=[.B1889]/[.C1889]" office:value-type="float" office:value="0.00174814814814815" calcext:value-type="float">
            <text:p>0,00174814814814815000</text:p>
          </table:table-cell>
          <table:table-cell table:formula="of:=[.D1890]-[.D18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[.B1889]+8" office:value-type="float" office:value="15112" calcext:value-type="float">
            <text:p>15112</text:p>
          </table:table-cell>
          <table:table-cell office:value-type="float" office:value="8640000" calcext:value-type="float">
            <text:p>8640000</text:p>
          </table:table-cell>
          <table:table-cell table:formula="of:=[.B1890]/[.C1890]" office:value-type="float" office:value="0.00174907407407407" calcext:value-type="float">
            <text:p>0,00174907407407407000</text:p>
          </table:table-cell>
          <table:table-cell table:formula="of:=[.D1891]-[.D18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[.B1890]+8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1891]/[.C1891]" office:value-type="float" office:value="0.00175" calcext:value-type="float">
            <text:p>0,00175000000000000000</text:p>
          </table:table-cell>
          <table:table-cell table:formula="of:=[.D1892]-[.D18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[.B1891]+8" office:value-type="float" office:value="15128" calcext:value-type="float">
            <text:p>15128</text:p>
          </table:table-cell>
          <table:table-cell office:value-type="float" office:value="8640000" calcext:value-type="float">
            <text:p>8640000</text:p>
          </table:table-cell>
          <table:table-cell table:formula="of:=[.B1892]/[.C1892]" office:value-type="float" office:value="0.00175092592592593" calcext:value-type="float">
            <text:p>0,00175092592592593000</text:p>
          </table:table-cell>
          <table:table-cell table:formula="of:=[.D1893]-[.D18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[.B1892]+8" office:value-type="float" office:value="15136" calcext:value-type="float">
            <text:p>15136</text:p>
          </table:table-cell>
          <table:table-cell office:value-type="float" office:value="8640000" calcext:value-type="float">
            <text:p>8640000</text:p>
          </table:table-cell>
          <table:table-cell table:formula="of:=[.B1893]/[.C1893]" office:value-type="float" office:value="0.00175185185185185" calcext:value-type="float">
            <text:p>0,00175185185185185000</text:p>
          </table:table-cell>
          <table:table-cell table:formula="of:=[.D1894]-[.D18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B1893]+8" office:value-type="float" office:value="15144" calcext:value-type="float">
            <text:p>15144</text:p>
          </table:table-cell>
          <table:table-cell office:value-type="float" office:value="8640000" calcext:value-type="float">
            <text:p>8640000</text:p>
          </table:table-cell>
          <table:table-cell table:formula="of:=[.B1894]/[.C1894]" office:value-type="float" office:value="0.00175277777777778" calcext:value-type="float">
            <text:p>0,00175277777777778000</text:p>
          </table:table-cell>
          <table:table-cell table:formula="of:=[.D1895]-[.D18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[.B1894]+8" office:value-type="float" office:value="15152" calcext:value-type="float">
            <text:p>15152</text:p>
          </table:table-cell>
          <table:table-cell office:value-type="float" office:value="8640000" calcext:value-type="float">
            <text:p>8640000</text:p>
          </table:table-cell>
          <table:table-cell table:formula="of:=[.B1895]/[.C1895]" office:value-type="float" office:value="0.0017537037037037" calcext:value-type="float">
            <text:p>0,00175370370370370000</text:p>
          </table:table-cell>
          <table:table-cell table:formula="of:=[.D1896]-[.D18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[.B1895]+8" office:value-type="float" office:value="15160" calcext:value-type="float">
            <text:p>15160</text:p>
          </table:table-cell>
          <table:table-cell office:value-type="float" office:value="8640000" calcext:value-type="float">
            <text:p>8640000</text:p>
          </table:table-cell>
          <table:table-cell table:formula="of:=[.B1896]/[.C1896]" office:value-type="float" office:value="0.00175462962962963" calcext:value-type="float">
            <text:p>0,00175462962962963000</text:p>
          </table:table-cell>
          <table:table-cell table:formula="of:=[.D1897]-[.D18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[.B1896]+8" office:value-type="float" office:value="15168" calcext:value-type="float">
            <text:p>15168</text:p>
          </table:table-cell>
          <table:table-cell office:value-type="float" office:value="8640000" calcext:value-type="float">
            <text:p>8640000</text:p>
          </table:table-cell>
          <table:table-cell table:formula="of:=[.B1897]/[.C1897]" office:value-type="float" office:value="0.00175555555555556" calcext:value-type="float">
            <text:p>0,00175555555555556000</text:p>
          </table:table-cell>
          <table:table-cell table:formula="of:=[.D1898]-[.D18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[.B1897]+8" office:value-type="float" office:value="15176" calcext:value-type="float">
            <text:p>15176</text:p>
          </table:table-cell>
          <table:table-cell office:value-type="float" office:value="8640000" calcext:value-type="float">
            <text:p>8640000</text:p>
          </table:table-cell>
          <table:table-cell table:formula="of:=[.B1898]/[.C1898]" office:value-type="float" office:value="0.00175648148148148" calcext:value-type="float">
            <text:p>0,00175648148148148000</text:p>
          </table:table-cell>
          <table:table-cell table:formula="of:=[.D1899]-[.D18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[.B1898]+8" office:value-type="float" office:value="15184" calcext:value-type="float">
            <text:p>15184</text:p>
          </table:table-cell>
          <table:table-cell office:value-type="float" office:value="8640000" calcext:value-type="float">
            <text:p>8640000</text:p>
          </table:table-cell>
          <table:table-cell table:formula="of:=[.B1899]/[.C1899]" office:value-type="float" office:value="0.00175740740740741" calcext:value-type="float">
            <text:p>0,00175740740740741000</text:p>
          </table:table-cell>
          <table:table-cell table:formula="of:=[.D1900]-[.D18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[.B1899]+8" office:value-type="float" office:value="15192" calcext:value-type="float">
            <text:p>15192</text:p>
          </table:table-cell>
          <table:table-cell office:value-type="float" office:value="8640000" calcext:value-type="float">
            <text:p>8640000</text:p>
          </table:table-cell>
          <table:table-cell table:formula="of:=[.B1900]/[.C1900]" office:value-type="float" office:value="0.00175833333333333" calcext:value-type="float">
            <text:p>0,00175833333333333000</text:p>
          </table:table-cell>
          <table:table-cell table:formula="of:=[.D1901]-[.D19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B1900]+8" office:value-type="float" office:value="15200" calcext:value-type="float">
            <text:p>15200</text:p>
          </table:table-cell>
          <table:table-cell office:value-type="float" office:value="8640000" calcext:value-type="float">
            <text:p>8640000</text:p>
          </table:table-cell>
          <table:table-cell table:formula="of:=[.B1901]/[.C1901]" office:value-type="float" office:value="0.00175925925925926" calcext:value-type="float">
            <text:p>0,00175925925925926000</text:p>
          </table:table-cell>
          <table:table-cell table:formula="of:=[.D1902]-[.D19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[.B1901]+8" office:value-type="float" office:value="15208" calcext:value-type="float">
            <text:p>15208</text:p>
          </table:table-cell>
          <table:table-cell office:value-type="float" office:value="8640000" calcext:value-type="float">
            <text:p>8640000</text:p>
          </table:table-cell>
          <table:table-cell table:formula="of:=[.B1902]/[.C1902]" office:value-type="float" office:value="0.00176018518518519" calcext:value-type="float">
            <text:p>0,00176018518518519000</text:p>
          </table:table-cell>
          <table:table-cell table:formula="of:=[.D1903]-[.D19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[.B1902]+8" office:value-type="float" office:value="15216" calcext:value-type="float">
            <text:p>15216</text:p>
          </table:table-cell>
          <table:table-cell office:value-type="float" office:value="8640000" calcext:value-type="float">
            <text:p>8640000</text:p>
          </table:table-cell>
          <table:table-cell table:formula="of:=[.B1903]/[.C1903]" office:value-type="float" office:value="0.00176111111111111" calcext:value-type="float">
            <text:p>0,00176111111111111000</text:p>
          </table:table-cell>
          <table:table-cell table:formula="of:=[.D1904]-[.D19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[.B1903]+8" office:value-type="float" office:value="15224" calcext:value-type="float">
            <text:p>15224</text:p>
          </table:table-cell>
          <table:table-cell office:value-type="float" office:value="8640000" calcext:value-type="float">
            <text:p>8640000</text:p>
          </table:table-cell>
          <table:table-cell table:formula="of:=[.B1904]/[.C1904]" office:value-type="float" office:value="0.00176203703703704" calcext:value-type="float">
            <text:p>0,00176203703703704000</text:p>
          </table:table-cell>
          <table:table-cell table:formula="of:=[.D1905]-[.D19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[.B1904]+8" office:value-type="float" office:value="15232" calcext:value-type="float">
            <text:p>15232</text:p>
          </table:table-cell>
          <table:table-cell office:value-type="float" office:value="8640000" calcext:value-type="float">
            <text:p>8640000</text:p>
          </table:table-cell>
          <table:table-cell table:formula="of:=[.B1905]/[.C1905]" office:value-type="float" office:value="0.00176296296296296" calcext:value-type="float">
            <text:p>0,00176296296296296000</text:p>
          </table:table-cell>
          <table:table-cell table:formula="of:=[.D1906]-[.D19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[.B1905]+8" office:value-type="float" office:value="15240" calcext:value-type="float">
            <text:p>15240</text:p>
          </table:table-cell>
          <table:table-cell office:value-type="float" office:value="8640000" calcext:value-type="float">
            <text:p>8640000</text:p>
          </table:table-cell>
          <table:table-cell table:formula="of:=[.B1906]/[.C1906]" office:value-type="float" office:value="0.00176388888888889" calcext:value-type="float">
            <text:p>0,00176388888888889000</text:p>
          </table:table-cell>
          <table:table-cell table:formula="of:=[.D1907]-[.D19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[.B1906]+8" office:value-type="float" office:value="15248" calcext:value-type="float">
            <text:p>15248</text:p>
          </table:table-cell>
          <table:table-cell office:value-type="float" office:value="8640000" calcext:value-type="float">
            <text:p>8640000</text:p>
          </table:table-cell>
          <table:table-cell table:formula="of:=[.B1907]/[.C1907]" office:value-type="float" office:value="0.00176481481481481" calcext:value-type="float">
            <text:p>0,00176481481481481000</text:p>
          </table:table-cell>
          <table:table-cell table:formula="of:=[.D1908]-[.D19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[.B1907]+8" office:value-type="float" office:value="15256" calcext:value-type="float">
            <text:p>15256</text:p>
          </table:table-cell>
          <table:table-cell office:value-type="float" office:value="8640000" calcext:value-type="float">
            <text:p>8640000</text:p>
          </table:table-cell>
          <table:table-cell table:formula="of:=[.B1908]/[.C1908]" office:value-type="float" office:value="0.00176574074074074" calcext:value-type="float">
            <text:p>0,00176574074074074000</text:p>
          </table:table-cell>
          <table:table-cell table:formula="of:=[.D1909]-[.D19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[.B1908]+8" office:value-type="float" office:value="15264" calcext:value-type="float">
            <text:p>15264</text:p>
          </table:table-cell>
          <table:table-cell office:value-type="float" office:value="8640000" calcext:value-type="float">
            <text:p>8640000</text:p>
          </table:table-cell>
          <table:table-cell table:formula="of:=[.B1909]/[.C1909]" office:value-type="float" office:value="0.00176666666666667" calcext:value-type="float">
            <text:p>0,00176666666666667000</text:p>
          </table:table-cell>
          <table:table-cell table:formula="of:=[.D1910]-[.D19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[.B1909]+8" office:value-type="float" office:value="15272" calcext:value-type="float">
            <text:p>15272</text:p>
          </table:table-cell>
          <table:table-cell office:value-type="float" office:value="8640000" calcext:value-type="float">
            <text:p>8640000</text:p>
          </table:table-cell>
          <table:table-cell table:formula="of:=[.B1910]/[.C1910]" office:value-type="float" office:value="0.00176759259259259" calcext:value-type="float">
            <text:p>0,00176759259259259000</text:p>
          </table:table-cell>
          <table:table-cell table:formula="of:=[.D1911]-[.D19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[.B1910]+8" office:value-type="float" office:value="15280" calcext:value-type="float">
            <text:p>15280</text:p>
          </table:table-cell>
          <table:table-cell office:value-type="float" office:value="8640000" calcext:value-type="float">
            <text:p>8640000</text:p>
          </table:table-cell>
          <table:table-cell table:formula="of:=[.B1911]/[.C1911]" office:value-type="float" office:value="0.00176851851851852" calcext:value-type="float">
            <text:p>0,00176851851851852000</text:p>
          </table:table-cell>
          <table:table-cell table:formula="of:=[.D1912]-[.D19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[.B1911]+8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1912]/[.C1912]" office:value-type="float" office:value="0.00176944444444444" calcext:value-type="float">
            <text:p>0,00176944444444444000</text:p>
          </table:table-cell>
          <table:table-cell table:formula="of:=[.D1913]-[.D19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B1912]+8" office:value-type="float" office:value="15296" calcext:value-type="float">
            <text:p>15296</text:p>
          </table:table-cell>
          <table:table-cell office:value-type="float" office:value="8640000" calcext:value-type="float">
            <text:p>8640000</text:p>
          </table:table-cell>
          <table:table-cell table:formula="of:=[.B1913]/[.C1913]" office:value-type="float" office:value="0.00177037037037037" calcext:value-type="float">
            <text:p>0,00177037037037037000</text:p>
          </table:table-cell>
          <table:table-cell table:formula="of:=[.D1914]-[.D19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[.B1913]+8" office:value-type="float" office:value="15304" calcext:value-type="float">
            <text:p>15304</text:p>
          </table:table-cell>
          <table:table-cell office:value-type="float" office:value="8640000" calcext:value-type="float">
            <text:p>8640000</text:p>
          </table:table-cell>
          <table:table-cell table:formula="of:=[.B1914]/[.C1914]" office:value-type="float" office:value="0.0017712962962963" calcext:value-type="float">
            <text:p>0,00177129629629630000</text:p>
          </table:table-cell>
          <table:table-cell table:formula="of:=[.D1915]-[.D19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[.B1914]+8" office:value-type="float" office:value="15312" calcext:value-type="float">
            <text:p>15312</text:p>
          </table:table-cell>
          <table:table-cell office:value-type="float" office:value="8640000" calcext:value-type="float">
            <text:p>8640000</text:p>
          </table:table-cell>
          <table:table-cell table:formula="of:=[.B1915]/[.C1915]" office:value-type="float" office:value="0.00177222222222222" calcext:value-type="float">
            <text:p>0,00177222222222222000</text:p>
          </table:table-cell>
          <table:table-cell table:formula="of:=[.D1916]-[.D19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[.B1915]+8" office:value-type="float" office:value="15320" calcext:value-type="float">
            <text:p>15320</text:p>
          </table:table-cell>
          <table:table-cell office:value-type="float" office:value="8640000" calcext:value-type="float">
            <text:p>8640000</text:p>
          </table:table-cell>
          <table:table-cell table:formula="of:=[.B1916]/[.C1916]" office:value-type="float" office:value="0.00177314814814815" calcext:value-type="float">
            <text:p>0,00177314814814815000</text:p>
          </table:table-cell>
          <table:table-cell table:formula="of:=[.D1917]-[.D1916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B1916]+8" office:value-type="float" office:value="15328" calcext:value-type="float">
            <text:p>15328</text:p>
          </table:table-cell>
          <table:table-cell office:value-type="float" office:value="8640000" calcext:value-type="float">
            <text:p>8640000</text:p>
          </table:table-cell>
          <table:table-cell table:formula="of:=[.B1917]/[.C1917]" office:value-type="float" office:value="0.00177407407407407" calcext:value-type="float">
            <text:p>0,00177407407407407000</text:p>
          </table:table-cell>
          <table:table-cell table:formula="of:=[.D1918]-[.D19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[.B1917]+8" office:value-type="float" office:value="15336" calcext:value-type="float">
            <text:p>15336</text:p>
          </table:table-cell>
          <table:table-cell office:value-type="float" office:value="8640000" calcext:value-type="float">
            <text:p>8640000</text:p>
          </table:table-cell>
          <table:table-cell table:formula="of:=[.B1918]/[.C1918]" office:value-type="float" office:value="0.001775" calcext:value-type="float">
            <text:p>0,00177500000000000000</text:p>
          </table:table-cell>
          <table:table-cell table:formula="of:=[.D1919]-[.D19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[.B1918]+8" office:value-type="float" office:value="15344" calcext:value-type="float">
            <text:p>15344</text:p>
          </table:table-cell>
          <table:table-cell office:value-type="float" office:value="8640000" calcext:value-type="float">
            <text:p>8640000</text:p>
          </table:table-cell>
          <table:table-cell table:formula="of:=[.B1919]/[.C1919]" office:value-type="float" office:value="0.00177592592592593" calcext:value-type="float">
            <text:p>0,00177592592592593000</text:p>
          </table:table-cell>
          <table:table-cell table:formula="of:=[.D1920]-[.D19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[.B1919]+8" office:value-type="float" office:value="15352" calcext:value-type="float">
            <text:p>15352</text:p>
          </table:table-cell>
          <table:table-cell office:value-type="float" office:value="8640000" calcext:value-type="float">
            <text:p>8640000</text:p>
          </table:table-cell>
          <table:table-cell table:formula="of:=[.B1920]/[.C1920]" office:value-type="float" office:value="0.00177685185185185" calcext:value-type="float">
            <text:p>0,00177685185185185000</text:p>
          </table:table-cell>
          <table:table-cell table:formula="of:=[.D1921]-[.D19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B1920]+8" office:value-type="float" office:value="15360" calcext:value-type="float">
            <text:p>15360</text:p>
          </table:table-cell>
          <table:table-cell office:value-type="float" office:value="8640000" calcext:value-type="float">
            <text:p>8640000</text:p>
          </table:table-cell>
          <table:table-cell table:formula="of:=[.B1921]/[.C1921]" office:value-type="float" office:value="0.00177777777777778" calcext:value-type="float">
            <text:p>0,00177777777777778000</text:p>
          </table:table-cell>
          <table:table-cell table:formula="of:=[.D1922]-[.D19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[.B1921]+8" office:value-type="float" office:value="15368" calcext:value-type="float">
            <text:p>15368</text:p>
          </table:table-cell>
          <table:table-cell office:value-type="float" office:value="8640000" calcext:value-type="float">
            <text:p>8640000</text:p>
          </table:table-cell>
          <table:table-cell table:formula="of:=[.B1922]/[.C1922]" office:value-type="float" office:value="0.0017787037037037" calcext:value-type="float">
            <text:p>0,00177870370370370000</text:p>
          </table:table-cell>
          <table:table-cell table:formula="of:=[.D1923]-[.D19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[.B1922]+8" office:value-type="float" office:value="15376" calcext:value-type="float">
            <text:p>15376</text:p>
          </table:table-cell>
          <table:table-cell office:value-type="float" office:value="8640000" calcext:value-type="float">
            <text:p>8640000</text:p>
          </table:table-cell>
          <table:table-cell table:formula="of:=[.B1923]/[.C1923]" office:value-type="float" office:value="0.00177962962962963" calcext:value-type="float">
            <text:p>0,00177962962962963000</text:p>
          </table:table-cell>
          <table:table-cell table:formula="of:=[.D1924]-[.D19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[.B1923]+8" office:value-type="float" office:value="15384" calcext:value-type="float">
            <text:p>15384</text:p>
          </table:table-cell>
          <table:table-cell office:value-type="float" office:value="8640000" calcext:value-type="float">
            <text:p>8640000</text:p>
          </table:table-cell>
          <table:table-cell table:formula="of:=[.B1924]/[.C1924]" office:value-type="float" office:value="0.00178055555555556" calcext:value-type="float">
            <text:p>0,00178055555555556000</text:p>
          </table:table-cell>
          <table:table-cell table:formula="of:=[.D1925]-[.D19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[.B1924]+8" office:value-type="float" office:value="15392" calcext:value-type="float">
            <text:p>15392</text:p>
          </table:table-cell>
          <table:table-cell office:value-type="float" office:value="8640000" calcext:value-type="float">
            <text:p>8640000</text:p>
          </table:table-cell>
          <table:table-cell table:formula="of:=[.B1925]/[.C1925]" office:value-type="float" office:value="0.00178148148148148" calcext:value-type="float">
            <text:p>0,00178148148148148000</text:p>
          </table:table-cell>
          <table:table-cell table:formula="of:=[.D1926]-[.D19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[.B1925]+8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1926]/[.C1926]" office:value-type="float" office:value="0.00178240740740741" calcext:value-type="float">
            <text:p>0,00178240740740741000</text:p>
          </table:table-cell>
          <table:table-cell table:formula="of:=[.D1927]-[.D19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[.B1926]+8" office:value-type="float" office:value="15408" calcext:value-type="float">
            <text:p>15408</text:p>
          </table:table-cell>
          <table:table-cell office:value-type="float" office:value="8640000" calcext:value-type="float">
            <text:p>8640000</text:p>
          </table:table-cell>
          <table:table-cell table:formula="of:=[.B1927]/[.C1927]" office:value-type="float" office:value="0.00178333333333333" calcext:value-type="float">
            <text:p>0,00178333333333333000</text:p>
          </table:table-cell>
          <table:table-cell table:formula="of:=[.D1928]-[.D19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[.B1927]+8" office:value-type="float" office:value="15416" calcext:value-type="float">
            <text:p>15416</text:p>
          </table:table-cell>
          <table:table-cell office:value-type="float" office:value="8640000" calcext:value-type="float">
            <text:p>8640000</text:p>
          </table:table-cell>
          <table:table-cell table:formula="of:=[.B1928]/[.C1928]" office:value-type="float" office:value="0.00178425925925926" calcext:value-type="float">
            <text:p>0,00178425925925926000</text:p>
          </table:table-cell>
          <table:table-cell table:formula="of:=[.D1929]-[.D19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[.B1928]+8" office:value-type="float" office:value="15424" calcext:value-type="float">
            <text:p>15424</text:p>
          </table:table-cell>
          <table:table-cell office:value-type="float" office:value="8640000" calcext:value-type="float">
            <text:p>8640000</text:p>
          </table:table-cell>
          <table:table-cell table:formula="of:=[.B1929]/[.C1929]" office:value-type="float" office:value="0.00178518518518519" calcext:value-type="float">
            <text:p>0,00178518518518519000</text:p>
          </table:table-cell>
          <table:table-cell table:formula="of:=[.D1930]-[.D19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[.B1929]+8" office:value-type="float" office:value="15432" calcext:value-type="float">
            <text:p>15432</text:p>
          </table:table-cell>
          <table:table-cell office:value-type="float" office:value="8640000" calcext:value-type="float">
            <text:p>8640000</text:p>
          </table:table-cell>
          <table:table-cell table:formula="of:=[.B1930]/[.C1930]" office:value-type="float" office:value="0.00178611111111111" calcext:value-type="float">
            <text:p>0,00178611111111111000</text:p>
          </table:table-cell>
          <table:table-cell table:formula="of:=[.D1931]-[.D19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[.B1930]+8" office:value-type="float" office:value="15440" calcext:value-type="float">
            <text:p>15440</text:p>
          </table:table-cell>
          <table:table-cell office:value-type="float" office:value="8640000" calcext:value-type="float">
            <text:p>8640000</text:p>
          </table:table-cell>
          <table:table-cell table:formula="of:=[.B1931]/[.C1931]" office:value-type="float" office:value="0.00178703703703704" calcext:value-type="float">
            <text:p>0,00178703703703704000</text:p>
          </table:table-cell>
          <table:table-cell table:formula="of:=[.D1932]-[.D19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[.B1931]+8" office:value-type="float" office:value="15448" calcext:value-type="float">
            <text:p>15448</text:p>
          </table:table-cell>
          <table:table-cell office:value-type="float" office:value="8640000" calcext:value-type="float">
            <text:p>8640000</text:p>
          </table:table-cell>
          <table:table-cell table:formula="of:=[.B1932]/[.C1932]" office:value-type="float" office:value="0.00178796296296296" calcext:value-type="float">
            <text:p>0,00178796296296296000</text:p>
          </table:table-cell>
          <table:table-cell table:formula="of:=[.D1933]-[.D19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B1932]+8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1933]/[.C1933]" office:value-type="float" office:value="0.00178888888888889" calcext:value-type="float">
            <text:p>0,00178888888888889000</text:p>
          </table:table-cell>
          <table:table-cell table:formula="of:=[.D1934]-[.D19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[.B1933]+8" office:value-type="float" office:value="15464" calcext:value-type="float">
            <text:p>15464</text:p>
          </table:table-cell>
          <table:table-cell office:value-type="float" office:value="8640000" calcext:value-type="float">
            <text:p>8640000</text:p>
          </table:table-cell>
          <table:table-cell table:formula="of:=[.B1934]/[.C1934]" office:value-type="float" office:value="0.00178981481481481" calcext:value-type="float">
            <text:p>0,00178981481481481000</text:p>
          </table:table-cell>
          <table:table-cell table:formula="of:=[.D1935]-[.D19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[.B1934]+8" office:value-type="float" office:value="15472" calcext:value-type="float">
            <text:p>15472</text:p>
          </table:table-cell>
          <table:table-cell office:value-type="float" office:value="8640000" calcext:value-type="float">
            <text:p>8640000</text:p>
          </table:table-cell>
          <table:table-cell table:formula="of:=[.B1935]/[.C1935]" office:value-type="float" office:value="0.00179074074074074" calcext:value-type="float">
            <text:p>0,00179074074074074000</text:p>
          </table:table-cell>
          <table:table-cell table:formula="of:=[.D1936]-[.D19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[.B1935]+8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1936]/[.C1936]" office:value-type="float" office:value="0.00179166666666667" calcext:value-type="float">
            <text:p>0,00179166666666667000</text:p>
          </table:table-cell>
          <table:table-cell table:formula="of:=[.D1937]-[.D19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[.B1936]+8" office:value-type="float" office:value="15488" calcext:value-type="float">
            <text:p>15488</text:p>
          </table:table-cell>
          <table:table-cell office:value-type="float" office:value="8640000" calcext:value-type="float">
            <text:p>8640000</text:p>
          </table:table-cell>
          <table:table-cell table:formula="of:=[.B1937]/[.C1937]" office:value-type="float" office:value="0.00179259259259259" calcext:value-type="float">
            <text:p>0,00179259259259259000</text:p>
          </table:table-cell>
          <table:table-cell table:formula="of:=[.D1938]-[.D19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[.B1937]+8" office:value-type="float" office:value="15496" calcext:value-type="float">
            <text:p>15496</text:p>
          </table:table-cell>
          <table:table-cell office:value-type="float" office:value="8640000" calcext:value-type="float">
            <text:p>8640000</text:p>
          </table:table-cell>
          <table:table-cell table:formula="of:=[.B1938]/[.C1938]" office:value-type="float" office:value="0.00179351851851852" calcext:value-type="float">
            <text:p>0,00179351851851852000</text:p>
          </table:table-cell>
          <table:table-cell table:formula="of:=[.D1939]-[.D19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[.B1938]+8" office:value-type="float" office:value="15504" calcext:value-type="float">
            <text:p>15504</text:p>
          </table:table-cell>
          <table:table-cell office:value-type="float" office:value="8640000" calcext:value-type="float">
            <text:p>8640000</text:p>
          </table:table-cell>
          <table:table-cell table:formula="of:=[.B1939]/[.C1939]" office:value-type="float" office:value="0.00179444444444444" calcext:value-type="float">
            <text:p>0,00179444444444444000</text:p>
          </table:table-cell>
          <table:table-cell table:formula="of:=[.D1940]-[.D19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[.B1939]+8" office:value-type="float" office:value="15512" calcext:value-type="float">
            <text:p>15512</text:p>
          </table:table-cell>
          <table:table-cell office:value-type="float" office:value="8640000" calcext:value-type="float">
            <text:p>8640000</text:p>
          </table:table-cell>
          <table:table-cell table:formula="of:=[.B1940]/[.C1940]" office:value-type="float" office:value="0.00179537037037037" calcext:value-type="float">
            <text:p>0,00179537037037037000</text:p>
          </table:table-cell>
          <table:table-cell table:formula="of:=[.D1941]-[.D19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[.B1940]+8" office:value-type="float" office:value="15520" calcext:value-type="float">
            <text:p>15520</text:p>
          </table:table-cell>
          <table:table-cell office:value-type="float" office:value="8640000" calcext:value-type="float">
            <text:p>8640000</text:p>
          </table:table-cell>
          <table:table-cell table:formula="of:=[.B1941]/[.C1941]" office:value-type="float" office:value="0.0017962962962963" calcext:value-type="float">
            <text:p>0,00179629629629630000</text:p>
          </table:table-cell>
          <table:table-cell table:formula="of:=[.D1942]-[.D19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[.B1941]+8" office:value-type="float" office:value="15528" calcext:value-type="float">
            <text:p>15528</text:p>
          </table:table-cell>
          <table:table-cell office:value-type="float" office:value="8640000" calcext:value-type="float">
            <text:p>8640000</text:p>
          </table:table-cell>
          <table:table-cell table:formula="of:=[.B1942]/[.C1942]" office:value-type="float" office:value="0.00179722222222222" calcext:value-type="float">
            <text:p>0,00179722222222222000</text:p>
          </table:table-cell>
          <table:table-cell table:formula="of:=[.D1943]-[.D19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[.B1942]+8" office:value-type="float" office:value="15536" calcext:value-type="float">
            <text:p>15536</text:p>
          </table:table-cell>
          <table:table-cell office:value-type="float" office:value="8640000" calcext:value-type="float">
            <text:p>8640000</text:p>
          </table:table-cell>
          <table:table-cell table:formula="of:=[.B1943]/[.C1943]" office:value-type="float" office:value="0.00179814814814815" calcext:value-type="float">
            <text:p>0,00179814814814815000</text:p>
          </table:table-cell>
          <table:table-cell table:formula="of:=[.D1944]-[.D19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[.B1943]+8" office:value-type="float" office:value="15544" calcext:value-type="float">
            <text:p>15544</text:p>
          </table:table-cell>
          <table:table-cell office:value-type="float" office:value="8640000" calcext:value-type="float">
            <text:p>8640000</text:p>
          </table:table-cell>
          <table:table-cell table:formula="of:=[.B1944]/[.C1944]" office:value-type="float" office:value="0.00179907407407407" calcext:value-type="float">
            <text:p>0,00179907407407407000</text:p>
          </table:table-cell>
          <table:table-cell table:formula="of:=[.D1945]-[.D19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[.B1944]+8" office:value-type="float" office:value="15552" calcext:value-type="float">
            <text:p>15552</text:p>
          </table:table-cell>
          <table:table-cell office:value-type="float" office:value="8640000" calcext:value-type="float">
            <text:p>8640000</text:p>
          </table:table-cell>
          <table:table-cell table:formula="of:=[.B1945]/[.C1945]" office:value-type="float" office:value="0.0018" calcext:value-type="float">
            <text:p>0,00180000000000000000</text:p>
          </table:table-cell>
          <table:table-cell table:formula="of:=[.D1946]-[.D19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[.B1945]+8" office:value-type="float" office:value="15560" calcext:value-type="float">
            <text:p>15560</text:p>
          </table:table-cell>
          <table:table-cell office:value-type="float" office:value="8640000" calcext:value-type="float">
            <text:p>8640000</text:p>
          </table:table-cell>
          <table:table-cell table:formula="of:=[.B1946]/[.C1946]" office:value-type="float" office:value="0.00180092592592593" calcext:value-type="float">
            <text:p>0,00180092592592593000</text:p>
          </table:table-cell>
          <table:table-cell table:formula="of:=[.D1947]-[.D19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[.B1946]+8" office:value-type="float" office:value="15568" calcext:value-type="float">
            <text:p>15568</text:p>
          </table:table-cell>
          <table:table-cell office:value-type="float" office:value="8640000" calcext:value-type="float">
            <text:p>8640000</text:p>
          </table:table-cell>
          <table:table-cell table:formula="of:=[.B1947]/[.C1947]" office:value-type="float" office:value="0.00180185185185185" calcext:value-type="float">
            <text:p>0,00180185185185185000</text:p>
          </table:table-cell>
          <table:table-cell table:formula="of:=[.D1948]-[.D19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[.B1947]+8" office:value-type="float" office:value="15576" calcext:value-type="float">
            <text:p>15576</text:p>
          </table:table-cell>
          <table:table-cell office:value-type="float" office:value="8640000" calcext:value-type="float">
            <text:p>8640000</text:p>
          </table:table-cell>
          <table:table-cell table:formula="of:=[.B1948]/[.C1948]" office:value-type="float" office:value="0.00180277777777778" calcext:value-type="float">
            <text:p>0,00180277777777778000</text:p>
          </table:table-cell>
          <table:table-cell table:formula="of:=[.D1949]-[.D19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[.B1948]+8" office:value-type="float" office:value="15584" calcext:value-type="float">
            <text:p>15584</text:p>
          </table:table-cell>
          <table:table-cell office:value-type="float" office:value="8640000" calcext:value-type="float">
            <text:p>8640000</text:p>
          </table:table-cell>
          <table:table-cell table:formula="of:=[.B1949]/[.C1949]" office:value-type="float" office:value="0.0018037037037037" calcext:value-type="float">
            <text:p>0,00180370370370370000</text:p>
          </table:table-cell>
          <table:table-cell table:formula="of:=[.D1950]-[.D19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[.B1949]+8" office:value-type="float" office:value="15592" calcext:value-type="float">
            <text:p>15592</text:p>
          </table:table-cell>
          <table:table-cell office:value-type="float" office:value="8640000" calcext:value-type="float">
            <text:p>8640000</text:p>
          </table:table-cell>
          <table:table-cell table:formula="of:=[.B1950]/[.C1950]" office:value-type="float" office:value="0.00180462962962963" calcext:value-type="float">
            <text:p>0,00180462962962963000</text:p>
          </table:table-cell>
          <table:table-cell table:formula="of:=[.D1951]-[.D19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[.B1950]+8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1951]/[.C1951]" office:value-type="float" office:value="0.00180555555555556" calcext:value-type="float">
            <text:p>0,00180555555555556000</text:p>
          </table:table-cell>
          <table:table-cell table:formula="of:=[.D1952]-[.D19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[.B1951]+8" office:value-type="float" office:value="15608" calcext:value-type="float">
            <text:p>15608</text:p>
          </table:table-cell>
          <table:table-cell office:value-type="float" office:value="8640000" calcext:value-type="float">
            <text:p>8640000</text:p>
          </table:table-cell>
          <table:table-cell table:formula="of:=[.B1952]/[.C1952]" office:value-type="float" office:value="0.00180648148148148" calcext:value-type="float">
            <text:p>0,00180648148148148000</text:p>
          </table:table-cell>
          <table:table-cell table:formula="of:=[.D1953]-[.D19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[.B1952]+8" office:value-type="float" office:value="15616" calcext:value-type="float">
            <text:p>15616</text:p>
          </table:table-cell>
          <table:table-cell office:value-type="float" office:value="8640000" calcext:value-type="float">
            <text:p>8640000</text:p>
          </table:table-cell>
          <table:table-cell table:formula="of:=[.B1953]/[.C1953]" office:value-type="float" office:value="0.00180740740740741" calcext:value-type="float">
            <text:p>0,00180740740740741000</text:p>
          </table:table-cell>
          <table:table-cell table:formula="of:=[.D1954]-[.D19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[.B1953]+8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1954]/[.C1954]" office:value-type="float" office:value="0.00180833333333333" calcext:value-type="float">
            <text:p>0,00180833333333333000</text:p>
          </table:table-cell>
          <table:table-cell table:formula="of:=[.D1955]-[.D19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[.B1954]+8" office:value-type="float" office:value="15632" calcext:value-type="float">
            <text:p>15632</text:p>
          </table:table-cell>
          <table:table-cell office:value-type="float" office:value="8640000" calcext:value-type="float">
            <text:p>8640000</text:p>
          </table:table-cell>
          <table:table-cell table:formula="of:=[.B1955]/[.C1955]" office:value-type="float" office:value="0.00180925925925926" calcext:value-type="float">
            <text:p>0,00180925925925926000</text:p>
          </table:table-cell>
          <table:table-cell table:formula="of:=[.D1956]-[.D1955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[.B1955]+8" office:value-type="float" office:value="15640" calcext:value-type="float">
            <text:p>15640</text:p>
          </table:table-cell>
          <table:table-cell office:value-type="float" office:value="8640000" calcext:value-type="float">
            <text:p>8640000</text:p>
          </table:table-cell>
          <table:table-cell table:formula="of:=[.B1956]/[.C1956]" office:value-type="float" office:value="0.00181018518518519" calcext:value-type="float">
            <text:p>0,00181018518518519000</text:p>
          </table:table-cell>
          <table:table-cell table:formula="of:=[.D1957]-[.D19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[.B1956]+8" office:value-type="float" office:value="15648" calcext:value-type="float">
            <text:p>15648</text:p>
          </table:table-cell>
          <table:table-cell office:value-type="float" office:value="8640000" calcext:value-type="float">
            <text:p>8640000</text:p>
          </table:table-cell>
          <table:table-cell table:formula="of:=[.B1957]/[.C1957]" office:value-type="float" office:value="0.00181111111111111" calcext:value-type="float">
            <text:p>0,00181111111111111000</text:p>
          </table:table-cell>
          <table:table-cell table:formula="of:=[.D1958]-[.D19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[.B1957]+8" office:value-type="float" office:value="15656" calcext:value-type="float">
            <text:p>15656</text:p>
          </table:table-cell>
          <table:table-cell office:value-type="float" office:value="8640000" calcext:value-type="float">
            <text:p>8640000</text:p>
          </table:table-cell>
          <table:table-cell table:formula="of:=[.B1958]/[.C1958]" office:value-type="float" office:value="0.00181203703703704" calcext:value-type="float">
            <text:p>0,00181203703703704000</text:p>
          </table:table-cell>
          <table:table-cell table:formula="of:=[.D1959]-[.D19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[.B1958]+8" office:value-type="float" office:value="15664" calcext:value-type="float">
            <text:p>15664</text:p>
          </table:table-cell>
          <table:table-cell office:value-type="float" office:value="8640000" calcext:value-type="float">
            <text:p>8640000</text:p>
          </table:table-cell>
          <table:table-cell table:formula="of:=[.B1959]/[.C1959]" office:value-type="float" office:value="0.00181296296296296" calcext:value-type="float">
            <text:p>0,00181296296296296000</text:p>
          </table:table-cell>
          <table:table-cell table:formula="of:=[.D1960]-[.D19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[.B1959]+8" office:value-type="float" office:value="15672" calcext:value-type="float">
            <text:p>15672</text:p>
          </table:table-cell>
          <table:table-cell office:value-type="float" office:value="8640000" calcext:value-type="float">
            <text:p>8640000</text:p>
          </table:table-cell>
          <table:table-cell table:formula="of:=[.B1960]/[.C1960]" office:value-type="float" office:value="0.00181388888888889" calcext:value-type="float">
            <text:p>0,00181388888888889000</text:p>
          </table:table-cell>
          <table:table-cell table:formula="of:=[.D1961]-[.D19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[.B1960]+8" office:value-type="float" office:value="15680" calcext:value-type="float">
            <text:p>15680</text:p>
          </table:table-cell>
          <table:table-cell office:value-type="float" office:value="8640000" calcext:value-type="float">
            <text:p>8640000</text:p>
          </table:table-cell>
          <table:table-cell table:formula="of:=[.B1961]/[.C1961]" office:value-type="float" office:value="0.00181481481481482" calcext:value-type="float">
            <text:p>0,00181481481481482000</text:p>
          </table:table-cell>
          <table:table-cell table:formula="of:=[.D1962]-[.D19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[.B1961]+8" office:value-type="float" office:value="15688" calcext:value-type="float">
            <text:p>15688</text:p>
          </table:table-cell>
          <table:table-cell office:value-type="float" office:value="8640000" calcext:value-type="float">
            <text:p>8640000</text:p>
          </table:table-cell>
          <table:table-cell table:formula="of:=[.B1962]/[.C1962]" office:value-type="float" office:value="0.00181574074074074" calcext:value-type="float">
            <text:p>0,00181574074074074000</text:p>
          </table:table-cell>
          <table:table-cell table:formula="of:=[.D1963]-[.D19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[.B1962]+8" office:value-type="float" office:value="15696" calcext:value-type="float">
            <text:p>15696</text:p>
          </table:table-cell>
          <table:table-cell office:value-type="float" office:value="8640000" calcext:value-type="float">
            <text:p>8640000</text:p>
          </table:table-cell>
          <table:table-cell table:formula="of:=[.B1963]/[.C1963]" office:value-type="float" office:value="0.00181666666666667" calcext:value-type="float">
            <text:p>0,00181666666666667000</text:p>
          </table:table-cell>
          <table:table-cell table:formula="of:=[.D1964]-[.D19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[.B1963]+8" office:value-type="float" office:value="15704" calcext:value-type="float">
            <text:p>15704</text:p>
          </table:table-cell>
          <table:table-cell office:value-type="float" office:value="8640000" calcext:value-type="float">
            <text:p>8640000</text:p>
          </table:table-cell>
          <table:table-cell table:formula="of:=[.B1964]/[.C1964]" office:value-type="float" office:value="0.00181759259259259" calcext:value-type="float">
            <text:p>0,00181759259259259000</text:p>
          </table:table-cell>
          <table:table-cell table:formula="of:=[.D1965]-[.D19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[.B1964]+8" office:value-type="float" office:value="15712" calcext:value-type="float">
            <text:p>15712</text:p>
          </table:table-cell>
          <table:table-cell office:value-type="float" office:value="8640000" calcext:value-type="float">
            <text:p>8640000</text:p>
          </table:table-cell>
          <table:table-cell table:formula="of:=[.B1965]/[.C1965]" office:value-type="float" office:value="0.00181851851851852" calcext:value-type="float">
            <text:p>0,00181851851851852000</text:p>
          </table:table-cell>
          <table:table-cell table:formula="of:=[.D1966]-[.D19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[.B1965]+8" office:value-type="float" office:value="15720" calcext:value-type="float">
            <text:p>15720</text:p>
          </table:table-cell>
          <table:table-cell office:value-type="float" office:value="8640000" calcext:value-type="float">
            <text:p>8640000</text:p>
          </table:table-cell>
          <table:table-cell table:formula="of:=[.B1966]/[.C1966]" office:value-type="float" office:value="0.00181944444444444" calcext:value-type="float">
            <text:p>0,00181944444444444000</text:p>
          </table:table-cell>
          <table:table-cell table:formula="of:=[.D1967]-[.D19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[.B1966]+8" office:value-type="float" office:value="15728" calcext:value-type="float">
            <text:p>15728</text:p>
          </table:table-cell>
          <table:table-cell office:value-type="float" office:value="8640000" calcext:value-type="float">
            <text:p>8640000</text:p>
          </table:table-cell>
          <table:table-cell table:formula="of:=[.B1967]/[.C1967]" office:value-type="float" office:value="0.00182037037037037" calcext:value-type="float">
            <text:p>0,00182037037037037000</text:p>
          </table:table-cell>
          <table:table-cell table:formula="of:=[.D1968]-[.D19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[.B1967]+8" office:value-type="float" office:value="15736" calcext:value-type="float">
            <text:p>15736</text:p>
          </table:table-cell>
          <table:table-cell office:value-type="float" office:value="8640000" calcext:value-type="float">
            <text:p>8640000</text:p>
          </table:table-cell>
          <table:table-cell table:formula="of:=[.B1968]/[.C1968]" office:value-type="float" office:value="0.0018212962962963" calcext:value-type="float">
            <text:p>0,00182129629629630000</text:p>
          </table:table-cell>
          <table:table-cell table:formula="of:=[.D1969]-[.D19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B1968]+8" office:value-type="float" office:value="15744" calcext:value-type="float">
            <text:p>15744</text:p>
          </table:table-cell>
          <table:table-cell office:value-type="float" office:value="8640000" calcext:value-type="float">
            <text:p>8640000</text:p>
          </table:table-cell>
          <table:table-cell table:formula="of:=[.B1969]/[.C1969]" office:value-type="float" office:value="0.00182222222222222" calcext:value-type="float">
            <text:p>0,00182222222222222000</text:p>
          </table:table-cell>
          <table:table-cell table:formula="of:=[.D1970]-[.D19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[.B1969]+8" office:value-type="float" office:value="15752" calcext:value-type="float">
            <text:p>15752</text:p>
          </table:table-cell>
          <table:table-cell office:value-type="float" office:value="8640000" calcext:value-type="float">
            <text:p>8640000</text:p>
          </table:table-cell>
          <table:table-cell table:formula="of:=[.B1970]/[.C1970]" office:value-type="float" office:value="0.00182314814814815" calcext:value-type="float">
            <text:p>0,00182314814814815000</text:p>
          </table:table-cell>
          <table:table-cell table:formula="of:=[.D1971]-[.D19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[.B1970]+8" office:value-type="float" office:value="15760" calcext:value-type="float">
            <text:p>15760</text:p>
          </table:table-cell>
          <table:table-cell office:value-type="float" office:value="8640000" calcext:value-type="float">
            <text:p>8640000</text:p>
          </table:table-cell>
          <table:table-cell table:formula="of:=[.B1971]/[.C1971]" office:value-type="float" office:value="0.00182407407407407" calcext:value-type="float">
            <text:p>0,00182407407407407000</text:p>
          </table:table-cell>
          <table:table-cell table:formula="of:=[.D1972]-[.D19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[.B1971]+8" office:value-type="float" office:value="15768" calcext:value-type="float">
            <text:p>15768</text:p>
          </table:table-cell>
          <table:table-cell office:value-type="float" office:value="8640000" calcext:value-type="float">
            <text:p>8640000</text:p>
          </table:table-cell>
          <table:table-cell table:formula="of:=[.B1972]/[.C1972]" office:value-type="float" office:value="0.001825" calcext:value-type="float">
            <text:p>0,00182500000000000000</text:p>
          </table:table-cell>
          <table:table-cell table:formula="of:=[.D1973]-[.D19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[.B1972]+8" office:value-type="float" office:value="15776" calcext:value-type="float">
            <text:p>15776</text:p>
          </table:table-cell>
          <table:table-cell office:value-type="float" office:value="8640000" calcext:value-type="float">
            <text:p>8640000</text:p>
          </table:table-cell>
          <table:table-cell table:formula="of:=[.B1973]/[.C1973]" office:value-type="float" office:value="0.00182592592592593" calcext:value-type="float">
            <text:p>0,00182592592592593000</text:p>
          </table:table-cell>
          <table:table-cell table:formula="of:=[.D1974]-[.D19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[.B1973]+8" office:value-type="float" office:value="15784" calcext:value-type="float">
            <text:p>15784</text:p>
          </table:table-cell>
          <table:table-cell office:value-type="float" office:value="8640000" calcext:value-type="float">
            <text:p>8640000</text:p>
          </table:table-cell>
          <table:table-cell table:formula="of:=[.B1974]/[.C1974]" office:value-type="float" office:value="0.00182685185185185" calcext:value-type="float">
            <text:p>0,00182685185185185000</text:p>
          </table:table-cell>
          <table:table-cell table:formula="of:=[.D1975]-[.D19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[.B1974]+8" office:value-type="float" office:value="15792" calcext:value-type="float">
            <text:p>15792</text:p>
          </table:table-cell>
          <table:table-cell office:value-type="float" office:value="8640000" calcext:value-type="float">
            <text:p>8640000</text:p>
          </table:table-cell>
          <table:table-cell table:formula="of:=[.B1975]/[.C1975]" office:value-type="float" office:value="0.00182777777777778" calcext:value-type="float">
            <text:p>0,00182777777777778000</text:p>
          </table:table-cell>
          <table:table-cell table:formula="of:=[.D1976]-[.D19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.B1975]+8" office:value-type="float" office:value="15800" calcext:value-type="float">
            <text:p>15800</text:p>
          </table:table-cell>
          <table:table-cell office:value-type="float" office:value="8640000" calcext:value-type="float">
            <text:p>8640000</text:p>
          </table:table-cell>
          <table:table-cell table:formula="of:=[.B1976]/[.C1976]" office:value-type="float" office:value="0.0018287037037037" calcext:value-type="float">
            <text:p>0,00182870370370370000</text:p>
          </table:table-cell>
          <table:table-cell table:formula="of:=[.D1977]-[.D19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B1976]+8" office:value-type="float" office:value="15808" calcext:value-type="float">
            <text:p>15808</text:p>
          </table:table-cell>
          <table:table-cell office:value-type="float" office:value="8640000" calcext:value-type="float">
            <text:p>8640000</text:p>
          </table:table-cell>
          <table:table-cell table:formula="of:=[.B1977]/[.C1977]" office:value-type="float" office:value="0.00182962962962963" calcext:value-type="float">
            <text:p>0,00182962962962963000</text:p>
          </table:table-cell>
          <table:table-cell table:formula="of:=[.D1978]-[.D19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.B1977]+8" office:value-type="float" office:value="15816" calcext:value-type="float">
            <text:p>15816</text:p>
          </table:table-cell>
          <table:table-cell office:value-type="float" office:value="8640000" calcext:value-type="float">
            <text:p>8640000</text:p>
          </table:table-cell>
          <table:table-cell table:formula="of:=[.B1978]/[.C1978]" office:value-type="float" office:value="0.00183055555555556" calcext:value-type="float">
            <text:p>0,00183055555555556000</text:p>
          </table:table-cell>
          <table:table-cell table:formula="of:=[.D1979]-[.D19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.B1978]+8" office:value-type="float" office:value="15824" calcext:value-type="float">
            <text:p>15824</text:p>
          </table:table-cell>
          <table:table-cell office:value-type="float" office:value="8640000" calcext:value-type="float">
            <text:p>8640000</text:p>
          </table:table-cell>
          <table:table-cell table:formula="of:=[.B1979]/[.C1979]" office:value-type="float" office:value="0.00183148148148148" calcext:value-type="float">
            <text:p>0,00183148148148148000</text:p>
          </table:table-cell>
          <table:table-cell table:formula="of:=[.D1980]-[.D19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.B1979]+8" office:value-type="float" office:value="15832" calcext:value-type="float">
            <text:p>15832</text:p>
          </table:table-cell>
          <table:table-cell office:value-type="float" office:value="8640000" calcext:value-type="float">
            <text:p>8640000</text:p>
          </table:table-cell>
          <table:table-cell table:formula="of:=[.B1980]/[.C1980]" office:value-type="float" office:value="0.00183240740740741" calcext:value-type="float">
            <text:p>0,00183240740740741000</text:p>
          </table:table-cell>
          <table:table-cell table:formula="of:=[.D1981]-[.D19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.B1980]+8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1981]/[.C1981]" office:value-type="float" office:value="0.00183333333333333" calcext:value-type="float">
            <text:p>0,00183333333333333000</text:p>
          </table:table-cell>
          <table:table-cell table:formula="of:=[.D1982]-[.D19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.B1981]+8" office:value-type="float" office:value="15848" calcext:value-type="float">
            <text:p>15848</text:p>
          </table:table-cell>
          <table:table-cell office:value-type="float" office:value="8640000" calcext:value-type="float">
            <text:p>8640000</text:p>
          </table:table-cell>
          <table:table-cell table:formula="of:=[.B1982]/[.C1982]" office:value-type="float" office:value="0.00183425925925926" calcext:value-type="float">
            <text:p>0,00183425925925926000</text:p>
          </table:table-cell>
          <table:table-cell table:formula="of:=[.D1983]-[.D19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.B1982]+8" office:value-type="float" office:value="15856" calcext:value-type="float">
            <text:p>15856</text:p>
          </table:table-cell>
          <table:table-cell office:value-type="float" office:value="8640000" calcext:value-type="float">
            <text:p>8640000</text:p>
          </table:table-cell>
          <table:table-cell table:formula="of:=[.B1983]/[.C1983]" office:value-type="float" office:value="0.00183518518518519" calcext:value-type="float">
            <text:p>0,00183518518518519000</text:p>
          </table:table-cell>
          <table:table-cell table:formula="of:=[.D1984]-[.D19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.B1983]+8" office:value-type="float" office:value="15864" calcext:value-type="float">
            <text:p>15864</text:p>
          </table:table-cell>
          <table:table-cell office:value-type="float" office:value="8640000" calcext:value-type="float">
            <text:p>8640000</text:p>
          </table:table-cell>
          <table:table-cell table:formula="of:=[.B1984]/[.C1984]" office:value-type="float" office:value="0.00183611111111111" calcext:value-type="float">
            <text:p>0,00183611111111111000</text:p>
          </table:table-cell>
          <table:table-cell table:formula="of:=[.D1985]-[.D19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.B1984]+8" office:value-type="float" office:value="15872" calcext:value-type="float">
            <text:p>15872</text:p>
          </table:table-cell>
          <table:table-cell office:value-type="float" office:value="8640000" calcext:value-type="float">
            <text:p>8640000</text:p>
          </table:table-cell>
          <table:table-cell table:formula="of:=[.B1985]/[.C1985]" office:value-type="float" office:value="0.00183703703703704" calcext:value-type="float">
            <text:p>0,00183703703703704000</text:p>
          </table:table-cell>
          <table:table-cell table:formula="of:=[.D1986]-[.D19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B1985]+8" office:value-type="float" office:value="15880" calcext:value-type="float">
            <text:p>15880</text:p>
          </table:table-cell>
          <table:table-cell office:value-type="float" office:value="8640000" calcext:value-type="float">
            <text:p>8640000</text:p>
          </table:table-cell>
          <table:table-cell table:formula="of:=[.B1986]/[.C1986]" office:value-type="float" office:value="0.00183796296296296" calcext:value-type="float">
            <text:p>0,00183796296296296000</text:p>
          </table:table-cell>
          <table:table-cell table:formula="of:=[.D1987]-[.D19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B1986]+8" office:value-type="float" office:value="15888" calcext:value-type="float">
            <text:p>15888</text:p>
          </table:table-cell>
          <table:table-cell office:value-type="float" office:value="8640000" calcext:value-type="float">
            <text:p>8640000</text:p>
          </table:table-cell>
          <table:table-cell table:formula="of:=[.B1987]/[.C1987]" office:value-type="float" office:value="0.00183888888888889" calcext:value-type="float">
            <text:p>0,00183888888888889000</text:p>
          </table:table-cell>
          <table:table-cell table:formula="of:=[.D1988]-[.D19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.B1987]+8" office:value-type="float" office:value="15896" calcext:value-type="float">
            <text:p>15896</text:p>
          </table:table-cell>
          <table:table-cell office:value-type="float" office:value="8640000" calcext:value-type="float">
            <text:p>8640000</text:p>
          </table:table-cell>
          <table:table-cell table:formula="of:=[.B1988]/[.C1988]" office:value-type="float" office:value="0.00183981481481481" calcext:value-type="float">
            <text:p>0,00183981481481481000</text:p>
          </table:table-cell>
          <table:table-cell table:formula="of:=[.D1989]-[.D19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.B1988]+8" office:value-type="float" office:value="15904" calcext:value-type="float">
            <text:p>15904</text:p>
          </table:table-cell>
          <table:table-cell office:value-type="float" office:value="8640000" calcext:value-type="float">
            <text:p>8640000</text:p>
          </table:table-cell>
          <table:table-cell table:formula="of:=[.B1989]/[.C1989]" office:value-type="float" office:value="0.00184074074074074" calcext:value-type="float">
            <text:p>0,00184074074074074000</text:p>
          </table:table-cell>
          <table:table-cell table:formula="of:=[.D1990]-[.D19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.B1989]+8" office:value-type="float" office:value="15912" calcext:value-type="float">
            <text:p>15912</text:p>
          </table:table-cell>
          <table:table-cell office:value-type="float" office:value="8640000" calcext:value-type="float">
            <text:p>8640000</text:p>
          </table:table-cell>
          <table:table-cell table:formula="of:=[.B1990]/[.C1990]" office:value-type="float" office:value="0.00184166666666667" calcext:value-type="float">
            <text:p>0,00184166666666667000</text:p>
          </table:table-cell>
          <table:table-cell table:formula="of:=[.D1991]-[.D19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.B1990]+8" office:value-type="float" office:value="15920" calcext:value-type="float">
            <text:p>15920</text:p>
          </table:table-cell>
          <table:table-cell office:value-type="float" office:value="8640000" calcext:value-type="float">
            <text:p>8640000</text:p>
          </table:table-cell>
          <table:table-cell table:formula="of:=[.B1991]/[.C1991]" office:value-type="float" office:value="0.00184259259259259" calcext:value-type="float">
            <text:p>0,00184259259259259000</text:p>
          </table:table-cell>
          <table:table-cell table:formula="of:=[.D1992]-[.D19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.B1991]+8" office:value-type="float" office:value="15928" calcext:value-type="float">
            <text:p>15928</text:p>
          </table:table-cell>
          <table:table-cell office:value-type="float" office:value="8640000" calcext:value-type="float">
            <text:p>8640000</text:p>
          </table:table-cell>
          <table:table-cell table:formula="of:=[.B1992]/[.C1992]" office:value-type="float" office:value="0.00184351851851852" calcext:value-type="float">
            <text:p>0,00184351851851852000</text:p>
          </table:table-cell>
          <table:table-cell table:formula="of:=[.D1993]-[.D19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.B1992]+8" office:value-type="float" office:value="15936" calcext:value-type="float">
            <text:p>15936</text:p>
          </table:table-cell>
          <table:table-cell office:value-type="float" office:value="8640000" calcext:value-type="float">
            <text:p>8640000</text:p>
          </table:table-cell>
          <table:table-cell table:formula="of:=[.B1993]/[.C1993]" office:value-type="float" office:value="0.00184444444444444" calcext:value-type="float">
            <text:p>0,00184444444444444000</text:p>
          </table:table-cell>
          <table:table-cell table:formula="of:=[.D1994]-[.D19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.B1993]+8" office:value-type="float" office:value="15944" calcext:value-type="float">
            <text:p>15944</text:p>
          </table:table-cell>
          <table:table-cell office:value-type="float" office:value="8640000" calcext:value-type="float">
            <text:p>8640000</text:p>
          </table:table-cell>
          <table:table-cell table:formula="of:=[.B1994]/[.C1994]" office:value-type="float" office:value="0.00184537037037037" calcext:value-type="float">
            <text:p>0,00184537037037037000</text:p>
          </table:table-cell>
          <table:table-cell table:formula="of:=[.D1995]-[.D1994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.B1994]+8" office:value-type="float" office:value="15952" calcext:value-type="float">
            <text:p>15952</text:p>
          </table:table-cell>
          <table:table-cell office:value-type="float" office:value="8640000" calcext:value-type="float">
            <text:p>8640000</text:p>
          </table:table-cell>
          <table:table-cell table:formula="of:=[.B1995]/[.C1995]" office:value-type="float" office:value="0.0018462962962963" calcext:value-type="float">
            <text:p>0,00184629629629630000</text:p>
          </table:table-cell>
          <table:table-cell table:formula="of:=[.D1996]-[.D19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.B1995]+8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1996]/[.C1996]" office:value-type="float" office:value="0.00184722222222222" calcext:value-type="float">
            <text:p>0,00184722222222222000</text:p>
          </table:table-cell>
          <table:table-cell table:formula="of:=[.D1997]-[.D19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.B1996]+8" office:value-type="float" office:value="15968" calcext:value-type="float">
            <text:p>15968</text:p>
          </table:table-cell>
          <table:table-cell office:value-type="float" office:value="8640000" calcext:value-type="float">
            <text:p>8640000</text:p>
          </table:table-cell>
          <table:table-cell table:formula="of:=[.B1997]/[.C1997]" office:value-type="float" office:value="0.00184814814814815" calcext:value-type="float">
            <text:p>0,00184814814814815000</text:p>
          </table:table-cell>
          <table:table-cell table:formula="of:=[.D1998]-[.D19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.B1997]+8" office:value-type="float" office:value="15976" calcext:value-type="float">
            <text:p>15976</text:p>
          </table:table-cell>
          <table:table-cell office:value-type="float" office:value="8640000" calcext:value-type="float">
            <text:p>8640000</text:p>
          </table:table-cell>
          <table:table-cell table:formula="of:=[.B1998]/[.C1998]" office:value-type="float" office:value="0.00184907407407407" calcext:value-type="float">
            <text:p>0,00184907407407407000</text:p>
          </table:table-cell>
          <table:table-cell table:formula="of:=[.D1999]-[.D19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.B1998]+8" office:value-type="float" office:value="15984" calcext:value-type="float">
            <text:p>15984</text:p>
          </table:table-cell>
          <table:table-cell office:value-type="float" office:value="8640000" calcext:value-type="float">
            <text:p>8640000</text:p>
          </table:table-cell>
          <table:table-cell table:formula="of:=[.B1999]/[.C1999]" office:value-type="float" office:value="0.00185" calcext:value-type="float">
            <text:p>0,00185000000000000000</text:p>
          </table:table-cell>
          <table:table-cell table:formula="of:=[.D2000]-[.D19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.B1999]+8" office:value-type="float" office:value="15992" calcext:value-type="float">
            <text:p>15992</text:p>
          </table:table-cell>
          <table:table-cell office:value-type="float" office:value="8640000" calcext:value-type="float">
            <text:p>8640000</text:p>
          </table:table-cell>
          <table:table-cell table:formula="of:=[.B2000]/[.C2000]" office:value-type="float" office:value="0.00185092592592593" calcext:value-type="float">
            <text:p>0,00185092592592593000</text:p>
          </table:table-cell>
          <table:table-cell table:formula="of:=[.D2001]-[.D20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000]+8" office:value-type="float" office:value="16000" calcext:value-type="float">
            <text:p>16000</text:p>
          </table:table-cell>
          <table:table-cell office:value-type="float" office:value="8640000" calcext:value-type="float">
            <text:p>8640000</text:p>
          </table:table-cell>
          <table:table-cell table:formula="of:=[.B2001]/[.C2001]" office:value-type="float" office:value="0.00185185185185185" calcext:value-type="float">
            <text:p>0,00185185185185185000</text:p>
          </table:table-cell>
          <table:table-cell table:formula="of:=[.D2002]-[.D20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B2001]+8" office:value-type="float" office:value="16008" calcext:value-type="float">
            <text:p>16008</text:p>
          </table:table-cell>
          <table:table-cell office:value-type="float" office:value="8640000" calcext:value-type="float">
            <text:p>8640000</text:p>
          </table:table-cell>
          <table:table-cell table:formula="of:=[.B2002]/[.C2002]" office:value-type="float" office:value="0.00185277777777778" calcext:value-type="float">
            <text:p>0,00185277777777778000</text:p>
          </table:table-cell>
          <table:table-cell table:formula="of:=[.D2003]-[.D20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.B2002]+8" office:value-type="float" office:value="16016" calcext:value-type="float">
            <text:p>16016</text:p>
          </table:table-cell>
          <table:table-cell office:value-type="float" office:value="8640000" calcext:value-type="float">
            <text:p>8640000</text:p>
          </table:table-cell>
          <table:table-cell table:formula="of:=[.B2003]/[.C2003]" office:value-type="float" office:value="0.0018537037037037" calcext:value-type="float">
            <text:p>0,00185370370370370000</text:p>
          </table:table-cell>
          <table:table-cell table:formula="of:=[.D2004]-[.D20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B2003]+8" office:value-type="float" office:value="16024" calcext:value-type="float">
            <text:p>16024</text:p>
          </table:table-cell>
          <table:table-cell office:value-type="float" office:value="8640000" calcext:value-type="float">
            <text:p>8640000</text:p>
          </table:table-cell>
          <table:table-cell table:formula="of:=[.B2004]/[.C2004]" office:value-type="float" office:value="0.00185462962962963" calcext:value-type="float">
            <text:p>0,00185462962962963000</text:p>
          </table:table-cell>
          <table:table-cell table:formula="of:=[.D2005]-[.D20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B2004]+8" office:value-type="float" office:value="16032" calcext:value-type="float">
            <text:p>16032</text:p>
          </table:table-cell>
          <table:table-cell office:value-type="float" office:value="8640000" calcext:value-type="float">
            <text:p>8640000</text:p>
          </table:table-cell>
          <table:table-cell table:formula="of:=[.B2005]/[.C2005]" office:value-type="float" office:value="0.00185555555555556" calcext:value-type="float">
            <text:p>0,00185555555555556000</text:p>
          </table:table-cell>
          <table:table-cell table:formula="of:=[.D2006]-[.D20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.B2005]+8" office:value-type="float" office:value="16040" calcext:value-type="float">
            <text:p>16040</text:p>
          </table:table-cell>
          <table:table-cell office:value-type="float" office:value="8640000" calcext:value-type="float">
            <text:p>8640000</text:p>
          </table:table-cell>
          <table:table-cell table:formula="of:=[.B2006]/[.C2006]" office:value-type="float" office:value="0.00185648148148148" calcext:value-type="float">
            <text:p>0,00185648148148148000</text:p>
          </table:table-cell>
          <table:table-cell table:formula="of:=[.D2007]-[.D20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.B2006]+8" office:value-type="float" office:value="16048" calcext:value-type="float">
            <text:p>16048</text:p>
          </table:table-cell>
          <table:table-cell office:value-type="float" office:value="8640000" calcext:value-type="float">
            <text:p>8640000</text:p>
          </table:table-cell>
          <table:table-cell table:formula="of:=[.B2007]/[.C2007]" office:value-type="float" office:value="0.00185740740740741" calcext:value-type="float">
            <text:p>0,00185740740740741000</text:p>
          </table:table-cell>
          <table:table-cell table:formula="of:=[.D2008]-[.D20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B2007]+8" office:value-type="float" office:value="16056" calcext:value-type="float">
            <text:p>16056</text:p>
          </table:table-cell>
          <table:table-cell office:value-type="float" office:value="8640000" calcext:value-type="float">
            <text:p>8640000</text:p>
          </table:table-cell>
          <table:table-cell table:formula="of:=[.B2008]/[.C2008]" office:value-type="float" office:value="0.00185833333333333" calcext:value-type="float">
            <text:p>0,00185833333333333000</text:p>
          </table:table-cell>
          <table:table-cell table:formula="of:=[.D2009]-[.D20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B2008]+8" office:value-type="float" office:value="16064" calcext:value-type="float">
            <text:p>16064</text:p>
          </table:table-cell>
          <table:table-cell office:value-type="float" office:value="8640000" calcext:value-type="float">
            <text:p>8640000</text:p>
          </table:table-cell>
          <table:table-cell table:formula="of:=[.B2009]/[.C2009]" office:value-type="float" office:value="0.00185925925925926" calcext:value-type="float">
            <text:p>0,00185925925925926000</text:p>
          </table:table-cell>
          <table:table-cell table:formula="of:=[.D2010]-[.D20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B2009]+8" office:value-type="float" office:value="16072" calcext:value-type="float">
            <text:p>16072</text:p>
          </table:table-cell>
          <table:table-cell office:value-type="float" office:value="8640000" calcext:value-type="float">
            <text:p>8640000</text:p>
          </table:table-cell>
          <table:table-cell table:formula="of:=[.B2010]/[.C2010]" office:value-type="float" office:value="0.00186018518518519" calcext:value-type="float">
            <text:p>0,00186018518518519000</text:p>
          </table:table-cell>
          <table:table-cell table:formula="of:=[.D2011]-[.D20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B2010]+8" office:value-type="float" office:value="16080" calcext:value-type="float">
            <text:p>16080</text:p>
          </table:table-cell>
          <table:table-cell office:value-type="float" office:value="8640000" calcext:value-type="float">
            <text:p>8640000</text:p>
          </table:table-cell>
          <table:table-cell table:formula="of:=[.B2011]/[.C2011]" office:value-type="float" office:value="0.00186111111111111" calcext:value-type="float">
            <text:p>0,00186111111111111000</text:p>
          </table:table-cell>
          <table:table-cell table:formula="of:=[.D2012]-[.D20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B2011]+8" office:value-type="float" office:value="16088" calcext:value-type="float">
            <text:p>16088</text:p>
          </table:table-cell>
          <table:table-cell office:value-type="float" office:value="8640000" calcext:value-type="float">
            <text:p>8640000</text:p>
          </table:table-cell>
          <table:table-cell table:formula="of:=[.B2012]/[.C2012]" office:value-type="float" office:value="0.00186203703703704" calcext:value-type="float">
            <text:p>0,00186203703703704000</text:p>
          </table:table-cell>
          <table:table-cell table:formula="of:=[.D2013]-[.D20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B2012]+8" office:value-type="float" office:value="16096" calcext:value-type="float">
            <text:p>16096</text:p>
          </table:table-cell>
          <table:table-cell office:value-type="float" office:value="8640000" calcext:value-type="float">
            <text:p>8640000</text:p>
          </table:table-cell>
          <table:table-cell table:formula="of:=[.B2013]/[.C2013]" office:value-type="float" office:value="0.00186296296296296" calcext:value-type="float">
            <text:p>0,00186296296296296000</text:p>
          </table:table-cell>
          <table:table-cell table:formula="of:=[.D2014]-[.D20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B2013]+8" office:value-type="float" office:value="16104" calcext:value-type="float">
            <text:p>16104</text:p>
          </table:table-cell>
          <table:table-cell office:value-type="float" office:value="8640000" calcext:value-type="float">
            <text:p>8640000</text:p>
          </table:table-cell>
          <table:table-cell table:formula="of:=[.B2014]/[.C2014]" office:value-type="float" office:value="0.00186388888888889" calcext:value-type="float">
            <text:p>0,00186388888888889000</text:p>
          </table:table-cell>
          <table:table-cell table:formula="of:=[.D2015]-[.D20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B2014]+8" office:value-type="float" office:value="16112" calcext:value-type="float">
            <text:p>16112</text:p>
          </table:table-cell>
          <table:table-cell office:value-type="float" office:value="8640000" calcext:value-type="float">
            <text:p>8640000</text:p>
          </table:table-cell>
          <table:table-cell table:formula="of:=[.B2015]/[.C2015]" office:value-type="float" office:value="0.00186481481481481" calcext:value-type="float">
            <text:p>0,00186481481481481000</text:p>
          </table:table-cell>
          <table:table-cell table:formula="of:=[.D2016]-[.D20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B2015]+8" office:value-type="float" office:value="16120" calcext:value-type="float">
            <text:p>16120</text:p>
          </table:table-cell>
          <table:table-cell office:value-type="float" office:value="8640000" calcext:value-type="float">
            <text:p>8640000</text:p>
          </table:table-cell>
          <table:table-cell table:formula="of:=[.B2016]/[.C2016]" office:value-type="float" office:value="0.00186574074074074" calcext:value-type="float">
            <text:p>0,00186574074074074000</text:p>
          </table:table-cell>
          <table:table-cell table:formula="of:=[.D2017]-[.D20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B2016]+8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2017]/[.C2017]" office:value-type="float" office:value="0.00186666666666667" calcext:value-type="float">
            <text:p>0,00186666666666667000</text:p>
          </table:table-cell>
          <table:table-cell table:formula="of:=[.D2018]-[.D20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B2017]+8" office:value-type="float" office:value="16136" calcext:value-type="float">
            <text:p>16136</text:p>
          </table:table-cell>
          <table:table-cell office:value-type="float" office:value="8640000" calcext:value-type="float">
            <text:p>8640000</text:p>
          </table:table-cell>
          <table:table-cell table:formula="of:=[.B2018]/[.C2018]" office:value-type="float" office:value="0.00186759259259259" calcext:value-type="float">
            <text:p>0,00186759259259259000</text:p>
          </table:table-cell>
          <table:table-cell table:formula="of:=[.D2019]-[.D20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B2018]+8" office:value-type="float" office:value="16144" calcext:value-type="float">
            <text:p>16144</text:p>
          </table:table-cell>
          <table:table-cell office:value-type="float" office:value="8640000" calcext:value-type="float">
            <text:p>8640000</text:p>
          </table:table-cell>
          <table:table-cell table:formula="of:=[.B2019]/[.C2019]" office:value-type="float" office:value="0.00186851851851852" calcext:value-type="float">
            <text:p>0,00186851851851852000</text:p>
          </table:table-cell>
          <table:table-cell table:formula="of:=[.D2020]-[.D20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B2019]+8" office:value-type="float" office:value="16152" calcext:value-type="float">
            <text:p>16152</text:p>
          </table:table-cell>
          <table:table-cell office:value-type="float" office:value="8640000" calcext:value-type="float">
            <text:p>8640000</text:p>
          </table:table-cell>
          <table:table-cell table:formula="of:=[.B2020]/[.C2020]" office:value-type="float" office:value="0.00186944444444444" calcext:value-type="float">
            <text:p>0,00186944444444444000</text:p>
          </table:table-cell>
          <table:table-cell table:formula="of:=[.D2021]-[.D20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[.B2020]+8" office:value-type="float" office:value="16160" calcext:value-type="float">
            <text:p>16160</text:p>
          </table:table-cell>
          <table:table-cell office:value-type="float" office:value="8640000" calcext:value-type="float">
            <text:p>8640000</text:p>
          </table:table-cell>
          <table:table-cell table:formula="of:=[.B2021]/[.C2021]" office:value-type="float" office:value="0.00187037037037037" calcext:value-type="float">
            <text:p>0,00187037037037037000</text:p>
          </table:table-cell>
          <table:table-cell table:formula="of:=[.D2022]-[.D20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[.B2021]+8" office:value-type="float" office:value="16168" calcext:value-type="float">
            <text:p>16168</text:p>
          </table:table-cell>
          <table:table-cell office:value-type="float" office:value="8640000" calcext:value-type="float">
            <text:p>8640000</text:p>
          </table:table-cell>
          <table:table-cell table:formula="of:=[.B2022]/[.C2022]" office:value-type="float" office:value="0.0018712962962963" calcext:value-type="float">
            <text:p>0,00187129629629630000</text:p>
          </table:table-cell>
          <table:table-cell table:formula="of:=[.D2023]-[.D20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B2022]+8" office:value-type="float" office:value="16176" calcext:value-type="float">
            <text:p>16176</text:p>
          </table:table-cell>
          <table:table-cell office:value-type="float" office:value="8640000" calcext:value-type="float">
            <text:p>8640000</text:p>
          </table:table-cell>
          <table:table-cell table:formula="of:=[.B2023]/[.C2023]" office:value-type="float" office:value="0.00187222222222222" calcext:value-type="float">
            <text:p>0,00187222222222222000</text:p>
          </table:table-cell>
          <table:table-cell table:formula="of:=[.D2024]-[.D20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[.B2023]+8" office:value-type="float" office:value="16184" calcext:value-type="float">
            <text:p>16184</text:p>
          </table:table-cell>
          <table:table-cell office:value-type="float" office:value="8640000" calcext:value-type="float">
            <text:p>8640000</text:p>
          </table:table-cell>
          <table:table-cell table:formula="of:=[.B2024]/[.C2024]" office:value-type="float" office:value="0.00187314814814815" calcext:value-type="float">
            <text:p>0,00187314814814815000</text:p>
          </table:table-cell>
          <table:table-cell table:formula="of:=[.D2025]-[.D20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[.B2024]+8" office:value-type="float" office:value="16192" calcext:value-type="float">
            <text:p>16192</text:p>
          </table:table-cell>
          <table:table-cell office:value-type="float" office:value="8640000" calcext:value-type="float">
            <text:p>8640000</text:p>
          </table:table-cell>
          <table:table-cell table:formula="of:=[.B2025]/[.C2025]" office:value-type="float" office:value="0.00187407407407407" calcext:value-type="float">
            <text:p>0,00187407407407407000</text:p>
          </table:table-cell>
          <table:table-cell table:formula="of:=[.D2026]-[.D20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.B2025]+8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2026]/[.C2026]" office:value-type="float" office:value="0.001875" calcext:value-type="float">
            <text:p>0,00187500000000000000</text:p>
          </table:table-cell>
          <table:table-cell table:formula="of:=[.D2027]-[.D20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[.B2026]+8" office:value-type="float" office:value="16208" calcext:value-type="float">
            <text:p>16208</text:p>
          </table:table-cell>
          <table:table-cell office:value-type="float" office:value="8640000" calcext:value-type="float">
            <text:p>8640000</text:p>
          </table:table-cell>
          <table:table-cell table:formula="of:=[.B2027]/[.C2027]" office:value-type="float" office:value="0.00187592592592593" calcext:value-type="float">
            <text:p>0,00187592592592593000</text:p>
          </table:table-cell>
          <table:table-cell table:formula="of:=[.D2028]-[.D20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[.B2027]+8" office:value-type="float" office:value="16216" calcext:value-type="float">
            <text:p>16216</text:p>
          </table:table-cell>
          <table:table-cell office:value-type="float" office:value="8640000" calcext:value-type="float">
            <text:p>8640000</text:p>
          </table:table-cell>
          <table:table-cell table:formula="of:=[.B2028]/[.C2028]" office:value-type="float" office:value="0.00187685185185185" calcext:value-type="float">
            <text:p>0,00187685185185185000</text:p>
          </table:table-cell>
          <table:table-cell table:formula="of:=[.D2029]-[.D20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[.B2028]+8" office:value-type="float" office:value="16224" calcext:value-type="float">
            <text:p>16224</text:p>
          </table:table-cell>
          <table:table-cell office:value-type="float" office:value="8640000" calcext:value-type="float">
            <text:p>8640000</text:p>
          </table:table-cell>
          <table:table-cell table:formula="of:=[.B2029]/[.C2029]" office:value-type="float" office:value="0.00187777777777778" calcext:value-type="float">
            <text:p>0,00187777777777778000</text:p>
          </table:table-cell>
          <table:table-cell table:formula="of:=[.D2030]-[.D20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[.B2029]+8" office:value-type="float" office:value="16232" calcext:value-type="float">
            <text:p>16232</text:p>
          </table:table-cell>
          <table:table-cell office:value-type="float" office:value="8640000" calcext:value-type="float">
            <text:p>8640000</text:p>
          </table:table-cell>
          <table:table-cell table:formula="of:=[.B2030]/[.C2030]" office:value-type="float" office:value="0.0018787037037037" calcext:value-type="float">
            <text:p>0,00187870370370370000</text:p>
          </table:table-cell>
          <table:table-cell table:formula="of:=[.D2031]-[.D20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[.B2030]+8" office:value-type="float" office:value="16240" calcext:value-type="float">
            <text:p>16240</text:p>
          </table:table-cell>
          <table:table-cell office:value-type="float" office:value="8640000" calcext:value-type="float">
            <text:p>8640000</text:p>
          </table:table-cell>
          <table:table-cell table:formula="of:=[.B2031]/[.C2031]" office:value-type="float" office:value="0.00187962962962963" calcext:value-type="float">
            <text:p>0,00187962962962963000</text:p>
          </table:table-cell>
          <table:table-cell table:formula="of:=[.D2032]-[.D20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[.B2031]+8" office:value-type="float" office:value="16248" calcext:value-type="float">
            <text:p>16248</text:p>
          </table:table-cell>
          <table:table-cell office:value-type="float" office:value="8640000" calcext:value-type="float">
            <text:p>8640000</text:p>
          </table:table-cell>
          <table:table-cell table:formula="of:=[.B2032]/[.C2032]" office:value-type="float" office:value="0.00188055555555556" calcext:value-type="float">
            <text:p>0,00188055555555556000</text:p>
          </table:table-cell>
          <table:table-cell table:formula="of:=[.D2033]-[.D2032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[.B2032]+8" office:value-type="float" office:value="16256" calcext:value-type="float">
            <text:p>16256</text:p>
          </table:table-cell>
          <table:table-cell office:value-type="float" office:value="8640000" calcext:value-type="float">
            <text:p>8640000</text:p>
          </table:table-cell>
          <table:table-cell table:formula="of:=[.B2033]/[.C2033]" office:value-type="float" office:value="0.00188148148148148" calcext:value-type="float">
            <text:p>0,00188148148148148000</text:p>
          </table:table-cell>
          <table:table-cell table:formula="of:=[.D2034]-[.D20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[.B2033]+8" office:value-type="float" office:value="16264" calcext:value-type="float">
            <text:p>16264</text:p>
          </table:table-cell>
          <table:table-cell office:value-type="float" office:value="8640000" calcext:value-type="float">
            <text:p>8640000</text:p>
          </table:table-cell>
          <table:table-cell table:formula="of:=[.B2034]/[.C2034]" office:value-type="float" office:value="0.00188240740740741" calcext:value-type="float">
            <text:p>0,00188240740740741000</text:p>
          </table:table-cell>
          <table:table-cell table:formula="of:=[.D2035]-[.D20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[.B2034]+8" office:value-type="float" office:value="16272" calcext:value-type="float">
            <text:p>16272</text:p>
          </table:table-cell>
          <table:table-cell office:value-type="float" office:value="8640000" calcext:value-type="float">
            <text:p>8640000</text:p>
          </table:table-cell>
          <table:table-cell table:formula="of:=[.B2035]/[.C2035]" office:value-type="float" office:value="0.00188333333333333" calcext:value-type="float">
            <text:p>0,00188333333333333000</text:p>
          </table:table-cell>
          <table:table-cell table:formula="of:=[.D2036]-[.D20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[.B2035]+8" office:value-type="float" office:value="16280" calcext:value-type="float">
            <text:p>16280</text:p>
          </table:table-cell>
          <table:table-cell office:value-type="float" office:value="8640000" calcext:value-type="float">
            <text:p>8640000</text:p>
          </table:table-cell>
          <table:table-cell table:formula="of:=[.B2036]/[.C2036]" office:value-type="float" office:value="0.00188425925925926" calcext:value-type="float">
            <text:p>0,00188425925925926000</text:p>
          </table:table-cell>
          <table:table-cell table:formula="of:=[.D2037]-[.D20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[.B2036]+8" office:value-type="float" office:value="16288" calcext:value-type="float">
            <text:p>16288</text:p>
          </table:table-cell>
          <table:table-cell office:value-type="float" office:value="8640000" calcext:value-type="float">
            <text:p>8640000</text:p>
          </table:table-cell>
          <table:table-cell table:formula="of:=[.B2037]/[.C2037]" office:value-type="float" office:value="0.00188518518518519" calcext:value-type="float">
            <text:p>0,00188518518518519000</text:p>
          </table:table-cell>
          <table:table-cell table:formula="of:=[.D2038]-[.D20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[.B2037]+8" office:value-type="float" office:value="16296" calcext:value-type="float">
            <text:p>16296</text:p>
          </table:table-cell>
          <table:table-cell office:value-type="float" office:value="8640000" calcext:value-type="float">
            <text:p>8640000</text:p>
          </table:table-cell>
          <table:table-cell table:formula="of:=[.B2038]/[.C2038]" office:value-type="float" office:value="0.00188611111111111" calcext:value-type="float">
            <text:p>0,00188611111111111000</text:p>
          </table:table-cell>
          <table:table-cell table:formula="of:=[.D2039]-[.D20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[.B2038]+8" office:value-type="float" office:value="16304" calcext:value-type="float">
            <text:p>16304</text:p>
          </table:table-cell>
          <table:table-cell office:value-type="float" office:value="8640000" calcext:value-type="float">
            <text:p>8640000</text:p>
          </table:table-cell>
          <table:table-cell table:formula="of:=[.B2039]/[.C2039]" office:value-type="float" office:value="0.00188703703703704" calcext:value-type="float">
            <text:p>0,00188703703703704000</text:p>
          </table:table-cell>
          <table:table-cell table:formula="of:=[.D2040]-[.D20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[.B2039]+8" office:value-type="float" office:value="16312" calcext:value-type="float">
            <text:p>16312</text:p>
          </table:table-cell>
          <table:table-cell office:value-type="float" office:value="8640000" calcext:value-type="float">
            <text:p>8640000</text:p>
          </table:table-cell>
          <table:table-cell table:formula="of:=[.B2040]/[.C2040]" office:value-type="float" office:value="0.00188796296296296" calcext:value-type="float">
            <text:p>0,00188796296296296000</text:p>
          </table:table-cell>
          <table:table-cell table:formula="of:=[.D2041]-[.D20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[.B2040]+8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2041]/[.C2041]" office:value-type="float" office:value="0.00188888888888889" calcext:value-type="float">
            <text:p>0,00188888888888889000</text:p>
          </table:table-cell>
          <table:table-cell table:formula="of:=[.D2042]-[.D20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[.B2041]+8" office:value-type="float" office:value="16328" calcext:value-type="float">
            <text:p>16328</text:p>
          </table:table-cell>
          <table:table-cell office:value-type="float" office:value="8640000" calcext:value-type="float">
            <text:p>8640000</text:p>
          </table:table-cell>
          <table:table-cell table:formula="of:=[.B2042]/[.C2042]" office:value-type="float" office:value="0.00188981481481481" calcext:value-type="float">
            <text:p>0,00188981481481481000</text:p>
          </table:table-cell>
          <table:table-cell table:formula="of:=[.D2043]-[.D20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[.B2042]+8" office:value-type="float" office:value="16336" calcext:value-type="float">
            <text:p>16336</text:p>
          </table:table-cell>
          <table:table-cell office:value-type="float" office:value="8640000" calcext:value-type="float">
            <text:p>8640000</text:p>
          </table:table-cell>
          <table:table-cell table:formula="of:=[.B2043]/[.C2043]" office:value-type="float" office:value="0.00189074074074074" calcext:value-type="float">
            <text:p>0,00189074074074074000</text:p>
          </table:table-cell>
          <table:table-cell table:formula="of:=[.D2044]-[.D20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[.B2043]+8" office:value-type="float" office:value="16344" calcext:value-type="float">
            <text:p>16344</text:p>
          </table:table-cell>
          <table:table-cell office:value-type="float" office:value="8640000" calcext:value-type="float">
            <text:p>8640000</text:p>
          </table:table-cell>
          <table:table-cell table:formula="of:=[.B2044]/[.C2044]" office:value-type="float" office:value="0.00189166666666667" calcext:value-type="float">
            <text:p>0,00189166666666667000</text:p>
          </table:table-cell>
          <table:table-cell table:formula="of:=[.D2045]-[.D20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[.B2044]+8" office:value-type="float" office:value="16352" calcext:value-type="float">
            <text:p>16352</text:p>
          </table:table-cell>
          <table:table-cell office:value-type="float" office:value="8640000" calcext:value-type="float">
            <text:p>8640000</text:p>
          </table:table-cell>
          <table:table-cell table:formula="of:=[.B2045]/[.C2045]" office:value-type="float" office:value="0.00189259259259259" calcext:value-type="float">
            <text:p>0,00189259259259259000</text:p>
          </table:table-cell>
          <table:table-cell table:formula="of:=[.D2046]-[.D20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[.B2045]+8" office:value-type="float" office:value="16360" calcext:value-type="float">
            <text:p>16360</text:p>
          </table:table-cell>
          <table:table-cell office:value-type="float" office:value="8640000" calcext:value-type="float">
            <text:p>8640000</text:p>
          </table:table-cell>
          <table:table-cell table:formula="of:=[.B2046]/[.C2046]" office:value-type="float" office:value="0.00189351851851852" calcext:value-type="float">
            <text:p>0,00189351851851852000</text:p>
          </table:table-cell>
          <table:table-cell table:formula="of:=[.D2047]-[.D20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[.B2046]+8" office:value-type="float" office:value="16368" calcext:value-type="float">
            <text:p>16368</text:p>
          </table:table-cell>
          <table:table-cell office:value-type="float" office:value="8640000" calcext:value-type="float">
            <text:p>8640000</text:p>
          </table:table-cell>
          <table:table-cell table:formula="of:=[.B2047]/[.C2047]" office:value-type="float" office:value="0.00189444444444444" calcext:value-type="float">
            <text:p>0,00189444444444444000</text:p>
          </table:table-cell>
          <table:table-cell table:formula="of:=[.D2048]-[.D20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[.B2047]+8" office:value-type="float" office:value="16376" calcext:value-type="float">
            <text:p>16376</text:p>
          </table:table-cell>
          <table:table-cell office:value-type="float" office:value="8640000" calcext:value-type="float">
            <text:p>8640000</text:p>
          </table:table-cell>
          <table:table-cell table:formula="of:=[.B2048]/[.C2048]" office:value-type="float" office:value="0.00189537037037037" calcext:value-type="float">
            <text:p>0,00189537037037037000</text:p>
          </table:table-cell>
          <table:table-cell table:formula="of:=[.D2049]-[.D20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B2048]+8" office:value-type="float" office:value="16384" calcext:value-type="float">
            <text:p>16384</text:p>
          </table:table-cell>
          <table:table-cell office:value-type="float" office:value="8640000" calcext:value-type="float">
            <text:p>8640000</text:p>
          </table:table-cell>
          <table:table-cell table:formula="of:=[.B2049]/[.C2049]" office:value-type="float" office:value="0.0018962962962963" calcext:value-type="float">
            <text:p>0,00189629629629630000</text:p>
          </table:table-cell>
          <table:table-cell table:formula="of:=[.D2050]-[.D20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[.B2049]+8" office:value-type="float" office:value="16392" calcext:value-type="float">
            <text:p>16392</text:p>
          </table:table-cell>
          <table:table-cell office:value-type="float" office:value="8640000" calcext:value-type="float">
            <text:p>8640000</text:p>
          </table:table-cell>
          <table:table-cell table:formula="of:=[.B2050]/[.C2050]" office:value-type="float" office:value="0.00189722222222222" calcext:value-type="float">
            <text:p>0,00189722222222222000</text:p>
          </table:table-cell>
          <table:table-cell table:formula="of:=[.D2051]-[.D20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[.B2050]+8" office:value-type="float" office:value="16400" calcext:value-type="float">
            <text:p>16400</text:p>
          </table:table-cell>
          <table:table-cell office:value-type="float" office:value="8640000" calcext:value-type="float">
            <text:p>8640000</text:p>
          </table:table-cell>
          <table:table-cell table:formula="of:=[.B2051]/[.C2051]" office:value-type="float" office:value="0.00189814814814815" calcext:value-type="float">
            <text:p>0,00189814814814815000</text:p>
          </table:table-cell>
          <table:table-cell table:formula="of:=[.D2052]-[.D20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[.B2051]+8" office:value-type="float" office:value="16408" calcext:value-type="float">
            <text:p>16408</text:p>
          </table:table-cell>
          <table:table-cell office:value-type="float" office:value="8640000" calcext:value-type="float">
            <text:p>8640000</text:p>
          </table:table-cell>
          <table:table-cell table:formula="of:=[.B2052]/[.C2052]" office:value-type="float" office:value="0.00189907407407407" calcext:value-type="float">
            <text:p>0,00189907407407407000</text:p>
          </table:table-cell>
          <table:table-cell table:formula="of:=[.D2053]-[.D20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[.B2052]+8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2053]/[.C2053]" office:value-type="float" office:value="0.0019" calcext:value-type="float">
            <text:p>0,00190000000000000000</text:p>
          </table:table-cell>
          <table:table-cell table:formula="of:=[.D2054]-[.D20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[.B2053]+8" office:value-type="float" office:value="16424" calcext:value-type="float">
            <text:p>16424</text:p>
          </table:table-cell>
          <table:table-cell office:value-type="float" office:value="8640000" calcext:value-type="float">
            <text:p>8640000</text:p>
          </table:table-cell>
          <table:table-cell table:formula="of:=[.B2054]/[.C2054]" office:value-type="float" office:value="0.00190092592592593" calcext:value-type="float">
            <text:p>0,00190092592592593000</text:p>
          </table:table-cell>
          <table:table-cell table:formula="of:=[.D2055]-[.D20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[.B2054]+8" office:value-type="float" office:value="16432" calcext:value-type="float">
            <text:p>16432</text:p>
          </table:table-cell>
          <table:table-cell office:value-type="float" office:value="8640000" calcext:value-type="float">
            <text:p>8640000</text:p>
          </table:table-cell>
          <table:table-cell table:formula="of:=[.B2055]/[.C2055]" office:value-type="float" office:value="0.00190185185185185" calcext:value-type="float">
            <text:p>0,00190185185185185000</text:p>
          </table:table-cell>
          <table:table-cell table:formula="of:=[.D2056]-[.D20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B2055]+8" office:value-type="float" office:value="16440" calcext:value-type="float">
            <text:p>16440</text:p>
          </table:table-cell>
          <table:table-cell office:value-type="float" office:value="8640000" calcext:value-type="float">
            <text:p>8640000</text:p>
          </table:table-cell>
          <table:table-cell table:formula="of:=[.B2056]/[.C2056]" office:value-type="float" office:value="0.00190277777777778" calcext:value-type="float">
            <text:p>0,00190277777777778000</text:p>
          </table:table-cell>
          <table:table-cell table:formula="of:=[.D2057]-[.D20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B2056]+8" office:value-type="float" office:value="16448" calcext:value-type="float">
            <text:p>16448</text:p>
          </table:table-cell>
          <table:table-cell office:value-type="float" office:value="8640000" calcext:value-type="float">
            <text:p>8640000</text:p>
          </table:table-cell>
          <table:table-cell table:formula="of:=[.B2057]/[.C2057]" office:value-type="float" office:value="0.0019037037037037" calcext:value-type="float">
            <text:p>0,00190370370370370000</text:p>
          </table:table-cell>
          <table:table-cell table:formula="of:=[.D2058]-[.D20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[.B2057]+8" office:value-type="float" office:value="16456" calcext:value-type="float">
            <text:p>16456</text:p>
          </table:table-cell>
          <table:table-cell office:value-type="float" office:value="8640000" calcext:value-type="float">
            <text:p>8640000</text:p>
          </table:table-cell>
          <table:table-cell table:formula="of:=[.B2058]/[.C2058]" office:value-type="float" office:value="0.00190462962962963" calcext:value-type="float">
            <text:p>0,00190462962962963000</text:p>
          </table:table-cell>
          <table:table-cell table:formula="of:=[.D2059]-[.D20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B2058]+8" office:value-type="float" office:value="16464" calcext:value-type="float">
            <text:p>16464</text:p>
          </table:table-cell>
          <table:table-cell office:value-type="float" office:value="8640000" calcext:value-type="float">
            <text:p>8640000</text:p>
          </table:table-cell>
          <table:table-cell table:formula="of:=[.B2059]/[.C2059]" office:value-type="float" office:value="0.00190555555555556" calcext:value-type="float">
            <text:p>0,00190555555555556000</text:p>
          </table:table-cell>
          <table:table-cell table:formula="of:=[.D2060]-[.D20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B2059]+8" office:value-type="float" office:value="16472" calcext:value-type="float">
            <text:p>16472</text:p>
          </table:table-cell>
          <table:table-cell office:value-type="float" office:value="8640000" calcext:value-type="float">
            <text:p>8640000</text:p>
          </table:table-cell>
          <table:table-cell table:formula="of:=[.B2060]/[.C2060]" office:value-type="float" office:value="0.00190648148148148" calcext:value-type="float">
            <text:p>0,00190648148148148000</text:p>
          </table:table-cell>
          <table:table-cell table:formula="of:=[.D2061]-[.D20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B2060]+8" office:value-type="float" office:value="16480" calcext:value-type="float">
            <text:p>16480</text:p>
          </table:table-cell>
          <table:table-cell office:value-type="float" office:value="8640000" calcext:value-type="float">
            <text:p>8640000</text:p>
          </table:table-cell>
          <table:table-cell table:formula="of:=[.B2061]/[.C2061]" office:value-type="float" office:value="0.00190740740740741" calcext:value-type="float">
            <text:p>0,00190740740740741000</text:p>
          </table:table-cell>
          <table:table-cell table:formula="of:=[.D2062]-[.D20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B2061]+8" office:value-type="float" office:value="16488" calcext:value-type="float">
            <text:p>16488</text:p>
          </table:table-cell>
          <table:table-cell office:value-type="float" office:value="8640000" calcext:value-type="float">
            <text:p>8640000</text:p>
          </table:table-cell>
          <table:table-cell table:formula="of:=[.B2062]/[.C2062]" office:value-type="float" office:value="0.00190833333333333" calcext:value-type="float">
            <text:p>0,00190833333333333000</text:p>
          </table:table-cell>
          <table:table-cell table:formula="of:=[.D2063]-[.D20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B2062]+8" office:value-type="float" office:value="16496" calcext:value-type="float">
            <text:p>16496</text:p>
          </table:table-cell>
          <table:table-cell office:value-type="float" office:value="8640000" calcext:value-type="float">
            <text:p>8640000</text:p>
          </table:table-cell>
          <table:table-cell table:formula="of:=[.B2063]/[.C2063]" office:value-type="float" office:value="0.00190925925925926" calcext:value-type="float">
            <text:p>0,00190925925925926000</text:p>
          </table:table-cell>
          <table:table-cell table:formula="of:=[.D2064]-[.D20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B2063]+8" office:value-type="float" office:value="16504" calcext:value-type="float">
            <text:p>16504</text:p>
          </table:table-cell>
          <table:table-cell office:value-type="float" office:value="8640000" calcext:value-type="float">
            <text:p>8640000</text:p>
          </table:table-cell>
          <table:table-cell table:formula="of:=[.B2064]/[.C2064]" office:value-type="float" office:value="0.00191018518518519" calcext:value-type="float">
            <text:p>0,00191018518518519000</text:p>
          </table:table-cell>
          <table:table-cell table:formula="of:=[.D2065]-[.D20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B2064]+8" office:value-type="float" office:value="16512" calcext:value-type="float">
            <text:p>16512</text:p>
          </table:table-cell>
          <table:table-cell office:value-type="float" office:value="8640000" calcext:value-type="float">
            <text:p>8640000</text:p>
          </table:table-cell>
          <table:table-cell table:formula="of:=[.B2065]/[.C2065]" office:value-type="float" office:value="0.00191111111111111" calcext:value-type="float">
            <text:p>0,00191111111111111000</text:p>
          </table:table-cell>
          <table:table-cell table:formula="of:=[.D2066]-[.D20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B2065]+8" office:value-type="float" office:value="16520" calcext:value-type="float">
            <text:p>16520</text:p>
          </table:table-cell>
          <table:table-cell office:value-type="float" office:value="8640000" calcext:value-type="float">
            <text:p>8640000</text:p>
          </table:table-cell>
          <table:table-cell table:formula="of:=[.B2066]/[.C2066]" office:value-type="float" office:value="0.00191203703703704" calcext:value-type="float">
            <text:p>0,00191203703703704000</text:p>
          </table:table-cell>
          <table:table-cell table:formula="of:=[.D2067]-[.D20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B2066]+8" office:value-type="float" office:value="16528" calcext:value-type="float">
            <text:p>16528</text:p>
          </table:table-cell>
          <table:table-cell office:value-type="float" office:value="8640000" calcext:value-type="float">
            <text:p>8640000</text:p>
          </table:table-cell>
          <table:table-cell table:formula="of:=[.B2067]/[.C2067]" office:value-type="float" office:value="0.00191296296296296" calcext:value-type="float">
            <text:p>0,00191296296296296000</text:p>
          </table:table-cell>
          <table:table-cell table:formula="of:=[.D2068]-[.D20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B2067]+8" office:value-type="float" office:value="16536" calcext:value-type="float">
            <text:p>16536</text:p>
          </table:table-cell>
          <table:table-cell office:value-type="float" office:value="8640000" calcext:value-type="float">
            <text:p>8640000</text:p>
          </table:table-cell>
          <table:table-cell table:formula="of:=[.B2068]/[.C2068]" office:value-type="float" office:value="0.00191388888888889" calcext:value-type="float">
            <text:p>0,00191388888888889000</text:p>
          </table:table-cell>
          <table:table-cell table:formula="of:=[.D2069]-[.D20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B2068]+8" office:value-type="float" office:value="16544" calcext:value-type="float">
            <text:p>16544</text:p>
          </table:table-cell>
          <table:table-cell office:value-type="float" office:value="8640000" calcext:value-type="float">
            <text:p>8640000</text:p>
          </table:table-cell>
          <table:table-cell table:formula="of:=[.B2069]/[.C2069]" office:value-type="float" office:value="0.00191481481481481" calcext:value-type="float">
            <text:p>0,00191481481481481000</text:p>
          </table:table-cell>
          <table:table-cell table:formula="of:=[.D2070]-[.D20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B2069]+8" office:value-type="float" office:value="16552" calcext:value-type="float">
            <text:p>16552</text:p>
          </table:table-cell>
          <table:table-cell office:value-type="float" office:value="8640000" calcext:value-type="float">
            <text:p>8640000</text:p>
          </table:table-cell>
          <table:table-cell table:formula="of:=[.B2070]/[.C2070]" office:value-type="float" office:value="0.00191574074074074" calcext:value-type="float">
            <text:p>0,00191574074074074000</text:p>
          </table:table-cell>
          <table:table-cell table:formula="of:=[.D2071]-[.D20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B2070]+8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2071]/[.C2071]" office:value-type="float" office:value="0.00191666666666667" calcext:value-type="float">
            <text:p>0,00191666666666667000</text:p>
          </table:table-cell>
          <table:table-cell table:formula="of:=[.D2072]-[.D2071]" office:value-type="float" office:value="0.000000925925925926137" calcext:value-type="float">
            <text:p>0,00000092592592592614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B2071]+8" office:value-type="float" office:value="16568" calcext:value-type="float">
            <text:p>16568</text:p>
          </table:table-cell>
          <table:table-cell office:value-type="float" office:value="8640000" calcext:value-type="float">
            <text:p>8640000</text:p>
          </table:table-cell>
          <table:table-cell table:formula="of:=[.B2072]/[.C2072]" office:value-type="float" office:value="0.00191759259259259" calcext:value-type="float">
            <text:p>0,00191759259259259000</text:p>
          </table:table-cell>
          <table:table-cell table:formula="of:=[.D2073]-[.D20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B2072]+8" office:value-type="float" office:value="16576" calcext:value-type="float">
            <text:p>16576</text:p>
          </table:table-cell>
          <table:table-cell office:value-type="float" office:value="8640000" calcext:value-type="float">
            <text:p>8640000</text:p>
          </table:table-cell>
          <table:table-cell table:formula="of:=[.B2073]/[.C2073]" office:value-type="float" office:value="0.00191851851851852" calcext:value-type="float">
            <text:p>0,00191851851851852000</text:p>
          </table:table-cell>
          <table:table-cell table:formula="of:=[.D2074]-[.D20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B2073]+8" office:value-type="float" office:value="16584" calcext:value-type="float">
            <text:p>16584</text:p>
          </table:table-cell>
          <table:table-cell office:value-type="float" office:value="8640000" calcext:value-type="float">
            <text:p>8640000</text:p>
          </table:table-cell>
          <table:table-cell table:formula="of:=[.B2074]/[.C2074]" office:value-type="float" office:value="0.00191944444444444" calcext:value-type="float">
            <text:p>0,00191944444444444000</text:p>
          </table:table-cell>
          <table:table-cell table:formula="of:=[.D2075]-[.D20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B2074]+8" office:value-type="float" office:value="16592" calcext:value-type="float">
            <text:p>16592</text:p>
          </table:table-cell>
          <table:table-cell office:value-type="float" office:value="8640000" calcext:value-type="float">
            <text:p>8640000</text:p>
          </table:table-cell>
          <table:table-cell table:formula="of:=[.B2075]/[.C2075]" office:value-type="float" office:value="0.00192037037037037" calcext:value-type="float">
            <text:p>0,00192037037037037000</text:p>
          </table:table-cell>
          <table:table-cell table:formula="of:=[.D2076]-[.D20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B2075]+8" office:value-type="float" office:value="16600" calcext:value-type="float">
            <text:p>16600</text:p>
          </table:table-cell>
          <table:table-cell office:value-type="float" office:value="8640000" calcext:value-type="float">
            <text:p>8640000</text:p>
          </table:table-cell>
          <table:table-cell table:formula="of:=[.B2076]/[.C2076]" office:value-type="float" office:value="0.0019212962962963" calcext:value-type="float">
            <text:p>0,00192129629629630000</text:p>
          </table:table-cell>
          <table:table-cell table:formula="of:=[.D2077]-[.D20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B2076]+8" office:value-type="float" office:value="16608" calcext:value-type="float">
            <text:p>16608</text:p>
          </table:table-cell>
          <table:table-cell office:value-type="float" office:value="8640000" calcext:value-type="float">
            <text:p>8640000</text:p>
          </table:table-cell>
          <table:table-cell table:formula="of:=[.B2077]/[.C2077]" office:value-type="float" office:value="0.00192222222222222" calcext:value-type="float">
            <text:p>0,00192222222222222000</text:p>
          </table:table-cell>
          <table:table-cell table:formula="of:=[.D2078]-[.D20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[.B2077]+8" office:value-type="float" office:value="16616" calcext:value-type="float">
            <text:p>16616</text:p>
          </table:table-cell>
          <table:table-cell office:value-type="float" office:value="8640000" calcext:value-type="float">
            <text:p>8640000</text:p>
          </table:table-cell>
          <table:table-cell table:formula="of:=[.B2078]/[.C2078]" office:value-type="float" office:value="0.00192314814814815" calcext:value-type="float">
            <text:p>0,00192314814814815000</text:p>
          </table:table-cell>
          <table:table-cell table:formula="of:=[.D2079]-[.D20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[.B2078]+8" office:value-type="float" office:value="16624" calcext:value-type="float">
            <text:p>16624</text:p>
          </table:table-cell>
          <table:table-cell office:value-type="float" office:value="8640000" calcext:value-type="float">
            <text:p>8640000</text:p>
          </table:table-cell>
          <table:table-cell table:formula="of:=[.B2079]/[.C2079]" office:value-type="float" office:value="0.00192407407407407" calcext:value-type="float">
            <text:p>0,00192407407407407000</text:p>
          </table:table-cell>
          <table:table-cell table:formula="of:=[.D2080]-[.D20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[.B2079]+8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2080]/[.C2080]" office:value-type="float" office:value="0.001925" calcext:value-type="float">
            <text:p>0,00192500000000000000</text:p>
          </table:table-cell>
          <table:table-cell table:formula="of:=[.D2081]-[.D20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formula="of:=[.B2080]+8" office:value-type="float" office:value="16640" calcext:value-type="float">
            <text:p>16640</text:p>
          </table:table-cell>
          <table:table-cell office:value-type="float" office:value="8640000" calcext:value-type="float">
            <text:p>8640000</text:p>
          </table:table-cell>
          <table:table-cell table:formula="of:=[.B2081]/[.C2081]" office:value-type="float" office:value="0.00192592592592593" calcext:value-type="float">
            <text:p>0,00192592592592593000</text:p>
          </table:table-cell>
          <table:table-cell table:formula="of:=[.D2082]-[.D20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[.B2081]+8" office:value-type="float" office:value="16648" calcext:value-type="float">
            <text:p>16648</text:p>
          </table:table-cell>
          <table:table-cell office:value-type="float" office:value="8640000" calcext:value-type="float">
            <text:p>8640000</text:p>
          </table:table-cell>
          <table:table-cell table:formula="of:=[.B2082]/[.C2082]" office:value-type="float" office:value="0.00192685185185185" calcext:value-type="float">
            <text:p>0,00192685185185185000</text:p>
          </table:table-cell>
          <table:table-cell table:formula="of:=[.D2083]-[.D20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[.B2082]+8" office:value-type="float" office:value="16656" calcext:value-type="float">
            <text:p>16656</text:p>
          </table:table-cell>
          <table:table-cell office:value-type="float" office:value="8640000" calcext:value-type="float">
            <text:p>8640000</text:p>
          </table:table-cell>
          <table:table-cell table:formula="of:=[.B2083]/[.C2083]" office:value-type="float" office:value="0.00192777777777778" calcext:value-type="float">
            <text:p>0,00192777777777778000</text:p>
          </table:table-cell>
          <table:table-cell table:formula="of:=[.D2084]-[.D20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table:formula="of:=[.B2083]+8" office:value-type="float" office:value="16664" calcext:value-type="float">
            <text:p>16664</text:p>
          </table:table-cell>
          <table:table-cell office:value-type="float" office:value="8640000" calcext:value-type="float">
            <text:p>8640000</text:p>
          </table:table-cell>
          <table:table-cell table:formula="of:=[.B2084]/[.C2084]" office:value-type="float" office:value="0.0019287037037037" calcext:value-type="float">
            <text:p>0,00192870370370370000</text:p>
          </table:table-cell>
          <table:table-cell table:formula="of:=[.D2085]-[.D20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[.B2084]+8" office:value-type="float" office:value="16672" calcext:value-type="float">
            <text:p>16672</text:p>
          </table:table-cell>
          <table:table-cell office:value-type="float" office:value="8640000" calcext:value-type="float">
            <text:p>8640000</text:p>
          </table:table-cell>
          <table:table-cell table:formula="of:=[.B2085]/[.C2085]" office:value-type="float" office:value="0.00192962962962963" calcext:value-type="float">
            <text:p>0,00192962962962963000</text:p>
          </table:table-cell>
          <table:table-cell table:formula="of:=[.D2086]-[.D20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[.B2085]+8" office:value-type="float" office:value="16680" calcext:value-type="float">
            <text:p>16680</text:p>
          </table:table-cell>
          <table:table-cell office:value-type="float" office:value="8640000" calcext:value-type="float">
            <text:p>8640000</text:p>
          </table:table-cell>
          <table:table-cell table:formula="of:=[.B2086]/[.C2086]" office:value-type="float" office:value="0.00193055555555556" calcext:value-type="float">
            <text:p>0,00193055555555556000</text:p>
          </table:table-cell>
          <table:table-cell table:formula="of:=[.D2087]-[.D20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[.B2086]+8" office:value-type="float" office:value="16688" calcext:value-type="float">
            <text:p>16688</text:p>
          </table:table-cell>
          <table:table-cell office:value-type="float" office:value="8640000" calcext:value-type="float">
            <text:p>8640000</text:p>
          </table:table-cell>
          <table:table-cell table:formula="of:=[.B2087]/[.C2087]" office:value-type="float" office:value="0.00193148148148148" calcext:value-type="float">
            <text:p>0,00193148148148148000</text:p>
          </table:table-cell>
          <table:table-cell table:formula="of:=[.D2088]-[.D20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[.B2087]+8" office:value-type="float" office:value="16696" calcext:value-type="float">
            <text:p>16696</text:p>
          </table:table-cell>
          <table:table-cell office:value-type="float" office:value="8640000" calcext:value-type="float">
            <text:p>8640000</text:p>
          </table:table-cell>
          <table:table-cell table:formula="of:=[.B2088]/[.C2088]" office:value-type="float" office:value="0.00193240740740741" calcext:value-type="float">
            <text:p>0,00193240740740741000</text:p>
          </table:table-cell>
          <table:table-cell table:formula="of:=[.D2089]-[.D20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[.B2088]+8" office:value-type="float" office:value="16704" calcext:value-type="float">
            <text:p>16704</text:p>
          </table:table-cell>
          <table:table-cell office:value-type="float" office:value="8640000" calcext:value-type="float">
            <text:p>8640000</text:p>
          </table:table-cell>
          <table:table-cell table:formula="of:=[.B2089]/[.C2089]" office:value-type="float" office:value="0.00193333333333333" calcext:value-type="float">
            <text:p>0,00193333333333333000</text:p>
          </table:table-cell>
          <table:table-cell table:formula="of:=[.D2090]-[.D20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[.B2089]+8" office:value-type="float" office:value="16712" calcext:value-type="float">
            <text:p>16712</text:p>
          </table:table-cell>
          <table:table-cell office:value-type="float" office:value="8640000" calcext:value-type="float">
            <text:p>8640000</text:p>
          </table:table-cell>
          <table:table-cell table:formula="of:=[.B2090]/[.C2090]" office:value-type="float" office:value="0.00193425925925926" calcext:value-type="float">
            <text:p>0,00193425925925926000</text:p>
          </table:table-cell>
          <table:table-cell table:formula="of:=[.D2091]-[.D20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[.B2090]+8" office:value-type="float" office:value="16720" calcext:value-type="float">
            <text:p>16720</text:p>
          </table:table-cell>
          <table:table-cell office:value-type="float" office:value="8640000" calcext:value-type="float">
            <text:p>8640000</text:p>
          </table:table-cell>
          <table:table-cell table:formula="of:=[.B2091]/[.C2091]" office:value-type="float" office:value="0.00193518518518519" calcext:value-type="float">
            <text:p>0,00193518518518519000</text:p>
          </table:table-cell>
          <table:table-cell table:formula="of:=[.D2092]-[.D20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[.B2091]+8" office:value-type="float" office:value="16728" calcext:value-type="float">
            <text:p>16728</text:p>
          </table:table-cell>
          <table:table-cell office:value-type="float" office:value="8640000" calcext:value-type="float">
            <text:p>8640000</text:p>
          </table:table-cell>
          <table:table-cell table:formula="of:=[.B2092]/[.C2092]" office:value-type="float" office:value="0.00193611111111111" calcext:value-type="float">
            <text:p>0,00193611111111111000</text:p>
          </table:table-cell>
          <table:table-cell table:formula="of:=[.D2093]-[.D20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[.B2092]+8" office:value-type="float" office:value="16736" calcext:value-type="float">
            <text:p>16736</text:p>
          </table:table-cell>
          <table:table-cell office:value-type="float" office:value="8640000" calcext:value-type="float">
            <text:p>8640000</text:p>
          </table:table-cell>
          <table:table-cell table:formula="of:=[.B2093]/[.C2093]" office:value-type="float" office:value="0.00193703703703704" calcext:value-type="float">
            <text:p>0,00193703703703704000</text:p>
          </table:table-cell>
          <table:table-cell table:formula="of:=[.D2094]-[.D20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[.B2093]+8" office:value-type="float" office:value="16744" calcext:value-type="float">
            <text:p>16744</text:p>
          </table:table-cell>
          <table:table-cell office:value-type="float" office:value="8640000" calcext:value-type="float">
            <text:p>8640000</text:p>
          </table:table-cell>
          <table:table-cell table:formula="of:=[.B2094]/[.C2094]" office:value-type="float" office:value="0.00193796296296296" calcext:value-type="float">
            <text:p>0,00193796296296296000</text:p>
          </table:table-cell>
          <table:table-cell table:formula="of:=[.D2095]-[.D20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[.B2094]+8" office:value-type="float" office:value="16752" calcext:value-type="float">
            <text:p>16752</text:p>
          </table:table-cell>
          <table:table-cell office:value-type="float" office:value="8640000" calcext:value-type="float">
            <text:p>8640000</text:p>
          </table:table-cell>
          <table:table-cell table:formula="of:=[.B2095]/[.C2095]" office:value-type="float" office:value="0.00193888888888889" calcext:value-type="float">
            <text:p>0,00193888888888889000</text:p>
          </table:table-cell>
          <table:table-cell table:formula="of:=[.D2096]-[.D20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table:formula="of:=[.B2095]+8" office:value-type="float" office:value="16760" calcext:value-type="float">
            <text:p>16760</text:p>
          </table:table-cell>
          <table:table-cell office:value-type="float" office:value="8640000" calcext:value-type="float">
            <text:p>8640000</text:p>
          </table:table-cell>
          <table:table-cell table:formula="of:=[.B2096]/[.C2096]" office:value-type="float" office:value="0.00193981481481481" calcext:value-type="float">
            <text:p>0,00193981481481481000</text:p>
          </table:table-cell>
          <table:table-cell table:formula="of:=[.D2097]-[.D20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[.B2096]+8" office:value-type="float" office:value="16768" calcext:value-type="float">
            <text:p>16768</text:p>
          </table:table-cell>
          <table:table-cell office:value-type="float" office:value="8640000" calcext:value-type="float">
            <text:p>8640000</text:p>
          </table:table-cell>
          <table:table-cell table:formula="of:=[.B2097]/[.C2097]" office:value-type="float" office:value="0.00194074074074074" calcext:value-type="float">
            <text:p>0,00194074074074074000</text:p>
          </table:table-cell>
          <table:table-cell table:formula="of:=[.D2098]-[.D20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[.B2097]+8" office:value-type="float" office:value="16776" calcext:value-type="float">
            <text:p>16776</text:p>
          </table:table-cell>
          <table:table-cell office:value-type="float" office:value="8640000" calcext:value-type="float">
            <text:p>8640000</text:p>
          </table:table-cell>
          <table:table-cell table:formula="of:=[.B2098]/[.C2098]" office:value-type="float" office:value="0.00194166666666667" calcext:value-type="float">
            <text:p>0,00194166666666667000</text:p>
          </table:table-cell>
          <table:table-cell table:formula="of:=[.D2099]-[.D20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[.B2098]+8" office:value-type="float" office:value="16784" calcext:value-type="float">
            <text:p>16784</text:p>
          </table:table-cell>
          <table:table-cell office:value-type="float" office:value="8640000" calcext:value-type="float">
            <text:p>8640000</text:p>
          </table:table-cell>
          <table:table-cell table:formula="of:=[.B2099]/[.C2099]" office:value-type="float" office:value="0.00194259259259259" calcext:value-type="float">
            <text:p>0,00194259259259259000</text:p>
          </table:table-cell>
          <table:table-cell table:formula="of:=[.D2100]-[.D20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[.B2099]+8" office:value-type="float" office:value="16792" calcext:value-type="float">
            <text:p>16792</text:p>
          </table:table-cell>
          <table:table-cell office:value-type="float" office:value="8640000" calcext:value-type="float">
            <text:p>8640000</text:p>
          </table:table-cell>
          <table:table-cell table:formula="of:=[.B2100]/[.C2100]" office:value-type="float" office:value="0.00194351851851852" calcext:value-type="float">
            <text:p>0,00194351851851852000</text:p>
          </table:table-cell>
          <table:table-cell table:formula="of:=[.D2101]-[.D21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B2100]+8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2101]/[.C2101]" office:value-type="float" office:value="0.00194444444444444" calcext:value-type="float">
            <text:p>0,00194444444444444000</text:p>
          </table:table-cell>
          <table:table-cell table:formula="of:=[.D2102]-[.D21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[.B2101]+8" office:value-type="float" office:value="16808" calcext:value-type="float">
            <text:p>16808</text:p>
          </table:table-cell>
          <table:table-cell office:value-type="float" office:value="8640000" calcext:value-type="float">
            <text:p>8640000</text:p>
          </table:table-cell>
          <table:table-cell table:formula="of:=[.B2102]/[.C2102]" office:value-type="float" office:value="0.00194537037037037" calcext:value-type="float">
            <text:p>0,00194537037037037000</text:p>
          </table:table-cell>
          <table:table-cell table:formula="of:=[.D2103]-[.D21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[.B2102]+8" office:value-type="float" office:value="16816" calcext:value-type="float">
            <text:p>16816</text:p>
          </table:table-cell>
          <table:table-cell office:value-type="float" office:value="8640000" calcext:value-type="float">
            <text:p>8640000</text:p>
          </table:table-cell>
          <table:table-cell table:formula="of:=[.B2103]/[.C2103]" office:value-type="float" office:value="0.0019462962962963" calcext:value-type="float">
            <text:p>0,00194629629629630000</text:p>
          </table:table-cell>
          <table:table-cell table:formula="of:=[.D2104]-[.D21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[.B2103]+8" office:value-type="float" office:value="16824" calcext:value-type="float">
            <text:p>16824</text:p>
          </table:table-cell>
          <table:table-cell office:value-type="float" office:value="8640000" calcext:value-type="float">
            <text:p>8640000</text:p>
          </table:table-cell>
          <table:table-cell table:formula="of:=[.B2104]/[.C2104]" office:value-type="float" office:value="0.00194722222222222" calcext:value-type="float">
            <text:p>0,00194722222222222000</text:p>
          </table:table-cell>
          <table:table-cell table:formula="of:=[.D2105]-[.D21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[.B2104]+8" office:value-type="float" office:value="16832" calcext:value-type="float">
            <text:p>16832</text:p>
          </table:table-cell>
          <table:table-cell office:value-type="float" office:value="8640000" calcext:value-type="float">
            <text:p>8640000</text:p>
          </table:table-cell>
          <table:table-cell table:formula="of:=[.B2105]/[.C2105]" office:value-type="float" office:value="0.00194814814814815" calcext:value-type="float">
            <text:p>0,00194814814814815000</text:p>
          </table:table-cell>
          <table:table-cell table:formula="of:=[.D2106]-[.D21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table:formula="of:=[.B2105]+8" office:value-type="float" office:value="16840" calcext:value-type="float">
            <text:p>16840</text:p>
          </table:table-cell>
          <table:table-cell office:value-type="float" office:value="8640000" calcext:value-type="float">
            <text:p>8640000</text:p>
          </table:table-cell>
          <table:table-cell table:formula="of:=[.B2106]/[.C2106]" office:value-type="float" office:value="0.00194907407407407" calcext:value-type="float">
            <text:p>0,00194907407407407000</text:p>
          </table:table-cell>
          <table:table-cell table:formula="of:=[.D2107]-[.D21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[.B2106]+8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2107]/[.C2107]" office:value-type="float" office:value="0.00195" calcext:value-type="float">
            <text:p>0,00195000000000000000</text:p>
          </table:table-cell>
          <table:table-cell table:formula="of:=[.D2108]-[.D21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[.B2107]+8" office:value-type="float" office:value="16856" calcext:value-type="float">
            <text:p>16856</text:p>
          </table:table-cell>
          <table:table-cell office:value-type="float" office:value="8640000" calcext:value-type="float">
            <text:p>8640000</text:p>
          </table:table-cell>
          <table:table-cell table:formula="of:=[.B2108]/[.C2108]" office:value-type="float" office:value="0.00195092592592593" calcext:value-type="float">
            <text:p>0,00195092592592593000</text:p>
          </table:table-cell>
          <table:table-cell table:formula="of:=[.D2109]-[.D21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[.B2108]+8" office:value-type="float" office:value="16864" calcext:value-type="float">
            <text:p>16864</text:p>
          </table:table-cell>
          <table:table-cell office:value-type="float" office:value="8640000" calcext:value-type="float">
            <text:p>8640000</text:p>
          </table:table-cell>
          <table:table-cell table:formula="of:=[.B2109]/[.C2109]" office:value-type="float" office:value="0.00195185185185185" calcext:value-type="float">
            <text:p>0,00195185185185185000</text:p>
          </table:table-cell>
          <table:table-cell table:formula="of:=[.D2110]-[.D21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table:formula="of:=[.B2109]+8" office:value-type="float" office:value="16872" calcext:value-type="float">
            <text:p>16872</text:p>
          </table:table-cell>
          <table:table-cell office:value-type="float" office:value="8640000" calcext:value-type="float">
            <text:p>8640000</text:p>
          </table:table-cell>
          <table:table-cell table:formula="of:=[.B2110]/[.C2110]" office:value-type="float" office:value="0.00195277777777778" calcext:value-type="float">
            <text:p>0,00195277777777778000</text:p>
          </table:table-cell>
          <table:table-cell table:formula="of:=[.D2111]-[.D21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[.B2110]+8" office:value-type="float" office:value="16880" calcext:value-type="float">
            <text:p>16880</text:p>
          </table:table-cell>
          <table:table-cell office:value-type="float" office:value="8640000" calcext:value-type="float">
            <text:p>8640000</text:p>
          </table:table-cell>
          <table:table-cell table:formula="of:=[.B2111]/[.C2111]" office:value-type="float" office:value="0.0019537037037037" calcext:value-type="float">
            <text:p>0,00195370370370370000</text:p>
          </table:table-cell>
          <table:table-cell table:formula="of:=[.D2112]-[.D21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[.B2111]+8" office:value-type="float" office:value="16888" calcext:value-type="float">
            <text:p>16888</text:p>
          </table:table-cell>
          <table:table-cell office:value-type="float" office:value="8640000" calcext:value-type="float">
            <text:p>8640000</text:p>
          </table:table-cell>
          <table:table-cell table:formula="of:=[.B2112]/[.C2112]" office:value-type="float" office:value="0.00195462962962963" calcext:value-type="float">
            <text:p>0,00195462962962963000</text:p>
          </table:table-cell>
          <table:table-cell table:formula="of:=[.D2113]-[.D21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[.B2112]+8" office:value-type="float" office:value="16896" calcext:value-type="float">
            <text:p>16896</text:p>
          </table:table-cell>
          <table:table-cell office:value-type="float" office:value="8640000" calcext:value-type="float">
            <text:p>8640000</text:p>
          </table:table-cell>
          <table:table-cell table:formula="of:=[.B2113]/[.C2113]" office:value-type="float" office:value="0.00195555555555556" calcext:value-type="float">
            <text:p>0,00195555555555556000</text:p>
          </table:table-cell>
          <table:table-cell table:formula="of:=[.D2114]-[.D21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table:formula="of:=[.B2113]+8" office:value-type="float" office:value="16904" calcext:value-type="float">
            <text:p>16904</text:p>
          </table:table-cell>
          <table:table-cell office:value-type="float" office:value="8640000" calcext:value-type="float">
            <text:p>8640000</text:p>
          </table:table-cell>
          <table:table-cell table:formula="of:=[.B2114]/[.C2114]" office:value-type="float" office:value="0.00195648148148148" calcext:value-type="float">
            <text:p>0,00195648148148148000</text:p>
          </table:table-cell>
          <table:table-cell table:formula="of:=[.D2115]-[.D21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[.B2114]+8" office:value-type="float" office:value="16912" calcext:value-type="float">
            <text:p>16912</text:p>
          </table:table-cell>
          <table:table-cell office:value-type="float" office:value="8640000" calcext:value-type="float">
            <text:p>8640000</text:p>
          </table:table-cell>
          <table:table-cell table:formula="of:=[.B2115]/[.C2115]" office:value-type="float" office:value="0.00195740740740741" calcext:value-type="float">
            <text:p>0,00195740740740741000</text:p>
          </table:table-cell>
          <table:table-cell table:formula="of:=[.D2116]-[.D21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table:formula="of:=[.B2115]+8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2116]/[.C2116]" office:value-type="float" office:value="0.00195833333333333" calcext:value-type="float">
            <text:p>0,00195833333333333000</text:p>
          </table:table-cell>
          <table:table-cell table:formula="of:=[.D2117]-[.D21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[.B2116]+8" office:value-type="float" office:value="16928" calcext:value-type="float">
            <text:p>16928</text:p>
          </table:table-cell>
          <table:table-cell office:value-type="float" office:value="8640000" calcext:value-type="float">
            <text:p>8640000</text:p>
          </table:table-cell>
          <table:table-cell table:formula="of:=[.B2117]/[.C2117]" office:value-type="float" office:value="0.00195925925925926" calcext:value-type="float">
            <text:p>0,00195925925925926000</text:p>
          </table:table-cell>
          <table:table-cell table:formula="of:=[.D2118]-[.D21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[.B2117]+8" office:value-type="float" office:value="16936" calcext:value-type="float">
            <text:p>16936</text:p>
          </table:table-cell>
          <table:table-cell office:value-type="float" office:value="8640000" calcext:value-type="float">
            <text:p>8640000</text:p>
          </table:table-cell>
          <table:table-cell table:formula="of:=[.B2118]/[.C2118]" office:value-type="float" office:value="0.00196018518518519" calcext:value-type="float">
            <text:p>0,00196018518518519000</text:p>
          </table:table-cell>
          <table:table-cell table:formula="of:=[.D2119]-[.D21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[.B2118]+8" office:value-type="float" office:value="16944" calcext:value-type="float">
            <text:p>16944</text:p>
          </table:table-cell>
          <table:table-cell office:value-type="float" office:value="8640000" calcext:value-type="float">
            <text:p>8640000</text:p>
          </table:table-cell>
          <table:table-cell table:formula="of:=[.B2119]/[.C2119]" office:value-type="float" office:value="0.00196111111111111" calcext:value-type="float">
            <text:p>0,00196111111111111000</text:p>
          </table:table-cell>
          <table:table-cell table:formula="of:=[.D2120]-[.D21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[.B2119]+8" office:value-type="float" office:value="16952" calcext:value-type="float">
            <text:p>16952</text:p>
          </table:table-cell>
          <table:table-cell office:value-type="float" office:value="8640000" calcext:value-type="float">
            <text:p>8640000</text:p>
          </table:table-cell>
          <table:table-cell table:formula="of:=[.B2120]/[.C2120]" office:value-type="float" office:value="0.00196203703703704" calcext:value-type="float">
            <text:p>0,00196203703703704000</text:p>
          </table:table-cell>
          <table:table-cell table:formula="of:=[.D2121]-[.D21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[.B2120]+8" office:value-type="float" office:value="16960" calcext:value-type="float">
            <text:p>16960</text:p>
          </table:table-cell>
          <table:table-cell office:value-type="float" office:value="8640000" calcext:value-type="float">
            <text:p>8640000</text:p>
          </table:table-cell>
          <table:table-cell table:formula="of:=[.B2121]/[.C2121]" office:value-type="float" office:value="0.00196296296296296" calcext:value-type="float">
            <text:p>0,00196296296296296000</text:p>
          </table:table-cell>
          <table:table-cell table:formula="of:=[.D2122]-[.D21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table:formula="of:=[.B2121]+8" office:value-type="float" office:value="16968" calcext:value-type="float">
            <text:p>16968</text:p>
          </table:table-cell>
          <table:table-cell office:value-type="float" office:value="8640000" calcext:value-type="float">
            <text:p>8640000</text:p>
          </table:table-cell>
          <table:table-cell table:formula="of:=[.B2122]/[.C2122]" office:value-type="float" office:value="0.00196388888888889" calcext:value-type="float">
            <text:p>0,00196388888888889000</text:p>
          </table:table-cell>
          <table:table-cell table:formula="of:=[.D2123]-[.D21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[.B2122]+8" office:value-type="float" office:value="16976" calcext:value-type="float">
            <text:p>16976</text:p>
          </table:table-cell>
          <table:table-cell office:value-type="float" office:value="8640000" calcext:value-type="float">
            <text:p>8640000</text:p>
          </table:table-cell>
          <table:table-cell table:formula="of:=[.B2123]/[.C2123]" office:value-type="float" office:value="0.00196481481481481" calcext:value-type="float">
            <text:p>0,00196481481481481000</text:p>
          </table:table-cell>
          <table:table-cell table:formula="of:=[.D2124]-[.D21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table:formula="of:=[.B2123]+8" office:value-type="float" office:value="16984" calcext:value-type="float">
            <text:p>16984</text:p>
          </table:table-cell>
          <table:table-cell office:value-type="float" office:value="8640000" calcext:value-type="float">
            <text:p>8640000</text:p>
          </table:table-cell>
          <table:table-cell table:formula="of:=[.B2124]/[.C2124]" office:value-type="float" office:value="0.00196574074074074" calcext:value-type="float">
            <text:p>0,00196574074074074000</text:p>
          </table:table-cell>
          <table:table-cell table:formula="of:=[.D2125]-[.D21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[.B2124]+8" office:value-type="float" office:value="16992" calcext:value-type="float">
            <text:p>16992</text:p>
          </table:table-cell>
          <table:table-cell office:value-type="float" office:value="8640000" calcext:value-type="float">
            <text:p>8640000</text:p>
          </table:table-cell>
          <table:table-cell table:formula="of:=[.B2125]/[.C2125]" office:value-type="float" office:value="0.00196666666666667" calcext:value-type="float">
            <text:p>0,00196666666666667000</text:p>
          </table:table-cell>
          <table:table-cell table:formula="of:=[.D2126]-[.D21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[.B2125]+8" office:value-type="float" office:value="17000" calcext:value-type="float">
            <text:p>17000</text:p>
          </table:table-cell>
          <table:table-cell office:value-type="float" office:value="8640000" calcext:value-type="float">
            <text:p>8640000</text:p>
          </table:table-cell>
          <table:table-cell table:formula="of:=[.B2126]/[.C2126]" office:value-type="float" office:value="0.00196759259259259" calcext:value-type="float">
            <text:p>0,00196759259259259000</text:p>
          </table:table-cell>
          <table:table-cell table:formula="of:=[.D2127]-[.D21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[.B2126]+8" office:value-type="float" office:value="17008" calcext:value-type="float">
            <text:p>17008</text:p>
          </table:table-cell>
          <table:table-cell office:value-type="float" office:value="8640000" calcext:value-type="float">
            <text:p>8640000</text:p>
          </table:table-cell>
          <table:table-cell table:formula="of:=[.B2127]/[.C2127]" office:value-type="float" office:value="0.00196851851851852" calcext:value-type="float">
            <text:p>0,00196851851851852000</text:p>
          </table:table-cell>
          <table:table-cell table:formula="of:=[.D2128]-[.D21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[.B2127]+8" office:value-type="float" office:value="17016" calcext:value-type="float">
            <text:p>17016</text:p>
          </table:table-cell>
          <table:table-cell office:value-type="float" office:value="8640000" calcext:value-type="float">
            <text:p>8640000</text:p>
          </table:table-cell>
          <table:table-cell table:formula="of:=[.B2128]/[.C2128]" office:value-type="float" office:value="0.00196944444444444" calcext:value-type="float">
            <text:p>0,00196944444444444000</text:p>
          </table:table-cell>
          <table:table-cell table:formula="of:=[.D2129]-[.D21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[.B2128]+8" office:value-type="float" office:value="17024" calcext:value-type="float">
            <text:p>17024</text:p>
          </table:table-cell>
          <table:table-cell office:value-type="float" office:value="8640000" calcext:value-type="float">
            <text:p>8640000</text:p>
          </table:table-cell>
          <table:table-cell table:formula="of:=[.B2129]/[.C2129]" office:value-type="float" office:value="0.00197037037037037" calcext:value-type="float">
            <text:p>0,00197037037037037000</text:p>
          </table:table-cell>
          <table:table-cell table:formula="of:=[.D2130]-[.D2129]" office:value-type="float" office:value="0.000000925925925926354" calcext:value-type="float">
            <text:p>0,00000092592592592635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[.B2129]+8" office:value-type="float" office:value="17032" calcext:value-type="float">
            <text:p>17032</text:p>
          </table:table-cell>
          <table:table-cell office:value-type="float" office:value="8640000" calcext:value-type="float">
            <text:p>8640000</text:p>
          </table:table-cell>
          <table:table-cell table:formula="of:=[.B2130]/[.C2130]" office:value-type="float" office:value="0.0019712962962963" calcext:value-type="float">
            <text:p>0,00197129629629630000</text:p>
          </table:table-cell>
          <table:table-cell table:formula="of:=[.D2131]-[.D21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[.B2130]+8" office:value-type="float" office:value="17040" calcext:value-type="float">
            <text:p>17040</text:p>
          </table:table-cell>
          <table:table-cell office:value-type="float" office:value="8640000" calcext:value-type="float">
            <text:p>8640000</text:p>
          </table:table-cell>
          <table:table-cell table:formula="of:=[.B2131]/[.C2131]" office:value-type="float" office:value="0.00197222222222222" calcext:value-type="float">
            <text:p>0,00197222222222222000</text:p>
          </table:table-cell>
          <table:table-cell table:formula="of:=[.D2132]-[.D21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[.B2131]+8" office:value-type="float" office:value="17048" calcext:value-type="float">
            <text:p>17048</text:p>
          </table:table-cell>
          <table:table-cell office:value-type="float" office:value="8640000" calcext:value-type="float">
            <text:p>8640000</text:p>
          </table:table-cell>
          <table:table-cell table:formula="of:=[.B2132]/[.C2132]" office:value-type="float" office:value="0.00197314814814815" calcext:value-type="float">
            <text:p>0,00197314814814815000</text:p>
          </table:table-cell>
          <table:table-cell table:formula="of:=[.D2133]-[.D21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table:formula="of:=[.B2132]+8" office:value-type="float" office:value="17056" calcext:value-type="float">
            <text:p>17056</text:p>
          </table:table-cell>
          <table:table-cell office:value-type="float" office:value="8640000" calcext:value-type="float">
            <text:p>8640000</text:p>
          </table:table-cell>
          <table:table-cell table:formula="of:=[.B2133]/[.C2133]" office:value-type="float" office:value="0.00197407407407407" calcext:value-type="float">
            <text:p>0,00197407407407407000</text:p>
          </table:table-cell>
          <table:table-cell table:formula="of:=[.D2134]-[.D21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[.B2133]+8" office:value-type="float" office:value="17064" calcext:value-type="float">
            <text:p>17064</text:p>
          </table:table-cell>
          <table:table-cell office:value-type="float" office:value="8640000" calcext:value-type="float">
            <text:p>8640000</text:p>
          </table:table-cell>
          <table:table-cell table:formula="of:=[.B2134]/[.C2134]" office:value-type="float" office:value="0.001975" calcext:value-type="float">
            <text:p>0,00197500000000000000</text:p>
          </table:table-cell>
          <table:table-cell table:formula="of:=[.D2135]-[.D21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[.B2134]+8" office:value-type="float" office:value="17072" calcext:value-type="float">
            <text:p>17072</text:p>
          </table:table-cell>
          <table:table-cell office:value-type="float" office:value="8640000" calcext:value-type="float">
            <text:p>8640000</text:p>
          </table:table-cell>
          <table:table-cell table:formula="of:=[.B2135]/[.C2135]" office:value-type="float" office:value="0.00197592592592593" calcext:value-type="float">
            <text:p>0,00197592592592593000</text:p>
          </table:table-cell>
          <table:table-cell table:formula="of:=[.D2136]-[.D21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[.B2135]+8" office:value-type="float" office:value="17080" calcext:value-type="float">
            <text:p>17080</text:p>
          </table:table-cell>
          <table:table-cell office:value-type="float" office:value="8640000" calcext:value-type="float">
            <text:p>8640000</text:p>
          </table:table-cell>
          <table:table-cell table:formula="of:=[.B2136]/[.C2136]" office:value-type="float" office:value="0.00197685185185185" calcext:value-type="float">
            <text:p>0,00197685185185185000</text:p>
          </table:table-cell>
          <table:table-cell table:formula="of:=[.D2137]-[.D21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[.B2136]+8" office:value-type="float" office:value="17088" calcext:value-type="float">
            <text:p>17088</text:p>
          </table:table-cell>
          <table:table-cell office:value-type="float" office:value="8640000" calcext:value-type="float">
            <text:p>8640000</text:p>
          </table:table-cell>
          <table:table-cell table:formula="of:=[.B2137]/[.C2137]" office:value-type="float" office:value="0.00197777777777778" calcext:value-type="float">
            <text:p>0,00197777777777778000</text:p>
          </table:table-cell>
          <table:table-cell table:formula="of:=[.D2138]-[.D21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[.B2137]+8" office:value-type="float" office:value="17096" calcext:value-type="float">
            <text:p>17096</text:p>
          </table:table-cell>
          <table:table-cell office:value-type="float" office:value="8640000" calcext:value-type="float">
            <text:p>8640000</text:p>
          </table:table-cell>
          <table:table-cell table:formula="of:=[.B2138]/[.C2138]" office:value-type="float" office:value="0.0019787037037037" calcext:value-type="float">
            <text:p>0,00197870370370370000</text:p>
          </table:table-cell>
          <table:table-cell table:formula="of:=[.D2139]-[.D21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table:formula="of:=[.B2138]+8" office:value-type="float" office:value="17104" calcext:value-type="float">
            <text:p>17104</text:p>
          </table:table-cell>
          <table:table-cell office:value-type="float" office:value="8640000" calcext:value-type="float">
            <text:p>8640000</text:p>
          </table:table-cell>
          <table:table-cell table:formula="of:=[.B2139]/[.C2139]" office:value-type="float" office:value="0.00197962962962963" calcext:value-type="float">
            <text:p>0,00197962962962963000</text:p>
          </table:table-cell>
          <table:table-cell table:formula="of:=[.D2140]-[.D21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[.B2139]+8" office:value-type="float" office:value="17112" calcext:value-type="float">
            <text:p>17112</text:p>
          </table:table-cell>
          <table:table-cell office:value-type="float" office:value="8640000" calcext:value-type="float">
            <text:p>8640000</text:p>
          </table:table-cell>
          <table:table-cell table:formula="of:=[.B2140]/[.C2140]" office:value-type="float" office:value="0.00198055555555556" calcext:value-type="float">
            <text:p>0,00198055555555556000</text:p>
          </table:table-cell>
          <table:table-cell table:formula="of:=[.D2141]-[.D21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[.B2140]+8" office:value-type="float" office:value="17120" calcext:value-type="float">
            <text:p>17120</text:p>
          </table:table-cell>
          <table:table-cell office:value-type="float" office:value="8640000" calcext:value-type="float">
            <text:p>8640000</text:p>
          </table:table-cell>
          <table:table-cell table:formula="of:=[.B2141]/[.C2141]" office:value-type="float" office:value="0.00198148148148148" calcext:value-type="float">
            <text:p>0,00198148148148148000</text:p>
          </table:table-cell>
          <table:table-cell table:formula="of:=[.D2142]-[.D21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table:formula="of:=[.B2141]+8" office:value-type="float" office:value="17128" calcext:value-type="float">
            <text:p>17128</text:p>
          </table:table-cell>
          <table:table-cell office:value-type="float" office:value="8640000" calcext:value-type="float">
            <text:p>8640000</text:p>
          </table:table-cell>
          <table:table-cell table:formula="of:=[.B2142]/[.C2142]" office:value-type="float" office:value="0.00198240740740741" calcext:value-type="float">
            <text:p>0,00198240740740741000</text:p>
          </table:table-cell>
          <table:table-cell table:formula="of:=[.D2143]-[.D21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table:formula="of:=[.B2142]+8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2143]/[.C2143]" office:value-type="float" office:value="0.00198333333333333" calcext:value-type="float">
            <text:p>0,00198333333333333000</text:p>
          </table:table-cell>
          <table:table-cell table:formula="of:=[.D2144]-[.D21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[.B2143]+8" office:value-type="float" office:value="17144" calcext:value-type="float">
            <text:p>17144</text:p>
          </table:table-cell>
          <table:table-cell office:value-type="float" office:value="8640000" calcext:value-type="float">
            <text:p>8640000</text:p>
          </table:table-cell>
          <table:table-cell table:formula="of:=[.B2144]/[.C2144]" office:value-type="float" office:value="0.00198425925925926" calcext:value-type="float">
            <text:p>0,00198425925925926000</text:p>
          </table:table-cell>
          <table:table-cell table:formula="of:=[.D2145]-[.D21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[.B2144]+8" office:value-type="float" office:value="17152" calcext:value-type="float">
            <text:p>17152</text:p>
          </table:table-cell>
          <table:table-cell office:value-type="float" office:value="8640000" calcext:value-type="float">
            <text:p>8640000</text:p>
          </table:table-cell>
          <table:table-cell table:formula="of:=[.B2145]/[.C2145]" office:value-type="float" office:value="0.00198518518518519" calcext:value-type="float">
            <text:p>0,00198518518518519000</text:p>
          </table:table-cell>
          <table:table-cell table:formula="of:=[.D2146]-[.D21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table:formula="of:=[.B2145]+8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2146]/[.C2146]" office:value-type="float" office:value="0.00198611111111111" calcext:value-type="float">
            <text:p>0,00198611111111111000</text:p>
          </table:table-cell>
          <table:table-cell table:formula="of:=[.D2147]-[.D21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table:formula="of:=[.B2146]+8" office:value-type="float" office:value="17168" calcext:value-type="float">
            <text:p>17168</text:p>
          </table:table-cell>
          <table:table-cell office:value-type="float" office:value="8640000" calcext:value-type="float">
            <text:p>8640000</text:p>
          </table:table-cell>
          <table:table-cell table:formula="of:=[.B2147]/[.C2147]" office:value-type="float" office:value="0.00198703703703704" calcext:value-type="float">
            <text:p>0,00198703703703704000</text:p>
          </table:table-cell>
          <table:table-cell table:formula="of:=[.D2148]-[.D21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[.B2147]+8" office:value-type="float" office:value="17176" calcext:value-type="float">
            <text:p>17176</text:p>
          </table:table-cell>
          <table:table-cell office:value-type="float" office:value="8640000" calcext:value-type="float">
            <text:p>8640000</text:p>
          </table:table-cell>
          <table:table-cell table:formula="of:=[.B2148]/[.C2148]" office:value-type="float" office:value="0.00198796296296296" calcext:value-type="float">
            <text:p>0,00198796296296296000</text:p>
          </table:table-cell>
          <table:table-cell table:formula="of:=[.D2149]-[.D21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[.B2148]+8" office:value-type="float" office:value="17184" calcext:value-type="float">
            <text:p>17184</text:p>
          </table:table-cell>
          <table:table-cell office:value-type="float" office:value="8640000" calcext:value-type="float">
            <text:p>8640000</text:p>
          </table:table-cell>
          <table:table-cell table:formula="of:=[.B2149]/[.C2149]" office:value-type="float" office:value="0.00198888888888889" calcext:value-type="float">
            <text:p>0,00198888888888889000</text:p>
          </table:table-cell>
          <table:table-cell table:formula="of:=[.D2150]-[.D21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[.B2149]+8" office:value-type="float" office:value="17192" calcext:value-type="float">
            <text:p>17192</text:p>
          </table:table-cell>
          <table:table-cell office:value-type="float" office:value="8640000" calcext:value-type="float">
            <text:p>8640000</text:p>
          </table:table-cell>
          <table:table-cell table:formula="of:=[.B2150]/[.C2150]" office:value-type="float" office:value="0.00198981481481482" calcext:value-type="float">
            <text:p>0,00198981481481482000</text:p>
          </table:table-cell>
          <table:table-cell table:formula="of:=[.D2151]-[.D21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[.B2150]+8" office:value-type="float" office:value="17200" calcext:value-type="float">
            <text:p>17200</text:p>
          </table:table-cell>
          <table:table-cell office:value-type="float" office:value="8640000" calcext:value-type="float">
            <text:p>8640000</text:p>
          </table:table-cell>
          <table:table-cell table:formula="of:=[.B2151]/[.C2151]" office:value-type="float" office:value="0.00199074074074074" calcext:value-type="float">
            <text:p>0,00199074074074074000</text:p>
          </table:table-cell>
          <table:table-cell table:formula="of:=[.D2152]-[.D21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[.B2151]+8" office:value-type="float" office:value="17208" calcext:value-type="float">
            <text:p>17208</text:p>
          </table:table-cell>
          <table:table-cell office:value-type="float" office:value="8640000" calcext:value-type="float">
            <text:p>8640000</text:p>
          </table:table-cell>
          <table:table-cell table:formula="of:=[.B2152]/[.C2152]" office:value-type="float" office:value="0.00199166666666667" calcext:value-type="float">
            <text:p>0,00199166666666667000</text:p>
          </table:table-cell>
          <table:table-cell table:formula="of:=[.D2153]-[.D21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[.B2152]+8" office:value-type="float" office:value="17216" calcext:value-type="float">
            <text:p>17216</text:p>
          </table:table-cell>
          <table:table-cell office:value-type="float" office:value="8640000" calcext:value-type="float">
            <text:p>8640000</text:p>
          </table:table-cell>
          <table:table-cell table:formula="of:=[.B2153]/[.C2153]" office:value-type="float" office:value="0.00199259259259259" calcext:value-type="float">
            <text:p>0,00199259259259259000</text:p>
          </table:table-cell>
          <table:table-cell table:formula="of:=[.D2154]-[.D21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table:formula="of:=[.B2153]+8" office:value-type="float" office:value="17224" calcext:value-type="float">
            <text:p>17224</text:p>
          </table:table-cell>
          <table:table-cell office:value-type="float" office:value="8640000" calcext:value-type="float">
            <text:p>8640000</text:p>
          </table:table-cell>
          <table:table-cell table:formula="of:=[.B2154]/[.C2154]" office:value-type="float" office:value="0.00199351851851852" calcext:value-type="float">
            <text:p>0,00199351851851852000</text:p>
          </table:table-cell>
          <table:table-cell table:formula="of:=[.D2155]-[.D21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[.B2154]+8" office:value-type="float" office:value="17232" calcext:value-type="float">
            <text:p>17232</text:p>
          </table:table-cell>
          <table:table-cell office:value-type="float" office:value="8640000" calcext:value-type="float">
            <text:p>8640000</text:p>
          </table:table-cell>
          <table:table-cell table:formula="of:=[.B2155]/[.C2155]" office:value-type="float" office:value="0.00199444444444444" calcext:value-type="float">
            <text:p>0,00199444444444444000</text:p>
          </table:table-cell>
          <table:table-cell table:formula="of:=[.D2156]-[.D21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[.B2155]+8" office:value-type="float" office:value="17240" calcext:value-type="float">
            <text:p>17240</text:p>
          </table:table-cell>
          <table:table-cell office:value-type="float" office:value="8640000" calcext:value-type="float">
            <text:p>8640000</text:p>
          </table:table-cell>
          <table:table-cell table:formula="of:=[.B2156]/[.C2156]" office:value-type="float" office:value="0.00199537037037037" calcext:value-type="float">
            <text:p>0,00199537037037037000</text:p>
          </table:table-cell>
          <table:table-cell table:formula="of:=[.D2157]-[.D21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[.B2156]+8" office:value-type="float" office:value="17248" calcext:value-type="float">
            <text:p>17248</text:p>
          </table:table-cell>
          <table:table-cell office:value-type="float" office:value="8640000" calcext:value-type="float">
            <text:p>8640000</text:p>
          </table:table-cell>
          <table:table-cell table:formula="of:=[.B2157]/[.C2157]" office:value-type="float" office:value="0.0019962962962963" calcext:value-type="float">
            <text:p>0,00199629629629630000</text:p>
          </table:table-cell>
          <table:table-cell table:formula="of:=[.D2158]-[.D21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[.B2157]+8" office:value-type="float" office:value="17256" calcext:value-type="float">
            <text:p>17256</text:p>
          </table:table-cell>
          <table:table-cell office:value-type="float" office:value="8640000" calcext:value-type="float">
            <text:p>8640000</text:p>
          </table:table-cell>
          <table:table-cell table:formula="of:=[.B2158]/[.C2158]" office:value-type="float" office:value="0.00199722222222222" calcext:value-type="float">
            <text:p>0,00199722222222222000</text:p>
          </table:table-cell>
          <table:table-cell table:formula="of:=[.D2159]-[.D21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[.B2158]+8" office:value-type="float" office:value="17264" calcext:value-type="float">
            <text:p>17264</text:p>
          </table:table-cell>
          <table:table-cell office:value-type="float" office:value="8640000" calcext:value-type="float">
            <text:p>8640000</text:p>
          </table:table-cell>
          <table:table-cell table:formula="of:=[.B2159]/[.C2159]" office:value-type="float" office:value="0.00199814814814815" calcext:value-type="float">
            <text:p>0,00199814814814815000</text:p>
          </table:table-cell>
          <table:table-cell table:formula="of:=[.D2160]-[.D21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[.B2159]+8" office:value-type="float" office:value="17272" calcext:value-type="float">
            <text:p>17272</text:p>
          </table:table-cell>
          <table:table-cell office:value-type="float" office:value="8640000" calcext:value-type="float">
            <text:p>8640000</text:p>
          </table:table-cell>
          <table:table-cell table:formula="of:=[.B2160]/[.C2160]" office:value-type="float" office:value="0.00199907407407407" calcext:value-type="float">
            <text:p>0,00199907407407407000</text:p>
          </table:table-cell>
          <table:table-cell table:formula="of:=[.D2161]-[.D21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[.B2160]+8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2161]/[.C2161]" office:value-type="float" office:value="0.002" calcext:value-type="float">
            <text:p>0,00200000000000000000</text:p>
          </table:table-cell>
          <table:table-cell table:formula="of:=[.D2162]-[.D21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[.B2161]+8" office:value-type="float" office:value="17288" calcext:value-type="float">
            <text:p>17288</text:p>
          </table:table-cell>
          <table:table-cell office:value-type="float" office:value="8640000" calcext:value-type="float">
            <text:p>8640000</text:p>
          </table:table-cell>
          <table:table-cell table:formula="of:=[.B2162]/[.C2162]" office:value-type="float" office:value="0.00200092592592593" calcext:value-type="float">
            <text:p>0,00200092592592593000</text:p>
          </table:table-cell>
          <table:table-cell table:formula="of:=[.D2163]-[.D21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[.B2162]+8" office:value-type="float" office:value="17296" calcext:value-type="float">
            <text:p>17296</text:p>
          </table:table-cell>
          <table:table-cell office:value-type="float" office:value="8640000" calcext:value-type="float">
            <text:p>8640000</text:p>
          </table:table-cell>
          <table:table-cell table:formula="of:=[.B2163]/[.C2163]" office:value-type="float" office:value="0.00200185185185185" calcext:value-type="float">
            <text:p>0,00200185185185185000</text:p>
          </table:table-cell>
          <table:table-cell table:formula="of:=[.D2164]-[.D21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[.B2163]+8" office:value-type="float" office:value="17304" calcext:value-type="float">
            <text:p>17304</text:p>
          </table:table-cell>
          <table:table-cell office:value-type="float" office:value="8640000" calcext:value-type="float">
            <text:p>8640000</text:p>
          </table:table-cell>
          <table:table-cell table:formula="of:=[.B2164]/[.C2164]" office:value-type="float" office:value="0.00200277777777778" calcext:value-type="float">
            <text:p>0,00200277777777778000</text:p>
          </table:table-cell>
          <table:table-cell table:formula="of:=[.D2165]-[.D21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[.B2164]+8" office:value-type="float" office:value="17312" calcext:value-type="float">
            <text:p>17312</text:p>
          </table:table-cell>
          <table:table-cell office:value-type="float" office:value="8640000" calcext:value-type="float">
            <text:p>8640000</text:p>
          </table:table-cell>
          <table:table-cell table:formula="of:=[.B2165]/[.C2165]" office:value-type="float" office:value="0.0020037037037037" calcext:value-type="float">
            <text:p>0,00200370370370370000</text:p>
          </table:table-cell>
          <table:table-cell table:formula="of:=[.D2166]-[.D21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[.B2165]+8" office:value-type="float" office:value="17320" calcext:value-type="float">
            <text:p>17320</text:p>
          </table:table-cell>
          <table:table-cell office:value-type="float" office:value="8640000" calcext:value-type="float">
            <text:p>8640000</text:p>
          </table:table-cell>
          <table:table-cell table:formula="of:=[.B2166]/[.C2166]" office:value-type="float" office:value="0.00200462962962963" calcext:value-type="float">
            <text:p>0,00200462962962963000</text:p>
          </table:table-cell>
          <table:table-cell table:formula="of:=[.D2167]-[.D21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[.B2166]+8" office:value-type="float" office:value="17328" calcext:value-type="float">
            <text:p>17328</text:p>
          </table:table-cell>
          <table:table-cell office:value-type="float" office:value="8640000" calcext:value-type="float">
            <text:p>8640000</text:p>
          </table:table-cell>
          <table:table-cell table:formula="of:=[.B2167]/[.C2167]" office:value-type="float" office:value="0.00200555555555556" calcext:value-type="float">
            <text:p>0,00200555555555556000</text:p>
          </table:table-cell>
          <table:table-cell table:formula="of:=[.D2168]-[.D21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[.B2167]+8" office:value-type="float" office:value="17336" calcext:value-type="float">
            <text:p>17336</text:p>
          </table:table-cell>
          <table:table-cell office:value-type="float" office:value="8640000" calcext:value-type="float">
            <text:p>8640000</text:p>
          </table:table-cell>
          <table:table-cell table:formula="of:=[.B2168]/[.C2168]" office:value-type="float" office:value="0.00200648148148148" calcext:value-type="float">
            <text:p>0,00200648148148148000</text:p>
          </table:table-cell>
          <table:table-cell table:formula="of:=[.D2169]-[.D21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[.B2168]+8" office:value-type="float" office:value="17344" calcext:value-type="float">
            <text:p>17344</text:p>
          </table:table-cell>
          <table:table-cell office:value-type="float" office:value="8640000" calcext:value-type="float">
            <text:p>8640000</text:p>
          </table:table-cell>
          <table:table-cell table:formula="of:=[.B2169]/[.C2169]" office:value-type="float" office:value="0.00200740740740741" calcext:value-type="float">
            <text:p>0,00200740740740741000</text:p>
          </table:table-cell>
          <table:table-cell table:formula="of:=[.D2170]-[.D21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[.B2169]+8" office:value-type="float" office:value="17352" calcext:value-type="float">
            <text:p>17352</text:p>
          </table:table-cell>
          <table:table-cell office:value-type="float" office:value="8640000" calcext:value-type="float">
            <text:p>8640000</text:p>
          </table:table-cell>
          <table:table-cell table:formula="of:=[.B2170]/[.C2170]" office:value-type="float" office:value="0.00200833333333333" calcext:value-type="float">
            <text:p>0,00200833333333333000</text:p>
          </table:table-cell>
          <table:table-cell table:formula="of:=[.D2171]-[.D21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[.B2170]+8" office:value-type="float" office:value="17360" calcext:value-type="float">
            <text:p>17360</text:p>
          </table:table-cell>
          <table:table-cell office:value-type="float" office:value="8640000" calcext:value-type="float">
            <text:p>8640000</text:p>
          </table:table-cell>
          <table:table-cell table:formula="of:=[.B2171]/[.C2171]" office:value-type="float" office:value="0.00200925925925926" calcext:value-type="float">
            <text:p>0,00200925925925926000</text:p>
          </table:table-cell>
          <table:table-cell table:formula="of:=[.D2172]-[.D21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table:formula="of:=[.B2171]+8" office:value-type="float" office:value="17368" calcext:value-type="float">
            <text:p>17368</text:p>
          </table:table-cell>
          <table:table-cell office:value-type="float" office:value="8640000" calcext:value-type="float">
            <text:p>8640000</text:p>
          </table:table-cell>
          <table:table-cell table:formula="of:=[.B2172]/[.C2172]" office:value-type="float" office:value="0.00201018518518519" calcext:value-type="float">
            <text:p>0,00201018518518519000</text:p>
          </table:table-cell>
          <table:table-cell table:formula="of:=[.D2173]-[.D21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[.B2172]+8" office:value-type="float" office:value="17376" calcext:value-type="float">
            <text:p>17376</text:p>
          </table:table-cell>
          <table:table-cell office:value-type="float" office:value="8640000" calcext:value-type="float">
            <text:p>8640000</text:p>
          </table:table-cell>
          <table:table-cell table:formula="of:=[.B2173]/[.C2173]" office:value-type="float" office:value="0.00201111111111111" calcext:value-type="float">
            <text:p>0,00201111111111111000</text:p>
          </table:table-cell>
          <table:table-cell table:formula="of:=[.D2174]-[.D21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[.B2173]+8" office:value-type="float" office:value="17384" calcext:value-type="float">
            <text:p>17384</text:p>
          </table:table-cell>
          <table:table-cell office:value-type="float" office:value="8640000" calcext:value-type="float">
            <text:p>8640000</text:p>
          </table:table-cell>
          <table:table-cell table:formula="of:=[.B2174]/[.C2174]" office:value-type="float" office:value="0.00201203703703704" calcext:value-type="float">
            <text:p>0,00201203703703704000</text:p>
          </table:table-cell>
          <table:table-cell table:formula="of:=[.D2175]-[.D21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[.B2174]+8" office:value-type="float" office:value="17392" calcext:value-type="float">
            <text:p>17392</text:p>
          </table:table-cell>
          <table:table-cell office:value-type="float" office:value="8640000" calcext:value-type="float">
            <text:p>8640000</text:p>
          </table:table-cell>
          <table:table-cell table:formula="of:=[.B2175]/[.C2175]" office:value-type="float" office:value="0.00201296296296296" calcext:value-type="float">
            <text:p>0,00201296296296296000</text:p>
          </table:table-cell>
          <table:table-cell table:formula="of:=[.D2176]-[.D21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[.B2175]+8" office:value-type="float" office:value="17400" calcext:value-type="float">
            <text:p>17400</text:p>
          </table:table-cell>
          <table:table-cell office:value-type="float" office:value="8640000" calcext:value-type="float">
            <text:p>8640000</text:p>
          </table:table-cell>
          <table:table-cell table:formula="of:=[.B2176]/[.C2176]" office:value-type="float" office:value="0.00201388888888889" calcext:value-type="float">
            <text:p>0,00201388888888889000</text:p>
          </table:table-cell>
          <table:table-cell table:formula="of:=[.D2177]-[.D21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B2176]+8" office:value-type="float" office:value="17408" calcext:value-type="float">
            <text:p>17408</text:p>
          </table:table-cell>
          <table:table-cell office:value-type="float" office:value="8640000" calcext:value-type="float">
            <text:p>8640000</text:p>
          </table:table-cell>
          <table:table-cell table:formula="of:=[.B2177]/[.C2177]" office:value-type="float" office:value="0.00201481481481481" calcext:value-type="float">
            <text:p>0,00201481481481481000</text:p>
          </table:table-cell>
          <table:table-cell table:formula="of:=[.D2178]-[.D21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table:formula="of:=[.B2177]+8" office:value-type="float" office:value="17416" calcext:value-type="float">
            <text:p>17416</text:p>
          </table:table-cell>
          <table:table-cell office:value-type="float" office:value="8640000" calcext:value-type="float">
            <text:p>8640000</text:p>
          </table:table-cell>
          <table:table-cell table:formula="of:=[.B2178]/[.C2178]" office:value-type="float" office:value="0.00201574074074074" calcext:value-type="float">
            <text:p>0,00201574074074074000</text:p>
          </table:table-cell>
          <table:table-cell table:formula="of:=[.D2179]-[.D21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[.B2178]+8" office:value-type="float" office:value="17424" calcext:value-type="float">
            <text:p>17424</text:p>
          </table:table-cell>
          <table:table-cell office:value-type="float" office:value="8640000" calcext:value-type="float">
            <text:p>8640000</text:p>
          </table:table-cell>
          <table:table-cell table:formula="of:=[.B2179]/[.C2179]" office:value-type="float" office:value="0.00201666666666667" calcext:value-type="float">
            <text:p>0,00201666666666667000</text:p>
          </table:table-cell>
          <table:table-cell table:formula="of:=[.D2180]-[.D21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table:formula="of:=[.B2179]+8" office:value-type="float" office:value="17432" calcext:value-type="float">
            <text:p>17432</text:p>
          </table:table-cell>
          <table:table-cell office:value-type="float" office:value="8640000" calcext:value-type="float">
            <text:p>8640000</text:p>
          </table:table-cell>
          <table:table-cell table:formula="of:=[.B2180]/[.C2180]" office:value-type="float" office:value="0.00201759259259259" calcext:value-type="float">
            <text:p>0,00201759259259259000</text:p>
          </table:table-cell>
          <table:table-cell table:formula="of:=[.D2181]-[.D21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[.B2180]+8" office:value-type="float" office:value="17440" calcext:value-type="float">
            <text:p>17440</text:p>
          </table:table-cell>
          <table:table-cell office:value-type="float" office:value="8640000" calcext:value-type="float">
            <text:p>8640000</text:p>
          </table:table-cell>
          <table:table-cell table:formula="of:=[.B2181]/[.C2181]" office:value-type="float" office:value="0.00201851851851852" calcext:value-type="float">
            <text:p>0,00201851851851852000</text:p>
          </table:table-cell>
          <table:table-cell table:formula="of:=[.D2182]-[.D21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table:formula="of:=[.B2181]+8" office:value-type="float" office:value="17448" calcext:value-type="float">
            <text:p>17448</text:p>
          </table:table-cell>
          <table:table-cell office:value-type="float" office:value="8640000" calcext:value-type="float">
            <text:p>8640000</text:p>
          </table:table-cell>
          <table:table-cell table:formula="of:=[.B2182]/[.C2182]" office:value-type="float" office:value="0.00201944444444444" calcext:value-type="float">
            <text:p>0,00201944444444444000</text:p>
          </table:table-cell>
          <table:table-cell table:formula="of:=[.D2183]-[.D21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table:formula="of:=[.B2182]+8" office:value-type="float" office:value="17456" calcext:value-type="float">
            <text:p>17456</text:p>
          </table:table-cell>
          <table:table-cell office:value-type="float" office:value="8640000" calcext:value-type="float">
            <text:p>8640000</text:p>
          </table:table-cell>
          <table:table-cell table:formula="of:=[.B2183]/[.C2183]" office:value-type="float" office:value="0.00202037037037037" calcext:value-type="float">
            <text:p>0,00202037037037037000</text:p>
          </table:table-cell>
          <table:table-cell table:formula="of:=[.D2184]-[.D21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[.B2183]+8" office:value-type="float" office:value="17464" calcext:value-type="float">
            <text:p>17464</text:p>
          </table:table-cell>
          <table:table-cell office:value-type="float" office:value="8640000" calcext:value-type="float">
            <text:p>8640000</text:p>
          </table:table-cell>
          <table:table-cell table:formula="of:=[.B2184]/[.C2184]" office:value-type="float" office:value="0.0020212962962963" calcext:value-type="float">
            <text:p>0,00202129629629630000</text:p>
          </table:table-cell>
          <table:table-cell table:formula="of:=[.D2185]-[.D21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[.B2184]+8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2185]/[.C2185]" office:value-type="float" office:value="0.00202222222222222" calcext:value-type="float">
            <text:p>0,00202222222222222000</text:p>
          </table:table-cell>
          <table:table-cell table:formula="of:=[.D2186]-[.D21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[.B2185]+8" office:value-type="float" office:value="17480" calcext:value-type="float">
            <text:p>17480</text:p>
          </table:table-cell>
          <table:table-cell office:value-type="float" office:value="8640000" calcext:value-type="float">
            <text:p>8640000</text:p>
          </table:table-cell>
          <table:table-cell table:formula="of:=[.B2186]/[.C2186]" office:value-type="float" office:value="0.00202314814814815" calcext:value-type="float">
            <text:p>0,00202314814814815000</text:p>
          </table:table-cell>
          <table:table-cell table:formula="of:=[.D2187]-[.D21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[.B2186]+8" office:value-type="float" office:value="17488" calcext:value-type="float">
            <text:p>17488</text:p>
          </table:table-cell>
          <table:table-cell office:value-type="float" office:value="8640000" calcext:value-type="float">
            <text:p>8640000</text:p>
          </table:table-cell>
          <table:table-cell table:formula="of:=[.B2187]/[.C2187]" office:value-type="float" office:value="0.00202407407407407" calcext:value-type="float">
            <text:p>0,00202407407407407000</text:p>
          </table:table-cell>
          <table:table-cell table:formula="of:=[.D2188]-[.D21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table:formula="of:=[.B2187]+8" office:value-type="float" office:value="17496" calcext:value-type="float">
            <text:p>17496</text:p>
          </table:table-cell>
          <table:table-cell office:value-type="float" office:value="8640000" calcext:value-type="float">
            <text:p>8640000</text:p>
          </table:table-cell>
          <table:table-cell table:formula="of:=[.B2188]/[.C2188]" office:value-type="float" office:value="0.002025" calcext:value-type="float">
            <text:p>0,00202500000000000000</text:p>
          </table:table-cell>
          <table:table-cell table:formula="of:=[.D2189]-[.D21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[.B2188]+8" office:value-type="float" office:value="17504" calcext:value-type="float">
            <text:p>17504</text:p>
          </table:table-cell>
          <table:table-cell office:value-type="float" office:value="8640000" calcext:value-type="float">
            <text:p>8640000</text:p>
          </table:table-cell>
          <table:table-cell table:formula="of:=[.B2189]/[.C2189]" office:value-type="float" office:value="0.00202592592592593" calcext:value-type="float">
            <text:p>0,00202592592592593000</text:p>
          </table:table-cell>
          <table:table-cell table:formula="of:=[.D2190]-[.D21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[.B2189]+8" office:value-type="float" office:value="17512" calcext:value-type="float">
            <text:p>17512</text:p>
          </table:table-cell>
          <table:table-cell office:value-type="float" office:value="8640000" calcext:value-type="float">
            <text:p>8640000</text:p>
          </table:table-cell>
          <table:table-cell table:formula="of:=[.B2190]/[.C2190]" office:value-type="float" office:value="0.00202685185185185" calcext:value-type="float">
            <text:p>0,00202685185185185000</text:p>
          </table:table-cell>
          <table:table-cell table:formula="of:=[.D2191]-[.D21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[.B2190]+8" office:value-type="float" office:value="17520" calcext:value-type="float">
            <text:p>17520</text:p>
          </table:table-cell>
          <table:table-cell office:value-type="float" office:value="8640000" calcext:value-type="float">
            <text:p>8640000</text:p>
          </table:table-cell>
          <table:table-cell table:formula="of:=[.B2191]/[.C2191]" office:value-type="float" office:value="0.00202777777777778" calcext:value-type="float">
            <text:p>0,00202777777777778000</text:p>
          </table:table-cell>
          <table:table-cell table:formula="of:=[.D2192]-[.D21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[.B2191]+8" office:value-type="float" office:value="17528" calcext:value-type="float">
            <text:p>17528</text:p>
          </table:table-cell>
          <table:table-cell office:value-type="float" office:value="8640000" calcext:value-type="float">
            <text:p>8640000</text:p>
          </table:table-cell>
          <table:table-cell table:formula="of:=[.B2192]/[.C2192]" office:value-type="float" office:value="0.0020287037037037" calcext:value-type="float">
            <text:p>0,00202870370370370000</text:p>
          </table:table-cell>
          <table:table-cell table:formula="of:=[.D2193]-[.D21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[.B2192]+8" office:value-type="float" office:value="17536" calcext:value-type="float">
            <text:p>17536</text:p>
          </table:table-cell>
          <table:table-cell office:value-type="float" office:value="8640000" calcext:value-type="float">
            <text:p>8640000</text:p>
          </table:table-cell>
          <table:table-cell table:formula="of:=[.B2193]/[.C2193]" office:value-type="float" office:value="0.00202962962962963" calcext:value-type="float">
            <text:p>0,00202962962962963000</text:p>
          </table:table-cell>
          <table:table-cell table:formula="of:=[.D2194]-[.D21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table:formula="of:=[.B2193]+8" office:value-type="float" office:value="17544" calcext:value-type="float">
            <text:p>17544</text:p>
          </table:table-cell>
          <table:table-cell office:value-type="float" office:value="8640000" calcext:value-type="float">
            <text:p>8640000</text:p>
          </table:table-cell>
          <table:table-cell table:formula="of:=[.B2194]/[.C2194]" office:value-type="float" office:value="0.00203055555555556" calcext:value-type="float">
            <text:p>0,00203055555555556000</text:p>
          </table:table-cell>
          <table:table-cell table:formula="of:=[.D2195]-[.D21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table:formula="of:=[.B2194]+8" office:value-type="float" office:value="17552" calcext:value-type="float">
            <text:p>17552</text:p>
          </table:table-cell>
          <table:table-cell office:value-type="float" office:value="8640000" calcext:value-type="float">
            <text:p>8640000</text:p>
          </table:table-cell>
          <table:table-cell table:formula="of:=[.B2195]/[.C2195]" office:value-type="float" office:value="0.00203148148148148" calcext:value-type="float">
            <text:p>0,00203148148148148000</text:p>
          </table:table-cell>
          <table:table-cell table:formula="of:=[.D2196]-[.D21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table:formula="of:=[.B2195]+8" office:value-type="float" office:value="17560" calcext:value-type="float">
            <text:p>17560</text:p>
          </table:table-cell>
          <table:table-cell office:value-type="float" office:value="8640000" calcext:value-type="float">
            <text:p>8640000</text:p>
          </table:table-cell>
          <table:table-cell table:formula="of:=[.B2196]/[.C2196]" office:value-type="float" office:value="0.00203240740740741" calcext:value-type="float">
            <text:p>0,00203240740740741000</text:p>
          </table:table-cell>
          <table:table-cell table:formula="of:=[.D2197]-[.D21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table:formula="of:=[.B2196]+8" office:value-type="float" office:value="17568" calcext:value-type="float">
            <text:p>17568</text:p>
          </table:table-cell>
          <table:table-cell office:value-type="float" office:value="8640000" calcext:value-type="float">
            <text:p>8640000</text:p>
          </table:table-cell>
          <table:table-cell table:formula="of:=[.B2197]/[.C2197]" office:value-type="float" office:value="0.00203333333333333" calcext:value-type="float">
            <text:p>0,00203333333333333000</text:p>
          </table:table-cell>
          <table:table-cell table:formula="of:=[.D2198]-[.D21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[.B2197]+8" office:value-type="float" office:value="17576" calcext:value-type="float">
            <text:p>17576</text:p>
          </table:table-cell>
          <table:table-cell office:value-type="float" office:value="8640000" calcext:value-type="float">
            <text:p>8640000</text:p>
          </table:table-cell>
          <table:table-cell table:formula="of:=[.B2198]/[.C2198]" office:value-type="float" office:value="0.00203425925925926" calcext:value-type="float">
            <text:p>0,00203425925925926000</text:p>
          </table:table-cell>
          <table:table-cell table:formula="of:=[.D2199]-[.D21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[.B2198]+8" office:value-type="float" office:value="17584" calcext:value-type="float">
            <text:p>17584</text:p>
          </table:table-cell>
          <table:table-cell office:value-type="float" office:value="8640000" calcext:value-type="float">
            <text:p>8640000</text:p>
          </table:table-cell>
          <table:table-cell table:formula="of:=[.B2199]/[.C2199]" office:value-type="float" office:value="0.00203518518518519" calcext:value-type="float">
            <text:p>0,00203518518518519000</text:p>
          </table:table-cell>
          <table:table-cell table:formula="of:=[.D2200]-[.D21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[.B2199]+8" office:value-type="float" office:value="17592" calcext:value-type="float">
            <text:p>17592</text:p>
          </table:table-cell>
          <table:table-cell office:value-type="float" office:value="8640000" calcext:value-type="float">
            <text:p>8640000</text:p>
          </table:table-cell>
          <table:table-cell table:formula="of:=[.B2200]/[.C2200]" office:value-type="float" office:value="0.00203611111111111" calcext:value-type="float">
            <text:p>0,00203611111111111000</text:p>
          </table:table-cell>
          <table:table-cell table:formula="of:=[.D2201]-[.D22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B2200]+8" office:value-type="float" office:value="17600" calcext:value-type="float">
            <text:p>17600</text:p>
          </table:table-cell>
          <table:table-cell office:value-type="float" office:value="8640000" calcext:value-type="float">
            <text:p>8640000</text:p>
          </table:table-cell>
          <table:table-cell table:formula="of:=[.B2201]/[.C2201]" office:value-type="float" office:value="0.00203703703703704" calcext:value-type="float">
            <text:p>0,00203703703703704000</text:p>
          </table:table-cell>
          <table:table-cell table:formula="of:=[.D2202]-[.D22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table:formula="of:=[.B2201]+8" office:value-type="float" office:value="17608" calcext:value-type="float">
            <text:p>17608</text:p>
          </table:table-cell>
          <table:table-cell office:value-type="float" office:value="8640000" calcext:value-type="float">
            <text:p>8640000</text:p>
          </table:table-cell>
          <table:table-cell table:formula="of:=[.B2202]/[.C2202]" office:value-type="float" office:value="0.00203796296296296" calcext:value-type="float">
            <text:p>0,00203796296296296000</text:p>
          </table:table-cell>
          <table:table-cell table:formula="of:=[.D2203]-[.D22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[.B2202]+8" office:value-type="float" office:value="17616" calcext:value-type="float">
            <text:p>17616</text:p>
          </table:table-cell>
          <table:table-cell office:value-type="float" office:value="8640000" calcext:value-type="float">
            <text:p>8640000</text:p>
          </table:table-cell>
          <table:table-cell table:formula="of:=[.B2203]/[.C2203]" office:value-type="float" office:value="0.00203888888888889" calcext:value-type="float">
            <text:p>0,00203888888888889000</text:p>
          </table:table-cell>
          <table:table-cell table:formula="of:=[.D2204]-[.D22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[.B2203]+8" office:value-type="float" office:value="17624" calcext:value-type="float">
            <text:p>17624</text:p>
          </table:table-cell>
          <table:table-cell office:value-type="float" office:value="8640000" calcext:value-type="float">
            <text:p>8640000</text:p>
          </table:table-cell>
          <table:table-cell table:formula="of:=[.B2204]/[.C2204]" office:value-type="float" office:value="0.00203981481481481" calcext:value-type="float">
            <text:p>0,00203981481481481000</text:p>
          </table:table-cell>
          <table:table-cell table:formula="of:=[.D2205]-[.D22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table:formula="of:=[.B2204]+8" office:value-type="float" office:value="17632" calcext:value-type="float">
            <text:p>17632</text:p>
          </table:table-cell>
          <table:table-cell office:value-type="float" office:value="8640000" calcext:value-type="float">
            <text:p>8640000</text:p>
          </table:table-cell>
          <table:table-cell table:formula="of:=[.B2205]/[.C2205]" office:value-type="float" office:value="0.00204074074074074" calcext:value-type="float">
            <text:p>0,00204074074074074000</text:p>
          </table:table-cell>
          <table:table-cell table:formula="of:=[.D2206]-[.D22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[.B2205]+8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2206]/[.C2206]" office:value-type="float" office:value="0.00204166666666667" calcext:value-type="float">
            <text:p>0,00204166666666667000</text:p>
          </table:table-cell>
          <table:table-cell table:formula="of:=[.D2207]-[.D22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[.B2206]+8" office:value-type="float" office:value="17648" calcext:value-type="float">
            <text:p>17648</text:p>
          </table:table-cell>
          <table:table-cell office:value-type="float" office:value="8640000" calcext:value-type="float">
            <text:p>8640000</text:p>
          </table:table-cell>
          <table:table-cell table:formula="of:=[.B2207]/[.C2207]" office:value-type="float" office:value="0.00204259259259259" calcext:value-type="float">
            <text:p>0,00204259259259259000</text:p>
          </table:table-cell>
          <table:table-cell table:formula="of:=[.D2208]-[.D2207]" office:value-type="float" office:value="0.000000925925925926354" calcext:value-type="float">
            <text:p>0,00000092592592592635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[.B2207]+8" office:value-type="float" office:value="17656" calcext:value-type="float">
            <text:p>17656</text:p>
          </table:table-cell>
          <table:table-cell office:value-type="float" office:value="8640000" calcext:value-type="float">
            <text:p>8640000</text:p>
          </table:table-cell>
          <table:table-cell table:formula="of:=[.B2208]/[.C2208]" office:value-type="float" office:value="0.00204351851851852" calcext:value-type="float">
            <text:p>0,00204351851851852000</text:p>
          </table:table-cell>
          <table:table-cell table:formula="of:=[.D2209]-[.D22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table:formula="of:=[.B2208]+8" office:value-type="float" office:value="17664" calcext:value-type="float">
            <text:p>17664</text:p>
          </table:table-cell>
          <table:table-cell office:value-type="float" office:value="8640000" calcext:value-type="float">
            <text:p>8640000</text:p>
          </table:table-cell>
          <table:table-cell table:formula="of:=[.B2209]/[.C2209]" office:value-type="float" office:value="0.00204444444444444" calcext:value-type="float">
            <text:p>0,00204444444444444000</text:p>
          </table:table-cell>
          <table:table-cell table:formula="of:=[.D2210]-[.D22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[.B2209]+8" office:value-type="float" office:value="17672" calcext:value-type="float">
            <text:p>17672</text:p>
          </table:table-cell>
          <table:table-cell office:value-type="float" office:value="8640000" calcext:value-type="float">
            <text:p>8640000</text:p>
          </table:table-cell>
          <table:table-cell table:formula="of:=[.B2210]/[.C2210]" office:value-type="float" office:value="0.00204537037037037" calcext:value-type="float">
            <text:p>0,00204537037037037000</text:p>
          </table:table-cell>
          <table:table-cell table:formula="of:=[.D2211]-[.D22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table:formula="of:=[.B2210]+8" office:value-type="float" office:value="17680" calcext:value-type="float">
            <text:p>17680</text:p>
          </table:table-cell>
          <table:table-cell office:value-type="float" office:value="8640000" calcext:value-type="float">
            <text:p>8640000</text:p>
          </table:table-cell>
          <table:table-cell table:formula="of:=[.B2211]/[.C2211]" office:value-type="float" office:value="0.0020462962962963" calcext:value-type="float">
            <text:p>0,00204629629629630000</text:p>
          </table:table-cell>
          <table:table-cell table:formula="of:=[.D2212]-[.D22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[.B2211]+8" office:value-type="float" office:value="17688" calcext:value-type="float">
            <text:p>17688</text:p>
          </table:table-cell>
          <table:table-cell office:value-type="float" office:value="8640000" calcext:value-type="float">
            <text:p>8640000</text:p>
          </table:table-cell>
          <table:table-cell table:formula="of:=[.B2212]/[.C2212]" office:value-type="float" office:value="0.00204722222222222" calcext:value-type="float">
            <text:p>0,00204722222222222000</text:p>
          </table:table-cell>
          <table:table-cell table:formula="of:=[.D2213]-[.D22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[.B2212]+8" office:value-type="float" office:value="17696" calcext:value-type="float">
            <text:p>17696</text:p>
          </table:table-cell>
          <table:table-cell office:value-type="float" office:value="8640000" calcext:value-type="float">
            <text:p>8640000</text:p>
          </table:table-cell>
          <table:table-cell table:formula="of:=[.B2213]/[.C2213]" office:value-type="float" office:value="0.00204814814814815" calcext:value-type="float">
            <text:p>0,00204814814814815000</text:p>
          </table:table-cell>
          <table:table-cell table:formula="of:=[.D2214]-[.D22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table:formula="of:=[.B2213]+8" office:value-type="float" office:value="17704" calcext:value-type="float">
            <text:p>17704</text:p>
          </table:table-cell>
          <table:table-cell office:value-type="float" office:value="8640000" calcext:value-type="float">
            <text:p>8640000</text:p>
          </table:table-cell>
          <table:table-cell table:formula="of:=[.B2214]/[.C2214]" office:value-type="float" office:value="0.00204907407407407" calcext:value-type="float">
            <text:p>0,00204907407407407000</text:p>
          </table:table-cell>
          <table:table-cell table:formula="of:=[.D2215]-[.D22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[.B2214]+8" office:value-type="float" office:value="17712" calcext:value-type="float">
            <text:p>17712</text:p>
          </table:table-cell>
          <table:table-cell office:value-type="float" office:value="8640000" calcext:value-type="float">
            <text:p>8640000</text:p>
          </table:table-cell>
          <table:table-cell table:formula="of:=[.B2215]/[.C2215]" office:value-type="float" office:value="0.00205" calcext:value-type="float">
            <text:p>0,00205000000000000000</text:p>
          </table:table-cell>
          <table:table-cell table:formula="of:=[.D2216]-[.D22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[.B2215]+8" office:value-type="float" office:value="17720" calcext:value-type="float">
            <text:p>17720</text:p>
          </table:table-cell>
          <table:table-cell office:value-type="float" office:value="8640000" calcext:value-type="float">
            <text:p>8640000</text:p>
          </table:table-cell>
          <table:table-cell table:formula="of:=[.B2216]/[.C2216]" office:value-type="float" office:value="0.00205092592592593" calcext:value-type="float">
            <text:p>0,00205092592592593000</text:p>
          </table:table-cell>
          <table:table-cell table:formula="of:=[.D2217]-[.D22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[.B2216]+8" office:value-type="float" office:value="17728" calcext:value-type="float">
            <text:p>17728</text:p>
          </table:table-cell>
          <table:table-cell office:value-type="float" office:value="8640000" calcext:value-type="float">
            <text:p>8640000</text:p>
          </table:table-cell>
          <table:table-cell table:formula="of:=[.B2217]/[.C2217]" office:value-type="float" office:value="0.00205185185185185" calcext:value-type="float">
            <text:p>0,00205185185185185000</text:p>
          </table:table-cell>
          <table:table-cell table:formula="of:=[.D2218]-[.D22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table:formula="of:=[.B2217]+8" office:value-type="float" office:value="17736" calcext:value-type="float">
            <text:p>17736</text:p>
          </table:table-cell>
          <table:table-cell office:value-type="float" office:value="8640000" calcext:value-type="float">
            <text:p>8640000</text:p>
          </table:table-cell>
          <table:table-cell table:formula="of:=[.B2218]/[.C2218]" office:value-type="float" office:value="0.00205277777777778" calcext:value-type="float">
            <text:p>0,00205277777777778000</text:p>
          </table:table-cell>
          <table:table-cell table:formula="of:=[.D2219]-[.D22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[.B2218]+8" office:value-type="float" office:value="17744" calcext:value-type="float">
            <text:p>17744</text:p>
          </table:table-cell>
          <table:table-cell office:value-type="float" office:value="8640000" calcext:value-type="float">
            <text:p>8640000</text:p>
          </table:table-cell>
          <table:table-cell table:formula="of:=[.B2219]/[.C2219]" office:value-type="float" office:value="0.0020537037037037" calcext:value-type="float">
            <text:p>0,00205370370370370000</text:p>
          </table:table-cell>
          <table:table-cell table:formula="of:=[.D2220]-[.D22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table:formula="of:=[.B2219]+8" office:value-type="float" office:value="17752" calcext:value-type="float">
            <text:p>17752</text:p>
          </table:table-cell>
          <table:table-cell office:value-type="float" office:value="8640000" calcext:value-type="float">
            <text:p>8640000</text:p>
          </table:table-cell>
          <table:table-cell table:formula="of:=[.B2220]/[.C2220]" office:value-type="float" office:value="0.00205462962962963" calcext:value-type="float">
            <text:p>0,00205462962962963000</text:p>
          </table:table-cell>
          <table:table-cell table:formula="of:=[.D2221]-[.D22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[.B2220]+8" office:value-type="float" office:value="17760" calcext:value-type="float">
            <text:p>17760</text:p>
          </table:table-cell>
          <table:table-cell office:value-type="float" office:value="8640000" calcext:value-type="float">
            <text:p>8640000</text:p>
          </table:table-cell>
          <table:table-cell table:formula="of:=[.B2221]/[.C2221]" office:value-type="float" office:value="0.00205555555555556" calcext:value-type="float">
            <text:p>0,00205555555555556000</text:p>
          </table:table-cell>
          <table:table-cell table:formula="of:=[.D2222]-[.D22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[.B2221]+8" office:value-type="float" office:value="17768" calcext:value-type="float">
            <text:p>17768</text:p>
          </table:table-cell>
          <table:table-cell office:value-type="float" office:value="8640000" calcext:value-type="float">
            <text:p>8640000</text:p>
          </table:table-cell>
          <table:table-cell table:formula="of:=[.B2222]/[.C2222]" office:value-type="float" office:value="0.00205648148148148" calcext:value-type="float">
            <text:p>0,00205648148148148000</text:p>
          </table:table-cell>
          <table:table-cell table:formula="of:=[.D2223]-[.D22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[.B2222]+8" office:value-type="float" office:value="17776" calcext:value-type="float">
            <text:p>17776</text:p>
          </table:table-cell>
          <table:table-cell office:value-type="float" office:value="8640000" calcext:value-type="float">
            <text:p>8640000</text:p>
          </table:table-cell>
          <table:table-cell table:formula="of:=[.B2223]/[.C2223]" office:value-type="float" office:value="0.00205740740740741" calcext:value-type="float">
            <text:p>0,00205740740740741000</text:p>
          </table:table-cell>
          <table:table-cell table:formula="of:=[.D2224]-[.D22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[.B2223]+8" office:value-type="float" office:value="17784" calcext:value-type="float">
            <text:p>17784</text:p>
          </table:table-cell>
          <table:table-cell office:value-type="float" office:value="8640000" calcext:value-type="float">
            <text:p>8640000</text:p>
          </table:table-cell>
          <table:table-cell table:formula="of:=[.B2224]/[.C2224]" office:value-type="float" office:value="0.00205833333333333" calcext:value-type="float">
            <text:p>0,00205833333333333000</text:p>
          </table:table-cell>
          <table:table-cell table:formula="of:=[.D2225]-[.D22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[.B2224]+8" office:value-type="float" office:value="17792" calcext:value-type="float">
            <text:p>17792</text:p>
          </table:table-cell>
          <table:table-cell office:value-type="float" office:value="8640000" calcext:value-type="float">
            <text:p>8640000</text:p>
          </table:table-cell>
          <table:table-cell table:formula="of:=[.B2225]/[.C2225]" office:value-type="float" office:value="0.00205925925925926" calcext:value-type="float">
            <text:p>0,00205925925925926000</text:p>
          </table:table-cell>
          <table:table-cell table:formula="of:=[.D2226]-[.D22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[.B2225]+8" office:value-type="float" office:value="17800" calcext:value-type="float">
            <text:p>17800</text:p>
          </table:table-cell>
          <table:table-cell office:value-type="float" office:value="8640000" calcext:value-type="float">
            <text:p>8640000</text:p>
          </table:table-cell>
          <table:table-cell table:formula="of:=[.B2226]/[.C2226]" office:value-type="float" office:value="0.00206018518518519" calcext:value-type="float">
            <text:p>0,00206018518518519000</text:p>
          </table:table-cell>
          <table:table-cell table:formula="of:=[.D2227]-[.D22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[.B2226]+8" office:value-type="float" office:value="17808" calcext:value-type="float">
            <text:p>17808</text:p>
          </table:table-cell>
          <table:table-cell office:value-type="float" office:value="8640000" calcext:value-type="float">
            <text:p>8640000</text:p>
          </table:table-cell>
          <table:table-cell table:formula="of:=[.B2227]/[.C2227]" office:value-type="float" office:value="0.00206111111111111" calcext:value-type="float">
            <text:p>0,00206111111111111000</text:p>
          </table:table-cell>
          <table:table-cell table:formula="of:=[.D2228]-[.D22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table:formula="of:=[.B2227]+8" office:value-type="float" office:value="17816" calcext:value-type="float">
            <text:p>17816</text:p>
          </table:table-cell>
          <table:table-cell office:value-type="float" office:value="8640000" calcext:value-type="float">
            <text:p>8640000</text:p>
          </table:table-cell>
          <table:table-cell table:formula="of:=[.B2228]/[.C2228]" office:value-type="float" office:value="0.00206203703703704" calcext:value-type="float">
            <text:p>0,00206203703703704000</text:p>
          </table:table-cell>
          <table:table-cell table:formula="of:=[.D2229]-[.D22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[.B2228]+8" office:value-type="float" office:value="17824" calcext:value-type="float">
            <text:p>17824</text:p>
          </table:table-cell>
          <table:table-cell office:value-type="float" office:value="8640000" calcext:value-type="float">
            <text:p>8640000</text:p>
          </table:table-cell>
          <table:table-cell table:formula="of:=[.B2229]/[.C2229]" office:value-type="float" office:value="0.00206296296296296" calcext:value-type="float">
            <text:p>0,00206296296296296000</text:p>
          </table:table-cell>
          <table:table-cell table:formula="of:=[.D2230]-[.D22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[.B2229]+8" office:value-type="float" office:value="17832" calcext:value-type="float">
            <text:p>17832</text:p>
          </table:table-cell>
          <table:table-cell office:value-type="float" office:value="8640000" calcext:value-type="float">
            <text:p>8640000</text:p>
          </table:table-cell>
          <table:table-cell table:formula="of:=[.B2230]/[.C2230]" office:value-type="float" office:value="0.00206388888888889" calcext:value-type="float">
            <text:p>0,00206388888888889000</text:p>
          </table:table-cell>
          <table:table-cell table:formula="of:=[.D2231]-[.D22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[.B2230]+8" office:value-type="float" office:value="17840" calcext:value-type="float">
            <text:p>17840</text:p>
          </table:table-cell>
          <table:table-cell office:value-type="float" office:value="8640000" calcext:value-type="float">
            <text:p>8640000</text:p>
          </table:table-cell>
          <table:table-cell table:formula="of:=[.B2231]/[.C2231]" office:value-type="float" office:value="0.00206481481481482" calcext:value-type="float">
            <text:p>0,00206481481481482000</text:p>
          </table:table-cell>
          <table:table-cell table:formula="of:=[.D2232]-[.D22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[.B2231]+8" office:value-type="float" office:value="17848" calcext:value-type="float">
            <text:p>17848</text:p>
          </table:table-cell>
          <table:table-cell office:value-type="float" office:value="8640000" calcext:value-type="float">
            <text:p>8640000</text:p>
          </table:table-cell>
          <table:table-cell table:formula="of:=[.B2232]/[.C2232]" office:value-type="float" office:value="0.00206574074074074" calcext:value-type="float">
            <text:p>0,00206574074074074000</text:p>
          </table:table-cell>
          <table:table-cell table:formula="of:=[.D2233]-[.D22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[.B2232]+8" office:value-type="float" office:value="17856" calcext:value-type="float">
            <text:p>17856</text:p>
          </table:table-cell>
          <table:table-cell office:value-type="float" office:value="8640000" calcext:value-type="float">
            <text:p>8640000</text:p>
          </table:table-cell>
          <table:table-cell table:formula="of:=[.B2233]/[.C2233]" office:value-type="float" office:value="0.00206666666666667" calcext:value-type="float">
            <text:p>0,00206666666666667000</text:p>
          </table:table-cell>
          <table:table-cell table:formula="of:=[.D2234]-[.D22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[.B2233]+8" office:value-type="float" office:value="17864" calcext:value-type="float">
            <text:p>17864</text:p>
          </table:table-cell>
          <table:table-cell office:value-type="float" office:value="8640000" calcext:value-type="float">
            <text:p>8640000</text:p>
          </table:table-cell>
          <table:table-cell table:formula="of:=[.B2234]/[.C2234]" office:value-type="float" office:value="0.00206759259259259" calcext:value-type="float">
            <text:p>0,00206759259259259000</text:p>
          </table:table-cell>
          <table:table-cell table:formula="of:=[.D2235]-[.D22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[.B2234]+8" office:value-type="float" office:value="17872" calcext:value-type="float">
            <text:p>17872</text:p>
          </table:table-cell>
          <table:table-cell office:value-type="float" office:value="8640000" calcext:value-type="float">
            <text:p>8640000</text:p>
          </table:table-cell>
          <table:table-cell table:formula="of:=[.B2235]/[.C2235]" office:value-type="float" office:value="0.00206851851851852" calcext:value-type="float">
            <text:p>0,00206851851851852000</text:p>
          </table:table-cell>
          <table:table-cell table:formula="of:=[.D2236]-[.D22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[.B2235]+8" office:value-type="float" office:value="17880" calcext:value-type="float">
            <text:p>17880</text:p>
          </table:table-cell>
          <table:table-cell office:value-type="float" office:value="8640000" calcext:value-type="float">
            <text:p>8640000</text:p>
          </table:table-cell>
          <table:table-cell table:formula="of:=[.B2236]/[.C2236]" office:value-type="float" office:value="0.00206944444444444" calcext:value-type="float">
            <text:p>0,00206944444444444000</text:p>
          </table:table-cell>
          <table:table-cell table:formula="of:=[.D2237]-[.D22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table:formula="of:=[.B2236]+8" office:value-type="float" office:value="17888" calcext:value-type="float">
            <text:p>17888</text:p>
          </table:table-cell>
          <table:table-cell office:value-type="float" office:value="8640000" calcext:value-type="float">
            <text:p>8640000</text:p>
          </table:table-cell>
          <table:table-cell table:formula="of:=[.B2237]/[.C2237]" office:value-type="float" office:value="0.00207037037037037" calcext:value-type="float">
            <text:p>0,00207037037037037000</text:p>
          </table:table-cell>
          <table:table-cell table:formula="of:=[.D2238]-[.D22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table:formula="of:=[.B2237]+8" office:value-type="float" office:value="17896" calcext:value-type="float">
            <text:p>17896</text:p>
          </table:table-cell>
          <table:table-cell office:value-type="float" office:value="8640000" calcext:value-type="float">
            <text:p>8640000</text:p>
          </table:table-cell>
          <table:table-cell table:formula="of:=[.B2238]/[.C2238]" office:value-type="float" office:value="0.0020712962962963" calcext:value-type="float">
            <text:p>0,00207129629629630000</text:p>
          </table:table-cell>
          <table:table-cell table:formula="of:=[.D2239]-[.D22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table:formula="of:=[.B2238]+8" office:value-type="float" office:value="17904" calcext:value-type="float">
            <text:p>17904</text:p>
          </table:table-cell>
          <table:table-cell office:value-type="float" office:value="8640000" calcext:value-type="float">
            <text:p>8640000</text:p>
          </table:table-cell>
          <table:table-cell table:formula="of:=[.B2239]/[.C2239]" office:value-type="float" office:value="0.00207222222222222" calcext:value-type="float">
            <text:p>0,00207222222222222000</text:p>
          </table:table-cell>
          <table:table-cell table:formula="of:=[.D2240]-[.D22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table:formula="of:=[.B2239]+8" office:value-type="float" office:value="17912" calcext:value-type="float">
            <text:p>17912</text:p>
          </table:table-cell>
          <table:table-cell office:value-type="float" office:value="8640000" calcext:value-type="float">
            <text:p>8640000</text:p>
          </table:table-cell>
          <table:table-cell table:formula="of:=[.B2240]/[.C2240]" office:value-type="float" office:value="0.00207314814814815" calcext:value-type="float">
            <text:p>0,00207314814814815000</text:p>
          </table:table-cell>
          <table:table-cell table:formula="of:=[.D2241]-[.D22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[.B2240]+8" office:value-type="float" office:value="17920" calcext:value-type="float">
            <text:p>17920</text:p>
          </table:table-cell>
          <table:table-cell office:value-type="float" office:value="8640000" calcext:value-type="float">
            <text:p>8640000</text:p>
          </table:table-cell>
          <table:table-cell table:formula="of:=[.B2241]/[.C2241]" office:value-type="float" office:value="0.00207407407407407" calcext:value-type="float">
            <text:p>0,00207407407407407000</text:p>
          </table:table-cell>
          <table:table-cell table:formula="of:=[.D2242]-[.D22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[.B2241]+8" office:value-type="float" office:value="17928" calcext:value-type="float">
            <text:p>17928</text:p>
          </table:table-cell>
          <table:table-cell office:value-type="float" office:value="8640000" calcext:value-type="float">
            <text:p>8640000</text:p>
          </table:table-cell>
          <table:table-cell table:formula="of:=[.B2242]/[.C2242]" office:value-type="float" office:value="0.002075" calcext:value-type="float">
            <text:p>0,00207500000000000000</text:p>
          </table:table-cell>
          <table:table-cell table:formula="of:=[.D2243]-[.D22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[.B2242]+8" office:value-type="float" office:value="17936" calcext:value-type="float">
            <text:p>17936</text:p>
          </table:table-cell>
          <table:table-cell office:value-type="float" office:value="8640000" calcext:value-type="float">
            <text:p>8640000</text:p>
          </table:table-cell>
          <table:table-cell table:formula="of:=[.B2243]/[.C2243]" office:value-type="float" office:value="0.00207592592592593" calcext:value-type="float">
            <text:p>0,00207592592592593000</text:p>
          </table:table-cell>
          <table:table-cell table:formula="of:=[.D2244]-[.D22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[.B2243]+8" office:value-type="float" office:value="17944" calcext:value-type="float">
            <text:p>17944</text:p>
          </table:table-cell>
          <table:table-cell office:value-type="float" office:value="8640000" calcext:value-type="float">
            <text:p>8640000</text:p>
          </table:table-cell>
          <table:table-cell table:formula="of:=[.B2244]/[.C2244]" office:value-type="float" office:value="0.00207685185185185" calcext:value-type="float">
            <text:p>0,00207685185185185000</text:p>
          </table:table-cell>
          <table:table-cell table:formula="of:=[.D2245]-[.D22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[.B2244]+8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2245]/[.C2245]" office:value-type="float" office:value="0.00207777777777778" calcext:value-type="float">
            <text:p>0,00207777777777778000</text:p>
          </table:table-cell>
          <table:table-cell table:formula="of:=[.D2246]-[.D22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[.B2245]+8" office:value-type="float" office:value="17960" calcext:value-type="float">
            <text:p>17960</text:p>
          </table:table-cell>
          <table:table-cell office:value-type="float" office:value="8640000" calcext:value-type="float">
            <text:p>8640000</text:p>
          </table:table-cell>
          <table:table-cell table:formula="of:=[.B2246]/[.C2246]" office:value-type="float" office:value="0.0020787037037037" calcext:value-type="float">
            <text:p>0,00207870370370370000</text:p>
          </table:table-cell>
          <table:table-cell table:formula="of:=[.D2247]-[.D22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table:formula="of:=[.B2246]+8" office:value-type="float" office:value="17968" calcext:value-type="float">
            <text:p>17968</text:p>
          </table:table-cell>
          <table:table-cell office:value-type="float" office:value="8640000" calcext:value-type="float">
            <text:p>8640000</text:p>
          </table:table-cell>
          <table:table-cell table:formula="of:=[.B2247]/[.C2247]" office:value-type="float" office:value="0.00207962962962963" calcext:value-type="float">
            <text:p>0,00207962962962963000</text:p>
          </table:table-cell>
          <table:table-cell table:formula="of:=[.D2248]-[.D22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table:formula="of:=[.B2247]+8" office:value-type="float" office:value="17976" calcext:value-type="float">
            <text:p>17976</text:p>
          </table:table-cell>
          <table:table-cell office:value-type="float" office:value="8640000" calcext:value-type="float">
            <text:p>8640000</text:p>
          </table:table-cell>
          <table:table-cell table:formula="of:=[.B2248]/[.C2248]" office:value-type="float" office:value="0.00208055555555556" calcext:value-type="float">
            <text:p>0,00208055555555556000</text:p>
          </table:table-cell>
          <table:table-cell table:formula="of:=[.D2249]-[.D22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table:formula="of:=[.B2248]+8" office:value-type="float" office:value="17984" calcext:value-type="float">
            <text:p>17984</text:p>
          </table:table-cell>
          <table:table-cell office:value-type="float" office:value="8640000" calcext:value-type="float">
            <text:p>8640000</text:p>
          </table:table-cell>
          <table:table-cell table:formula="of:=[.B2249]/[.C2249]" office:value-type="float" office:value="0.00208148148148148" calcext:value-type="float">
            <text:p>0,00208148148148148000</text:p>
          </table:table-cell>
          <table:table-cell table:formula="of:=[.D2250]-[.D22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[.B2249]+8" office:value-type="float" office:value="17992" calcext:value-type="float">
            <text:p>17992</text:p>
          </table:table-cell>
          <table:table-cell office:value-type="float" office:value="8640000" calcext:value-type="float">
            <text:p>8640000</text:p>
          </table:table-cell>
          <table:table-cell table:formula="of:=[.B2250]/[.C2250]" office:value-type="float" office:value="0.00208240740740741" calcext:value-type="float">
            <text:p>0,00208240740740741000</text:p>
          </table:table-cell>
          <table:table-cell table:formula="of:=[.D2251]-[.D22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[.B2250]+8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2251]/[.C2251]" office:value-type="float" office:value="0.00208333333333333" calcext:value-type="float">
            <text:p>0,00208333333333333000</text:p>
          </table:table-cell>
          <table:table-cell table:formula="of:=[.D2252]-[.D22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table:formula="of:=[.B2251]+8" office:value-type="float" office:value="18008" calcext:value-type="float">
            <text:p>18008</text:p>
          </table:table-cell>
          <table:table-cell office:value-type="float" office:value="8640000" calcext:value-type="float">
            <text:p>8640000</text:p>
          </table:table-cell>
          <table:table-cell table:formula="of:=[.B2252]/[.C2252]" office:value-type="float" office:value="0.00208425925925926" calcext:value-type="float">
            <text:p>0,00208425925925926000</text:p>
          </table:table-cell>
          <table:table-cell table:formula="of:=[.D2253]-[.D22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table:formula="of:=[.B2252]+8" office:value-type="float" office:value="18016" calcext:value-type="float">
            <text:p>18016</text:p>
          </table:table-cell>
          <table:table-cell office:value-type="float" office:value="8640000" calcext:value-type="float">
            <text:p>8640000</text:p>
          </table:table-cell>
          <table:table-cell table:formula="of:=[.B2253]/[.C2253]" office:value-type="float" office:value="0.00208518518518519" calcext:value-type="float">
            <text:p>0,00208518518518519000</text:p>
          </table:table-cell>
          <table:table-cell table:formula="of:=[.D2254]-[.D22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table:formula="of:=[.B2253]+8" office:value-type="float" office:value="18024" calcext:value-type="float">
            <text:p>18024</text:p>
          </table:table-cell>
          <table:table-cell office:value-type="float" office:value="8640000" calcext:value-type="float">
            <text:p>8640000</text:p>
          </table:table-cell>
          <table:table-cell table:formula="of:=[.B2254]/[.C2254]" office:value-type="float" office:value="0.00208611111111111" calcext:value-type="float">
            <text:p>0,00208611111111111000</text:p>
          </table:table-cell>
          <table:table-cell table:formula="of:=[.D2255]-[.D22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table:formula="of:=[.B2254]+8" office:value-type="float" office:value="18032" calcext:value-type="float">
            <text:p>18032</text:p>
          </table:table-cell>
          <table:table-cell office:value-type="float" office:value="8640000" calcext:value-type="float">
            <text:p>8640000</text:p>
          </table:table-cell>
          <table:table-cell table:formula="of:=[.B2255]/[.C2255]" office:value-type="float" office:value="0.00208703703703704" calcext:value-type="float">
            <text:p>0,00208703703703704000</text:p>
          </table:table-cell>
          <table:table-cell table:formula="of:=[.D2256]-[.D22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table:formula="of:=[.B2255]+8" office:value-type="float" office:value="18040" calcext:value-type="float">
            <text:p>18040</text:p>
          </table:table-cell>
          <table:table-cell office:value-type="float" office:value="8640000" calcext:value-type="float">
            <text:p>8640000</text:p>
          </table:table-cell>
          <table:table-cell table:formula="of:=[.B2256]/[.C2256]" office:value-type="float" office:value="0.00208796296296296" calcext:value-type="float">
            <text:p>0,00208796296296296000</text:p>
          </table:table-cell>
          <table:table-cell table:formula="of:=[.D2257]-[.D22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[.B2256]+8" office:value-type="float" office:value="18048" calcext:value-type="float">
            <text:p>18048</text:p>
          </table:table-cell>
          <table:table-cell office:value-type="float" office:value="8640000" calcext:value-type="float">
            <text:p>8640000</text:p>
          </table:table-cell>
          <table:table-cell table:formula="of:=[.B2257]/[.C2257]" office:value-type="float" office:value="0.00208888888888889" calcext:value-type="float">
            <text:p>0,00208888888888889000</text:p>
          </table:table-cell>
          <table:table-cell table:formula="of:=[.D2258]-[.D22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table:formula="of:=[.B2257]+8" office:value-type="float" office:value="18056" calcext:value-type="float">
            <text:p>18056</text:p>
          </table:table-cell>
          <table:table-cell office:value-type="float" office:value="8640000" calcext:value-type="float">
            <text:p>8640000</text:p>
          </table:table-cell>
          <table:table-cell table:formula="of:=[.B2258]/[.C2258]" office:value-type="float" office:value="0.00208981481481481" calcext:value-type="float">
            <text:p>0,00208981481481481000</text:p>
          </table:table-cell>
          <table:table-cell table:formula="of:=[.D2259]-[.D22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table:formula="of:=[.B2258]+8" office:value-type="float" office:value="18064" calcext:value-type="float">
            <text:p>18064</text:p>
          </table:table-cell>
          <table:table-cell office:value-type="float" office:value="8640000" calcext:value-type="float">
            <text:p>8640000</text:p>
          </table:table-cell>
          <table:table-cell table:formula="of:=[.B2259]/[.C2259]" office:value-type="float" office:value="0.00209074074074074" calcext:value-type="float">
            <text:p>0,00209074074074074000</text:p>
          </table:table-cell>
          <table:table-cell table:formula="of:=[.D2260]-[.D22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[.B2259]+8" office:value-type="float" office:value="18072" calcext:value-type="float">
            <text:p>18072</text:p>
          </table:table-cell>
          <table:table-cell office:value-type="float" office:value="8640000" calcext:value-type="float">
            <text:p>8640000</text:p>
          </table:table-cell>
          <table:table-cell table:formula="of:=[.B2260]/[.C2260]" office:value-type="float" office:value="0.00209166666666667" calcext:value-type="float">
            <text:p>0,00209166666666667000</text:p>
          </table:table-cell>
          <table:table-cell table:formula="of:=[.D2261]-[.D22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[.B2260]+8" office:value-type="float" office:value="18080" calcext:value-type="float">
            <text:p>18080</text:p>
          </table:table-cell>
          <table:table-cell office:value-type="float" office:value="8640000" calcext:value-type="float">
            <text:p>8640000</text:p>
          </table:table-cell>
          <table:table-cell table:formula="of:=[.B2261]/[.C2261]" office:value-type="float" office:value="0.00209259259259259" calcext:value-type="float">
            <text:p>0,00209259259259259000</text:p>
          </table:table-cell>
          <table:table-cell table:formula="of:=[.D2262]-[.D22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table:formula="of:=[.B2261]+8" office:value-type="float" office:value="18088" calcext:value-type="float">
            <text:p>18088</text:p>
          </table:table-cell>
          <table:table-cell office:value-type="float" office:value="8640000" calcext:value-type="float">
            <text:p>8640000</text:p>
          </table:table-cell>
          <table:table-cell table:formula="of:=[.B2262]/[.C2262]" office:value-type="float" office:value="0.00209351851851852" calcext:value-type="float">
            <text:p>0,00209351851851852000</text:p>
          </table:table-cell>
          <table:table-cell table:formula="of:=[.D2263]-[.D22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[.B2262]+8" office:value-type="float" office:value="18096" calcext:value-type="float">
            <text:p>18096</text:p>
          </table:table-cell>
          <table:table-cell office:value-type="float" office:value="8640000" calcext:value-type="float">
            <text:p>8640000</text:p>
          </table:table-cell>
          <table:table-cell table:formula="of:=[.B2263]/[.C2263]" office:value-type="float" office:value="0.00209444444444444" calcext:value-type="float">
            <text:p>0,00209444444444444000</text:p>
          </table:table-cell>
          <table:table-cell table:formula="of:=[.D2264]-[.D22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[.B2263]+8" office:value-type="float" office:value="18104" calcext:value-type="float">
            <text:p>18104</text:p>
          </table:table-cell>
          <table:table-cell office:value-type="float" office:value="8640000" calcext:value-type="float">
            <text:p>8640000</text:p>
          </table:table-cell>
          <table:table-cell table:formula="of:=[.B2264]/[.C2264]" office:value-type="float" office:value="0.00209537037037037" calcext:value-type="float">
            <text:p>0,00209537037037037000</text:p>
          </table:table-cell>
          <table:table-cell table:formula="of:=[.D2265]-[.D22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[.B2264]+8" office:value-type="float" office:value="18112" calcext:value-type="float">
            <text:p>18112</text:p>
          </table:table-cell>
          <table:table-cell office:value-type="float" office:value="8640000" calcext:value-type="float">
            <text:p>8640000</text:p>
          </table:table-cell>
          <table:table-cell table:formula="of:=[.B2265]/[.C2265]" office:value-type="float" office:value="0.0020962962962963" calcext:value-type="float">
            <text:p>0,00209629629629630000</text:p>
          </table:table-cell>
          <table:table-cell table:formula="of:=[.D2266]-[.D22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table:formula="of:=[.B2265]+8" office:value-type="float" office:value="18120" calcext:value-type="float">
            <text:p>18120</text:p>
          </table:table-cell>
          <table:table-cell office:value-type="float" office:value="8640000" calcext:value-type="float">
            <text:p>8640000</text:p>
          </table:table-cell>
          <table:table-cell table:formula="of:=[.B2266]/[.C2266]" office:value-type="float" office:value="0.00209722222222222" calcext:value-type="float">
            <text:p>0,00209722222222222000</text:p>
          </table:table-cell>
          <table:table-cell table:formula="of:=[.D2267]-[.D22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[.B2266]+8" office:value-type="float" office:value="18128" calcext:value-type="float">
            <text:p>18128</text:p>
          </table:table-cell>
          <table:table-cell office:value-type="float" office:value="8640000" calcext:value-type="float">
            <text:p>8640000</text:p>
          </table:table-cell>
          <table:table-cell table:formula="of:=[.B2267]/[.C2267]" office:value-type="float" office:value="0.00209814814814815" calcext:value-type="float">
            <text:p>0,00209814814814815000</text:p>
          </table:table-cell>
          <table:table-cell table:formula="of:=[.D2268]-[.D22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[.B2267]+8" office:value-type="float" office:value="18136" calcext:value-type="float">
            <text:p>18136</text:p>
          </table:table-cell>
          <table:table-cell office:value-type="float" office:value="8640000" calcext:value-type="float">
            <text:p>8640000</text:p>
          </table:table-cell>
          <table:table-cell table:formula="of:=[.B2268]/[.C2268]" office:value-type="float" office:value="0.00209907407407407" calcext:value-type="float">
            <text:p>0,00209907407407407000</text:p>
          </table:table-cell>
          <table:table-cell table:formula="of:=[.D2269]-[.D22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[.B2268]+8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2269]/[.C2269]" office:value-type="float" office:value="0.0021" calcext:value-type="float">
            <text:p>0,00210000000000000000</text:p>
          </table:table-cell>
          <table:table-cell table:formula="of:=[.D2270]-[.D22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[.B2269]+8" office:value-type="float" office:value="18152" calcext:value-type="float">
            <text:p>18152</text:p>
          </table:table-cell>
          <table:table-cell office:value-type="float" office:value="8640000" calcext:value-type="float">
            <text:p>8640000</text:p>
          </table:table-cell>
          <table:table-cell table:formula="of:=[.B2270]/[.C2270]" office:value-type="float" office:value="0.00210092592592593" calcext:value-type="float">
            <text:p>0,00210092592592593000</text:p>
          </table:table-cell>
          <table:table-cell table:formula="of:=[.D2271]-[.D22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[.B2270]+8" office:value-type="float" office:value="18160" calcext:value-type="float">
            <text:p>18160</text:p>
          </table:table-cell>
          <table:table-cell office:value-type="float" office:value="8640000" calcext:value-type="float">
            <text:p>8640000</text:p>
          </table:table-cell>
          <table:table-cell table:formula="of:=[.B2271]/[.C2271]" office:value-type="float" office:value="0.00210185185185185" calcext:value-type="float">
            <text:p>0,00210185185185185000</text:p>
          </table:table-cell>
          <table:table-cell table:formula="of:=[.D2272]-[.D22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[.B2271]+8" office:value-type="float" office:value="18168" calcext:value-type="float">
            <text:p>18168</text:p>
          </table:table-cell>
          <table:table-cell office:value-type="float" office:value="8640000" calcext:value-type="float">
            <text:p>8640000</text:p>
          </table:table-cell>
          <table:table-cell table:formula="of:=[.B2272]/[.C2272]" office:value-type="float" office:value="0.00210277777777778" calcext:value-type="float">
            <text:p>0,00210277777777778000</text:p>
          </table:table-cell>
          <table:table-cell table:formula="of:=[.D2273]-[.D22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[.B2272]+8" office:value-type="float" office:value="18176" calcext:value-type="float">
            <text:p>18176</text:p>
          </table:table-cell>
          <table:table-cell office:value-type="float" office:value="8640000" calcext:value-type="float">
            <text:p>8640000</text:p>
          </table:table-cell>
          <table:table-cell table:formula="of:=[.B2273]/[.C2273]" office:value-type="float" office:value="0.0021037037037037" calcext:value-type="float">
            <text:p>0,00210370370370370000</text:p>
          </table:table-cell>
          <table:table-cell table:formula="of:=[.D2274]-[.D22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[.B2273]+8" office:value-type="float" office:value="18184" calcext:value-type="float">
            <text:p>18184</text:p>
          </table:table-cell>
          <table:table-cell office:value-type="float" office:value="8640000" calcext:value-type="float">
            <text:p>8640000</text:p>
          </table:table-cell>
          <table:table-cell table:formula="of:=[.B2274]/[.C2274]" office:value-type="float" office:value="0.00210462962962963" calcext:value-type="float">
            <text:p>0,00210462962962963000</text:p>
          </table:table-cell>
          <table:table-cell table:formula="of:=[.D2275]-[.D22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[.B2274]+8" office:value-type="float" office:value="18192" calcext:value-type="float">
            <text:p>18192</text:p>
          </table:table-cell>
          <table:table-cell office:value-type="float" office:value="8640000" calcext:value-type="float">
            <text:p>8640000</text:p>
          </table:table-cell>
          <table:table-cell table:formula="of:=[.B2275]/[.C2275]" office:value-type="float" office:value="0.00210555555555556" calcext:value-type="float">
            <text:p>0,00210555555555556000</text:p>
          </table:table-cell>
          <table:table-cell table:formula="of:=[.D2276]-[.D22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table:formula="of:=[.B2275]+8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2276]/[.C2276]" office:value-type="float" office:value="0.00210648148148148" calcext:value-type="float">
            <text:p>0,00210648148148148000</text:p>
          </table:table-cell>
          <table:table-cell table:formula="of:=[.D2277]-[.D22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[.B2276]+8" office:value-type="float" office:value="18208" calcext:value-type="float">
            <text:p>18208</text:p>
          </table:table-cell>
          <table:table-cell office:value-type="float" office:value="8640000" calcext:value-type="float">
            <text:p>8640000</text:p>
          </table:table-cell>
          <table:table-cell table:formula="of:=[.B2277]/[.C2277]" office:value-type="float" office:value="0.00210740740740741" calcext:value-type="float">
            <text:p>0,00210740740740741000</text:p>
          </table:table-cell>
          <table:table-cell table:formula="of:=[.D2278]-[.D22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[.B2277]+8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2278]/[.C2278]" office:value-type="float" office:value="0.00210833333333333" calcext:value-type="float">
            <text:p>0,00210833333333333000</text:p>
          </table:table-cell>
          <table:table-cell table:formula="of:=[.D2279]-[.D22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[.B2278]+8" office:value-type="float" office:value="18224" calcext:value-type="float">
            <text:p>18224</text:p>
          </table:table-cell>
          <table:table-cell office:value-type="float" office:value="8640000" calcext:value-type="float">
            <text:p>8640000</text:p>
          </table:table-cell>
          <table:table-cell table:formula="of:=[.B2279]/[.C2279]" office:value-type="float" office:value="0.00210925925925926" calcext:value-type="float">
            <text:p>0,00210925925925926000</text:p>
          </table:table-cell>
          <table:table-cell table:formula="of:=[.D2280]-[.D22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[.B2279]+8" office:value-type="float" office:value="18232" calcext:value-type="float">
            <text:p>18232</text:p>
          </table:table-cell>
          <table:table-cell office:value-type="float" office:value="8640000" calcext:value-type="float">
            <text:p>8640000</text:p>
          </table:table-cell>
          <table:table-cell table:formula="of:=[.B2280]/[.C2280]" office:value-type="float" office:value="0.00211018518518519" calcext:value-type="float">
            <text:p>0,00211018518518519000</text:p>
          </table:table-cell>
          <table:table-cell table:formula="of:=[.D2281]-[.D22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[.B2280]+8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2281]/[.C2281]" office:value-type="float" office:value="0.00211111111111111" calcext:value-type="float">
            <text:p>0,00211111111111111000</text:p>
          </table:table-cell>
          <table:table-cell table:formula="of:=[.D2282]-[.D22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[.B2281]+8" office:value-type="float" office:value="18248" calcext:value-type="float">
            <text:p>18248</text:p>
          </table:table-cell>
          <table:table-cell office:value-type="float" office:value="8640000" calcext:value-type="float">
            <text:p>8640000</text:p>
          </table:table-cell>
          <table:table-cell table:formula="of:=[.B2282]/[.C2282]" office:value-type="float" office:value="0.00211203703703704" calcext:value-type="float">
            <text:p>0,00211203703703704000</text:p>
          </table:table-cell>
          <table:table-cell table:formula="of:=[.D2283]-[.D22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table:formula="of:=[.B2282]+8" office:value-type="float" office:value="18256" calcext:value-type="float">
            <text:p>18256</text:p>
          </table:table-cell>
          <table:table-cell office:value-type="float" office:value="8640000" calcext:value-type="float">
            <text:p>8640000</text:p>
          </table:table-cell>
          <table:table-cell table:formula="of:=[.B2283]/[.C2283]" office:value-type="float" office:value="0.00211296296296296" calcext:value-type="float">
            <text:p>0,00211296296296296000</text:p>
          </table:table-cell>
          <table:table-cell table:formula="of:=[.D2284]-[.D22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table:formula="of:=[.B2283]+8" office:value-type="float" office:value="18264" calcext:value-type="float">
            <text:p>18264</text:p>
          </table:table-cell>
          <table:table-cell office:value-type="float" office:value="8640000" calcext:value-type="float">
            <text:p>8640000</text:p>
          </table:table-cell>
          <table:table-cell table:formula="of:=[.B2284]/[.C2284]" office:value-type="float" office:value="0.00211388888888889" calcext:value-type="float">
            <text:p>0,00211388888888889000</text:p>
          </table:table-cell>
          <table:table-cell table:formula="of:=[.D2285]-[.D2284]" office:value-type="float" office:value="0.000000925925925926354" calcext:value-type="float">
            <text:p>0,00000092592592592635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[.B2284]+8" office:value-type="float" office:value="18272" calcext:value-type="float">
            <text:p>18272</text:p>
          </table:table-cell>
          <table:table-cell office:value-type="float" office:value="8640000" calcext:value-type="float">
            <text:p>8640000</text:p>
          </table:table-cell>
          <table:table-cell table:formula="of:=[.B2285]/[.C2285]" office:value-type="float" office:value="0.00211481481481482" calcext:value-type="float">
            <text:p>0,00211481481481482000</text:p>
          </table:table-cell>
          <table:table-cell table:formula="of:=[.D2286]-[.D22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[.B2285]+8" office:value-type="float" office:value="18280" calcext:value-type="float">
            <text:p>18280</text:p>
          </table:table-cell>
          <table:table-cell office:value-type="float" office:value="8640000" calcext:value-type="float">
            <text:p>8640000</text:p>
          </table:table-cell>
          <table:table-cell table:formula="of:=[.B2286]/[.C2286]" office:value-type="float" office:value="0.00211574074074074" calcext:value-type="float">
            <text:p>0,00211574074074074000</text:p>
          </table:table-cell>
          <table:table-cell table:formula="of:=[.D2287]-[.D22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[.B2286]+8" office:value-type="float" office:value="18288" calcext:value-type="float">
            <text:p>18288</text:p>
          </table:table-cell>
          <table:table-cell office:value-type="float" office:value="8640000" calcext:value-type="float">
            <text:p>8640000</text:p>
          </table:table-cell>
          <table:table-cell table:formula="of:=[.B2287]/[.C2287]" office:value-type="float" office:value="0.00211666666666667" calcext:value-type="float">
            <text:p>0,00211666666666667000</text:p>
          </table:table-cell>
          <table:table-cell table:formula="of:=[.D2288]-[.D22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[.B2287]+8" office:value-type="float" office:value="18296" calcext:value-type="float">
            <text:p>18296</text:p>
          </table:table-cell>
          <table:table-cell office:value-type="float" office:value="8640000" calcext:value-type="float">
            <text:p>8640000</text:p>
          </table:table-cell>
          <table:table-cell table:formula="of:=[.B2288]/[.C2288]" office:value-type="float" office:value="0.00211759259259259" calcext:value-type="float">
            <text:p>0,00211759259259259000</text:p>
          </table:table-cell>
          <table:table-cell table:formula="of:=[.D2289]-[.D22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[.B2288]+8" office:value-type="float" office:value="18304" calcext:value-type="float">
            <text:p>18304</text:p>
          </table:table-cell>
          <table:table-cell office:value-type="float" office:value="8640000" calcext:value-type="float">
            <text:p>8640000</text:p>
          </table:table-cell>
          <table:table-cell table:formula="of:=[.B2289]/[.C2289]" office:value-type="float" office:value="0.00211851851851852" calcext:value-type="float">
            <text:p>0,00211851851851852000</text:p>
          </table:table-cell>
          <table:table-cell table:formula="of:=[.D2290]-[.D22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table:formula="of:=[.B2289]+8" office:value-type="float" office:value="18312" calcext:value-type="float">
            <text:p>18312</text:p>
          </table:table-cell>
          <table:table-cell office:value-type="float" office:value="8640000" calcext:value-type="float">
            <text:p>8640000</text:p>
          </table:table-cell>
          <table:table-cell table:formula="of:=[.B2290]/[.C2290]" office:value-type="float" office:value="0.00211944444444444" calcext:value-type="float">
            <text:p>0,00211944444444444000</text:p>
          </table:table-cell>
          <table:table-cell table:formula="of:=[.D2291]-[.D22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[.B2290]+8" office:value-type="float" office:value="18320" calcext:value-type="float">
            <text:p>18320</text:p>
          </table:table-cell>
          <table:table-cell office:value-type="float" office:value="8640000" calcext:value-type="float">
            <text:p>8640000</text:p>
          </table:table-cell>
          <table:table-cell table:formula="of:=[.B2291]/[.C2291]" office:value-type="float" office:value="0.00212037037037037" calcext:value-type="float">
            <text:p>0,00212037037037037000</text:p>
          </table:table-cell>
          <table:table-cell table:formula="of:=[.D2292]-[.D22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[.B2291]+8" office:value-type="float" office:value="18328" calcext:value-type="float">
            <text:p>18328</text:p>
          </table:table-cell>
          <table:table-cell office:value-type="float" office:value="8640000" calcext:value-type="float">
            <text:p>8640000</text:p>
          </table:table-cell>
          <table:table-cell table:formula="of:=[.B2292]/[.C2292]" office:value-type="float" office:value="0.0021212962962963" calcext:value-type="float">
            <text:p>0,00212129629629630000</text:p>
          </table:table-cell>
          <table:table-cell table:formula="of:=[.D2293]-[.D22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table:formula="of:=[.B2292]+8" office:value-type="float" office:value="18336" calcext:value-type="float">
            <text:p>18336</text:p>
          </table:table-cell>
          <table:table-cell office:value-type="float" office:value="8640000" calcext:value-type="float">
            <text:p>8640000</text:p>
          </table:table-cell>
          <table:table-cell table:formula="of:=[.B2293]/[.C2293]" office:value-type="float" office:value="0.00212222222222222" calcext:value-type="float">
            <text:p>0,00212222222222222000</text:p>
          </table:table-cell>
          <table:table-cell table:formula="of:=[.D2294]-[.D22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[.B2293]+8" office:value-type="float" office:value="18344" calcext:value-type="float">
            <text:p>18344</text:p>
          </table:table-cell>
          <table:table-cell office:value-type="float" office:value="8640000" calcext:value-type="float">
            <text:p>8640000</text:p>
          </table:table-cell>
          <table:table-cell table:formula="of:=[.B2294]/[.C2294]" office:value-type="float" office:value="0.00212314814814815" calcext:value-type="float">
            <text:p>0,00212314814814815000</text:p>
          </table:table-cell>
          <table:table-cell table:formula="of:=[.D2295]-[.D22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table:formula="of:=[.B2294]+8" office:value-type="float" office:value="18352" calcext:value-type="float">
            <text:p>18352</text:p>
          </table:table-cell>
          <table:table-cell office:value-type="float" office:value="8640000" calcext:value-type="float">
            <text:p>8640000</text:p>
          </table:table-cell>
          <table:table-cell table:formula="of:=[.B2295]/[.C2295]" office:value-type="float" office:value="0.00212407407407407" calcext:value-type="float">
            <text:p>0,00212407407407407000</text:p>
          </table:table-cell>
          <table:table-cell table:formula="of:=[.D2296]-[.D22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[.B2295]+8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2296]/[.C2296]" office:value-type="float" office:value="0.002125" calcext:value-type="float">
            <text:p>0,00212500000000000000</text:p>
          </table:table-cell>
          <table:table-cell table:formula="of:=[.D2297]-[.D22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[.B2296]+8" office:value-type="float" office:value="18368" calcext:value-type="float">
            <text:p>18368</text:p>
          </table:table-cell>
          <table:table-cell office:value-type="float" office:value="8640000" calcext:value-type="float">
            <text:p>8640000</text:p>
          </table:table-cell>
          <table:table-cell table:formula="of:=[.B2297]/[.C2297]" office:value-type="float" office:value="0.00212592592592593" calcext:value-type="float">
            <text:p>0,00212592592592593000</text:p>
          </table:table-cell>
          <table:table-cell table:formula="of:=[.D2298]-[.D22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[.B2297]+8" office:value-type="float" office:value="18376" calcext:value-type="float">
            <text:p>18376</text:p>
          </table:table-cell>
          <table:table-cell office:value-type="float" office:value="8640000" calcext:value-type="float">
            <text:p>8640000</text:p>
          </table:table-cell>
          <table:table-cell table:formula="of:=[.B2298]/[.C2298]" office:value-type="float" office:value="0.00212685185185185" calcext:value-type="float">
            <text:p>0,00212685185185185000</text:p>
          </table:table-cell>
          <table:table-cell table:formula="of:=[.D2299]-[.D22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[.B2298]+8" office:value-type="float" office:value="18384" calcext:value-type="float">
            <text:p>18384</text:p>
          </table:table-cell>
          <table:table-cell office:value-type="float" office:value="8640000" calcext:value-type="float">
            <text:p>8640000</text:p>
          </table:table-cell>
          <table:table-cell table:formula="of:=[.B2299]/[.C2299]" office:value-type="float" office:value="0.00212777777777778" calcext:value-type="float">
            <text:p>0,00212777777777778000</text:p>
          </table:table-cell>
          <table:table-cell table:formula="of:=[.D2300]-[.D22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[.B2299]+8" office:value-type="float" office:value="18392" calcext:value-type="float">
            <text:p>18392</text:p>
          </table:table-cell>
          <table:table-cell office:value-type="float" office:value="8640000" calcext:value-type="float">
            <text:p>8640000</text:p>
          </table:table-cell>
          <table:table-cell table:formula="of:=[.B2300]/[.C2300]" office:value-type="float" office:value="0.0021287037037037" calcext:value-type="float">
            <text:p>0,00212870370370370000</text:p>
          </table:table-cell>
          <table:table-cell table:formula="of:=[.D2301]-[.D23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[.B2300]+8" office:value-type="float" office:value="18400" calcext:value-type="float">
            <text:p>18400</text:p>
          </table:table-cell>
          <table:table-cell office:value-type="float" office:value="8640000" calcext:value-type="float">
            <text:p>8640000</text:p>
          </table:table-cell>
          <table:table-cell table:formula="of:=[.B2301]/[.C2301]" office:value-type="float" office:value="0.00212962962962963" calcext:value-type="float">
            <text:p>0,00212962962962963000</text:p>
          </table:table-cell>
          <table:table-cell table:formula="of:=[.D2302]-[.D23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table:formula="of:=[.B2301]+8" office:value-type="float" office:value="18408" calcext:value-type="float">
            <text:p>18408</text:p>
          </table:table-cell>
          <table:table-cell office:value-type="float" office:value="8640000" calcext:value-type="float">
            <text:p>8640000</text:p>
          </table:table-cell>
          <table:table-cell table:formula="of:=[.B2302]/[.C2302]" office:value-type="float" office:value="0.00213055555555556" calcext:value-type="float">
            <text:p>0,00213055555555556000</text:p>
          </table:table-cell>
          <table:table-cell table:formula="of:=[.D2303]-[.D23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[.B2302]+8" office:value-type="float" office:value="18416" calcext:value-type="float">
            <text:p>18416</text:p>
          </table:table-cell>
          <table:table-cell office:value-type="float" office:value="8640000" calcext:value-type="float">
            <text:p>8640000</text:p>
          </table:table-cell>
          <table:table-cell table:formula="of:=[.B2303]/[.C2303]" office:value-type="float" office:value="0.00213148148148148" calcext:value-type="float">
            <text:p>0,00213148148148148000</text:p>
          </table:table-cell>
          <table:table-cell table:formula="of:=[.D2304]-[.D23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table:formula="of:=[.B2303]+8" office:value-type="float" office:value="18424" calcext:value-type="float">
            <text:p>18424</text:p>
          </table:table-cell>
          <table:table-cell office:value-type="float" office:value="8640000" calcext:value-type="float">
            <text:p>8640000</text:p>
          </table:table-cell>
          <table:table-cell table:formula="of:=[.B2304]/[.C2304]" office:value-type="float" office:value="0.00213240740740741" calcext:value-type="float">
            <text:p>0,00213240740740741000</text:p>
          </table:table-cell>
          <table:table-cell table:formula="of:=[.D2305]-[.D23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[.B2304]+8" office:value-type="float" office:value="18432" calcext:value-type="float">
            <text:p>18432</text:p>
          </table:table-cell>
          <table:table-cell office:value-type="float" office:value="8640000" calcext:value-type="float">
            <text:p>8640000</text:p>
          </table:table-cell>
          <table:table-cell table:formula="of:=[.B2305]/[.C2305]" office:value-type="float" office:value="0.00213333333333333" calcext:value-type="float">
            <text:p>0,00213333333333333000</text:p>
          </table:table-cell>
          <table:table-cell table:formula="of:=[.D2306]-[.D23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[.B2305]+8" office:value-type="float" office:value="18440" calcext:value-type="float">
            <text:p>18440</text:p>
          </table:table-cell>
          <table:table-cell office:value-type="float" office:value="8640000" calcext:value-type="float">
            <text:p>8640000</text:p>
          </table:table-cell>
          <table:table-cell table:formula="of:=[.B2306]/[.C2306]" office:value-type="float" office:value="0.00213425925925926" calcext:value-type="float">
            <text:p>0,00213425925925926000</text:p>
          </table:table-cell>
          <table:table-cell table:formula="of:=[.D2307]-[.D23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[.B2306]+8" office:value-type="float" office:value="18448" calcext:value-type="float">
            <text:p>18448</text:p>
          </table:table-cell>
          <table:table-cell office:value-type="float" office:value="8640000" calcext:value-type="float">
            <text:p>8640000</text:p>
          </table:table-cell>
          <table:table-cell table:formula="of:=[.B2307]/[.C2307]" office:value-type="float" office:value="0.00213518518518519" calcext:value-type="float">
            <text:p>0,00213518518518519000</text:p>
          </table:table-cell>
          <table:table-cell table:formula="of:=[.D2308]-[.D23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table:formula="of:=[.B2307]+8" office:value-type="float" office:value="18456" calcext:value-type="float">
            <text:p>18456</text:p>
          </table:table-cell>
          <table:table-cell office:value-type="float" office:value="8640000" calcext:value-type="float">
            <text:p>8640000</text:p>
          </table:table-cell>
          <table:table-cell table:formula="of:=[.B2308]/[.C2308]" office:value-type="float" office:value="0.00213611111111111" calcext:value-type="float">
            <text:p>0,00213611111111111000</text:p>
          </table:table-cell>
          <table:table-cell table:formula="of:=[.D2309]-[.D23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[.B2308]+8" office:value-type="float" office:value="18464" calcext:value-type="float">
            <text:p>18464</text:p>
          </table:table-cell>
          <table:table-cell office:value-type="float" office:value="8640000" calcext:value-type="float">
            <text:p>8640000</text:p>
          </table:table-cell>
          <table:table-cell table:formula="of:=[.B2309]/[.C2309]" office:value-type="float" office:value="0.00213703703703704" calcext:value-type="float">
            <text:p>0,00213703703703704000</text:p>
          </table:table-cell>
          <table:table-cell table:formula="of:=[.D2310]-[.D23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table:formula="of:=[.B2309]+8" office:value-type="float" office:value="18472" calcext:value-type="float">
            <text:p>18472</text:p>
          </table:table-cell>
          <table:table-cell office:value-type="float" office:value="8640000" calcext:value-type="float">
            <text:p>8640000</text:p>
          </table:table-cell>
          <table:table-cell table:formula="of:=[.B2310]/[.C2310]" office:value-type="float" office:value="0.00213796296296296" calcext:value-type="float">
            <text:p>0,00213796296296296000</text:p>
          </table:table-cell>
          <table:table-cell table:formula="of:=[.D2311]-[.D23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[.B2310]+8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2311]/[.C2311]" office:value-type="float" office:value="0.00213888888888889" calcext:value-type="float">
            <text:p>0,00213888888888889000</text:p>
          </table:table-cell>
          <table:table-cell table:formula="of:=[.D2312]-[.D23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[.B2311]+8" office:value-type="float" office:value="18488" calcext:value-type="float">
            <text:p>18488</text:p>
          </table:table-cell>
          <table:table-cell office:value-type="float" office:value="8640000" calcext:value-type="float">
            <text:p>8640000</text:p>
          </table:table-cell>
          <table:table-cell table:formula="of:=[.B2312]/[.C2312]" office:value-type="float" office:value="0.00213981481481482" calcext:value-type="float">
            <text:p>0,00213981481481482000</text:p>
          </table:table-cell>
          <table:table-cell table:formula="of:=[.D2313]-[.D23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[.B2312]+8" office:value-type="float" office:value="18496" calcext:value-type="float">
            <text:p>18496</text:p>
          </table:table-cell>
          <table:table-cell office:value-type="float" office:value="8640000" calcext:value-type="float">
            <text:p>8640000</text:p>
          </table:table-cell>
          <table:table-cell table:formula="of:=[.B2313]/[.C2313]" office:value-type="float" office:value="0.00214074074074074" calcext:value-type="float">
            <text:p>0,00214074074074074000</text:p>
          </table:table-cell>
          <table:table-cell table:formula="of:=[.D2314]-[.D23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[.B2313]+8" office:value-type="float" office:value="18504" calcext:value-type="float">
            <text:p>18504</text:p>
          </table:table-cell>
          <table:table-cell office:value-type="float" office:value="8640000" calcext:value-type="float">
            <text:p>8640000</text:p>
          </table:table-cell>
          <table:table-cell table:formula="of:=[.B2314]/[.C2314]" office:value-type="float" office:value="0.00214166666666667" calcext:value-type="float">
            <text:p>0,00214166666666667000</text:p>
          </table:table-cell>
          <table:table-cell table:formula="of:=[.D2315]-[.D23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formula="of:=[.B2314]+8" office:value-type="float" office:value="18512" calcext:value-type="float">
            <text:p>18512</text:p>
          </table:table-cell>
          <table:table-cell office:value-type="float" office:value="8640000" calcext:value-type="float">
            <text:p>8640000</text:p>
          </table:table-cell>
          <table:table-cell table:formula="of:=[.B2315]/[.C2315]" office:value-type="float" office:value="0.00214259259259259" calcext:value-type="float">
            <text:p>0,00214259259259259000</text:p>
          </table:table-cell>
          <table:table-cell table:formula="of:=[.D2316]-[.D23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[.B2315]+8" office:value-type="float" office:value="18520" calcext:value-type="float">
            <text:p>18520</text:p>
          </table:table-cell>
          <table:table-cell office:value-type="float" office:value="8640000" calcext:value-type="float">
            <text:p>8640000</text:p>
          </table:table-cell>
          <table:table-cell table:formula="of:=[.B2316]/[.C2316]" office:value-type="float" office:value="0.00214351851851852" calcext:value-type="float">
            <text:p>0,00214351851851852000</text:p>
          </table:table-cell>
          <table:table-cell table:formula="of:=[.D2317]-[.D23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[.B2316]+8" office:value-type="float" office:value="18528" calcext:value-type="float">
            <text:p>18528</text:p>
          </table:table-cell>
          <table:table-cell office:value-type="float" office:value="8640000" calcext:value-type="float">
            <text:p>8640000</text:p>
          </table:table-cell>
          <table:table-cell table:formula="of:=[.B2317]/[.C2317]" office:value-type="float" office:value="0.00214444444444444" calcext:value-type="float">
            <text:p>0,00214444444444444000</text:p>
          </table:table-cell>
          <table:table-cell table:formula="of:=[.D2318]-[.D23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[.B2317]+8" office:value-type="float" office:value="18536" calcext:value-type="float">
            <text:p>18536</text:p>
          </table:table-cell>
          <table:table-cell office:value-type="float" office:value="8640000" calcext:value-type="float">
            <text:p>8640000</text:p>
          </table:table-cell>
          <table:table-cell table:formula="of:=[.B2318]/[.C2318]" office:value-type="float" office:value="0.00214537037037037" calcext:value-type="float">
            <text:p>0,00214537037037037000</text:p>
          </table:table-cell>
          <table:table-cell table:formula="of:=[.D2319]-[.D23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[.B2318]+8" office:value-type="float" office:value="18544" calcext:value-type="float">
            <text:p>18544</text:p>
          </table:table-cell>
          <table:table-cell office:value-type="float" office:value="8640000" calcext:value-type="float">
            <text:p>8640000</text:p>
          </table:table-cell>
          <table:table-cell table:formula="of:=[.B2319]/[.C2319]" office:value-type="float" office:value="0.0021462962962963" calcext:value-type="float">
            <text:p>0,00214629629629630000</text:p>
          </table:table-cell>
          <table:table-cell table:formula="of:=[.D2320]-[.D23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[.B2319]+8" office:value-type="float" office:value="18552" calcext:value-type="float">
            <text:p>18552</text:p>
          </table:table-cell>
          <table:table-cell office:value-type="float" office:value="8640000" calcext:value-type="float">
            <text:p>8640000</text:p>
          </table:table-cell>
          <table:table-cell table:formula="of:=[.B2320]/[.C2320]" office:value-type="float" office:value="0.00214722222222222" calcext:value-type="float">
            <text:p>0,00214722222222222000</text:p>
          </table:table-cell>
          <table:table-cell table:formula="of:=[.D2321]-[.D23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[.B2320]+8" office:value-type="float" office:value="18560" calcext:value-type="float">
            <text:p>18560</text:p>
          </table:table-cell>
          <table:table-cell office:value-type="float" office:value="8640000" calcext:value-type="float">
            <text:p>8640000</text:p>
          </table:table-cell>
          <table:table-cell table:formula="of:=[.B2321]/[.C2321]" office:value-type="float" office:value="0.00214814814814815" calcext:value-type="float">
            <text:p>0,00214814814814815000</text:p>
          </table:table-cell>
          <table:table-cell table:formula="of:=[.D2322]-[.D23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[.B2321]+8" office:value-type="float" office:value="18568" calcext:value-type="float">
            <text:p>18568</text:p>
          </table:table-cell>
          <table:table-cell office:value-type="float" office:value="8640000" calcext:value-type="float">
            <text:p>8640000</text:p>
          </table:table-cell>
          <table:table-cell table:formula="of:=[.B2322]/[.C2322]" office:value-type="float" office:value="0.00214907407407407" calcext:value-type="float">
            <text:p>0,00214907407407407000</text:p>
          </table:table-cell>
          <table:table-cell table:formula="of:=[.D2323]-[.D23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[.B2322]+8" office:value-type="float" office:value="18576" calcext:value-type="float">
            <text:p>18576</text:p>
          </table:table-cell>
          <table:table-cell office:value-type="float" office:value="8640000" calcext:value-type="float">
            <text:p>8640000</text:p>
          </table:table-cell>
          <table:table-cell table:formula="of:=[.B2323]/[.C2323]" office:value-type="float" office:value="0.00215" calcext:value-type="float">
            <text:p>0,00215000000000000000</text:p>
          </table:table-cell>
          <table:table-cell table:formula="of:=[.D2324]-[.D23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[.B2323]+8" office:value-type="float" office:value="18584" calcext:value-type="float">
            <text:p>18584</text:p>
          </table:table-cell>
          <table:table-cell office:value-type="float" office:value="8640000" calcext:value-type="float">
            <text:p>8640000</text:p>
          </table:table-cell>
          <table:table-cell table:formula="of:=[.B2324]/[.C2324]" office:value-type="float" office:value="0.00215092592592593" calcext:value-type="float">
            <text:p>0,00215092592592593000</text:p>
          </table:table-cell>
          <table:table-cell table:formula="of:=[.D2325]-[.D23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[.B2324]+8" office:value-type="float" office:value="18592" calcext:value-type="float">
            <text:p>18592</text:p>
          </table:table-cell>
          <table:table-cell office:value-type="float" office:value="8640000" calcext:value-type="float">
            <text:p>8640000</text:p>
          </table:table-cell>
          <table:table-cell table:formula="of:=[.B2325]/[.C2325]" office:value-type="float" office:value="0.00215185185185185" calcext:value-type="float">
            <text:p>0,00215185185185185000</text:p>
          </table:table-cell>
          <table:table-cell table:formula="of:=[.D2326]-[.D23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[.B2325]+8" office:value-type="float" office:value="18600" calcext:value-type="float">
            <text:p>18600</text:p>
          </table:table-cell>
          <table:table-cell office:value-type="float" office:value="8640000" calcext:value-type="float">
            <text:p>8640000</text:p>
          </table:table-cell>
          <table:table-cell table:formula="of:=[.B2326]/[.C2326]" office:value-type="float" office:value="0.00215277777777778" calcext:value-type="float">
            <text:p>0,00215277777777778000</text:p>
          </table:table-cell>
          <table:table-cell table:formula="of:=[.D2327]-[.D23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[.B2326]+8" office:value-type="float" office:value="18608" calcext:value-type="float">
            <text:p>18608</text:p>
          </table:table-cell>
          <table:table-cell office:value-type="float" office:value="8640000" calcext:value-type="float">
            <text:p>8640000</text:p>
          </table:table-cell>
          <table:table-cell table:formula="of:=[.B2327]/[.C2327]" office:value-type="float" office:value="0.0021537037037037" calcext:value-type="float">
            <text:p>0,00215370370370370000</text:p>
          </table:table-cell>
          <table:table-cell table:formula="of:=[.D2328]-[.D23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[.B2327]+8" office:value-type="float" office:value="18616" calcext:value-type="float">
            <text:p>18616</text:p>
          </table:table-cell>
          <table:table-cell office:value-type="float" office:value="8640000" calcext:value-type="float">
            <text:p>8640000</text:p>
          </table:table-cell>
          <table:table-cell table:formula="of:=[.B2328]/[.C2328]" office:value-type="float" office:value="0.00215462962962963" calcext:value-type="float">
            <text:p>0,00215462962962963000</text:p>
          </table:table-cell>
          <table:table-cell table:formula="of:=[.D2329]-[.D23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table:formula="of:=[.B2328]+8" office:value-type="float" office:value="18624" calcext:value-type="float">
            <text:p>18624</text:p>
          </table:table-cell>
          <table:table-cell office:value-type="float" office:value="8640000" calcext:value-type="float">
            <text:p>8640000</text:p>
          </table:table-cell>
          <table:table-cell table:formula="of:=[.B2329]/[.C2329]" office:value-type="float" office:value="0.00215555555555556" calcext:value-type="float">
            <text:p>0,00215555555555556000</text:p>
          </table:table-cell>
          <table:table-cell table:formula="of:=[.D2330]-[.D23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table:formula="of:=[.B2329]+8" office:value-type="float" office:value="18632" calcext:value-type="float">
            <text:p>18632</text:p>
          </table:table-cell>
          <table:table-cell office:value-type="float" office:value="8640000" calcext:value-type="float">
            <text:p>8640000</text:p>
          </table:table-cell>
          <table:table-cell table:formula="of:=[.B2330]/[.C2330]" office:value-type="float" office:value="0.00215648148148148" calcext:value-type="float">
            <text:p>0,00215648148148148000</text:p>
          </table:table-cell>
          <table:table-cell table:formula="of:=[.D2331]-[.D23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table:formula="of:=[.B2330]+8" office:value-type="float" office:value="18640" calcext:value-type="float">
            <text:p>18640</text:p>
          </table:table-cell>
          <table:table-cell office:value-type="float" office:value="8640000" calcext:value-type="float">
            <text:p>8640000</text:p>
          </table:table-cell>
          <table:table-cell table:formula="of:=[.B2331]/[.C2331]" office:value-type="float" office:value="0.00215740740740741" calcext:value-type="float">
            <text:p>0,00215740740740741000</text:p>
          </table:table-cell>
          <table:table-cell table:formula="of:=[.D2332]-[.D23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table:formula="of:=[.B2331]+8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2332]/[.C2332]" office:value-type="float" office:value="0.00215833333333333" calcext:value-type="float">
            <text:p>0,00215833333333333000</text:p>
          </table:table-cell>
          <table:table-cell table:formula="of:=[.D2333]-[.D23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[.B2332]+8" office:value-type="float" office:value="18656" calcext:value-type="float">
            <text:p>18656</text:p>
          </table:table-cell>
          <table:table-cell office:value-type="float" office:value="8640000" calcext:value-type="float">
            <text:p>8640000</text:p>
          </table:table-cell>
          <table:table-cell table:formula="of:=[.B2333]/[.C2333]" office:value-type="float" office:value="0.00215925925925926" calcext:value-type="float">
            <text:p>0,00215925925925926000</text:p>
          </table:table-cell>
          <table:table-cell table:formula="of:=[.D2334]-[.D23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table:formula="of:=[.B2333]+8" office:value-type="float" office:value="18664" calcext:value-type="float">
            <text:p>18664</text:p>
          </table:table-cell>
          <table:table-cell office:value-type="float" office:value="8640000" calcext:value-type="float">
            <text:p>8640000</text:p>
          </table:table-cell>
          <table:table-cell table:formula="of:=[.B2334]/[.C2334]" office:value-type="float" office:value="0.00216018518518519" calcext:value-type="float">
            <text:p>0,00216018518518519000</text:p>
          </table:table-cell>
          <table:table-cell table:formula="of:=[.D2335]-[.D23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[.B2334]+8" office:value-type="float" office:value="18672" calcext:value-type="float">
            <text:p>18672</text:p>
          </table:table-cell>
          <table:table-cell office:value-type="float" office:value="8640000" calcext:value-type="float">
            <text:p>8640000</text:p>
          </table:table-cell>
          <table:table-cell table:formula="of:=[.B2335]/[.C2335]" office:value-type="float" office:value="0.00216111111111111" calcext:value-type="float">
            <text:p>0,00216111111111111000</text:p>
          </table:table-cell>
          <table:table-cell table:formula="of:=[.D2336]-[.D23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[.B2335]+8" office:value-type="float" office:value="18680" calcext:value-type="float">
            <text:p>18680</text:p>
          </table:table-cell>
          <table:table-cell office:value-type="float" office:value="8640000" calcext:value-type="float">
            <text:p>8640000</text:p>
          </table:table-cell>
          <table:table-cell table:formula="of:=[.B2336]/[.C2336]" office:value-type="float" office:value="0.00216203703703704" calcext:value-type="float">
            <text:p>0,00216203703703704000</text:p>
          </table:table-cell>
          <table:table-cell table:formula="of:=[.D2337]-[.D23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[.B2336]+8" office:value-type="float" office:value="18688" calcext:value-type="float">
            <text:p>18688</text:p>
          </table:table-cell>
          <table:table-cell office:value-type="float" office:value="8640000" calcext:value-type="float">
            <text:p>8640000</text:p>
          </table:table-cell>
          <table:table-cell table:formula="of:=[.B2337]/[.C2337]" office:value-type="float" office:value="0.00216296296296296" calcext:value-type="float">
            <text:p>0,00216296296296296000</text:p>
          </table:table-cell>
          <table:table-cell table:formula="of:=[.D2338]-[.D23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[.B2337]+8" office:value-type="float" office:value="18696" calcext:value-type="float">
            <text:p>18696</text:p>
          </table:table-cell>
          <table:table-cell office:value-type="float" office:value="8640000" calcext:value-type="float">
            <text:p>8640000</text:p>
          </table:table-cell>
          <table:table-cell table:formula="of:=[.B2338]/[.C2338]" office:value-type="float" office:value="0.00216388888888889" calcext:value-type="float">
            <text:p>0,00216388888888889000</text:p>
          </table:table-cell>
          <table:table-cell table:formula="of:=[.D2339]-[.D23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[.B2338]+8" office:value-type="float" office:value="18704" calcext:value-type="float">
            <text:p>18704</text:p>
          </table:table-cell>
          <table:table-cell office:value-type="float" office:value="8640000" calcext:value-type="float">
            <text:p>8640000</text:p>
          </table:table-cell>
          <table:table-cell table:formula="of:=[.B2339]/[.C2339]" office:value-type="float" office:value="0.00216481481481481" calcext:value-type="float">
            <text:p>0,00216481481481481000</text:p>
          </table:table-cell>
          <table:table-cell table:formula="of:=[.D2340]-[.D23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[.B2339]+8" office:value-type="float" office:value="18712" calcext:value-type="float">
            <text:p>18712</text:p>
          </table:table-cell>
          <table:table-cell office:value-type="float" office:value="8640000" calcext:value-type="float">
            <text:p>8640000</text:p>
          </table:table-cell>
          <table:table-cell table:formula="of:=[.B2340]/[.C2340]" office:value-type="float" office:value="0.00216574074074074" calcext:value-type="float">
            <text:p>0,00216574074074074000</text:p>
          </table:table-cell>
          <table:table-cell table:formula="of:=[.D2341]-[.D23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[.B2340]+8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2341]/[.C2341]" office:value-type="float" office:value="0.00216666666666667" calcext:value-type="float">
            <text:p>0,00216666666666667000</text:p>
          </table:table-cell>
          <table:table-cell table:formula="of:=[.D2342]-[.D23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[.B2341]+8" office:value-type="float" office:value="18728" calcext:value-type="float">
            <text:p>18728</text:p>
          </table:table-cell>
          <table:table-cell office:value-type="float" office:value="8640000" calcext:value-type="float">
            <text:p>8640000</text:p>
          </table:table-cell>
          <table:table-cell table:formula="of:=[.B2342]/[.C2342]" office:value-type="float" office:value="0.00216759259259259" calcext:value-type="float">
            <text:p>0,00216759259259259000</text:p>
          </table:table-cell>
          <table:table-cell table:formula="of:=[.D2343]-[.D23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[.B2342]+8" office:value-type="float" office:value="18736" calcext:value-type="float">
            <text:p>18736</text:p>
          </table:table-cell>
          <table:table-cell office:value-type="float" office:value="8640000" calcext:value-type="float">
            <text:p>8640000</text:p>
          </table:table-cell>
          <table:table-cell table:formula="of:=[.B2343]/[.C2343]" office:value-type="float" office:value="0.00216851851851852" calcext:value-type="float">
            <text:p>0,00216851851851852000</text:p>
          </table:table-cell>
          <table:table-cell table:formula="of:=[.D2344]-[.D23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[.B2343]+8" office:value-type="float" office:value="18744" calcext:value-type="float">
            <text:p>18744</text:p>
          </table:table-cell>
          <table:table-cell office:value-type="float" office:value="8640000" calcext:value-type="float">
            <text:p>8640000</text:p>
          </table:table-cell>
          <table:table-cell table:formula="of:=[.B2344]/[.C2344]" office:value-type="float" office:value="0.00216944444444444" calcext:value-type="float">
            <text:p>0,00216944444444444000</text:p>
          </table:table-cell>
          <table:table-cell table:formula="of:=[.D2345]-[.D23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[.B2344]+8" office:value-type="float" office:value="18752" calcext:value-type="float">
            <text:p>18752</text:p>
          </table:table-cell>
          <table:table-cell office:value-type="float" office:value="8640000" calcext:value-type="float">
            <text:p>8640000</text:p>
          </table:table-cell>
          <table:table-cell table:formula="of:=[.B2345]/[.C2345]" office:value-type="float" office:value="0.00217037037037037" calcext:value-type="float">
            <text:p>0,00217037037037037000</text:p>
          </table:table-cell>
          <table:table-cell table:formula="of:=[.D2346]-[.D23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[.B2345]+8" office:value-type="float" office:value="18760" calcext:value-type="float">
            <text:p>18760</text:p>
          </table:table-cell>
          <table:table-cell office:value-type="float" office:value="8640000" calcext:value-type="float">
            <text:p>8640000</text:p>
          </table:table-cell>
          <table:table-cell table:formula="of:=[.B2346]/[.C2346]" office:value-type="float" office:value="0.0021712962962963" calcext:value-type="float">
            <text:p>0,00217129629629630000</text:p>
          </table:table-cell>
          <table:table-cell table:formula="of:=[.D2347]-[.D23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[.B2346]+8" office:value-type="float" office:value="18768" calcext:value-type="float">
            <text:p>18768</text:p>
          </table:table-cell>
          <table:table-cell office:value-type="float" office:value="8640000" calcext:value-type="float">
            <text:p>8640000</text:p>
          </table:table-cell>
          <table:table-cell table:formula="of:=[.B2347]/[.C2347]" office:value-type="float" office:value="0.00217222222222222" calcext:value-type="float">
            <text:p>0,00217222222222222000</text:p>
          </table:table-cell>
          <table:table-cell table:formula="of:=[.D2348]-[.D23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[.B2347]+8" office:value-type="float" office:value="18776" calcext:value-type="float">
            <text:p>18776</text:p>
          </table:table-cell>
          <table:table-cell office:value-type="float" office:value="8640000" calcext:value-type="float">
            <text:p>8640000</text:p>
          </table:table-cell>
          <table:table-cell table:formula="of:=[.B2348]/[.C2348]" office:value-type="float" office:value="0.00217314814814815" calcext:value-type="float">
            <text:p>0,00217314814814815000</text:p>
          </table:table-cell>
          <table:table-cell table:formula="of:=[.D2349]-[.D23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[.B2348]+8" office:value-type="float" office:value="18784" calcext:value-type="float">
            <text:p>18784</text:p>
          </table:table-cell>
          <table:table-cell office:value-type="float" office:value="8640000" calcext:value-type="float">
            <text:p>8640000</text:p>
          </table:table-cell>
          <table:table-cell table:formula="of:=[.B2349]/[.C2349]" office:value-type="float" office:value="0.00217407407407407" calcext:value-type="float">
            <text:p>0,00217407407407407000</text:p>
          </table:table-cell>
          <table:table-cell table:formula="of:=[.D2350]-[.D23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[.B2349]+8" office:value-type="float" office:value="18792" calcext:value-type="float">
            <text:p>18792</text:p>
          </table:table-cell>
          <table:table-cell office:value-type="float" office:value="8640000" calcext:value-type="float">
            <text:p>8640000</text:p>
          </table:table-cell>
          <table:table-cell table:formula="of:=[.B2350]/[.C2350]" office:value-type="float" office:value="0.002175" calcext:value-type="float">
            <text:p>0,00217500000000000000</text:p>
          </table:table-cell>
          <table:table-cell table:formula="of:=[.D2351]-[.D23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[.B2350]+8" office:value-type="float" office:value="18800" calcext:value-type="float">
            <text:p>18800</text:p>
          </table:table-cell>
          <table:table-cell office:value-type="float" office:value="8640000" calcext:value-type="float">
            <text:p>8640000</text:p>
          </table:table-cell>
          <table:table-cell table:formula="of:=[.B2351]/[.C2351]" office:value-type="float" office:value="0.00217592592592593" calcext:value-type="float">
            <text:p>0,00217592592592593000</text:p>
          </table:table-cell>
          <table:table-cell table:formula="of:=[.D2352]-[.D23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[.B2351]+8" office:value-type="float" office:value="18808" calcext:value-type="float">
            <text:p>18808</text:p>
          </table:table-cell>
          <table:table-cell office:value-type="float" office:value="8640000" calcext:value-type="float">
            <text:p>8640000</text:p>
          </table:table-cell>
          <table:table-cell table:formula="of:=[.B2352]/[.C2352]" office:value-type="float" office:value="0.00217685185185185" calcext:value-type="float">
            <text:p>0,00217685185185185000</text:p>
          </table:table-cell>
          <table:table-cell table:formula="of:=[.D2353]-[.D23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[.B2352]+8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2353]/[.C2353]" office:value-type="float" office:value="0.00217777777777778" calcext:value-type="float">
            <text:p>0,00217777777777778000</text:p>
          </table:table-cell>
          <table:table-cell table:formula="of:=[.D2354]-[.D23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[.B2353]+8" office:value-type="float" office:value="18824" calcext:value-type="float">
            <text:p>18824</text:p>
          </table:table-cell>
          <table:table-cell office:value-type="float" office:value="8640000" calcext:value-type="float">
            <text:p>8640000</text:p>
          </table:table-cell>
          <table:table-cell table:formula="of:=[.B2354]/[.C2354]" office:value-type="float" office:value="0.0021787037037037" calcext:value-type="float">
            <text:p>0,00217870370370370000</text:p>
          </table:table-cell>
          <table:table-cell table:formula="of:=[.D2355]-[.D23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[.B2354]+8" office:value-type="float" office:value="18832" calcext:value-type="float">
            <text:p>18832</text:p>
          </table:table-cell>
          <table:table-cell office:value-type="float" office:value="8640000" calcext:value-type="float">
            <text:p>8640000</text:p>
          </table:table-cell>
          <table:table-cell table:formula="of:=[.B2355]/[.C2355]" office:value-type="float" office:value="0.00217962962962963" calcext:value-type="float">
            <text:p>0,00217962962962963000</text:p>
          </table:table-cell>
          <table:table-cell table:formula="of:=[.D2356]-[.D23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[.B2355]+8" office:value-type="float" office:value="18840" calcext:value-type="float">
            <text:p>18840</text:p>
          </table:table-cell>
          <table:table-cell office:value-type="float" office:value="8640000" calcext:value-type="float">
            <text:p>8640000</text:p>
          </table:table-cell>
          <table:table-cell table:formula="of:=[.B2356]/[.C2356]" office:value-type="float" office:value="0.00218055555555556" calcext:value-type="float">
            <text:p>0,00218055555555556000</text:p>
          </table:table-cell>
          <table:table-cell table:formula="of:=[.D2357]-[.D23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[.B2356]+8" office:value-type="float" office:value="18848" calcext:value-type="float">
            <text:p>18848</text:p>
          </table:table-cell>
          <table:table-cell office:value-type="float" office:value="8640000" calcext:value-type="float">
            <text:p>8640000</text:p>
          </table:table-cell>
          <table:table-cell table:formula="of:=[.B2357]/[.C2357]" office:value-type="float" office:value="0.00218148148148148" calcext:value-type="float">
            <text:p>0,00218148148148148000</text:p>
          </table:table-cell>
          <table:table-cell table:formula="of:=[.D2358]-[.D23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[.B2357]+8" office:value-type="float" office:value="18856" calcext:value-type="float">
            <text:p>18856</text:p>
          </table:table-cell>
          <table:table-cell office:value-type="float" office:value="8640000" calcext:value-type="float">
            <text:p>8640000</text:p>
          </table:table-cell>
          <table:table-cell table:formula="of:=[.B2358]/[.C2358]" office:value-type="float" office:value="0.00218240740740741" calcext:value-type="float">
            <text:p>0,00218240740740741000</text:p>
          </table:table-cell>
          <table:table-cell table:formula="of:=[.D2359]-[.D23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[.B2358]+8" office:value-type="float" office:value="18864" calcext:value-type="float">
            <text:p>18864</text:p>
          </table:table-cell>
          <table:table-cell office:value-type="float" office:value="8640000" calcext:value-type="float">
            <text:p>8640000</text:p>
          </table:table-cell>
          <table:table-cell table:formula="of:=[.B2359]/[.C2359]" office:value-type="float" office:value="0.00218333333333333" calcext:value-type="float">
            <text:p>0,00218333333333333000</text:p>
          </table:table-cell>
          <table:table-cell table:formula="of:=[.D2360]-[.D23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[.B2359]+8" office:value-type="float" office:value="18872" calcext:value-type="float">
            <text:p>18872</text:p>
          </table:table-cell>
          <table:table-cell office:value-type="float" office:value="8640000" calcext:value-type="float">
            <text:p>8640000</text:p>
          </table:table-cell>
          <table:table-cell table:formula="of:=[.B2360]/[.C2360]" office:value-type="float" office:value="0.00218425925925926" calcext:value-type="float">
            <text:p>0,00218425925925926000</text:p>
          </table:table-cell>
          <table:table-cell table:formula="of:=[.D2361]-[.D23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[.B2360]+8" office:value-type="float" office:value="18880" calcext:value-type="float">
            <text:p>18880</text:p>
          </table:table-cell>
          <table:table-cell office:value-type="float" office:value="8640000" calcext:value-type="float">
            <text:p>8640000</text:p>
          </table:table-cell>
          <table:table-cell table:formula="of:=[.B2361]/[.C2361]" office:value-type="float" office:value="0.00218518518518519" calcext:value-type="float">
            <text:p>0,00218518518518519000</text:p>
          </table:table-cell>
          <table:table-cell table:formula="of:=[.D2362]-[.D2361]" office:value-type="float" office:value="0.000000925925925926354" calcext:value-type="float">
            <text:p>0,00000092592592592635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[.B2361]+8" office:value-type="float" office:value="18888" calcext:value-type="float">
            <text:p>18888</text:p>
          </table:table-cell>
          <table:table-cell office:value-type="float" office:value="8640000" calcext:value-type="float">
            <text:p>8640000</text:p>
          </table:table-cell>
          <table:table-cell table:formula="of:=[.B2362]/[.C2362]" office:value-type="float" office:value="0.00218611111111111" calcext:value-type="float">
            <text:p>0,00218611111111111000</text:p>
          </table:table-cell>
          <table:table-cell table:formula="of:=[.D2363]-[.D23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formula="of:=[.B2362]+8" office:value-type="float" office:value="18896" calcext:value-type="float">
            <text:p>18896</text:p>
          </table:table-cell>
          <table:table-cell office:value-type="float" office:value="8640000" calcext:value-type="float">
            <text:p>8640000</text:p>
          </table:table-cell>
          <table:table-cell table:formula="of:=[.B2363]/[.C2363]" office:value-type="float" office:value="0.00218703703703704" calcext:value-type="float">
            <text:p>0,00218703703703704000</text:p>
          </table:table-cell>
          <table:table-cell table:formula="of:=[.D2364]-[.D23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table:formula="of:=[.B2363]+8" office:value-type="float" office:value="18904" calcext:value-type="float">
            <text:p>18904</text:p>
          </table:table-cell>
          <table:table-cell office:value-type="float" office:value="8640000" calcext:value-type="float">
            <text:p>8640000</text:p>
          </table:table-cell>
          <table:table-cell table:formula="of:=[.B2364]/[.C2364]" office:value-type="float" office:value="0.00218796296296296" calcext:value-type="float">
            <text:p>0,00218796296296296000</text:p>
          </table:table-cell>
          <table:table-cell table:formula="of:=[.D2365]-[.D23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formula="of:=[.B2364]+8" office:value-type="float" office:value="18912" calcext:value-type="float">
            <text:p>18912</text:p>
          </table:table-cell>
          <table:table-cell office:value-type="float" office:value="8640000" calcext:value-type="float">
            <text:p>8640000</text:p>
          </table:table-cell>
          <table:table-cell table:formula="of:=[.B2365]/[.C2365]" office:value-type="float" office:value="0.00218888888888889" calcext:value-type="float">
            <text:p>0,00218888888888889000</text:p>
          </table:table-cell>
          <table:table-cell table:formula="of:=[.D2366]-[.D23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table:formula="of:=[.B2365]+8" office:value-type="float" office:value="18920" calcext:value-type="float">
            <text:p>18920</text:p>
          </table:table-cell>
          <table:table-cell office:value-type="float" office:value="8640000" calcext:value-type="float">
            <text:p>8640000</text:p>
          </table:table-cell>
          <table:table-cell table:formula="of:=[.B2366]/[.C2366]" office:value-type="float" office:value="0.00218981481481482" calcext:value-type="float">
            <text:p>0,00218981481481482000</text:p>
          </table:table-cell>
          <table:table-cell table:formula="of:=[.D2367]-[.D23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formula="of:=[.B2366]+8" office:value-type="float" office:value="18928" calcext:value-type="float">
            <text:p>18928</text:p>
          </table:table-cell>
          <table:table-cell office:value-type="float" office:value="8640000" calcext:value-type="float">
            <text:p>8640000</text:p>
          </table:table-cell>
          <table:table-cell table:formula="of:=[.B2367]/[.C2367]" office:value-type="float" office:value="0.00219074074074074" calcext:value-type="float">
            <text:p>0,00219074074074074000</text:p>
          </table:table-cell>
          <table:table-cell table:formula="of:=[.D2368]-[.D23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table:formula="of:=[.B2367]+8" office:value-type="float" office:value="18936" calcext:value-type="float">
            <text:p>18936</text:p>
          </table:table-cell>
          <table:table-cell office:value-type="float" office:value="8640000" calcext:value-type="float">
            <text:p>8640000</text:p>
          </table:table-cell>
          <table:table-cell table:formula="of:=[.B2368]/[.C2368]" office:value-type="float" office:value="0.00219166666666667" calcext:value-type="float">
            <text:p>0,00219166666666667000</text:p>
          </table:table-cell>
          <table:table-cell table:formula="of:=[.D2369]-[.D23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table:formula="of:=[.B2368]+8" office:value-type="float" office:value="18944" calcext:value-type="float">
            <text:p>18944</text:p>
          </table:table-cell>
          <table:table-cell office:value-type="float" office:value="8640000" calcext:value-type="float">
            <text:p>8640000</text:p>
          </table:table-cell>
          <table:table-cell table:formula="of:=[.B2369]/[.C2369]" office:value-type="float" office:value="0.00219259259259259" calcext:value-type="float">
            <text:p>0,00219259259259259000</text:p>
          </table:table-cell>
          <table:table-cell table:formula="of:=[.D2370]-[.D23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formula="of:=[.B2369]+8" office:value-type="float" office:value="18952" calcext:value-type="float">
            <text:p>18952</text:p>
          </table:table-cell>
          <table:table-cell office:value-type="float" office:value="8640000" calcext:value-type="float">
            <text:p>8640000</text:p>
          </table:table-cell>
          <table:table-cell table:formula="of:=[.B2370]/[.C2370]" office:value-type="float" office:value="0.00219351851851852" calcext:value-type="float">
            <text:p>0,00219351851851852000</text:p>
          </table:table-cell>
          <table:table-cell table:formula="of:=[.D2371]-[.D23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[.B2370]+8" office:value-type="float" office:value="18960" calcext:value-type="float">
            <text:p>18960</text:p>
          </table:table-cell>
          <table:table-cell office:value-type="float" office:value="8640000" calcext:value-type="float">
            <text:p>8640000</text:p>
          </table:table-cell>
          <table:table-cell table:formula="of:=[.B2371]/[.C2371]" office:value-type="float" office:value="0.00219444444444444" calcext:value-type="float">
            <text:p>0,00219444444444444000</text:p>
          </table:table-cell>
          <table:table-cell table:formula="of:=[.D2372]-[.D23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[.B2371]+8" office:value-type="float" office:value="18968" calcext:value-type="float">
            <text:p>18968</text:p>
          </table:table-cell>
          <table:table-cell office:value-type="float" office:value="8640000" calcext:value-type="float">
            <text:p>8640000</text:p>
          </table:table-cell>
          <table:table-cell table:formula="of:=[.B2372]/[.C2372]" office:value-type="float" office:value="0.00219537037037037" calcext:value-type="float">
            <text:p>0,00219537037037037000</text:p>
          </table:table-cell>
          <table:table-cell table:formula="of:=[.D2373]-[.D23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[.B2372]+8" office:value-type="float" office:value="18976" calcext:value-type="float">
            <text:p>18976</text:p>
          </table:table-cell>
          <table:table-cell office:value-type="float" office:value="8640000" calcext:value-type="float">
            <text:p>8640000</text:p>
          </table:table-cell>
          <table:table-cell table:formula="of:=[.B2373]/[.C2373]" office:value-type="float" office:value="0.0021962962962963" calcext:value-type="float">
            <text:p>0,00219629629629630000</text:p>
          </table:table-cell>
          <table:table-cell table:formula="of:=[.D2374]-[.D23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[.B2373]+8" office:value-type="float" office:value="18984" calcext:value-type="float">
            <text:p>18984</text:p>
          </table:table-cell>
          <table:table-cell office:value-type="float" office:value="8640000" calcext:value-type="float">
            <text:p>8640000</text:p>
          </table:table-cell>
          <table:table-cell table:formula="of:=[.B2374]/[.C2374]" office:value-type="float" office:value="0.00219722222222222" calcext:value-type="float">
            <text:p>0,00219722222222222000</text:p>
          </table:table-cell>
          <table:table-cell table:formula="of:=[.D2375]-[.D23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table:formula="of:=[.B2374]+8" office:value-type="float" office:value="18992" calcext:value-type="float">
            <text:p>18992</text:p>
          </table:table-cell>
          <table:table-cell office:value-type="float" office:value="8640000" calcext:value-type="float">
            <text:p>8640000</text:p>
          </table:table-cell>
          <table:table-cell table:formula="of:=[.B2375]/[.C2375]" office:value-type="float" office:value="0.00219814814814815" calcext:value-type="float">
            <text:p>0,00219814814814815000</text:p>
          </table:table-cell>
          <table:table-cell table:formula="of:=[.D2376]-[.D23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table:formula="of:=[.B2375]+8" office:value-type="float" office:value="19000" calcext:value-type="float">
            <text:p>19000</text:p>
          </table:table-cell>
          <table:table-cell office:value-type="float" office:value="8640000" calcext:value-type="float">
            <text:p>8640000</text:p>
          </table:table-cell>
          <table:table-cell table:formula="of:=[.B2376]/[.C2376]" office:value-type="float" office:value="0.00219907407407407" calcext:value-type="float">
            <text:p>0,00219907407407407000</text:p>
          </table:table-cell>
          <table:table-cell table:formula="of:=[.D2377]-[.D23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formula="of:=[.B2376]+8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2377]/[.C2377]" office:value-type="float" office:value="0.0022" calcext:value-type="float">
            <text:p>0,00220000000000000000</text:p>
          </table:table-cell>
          <table:table-cell table:formula="of:=[.D2378]-[.D23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[.B2377]+8" office:value-type="float" office:value="19016" calcext:value-type="float">
            <text:p>19016</text:p>
          </table:table-cell>
          <table:table-cell office:value-type="float" office:value="8640000" calcext:value-type="float">
            <text:p>8640000</text:p>
          </table:table-cell>
          <table:table-cell table:formula="of:=[.B2378]/[.C2378]" office:value-type="float" office:value="0.00220092592592593" calcext:value-type="float">
            <text:p>0,00220092592592593000</text:p>
          </table:table-cell>
          <table:table-cell table:formula="of:=[.D2379]-[.D23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table:formula="of:=[.B2378]+8" office:value-type="float" office:value="19024" calcext:value-type="float">
            <text:p>19024</text:p>
          </table:table-cell>
          <table:table-cell office:value-type="float" office:value="8640000" calcext:value-type="float">
            <text:p>8640000</text:p>
          </table:table-cell>
          <table:table-cell table:formula="of:=[.B2379]/[.C2379]" office:value-type="float" office:value="0.00220185185185185" calcext:value-type="float">
            <text:p>0,00220185185185185000</text:p>
          </table:table-cell>
          <table:table-cell table:formula="of:=[.D2380]-[.D23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table:formula="of:=[.B2379]+8" office:value-type="float" office:value="19032" calcext:value-type="float">
            <text:p>19032</text:p>
          </table:table-cell>
          <table:table-cell office:value-type="float" office:value="8640000" calcext:value-type="float">
            <text:p>8640000</text:p>
          </table:table-cell>
          <table:table-cell table:formula="of:=[.B2380]/[.C2380]" office:value-type="float" office:value="0.00220277777777778" calcext:value-type="float">
            <text:p>0,00220277777777778000</text:p>
          </table:table-cell>
          <table:table-cell table:formula="of:=[.D2381]-[.D23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formula="of:=[.B2380]+8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2381]/[.C2381]" office:value-type="float" office:value="0.0022037037037037" calcext:value-type="float">
            <text:p>0,00220370370370370000</text:p>
          </table:table-cell>
          <table:table-cell table:formula="of:=[.D2382]-[.D23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table:formula="of:=[.B2381]+8" office:value-type="float" office:value="19048" calcext:value-type="float">
            <text:p>19048</text:p>
          </table:table-cell>
          <table:table-cell office:value-type="float" office:value="8640000" calcext:value-type="float">
            <text:p>8640000</text:p>
          </table:table-cell>
          <table:table-cell table:formula="of:=[.B2382]/[.C2382]" office:value-type="float" office:value="0.00220462962962963" calcext:value-type="float">
            <text:p>0,00220462962962963000</text:p>
          </table:table-cell>
          <table:table-cell table:formula="of:=[.D2383]-[.D23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table:formula="of:=[.B2382]+8" office:value-type="float" office:value="19056" calcext:value-type="float">
            <text:p>19056</text:p>
          </table:table-cell>
          <table:table-cell office:value-type="float" office:value="8640000" calcext:value-type="float">
            <text:p>8640000</text:p>
          </table:table-cell>
          <table:table-cell table:formula="of:=[.B2383]/[.C2383]" office:value-type="float" office:value="0.00220555555555556" calcext:value-type="float">
            <text:p>0,00220555555555556000</text:p>
          </table:table-cell>
          <table:table-cell table:formula="of:=[.D2384]-[.D23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table:formula="of:=[.B2383]+8" office:value-type="float" office:value="19064" calcext:value-type="float">
            <text:p>19064</text:p>
          </table:table-cell>
          <table:table-cell office:value-type="float" office:value="8640000" calcext:value-type="float">
            <text:p>8640000</text:p>
          </table:table-cell>
          <table:table-cell table:formula="of:=[.B2384]/[.C2384]" office:value-type="float" office:value="0.00220648148148148" calcext:value-type="float">
            <text:p>0,00220648148148148000</text:p>
          </table:table-cell>
          <table:table-cell table:formula="of:=[.D2385]-[.D23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[.B2384]+8" office:value-type="float" office:value="19072" calcext:value-type="float">
            <text:p>19072</text:p>
          </table:table-cell>
          <table:table-cell office:value-type="float" office:value="8640000" calcext:value-type="float">
            <text:p>8640000</text:p>
          </table:table-cell>
          <table:table-cell table:formula="of:=[.B2385]/[.C2385]" office:value-type="float" office:value="0.00220740740740741" calcext:value-type="float">
            <text:p>0,00220740740740741000</text:p>
          </table:table-cell>
          <table:table-cell table:formula="of:=[.D2386]-[.D23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formula="of:=[.B2385]+8" office:value-type="float" office:value="19080" calcext:value-type="float">
            <text:p>19080</text:p>
          </table:table-cell>
          <table:table-cell office:value-type="float" office:value="8640000" calcext:value-type="float">
            <text:p>8640000</text:p>
          </table:table-cell>
          <table:table-cell table:formula="of:=[.B2386]/[.C2386]" office:value-type="float" office:value="0.00220833333333333" calcext:value-type="float">
            <text:p>0,00220833333333333000</text:p>
          </table:table-cell>
          <table:table-cell table:formula="of:=[.D2387]-[.D23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[.B2386]+8" office:value-type="float" office:value="19088" calcext:value-type="float">
            <text:p>19088</text:p>
          </table:table-cell>
          <table:table-cell office:value-type="float" office:value="8640000" calcext:value-type="float">
            <text:p>8640000</text:p>
          </table:table-cell>
          <table:table-cell table:formula="of:=[.B2387]/[.C2387]" office:value-type="float" office:value="0.00220925925925926" calcext:value-type="float">
            <text:p>0,00220925925925926000</text:p>
          </table:table-cell>
          <table:table-cell table:formula="of:=[.D2388]-[.D23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[.B2387]+8" office:value-type="float" office:value="19096" calcext:value-type="float">
            <text:p>19096</text:p>
          </table:table-cell>
          <table:table-cell office:value-type="float" office:value="8640000" calcext:value-type="float">
            <text:p>8640000</text:p>
          </table:table-cell>
          <table:table-cell table:formula="of:=[.B2388]/[.C2388]" office:value-type="float" office:value="0.00221018518518519" calcext:value-type="float">
            <text:p>0,00221018518518519000</text:p>
          </table:table-cell>
          <table:table-cell table:formula="of:=[.D2389]-[.D23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formula="of:=[.B2388]+8" office:value-type="float" office:value="19104" calcext:value-type="float">
            <text:p>19104</text:p>
          </table:table-cell>
          <table:table-cell office:value-type="float" office:value="8640000" calcext:value-type="float">
            <text:p>8640000</text:p>
          </table:table-cell>
          <table:table-cell table:formula="of:=[.B2389]/[.C2389]" office:value-type="float" office:value="0.00221111111111111" calcext:value-type="float">
            <text:p>0,00221111111111111000</text:p>
          </table:table-cell>
          <table:table-cell table:formula="of:=[.D2390]-[.D23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[.B2389]+8" office:value-type="float" office:value="19112" calcext:value-type="float">
            <text:p>19112</text:p>
          </table:table-cell>
          <table:table-cell office:value-type="float" office:value="8640000" calcext:value-type="float">
            <text:p>8640000</text:p>
          </table:table-cell>
          <table:table-cell table:formula="of:=[.B2390]/[.C2390]" office:value-type="float" office:value="0.00221203703703704" calcext:value-type="float">
            <text:p>0,00221203703703704000</text:p>
          </table:table-cell>
          <table:table-cell table:formula="of:=[.D2391]-[.D23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[.B2390]+8" office:value-type="float" office:value="19120" calcext:value-type="float">
            <text:p>19120</text:p>
          </table:table-cell>
          <table:table-cell office:value-type="float" office:value="8640000" calcext:value-type="float">
            <text:p>8640000</text:p>
          </table:table-cell>
          <table:table-cell table:formula="of:=[.B2391]/[.C2391]" office:value-type="float" office:value="0.00221296296296296" calcext:value-type="float">
            <text:p>0,00221296296296296000</text:p>
          </table:table-cell>
          <table:table-cell table:formula="of:=[.D2392]-[.D23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table:formula="of:=[.B2391]+8" office:value-type="float" office:value="19128" calcext:value-type="float">
            <text:p>19128</text:p>
          </table:table-cell>
          <table:table-cell office:value-type="float" office:value="8640000" calcext:value-type="float">
            <text:p>8640000</text:p>
          </table:table-cell>
          <table:table-cell table:formula="of:=[.B2392]/[.C2392]" office:value-type="float" office:value="0.00221388888888889" calcext:value-type="float">
            <text:p>0,00221388888888889000</text:p>
          </table:table-cell>
          <table:table-cell table:formula="of:=[.D2393]-[.D23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[.B2392]+8" office:value-type="float" office:value="19136" calcext:value-type="float">
            <text:p>19136</text:p>
          </table:table-cell>
          <table:table-cell office:value-type="float" office:value="8640000" calcext:value-type="float">
            <text:p>8640000</text:p>
          </table:table-cell>
          <table:table-cell table:formula="of:=[.B2393]/[.C2393]" office:value-type="float" office:value="0.00221481481481482" calcext:value-type="float">
            <text:p>0,00221481481481482000</text:p>
          </table:table-cell>
          <table:table-cell table:formula="of:=[.D2394]-[.D23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[.B2393]+8" office:value-type="float" office:value="19144" calcext:value-type="float">
            <text:p>19144</text:p>
          </table:table-cell>
          <table:table-cell office:value-type="float" office:value="8640000" calcext:value-type="float">
            <text:p>8640000</text:p>
          </table:table-cell>
          <table:table-cell table:formula="of:=[.B2394]/[.C2394]" office:value-type="float" office:value="0.00221574074074074" calcext:value-type="float">
            <text:p>0,00221574074074074000</text:p>
          </table:table-cell>
          <table:table-cell table:formula="of:=[.D2395]-[.D23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[.B2394]+8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2395]/[.C2395]" office:value-type="float" office:value="0.00221666666666667" calcext:value-type="float">
            <text:p>0,00221666666666667000</text:p>
          </table:table-cell>
          <table:table-cell table:formula="of:=[.D2396]-[.D23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[.B2395]+8" office:value-type="float" office:value="19160" calcext:value-type="float">
            <text:p>19160</text:p>
          </table:table-cell>
          <table:table-cell office:value-type="float" office:value="8640000" calcext:value-type="float">
            <text:p>8640000</text:p>
          </table:table-cell>
          <table:table-cell table:formula="of:=[.B2396]/[.C2396]" office:value-type="float" office:value="0.00221759259259259" calcext:value-type="float">
            <text:p>0,00221759259259259000</text:p>
          </table:table-cell>
          <table:table-cell table:formula="of:=[.D2397]-[.D23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[.B2396]+8" office:value-type="float" office:value="19168" calcext:value-type="float">
            <text:p>19168</text:p>
          </table:table-cell>
          <table:table-cell office:value-type="float" office:value="8640000" calcext:value-type="float">
            <text:p>8640000</text:p>
          </table:table-cell>
          <table:table-cell table:formula="of:=[.B2397]/[.C2397]" office:value-type="float" office:value="0.00221851851851852" calcext:value-type="float">
            <text:p>0,00221851851851852000</text:p>
          </table:table-cell>
          <table:table-cell table:formula="of:=[.D2398]-[.D23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[.B2397]+8" office:value-type="float" office:value="19176" calcext:value-type="float">
            <text:p>19176</text:p>
          </table:table-cell>
          <table:table-cell office:value-type="float" office:value="8640000" calcext:value-type="float">
            <text:p>8640000</text:p>
          </table:table-cell>
          <table:table-cell table:formula="of:=[.B2398]/[.C2398]" office:value-type="float" office:value="0.00221944444444444" calcext:value-type="float">
            <text:p>0,00221944444444444000</text:p>
          </table:table-cell>
          <table:table-cell table:formula="of:=[.D2399]-[.D23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[.B2398]+8" office:value-type="float" office:value="19184" calcext:value-type="float">
            <text:p>19184</text:p>
          </table:table-cell>
          <table:table-cell office:value-type="float" office:value="8640000" calcext:value-type="float">
            <text:p>8640000</text:p>
          </table:table-cell>
          <table:table-cell table:formula="of:=[.B2399]/[.C2399]" office:value-type="float" office:value="0.00222037037037037" calcext:value-type="float">
            <text:p>0,00222037037037037000</text:p>
          </table:table-cell>
          <table:table-cell table:formula="of:=[.D2400]-[.D23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[.B2399]+8" office:value-type="float" office:value="19192" calcext:value-type="float">
            <text:p>19192</text:p>
          </table:table-cell>
          <table:table-cell office:value-type="float" office:value="8640000" calcext:value-type="float">
            <text:p>8640000</text:p>
          </table:table-cell>
          <table:table-cell table:formula="of:=[.B2400]/[.C2400]" office:value-type="float" office:value="0.0022212962962963" calcext:value-type="float">
            <text:p>0,00222129629629630000</text:p>
          </table:table-cell>
          <table:table-cell table:formula="of:=[.D2401]-[.D24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B2400]+8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2401]/[.C2401]" office:value-type="float" office:value="0.00222222222222222" calcext:value-type="float">
            <text:p>0,00222222222222222000</text:p>
          </table:table-cell>
          <table:table-cell table:formula="of:=[.D2402]-[.D24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[.B2401]+8" office:value-type="float" office:value="19208" calcext:value-type="float">
            <text:p>19208</text:p>
          </table:table-cell>
          <table:table-cell office:value-type="float" office:value="8640000" calcext:value-type="float">
            <text:p>8640000</text:p>
          </table:table-cell>
          <table:table-cell table:formula="of:=[.B2402]/[.C2402]" office:value-type="float" office:value="0.00222314814814815" calcext:value-type="float">
            <text:p>0,00222314814814815000</text:p>
          </table:table-cell>
          <table:table-cell table:formula="of:=[.D2403]-[.D24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table:formula="of:=[.B2402]+8" office:value-type="float" office:value="19216" calcext:value-type="float">
            <text:p>19216</text:p>
          </table:table-cell>
          <table:table-cell office:value-type="float" office:value="8640000" calcext:value-type="float">
            <text:p>8640000</text:p>
          </table:table-cell>
          <table:table-cell table:formula="of:=[.B2403]/[.C2403]" office:value-type="float" office:value="0.00222407407407407" calcext:value-type="float">
            <text:p>0,00222407407407407000</text:p>
          </table:table-cell>
          <table:table-cell table:formula="of:=[.D2404]-[.D24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[.B2403]+8" office:value-type="float" office:value="19224" calcext:value-type="float">
            <text:p>19224</text:p>
          </table:table-cell>
          <table:table-cell office:value-type="float" office:value="8640000" calcext:value-type="float">
            <text:p>8640000</text:p>
          </table:table-cell>
          <table:table-cell table:formula="of:=[.B2404]/[.C2404]" office:value-type="float" office:value="0.002225" calcext:value-type="float">
            <text:p>0,00222500000000000000</text:p>
          </table:table-cell>
          <table:table-cell table:formula="of:=[.D2405]-[.D24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table:formula="of:=[.B2404]+8" office:value-type="float" office:value="19232" calcext:value-type="float">
            <text:p>19232</text:p>
          </table:table-cell>
          <table:table-cell office:value-type="float" office:value="8640000" calcext:value-type="float">
            <text:p>8640000</text:p>
          </table:table-cell>
          <table:table-cell table:formula="of:=[.B2405]/[.C2405]" office:value-type="float" office:value="0.00222592592592593" calcext:value-type="float">
            <text:p>0,00222592592592593000</text:p>
          </table:table-cell>
          <table:table-cell table:formula="of:=[.D2406]-[.D24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[.B2405]+8" office:value-type="float" office:value="19240" calcext:value-type="float">
            <text:p>19240</text:p>
          </table:table-cell>
          <table:table-cell office:value-type="float" office:value="8640000" calcext:value-type="float">
            <text:p>8640000</text:p>
          </table:table-cell>
          <table:table-cell table:formula="of:=[.B2406]/[.C2406]" office:value-type="float" office:value="0.00222685185185185" calcext:value-type="float">
            <text:p>0,00222685185185185000</text:p>
          </table:table-cell>
          <table:table-cell table:formula="of:=[.D2407]-[.D24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[.B2406]+8" office:value-type="float" office:value="19248" calcext:value-type="float">
            <text:p>19248</text:p>
          </table:table-cell>
          <table:table-cell office:value-type="float" office:value="8640000" calcext:value-type="float">
            <text:p>8640000</text:p>
          </table:table-cell>
          <table:table-cell table:formula="of:=[.B2407]/[.C2407]" office:value-type="float" office:value="0.00222777777777778" calcext:value-type="float">
            <text:p>0,00222777777777778000</text:p>
          </table:table-cell>
          <table:table-cell table:formula="of:=[.D2408]-[.D24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[.B2407]+8" office:value-type="float" office:value="19256" calcext:value-type="float">
            <text:p>19256</text:p>
          </table:table-cell>
          <table:table-cell office:value-type="float" office:value="8640000" calcext:value-type="float">
            <text:p>8640000</text:p>
          </table:table-cell>
          <table:table-cell table:formula="of:=[.B2408]/[.C2408]" office:value-type="float" office:value="0.0022287037037037" calcext:value-type="float">
            <text:p>0,00222870370370370000</text:p>
          </table:table-cell>
          <table:table-cell table:formula="of:=[.D2409]-[.D24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[.B2408]+8" office:value-type="float" office:value="19264" calcext:value-type="float">
            <text:p>19264</text:p>
          </table:table-cell>
          <table:table-cell office:value-type="float" office:value="8640000" calcext:value-type="float">
            <text:p>8640000</text:p>
          </table:table-cell>
          <table:table-cell table:formula="of:=[.B2409]/[.C2409]" office:value-type="float" office:value="0.00222962962962963" calcext:value-type="float">
            <text:p>0,00222962962962963000</text:p>
          </table:table-cell>
          <table:table-cell table:formula="of:=[.D2410]-[.D24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table:formula="of:=[.B2409]+8" office:value-type="float" office:value="19272" calcext:value-type="float">
            <text:p>19272</text:p>
          </table:table-cell>
          <table:table-cell office:value-type="float" office:value="8640000" calcext:value-type="float">
            <text:p>8640000</text:p>
          </table:table-cell>
          <table:table-cell table:formula="of:=[.B2410]/[.C2410]" office:value-type="float" office:value="0.00223055555555556" calcext:value-type="float">
            <text:p>0,00223055555555556000</text:p>
          </table:table-cell>
          <table:table-cell table:formula="of:=[.D2411]-[.D24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[.B2410]+8" office:value-type="float" office:value="19280" calcext:value-type="float">
            <text:p>19280</text:p>
          </table:table-cell>
          <table:table-cell office:value-type="float" office:value="8640000" calcext:value-type="float">
            <text:p>8640000</text:p>
          </table:table-cell>
          <table:table-cell table:formula="of:=[.B2411]/[.C2411]" office:value-type="float" office:value="0.00223148148148148" calcext:value-type="float">
            <text:p>0,00223148148148148000</text:p>
          </table:table-cell>
          <table:table-cell table:formula="of:=[.D2412]-[.D24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formula="of:=[.B2411]+8" office:value-type="float" office:value="19288" calcext:value-type="float">
            <text:p>19288</text:p>
          </table:table-cell>
          <table:table-cell office:value-type="float" office:value="8640000" calcext:value-type="float">
            <text:p>8640000</text:p>
          </table:table-cell>
          <table:table-cell table:formula="of:=[.B2412]/[.C2412]" office:value-type="float" office:value="0.00223240740740741" calcext:value-type="float">
            <text:p>0,00223240740740741000</text:p>
          </table:table-cell>
          <table:table-cell table:formula="of:=[.D2413]-[.D24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[.B2412]+8" office:value-type="float" office:value="19296" calcext:value-type="float">
            <text:p>19296</text:p>
          </table:table-cell>
          <table:table-cell office:value-type="float" office:value="8640000" calcext:value-type="float">
            <text:p>8640000</text:p>
          </table:table-cell>
          <table:table-cell table:formula="of:=[.B2413]/[.C2413]" office:value-type="float" office:value="0.00223333333333333" calcext:value-type="float">
            <text:p>0,00223333333333333000</text:p>
          </table:table-cell>
          <table:table-cell table:formula="of:=[.D2414]-[.D24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table:formula="of:=[.B2413]+8" office:value-type="float" office:value="19304" calcext:value-type="float">
            <text:p>19304</text:p>
          </table:table-cell>
          <table:table-cell office:value-type="float" office:value="8640000" calcext:value-type="float">
            <text:p>8640000</text:p>
          </table:table-cell>
          <table:table-cell table:formula="of:=[.B2414]/[.C2414]" office:value-type="float" office:value="0.00223425925925926" calcext:value-type="float">
            <text:p>0,00223425925925926000</text:p>
          </table:table-cell>
          <table:table-cell table:formula="of:=[.D2415]-[.D24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[.B2414]+8" office:value-type="float" office:value="19312" calcext:value-type="float">
            <text:p>19312</text:p>
          </table:table-cell>
          <table:table-cell office:value-type="float" office:value="8640000" calcext:value-type="float">
            <text:p>8640000</text:p>
          </table:table-cell>
          <table:table-cell table:formula="of:=[.B2415]/[.C2415]" office:value-type="float" office:value="0.00223518518518519" calcext:value-type="float">
            <text:p>0,00223518518518519000</text:p>
          </table:table-cell>
          <table:table-cell table:formula="of:=[.D2416]-[.D24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[.B2415]+8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2416]/[.C2416]" office:value-type="float" office:value="0.00223611111111111" calcext:value-type="float">
            <text:p>0,00223611111111111000</text:p>
          </table:table-cell>
          <table:table-cell table:formula="of:=[.D2417]-[.D24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[.B2416]+8" office:value-type="float" office:value="19328" calcext:value-type="float">
            <text:p>19328</text:p>
          </table:table-cell>
          <table:table-cell office:value-type="float" office:value="8640000" calcext:value-type="float">
            <text:p>8640000</text:p>
          </table:table-cell>
          <table:table-cell table:formula="of:=[.B2417]/[.C2417]" office:value-type="float" office:value="0.00223703703703704" calcext:value-type="float">
            <text:p>0,00223703703703704000</text:p>
          </table:table-cell>
          <table:table-cell table:formula="of:=[.D2418]-[.D24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[.B2417]+8" office:value-type="float" office:value="19336" calcext:value-type="float">
            <text:p>19336</text:p>
          </table:table-cell>
          <table:table-cell office:value-type="float" office:value="8640000" calcext:value-type="float">
            <text:p>8640000</text:p>
          </table:table-cell>
          <table:table-cell table:formula="of:=[.B2418]/[.C2418]" office:value-type="float" office:value="0.00223796296296296" calcext:value-type="float">
            <text:p>0,00223796296296296000</text:p>
          </table:table-cell>
          <table:table-cell table:formula="of:=[.D2419]-[.D24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table:formula="of:=[.B2418]+8" office:value-type="float" office:value="19344" calcext:value-type="float">
            <text:p>19344</text:p>
          </table:table-cell>
          <table:table-cell office:value-type="float" office:value="8640000" calcext:value-type="float">
            <text:p>8640000</text:p>
          </table:table-cell>
          <table:table-cell table:formula="of:=[.B2419]/[.C2419]" office:value-type="float" office:value="0.00223888888888889" calcext:value-type="float">
            <text:p>0,00223888888888889000</text:p>
          </table:table-cell>
          <table:table-cell table:formula="of:=[.D2420]-[.D24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[.B2419]+8" office:value-type="float" office:value="19352" calcext:value-type="float">
            <text:p>19352</text:p>
          </table:table-cell>
          <table:table-cell office:value-type="float" office:value="8640000" calcext:value-type="float">
            <text:p>8640000</text:p>
          </table:table-cell>
          <table:table-cell table:formula="of:=[.B2420]/[.C2420]" office:value-type="float" office:value="0.00223981481481481" calcext:value-type="float">
            <text:p>0,00223981481481481000</text:p>
          </table:table-cell>
          <table:table-cell table:formula="of:=[.D2421]-[.D24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[.B2420]+8" office:value-type="float" office:value="19360" calcext:value-type="float">
            <text:p>19360</text:p>
          </table:table-cell>
          <table:table-cell office:value-type="float" office:value="8640000" calcext:value-type="float">
            <text:p>8640000</text:p>
          </table:table-cell>
          <table:table-cell table:formula="of:=[.B2421]/[.C2421]" office:value-type="float" office:value="0.00224074074074074" calcext:value-type="float">
            <text:p>0,00224074074074074000</text:p>
          </table:table-cell>
          <table:table-cell table:formula="of:=[.D2422]-[.D24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[.B2421]+8" office:value-type="float" office:value="19368" calcext:value-type="float">
            <text:p>19368</text:p>
          </table:table-cell>
          <table:table-cell office:value-type="float" office:value="8640000" calcext:value-type="float">
            <text:p>8640000</text:p>
          </table:table-cell>
          <table:table-cell table:formula="of:=[.B2422]/[.C2422]" office:value-type="float" office:value="0.00224166666666667" calcext:value-type="float">
            <text:p>0,00224166666666667000</text:p>
          </table:table-cell>
          <table:table-cell table:formula="of:=[.D2423]-[.D24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[.B2422]+8" office:value-type="float" office:value="19376" calcext:value-type="float">
            <text:p>19376</text:p>
          </table:table-cell>
          <table:table-cell office:value-type="float" office:value="8640000" calcext:value-type="float">
            <text:p>8640000</text:p>
          </table:table-cell>
          <table:table-cell table:formula="of:=[.B2423]/[.C2423]" office:value-type="float" office:value="0.00224259259259259" calcext:value-type="float">
            <text:p>0,00224259259259259000</text:p>
          </table:table-cell>
          <table:table-cell table:formula="of:=[.D2424]-[.D24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table:formula="of:=[.B2423]+8" office:value-type="float" office:value="19384" calcext:value-type="float">
            <text:p>19384</text:p>
          </table:table-cell>
          <table:table-cell office:value-type="float" office:value="8640000" calcext:value-type="float">
            <text:p>8640000</text:p>
          </table:table-cell>
          <table:table-cell table:formula="of:=[.B2424]/[.C2424]" office:value-type="float" office:value="0.00224351851851852" calcext:value-type="float">
            <text:p>0,00224351851851852000</text:p>
          </table:table-cell>
          <table:table-cell table:formula="of:=[.D2425]-[.D24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[.B2424]+8" office:value-type="float" office:value="19392" calcext:value-type="float">
            <text:p>19392</text:p>
          </table:table-cell>
          <table:table-cell office:value-type="float" office:value="8640000" calcext:value-type="float">
            <text:p>8640000</text:p>
          </table:table-cell>
          <table:table-cell table:formula="of:=[.B2425]/[.C2425]" office:value-type="float" office:value="0.00224444444444444" calcext:value-type="float">
            <text:p>0,00224444444444444000</text:p>
          </table:table-cell>
          <table:table-cell table:formula="of:=[.D2426]-[.D24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[.B2425]+8" office:value-type="float" office:value="19400" calcext:value-type="float">
            <text:p>19400</text:p>
          </table:table-cell>
          <table:table-cell office:value-type="float" office:value="8640000" calcext:value-type="float">
            <text:p>8640000</text:p>
          </table:table-cell>
          <table:table-cell table:formula="of:=[.B2426]/[.C2426]" office:value-type="float" office:value="0.00224537037037037" calcext:value-type="float">
            <text:p>0,00224537037037037000</text:p>
          </table:table-cell>
          <table:table-cell table:formula="of:=[.D2427]-[.D24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table:formula="of:=[.B2426]+8" office:value-type="float" office:value="19408" calcext:value-type="float">
            <text:p>19408</text:p>
          </table:table-cell>
          <table:table-cell office:value-type="float" office:value="8640000" calcext:value-type="float">
            <text:p>8640000</text:p>
          </table:table-cell>
          <table:table-cell table:formula="of:=[.B2427]/[.C2427]" office:value-type="float" office:value="0.0022462962962963" calcext:value-type="float">
            <text:p>0,00224629629629630000</text:p>
          </table:table-cell>
          <table:table-cell table:formula="of:=[.D2428]-[.D24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table:formula="of:=[.B2427]+8" office:value-type="float" office:value="19416" calcext:value-type="float">
            <text:p>19416</text:p>
          </table:table-cell>
          <table:table-cell office:value-type="float" office:value="8640000" calcext:value-type="float">
            <text:p>8640000</text:p>
          </table:table-cell>
          <table:table-cell table:formula="of:=[.B2428]/[.C2428]" office:value-type="float" office:value="0.00224722222222222" calcext:value-type="float">
            <text:p>0,00224722222222222000</text:p>
          </table:table-cell>
          <table:table-cell table:formula="of:=[.D2429]-[.D24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[.B2428]+8" office:value-type="float" office:value="19424" calcext:value-type="float">
            <text:p>19424</text:p>
          </table:table-cell>
          <table:table-cell office:value-type="float" office:value="8640000" calcext:value-type="float">
            <text:p>8640000</text:p>
          </table:table-cell>
          <table:table-cell table:formula="of:=[.B2429]/[.C2429]" office:value-type="float" office:value="0.00224814814814815" calcext:value-type="float">
            <text:p>0,00224814814814815000</text:p>
          </table:table-cell>
          <table:table-cell table:formula="of:=[.D2430]-[.D24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table:formula="of:=[.B2429]+8" office:value-type="float" office:value="19432" calcext:value-type="float">
            <text:p>19432</text:p>
          </table:table-cell>
          <table:table-cell office:value-type="float" office:value="8640000" calcext:value-type="float">
            <text:p>8640000</text:p>
          </table:table-cell>
          <table:table-cell table:formula="of:=[.B2430]/[.C2430]" office:value-type="float" office:value="0.00224907407407407" calcext:value-type="float">
            <text:p>0,00224907407407407000</text:p>
          </table:table-cell>
          <table:table-cell table:formula="of:=[.D2431]-[.D24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[.B2430]+8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2431]/[.C2431]" office:value-type="float" office:value="0.00225" calcext:value-type="float">
            <text:p>0,00225000000000000000</text:p>
          </table:table-cell>
          <table:table-cell table:formula="of:=[.D2432]-[.D24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table:formula="of:=[.B2431]+8" office:value-type="float" office:value="19448" calcext:value-type="float">
            <text:p>19448</text:p>
          </table:table-cell>
          <table:table-cell office:value-type="float" office:value="8640000" calcext:value-type="float">
            <text:p>8640000</text:p>
          </table:table-cell>
          <table:table-cell table:formula="of:=[.B2432]/[.C2432]" office:value-type="float" office:value="0.00225092592592593" calcext:value-type="float">
            <text:p>0,00225092592592593000</text:p>
          </table:table-cell>
          <table:table-cell table:formula="of:=[.D2433]-[.D24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[.B2432]+8" office:value-type="float" office:value="19456" calcext:value-type="float">
            <text:p>19456</text:p>
          </table:table-cell>
          <table:table-cell office:value-type="float" office:value="8640000" calcext:value-type="float">
            <text:p>8640000</text:p>
          </table:table-cell>
          <table:table-cell table:formula="of:=[.B2433]/[.C2433]" office:value-type="float" office:value="0.00225185185185185" calcext:value-type="float">
            <text:p>0,00225185185185185000</text:p>
          </table:table-cell>
          <table:table-cell table:formula="of:=[.D2434]-[.D24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table:formula="of:=[.B2433]+8" office:value-type="float" office:value="19464" calcext:value-type="float">
            <text:p>19464</text:p>
          </table:table-cell>
          <table:table-cell office:value-type="float" office:value="8640000" calcext:value-type="float">
            <text:p>8640000</text:p>
          </table:table-cell>
          <table:table-cell table:formula="of:=[.B2434]/[.C2434]" office:value-type="float" office:value="0.00225277777777778" calcext:value-type="float">
            <text:p>0,00225277777777778000</text:p>
          </table:table-cell>
          <table:table-cell table:formula="of:=[.D2435]-[.D24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table:formula="of:=[.B2434]+8" office:value-type="float" office:value="19472" calcext:value-type="float">
            <text:p>19472</text:p>
          </table:table-cell>
          <table:table-cell office:value-type="float" office:value="8640000" calcext:value-type="float">
            <text:p>8640000</text:p>
          </table:table-cell>
          <table:table-cell table:formula="of:=[.B2435]/[.C2435]" office:value-type="float" office:value="0.0022537037037037" calcext:value-type="float">
            <text:p>0,00225370370370370000</text:p>
          </table:table-cell>
          <table:table-cell table:formula="of:=[.D2436]-[.D24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table:formula="of:=[.B2435]+8" office:value-type="float" office:value="19480" calcext:value-type="float">
            <text:p>19480</text:p>
          </table:table-cell>
          <table:table-cell office:value-type="float" office:value="8640000" calcext:value-type="float">
            <text:p>8640000</text:p>
          </table:table-cell>
          <table:table-cell table:formula="of:=[.B2436]/[.C2436]" office:value-type="float" office:value="0.00225462962962963" calcext:value-type="float">
            <text:p>0,00225462962962963000</text:p>
          </table:table-cell>
          <table:table-cell table:formula="of:=[.D2437]-[.D24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table:formula="of:=[.B2436]+8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2437]/[.C2437]" office:value-type="float" office:value="0.00225555555555556" calcext:value-type="float">
            <text:p>0,00225555555555556000</text:p>
          </table:table-cell>
          <table:table-cell table:formula="of:=[.D2438]-[.D24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table:formula="of:=[.B2437]+8" office:value-type="float" office:value="19496" calcext:value-type="float">
            <text:p>19496</text:p>
          </table:table-cell>
          <table:table-cell office:value-type="float" office:value="8640000" calcext:value-type="float">
            <text:p>8640000</text:p>
          </table:table-cell>
          <table:table-cell table:formula="of:=[.B2438]/[.C2438]" office:value-type="float" office:value="0.00225648148148148" calcext:value-type="float">
            <text:p>0,00225648148148148000</text:p>
          </table:table-cell>
          <table:table-cell table:formula="of:=[.D2439]-[.D24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table:formula="of:=[.B2438]+8" office:value-type="float" office:value="19504" calcext:value-type="float">
            <text:p>19504</text:p>
          </table:table-cell>
          <table:table-cell office:value-type="float" office:value="8640000" calcext:value-type="float">
            <text:p>8640000</text:p>
          </table:table-cell>
          <table:table-cell table:formula="of:=[.B2439]/[.C2439]" office:value-type="float" office:value="0.00225740740740741" calcext:value-type="float">
            <text:p>0,00225740740740741000</text:p>
          </table:table-cell>
          <table:table-cell table:formula="of:=[.D2440]-[.D2439]" office:value-type="float" office:value="0.000000925925925926354" calcext:value-type="float">
            <text:p>0,00000092592592592635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table:formula="of:=[.B2439]+8" office:value-type="float" office:value="19512" calcext:value-type="float">
            <text:p>19512</text:p>
          </table:table-cell>
          <table:table-cell office:value-type="float" office:value="8640000" calcext:value-type="float">
            <text:p>8640000</text:p>
          </table:table-cell>
          <table:table-cell table:formula="of:=[.B2440]/[.C2440]" office:value-type="float" office:value="0.00225833333333333" calcext:value-type="float">
            <text:p>0,00225833333333333000</text:p>
          </table:table-cell>
          <table:table-cell table:formula="of:=[.D2441]-[.D24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table:formula="of:=[.B2440]+8" office:value-type="float" office:value="19520" calcext:value-type="float">
            <text:p>19520</text:p>
          </table:table-cell>
          <table:table-cell office:value-type="float" office:value="8640000" calcext:value-type="float">
            <text:p>8640000</text:p>
          </table:table-cell>
          <table:table-cell table:formula="of:=[.B2441]/[.C2441]" office:value-type="float" office:value="0.00225925925925926" calcext:value-type="float">
            <text:p>0,00225925925925926000</text:p>
          </table:table-cell>
          <table:table-cell table:formula="of:=[.D2442]-[.D24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[.B2441]+8" office:value-type="float" office:value="19528" calcext:value-type="float">
            <text:p>19528</text:p>
          </table:table-cell>
          <table:table-cell office:value-type="float" office:value="8640000" calcext:value-type="float">
            <text:p>8640000</text:p>
          </table:table-cell>
          <table:table-cell table:formula="of:=[.B2442]/[.C2442]" office:value-type="float" office:value="0.00226018518518519" calcext:value-type="float">
            <text:p>0,00226018518518519000</text:p>
          </table:table-cell>
          <table:table-cell table:formula="of:=[.D2443]-[.D24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table:formula="of:=[.B2442]+8" office:value-type="float" office:value="19536" calcext:value-type="float">
            <text:p>19536</text:p>
          </table:table-cell>
          <table:table-cell office:value-type="float" office:value="8640000" calcext:value-type="float">
            <text:p>8640000</text:p>
          </table:table-cell>
          <table:table-cell table:formula="of:=[.B2443]/[.C2443]" office:value-type="float" office:value="0.00226111111111111" calcext:value-type="float">
            <text:p>0,00226111111111111000</text:p>
          </table:table-cell>
          <table:table-cell table:formula="of:=[.D2444]-[.D24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[.B2443]+8" office:value-type="float" office:value="19544" calcext:value-type="float">
            <text:p>19544</text:p>
          </table:table-cell>
          <table:table-cell office:value-type="float" office:value="8640000" calcext:value-type="float">
            <text:p>8640000</text:p>
          </table:table-cell>
          <table:table-cell table:formula="of:=[.B2444]/[.C2444]" office:value-type="float" office:value="0.00226203703703704" calcext:value-type="float">
            <text:p>0,00226203703703704000</text:p>
          </table:table-cell>
          <table:table-cell table:formula="of:=[.D2445]-[.D24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[.B2444]+8" office:value-type="float" office:value="19552" calcext:value-type="float">
            <text:p>19552</text:p>
          </table:table-cell>
          <table:table-cell office:value-type="float" office:value="8640000" calcext:value-type="float">
            <text:p>8640000</text:p>
          </table:table-cell>
          <table:table-cell table:formula="of:=[.B2445]/[.C2445]" office:value-type="float" office:value="0.00226296296296296" calcext:value-type="float">
            <text:p>0,00226296296296296000</text:p>
          </table:table-cell>
          <table:table-cell table:formula="of:=[.D2446]-[.D24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table:formula="of:=[.B2445]+8" office:value-type="float" office:value="19560" calcext:value-type="float">
            <text:p>19560</text:p>
          </table:table-cell>
          <table:table-cell office:value-type="float" office:value="8640000" calcext:value-type="float">
            <text:p>8640000</text:p>
          </table:table-cell>
          <table:table-cell table:formula="of:=[.B2446]/[.C2446]" office:value-type="float" office:value="0.00226388888888889" calcext:value-type="float">
            <text:p>0,00226388888888889000</text:p>
          </table:table-cell>
          <table:table-cell table:formula="of:=[.D2447]-[.D24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[.B2446]+8" office:value-type="float" office:value="19568" calcext:value-type="float">
            <text:p>19568</text:p>
          </table:table-cell>
          <table:table-cell office:value-type="float" office:value="8640000" calcext:value-type="float">
            <text:p>8640000</text:p>
          </table:table-cell>
          <table:table-cell table:formula="of:=[.B2447]/[.C2447]" office:value-type="float" office:value="0.00226481481481482" calcext:value-type="float">
            <text:p>0,00226481481481482000</text:p>
          </table:table-cell>
          <table:table-cell table:formula="of:=[.D2448]-[.D24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table:formula="of:=[.B2447]+8" office:value-type="float" office:value="19576" calcext:value-type="float">
            <text:p>19576</text:p>
          </table:table-cell>
          <table:table-cell office:value-type="float" office:value="8640000" calcext:value-type="float">
            <text:p>8640000</text:p>
          </table:table-cell>
          <table:table-cell table:formula="of:=[.B2448]/[.C2448]" office:value-type="float" office:value="0.00226574074074074" calcext:value-type="float">
            <text:p>0,00226574074074074000</text:p>
          </table:table-cell>
          <table:table-cell table:formula="of:=[.D2449]-[.D24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table:formula="of:=[.B2448]+8" office:value-type="float" office:value="19584" calcext:value-type="float">
            <text:p>19584</text:p>
          </table:table-cell>
          <table:table-cell office:value-type="float" office:value="8640000" calcext:value-type="float">
            <text:p>8640000</text:p>
          </table:table-cell>
          <table:table-cell table:formula="of:=[.B2449]/[.C2449]" office:value-type="float" office:value="0.00226666666666667" calcext:value-type="float">
            <text:p>0,00226666666666667000</text:p>
          </table:table-cell>
          <table:table-cell table:formula="of:=[.D2450]-[.D24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table:formula="of:=[.B2449]+8" office:value-type="float" office:value="19592" calcext:value-type="float">
            <text:p>19592</text:p>
          </table:table-cell>
          <table:table-cell office:value-type="float" office:value="8640000" calcext:value-type="float">
            <text:p>8640000</text:p>
          </table:table-cell>
          <table:table-cell table:formula="of:=[.B2450]/[.C2450]" office:value-type="float" office:value="0.00226759259259259" calcext:value-type="float">
            <text:p>0,00226759259259259000</text:p>
          </table:table-cell>
          <table:table-cell table:formula="of:=[.D2451]-[.D24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[.B2450]+8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2451]/[.C2451]" office:value-type="float" office:value="0.00226851851851852" calcext:value-type="float">
            <text:p>0,00226851851851852000</text:p>
          </table:table-cell>
          <table:table-cell table:formula="of:=[.D2452]-[.D24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[.B2451]+8" office:value-type="float" office:value="19608" calcext:value-type="float">
            <text:p>19608</text:p>
          </table:table-cell>
          <table:table-cell office:value-type="float" office:value="8640000" calcext:value-type="float">
            <text:p>8640000</text:p>
          </table:table-cell>
          <table:table-cell table:formula="of:=[.B2452]/[.C2452]" office:value-type="float" office:value="0.00226944444444444" calcext:value-type="float">
            <text:p>0,00226944444444444000</text:p>
          </table:table-cell>
          <table:table-cell table:formula="of:=[.D2453]-[.D24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[.B2452]+8" office:value-type="float" office:value="19616" calcext:value-type="float">
            <text:p>19616</text:p>
          </table:table-cell>
          <table:table-cell office:value-type="float" office:value="8640000" calcext:value-type="float">
            <text:p>8640000</text:p>
          </table:table-cell>
          <table:table-cell table:formula="of:=[.B2453]/[.C2453]" office:value-type="float" office:value="0.00227037037037037" calcext:value-type="float">
            <text:p>0,00227037037037037000</text:p>
          </table:table-cell>
          <table:table-cell table:formula="of:=[.D2454]-[.D24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[.B2453]+8" office:value-type="float" office:value="19624" calcext:value-type="float">
            <text:p>19624</text:p>
          </table:table-cell>
          <table:table-cell office:value-type="float" office:value="8640000" calcext:value-type="float">
            <text:p>8640000</text:p>
          </table:table-cell>
          <table:table-cell table:formula="of:=[.B2454]/[.C2454]" office:value-type="float" office:value="0.0022712962962963" calcext:value-type="float">
            <text:p>0,00227129629629630000</text:p>
          </table:table-cell>
          <table:table-cell table:formula="of:=[.D2455]-[.D24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table:formula="of:=[.B2454]+8" office:value-type="float" office:value="19632" calcext:value-type="float">
            <text:p>19632</text:p>
          </table:table-cell>
          <table:table-cell office:value-type="float" office:value="8640000" calcext:value-type="float">
            <text:p>8640000</text:p>
          </table:table-cell>
          <table:table-cell table:formula="of:=[.B2455]/[.C2455]" office:value-type="float" office:value="0.00227222222222222" calcext:value-type="float">
            <text:p>0,00227222222222222000</text:p>
          </table:table-cell>
          <table:table-cell table:formula="of:=[.D2456]-[.D24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[.B2455]+8" office:value-type="float" office:value="19640" calcext:value-type="float">
            <text:p>19640</text:p>
          </table:table-cell>
          <table:table-cell office:value-type="float" office:value="8640000" calcext:value-type="float">
            <text:p>8640000</text:p>
          </table:table-cell>
          <table:table-cell table:formula="of:=[.B2456]/[.C2456]" office:value-type="float" office:value="0.00227314814814815" calcext:value-type="float">
            <text:p>0,00227314814814815000</text:p>
          </table:table-cell>
          <table:table-cell table:formula="of:=[.D2457]-[.D24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[.B2456]+8" office:value-type="float" office:value="19648" calcext:value-type="float">
            <text:p>19648</text:p>
          </table:table-cell>
          <table:table-cell office:value-type="float" office:value="8640000" calcext:value-type="float">
            <text:p>8640000</text:p>
          </table:table-cell>
          <table:table-cell table:formula="of:=[.B2457]/[.C2457]" office:value-type="float" office:value="0.00227407407407407" calcext:value-type="float">
            <text:p>0,00227407407407407000</text:p>
          </table:table-cell>
          <table:table-cell table:formula="of:=[.D2458]-[.D24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[.B2457]+8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2458]/[.C2458]" office:value-type="float" office:value="0.002275" calcext:value-type="float">
            <text:p>0,00227500000000000000</text:p>
          </table:table-cell>
          <table:table-cell table:formula="of:=[.D2459]-[.D24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[.B2458]+8" office:value-type="float" office:value="19664" calcext:value-type="float">
            <text:p>19664</text:p>
          </table:table-cell>
          <table:table-cell office:value-type="float" office:value="8640000" calcext:value-type="float">
            <text:p>8640000</text:p>
          </table:table-cell>
          <table:table-cell table:formula="of:=[.B2459]/[.C2459]" office:value-type="float" office:value="0.00227592592592593" calcext:value-type="float">
            <text:p>0,00227592592592593000</text:p>
          </table:table-cell>
          <table:table-cell table:formula="of:=[.D2460]-[.D24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table:formula="of:=[.B2459]+8" office:value-type="float" office:value="19672" calcext:value-type="float">
            <text:p>19672</text:p>
          </table:table-cell>
          <table:table-cell office:value-type="float" office:value="8640000" calcext:value-type="float">
            <text:p>8640000</text:p>
          </table:table-cell>
          <table:table-cell table:formula="of:=[.B2460]/[.C2460]" office:value-type="float" office:value="0.00227685185185185" calcext:value-type="float">
            <text:p>0,00227685185185185000</text:p>
          </table:table-cell>
          <table:table-cell table:formula="of:=[.D2461]-[.D24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[.B2460]+8" office:value-type="float" office:value="19680" calcext:value-type="float">
            <text:p>19680</text:p>
          </table:table-cell>
          <table:table-cell office:value-type="float" office:value="8640000" calcext:value-type="float">
            <text:p>8640000</text:p>
          </table:table-cell>
          <table:table-cell table:formula="of:=[.B2461]/[.C2461]" office:value-type="float" office:value="0.00227777777777778" calcext:value-type="float">
            <text:p>0,00227777777777778000</text:p>
          </table:table-cell>
          <table:table-cell table:formula="of:=[.D2462]-[.D24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table:formula="of:=[.B2461]+8" office:value-type="float" office:value="19688" calcext:value-type="float">
            <text:p>19688</text:p>
          </table:table-cell>
          <table:table-cell office:value-type="float" office:value="8640000" calcext:value-type="float">
            <text:p>8640000</text:p>
          </table:table-cell>
          <table:table-cell table:formula="of:=[.B2462]/[.C2462]" office:value-type="float" office:value="0.0022787037037037" calcext:value-type="float">
            <text:p>0,00227870370370370000</text:p>
          </table:table-cell>
          <table:table-cell table:formula="of:=[.D2463]-[.D24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table:formula="of:=[.B2462]+8" office:value-type="float" office:value="19696" calcext:value-type="float">
            <text:p>19696</text:p>
          </table:table-cell>
          <table:table-cell office:value-type="float" office:value="8640000" calcext:value-type="float">
            <text:p>8640000</text:p>
          </table:table-cell>
          <table:table-cell table:formula="of:=[.B2463]/[.C2463]" office:value-type="float" office:value="0.00227962962962963" calcext:value-type="float">
            <text:p>0,00227962962962963000</text:p>
          </table:table-cell>
          <table:table-cell table:formula="of:=[.D2464]-[.D24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table:formula="of:=[.B2463]+8" office:value-type="float" office:value="19704" calcext:value-type="float">
            <text:p>19704</text:p>
          </table:table-cell>
          <table:table-cell office:value-type="float" office:value="8640000" calcext:value-type="float">
            <text:p>8640000</text:p>
          </table:table-cell>
          <table:table-cell table:formula="of:=[.B2464]/[.C2464]" office:value-type="float" office:value="0.00228055555555556" calcext:value-type="float">
            <text:p>0,00228055555555556000</text:p>
          </table:table-cell>
          <table:table-cell table:formula="of:=[.D2465]-[.D24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table:formula="of:=[.B2464]+8" office:value-type="float" office:value="19712" calcext:value-type="float">
            <text:p>19712</text:p>
          </table:table-cell>
          <table:table-cell office:value-type="float" office:value="8640000" calcext:value-type="float">
            <text:p>8640000</text:p>
          </table:table-cell>
          <table:table-cell table:formula="of:=[.B2465]/[.C2465]" office:value-type="float" office:value="0.00228148148148148" calcext:value-type="float">
            <text:p>0,00228148148148148000</text:p>
          </table:table-cell>
          <table:table-cell table:formula="of:=[.D2466]-[.D24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table:formula="of:=[.B2465]+8" office:value-type="float" office:value="19720" calcext:value-type="float">
            <text:p>19720</text:p>
          </table:table-cell>
          <table:table-cell office:value-type="float" office:value="8640000" calcext:value-type="float">
            <text:p>8640000</text:p>
          </table:table-cell>
          <table:table-cell table:formula="of:=[.B2466]/[.C2466]" office:value-type="float" office:value="0.00228240740740741" calcext:value-type="float">
            <text:p>0,00228240740740741000</text:p>
          </table:table-cell>
          <table:table-cell table:formula="of:=[.D2467]-[.D24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[.B2466]+8" office:value-type="float" office:value="19728" calcext:value-type="float">
            <text:p>19728</text:p>
          </table:table-cell>
          <table:table-cell office:value-type="float" office:value="8640000" calcext:value-type="float">
            <text:p>8640000</text:p>
          </table:table-cell>
          <table:table-cell table:formula="of:=[.B2467]/[.C2467]" office:value-type="float" office:value="0.00228333333333333" calcext:value-type="float">
            <text:p>0,00228333333333333000</text:p>
          </table:table-cell>
          <table:table-cell table:formula="of:=[.D2468]-[.D24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[.B2467]+8" office:value-type="float" office:value="19736" calcext:value-type="float">
            <text:p>19736</text:p>
          </table:table-cell>
          <table:table-cell office:value-type="float" office:value="8640000" calcext:value-type="float">
            <text:p>8640000</text:p>
          </table:table-cell>
          <table:table-cell table:formula="of:=[.B2468]/[.C2468]" office:value-type="float" office:value="0.00228425925925926" calcext:value-type="float">
            <text:p>0,00228425925925926000</text:p>
          </table:table-cell>
          <table:table-cell table:formula="of:=[.D2469]-[.D24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table:formula="of:=[.B2468]+8" office:value-type="float" office:value="19744" calcext:value-type="float">
            <text:p>19744</text:p>
          </table:table-cell>
          <table:table-cell office:value-type="float" office:value="8640000" calcext:value-type="float">
            <text:p>8640000</text:p>
          </table:table-cell>
          <table:table-cell table:formula="of:=[.B2469]/[.C2469]" office:value-type="float" office:value="0.00228518518518519" calcext:value-type="float">
            <text:p>0,00228518518518519000</text:p>
          </table:table-cell>
          <table:table-cell table:formula="of:=[.D2470]-[.D24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[.B2469]+8" office:value-type="float" office:value="19752" calcext:value-type="float">
            <text:p>19752</text:p>
          </table:table-cell>
          <table:table-cell office:value-type="float" office:value="8640000" calcext:value-type="float">
            <text:p>8640000</text:p>
          </table:table-cell>
          <table:table-cell table:formula="of:=[.B2470]/[.C2470]" office:value-type="float" office:value="0.00228611111111111" calcext:value-type="float">
            <text:p>0,00228611111111111000</text:p>
          </table:table-cell>
          <table:table-cell table:formula="of:=[.D2471]-[.D24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[.B2470]+8" office:value-type="float" office:value="19760" calcext:value-type="float">
            <text:p>19760</text:p>
          </table:table-cell>
          <table:table-cell office:value-type="float" office:value="8640000" calcext:value-type="float">
            <text:p>8640000</text:p>
          </table:table-cell>
          <table:table-cell table:formula="of:=[.B2471]/[.C2471]" office:value-type="float" office:value="0.00228703703703704" calcext:value-type="float">
            <text:p>0,00228703703703704000</text:p>
          </table:table-cell>
          <table:table-cell table:formula="of:=[.D2472]-[.D24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[.B2471]+8" office:value-type="float" office:value="19768" calcext:value-type="float">
            <text:p>19768</text:p>
          </table:table-cell>
          <table:table-cell office:value-type="float" office:value="8640000" calcext:value-type="float">
            <text:p>8640000</text:p>
          </table:table-cell>
          <table:table-cell table:formula="of:=[.B2472]/[.C2472]" office:value-type="float" office:value="0.00228796296296296" calcext:value-type="float">
            <text:p>0,00228796296296296000</text:p>
          </table:table-cell>
          <table:table-cell table:formula="of:=[.D2473]-[.D24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[.B2472]+8" office:value-type="float" office:value="19776" calcext:value-type="float">
            <text:p>19776</text:p>
          </table:table-cell>
          <table:table-cell office:value-type="float" office:value="8640000" calcext:value-type="float">
            <text:p>8640000</text:p>
          </table:table-cell>
          <table:table-cell table:formula="of:=[.B2473]/[.C2473]" office:value-type="float" office:value="0.00228888888888889" calcext:value-type="float">
            <text:p>0,00228888888888889000</text:p>
          </table:table-cell>
          <table:table-cell table:formula="of:=[.D2474]-[.D24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table:formula="of:=[.B2473]+8" office:value-type="float" office:value="19784" calcext:value-type="float">
            <text:p>19784</text:p>
          </table:table-cell>
          <table:table-cell office:value-type="float" office:value="8640000" calcext:value-type="float">
            <text:p>8640000</text:p>
          </table:table-cell>
          <table:table-cell table:formula="of:=[.B2474]/[.C2474]" office:value-type="float" office:value="0.00228981481481482" calcext:value-type="float">
            <text:p>0,00228981481481482000</text:p>
          </table:table-cell>
          <table:table-cell table:formula="of:=[.D2475]-[.D24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table:formula="of:=[.B2474]+8" office:value-type="float" office:value="19792" calcext:value-type="float">
            <text:p>19792</text:p>
          </table:table-cell>
          <table:table-cell office:value-type="float" office:value="8640000" calcext:value-type="float">
            <text:p>8640000</text:p>
          </table:table-cell>
          <table:table-cell table:formula="of:=[.B2475]/[.C2475]" office:value-type="float" office:value="0.00229074074074074" calcext:value-type="float">
            <text:p>0,00229074074074074000</text:p>
          </table:table-cell>
          <table:table-cell table:formula="of:=[.D2476]-[.D24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table:formula="of:=[.B2475]+8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2476]/[.C2476]" office:value-type="float" office:value="0.00229166666666667" calcext:value-type="float">
            <text:p>0,00229166666666667000</text:p>
          </table:table-cell>
          <table:table-cell table:formula="of:=[.D2477]-[.D24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table:formula="of:=[.B2476]+8" office:value-type="float" office:value="19808" calcext:value-type="float">
            <text:p>19808</text:p>
          </table:table-cell>
          <table:table-cell office:value-type="float" office:value="8640000" calcext:value-type="float">
            <text:p>8640000</text:p>
          </table:table-cell>
          <table:table-cell table:formula="of:=[.B2477]/[.C2477]" office:value-type="float" office:value="0.00229259259259259" calcext:value-type="float">
            <text:p>0,00229259259259259000</text:p>
          </table:table-cell>
          <table:table-cell table:formula="of:=[.D2478]-[.D24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[.B2477]+8" office:value-type="float" office:value="19816" calcext:value-type="float">
            <text:p>19816</text:p>
          </table:table-cell>
          <table:table-cell office:value-type="float" office:value="8640000" calcext:value-type="float">
            <text:p>8640000</text:p>
          </table:table-cell>
          <table:table-cell table:formula="of:=[.B2478]/[.C2478]" office:value-type="float" office:value="0.00229351851851852" calcext:value-type="float">
            <text:p>0,00229351851851852000</text:p>
          </table:table-cell>
          <table:table-cell table:formula="of:=[.D2479]-[.D24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[.B2478]+8" office:value-type="float" office:value="19824" calcext:value-type="float">
            <text:p>19824</text:p>
          </table:table-cell>
          <table:table-cell office:value-type="float" office:value="8640000" calcext:value-type="float">
            <text:p>8640000</text:p>
          </table:table-cell>
          <table:table-cell table:formula="of:=[.B2479]/[.C2479]" office:value-type="float" office:value="0.00229444444444444" calcext:value-type="float">
            <text:p>0,00229444444444444000</text:p>
          </table:table-cell>
          <table:table-cell table:formula="of:=[.D2480]-[.D24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[.B2479]+8" office:value-type="float" office:value="19832" calcext:value-type="float">
            <text:p>19832</text:p>
          </table:table-cell>
          <table:table-cell office:value-type="float" office:value="8640000" calcext:value-type="float">
            <text:p>8640000</text:p>
          </table:table-cell>
          <table:table-cell table:formula="of:=[.B2480]/[.C2480]" office:value-type="float" office:value="0.00229537037037037" calcext:value-type="float">
            <text:p>0,00229537037037037000</text:p>
          </table:table-cell>
          <table:table-cell table:formula="of:=[.D2481]-[.D24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[.B2480]+8" office:value-type="float" office:value="19840" calcext:value-type="float">
            <text:p>19840</text:p>
          </table:table-cell>
          <table:table-cell office:value-type="float" office:value="8640000" calcext:value-type="float">
            <text:p>8640000</text:p>
          </table:table-cell>
          <table:table-cell table:formula="of:=[.B2481]/[.C2481]" office:value-type="float" office:value="0.0022962962962963" calcext:value-type="float">
            <text:p>0,00229629629629630000</text:p>
          </table:table-cell>
          <table:table-cell table:formula="of:=[.D2482]-[.D24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table:formula="of:=[.B2481]+8" office:value-type="float" office:value="19848" calcext:value-type="float">
            <text:p>19848</text:p>
          </table:table-cell>
          <table:table-cell office:value-type="float" office:value="8640000" calcext:value-type="float">
            <text:p>8640000</text:p>
          </table:table-cell>
          <table:table-cell table:formula="of:=[.B2482]/[.C2482]" office:value-type="float" office:value="0.00229722222222222" calcext:value-type="float">
            <text:p>0,00229722222222222000</text:p>
          </table:table-cell>
          <table:table-cell table:formula="of:=[.D2483]-[.D24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[.B2482]+8" office:value-type="float" office:value="19856" calcext:value-type="float">
            <text:p>19856</text:p>
          </table:table-cell>
          <table:table-cell office:value-type="float" office:value="8640000" calcext:value-type="float">
            <text:p>8640000</text:p>
          </table:table-cell>
          <table:table-cell table:formula="of:=[.B2483]/[.C2483]" office:value-type="float" office:value="0.00229814814814815" calcext:value-type="float">
            <text:p>0,00229814814814815000</text:p>
          </table:table-cell>
          <table:table-cell table:formula="of:=[.D2484]-[.D24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[.B2483]+8" office:value-type="float" office:value="19864" calcext:value-type="float">
            <text:p>19864</text:p>
          </table:table-cell>
          <table:table-cell office:value-type="float" office:value="8640000" calcext:value-type="float">
            <text:p>8640000</text:p>
          </table:table-cell>
          <table:table-cell table:formula="of:=[.B2484]/[.C2484]" office:value-type="float" office:value="0.00229907407407407" calcext:value-type="float">
            <text:p>0,00229907407407407000</text:p>
          </table:table-cell>
          <table:table-cell table:formula="of:=[.D2485]-[.D24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table:formula="of:=[.B2484]+8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2485]/[.C2485]" office:value-type="float" office:value="0.0023" calcext:value-type="float">
            <text:p>0,00230000000000000000</text:p>
          </table:table-cell>
          <table:table-cell table:formula="of:=[.D2486]-[.D24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table:formula="of:=[.B2485]+8" office:value-type="float" office:value="19880" calcext:value-type="float">
            <text:p>19880</text:p>
          </table:table-cell>
          <table:table-cell office:value-type="float" office:value="8640000" calcext:value-type="float">
            <text:p>8640000</text:p>
          </table:table-cell>
          <table:table-cell table:formula="of:=[.B2486]/[.C2486]" office:value-type="float" office:value="0.00230092592592593" calcext:value-type="float">
            <text:p>0,00230092592592593000</text:p>
          </table:table-cell>
          <table:table-cell table:formula="of:=[.D2487]-[.D24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[.B2486]+8" office:value-type="float" office:value="19888" calcext:value-type="float">
            <text:p>19888</text:p>
          </table:table-cell>
          <table:table-cell office:value-type="float" office:value="8640000" calcext:value-type="float">
            <text:p>8640000</text:p>
          </table:table-cell>
          <table:table-cell table:formula="of:=[.B2487]/[.C2487]" office:value-type="float" office:value="0.00230185185185185" calcext:value-type="float">
            <text:p>0,00230185185185185000</text:p>
          </table:table-cell>
          <table:table-cell table:formula="of:=[.D2488]-[.D24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table:formula="of:=[.B2487]+8" office:value-type="float" office:value="19896" calcext:value-type="float">
            <text:p>19896</text:p>
          </table:table-cell>
          <table:table-cell office:value-type="float" office:value="8640000" calcext:value-type="float">
            <text:p>8640000</text:p>
          </table:table-cell>
          <table:table-cell table:formula="of:=[.B2488]/[.C2488]" office:value-type="float" office:value="0.00230277777777778" calcext:value-type="float">
            <text:p>0,00230277777777778000</text:p>
          </table:table-cell>
          <table:table-cell table:formula="of:=[.D2489]-[.D24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[.B2488]+8" office:value-type="float" office:value="19904" calcext:value-type="float">
            <text:p>19904</text:p>
          </table:table-cell>
          <table:table-cell office:value-type="float" office:value="8640000" calcext:value-type="float">
            <text:p>8640000</text:p>
          </table:table-cell>
          <table:table-cell table:formula="of:=[.B2489]/[.C2489]" office:value-type="float" office:value="0.0023037037037037" calcext:value-type="float">
            <text:p>0,00230370370370370000</text:p>
          </table:table-cell>
          <table:table-cell table:formula="of:=[.D2490]-[.D24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table:formula="of:=[.B2489]+8" office:value-type="float" office:value="19912" calcext:value-type="float">
            <text:p>19912</text:p>
          </table:table-cell>
          <table:table-cell office:value-type="float" office:value="8640000" calcext:value-type="float">
            <text:p>8640000</text:p>
          </table:table-cell>
          <table:table-cell table:formula="of:=[.B2490]/[.C2490]" office:value-type="float" office:value="0.00230462962962963" calcext:value-type="float">
            <text:p>0,00230462962962963000</text:p>
          </table:table-cell>
          <table:table-cell table:formula="of:=[.D2491]-[.D24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[.B2490]+8" office:value-type="float" office:value="19920" calcext:value-type="float">
            <text:p>19920</text:p>
          </table:table-cell>
          <table:table-cell office:value-type="float" office:value="8640000" calcext:value-type="float">
            <text:p>8640000</text:p>
          </table:table-cell>
          <table:table-cell table:formula="of:=[.B2491]/[.C2491]" office:value-type="float" office:value="0.00230555555555556" calcext:value-type="float">
            <text:p>0,00230555555555556000</text:p>
          </table:table-cell>
          <table:table-cell table:formula="of:=[.D2492]-[.D24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[.B2491]+8" office:value-type="float" office:value="19928" calcext:value-type="float">
            <text:p>19928</text:p>
          </table:table-cell>
          <table:table-cell office:value-type="float" office:value="8640000" calcext:value-type="float">
            <text:p>8640000</text:p>
          </table:table-cell>
          <table:table-cell table:formula="of:=[.B2492]/[.C2492]" office:value-type="float" office:value="0.00230648148148148" calcext:value-type="float">
            <text:p>0,00230648148148148000</text:p>
          </table:table-cell>
          <table:table-cell table:formula="of:=[.D2493]-[.D24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[.B2492]+8" office:value-type="float" office:value="19936" calcext:value-type="float">
            <text:p>19936</text:p>
          </table:table-cell>
          <table:table-cell office:value-type="float" office:value="8640000" calcext:value-type="float">
            <text:p>8640000</text:p>
          </table:table-cell>
          <table:table-cell table:formula="of:=[.B2493]/[.C2493]" office:value-type="float" office:value="0.00230740740740741" calcext:value-type="float">
            <text:p>0,00230740740740741000</text:p>
          </table:table-cell>
          <table:table-cell table:formula="of:=[.D2494]-[.D24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table:formula="of:=[.B2493]+8" office:value-type="float" office:value="19944" calcext:value-type="float">
            <text:p>19944</text:p>
          </table:table-cell>
          <table:table-cell office:value-type="float" office:value="8640000" calcext:value-type="float">
            <text:p>8640000</text:p>
          </table:table-cell>
          <table:table-cell table:formula="of:=[.B2494]/[.C2494]" office:value-type="float" office:value="0.00230833333333333" calcext:value-type="float">
            <text:p>0,00230833333333333000</text:p>
          </table:table-cell>
          <table:table-cell table:formula="of:=[.D2495]-[.D24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[.B2494]+8" office:value-type="float" office:value="19952" calcext:value-type="float">
            <text:p>19952</text:p>
          </table:table-cell>
          <table:table-cell office:value-type="float" office:value="8640000" calcext:value-type="float">
            <text:p>8640000</text:p>
          </table:table-cell>
          <table:table-cell table:formula="of:=[.B2495]/[.C2495]" office:value-type="float" office:value="0.00230925925925926" calcext:value-type="float">
            <text:p>0,00230925925925926000</text:p>
          </table:table-cell>
          <table:table-cell table:formula="of:=[.D2496]-[.D24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[.B2495]+8" office:value-type="float" office:value="19960" calcext:value-type="float">
            <text:p>19960</text:p>
          </table:table-cell>
          <table:table-cell office:value-type="float" office:value="8640000" calcext:value-type="float">
            <text:p>8640000</text:p>
          </table:table-cell>
          <table:table-cell table:formula="of:=[.B2496]/[.C2496]" office:value-type="float" office:value="0.00231018518518519" calcext:value-type="float">
            <text:p>0,00231018518518519000</text:p>
          </table:table-cell>
          <table:table-cell table:formula="of:=[.D2497]-[.D24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[.B2496]+8" office:value-type="float" office:value="19968" calcext:value-type="float">
            <text:p>19968</text:p>
          </table:table-cell>
          <table:table-cell office:value-type="float" office:value="8640000" calcext:value-type="float">
            <text:p>8640000</text:p>
          </table:table-cell>
          <table:table-cell table:formula="of:=[.B2497]/[.C2497]" office:value-type="float" office:value="0.00231111111111111" calcext:value-type="float">
            <text:p>0,00231111111111111000</text:p>
          </table:table-cell>
          <table:table-cell table:formula="of:=[.D2498]-[.D24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table:formula="of:=[.B2497]+8" office:value-type="float" office:value="19976" calcext:value-type="float">
            <text:p>19976</text:p>
          </table:table-cell>
          <table:table-cell office:value-type="float" office:value="8640000" calcext:value-type="float">
            <text:p>8640000</text:p>
          </table:table-cell>
          <table:table-cell table:formula="of:=[.B2498]/[.C2498]" office:value-type="float" office:value="0.00231203703703704" calcext:value-type="float">
            <text:p>0,00231203703703704000</text:p>
          </table:table-cell>
          <table:table-cell table:formula="of:=[.D2499]-[.D24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[.B2498]+8" office:value-type="float" office:value="19984" calcext:value-type="float">
            <text:p>19984</text:p>
          </table:table-cell>
          <table:table-cell office:value-type="float" office:value="8640000" calcext:value-type="float">
            <text:p>8640000</text:p>
          </table:table-cell>
          <table:table-cell table:formula="of:=[.B2499]/[.C2499]" office:value-type="float" office:value="0.00231296296296296" calcext:value-type="float">
            <text:p>0,00231296296296296000</text:p>
          </table:table-cell>
          <table:table-cell table:formula="of:=[.D2500]-[.D24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table:formula="of:=[.B2499]+8" office:value-type="float" office:value="19992" calcext:value-type="float">
            <text:p>19992</text:p>
          </table:table-cell>
          <table:table-cell office:value-type="float" office:value="8640000" calcext:value-type="float">
            <text:p>8640000</text:p>
          </table:table-cell>
          <table:table-cell table:formula="of:=[.B2500]/[.C2500]" office:value-type="float" office:value="0.00231388888888889" calcext:value-type="float">
            <text:p>0,00231388888888889000</text:p>
          </table:table-cell>
          <table:table-cell table:formula="of:=[.D2501]-[.D25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B2500]+8" office:value-type="float" office:value="20000" calcext:value-type="float">
            <text:p>20000</text:p>
          </table:table-cell>
          <table:table-cell office:value-type="float" office:value="8640000" calcext:value-type="float">
            <text:p>8640000</text:p>
          </table:table-cell>
          <table:table-cell table:formula="of:=[.B2501]/[.C2501]" office:value-type="float" office:value="0.00231481481481481" calcext:value-type="float">
            <text:p>0,00231481481481481000</text:p>
          </table:table-cell>
          <table:table-cell table:formula="of:=[.D2502]-[.D25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table:formula="of:=[.B2501]+8" office:value-type="float" office:value="20008" calcext:value-type="float">
            <text:p>20008</text:p>
          </table:table-cell>
          <table:table-cell office:value-type="float" office:value="8640000" calcext:value-type="float">
            <text:p>8640000</text:p>
          </table:table-cell>
          <table:table-cell table:formula="of:=[.B2502]/[.C2502]" office:value-type="float" office:value="0.00231574074074074" calcext:value-type="float">
            <text:p>0,00231574074074074000</text:p>
          </table:table-cell>
          <table:table-cell table:formula="of:=[.D2503]-[.D25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table:formula="of:=[.B2502]+8" office:value-type="float" office:value="20016" calcext:value-type="float">
            <text:p>20016</text:p>
          </table:table-cell>
          <table:table-cell office:value-type="float" office:value="8640000" calcext:value-type="float">
            <text:p>8640000</text:p>
          </table:table-cell>
          <table:table-cell table:formula="of:=[.B2503]/[.C2503]" office:value-type="float" office:value="0.00231666666666667" calcext:value-type="float">
            <text:p>0,00231666666666667000</text:p>
          </table:table-cell>
          <table:table-cell table:formula="of:=[.D2504]-[.D25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table:formula="of:=[.B2503]+8" office:value-type="float" office:value="20024" calcext:value-type="float">
            <text:p>20024</text:p>
          </table:table-cell>
          <table:table-cell office:value-type="float" office:value="8640000" calcext:value-type="float">
            <text:p>8640000</text:p>
          </table:table-cell>
          <table:table-cell table:formula="of:=[.B2504]/[.C2504]" office:value-type="float" office:value="0.00231759259259259" calcext:value-type="float">
            <text:p>0,00231759259259259000</text:p>
          </table:table-cell>
          <table:table-cell table:formula="of:=[.D2505]-[.D25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table:formula="of:=[.B2504]+8" office:value-type="float" office:value="20032" calcext:value-type="float">
            <text:p>20032</text:p>
          </table:table-cell>
          <table:table-cell office:value-type="float" office:value="8640000" calcext:value-type="float">
            <text:p>8640000</text:p>
          </table:table-cell>
          <table:table-cell table:formula="of:=[.B2505]/[.C2505]" office:value-type="float" office:value="0.00231851851851852" calcext:value-type="float">
            <text:p>0,00231851851851852000</text:p>
          </table:table-cell>
          <table:table-cell table:formula="of:=[.D2506]-[.D25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table:formula="of:=[.B2505]+8" office:value-type="float" office:value="20040" calcext:value-type="float">
            <text:p>20040</text:p>
          </table:table-cell>
          <table:table-cell office:value-type="float" office:value="8640000" calcext:value-type="float">
            <text:p>8640000</text:p>
          </table:table-cell>
          <table:table-cell table:formula="of:=[.B2506]/[.C2506]" office:value-type="float" office:value="0.00231944444444444" calcext:value-type="float">
            <text:p>0,00231944444444444000</text:p>
          </table:table-cell>
          <table:table-cell table:formula="of:=[.D2507]-[.D25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table:formula="of:=[.B2506]+8" office:value-type="float" office:value="20048" calcext:value-type="float">
            <text:p>20048</text:p>
          </table:table-cell>
          <table:table-cell office:value-type="float" office:value="8640000" calcext:value-type="float">
            <text:p>8640000</text:p>
          </table:table-cell>
          <table:table-cell table:formula="of:=[.B2507]/[.C2507]" office:value-type="float" office:value="0.00232037037037037" calcext:value-type="float">
            <text:p>0,00232037037037037000</text:p>
          </table:table-cell>
          <table:table-cell table:formula="of:=[.D2508]-[.D25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[.B2507]+8" office:value-type="float" office:value="20056" calcext:value-type="float">
            <text:p>20056</text:p>
          </table:table-cell>
          <table:table-cell office:value-type="float" office:value="8640000" calcext:value-type="float">
            <text:p>8640000</text:p>
          </table:table-cell>
          <table:table-cell table:formula="of:=[.B2508]/[.C2508]" office:value-type="float" office:value="0.0023212962962963" calcext:value-type="float">
            <text:p>0,00232129629629630000</text:p>
          </table:table-cell>
          <table:table-cell table:formula="of:=[.D2509]-[.D25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table:formula="of:=[.B2508]+8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2509]/[.C2509]" office:value-type="float" office:value="0.00232222222222222" calcext:value-type="float">
            <text:p>0,00232222222222222000</text:p>
          </table:table-cell>
          <table:table-cell table:formula="of:=[.D2510]-[.D25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table:formula="of:=[.B2509]+8" office:value-type="float" office:value="20072" calcext:value-type="float">
            <text:p>20072</text:p>
          </table:table-cell>
          <table:table-cell office:value-type="float" office:value="8640000" calcext:value-type="float">
            <text:p>8640000</text:p>
          </table:table-cell>
          <table:table-cell table:formula="of:=[.B2510]/[.C2510]" office:value-type="float" office:value="0.00232314814814815" calcext:value-type="float">
            <text:p>0,00232314814814815000</text:p>
          </table:table-cell>
          <table:table-cell table:formula="of:=[.D2511]-[.D25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table:formula="of:=[.B2510]+8" office:value-type="float" office:value="20080" calcext:value-type="float">
            <text:p>20080</text:p>
          </table:table-cell>
          <table:table-cell office:value-type="float" office:value="8640000" calcext:value-type="float">
            <text:p>8640000</text:p>
          </table:table-cell>
          <table:table-cell table:formula="of:=[.B2511]/[.C2511]" office:value-type="float" office:value="0.00232407407407407" calcext:value-type="float">
            <text:p>0,00232407407407407000</text:p>
          </table:table-cell>
          <table:table-cell table:formula="of:=[.D2512]-[.D25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table:formula="of:=[.B2511]+8" office:value-type="float" office:value="20088" calcext:value-type="float">
            <text:p>20088</text:p>
          </table:table-cell>
          <table:table-cell office:value-type="float" office:value="8640000" calcext:value-type="float">
            <text:p>8640000</text:p>
          </table:table-cell>
          <table:table-cell table:formula="of:=[.B2512]/[.C2512]" office:value-type="float" office:value="0.002325" calcext:value-type="float">
            <text:p>0,00232500000000000000</text:p>
          </table:table-cell>
          <table:table-cell table:formula="of:=[.D2513]-[.D25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table:formula="of:=[.B2512]+8" office:value-type="float" office:value="20096" calcext:value-type="float">
            <text:p>20096</text:p>
          </table:table-cell>
          <table:table-cell office:value-type="float" office:value="8640000" calcext:value-type="float">
            <text:p>8640000</text:p>
          </table:table-cell>
          <table:table-cell table:formula="of:=[.B2513]/[.C2513]" office:value-type="float" office:value="0.00232592592592593" calcext:value-type="float">
            <text:p>0,00232592592592593000</text:p>
          </table:table-cell>
          <table:table-cell table:formula="of:=[.D2514]-[.D25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table:formula="of:=[.B2513]+8" office:value-type="float" office:value="20104" calcext:value-type="float">
            <text:p>20104</text:p>
          </table:table-cell>
          <table:table-cell office:value-type="float" office:value="8640000" calcext:value-type="float">
            <text:p>8640000</text:p>
          </table:table-cell>
          <table:table-cell table:formula="of:=[.B2514]/[.C2514]" office:value-type="float" office:value="0.00232685185185185" calcext:value-type="float">
            <text:p>0,00232685185185185000</text:p>
          </table:table-cell>
          <table:table-cell table:formula="of:=[.D2515]-[.D25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[.B2514]+8" office:value-type="float" office:value="20112" calcext:value-type="float">
            <text:p>20112</text:p>
          </table:table-cell>
          <table:table-cell office:value-type="float" office:value="8640000" calcext:value-type="float">
            <text:p>8640000</text:p>
          </table:table-cell>
          <table:table-cell table:formula="of:=[.B2515]/[.C2515]" office:value-type="float" office:value="0.00232777777777778" calcext:value-type="float">
            <text:p>0,00232777777777778000</text:p>
          </table:table-cell>
          <table:table-cell table:formula="of:=[.D2516]-[.D25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table:formula="of:=[.B2515]+8" office:value-type="float" office:value="20120" calcext:value-type="float">
            <text:p>20120</text:p>
          </table:table-cell>
          <table:table-cell office:value-type="float" office:value="8640000" calcext:value-type="float">
            <text:p>8640000</text:p>
          </table:table-cell>
          <table:table-cell table:formula="of:=[.B2516]/[.C2516]" office:value-type="float" office:value="0.0023287037037037" calcext:value-type="float">
            <text:p>0,00232870370370370000</text:p>
          </table:table-cell>
          <table:table-cell table:formula="of:=[.D2517]-[.D2516]" office:value-type="float" office:value="0.000000925925925926354" calcext:value-type="float">
            <text:p>0,00000092592592592635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table:formula="of:=[.B2516]+8" office:value-type="float" office:value="20128" calcext:value-type="float">
            <text:p>20128</text:p>
          </table:table-cell>
          <table:table-cell office:value-type="float" office:value="8640000" calcext:value-type="float">
            <text:p>8640000</text:p>
          </table:table-cell>
          <table:table-cell table:formula="of:=[.B2517]/[.C2517]" office:value-type="float" office:value="0.00232962962962963" calcext:value-type="float">
            <text:p>0,00232962962962963000</text:p>
          </table:table-cell>
          <table:table-cell table:formula="of:=[.D2518]-[.D25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table:formula="of:=[.B2517]+8" office:value-type="float" office:value="20136" calcext:value-type="float">
            <text:p>20136</text:p>
          </table:table-cell>
          <table:table-cell office:value-type="float" office:value="8640000" calcext:value-type="float">
            <text:p>8640000</text:p>
          </table:table-cell>
          <table:table-cell table:formula="of:=[.B2518]/[.C2518]" office:value-type="float" office:value="0.00233055555555556" calcext:value-type="float">
            <text:p>0,00233055555555556000</text:p>
          </table:table-cell>
          <table:table-cell table:formula="of:=[.D2519]-[.D25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table:formula="of:=[.B2518]+8" office:value-type="float" office:value="20144" calcext:value-type="float">
            <text:p>20144</text:p>
          </table:table-cell>
          <table:table-cell office:value-type="float" office:value="8640000" calcext:value-type="float">
            <text:p>8640000</text:p>
          </table:table-cell>
          <table:table-cell table:formula="of:=[.B2519]/[.C2519]" office:value-type="float" office:value="0.00233148148148148" calcext:value-type="float">
            <text:p>0,00233148148148148000</text:p>
          </table:table-cell>
          <table:table-cell table:formula="of:=[.D2520]-[.D25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table:formula="of:=[.B2519]+8" office:value-type="float" office:value="20152" calcext:value-type="float">
            <text:p>20152</text:p>
          </table:table-cell>
          <table:table-cell office:value-type="float" office:value="8640000" calcext:value-type="float">
            <text:p>8640000</text:p>
          </table:table-cell>
          <table:table-cell table:formula="of:=[.B2520]/[.C2520]" office:value-type="float" office:value="0.00233240740740741" calcext:value-type="float">
            <text:p>0,00233240740740741000</text:p>
          </table:table-cell>
          <table:table-cell table:formula="of:=[.D2521]-[.D25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table:formula="of:=[.B2520]+8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2521]/[.C2521]" office:value-type="float" office:value="0.00233333333333333" calcext:value-type="float">
            <text:p>0,00233333333333333000</text:p>
          </table:table-cell>
          <table:table-cell table:formula="of:=[.D2522]-[.D25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table:formula="of:=[.B2521]+8" office:value-type="float" office:value="20168" calcext:value-type="float">
            <text:p>20168</text:p>
          </table:table-cell>
          <table:table-cell office:value-type="float" office:value="8640000" calcext:value-type="float">
            <text:p>8640000</text:p>
          </table:table-cell>
          <table:table-cell table:formula="of:=[.B2522]/[.C2522]" office:value-type="float" office:value="0.00233425925925926" calcext:value-type="float">
            <text:p>0,00233425925925926000</text:p>
          </table:table-cell>
          <table:table-cell table:formula="of:=[.D2523]-[.D25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[.B2522]+8" office:value-type="float" office:value="20176" calcext:value-type="float">
            <text:p>20176</text:p>
          </table:table-cell>
          <table:table-cell office:value-type="float" office:value="8640000" calcext:value-type="float">
            <text:p>8640000</text:p>
          </table:table-cell>
          <table:table-cell table:formula="of:=[.B2523]/[.C2523]" office:value-type="float" office:value="0.00233518518518519" calcext:value-type="float">
            <text:p>0,00233518518518519000</text:p>
          </table:table-cell>
          <table:table-cell table:formula="of:=[.D2524]-[.D25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table:formula="of:=[.B2523]+8" office:value-type="float" office:value="20184" calcext:value-type="float">
            <text:p>20184</text:p>
          </table:table-cell>
          <table:table-cell office:value-type="float" office:value="8640000" calcext:value-type="float">
            <text:p>8640000</text:p>
          </table:table-cell>
          <table:table-cell table:formula="of:=[.B2524]/[.C2524]" office:value-type="float" office:value="0.00233611111111111" calcext:value-type="float">
            <text:p>0,00233611111111111000</text:p>
          </table:table-cell>
          <table:table-cell table:formula="of:=[.D2525]-[.D25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table:formula="of:=[.B2524]+8" office:value-type="float" office:value="20192" calcext:value-type="float">
            <text:p>20192</text:p>
          </table:table-cell>
          <table:table-cell office:value-type="float" office:value="8640000" calcext:value-type="float">
            <text:p>8640000</text:p>
          </table:table-cell>
          <table:table-cell table:formula="of:=[.B2525]/[.C2525]" office:value-type="float" office:value="0.00233703703703704" calcext:value-type="float">
            <text:p>0,00233703703703704000</text:p>
          </table:table-cell>
          <table:table-cell table:formula="of:=[.D2526]-[.D25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table:formula="of:=[.B2525]+8" office:value-type="float" office:value="20200" calcext:value-type="float">
            <text:p>20200</text:p>
          </table:table-cell>
          <table:table-cell office:value-type="float" office:value="8640000" calcext:value-type="float">
            <text:p>8640000</text:p>
          </table:table-cell>
          <table:table-cell table:formula="of:=[.B2526]/[.C2526]" office:value-type="float" office:value="0.00233796296296296" calcext:value-type="float">
            <text:p>0,00233796296296296000</text:p>
          </table:table-cell>
          <table:table-cell table:formula="of:=[.D2527]-[.D25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[.B2526]+8" office:value-type="float" office:value="20208" calcext:value-type="float">
            <text:p>20208</text:p>
          </table:table-cell>
          <table:table-cell office:value-type="float" office:value="8640000" calcext:value-type="float">
            <text:p>8640000</text:p>
          </table:table-cell>
          <table:table-cell table:formula="of:=[.B2527]/[.C2527]" office:value-type="float" office:value="0.00233888888888889" calcext:value-type="float">
            <text:p>0,00233888888888889000</text:p>
          </table:table-cell>
          <table:table-cell table:formula="of:=[.D2528]-[.D25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table:formula="of:=[.B2527]+8" office:value-type="float" office:value="20216" calcext:value-type="float">
            <text:p>20216</text:p>
          </table:table-cell>
          <table:table-cell office:value-type="float" office:value="8640000" calcext:value-type="float">
            <text:p>8640000</text:p>
          </table:table-cell>
          <table:table-cell table:formula="of:=[.B2528]/[.C2528]" office:value-type="float" office:value="0.00233981481481482" calcext:value-type="float">
            <text:p>0,00233981481481482000</text:p>
          </table:table-cell>
          <table:table-cell table:formula="of:=[.D2529]-[.D25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[.B2528]+8" office:value-type="float" office:value="20224" calcext:value-type="float">
            <text:p>20224</text:p>
          </table:table-cell>
          <table:table-cell office:value-type="float" office:value="8640000" calcext:value-type="float">
            <text:p>8640000</text:p>
          </table:table-cell>
          <table:table-cell table:formula="of:=[.B2529]/[.C2529]" office:value-type="float" office:value="0.00234074074074074" calcext:value-type="float">
            <text:p>0,00234074074074074000</text:p>
          </table:table-cell>
          <table:table-cell table:formula="of:=[.D2530]-[.D25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table:formula="of:=[.B2529]+8" office:value-type="float" office:value="20232" calcext:value-type="float">
            <text:p>20232</text:p>
          </table:table-cell>
          <table:table-cell office:value-type="float" office:value="8640000" calcext:value-type="float">
            <text:p>8640000</text:p>
          </table:table-cell>
          <table:table-cell table:formula="of:=[.B2530]/[.C2530]" office:value-type="float" office:value="0.00234166666666667" calcext:value-type="float">
            <text:p>0,00234166666666667000</text:p>
          </table:table-cell>
          <table:table-cell table:formula="of:=[.D2531]-[.D25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[.B2530]+8" office:value-type="float" office:value="20240" calcext:value-type="float">
            <text:p>20240</text:p>
          </table:table-cell>
          <table:table-cell office:value-type="float" office:value="8640000" calcext:value-type="float">
            <text:p>8640000</text:p>
          </table:table-cell>
          <table:table-cell table:formula="of:=[.B2531]/[.C2531]" office:value-type="float" office:value="0.00234259259259259" calcext:value-type="float">
            <text:p>0,00234259259259259000</text:p>
          </table:table-cell>
          <table:table-cell table:formula="of:=[.D2532]-[.D25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table:formula="of:=[.B2531]+8" office:value-type="float" office:value="20248" calcext:value-type="float">
            <text:p>20248</text:p>
          </table:table-cell>
          <table:table-cell office:value-type="float" office:value="8640000" calcext:value-type="float">
            <text:p>8640000</text:p>
          </table:table-cell>
          <table:table-cell table:formula="of:=[.B2532]/[.C2532]" office:value-type="float" office:value="0.00234351851851852" calcext:value-type="float">
            <text:p>0,00234351851851852000</text:p>
          </table:table-cell>
          <table:table-cell table:formula="of:=[.D2533]-[.D25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[.B2532]+8" office:value-type="float" office:value="20256" calcext:value-type="float">
            <text:p>20256</text:p>
          </table:table-cell>
          <table:table-cell office:value-type="float" office:value="8640000" calcext:value-type="float">
            <text:p>8640000</text:p>
          </table:table-cell>
          <table:table-cell table:formula="of:=[.B2533]/[.C2533]" office:value-type="float" office:value="0.00234444444444444" calcext:value-type="float">
            <text:p>0,00234444444444444000</text:p>
          </table:table-cell>
          <table:table-cell table:formula="of:=[.D2534]-[.D25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table:formula="of:=[.B2533]+8" office:value-type="float" office:value="20264" calcext:value-type="float">
            <text:p>20264</text:p>
          </table:table-cell>
          <table:table-cell office:value-type="float" office:value="8640000" calcext:value-type="float">
            <text:p>8640000</text:p>
          </table:table-cell>
          <table:table-cell table:formula="of:=[.B2534]/[.C2534]" office:value-type="float" office:value="0.00234537037037037" calcext:value-type="float">
            <text:p>0,00234537037037037000</text:p>
          </table:table-cell>
          <table:table-cell table:formula="of:=[.D2535]-[.D25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[.B2534]+8" office:value-type="float" office:value="20272" calcext:value-type="float">
            <text:p>20272</text:p>
          </table:table-cell>
          <table:table-cell office:value-type="float" office:value="8640000" calcext:value-type="float">
            <text:p>8640000</text:p>
          </table:table-cell>
          <table:table-cell table:formula="of:=[.B2535]/[.C2535]" office:value-type="float" office:value="0.0023462962962963" calcext:value-type="float">
            <text:p>0,00234629629629630000</text:p>
          </table:table-cell>
          <table:table-cell table:formula="of:=[.D2536]-[.D25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[.B2535]+8" office:value-type="float" office:value="20280" calcext:value-type="float">
            <text:p>20280</text:p>
          </table:table-cell>
          <table:table-cell office:value-type="float" office:value="8640000" calcext:value-type="float">
            <text:p>8640000</text:p>
          </table:table-cell>
          <table:table-cell table:formula="of:=[.B2536]/[.C2536]" office:value-type="float" office:value="0.00234722222222222" calcext:value-type="float">
            <text:p>0,00234722222222222000</text:p>
          </table:table-cell>
          <table:table-cell table:formula="of:=[.D2537]-[.D25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table:formula="of:=[.B2536]+8" office:value-type="float" office:value="20288" calcext:value-type="float">
            <text:p>20288</text:p>
          </table:table-cell>
          <table:table-cell office:value-type="float" office:value="8640000" calcext:value-type="float">
            <text:p>8640000</text:p>
          </table:table-cell>
          <table:table-cell table:formula="of:=[.B2537]/[.C2537]" office:value-type="float" office:value="0.00234814814814815" calcext:value-type="float">
            <text:p>0,00234814814814815000</text:p>
          </table:table-cell>
          <table:table-cell table:formula="of:=[.D2538]-[.D25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table:formula="of:=[.B2537]+8" office:value-type="float" office:value="20296" calcext:value-type="float">
            <text:p>20296</text:p>
          </table:table-cell>
          <table:table-cell office:value-type="float" office:value="8640000" calcext:value-type="float">
            <text:p>8640000</text:p>
          </table:table-cell>
          <table:table-cell table:formula="of:=[.B2538]/[.C2538]" office:value-type="float" office:value="0.00234907407407407" calcext:value-type="float">
            <text:p>0,00234907407407407000</text:p>
          </table:table-cell>
          <table:table-cell table:formula="of:=[.D2539]-[.D25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table:formula="of:=[.B2538]+8" office:value-type="float" office:value="20304" calcext:value-type="float">
            <text:p>20304</text:p>
          </table:table-cell>
          <table:table-cell office:value-type="float" office:value="8640000" calcext:value-type="float">
            <text:p>8640000</text:p>
          </table:table-cell>
          <table:table-cell table:formula="of:=[.B2539]/[.C2539]" office:value-type="float" office:value="0.00235" calcext:value-type="float">
            <text:p>0,00235000000000000000</text:p>
          </table:table-cell>
          <table:table-cell table:formula="of:=[.D2540]-[.D25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[.B2539]+8" office:value-type="float" office:value="20312" calcext:value-type="float">
            <text:p>20312</text:p>
          </table:table-cell>
          <table:table-cell office:value-type="float" office:value="8640000" calcext:value-type="float">
            <text:p>8640000</text:p>
          </table:table-cell>
          <table:table-cell table:formula="of:=[.B2540]/[.C2540]" office:value-type="float" office:value="0.00235092592592593" calcext:value-type="float">
            <text:p>0,00235092592592593000</text:p>
          </table:table-cell>
          <table:table-cell table:formula="of:=[.D2541]-[.D25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table:formula="of:=[.B2540]+8" office:value-type="float" office:value="20320" calcext:value-type="float">
            <text:p>20320</text:p>
          </table:table-cell>
          <table:table-cell office:value-type="float" office:value="8640000" calcext:value-type="float">
            <text:p>8640000</text:p>
          </table:table-cell>
          <table:table-cell table:formula="of:=[.B2541]/[.C2541]" office:value-type="float" office:value="0.00235185185185185" calcext:value-type="float">
            <text:p>0,00235185185185185000</text:p>
          </table:table-cell>
          <table:table-cell table:formula="of:=[.D2542]-[.D25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[.B2541]+8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2542]/[.C2542]" office:value-type="float" office:value="0.00235277777777778" calcext:value-type="float">
            <text:p>0,00235277777777778000</text:p>
          </table:table-cell>
          <table:table-cell table:formula="of:=[.D2543]-[.D25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[.B2542]+8" office:value-type="float" office:value="20336" calcext:value-type="float">
            <text:p>20336</text:p>
          </table:table-cell>
          <table:table-cell office:value-type="float" office:value="8640000" calcext:value-type="float">
            <text:p>8640000</text:p>
          </table:table-cell>
          <table:table-cell table:formula="of:=[.B2543]/[.C2543]" office:value-type="float" office:value="0.0023537037037037" calcext:value-type="float">
            <text:p>0,00235370370370370000</text:p>
          </table:table-cell>
          <table:table-cell table:formula="of:=[.D2544]-[.D25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table:formula="of:=[.B2543]+8" office:value-type="float" office:value="20344" calcext:value-type="float">
            <text:p>20344</text:p>
          </table:table-cell>
          <table:table-cell office:value-type="float" office:value="8640000" calcext:value-type="float">
            <text:p>8640000</text:p>
          </table:table-cell>
          <table:table-cell table:formula="of:=[.B2544]/[.C2544]" office:value-type="float" office:value="0.00235462962962963" calcext:value-type="float">
            <text:p>0,00235462962962963000</text:p>
          </table:table-cell>
          <table:table-cell table:formula="of:=[.D2545]-[.D25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[.B2544]+8" office:value-type="float" office:value="20352" calcext:value-type="float">
            <text:p>20352</text:p>
          </table:table-cell>
          <table:table-cell office:value-type="float" office:value="8640000" calcext:value-type="float">
            <text:p>8640000</text:p>
          </table:table-cell>
          <table:table-cell table:formula="of:=[.B2545]/[.C2545]" office:value-type="float" office:value="0.00235555555555556" calcext:value-type="float">
            <text:p>0,00235555555555556000</text:p>
          </table:table-cell>
          <table:table-cell table:formula="of:=[.D2546]-[.D25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table:formula="of:=[.B2545]+8" office:value-type="float" office:value="20360" calcext:value-type="float">
            <text:p>20360</text:p>
          </table:table-cell>
          <table:table-cell office:value-type="float" office:value="8640000" calcext:value-type="float">
            <text:p>8640000</text:p>
          </table:table-cell>
          <table:table-cell table:formula="of:=[.B2546]/[.C2546]" office:value-type="float" office:value="0.00235648148148148" calcext:value-type="float">
            <text:p>0,00235648148148148000</text:p>
          </table:table-cell>
          <table:table-cell table:formula="of:=[.D2547]-[.D25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table:formula="of:=[.B2546]+8" office:value-type="float" office:value="20368" calcext:value-type="float">
            <text:p>20368</text:p>
          </table:table-cell>
          <table:table-cell office:value-type="float" office:value="8640000" calcext:value-type="float">
            <text:p>8640000</text:p>
          </table:table-cell>
          <table:table-cell table:formula="of:=[.B2547]/[.C2547]" office:value-type="float" office:value="0.00235740740740741" calcext:value-type="float">
            <text:p>0,00235740740740741000</text:p>
          </table:table-cell>
          <table:table-cell table:formula="of:=[.D2548]-[.D25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[.B2547]+8" office:value-type="float" office:value="20376" calcext:value-type="float">
            <text:p>20376</text:p>
          </table:table-cell>
          <table:table-cell office:value-type="float" office:value="8640000" calcext:value-type="float">
            <text:p>8640000</text:p>
          </table:table-cell>
          <table:table-cell table:formula="of:=[.B2548]/[.C2548]" office:value-type="float" office:value="0.00235833333333333" calcext:value-type="float">
            <text:p>0,00235833333333333000</text:p>
          </table:table-cell>
          <table:table-cell table:formula="of:=[.D2549]-[.D25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table:formula="of:=[.B2548]+8" office:value-type="float" office:value="20384" calcext:value-type="float">
            <text:p>20384</text:p>
          </table:table-cell>
          <table:table-cell office:value-type="float" office:value="8640000" calcext:value-type="float">
            <text:p>8640000</text:p>
          </table:table-cell>
          <table:table-cell table:formula="of:=[.B2549]/[.C2549]" office:value-type="float" office:value="0.00235925925925926" calcext:value-type="float">
            <text:p>0,00235925925925926000</text:p>
          </table:table-cell>
          <table:table-cell table:formula="of:=[.D2550]-[.D25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table:formula="of:=[.B2549]+8" office:value-type="float" office:value="20392" calcext:value-type="float">
            <text:p>20392</text:p>
          </table:table-cell>
          <table:table-cell office:value-type="float" office:value="8640000" calcext:value-type="float">
            <text:p>8640000</text:p>
          </table:table-cell>
          <table:table-cell table:formula="of:=[.B2550]/[.C2550]" office:value-type="float" office:value="0.00236018518518519" calcext:value-type="float">
            <text:p>0,00236018518518519000</text:p>
          </table:table-cell>
          <table:table-cell table:formula="of:=[.D2551]-[.D25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[.B2550]+8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2551]/[.C2551]" office:value-type="float" office:value="0.00236111111111111" calcext:value-type="float">
            <text:p>0,00236111111111111000</text:p>
          </table:table-cell>
          <table:table-cell table:formula="of:=[.D2552]-[.D25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[.B2551]+8" office:value-type="float" office:value="20408" calcext:value-type="float">
            <text:p>20408</text:p>
          </table:table-cell>
          <table:table-cell office:value-type="float" office:value="8640000" calcext:value-type="float">
            <text:p>8640000</text:p>
          </table:table-cell>
          <table:table-cell table:formula="of:=[.B2552]/[.C2552]" office:value-type="float" office:value="0.00236203703703704" calcext:value-type="float">
            <text:p>0,00236203703703704000</text:p>
          </table:table-cell>
          <table:table-cell table:formula="of:=[.D2553]-[.D25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table:formula="of:=[.B2552]+8" office:value-type="float" office:value="20416" calcext:value-type="float">
            <text:p>20416</text:p>
          </table:table-cell>
          <table:table-cell office:value-type="float" office:value="8640000" calcext:value-type="float">
            <text:p>8640000</text:p>
          </table:table-cell>
          <table:table-cell table:formula="of:=[.B2553]/[.C2553]" office:value-type="float" office:value="0.00236296296296296" calcext:value-type="float">
            <text:p>0,00236296296296296000</text:p>
          </table:table-cell>
          <table:table-cell table:formula="of:=[.D2554]-[.D25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table:formula="of:=[.B2553]+8" office:value-type="float" office:value="20424" calcext:value-type="float">
            <text:p>20424</text:p>
          </table:table-cell>
          <table:table-cell office:value-type="float" office:value="8640000" calcext:value-type="float">
            <text:p>8640000</text:p>
          </table:table-cell>
          <table:table-cell table:formula="of:=[.B2554]/[.C2554]" office:value-type="float" office:value="0.00236388888888889" calcext:value-type="float">
            <text:p>0,00236388888888889000</text:p>
          </table:table-cell>
          <table:table-cell table:formula="of:=[.D2555]-[.D25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table:formula="of:=[.B2554]+8" office:value-type="float" office:value="20432" calcext:value-type="float">
            <text:p>20432</text:p>
          </table:table-cell>
          <table:table-cell office:value-type="float" office:value="8640000" calcext:value-type="float">
            <text:p>8640000</text:p>
          </table:table-cell>
          <table:table-cell table:formula="of:=[.B2555]/[.C2555]" office:value-type="float" office:value="0.00236481481481482" calcext:value-type="float">
            <text:p>0,00236481481481482000</text:p>
          </table:table-cell>
          <table:table-cell table:formula="of:=[.D2556]-[.D25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[.B2555]+8" office:value-type="float" office:value="20440" calcext:value-type="float">
            <text:p>20440</text:p>
          </table:table-cell>
          <table:table-cell office:value-type="float" office:value="8640000" calcext:value-type="float">
            <text:p>8640000</text:p>
          </table:table-cell>
          <table:table-cell table:formula="of:=[.B2556]/[.C2556]" office:value-type="float" office:value="0.00236574074074074" calcext:value-type="float">
            <text:p>0,00236574074074074000</text:p>
          </table:table-cell>
          <table:table-cell table:formula="of:=[.D2557]-[.D25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table:formula="of:=[.B2556]+8" office:value-type="float" office:value="20448" calcext:value-type="float">
            <text:p>20448</text:p>
          </table:table-cell>
          <table:table-cell office:value-type="float" office:value="8640000" calcext:value-type="float">
            <text:p>8640000</text:p>
          </table:table-cell>
          <table:table-cell table:formula="of:=[.B2557]/[.C2557]" office:value-type="float" office:value="0.00236666666666667" calcext:value-type="float">
            <text:p>0,00236666666666667000</text:p>
          </table:table-cell>
          <table:table-cell table:formula="of:=[.D2558]-[.D25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[.B2557]+8" office:value-type="float" office:value="20456" calcext:value-type="float">
            <text:p>20456</text:p>
          </table:table-cell>
          <table:table-cell office:value-type="float" office:value="8640000" calcext:value-type="float">
            <text:p>8640000</text:p>
          </table:table-cell>
          <table:table-cell table:formula="of:=[.B2558]/[.C2558]" office:value-type="float" office:value="0.00236759259259259" calcext:value-type="float">
            <text:p>0,00236759259259259000</text:p>
          </table:table-cell>
          <table:table-cell table:formula="of:=[.D2559]-[.D25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[.B2558]+8" office:value-type="float" office:value="20464" calcext:value-type="float">
            <text:p>20464</text:p>
          </table:table-cell>
          <table:table-cell office:value-type="float" office:value="8640000" calcext:value-type="float">
            <text:p>8640000</text:p>
          </table:table-cell>
          <table:table-cell table:formula="of:=[.B2559]/[.C2559]" office:value-type="float" office:value="0.00236851851851852" calcext:value-type="float">
            <text:p>0,00236851851851852000</text:p>
          </table:table-cell>
          <table:table-cell table:formula="of:=[.D2560]-[.D25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[.B2559]+8" office:value-type="float" office:value="20472" calcext:value-type="float">
            <text:p>20472</text:p>
          </table:table-cell>
          <table:table-cell office:value-type="float" office:value="8640000" calcext:value-type="float">
            <text:p>8640000</text:p>
          </table:table-cell>
          <table:table-cell table:formula="of:=[.B2560]/[.C2560]" office:value-type="float" office:value="0.00236944444444444" calcext:value-type="float">
            <text:p>0,00236944444444444000</text:p>
          </table:table-cell>
          <table:table-cell table:formula="of:=[.D2561]-[.D25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[.B2560]+8" office:value-type="float" office:value="20480" calcext:value-type="float">
            <text:p>20480</text:p>
          </table:table-cell>
          <table:table-cell office:value-type="float" office:value="8640000" calcext:value-type="float">
            <text:p>8640000</text:p>
          </table:table-cell>
          <table:table-cell table:formula="of:=[.B2561]/[.C2561]" office:value-type="float" office:value="0.00237037037037037" calcext:value-type="float">
            <text:p>0,00237037037037037000</text:p>
          </table:table-cell>
          <table:table-cell table:formula="of:=[.D2562]-[.D25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[.B2561]+8" office:value-type="float" office:value="20488" calcext:value-type="float">
            <text:p>20488</text:p>
          </table:table-cell>
          <table:table-cell office:value-type="float" office:value="8640000" calcext:value-type="float">
            <text:p>8640000</text:p>
          </table:table-cell>
          <table:table-cell table:formula="of:=[.B2562]/[.C2562]" office:value-type="float" office:value="0.0023712962962963" calcext:value-type="float">
            <text:p>0,00237129629629630000</text:p>
          </table:table-cell>
          <table:table-cell table:formula="of:=[.D2563]-[.D25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[.B2562]+8" office:value-type="float" office:value="20496" calcext:value-type="float">
            <text:p>20496</text:p>
          </table:table-cell>
          <table:table-cell office:value-type="float" office:value="8640000" calcext:value-type="float">
            <text:p>8640000</text:p>
          </table:table-cell>
          <table:table-cell table:formula="of:=[.B2563]/[.C2563]" office:value-type="float" office:value="0.00237222222222222" calcext:value-type="float">
            <text:p>0,00237222222222222000</text:p>
          </table:table-cell>
          <table:table-cell table:formula="of:=[.D2564]-[.D25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table:formula="of:=[.B2563]+8" office:value-type="float" office:value="20504" calcext:value-type="float">
            <text:p>20504</text:p>
          </table:table-cell>
          <table:table-cell office:value-type="float" office:value="8640000" calcext:value-type="float">
            <text:p>8640000</text:p>
          </table:table-cell>
          <table:table-cell table:formula="of:=[.B2564]/[.C2564]" office:value-type="float" office:value="0.00237314814814815" calcext:value-type="float">
            <text:p>0,00237314814814815000</text:p>
          </table:table-cell>
          <table:table-cell table:formula="of:=[.D2565]-[.D25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table:formula="of:=[.B2564]+8" office:value-type="float" office:value="20512" calcext:value-type="float">
            <text:p>20512</text:p>
          </table:table-cell>
          <table:table-cell office:value-type="float" office:value="8640000" calcext:value-type="float">
            <text:p>8640000</text:p>
          </table:table-cell>
          <table:table-cell table:formula="of:=[.B2565]/[.C2565]" office:value-type="float" office:value="0.00237407407407407" calcext:value-type="float">
            <text:p>0,00237407407407407000</text:p>
          </table:table-cell>
          <table:table-cell table:formula="of:=[.D2566]-[.D25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table:formula="of:=[.B2565]+8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2566]/[.C2566]" office:value-type="float" office:value="0.002375" calcext:value-type="float">
            <text:p>0,00237500000000000000</text:p>
          </table:table-cell>
          <table:table-cell table:formula="of:=[.D2567]-[.D25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[.B2566]+8" office:value-type="float" office:value="20528" calcext:value-type="float">
            <text:p>20528</text:p>
          </table:table-cell>
          <table:table-cell office:value-type="float" office:value="8640000" calcext:value-type="float">
            <text:p>8640000</text:p>
          </table:table-cell>
          <table:table-cell table:formula="of:=[.B2567]/[.C2567]" office:value-type="float" office:value="0.00237592592592593" calcext:value-type="float">
            <text:p>0,00237592592592593000</text:p>
          </table:table-cell>
          <table:table-cell table:formula="of:=[.D2568]-[.D25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[.B2567]+8" office:value-type="float" office:value="20536" calcext:value-type="float">
            <text:p>20536</text:p>
          </table:table-cell>
          <table:table-cell office:value-type="float" office:value="8640000" calcext:value-type="float">
            <text:p>8640000</text:p>
          </table:table-cell>
          <table:table-cell table:formula="of:=[.B2568]/[.C2568]" office:value-type="float" office:value="0.00237685185185185" calcext:value-type="float">
            <text:p>0,00237685185185185000</text:p>
          </table:table-cell>
          <table:table-cell table:formula="of:=[.D2569]-[.D25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table:formula="of:=[.B2568]+8" office:value-type="float" office:value="20544" calcext:value-type="float">
            <text:p>20544</text:p>
          </table:table-cell>
          <table:table-cell office:value-type="float" office:value="8640000" calcext:value-type="float">
            <text:p>8640000</text:p>
          </table:table-cell>
          <table:table-cell table:formula="of:=[.B2569]/[.C2569]" office:value-type="float" office:value="0.00237777777777778" calcext:value-type="float">
            <text:p>0,00237777777777778000</text:p>
          </table:table-cell>
          <table:table-cell table:formula="of:=[.D2570]-[.D25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[.B2569]+8" office:value-type="float" office:value="20552" calcext:value-type="float">
            <text:p>20552</text:p>
          </table:table-cell>
          <table:table-cell office:value-type="float" office:value="8640000" calcext:value-type="float">
            <text:p>8640000</text:p>
          </table:table-cell>
          <table:table-cell table:formula="of:=[.B2570]/[.C2570]" office:value-type="float" office:value="0.0023787037037037" calcext:value-type="float">
            <text:p>0,00237870370370370000</text:p>
          </table:table-cell>
          <table:table-cell table:formula="of:=[.D2571]-[.D25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[.B2570]+8" office:value-type="float" office:value="20560" calcext:value-type="float">
            <text:p>20560</text:p>
          </table:table-cell>
          <table:table-cell office:value-type="float" office:value="8640000" calcext:value-type="float">
            <text:p>8640000</text:p>
          </table:table-cell>
          <table:table-cell table:formula="of:=[.B2571]/[.C2571]" office:value-type="float" office:value="0.00237962962962963" calcext:value-type="float">
            <text:p>0,00237962962962963000</text:p>
          </table:table-cell>
          <table:table-cell table:formula="of:=[.D2572]-[.D25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[.B2571]+8" office:value-type="float" office:value="20568" calcext:value-type="float">
            <text:p>20568</text:p>
          </table:table-cell>
          <table:table-cell office:value-type="float" office:value="8640000" calcext:value-type="float">
            <text:p>8640000</text:p>
          </table:table-cell>
          <table:table-cell table:formula="of:=[.B2572]/[.C2572]" office:value-type="float" office:value="0.00238055555555556" calcext:value-type="float">
            <text:p>0,00238055555555556000</text:p>
          </table:table-cell>
          <table:table-cell table:formula="of:=[.D2573]-[.D25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[.B2572]+8" office:value-type="float" office:value="20576" calcext:value-type="float">
            <text:p>20576</text:p>
          </table:table-cell>
          <table:table-cell office:value-type="float" office:value="8640000" calcext:value-type="float">
            <text:p>8640000</text:p>
          </table:table-cell>
          <table:table-cell table:formula="of:=[.B2573]/[.C2573]" office:value-type="float" office:value="0.00238148148148148" calcext:value-type="float">
            <text:p>0,00238148148148148000</text:p>
          </table:table-cell>
          <table:table-cell table:formula="of:=[.D2574]-[.D25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[.B2573]+8" office:value-type="float" office:value="20584" calcext:value-type="float">
            <text:p>20584</text:p>
          </table:table-cell>
          <table:table-cell office:value-type="float" office:value="8640000" calcext:value-type="float">
            <text:p>8640000</text:p>
          </table:table-cell>
          <table:table-cell table:formula="of:=[.B2574]/[.C2574]" office:value-type="float" office:value="0.00238240740740741" calcext:value-type="float">
            <text:p>0,00238240740740741000</text:p>
          </table:table-cell>
          <table:table-cell table:formula="of:=[.D2575]-[.D25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[.B2574]+8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2575]/[.C2575]" office:value-type="float" office:value="0.00238333333333333" calcext:value-type="float">
            <text:p>0,00238333333333333000</text:p>
          </table:table-cell>
          <table:table-cell table:formula="of:=[.D2576]-[.D25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[.B2575]+8" office:value-type="float" office:value="20600" calcext:value-type="float">
            <text:p>20600</text:p>
          </table:table-cell>
          <table:table-cell office:value-type="float" office:value="8640000" calcext:value-type="float">
            <text:p>8640000</text:p>
          </table:table-cell>
          <table:table-cell table:formula="of:=[.B2576]/[.C2576]" office:value-type="float" office:value="0.00238425925925926" calcext:value-type="float">
            <text:p>0,00238425925925926000</text:p>
          </table:table-cell>
          <table:table-cell table:formula="of:=[.D2577]-[.D25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table:formula="of:=[.B2576]+8" office:value-type="float" office:value="20608" calcext:value-type="float">
            <text:p>20608</text:p>
          </table:table-cell>
          <table:table-cell office:value-type="float" office:value="8640000" calcext:value-type="float">
            <text:p>8640000</text:p>
          </table:table-cell>
          <table:table-cell table:formula="of:=[.B2577]/[.C2577]" office:value-type="float" office:value="0.00238518518518519" calcext:value-type="float">
            <text:p>0,00238518518518519000</text:p>
          </table:table-cell>
          <table:table-cell table:formula="of:=[.D2578]-[.D25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[.B2577]+8" office:value-type="float" office:value="20616" calcext:value-type="float">
            <text:p>20616</text:p>
          </table:table-cell>
          <table:table-cell office:value-type="float" office:value="8640000" calcext:value-type="float">
            <text:p>8640000</text:p>
          </table:table-cell>
          <table:table-cell table:formula="of:=[.B2578]/[.C2578]" office:value-type="float" office:value="0.00238611111111111" calcext:value-type="float">
            <text:p>0,00238611111111111000</text:p>
          </table:table-cell>
          <table:table-cell table:formula="of:=[.D2579]-[.D25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table:formula="of:=[.B2578]+8" office:value-type="float" office:value="20624" calcext:value-type="float">
            <text:p>20624</text:p>
          </table:table-cell>
          <table:table-cell office:value-type="float" office:value="8640000" calcext:value-type="float">
            <text:p>8640000</text:p>
          </table:table-cell>
          <table:table-cell table:formula="of:=[.B2579]/[.C2579]" office:value-type="float" office:value="0.00238703703703704" calcext:value-type="float">
            <text:p>0,00238703703703704000</text:p>
          </table:table-cell>
          <table:table-cell table:formula="of:=[.D2580]-[.D25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table:formula="of:=[.B2579]+8" office:value-type="float" office:value="20632" calcext:value-type="float">
            <text:p>20632</text:p>
          </table:table-cell>
          <table:table-cell office:value-type="float" office:value="8640000" calcext:value-type="float">
            <text:p>8640000</text:p>
          </table:table-cell>
          <table:table-cell table:formula="of:=[.B2580]/[.C2580]" office:value-type="float" office:value="0.00238796296296296" calcext:value-type="float">
            <text:p>0,00238796296296296000</text:p>
          </table:table-cell>
          <table:table-cell table:formula="of:=[.D2581]-[.D25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table:formula="of:=[.B2580]+8" office:value-type="float" office:value="20640" calcext:value-type="float">
            <text:p>20640</text:p>
          </table:table-cell>
          <table:table-cell office:value-type="float" office:value="8640000" calcext:value-type="float">
            <text:p>8640000</text:p>
          </table:table-cell>
          <table:table-cell table:formula="of:=[.B2581]/[.C2581]" office:value-type="float" office:value="0.00238888888888889" calcext:value-type="float">
            <text:p>0,00238888888888889000</text:p>
          </table:table-cell>
          <table:table-cell table:formula="of:=[.D2582]-[.D25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table:formula="of:=[.B2581]+8" office:value-type="float" office:value="20648" calcext:value-type="float">
            <text:p>20648</text:p>
          </table:table-cell>
          <table:table-cell office:value-type="float" office:value="8640000" calcext:value-type="float">
            <text:p>8640000</text:p>
          </table:table-cell>
          <table:table-cell table:formula="of:=[.B2582]/[.C2582]" office:value-type="float" office:value="0.00238981481481481" calcext:value-type="float">
            <text:p>0,00238981481481481000</text:p>
          </table:table-cell>
          <table:table-cell table:formula="of:=[.D2583]-[.D25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formula="of:=[.B2582]+8" office:value-type="float" office:value="20656" calcext:value-type="float">
            <text:p>20656</text:p>
          </table:table-cell>
          <table:table-cell office:value-type="float" office:value="8640000" calcext:value-type="float">
            <text:p>8640000</text:p>
          </table:table-cell>
          <table:table-cell table:formula="of:=[.B2583]/[.C2583]" office:value-type="float" office:value="0.00239074074074074" calcext:value-type="float">
            <text:p>0,00239074074074074000</text:p>
          </table:table-cell>
          <table:table-cell table:formula="of:=[.D2584]-[.D25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[.B2583]+8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2584]/[.C2584]" office:value-type="float" office:value="0.00239166666666667" calcext:value-type="float">
            <text:p>0,00239166666666667000</text:p>
          </table:table-cell>
          <table:table-cell table:formula="of:=[.D2585]-[.D25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table:formula="of:=[.B2584]+8" office:value-type="float" office:value="20672" calcext:value-type="float">
            <text:p>20672</text:p>
          </table:table-cell>
          <table:table-cell office:value-type="float" office:value="8640000" calcext:value-type="float">
            <text:p>8640000</text:p>
          </table:table-cell>
          <table:table-cell table:formula="of:=[.B2585]/[.C2585]" office:value-type="float" office:value="0.00239259259259259" calcext:value-type="float">
            <text:p>0,00239259259259259000</text:p>
          </table:table-cell>
          <table:table-cell table:formula="of:=[.D2586]-[.D25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[.B2585]+8" office:value-type="float" office:value="20680" calcext:value-type="float">
            <text:p>20680</text:p>
          </table:table-cell>
          <table:table-cell office:value-type="float" office:value="8640000" calcext:value-type="float">
            <text:p>8640000</text:p>
          </table:table-cell>
          <table:table-cell table:formula="of:=[.B2586]/[.C2586]" office:value-type="float" office:value="0.00239351851851852" calcext:value-type="float">
            <text:p>0,00239351851851852000</text:p>
          </table:table-cell>
          <table:table-cell table:formula="of:=[.D2587]-[.D25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table:formula="of:=[.B2586]+8" office:value-type="float" office:value="20688" calcext:value-type="float">
            <text:p>20688</text:p>
          </table:table-cell>
          <table:table-cell office:value-type="float" office:value="8640000" calcext:value-type="float">
            <text:p>8640000</text:p>
          </table:table-cell>
          <table:table-cell table:formula="of:=[.B2587]/[.C2587]" office:value-type="float" office:value="0.00239444444444444" calcext:value-type="float">
            <text:p>0,00239444444444444000</text:p>
          </table:table-cell>
          <table:table-cell table:formula="of:=[.D2588]-[.D25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table:formula="of:=[.B2587]+8" office:value-type="float" office:value="20696" calcext:value-type="float">
            <text:p>20696</text:p>
          </table:table-cell>
          <table:table-cell office:value-type="float" office:value="8640000" calcext:value-type="float">
            <text:p>8640000</text:p>
          </table:table-cell>
          <table:table-cell table:formula="of:=[.B2588]/[.C2588]" office:value-type="float" office:value="0.00239537037037037" calcext:value-type="float">
            <text:p>0,00239537037037037000</text:p>
          </table:table-cell>
          <table:table-cell table:formula="of:=[.D2589]-[.D25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table:formula="of:=[.B2588]+8" office:value-type="float" office:value="20704" calcext:value-type="float">
            <text:p>20704</text:p>
          </table:table-cell>
          <table:table-cell office:value-type="float" office:value="8640000" calcext:value-type="float">
            <text:p>8640000</text:p>
          </table:table-cell>
          <table:table-cell table:formula="of:=[.B2589]/[.C2589]" office:value-type="float" office:value="0.0023962962962963" calcext:value-type="float">
            <text:p>0,00239629629629630000</text:p>
          </table:table-cell>
          <table:table-cell table:formula="of:=[.D2590]-[.D25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[.B2589]+8" office:value-type="float" office:value="20712" calcext:value-type="float">
            <text:p>20712</text:p>
          </table:table-cell>
          <table:table-cell office:value-type="float" office:value="8640000" calcext:value-type="float">
            <text:p>8640000</text:p>
          </table:table-cell>
          <table:table-cell table:formula="of:=[.B2590]/[.C2590]" office:value-type="float" office:value="0.00239722222222222" calcext:value-type="float">
            <text:p>0,00239722222222222000</text:p>
          </table:table-cell>
          <table:table-cell table:formula="of:=[.D2591]-[.D25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[.B2590]+8" office:value-type="float" office:value="20720" calcext:value-type="float">
            <text:p>20720</text:p>
          </table:table-cell>
          <table:table-cell office:value-type="float" office:value="8640000" calcext:value-type="float">
            <text:p>8640000</text:p>
          </table:table-cell>
          <table:table-cell table:formula="of:=[.B2591]/[.C2591]" office:value-type="float" office:value="0.00239814814814815" calcext:value-type="float">
            <text:p>0,00239814814814815000</text:p>
          </table:table-cell>
          <table:table-cell table:formula="of:=[.D2592]-[.D25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table:formula="of:=[.B2591]+8" office:value-type="float" office:value="20728" calcext:value-type="float">
            <text:p>20728</text:p>
          </table:table-cell>
          <table:table-cell office:value-type="float" office:value="8640000" calcext:value-type="float">
            <text:p>8640000</text:p>
          </table:table-cell>
          <table:table-cell table:formula="of:=[.B2592]/[.C2592]" office:value-type="float" office:value="0.00239907407407407" calcext:value-type="float">
            <text:p>0,00239907407407407000</text:p>
          </table:table-cell>
          <table:table-cell table:formula="of:=[.D2593]-[.D25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[.B2592]+8" office:value-type="float" office:value="20736" calcext:value-type="float">
            <text:p>20736</text:p>
          </table:table-cell>
          <table:table-cell office:value-type="float" office:value="8640000" calcext:value-type="float">
            <text:p>8640000</text:p>
          </table:table-cell>
          <table:table-cell table:formula="of:=[.B2593]/[.C2593]" office:value-type="float" office:value="0.0024" calcext:value-type="float">
            <text:p>0,00240000000000000000</text:p>
          </table:table-cell>
          <table:table-cell table:formula="of:=[.D2594]-[.D25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[.B2593]+8" office:value-type="float" office:value="20744" calcext:value-type="float">
            <text:p>20744</text:p>
          </table:table-cell>
          <table:table-cell office:value-type="float" office:value="8640000" calcext:value-type="float">
            <text:p>8640000</text:p>
          </table:table-cell>
          <table:table-cell table:formula="of:=[.B2594]/[.C2594]" office:value-type="float" office:value="0.00240092592592593" calcext:value-type="float">
            <text:p>0,00240092592592593000</text:p>
          </table:table-cell>
          <table:table-cell table:formula="of:=[.D2595]-[.D2594]" office:value-type="float" office:value="0.000000925925925926354" calcext:value-type="float">
            <text:p>0,00000092592592592635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table:formula="of:=[.B2594]+8" office:value-type="float" office:value="20752" calcext:value-type="float">
            <text:p>20752</text:p>
          </table:table-cell>
          <table:table-cell office:value-type="float" office:value="8640000" calcext:value-type="float">
            <text:p>8640000</text:p>
          </table:table-cell>
          <table:table-cell table:formula="of:=[.B2595]/[.C2595]" office:value-type="float" office:value="0.00240185185185185" calcext:value-type="float">
            <text:p>0,00240185185185185000</text:p>
          </table:table-cell>
          <table:table-cell table:formula="of:=[.D2596]-[.D25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table:formula="of:=[.B2595]+8" office:value-type="float" office:value="20760" calcext:value-type="float">
            <text:p>20760</text:p>
          </table:table-cell>
          <table:table-cell office:value-type="float" office:value="8640000" calcext:value-type="float">
            <text:p>8640000</text:p>
          </table:table-cell>
          <table:table-cell table:formula="of:=[.B2596]/[.C2596]" office:value-type="float" office:value="0.00240277777777778" calcext:value-type="float">
            <text:p>0,00240277777777778000</text:p>
          </table:table-cell>
          <table:table-cell table:formula="of:=[.D2597]-[.D25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[.B2596]+8" office:value-type="float" office:value="20768" calcext:value-type="float">
            <text:p>20768</text:p>
          </table:table-cell>
          <table:table-cell office:value-type="float" office:value="8640000" calcext:value-type="float">
            <text:p>8640000</text:p>
          </table:table-cell>
          <table:table-cell table:formula="of:=[.B2597]/[.C2597]" office:value-type="float" office:value="0.0024037037037037" calcext:value-type="float">
            <text:p>0,00240370370370370000</text:p>
          </table:table-cell>
          <table:table-cell table:formula="of:=[.D2598]-[.D25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table:formula="of:=[.B2597]+8" office:value-type="float" office:value="20776" calcext:value-type="float">
            <text:p>20776</text:p>
          </table:table-cell>
          <table:table-cell office:value-type="float" office:value="8640000" calcext:value-type="float">
            <text:p>8640000</text:p>
          </table:table-cell>
          <table:table-cell table:formula="of:=[.B2598]/[.C2598]" office:value-type="float" office:value="0.00240462962962963" calcext:value-type="float">
            <text:p>0,00240462962962963000</text:p>
          </table:table-cell>
          <table:table-cell table:formula="of:=[.D2599]-[.D25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table:formula="of:=[.B2598]+8" office:value-type="float" office:value="20784" calcext:value-type="float">
            <text:p>20784</text:p>
          </table:table-cell>
          <table:table-cell office:value-type="float" office:value="8640000" calcext:value-type="float">
            <text:p>8640000</text:p>
          </table:table-cell>
          <table:table-cell table:formula="of:=[.B2599]/[.C2599]" office:value-type="float" office:value="0.00240555555555556" calcext:value-type="float">
            <text:p>0,00240555555555556000</text:p>
          </table:table-cell>
          <table:table-cell table:formula="of:=[.D2600]-[.D25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table:formula="of:=[.B2599]+8" office:value-type="float" office:value="20792" calcext:value-type="float">
            <text:p>20792</text:p>
          </table:table-cell>
          <table:table-cell office:value-type="float" office:value="8640000" calcext:value-type="float">
            <text:p>8640000</text:p>
          </table:table-cell>
          <table:table-cell table:formula="of:=[.B2600]/[.C2600]" office:value-type="float" office:value="0.00240648148148148" calcext:value-type="float">
            <text:p>0,00240648148148148000</text:p>
          </table:table-cell>
          <table:table-cell table:formula="of:=[.D2601]-[.D26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[.B2600]+8" office:value-type="float" office:value="20800" calcext:value-type="float">
            <text:p>20800</text:p>
          </table:table-cell>
          <table:table-cell office:value-type="float" office:value="8640000" calcext:value-type="float">
            <text:p>8640000</text:p>
          </table:table-cell>
          <table:table-cell table:formula="of:=[.B2601]/[.C2601]" office:value-type="float" office:value="0.00240740740740741" calcext:value-type="float">
            <text:p>0,00240740740740741000</text:p>
          </table:table-cell>
          <table:table-cell table:formula="of:=[.D2602]-[.D26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table:formula="of:=[.B2601]+8" office:value-type="float" office:value="20808" calcext:value-type="float">
            <text:p>20808</text:p>
          </table:table-cell>
          <table:table-cell office:value-type="float" office:value="8640000" calcext:value-type="float">
            <text:p>8640000</text:p>
          </table:table-cell>
          <table:table-cell table:formula="of:=[.B2602]/[.C2602]" office:value-type="float" office:value="0.00240833333333333" calcext:value-type="float">
            <text:p>0,00240833333333333000</text:p>
          </table:table-cell>
          <table:table-cell table:formula="of:=[.D2603]-[.D26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[.B2602]+8" office:value-type="float" office:value="20816" calcext:value-type="float">
            <text:p>20816</text:p>
          </table:table-cell>
          <table:table-cell office:value-type="float" office:value="8640000" calcext:value-type="float">
            <text:p>8640000</text:p>
          </table:table-cell>
          <table:table-cell table:formula="of:=[.B2603]/[.C2603]" office:value-type="float" office:value="0.00240925925925926" calcext:value-type="float">
            <text:p>0,00240925925925926000</text:p>
          </table:table-cell>
          <table:table-cell table:formula="of:=[.D2604]-[.D26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[.B2603]+8" office:value-type="float" office:value="20824" calcext:value-type="float">
            <text:p>20824</text:p>
          </table:table-cell>
          <table:table-cell office:value-type="float" office:value="8640000" calcext:value-type="float">
            <text:p>8640000</text:p>
          </table:table-cell>
          <table:table-cell table:formula="of:=[.B2604]/[.C2604]" office:value-type="float" office:value="0.00241018518518519" calcext:value-type="float">
            <text:p>0,00241018518518519000</text:p>
          </table:table-cell>
          <table:table-cell table:formula="of:=[.D2605]-[.D26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[.B2604]+8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2605]/[.C2605]" office:value-type="float" office:value="0.00241111111111111" calcext:value-type="float">
            <text:p>0,00241111111111111000</text:p>
          </table:table-cell>
          <table:table-cell table:formula="of:=[.D2606]-[.D26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[.B2605]+8" office:value-type="float" office:value="20840" calcext:value-type="float">
            <text:p>20840</text:p>
          </table:table-cell>
          <table:table-cell office:value-type="float" office:value="8640000" calcext:value-type="float">
            <text:p>8640000</text:p>
          </table:table-cell>
          <table:table-cell table:formula="of:=[.B2606]/[.C2606]" office:value-type="float" office:value="0.00241203703703704" calcext:value-type="float">
            <text:p>0,00241203703703704000</text:p>
          </table:table-cell>
          <table:table-cell table:formula="of:=[.D2607]-[.D26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table:formula="of:=[.B2606]+8" office:value-type="float" office:value="20848" calcext:value-type="float">
            <text:p>20848</text:p>
          </table:table-cell>
          <table:table-cell office:value-type="float" office:value="8640000" calcext:value-type="float">
            <text:p>8640000</text:p>
          </table:table-cell>
          <table:table-cell table:formula="of:=[.B2607]/[.C2607]" office:value-type="float" office:value="0.00241296296296296" calcext:value-type="float">
            <text:p>0,00241296296296296000</text:p>
          </table:table-cell>
          <table:table-cell table:formula="of:=[.D2608]-[.D26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table:formula="of:=[.B2607]+8" office:value-type="float" office:value="20856" calcext:value-type="float">
            <text:p>20856</text:p>
          </table:table-cell>
          <table:table-cell office:value-type="float" office:value="8640000" calcext:value-type="float">
            <text:p>8640000</text:p>
          </table:table-cell>
          <table:table-cell table:formula="of:=[.B2608]/[.C2608]" office:value-type="float" office:value="0.00241388888888889" calcext:value-type="float">
            <text:p>0,00241388888888889000</text:p>
          </table:table-cell>
          <table:table-cell table:formula="of:=[.D2609]-[.D26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table:formula="of:=[.B2608]+8" office:value-type="float" office:value="20864" calcext:value-type="float">
            <text:p>20864</text:p>
          </table:table-cell>
          <table:table-cell office:value-type="float" office:value="8640000" calcext:value-type="float">
            <text:p>8640000</text:p>
          </table:table-cell>
          <table:table-cell table:formula="of:=[.B2609]/[.C2609]" office:value-type="float" office:value="0.00241481481481482" calcext:value-type="float">
            <text:p>0,00241481481481482000</text:p>
          </table:table-cell>
          <table:table-cell table:formula="of:=[.D2610]-[.D26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table:formula="of:=[.B2609]+8" office:value-type="float" office:value="20872" calcext:value-type="float">
            <text:p>20872</text:p>
          </table:table-cell>
          <table:table-cell office:value-type="float" office:value="8640000" calcext:value-type="float">
            <text:p>8640000</text:p>
          </table:table-cell>
          <table:table-cell table:formula="of:=[.B2610]/[.C2610]" office:value-type="float" office:value="0.00241574074074074" calcext:value-type="float">
            <text:p>0,00241574074074074000</text:p>
          </table:table-cell>
          <table:table-cell table:formula="of:=[.D2611]-[.D26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[.B2610]+8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2611]/[.C2611]" office:value-type="float" office:value="0.00241666666666667" calcext:value-type="float">
            <text:p>0,00241666666666667000</text:p>
          </table:table-cell>
          <table:table-cell table:formula="of:=[.D2612]-[.D26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table:formula="of:=[.B2611]+8" office:value-type="float" office:value="20888" calcext:value-type="float">
            <text:p>20888</text:p>
          </table:table-cell>
          <table:table-cell office:value-type="float" office:value="8640000" calcext:value-type="float">
            <text:p>8640000</text:p>
          </table:table-cell>
          <table:table-cell table:formula="of:=[.B2612]/[.C2612]" office:value-type="float" office:value="0.00241759259259259" calcext:value-type="float">
            <text:p>0,00241759259259259000</text:p>
          </table:table-cell>
          <table:table-cell table:formula="of:=[.D2613]-[.D26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table:formula="of:=[.B2612]+8" office:value-type="float" office:value="20896" calcext:value-type="float">
            <text:p>20896</text:p>
          </table:table-cell>
          <table:table-cell office:value-type="float" office:value="8640000" calcext:value-type="float">
            <text:p>8640000</text:p>
          </table:table-cell>
          <table:table-cell table:formula="of:=[.B2613]/[.C2613]" office:value-type="float" office:value="0.00241851851851852" calcext:value-type="float">
            <text:p>0,00241851851851852000</text:p>
          </table:table-cell>
          <table:table-cell table:formula="of:=[.D2614]-[.D26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[.B2613]+8" office:value-type="float" office:value="20904" calcext:value-type="float">
            <text:p>20904</text:p>
          </table:table-cell>
          <table:table-cell office:value-type="float" office:value="8640000" calcext:value-type="float">
            <text:p>8640000</text:p>
          </table:table-cell>
          <table:table-cell table:formula="of:=[.B2614]/[.C2614]" office:value-type="float" office:value="0.00241944444444444" calcext:value-type="float">
            <text:p>0,00241944444444444000</text:p>
          </table:table-cell>
          <table:table-cell table:formula="of:=[.D2615]-[.D26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table:formula="of:=[.B2614]+8" office:value-type="float" office:value="20912" calcext:value-type="float">
            <text:p>20912</text:p>
          </table:table-cell>
          <table:table-cell office:value-type="float" office:value="8640000" calcext:value-type="float">
            <text:p>8640000</text:p>
          </table:table-cell>
          <table:table-cell table:formula="of:=[.B2615]/[.C2615]" office:value-type="float" office:value="0.00242037037037037" calcext:value-type="float">
            <text:p>0,00242037037037037000</text:p>
          </table:table-cell>
          <table:table-cell table:formula="of:=[.D2616]-[.D26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table:formula="of:=[.B2615]+8" office:value-type="float" office:value="20920" calcext:value-type="float">
            <text:p>20920</text:p>
          </table:table-cell>
          <table:table-cell office:value-type="float" office:value="8640000" calcext:value-type="float">
            <text:p>8640000</text:p>
          </table:table-cell>
          <table:table-cell table:formula="of:=[.B2616]/[.C2616]" office:value-type="float" office:value="0.0024212962962963" calcext:value-type="float">
            <text:p>0,00242129629629630000</text:p>
          </table:table-cell>
          <table:table-cell table:formula="of:=[.D2617]-[.D26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table:formula="of:=[.B2616]+8" office:value-type="float" office:value="20928" calcext:value-type="float">
            <text:p>20928</text:p>
          </table:table-cell>
          <table:table-cell office:value-type="float" office:value="8640000" calcext:value-type="float">
            <text:p>8640000</text:p>
          </table:table-cell>
          <table:table-cell table:formula="of:=[.B2617]/[.C2617]" office:value-type="float" office:value="0.00242222222222222" calcext:value-type="float">
            <text:p>0,00242222222222222000</text:p>
          </table:table-cell>
          <table:table-cell table:formula="of:=[.D2618]-[.D26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table:formula="of:=[.B2617]+8" office:value-type="float" office:value="20936" calcext:value-type="float">
            <text:p>20936</text:p>
          </table:table-cell>
          <table:table-cell office:value-type="float" office:value="8640000" calcext:value-type="float">
            <text:p>8640000</text:p>
          </table:table-cell>
          <table:table-cell table:formula="of:=[.B2618]/[.C2618]" office:value-type="float" office:value="0.00242314814814815" calcext:value-type="float">
            <text:p>0,00242314814814815000</text:p>
          </table:table-cell>
          <table:table-cell table:formula="of:=[.D2619]-[.D26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table:formula="of:=[.B2618]+8" office:value-type="float" office:value="20944" calcext:value-type="float">
            <text:p>20944</text:p>
          </table:table-cell>
          <table:table-cell office:value-type="float" office:value="8640000" calcext:value-type="float">
            <text:p>8640000</text:p>
          </table:table-cell>
          <table:table-cell table:formula="of:=[.B2619]/[.C2619]" office:value-type="float" office:value="0.00242407407407407" calcext:value-type="float">
            <text:p>0,00242407407407407000</text:p>
          </table:table-cell>
          <table:table-cell table:formula="of:=[.D2620]-[.D26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[.B2619]+8" office:value-type="float" office:value="20952" calcext:value-type="float">
            <text:p>20952</text:p>
          </table:table-cell>
          <table:table-cell office:value-type="float" office:value="8640000" calcext:value-type="float">
            <text:p>8640000</text:p>
          </table:table-cell>
          <table:table-cell table:formula="of:=[.B2620]/[.C2620]" office:value-type="float" office:value="0.002425" calcext:value-type="float">
            <text:p>0,00242500000000000000</text:p>
          </table:table-cell>
          <table:table-cell table:formula="of:=[.D2621]-[.D26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table:formula="of:=[.B2620]+8" office:value-type="float" office:value="20960" calcext:value-type="float">
            <text:p>20960</text:p>
          </table:table-cell>
          <table:table-cell office:value-type="float" office:value="8640000" calcext:value-type="float">
            <text:p>8640000</text:p>
          </table:table-cell>
          <table:table-cell table:formula="of:=[.B2621]/[.C2621]" office:value-type="float" office:value="0.00242592592592593" calcext:value-type="float">
            <text:p>0,00242592592592593000</text:p>
          </table:table-cell>
          <table:table-cell table:formula="of:=[.D2622]-[.D26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table:formula="of:=[.B2621]+8" office:value-type="float" office:value="20968" calcext:value-type="float">
            <text:p>20968</text:p>
          </table:table-cell>
          <table:table-cell office:value-type="float" office:value="8640000" calcext:value-type="float">
            <text:p>8640000</text:p>
          </table:table-cell>
          <table:table-cell table:formula="of:=[.B2622]/[.C2622]" office:value-type="float" office:value="0.00242685185185185" calcext:value-type="float">
            <text:p>0,00242685185185185000</text:p>
          </table:table-cell>
          <table:table-cell table:formula="of:=[.D2623]-[.D26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table:formula="of:=[.B2622]+8" office:value-type="float" office:value="20976" calcext:value-type="float">
            <text:p>20976</text:p>
          </table:table-cell>
          <table:table-cell office:value-type="float" office:value="8640000" calcext:value-type="float">
            <text:p>8640000</text:p>
          </table:table-cell>
          <table:table-cell table:formula="of:=[.B2623]/[.C2623]" office:value-type="float" office:value="0.00242777777777778" calcext:value-type="float">
            <text:p>0,00242777777777778000</text:p>
          </table:table-cell>
          <table:table-cell table:formula="of:=[.D2624]-[.D26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table:formula="of:=[.B2623]+8" office:value-type="float" office:value="20984" calcext:value-type="float">
            <text:p>20984</text:p>
          </table:table-cell>
          <table:table-cell office:value-type="float" office:value="8640000" calcext:value-type="float">
            <text:p>8640000</text:p>
          </table:table-cell>
          <table:table-cell table:formula="of:=[.B2624]/[.C2624]" office:value-type="float" office:value="0.0024287037037037" calcext:value-type="float">
            <text:p>0,00242870370370370000</text:p>
          </table:table-cell>
          <table:table-cell table:formula="of:=[.D2625]-[.D26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table:formula="of:=[.B2624]+8" office:value-type="float" office:value="20992" calcext:value-type="float">
            <text:p>20992</text:p>
          </table:table-cell>
          <table:table-cell office:value-type="float" office:value="8640000" calcext:value-type="float">
            <text:p>8640000</text:p>
          </table:table-cell>
          <table:table-cell table:formula="of:=[.B2625]/[.C2625]" office:value-type="float" office:value="0.00242962962962963" calcext:value-type="float">
            <text:p>0,00242962962962963000</text:p>
          </table:table-cell>
          <table:table-cell table:formula="of:=[.D2626]-[.D26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table:formula="of:=[.B2625]+8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2626]/[.C2626]" office:value-type="float" office:value="0.00243055555555556" calcext:value-type="float">
            <text:p>0,00243055555555556000</text:p>
          </table:table-cell>
          <table:table-cell table:formula="of:=[.D2627]-[.D26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table:formula="of:=[.B2626]+8" office:value-type="float" office:value="21008" calcext:value-type="float">
            <text:p>21008</text:p>
          </table:table-cell>
          <table:table-cell office:value-type="float" office:value="8640000" calcext:value-type="float">
            <text:p>8640000</text:p>
          </table:table-cell>
          <table:table-cell table:formula="of:=[.B2627]/[.C2627]" office:value-type="float" office:value="0.00243148148148148" calcext:value-type="float">
            <text:p>0,00243148148148148000</text:p>
          </table:table-cell>
          <table:table-cell table:formula="of:=[.D2628]-[.D26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table:formula="of:=[.B2627]+8" office:value-type="float" office:value="21016" calcext:value-type="float">
            <text:p>21016</text:p>
          </table:table-cell>
          <table:table-cell office:value-type="float" office:value="8640000" calcext:value-type="float">
            <text:p>8640000</text:p>
          </table:table-cell>
          <table:table-cell table:formula="of:=[.B2628]/[.C2628]" office:value-type="float" office:value="0.00243240740740741" calcext:value-type="float">
            <text:p>0,00243240740740741000</text:p>
          </table:table-cell>
          <table:table-cell table:formula="of:=[.D2629]-[.D26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[.B2628]+8" office:value-type="float" office:value="21024" calcext:value-type="float">
            <text:p>21024</text:p>
          </table:table-cell>
          <table:table-cell office:value-type="float" office:value="8640000" calcext:value-type="float">
            <text:p>8640000</text:p>
          </table:table-cell>
          <table:table-cell table:formula="of:=[.B2629]/[.C2629]" office:value-type="float" office:value="0.00243333333333333" calcext:value-type="float">
            <text:p>0,00243333333333333000</text:p>
          </table:table-cell>
          <table:table-cell table:formula="of:=[.D2630]-[.D26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table:formula="of:=[.B2629]+8" office:value-type="float" office:value="21032" calcext:value-type="float">
            <text:p>21032</text:p>
          </table:table-cell>
          <table:table-cell office:value-type="float" office:value="8640000" calcext:value-type="float">
            <text:p>8640000</text:p>
          </table:table-cell>
          <table:table-cell table:formula="of:=[.B2630]/[.C2630]" office:value-type="float" office:value="0.00243425925925926" calcext:value-type="float">
            <text:p>0,00243425925925926000</text:p>
          </table:table-cell>
          <table:table-cell table:formula="of:=[.D2631]-[.D26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table:formula="of:=[.B2630]+8" office:value-type="float" office:value="21040" calcext:value-type="float">
            <text:p>21040</text:p>
          </table:table-cell>
          <table:table-cell office:value-type="float" office:value="8640000" calcext:value-type="float">
            <text:p>8640000</text:p>
          </table:table-cell>
          <table:table-cell table:formula="of:=[.B2631]/[.C2631]" office:value-type="float" office:value="0.00243518518518519" calcext:value-type="float">
            <text:p>0,00243518518518519000</text:p>
          </table:table-cell>
          <table:table-cell table:formula="of:=[.D2632]-[.D26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table:formula="of:=[.B2631]+8" office:value-type="float" office:value="21048" calcext:value-type="float">
            <text:p>21048</text:p>
          </table:table-cell>
          <table:table-cell office:value-type="float" office:value="8640000" calcext:value-type="float">
            <text:p>8640000</text:p>
          </table:table-cell>
          <table:table-cell table:formula="of:=[.B2632]/[.C2632]" office:value-type="float" office:value="0.00243611111111111" calcext:value-type="float">
            <text:p>0,00243611111111111000</text:p>
          </table:table-cell>
          <table:table-cell table:formula="of:=[.D2633]-[.D26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table:formula="of:=[.B2632]+8" office:value-type="float" office:value="21056" calcext:value-type="float">
            <text:p>21056</text:p>
          </table:table-cell>
          <table:table-cell office:value-type="float" office:value="8640000" calcext:value-type="float">
            <text:p>8640000</text:p>
          </table:table-cell>
          <table:table-cell table:formula="of:=[.B2633]/[.C2633]" office:value-type="float" office:value="0.00243703703703704" calcext:value-type="float">
            <text:p>0,00243703703703704000</text:p>
          </table:table-cell>
          <table:table-cell table:formula="of:=[.D2634]-[.D26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table:formula="of:=[.B2633]+8" office:value-type="float" office:value="21064" calcext:value-type="float">
            <text:p>21064</text:p>
          </table:table-cell>
          <table:table-cell office:value-type="float" office:value="8640000" calcext:value-type="float">
            <text:p>8640000</text:p>
          </table:table-cell>
          <table:table-cell table:formula="of:=[.B2634]/[.C2634]" office:value-type="float" office:value="0.00243796296296296" calcext:value-type="float">
            <text:p>0,00243796296296296000</text:p>
          </table:table-cell>
          <table:table-cell table:formula="of:=[.D2635]-[.D26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table:formula="of:=[.B2634]+8" office:value-type="float" office:value="21072" calcext:value-type="float">
            <text:p>21072</text:p>
          </table:table-cell>
          <table:table-cell office:value-type="float" office:value="8640000" calcext:value-type="float">
            <text:p>8640000</text:p>
          </table:table-cell>
          <table:table-cell table:formula="of:=[.B2635]/[.C2635]" office:value-type="float" office:value="0.00243888888888889" calcext:value-type="float">
            <text:p>0,00243888888888889000</text:p>
          </table:table-cell>
          <table:table-cell table:formula="of:=[.D2636]-[.D26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table:formula="of:=[.B2635]+8" office:value-type="float" office:value="21080" calcext:value-type="float">
            <text:p>21080</text:p>
          </table:table-cell>
          <table:table-cell office:value-type="float" office:value="8640000" calcext:value-type="float">
            <text:p>8640000</text:p>
          </table:table-cell>
          <table:table-cell table:formula="of:=[.B2636]/[.C2636]" office:value-type="float" office:value="0.00243981481481482" calcext:value-type="float">
            <text:p>0,00243981481481482000</text:p>
          </table:table-cell>
          <table:table-cell table:formula="of:=[.D2637]-[.D26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[.B2636]+8" office:value-type="float" office:value="21088" calcext:value-type="float">
            <text:p>21088</text:p>
          </table:table-cell>
          <table:table-cell office:value-type="float" office:value="8640000" calcext:value-type="float">
            <text:p>8640000</text:p>
          </table:table-cell>
          <table:table-cell table:formula="of:=[.B2637]/[.C2637]" office:value-type="float" office:value="0.00244074074074074" calcext:value-type="float">
            <text:p>0,00244074074074074000</text:p>
          </table:table-cell>
          <table:table-cell table:formula="of:=[.D2638]-[.D26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table:formula="of:=[.B2637]+8" office:value-type="float" office:value="21096" calcext:value-type="float">
            <text:p>21096</text:p>
          </table:table-cell>
          <table:table-cell office:value-type="float" office:value="8640000" calcext:value-type="float">
            <text:p>8640000</text:p>
          </table:table-cell>
          <table:table-cell table:formula="of:=[.B2638]/[.C2638]" office:value-type="float" office:value="0.00244166666666667" calcext:value-type="float">
            <text:p>0,00244166666666667000</text:p>
          </table:table-cell>
          <table:table-cell table:formula="of:=[.D2639]-[.D26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table:formula="of:=[.B2638]+8" office:value-type="float" office:value="21104" calcext:value-type="float">
            <text:p>21104</text:p>
          </table:table-cell>
          <table:table-cell office:value-type="float" office:value="8640000" calcext:value-type="float">
            <text:p>8640000</text:p>
          </table:table-cell>
          <table:table-cell table:formula="of:=[.B2639]/[.C2639]" office:value-type="float" office:value="0.00244259259259259" calcext:value-type="float">
            <text:p>0,00244259259259259000</text:p>
          </table:table-cell>
          <table:table-cell table:formula="of:=[.D2640]-[.D26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[.B2639]+8" office:value-type="float" office:value="21112" calcext:value-type="float">
            <text:p>21112</text:p>
          </table:table-cell>
          <table:table-cell office:value-type="float" office:value="8640000" calcext:value-type="float">
            <text:p>8640000</text:p>
          </table:table-cell>
          <table:table-cell table:formula="of:=[.B2640]/[.C2640]" office:value-type="float" office:value="0.00244351851851852" calcext:value-type="float">
            <text:p>0,00244351851851852000</text:p>
          </table:table-cell>
          <table:table-cell table:formula="of:=[.D2641]-[.D26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[.B2640]+8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2641]/[.C2641]" office:value-type="float" office:value="0.00244444444444444" calcext:value-type="float">
            <text:p>0,00244444444444444000</text:p>
          </table:table-cell>
          <table:table-cell table:formula="of:=[.D2642]-[.D26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table:formula="of:=[.B2641]+8" office:value-type="float" office:value="21128" calcext:value-type="float">
            <text:p>21128</text:p>
          </table:table-cell>
          <table:table-cell office:value-type="float" office:value="8640000" calcext:value-type="float">
            <text:p>8640000</text:p>
          </table:table-cell>
          <table:table-cell table:formula="of:=[.B2642]/[.C2642]" office:value-type="float" office:value="0.00244537037037037" calcext:value-type="float">
            <text:p>0,00244537037037037000</text:p>
          </table:table-cell>
          <table:table-cell table:formula="of:=[.D2643]-[.D26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table:formula="of:=[.B2642]+8" office:value-type="float" office:value="21136" calcext:value-type="float">
            <text:p>21136</text:p>
          </table:table-cell>
          <table:table-cell office:value-type="float" office:value="8640000" calcext:value-type="float">
            <text:p>8640000</text:p>
          </table:table-cell>
          <table:table-cell table:formula="of:=[.B2643]/[.C2643]" office:value-type="float" office:value="0.0024462962962963" calcext:value-type="float">
            <text:p>0,00244629629629630000</text:p>
          </table:table-cell>
          <table:table-cell table:formula="of:=[.D2644]-[.D26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table:formula="of:=[.B2643]+8" office:value-type="float" office:value="21144" calcext:value-type="float">
            <text:p>21144</text:p>
          </table:table-cell>
          <table:table-cell office:value-type="float" office:value="8640000" calcext:value-type="float">
            <text:p>8640000</text:p>
          </table:table-cell>
          <table:table-cell table:formula="of:=[.B2644]/[.C2644]" office:value-type="float" office:value="0.00244722222222222" calcext:value-type="float">
            <text:p>0,00244722222222222000</text:p>
          </table:table-cell>
          <table:table-cell table:formula="of:=[.D2645]-[.D26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table:formula="of:=[.B2644]+8" office:value-type="float" office:value="21152" calcext:value-type="float">
            <text:p>21152</text:p>
          </table:table-cell>
          <table:table-cell office:value-type="float" office:value="8640000" calcext:value-type="float">
            <text:p>8640000</text:p>
          </table:table-cell>
          <table:table-cell table:formula="of:=[.B2645]/[.C2645]" office:value-type="float" office:value="0.00244814814814815" calcext:value-type="float">
            <text:p>0,00244814814814815000</text:p>
          </table:table-cell>
          <table:table-cell table:formula="of:=[.D2646]-[.D26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[.B2645]+8" office:value-type="float" office:value="21160" calcext:value-type="float">
            <text:p>21160</text:p>
          </table:table-cell>
          <table:table-cell office:value-type="float" office:value="8640000" calcext:value-type="float">
            <text:p>8640000</text:p>
          </table:table-cell>
          <table:table-cell table:formula="of:=[.B2646]/[.C2646]" office:value-type="float" office:value="0.00244907407407407" calcext:value-type="float">
            <text:p>0,00244907407407407000</text:p>
          </table:table-cell>
          <table:table-cell table:formula="of:=[.D2647]-[.D26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table:formula="of:=[.B2646]+8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2647]/[.C2647]" office:value-type="float" office:value="0.00245" calcext:value-type="float">
            <text:p>0,00245000000000000000</text:p>
          </table:table-cell>
          <table:table-cell table:formula="of:=[.D2648]-[.D26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table:formula="of:=[.B2647]+8" office:value-type="float" office:value="21176" calcext:value-type="float">
            <text:p>21176</text:p>
          </table:table-cell>
          <table:table-cell office:value-type="float" office:value="8640000" calcext:value-type="float">
            <text:p>8640000</text:p>
          </table:table-cell>
          <table:table-cell table:formula="of:=[.B2648]/[.C2648]" office:value-type="float" office:value="0.00245092592592593" calcext:value-type="float">
            <text:p>0,00245092592592593000</text:p>
          </table:table-cell>
          <table:table-cell table:formula="of:=[.D2649]-[.D26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table:formula="of:=[.B2648]+8" office:value-type="float" office:value="21184" calcext:value-type="float">
            <text:p>21184</text:p>
          </table:table-cell>
          <table:table-cell office:value-type="float" office:value="8640000" calcext:value-type="float">
            <text:p>8640000</text:p>
          </table:table-cell>
          <table:table-cell table:formula="of:=[.B2649]/[.C2649]" office:value-type="float" office:value="0.00245185185185185" calcext:value-type="float">
            <text:p>0,00245185185185185000</text:p>
          </table:table-cell>
          <table:table-cell table:formula="of:=[.D2650]-[.D26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table:formula="of:=[.B2649]+8" office:value-type="float" office:value="21192" calcext:value-type="float">
            <text:p>21192</text:p>
          </table:table-cell>
          <table:table-cell office:value-type="float" office:value="8640000" calcext:value-type="float">
            <text:p>8640000</text:p>
          </table:table-cell>
          <table:table-cell table:formula="of:=[.B2650]/[.C2650]" office:value-type="float" office:value="0.00245277777777778" calcext:value-type="float">
            <text:p>0,00245277777777778000</text:p>
          </table:table-cell>
          <table:table-cell table:formula="of:=[.D2651]-[.D26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table:formula="of:=[.B2650]+8" office:value-type="float" office:value="21200" calcext:value-type="float">
            <text:p>21200</text:p>
          </table:table-cell>
          <table:table-cell office:value-type="float" office:value="8640000" calcext:value-type="float">
            <text:p>8640000</text:p>
          </table:table-cell>
          <table:table-cell table:formula="of:=[.B2651]/[.C2651]" office:value-type="float" office:value="0.0024537037037037" calcext:value-type="float">
            <text:p>0,00245370370370370000</text:p>
          </table:table-cell>
          <table:table-cell table:formula="of:=[.D2652]-[.D26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table:formula="of:=[.B2651]+8" office:value-type="float" office:value="21208" calcext:value-type="float">
            <text:p>21208</text:p>
          </table:table-cell>
          <table:table-cell office:value-type="float" office:value="8640000" calcext:value-type="float">
            <text:p>8640000</text:p>
          </table:table-cell>
          <table:table-cell table:formula="of:=[.B2652]/[.C2652]" office:value-type="float" office:value="0.00245462962962963" calcext:value-type="float">
            <text:p>0,00245462962962963000</text:p>
          </table:table-cell>
          <table:table-cell table:formula="of:=[.D2653]-[.D26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table:formula="of:=[.B2652]+8" office:value-type="float" office:value="21216" calcext:value-type="float">
            <text:p>21216</text:p>
          </table:table-cell>
          <table:table-cell office:value-type="float" office:value="8640000" calcext:value-type="float">
            <text:p>8640000</text:p>
          </table:table-cell>
          <table:table-cell table:formula="of:=[.B2653]/[.C2653]" office:value-type="float" office:value="0.00245555555555556" calcext:value-type="float">
            <text:p>0,00245555555555556000</text:p>
          </table:table-cell>
          <table:table-cell table:formula="of:=[.D2654]-[.D26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table:formula="of:=[.B2653]+8" office:value-type="float" office:value="21224" calcext:value-type="float">
            <text:p>21224</text:p>
          </table:table-cell>
          <table:table-cell office:value-type="float" office:value="8640000" calcext:value-type="float">
            <text:p>8640000</text:p>
          </table:table-cell>
          <table:table-cell table:formula="of:=[.B2654]/[.C2654]" office:value-type="float" office:value="0.00245648148148148" calcext:value-type="float">
            <text:p>0,00245648148148148000</text:p>
          </table:table-cell>
          <table:table-cell table:formula="of:=[.D2655]-[.D26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table:formula="of:=[.B2654]+8" office:value-type="float" office:value="21232" calcext:value-type="float">
            <text:p>21232</text:p>
          </table:table-cell>
          <table:table-cell office:value-type="float" office:value="8640000" calcext:value-type="float">
            <text:p>8640000</text:p>
          </table:table-cell>
          <table:table-cell table:formula="of:=[.B2655]/[.C2655]" office:value-type="float" office:value="0.00245740740740741" calcext:value-type="float">
            <text:p>0,00245740740740741000</text:p>
          </table:table-cell>
          <table:table-cell table:formula="of:=[.D2656]-[.D26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table:formula="of:=[.B2655]+8" office:value-type="float" office:value="21240" calcext:value-type="float">
            <text:p>21240</text:p>
          </table:table-cell>
          <table:table-cell office:value-type="float" office:value="8640000" calcext:value-type="float">
            <text:p>8640000</text:p>
          </table:table-cell>
          <table:table-cell table:formula="of:=[.B2656]/[.C2656]" office:value-type="float" office:value="0.00245833333333333" calcext:value-type="float">
            <text:p>0,00245833333333333000</text:p>
          </table:table-cell>
          <table:table-cell table:formula="of:=[.D2657]-[.D26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table:formula="of:=[.B2656]+8" office:value-type="float" office:value="21248" calcext:value-type="float">
            <text:p>21248</text:p>
          </table:table-cell>
          <table:table-cell office:value-type="float" office:value="8640000" calcext:value-type="float">
            <text:p>8640000</text:p>
          </table:table-cell>
          <table:table-cell table:formula="of:=[.B2657]/[.C2657]" office:value-type="float" office:value="0.00245925925925926" calcext:value-type="float">
            <text:p>0,00245925925925926000</text:p>
          </table:table-cell>
          <table:table-cell table:formula="of:=[.D2658]-[.D26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[.B2657]+8" office:value-type="float" office:value="21256" calcext:value-type="float">
            <text:p>21256</text:p>
          </table:table-cell>
          <table:table-cell office:value-type="float" office:value="8640000" calcext:value-type="float">
            <text:p>8640000</text:p>
          </table:table-cell>
          <table:table-cell table:formula="of:=[.B2658]/[.C2658]" office:value-type="float" office:value="0.00246018518518519" calcext:value-type="float">
            <text:p>0,00246018518518519000</text:p>
          </table:table-cell>
          <table:table-cell table:formula="of:=[.D2659]-[.D26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table:formula="of:=[.B2658]+8" office:value-type="float" office:value="21264" calcext:value-type="float">
            <text:p>21264</text:p>
          </table:table-cell>
          <table:table-cell office:value-type="float" office:value="8640000" calcext:value-type="float">
            <text:p>8640000</text:p>
          </table:table-cell>
          <table:table-cell table:formula="of:=[.B2659]/[.C2659]" office:value-type="float" office:value="0.00246111111111111" calcext:value-type="float">
            <text:p>0,00246111111111111000</text:p>
          </table:table-cell>
          <table:table-cell table:formula="of:=[.D2660]-[.D26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[.B2659]+8" office:value-type="float" office:value="21272" calcext:value-type="float">
            <text:p>21272</text:p>
          </table:table-cell>
          <table:table-cell office:value-type="float" office:value="8640000" calcext:value-type="float">
            <text:p>8640000</text:p>
          </table:table-cell>
          <table:table-cell table:formula="of:=[.B2660]/[.C2660]" office:value-type="float" office:value="0.00246203703703704" calcext:value-type="float">
            <text:p>0,00246203703703704000</text:p>
          </table:table-cell>
          <table:table-cell table:formula="of:=[.D2661]-[.D26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[.B2660]+8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2661]/[.C2661]" office:value-type="float" office:value="0.00246296296296296" calcext:value-type="float">
            <text:p>0,00246296296296296000</text:p>
          </table:table-cell>
          <table:table-cell table:formula="of:=[.D2662]-[.D26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table:formula="of:=[.B2661]+8" office:value-type="float" office:value="21288" calcext:value-type="float">
            <text:p>21288</text:p>
          </table:table-cell>
          <table:table-cell office:value-type="float" office:value="8640000" calcext:value-type="float">
            <text:p>8640000</text:p>
          </table:table-cell>
          <table:table-cell table:formula="of:=[.B2662]/[.C2662]" office:value-type="float" office:value="0.00246388888888889" calcext:value-type="float">
            <text:p>0,00246388888888889000</text:p>
          </table:table-cell>
          <table:table-cell table:formula="of:=[.D2663]-[.D26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[.B2662]+8" office:value-type="float" office:value="21296" calcext:value-type="float">
            <text:p>21296</text:p>
          </table:table-cell>
          <table:table-cell office:value-type="float" office:value="8640000" calcext:value-type="float">
            <text:p>8640000</text:p>
          </table:table-cell>
          <table:table-cell table:formula="of:=[.B2663]/[.C2663]" office:value-type="float" office:value="0.00246481481481481" calcext:value-type="float">
            <text:p>0,00246481481481481000</text:p>
          </table:table-cell>
          <table:table-cell table:formula="of:=[.D2664]-[.D26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[.B2663]+8" office:value-type="float" office:value="21304" calcext:value-type="float">
            <text:p>21304</text:p>
          </table:table-cell>
          <table:table-cell office:value-type="float" office:value="8640000" calcext:value-type="float">
            <text:p>8640000</text:p>
          </table:table-cell>
          <table:table-cell table:formula="of:=[.B2664]/[.C2664]" office:value-type="float" office:value="0.00246574074074074" calcext:value-type="float">
            <text:p>0,00246574074074074000</text:p>
          </table:table-cell>
          <table:table-cell table:formula="of:=[.D2665]-[.D26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[.B2664]+8" office:value-type="float" office:value="21312" calcext:value-type="float">
            <text:p>21312</text:p>
          </table:table-cell>
          <table:table-cell office:value-type="float" office:value="8640000" calcext:value-type="float">
            <text:p>8640000</text:p>
          </table:table-cell>
          <table:table-cell table:formula="of:=[.B2665]/[.C2665]" office:value-type="float" office:value="0.00246666666666667" calcext:value-type="float">
            <text:p>0,00246666666666667000</text:p>
          </table:table-cell>
          <table:table-cell table:formula="of:=[.D2666]-[.D26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table:formula="of:=[.B2665]+8" office:value-type="float" office:value="21320" calcext:value-type="float">
            <text:p>21320</text:p>
          </table:table-cell>
          <table:table-cell office:value-type="float" office:value="8640000" calcext:value-type="float">
            <text:p>8640000</text:p>
          </table:table-cell>
          <table:table-cell table:formula="of:=[.B2666]/[.C2666]" office:value-type="float" office:value="0.00246759259259259" calcext:value-type="float">
            <text:p>0,00246759259259259000</text:p>
          </table:table-cell>
          <table:table-cell table:formula="of:=[.D2667]-[.D26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table:formula="of:=[.B2666]+8" office:value-type="float" office:value="21328" calcext:value-type="float">
            <text:p>21328</text:p>
          </table:table-cell>
          <table:table-cell office:value-type="float" office:value="8640000" calcext:value-type="float">
            <text:p>8640000</text:p>
          </table:table-cell>
          <table:table-cell table:formula="of:=[.B2667]/[.C2667]" office:value-type="float" office:value="0.00246851851851852" calcext:value-type="float">
            <text:p>0,00246851851851852000</text:p>
          </table:table-cell>
          <table:table-cell table:formula="of:=[.D2668]-[.D26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table:formula="of:=[.B2667]+8" office:value-type="float" office:value="21336" calcext:value-type="float">
            <text:p>21336</text:p>
          </table:table-cell>
          <table:table-cell office:value-type="float" office:value="8640000" calcext:value-type="float">
            <text:p>8640000</text:p>
          </table:table-cell>
          <table:table-cell table:formula="of:=[.B2668]/[.C2668]" office:value-type="float" office:value="0.00246944444444444" calcext:value-type="float">
            <text:p>0,00246944444444444000</text:p>
          </table:table-cell>
          <table:table-cell table:formula="of:=[.D2669]-[.D26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table:formula="of:=[.B2668]+8" office:value-type="float" office:value="21344" calcext:value-type="float">
            <text:p>21344</text:p>
          </table:table-cell>
          <table:table-cell office:value-type="float" office:value="8640000" calcext:value-type="float">
            <text:p>8640000</text:p>
          </table:table-cell>
          <table:table-cell table:formula="of:=[.B2669]/[.C2669]" office:value-type="float" office:value="0.00247037037037037" calcext:value-type="float">
            <text:p>0,00247037037037037000</text:p>
          </table:table-cell>
          <table:table-cell table:formula="of:=[.D2670]-[.D26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table:formula="of:=[.B2669]+8" office:value-type="float" office:value="21352" calcext:value-type="float">
            <text:p>21352</text:p>
          </table:table-cell>
          <table:table-cell office:value-type="float" office:value="8640000" calcext:value-type="float">
            <text:p>8640000</text:p>
          </table:table-cell>
          <table:table-cell table:formula="of:=[.B2670]/[.C2670]" office:value-type="float" office:value="0.0024712962962963" calcext:value-type="float">
            <text:p>0,00247129629629630000</text:p>
          </table:table-cell>
          <table:table-cell table:formula="of:=[.D2671]-[.D26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table:formula="of:=[.B2670]+8" office:value-type="float" office:value="21360" calcext:value-type="float">
            <text:p>21360</text:p>
          </table:table-cell>
          <table:table-cell office:value-type="float" office:value="8640000" calcext:value-type="float">
            <text:p>8640000</text:p>
          </table:table-cell>
          <table:table-cell table:formula="of:=[.B2671]/[.C2671]" office:value-type="float" office:value="0.00247222222222222" calcext:value-type="float">
            <text:p>0,00247222222222222000</text:p>
          </table:table-cell>
          <table:table-cell table:formula="of:=[.D2672]-[.D2671]" office:value-type="float" office:value="0.000000925925925926354" calcext:value-type="float">
            <text:p>0,00000092592592592635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table:formula="of:=[.B2671]+8" office:value-type="float" office:value="21368" calcext:value-type="float">
            <text:p>21368</text:p>
          </table:table-cell>
          <table:table-cell office:value-type="float" office:value="8640000" calcext:value-type="float">
            <text:p>8640000</text:p>
          </table:table-cell>
          <table:table-cell table:formula="of:=[.B2672]/[.C2672]" office:value-type="float" office:value="0.00247314814814815" calcext:value-type="float">
            <text:p>0,00247314814814815000</text:p>
          </table:table-cell>
          <table:table-cell table:formula="of:=[.D2673]-[.D26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table:formula="of:=[.B2672]+8" office:value-type="float" office:value="21376" calcext:value-type="float">
            <text:p>21376</text:p>
          </table:table-cell>
          <table:table-cell office:value-type="float" office:value="8640000" calcext:value-type="float">
            <text:p>8640000</text:p>
          </table:table-cell>
          <table:table-cell table:formula="of:=[.B2673]/[.C2673]" office:value-type="float" office:value="0.00247407407407407" calcext:value-type="float">
            <text:p>0,00247407407407407000</text:p>
          </table:table-cell>
          <table:table-cell table:formula="of:=[.D2674]-[.D26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table:formula="of:=[.B2673]+8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2674]/[.C2674]" office:value-type="float" office:value="0.002475" calcext:value-type="float">
            <text:p>0,00247500000000000000</text:p>
          </table:table-cell>
          <table:table-cell table:formula="of:=[.D2675]-[.D26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table:formula="of:=[.B2674]+8" office:value-type="float" office:value="21392" calcext:value-type="float">
            <text:p>21392</text:p>
          </table:table-cell>
          <table:table-cell office:value-type="float" office:value="8640000" calcext:value-type="float">
            <text:p>8640000</text:p>
          </table:table-cell>
          <table:table-cell table:formula="of:=[.B2675]/[.C2675]" office:value-type="float" office:value="0.00247592592592593" calcext:value-type="float">
            <text:p>0,00247592592592593000</text:p>
          </table:table-cell>
          <table:table-cell table:formula="of:=[.D2676]-[.D26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table:formula="of:=[.B2675]+8" office:value-type="float" office:value="21400" calcext:value-type="float">
            <text:p>21400</text:p>
          </table:table-cell>
          <table:table-cell office:value-type="float" office:value="8640000" calcext:value-type="float">
            <text:p>8640000</text:p>
          </table:table-cell>
          <table:table-cell table:formula="of:=[.B2676]/[.C2676]" office:value-type="float" office:value="0.00247685185185185" calcext:value-type="float">
            <text:p>0,00247685185185185000</text:p>
          </table:table-cell>
          <table:table-cell table:formula="of:=[.D2677]-[.D26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table:formula="of:=[.B2676]+8" office:value-type="float" office:value="21408" calcext:value-type="float">
            <text:p>21408</text:p>
          </table:table-cell>
          <table:table-cell office:value-type="float" office:value="8640000" calcext:value-type="float">
            <text:p>8640000</text:p>
          </table:table-cell>
          <table:table-cell table:formula="of:=[.B2677]/[.C2677]" office:value-type="float" office:value="0.00247777777777778" calcext:value-type="float">
            <text:p>0,00247777777777778000</text:p>
          </table:table-cell>
          <table:table-cell table:formula="of:=[.D2678]-[.D26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table:formula="of:=[.B2677]+8" office:value-type="float" office:value="21416" calcext:value-type="float">
            <text:p>21416</text:p>
          </table:table-cell>
          <table:table-cell office:value-type="float" office:value="8640000" calcext:value-type="float">
            <text:p>8640000</text:p>
          </table:table-cell>
          <table:table-cell table:formula="of:=[.B2678]/[.C2678]" office:value-type="float" office:value="0.0024787037037037" calcext:value-type="float">
            <text:p>0,00247870370370370000</text:p>
          </table:table-cell>
          <table:table-cell table:formula="of:=[.D2679]-[.D26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[.B2678]+8" office:value-type="float" office:value="21424" calcext:value-type="float">
            <text:p>21424</text:p>
          </table:table-cell>
          <table:table-cell office:value-type="float" office:value="8640000" calcext:value-type="float">
            <text:p>8640000</text:p>
          </table:table-cell>
          <table:table-cell table:formula="of:=[.B2679]/[.C2679]" office:value-type="float" office:value="0.00247962962962963" calcext:value-type="float">
            <text:p>0,00247962962962963000</text:p>
          </table:table-cell>
          <table:table-cell table:formula="of:=[.D2680]-[.D26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table:formula="of:=[.B2679]+8" office:value-type="float" office:value="21432" calcext:value-type="float">
            <text:p>21432</text:p>
          </table:table-cell>
          <table:table-cell office:value-type="float" office:value="8640000" calcext:value-type="float">
            <text:p>8640000</text:p>
          </table:table-cell>
          <table:table-cell table:formula="of:=[.B2680]/[.C2680]" office:value-type="float" office:value="0.00248055555555556" calcext:value-type="float">
            <text:p>0,00248055555555556000</text:p>
          </table:table-cell>
          <table:table-cell table:formula="of:=[.D2681]-[.D26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[.B2680]+8" office:value-type="float" office:value="21440" calcext:value-type="float">
            <text:p>21440</text:p>
          </table:table-cell>
          <table:table-cell office:value-type="float" office:value="8640000" calcext:value-type="float">
            <text:p>8640000</text:p>
          </table:table-cell>
          <table:table-cell table:formula="of:=[.B2681]/[.C2681]" office:value-type="float" office:value="0.00248148148148148" calcext:value-type="float">
            <text:p>0,00248148148148148000</text:p>
          </table:table-cell>
          <table:table-cell table:formula="of:=[.D2682]-[.D26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table:formula="of:=[.B2681]+8" office:value-type="float" office:value="21448" calcext:value-type="float">
            <text:p>21448</text:p>
          </table:table-cell>
          <table:table-cell office:value-type="float" office:value="8640000" calcext:value-type="float">
            <text:p>8640000</text:p>
          </table:table-cell>
          <table:table-cell table:formula="of:=[.B2682]/[.C2682]" office:value-type="float" office:value="0.00248240740740741" calcext:value-type="float">
            <text:p>0,00248240740740741000</text:p>
          </table:table-cell>
          <table:table-cell table:formula="of:=[.D2683]-[.D26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table:formula="of:=[.B2682]+8" office:value-type="float" office:value="21456" calcext:value-type="float">
            <text:p>21456</text:p>
          </table:table-cell>
          <table:table-cell office:value-type="float" office:value="8640000" calcext:value-type="float">
            <text:p>8640000</text:p>
          </table:table-cell>
          <table:table-cell table:formula="of:=[.B2683]/[.C2683]" office:value-type="float" office:value="0.00248333333333333" calcext:value-type="float">
            <text:p>0,00248333333333333000</text:p>
          </table:table-cell>
          <table:table-cell table:formula="of:=[.D2684]-[.D26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table:formula="of:=[.B2683]+8" office:value-type="float" office:value="21464" calcext:value-type="float">
            <text:p>21464</text:p>
          </table:table-cell>
          <table:table-cell office:value-type="float" office:value="8640000" calcext:value-type="float">
            <text:p>8640000</text:p>
          </table:table-cell>
          <table:table-cell table:formula="of:=[.B2684]/[.C2684]" office:value-type="float" office:value="0.00248425925925926" calcext:value-type="float">
            <text:p>0,00248425925925926000</text:p>
          </table:table-cell>
          <table:table-cell table:formula="of:=[.D2685]-[.D26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table:formula="of:=[.B2684]+8" office:value-type="float" office:value="21472" calcext:value-type="float">
            <text:p>21472</text:p>
          </table:table-cell>
          <table:table-cell office:value-type="float" office:value="8640000" calcext:value-type="float">
            <text:p>8640000</text:p>
          </table:table-cell>
          <table:table-cell table:formula="of:=[.B2685]/[.C2685]" office:value-type="float" office:value="0.00248518518518519" calcext:value-type="float">
            <text:p>0,00248518518518519000</text:p>
          </table:table-cell>
          <table:table-cell table:formula="of:=[.D2686]-[.D26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table:formula="of:=[.B2685]+8" office:value-type="float" office:value="21480" calcext:value-type="float">
            <text:p>21480</text:p>
          </table:table-cell>
          <table:table-cell office:value-type="float" office:value="8640000" calcext:value-type="float">
            <text:p>8640000</text:p>
          </table:table-cell>
          <table:table-cell table:formula="of:=[.B2686]/[.C2686]" office:value-type="float" office:value="0.00248611111111111" calcext:value-type="float">
            <text:p>0,00248611111111111000</text:p>
          </table:table-cell>
          <table:table-cell table:formula="of:=[.D2687]-[.D26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table:formula="of:=[.B2686]+8" office:value-type="float" office:value="21488" calcext:value-type="float">
            <text:p>21488</text:p>
          </table:table-cell>
          <table:table-cell office:value-type="float" office:value="8640000" calcext:value-type="float">
            <text:p>8640000</text:p>
          </table:table-cell>
          <table:table-cell table:formula="of:=[.B2687]/[.C2687]" office:value-type="float" office:value="0.00248703703703704" calcext:value-type="float">
            <text:p>0,00248703703703704000</text:p>
          </table:table-cell>
          <table:table-cell table:formula="of:=[.D2688]-[.D26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table:formula="of:=[.B2687]+8" office:value-type="float" office:value="21496" calcext:value-type="float">
            <text:p>21496</text:p>
          </table:table-cell>
          <table:table-cell office:value-type="float" office:value="8640000" calcext:value-type="float">
            <text:p>8640000</text:p>
          </table:table-cell>
          <table:table-cell table:formula="of:=[.B2688]/[.C2688]" office:value-type="float" office:value="0.00248796296296296" calcext:value-type="float">
            <text:p>0,00248796296296296000</text:p>
          </table:table-cell>
          <table:table-cell table:formula="of:=[.D2689]-[.D26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table:formula="of:=[.B2688]+8" office:value-type="float" office:value="21504" calcext:value-type="float">
            <text:p>21504</text:p>
          </table:table-cell>
          <table:table-cell office:value-type="float" office:value="8640000" calcext:value-type="float">
            <text:p>8640000</text:p>
          </table:table-cell>
          <table:table-cell table:formula="of:=[.B2689]/[.C2689]" office:value-type="float" office:value="0.00248888888888889" calcext:value-type="float">
            <text:p>0,00248888888888889000</text:p>
          </table:table-cell>
          <table:table-cell table:formula="of:=[.D2690]-[.D26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table:formula="of:=[.B2689]+8" office:value-type="float" office:value="21512" calcext:value-type="float">
            <text:p>21512</text:p>
          </table:table-cell>
          <table:table-cell office:value-type="float" office:value="8640000" calcext:value-type="float">
            <text:p>8640000</text:p>
          </table:table-cell>
          <table:table-cell table:formula="of:=[.B2690]/[.C2690]" office:value-type="float" office:value="0.00248981481481482" calcext:value-type="float">
            <text:p>0,00248981481481482000</text:p>
          </table:table-cell>
          <table:table-cell table:formula="of:=[.D2691]-[.D26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table:formula="of:=[.B2690]+8" office:value-type="float" office:value="21520" calcext:value-type="float">
            <text:p>21520</text:p>
          </table:table-cell>
          <table:table-cell office:value-type="float" office:value="8640000" calcext:value-type="float">
            <text:p>8640000</text:p>
          </table:table-cell>
          <table:table-cell table:formula="of:=[.B2691]/[.C2691]" office:value-type="float" office:value="0.00249074074074074" calcext:value-type="float">
            <text:p>0,00249074074074074000</text:p>
          </table:table-cell>
          <table:table-cell table:formula="of:=[.D2692]-[.D26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table:formula="of:=[.B2691]+8" office:value-type="float" office:value="21528" calcext:value-type="float">
            <text:p>21528</text:p>
          </table:table-cell>
          <table:table-cell office:value-type="float" office:value="8640000" calcext:value-type="float">
            <text:p>8640000</text:p>
          </table:table-cell>
          <table:table-cell table:formula="of:=[.B2692]/[.C2692]" office:value-type="float" office:value="0.00249166666666667" calcext:value-type="float">
            <text:p>0,00249166666666667000</text:p>
          </table:table-cell>
          <table:table-cell table:formula="of:=[.D2693]-[.D26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table:formula="of:=[.B2692]+8" office:value-type="float" office:value="21536" calcext:value-type="float">
            <text:p>21536</text:p>
          </table:table-cell>
          <table:table-cell office:value-type="float" office:value="8640000" calcext:value-type="float">
            <text:p>8640000</text:p>
          </table:table-cell>
          <table:table-cell table:formula="of:=[.B2693]/[.C2693]" office:value-type="float" office:value="0.00249259259259259" calcext:value-type="float">
            <text:p>0,00249259259259259000</text:p>
          </table:table-cell>
          <table:table-cell table:formula="of:=[.D2694]-[.D26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table:formula="of:=[.B2693]+8" office:value-type="float" office:value="21544" calcext:value-type="float">
            <text:p>21544</text:p>
          </table:table-cell>
          <table:table-cell office:value-type="float" office:value="8640000" calcext:value-type="float">
            <text:p>8640000</text:p>
          </table:table-cell>
          <table:table-cell table:formula="of:=[.B2694]/[.C2694]" office:value-type="float" office:value="0.00249351851851852" calcext:value-type="float">
            <text:p>0,00249351851851852000</text:p>
          </table:table-cell>
          <table:table-cell table:formula="of:=[.D2695]-[.D26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table:formula="of:=[.B2694]+8" office:value-type="float" office:value="21552" calcext:value-type="float">
            <text:p>21552</text:p>
          </table:table-cell>
          <table:table-cell office:value-type="float" office:value="8640000" calcext:value-type="float">
            <text:p>8640000</text:p>
          </table:table-cell>
          <table:table-cell table:formula="of:=[.B2695]/[.C2695]" office:value-type="float" office:value="0.00249444444444444" calcext:value-type="float">
            <text:p>0,00249444444444444000</text:p>
          </table:table-cell>
          <table:table-cell table:formula="of:=[.D2696]-[.D26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table:formula="of:=[.B2695]+8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2696]/[.C2696]" office:value-type="float" office:value="0.00249537037037037" calcext:value-type="float">
            <text:p>0,00249537037037037000</text:p>
          </table:table-cell>
          <table:table-cell table:formula="of:=[.D2697]-[.D26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table:formula="of:=[.B2696]+8" office:value-type="float" office:value="21568" calcext:value-type="float">
            <text:p>21568</text:p>
          </table:table-cell>
          <table:table-cell office:value-type="float" office:value="8640000" calcext:value-type="float">
            <text:p>8640000</text:p>
          </table:table-cell>
          <table:table-cell table:formula="of:=[.B2697]/[.C2697]" office:value-type="float" office:value="0.0024962962962963" calcext:value-type="float">
            <text:p>0,00249629629629630000</text:p>
          </table:table-cell>
          <table:table-cell table:formula="of:=[.D2698]-[.D26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table:formula="of:=[.B2697]+8" office:value-type="float" office:value="21576" calcext:value-type="float">
            <text:p>21576</text:p>
          </table:table-cell>
          <table:table-cell office:value-type="float" office:value="8640000" calcext:value-type="float">
            <text:p>8640000</text:p>
          </table:table-cell>
          <table:table-cell table:formula="of:=[.B2698]/[.C2698]" office:value-type="float" office:value="0.00249722222222222" calcext:value-type="float">
            <text:p>0,00249722222222222000</text:p>
          </table:table-cell>
          <table:table-cell table:formula="of:=[.D2699]-[.D26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table:formula="of:=[.B2698]+8" office:value-type="float" office:value="21584" calcext:value-type="float">
            <text:p>21584</text:p>
          </table:table-cell>
          <table:table-cell office:value-type="float" office:value="8640000" calcext:value-type="float">
            <text:p>8640000</text:p>
          </table:table-cell>
          <table:table-cell table:formula="of:=[.B2699]/[.C2699]" office:value-type="float" office:value="0.00249814814814815" calcext:value-type="float">
            <text:p>0,00249814814814815000</text:p>
          </table:table-cell>
          <table:table-cell table:formula="of:=[.D2700]-[.D26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table:formula="of:=[.B2699]+8" office:value-type="float" office:value="21592" calcext:value-type="float">
            <text:p>21592</text:p>
          </table:table-cell>
          <table:table-cell office:value-type="float" office:value="8640000" calcext:value-type="float">
            <text:p>8640000</text:p>
          </table:table-cell>
          <table:table-cell table:formula="of:=[.B2700]/[.C2700]" office:value-type="float" office:value="0.00249907407407407" calcext:value-type="float">
            <text:p>0,00249907407407407000</text:p>
          </table:table-cell>
          <table:table-cell table:formula="of:=[.D2701]-[.D27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.B2700]+8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2701]/[.C2701]" office:value-type="float" office:value="0.0025" calcext:value-type="float">
            <text:p>0,00250000000000000000</text:p>
          </table:table-cell>
          <table:table-cell table:formula="of:=[.D2702]-[.D27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table:formula="of:=[.B2701]+8" office:value-type="float" office:value="21608" calcext:value-type="float">
            <text:p>21608</text:p>
          </table:table-cell>
          <table:table-cell office:value-type="float" office:value="8640000" calcext:value-type="float">
            <text:p>8640000</text:p>
          </table:table-cell>
          <table:table-cell table:formula="of:=[.B2702]/[.C2702]" office:value-type="float" office:value="0.00250092592592593" calcext:value-type="float">
            <text:p>0,00250092592592593000</text:p>
          </table:table-cell>
          <table:table-cell table:formula="of:=[.D2703]-[.D27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table:formula="of:=[.B2702]+8" office:value-type="float" office:value="21616" calcext:value-type="float">
            <text:p>21616</text:p>
          </table:table-cell>
          <table:table-cell office:value-type="float" office:value="8640000" calcext:value-type="float">
            <text:p>8640000</text:p>
          </table:table-cell>
          <table:table-cell table:formula="of:=[.B2703]/[.C2703]" office:value-type="float" office:value="0.00250185185185185" calcext:value-type="float">
            <text:p>0,00250185185185185000</text:p>
          </table:table-cell>
          <table:table-cell table:formula="of:=[.D2704]-[.D27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table:formula="of:=[.B2703]+8" office:value-type="float" office:value="21624" calcext:value-type="float">
            <text:p>21624</text:p>
          </table:table-cell>
          <table:table-cell office:value-type="float" office:value="8640000" calcext:value-type="float">
            <text:p>8640000</text:p>
          </table:table-cell>
          <table:table-cell table:formula="of:=[.B2704]/[.C2704]" office:value-type="float" office:value="0.00250277777777778" calcext:value-type="float">
            <text:p>0,00250277777777778000</text:p>
          </table:table-cell>
          <table:table-cell table:formula="of:=[.D2705]-[.D27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table:formula="of:=[.B2704]+8" office:value-type="float" office:value="21632" calcext:value-type="float">
            <text:p>21632</text:p>
          </table:table-cell>
          <table:table-cell office:value-type="float" office:value="8640000" calcext:value-type="float">
            <text:p>8640000</text:p>
          </table:table-cell>
          <table:table-cell table:formula="of:=[.B2705]/[.C2705]" office:value-type="float" office:value="0.0025037037037037" calcext:value-type="float">
            <text:p>0,00250370370370370000</text:p>
          </table:table-cell>
          <table:table-cell table:formula="of:=[.D2706]-[.D27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[.B2705]+8" office:value-type="float" office:value="21640" calcext:value-type="float">
            <text:p>21640</text:p>
          </table:table-cell>
          <table:table-cell office:value-type="float" office:value="8640000" calcext:value-type="float">
            <text:p>8640000</text:p>
          </table:table-cell>
          <table:table-cell table:formula="of:=[.B2706]/[.C2706]" office:value-type="float" office:value="0.00250462962962963" calcext:value-type="float">
            <text:p>0,00250462962962963000</text:p>
          </table:table-cell>
          <table:table-cell table:formula="of:=[.D2707]-[.D27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table:formula="of:=[.B2706]+8" office:value-type="float" office:value="21648" calcext:value-type="float">
            <text:p>21648</text:p>
          </table:table-cell>
          <table:table-cell office:value-type="float" office:value="8640000" calcext:value-type="float">
            <text:p>8640000</text:p>
          </table:table-cell>
          <table:table-cell table:formula="of:=[.B2707]/[.C2707]" office:value-type="float" office:value="0.00250555555555556" calcext:value-type="float">
            <text:p>0,00250555555555556000</text:p>
          </table:table-cell>
          <table:table-cell table:formula="of:=[.D2708]-[.D27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[.B2707]+8" office:value-type="float" office:value="21656" calcext:value-type="float">
            <text:p>21656</text:p>
          </table:table-cell>
          <table:table-cell office:value-type="float" office:value="8640000" calcext:value-type="float">
            <text:p>8640000</text:p>
          </table:table-cell>
          <table:table-cell table:formula="of:=[.B2708]/[.C2708]" office:value-type="float" office:value="0.00250648148148148" calcext:value-type="float">
            <text:p>0,00250648148148148000</text:p>
          </table:table-cell>
          <table:table-cell table:formula="of:=[.D2709]-[.D27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table:formula="of:=[.B2708]+8" office:value-type="float" office:value="21664" calcext:value-type="float">
            <text:p>21664</text:p>
          </table:table-cell>
          <table:table-cell office:value-type="float" office:value="8640000" calcext:value-type="float">
            <text:p>8640000</text:p>
          </table:table-cell>
          <table:table-cell table:formula="of:=[.B2709]/[.C2709]" office:value-type="float" office:value="0.00250740740740741" calcext:value-type="float">
            <text:p>0,00250740740740741000</text:p>
          </table:table-cell>
          <table:table-cell table:formula="of:=[.D2710]-[.D27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table:formula="of:=[.B2709]+8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2710]/[.C2710]" office:value-type="float" office:value="0.00250833333333333" calcext:value-type="float">
            <text:p>0,00250833333333333000</text:p>
          </table:table-cell>
          <table:table-cell table:formula="of:=[.D2711]-[.D27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table:formula="of:=[.B2710]+8" office:value-type="float" office:value="21680" calcext:value-type="float">
            <text:p>21680</text:p>
          </table:table-cell>
          <table:table-cell office:value-type="float" office:value="8640000" calcext:value-type="float">
            <text:p>8640000</text:p>
          </table:table-cell>
          <table:table-cell table:formula="of:=[.B2711]/[.C2711]" office:value-type="float" office:value="0.00250925925925926" calcext:value-type="float">
            <text:p>0,00250925925925926000</text:p>
          </table:table-cell>
          <table:table-cell table:formula="of:=[.D2712]-[.D27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table:formula="of:=[.B2711]+8" office:value-type="float" office:value="21688" calcext:value-type="float">
            <text:p>21688</text:p>
          </table:table-cell>
          <table:table-cell office:value-type="float" office:value="8640000" calcext:value-type="float">
            <text:p>8640000</text:p>
          </table:table-cell>
          <table:table-cell table:formula="of:=[.B2712]/[.C2712]" office:value-type="float" office:value="0.00251018518518519" calcext:value-type="float">
            <text:p>0,00251018518518519000</text:p>
          </table:table-cell>
          <table:table-cell table:formula="of:=[.D2713]-[.D27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table:formula="of:=[.B2712]+8" office:value-type="float" office:value="21696" calcext:value-type="float">
            <text:p>21696</text:p>
          </table:table-cell>
          <table:table-cell office:value-type="float" office:value="8640000" calcext:value-type="float">
            <text:p>8640000</text:p>
          </table:table-cell>
          <table:table-cell table:formula="of:=[.B2713]/[.C2713]" office:value-type="float" office:value="0.00251111111111111" calcext:value-type="float">
            <text:p>0,00251111111111111000</text:p>
          </table:table-cell>
          <table:table-cell table:formula="of:=[.D2714]-[.D27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table:formula="of:=[.B2713]+8" office:value-type="float" office:value="21704" calcext:value-type="float">
            <text:p>21704</text:p>
          </table:table-cell>
          <table:table-cell office:value-type="float" office:value="8640000" calcext:value-type="float">
            <text:p>8640000</text:p>
          </table:table-cell>
          <table:table-cell table:formula="of:=[.B2714]/[.C2714]" office:value-type="float" office:value="0.00251203703703704" calcext:value-type="float">
            <text:p>0,00251203703703704000</text:p>
          </table:table-cell>
          <table:table-cell table:formula="of:=[.D2715]-[.D27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table:formula="of:=[.B2714]+8" office:value-type="float" office:value="21712" calcext:value-type="float">
            <text:p>21712</text:p>
          </table:table-cell>
          <table:table-cell office:value-type="float" office:value="8640000" calcext:value-type="float">
            <text:p>8640000</text:p>
          </table:table-cell>
          <table:table-cell table:formula="of:=[.B2715]/[.C2715]" office:value-type="float" office:value="0.00251296296296296" calcext:value-type="float">
            <text:p>0,00251296296296296000</text:p>
          </table:table-cell>
          <table:table-cell table:formula="of:=[.D2716]-[.D27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[.B2715]+8" office:value-type="float" office:value="21720" calcext:value-type="float">
            <text:p>21720</text:p>
          </table:table-cell>
          <table:table-cell office:value-type="float" office:value="8640000" calcext:value-type="float">
            <text:p>8640000</text:p>
          </table:table-cell>
          <table:table-cell table:formula="of:=[.B2716]/[.C2716]" office:value-type="float" office:value="0.00251388888888889" calcext:value-type="float">
            <text:p>0,00251388888888889000</text:p>
          </table:table-cell>
          <table:table-cell table:formula="of:=[.D2717]-[.D27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table:formula="of:=[.B2716]+8" office:value-type="float" office:value="21728" calcext:value-type="float">
            <text:p>21728</text:p>
          </table:table-cell>
          <table:table-cell office:value-type="float" office:value="8640000" calcext:value-type="float">
            <text:p>8640000</text:p>
          </table:table-cell>
          <table:table-cell table:formula="of:=[.B2717]/[.C2717]" office:value-type="float" office:value="0.00251481481481481" calcext:value-type="float">
            <text:p>0,00251481481481481000</text:p>
          </table:table-cell>
          <table:table-cell table:formula="of:=[.D2718]-[.D27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table:formula="of:=[.B2717]+8" office:value-type="float" office:value="21736" calcext:value-type="float">
            <text:p>21736</text:p>
          </table:table-cell>
          <table:table-cell office:value-type="float" office:value="8640000" calcext:value-type="float">
            <text:p>8640000</text:p>
          </table:table-cell>
          <table:table-cell table:formula="of:=[.B2718]/[.C2718]" office:value-type="float" office:value="0.00251574074074074" calcext:value-type="float">
            <text:p>0,00251574074074074000</text:p>
          </table:table-cell>
          <table:table-cell table:formula="of:=[.D2719]-[.D27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table:formula="of:=[.B2718]+8" office:value-type="float" office:value="21744" calcext:value-type="float">
            <text:p>21744</text:p>
          </table:table-cell>
          <table:table-cell office:value-type="float" office:value="8640000" calcext:value-type="float">
            <text:p>8640000</text:p>
          </table:table-cell>
          <table:table-cell table:formula="of:=[.B2719]/[.C2719]" office:value-type="float" office:value="0.00251666666666667" calcext:value-type="float">
            <text:p>0,00251666666666667000</text:p>
          </table:table-cell>
          <table:table-cell table:formula="of:=[.D2720]-[.D27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table:formula="of:=[.B2719]+8" office:value-type="float" office:value="21752" calcext:value-type="float">
            <text:p>21752</text:p>
          </table:table-cell>
          <table:table-cell office:value-type="float" office:value="8640000" calcext:value-type="float">
            <text:p>8640000</text:p>
          </table:table-cell>
          <table:table-cell table:formula="of:=[.B2720]/[.C2720]" office:value-type="float" office:value="0.00251759259259259" calcext:value-type="float">
            <text:p>0,00251759259259259000</text:p>
          </table:table-cell>
          <table:table-cell table:formula="of:=[.D2721]-[.D27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[.B2720]+8" office:value-type="float" office:value="21760" calcext:value-type="float">
            <text:p>21760</text:p>
          </table:table-cell>
          <table:table-cell office:value-type="float" office:value="8640000" calcext:value-type="float">
            <text:p>8640000</text:p>
          </table:table-cell>
          <table:table-cell table:formula="of:=[.B2721]/[.C2721]" office:value-type="float" office:value="0.00251851851851852" calcext:value-type="float">
            <text:p>0,00251851851851852000</text:p>
          </table:table-cell>
          <table:table-cell table:formula="of:=[.D2722]-[.D27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[.B2721]+8" office:value-type="float" office:value="21768" calcext:value-type="float">
            <text:p>21768</text:p>
          </table:table-cell>
          <table:table-cell office:value-type="float" office:value="8640000" calcext:value-type="float">
            <text:p>8640000</text:p>
          </table:table-cell>
          <table:table-cell table:formula="of:=[.B2722]/[.C2722]" office:value-type="float" office:value="0.00251944444444444" calcext:value-type="float">
            <text:p>0,00251944444444444000</text:p>
          </table:table-cell>
          <table:table-cell table:formula="of:=[.D2723]-[.D27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table:formula="of:=[.B2722]+8" office:value-type="float" office:value="21776" calcext:value-type="float">
            <text:p>21776</text:p>
          </table:table-cell>
          <table:table-cell office:value-type="float" office:value="8640000" calcext:value-type="float">
            <text:p>8640000</text:p>
          </table:table-cell>
          <table:table-cell table:formula="of:=[.B2723]/[.C2723]" office:value-type="float" office:value="0.00252037037037037" calcext:value-type="float">
            <text:p>0,00252037037037037000</text:p>
          </table:table-cell>
          <table:table-cell table:formula="of:=[.D2724]-[.D27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table:formula="of:=[.B2723]+8" office:value-type="float" office:value="21784" calcext:value-type="float">
            <text:p>21784</text:p>
          </table:table-cell>
          <table:table-cell office:value-type="float" office:value="8640000" calcext:value-type="float">
            <text:p>8640000</text:p>
          </table:table-cell>
          <table:table-cell table:formula="of:=[.B2724]/[.C2724]" office:value-type="float" office:value="0.0025212962962963" calcext:value-type="float">
            <text:p>0,00252129629629630000</text:p>
          </table:table-cell>
          <table:table-cell table:formula="of:=[.D2725]-[.D27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table:formula="of:=[.B2724]+8" office:value-type="float" office:value="21792" calcext:value-type="float">
            <text:p>21792</text:p>
          </table:table-cell>
          <table:table-cell office:value-type="float" office:value="8640000" calcext:value-type="float">
            <text:p>8640000</text:p>
          </table:table-cell>
          <table:table-cell table:formula="of:=[.B2725]/[.C2725]" office:value-type="float" office:value="0.00252222222222222" calcext:value-type="float">
            <text:p>0,00252222222222222000</text:p>
          </table:table-cell>
          <table:table-cell table:formula="of:=[.D2726]-[.D27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table:formula="of:=[.B2725]+8" office:value-type="float" office:value="21800" calcext:value-type="float">
            <text:p>21800</text:p>
          </table:table-cell>
          <table:table-cell office:value-type="float" office:value="8640000" calcext:value-type="float">
            <text:p>8640000</text:p>
          </table:table-cell>
          <table:table-cell table:formula="of:=[.B2726]/[.C2726]" office:value-type="float" office:value="0.00252314814814815" calcext:value-type="float">
            <text:p>0,00252314814814815000</text:p>
          </table:table-cell>
          <table:table-cell table:formula="of:=[.D2727]-[.D27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table:formula="of:=[.B2726]+8" office:value-type="float" office:value="21808" calcext:value-type="float">
            <text:p>21808</text:p>
          </table:table-cell>
          <table:table-cell office:value-type="float" office:value="8640000" calcext:value-type="float">
            <text:p>8640000</text:p>
          </table:table-cell>
          <table:table-cell table:formula="of:=[.B2727]/[.C2727]" office:value-type="float" office:value="0.00252407407407407" calcext:value-type="float">
            <text:p>0,00252407407407407000</text:p>
          </table:table-cell>
          <table:table-cell table:formula="of:=[.D2728]-[.D27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table:formula="of:=[.B2727]+8" office:value-type="float" office:value="21816" calcext:value-type="float">
            <text:p>21816</text:p>
          </table:table-cell>
          <table:table-cell office:value-type="float" office:value="8640000" calcext:value-type="float">
            <text:p>8640000</text:p>
          </table:table-cell>
          <table:table-cell table:formula="of:=[.B2728]/[.C2728]" office:value-type="float" office:value="0.002525" calcext:value-type="float">
            <text:p>0,00252500000000000000</text:p>
          </table:table-cell>
          <table:table-cell table:formula="of:=[.D2729]-[.D27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table:formula="of:=[.B2728]+8" office:value-type="float" office:value="21824" calcext:value-type="float">
            <text:p>21824</text:p>
          </table:table-cell>
          <table:table-cell office:value-type="float" office:value="8640000" calcext:value-type="float">
            <text:p>8640000</text:p>
          </table:table-cell>
          <table:table-cell table:formula="of:=[.B2729]/[.C2729]" office:value-type="float" office:value="0.00252592592592593" calcext:value-type="float">
            <text:p>0,00252592592592593000</text:p>
          </table:table-cell>
          <table:table-cell table:formula="of:=[.D2730]-[.D27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table:formula="of:=[.B2729]+8" office:value-type="float" office:value="21832" calcext:value-type="float">
            <text:p>21832</text:p>
          </table:table-cell>
          <table:table-cell office:value-type="float" office:value="8640000" calcext:value-type="float">
            <text:p>8640000</text:p>
          </table:table-cell>
          <table:table-cell table:formula="of:=[.B2730]/[.C2730]" office:value-type="float" office:value="0.00252685185185185" calcext:value-type="float">
            <text:p>0,00252685185185185000</text:p>
          </table:table-cell>
          <table:table-cell table:formula="of:=[.D2731]-[.D27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table:formula="of:=[.B2730]+8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2731]/[.C2731]" office:value-type="float" office:value="0.00252777777777778" calcext:value-type="float">
            <text:p>0,00252777777777778000</text:p>
          </table:table-cell>
          <table:table-cell table:formula="of:=[.D2732]-[.D27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table:formula="of:=[.B2731]+8" office:value-type="float" office:value="21848" calcext:value-type="float">
            <text:p>21848</text:p>
          </table:table-cell>
          <table:table-cell office:value-type="float" office:value="8640000" calcext:value-type="float">
            <text:p>8640000</text:p>
          </table:table-cell>
          <table:table-cell table:formula="of:=[.B2732]/[.C2732]" office:value-type="float" office:value="0.0025287037037037" calcext:value-type="float">
            <text:p>0,00252870370370370000</text:p>
          </table:table-cell>
          <table:table-cell table:formula="of:=[.D2733]-[.D27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table:formula="of:=[.B2732]+8" office:value-type="float" office:value="21856" calcext:value-type="float">
            <text:p>21856</text:p>
          </table:table-cell>
          <table:table-cell office:value-type="float" office:value="8640000" calcext:value-type="float">
            <text:p>8640000</text:p>
          </table:table-cell>
          <table:table-cell table:formula="of:=[.B2733]/[.C2733]" office:value-type="float" office:value="0.00252962962962963" calcext:value-type="float">
            <text:p>0,00252962962962963000</text:p>
          </table:table-cell>
          <table:table-cell table:formula="of:=[.D2734]-[.D27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table:formula="of:=[.B2733]+8" office:value-type="float" office:value="21864" calcext:value-type="float">
            <text:p>21864</text:p>
          </table:table-cell>
          <table:table-cell office:value-type="float" office:value="8640000" calcext:value-type="float">
            <text:p>8640000</text:p>
          </table:table-cell>
          <table:table-cell table:formula="of:=[.B2734]/[.C2734]" office:value-type="float" office:value="0.00253055555555556" calcext:value-type="float">
            <text:p>0,00253055555555556000</text:p>
          </table:table-cell>
          <table:table-cell table:formula="of:=[.D2735]-[.D27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table:formula="of:=[.B2734]+8" office:value-type="float" office:value="21872" calcext:value-type="float">
            <text:p>21872</text:p>
          </table:table-cell>
          <table:table-cell office:value-type="float" office:value="8640000" calcext:value-type="float">
            <text:p>8640000</text:p>
          </table:table-cell>
          <table:table-cell table:formula="of:=[.B2735]/[.C2735]" office:value-type="float" office:value="0.00253148148148148" calcext:value-type="float">
            <text:p>0,00253148148148148000</text:p>
          </table:table-cell>
          <table:table-cell table:formula="of:=[.D2736]-[.D27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table:formula="of:=[.B2735]+8" office:value-type="float" office:value="21880" calcext:value-type="float">
            <text:p>21880</text:p>
          </table:table-cell>
          <table:table-cell office:value-type="float" office:value="8640000" calcext:value-type="float">
            <text:p>8640000</text:p>
          </table:table-cell>
          <table:table-cell table:formula="of:=[.B2736]/[.C2736]" office:value-type="float" office:value="0.00253240740740741" calcext:value-type="float">
            <text:p>0,00253240740740741000</text:p>
          </table:table-cell>
          <table:table-cell table:formula="of:=[.D2737]-[.D27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table:formula="of:=[.B2736]+8" office:value-type="float" office:value="21888" calcext:value-type="float">
            <text:p>21888</text:p>
          </table:table-cell>
          <table:table-cell office:value-type="float" office:value="8640000" calcext:value-type="float">
            <text:p>8640000</text:p>
          </table:table-cell>
          <table:table-cell table:formula="of:=[.B2737]/[.C2737]" office:value-type="float" office:value="0.00253333333333333" calcext:value-type="float">
            <text:p>0,00253333333333333000</text:p>
          </table:table-cell>
          <table:table-cell table:formula="of:=[.D2738]-[.D27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table:formula="of:=[.B2737]+8" office:value-type="float" office:value="21896" calcext:value-type="float">
            <text:p>21896</text:p>
          </table:table-cell>
          <table:table-cell office:value-type="float" office:value="8640000" calcext:value-type="float">
            <text:p>8640000</text:p>
          </table:table-cell>
          <table:table-cell table:formula="of:=[.B2738]/[.C2738]" office:value-type="float" office:value="0.00253425925925926" calcext:value-type="float">
            <text:p>0,00253425925925926000</text:p>
          </table:table-cell>
          <table:table-cell table:formula="of:=[.D2739]-[.D27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[.B2738]+8" office:value-type="float" office:value="21904" calcext:value-type="float">
            <text:p>21904</text:p>
          </table:table-cell>
          <table:table-cell office:value-type="float" office:value="8640000" calcext:value-type="float">
            <text:p>8640000</text:p>
          </table:table-cell>
          <table:table-cell table:formula="of:=[.B2739]/[.C2739]" office:value-type="float" office:value="0.00253518518518519" calcext:value-type="float">
            <text:p>0,00253518518518519000</text:p>
          </table:table-cell>
          <table:table-cell table:formula="of:=[.D2740]-[.D27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[.B2739]+8" office:value-type="float" office:value="21912" calcext:value-type="float">
            <text:p>21912</text:p>
          </table:table-cell>
          <table:table-cell office:value-type="float" office:value="8640000" calcext:value-type="float">
            <text:p>8640000</text:p>
          </table:table-cell>
          <table:table-cell table:formula="of:=[.B2740]/[.C2740]" office:value-type="float" office:value="0.00253611111111111" calcext:value-type="float">
            <text:p>0,00253611111111111000</text:p>
          </table:table-cell>
          <table:table-cell table:formula="of:=[.D2741]-[.D27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[.B2740]+8" office:value-type="float" office:value="21920" calcext:value-type="float">
            <text:p>21920</text:p>
          </table:table-cell>
          <table:table-cell office:value-type="float" office:value="8640000" calcext:value-type="float">
            <text:p>8640000</text:p>
          </table:table-cell>
          <table:table-cell table:formula="of:=[.B2741]/[.C2741]" office:value-type="float" office:value="0.00253703703703704" calcext:value-type="float">
            <text:p>0,00253703703703704000</text:p>
          </table:table-cell>
          <table:table-cell table:formula="of:=[.D2742]-[.D27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[.B2741]+8" office:value-type="float" office:value="21928" calcext:value-type="float">
            <text:p>21928</text:p>
          </table:table-cell>
          <table:table-cell office:value-type="float" office:value="8640000" calcext:value-type="float">
            <text:p>8640000</text:p>
          </table:table-cell>
          <table:table-cell table:formula="of:=[.B2742]/[.C2742]" office:value-type="float" office:value="0.00253796296296296" calcext:value-type="float">
            <text:p>0,00253796296296296000</text:p>
          </table:table-cell>
          <table:table-cell table:formula="of:=[.D2743]-[.D27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table:formula="of:=[.B2742]+8" office:value-type="float" office:value="21936" calcext:value-type="float">
            <text:p>21936</text:p>
          </table:table-cell>
          <table:table-cell office:value-type="float" office:value="8640000" calcext:value-type="float">
            <text:p>8640000</text:p>
          </table:table-cell>
          <table:table-cell table:formula="of:=[.B2743]/[.C2743]" office:value-type="float" office:value="0.00253888888888889" calcext:value-type="float">
            <text:p>0,00253888888888889000</text:p>
          </table:table-cell>
          <table:table-cell table:formula="of:=[.D2744]-[.D27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table:formula="of:=[.B2743]+8" office:value-type="float" office:value="21944" calcext:value-type="float">
            <text:p>21944</text:p>
          </table:table-cell>
          <table:table-cell office:value-type="float" office:value="8640000" calcext:value-type="float">
            <text:p>8640000</text:p>
          </table:table-cell>
          <table:table-cell table:formula="of:=[.B2744]/[.C2744]" office:value-type="float" office:value="0.00253981481481481" calcext:value-type="float">
            <text:p>0,00253981481481481000</text:p>
          </table:table-cell>
          <table:table-cell table:formula="of:=[.D2745]-[.D27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[.B2744]+8" office:value-type="float" office:value="21952" calcext:value-type="float">
            <text:p>21952</text:p>
          </table:table-cell>
          <table:table-cell office:value-type="float" office:value="8640000" calcext:value-type="float">
            <text:p>8640000</text:p>
          </table:table-cell>
          <table:table-cell table:formula="of:=[.B2745]/[.C2745]" office:value-type="float" office:value="0.00254074074074074" calcext:value-type="float">
            <text:p>0,00254074074074074000</text:p>
          </table:table-cell>
          <table:table-cell table:formula="of:=[.D2746]-[.D27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[.B2745]+8" office:value-type="float" office:value="21960" calcext:value-type="float">
            <text:p>21960</text:p>
          </table:table-cell>
          <table:table-cell office:value-type="float" office:value="8640000" calcext:value-type="float">
            <text:p>8640000</text:p>
          </table:table-cell>
          <table:table-cell table:formula="of:=[.B2746]/[.C2746]" office:value-type="float" office:value="0.00254166666666667" calcext:value-type="float">
            <text:p>0,00254166666666667000</text:p>
          </table:table-cell>
          <table:table-cell table:formula="of:=[.D2747]-[.D27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[.B2746]+8" office:value-type="float" office:value="21968" calcext:value-type="float">
            <text:p>21968</text:p>
          </table:table-cell>
          <table:table-cell office:value-type="float" office:value="8640000" calcext:value-type="float">
            <text:p>8640000</text:p>
          </table:table-cell>
          <table:table-cell table:formula="of:=[.B2747]/[.C2747]" office:value-type="float" office:value="0.00254259259259259" calcext:value-type="float">
            <text:p>0,00254259259259259000</text:p>
          </table:table-cell>
          <table:table-cell table:formula="of:=[.D2748]-[.D27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table:formula="of:=[.B2747]+8" office:value-type="float" office:value="21976" calcext:value-type="float">
            <text:p>21976</text:p>
          </table:table-cell>
          <table:table-cell office:value-type="float" office:value="8640000" calcext:value-type="float">
            <text:p>8640000</text:p>
          </table:table-cell>
          <table:table-cell table:formula="of:=[.B2748]/[.C2748]" office:value-type="float" office:value="0.00254351851851852" calcext:value-type="float">
            <text:p>0,00254351851851852000</text:p>
          </table:table-cell>
          <table:table-cell table:formula="of:=[.D2749]-[.D2748]" office:value-type="float" office:value="0.000000925925925926354" calcext:value-type="float">
            <text:p>0,00000092592592592635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table:formula="of:=[.B2748]+8" office:value-type="float" office:value="21984" calcext:value-type="float">
            <text:p>21984</text:p>
          </table:table-cell>
          <table:table-cell office:value-type="float" office:value="8640000" calcext:value-type="float">
            <text:p>8640000</text:p>
          </table:table-cell>
          <table:table-cell table:formula="of:=[.B2749]/[.C2749]" office:value-type="float" office:value="0.00254444444444444" calcext:value-type="float">
            <text:p>0,00254444444444444000</text:p>
          </table:table-cell>
          <table:table-cell table:formula="of:=[.D2750]-[.D27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table:formula="of:=[.B2749]+8" office:value-type="float" office:value="21992" calcext:value-type="float">
            <text:p>21992</text:p>
          </table:table-cell>
          <table:table-cell office:value-type="float" office:value="8640000" calcext:value-type="float">
            <text:p>8640000</text:p>
          </table:table-cell>
          <table:table-cell table:formula="of:=[.B2750]/[.C2750]" office:value-type="float" office:value="0.00254537037037037" calcext:value-type="float">
            <text:p>0,00254537037037037000</text:p>
          </table:table-cell>
          <table:table-cell table:formula="of:=[.D2751]-[.D27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[.B2750]+8" office:value-type="float" office:value="22000" calcext:value-type="float">
            <text:p>22000</text:p>
          </table:table-cell>
          <table:table-cell office:value-type="float" office:value="8640000" calcext:value-type="float">
            <text:p>8640000</text:p>
          </table:table-cell>
          <table:table-cell table:formula="of:=[.B2751]/[.C2751]" office:value-type="float" office:value="0.0025462962962963" calcext:value-type="float">
            <text:p>0,00254629629629630000</text:p>
          </table:table-cell>
          <table:table-cell table:formula="of:=[.D2752]-[.D27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table:formula="of:=[.B2751]+8" office:value-type="float" office:value="22008" calcext:value-type="float">
            <text:p>22008</text:p>
          </table:table-cell>
          <table:table-cell office:value-type="float" office:value="8640000" calcext:value-type="float">
            <text:p>8640000</text:p>
          </table:table-cell>
          <table:table-cell table:formula="of:=[.B2752]/[.C2752]" office:value-type="float" office:value="0.00254722222222222" calcext:value-type="float">
            <text:p>0,00254722222222222000</text:p>
          </table:table-cell>
          <table:table-cell table:formula="of:=[.D2753]-[.D27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[.B2752]+8" office:value-type="float" office:value="22016" calcext:value-type="float">
            <text:p>22016</text:p>
          </table:table-cell>
          <table:table-cell office:value-type="float" office:value="8640000" calcext:value-type="float">
            <text:p>8640000</text:p>
          </table:table-cell>
          <table:table-cell table:formula="of:=[.B2753]/[.C2753]" office:value-type="float" office:value="0.00254814814814815" calcext:value-type="float">
            <text:p>0,00254814814814815000</text:p>
          </table:table-cell>
          <table:table-cell table:formula="of:=[.D2754]-[.D27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table:formula="of:=[.B2753]+8" office:value-type="float" office:value="22024" calcext:value-type="float">
            <text:p>22024</text:p>
          </table:table-cell>
          <table:table-cell office:value-type="float" office:value="8640000" calcext:value-type="float">
            <text:p>8640000</text:p>
          </table:table-cell>
          <table:table-cell table:formula="of:=[.B2754]/[.C2754]" office:value-type="float" office:value="0.00254907407407407" calcext:value-type="float">
            <text:p>0,00254907407407407000</text:p>
          </table:table-cell>
          <table:table-cell table:formula="of:=[.D2755]-[.D27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table:formula="of:=[.B2754]+8" office:value-type="float" office:value="22032" calcext:value-type="float">
            <text:p>22032</text:p>
          </table:table-cell>
          <table:table-cell office:value-type="float" office:value="8640000" calcext:value-type="float">
            <text:p>8640000</text:p>
          </table:table-cell>
          <table:table-cell table:formula="of:=[.B2755]/[.C2755]" office:value-type="float" office:value="0.00255" calcext:value-type="float">
            <text:p>0,00255000000000000000</text:p>
          </table:table-cell>
          <table:table-cell table:formula="of:=[.D2756]-[.D27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table:formula="of:=[.B2755]+8" office:value-type="float" office:value="22040" calcext:value-type="float">
            <text:p>22040</text:p>
          </table:table-cell>
          <table:table-cell office:value-type="float" office:value="8640000" calcext:value-type="float">
            <text:p>8640000</text:p>
          </table:table-cell>
          <table:table-cell table:formula="of:=[.B2756]/[.C2756]" office:value-type="float" office:value="0.00255092592592593" calcext:value-type="float">
            <text:p>0,00255092592592593000</text:p>
          </table:table-cell>
          <table:table-cell table:formula="of:=[.D2757]-[.D27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[.B2756]+8" office:value-type="float" office:value="22048" calcext:value-type="float">
            <text:p>22048</text:p>
          </table:table-cell>
          <table:table-cell office:value-type="float" office:value="8640000" calcext:value-type="float">
            <text:p>8640000</text:p>
          </table:table-cell>
          <table:table-cell table:formula="of:=[.B2757]/[.C2757]" office:value-type="float" office:value="0.00255185185185185" calcext:value-type="float">
            <text:p>0,00255185185185185000</text:p>
          </table:table-cell>
          <table:table-cell table:formula="of:=[.D2758]-[.D27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table:formula="of:=[.B2757]+8" office:value-type="float" office:value="22056" calcext:value-type="float">
            <text:p>22056</text:p>
          </table:table-cell>
          <table:table-cell office:value-type="float" office:value="8640000" calcext:value-type="float">
            <text:p>8640000</text:p>
          </table:table-cell>
          <table:table-cell table:formula="of:=[.B2758]/[.C2758]" office:value-type="float" office:value="0.00255277777777778" calcext:value-type="float">
            <text:p>0,00255277777777778000</text:p>
          </table:table-cell>
          <table:table-cell table:formula="of:=[.D2759]-[.D27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table:formula="of:=[.B2758]+8" office:value-type="float" office:value="22064" calcext:value-type="float">
            <text:p>22064</text:p>
          </table:table-cell>
          <table:table-cell office:value-type="float" office:value="8640000" calcext:value-type="float">
            <text:p>8640000</text:p>
          </table:table-cell>
          <table:table-cell table:formula="of:=[.B2759]/[.C2759]" office:value-type="float" office:value="0.0025537037037037" calcext:value-type="float">
            <text:p>0,00255370370370370000</text:p>
          </table:table-cell>
          <table:table-cell table:formula="of:=[.D2760]-[.D27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table:formula="of:=[.B2759]+8" office:value-type="float" office:value="22072" calcext:value-type="float">
            <text:p>22072</text:p>
          </table:table-cell>
          <table:table-cell office:value-type="float" office:value="8640000" calcext:value-type="float">
            <text:p>8640000</text:p>
          </table:table-cell>
          <table:table-cell table:formula="of:=[.B2760]/[.C2760]" office:value-type="float" office:value="0.00255462962962963" calcext:value-type="float">
            <text:p>0,00255462962962963000</text:p>
          </table:table-cell>
          <table:table-cell table:formula="of:=[.D2761]-[.D27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table:formula="of:=[.B2760]+8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2761]/[.C2761]" office:value-type="float" office:value="0.00255555555555556" calcext:value-type="float">
            <text:p>0,00255555555555556000</text:p>
          </table:table-cell>
          <table:table-cell table:formula="of:=[.D2762]-[.D27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table:formula="of:=[.B2761]+8" office:value-type="float" office:value="22088" calcext:value-type="float">
            <text:p>22088</text:p>
          </table:table-cell>
          <table:table-cell office:value-type="float" office:value="8640000" calcext:value-type="float">
            <text:p>8640000</text:p>
          </table:table-cell>
          <table:table-cell table:formula="of:=[.B2762]/[.C2762]" office:value-type="float" office:value="0.00255648148148148" calcext:value-type="float">
            <text:p>0,00255648148148148000</text:p>
          </table:table-cell>
          <table:table-cell table:formula="of:=[.D2763]-[.D27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[.B2762]+8" office:value-type="float" office:value="22096" calcext:value-type="float">
            <text:p>22096</text:p>
          </table:table-cell>
          <table:table-cell office:value-type="float" office:value="8640000" calcext:value-type="float">
            <text:p>8640000</text:p>
          </table:table-cell>
          <table:table-cell table:formula="of:=[.B2763]/[.C2763]" office:value-type="float" office:value="0.00255740740740741" calcext:value-type="float">
            <text:p>0,00255740740740741000</text:p>
          </table:table-cell>
          <table:table-cell table:formula="of:=[.D2764]-[.D27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table:formula="of:=[.B2763]+8" office:value-type="float" office:value="22104" calcext:value-type="float">
            <text:p>22104</text:p>
          </table:table-cell>
          <table:table-cell office:value-type="float" office:value="8640000" calcext:value-type="float">
            <text:p>8640000</text:p>
          </table:table-cell>
          <table:table-cell table:formula="of:=[.B2764]/[.C2764]" office:value-type="float" office:value="0.00255833333333333" calcext:value-type="float">
            <text:p>0,00255833333333333000</text:p>
          </table:table-cell>
          <table:table-cell table:formula="of:=[.D2765]-[.D27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table:formula="of:=[.B2764]+8" office:value-type="float" office:value="22112" calcext:value-type="float">
            <text:p>22112</text:p>
          </table:table-cell>
          <table:table-cell office:value-type="float" office:value="8640000" calcext:value-type="float">
            <text:p>8640000</text:p>
          </table:table-cell>
          <table:table-cell table:formula="of:=[.B2765]/[.C2765]" office:value-type="float" office:value="0.00255925925925926" calcext:value-type="float">
            <text:p>0,00255925925925926000</text:p>
          </table:table-cell>
          <table:table-cell table:formula="of:=[.D2766]-[.D27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[.B2765]+8" office:value-type="float" office:value="22120" calcext:value-type="float">
            <text:p>22120</text:p>
          </table:table-cell>
          <table:table-cell office:value-type="float" office:value="8640000" calcext:value-type="float">
            <text:p>8640000</text:p>
          </table:table-cell>
          <table:table-cell table:formula="of:=[.B2766]/[.C2766]" office:value-type="float" office:value="0.00256018518518519" calcext:value-type="float">
            <text:p>0,00256018518518519000</text:p>
          </table:table-cell>
          <table:table-cell table:formula="of:=[.D2767]-[.D27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table:formula="of:=[.B2766]+8" office:value-type="float" office:value="22128" calcext:value-type="float">
            <text:p>22128</text:p>
          </table:table-cell>
          <table:table-cell office:value-type="float" office:value="8640000" calcext:value-type="float">
            <text:p>8640000</text:p>
          </table:table-cell>
          <table:table-cell table:formula="of:=[.B2767]/[.C2767]" office:value-type="float" office:value="0.00256111111111111" calcext:value-type="float">
            <text:p>0,00256111111111111000</text:p>
          </table:table-cell>
          <table:table-cell table:formula="of:=[.D2768]-[.D27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[.B2767]+8" office:value-type="float" office:value="22136" calcext:value-type="float">
            <text:p>22136</text:p>
          </table:table-cell>
          <table:table-cell office:value-type="float" office:value="8640000" calcext:value-type="float">
            <text:p>8640000</text:p>
          </table:table-cell>
          <table:table-cell table:formula="of:=[.B2768]/[.C2768]" office:value-type="float" office:value="0.00256203703703704" calcext:value-type="float">
            <text:p>0,00256203703703704000</text:p>
          </table:table-cell>
          <table:table-cell table:formula="of:=[.D2769]-[.D27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table:formula="of:=[.B2768]+8" office:value-type="float" office:value="22144" calcext:value-type="float">
            <text:p>22144</text:p>
          </table:table-cell>
          <table:table-cell office:value-type="float" office:value="8640000" calcext:value-type="float">
            <text:p>8640000</text:p>
          </table:table-cell>
          <table:table-cell table:formula="of:=[.B2769]/[.C2769]" office:value-type="float" office:value="0.00256296296296296" calcext:value-type="float">
            <text:p>0,00256296296296296000</text:p>
          </table:table-cell>
          <table:table-cell table:formula="of:=[.D2770]-[.D27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table:formula="of:=[.B2769]+8" office:value-type="float" office:value="22152" calcext:value-type="float">
            <text:p>22152</text:p>
          </table:table-cell>
          <table:table-cell office:value-type="float" office:value="8640000" calcext:value-type="float">
            <text:p>8640000</text:p>
          </table:table-cell>
          <table:table-cell table:formula="of:=[.B2770]/[.C2770]" office:value-type="float" office:value="0.00256388888888889" calcext:value-type="float">
            <text:p>0,00256388888888889000</text:p>
          </table:table-cell>
          <table:table-cell table:formula="of:=[.D2771]-[.D27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table:formula="of:=[.B2770]+8" office:value-type="float" office:value="22160" calcext:value-type="float">
            <text:p>22160</text:p>
          </table:table-cell>
          <table:table-cell office:value-type="float" office:value="8640000" calcext:value-type="float">
            <text:p>8640000</text:p>
          </table:table-cell>
          <table:table-cell table:formula="of:=[.B2771]/[.C2771]" office:value-type="float" office:value="0.00256481481481482" calcext:value-type="float">
            <text:p>0,00256481481481482000</text:p>
          </table:table-cell>
          <table:table-cell table:formula="of:=[.D2772]-[.D27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[.B2771]+8" office:value-type="float" office:value="22168" calcext:value-type="float">
            <text:p>22168</text:p>
          </table:table-cell>
          <table:table-cell office:value-type="float" office:value="8640000" calcext:value-type="float">
            <text:p>8640000</text:p>
          </table:table-cell>
          <table:table-cell table:formula="of:=[.B2772]/[.C2772]" office:value-type="float" office:value="0.00256574074074074" calcext:value-type="float">
            <text:p>0,00256574074074074000</text:p>
          </table:table-cell>
          <table:table-cell table:formula="of:=[.D2773]-[.D27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table:formula="of:=[.B2772]+8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2773]/[.C2773]" office:value-type="float" office:value="0.00256666666666667" calcext:value-type="float">
            <text:p>0,00256666666666667000</text:p>
          </table:table-cell>
          <table:table-cell table:formula="of:=[.D2774]-[.D27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table:formula="of:=[.B2773]+8" office:value-type="float" office:value="22184" calcext:value-type="float">
            <text:p>22184</text:p>
          </table:table-cell>
          <table:table-cell office:value-type="float" office:value="8640000" calcext:value-type="float">
            <text:p>8640000</text:p>
          </table:table-cell>
          <table:table-cell table:formula="of:=[.B2774]/[.C2774]" office:value-type="float" office:value="0.00256759259259259" calcext:value-type="float">
            <text:p>0,00256759259259259000</text:p>
          </table:table-cell>
          <table:table-cell table:formula="of:=[.D2775]-[.D27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table:formula="of:=[.B2774]+8" office:value-type="float" office:value="22192" calcext:value-type="float">
            <text:p>22192</text:p>
          </table:table-cell>
          <table:table-cell office:value-type="float" office:value="8640000" calcext:value-type="float">
            <text:p>8640000</text:p>
          </table:table-cell>
          <table:table-cell table:formula="of:=[.B2775]/[.C2775]" office:value-type="float" office:value="0.00256851851851852" calcext:value-type="float">
            <text:p>0,00256851851851852000</text:p>
          </table:table-cell>
          <table:table-cell table:formula="of:=[.D2776]-[.D27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table:formula="of:=[.B2775]+8" office:value-type="float" office:value="22200" calcext:value-type="float">
            <text:p>22200</text:p>
          </table:table-cell>
          <table:table-cell office:value-type="float" office:value="8640000" calcext:value-type="float">
            <text:p>8640000</text:p>
          </table:table-cell>
          <table:table-cell table:formula="of:=[.B2776]/[.C2776]" office:value-type="float" office:value="0.00256944444444444" calcext:value-type="float">
            <text:p>0,00256944444444444000</text:p>
          </table:table-cell>
          <table:table-cell table:formula="of:=[.D2777]-[.D27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table:formula="of:=[.B2776]+8" office:value-type="float" office:value="22208" calcext:value-type="float">
            <text:p>22208</text:p>
          </table:table-cell>
          <table:table-cell office:value-type="float" office:value="8640000" calcext:value-type="float">
            <text:p>8640000</text:p>
          </table:table-cell>
          <table:table-cell table:formula="of:=[.B2777]/[.C2777]" office:value-type="float" office:value="0.00257037037037037" calcext:value-type="float">
            <text:p>0,00257037037037037000</text:p>
          </table:table-cell>
          <table:table-cell table:formula="of:=[.D2778]-[.D27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table:formula="of:=[.B2777]+8" office:value-type="float" office:value="22216" calcext:value-type="float">
            <text:p>22216</text:p>
          </table:table-cell>
          <table:table-cell office:value-type="float" office:value="8640000" calcext:value-type="float">
            <text:p>8640000</text:p>
          </table:table-cell>
          <table:table-cell table:formula="of:=[.B2778]/[.C2778]" office:value-type="float" office:value="0.0025712962962963" calcext:value-type="float">
            <text:p>0,00257129629629630000</text:p>
          </table:table-cell>
          <table:table-cell table:formula="of:=[.D2779]-[.D27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[.B2778]+8" office:value-type="float" office:value="22224" calcext:value-type="float">
            <text:p>22224</text:p>
          </table:table-cell>
          <table:table-cell office:value-type="float" office:value="8640000" calcext:value-type="float">
            <text:p>8640000</text:p>
          </table:table-cell>
          <table:table-cell table:formula="of:=[.B2779]/[.C2779]" office:value-type="float" office:value="0.00257222222222222" calcext:value-type="float">
            <text:p>0,00257222222222222000</text:p>
          </table:table-cell>
          <table:table-cell table:formula="of:=[.D2780]-[.D27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table:formula="of:=[.B2779]+8" office:value-type="float" office:value="22232" calcext:value-type="float">
            <text:p>22232</text:p>
          </table:table-cell>
          <table:table-cell office:value-type="float" office:value="8640000" calcext:value-type="float">
            <text:p>8640000</text:p>
          </table:table-cell>
          <table:table-cell table:formula="of:=[.B2780]/[.C2780]" office:value-type="float" office:value="0.00257314814814815" calcext:value-type="float">
            <text:p>0,00257314814814815000</text:p>
          </table:table-cell>
          <table:table-cell table:formula="of:=[.D2781]-[.D27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[.B2780]+8" office:value-type="float" office:value="22240" calcext:value-type="float">
            <text:p>22240</text:p>
          </table:table-cell>
          <table:table-cell office:value-type="float" office:value="8640000" calcext:value-type="float">
            <text:p>8640000</text:p>
          </table:table-cell>
          <table:table-cell table:formula="of:=[.B2781]/[.C2781]" office:value-type="float" office:value="0.00257407407407407" calcext:value-type="float">
            <text:p>0,00257407407407407000</text:p>
          </table:table-cell>
          <table:table-cell table:formula="of:=[.D2782]-[.D27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table:formula="of:=[.B2781]+8" office:value-type="float" office:value="22248" calcext:value-type="float">
            <text:p>22248</text:p>
          </table:table-cell>
          <table:table-cell office:value-type="float" office:value="8640000" calcext:value-type="float">
            <text:p>8640000</text:p>
          </table:table-cell>
          <table:table-cell table:formula="of:=[.B2782]/[.C2782]" office:value-type="float" office:value="0.002575" calcext:value-type="float">
            <text:p>0,00257500000000000000</text:p>
          </table:table-cell>
          <table:table-cell table:formula="of:=[.D2783]-[.D27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table:formula="of:=[.B2782]+8" office:value-type="float" office:value="22256" calcext:value-type="float">
            <text:p>22256</text:p>
          </table:table-cell>
          <table:table-cell office:value-type="float" office:value="8640000" calcext:value-type="float">
            <text:p>8640000</text:p>
          </table:table-cell>
          <table:table-cell table:formula="of:=[.B2783]/[.C2783]" office:value-type="float" office:value="0.00257592592592593" calcext:value-type="float">
            <text:p>0,00257592592592593000</text:p>
          </table:table-cell>
          <table:table-cell table:formula="of:=[.D2784]-[.D27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table:formula="of:=[.B2783]+8" office:value-type="float" office:value="22264" calcext:value-type="float">
            <text:p>22264</text:p>
          </table:table-cell>
          <table:table-cell office:value-type="float" office:value="8640000" calcext:value-type="float">
            <text:p>8640000</text:p>
          </table:table-cell>
          <table:table-cell table:formula="of:=[.B2784]/[.C2784]" office:value-type="float" office:value="0.00257685185185185" calcext:value-type="float">
            <text:p>0,00257685185185185000</text:p>
          </table:table-cell>
          <table:table-cell table:formula="of:=[.D2785]-[.D27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table:formula="of:=[.B2784]+8" office:value-type="float" office:value="22272" calcext:value-type="float">
            <text:p>22272</text:p>
          </table:table-cell>
          <table:table-cell office:value-type="float" office:value="8640000" calcext:value-type="float">
            <text:p>8640000</text:p>
          </table:table-cell>
          <table:table-cell table:formula="of:=[.B2785]/[.C2785]" office:value-type="float" office:value="0.00257777777777778" calcext:value-type="float">
            <text:p>0,00257777777777778000</text:p>
          </table:table-cell>
          <table:table-cell table:formula="of:=[.D2786]-[.D27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table:formula="of:=[.B2785]+8" office:value-type="float" office:value="22280" calcext:value-type="float">
            <text:p>22280</text:p>
          </table:table-cell>
          <table:table-cell office:value-type="float" office:value="8640000" calcext:value-type="float">
            <text:p>8640000</text:p>
          </table:table-cell>
          <table:table-cell table:formula="of:=[.B2786]/[.C2786]" office:value-type="float" office:value="0.0025787037037037" calcext:value-type="float">
            <text:p>0,00257870370370370000</text:p>
          </table:table-cell>
          <table:table-cell table:formula="of:=[.D2787]-[.D27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table:formula="of:=[.B2786]+8" office:value-type="float" office:value="22288" calcext:value-type="float">
            <text:p>22288</text:p>
          </table:table-cell>
          <table:table-cell office:value-type="float" office:value="8640000" calcext:value-type="float">
            <text:p>8640000</text:p>
          </table:table-cell>
          <table:table-cell table:formula="of:=[.B2787]/[.C2787]" office:value-type="float" office:value="0.00257962962962963" calcext:value-type="float">
            <text:p>0,00257962962962963000</text:p>
          </table:table-cell>
          <table:table-cell table:formula="of:=[.D2788]-[.D27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table:formula="of:=[.B2787]+8" office:value-type="float" office:value="22296" calcext:value-type="float">
            <text:p>22296</text:p>
          </table:table-cell>
          <table:table-cell office:value-type="float" office:value="8640000" calcext:value-type="float">
            <text:p>8640000</text:p>
          </table:table-cell>
          <table:table-cell table:formula="of:=[.B2788]/[.C2788]" office:value-type="float" office:value="0.00258055555555556" calcext:value-type="float">
            <text:p>0,00258055555555556000</text:p>
          </table:table-cell>
          <table:table-cell table:formula="of:=[.D2789]-[.D27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[.B2788]+8" office:value-type="float" office:value="22304" calcext:value-type="float">
            <text:p>22304</text:p>
          </table:table-cell>
          <table:table-cell office:value-type="float" office:value="8640000" calcext:value-type="float">
            <text:p>8640000</text:p>
          </table:table-cell>
          <table:table-cell table:formula="of:=[.B2789]/[.C2789]" office:value-type="float" office:value="0.00258148148148148" calcext:value-type="float">
            <text:p>0,00258148148148148000</text:p>
          </table:table-cell>
          <table:table-cell table:formula="of:=[.D2790]-[.D27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[.B2789]+8" office:value-type="float" office:value="22312" calcext:value-type="float">
            <text:p>22312</text:p>
          </table:table-cell>
          <table:table-cell office:value-type="float" office:value="8640000" calcext:value-type="float">
            <text:p>8640000</text:p>
          </table:table-cell>
          <table:table-cell table:formula="of:=[.B2790]/[.C2790]" office:value-type="float" office:value="0.00258240740740741" calcext:value-type="float">
            <text:p>0,00258240740740741000</text:p>
          </table:table-cell>
          <table:table-cell table:formula="of:=[.D2791]-[.D27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[.B2790]+8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2791]/[.C2791]" office:value-type="float" office:value="0.00258333333333333" calcext:value-type="float">
            <text:p>0,00258333333333333000</text:p>
          </table:table-cell>
          <table:table-cell table:formula="of:=[.D2792]-[.D27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table:formula="of:=[.B2791]+8" office:value-type="float" office:value="22328" calcext:value-type="float">
            <text:p>22328</text:p>
          </table:table-cell>
          <table:table-cell office:value-type="float" office:value="8640000" calcext:value-type="float">
            <text:p>8640000</text:p>
          </table:table-cell>
          <table:table-cell table:formula="of:=[.B2792]/[.C2792]" office:value-type="float" office:value="0.00258425925925926" calcext:value-type="float">
            <text:p>0,00258425925925926000</text:p>
          </table:table-cell>
          <table:table-cell table:formula="of:=[.D2793]-[.D27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table:formula="of:=[.B2792]+8" office:value-type="float" office:value="22336" calcext:value-type="float">
            <text:p>22336</text:p>
          </table:table-cell>
          <table:table-cell office:value-type="float" office:value="8640000" calcext:value-type="float">
            <text:p>8640000</text:p>
          </table:table-cell>
          <table:table-cell table:formula="of:=[.B2793]/[.C2793]" office:value-type="float" office:value="0.00258518518518519" calcext:value-type="float">
            <text:p>0,00258518518518519000</text:p>
          </table:table-cell>
          <table:table-cell table:formula="of:=[.D2794]-[.D27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table:formula="of:=[.B2793]+8" office:value-type="float" office:value="22344" calcext:value-type="float">
            <text:p>22344</text:p>
          </table:table-cell>
          <table:table-cell office:value-type="float" office:value="8640000" calcext:value-type="float">
            <text:p>8640000</text:p>
          </table:table-cell>
          <table:table-cell table:formula="of:=[.B2794]/[.C2794]" office:value-type="float" office:value="0.00258611111111111" calcext:value-type="float">
            <text:p>0,00258611111111111000</text:p>
          </table:table-cell>
          <table:table-cell table:formula="of:=[.D2795]-[.D27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table:formula="of:=[.B2794]+8" office:value-type="float" office:value="22352" calcext:value-type="float">
            <text:p>22352</text:p>
          </table:table-cell>
          <table:table-cell office:value-type="float" office:value="8640000" calcext:value-type="float">
            <text:p>8640000</text:p>
          </table:table-cell>
          <table:table-cell table:formula="of:=[.B2795]/[.C2795]" office:value-type="float" office:value="0.00258703703703704" calcext:value-type="float">
            <text:p>0,00258703703703704000</text:p>
          </table:table-cell>
          <table:table-cell table:formula="of:=[.D2796]-[.D27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formula="of:=[.B2795]+8" office:value-type="float" office:value="22360" calcext:value-type="float">
            <text:p>22360</text:p>
          </table:table-cell>
          <table:table-cell office:value-type="float" office:value="8640000" calcext:value-type="float">
            <text:p>8640000</text:p>
          </table:table-cell>
          <table:table-cell table:formula="of:=[.B2796]/[.C2796]" office:value-type="float" office:value="0.00258796296296296" calcext:value-type="float">
            <text:p>0,00258796296296296000</text:p>
          </table:table-cell>
          <table:table-cell table:formula="of:=[.D2797]-[.D27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table:formula="of:=[.B2796]+8" office:value-type="float" office:value="22368" calcext:value-type="float">
            <text:p>22368</text:p>
          </table:table-cell>
          <table:table-cell office:value-type="float" office:value="8640000" calcext:value-type="float">
            <text:p>8640000</text:p>
          </table:table-cell>
          <table:table-cell table:formula="of:=[.B2797]/[.C2797]" office:value-type="float" office:value="0.00258888888888889" calcext:value-type="float">
            <text:p>0,00258888888888889000</text:p>
          </table:table-cell>
          <table:table-cell table:formula="of:=[.D2798]-[.D27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table:formula="of:=[.B2797]+8" office:value-type="float" office:value="22376" calcext:value-type="float">
            <text:p>22376</text:p>
          </table:table-cell>
          <table:table-cell office:value-type="float" office:value="8640000" calcext:value-type="float">
            <text:p>8640000</text:p>
          </table:table-cell>
          <table:table-cell table:formula="of:=[.B2798]/[.C2798]" office:value-type="float" office:value="0.00258981481481481" calcext:value-type="float">
            <text:p>0,00258981481481481000</text:p>
          </table:table-cell>
          <table:table-cell table:formula="of:=[.D2799]-[.D27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table:formula="of:=[.B2798]+8" office:value-type="float" office:value="22384" calcext:value-type="float">
            <text:p>22384</text:p>
          </table:table-cell>
          <table:table-cell office:value-type="float" office:value="8640000" calcext:value-type="float">
            <text:p>8640000</text:p>
          </table:table-cell>
          <table:table-cell table:formula="of:=[.B2799]/[.C2799]" office:value-type="float" office:value="0.00259074074074074" calcext:value-type="float">
            <text:p>0,00259074074074074000</text:p>
          </table:table-cell>
          <table:table-cell table:formula="of:=[.D2800]-[.D27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table:formula="of:=[.B2799]+8" office:value-type="float" office:value="22392" calcext:value-type="float">
            <text:p>22392</text:p>
          </table:table-cell>
          <table:table-cell office:value-type="float" office:value="8640000" calcext:value-type="float">
            <text:p>8640000</text:p>
          </table:table-cell>
          <table:table-cell table:formula="of:=[.B2800]/[.C2800]" office:value-type="float" office:value="0.00259166666666667" calcext:value-type="float">
            <text:p>0,00259166666666667000</text:p>
          </table:table-cell>
          <table:table-cell table:formula="of:=[.D2801]-[.D28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B2800]+8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2801]/[.C2801]" office:value-type="float" office:value="0.00259259259259259" calcext:value-type="float">
            <text:p>0,00259259259259259000</text:p>
          </table:table-cell>
          <table:table-cell table:formula="of:=[.D2802]-[.D28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table:formula="of:=[.B2801]+8" office:value-type="float" office:value="22408" calcext:value-type="float">
            <text:p>22408</text:p>
          </table:table-cell>
          <table:table-cell office:value-type="float" office:value="8640000" calcext:value-type="float">
            <text:p>8640000</text:p>
          </table:table-cell>
          <table:table-cell table:formula="of:=[.B2802]/[.C2802]" office:value-type="float" office:value="0.00259351851851852" calcext:value-type="float">
            <text:p>0,00259351851851852000</text:p>
          </table:table-cell>
          <table:table-cell table:formula="of:=[.D2803]-[.D28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table:formula="of:=[.B2802]+8" office:value-type="float" office:value="22416" calcext:value-type="float">
            <text:p>22416</text:p>
          </table:table-cell>
          <table:table-cell office:value-type="float" office:value="8640000" calcext:value-type="float">
            <text:p>8640000</text:p>
          </table:table-cell>
          <table:table-cell table:formula="of:=[.B2803]/[.C2803]" office:value-type="float" office:value="0.00259444444444444" calcext:value-type="float">
            <text:p>0,00259444444444444000</text:p>
          </table:table-cell>
          <table:table-cell table:formula="of:=[.D2804]-[.D280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[.B2803]+8" office:value-type="float" office:value="22424" calcext:value-type="float">
            <text:p>22424</text:p>
          </table:table-cell>
          <table:table-cell office:value-type="float" office:value="8640000" calcext:value-type="float">
            <text:p>8640000</text:p>
          </table:table-cell>
          <table:table-cell table:formula="of:=[.B2804]/[.C2804]" office:value-type="float" office:value="0.00259537037037037" calcext:value-type="float">
            <text:p>0,00259537037037037000</text:p>
          </table:table-cell>
          <table:table-cell table:formula="of:=[.D2805]-[.D28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[.B2804]+8" office:value-type="float" office:value="22432" calcext:value-type="float">
            <text:p>22432</text:p>
          </table:table-cell>
          <table:table-cell office:value-type="float" office:value="8640000" calcext:value-type="float">
            <text:p>8640000</text:p>
          </table:table-cell>
          <table:table-cell table:formula="of:=[.B2805]/[.C2805]" office:value-type="float" office:value="0.0025962962962963" calcext:value-type="float">
            <text:p>0,00259629629629630000</text:p>
          </table:table-cell>
          <table:table-cell table:formula="of:=[.D2806]-[.D28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table:formula="of:=[.B2805]+8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2806]/[.C2806]" office:value-type="float" office:value="0.00259722222222222" calcext:value-type="float">
            <text:p>0,00259722222222222000</text:p>
          </table:table-cell>
          <table:table-cell table:formula="of:=[.D2807]-[.D28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table:formula="of:=[.B2806]+8" office:value-type="float" office:value="22448" calcext:value-type="float">
            <text:p>22448</text:p>
          </table:table-cell>
          <table:table-cell office:value-type="float" office:value="8640000" calcext:value-type="float">
            <text:p>8640000</text:p>
          </table:table-cell>
          <table:table-cell table:formula="of:=[.B2807]/[.C2807]" office:value-type="float" office:value="0.00259814814814815" calcext:value-type="float">
            <text:p>0,00259814814814815000</text:p>
          </table:table-cell>
          <table:table-cell table:formula="of:=[.D2808]-[.D28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table:formula="of:=[.B2807]+8" office:value-type="float" office:value="22456" calcext:value-type="float">
            <text:p>22456</text:p>
          </table:table-cell>
          <table:table-cell office:value-type="float" office:value="8640000" calcext:value-type="float">
            <text:p>8640000</text:p>
          </table:table-cell>
          <table:table-cell table:formula="of:=[.B2808]/[.C2808]" office:value-type="float" office:value="0.00259907407407407" calcext:value-type="float">
            <text:p>0,00259907407407407000</text:p>
          </table:table-cell>
          <table:table-cell table:formula="of:=[.D2809]-[.D28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table:formula="of:=[.B2808]+8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2809]/[.C2809]" office:value-type="float" office:value="0.0026" calcext:value-type="float">
            <text:p>0,00260000000000000000</text:p>
          </table:table-cell>
          <table:table-cell table:formula="of:=[.D2810]-[.D28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table:formula="of:=[.B2809]+8" office:value-type="float" office:value="22472" calcext:value-type="float">
            <text:p>22472</text:p>
          </table:table-cell>
          <table:table-cell office:value-type="float" office:value="8640000" calcext:value-type="float">
            <text:p>8640000</text:p>
          </table:table-cell>
          <table:table-cell table:formula="of:=[.B2810]/[.C2810]" office:value-type="float" office:value="0.00260092592592593" calcext:value-type="float">
            <text:p>0,00260092592592593000</text:p>
          </table:table-cell>
          <table:table-cell table:formula="of:=[.D2811]-[.D28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table:formula="of:=[.B2810]+8" office:value-type="float" office:value="22480" calcext:value-type="float">
            <text:p>22480</text:p>
          </table:table-cell>
          <table:table-cell office:value-type="float" office:value="8640000" calcext:value-type="float">
            <text:p>8640000</text:p>
          </table:table-cell>
          <table:table-cell table:formula="of:=[.B2811]/[.C2811]" office:value-type="float" office:value="0.00260185185185185" calcext:value-type="float">
            <text:p>0,00260185185185185000</text:p>
          </table:table-cell>
          <table:table-cell table:formula="of:=[.D2812]-[.D28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table:formula="of:=[.B2811]+8" office:value-type="float" office:value="22488" calcext:value-type="float">
            <text:p>22488</text:p>
          </table:table-cell>
          <table:table-cell office:value-type="float" office:value="8640000" calcext:value-type="float">
            <text:p>8640000</text:p>
          </table:table-cell>
          <table:table-cell table:formula="of:=[.B2812]/[.C2812]" office:value-type="float" office:value="0.00260277777777778" calcext:value-type="float">
            <text:p>0,00260277777777778000</text:p>
          </table:table-cell>
          <table:table-cell table:formula="of:=[.D2813]-[.D28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table:formula="of:=[.B2812]+8" office:value-type="float" office:value="22496" calcext:value-type="float">
            <text:p>22496</text:p>
          </table:table-cell>
          <table:table-cell office:value-type="float" office:value="8640000" calcext:value-type="float">
            <text:p>8640000</text:p>
          </table:table-cell>
          <table:table-cell table:formula="of:=[.B2813]/[.C2813]" office:value-type="float" office:value="0.0026037037037037" calcext:value-type="float">
            <text:p>0,00260370370370370000</text:p>
          </table:table-cell>
          <table:table-cell table:formula="of:=[.D2814]-[.D28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table:formula="of:=[.B2813]+8" office:value-type="float" office:value="22504" calcext:value-type="float">
            <text:p>22504</text:p>
          </table:table-cell>
          <table:table-cell office:value-type="float" office:value="8640000" calcext:value-type="float">
            <text:p>8640000</text:p>
          </table:table-cell>
          <table:table-cell table:formula="of:=[.B2814]/[.C2814]" office:value-type="float" office:value="0.00260462962962963" calcext:value-type="float">
            <text:p>0,00260462962962963000</text:p>
          </table:table-cell>
          <table:table-cell table:formula="of:=[.D2815]-[.D28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table:formula="of:=[.B2814]+8" office:value-type="float" office:value="22512" calcext:value-type="float">
            <text:p>22512</text:p>
          </table:table-cell>
          <table:table-cell office:value-type="float" office:value="8640000" calcext:value-type="float">
            <text:p>8640000</text:p>
          </table:table-cell>
          <table:table-cell table:formula="of:=[.B2815]/[.C2815]" office:value-type="float" office:value="0.00260555555555556" calcext:value-type="float">
            <text:p>0,00260555555555556000</text:p>
          </table:table-cell>
          <table:table-cell table:formula="of:=[.D2816]-[.D28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table:formula="of:=[.B2815]+8" office:value-type="float" office:value="22520" calcext:value-type="float">
            <text:p>22520</text:p>
          </table:table-cell>
          <table:table-cell office:value-type="float" office:value="8640000" calcext:value-type="float">
            <text:p>8640000</text:p>
          </table:table-cell>
          <table:table-cell table:formula="of:=[.B2816]/[.C2816]" office:value-type="float" office:value="0.00260648148148148" calcext:value-type="float">
            <text:p>0,00260648148148148000</text:p>
          </table:table-cell>
          <table:table-cell table:formula="of:=[.D2817]-[.D28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table:formula="of:=[.B2816]+8" office:value-type="float" office:value="22528" calcext:value-type="float">
            <text:p>22528</text:p>
          </table:table-cell>
          <table:table-cell office:value-type="float" office:value="8640000" calcext:value-type="float">
            <text:p>8640000</text:p>
          </table:table-cell>
          <table:table-cell table:formula="of:=[.B2817]/[.C2817]" office:value-type="float" office:value="0.00260740740740741" calcext:value-type="float">
            <text:p>0,00260740740740741000</text:p>
          </table:table-cell>
          <table:table-cell table:formula="of:=[.D2818]-[.D28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table:formula="of:=[.B2817]+8" office:value-type="float" office:value="22536" calcext:value-type="float">
            <text:p>22536</text:p>
          </table:table-cell>
          <table:table-cell office:value-type="float" office:value="8640000" calcext:value-type="float">
            <text:p>8640000</text:p>
          </table:table-cell>
          <table:table-cell table:formula="of:=[.B2818]/[.C2818]" office:value-type="float" office:value="0.00260833333333333" calcext:value-type="float">
            <text:p>0,00260833333333333000</text:p>
          </table:table-cell>
          <table:table-cell table:formula="of:=[.D2819]-[.D28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table:formula="of:=[.B2818]+8" office:value-type="float" office:value="22544" calcext:value-type="float">
            <text:p>22544</text:p>
          </table:table-cell>
          <table:table-cell office:value-type="float" office:value="8640000" calcext:value-type="float">
            <text:p>8640000</text:p>
          </table:table-cell>
          <table:table-cell table:formula="of:=[.B2819]/[.C2819]" office:value-type="float" office:value="0.00260925925925926" calcext:value-type="float">
            <text:p>0,00260925925925926000</text:p>
          </table:table-cell>
          <table:table-cell table:formula="of:=[.D2820]-[.D28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table:formula="of:=[.B2819]+8" office:value-type="float" office:value="22552" calcext:value-type="float">
            <text:p>22552</text:p>
          </table:table-cell>
          <table:table-cell office:value-type="float" office:value="8640000" calcext:value-type="float">
            <text:p>8640000</text:p>
          </table:table-cell>
          <table:table-cell table:formula="of:=[.B2820]/[.C2820]" office:value-type="float" office:value="0.00261018518518519" calcext:value-type="float">
            <text:p>0,00261018518518519000</text:p>
          </table:table-cell>
          <table:table-cell table:formula="of:=[.D2821]-[.D28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table:formula="of:=[.B2820]+8" office:value-type="float" office:value="22560" calcext:value-type="float">
            <text:p>22560</text:p>
          </table:table-cell>
          <table:table-cell office:value-type="float" office:value="8640000" calcext:value-type="float">
            <text:p>8640000</text:p>
          </table:table-cell>
          <table:table-cell table:formula="of:=[.B2821]/[.C2821]" office:value-type="float" office:value="0.00261111111111111" calcext:value-type="float">
            <text:p>0,00261111111111111000</text:p>
          </table:table-cell>
          <table:table-cell table:formula="of:=[.D2822]-[.D28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[.B2821]+8" office:value-type="float" office:value="22568" calcext:value-type="float">
            <text:p>22568</text:p>
          </table:table-cell>
          <table:table-cell office:value-type="float" office:value="8640000" calcext:value-type="float">
            <text:p>8640000</text:p>
          </table:table-cell>
          <table:table-cell table:formula="of:=[.B2822]/[.C2822]" office:value-type="float" office:value="0.00261203703703704" calcext:value-type="float">
            <text:p>0,00261203703703704000</text:p>
          </table:table-cell>
          <table:table-cell table:formula="of:=[.D2823]-[.D28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table:formula="of:=[.B2822]+8" office:value-type="float" office:value="22576" calcext:value-type="float">
            <text:p>22576</text:p>
          </table:table-cell>
          <table:table-cell office:value-type="float" office:value="8640000" calcext:value-type="float">
            <text:p>8640000</text:p>
          </table:table-cell>
          <table:table-cell table:formula="of:=[.B2823]/[.C2823]" office:value-type="float" office:value="0.00261296296296296" calcext:value-type="float">
            <text:p>0,00261296296296296000</text:p>
          </table:table-cell>
          <table:table-cell table:formula="of:=[.D2824]-[.D28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table:formula="of:=[.B2823]+8" office:value-type="float" office:value="22584" calcext:value-type="float">
            <text:p>22584</text:p>
          </table:table-cell>
          <table:table-cell office:value-type="float" office:value="8640000" calcext:value-type="float">
            <text:p>8640000</text:p>
          </table:table-cell>
          <table:table-cell table:formula="of:=[.B2824]/[.C2824]" office:value-type="float" office:value="0.00261388888888889" calcext:value-type="float">
            <text:p>0,00261388888888889000</text:p>
          </table:table-cell>
          <table:table-cell table:formula="of:=[.D2825]-[.D28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table:formula="of:=[.B2824]+8" office:value-type="float" office:value="22592" calcext:value-type="float">
            <text:p>22592</text:p>
          </table:table-cell>
          <table:table-cell office:value-type="float" office:value="8640000" calcext:value-type="float">
            <text:p>8640000</text:p>
          </table:table-cell>
          <table:table-cell table:formula="of:=[.B2825]/[.C2825]" office:value-type="float" office:value="0.00261481481481481" calcext:value-type="float">
            <text:p>0,00261481481481481000</text:p>
          </table:table-cell>
          <table:table-cell table:formula="of:=[.D2826]-[.D28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table:formula="of:=[.B2825]+8" office:value-type="float" office:value="22600" calcext:value-type="float">
            <text:p>22600</text:p>
          </table:table-cell>
          <table:table-cell office:value-type="float" office:value="8640000" calcext:value-type="float">
            <text:p>8640000</text:p>
          </table:table-cell>
          <table:table-cell table:formula="of:=[.B2826]/[.C2826]" office:value-type="float" office:value="0.00261574074074074" calcext:value-type="float">
            <text:p>0,00261574074074074000</text:p>
          </table:table-cell>
          <table:table-cell table:formula="of:=[.D2827]-[.D2826]" office:value-type="float" office:value="0.000000925925925926354" calcext:value-type="float">
            <text:p>0,00000092592592592635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table:formula="of:=[.B2826]+8" office:value-type="float" office:value="22608" calcext:value-type="float">
            <text:p>22608</text:p>
          </table:table-cell>
          <table:table-cell office:value-type="float" office:value="8640000" calcext:value-type="float">
            <text:p>8640000</text:p>
          </table:table-cell>
          <table:table-cell table:formula="of:=[.B2827]/[.C2827]" office:value-type="float" office:value="0.00261666666666667" calcext:value-type="float">
            <text:p>0,00261666666666667000</text:p>
          </table:table-cell>
          <table:table-cell table:formula="of:=[.D2828]-[.D28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table:formula="of:=[.B2827]+8" office:value-type="float" office:value="22616" calcext:value-type="float">
            <text:p>22616</text:p>
          </table:table-cell>
          <table:table-cell office:value-type="float" office:value="8640000" calcext:value-type="float">
            <text:p>8640000</text:p>
          </table:table-cell>
          <table:table-cell table:formula="of:=[.B2828]/[.C2828]" office:value-type="float" office:value="0.00261759259259259" calcext:value-type="float">
            <text:p>0,00261759259259259000</text:p>
          </table:table-cell>
          <table:table-cell table:formula="of:=[.D2829]-[.D28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table:formula="of:=[.B2828]+8" office:value-type="float" office:value="22624" calcext:value-type="float">
            <text:p>22624</text:p>
          </table:table-cell>
          <table:table-cell office:value-type="float" office:value="8640000" calcext:value-type="float">
            <text:p>8640000</text:p>
          </table:table-cell>
          <table:table-cell table:formula="of:=[.B2829]/[.C2829]" office:value-type="float" office:value="0.00261851851851852" calcext:value-type="float">
            <text:p>0,00261851851851852000</text:p>
          </table:table-cell>
          <table:table-cell table:formula="of:=[.D2830]-[.D28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table:formula="of:=[.B2829]+8" office:value-type="float" office:value="22632" calcext:value-type="float">
            <text:p>22632</text:p>
          </table:table-cell>
          <table:table-cell office:value-type="float" office:value="8640000" calcext:value-type="float">
            <text:p>8640000</text:p>
          </table:table-cell>
          <table:table-cell table:formula="of:=[.B2830]/[.C2830]" office:value-type="float" office:value="0.00261944444444444" calcext:value-type="float">
            <text:p>0,00261944444444444000</text:p>
          </table:table-cell>
          <table:table-cell table:formula="of:=[.D2831]-[.D28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table:formula="of:=[.B2830]+8" office:value-type="float" office:value="22640" calcext:value-type="float">
            <text:p>22640</text:p>
          </table:table-cell>
          <table:table-cell office:value-type="float" office:value="8640000" calcext:value-type="float">
            <text:p>8640000</text:p>
          </table:table-cell>
          <table:table-cell table:formula="of:=[.B2831]/[.C2831]" office:value-type="float" office:value="0.00262037037037037" calcext:value-type="float">
            <text:p>0,00262037037037037000</text:p>
          </table:table-cell>
          <table:table-cell table:formula="of:=[.D2832]-[.D28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[.B2831]+8" office:value-type="float" office:value="22648" calcext:value-type="float">
            <text:p>22648</text:p>
          </table:table-cell>
          <table:table-cell office:value-type="float" office:value="8640000" calcext:value-type="float">
            <text:p>8640000</text:p>
          </table:table-cell>
          <table:table-cell table:formula="of:=[.B2832]/[.C2832]" office:value-type="float" office:value="0.0026212962962963" calcext:value-type="float">
            <text:p>0,00262129629629630000</text:p>
          </table:table-cell>
          <table:table-cell table:formula="of:=[.D2833]-[.D28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table:formula="of:=[.B2832]+8" office:value-type="float" office:value="22656" calcext:value-type="float">
            <text:p>22656</text:p>
          </table:table-cell>
          <table:table-cell office:value-type="float" office:value="8640000" calcext:value-type="float">
            <text:p>8640000</text:p>
          </table:table-cell>
          <table:table-cell table:formula="of:=[.B2833]/[.C2833]" office:value-type="float" office:value="0.00262222222222222" calcext:value-type="float">
            <text:p>0,00262222222222222000</text:p>
          </table:table-cell>
          <table:table-cell table:formula="of:=[.D2834]-[.D28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table:formula="of:=[.B2833]+8" office:value-type="float" office:value="22664" calcext:value-type="float">
            <text:p>22664</text:p>
          </table:table-cell>
          <table:table-cell office:value-type="float" office:value="8640000" calcext:value-type="float">
            <text:p>8640000</text:p>
          </table:table-cell>
          <table:table-cell table:formula="of:=[.B2834]/[.C2834]" office:value-type="float" office:value="0.00262314814814815" calcext:value-type="float">
            <text:p>0,00262314814814815000</text:p>
          </table:table-cell>
          <table:table-cell table:formula="of:=[.D2835]-[.D28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table:formula="of:=[.B2834]+8" office:value-type="float" office:value="22672" calcext:value-type="float">
            <text:p>22672</text:p>
          </table:table-cell>
          <table:table-cell office:value-type="float" office:value="8640000" calcext:value-type="float">
            <text:p>8640000</text:p>
          </table:table-cell>
          <table:table-cell table:formula="of:=[.B2835]/[.C2835]" office:value-type="float" office:value="0.00262407407407407" calcext:value-type="float">
            <text:p>0,00262407407407407000</text:p>
          </table:table-cell>
          <table:table-cell table:formula="of:=[.D2836]-[.D28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table:formula="of:=[.B2835]+8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2836]/[.C2836]" office:value-type="float" office:value="0.002625" calcext:value-type="float">
            <text:p>0,00262500000000000000</text:p>
          </table:table-cell>
          <table:table-cell table:formula="of:=[.D2837]-[.D28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table:formula="of:=[.B2836]+8" office:value-type="float" office:value="22688" calcext:value-type="float">
            <text:p>22688</text:p>
          </table:table-cell>
          <table:table-cell office:value-type="float" office:value="8640000" calcext:value-type="float">
            <text:p>8640000</text:p>
          </table:table-cell>
          <table:table-cell table:formula="of:=[.B2837]/[.C2837]" office:value-type="float" office:value="0.00262592592592593" calcext:value-type="float">
            <text:p>0,00262592592592593000</text:p>
          </table:table-cell>
          <table:table-cell table:formula="of:=[.D2838]-[.D28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[.B2837]+8" office:value-type="float" office:value="22696" calcext:value-type="float">
            <text:p>22696</text:p>
          </table:table-cell>
          <table:table-cell office:value-type="float" office:value="8640000" calcext:value-type="float">
            <text:p>8640000</text:p>
          </table:table-cell>
          <table:table-cell table:formula="of:=[.B2838]/[.C2838]" office:value-type="float" office:value="0.00262685185185185" calcext:value-type="float">
            <text:p>0,00262685185185185000</text:p>
          </table:table-cell>
          <table:table-cell table:formula="of:=[.D2839]-[.D28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table:formula="of:=[.B2838]+8" office:value-type="float" office:value="22704" calcext:value-type="float">
            <text:p>22704</text:p>
          </table:table-cell>
          <table:table-cell office:value-type="float" office:value="8640000" calcext:value-type="float">
            <text:p>8640000</text:p>
          </table:table-cell>
          <table:table-cell table:formula="of:=[.B2839]/[.C2839]" office:value-type="float" office:value="0.00262777777777778" calcext:value-type="float">
            <text:p>0,00262777777777778000</text:p>
          </table:table-cell>
          <table:table-cell table:formula="of:=[.D2840]-[.D28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table:formula="of:=[.B2839]+8" office:value-type="float" office:value="22712" calcext:value-type="float">
            <text:p>22712</text:p>
          </table:table-cell>
          <table:table-cell office:value-type="float" office:value="8640000" calcext:value-type="float">
            <text:p>8640000</text:p>
          </table:table-cell>
          <table:table-cell table:formula="of:=[.B2840]/[.C2840]" office:value-type="float" office:value="0.0026287037037037" calcext:value-type="float">
            <text:p>0,00262870370370370000</text:p>
          </table:table-cell>
          <table:table-cell table:formula="of:=[.D2841]-[.D28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table:formula="of:=[.B2840]+8" office:value-type="float" office:value="22720" calcext:value-type="float">
            <text:p>22720</text:p>
          </table:table-cell>
          <table:table-cell office:value-type="float" office:value="8640000" calcext:value-type="float">
            <text:p>8640000</text:p>
          </table:table-cell>
          <table:table-cell table:formula="of:=[.B2841]/[.C2841]" office:value-type="float" office:value="0.00262962962962963" calcext:value-type="float">
            <text:p>0,00262962962962963000</text:p>
          </table:table-cell>
          <table:table-cell table:formula="of:=[.D2842]-[.D28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table:formula="of:=[.B2841]+8" office:value-type="float" office:value="22728" calcext:value-type="float">
            <text:p>22728</text:p>
          </table:table-cell>
          <table:table-cell office:value-type="float" office:value="8640000" calcext:value-type="float">
            <text:p>8640000</text:p>
          </table:table-cell>
          <table:table-cell table:formula="of:=[.B2842]/[.C2842]" office:value-type="float" office:value="0.00263055555555556" calcext:value-type="float">
            <text:p>0,00263055555555556000</text:p>
          </table:table-cell>
          <table:table-cell table:formula="of:=[.D2843]-[.D28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table:formula="of:=[.B2842]+8" office:value-type="float" office:value="22736" calcext:value-type="float">
            <text:p>22736</text:p>
          </table:table-cell>
          <table:table-cell office:value-type="float" office:value="8640000" calcext:value-type="float">
            <text:p>8640000</text:p>
          </table:table-cell>
          <table:table-cell table:formula="of:=[.B2843]/[.C2843]" office:value-type="float" office:value="0.00263148148148148" calcext:value-type="float">
            <text:p>0,00263148148148148000</text:p>
          </table:table-cell>
          <table:table-cell table:formula="of:=[.D2844]-[.D28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[.B2843]+8" office:value-type="float" office:value="22744" calcext:value-type="float">
            <text:p>22744</text:p>
          </table:table-cell>
          <table:table-cell office:value-type="float" office:value="8640000" calcext:value-type="float">
            <text:p>8640000</text:p>
          </table:table-cell>
          <table:table-cell table:formula="of:=[.B2844]/[.C2844]" office:value-type="float" office:value="0.00263240740740741" calcext:value-type="float">
            <text:p>0,00263240740740741000</text:p>
          </table:table-cell>
          <table:table-cell table:formula="of:=[.D2845]-[.D28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[.B2844]+8" office:value-type="float" office:value="22752" calcext:value-type="float">
            <text:p>22752</text:p>
          </table:table-cell>
          <table:table-cell office:value-type="float" office:value="8640000" calcext:value-type="float">
            <text:p>8640000</text:p>
          </table:table-cell>
          <table:table-cell table:formula="of:=[.B2845]/[.C2845]" office:value-type="float" office:value="0.00263333333333333" calcext:value-type="float">
            <text:p>0,00263333333333333000</text:p>
          </table:table-cell>
          <table:table-cell table:formula="of:=[.D2846]-[.D28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[.B2845]+8" office:value-type="float" office:value="22760" calcext:value-type="float">
            <text:p>22760</text:p>
          </table:table-cell>
          <table:table-cell office:value-type="float" office:value="8640000" calcext:value-type="float">
            <text:p>8640000</text:p>
          </table:table-cell>
          <table:table-cell table:formula="of:=[.B2846]/[.C2846]" office:value-type="float" office:value="0.00263425925925926" calcext:value-type="float">
            <text:p>0,00263425925925926000</text:p>
          </table:table-cell>
          <table:table-cell table:formula="of:=[.D2847]-[.D28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table:formula="of:=[.B2846]+8" office:value-type="float" office:value="22768" calcext:value-type="float">
            <text:p>22768</text:p>
          </table:table-cell>
          <table:table-cell office:value-type="float" office:value="8640000" calcext:value-type="float">
            <text:p>8640000</text:p>
          </table:table-cell>
          <table:table-cell table:formula="of:=[.B2847]/[.C2847]" office:value-type="float" office:value="0.00263518518518519" calcext:value-type="float">
            <text:p>0,00263518518518519000</text:p>
          </table:table-cell>
          <table:table-cell table:formula="of:=[.D2848]-[.D28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table:formula="of:=[.B2847]+8" office:value-type="float" office:value="22776" calcext:value-type="float">
            <text:p>22776</text:p>
          </table:table-cell>
          <table:table-cell office:value-type="float" office:value="8640000" calcext:value-type="float">
            <text:p>8640000</text:p>
          </table:table-cell>
          <table:table-cell table:formula="of:=[.B2848]/[.C2848]" office:value-type="float" office:value="0.00263611111111111" calcext:value-type="float">
            <text:p>0,00263611111111111000</text:p>
          </table:table-cell>
          <table:table-cell table:formula="of:=[.D2849]-[.D28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[.B2848]+8" office:value-type="float" office:value="22784" calcext:value-type="float">
            <text:p>22784</text:p>
          </table:table-cell>
          <table:table-cell office:value-type="float" office:value="8640000" calcext:value-type="float">
            <text:p>8640000</text:p>
          </table:table-cell>
          <table:table-cell table:formula="of:=[.B2849]/[.C2849]" office:value-type="float" office:value="0.00263703703703704" calcext:value-type="float">
            <text:p>0,00263703703703704000</text:p>
          </table:table-cell>
          <table:table-cell table:formula="of:=[.D2850]-[.D28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table:formula="of:=[.B2849]+8" office:value-type="float" office:value="22792" calcext:value-type="float">
            <text:p>22792</text:p>
          </table:table-cell>
          <table:table-cell office:value-type="float" office:value="8640000" calcext:value-type="float">
            <text:p>8640000</text:p>
          </table:table-cell>
          <table:table-cell table:formula="of:=[.B2850]/[.C2850]" office:value-type="float" office:value="0.00263796296296296" calcext:value-type="float">
            <text:p>0,00263796296296296000</text:p>
          </table:table-cell>
          <table:table-cell table:formula="of:=[.D2851]-[.D28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[.B2850]+8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2851]/[.C2851]" office:value-type="float" office:value="0.00263888888888889" calcext:value-type="float">
            <text:p>0,00263888888888889000</text:p>
          </table:table-cell>
          <table:table-cell table:formula="of:=[.D2852]-[.D28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table:formula="of:=[.B2851]+8" office:value-type="float" office:value="22808" calcext:value-type="float">
            <text:p>22808</text:p>
          </table:table-cell>
          <table:table-cell office:value-type="float" office:value="8640000" calcext:value-type="float">
            <text:p>8640000</text:p>
          </table:table-cell>
          <table:table-cell table:formula="of:=[.B2852]/[.C2852]" office:value-type="float" office:value="0.00263981481481482" calcext:value-type="float">
            <text:p>0,00263981481481482000</text:p>
          </table:table-cell>
          <table:table-cell table:formula="of:=[.D2853]-[.D28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table:formula="of:=[.B2852]+8" office:value-type="float" office:value="22816" calcext:value-type="float">
            <text:p>22816</text:p>
          </table:table-cell>
          <table:table-cell office:value-type="float" office:value="8640000" calcext:value-type="float">
            <text:p>8640000</text:p>
          </table:table-cell>
          <table:table-cell table:formula="of:=[.B2853]/[.C2853]" office:value-type="float" office:value="0.00264074074074074" calcext:value-type="float">
            <text:p>0,00264074074074074000</text:p>
          </table:table-cell>
          <table:table-cell table:formula="of:=[.D2854]-[.D28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table:formula="of:=[.B2853]+8" office:value-type="float" office:value="22824" calcext:value-type="float">
            <text:p>22824</text:p>
          </table:table-cell>
          <table:table-cell office:value-type="float" office:value="8640000" calcext:value-type="float">
            <text:p>8640000</text:p>
          </table:table-cell>
          <table:table-cell table:formula="of:=[.B2854]/[.C2854]" office:value-type="float" office:value="0.00264166666666667" calcext:value-type="float">
            <text:p>0,00264166666666667000</text:p>
          </table:table-cell>
          <table:table-cell table:formula="of:=[.D2855]-[.D28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table:formula="of:=[.B2854]+8" office:value-type="float" office:value="22832" calcext:value-type="float">
            <text:p>22832</text:p>
          </table:table-cell>
          <table:table-cell office:value-type="float" office:value="8640000" calcext:value-type="float">
            <text:p>8640000</text:p>
          </table:table-cell>
          <table:table-cell table:formula="of:=[.B2855]/[.C2855]" office:value-type="float" office:value="0.00264259259259259" calcext:value-type="float">
            <text:p>0,00264259259259259000</text:p>
          </table:table-cell>
          <table:table-cell table:formula="of:=[.D2856]-[.D28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table:formula="of:=[.B2855]+8" office:value-type="float" office:value="22840" calcext:value-type="float">
            <text:p>22840</text:p>
          </table:table-cell>
          <table:table-cell office:value-type="float" office:value="8640000" calcext:value-type="float">
            <text:p>8640000</text:p>
          </table:table-cell>
          <table:table-cell table:formula="of:=[.B2856]/[.C2856]" office:value-type="float" office:value="0.00264351851851852" calcext:value-type="float">
            <text:p>0,00264351851851852000</text:p>
          </table:table-cell>
          <table:table-cell table:formula="of:=[.D2857]-[.D28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table:formula="of:=[.B2856]+8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2857]/[.C2857]" office:value-type="float" office:value="0.00264444444444444" calcext:value-type="float">
            <text:p>0,00264444444444444000</text:p>
          </table:table-cell>
          <table:table-cell table:formula="of:=[.D2858]-[.D28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table:formula="of:=[.B2857]+8" office:value-type="float" office:value="22856" calcext:value-type="float">
            <text:p>22856</text:p>
          </table:table-cell>
          <table:table-cell office:value-type="float" office:value="8640000" calcext:value-type="float">
            <text:p>8640000</text:p>
          </table:table-cell>
          <table:table-cell table:formula="of:=[.B2858]/[.C2858]" office:value-type="float" office:value="0.00264537037037037" calcext:value-type="float">
            <text:p>0,00264537037037037000</text:p>
          </table:table-cell>
          <table:table-cell table:formula="of:=[.D2859]-[.D28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table:formula="of:=[.B2858]+8" office:value-type="float" office:value="22864" calcext:value-type="float">
            <text:p>22864</text:p>
          </table:table-cell>
          <table:table-cell office:value-type="float" office:value="8640000" calcext:value-type="float">
            <text:p>8640000</text:p>
          </table:table-cell>
          <table:table-cell table:formula="of:=[.B2859]/[.C2859]" office:value-type="float" office:value="0.0026462962962963" calcext:value-type="float">
            <text:p>0,00264629629629630000</text:p>
          </table:table-cell>
          <table:table-cell table:formula="of:=[.D2860]-[.D28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table:formula="of:=[.B2859]+8" office:value-type="float" office:value="22872" calcext:value-type="float">
            <text:p>22872</text:p>
          </table:table-cell>
          <table:table-cell office:value-type="float" office:value="8640000" calcext:value-type="float">
            <text:p>8640000</text:p>
          </table:table-cell>
          <table:table-cell table:formula="of:=[.B2860]/[.C2860]" office:value-type="float" office:value="0.00264722222222222" calcext:value-type="float">
            <text:p>0,00264722222222222000</text:p>
          </table:table-cell>
          <table:table-cell table:formula="of:=[.D2861]-[.D28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table:formula="of:=[.B2860]+8" office:value-type="float" office:value="22880" calcext:value-type="float">
            <text:p>22880</text:p>
          </table:table-cell>
          <table:table-cell office:value-type="float" office:value="8640000" calcext:value-type="float">
            <text:p>8640000</text:p>
          </table:table-cell>
          <table:table-cell table:formula="of:=[.B2861]/[.C2861]" office:value-type="float" office:value="0.00264814814814815" calcext:value-type="float">
            <text:p>0,00264814814814815000</text:p>
          </table:table-cell>
          <table:table-cell table:formula="of:=[.D2862]-[.D28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table:formula="of:=[.B2861]+8" office:value-type="float" office:value="22888" calcext:value-type="float">
            <text:p>22888</text:p>
          </table:table-cell>
          <table:table-cell office:value-type="float" office:value="8640000" calcext:value-type="float">
            <text:p>8640000</text:p>
          </table:table-cell>
          <table:table-cell table:formula="of:=[.B2862]/[.C2862]" office:value-type="float" office:value="0.00264907407407407" calcext:value-type="float">
            <text:p>0,00264907407407407000</text:p>
          </table:table-cell>
          <table:table-cell table:formula="of:=[.D2863]-[.D28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table:formula="of:=[.B2862]+8" office:value-type="float" office:value="22896" calcext:value-type="float">
            <text:p>22896</text:p>
          </table:table-cell>
          <table:table-cell office:value-type="float" office:value="8640000" calcext:value-type="float">
            <text:p>8640000</text:p>
          </table:table-cell>
          <table:table-cell table:formula="of:=[.B2863]/[.C2863]" office:value-type="float" office:value="0.00265" calcext:value-type="float">
            <text:p>0,00265000000000000000</text:p>
          </table:table-cell>
          <table:table-cell table:formula="of:=[.D2864]-[.D28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table:formula="of:=[.B2863]+8" office:value-type="float" office:value="22904" calcext:value-type="float">
            <text:p>22904</text:p>
          </table:table-cell>
          <table:table-cell office:value-type="float" office:value="8640000" calcext:value-type="float">
            <text:p>8640000</text:p>
          </table:table-cell>
          <table:table-cell table:formula="of:=[.B2864]/[.C2864]" office:value-type="float" office:value="0.00265092592592593" calcext:value-type="float">
            <text:p>0,00265092592592593000</text:p>
          </table:table-cell>
          <table:table-cell table:formula="of:=[.D2865]-[.D28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table:formula="of:=[.B2864]+8" office:value-type="float" office:value="22912" calcext:value-type="float">
            <text:p>22912</text:p>
          </table:table-cell>
          <table:table-cell office:value-type="float" office:value="8640000" calcext:value-type="float">
            <text:p>8640000</text:p>
          </table:table-cell>
          <table:table-cell table:formula="of:=[.B2865]/[.C2865]" office:value-type="float" office:value="0.00265185185185185" calcext:value-type="float">
            <text:p>0,00265185185185185000</text:p>
          </table:table-cell>
          <table:table-cell table:formula="of:=[.D2866]-[.D28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table:formula="of:=[.B2865]+8" office:value-type="float" office:value="22920" calcext:value-type="float">
            <text:p>22920</text:p>
          </table:table-cell>
          <table:table-cell office:value-type="float" office:value="8640000" calcext:value-type="float">
            <text:p>8640000</text:p>
          </table:table-cell>
          <table:table-cell table:formula="of:=[.B2866]/[.C2866]" office:value-type="float" office:value="0.00265277777777778" calcext:value-type="float">
            <text:p>0,00265277777777778000</text:p>
          </table:table-cell>
          <table:table-cell table:formula="of:=[.D2867]-[.D28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table:formula="of:=[.B2866]+8" office:value-type="float" office:value="22928" calcext:value-type="float">
            <text:p>22928</text:p>
          </table:table-cell>
          <table:table-cell office:value-type="float" office:value="8640000" calcext:value-type="float">
            <text:p>8640000</text:p>
          </table:table-cell>
          <table:table-cell table:formula="of:=[.B2867]/[.C2867]" office:value-type="float" office:value="0.0026537037037037" calcext:value-type="float">
            <text:p>0,00265370370370370000</text:p>
          </table:table-cell>
          <table:table-cell table:formula="of:=[.D2868]-[.D28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table:formula="of:=[.B2867]+8" office:value-type="float" office:value="22936" calcext:value-type="float">
            <text:p>22936</text:p>
          </table:table-cell>
          <table:table-cell office:value-type="float" office:value="8640000" calcext:value-type="float">
            <text:p>8640000</text:p>
          </table:table-cell>
          <table:table-cell table:formula="of:=[.B2868]/[.C2868]" office:value-type="float" office:value="0.00265462962962963" calcext:value-type="float">
            <text:p>0,00265462962962963000</text:p>
          </table:table-cell>
          <table:table-cell table:formula="of:=[.D2869]-[.D28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[.B2868]+8" office:value-type="float" office:value="22944" calcext:value-type="float">
            <text:p>22944</text:p>
          </table:table-cell>
          <table:table-cell office:value-type="float" office:value="8640000" calcext:value-type="float">
            <text:p>8640000</text:p>
          </table:table-cell>
          <table:table-cell table:formula="of:=[.B2869]/[.C2869]" office:value-type="float" office:value="0.00265555555555556" calcext:value-type="float">
            <text:p>0,00265555555555556000</text:p>
          </table:table-cell>
          <table:table-cell table:formula="of:=[.D2870]-[.D28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table:formula="of:=[.B2869]+8" office:value-type="float" office:value="22952" calcext:value-type="float">
            <text:p>22952</text:p>
          </table:table-cell>
          <table:table-cell office:value-type="float" office:value="8640000" calcext:value-type="float">
            <text:p>8640000</text:p>
          </table:table-cell>
          <table:table-cell table:formula="of:=[.B2870]/[.C2870]" office:value-type="float" office:value="0.00265648148148148" calcext:value-type="float">
            <text:p>0,00265648148148148000</text:p>
          </table:table-cell>
          <table:table-cell table:formula="of:=[.D2871]-[.D28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table:formula="of:=[.B2870]+8" office:value-type="float" office:value="22960" calcext:value-type="float">
            <text:p>22960</text:p>
          </table:table-cell>
          <table:table-cell office:value-type="float" office:value="8640000" calcext:value-type="float">
            <text:p>8640000</text:p>
          </table:table-cell>
          <table:table-cell table:formula="of:=[.B2871]/[.C2871]" office:value-type="float" office:value="0.00265740740740741" calcext:value-type="float">
            <text:p>0,00265740740740741000</text:p>
          </table:table-cell>
          <table:table-cell table:formula="of:=[.D2872]-[.D28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table:formula="of:=[.B2871]+8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2872]/[.C2872]" office:value-type="float" office:value="0.00265833333333333" calcext:value-type="float">
            <text:p>0,00265833333333333000</text:p>
          </table:table-cell>
          <table:table-cell table:formula="of:=[.D2873]-[.D28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table:formula="of:=[.B2872]+8" office:value-type="float" office:value="22976" calcext:value-type="float">
            <text:p>22976</text:p>
          </table:table-cell>
          <table:table-cell office:value-type="float" office:value="8640000" calcext:value-type="float">
            <text:p>8640000</text:p>
          </table:table-cell>
          <table:table-cell table:formula="of:=[.B2873]/[.C2873]" office:value-type="float" office:value="0.00265925925925926" calcext:value-type="float">
            <text:p>0,00265925925925926000</text:p>
          </table:table-cell>
          <table:table-cell table:formula="of:=[.D2874]-[.D28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table:formula="of:=[.B2873]+8" office:value-type="float" office:value="22984" calcext:value-type="float">
            <text:p>22984</text:p>
          </table:table-cell>
          <table:table-cell office:value-type="float" office:value="8640000" calcext:value-type="float">
            <text:p>8640000</text:p>
          </table:table-cell>
          <table:table-cell table:formula="of:=[.B2874]/[.C2874]" office:value-type="float" office:value="0.00266018518518519" calcext:value-type="float">
            <text:p>0,00266018518518519000</text:p>
          </table:table-cell>
          <table:table-cell table:formula="of:=[.D2875]-[.D28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table:formula="of:=[.B2874]+8" office:value-type="float" office:value="22992" calcext:value-type="float">
            <text:p>22992</text:p>
          </table:table-cell>
          <table:table-cell office:value-type="float" office:value="8640000" calcext:value-type="float">
            <text:p>8640000</text:p>
          </table:table-cell>
          <table:table-cell table:formula="of:=[.B2875]/[.C2875]" office:value-type="float" office:value="0.00266111111111111" calcext:value-type="float">
            <text:p>0,00266111111111111000</text:p>
          </table:table-cell>
          <table:table-cell table:formula="of:=[.D2876]-[.D28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table:formula="of:=[.B2875]+8" office:value-type="float" office:value="23000" calcext:value-type="float">
            <text:p>23000</text:p>
          </table:table-cell>
          <table:table-cell office:value-type="float" office:value="8640000" calcext:value-type="float">
            <text:p>8640000</text:p>
          </table:table-cell>
          <table:table-cell table:formula="of:=[.B2876]/[.C2876]" office:value-type="float" office:value="0.00266203703703704" calcext:value-type="float">
            <text:p>0,00266203703703704000</text:p>
          </table:table-cell>
          <table:table-cell table:formula="of:=[.D2877]-[.D28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table:formula="of:=[.B2876]+8" office:value-type="float" office:value="23008" calcext:value-type="float">
            <text:p>23008</text:p>
          </table:table-cell>
          <table:table-cell office:value-type="float" office:value="8640000" calcext:value-type="float">
            <text:p>8640000</text:p>
          </table:table-cell>
          <table:table-cell table:formula="of:=[.B2877]/[.C2877]" office:value-type="float" office:value="0.00266296296296296" calcext:value-type="float">
            <text:p>0,00266296296296296000</text:p>
          </table:table-cell>
          <table:table-cell table:formula="of:=[.D2878]-[.D28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table:formula="of:=[.B2877]+8" office:value-type="float" office:value="23016" calcext:value-type="float">
            <text:p>23016</text:p>
          </table:table-cell>
          <table:table-cell office:value-type="float" office:value="8640000" calcext:value-type="float">
            <text:p>8640000</text:p>
          </table:table-cell>
          <table:table-cell table:formula="of:=[.B2878]/[.C2878]" office:value-type="float" office:value="0.00266388888888889" calcext:value-type="float">
            <text:p>0,00266388888888889000</text:p>
          </table:table-cell>
          <table:table-cell table:formula="of:=[.D2879]-[.D28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table:formula="of:=[.B2878]+8" office:value-type="float" office:value="23024" calcext:value-type="float">
            <text:p>23024</text:p>
          </table:table-cell>
          <table:table-cell office:value-type="float" office:value="8640000" calcext:value-type="float">
            <text:p>8640000</text:p>
          </table:table-cell>
          <table:table-cell table:formula="of:=[.B2879]/[.C2879]" office:value-type="float" office:value="0.00266481481481481" calcext:value-type="float">
            <text:p>0,00266481481481481000</text:p>
          </table:table-cell>
          <table:table-cell table:formula="of:=[.D2880]-[.D28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table:formula="of:=[.B2879]+8" office:value-type="float" office:value="23032" calcext:value-type="float">
            <text:p>23032</text:p>
          </table:table-cell>
          <table:table-cell office:value-type="float" office:value="8640000" calcext:value-type="float">
            <text:p>8640000</text:p>
          </table:table-cell>
          <table:table-cell table:formula="of:=[.B2880]/[.C2880]" office:value-type="float" office:value="0.00266574074074074" calcext:value-type="float">
            <text:p>0,00266574074074074000</text:p>
          </table:table-cell>
          <table:table-cell table:formula="of:=[.D2881]-[.D28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[.B2880]+8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2881]/[.C2881]" office:value-type="float" office:value="0.00266666666666667" calcext:value-type="float">
            <text:p>0,00266666666666667000</text:p>
          </table:table-cell>
          <table:table-cell table:formula="of:=[.D2882]-[.D288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table:formula="of:=[.B2881]+8" office:value-type="float" office:value="23048" calcext:value-type="float">
            <text:p>23048</text:p>
          </table:table-cell>
          <table:table-cell office:value-type="float" office:value="8640000" calcext:value-type="float">
            <text:p>8640000</text:p>
          </table:table-cell>
          <table:table-cell table:formula="of:=[.B2882]/[.C2882]" office:value-type="float" office:value="0.00266759259259259" calcext:value-type="float">
            <text:p>0,00266759259259259000</text:p>
          </table:table-cell>
          <table:table-cell table:formula="of:=[.D2883]-[.D28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table:formula="of:=[.B2882]+8" office:value-type="float" office:value="23056" calcext:value-type="float">
            <text:p>23056</text:p>
          </table:table-cell>
          <table:table-cell office:value-type="float" office:value="8640000" calcext:value-type="float">
            <text:p>8640000</text:p>
          </table:table-cell>
          <table:table-cell table:formula="of:=[.B2883]/[.C2883]" office:value-type="float" office:value="0.00266851851851852" calcext:value-type="float">
            <text:p>0,00266851851851852000</text:p>
          </table:table-cell>
          <table:table-cell table:formula="of:=[.D2884]-[.D28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table:formula="of:=[.B2883]+8" office:value-type="float" office:value="23064" calcext:value-type="float">
            <text:p>23064</text:p>
          </table:table-cell>
          <table:table-cell office:value-type="float" office:value="8640000" calcext:value-type="float">
            <text:p>8640000</text:p>
          </table:table-cell>
          <table:table-cell table:formula="of:=[.B2884]/[.C2884]" office:value-type="float" office:value="0.00266944444444444" calcext:value-type="float">
            <text:p>0,00266944444444444000</text:p>
          </table:table-cell>
          <table:table-cell table:formula="of:=[.D2885]-[.D28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table:formula="of:=[.B2884]+8" office:value-type="float" office:value="23072" calcext:value-type="float">
            <text:p>23072</text:p>
          </table:table-cell>
          <table:table-cell office:value-type="float" office:value="8640000" calcext:value-type="float">
            <text:p>8640000</text:p>
          </table:table-cell>
          <table:table-cell table:formula="of:=[.B2885]/[.C2885]" office:value-type="float" office:value="0.00267037037037037" calcext:value-type="float">
            <text:p>0,00267037037037037000</text:p>
          </table:table-cell>
          <table:table-cell table:formula="of:=[.D2886]-[.D28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[.B2885]+8" office:value-type="float" office:value="23080" calcext:value-type="float">
            <text:p>23080</text:p>
          </table:table-cell>
          <table:table-cell office:value-type="float" office:value="8640000" calcext:value-type="float">
            <text:p>8640000</text:p>
          </table:table-cell>
          <table:table-cell table:formula="of:=[.B2886]/[.C2886]" office:value-type="float" office:value="0.0026712962962963" calcext:value-type="float">
            <text:p>0,00267129629629630000</text:p>
          </table:table-cell>
          <table:table-cell table:formula="of:=[.D2887]-[.D28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table:formula="of:=[.B2886]+8" office:value-type="float" office:value="23088" calcext:value-type="float">
            <text:p>23088</text:p>
          </table:table-cell>
          <table:table-cell office:value-type="float" office:value="8640000" calcext:value-type="float">
            <text:p>8640000</text:p>
          </table:table-cell>
          <table:table-cell table:formula="of:=[.B2887]/[.C2887]" office:value-type="float" office:value="0.00267222222222222" calcext:value-type="float">
            <text:p>0,00267222222222222000</text:p>
          </table:table-cell>
          <table:table-cell table:formula="of:=[.D2888]-[.D28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table:formula="of:=[.B2887]+8" office:value-type="float" office:value="23096" calcext:value-type="float">
            <text:p>23096</text:p>
          </table:table-cell>
          <table:table-cell office:value-type="float" office:value="8640000" calcext:value-type="float">
            <text:p>8640000</text:p>
          </table:table-cell>
          <table:table-cell table:formula="of:=[.B2888]/[.C2888]" office:value-type="float" office:value="0.00267314814814815" calcext:value-type="float">
            <text:p>0,00267314814814815000</text:p>
          </table:table-cell>
          <table:table-cell table:formula="of:=[.D2889]-[.D28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table:formula="of:=[.B2888]+8" office:value-type="float" office:value="23104" calcext:value-type="float">
            <text:p>23104</text:p>
          </table:table-cell>
          <table:table-cell office:value-type="float" office:value="8640000" calcext:value-type="float">
            <text:p>8640000</text:p>
          </table:table-cell>
          <table:table-cell table:formula="of:=[.B2889]/[.C2889]" office:value-type="float" office:value="0.00267407407407407" calcext:value-type="float">
            <text:p>0,00267407407407407000</text:p>
          </table:table-cell>
          <table:table-cell table:formula="of:=[.D2890]-[.D28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table:formula="of:=[.B2889]+8" office:value-type="float" office:value="23112" calcext:value-type="float">
            <text:p>23112</text:p>
          </table:table-cell>
          <table:table-cell office:value-type="float" office:value="8640000" calcext:value-type="float">
            <text:p>8640000</text:p>
          </table:table-cell>
          <table:table-cell table:formula="of:=[.B2890]/[.C2890]" office:value-type="float" office:value="0.002675" calcext:value-type="float">
            <text:p>0,00267500000000000000</text:p>
          </table:table-cell>
          <table:table-cell table:formula="of:=[.D2891]-[.D28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table:formula="of:=[.B2890]+8" office:value-type="float" office:value="23120" calcext:value-type="float">
            <text:p>23120</text:p>
          </table:table-cell>
          <table:table-cell office:value-type="float" office:value="8640000" calcext:value-type="float">
            <text:p>8640000</text:p>
          </table:table-cell>
          <table:table-cell table:formula="of:=[.B2891]/[.C2891]" office:value-type="float" office:value="0.00267592592592593" calcext:value-type="float">
            <text:p>0,00267592592592593000</text:p>
          </table:table-cell>
          <table:table-cell table:formula="of:=[.D2892]-[.D28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table:formula="of:=[.B2891]+8" office:value-type="float" office:value="23128" calcext:value-type="float">
            <text:p>23128</text:p>
          </table:table-cell>
          <table:table-cell office:value-type="float" office:value="8640000" calcext:value-type="float">
            <text:p>8640000</text:p>
          </table:table-cell>
          <table:table-cell table:formula="of:=[.B2892]/[.C2892]" office:value-type="float" office:value="0.00267685185185185" calcext:value-type="float">
            <text:p>0,00267685185185185000</text:p>
          </table:table-cell>
          <table:table-cell table:formula="of:=[.D2893]-[.D28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[.B2892]+8" office:value-type="float" office:value="23136" calcext:value-type="float">
            <text:p>23136</text:p>
          </table:table-cell>
          <table:table-cell office:value-type="float" office:value="8640000" calcext:value-type="float">
            <text:p>8640000</text:p>
          </table:table-cell>
          <table:table-cell table:formula="of:=[.B2893]/[.C2893]" office:value-type="float" office:value="0.00267777777777778" calcext:value-type="float">
            <text:p>0,00267777777777778000</text:p>
          </table:table-cell>
          <table:table-cell table:formula="of:=[.D2894]-[.D28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table:formula="of:=[.B2893]+8" office:value-type="float" office:value="23144" calcext:value-type="float">
            <text:p>23144</text:p>
          </table:table-cell>
          <table:table-cell office:value-type="float" office:value="8640000" calcext:value-type="float">
            <text:p>8640000</text:p>
          </table:table-cell>
          <table:table-cell table:formula="of:=[.B2894]/[.C2894]" office:value-type="float" office:value="0.0026787037037037" calcext:value-type="float">
            <text:p>0,00267870370370370000</text:p>
          </table:table-cell>
          <table:table-cell table:formula="of:=[.D2895]-[.D28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table:formula="of:=[.B2894]+8" office:value-type="float" office:value="23152" calcext:value-type="float">
            <text:p>23152</text:p>
          </table:table-cell>
          <table:table-cell office:value-type="float" office:value="8640000" calcext:value-type="float">
            <text:p>8640000</text:p>
          </table:table-cell>
          <table:table-cell table:formula="of:=[.B2895]/[.C2895]" office:value-type="float" office:value="0.00267962962962963" calcext:value-type="float">
            <text:p>0,00267962962962963000</text:p>
          </table:table-cell>
          <table:table-cell table:formula="of:=[.D2896]-[.D28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table:formula="of:=[.B2895]+8" office:value-type="float" office:value="23160" calcext:value-type="float">
            <text:p>23160</text:p>
          </table:table-cell>
          <table:table-cell office:value-type="float" office:value="8640000" calcext:value-type="float">
            <text:p>8640000</text:p>
          </table:table-cell>
          <table:table-cell table:formula="of:=[.B2896]/[.C2896]" office:value-type="float" office:value="0.00268055555555556" calcext:value-type="float">
            <text:p>0,00268055555555556000</text:p>
          </table:table-cell>
          <table:table-cell table:formula="of:=[.D2897]-[.D28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table:formula="of:=[.B2896]+8" office:value-type="float" office:value="23168" calcext:value-type="float">
            <text:p>23168</text:p>
          </table:table-cell>
          <table:table-cell office:value-type="float" office:value="8640000" calcext:value-type="float">
            <text:p>8640000</text:p>
          </table:table-cell>
          <table:table-cell table:formula="of:=[.B2897]/[.C2897]" office:value-type="float" office:value="0.00268148148148148" calcext:value-type="float">
            <text:p>0,00268148148148148000</text:p>
          </table:table-cell>
          <table:table-cell table:formula="of:=[.D2898]-[.D28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table:formula="of:=[.B2897]+8" office:value-type="float" office:value="23176" calcext:value-type="float">
            <text:p>23176</text:p>
          </table:table-cell>
          <table:table-cell office:value-type="float" office:value="8640000" calcext:value-type="float">
            <text:p>8640000</text:p>
          </table:table-cell>
          <table:table-cell table:formula="of:=[.B2898]/[.C2898]" office:value-type="float" office:value="0.00268240740740741" calcext:value-type="float">
            <text:p>0,00268240740740741000</text:p>
          </table:table-cell>
          <table:table-cell table:formula="of:=[.D2899]-[.D28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table:formula="of:=[.B2898]+8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2899]/[.C2899]" office:value-type="float" office:value="0.00268333333333333" calcext:value-type="float">
            <text:p>0,00268333333333333000</text:p>
          </table:table-cell>
          <table:table-cell table:formula="of:=[.D2900]-[.D28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table:formula="of:=[.B2899]+8" office:value-type="float" office:value="23192" calcext:value-type="float">
            <text:p>23192</text:p>
          </table:table-cell>
          <table:table-cell office:value-type="float" office:value="8640000" calcext:value-type="float">
            <text:p>8640000</text:p>
          </table:table-cell>
          <table:table-cell table:formula="of:=[.B2900]/[.C2900]" office:value-type="float" office:value="0.00268425925925926" calcext:value-type="float">
            <text:p>0,00268425925925926000</text:p>
          </table:table-cell>
          <table:table-cell table:formula="of:=[.D2901]-[.D29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formula="of:=[.B2900]+8" office:value-type="float" office:value="23200" calcext:value-type="float">
            <text:p>23200</text:p>
          </table:table-cell>
          <table:table-cell office:value-type="float" office:value="8640000" calcext:value-type="float">
            <text:p>8640000</text:p>
          </table:table-cell>
          <table:table-cell table:formula="of:=[.B2901]/[.C2901]" office:value-type="float" office:value="0.00268518518518519" calcext:value-type="float">
            <text:p>0,00268518518518519000</text:p>
          </table:table-cell>
          <table:table-cell table:formula="of:=[.D2902]-[.D290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table:formula="of:=[.B2901]+8" office:value-type="float" office:value="23208" calcext:value-type="float">
            <text:p>23208</text:p>
          </table:table-cell>
          <table:table-cell office:value-type="float" office:value="8640000" calcext:value-type="float">
            <text:p>8640000</text:p>
          </table:table-cell>
          <table:table-cell table:formula="of:=[.B2902]/[.C2902]" office:value-type="float" office:value="0.00268611111111111" calcext:value-type="float">
            <text:p>0,00268611111111111000</text:p>
          </table:table-cell>
          <table:table-cell table:formula="of:=[.D2903]-[.D290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table:formula="of:=[.B2902]+8" office:value-type="float" office:value="23216" calcext:value-type="float">
            <text:p>23216</text:p>
          </table:table-cell>
          <table:table-cell office:value-type="float" office:value="8640000" calcext:value-type="float">
            <text:p>8640000</text:p>
          </table:table-cell>
          <table:table-cell table:formula="of:=[.B2903]/[.C2903]" office:value-type="float" office:value="0.00268703703703704" calcext:value-type="float">
            <text:p>0,00268703703703704000</text:p>
          </table:table-cell>
          <table:table-cell table:formula="of:=[.D2904]-[.D2903]" office:value-type="float" office:value="0.000000925925925926354" calcext:value-type="float">
            <text:p>0,00000092592592592635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table:formula="of:=[.B2903]+8" office:value-type="float" office:value="23224" calcext:value-type="float">
            <text:p>23224</text:p>
          </table:table-cell>
          <table:table-cell office:value-type="float" office:value="8640000" calcext:value-type="float">
            <text:p>8640000</text:p>
          </table:table-cell>
          <table:table-cell table:formula="of:=[.B2904]/[.C2904]" office:value-type="float" office:value="0.00268796296296296" calcext:value-type="float">
            <text:p>0,00268796296296296000</text:p>
          </table:table-cell>
          <table:table-cell table:formula="of:=[.D2905]-[.D290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table:formula="of:=[.B2904]+8" office:value-type="float" office:value="23232" calcext:value-type="float">
            <text:p>23232</text:p>
          </table:table-cell>
          <table:table-cell office:value-type="float" office:value="8640000" calcext:value-type="float">
            <text:p>8640000</text:p>
          </table:table-cell>
          <table:table-cell table:formula="of:=[.B2905]/[.C2905]" office:value-type="float" office:value="0.00268888888888889" calcext:value-type="float">
            <text:p>0,00268888888888889000</text:p>
          </table:table-cell>
          <table:table-cell table:formula="of:=[.D2906]-[.D290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table:formula="of:=[.B2905]+8" office:value-type="float" office:value="23240" calcext:value-type="float">
            <text:p>23240</text:p>
          </table:table-cell>
          <table:table-cell office:value-type="float" office:value="8640000" calcext:value-type="float">
            <text:p>8640000</text:p>
          </table:table-cell>
          <table:table-cell table:formula="of:=[.B2906]/[.C2906]" office:value-type="float" office:value="0.00268981481481482" calcext:value-type="float">
            <text:p>0,00268981481481482000</text:p>
          </table:table-cell>
          <table:table-cell table:formula="of:=[.D2907]-[.D290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table:formula="of:=[.B2906]+8" office:value-type="float" office:value="23248" calcext:value-type="float">
            <text:p>23248</text:p>
          </table:table-cell>
          <table:table-cell office:value-type="float" office:value="8640000" calcext:value-type="float">
            <text:p>8640000</text:p>
          </table:table-cell>
          <table:table-cell table:formula="of:=[.B2907]/[.C2907]" office:value-type="float" office:value="0.00269074074074074" calcext:value-type="float">
            <text:p>0,00269074074074074000</text:p>
          </table:table-cell>
          <table:table-cell table:formula="of:=[.D2908]-[.D290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table:formula="of:=[.B2907]+8" office:value-type="float" office:value="23256" calcext:value-type="float">
            <text:p>23256</text:p>
          </table:table-cell>
          <table:table-cell office:value-type="float" office:value="8640000" calcext:value-type="float">
            <text:p>8640000</text:p>
          </table:table-cell>
          <table:table-cell table:formula="of:=[.B2908]/[.C2908]" office:value-type="float" office:value="0.00269166666666667" calcext:value-type="float">
            <text:p>0,00269166666666667000</text:p>
          </table:table-cell>
          <table:table-cell table:formula="of:=[.D2909]-[.D290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table:formula="of:=[.B2908]+8" office:value-type="float" office:value="23264" calcext:value-type="float">
            <text:p>23264</text:p>
          </table:table-cell>
          <table:table-cell office:value-type="float" office:value="8640000" calcext:value-type="float">
            <text:p>8640000</text:p>
          </table:table-cell>
          <table:table-cell table:formula="of:=[.B2909]/[.C2909]" office:value-type="float" office:value="0.00269259259259259" calcext:value-type="float">
            <text:p>0,00269259259259259000</text:p>
          </table:table-cell>
          <table:table-cell table:formula="of:=[.D2910]-[.D290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table:formula="of:=[.B2909]+8" office:value-type="float" office:value="23272" calcext:value-type="float">
            <text:p>23272</text:p>
          </table:table-cell>
          <table:table-cell office:value-type="float" office:value="8640000" calcext:value-type="float">
            <text:p>8640000</text:p>
          </table:table-cell>
          <table:table-cell table:formula="of:=[.B2910]/[.C2910]" office:value-type="float" office:value="0.00269351851851852" calcext:value-type="float">
            <text:p>0,00269351851851852000</text:p>
          </table:table-cell>
          <table:table-cell table:formula="of:=[.D2911]-[.D291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[.B2910]+8" office:value-type="float" office:value="23280" calcext:value-type="float">
            <text:p>23280</text:p>
          </table:table-cell>
          <table:table-cell office:value-type="float" office:value="8640000" calcext:value-type="float">
            <text:p>8640000</text:p>
          </table:table-cell>
          <table:table-cell table:formula="of:=[.B2911]/[.C2911]" office:value-type="float" office:value="0.00269444444444444" calcext:value-type="float">
            <text:p>0,00269444444444444000</text:p>
          </table:table-cell>
          <table:table-cell table:formula="of:=[.D2912]-[.D291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table:formula="of:=[.B2911]+8" office:value-type="float" office:value="23288" calcext:value-type="float">
            <text:p>23288</text:p>
          </table:table-cell>
          <table:table-cell office:value-type="float" office:value="8640000" calcext:value-type="float">
            <text:p>8640000</text:p>
          </table:table-cell>
          <table:table-cell table:formula="of:=[.B2912]/[.C2912]" office:value-type="float" office:value="0.00269537037037037" calcext:value-type="float">
            <text:p>0,00269537037037037000</text:p>
          </table:table-cell>
          <table:table-cell table:formula="of:=[.D2913]-[.D291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table:formula="of:=[.B2912]+8" office:value-type="float" office:value="23296" calcext:value-type="float">
            <text:p>23296</text:p>
          </table:table-cell>
          <table:table-cell office:value-type="float" office:value="8640000" calcext:value-type="float">
            <text:p>8640000</text:p>
          </table:table-cell>
          <table:table-cell table:formula="of:=[.B2913]/[.C2913]" office:value-type="float" office:value="0.0026962962962963" calcext:value-type="float">
            <text:p>0,00269629629629630000</text:p>
          </table:table-cell>
          <table:table-cell table:formula="of:=[.D2914]-[.D291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table:formula="of:=[.B2913]+8" office:value-type="float" office:value="23304" calcext:value-type="float">
            <text:p>23304</text:p>
          </table:table-cell>
          <table:table-cell office:value-type="float" office:value="8640000" calcext:value-type="float">
            <text:p>8640000</text:p>
          </table:table-cell>
          <table:table-cell table:formula="of:=[.B2914]/[.C2914]" office:value-type="float" office:value="0.00269722222222222" calcext:value-type="float">
            <text:p>0,00269722222222222000</text:p>
          </table:table-cell>
          <table:table-cell table:formula="of:=[.D2915]-[.D291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[.B2914]+8" office:value-type="float" office:value="23312" calcext:value-type="float">
            <text:p>23312</text:p>
          </table:table-cell>
          <table:table-cell office:value-type="float" office:value="8640000" calcext:value-type="float">
            <text:p>8640000</text:p>
          </table:table-cell>
          <table:table-cell table:formula="of:=[.B2915]/[.C2915]" office:value-type="float" office:value="0.00269814814814815" calcext:value-type="float">
            <text:p>0,00269814814814815000</text:p>
          </table:table-cell>
          <table:table-cell table:formula="of:=[.D2916]-[.D291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table:formula="of:=[.B2915]+8" office:value-type="float" office:value="23320" calcext:value-type="float">
            <text:p>23320</text:p>
          </table:table-cell>
          <table:table-cell office:value-type="float" office:value="8640000" calcext:value-type="float">
            <text:p>8640000</text:p>
          </table:table-cell>
          <table:table-cell table:formula="of:=[.B2916]/[.C2916]" office:value-type="float" office:value="0.00269907407407407" calcext:value-type="float">
            <text:p>0,00269907407407407000</text:p>
          </table:table-cell>
          <table:table-cell table:formula="of:=[.D2917]-[.D291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table:formula="of:=[.B2916]+8" office:value-type="float" office:value="23328" calcext:value-type="float">
            <text:p>23328</text:p>
          </table:table-cell>
          <table:table-cell office:value-type="float" office:value="8640000" calcext:value-type="float">
            <text:p>8640000</text:p>
          </table:table-cell>
          <table:table-cell table:formula="of:=[.B2917]/[.C2917]" office:value-type="float" office:value="0.0027" calcext:value-type="float">
            <text:p>0,00270000000000000000</text:p>
          </table:table-cell>
          <table:table-cell table:formula="of:=[.D2918]-[.D291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table:formula="of:=[.B2917]+8" office:value-type="float" office:value="23336" calcext:value-type="float">
            <text:p>23336</text:p>
          </table:table-cell>
          <table:table-cell office:value-type="float" office:value="8640000" calcext:value-type="float">
            <text:p>8640000</text:p>
          </table:table-cell>
          <table:table-cell table:formula="of:=[.B2918]/[.C2918]" office:value-type="float" office:value="0.00270092592592593" calcext:value-type="float">
            <text:p>0,00270092592592593000</text:p>
          </table:table-cell>
          <table:table-cell table:formula="of:=[.D2919]-[.D291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table:formula="of:=[.B2918]+8" office:value-type="float" office:value="23344" calcext:value-type="float">
            <text:p>23344</text:p>
          </table:table-cell>
          <table:table-cell office:value-type="float" office:value="8640000" calcext:value-type="float">
            <text:p>8640000</text:p>
          </table:table-cell>
          <table:table-cell table:formula="of:=[.B2919]/[.C2919]" office:value-type="float" office:value="0.00270185185185185" calcext:value-type="float">
            <text:p>0,00270185185185185000</text:p>
          </table:table-cell>
          <table:table-cell table:formula="of:=[.D2920]-[.D291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table:formula="of:=[.B2919]+8" office:value-type="float" office:value="23352" calcext:value-type="float">
            <text:p>23352</text:p>
          </table:table-cell>
          <table:table-cell office:value-type="float" office:value="8640000" calcext:value-type="float">
            <text:p>8640000</text:p>
          </table:table-cell>
          <table:table-cell table:formula="of:=[.B2920]/[.C2920]" office:value-type="float" office:value="0.00270277777777778" calcext:value-type="float">
            <text:p>0,00270277777777778000</text:p>
          </table:table-cell>
          <table:table-cell table:formula="of:=[.D2921]-[.D292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table:formula="of:=[.B2920]+8" office:value-type="float" office:value="23360" calcext:value-type="float">
            <text:p>23360</text:p>
          </table:table-cell>
          <table:table-cell office:value-type="float" office:value="8640000" calcext:value-type="float">
            <text:p>8640000</text:p>
          </table:table-cell>
          <table:table-cell table:formula="of:=[.B2921]/[.C2921]" office:value-type="float" office:value="0.0027037037037037" calcext:value-type="float">
            <text:p>0,00270370370370370000</text:p>
          </table:table-cell>
          <table:table-cell table:formula="of:=[.D2922]-[.D292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table:formula="of:=[.B2921]+8" office:value-type="float" office:value="23368" calcext:value-type="float">
            <text:p>23368</text:p>
          </table:table-cell>
          <table:table-cell office:value-type="float" office:value="8640000" calcext:value-type="float">
            <text:p>8640000</text:p>
          </table:table-cell>
          <table:table-cell table:formula="of:=[.B2922]/[.C2922]" office:value-type="float" office:value="0.00270462962962963" calcext:value-type="float">
            <text:p>0,00270462962962963000</text:p>
          </table:table-cell>
          <table:table-cell table:formula="of:=[.D2923]-[.D292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table:formula="of:=[.B2922]+8" office:value-type="float" office:value="23376" calcext:value-type="float">
            <text:p>23376</text:p>
          </table:table-cell>
          <table:table-cell office:value-type="float" office:value="8640000" calcext:value-type="float">
            <text:p>8640000</text:p>
          </table:table-cell>
          <table:table-cell table:formula="of:=[.B2923]/[.C2923]" office:value-type="float" office:value="0.00270555555555556" calcext:value-type="float">
            <text:p>0,00270555555555556000</text:p>
          </table:table-cell>
          <table:table-cell table:formula="of:=[.D2924]-[.D292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table:formula="of:=[.B2923]+8" office:value-type="float" office:value="23384" calcext:value-type="float">
            <text:p>23384</text:p>
          </table:table-cell>
          <table:table-cell office:value-type="float" office:value="8640000" calcext:value-type="float">
            <text:p>8640000</text:p>
          </table:table-cell>
          <table:table-cell table:formula="of:=[.B2924]/[.C2924]" office:value-type="float" office:value="0.00270648148148148" calcext:value-type="float">
            <text:p>0,00270648148148148000</text:p>
          </table:table-cell>
          <table:table-cell table:formula="of:=[.D2925]-[.D292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table:formula="of:=[.B2924]+8" office:value-type="float" office:value="23392" calcext:value-type="float">
            <text:p>23392</text:p>
          </table:table-cell>
          <table:table-cell office:value-type="float" office:value="8640000" calcext:value-type="float">
            <text:p>8640000</text:p>
          </table:table-cell>
          <table:table-cell table:formula="of:=[.B2925]/[.C2925]" office:value-type="float" office:value="0.00270740740740741" calcext:value-type="float">
            <text:p>0,00270740740740741000</text:p>
          </table:table-cell>
          <table:table-cell table:formula="of:=[.D2926]-[.D292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table:formula="of:=[.B2925]+8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2926]/[.C2926]" office:value-type="float" office:value="0.00270833333333333" calcext:value-type="float">
            <text:p>0,00270833333333333000</text:p>
          </table:table-cell>
          <table:table-cell table:formula="of:=[.D2927]-[.D292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table:formula="of:=[.B2926]+8" office:value-type="float" office:value="23408" calcext:value-type="float">
            <text:p>23408</text:p>
          </table:table-cell>
          <table:table-cell office:value-type="float" office:value="8640000" calcext:value-type="float">
            <text:p>8640000</text:p>
          </table:table-cell>
          <table:table-cell table:formula="of:=[.B2927]/[.C2927]" office:value-type="float" office:value="0.00270925925925926" calcext:value-type="float">
            <text:p>0,00270925925925926000</text:p>
          </table:table-cell>
          <table:table-cell table:formula="of:=[.D2928]-[.D292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table:formula="of:=[.B2927]+8" office:value-type="float" office:value="23416" calcext:value-type="float">
            <text:p>23416</text:p>
          </table:table-cell>
          <table:table-cell office:value-type="float" office:value="8640000" calcext:value-type="float">
            <text:p>8640000</text:p>
          </table:table-cell>
          <table:table-cell table:formula="of:=[.B2928]/[.C2928]" office:value-type="float" office:value="0.00271018518518519" calcext:value-type="float">
            <text:p>0,00271018518518519000</text:p>
          </table:table-cell>
          <table:table-cell table:formula="of:=[.D2929]-[.D292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table:formula="of:=[.B2928]+8" office:value-type="float" office:value="23424" calcext:value-type="float">
            <text:p>23424</text:p>
          </table:table-cell>
          <table:table-cell office:value-type="float" office:value="8640000" calcext:value-type="float">
            <text:p>8640000</text:p>
          </table:table-cell>
          <table:table-cell table:formula="of:=[.B2929]/[.C2929]" office:value-type="float" office:value="0.00271111111111111" calcext:value-type="float">
            <text:p>0,00271111111111111000</text:p>
          </table:table-cell>
          <table:table-cell table:formula="of:=[.D2930]-[.D292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table:formula="of:=[.B2929]+8" office:value-type="float" office:value="23432" calcext:value-type="float">
            <text:p>23432</text:p>
          </table:table-cell>
          <table:table-cell office:value-type="float" office:value="8640000" calcext:value-type="float">
            <text:p>8640000</text:p>
          </table:table-cell>
          <table:table-cell table:formula="of:=[.B2930]/[.C2930]" office:value-type="float" office:value="0.00271203703703704" calcext:value-type="float">
            <text:p>0,00271203703703704000</text:p>
          </table:table-cell>
          <table:table-cell table:formula="of:=[.D2931]-[.D293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table:formula="of:=[.B2930]+8" office:value-type="float" office:value="23440" calcext:value-type="float">
            <text:p>23440</text:p>
          </table:table-cell>
          <table:table-cell office:value-type="float" office:value="8640000" calcext:value-type="float">
            <text:p>8640000</text:p>
          </table:table-cell>
          <table:table-cell table:formula="of:=[.B2931]/[.C2931]" office:value-type="float" office:value="0.00271296296296296" calcext:value-type="float">
            <text:p>0,00271296296296296000</text:p>
          </table:table-cell>
          <table:table-cell table:formula="of:=[.D2932]-[.D293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table:formula="of:=[.B2931]+8" office:value-type="float" office:value="23448" calcext:value-type="float">
            <text:p>23448</text:p>
          </table:table-cell>
          <table:table-cell office:value-type="float" office:value="8640000" calcext:value-type="float">
            <text:p>8640000</text:p>
          </table:table-cell>
          <table:table-cell table:formula="of:=[.B2932]/[.C2932]" office:value-type="float" office:value="0.00271388888888889" calcext:value-type="float">
            <text:p>0,00271388888888889000</text:p>
          </table:table-cell>
          <table:table-cell table:formula="of:=[.D2933]-[.D293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table:formula="of:=[.B2932]+8" office:value-type="float" office:value="23456" calcext:value-type="float">
            <text:p>23456</text:p>
          </table:table-cell>
          <table:table-cell office:value-type="float" office:value="8640000" calcext:value-type="float">
            <text:p>8640000</text:p>
          </table:table-cell>
          <table:table-cell table:formula="of:=[.B2933]/[.C2933]" office:value-type="float" office:value="0.00271481481481482" calcext:value-type="float">
            <text:p>0,00271481481481482000</text:p>
          </table:table-cell>
          <table:table-cell table:formula="of:=[.D2934]-[.D293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table:formula="of:=[.B2933]+8" office:value-type="float" office:value="23464" calcext:value-type="float">
            <text:p>23464</text:p>
          </table:table-cell>
          <table:table-cell office:value-type="float" office:value="8640000" calcext:value-type="float">
            <text:p>8640000</text:p>
          </table:table-cell>
          <table:table-cell table:formula="of:=[.B2934]/[.C2934]" office:value-type="float" office:value="0.00271574074074074" calcext:value-type="float">
            <text:p>0,00271574074074074000</text:p>
          </table:table-cell>
          <table:table-cell table:formula="of:=[.D2935]-[.D293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table:formula="of:=[.B2934]+8" office:value-type="float" office:value="23472" calcext:value-type="float">
            <text:p>23472</text:p>
          </table:table-cell>
          <table:table-cell office:value-type="float" office:value="8640000" calcext:value-type="float">
            <text:p>8640000</text:p>
          </table:table-cell>
          <table:table-cell table:formula="of:=[.B2935]/[.C2935]" office:value-type="float" office:value="0.00271666666666667" calcext:value-type="float">
            <text:p>0,00271666666666667000</text:p>
          </table:table-cell>
          <table:table-cell table:formula="of:=[.D2936]-[.D293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table:formula="of:=[.B2935]+8" office:value-type="float" office:value="23480" calcext:value-type="float">
            <text:p>23480</text:p>
          </table:table-cell>
          <table:table-cell office:value-type="float" office:value="8640000" calcext:value-type="float">
            <text:p>8640000</text:p>
          </table:table-cell>
          <table:table-cell table:formula="of:=[.B2936]/[.C2936]" office:value-type="float" office:value="0.00271759259259259" calcext:value-type="float">
            <text:p>0,00271759259259259000</text:p>
          </table:table-cell>
          <table:table-cell table:formula="of:=[.D2937]-[.D293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table:formula="of:=[.B2936]+8" office:value-type="float" office:value="23488" calcext:value-type="float">
            <text:p>23488</text:p>
          </table:table-cell>
          <table:table-cell office:value-type="float" office:value="8640000" calcext:value-type="float">
            <text:p>8640000</text:p>
          </table:table-cell>
          <table:table-cell table:formula="of:=[.B2937]/[.C2937]" office:value-type="float" office:value="0.00271851851851852" calcext:value-type="float">
            <text:p>0,00271851851851852000</text:p>
          </table:table-cell>
          <table:table-cell table:formula="of:=[.D2938]-[.D293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table:formula="of:=[.B2937]+8" office:value-type="float" office:value="23496" calcext:value-type="float">
            <text:p>23496</text:p>
          </table:table-cell>
          <table:table-cell office:value-type="float" office:value="8640000" calcext:value-type="float">
            <text:p>8640000</text:p>
          </table:table-cell>
          <table:table-cell table:formula="of:=[.B2938]/[.C2938]" office:value-type="float" office:value="0.00271944444444444" calcext:value-type="float">
            <text:p>0,00271944444444444000</text:p>
          </table:table-cell>
          <table:table-cell table:formula="of:=[.D2939]-[.D293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table:formula="of:=[.B2938]+8" office:value-type="float" office:value="23504" calcext:value-type="float">
            <text:p>23504</text:p>
          </table:table-cell>
          <table:table-cell office:value-type="float" office:value="8640000" calcext:value-type="float">
            <text:p>8640000</text:p>
          </table:table-cell>
          <table:table-cell table:formula="of:=[.B2939]/[.C2939]" office:value-type="float" office:value="0.00272037037037037" calcext:value-type="float">
            <text:p>0,00272037037037037000</text:p>
          </table:table-cell>
          <table:table-cell table:formula="of:=[.D2940]-[.D293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table:formula="of:=[.B2939]+8" office:value-type="float" office:value="23512" calcext:value-type="float">
            <text:p>23512</text:p>
          </table:table-cell>
          <table:table-cell office:value-type="float" office:value="8640000" calcext:value-type="float">
            <text:p>8640000</text:p>
          </table:table-cell>
          <table:table-cell table:formula="of:=[.B2940]/[.C2940]" office:value-type="float" office:value="0.0027212962962963" calcext:value-type="float">
            <text:p>0,00272129629629630000</text:p>
          </table:table-cell>
          <table:table-cell table:formula="of:=[.D2941]-[.D294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[.B2940]+8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2941]/[.C2941]" office:value-type="float" office:value="0.00272222222222222" calcext:value-type="float">
            <text:p>0,00272222222222222000</text:p>
          </table:table-cell>
          <table:table-cell table:formula="of:=[.D2942]-[.D294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table:formula="of:=[.B2941]+8" office:value-type="float" office:value="23528" calcext:value-type="float">
            <text:p>23528</text:p>
          </table:table-cell>
          <table:table-cell office:value-type="float" office:value="8640000" calcext:value-type="float">
            <text:p>8640000</text:p>
          </table:table-cell>
          <table:table-cell table:formula="of:=[.B2942]/[.C2942]" office:value-type="float" office:value="0.00272314814814815" calcext:value-type="float">
            <text:p>0,00272314814814815000</text:p>
          </table:table-cell>
          <table:table-cell table:formula="of:=[.D2943]-[.D294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table:formula="of:=[.B2942]+8" office:value-type="float" office:value="23536" calcext:value-type="float">
            <text:p>23536</text:p>
          </table:table-cell>
          <table:table-cell office:value-type="float" office:value="8640000" calcext:value-type="float">
            <text:p>8640000</text:p>
          </table:table-cell>
          <table:table-cell table:formula="of:=[.B2943]/[.C2943]" office:value-type="float" office:value="0.00272407407407407" calcext:value-type="float">
            <text:p>0,00272407407407407000</text:p>
          </table:table-cell>
          <table:table-cell table:formula="of:=[.D2944]-[.D294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table:formula="of:=[.B2943]+8" office:value-type="float" office:value="23544" calcext:value-type="float">
            <text:p>23544</text:p>
          </table:table-cell>
          <table:table-cell office:value-type="float" office:value="8640000" calcext:value-type="float">
            <text:p>8640000</text:p>
          </table:table-cell>
          <table:table-cell table:formula="of:=[.B2944]/[.C2944]" office:value-type="float" office:value="0.002725" calcext:value-type="float">
            <text:p>0,00272500000000000000</text:p>
          </table:table-cell>
          <table:table-cell table:formula="of:=[.D2945]-[.D294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table:formula="of:=[.B2944]+8" office:value-type="float" office:value="23552" calcext:value-type="float">
            <text:p>23552</text:p>
          </table:table-cell>
          <table:table-cell office:value-type="float" office:value="8640000" calcext:value-type="float">
            <text:p>8640000</text:p>
          </table:table-cell>
          <table:table-cell table:formula="of:=[.B2945]/[.C2945]" office:value-type="float" office:value="0.00272592592592593" calcext:value-type="float">
            <text:p>0,00272592592592593000</text:p>
          </table:table-cell>
          <table:table-cell table:formula="of:=[.D2946]-[.D294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table:formula="of:=[.B2945]+8" office:value-type="float" office:value="23560" calcext:value-type="float">
            <text:p>23560</text:p>
          </table:table-cell>
          <table:table-cell office:value-type="float" office:value="8640000" calcext:value-type="float">
            <text:p>8640000</text:p>
          </table:table-cell>
          <table:table-cell table:formula="of:=[.B2946]/[.C2946]" office:value-type="float" office:value="0.00272685185185185" calcext:value-type="float">
            <text:p>0,00272685185185185000</text:p>
          </table:table-cell>
          <table:table-cell table:formula="of:=[.D2947]-[.D294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[.B2946]+8" office:value-type="float" office:value="23568" calcext:value-type="float">
            <text:p>23568</text:p>
          </table:table-cell>
          <table:table-cell office:value-type="float" office:value="8640000" calcext:value-type="float">
            <text:p>8640000</text:p>
          </table:table-cell>
          <table:table-cell table:formula="of:=[.B2947]/[.C2947]" office:value-type="float" office:value="0.00272777777777778" calcext:value-type="float">
            <text:p>0,00272777777777778000</text:p>
          </table:table-cell>
          <table:table-cell table:formula="of:=[.D2948]-[.D294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table:formula="of:=[.B2947]+8" office:value-type="float" office:value="23576" calcext:value-type="float">
            <text:p>23576</text:p>
          </table:table-cell>
          <table:table-cell office:value-type="float" office:value="8640000" calcext:value-type="float">
            <text:p>8640000</text:p>
          </table:table-cell>
          <table:table-cell table:formula="of:=[.B2948]/[.C2948]" office:value-type="float" office:value="0.0027287037037037" calcext:value-type="float">
            <text:p>0,00272870370370370000</text:p>
          </table:table-cell>
          <table:table-cell table:formula="of:=[.D2949]-[.D294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[.B2948]+8" office:value-type="float" office:value="23584" calcext:value-type="float">
            <text:p>23584</text:p>
          </table:table-cell>
          <table:table-cell office:value-type="float" office:value="8640000" calcext:value-type="float">
            <text:p>8640000</text:p>
          </table:table-cell>
          <table:table-cell table:formula="of:=[.B2949]/[.C2949]" office:value-type="float" office:value="0.00272962962962963" calcext:value-type="float">
            <text:p>0,00272962962962963000</text:p>
          </table:table-cell>
          <table:table-cell table:formula="of:=[.D2950]-[.D294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table:formula="of:=[.B2949]+8" office:value-type="float" office:value="23592" calcext:value-type="float">
            <text:p>23592</text:p>
          </table:table-cell>
          <table:table-cell office:value-type="float" office:value="8640000" calcext:value-type="float">
            <text:p>8640000</text:p>
          </table:table-cell>
          <table:table-cell table:formula="of:=[.B2950]/[.C2950]" office:value-type="float" office:value="0.00273055555555556" calcext:value-type="float">
            <text:p>0,00273055555555556000</text:p>
          </table:table-cell>
          <table:table-cell table:formula="of:=[.D2951]-[.D295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table:formula="of:=[.B2950]+8" office:value-type="float" office:value="23600" calcext:value-type="float">
            <text:p>23600</text:p>
          </table:table-cell>
          <table:table-cell office:value-type="float" office:value="8640000" calcext:value-type="float">
            <text:p>8640000</text:p>
          </table:table-cell>
          <table:table-cell table:formula="of:=[.B2951]/[.C2951]" office:value-type="float" office:value="0.00273148148148148" calcext:value-type="float">
            <text:p>0,00273148148148148000</text:p>
          </table:table-cell>
          <table:table-cell table:formula="of:=[.D2952]-[.D295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table:formula="of:=[.B2951]+8" office:value-type="float" office:value="23608" calcext:value-type="float">
            <text:p>23608</text:p>
          </table:table-cell>
          <table:table-cell office:value-type="float" office:value="8640000" calcext:value-type="float">
            <text:p>8640000</text:p>
          </table:table-cell>
          <table:table-cell table:formula="of:=[.B2952]/[.C2952]" office:value-type="float" office:value="0.00273240740740741" calcext:value-type="float">
            <text:p>0,00273240740740741000</text:p>
          </table:table-cell>
          <table:table-cell table:formula="of:=[.D2953]-[.D295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table:formula="of:=[.B2952]+8" office:value-type="float" office:value="23616" calcext:value-type="float">
            <text:p>23616</text:p>
          </table:table-cell>
          <table:table-cell office:value-type="float" office:value="8640000" calcext:value-type="float">
            <text:p>8640000</text:p>
          </table:table-cell>
          <table:table-cell table:formula="of:=[.B2953]/[.C2953]" office:value-type="float" office:value="0.00273333333333333" calcext:value-type="float">
            <text:p>0,00273333333333333000</text:p>
          </table:table-cell>
          <table:table-cell table:formula="of:=[.D2954]-[.D295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table:formula="of:=[.B2953]+8" office:value-type="float" office:value="23624" calcext:value-type="float">
            <text:p>23624</text:p>
          </table:table-cell>
          <table:table-cell office:value-type="float" office:value="8640000" calcext:value-type="float">
            <text:p>8640000</text:p>
          </table:table-cell>
          <table:table-cell table:formula="of:=[.B2954]/[.C2954]" office:value-type="float" office:value="0.00273425925925926" calcext:value-type="float">
            <text:p>0,00273425925925926000</text:p>
          </table:table-cell>
          <table:table-cell table:formula="of:=[.D2955]-[.D295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table:formula="of:=[.B2954]+8" office:value-type="float" office:value="23632" calcext:value-type="float">
            <text:p>23632</text:p>
          </table:table-cell>
          <table:table-cell office:value-type="float" office:value="8640000" calcext:value-type="float">
            <text:p>8640000</text:p>
          </table:table-cell>
          <table:table-cell table:formula="of:=[.B2955]/[.C2955]" office:value-type="float" office:value="0.00273518518518519" calcext:value-type="float">
            <text:p>0,00273518518518519000</text:p>
          </table:table-cell>
          <table:table-cell table:formula="of:=[.D2956]-[.D295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table:formula="of:=[.B2955]+8" office:value-type="float" office:value="23640" calcext:value-type="float">
            <text:p>23640</text:p>
          </table:table-cell>
          <table:table-cell office:value-type="float" office:value="8640000" calcext:value-type="float">
            <text:p>8640000</text:p>
          </table:table-cell>
          <table:table-cell table:formula="of:=[.B2956]/[.C2956]" office:value-type="float" office:value="0.00273611111111111" calcext:value-type="float">
            <text:p>0,00273611111111111000</text:p>
          </table:table-cell>
          <table:table-cell table:formula="of:=[.D2957]-[.D295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[.B2956]+8" office:value-type="float" office:value="23648" calcext:value-type="float">
            <text:p>23648</text:p>
          </table:table-cell>
          <table:table-cell office:value-type="float" office:value="8640000" calcext:value-type="float">
            <text:p>8640000</text:p>
          </table:table-cell>
          <table:table-cell table:formula="of:=[.B2957]/[.C2957]" office:value-type="float" office:value="0.00273703703703704" calcext:value-type="float">
            <text:p>0,00273703703703704000</text:p>
          </table:table-cell>
          <table:table-cell table:formula="of:=[.D2958]-[.D295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table:formula="of:=[.B2957]+8" office:value-type="float" office:value="23656" calcext:value-type="float">
            <text:p>23656</text:p>
          </table:table-cell>
          <table:table-cell office:value-type="float" office:value="8640000" calcext:value-type="float">
            <text:p>8640000</text:p>
          </table:table-cell>
          <table:table-cell table:formula="of:=[.B2958]/[.C2958]" office:value-type="float" office:value="0.00273796296296296" calcext:value-type="float">
            <text:p>0,00273796296296296000</text:p>
          </table:table-cell>
          <table:table-cell table:formula="of:=[.D2959]-[.D295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table:formula="of:=[.B2958]+8" office:value-type="float" office:value="23664" calcext:value-type="float">
            <text:p>23664</text:p>
          </table:table-cell>
          <table:table-cell office:value-type="float" office:value="8640000" calcext:value-type="float">
            <text:p>8640000</text:p>
          </table:table-cell>
          <table:table-cell table:formula="of:=[.B2959]/[.C2959]" office:value-type="float" office:value="0.00273888888888889" calcext:value-type="float">
            <text:p>0,00273888888888889000</text:p>
          </table:table-cell>
          <table:table-cell table:formula="of:=[.D2960]-[.D295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table:formula="of:=[.B2959]+8" office:value-type="float" office:value="23672" calcext:value-type="float">
            <text:p>23672</text:p>
          </table:table-cell>
          <table:table-cell office:value-type="float" office:value="8640000" calcext:value-type="float">
            <text:p>8640000</text:p>
          </table:table-cell>
          <table:table-cell table:formula="of:=[.B2960]/[.C2960]" office:value-type="float" office:value="0.00273981481481481" calcext:value-type="float">
            <text:p>0,00273981481481481000</text:p>
          </table:table-cell>
          <table:table-cell table:formula="of:=[.D2961]-[.D296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[.B2960]+8" office:value-type="float" office:value="23680" calcext:value-type="float">
            <text:p>23680</text:p>
          </table:table-cell>
          <table:table-cell office:value-type="float" office:value="8640000" calcext:value-type="float">
            <text:p>8640000</text:p>
          </table:table-cell>
          <table:table-cell table:formula="of:=[.B2961]/[.C2961]" office:value-type="float" office:value="0.00274074074074074" calcext:value-type="float">
            <text:p>0,00274074074074074000</text:p>
          </table:table-cell>
          <table:table-cell table:formula="of:=[.D2962]-[.D296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[.B2961]+8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2962]/[.C2962]" office:value-type="float" office:value="0.00274166666666667" calcext:value-type="float">
            <text:p>0,00274166666666667000</text:p>
          </table:table-cell>
          <table:table-cell table:formula="of:=[.D2963]-[.D296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table:formula="of:=[.B2962]+8" office:value-type="float" office:value="23696" calcext:value-type="float">
            <text:p>23696</text:p>
          </table:table-cell>
          <table:table-cell office:value-type="float" office:value="8640000" calcext:value-type="float">
            <text:p>8640000</text:p>
          </table:table-cell>
          <table:table-cell table:formula="of:=[.B2963]/[.C2963]" office:value-type="float" office:value="0.00274259259259259" calcext:value-type="float">
            <text:p>0,00274259259259259000</text:p>
          </table:table-cell>
          <table:table-cell table:formula="of:=[.D2964]-[.D296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table:formula="of:=[.B2963]+8" office:value-type="float" office:value="23704" calcext:value-type="float">
            <text:p>23704</text:p>
          </table:table-cell>
          <table:table-cell office:value-type="float" office:value="8640000" calcext:value-type="float">
            <text:p>8640000</text:p>
          </table:table-cell>
          <table:table-cell table:formula="of:=[.B2964]/[.C2964]" office:value-type="float" office:value="0.00274351851851852" calcext:value-type="float">
            <text:p>0,00274351851851852000</text:p>
          </table:table-cell>
          <table:table-cell table:formula="of:=[.D2965]-[.D296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table:formula="of:=[.B2964]+8" office:value-type="float" office:value="23712" calcext:value-type="float">
            <text:p>23712</text:p>
          </table:table-cell>
          <table:table-cell office:value-type="float" office:value="8640000" calcext:value-type="float">
            <text:p>8640000</text:p>
          </table:table-cell>
          <table:table-cell table:formula="of:=[.B2965]/[.C2965]" office:value-type="float" office:value="0.00274444444444444" calcext:value-type="float">
            <text:p>0,00274444444444444000</text:p>
          </table:table-cell>
          <table:table-cell table:formula="of:=[.D2966]-[.D296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table:formula="of:=[.B2965]+8" office:value-type="float" office:value="23720" calcext:value-type="float">
            <text:p>23720</text:p>
          </table:table-cell>
          <table:table-cell office:value-type="float" office:value="8640000" calcext:value-type="float">
            <text:p>8640000</text:p>
          </table:table-cell>
          <table:table-cell table:formula="of:=[.B2966]/[.C2966]" office:value-type="float" office:value="0.00274537037037037" calcext:value-type="float">
            <text:p>0,00274537037037037000</text:p>
          </table:table-cell>
          <table:table-cell table:formula="of:=[.D2967]-[.D296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table:formula="of:=[.B2966]+8" office:value-type="float" office:value="23728" calcext:value-type="float">
            <text:p>23728</text:p>
          </table:table-cell>
          <table:table-cell office:value-type="float" office:value="8640000" calcext:value-type="float">
            <text:p>8640000</text:p>
          </table:table-cell>
          <table:table-cell table:formula="of:=[.B2967]/[.C2967]" office:value-type="float" office:value="0.0027462962962963" calcext:value-type="float">
            <text:p>0,00274629629629630000</text:p>
          </table:table-cell>
          <table:table-cell table:formula="of:=[.D2968]-[.D296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table:formula="of:=[.B2967]+8" office:value-type="float" office:value="23736" calcext:value-type="float">
            <text:p>23736</text:p>
          </table:table-cell>
          <table:table-cell office:value-type="float" office:value="8640000" calcext:value-type="float">
            <text:p>8640000</text:p>
          </table:table-cell>
          <table:table-cell table:formula="of:=[.B2968]/[.C2968]" office:value-type="float" office:value="0.00274722222222222" calcext:value-type="float">
            <text:p>0,00274722222222222000</text:p>
          </table:table-cell>
          <table:table-cell table:formula="of:=[.D2969]-[.D296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[.B2968]+8" office:value-type="float" office:value="23744" calcext:value-type="float">
            <text:p>23744</text:p>
          </table:table-cell>
          <table:table-cell office:value-type="float" office:value="8640000" calcext:value-type="float">
            <text:p>8640000</text:p>
          </table:table-cell>
          <table:table-cell table:formula="of:=[.B2969]/[.C2969]" office:value-type="float" office:value="0.00274814814814815" calcext:value-type="float">
            <text:p>0,00274814814814815000</text:p>
          </table:table-cell>
          <table:table-cell table:formula="of:=[.D2970]-[.D296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table:formula="of:=[.B2969]+8" office:value-type="float" office:value="23752" calcext:value-type="float">
            <text:p>23752</text:p>
          </table:table-cell>
          <table:table-cell office:value-type="float" office:value="8640000" calcext:value-type="float">
            <text:p>8640000</text:p>
          </table:table-cell>
          <table:table-cell table:formula="of:=[.B2970]/[.C2970]" office:value-type="float" office:value="0.00274907407407407" calcext:value-type="float">
            <text:p>0,00274907407407407000</text:p>
          </table:table-cell>
          <table:table-cell table:formula="of:=[.D2971]-[.D297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table:formula="of:=[.B2970]+8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2971]/[.C2971]" office:value-type="float" office:value="0.00275" calcext:value-type="float">
            <text:p>0,00275000000000000000</text:p>
          </table:table-cell>
          <table:table-cell table:formula="of:=[.D2972]-[.D297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table:formula="of:=[.B2971]+8" office:value-type="float" office:value="23768" calcext:value-type="float">
            <text:p>23768</text:p>
          </table:table-cell>
          <table:table-cell office:value-type="float" office:value="8640000" calcext:value-type="float">
            <text:p>8640000</text:p>
          </table:table-cell>
          <table:table-cell table:formula="of:=[.B2972]/[.C2972]" office:value-type="float" office:value="0.00275092592592593" calcext:value-type="float">
            <text:p>0,00275092592592593000</text:p>
          </table:table-cell>
          <table:table-cell table:formula="of:=[.D2973]-[.D297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table:formula="of:=[.B2972]+8" office:value-type="float" office:value="23776" calcext:value-type="float">
            <text:p>23776</text:p>
          </table:table-cell>
          <table:table-cell office:value-type="float" office:value="8640000" calcext:value-type="float">
            <text:p>8640000</text:p>
          </table:table-cell>
          <table:table-cell table:formula="of:=[.B2973]/[.C2973]" office:value-type="float" office:value="0.00275185185185185" calcext:value-type="float">
            <text:p>0,00275185185185185000</text:p>
          </table:table-cell>
          <table:table-cell table:formula="of:=[.D2974]-[.D297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table:formula="of:=[.B2973]+8" office:value-type="float" office:value="23784" calcext:value-type="float">
            <text:p>23784</text:p>
          </table:table-cell>
          <table:table-cell office:value-type="float" office:value="8640000" calcext:value-type="float">
            <text:p>8640000</text:p>
          </table:table-cell>
          <table:table-cell table:formula="of:=[.B2974]/[.C2974]" office:value-type="float" office:value="0.00275277777777778" calcext:value-type="float">
            <text:p>0,00275277777777778000</text:p>
          </table:table-cell>
          <table:table-cell table:formula="of:=[.D2975]-[.D297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[.B2974]+8" office:value-type="float" office:value="23792" calcext:value-type="float">
            <text:p>23792</text:p>
          </table:table-cell>
          <table:table-cell office:value-type="float" office:value="8640000" calcext:value-type="float">
            <text:p>8640000</text:p>
          </table:table-cell>
          <table:table-cell table:formula="of:=[.B2975]/[.C2975]" office:value-type="float" office:value="0.0027537037037037" calcext:value-type="float">
            <text:p>0,00275370370370370000</text:p>
          </table:table-cell>
          <table:table-cell table:formula="of:=[.D2976]-[.D297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table:formula="of:=[.B2975]+8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2976]/[.C2976]" office:value-type="float" office:value="0.00275462962962963" calcext:value-type="float">
            <text:p>0,00275462962962963000</text:p>
          </table:table-cell>
          <table:table-cell table:formula="of:=[.D2977]-[.D297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table:formula="of:=[.B2976]+8" office:value-type="float" office:value="23808" calcext:value-type="float">
            <text:p>23808</text:p>
          </table:table-cell>
          <table:table-cell office:value-type="float" office:value="8640000" calcext:value-type="float">
            <text:p>8640000</text:p>
          </table:table-cell>
          <table:table-cell table:formula="of:=[.B2977]/[.C2977]" office:value-type="float" office:value="0.00275555555555556" calcext:value-type="float">
            <text:p>0,00275555555555556000</text:p>
          </table:table-cell>
          <table:table-cell table:formula="of:=[.D2978]-[.D297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table:formula="of:=[.B2977]+8" office:value-type="float" office:value="23816" calcext:value-type="float">
            <text:p>23816</text:p>
          </table:table-cell>
          <table:table-cell office:value-type="float" office:value="8640000" calcext:value-type="float">
            <text:p>8640000</text:p>
          </table:table-cell>
          <table:table-cell table:formula="of:=[.B2978]/[.C2978]" office:value-type="float" office:value="0.00275648148148148" calcext:value-type="float">
            <text:p>0,00275648148148148000</text:p>
          </table:table-cell>
          <table:table-cell table:formula="of:=[.D2979]-[.D297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[.B2978]+8" office:value-type="float" office:value="23824" calcext:value-type="float">
            <text:p>23824</text:p>
          </table:table-cell>
          <table:table-cell office:value-type="float" office:value="8640000" calcext:value-type="float">
            <text:p>8640000</text:p>
          </table:table-cell>
          <table:table-cell table:formula="of:=[.B2979]/[.C2979]" office:value-type="float" office:value="0.00275740740740741" calcext:value-type="float">
            <text:p>0,00275740740740741000</text:p>
          </table:table-cell>
          <table:table-cell table:formula="of:=[.D2980]-[.D297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table:formula="of:=[.B2979]+8" office:value-type="float" office:value="23832" calcext:value-type="float">
            <text:p>23832</text:p>
          </table:table-cell>
          <table:table-cell office:value-type="float" office:value="8640000" calcext:value-type="float">
            <text:p>8640000</text:p>
          </table:table-cell>
          <table:table-cell table:formula="of:=[.B2980]/[.C2980]" office:value-type="float" office:value="0.00275833333333333" calcext:value-type="float">
            <text:p>0,00275833333333333000</text:p>
          </table:table-cell>
          <table:table-cell table:formula="of:=[.D2981]-[.D298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[.B2980]+8" office:value-type="float" office:value="23840" calcext:value-type="float">
            <text:p>23840</text:p>
          </table:table-cell>
          <table:table-cell office:value-type="float" office:value="8640000" calcext:value-type="float">
            <text:p>8640000</text:p>
          </table:table-cell>
          <table:table-cell table:formula="of:=[.B2981]/[.C2981]" office:value-type="float" office:value="0.00275925925925926" calcext:value-type="float">
            <text:p>0,00275925925925926000</text:p>
          </table:table-cell>
          <table:table-cell table:formula="of:=[.D2982]-[.D2981]" office:value-type="float" office:value="0.000000925925925926354" calcext:value-type="float">
            <text:p>0,00000092592592592635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table:formula="of:=[.B2981]+8" office:value-type="float" office:value="23848" calcext:value-type="float">
            <text:p>23848</text:p>
          </table:table-cell>
          <table:table-cell office:value-type="float" office:value="8640000" calcext:value-type="float">
            <text:p>8640000</text:p>
          </table:table-cell>
          <table:table-cell table:formula="of:=[.B2982]/[.C2982]" office:value-type="float" office:value="0.00276018518518519" calcext:value-type="float">
            <text:p>0,00276018518518519000</text:p>
          </table:table-cell>
          <table:table-cell table:formula="of:=[.D2983]-[.D298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table:formula="of:=[.B2982]+8" office:value-type="float" office:value="23856" calcext:value-type="float">
            <text:p>23856</text:p>
          </table:table-cell>
          <table:table-cell office:value-type="float" office:value="8640000" calcext:value-type="float">
            <text:p>8640000</text:p>
          </table:table-cell>
          <table:table-cell table:formula="of:=[.B2983]/[.C2983]" office:value-type="float" office:value="0.00276111111111111" calcext:value-type="float">
            <text:p>0,00276111111111111000</text:p>
          </table:table-cell>
          <table:table-cell table:formula="of:=[.D2984]-[.D298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table:formula="of:=[.B2983]+8" office:value-type="float" office:value="23864" calcext:value-type="float">
            <text:p>23864</text:p>
          </table:table-cell>
          <table:table-cell office:value-type="float" office:value="8640000" calcext:value-type="float">
            <text:p>8640000</text:p>
          </table:table-cell>
          <table:table-cell table:formula="of:=[.B2984]/[.C2984]" office:value-type="float" office:value="0.00276203703703704" calcext:value-type="float">
            <text:p>0,00276203703703704000</text:p>
          </table:table-cell>
          <table:table-cell table:formula="of:=[.D2985]-[.D298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table:formula="of:=[.B2984]+8" office:value-type="float" office:value="23872" calcext:value-type="float">
            <text:p>23872</text:p>
          </table:table-cell>
          <table:table-cell office:value-type="float" office:value="8640000" calcext:value-type="float">
            <text:p>8640000</text:p>
          </table:table-cell>
          <table:table-cell table:formula="of:=[.B2985]/[.C2985]" office:value-type="float" office:value="0.00276296296296296" calcext:value-type="float">
            <text:p>0,00276296296296296000</text:p>
          </table:table-cell>
          <table:table-cell table:formula="of:=[.D2986]-[.D298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table:formula="of:=[.B2985]+8" office:value-type="float" office:value="23880" calcext:value-type="float">
            <text:p>23880</text:p>
          </table:table-cell>
          <table:table-cell office:value-type="float" office:value="8640000" calcext:value-type="float">
            <text:p>8640000</text:p>
          </table:table-cell>
          <table:table-cell table:formula="of:=[.B2986]/[.C2986]" office:value-type="float" office:value="0.00276388888888889" calcext:value-type="float">
            <text:p>0,00276388888888889000</text:p>
          </table:table-cell>
          <table:table-cell table:formula="of:=[.D2987]-[.D298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table:formula="of:=[.B2986]+8" office:value-type="float" office:value="23888" calcext:value-type="float">
            <text:p>23888</text:p>
          </table:table-cell>
          <table:table-cell office:value-type="float" office:value="8640000" calcext:value-type="float">
            <text:p>8640000</text:p>
          </table:table-cell>
          <table:table-cell table:formula="of:=[.B2987]/[.C2987]" office:value-type="float" office:value="0.00276481481481482" calcext:value-type="float">
            <text:p>0,00276481481481482000</text:p>
          </table:table-cell>
          <table:table-cell table:formula="of:=[.D2988]-[.D298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table:formula="of:=[.B2987]+8" office:value-type="float" office:value="23896" calcext:value-type="float">
            <text:p>23896</text:p>
          </table:table-cell>
          <table:table-cell office:value-type="float" office:value="8640000" calcext:value-type="float">
            <text:p>8640000</text:p>
          </table:table-cell>
          <table:table-cell table:formula="of:=[.B2988]/[.C2988]" office:value-type="float" office:value="0.00276574074074074" calcext:value-type="float">
            <text:p>0,00276574074074074000</text:p>
          </table:table-cell>
          <table:table-cell table:formula="of:=[.D2989]-[.D298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table:formula="of:=[.B2988]+8" office:value-type="float" office:value="23904" calcext:value-type="float">
            <text:p>23904</text:p>
          </table:table-cell>
          <table:table-cell office:value-type="float" office:value="8640000" calcext:value-type="float">
            <text:p>8640000</text:p>
          </table:table-cell>
          <table:table-cell table:formula="of:=[.B2989]/[.C2989]" office:value-type="float" office:value="0.00276666666666667" calcext:value-type="float">
            <text:p>0,00276666666666667000</text:p>
          </table:table-cell>
          <table:table-cell table:formula="of:=[.D2990]-[.D298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table:formula="of:=[.B2989]+8" office:value-type="float" office:value="23912" calcext:value-type="float">
            <text:p>23912</text:p>
          </table:table-cell>
          <table:table-cell office:value-type="float" office:value="8640000" calcext:value-type="float">
            <text:p>8640000</text:p>
          </table:table-cell>
          <table:table-cell table:formula="of:=[.B2990]/[.C2990]" office:value-type="float" office:value="0.00276759259259259" calcext:value-type="float">
            <text:p>0,00276759259259259000</text:p>
          </table:table-cell>
          <table:table-cell table:formula="of:=[.D2991]-[.D299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table:formula="of:=[.B2990]+8" office:value-type="float" office:value="23920" calcext:value-type="float">
            <text:p>23920</text:p>
          </table:table-cell>
          <table:table-cell office:value-type="float" office:value="8640000" calcext:value-type="float">
            <text:p>8640000</text:p>
          </table:table-cell>
          <table:table-cell table:formula="of:=[.B2991]/[.C2991]" office:value-type="float" office:value="0.00276851851851852" calcext:value-type="float">
            <text:p>0,00276851851851852000</text:p>
          </table:table-cell>
          <table:table-cell table:formula="of:=[.D2992]-[.D2991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table:formula="of:=[.B2991]+8" office:value-type="float" office:value="23928" calcext:value-type="float">
            <text:p>23928</text:p>
          </table:table-cell>
          <table:table-cell office:value-type="float" office:value="8640000" calcext:value-type="float">
            <text:p>8640000</text:p>
          </table:table-cell>
          <table:table-cell table:formula="of:=[.B2992]/[.C2992]" office:value-type="float" office:value="0.00276944444444444" calcext:value-type="float">
            <text:p>0,00276944444444444000</text:p>
          </table:table-cell>
          <table:table-cell table:formula="of:=[.D2993]-[.D2992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table:formula="of:=[.B2992]+8" office:value-type="float" office:value="23936" calcext:value-type="float">
            <text:p>23936</text:p>
          </table:table-cell>
          <table:table-cell office:value-type="float" office:value="8640000" calcext:value-type="float">
            <text:p>8640000</text:p>
          </table:table-cell>
          <table:table-cell table:formula="of:=[.B2993]/[.C2993]" office:value-type="float" office:value="0.00277037037037037" calcext:value-type="float">
            <text:p>0,00277037037037037000</text:p>
          </table:table-cell>
          <table:table-cell table:formula="of:=[.D2994]-[.D2993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table:formula="of:=[.B2993]+8" office:value-type="float" office:value="23944" calcext:value-type="float">
            <text:p>23944</text:p>
          </table:table-cell>
          <table:table-cell office:value-type="float" office:value="8640000" calcext:value-type="float">
            <text:p>8640000</text:p>
          </table:table-cell>
          <table:table-cell table:formula="of:=[.B2994]/[.C2994]" office:value-type="float" office:value="0.0027712962962963" calcext:value-type="float">
            <text:p>0,00277129629629630000</text:p>
          </table:table-cell>
          <table:table-cell table:formula="of:=[.D2995]-[.D2994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table:formula="of:=[.B2994]+8" office:value-type="float" office:value="23952" calcext:value-type="float">
            <text:p>23952</text:p>
          </table:table-cell>
          <table:table-cell office:value-type="float" office:value="8640000" calcext:value-type="float">
            <text:p>8640000</text:p>
          </table:table-cell>
          <table:table-cell table:formula="of:=[.B2995]/[.C2995]" office:value-type="float" office:value="0.00277222222222222" calcext:value-type="float">
            <text:p>0,00277222222222222000</text:p>
          </table:table-cell>
          <table:table-cell table:formula="of:=[.D2996]-[.D2995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table:formula="of:=[.B2995]+8" office:value-type="float" office:value="23960" calcext:value-type="float">
            <text:p>23960</text:p>
          </table:table-cell>
          <table:table-cell office:value-type="float" office:value="8640000" calcext:value-type="float">
            <text:p>8640000</text:p>
          </table:table-cell>
          <table:table-cell table:formula="of:=[.B2996]/[.C2996]" office:value-type="float" office:value="0.00277314814814815" calcext:value-type="float">
            <text:p>0,00277314814814815000</text:p>
          </table:table-cell>
          <table:table-cell table:formula="of:=[.D2997]-[.D2996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table:formula="of:=[.B2996]+8" office:value-type="float" office:value="23968" calcext:value-type="float">
            <text:p>23968</text:p>
          </table:table-cell>
          <table:table-cell office:value-type="float" office:value="8640000" calcext:value-type="float">
            <text:p>8640000</text:p>
          </table:table-cell>
          <table:table-cell table:formula="of:=[.B2997]/[.C2997]" office:value-type="float" office:value="0.00277407407407407" calcext:value-type="float">
            <text:p>0,00277407407407407000</text:p>
          </table:table-cell>
          <table:table-cell table:formula="of:=[.D2998]-[.D2997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table:formula="of:=[.B2997]+8" office:value-type="float" office:value="23976" calcext:value-type="float">
            <text:p>23976</text:p>
          </table:table-cell>
          <table:table-cell office:value-type="float" office:value="8640000" calcext:value-type="float">
            <text:p>8640000</text:p>
          </table:table-cell>
          <table:table-cell table:formula="of:=[.B2998]/[.C2998]" office:value-type="float" office:value="0.002775" calcext:value-type="float">
            <text:p>0,00277500000000000000</text:p>
          </table:table-cell>
          <table:table-cell table:formula="of:=[.D2999]-[.D2998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table:formula="of:=[.B2998]+8" office:value-type="float" office:value="23984" calcext:value-type="float">
            <text:p>23984</text:p>
          </table:table-cell>
          <table:table-cell office:value-type="float" office:value="8640000" calcext:value-type="float">
            <text:p>8640000</text:p>
          </table:table-cell>
          <table:table-cell table:formula="of:=[.B2999]/[.C2999]" office:value-type="float" office:value="0.00277592592592593" calcext:value-type="float">
            <text:p>0,00277592592592593000</text:p>
          </table:table-cell>
          <table:table-cell table:formula="of:=[.D3000]-[.D2999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table:formula="of:=[.B2999]+8" office:value-type="float" office:value="23992" calcext:value-type="float">
            <text:p>23992</text:p>
          </table:table-cell>
          <table:table-cell office:value-type="float" office:value="8640000" calcext:value-type="float">
            <text:p>8640000</text:p>
          </table:table-cell>
          <table:table-cell table:formula="of:=[.B3000]/[.C3000]" office:value-type="float" office:value="0.00277685185185185" calcext:value-type="float">
            <text:p>0,00277685185185185000</text:p>
          </table:table-cell>
          <table:table-cell table:formula="of:=[.D3001]-[.D3000]" office:value-type="float" office:value="0.00000092592592592592" calcext:value-type="float">
            <text:p>0,000000925925925925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3000]+8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3001]/[.C3001]" office:value-type="float" office:value="0.00277777777777778" calcext:value-type="float">
            <text:p>0,00277777777777778000</text:p>
          </table:table-cell>
          <table:table-cell table:formula="of:=#REF!-[.D3001]" office:value-type="string" office:string-value="" calcext:value-type="error">
            <text:p>#REF!</text:p>
          </table:table-cell>
        </table:table-row>
        <table:table-row table:style-name="ro1" table:number-rows-repeated="10455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31:43.809146293</meta:creation-date>
    <dc:date>2026-05-17T15:31:51.375060625</dc:date>
    <meta:editing-duration>PT9S</meta:editing-duration>
    <meta:editing-cycles>1</meta:editing-cycles>
    <meta:document-statistic meta:table-count="1" meta:cell-count="15005" meta:object-count="0"/>
    <meta:generator>LibreOffice/24.2.7.2$Linux_X86_64 LibreOffice_project/420$Build-2</meta:generator>
  </office:meta>
</office:document-meta>
</file>