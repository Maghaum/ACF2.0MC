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35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2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5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28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4" office:value-type="string" calcext:value-type="string">
            <text:p>B / C</text:p>
          </table:table-cell>
          <table:table-cell table:style-name="ce4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324074074074074" calcext:value-type="float">
            <text:p>0,00000324074074074074</text:p>
          </table:table-cell>
          <table:table-cell table:formula="of:=[.D3]-[.D2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28" office:value-type="float" office:value="56" calcext:value-type="float">
            <text:p>5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648148148148148" calcext:value-type="float">
            <text:p>0,00000648148148148148</text:p>
          </table:table-cell>
          <table:table-cell table:formula="of:=[.D4]-[.D3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28" office:value-type="float" office:value="84" calcext:value-type="float">
            <text:p>84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972222222222222" calcext:value-type="float">
            <text:p>0,00000972222222222222</text:p>
          </table:table-cell>
          <table:table-cell table:formula="of:=[.D5]-[.D4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28" office:value-type="float" office:value="112" calcext:value-type="float">
            <text:p>11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2962962962963" calcext:value-type="float">
            <text:p>0,00001296296296296300</text:p>
          </table:table-cell>
          <table:table-cell table:formula="of:=[.D6]-[.D5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28" office:value-type="float" office:value="140" calcext:value-type="float">
            <text:p>14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62037037037037" calcext:value-type="float">
            <text:p>0,00001620370370370370</text:p>
          </table:table-cell>
          <table:table-cell table:formula="of:=[.D7]-[.D6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28" office:value-type="float" office:value="168" calcext:value-type="float">
            <text:p>16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94444444444444" calcext:value-type="float">
            <text:p>0,00001944444444444450</text:p>
          </table:table-cell>
          <table:table-cell table:formula="of:=[.D8]-[.D7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28" office:value-type="float" office:value="196" calcext:value-type="float">
            <text:p>196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26851851851852" calcext:value-type="float">
            <text:p>0,00002268518518518520</text:p>
          </table:table-cell>
          <table:table-cell table:formula="of:=[.D9]-[.D8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28" office:value-type="float" office:value="224" calcext:value-type="float">
            <text:p>22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259259259259259" calcext:value-type="float">
            <text:p>0,00002592592592592590</text:p>
          </table:table-cell>
          <table:table-cell table:formula="of:=[.D10]-[.D9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28" office:value-type="float" office:value="252" calcext:value-type="float">
            <text:p>252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291666666666667" calcext:value-type="float">
            <text:p>0,00002916666666666670</text:p>
          </table:table-cell>
          <table:table-cell table:formula="of:=[.D11]-[.D10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28" office:value-type="float" office:value="280" calcext:value-type="float">
            <text:p>28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324074074074074" calcext:value-type="float">
            <text:p>0,00003240740740740740</text:p>
          </table:table-cell>
          <table:table-cell table:formula="of:=[.D12]-[.D11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28" office:value-type="float" office:value="308" calcext:value-type="float">
            <text:p>308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356481481481482" calcext:value-type="float">
            <text:p>0,00003564814814814820</text:p>
          </table:table-cell>
          <table:table-cell table:formula="of:=[.D13]-[.D12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28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388888888888889" calcext:value-type="float">
            <text:p>0,00003888888888888890</text:p>
          </table:table-cell>
          <table:table-cell table:formula="of:=[.D14]-[.D13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28" office:value-type="float" office:value="364" calcext:value-type="float">
            <text:p>364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421296296296296" calcext:value-type="float">
            <text:p>0,00004212962962962960</text:p>
          </table:table-cell>
          <table:table-cell table:formula="of:=[.D15]-[.D14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28" office:value-type="float" office:value="392" calcext:value-type="float">
            <text:p>39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453703703703704" calcext:value-type="float">
            <text:p>0,00004537037037037040</text:p>
          </table:table-cell>
          <table:table-cell table:formula="of:=[.D16]-[.D15]" office:value-type="float" office:value="0.00000324074074074073" calcext:value-type="float">
            <text:p>0,000003240740740740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28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486111111111111" calcext:value-type="float">
            <text:p>0,00004861111111111110</text:p>
          </table:table-cell>
          <table:table-cell table:formula="of:=[.D17]-[.D16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28" office:value-type="float" office:value="448" calcext:value-type="float">
            <text:p>44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518518518518519" calcext:value-type="float">
            <text:p>0,00005185185185185190</text:p>
          </table:table-cell>
          <table:table-cell table:formula="of:=[.D18]-[.D17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28" office:value-type="float" office:value="476" calcext:value-type="float">
            <text:p>476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550925925925926" calcext:value-type="float">
            <text:p>0,00005509259259259260</text:p>
          </table:table-cell>
          <table:table-cell table:formula="of:=[.D19]-[.D18]" office:value-type="float" office:value="0.00000324074074074074" calcext:value-type="float">
            <text:p>0,000003240740740740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28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583333333333333" calcext:value-type="float">
            <text:p>0,00005833333333333330</text:p>
          </table:table-cell>
          <table:table-cell table:formula="of:=[.D20]-[.D19]" office:value-type="float" office:value="0.00000324074074074073" calcext:value-type="float">
            <text:p>0,000003240740740740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28" office:value-type="float" office:value="532" calcext:value-type="float">
            <text:p>532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615740740740741" calcext:value-type="float">
            <text:p>0,00006157407407407410</text:p>
          </table:table-cell>
          <table:table-cell table:formula="of:=[.D21]-[.D20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28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648148148148148" calcext:value-type="float">
            <text:p>0,00006481481481481480</text:p>
          </table:table-cell>
          <table:table-cell table:formula="of:=[.D22]-[.D21]" office:value-type="float" office:value="0.00000324074074074073" calcext:value-type="float">
            <text:p>0,000003240740740740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28" office:value-type="float" office:value="588" calcext:value-type="float">
            <text:p>588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680555555555556" calcext:value-type="float">
            <text:p>0,00006805555555555560</text:p>
          </table:table-cell>
          <table:table-cell table:formula="of:=[.D23]-[.D22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28" office:value-type="float" office:value="616" calcext:value-type="float">
            <text:p>61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712962962962963" calcext:value-type="float">
            <text:p>0,00007129629629629630</text:p>
          </table:table-cell>
          <table:table-cell table:formula="of:=[.D24]-[.D23]" office:value-type="float" office:value="0.00000324074074074073" calcext:value-type="float">
            <text:p>0,000003240740740740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28" office:value-type="float" office:value="644" calcext:value-type="float">
            <text:p>644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74537037037037" calcext:value-type="float">
            <text:p>0,00007453703703703700</text:p>
          </table:table-cell>
          <table:table-cell table:formula="of:=[.D25]-[.D24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28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777777777777778" calcext:value-type="float">
            <text:p>0,00007777777777777780</text:p>
          </table:table-cell>
          <table:table-cell table:formula="of:=[.D26]-[.D25]" office:value-type="float" office:value="0.00000324074074074073" calcext:value-type="float">
            <text:p>0,000003240740740740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28" office:value-type="float" office:value="700" calcext:value-type="float">
            <text:p>7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810185185185185" calcext:value-type="float">
            <text:p>0,00008101851851851850</text:p>
          </table:table-cell>
          <table:table-cell table:formula="of:=[.D27]-[.D26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28" office:value-type="float" office:value="728" calcext:value-type="float">
            <text:p>72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842592592592593" calcext:value-type="float">
            <text:p>0,00008425925925925930</text:p>
          </table:table-cell>
          <table:table-cell table:formula="of:=[.D28]-[.D27]" office:value-type="float" office:value="0.00000324074074074073" calcext:value-type="float">
            <text:p>0,000003240740740740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28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875" calcext:value-type="float">
            <text:p>0,00008750000000000000</text:p>
          </table:table-cell>
          <table:table-cell table:formula="of:=[.D29]-[.D28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28" office:value-type="float" office:value="784" calcext:value-type="float">
            <text:p>78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907407407407408" calcext:value-type="float">
            <text:p>0,00009074074074074070</text:p>
          </table:table-cell>
          <table:table-cell table:formula="of:=[.D30]-[.D29]" office:value-type="float" office:value="0.00000324074074074073" calcext:value-type="float">
            <text:p>0,000003240740740740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28" office:value-type="float" office:value="812" calcext:value-type="float">
            <text:p>812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939814814814815" calcext:value-type="float">
            <text:p>0,00009398148148148150</text:p>
          </table:table-cell>
          <table:table-cell table:formula="of:=[.D31]-[.D30]" office:value-type="float" office:value="0.00000324074074074073" calcext:value-type="float">
            <text:p>0,000003240740740740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28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972222222222222" calcext:value-type="float">
            <text:p>0,00009722222222222220</text:p>
          </table:table-cell>
          <table:table-cell table:formula="of:=[.D32]-[.D31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28" office:value-type="float" office:value="868" calcext:value-type="float">
            <text:p>868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00462962962963" calcext:value-type="float">
            <text:p>0,00010046296296296300</text:p>
          </table:table-cell>
          <table:table-cell table:formula="of:=[.D33]-[.D32]" office:value-type="float" office:value="0.00000324074074074073" calcext:value-type="float">
            <text:p>0,000003240740740740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28" office:value-type="float" office:value="896" calcext:value-type="float">
            <text:p>89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03703703703704" calcext:value-type="float">
            <text:p>0,00010370370370370400</text:p>
          </table:table-cell>
          <table:table-cell table:formula="of:=[.D34]-[.D33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28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06944444444444" calcext:value-type="float">
            <text:p>0,00010694444444444400</text:p>
          </table:table-cell>
          <table:table-cell table:formula="of:=[.D35]-[.D34]" office:value-type="float" office:value="0.00000324074074074073" calcext:value-type="float">
            <text:p>0,000003240740740740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28" office:value-type="float" office:value="952" calcext:value-type="float">
            <text:p>95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10185185185185" calcext:value-type="float">
            <text:p>0,00011018518518518500</text:p>
          </table:table-cell>
          <table:table-cell table:formula="of:=[.D36]-[.D35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28" office:value-type="float" office:value="980" calcext:value-type="float">
            <text:p>98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13425925925926" calcext:value-type="float">
            <text:p>0,00011342592592592600</text:p>
          </table:table-cell>
          <table:table-cell table:formula="of:=[.D37]-[.D36]" office:value-type="float" office:value="0.00000324074074074073" calcext:value-type="float">
            <text:p>0,000003240740740740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28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16666666666667" calcext:value-type="float">
            <text:p>0,00011666666666666700</text:p>
          </table:table-cell>
          <table:table-cell table:formula="of:=[.D38]-[.D37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28" office:value-type="float" office:value="1036" calcext:value-type="float">
            <text:p>1036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19907407407407" calcext:value-type="float">
            <text:p>0,00011990740740740700</text:p>
          </table:table-cell>
          <table:table-cell table:formula="of:=[.D39]-[.D3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28" office:value-type="float" office:value="1064" calcext:value-type="float">
            <text:p>106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23148148148148" calcext:value-type="float">
            <text:p>0,00012314814814814800</text:p>
          </table:table-cell>
          <table:table-cell table:formula="of:=[.D40]-[.D39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28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26388888888889" calcext:value-type="float">
            <text:p>0,00012638888888888900</text:p>
          </table:table-cell>
          <table:table-cell table:formula="of:=[.D41]-[.D40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28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2962962962963" calcext:value-type="float">
            <text:p>0,00012962962962963000</text:p>
          </table:table-cell>
          <table:table-cell table:formula="of:=[.D42]-[.D41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28" office:value-type="float" office:value="1148" calcext:value-type="float">
            <text:p>1148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3287037037037" calcext:value-type="float">
            <text:p>0,00013287037037037000</text:p>
          </table:table-cell>
          <table:table-cell table:formula="of:=[.D43]-[.D4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28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36111111111111" calcext:value-type="float">
            <text:p>0,00013611111111111100</text:p>
          </table:table-cell>
          <table:table-cell table:formula="of:=[.D44]-[.D43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28" office:value-type="float" office:value="1204" calcext:value-type="float">
            <text:p>1204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39351851851852" calcext:value-type="float">
            <text:p>0,00013935185185185200</text:p>
          </table:table-cell>
          <table:table-cell table:formula="of:=[.D45]-[.D44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28" office:value-type="float" office:value="1232" calcext:value-type="float">
            <text:p>123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42592592592593" calcext:value-type="float">
            <text:p>0,00014259259259259300</text:p>
          </table:table-cell>
          <table:table-cell table:formula="of:=[.D46]-[.D45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28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45833333333333" calcext:value-type="float">
            <text:p>0,00014583333333333300</text:p>
          </table:table-cell>
          <table:table-cell table:formula="of:=[.D47]-[.D4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28" office:value-type="float" office:value="1288" calcext:value-type="float">
            <text:p>128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49074074074074" calcext:value-type="float">
            <text:p>0,00014907407407407400</text:p>
          </table:table-cell>
          <table:table-cell table:formula="of:=[.D48]-[.D47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28" office:value-type="float" office:value="1316" calcext:value-type="float">
            <text:p>1316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52314814814815" calcext:value-type="float">
            <text:p>0,00015231481481481500</text:p>
          </table:table-cell>
          <table:table-cell table:formula="of:=[.D49]-[.D48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28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55555555555556" calcext:value-type="float">
            <text:p>0,00015555555555555600</text:p>
          </table:table-cell>
          <table:table-cell table:formula="of:=[.D50]-[.D4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28" office:value-type="float" office:value="1372" calcext:value-type="float">
            <text:p>1372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58796296296296" calcext:value-type="float">
            <text:p>0,00015879629629629600</text:p>
          </table:table-cell>
          <table:table-cell table:formula="of:=[.D51]-[.D50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28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62037037037037" calcext:value-type="float">
            <text:p>0,00016203703703703700</text:p>
          </table:table-cell>
          <table:table-cell table:formula="of:=[.D52]-[.D51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28" office:value-type="float" office:value="1428" calcext:value-type="float">
            <text:p>1428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65277777777778" calcext:value-type="float">
            <text:p>0,00016527777777777800</text:p>
          </table:table-cell>
          <table:table-cell table:formula="of:=[.D53]-[.D52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28" office:value-type="float" office:value="1456" calcext:value-type="float">
            <text:p>145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68518518518519" calcext:value-type="float">
            <text:p>0,00016851851851851900</text:p>
          </table:table-cell>
          <table:table-cell table:formula="of:=[.D54]-[.D5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28" office:value-type="float" office:value="1484" calcext:value-type="float">
            <text:p>1484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71759259259259" calcext:value-type="float">
            <text:p>0,00017175925925925900</text:p>
          </table:table-cell>
          <table:table-cell table:formula="of:=[.D55]-[.D54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28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75" calcext:value-type="float">
            <text:p>0,00017500000000000000</text:p>
          </table:table-cell>
          <table:table-cell table:formula="of:=[.D56]-[.D55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28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78240740740741" calcext:value-type="float">
            <text:p>0,00017824074074074100</text:p>
          </table:table-cell>
          <table:table-cell table:formula="of:=[.D57]-[.D56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28" office:value-type="float" office:value="1568" calcext:value-type="float">
            <text:p>156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81481481481482" calcext:value-type="float">
            <text:p>0,00018148148148148100</text:p>
          </table:table-cell>
          <table:table-cell table:formula="of:=[.D58]-[.D5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28" office:value-type="float" office:value="1596" calcext:value-type="float">
            <text:p>1596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84722222222222" calcext:value-type="float">
            <text:p>0,00018472222222222200</text:p>
          </table:table-cell>
          <table:table-cell table:formula="of:=[.D59]-[.D58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28" office:value-type="float" office:value="1624" calcext:value-type="float">
            <text:p>162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87962962962963" calcext:value-type="float">
            <text:p>0,00018796296296296300</text:p>
          </table:table-cell>
          <table:table-cell table:formula="of:=[.D60]-[.D59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28" office:value-type="float" office:value="1652" calcext:value-type="float">
            <text:p>1652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91203703703704" calcext:value-type="float">
            <text:p>0,00019120370370370400</text:p>
          </table:table-cell>
          <table:table-cell table:formula="of:=[.D61]-[.D6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28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94444444444444" calcext:value-type="float">
            <text:p>0,00019444444444444400</text:p>
          </table:table-cell>
          <table:table-cell table:formula="of:=[.D62]-[.D61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28" office:value-type="float" office:value="1708" calcext:value-type="float">
            <text:p>1708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97685185185185" calcext:value-type="float">
            <text:p>0,00019768518518518500</text:p>
          </table:table-cell>
          <table:table-cell table:formula="of:=[.D63]-[.D62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28" office:value-type="float" office:value="1736" calcext:value-type="float">
            <text:p>173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00925925925926" calcext:value-type="float">
            <text:p>0,00020092592592592600</text:p>
          </table:table-cell>
          <table:table-cell table:formula="of:=[.D64]-[.D63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28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04166666666667" calcext:value-type="float">
            <text:p>0,00020416666666666700</text:p>
          </table:table-cell>
          <table:table-cell table:formula="of:=[.D65]-[.D6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28" office:value-type="float" office:value="1792" calcext:value-type="float">
            <text:p>179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07407407407407" calcext:value-type="float">
            <text:p>0,00020740740740740700</text:p>
          </table:table-cell>
          <table:table-cell table:formula="of:=[.D66]-[.D65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28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10648148148148" calcext:value-type="float">
            <text:p>0,00021064814814814800</text:p>
          </table:table-cell>
          <table:table-cell table:formula="of:=[.D67]-[.D66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28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13888888888889" calcext:value-type="float">
            <text:p>0,00021388888888888900</text:p>
          </table:table-cell>
          <table:table-cell table:formula="of:=[.D68]-[.D6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28" office:value-type="float" office:value="1876" calcext:value-type="float">
            <text:p>1876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1712962962963" calcext:value-type="float">
            <text:p>0,00021712962962963000</text:p>
          </table:table-cell>
          <table:table-cell table:formula="of:=[.D69]-[.D68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28" office:value-type="float" office:value="1904" calcext:value-type="float">
            <text:p>190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2037037037037" calcext:value-type="float">
            <text:p>0,00022037037037037000</text:p>
          </table:table-cell>
          <table:table-cell table:formula="of:=[.D70]-[.D69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28" office:value-type="float" office:value="1932" calcext:value-type="float">
            <text:p>1932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23611111111111" calcext:value-type="float">
            <text:p>0,00022361111111111100</text:p>
          </table:table-cell>
          <table:table-cell table:formula="of:=[.D71]-[.D70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28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26851851851852" calcext:value-type="float">
            <text:p>0,00022685185185185200</text:p>
          </table:table-cell>
          <table:table-cell table:formula="of:=[.D72]-[.D7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28" office:value-type="float" office:value="1988" calcext:value-type="float">
            <text:p>1988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30092592592593" calcext:value-type="float">
            <text:p>0,00023009259259259300</text:p>
          </table:table-cell>
          <table:table-cell table:formula="of:=[.D73]-[.D72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28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33333333333333" calcext:value-type="float">
            <text:p>0,00023333333333333300</text:p>
          </table:table-cell>
          <table:table-cell table:formula="of:=[.D74]-[.D73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28" office:value-type="float" office:value="2044" calcext:value-type="float">
            <text:p>2044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36574074074074" calcext:value-type="float">
            <text:p>0,00023657407407407400</text:p>
          </table:table-cell>
          <table:table-cell table:formula="of:=[.D75]-[.D74]" office:value-type="float" office:value="0.00000324074074074075" calcext:value-type="float">
            <text:p>0,000003240740740740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28" office:value-type="float" office:value="2072" calcext:value-type="float">
            <text:p>207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39814814814815" calcext:value-type="float">
            <text:p>0,00023981481481481500</text:p>
          </table:table-cell>
          <table:table-cell table:formula="of:=[.D76]-[.D7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28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243055555555556" calcext:value-type="float">
            <text:p>0,00024305555555555600</text:p>
          </table:table-cell>
          <table:table-cell table:formula="of:=[.D77]-[.D7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28" office:value-type="float" office:value="2128" calcext:value-type="float">
            <text:p>212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46296296296296" calcext:value-type="float">
            <text:p>0,00024629629629629600</text:p>
          </table:table-cell>
          <table:table-cell table:formula="of:=[.D78]-[.D77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28" office:value-type="float" office:value="2156" calcext:value-type="float">
            <text:p>2156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249537037037037" calcext:value-type="float">
            <text:p>0,00024953703703703700</text:p>
          </table:table-cell>
          <table:table-cell table:formula="of:=[.D79]-[.D7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28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252777777777778" calcext:value-type="float">
            <text:p>0,00025277777777777800</text:p>
          </table:table-cell>
          <table:table-cell table:formula="of:=[.D80]-[.D79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28" office:value-type="float" office:value="2212" calcext:value-type="float">
            <text:p>2212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256018518518519" calcext:value-type="float">
            <text:p>0,00025601851851851900</text:p>
          </table:table-cell>
          <table:table-cell table:formula="of:=[.D81]-[.D8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28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259259259259259" calcext:value-type="float">
            <text:p>0,00025925925925925900</text:p>
          </table:table-cell>
          <table:table-cell table:formula="of:=[.D82]-[.D8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28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2625" calcext:value-type="float">
            <text:p>0,00026250000000000000</text:p>
          </table:table-cell>
          <table:table-cell table:formula="of:=[.D83]-[.D82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28" office:value-type="float" office:value="2296" calcext:value-type="float">
            <text:p>229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265740740740741" calcext:value-type="float">
            <text:p>0,00026574074074074100</text:p>
          </table:table-cell>
          <table:table-cell table:formula="of:=[.D84]-[.D8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28" office:value-type="float" office:value="2324" calcext:value-type="float">
            <text:p>2324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268981481481482" calcext:value-type="float">
            <text:p>0,00026898148148148200</text:p>
          </table:table-cell>
          <table:table-cell table:formula="of:=[.D85]-[.D8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28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272222222222222" calcext:value-type="float">
            <text:p>0,00027222222222222200</text:p>
          </table:table-cell>
          <table:table-cell table:formula="of:=[.D86]-[.D85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28" office:value-type="float" office:value="2380" calcext:value-type="float">
            <text:p>238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275462962962963" calcext:value-type="float">
            <text:p>0,00027546296296296300</text:p>
          </table:table-cell>
          <table:table-cell table:formula="of:=[.D87]-[.D8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28" office:value-type="float" office:value="2408" calcext:value-type="float">
            <text:p>240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278703703703704" calcext:value-type="float">
            <text:p>0,00027870370370370400</text:p>
          </table:table-cell>
          <table:table-cell table:formula="of:=[.D88]-[.D8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28" office:value-type="float" office:value="2436" calcext:value-type="float">
            <text:p>2436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281944444444444" calcext:value-type="float">
            <text:p>0,00028194444444444400</text:p>
          </table:table-cell>
          <table:table-cell table:formula="of:=[.D89]-[.D88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28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285185185185185" calcext:value-type="float">
            <text:p>0,00028518518518518500</text:p>
          </table:table-cell>
          <table:table-cell table:formula="of:=[.D90]-[.D8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28" office:value-type="float" office:value="2492" calcext:value-type="float">
            <text:p>2492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288425925925926" calcext:value-type="float">
            <text:p>0,00028842592592592600</text:p>
          </table:table-cell>
          <table:table-cell table:formula="of:=[.D91]-[.D90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28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291666666666667" calcext:value-type="float">
            <text:p>0,00029166666666666700</text:p>
          </table:table-cell>
          <table:table-cell table:formula="of:=[.D92]-[.D9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28" office:value-type="float" office:value="2548" calcext:value-type="float">
            <text:p>2548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294907407407407" calcext:value-type="float">
            <text:p>0,00029490740740740700</text:p>
          </table:table-cell>
          <table:table-cell table:formula="of:=[.D93]-[.D9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28" office:value-type="float" office:value="2576" calcext:value-type="float">
            <text:p>257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298148148148148" calcext:value-type="float">
            <text:p>0,00029814814814814800</text:p>
          </table:table-cell>
          <table:table-cell table:formula="of:=[.D94]-[.D93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28" office:value-type="float" office:value="2604" calcext:value-type="float">
            <text:p>2604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301388888888889" calcext:value-type="float">
            <text:p>0,00030138888888888900</text:p>
          </table:table-cell>
          <table:table-cell table:formula="of:=[.D95]-[.D9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28" office:value-type="float" office:value="2632" calcext:value-type="float">
            <text:p>263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30462962962963" calcext:value-type="float">
            <text:p>0,00030462962962963000</text:p>
          </table:table-cell>
          <table:table-cell table:formula="of:=[.D96]-[.D9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28" office:value-type="float" office:value="2660" calcext:value-type="float">
            <text:p>266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30787037037037" calcext:value-type="float">
            <text:p>0,00030787037037037000</text:p>
          </table:table-cell>
          <table:table-cell table:formula="of:=[.D97]-[.D96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28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311111111111111" calcext:value-type="float">
            <text:p>0,00031111111111111100</text:p>
          </table:table-cell>
          <table:table-cell table:formula="of:=[.D98]-[.D9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28" office:value-type="float" office:value="2716" calcext:value-type="float">
            <text:p>2716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314351851851852" calcext:value-type="float">
            <text:p>0,00031435185185185200</text:p>
          </table:table-cell>
          <table:table-cell table:formula="of:=[.D99]-[.D9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28" office:value-type="float" office:value="2744" calcext:value-type="float">
            <text:p>274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317592592592593" calcext:value-type="float">
            <text:p>0,00031759259259259300</text:p>
          </table:table-cell>
          <table:table-cell table:formula="of:=[.D100]-[.D99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28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320833333333333" calcext:value-type="float">
            <text:p>0,00032083333333333300</text:p>
          </table:table-cell>
          <table:table-cell table:formula="of:=[.D101]-[.D10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28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324074074074074" calcext:value-type="float">
            <text:p>0,00032407407407407400</text:p>
          </table:table-cell>
          <table:table-cell table:formula="of:=[.D102]-[.D101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28" office:value-type="float" office:value="2828" calcext:value-type="float">
            <text:p>2828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327314814814815" calcext:value-type="float">
            <text:p>0,00032731481481481500</text:p>
          </table:table-cell>
          <table:table-cell table:formula="of:=[.D103]-[.D10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28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330555555555556" calcext:value-type="float">
            <text:p>0,00033055555555555600</text:p>
          </table:table-cell>
          <table:table-cell table:formula="of:=[.D104]-[.D10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28" office:value-type="float" office:value="2884" calcext:value-type="float">
            <text:p>2884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333796296296296" calcext:value-type="float">
            <text:p>0,00033379629629629600</text:p>
          </table:table-cell>
          <table:table-cell table:formula="of:=[.D105]-[.D104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28" office:value-type="float" office:value="2912" calcext:value-type="float">
            <text:p>291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337037037037037" calcext:value-type="float">
            <text:p>0,00033703703703703700</text:p>
          </table:table-cell>
          <table:table-cell table:formula="of:=[.D106]-[.D10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28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340277777777778" calcext:value-type="float">
            <text:p>0,00034027777777777800</text:p>
          </table:table-cell>
          <table:table-cell table:formula="of:=[.D107]-[.D10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28" office:value-type="float" office:value="2968" calcext:value-type="float">
            <text:p>296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343518518518519" calcext:value-type="float">
            <text:p>0,00034351851851851900</text:p>
          </table:table-cell>
          <table:table-cell table:formula="of:=[.D108]-[.D107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28" office:value-type="float" office:value="2996" calcext:value-type="float">
            <text:p>2996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346759259259259" calcext:value-type="float">
            <text:p>0,00034675925925925900</text:p>
          </table:table-cell>
          <table:table-cell table:formula="of:=[.D109]-[.D10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28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35" calcext:value-type="float">
            <text:p>0,00035000000000000000</text:p>
          </table:table-cell>
          <table:table-cell table:formula="of:=[.D110]-[.D10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28" office:value-type="float" office:value="3052" calcext:value-type="float">
            <text:p>3052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353240740740741" calcext:value-type="float">
            <text:p>0,00035324074074074100</text:p>
          </table:table-cell>
          <table:table-cell table:formula="of:=[.D111]-[.D110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28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356481481481482" calcext:value-type="float">
            <text:p>0,00035648148148148200</text:p>
          </table:table-cell>
          <table:table-cell table:formula="of:=[.D112]-[.D11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28" office:value-type="float" office:value="3108" calcext:value-type="float">
            <text:p>3108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359722222222222" calcext:value-type="float">
            <text:p>0,00035972222222222200</text:p>
          </table:table-cell>
          <table:table-cell table:formula="of:=[.D113]-[.D112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28" office:value-type="float" office:value="3136" calcext:value-type="float">
            <text:p>313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362962962962963" calcext:value-type="float">
            <text:p>0,00036296296296296300</text:p>
          </table:table-cell>
          <table:table-cell table:formula="of:=[.D114]-[.D11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28" office:value-type="float" office:value="3164" calcext:value-type="float">
            <text:p>3164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366203703703704" calcext:value-type="float">
            <text:p>0,00036620370370370400</text:p>
          </table:table-cell>
          <table:table-cell table:formula="of:=[.D115]-[.D11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28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369444444444444" calcext:value-type="float">
            <text:p>0,00036944444444444400</text:p>
          </table:table-cell>
          <table:table-cell table:formula="of:=[.D116]-[.D115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28" office:value-type="float" office:value="3220" calcext:value-type="float">
            <text:p>322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372685185185185" calcext:value-type="float">
            <text:p>0,00037268518518518500</text:p>
          </table:table-cell>
          <table:table-cell table:formula="of:=[.D117]-[.D11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28" office:value-type="float" office:value="3248" calcext:value-type="float">
            <text:p>324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375925925925926" calcext:value-type="float">
            <text:p>0,00037592592592592600</text:p>
          </table:table-cell>
          <table:table-cell table:formula="of:=[.D118]-[.D11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28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379166666666667" calcext:value-type="float">
            <text:p>0,00037916666666666700</text:p>
          </table:table-cell>
          <table:table-cell table:formula="of:=[.D119]-[.D118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28" office:value-type="float" office:value="3304" calcext:value-type="float">
            <text:p>330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382407407407407" calcext:value-type="float">
            <text:p>0,00038240740740740700</text:p>
          </table:table-cell>
          <table:table-cell table:formula="of:=[.D120]-[.D11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28" office:value-type="float" office:value="3332" calcext:value-type="float">
            <text:p>3332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385648148148148" calcext:value-type="float">
            <text:p>0,00038564814814814800</text:p>
          </table:table-cell>
          <table:table-cell table:formula="of:=[.D121]-[.D12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28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388888888888889" calcext:value-type="float">
            <text:p>0,00038888888888888900</text:p>
          </table:table-cell>
          <table:table-cell table:formula="of:=[.D122]-[.D121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28" office:value-type="float" office:value="3388" calcext:value-type="float">
            <text:p>3388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39212962962963" calcext:value-type="float">
            <text:p>0,00039212962962963000</text:p>
          </table:table-cell>
          <table:table-cell table:formula="of:=[.D123]-[.D12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28" office:value-type="float" office:value="3416" calcext:value-type="float">
            <text:p>341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39537037037037" calcext:value-type="float">
            <text:p>0,00039537037037037000</text:p>
          </table:table-cell>
          <table:table-cell table:formula="of:=[.D124]-[.D12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28" office:value-type="float" office:value="3444" calcext:value-type="float">
            <text:p>3444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398611111111111" calcext:value-type="float">
            <text:p>0,00039861111111111100</text:p>
          </table:table-cell>
          <table:table-cell table:formula="of:=[.D125]-[.D124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28" office:value-type="float" office:value="3472" calcext:value-type="float">
            <text:p>347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401851851851852" calcext:value-type="float">
            <text:p>0,00040185185185185200</text:p>
          </table:table-cell>
          <table:table-cell table:formula="of:=[.D126]-[.D12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28" office:value-type="float" office:value="3500" calcext:value-type="float">
            <text:p>3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405092592592593" calcext:value-type="float">
            <text:p>0,00040509259259259300</text:p>
          </table:table-cell>
          <table:table-cell table:formula="of:=[.D127]-[.D126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28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408333333333333" calcext:value-type="float">
            <text:p>0,00040833333333333300</text:p>
          </table:table-cell>
          <table:table-cell table:formula="of:=[.D128]-[.D12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28" office:value-type="float" office:value="3556" calcext:value-type="float">
            <text:p>3556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411574074074074" calcext:value-type="float">
            <text:p>0,00041157407407407400</text:p>
          </table:table-cell>
          <table:table-cell table:formula="of:=[.D129]-[.D12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28" office:value-type="float" office:value="3584" calcext:value-type="float">
            <text:p>358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414814814814815" calcext:value-type="float">
            <text:p>0,00041481481481481500</text:p>
          </table:table-cell>
          <table:table-cell table:formula="of:=[.D130]-[.D129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28" office:value-type="float" office:value="3612" calcext:value-type="float">
            <text:p>3612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418055555555556" calcext:value-type="float">
            <text:p>0,00041805555555555600</text:p>
          </table:table-cell>
          <table:table-cell table:formula="of:=[.D131]-[.D13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28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421296296296296" calcext:value-type="float">
            <text:p>0,00042129629629629600</text:p>
          </table:table-cell>
          <table:table-cell table:formula="of:=[.D132]-[.D13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28" office:value-type="float" office:value="3668" calcext:value-type="float">
            <text:p>3668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424537037037037" calcext:value-type="float">
            <text:p>0,00042453703703703700</text:p>
          </table:table-cell>
          <table:table-cell table:formula="of:=[.D133]-[.D132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28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427777777777778" calcext:value-type="float">
            <text:p>0,00042777777777777800</text:p>
          </table:table-cell>
          <table:table-cell table:formula="of:=[.D134]-[.D13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28" office:value-type="float" office:value="3724" calcext:value-type="float">
            <text:p>3724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431018518518519" calcext:value-type="float">
            <text:p>0,00043101851851851800</text:p>
          </table:table-cell>
          <table:table-cell table:formula="of:=[.D135]-[.D13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28" office:value-type="float" office:value="3752" calcext:value-type="float">
            <text:p>375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434259259259259" calcext:value-type="float">
            <text:p>0,00043425925925925900</text:p>
          </table:table-cell>
          <table:table-cell table:formula="of:=[.D136]-[.D135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28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4375" calcext:value-type="float">
            <text:p>0,00043750000000000000</text:p>
          </table:table-cell>
          <table:table-cell table:formula="of:=[.D137]-[.D13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28" office:value-type="float" office:value="3808" calcext:value-type="float">
            <text:p>380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440740740740741" calcext:value-type="float">
            <text:p>0,00044074074074074100</text:p>
          </table:table-cell>
          <table:table-cell table:formula="of:=[.D138]-[.D137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28" office:value-type="float" office:value="3836" calcext:value-type="float">
            <text:p>3836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443981481481482" calcext:value-type="float">
            <text:p>0,00044398148148148200</text:p>
          </table:table-cell>
          <table:table-cell table:formula="of:=[.D139]-[.D13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28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447222222222222" calcext:value-type="float">
            <text:p>0,00044722222222222200</text:p>
          </table:table-cell>
          <table:table-cell table:formula="of:=[.D140]-[.D13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28" office:value-type="float" office:value="3892" calcext:value-type="float">
            <text:p>3892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450462962962963" calcext:value-type="float">
            <text:p>0,00045046296296296300</text:p>
          </table:table-cell>
          <table:table-cell table:formula="of:=[.D141]-[.D140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28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453703703703704" calcext:value-type="float">
            <text:p>0,00045370370370370400</text:p>
          </table:table-cell>
          <table:table-cell table:formula="of:=[.D142]-[.D14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28" office:value-type="float" office:value="3948" calcext:value-type="float">
            <text:p>3948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456944444444444" calcext:value-type="float">
            <text:p>0,00045694444444444500</text:p>
          </table:table-cell>
          <table:table-cell table:formula="of:=[.D143]-[.D14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28" office:value-type="float" office:value="3976" calcext:value-type="float">
            <text:p>397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460185185185185" calcext:value-type="float">
            <text:p>0,00046018518518518500</text:p>
          </table:table-cell>
          <table:table-cell table:formula="of:=[.D144]-[.D143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28" office:value-type="float" office:value="4004" calcext:value-type="float">
            <text:p>4004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463425925925926" calcext:value-type="float">
            <text:p>0,00046342592592592600</text:p>
          </table:table-cell>
          <table:table-cell table:formula="of:=[.D145]-[.D14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28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466666666666667" calcext:value-type="float">
            <text:p>0,00046666666666666700</text:p>
          </table:table-cell>
          <table:table-cell table:formula="of:=[.D146]-[.D14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28" office:value-type="float" office:value="4060" calcext:value-type="float">
            <text:p>406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469907407407407" calcext:value-type="float">
            <text:p>0,00046990740740740700</text:p>
          </table:table-cell>
          <table:table-cell table:formula="of:=[.D147]-[.D146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28" office:value-type="float" office:value="4088" calcext:value-type="float">
            <text:p>408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473148148148148" calcext:value-type="float">
            <text:p>0,00047314814814814800</text:p>
          </table:table-cell>
          <table:table-cell table:formula="of:=[.D148]-[.D14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28" office:value-type="float" office:value="4116" calcext:value-type="float">
            <text:p>4116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476388888888889" calcext:value-type="float">
            <text:p>0,00047638888888888900</text:p>
          </table:table-cell>
          <table:table-cell table:formula="of:=[.D149]-[.D148]" office:value-type="float" office:value="0.00000324074074074078" calcext:value-type="float">
            <text:p>0,000003240740740740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28" office:value-type="float" office:value="4144" calcext:value-type="float">
            <text:p>414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47962962962963" calcext:value-type="float">
            <text:p>0,00047962962962963000</text:p>
          </table:table-cell>
          <table:table-cell table:formula="of:=[.D150]-[.D14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28" office:value-type="float" office:value="4172" calcext:value-type="float">
            <text:p>4172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48287037037037" calcext:value-type="float">
            <text:p>0,00048287037037037000</text:p>
          </table:table-cell>
          <table:table-cell table:formula="of:=[.D151]-[.D15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28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486111111111111" calcext:value-type="float">
            <text:p>0,00048611111111111100</text:p>
          </table:table-cell>
          <table:table-cell table:formula="of:=[.D152]-[.D15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28" office:value-type="float" office:value="4228" calcext:value-type="float">
            <text:p>4228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489351851851852" calcext:value-type="float">
            <text:p>0,00048935185185185200</text:p>
          </table:table-cell>
          <table:table-cell table:formula="of:=[.D153]-[.D15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28" office:value-type="float" office:value="4256" calcext:value-type="float">
            <text:p>425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492592592592593" calcext:value-type="float">
            <text:p>0,00049259259259259300</text:p>
          </table:table-cell>
          <table:table-cell table:formula="of:=[.D154]-[.D153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28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495833333333333" calcext:value-type="float">
            <text:p>0,00049583333333333300</text:p>
          </table:table-cell>
          <table:table-cell table:formula="of:=[.D155]-[.D15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28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499074074074074" calcext:value-type="float">
            <text:p>0,00049907407407407400</text:p>
          </table:table-cell>
          <table:table-cell table:formula="of:=[.D156]-[.D15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28" office:value-type="float" office:value="4340" calcext:value-type="float">
            <text:p>434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502314814814815" calcext:value-type="float">
            <text:p>0,00050231481481481500</text:p>
          </table:table-cell>
          <table:table-cell table:formula="of:=[.D157]-[.D15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28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505555555555556" calcext:value-type="float">
            <text:p>0,00050555555555555600</text:p>
          </table:table-cell>
          <table:table-cell table:formula="of:=[.D158]-[.D15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28" office:value-type="float" office:value="4396" calcext:value-type="float">
            <text:p>4396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508796296296296" calcext:value-type="float">
            <text:p>0,00050879629629629600</text:p>
          </table:table-cell>
          <table:table-cell table:formula="of:=[.D159]-[.D158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28" office:value-type="float" office:value="4424" calcext:value-type="float">
            <text:p>442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512037037037037" calcext:value-type="float">
            <text:p>0,00051203703703703700</text:p>
          </table:table-cell>
          <table:table-cell table:formula="of:=[.D160]-[.D15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28" office:value-type="float" office:value="4452" calcext:value-type="float">
            <text:p>4452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515277777777778" calcext:value-type="float">
            <text:p>0,00051527777777777800</text:p>
          </table:table-cell>
          <table:table-cell table:formula="of:=[.D161]-[.D16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28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518518518518519" calcext:value-type="float">
            <text:p>0,00051851851851851900</text:p>
          </table:table-cell>
          <table:table-cell table:formula="of:=[.D162]-[.D16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28" office:value-type="float" office:value="4508" calcext:value-type="float">
            <text:p>4508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521759259259259" calcext:value-type="float">
            <text:p>0,00052175925925925900</text:p>
          </table:table-cell>
          <table:table-cell table:formula="of:=[.D163]-[.D16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28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525" calcext:value-type="float">
            <text:p>0,00052500000000000000</text:p>
          </table:table-cell>
          <table:table-cell table:formula="of:=[.D164]-[.D16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28" office:value-type="float" office:value="4564" calcext:value-type="float">
            <text:p>4564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528240740740741" calcext:value-type="float">
            <text:p>0,00052824074074074100</text:p>
          </table:table-cell>
          <table:table-cell table:formula="of:=[.D165]-[.D164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28" office:value-type="float" office:value="4592" calcext:value-type="float">
            <text:p>459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531481481481482" calcext:value-type="float">
            <text:p>0,00053148148148148200</text:p>
          </table:table-cell>
          <table:table-cell table:formula="of:=[.D166]-[.D16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28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534722222222222" calcext:value-type="float">
            <text:p>0,00053472222222222200</text:p>
          </table:table-cell>
          <table:table-cell table:formula="of:=[.D167]-[.D16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28" office:value-type="float" office:value="4648" calcext:value-type="float">
            <text:p>464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537962962962963" calcext:value-type="float">
            <text:p>0,00053796296296296300</text:p>
          </table:table-cell>
          <table:table-cell table:formula="of:=[.D168]-[.D16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28" office:value-type="float" office:value="4676" calcext:value-type="float">
            <text:p>4676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541203703703704" calcext:value-type="float">
            <text:p>0,00054120370370370400</text:p>
          </table:table-cell>
          <table:table-cell table:formula="of:=[.D169]-[.D16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28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544444444444444" calcext:value-type="float">
            <text:p>0,00054444444444444400</text:p>
          </table:table-cell>
          <table:table-cell table:formula="of:=[.D170]-[.D169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28" office:value-type="float" office:value="4732" calcext:value-type="float">
            <text:p>4732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547685185185185" calcext:value-type="float">
            <text:p>0,00054768518518518500</text:p>
          </table:table-cell>
          <table:table-cell table:formula="of:=[.D171]-[.D17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28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550925925925926" calcext:value-type="float">
            <text:p>0,00055092592592592600</text:p>
          </table:table-cell>
          <table:table-cell table:formula="of:=[.D172]-[.D17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28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554166666666667" calcext:value-type="float">
            <text:p>0,00055416666666666700</text:p>
          </table:table-cell>
          <table:table-cell table:formula="of:=[.D173]-[.D17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28" office:value-type="float" office:value="4816" calcext:value-type="float">
            <text:p>481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557407407407407" calcext:value-type="float">
            <text:p>0,00055740740740740700</text:p>
          </table:table-cell>
          <table:table-cell table:formula="of:=[.D174]-[.D17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28" office:value-type="float" office:value="4844" calcext:value-type="float">
            <text:p>4844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560648148148148" calcext:value-type="float">
            <text:p>0,00056064814814814800</text:p>
          </table:table-cell>
          <table:table-cell table:formula="of:=[.D175]-[.D17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28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563888888888889" calcext:value-type="float">
            <text:p>0,00056388888888888900</text:p>
          </table:table-cell>
          <table:table-cell table:formula="of:=[.D176]-[.D175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28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56712962962963" calcext:value-type="float">
            <text:p>0,00056712962962963000</text:p>
          </table:table-cell>
          <table:table-cell table:formula="of:=[.D177]-[.D17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28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57037037037037" calcext:value-type="float">
            <text:p>0,00057037037037037000</text:p>
          </table:table-cell>
          <table:table-cell table:formula="of:=[.D178]-[.D17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28" office:value-type="float" office:value="4956" calcext:value-type="float">
            <text:p>4956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573611111111111" calcext:value-type="float">
            <text:p>0,00057361111111111100</text:p>
          </table:table-cell>
          <table:table-cell table:formula="of:=[.D179]-[.D17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28" office:value-type="float" office:value="4984" calcext:value-type="float">
            <text:p>498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576851851851852" calcext:value-type="float">
            <text:p>0,00057685185185185200</text:p>
          </table:table-cell>
          <table:table-cell table:formula="of:=[.D180]-[.D17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28" office:value-type="float" office:value="5012" calcext:value-type="float">
            <text:p>5012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580092592592593" calcext:value-type="float">
            <text:p>0,00058009259259259300</text:p>
          </table:table-cell>
          <table:table-cell table:formula="of:=[.D181]-[.D180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28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583333333333333" calcext:value-type="float">
            <text:p>0,00058333333333333300</text:p>
          </table:table-cell>
          <table:table-cell table:formula="of:=[.D182]-[.D18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28" office:value-type="float" office:value="5068" calcext:value-type="float">
            <text:p>5068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586574074074074" calcext:value-type="float">
            <text:p>0,00058657407407407400</text:p>
          </table:table-cell>
          <table:table-cell table:formula="of:=[.D183]-[.D18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28" office:value-type="float" office:value="5096" calcext:value-type="float">
            <text:p>509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589814814814815" calcext:value-type="float">
            <text:p>0,00058981481481481500</text:p>
          </table:table-cell>
          <table:table-cell table:formula="of:=[.D184]-[.D18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28" office:value-type="float" office:value="5124" calcext:value-type="float">
            <text:p>5124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593055555555556" calcext:value-type="float">
            <text:p>0,00059305555555555600</text:p>
          </table:table-cell>
          <table:table-cell table:formula="of:=[.D185]-[.D18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28" office:value-type="float" office:value="5152" calcext:value-type="float">
            <text:p>515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596296296296296" calcext:value-type="float">
            <text:p>0,00059629629629629600</text:p>
          </table:table-cell>
          <table:table-cell table:formula="of:=[.D186]-[.D18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28" office:value-type="float" office:value="5180" calcext:value-type="float">
            <text:p>518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599537037037037" calcext:value-type="float">
            <text:p>0,00059953703703703700</text:p>
          </table:table-cell>
          <table:table-cell table:formula="of:=[.D187]-[.D186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28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602777777777778" calcext:value-type="float">
            <text:p>0,00060277777777777800</text:p>
          </table:table-cell>
          <table:table-cell table:formula="of:=[.D188]-[.D18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28" office:value-type="float" office:value="5236" calcext:value-type="float">
            <text:p>5236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606018518518519" calcext:value-type="float">
            <text:p>0,00060601851851851900</text:p>
          </table:table-cell>
          <table:table-cell table:formula="of:=[.D189]-[.D18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28" office:value-type="float" office:value="5264" calcext:value-type="float">
            <text:p>526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609259259259259" calcext:value-type="float">
            <text:p>0,00060925925925925900</text:p>
          </table:table-cell>
          <table:table-cell table:formula="of:=[.D190]-[.D18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28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6125" calcext:value-type="float">
            <text:p>0,00061250000000000000</text:p>
          </table:table-cell>
          <table:table-cell table:formula="of:=[.D191]-[.D19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28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615740740740741" calcext:value-type="float">
            <text:p>0,00061574074074074100</text:p>
          </table:table-cell>
          <table:table-cell table:formula="of:=[.D192]-[.D191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28" office:value-type="float" office:value="5348" calcext:value-type="float">
            <text:p>5348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618981481481482" calcext:value-type="float">
            <text:p>0,00061898148148148200</text:p>
          </table:table-cell>
          <table:table-cell table:formula="of:=[.D193]-[.D19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28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622222222222222" calcext:value-type="float">
            <text:p>0,00062222222222222200</text:p>
          </table:table-cell>
          <table:table-cell table:formula="of:=[.D194]-[.D19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28" office:value-type="float" office:value="5404" calcext:value-type="float">
            <text:p>5404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625462962962963" calcext:value-type="float">
            <text:p>0,00062546296296296300</text:p>
          </table:table-cell>
          <table:table-cell table:formula="of:=[.D195]-[.D19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28" office:value-type="float" office:value="5432" calcext:value-type="float">
            <text:p>543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628703703703704" calcext:value-type="float">
            <text:p>0,00062870370370370400</text:p>
          </table:table-cell>
          <table:table-cell table:formula="of:=[.D196]-[.D19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28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631944444444444" calcext:value-type="float">
            <text:p>0,00063194444444444400</text:p>
          </table:table-cell>
          <table:table-cell table:formula="of:=[.D197]-[.D19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28" office:value-type="float" office:value="5488" calcext:value-type="float">
            <text:p>548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635185185185185" calcext:value-type="float">
            <text:p>0,00063518518518518500</text:p>
          </table:table-cell>
          <table:table-cell table:formula="of:=[.D198]-[.D197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28" office:value-type="float" office:value="5516" calcext:value-type="float">
            <text:p>5516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638425925925926" calcext:value-type="float">
            <text:p>0,00063842592592592600</text:p>
          </table:table-cell>
          <table:table-cell table:formula="of:=[.D199]-[.D19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28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641666666666667" calcext:value-type="float">
            <text:p>0,00064166666666666700</text:p>
          </table:table-cell>
          <table:table-cell table:formula="of:=[.D200]-[.D19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28" office:value-type="float" office:value="5572" calcext:value-type="float">
            <text:p>5572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644907407407407" calcext:value-type="float">
            <text:p>0,00064490740740740700</text:p>
          </table:table-cell>
          <table:table-cell table:formula="of:=[.D201]-[.D20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28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648148148148148" calcext:value-type="float">
            <text:p>0,00064814814814814800</text:p>
          </table:table-cell>
          <table:table-cell table:formula="of:=[.D202]-[.D20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28" office:value-type="float" office:value="5628" calcext:value-type="float">
            <text:p>5628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651388888888889" calcext:value-type="float">
            <text:p>0,00065138888888888900</text:p>
          </table:table-cell>
          <table:table-cell table:formula="of:=[.D203]-[.D202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28" office:value-type="float" office:value="5656" calcext:value-type="float">
            <text:p>565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65462962962963" calcext:value-type="float">
            <text:p>0,00065462962962963000</text:p>
          </table:table-cell>
          <table:table-cell table:formula="of:=[.D204]-[.D20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28" office:value-type="float" office:value="5684" calcext:value-type="float">
            <text:p>5684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65787037037037" calcext:value-type="float">
            <text:p>0,00065787037037037000</text:p>
          </table:table-cell>
          <table:table-cell table:formula="of:=[.D205]-[.D20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28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661111111111111" calcext:value-type="float">
            <text:p>0,00066111111111111100</text:p>
          </table:table-cell>
          <table:table-cell table:formula="of:=[.D206]-[.D20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28" office:value-type="float" office:value="5740" calcext:value-type="float">
            <text:p>574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664351851851852" calcext:value-type="float">
            <text:p>0,00066435185185185200</text:p>
          </table:table-cell>
          <table:table-cell table:formula="of:=[.D207]-[.D20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28" office:value-type="float" office:value="5768" calcext:value-type="float">
            <text:p>576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667592592592593" calcext:value-type="float">
            <text:p>0,00066759259259259300</text:p>
          </table:table-cell>
          <table:table-cell table:formula="of:=[.D208]-[.D20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28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670833333333333" calcext:value-type="float">
            <text:p>0,00067083333333333300</text:p>
          </table:table-cell>
          <table:table-cell table:formula="of:=[.D209]-[.D208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28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674074074074074" calcext:value-type="float">
            <text:p>0,00067407407407407400</text:p>
          </table:table-cell>
          <table:table-cell table:formula="of:=[.D210]-[.D20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28" office:value-type="float" office:value="5852" calcext:value-type="float">
            <text:p>5852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677314814814815" calcext:value-type="float">
            <text:p>0,00067731481481481500</text:p>
          </table:table-cell>
          <table:table-cell table:formula="of:=[.D211]-[.D21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28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680555555555556" calcext:value-type="float">
            <text:p>0,00068055555555555600</text:p>
          </table:table-cell>
          <table:table-cell table:formula="of:=[.D212]-[.D21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28" office:value-type="float" office:value="5908" calcext:value-type="float">
            <text:p>5908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683796296296296" calcext:value-type="float">
            <text:p>0,00068379629629629600</text:p>
          </table:table-cell>
          <table:table-cell table:formula="of:=[.D213]-[.D21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28" office:value-type="float" office:value="5936" calcext:value-type="float">
            <text:p>593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687037037037037" calcext:value-type="float">
            <text:p>0,00068703703703703700</text:p>
          </table:table-cell>
          <table:table-cell table:formula="of:=[.D214]-[.D213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28" office:value-type="float" office:value="5964" calcext:value-type="float">
            <text:p>5964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690277777777778" calcext:value-type="float">
            <text:p>0,00069027777777777800</text:p>
          </table:table-cell>
          <table:table-cell table:formula="of:=[.D215]-[.D21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28" office:value-type="float" office:value="5992" calcext:value-type="float">
            <text:p>599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693518518518519" calcext:value-type="float">
            <text:p>0,00069351851851851900</text:p>
          </table:table-cell>
          <table:table-cell table:formula="of:=[.D216]-[.D21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28" office:value-type="float" office:value="6020" calcext:value-type="float">
            <text:p>602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696759259259259" calcext:value-type="float">
            <text:p>0,00069675925925925900</text:p>
          </table:table-cell>
          <table:table-cell table:formula="of:=[.D217]-[.D21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28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7" calcext:value-type="float">
            <text:p>0,00070000000000000000</text:p>
          </table:table-cell>
          <table:table-cell table:formula="of:=[.D218]-[.D21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28" office:value-type="float" office:value="6076" calcext:value-type="float">
            <text:p>6076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703240740740741" calcext:value-type="float">
            <text:p>0,00070324074074074100</text:p>
          </table:table-cell>
          <table:table-cell table:formula="of:=[.D219]-[.D21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28" office:value-type="float" office:value="6104" calcext:value-type="float">
            <text:p>610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706481481481481" calcext:value-type="float">
            <text:p>0,00070648148148148100</text:p>
          </table:table-cell>
          <table:table-cell table:formula="of:=[.D220]-[.D219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28" office:value-type="float" office:value="6132" calcext:value-type="float">
            <text:p>6132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709722222222222" calcext:value-type="float">
            <text:p>0,00070972222222222200</text:p>
          </table:table-cell>
          <table:table-cell table:formula="of:=[.D221]-[.D22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28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712962962962963" calcext:value-type="float">
            <text:p>0,00071296296296296300</text:p>
          </table:table-cell>
          <table:table-cell table:formula="of:=[.D222]-[.D22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28" office:value-type="float" office:value="6188" calcext:value-type="float">
            <text:p>6188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716203703703704" calcext:value-type="float">
            <text:p>0,00071620370370370400</text:p>
          </table:table-cell>
          <table:table-cell table:formula="of:=[.D223]-[.D22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28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719444444444444" calcext:value-type="float">
            <text:p>0,00071944444444444400</text:p>
          </table:table-cell>
          <table:table-cell table:formula="of:=[.D224]-[.D22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28" office:value-type="float" office:value="6244" calcext:value-type="float">
            <text:p>6244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722685185185185" calcext:value-type="float">
            <text:p>0,00072268518518518500</text:p>
          </table:table-cell>
          <table:table-cell table:formula="of:=[.D225]-[.D224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28" office:value-type="float" office:value="6272" calcext:value-type="float">
            <text:p>627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725925925925926" calcext:value-type="float">
            <text:p>0,00072592592592592600</text:p>
          </table:table-cell>
          <table:table-cell table:formula="of:=[.D226]-[.D22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28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729166666666667" calcext:value-type="float">
            <text:p>0,00072916666666666700</text:p>
          </table:table-cell>
          <table:table-cell table:formula="of:=[.D227]-[.D22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28" office:value-type="float" office:value="6328" calcext:value-type="float">
            <text:p>632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732407407407407" calcext:value-type="float">
            <text:p>0,00073240740740740700</text:p>
          </table:table-cell>
          <table:table-cell table:formula="of:=[.D228]-[.D22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28" office:value-type="float" office:value="6356" calcext:value-type="float">
            <text:p>6356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735648148148148" calcext:value-type="float">
            <text:p>0,00073564814814814800</text:p>
          </table:table-cell>
          <table:table-cell table:formula="of:=[.D229]-[.D22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28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738888888888889" calcext:value-type="float">
            <text:p>0,00073888888888888900</text:p>
          </table:table-cell>
          <table:table-cell table:formula="of:=[.D230]-[.D22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28" office:value-type="float" office:value="6412" calcext:value-type="float">
            <text:p>6412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74212962962963" calcext:value-type="float">
            <text:p>0,00074212962962963000</text:p>
          </table:table-cell>
          <table:table-cell table:formula="of:=[.D231]-[.D230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28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74537037037037" calcext:value-type="float">
            <text:p>0,00074537037037037000</text:p>
          </table:table-cell>
          <table:table-cell table:formula="of:=[.D232]-[.D23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28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748611111111111" calcext:value-type="float">
            <text:p>0,00074861111111111100</text:p>
          </table:table-cell>
          <table:table-cell table:formula="of:=[.D233]-[.D23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28" office:value-type="float" office:value="6496" calcext:value-type="float">
            <text:p>649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751851851851852" calcext:value-type="float">
            <text:p>0,00075185185185185200</text:p>
          </table:table-cell>
          <table:table-cell table:formula="of:=[.D234]-[.D23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28" office:value-type="float" office:value="6524" calcext:value-type="float">
            <text:p>6524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755092592592593" calcext:value-type="float">
            <text:p>0,00075509259259259300</text:p>
          </table:table-cell>
          <table:table-cell table:formula="of:=[.D235]-[.D23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28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758333333333333" calcext:value-type="float">
            <text:p>0,00075833333333333300</text:p>
          </table:table-cell>
          <table:table-cell table:formula="of:=[.D236]-[.D235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28" office:value-type="float" office:value="6580" calcext:value-type="float">
            <text:p>658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761574074074074" calcext:value-type="float">
            <text:p>0,00076157407407407400</text:p>
          </table:table-cell>
          <table:table-cell table:formula="of:=[.D237]-[.D23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28" office:value-type="float" office:value="6608" calcext:value-type="float">
            <text:p>660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764814814814815" calcext:value-type="float">
            <text:p>0,00076481481481481500</text:p>
          </table:table-cell>
          <table:table-cell table:formula="of:=[.D238]-[.D23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28" office:value-type="float" office:value="6636" calcext:value-type="float">
            <text:p>6636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768055555555556" calcext:value-type="float">
            <text:p>0,00076805555555555600</text:p>
          </table:table-cell>
          <table:table-cell table:formula="of:=[.D239]-[.D23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28" office:value-type="float" office:value="6664" calcext:value-type="float">
            <text:p>666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771296296296296" calcext:value-type="float">
            <text:p>0,00077129629629629600</text:p>
          </table:table-cell>
          <table:table-cell table:formula="of:=[.D240]-[.D23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28" office:value-type="float" office:value="6692" calcext:value-type="float">
            <text:p>6692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774537037037037" calcext:value-type="float">
            <text:p>0,00077453703703703700</text:p>
          </table:table-cell>
          <table:table-cell table:formula="of:=[.D241]-[.D24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formula="of:=[.B240]+28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777777777777778" calcext:value-type="float">
            <text:p>0,00077777777777777800</text:p>
          </table:table-cell>
          <table:table-cell table:formula="of:=[.D242]-[.D241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28" office:value-type="float" office:value="6748" calcext:value-type="float">
            <text:p>6748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781018518518519" calcext:value-type="float">
            <text:p>0,00078101851851851900</text:p>
          </table:table-cell>
          <table:table-cell table:formula="of:=[.D243]-[.D24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28" office:value-type="float" office:value="6776" calcext:value-type="float">
            <text:p>677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784259259259259" calcext:value-type="float">
            <text:p>0,00078425925925925900</text:p>
          </table:table-cell>
          <table:table-cell table:formula="of:=[.D244]-[.D24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28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7875" calcext:value-type="float">
            <text:p>0,00078750000000000000</text:p>
          </table:table-cell>
          <table:table-cell table:formula="of:=[.D245]-[.D24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28" office:value-type="float" office:value="6832" calcext:value-type="float">
            <text:p>683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790740740740741" calcext:value-type="float">
            <text:p>0,00079074074074074100</text:p>
          </table:table-cell>
          <table:table-cell table:formula="of:=[.D246]-[.D24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28" office:value-type="float" office:value="6860" calcext:value-type="float">
            <text:p>686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793981481481481" calcext:value-type="float">
            <text:p>0,00079398148148148100</text:p>
          </table:table-cell>
          <table:table-cell table:formula="of:=[.D247]-[.D24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28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797222222222222" calcext:value-type="float">
            <text:p>0,00079722222222222200</text:p>
          </table:table-cell>
          <table:table-cell table:formula="of:=[.D248]-[.D247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28" office:value-type="float" office:value="6916" calcext:value-type="float">
            <text:p>6916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800462962962963" calcext:value-type="float">
            <text:p>0,00080046296296296300</text:p>
          </table:table-cell>
          <table:table-cell table:formula="of:=[.D249]-[.D24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28" office:value-type="float" office:value="6944" calcext:value-type="float">
            <text:p>694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803703703703704" calcext:value-type="float">
            <text:p>0,00080370370370370400</text:p>
          </table:table-cell>
          <table:table-cell table:formula="of:=[.D250]-[.D24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28" office:value-type="float" office:value="6972" calcext:value-type="float">
            <text:p>6972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806944444444444" calcext:value-type="float">
            <text:p>0,00080694444444444400</text:p>
          </table:table-cell>
          <table:table-cell table:formula="of:=[.D251]-[.D25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28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810185185185185" calcext:value-type="float">
            <text:p>0,00081018518518518500</text:p>
          </table:table-cell>
          <table:table-cell table:formula="of:=[.D252]-[.D25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28" office:value-type="float" office:value="7028" calcext:value-type="float">
            <text:p>7028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813425925925926" calcext:value-type="float">
            <text:p>0,00081342592592592600</text:p>
          </table:table-cell>
          <table:table-cell table:formula="of:=[.D253]-[.D252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28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816666666666667" calcext:value-type="float">
            <text:p>0,00081666666666666700</text:p>
          </table:table-cell>
          <table:table-cell table:formula="of:=[.D254]-[.D25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28" office:value-type="float" office:value="7084" calcext:value-type="float">
            <text:p>7084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819907407407407" calcext:value-type="float">
            <text:p>0,00081990740740740700</text:p>
          </table:table-cell>
          <table:table-cell table:formula="of:=[.D255]-[.D25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28" office:value-type="float" office:value="7112" calcext:value-type="float">
            <text:p>711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823148148148148" calcext:value-type="float">
            <text:p>0,00082314814814814800</text:p>
          </table:table-cell>
          <table:table-cell table:formula="of:=[.D256]-[.D25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28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826388888888889" calcext:value-type="float">
            <text:p>0,00082638888888888900</text:p>
          </table:table-cell>
          <table:table-cell table:formula="of:=[.D257]-[.D25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28" office:value-type="float" office:value="7168" calcext:value-type="float">
            <text:p>716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82962962962963" calcext:value-type="float">
            <text:p>0,00082962962962963000</text:p>
          </table:table-cell>
          <table:table-cell table:formula="of:=[.D258]-[.D25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28" office:value-type="float" office:value="7196" calcext:value-type="float">
            <text:p>7196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83287037037037" calcext:value-type="float">
            <text:p>0,00083287037037037000</text:p>
          </table:table-cell>
          <table:table-cell table:formula="of:=[.D259]-[.D258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28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836111111111111" calcext:value-type="float">
            <text:p>0,00083611111111111100</text:p>
          </table:table-cell>
          <table:table-cell table:formula="of:=[.D260]-[.D25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28" office:value-type="float" office:value="7252" calcext:value-type="float">
            <text:p>7252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839351851851852" calcext:value-type="float">
            <text:p>0,00083935185185185200</text:p>
          </table:table-cell>
          <table:table-cell table:formula="of:=[.D261]-[.D26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28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842592592592593" calcext:value-type="float">
            <text:p>0,00084259259259259300</text:p>
          </table:table-cell>
          <table:table-cell table:formula="of:=[.D262]-[.D26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28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845833333333333" calcext:value-type="float">
            <text:p>0,00084583333333333300</text:p>
          </table:table-cell>
          <table:table-cell table:formula="of:=[.D263]-[.D26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28" office:value-type="float" office:value="7336" calcext:value-type="float">
            <text:p>733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849074074074074" calcext:value-type="float">
            <text:p>0,00084907407407407400</text:p>
          </table:table-cell>
          <table:table-cell table:formula="of:=[.D264]-[.D263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28" office:value-type="float" office:value="7364" calcext:value-type="float">
            <text:p>7364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852314814814815" calcext:value-type="float">
            <text:p>0,00085231481481481500</text:p>
          </table:table-cell>
          <table:table-cell table:formula="of:=[.D265]-[.D26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28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855555555555556" calcext:value-type="float">
            <text:p>0,00085555555555555600</text:p>
          </table:table-cell>
          <table:table-cell table:formula="of:=[.D266]-[.D26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28" office:value-type="float" office:value="7420" calcext:value-type="float">
            <text:p>742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858796296296296" calcext:value-type="float">
            <text:p>0,00085879629629629600</text:p>
          </table:table-cell>
          <table:table-cell table:formula="of:=[.D267]-[.D26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28" office:value-type="float" office:value="7448" calcext:value-type="float">
            <text:p>744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862037037037037" calcext:value-type="float">
            <text:p>0,00086203703703703700</text:p>
          </table:table-cell>
          <table:table-cell table:formula="of:=[.D268]-[.D26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28" office:value-type="float" office:value="7476" calcext:value-type="float">
            <text:p>7476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865277777777778" calcext:value-type="float">
            <text:p>0,00086527777777777800</text:p>
          </table:table-cell>
          <table:table-cell table:formula="of:=[.D269]-[.D26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28" office:value-type="float" office:value="7504" calcext:value-type="float">
            <text:p>750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868518518518519" calcext:value-type="float">
            <text:p>0,00086851851851851800</text:p>
          </table:table-cell>
          <table:table-cell table:formula="of:=[.D270]-[.D269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28" office:value-type="float" office:value="7532" calcext:value-type="float">
            <text:p>7532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871759259259259" calcext:value-type="float">
            <text:p>0,00087175925925925900</text:p>
          </table:table-cell>
          <table:table-cell table:formula="of:=[.D271]-[.D27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28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875" calcext:value-type="float">
            <text:p>0,00087500000000000000</text:p>
          </table:table-cell>
          <table:table-cell table:formula="of:=[.D272]-[.D27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28" office:value-type="float" office:value="7588" calcext:value-type="float">
            <text:p>7588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878240740740741" calcext:value-type="float">
            <text:p>0,00087824074074074100</text:p>
          </table:table-cell>
          <table:table-cell table:formula="of:=[.D273]-[.D27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28" office:value-type="float" office:value="7616" calcext:value-type="float">
            <text:p>761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881481481481482" calcext:value-type="float">
            <text:p>0,00088148148148148200</text:p>
          </table:table-cell>
          <table:table-cell table:formula="of:=[.D274]-[.D27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28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884722222222222" calcext:value-type="float">
            <text:p>0,00088472222222222200</text:p>
          </table:table-cell>
          <table:table-cell table:formula="of:=[.D275]-[.D274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28" office:value-type="float" office:value="7672" calcext:value-type="float">
            <text:p>767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887962962962963" calcext:value-type="float">
            <text:p>0,00088796296296296300</text:p>
          </table:table-cell>
          <table:table-cell table:formula="of:=[.D276]-[.D27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28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891203703703704" calcext:value-type="float">
            <text:p>0,00089120370370370400</text:p>
          </table:table-cell>
          <table:table-cell table:formula="of:=[.D277]-[.D27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28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894444444444445" calcext:value-type="float">
            <text:p>0,00089444444444444500</text:p>
          </table:table-cell>
          <table:table-cell table:formula="of:=[.D278]-[.D27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28" office:value-type="float" office:value="7756" calcext:value-type="float">
            <text:p>7756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897685185185185" calcext:value-type="float">
            <text:p>0,00089768518518518500</text:p>
          </table:table-cell>
          <table:table-cell table:formula="of:=[.D279]-[.D27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28" office:value-type="float" office:value="7784" calcext:value-type="float">
            <text:p>778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900925925925926" calcext:value-type="float">
            <text:p>0,00090092592592592600</text:p>
          </table:table-cell>
          <table:table-cell table:formula="of:=[.D280]-[.D27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28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904166666666667" calcext:value-type="float">
            <text:p>0,00090416666666666700</text:p>
          </table:table-cell>
          <table:table-cell table:formula="of:=[.D281]-[.D280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28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907407407407407" calcext:value-type="float">
            <text:p>0,00090740740740740800</text:p>
          </table:table-cell>
          <table:table-cell table:formula="of:=[.D282]-[.D28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28" office:value-type="float" office:value="7868" calcext:value-type="float">
            <text:p>7868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910648148148148" calcext:value-type="float">
            <text:p>0,00091064814814814800</text:p>
          </table:table-cell>
          <table:table-cell table:formula="of:=[.D283]-[.D28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28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913888888888889" calcext:value-type="float">
            <text:p>0,00091388888888888900</text:p>
          </table:table-cell>
          <table:table-cell table:formula="of:=[.D284]-[.D28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28" office:value-type="float" office:value="7924" calcext:value-type="float">
            <text:p>7924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91712962962963" calcext:value-type="float">
            <text:p>0,00091712962962963000</text:p>
          </table:table-cell>
          <table:table-cell table:formula="of:=[.D285]-[.D28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28" office:value-type="float" office:value="7952" calcext:value-type="float">
            <text:p>795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92037037037037" calcext:value-type="float">
            <text:p>0,00092037037037037000</text:p>
          </table:table-cell>
          <table:table-cell table:formula="of:=[.D286]-[.D285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28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923611111111111" calcext:value-type="float">
            <text:p>0,00092361111111111100</text:p>
          </table:table-cell>
          <table:table-cell table:formula="of:=[.D287]-[.D28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28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926851851851852" calcext:value-type="float">
            <text:p>0,00092685185185185200</text:p>
          </table:table-cell>
          <table:table-cell table:formula="of:=[.D288]-[.D28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28" office:value-type="float" office:value="8036" calcext:value-type="float">
            <text:p>8036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930092592592593" calcext:value-type="float">
            <text:p>0,00093009259259259300</text:p>
          </table:table-cell>
          <table:table-cell table:formula="of:=[.D289]-[.D28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28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933333333333333" calcext:value-type="float">
            <text:p>0,00093333333333333300</text:p>
          </table:table-cell>
          <table:table-cell table:formula="of:=[.D290]-[.D28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28" office:value-type="float" office:value="8092" calcext:value-type="float">
            <text:p>8092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936574074074074" calcext:value-type="float">
            <text:p>0,00093657407407407400</text:p>
          </table:table-cell>
          <table:table-cell table:formula="of:=[.D291]-[.D29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28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939814814814815" calcext:value-type="float">
            <text:p>0,00093981481481481500</text:p>
          </table:table-cell>
          <table:table-cell table:formula="of:=[.D292]-[.D291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28" office:value-type="float" office:value="8148" calcext:value-type="float">
            <text:p>8148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943055555555556" calcext:value-type="float">
            <text:p>0,00094305555555555600</text:p>
          </table:table-cell>
          <table:table-cell table:formula="of:=[.D293]-[.D29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28" office:value-type="float" office:value="8176" calcext:value-type="float">
            <text:p>817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946296296296296" calcext:value-type="float">
            <text:p>0,00094629629629629600</text:p>
          </table:table-cell>
          <table:table-cell table:formula="of:=[.D294]-[.D29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28" office:value-type="float" office:value="8204" calcext:value-type="float">
            <text:p>8204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949537037037037" calcext:value-type="float">
            <text:p>0,00094953703703703700</text:p>
          </table:table-cell>
          <table:table-cell table:formula="of:=[.D295]-[.D29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28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952777777777778" calcext:value-type="float">
            <text:p>0,00095277777777777800</text:p>
          </table:table-cell>
          <table:table-cell table:formula="of:=[.D296]-[.D29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28" office:value-type="float" office:value="8260" calcext:value-type="float">
            <text:p>826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956018518518519" calcext:value-type="float">
            <text:p>0,00095601851851851900</text:p>
          </table:table-cell>
          <table:table-cell table:formula="of:=[.D297]-[.D296]" office:value-type="float" office:value="0.00000324074074074083" calcext:value-type="float">
            <text:p>0,0000032407407407408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28" office:value-type="float" office:value="8288" calcext:value-type="float">
            <text:p>828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959259259259259" calcext:value-type="float">
            <text:p>0,00095925925925925900</text:p>
          </table:table-cell>
          <table:table-cell table:formula="of:=[.D298]-[.D29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28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9625" calcext:value-type="float">
            <text:p>0,00096250000000000000</text:p>
          </table:table-cell>
          <table:table-cell table:formula="of:=[.D299]-[.D29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28" office:value-type="float" office:value="8344" calcext:value-type="float">
            <text:p>834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965740740740741" calcext:value-type="float">
            <text:p>0,00096574074074074100</text:p>
          </table:table-cell>
          <table:table-cell table:formula="of:=[.D300]-[.D29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28" office:value-type="float" office:value="8372" calcext:value-type="float">
            <text:p>8372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968981481481482" calcext:value-type="float">
            <text:p>0,00096898148148148200</text:p>
          </table:table-cell>
          <table:table-cell table:formula="of:=[.D301]-[.D30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28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972222222222222" calcext:value-type="float">
            <text:p>0,00097222222222222200</text:p>
          </table:table-cell>
          <table:table-cell table:formula="of:=[.D302]-[.D30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28" office:value-type="float" office:value="8428" calcext:value-type="float">
            <text:p>8428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975462962962963" calcext:value-type="float">
            <text:p>0,00097546296296296300</text:p>
          </table:table-cell>
          <table:table-cell table:formula="of:=[.D303]-[.D30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28" office:value-type="float" office:value="8456" calcext:value-type="float">
            <text:p>845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978703703703704" calcext:value-type="float">
            <text:p>0,00097870370370370400</text:p>
          </table:table-cell>
          <table:table-cell table:formula="of:=[.D304]-[.D30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28" office:value-type="float" office:value="8484" calcext:value-type="float">
            <text:p>8484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981944444444444" calcext:value-type="float">
            <text:p>0,00098194444444444400</text:p>
          </table:table-cell>
          <table:table-cell table:formula="of:=[.D305]-[.D30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28" office:value-type="float" office:value="8512" calcext:value-type="float">
            <text:p>851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985185185185185" calcext:value-type="float">
            <text:p>0,00098518518518518500</text:p>
          </table:table-cell>
          <table:table-cell table:formula="of:=[.D306]-[.D305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28" office:value-type="float" office:value="8540" calcext:value-type="float">
            <text:p>854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988425925925926" calcext:value-type="float">
            <text:p>0,00098842592592592600</text:p>
          </table:table-cell>
          <table:table-cell table:formula="of:=[.D307]-[.D30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28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991666666666667" calcext:value-type="float">
            <text:p>0,00099166666666666700</text:p>
          </table:table-cell>
          <table:table-cell table:formula="of:=[.D308]-[.D30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28" office:value-type="float" office:value="8596" calcext:value-type="float">
            <text:p>8596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994907407407408" calcext:value-type="float">
            <text:p>0,00099490740740740800</text:p>
          </table:table-cell>
          <table:table-cell table:formula="of:=[.D309]-[.D30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28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998148148148148" calcext:value-type="float">
            <text:p>0,00099814814814814800</text:p>
          </table:table-cell>
          <table:table-cell table:formula="of:=[.D310]-[.D30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28" office:value-type="float" office:value="8652" calcext:value-type="float">
            <text:p>8652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00138888888889" calcext:value-type="float">
            <text:p>0,00100138888888889000</text:p>
          </table:table-cell>
          <table:table-cell table:formula="of:=[.D311]-[.D31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28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00462962962963" calcext:value-type="float">
            <text:p>0,00100462962962963000</text:p>
          </table:table-cell>
          <table:table-cell table:formula="of:=[.D312]-[.D31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28" office:value-type="float" office:value="8708" calcext:value-type="float">
            <text:p>8708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00787037037037" calcext:value-type="float">
            <text:p>0,00100787037037037000</text:p>
          </table:table-cell>
          <table:table-cell table:formula="of:=[.D313]-[.D31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28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01111111111111" calcext:value-type="float">
            <text:p>0,00101111111111111000</text:p>
          </table:table-cell>
          <table:table-cell table:formula="of:=[.D314]-[.D31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28" office:value-type="float" office:value="8764" calcext:value-type="float">
            <text:p>8764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01435185185185" calcext:value-type="float">
            <text:p>0,00101435185185185000</text:p>
          </table:table-cell>
          <table:table-cell table:formula="of:=[.D315]-[.D31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28" office:value-type="float" office:value="8792" calcext:value-type="float">
            <text:p>879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01759259259259" calcext:value-type="float">
            <text:p>0,00101759259259259000</text:p>
          </table:table-cell>
          <table:table-cell table:formula="of:=[.D316]-[.D31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28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02083333333333" calcext:value-type="float">
            <text:p>0,00102083333333333000</text:p>
          </table:table-cell>
          <table:table-cell table:formula="of:=[.D317]-[.D316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28" office:value-type="float" office:value="8848" calcext:value-type="float">
            <text:p>884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02407407407407" calcext:value-type="float">
            <text:p>0,00102407407407407000</text:p>
          </table:table-cell>
          <table:table-cell table:formula="of:=[.D318]-[.D31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28" office:value-type="float" office:value="8876" calcext:value-type="float">
            <text:p>8876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02731481481481" calcext:value-type="float">
            <text:p>0,00102731481481481000</text:p>
          </table:table-cell>
          <table:table-cell table:formula="of:=[.D319]-[.D31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28" office:value-type="float" office:value="8904" calcext:value-type="float">
            <text:p>890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03055555555556" calcext:value-type="float">
            <text:p>0,00103055555555556000</text:p>
          </table:table-cell>
          <table:table-cell table:formula="of:=[.D320]-[.D31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28" office:value-type="float" office:value="8932" calcext:value-type="float">
            <text:p>8932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0337962962963" calcext:value-type="float">
            <text:p>0,00103379629629630000</text:p>
          </table:table-cell>
          <table:table-cell table:formula="of:=[.D321]-[.D32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28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03703703703704" calcext:value-type="float">
            <text:p>0,00103703703703704000</text:p>
          </table:table-cell>
          <table:table-cell table:formula="of:=[.D322]-[.D32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28" office:value-type="float" office:value="8988" calcext:value-type="float">
            <text:p>8988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04027777777778" calcext:value-type="float">
            <text:p>0,00104027777777778000</text:p>
          </table:table-cell>
          <table:table-cell table:formula="of:=[.D323]-[.D32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28" office:value-type="float" office:value="9016" calcext:value-type="float">
            <text:p>901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04351851851852" calcext:value-type="float">
            <text:p>0,00104351851851852000</text:p>
          </table:table-cell>
          <table:table-cell table:formula="of:=[.D324]-[.D32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28" office:value-type="float" office:value="9044" calcext:value-type="float">
            <text:p>9044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04675925925926" calcext:value-type="float">
            <text:p>0,00104675925925926000</text:p>
          </table:table-cell>
          <table:table-cell table:formula="of:=[.D325]-[.D32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28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05" calcext:value-type="float">
            <text:p>0,00105000000000000000</text:p>
          </table:table-cell>
          <table:table-cell table:formula="of:=[.D326]-[.D32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28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05324074074074" calcext:value-type="float">
            <text:p>0,00105324074074074000</text:p>
          </table:table-cell>
          <table:table-cell table:formula="of:=[.D327]-[.D32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28" office:value-type="float" office:value="9128" calcext:value-type="float">
            <text:p>912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05648148148148" calcext:value-type="float">
            <text:p>0,00105648148148148000</text:p>
          </table:table-cell>
          <table:table-cell table:formula="of:=[.D328]-[.D327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28" office:value-type="float" office:value="9156" calcext:value-type="float">
            <text:p>9156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05972222222222" calcext:value-type="float">
            <text:p>0,00105972222222222000</text:p>
          </table:table-cell>
          <table:table-cell table:formula="of:=[.D329]-[.D32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28" office:value-type="float" office:value="9184" calcext:value-type="float">
            <text:p>918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06296296296296" calcext:value-type="float">
            <text:p>0,00106296296296296000</text:p>
          </table:table-cell>
          <table:table-cell table:formula="of:=[.D330]-[.D32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28" office:value-type="float" office:value="9212" calcext:value-type="float">
            <text:p>9212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0662037037037" calcext:value-type="float">
            <text:p>0,00106620370370370000</text:p>
          </table:table-cell>
          <table:table-cell table:formula="of:=[.D331]-[.D33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28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06944444444444" calcext:value-type="float">
            <text:p>0,00106944444444444000</text:p>
          </table:table-cell>
          <table:table-cell table:formula="of:=[.D332]-[.D33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28" office:value-type="float" office:value="9268" calcext:value-type="float">
            <text:p>9268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07268518518519" calcext:value-type="float">
            <text:p>0,00107268518518519000</text:p>
          </table:table-cell>
          <table:table-cell table:formula="of:=[.D333]-[.D33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28" office:value-type="float" office:value="9296" calcext:value-type="float">
            <text:p>929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07592592592593" calcext:value-type="float">
            <text:p>0,00107592592592593000</text:p>
          </table:table-cell>
          <table:table-cell table:formula="of:=[.D334]-[.D33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28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07916666666667" calcext:value-type="float">
            <text:p>0,00107916666666667000</text:p>
          </table:table-cell>
          <table:table-cell table:formula="of:=[.D335]-[.D33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28" office:value-type="float" office:value="9352" calcext:value-type="float">
            <text:p>935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08240740740741" calcext:value-type="float">
            <text:p>0,00108240740740741000</text:p>
          </table:table-cell>
          <table:table-cell table:formula="of:=[.D336]-[.D33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28" office:value-type="float" office:value="9380" calcext:value-type="float">
            <text:p>938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08564814814815" calcext:value-type="float">
            <text:p>0,00108564814814815000</text:p>
          </table:table-cell>
          <table:table-cell table:formula="of:=[.D337]-[.D33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28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08888888888889" calcext:value-type="float">
            <text:p>0,00108888888888889000</text:p>
          </table:table-cell>
          <table:table-cell table:formula="of:=[.D338]-[.D33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28" office:value-type="float" office:value="9436" calcext:value-type="float">
            <text:p>9436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09212962962963" calcext:value-type="float">
            <text:p>0,00109212962962963000</text:p>
          </table:table-cell>
          <table:table-cell table:formula="of:=[.D339]-[.D338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28" office:value-type="float" office:value="9464" calcext:value-type="float">
            <text:p>946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09537037037037" calcext:value-type="float">
            <text:p>0,00109537037037037000</text:p>
          </table:table-cell>
          <table:table-cell table:formula="of:=[.D340]-[.D33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28" office:value-type="float" office:value="9492" calcext:value-type="float">
            <text:p>9492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09861111111111" calcext:value-type="float">
            <text:p>0,00109861111111111000</text:p>
          </table:table-cell>
          <table:table-cell table:formula="of:=[.D341]-[.D34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28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10185185185185" calcext:value-type="float">
            <text:p>0,00110185185185185000</text:p>
          </table:table-cell>
          <table:table-cell table:formula="of:=[.D342]-[.D34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28" office:value-type="float" office:value="9548" calcext:value-type="float">
            <text:p>9548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10509259259259" calcext:value-type="float">
            <text:p>0,00110509259259259000</text:p>
          </table:table-cell>
          <table:table-cell table:formula="of:=[.D343]-[.D34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28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10833333333333" calcext:value-type="float">
            <text:p>0,00110833333333333000</text:p>
          </table:table-cell>
          <table:table-cell table:formula="of:=[.D344]-[.D34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28" office:value-type="float" office:value="9604" calcext:value-type="float">
            <text:p>9604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11157407407407" calcext:value-type="float">
            <text:p>0,00111157407407407000</text:p>
          </table:table-cell>
          <table:table-cell table:formula="of:=[.D345]-[.D34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28" office:value-type="float" office:value="9632" calcext:value-type="float">
            <text:p>963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11481481481481" calcext:value-type="float">
            <text:p>0,00111481481481481000</text:p>
          </table:table-cell>
          <table:table-cell table:formula="of:=[.D346]-[.D34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28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11805555555556" calcext:value-type="float">
            <text:p>0,00111805555555556000</text:p>
          </table:table-cell>
          <table:table-cell table:formula="of:=[.D347]-[.D34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28" office:value-type="float" office:value="9688" calcext:value-type="float">
            <text:p>968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1212962962963" calcext:value-type="float">
            <text:p>0,00112129629629630000</text:p>
          </table:table-cell>
          <table:table-cell table:formula="of:=[.D348]-[.D34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28" office:value-type="float" office:value="9716" calcext:value-type="float">
            <text:p>9716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12453703703704" calcext:value-type="float">
            <text:p>0,00112453703703704000</text:p>
          </table:table-cell>
          <table:table-cell table:formula="of:=[.D349]-[.D34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28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12777777777778" calcext:value-type="float">
            <text:p>0,00112777777777778000</text:p>
          </table:table-cell>
          <table:table-cell table:formula="of:=[.D350]-[.D349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28" office:value-type="float" office:value="9772" calcext:value-type="float">
            <text:p>9772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13101851851852" calcext:value-type="float">
            <text:p>0,00113101851851852000</text:p>
          </table:table-cell>
          <table:table-cell table:formula="of:=[.D351]-[.D35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28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13425925925926" calcext:value-type="float">
            <text:p>0,00113425925925926000</text:p>
          </table:table-cell>
          <table:table-cell table:formula="of:=[.D352]-[.D35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28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1375" calcext:value-type="float">
            <text:p>0,00113750000000000000</text:p>
          </table:table-cell>
          <table:table-cell table:formula="of:=[.D353]-[.D35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28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14074074074074" calcext:value-type="float">
            <text:p>0,00114074074074074000</text:p>
          </table:table-cell>
          <table:table-cell table:formula="of:=[.D354]-[.D35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28" office:value-type="float" office:value="9884" calcext:value-type="float">
            <text:p>9884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14398148148148" calcext:value-type="float">
            <text:p>0,00114398148148148000</text:p>
          </table:table-cell>
          <table:table-cell table:formula="of:=[.D355]-[.D35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28" office:value-type="float" office:value="9912" calcext:value-type="float">
            <text:p>991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14722222222222" calcext:value-type="float">
            <text:p>0,00114722222222222000</text:p>
          </table:table-cell>
          <table:table-cell table:formula="of:=[.D356]-[.D35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28" office:value-type="float" office:value="9940" calcext:value-type="float">
            <text:p>994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15046296296296" calcext:value-type="float">
            <text:p>0,00115046296296296000</text:p>
          </table:table-cell>
          <table:table-cell table:formula="of:=[.D357]-[.D35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28" office:value-type="float" office:value="9968" calcext:value-type="float">
            <text:p>996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1537037037037" calcext:value-type="float">
            <text:p>0,00115370370370370000</text:p>
          </table:table-cell>
          <table:table-cell table:formula="of:=[.D358]-[.D35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28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15694444444444" calcext:value-type="float">
            <text:p>0,00115694444444444000</text:p>
          </table:table-cell>
          <table:table-cell table:formula="of:=[.D359]-[.D35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28" office:value-type="float" office:value="10024" calcext:value-type="float">
            <text:p>1002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16018518518519" calcext:value-type="float">
            <text:p>0,00116018518518519000</text:p>
          </table:table-cell>
          <table:table-cell table:formula="of:=[.D360]-[.D35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28" office:value-type="float" office:value="10052" calcext:value-type="float">
            <text:p>10052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16342592592593" calcext:value-type="float">
            <text:p>0,00116342592592593000</text:p>
          </table:table-cell>
          <table:table-cell table:formula="of:=[.D361]-[.D360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28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16666666666667" calcext:value-type="float">
            <text:p>0,00116666666666667000</text:p>
          </table:table-cell>
          <table:table-cell table:formula="of:=[.D362]-[.D36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28" office:value-type="float" office:value="10108" calcext:value-type="float">
            <text:p>10108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16990740740741" calcext:value-type="float">
            <text:p>0,00116990740740741000</text:p>
          </table:table-cell>
          <table:table-cell table:formula="of:=[.D363]-[.D36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28" office:value-type="float" office:value="10136" calcext:value-type="float">
            <text:p>1013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17314814814815" calcext:value-type="float">
            <text:p>0,00117314814814815000</text:p>
          </table:table-cell>
          <table:table-cell table:formula="of:=[.D364]-[.D36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28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17638888888889" calcext:value-type="float">
            <text:p>0,00117638888888889000</text:p>
          </table:table-cell>
          <table:table-cell table:formula="of:=[.D365]-[.D36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28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17962962962963" calcext:value-type="float">
            <text:p>0,00117962962962963000</text:p>
          </table:table-cell>
          <table:table-cell table:formula="of:=[.D366]-[.D36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28" office:value-type="float" office:value="10220" calcext:value-type="float">
            <text:p>1022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18287037037037" calcext:value-type="float">
            <text:p>0,00118287037037037000</text:p>
          </table:table-cell>
          <table:table-cell table:formula="of:=[.D367]-[.D36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28" office:value-type="float" office:value="10248" calcext:value-type="float">
            <text:p>1024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18611111111111" calcext:value-type="float">
            <text:p>0,00118611111111111000</text:p>
          </table:table-cell>
          <table:table-cell table:formula="of:=[.D368]-[.D36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28" office:value-type="float" office:value="10276" calcext:value-type="float">
            <text:p>10276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18935185185185" calcext:value-type="float">
            <text:p>0,00118935185185185000</text:p>
          </table:table-cell>
          <table:table-cell table:formula="of:=[.D369]-[.D36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28" office:value-type="float" office:value="10304" calcext:value-type="float">
            <text:p>1030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19259259259259" calcext:value-type="float">
            <text:p>0,00119259259259259000</text:p>
          </table:table-cell>
          <table:table-cell table:formula="of:=[.D370]-[.D36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28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19583333333333" calcext:value-type="float">
            <text:p>0,00119583333333333000</text:p>
          </table:table-cell>
          <table:table-cell table:formula="of:=[.D371]-[.D37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28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19907407407407" calcext:value-type="float">
            <text:p>0,00119907407407407000</text:p>
          </table:table-cell>
          <table:table-cell table:formula="of:=[.D372]-[.D371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28" office:value-type="float" office:value="10388" calcext:value-type="float">
            <text:p>10388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20231481481482" calcext:value-type="float">
            <text:p>0,00120231481481482000</text:p>
          </table:table-cell>
          <table:table-cell table:formula="of:=[.D373]-[.D37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28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20555555555556" calcext:value-type="float">
            <text:p>0,00120555555555556000</text:p>
          </table:table-cell>
          <table:table-cell table:formula="of:=[.D374]-[.D37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28" office:value-type="float" office:value="10444" calcext:value-type="float">
            <text:p>10444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2087962962963" calcext:value-type="float">
            <text:p>0,00120879629629630000</text:p>
          </table:table-cell>
          <table:table-cell table:formula="of:=[.D375]-[.D37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28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21203703703704" calcext:value-type="float">
            <text:p>0,00121203703703704000</text:p>
          </table:table-cell>
          <table:table-cell table:formula="of:=[.D376]-[.D37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28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21527777777778" calcext:value-type="float">
            <text:p>0,00121527777777778000</text:p>
          </table:table-cell>
          <table:table-cell table:formula="of:=[.D377]-[.D37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28" office:value-type="float" office:value="10528" calcext:value-type="float">
            <text:p>1052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21851851851852" calcext:value-type="float">
            <text:p>0,00121851851851852000</text:p>
          </table:table-cell>
          <table:table-cell table:formula="of:=[.D378]-[.D37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28" office:value-type="float" office:value="10556" calcext:value-type="float">
            <text:p>10556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22175925925926" calcext:value-type="float">
            <text:p>0,00122175925925926000</text:p>
          </table:table-cell>
          <table:table-cell table:formula="of:=[.D379]-[.D37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28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225" calcext:value-type="float">
            <text:p>0,00122500000000000000</text:p>
          </table:table-cell>
          <table:table-cell table:formula="of:=[.D380]-[.D37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28" office:value-type="float" office:value="10612" calcext:value-type="float">
            <text:p>10612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22824074074074" calcext:value-type="float">
            <text:p>0,00122824074074074000</text:p>
          </table:table-cell>
          <table:table-cell table:formula="of:=[.D381]-[.D38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28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23148148148148" calcext:value-type="float">
            <text:p>0,00123148148148148000</text:p>
          </table:table-cell>
          <table:table-cell table:formula="of:=[.D382]-[.D38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28" office:value-type="float" office:value="10668" calcext:value-type="float">
            <text:p>10668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23472222222222" calcext:value-type="float">
            <text:p>0,00123472222222222000</text:p>
          </table:table-cell>
          <table:table-cell table:formula="of:=[.D383]-[.D382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28" office:value-type="float" office:value="10696" calcext:value-type="float">
            <text:p>10696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23796296296296" calcext:value-type="float">
            <text:p>0,00123796296296296000</text:p>
          </table:table-cell>
          <table:table-cell table:formula="of:=[.D384]-[.D38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28" office:value-type="float" office:value="10724" calcext:value-type="float">
            <text:p>10724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2412037037037" calcext:value-type="float">
            <text:p>0,00124120370370370000</text:p>
          </table:table-cell>
          <table:table-cell table:formula="of:=[.D385]-[.D38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28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24444444444444" calcext:value-type="float">
            <text:p>0,00124444444444444000</text:p>
          </table:table-cell>
          <table:table-cell table:formula="of:=[.D386]-[.D38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28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24768518518519" calcext:value-type="float">
            <text:p>0,00124768518518519000</text:p>
          </table:table-cell>
          <table:table-cell table:formula="of:=[.D387]-[.D38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28" office:value-type="float" office:value="10808" calcext:value-type="float">
            <text:p>10808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25092592592593" calcext:value-type="float">
            <text:p>0,00125092592592593000</text:p>
          </table:table-cell>
          <table:table-cell table:formula="of:=[.D388]-[.D38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28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25416666666667" calcext:value-type="float">
            <text:p>0,00125416666666667000</text:p>
          </table:table-cell>
          <table:table-cell table:formula="of:=[.D389]-[.D38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28" office:value-type="float" office:value="10864" calcext:value-type="float">
            <text:p>10864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25740740740741" calcext:value-type="float">
            <text:p>0,00125740740740741000</text:p>
          </table:table-cell>
          <table:table-cell table:formula="of:=[.D390]-[.D38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28" office:value-type="float" office:value="10892" calcext:value-type="float">
            <text:p>10892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26064814814815" calcext:value-type="float">
            <text:p>0,00126064814814815000</text:p>
          </table:table-cell>
          <table:table-cell table:formula="of:=[.D391]-[.D39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28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26388888888889" calcext:value-type="float">
            <text:p>0,00126388888888889000</text:p>
          </table:table-cell>
          <table:table-cell table:formula="of:=[.D392]-[.D39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28" office:value-type="float" office:value="10948" calcext:value-type="float">
            <text:p>10948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26712962962963" calcext:value-type="float">
            <text:p>0,00126712962962963000</text:p>
          </table:table-cell>
          <table:table-cell table:formula="of:=[.D393]-[.D39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28" office:value-type="float" office:value="10976" calcext:value-type="float">
            <text:p>10976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27037037037037" calcext:value-type="float">
            <text:p>0,00127037037037037000</text:p>
          </table:table-cell>
          <table:table-cell table:formula="of:=[.D394]-[.D393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28" office:value-type="float" office:value="11004" calcext:value-type="float">
            <text:p>11004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27361111111111" calcext:value-type="float">
            <text:p>0,00127361111111111000</text:p>
          </table:table-cell>
          <table:table-cell table:formula="of:=[.D395]-[.D39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28" office:value-type="float" office:value="11032" calcext:value-type="float">
            <text:p>11032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27685185185185" calcext:value-type="float">
            <text:p>0,00127685185185185000</text:p>
          </table:table-cell>
          <table:table-cell table:formula="of:=[.D396]-[.D39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28" office:value-type="float" office:value="11060" calcext:value-type="float">
            <text:p>1106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28009259259259" calcext:value-type="float">
            <text:p>0,00128009259259259000</text:p>
          </table:table-cell>
          <table:table-cell table:formula="of:=[.D397]-[.D39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28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28333333333333" calcext:value-type="float">
            <text:p>0,00128333333333333000</text:p>
          </table:table-cell>
          <table:table-cell table:formula="of:=[.D398]-[.D39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28" office:value-type="float" office:value="11116" calcext:value-type="float">
            <text:p>11116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28657407407407" calcext:value-type="float">
            <text:p>0,00128657407407407000</text:p>
          </table:table-cell>
          <table:table-cell table:formula="of:=[.D399]-[.D39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28" office:value-type="float" office:value="11144" calcext:value-type="float">
            <text:p>11144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28981481481481" calcext:value-type="float">
            <text:p>0,00128981481481481000</text:p>
          </table:table-cell>
          <table:table-cell table:formula="of:=[.D400]-[.D39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28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29305555555556" calcext:value-type="float">
            <text:p>0,00129305555555556000</text:p>
          </table:table-cell>
          <table:table-cell table:formula="of:=[.D401]-[.D40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28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2962962962963" calcext:value-type="float">
            <text:p>0,00129629629629630000</text:p>
          </table:table-cell>
          <table:table-cell table:formula="of:=[.D402]-[.D40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28" office:value-type="float" office:value="11228" calcext:value-type="float">
            <text:p>11228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29953703703704" calcext:value-type="float">
            <text:p>0,00129953703703704000</text:p>
          </table:table-cell>
          <table:table-cell table:formula="of:=[.D403]-[.D40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28" office:value-type="float" office:value="11256" calcext:value-type="float">
            <text:p>11256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30277777777778" calcext:value-type="float">
            <text:p>0,00130277777777778000</text:p>
          </table:table-cell>
          <table:table-cell table:formula="of:=[.D404]-[.D40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28" office:value-type="float" office:value="11284" calcext:value-type="float">
            <text:p>11284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30601851851852" calcext:value-type="float">
            <text:p>0,00130601851851852000</text:p>
          </table:table-cell>
          <table:table-cell table:formula="of:=[.D405]-[.D404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28" office:value-type="float" office:value="11312" calcext:value-type="float">
            <text:p>11312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30925925925926" calcext:value-type="float">
            <text:p>0,00130925925925926000</text:p>
          </table:table-cell>
          <table:table-cell table:formula="of:=[.D406]-[.D40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28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3125" calcext:value-type="float">
            <text:p>0,00131250000000000000</text:p>
          </table:table-cell>
          <table:table-cell table:formula="of:=[.D407]-[.D40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28" office:value-type="float" office:value="11368" calcext:value-type="float">
            <text:p>11368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31574074074074" calcext:value-type="float">
            <text:p>0,00131574074074074000</text:p>
          </table:table-cell>
          <table:table-cell table:formula="of:=[.D408]-[.D40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28" office:value-type="float" office:value="11396" calcext:value-type="float">
            <text:p>11396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31898148148148" calcext:value-type="float">
            <text:p>0,00131898148148148000</text:p>
          </table:table-cell>
          <table:table-cell table:formula="of:=[.D409]-[.D40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28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32222222222222" calcext:value-type="float">
            <text:p>0,00132222222222222000</text:p>
          </table:table-cell>
          <table:table-cell table:formula="of:=[.D410]-[.D40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28" office:value-type="float" office:value="11452" calcext:value-type="float">
            <text:p>11452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32546296296296" calcext:value-type="float">
            <text:p>0,00132546296296296000</text:p>
          </table:table-cell>
          <table:table-cell table:formula="of:=[.D411]-[.D41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28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3287037037037" calcext:value-type="float">
            <text:p>0,00132870370370370000</text:p>
          </table:table-cell>
          <table:table-cell table:formula="of:=[.D412]-[.D41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28" office:value-type="float" office:value="11508" calcext:value-type="float">
            <text:p>11508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33194444444444" calcext:value-type="float">
            <text:p>0,00133194444444444000</text:p>
          </table:table-cell>
          <table:table-cell table:formula="of:=[.D413]-[.D41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28" office:value-type="float" office:value="11536" calcext:value-type="float">
            <text:p>11536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33518518518519" calcext:value-type="float">
            <text:p>0,00133518518518519000</text:p>
          </table:table-cell>
          <table:table-cell table:formula="of:=[.D414]-[.D41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28" office:value-type="float" office:value="11564" calcext:value-type="float">
            <text:p>11564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33842592592593" calcext:value-type="float">
            <text:p>0,00133842592592593000</text:p>
          </table:table-cell>
          <table:table-cell table:formula="of:=[.D415]-[.D41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28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34166666666667" calcext:value-type="float">
            <text:p>0,00134166666666667000</text:p>
          </table:table-cell>
          <table:table-cell table:formula="of:=[.D416]-[.D415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28" office:value-type="float" office:value="11620" calcext:value-type="float">
            <text:p>1162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34490740740741" calcext:value-type="float">
            <text:p>0,00134490740740741000</text:p>
          </table:table-cell>
          <table:table-cell table:formula="of:=[.D417]-[.D41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28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34814814814815" calcext:value-type="float">
            <text:p>0,00134814814814815000</text:p>
          </table:table-cell>
          <table:table-cell table:formula="of:=[.D418]-[.D41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28" office:value-type="float" office:value="11676" calcext:value-type="float">
            <text:p>11676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35138888888889" calcext:value-type="float">
            <text:p>0,00135138888888889000</text:p>
          </table:table-cell>
          <table:table-cell table:formula="of:=[.D419]-[.D41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28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35462962962963" calcext:value-type="float">
            <text:p>0,00135462962962963000</text:p>
          </table:table-cell>
          <table:table-cell table:formula="of:=[.D420]-[.D41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28" office:value-type="float" office:value="11732" calcext:value-type="float">
            <text:p>11732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35787037037037" calcext:value-type="float">
            <text:p>0,00135787037037037000</text:p>
          </table:table-cell>
          <table:table-cell table:formula="of:=[.D421]-[.D42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28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36111111111111" calcext:value-type="float">
            <text:p>0,00136111111111111000</text:p>
          </table:table-cell>
          <table:table-cell table:formula="of:=[.D422]-[.D42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28" office:value-type="float" office:value="11788" calcext:value-type="float">
            <text:p>11788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36435185185185" calcext:value-type="float">
            <text:p>0,00136435185185185000</text:p>
          </table:table-cell>
          <table:table-cell table:formula="of:=[.D423]-[.D42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28" office:value-type="float" office:value="11816" calcext:value-type="float">
            <text:p>11816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36759259259259" calcext:value-type="float">
            <text:p>0,00136759259259259000</text:p>
          </table:table-cell>
          <table:table-cell table:formula="of:=[.D424]-[.D42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28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37083333333333" calcext:value-type="float">
            <text:p>0,00137083333333333000</text:p>
          </table:table-cell>
          <table:table-cell table:formula="of:=[.D425]-[.D42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28" office:value-type="float" office:value="11872" calcext:value-type="float">
            <text:p>11872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37407407407407" calcext:value-type="float">
            <text:p>0,00137407407407407000</text:p>
          </table:table-cell>
          <table:table-cell table:formula="of:=[.D426]-[.D42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28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37731481481481" calcext:value-type="float">
            <text:p>0,00137731481481481000</text:p>
          </table:table-cell>
          <table:table-cell table:formula="of:=[.D427]-[.D426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28" office:value-type="float" office:value="11928" calcext:value-type="float">
            <text:p>11928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38055555555556" calcext:value-type="float">
            <text:p>0,00138055555555556000</text:p>
          </table:table-cell>
          <table:table-cell table:formula="of:=[.D428]-[.D42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28" office:value-type="float" office:value="11956" calcext:value-type="float">
            <text:p>11956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3837962962963" calcext:value-type="float">
            <text:p>0,00138379629629630000</text:p>
          </table:table-cell>
          <table:table-cell table:formula="of:=[.D429]-[.D42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28" office:value-type="float" office:value="11984" calcext:value-type="float">
            <text:p>11984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38703703703704" calcext:value-type="float">
            <text:p>0,00138703703703704000</text:p>
          </table:table-cell>
          <table:table-cell table:formula="of:=[.D430]-[.D42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28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39027777777778" calcext:value-type="float">
            <text:p>0,00139027777777778000</text:p>
          </table:table-cell>
          <table:table-cell table:formula="of:=[.D431]-[.D43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28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39351851851852" calcext:value-type="float">
            <text:p>0,00139351851851852000</text:p>
          </table:table-cell>
          <table:table-cell table:formula="of:=[.D432]-[.D43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28" office:value-type="float" office:value="12068" calcext:value-type="float">
            <text:p>12068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39675925925926" calcext:value-type="float">
            <text:p>0,00139675925925926000</text:p>
          </table:table-cell>
          <table:table-cell table:formula="of:=[.D433]-[.D43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28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4" calcext:value-type="float">
            <text:p>0,00140000000000000000</text:p>
          </table:table-cell>
          <table:table-cell table:formula="of:=[.D434]-[.D43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28" office:value-type="float" office:value="12124" calcext:value-type="float">
            <text:p>12124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40324074074074" calcext:value-type="float">
            <text:p>0,00140324074074074000</text:p>
          </table:table-cell>
          <table:table-cell table:formula="of:=[.D435]-[.D43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28" office:value-type="float" office:value="12152" calcext:value-type="float">
            <text:p>12152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40648148148148" calcext:value-type="float">
            <text:p>0,00140648148148148000</text:p>
          </table:table-cell>
          <table:table-cell table:formula="of:=[.D436]-[.D43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28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40972222222222" calcext:value-type="float">
            <text:p>0,00140972222222222000</text:p>
          </table:table-cell>
          <table:table-cell table:formula="of:=[.D437]-[.D43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28" office:value-type="float" office:value="12208" calcext:value-type="float">
            <text:p>12208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41296296296296" calcext:value-type="float">
            <text:p>0,00141296296296296000</text:p>
          </table:table-cell>
          <table:table-cell table:formula="of:=[.D438]-[.D437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28" office:value-type="float" office:value="12236" calcext:value-type="float">
            <text:p>12236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4162037037037" calcext:value-type="float">
            <text:p>0,00141620370370370000</text:p>
          </table:table-cell>
          <table:table-cell table:formula="of:=[.D439]-[.D43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28" office:value-type="float" office:value="12264" calcext:value-type="float">
            <text:p>12264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41944444444444" calcext:value-type="float">
            <text:p>0,00141944444444444000</text:p>
          </table:table-cell>
          <table:table-cell table:formula="of:=[.D440]-[.D43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28" office:value-type="float" office:value="12292" calcext:value-type="float">
            <text:p>12292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42268518518519" calcext:value-type="float">
            <text:p>0,00142268518518519000</text:p>
          </table:table-cell>
          <table:table-cell table:formula="of:=[.D441]-[.D44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28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42592592592593" calcext:value-type="float">
            <text:p>0,00142592592592593000</text:p>
          </table:table-cell>
          <table:table-cell table:formula="of:=[.D442]-[.D44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28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42916666666667" calcext:value-type="float">
            <text:p>0,00142916666666667000</text:p>
          </table:table-cell>
          <table:table-cell table:formula="of:=[.D443]-[.D44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28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43240740740741" calcext:value-type="float">
            <text:p>0,00143240740740741000</text:p>
          </table:table-cell>
          <table:table-cell table:formula="of:=[.D444]-[.D44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28" office:value-type="float" office:value="12404" calcext:value-type="float">
            <text:p>12404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43564814814815" calcext:value-type="float">
            <text:p>0,00143564814814815000</text:p>
          </table:table-cell>
          <table:table-cell table:formula="of:=[.D445]-[.D44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28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43888888888889" calcext:value-type="float">
            <text:p>0,00143888888888889000</text:p>
          </table:table-cell>
          <table:table-cell table:formula="of:=[.D446]-[.D44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28" office:value-type="float" office:value="12460" calcext:value-type="float">
            <text:p>1246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44212962962963" calcext:value-type="float">
            <text:p>0,00144212962962963000</text:p>
          </table:table-cell>
          <table:table-cell table:formula="of:=[.D447]-[.D44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28" office:value-type="float" office:value="12488" calcext:value-type="float">
            <text:p>12488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44537037037037" calcext:value-type="float">
            <text:p>0,00144537037037037000</text:p>
          </table:table-cell>
          <table:table-cell table:formula="of:=[.D448]-[.D44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28" office:value-type="float" office:value="12516" calcext:value-type="float">
            <text:p>12516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44861111111111" calcext:value-type="float">
            <text:p>0,00144861111111111000</text:p>
          </table:table-cell>
          <table:table-cell table:formula="of:=[.D449]-[.D448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28" office:value-type="float" office:value="12544" calcext:value-type="float">
            <text:p>12544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45185185185185" calcext:value-type="float">
            <text:p>0,00145185185185185000</text:p>
          </table:table-cell>
          <table:table-cell table:formula="of:=[.D450]-[.D44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28" office:value-type="float" office:value="12572" calcext:value-type="float">
            <text:p>12572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45509259259259" calcext:value-type="float">
            <text:p>0,00145509259259259000</text:p>
          </table:table-cell>
          <table:table-cell table:formula="of:=[.D451]-[.D45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28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45833333333333" calcext:value-type="float">
            <text:p>0,00145833333333333000</text:p>
          </table:table-cell>
          <table:table-cell table:formula="of:=[.D452]-[.D45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28" office:value-type="float" office:value="12628" calcext:value-type="float">
            <text:p>12628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46157407407407" calcext:value-type="float">
            <text:p>0,00146157407407407000</text:p>
          </table:table-cell>
          <table:table-cell table:formula="of:=[.D453]-[.D45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28" office:value-type="float" office:value="12656" calcext:value-type="float">
            <text:p>12656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46481481481481" calcext:value-type="float">
            <text:p>0,00146481481481481000</text:p>
          </table:table-cell>
          <table:table-cell table:formula="of:=[.D454]-[.D45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28" office:value-type="float" office:value="12684" calcext:value-type="float">
            <text:p>12684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46805555555556" calcext:value-type="float">
            <text:p>0,00146805555555556000</text:p>
          </table:table-cell>
          <table:table-cell table:formula="of:=[.D455]-[.D45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28" office:value-type="float" office:value="12712" calcext:value-type="float">
            <text:p>12712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4712962962963" calcext:value-type="float">
            <text:p>0,00147129629629630000</text:p>
          </table:table-cell>
          <table:table-cell table:formula="of:=[.D456]-[.D45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28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47453703703704" calcext:value-type="float">
            <text:p>0,00147453703703704000</text:p>
          </table:table-cell>
          <table:table-cell table:formula="of:=[.D457]-[.D45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28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47777777777778" calcext:value-type="float">
            <text:p>0,00147777777777778000</text:p>
          </table:table-cell>
          <table:table-cell table:formula="of:=[.D458]-[.D45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28" office:value-type="float" office:value="12796" calcext:value-type="float">
            <text:p>12796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48101851851852" calcext:value-type="float">
            <text:p>0,00148101851851852000</text:p>
          </table:table-cell>
          <table:table-cell table:formula="of:=[.D459]-[.D45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28" office:value-type="float" office:value="12824" calcext:value-type="float">
            <text:p>12824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48425925925926" calcext:value-type="float">
            <text:p>0,00148425925925926000</text:p>
          </table:table-cell>
          <table:table-cell table:formula="of:=[.D460]-[.D459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28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4875" calcext:value-type="float">
            <text:p>0,00148750000000000000</text:p>
          </table:table-cell>
          <table:table-cell table:formula="of:=[.D461]-[.D46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28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49074074074074" calcext:value-type="float">
            <text:p>0,00149074074074074000</text:p>
          </table:table-cell>
          <table:table-cell table:formula="of:=[.D462]-[.D46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28" office:value-type="float" office:value="12908" calcext:value-type="float">
            <text:p>12908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49398148148148" calcext:value-type="float">
            <text:p>0,00149398148148148000</text:p>
          </table:table-cell>
          <table:table-cell table:formula="of:=[.D463]-[.D46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28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49722222222222" calcext:value-type="float">
            <text:p>0,00149722222222222000</text:p>
          </table:table-cell>
          <table:table-cell table:formula="of:=[.D464]-[.D46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28" office:value-type="float" office:value="12964" calcext:value-type="float">
            <text:p>12964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50046296296296" calcext:value-type="float">
            <text:p>0,00150046296296296000</text:p>
          </table:table-cell>
          <table:table-cell table:formula="of:=[.D465]-[.D46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28" office:value-type="float" office:value="12992" calcext:value-type="float">
            <text:p>12992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5037037037037" calcext:value-type="float">
            <text:p>0,00150370370370370000</text:p>
          </table:table-cell>
          <table:table-cell table:formula="of:=[.D466]-[.D46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28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50694444444444" calcext:value-type="float">
            <text:p>0,00150694444444444000</text:p>
          </table:table-cell>
          <table:table-cell table:formula="of:=[.D467]-[.D46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28" office:value-type="float" office:value="13048" calcext:value-type="float">
            <text:p>13048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51018518518519" calcext:value-type="float">
            <text:p>0,00151018518518519000</text:p>
          </table:table-cell>
          <table:table-cell table:formula="of:=[.D468]-[.D46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28" office:value-type="float" office:value="13076" calcext:value-type="float">
            <text:p>13076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51342592592593" calcext:value-type="float">
            <text:p>0,00151342592592593000</text:p>
          </table:table-cell>
          <table:table-cell table:formula="of:=[.D469]-[.D46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28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51666666666667" calcext:value-type="float">
            <text:p>0,00151666666666667000</text:p>
          </table:table-cell>
          <table:table-cell table:formula="of:=[.D470]-[.D46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28" office:value-type="float" office:value="13132" calcext:value-type="float">
            <text:p>13132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51990740740741" calcext:value-type="float">
            <text:p>0,00151990740740741000</text:p>
          </table:table-cell>
          <table:table-cell table:formula="of:=[.D471]-[.D470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28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52314814814815" calcext:value-type="float">
            <text:p>0,00152314814814815000</text:p>
          </table:table-cell>
          <table:table-cell table:formula="of:=[.D472]-[.D47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28" office:value-type="float" office:value="13188" calcext:value-type="float">
            <text:p>13188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52638888888889" calcext:value-type="float">
            <text:p>0,00152638888888889000</text:p>
          </table:table-cell>
          <table:table-cell table:formula="of:=[.D473]-[.D47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28" office:value-type="float" office:value="13216" calcext:value-type="float">
            <text:p>13216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52962962962963" calcext:value-type="float">
            <text:p>0,00152962962962963000</text:p>
          </table:table-cell>
          <table:table-cell table:formula="of:=[.D474]-[.D47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28" office:value-type="float" office:value="13244" calcext:value-type="float">
            <text:p>13244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53287037037037" calcext:value-type="float">
            <text:p>0,00153287037037037000</text:p>
          </table:table-cell>
          <table:table-cell table:formula="of:=[.D475]-[.D47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28" office:value-type="float" office:value="13272" calcext:value-type="float">
            <text:p>13272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53611111111111" calcext:value-type="float">
            <text:p>0,00153611111111111000</text:p>
          </table:table-cell>
          <table:table-cell table:formula="of:=[.D476]-[.D47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28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53935185185185" calcext:value-type="float">
            <text:p>0,00153935185185185000</text:p>
          </table:table-cell>
          <table:table-cell table:formula="of:=[.D477]-[.D47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28" office:value-type="float" office:value="13328" calcext:value-type="float">
            <text:p>13328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54259259259259" calcext:value-type="float">
            <text:p>0,00154259259259259000</text:p>
          </table:table-cell>
          <table:table-cell table:formula="of:=[.D478]-[.D47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28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54583333333333" calcext:value-type="float">
            <text:p>0,00154583333333333000</text:p>
          </table:table-cell>
          <table:table-cell table:formula="of:=[.D479]-[.D47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28" office:value-type="float" office:value="13384" calcext:value-type="float">
            <text:p>13384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54907407407407" calcext:value-type="float">
            <text:p>0,00154907407407407000</text:p>
          </table:table-cell>
          <table:table-cell table:formula="of:=[.D480]-[.D47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28" office:value-type="float" office:value="13412" calcext:value-type="float">
            <text:p>13412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55231481481481" calcext:value-type="float">
            <text:p>0,00155231481481481000</text:p>
          </table:table-cell>
          <table:table-cell table:formula="of:=[.D481]-[.D48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28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55555555555556" calcext:value-type="float">
            <text:p>0,00155555555555556000</text:p>
          </table:table-cell>
          <table:table-cell table:formula="of:=[.D482]-[.D48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28" office:value-type="float" office:value="13468" calcext:value-type="float">
            <text:p>13468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5587962962963" calcext:value-type="float">
            <text:p>0,00155879629629630000</text:p>
          </table:table-cell>
          <table:table-cell table:formula="of:=[.D483]-[.D482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28" office:value-type="float" office:value="13496" calcext:value-type="float">
            <text:p>13496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56203703703704" calcext:value-type="float">
            <text:p>0,00156203703703704000</text:p>
          </table:table-cell>
          <table:table-cell table:formula="of:=[.D484]-[.D48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28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56527777777778" calcext:value-type="float">
            <text:p>0,00156527777777778000</text:p>
          </table:table-cell>
          <table:table-cell table:formula="of:=[.D485]-[.D48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28" office:value-type="float" office:value="13552" calcext:value-type="float">
            <text:p>13552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56851851851852" calcext:value-type="float">
            <text:p>0,00156851851851852000</text:p>
          </table:table-cell>
          <table:table-cell table:formula="of:=[.D486]-[.D48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28" office:value-type="float" office:value="13580" calcext:value-type="float">
            <text:p>1358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57175925925926" calcext:value-type="float">
            <text:p>0,00157175925925926000</text:p>
          </table:table-cell>
          <table:table-cell table:formula="of:=[.D487]-[.D48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28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575" calcext:value-type="float">
            <text:p>0,00157500000000000000</text:p>
          </table:table-cell>
          <table:table-cell table:formula="of:=[.D488]-[.D48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28" office:value-type="float" office:value="13636" calcext:value-type="float">
            <text:p>13636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57824074074074" calcext:value-type="float">
            <text:p>0,00157824074074074000</text:p>
          </table:table-cell>
          <table:table-cell table:formula="of:=[.D489]-[.D48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28" office:value-type="float" office:value="13664" calcext:value-type="float">
            <text:p>13664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58148148148148" calcext:value-type="float">
            <text:p>0,00158148148148148000</text:p>
          </table:table-cell>
          <table:table-cell table:formula="of:=[.D490]-[.D48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28" office:value-type="float" office:value="13692" calcext:value-type="float">
            <text:p>13692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58472222222222" calcext:value-type="float">
            <text:p>0,00158472222222222000</text:p>
          </table:table-cell>
          <table:table-cell table:formula="of:=[.D491]-[.D49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28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58796296296296" calcext:value-type="float">
            <text:p>0,00158796296296296000</text:p>
          </table:table-cell>
          <table:table-cell table:formula="of:=[.D492]-[.D49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28" office:value-type="float" office:value="13748" calcext:value-type="float">
            <text:p>13748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5912037037037" calcext:value-type="float">
            <text:p>0,00159120370370370000</text:p>
          </table:table-cell>
          <table:table-cell table:formula="of:=[.D493]-[.D49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28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59444444444444" calcext:value-type="float">
            <text:p>0,00159444444444444000</text:p>
          </table:table-cell>
          <table:table-cell table:formula="of:=[.D494]-[.D493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28" office:value-type="float" office:value="13804" calcext:value-type="float">
            <text:p>13804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59768518518519" calcext:value-type="float">
            <text:p>0,00159768518518519000</text:p>
          </table:table-cell>
          <table:table-cell table:formula="of:=[.D495]-[.D49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28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60092592592593" calcext:value-type="float">
            <text:p>0,00160092592592593000</text:p>
          </table:table-cell>
          <table:table-cell table:formula="of:=[.D496]-[.D49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28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60416666666667" calcext:value-type="float">
            <text:p>0,00160416666666667000</text:p>
          </table:table-cell>
          <table:table-cell table:formula="of:=[.D497]-[.D49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28" office:value-type="float" office:value="13888" calcext:value-type="float">
            <text:p>13888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60740740740741" calcext:value-type="float">
            <text:p>0,00160740740740741000</text:p>
          </table:table-cell>
          <table:table-cell table:formula="of:=[.D498]-[.D49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28" office:value-type="float" office:value="13916" calcext:value-type="float">
            <text:p>13916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61064814814815" calcext:value-type="float">
            <text:p>0,00161064814814815000</text:p>
          </table:table-cell>
          <table:table-cell table:formula="of:=[.D499]-[.D49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28" office:value-type="float" office:value="13944" calcext:value-type="float">
            <text:p>13944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61388888888889" calcext:value-type="float">
            <text:p>0,00161388888888889000</text:p>
          </table:table-cell>
          <table:table-cell table:formula="of:=[.D500]-[.D49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28" office:value-type="float" office:value="13972" calcext:value-type="float">
            <text:p>13972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61712962962963" calcext:value-type="float">
            <text:p>0,00161712962962963000</text:p>
          </table:table-cell>
          <table:table-cell table:formula="of:=[.D501]-[.D50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28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62037037037037" calcext:value-type="float">
            <text:p>0,00162037037037037000</text:p>
          </table:table-cell>
          <table:table-cell table:formula="of:=[.D502]-[.D50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28" office:value-type="float" office:value="14028" calcext:value-type="float">
            <text:p>14028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62361111111111" calcext:value-type="float">
            <text:p>0,00162361111111111000</text:p>
          </table:table-cell>
          <table:table-cell table:formula="of:=[.D503]-[.D50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28" office:value-type="float" office:value="14056" calcext:value-type="float">
            <text:p>14056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62685185185185" calcext:value-type="float">
            <text:p>0,00162685185185185000</text:p>
          </table:table-cell>
          <table:table-cell table:formula="of:=[.D504]-[.D50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28" office:value-type="float" office:value="14084" calcext:value-type="float">
            <text:p>14084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63009259259259" calcext:value-type="float">
            <text:p>0,00163009259259259000</text:p>
          </table:table-cell>
          <table:table-cell table:formula="of:=[.D505]-[.D504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28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63333333333333" calcext:value-type="float">
            <text:p>0,00163333333333333000</text:p>
          </table:table-cell>
          <table:table-cell table:formula="of:=[.D506]-[.D50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28" office:value-type="float" office:value="14140" calcext:value-type="float">
            <text:p>1414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63657407407407" calcext:value-type="float">
            <text:p>0,00163657407407407000</text:p>
          </table:table-cell>
          <table:table-cell table:formula="of:=[.D507]-[.D50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28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63981481481481" calcext:value-type="float">
            <text:p>0,00163981481481481000</text:p>
          </table:table-cell>
          <table:table-cell table:formula="of:=[.D508]-[.D50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28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64305555555556" calcext:value-type="float">
            <text:p>0,00164305555555556000</text:p>
          </table:table-cell>
          <table:table-cell table:formula="of:=[.D509]-[.D50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28" office:value-type="float" office:value="14224" calcext:value-type="float">
            <text:p>14224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6462962962963" calcext:value-type="float">
            <text:p>0,00164629629629630000</text:p>
          </table:table-cell>
          <table:table-cell table:formula="of:=[.D510]-[.D50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28" office:value-type="float" office:value="14252" calcext:value-type="float">
            <text:p>14252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64953703703704" calcext:value-type="float">
            <text:p>0,00164953703703704000</text:p>
          </table:table-cell>
          <table:table-cell table:formula="of:=[.D511]-[.D51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28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65277777777778" calcext:value-type="float">
            <text:p>0,00165277777777778000</text:p>
          </table:table-cell>
          <table:table-cell table:formula="of:=[.D512]-[.D51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28" office:value-type="float" office:value="14308" calcext:value-type="float">
            <text:p>14308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65601851851852" calcext:value-type="float">
            <text:p>0,00165601851851852000</text:p>
          </table:table-cell>
          <table:table-cell table:formula="of:=[.D513]-[.D51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28" office:value-type="float" office:value="14336" calcext:value-type="float">
            <text:p>14336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65925925925926" calcext:value-type="float">
            <text:p>0,00165925925925926000</text:p>
          </table:table-cell>
          <table:table-cell table:formula="of:=[.D514]-[.D51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28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6625" calcext:value-type="float">
            <text:p>0,00166250000000000000</text:p>
          </table:table-cell>
          <table:table-cell table:formula="of:=[.D515]-[.D51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28" office:value-type="float" office:value="14392" calcext:value-type="float">
            <text:p>14392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66574074074074" calcext:value-type="float">
            <text:p>0,00166574074074074000</text:p>
          </table:table-cell>
          <table:table-cell table:formula="of:=[.D516]-[.D515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28" office:value-type="float" office:value="14420" calcext:value-type="float">
            <text:p>1442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66898148148148" calcext:value-type="float">
            <text:p>0,00166898148148148000</text:p>
          </table:table-cell>
          <table:table-cell table:formula="of:=[.D517]-[.D51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28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67222222222222" calcext:value-type="float">
            <text:p>0,00167222222222222000</text:p>
          </table:table-cell>
          <table:table-cell table:formula="of:=[.D518]-[.D51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28" office:value-type="float" office:value="14476" calcext:value-type="float">
            <text:p>14476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67546296296296" calcext:value-type="float">
            <text:p>0,00167546296296296000</text:p>
          </table:table-cell>
          <table:table-cell table:formula="of:=[.D519]-[.D51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28" office:value-type="float" office:value="14504" calcext:value-type="float">
            <text:p>14504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6787037037037" calcext:value-type="float">
            <text:p>0,00167870370370370000</text:p>
          </table:table-cell>
          <table:table-cell table:formula="of:=[.D520]-[.D51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28" office:value-type="float" office:value="14532" calcext:value-type="float">
            <text:p>14532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68194444444444" calcext:value-type="float">
            <text:p>0,00168194444444444000</text:p>
          </table:table-cell>
          <table:table-cell table:formula="of:=[.D521]-[.D52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28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68518518518519" calcext:value-type="float">
            <text:p>0,00168518518518519000</text:p>
          </table:table-cell>
          <table:table-cell table:formula="of:=[.D522]-[.D52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28" office:value-type="float" office:value="14588" calcext:value-type="float">
            <text:p>14588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68842592592593" calcext:value-type="float">
            <text:p>0,00168842592592593000</text:p>
          </table:table-cell>
          <table:table-cell table:formula="of:=[.D523]-[.D52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28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69166666666667" calcext:value-type="float">
            <text:p>0,00169166666666667000</text:p>
          </table:table-cell>
          <table:table-cell table:formula="of:=[.D524]-[.D52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28" office:value-type="float" office:value="14644" calcext:value-type="float">
            <text:p>14644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69490740740741" calcext:value-type="float">
            <text:p>0,00169490740740741000</text:p>
          </table:table-cell>
          <table:table-cell table:formula="of:=[.D525]-[.D52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28" office:value-type="float" office:value="14672" calcext:value-type="float">
            <text:p>14672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69814814814815" calcext:value-type="float">
            <text:p>0,00169814814814815000</text:p>
          </table:table-cell>
          <table:table-cell table:formula="of:=[.D526]-[.D52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28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70138888888889" calcext:value-type="float">
            <text:p>0,00170138888888889000</text:p>
          </table:table-cell>
          <table:table-cell table:formula="of:=[.D527]-[.D526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28" office:value-type="float" office:value="14728" calcext:value-type="float">
            <text:p>14728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70462962962963" calcext:value-type="float">
            <text:p>0,00170462962962963000</text:p>
          </table:table-cell>
          <table:table-cell table:formula="of:=[.D528]-[.D52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28" office:value-type="float" office:value="14756" calcext:value-type="float">
            <text:p>14756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70787037037037" calcext:value-type="float">
            <text:p>0,00170787037037037000</text:p>
          </table:table-cell>
          <table:table-cell table:formula="of:=[.D529]-[.D52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28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71111111111111" calcext:value-type="float">
            <text:p>0,00171111111111111000</text:p>
          </table:table-cell>
          <table:table-cell table:formula="of:=[.D530]-[.D52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28" office:value-type="float" office:value="14812" calcext:value-type="float">
            <text:p>14812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71435185185185" calcext:value-type="float">
            <text:p>0,00171435185185185000</text:p>
          </table:table-cell>
          <table:table-cell table:formula="of:=[.D531]-[.D53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28" office:value-type="float" office:value="14840" calcext:value-type="float">
            <text:p>1484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71759259259259" calcext:value-type="float">
            <text:p>0,00171759259259259000</text:p>
          </table:table-cell>
          <table:table-cell table:formula="of:=[.D532]-[.D53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28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72083333333333" calcext:value-type="float">
            <text:p>0,00172083333333333000</text:p>
          </table:table-cell>
          <table:table-cell table:formula="of:=[.D533]-[.D53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28" office:value-type="float" office:value="14896" calcext:value-type="float">
            <text:p>14896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72407407407407" calcext:value-type="float">
            <text:p>0,00172407407407407000</text:p>
          </table:table-cell>
          <table:table-cell table:formula="of:=[.D534]-[.D53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28" office:value-type="float" office:value="14924" calcext:value-type="float">
            <text:p>14924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72731481481481" calcext:value-type="float">
            <text:p>0,00172731481481481000</text:p>
          </table:table-cell>
          <table:table-cell table:formula="of:=[.D535]-[.D53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28" office:value-type="float" office:value="14952" calcext:value-type="float">
            <text:p>14952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73055555555556" calcext:value-type="float">
            <text:p>0,00173055555555556000</text:p>
          </table:table-cell>
          <table:table-cell table:formula="of:=[.D536]-[.D53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28" office:value-type="float" office:value="14980" calcext:value-type="float">
            <text:p>1498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7337962962963" calcext:value-type="float">
            <text:p>0,00173379629629630000</text:p>
          </table:table-cell>
          <table:table-cell table:formula="of:=[.D537]-[.D53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28" office:value-type="float" office:value="15008" calcext:value-type="float">
            <text:p>15008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73703703703704" calcext:value-type="float">
            <text:p>0,00173703703703704000</text:p>
          </table:table-cell>
          <table:table-cell table:formula="of:=[.D538]-[.D537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28" office:value-type="float" office:value="15036" calcext:value-type="float">
            <text:p>15036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74027777777778" calcext:value-type="float">
            <text:p>0,00174027777777778000</text:p>
          </table:table-cell>
          <table:table-cell table:formula="of:=[.D539]-[.D53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28" office:value-type="float" office:value="15064" calcext:value-type="float">
            <text:p>15064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74351851851852" calcext:value-type="float">
            <text:p>0,00174351851851852000</text:p>
          </table:table-cell>
          <table:table-cell table:formula="of:=[.D540]-[.D53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28" office:value-type="float" office:value="15092" calcext:value-type="float">
            <text:p>15092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74675925925926" calcext:value-type="float">
            <text:p>0,00174675925925926000</text:p>
          </table:table-cell>
          <table:table-cell table:formula="of:=[.D541]-[.D54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28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75" calcext:value-type="float">
            <text:p>0,00175000000000000000</text:p>
          </table:table-cell>
          <table:table-cell table:formula="of:=[.D542]-[.D54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28" office:value-type="float" office:value="15148" calcext:value-type="float">
            <text:p>15148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75324074074074" calcext:value-type="float">
            <text:p>0,00175324074074074000</text:p>
          </table:table-cell>
          <table:table-cell table:formula="of:=[.D543]-[.D54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28" office:value-type="float" office:value="15176" calcext:value-type="float">
            <text:p>15176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75648148148148" calcext:value-type="float">
            <text:p>0,00175648148148148000</text:p>
          </table:table-cell>
          <table:table-cell table:formula="of:=[.D544]-[.D54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28" office:value-type="float" office:value="15204" calcext:value-type="float">
            <text:p>15204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75972222222222" calcext:value-type="float">
            <text:p>0,00175972222222222000</text:p>
          </table:table-cell>
          <table:table-cell table:formula="of:=[.D545]-[.D54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28" office:value-type="float" office:value="15232" calcext:value-type="float">
            <text:p>15232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76296296296296" calcext:value-type="float">
            <text:p>0,00176296296296296000</text:p>
          </table:table-cell>
          <table:table-cell table:formula="of:=[.D546]-[.D54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28" office:value-type="float" office:value="15260" calcext:value-type="float">
            <text:p>1526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7662037037037" calcext:value-type="float">
            <text:p>0,00176620370370370000</text:p>
          </table:table-cell>
          <table:table-cell table:formula="of:=[.D547]-[.D54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28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76944444444444" calcext:value-type="float">
            <text:p>0,00176944444444444000</text:p>
          </table:table-cell>
          <table:table-cell table:formula="of:=[.D548]-[.D54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28" office:value-type="float" office:value="15316" calcext:value-type="float">
            <text:p>15316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77268518518519" calcext:value-type="float">
            <text:p>0,00177268518518518000</text:p>
          </table:table-cell>
          <table:table-cell table:formula="of:=[.D549]-[.D548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28" office:value-type="float" office:value="15344" calcext:value-type="float">
            <text:p>15344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77592592592593" calcext:value-type="float">
            <text:p>0,00177592592592593000</text:p>
          </table:table-cell>
          <table:table-cell table:formula="of:=[.D550]-[.D54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28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77916666666667" calcext:value-type="float">
            <text:p>0,00177916666666667000</text:p>
          </table:table-cell>
          <table:table-cell table:formula="of:=[.D551]-[.D55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28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78240740740741" calcext:value-type="float">
            <text:p>0,00178240740740741000</text:p>
          </table:table-cell>
          <table:table-cell table:formula="of:=[.D552]-[.D55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28" office:value-type="float" office:value="15428" calcext:value-type="float">
            <text:p>15428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78564814814815" calcext:value-type="float">
            <text:p>0,00178564814814815000</text:p>
          </table:table-cell>
          <table:table-cell table:formula="of:=[.D553]-[.D55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28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78888888888889" calcext:value-type="float">
            <text:p>0,00178888888888889000</text:p>
          </table:table-cell>
          <table:table-cell table:formula="of:=[.D554]-[.D55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28" office:value-type="float" office:value="15484" calcext:value-type="float">
            <text:p>15484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79212962962963" calcext:value-type="float">
            <text:p>0,00179212962962963000</text:p>
          </table:table-cell>
          <table:table-cell table:formula="of:=[.D555]-[.D55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28" office:value-type="float" office:value="15512" calcext:value-type="float">
            <text:p>15512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79537037037037" calcext:value-type="float">
            <text:p>0,00179537037037037000</text:p>
          </table:table-cell>
          <table:table-cell table:formula="of:=[.D556]-[.D55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28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79861111111111" calcext:value-type="float">
            <text:p>0,00179861111111111000</text:p>
          </table:table-cell>
          <table:table-cell table:formula="of:=[.D557]-[.D55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28" office:value-type="float" office:value="15568" calcext:value-type="float">
            <text:p>15568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80185185185185" calcext:value-type="float">
            <text:p>0,00180185185185185000</text:p>
          </table:table-cell>
          <table:table-cell table:formula="of:=[.D558]-[.D55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28" office:value-type="float" office:value="15596" calcext:value-type="float">
            <text:p>15596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80509259259259" calcext:value-type="float">
            <text:p>0,00180509259259259000</text:p>
          </table:table-cell>
          <table:table-cell table:formula="of:=[.D559]-[.D55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28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80833333333333" calcext:value-type="float">
            <text:p>0,00180833333333333000</text:p>
          </table:table-cell>
          <table:table-cell table:formula="of:=[.D560]-[.D559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28" office:value-type="float" office:value="15652" calcext:value-type="float">
            <text:p>15652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81157407407407" calcext:value-type="float">
            <text:p>0,00181157407407407000</text:p>
          </table:table-cell>
          <table:table-cell table:formula="of:=[.D561]-[.D56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28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81481481481482" calcext:value-type="float">
            <text:p>0,00181481481481482000</text:p>
          </table:table-cell>
          <table:table-cell table:formula="of:=[.D562]-[.D56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28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81805555555556" calcext:value-type="float">
            <text:p>0,00181805555555556000</text:p>
          </table:table-cell>
          <table:table-cell table:formula="of:=[.D563]-[.D56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28" office:value-type="float" office:value="15736" calcext:value-type="float">
            <text:p>15736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8212962962963" calcext:value-type="float">
            <text:p>0,00182129629629630000</text:p>
          </table:table-cell>
          <table:table-cell table:formula="of:=[.D564]-[.D56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28" office:value-type="float" office:value="15764" calcext:value-type="float">
            <text:p>15764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82453703703704" calcext:value-type="float">
            <text:p>0,00182453703703704000</text:p>
          </table:table-cell>
          <table:table-cell table:formula="of:=[.D565]-[.D56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28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82777777777778" calcext:value-type="float">
            <text:p>0,00182777777777778000</text:p>
          </table:table-cell>
          <table:table-cell table:formula="of:=[.D566]-[.D56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28" office:value-type="float" office:value="15820" calcext:value-type="float">
            <text:p>1582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83101851851852" calcext:value-type="float">
            <text:p>0,00183101851851852000</text:p>
          </table:table-cell>
          <table:table-cell table:formula="of:=[.D567]-[.D56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28" office:value-type="float" office:value="15848" calcext:value-type="float">
            <text:p>15848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83425925925926" calcext:value-type="float">
            <text:p>0,00183425925925926000</text:p>
          </table:table-cell>
          <table:table-cell table:formula="of:=[.D568]-[.D56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28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8375" calcext:value-type="float">
            <text:p>0,00183750000000000000</text:p>
          </table:table-cell>
          <table:table-cell table:formula="of:=[.D569]-[.D56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28" office:value-type="float" office:value="15904" calcext:value-type="float">
            <text:p>15904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84074074074074" calcext:value-type="float">
            <text:p>0,00184074074074074000</text:p>
          </table:table-cell>
          <table:table-cell table:formula="of:=[.D570]-[.D56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28" office:value-type="float" office:value="15932" calcext:value-type="float">
            <text:p>15932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84398148148148" calcext:value-type="float">
            <text:p>0,00184398148148148000</text:p>
          </table:table-cell>
          <table:table-cell table:formula="of:=[.D571]-[.D570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28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84722222222222" calcext:value-type="float">
            <text:p>0,00184722222222222000</text:p>
          </table:table-cell>
          <table:table-cell table:formula="of:=[.D572]-[.D57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28" office:value-type="float" office:value="15988" calcext:value-type="float">
            <text:p>15988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85046296296296" calcext:value-type="float">
            <text:p>0,00185046296296296000</text:p>
          </table:table-cell>
          <table:table-cell table:formula="of:=[.D573]-[.D57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28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8537037037037" calcext:value-type="float">
            <text:p>0,00185370370370370000</text:p>
          </table:table-cell>
          <table:table-cell table:formula="of:=[.D574]-[.D57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28" office:value-type="float" office:value="16044" calcext:value-type="float">
            <text:p>16044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85694444444444" calcext:value-type="float">
            <text:p>0,00185694444444444000</text:p>
          </table:table-cell>
          <table:table-cell table:formula="of:=[.D575]-[.D57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28" office:value-type="float" office:value="16072" calcext:value-type="float">
            <text:p>16072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86018518518519" calcext:value-type="float">
            <text:p>0,00186018518518519000</text:p>
          </table:table-cell>
          <table:table-cell table:formula="of:=[.D576]-[.D57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28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86342592592593" calcext:value-type="float">
            <text:p>0,00186342592592593000</text:p>
          </table:table-cell>
          <table:table-cell table:formula="of:=[.D577]-[.D57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28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86666666666667" calcext:value-type="float">
            <text:p>0,00186666666666667000</text:p>
          </table:table-cell>
          <table:table-cell table:formula="of:=[.D578]-[.D57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28" office:value-type="float" office:value="16156" calcext:value-type="float">
            <text:p>16156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86990740740741" calcext:value-type="float">
            <text:p>0,00186990740740741000</text:p>
          </table:table-cell>
          <table:table-cell table:formula="of:=[.D579]-[.D57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28" office:value-type="float" office:value="16184" calcext:value-type="float">
            <text:p>16184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87314814814815" calcext:value-type="float">
            <text:p>0,00187314814814815000</text:p>
          </table:table-cell>
          <table:table-cell table:formula="of:=[.D580]-[.D57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28" office:value-type="float" office:value="16212" calcext:value-type="float">
            <text:p>16212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87638888888889" calcext:value-type="float">
            <text:p>0,00187638888888889000</text:p>
          </table:table-cell>
          <table:table-cell table:formula="of:=[.D581]-[.D58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28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87962962962963" calcext:value-type="float">
            <text:p>0,00187962962962963000</text:p>
          </table:table-cell>
          <table:table-cell table:formula="of:=[.D582]-[.D581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28" office:value-type="float" office:value="16268" calcext:value-type="float">
            <text:p>16268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88287037037037" calcext:value-type="float">
            <text:p>0,00188287037037037000</text:p>
          </table:table-cell>
          <table:table-cell table:formula="of:=[.D583]-[.D58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28" office:value-type="float" office:value="16296" calcext:value-type="float">
            <text:p>16296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88611111111111" calcext:value-type="float">
            <text:p>0,00188611111111111000</text:p>
          </table:table-cell>
          <table:table-cell table:formula="of:=[.D584]-[.D58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28" office:value-type="float" office:value="16324" calcext:value-type="float">
            <text:p>16324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88935185185185" calcext:value-type="float">
            <text:p>0,00188935185185185000</text:p>
          </table:table-cell>
          <table:table-cell table:formula="of:=[.D585]-[.D58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28" office:value-type="float" office:value="16352" calcext:value-type="float">
            <text:p>16352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89259259259259" calcext:value-type="float">
            <text:p>0,00189259259259259000</text:p>
          </table:table-cell>
          <table:table-cell table:formula="of:=[.D586]-[.D58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28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89583333333333" calcext:value-type="float">
            <text:p>0,00189583333333333000</text:p>
          </table:table-cell>
          <table:table-cell table:formula="of:=[.D587]-[.D58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28" office:value-type="float" office:value="16408" calcext:value-type="float">
            <text:p>16408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89907407407407" calcext:value-type="float">
            <text:p>0,00189907407407407000</text:p>
          </table:table-cell>
          <table:table-cell table:formula="of:=[.D588]-[.D58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28" office:value-type="float" office:value="16436" calcext:value-type="float">
            <text:p>16436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90231481481481" calcext:value-type="float">
            <text:p>0,00190231481481481000</text:p>
          </table:table-cell>
          <table:table-cell table:formula="of:=[.D589]-[.D58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28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90555555555556" calcext:value-type="float">
            <text:p>0,00190555555555556000</text:p>
          </table:table-cell>
          <table:table-cell table:formula="of:=[.D590]-[.D58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28" office:value-type="float" office:value="16492" calcext:value-type="float">
            <text:p>16492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9087962962963" calcext:value-type="float">
            <text:p>0,00190879629629630000</text:p>
          </table:table-cell>
          <table:table-cell table:formula="of:=[.D591]-[.D59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28" office:value-type="float" office:value="16520" calcext:value-type="float">
            <text:p>1652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91203703703704" calcext:value-type="float">
            <text:p>0,00191203703703704000</text:p>
          </table:table-cell>
          <table:table-cell table:formula="of:=[.D592]-[.D59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28" office:value-type="float" office:value="16548" calcext:value-type="float">
            <text:p>16548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91527777777778" calcext:value-type="float">
            <text:p>0,00191527777777778000</text:p>
          </table:table-cell>
          <table:table-cell table:formula="of:=[.D593]-[.D592]" office:value-type="float" office:value="0.00000324074074074094" calcext:value-type="float">
            <text:p>0,0000032407407407409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28" office:value-type="float" office:value="16576" calcext:value-type="float">
            <text:p>16576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91851851851852" calcext:value-type="float">
            <text:p>0,00191851851851852000</text:p>
          </table:table-cell>
          <table:table-cell table:formula="of:=[.D594]-[.D59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28" office:value-type="float" office:value="16604" calcext:value-type="float">
            <text:p>16604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92175925925926" calcext:value-type="float">
            <text:p>0,00192175925925926000</text:p>
          </table:table-cell>
          <table:table-cell table:formula="of:=[.D595]-[.D59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28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925" calcext:value-type="float">
            <text:p>0,00192500000000000000</text:p>
          </table:table-cell>
          <table:table-cell table:formula="of:=[.D596]-[.D59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28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92824074074074" calcext:value-type="float">
            <text:p>0,00192824074074074000</text:p>
          </table:table-cell>
          <table:table-cell table:formula="of:=[.D597]-[.D59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28" office:value-type="float" office:value="16688" calcext:value-type="float">
            <text:p>16688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93148148148148" calcext:value-type="float">
            <text:p>0,00193148148148148000</text:p>
          </table:table-cell>
          <table:table-cell table:formula="of:=[.D598]-[.D59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28" office:value-type="float" office:value="16716" calcext:value-type="float">
            <text:p>16716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93472222222222" calcext:value-type="float">
            <text:p>0,00193472222222222000</text:p>
          </table:table-cell>
          <table:table-cell table:formula="of:=[.D599]-[.D59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28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93796296296296" calcext:value-type="float">
            <text:p>0,00193796296296296000</text:p>
          </table:table-cell>
          <table:table-cell table:formula="of:=[.D600]-[.D59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28" office:value-type="float" office:value="16772" calcext:value-type="float">
            <text:p>16772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9412037037037" calcext:value-type="float">
            <text:p>0,00194120370370370000</text:p>
          </table:table-cell>
          <table:table-cell table:formula="of:=[.D601]-[.D60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28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94444444444444" calcext:value-type="float">
            <text:p>0,00194444444444444000</text:p>
          </table:table-cell>
          <table:table-cell table:formula="of:=[.D602]-[.D60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28" office:value-type="float" office:value="16828" calcext:value-type="float">
            <text:p>16828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94768518518519" calcext:value-type="float">
            <text:p>0,00194768518518519000</text:p>
          </table:table-cell>
          <table:table-cell table:formula="of:=[.D603]-[.D60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28" office:value-type="float" office:value="16856" calcext:value-type="float">
            <text:p>16856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95092592592593" calcext:value-type="float">
            <text:p>0,00195092592592593000</text:p>
          </table:table-cell>
          <table:table-cell table:formula="of:=[.D604]-[.D60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28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95416666666667" calcext:value-type="float">
            <text:p>0,00195416666666667000</text:p>
          </table:table-cell>
          <table:table-cell table:formula="of:=[.D605]-[.D60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28" office:value-type="float" office:value="16912" calcext:value-type="float">
            <text:p>16912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95740740740741" calcext:value-type="float">
            <text:p>0,00195740740740741000</text:p>
          </table:table-cell>
          <table:table-cell table:formula="of:=[.D606]-[.D60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28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96064814814815" calcext:value-type="float">
            <text:p>0,00196064814814815000</text:p>
          </table:table-cell>
          <table:table-cell table:formula="of:=[.D607]-[.D60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28" office:value-type="float" office:value="16968" calcext:value-type="float">
            <text:p>16968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96388888888889" calcext:value-type="float">
            <text:p>0,00196388888888889000</text:p>
          </table:table-cell>
          <table:table-cell table:formula="of:=[.D608]-[.D60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28" office:value-type="float" office:value="16996" calcext:value-type="float">
            <text:p>16996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96712962962963" calcext:value-type="float">
            <text:p>0,00196712962962963000</text:p>
          </table:table-cell>
          <table:table-cell table:formula="of:=[.D609]-[.D60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28" office:value-type="float" office:value="17024" calcext:value-type="float">
            <text:p>17024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97037037037037" calcext:value-type="float">
            <text:p>0,00197037037037037000</text:p>
          </table:table-cell>
          <table:table-cell table:formula="of:=[.D610]-[.D609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28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97361111111111" calcext:value-type="float">
            <text:p>0,00197361111111111000</text:p>
          </table:table-cell>
          <table:table-cell table:formula="of:=[.D611]-[.D61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28" office:value-type="float" office:value="17080" calcext:value-type="float">
            <text:p>1708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97685185185185" calcext:value-type="float">
            <text:p>0,00197685185185185000</text:p>
          </table:table-cell>
          <table:table-cell table:formula="of:=[.D612]-[.D61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28" office:value-type="float" office:value="17108" calcext:value-type="float">
            <text:p>17108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98009259259259" calcext:value-type="float">
            <text:p>0,00198009259259259000</text:p>
          </table:table-cell>
          <table:table-cell table:formula="of:=[.D613]-[.D61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28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98333333333333" calcext:value-type="float">
            <text:p>0,00198333333333333000</text:p>
          </table:table-cell>
          <table:table-cell table:formula="of:=[.D614]-[.D61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28" office:value-type="float" office:value="17164" calcext:value-type="float">
            <text:p>17164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98657407407407" calcext:value-type="float">
            <text:p>0,00198657407407407000</text:p>
          </table:table-cell>
          <table:table-cell table:formula="of:=[.D615]-[.D61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28" office:value-type="float" office:value="17192" calcext:value-type="float">
            <text:p>17192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98981481481482" calcext:value-type="float">
            <text:p>0,00198981481481482000</text:p>
          </table:table-cell>
          <table:table-cell table:formula="of:=[.D616]-[.D61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28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99305555555556" calcext:value-type="float">
            <text:p>0,00199305555555556000</text:p>
          </table:table-cell>
          <table:table-cell table:formula="of:=[.D617]-[.D61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28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9962962962963" calcext:value-type="float">
            <text:p>0,00199629629629630000</text:p>
          </table:table-cell>
          <table:table-cell table:formula="of:=[.D618]-[.D61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28" office:value-type="float" office:value="17276" calcext:value-type="float">
            <text:p>17276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99953703703704" calcext:value-type="float">
            <text:p>0,00199953703703704000</text:p>
          </table:table-cell>
          <table:table-cell table:formula="of:=[.D619]-[.D61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28" office:value-type="float" office:value="17304" calcext:value-type="float">
            <text:p>17304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200277777777778" calcext:value-type="float">
            <text:p>0,00200277777777778000</text:p>
          </table:table-cell>
          <table:table-cell table:formula="of:=[.D620]-[.D61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28" office:value-type="float" office:value="17332" calcext:value-type="float">
            <text:p>17332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200601851851852" calcext:value-type="float">
            <text:p>0,00200601851851852000</text:p>
          </table:table-cell>
          <table:table-cell table:formula="of:=[.D621]-[.D62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28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200925925925926" calcext:value-type="float">
            <text:p>0,00200925925925926000</text:p>
          </table:table-cell>
          <table:table-cell table:formula="of:=[.D622]-[.D62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28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20125" calcext:value-type="float">
            <text:p>0,00201250000000000000</text:p>
          </table:table-cell>
          <table:table-cell table:formula="of:=[.D623]-[.D62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28" office:value-type="float" office:value="17416" calcext:value-type="float">
            <text:p>17416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201574074074074" calcext:value-type="float">
            <text:p>0,00201574074074074000</text:p>
          </table:table-cell>
          <table:table-cell table:formula="of:=[.D624]-[.D62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28" office:value-type="float" office:value="17444" calcext:value-type="float">
            <text:p>17444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201898148148148" calcext:value-type="float">
            <text:p>0,00201898148148148000</text:p>
          </table:table-cell>
          <table:table-cell table:formula="of:=[.D625]-[.D62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28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202222222222222" calcext:value-type="float">
            <text:p>0,00202222222222222000</text:p>
          </table:table-cell>
          <table:table-cell table:formula="of:=[.D626]-[.D62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28" office:value-type="float" office:value="17500" calcext:value-type="float">
            <text:p>1750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202546296296296" calcext:value-type="float">
            <text:p>0,00202546296296296000</text:p>
          </table:table-cell>
          <table:table-cell table:formula="of:=[.D627]-[.D62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28" office:value-type="float" office:value="17528" calcext:value-type="float">
            <text:p>17528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20287037037037" calcext:value-type="float">
            <text:p>0,00202870370370370000</text:p>
          </table:table-cell>
          <table:table-cell table:formula="of:=[.D628]-[.D62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28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203194444444444" calcext:value-type="float">
            <text:p>0,00203194444444444000</text:p>
          </table:table-cell>
          <table:table-cell table:formula="of:=[.D629]-[.D62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28" office:value-type="float" office:value="17584" calcext:value-type="float">
            <text:p>17584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203518518518519" calcext:value-type="float">
            <text:p>0,00203518518518519000</text:p>
          </table:table-cell>
          <table:table-cell table:formula="of:=[.D630]-[.D62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28" office:value-type="float" office:value="17612" calcext:value-type="float">
            <text:p>17612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203842592592593" calcext:value-type="float">
            <text:p>0,00203842592592593000</text:p>
          </table:table-cell>
          <table:table-cell table:formula="of:=[.D631]-[.D63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28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204166666666667" calcext:value-type="float">
            <text:p>0,00204166666666667000</text:p>
          </table:table-cell>
          <table:table-cell table:formula="of:=[.D632]-[.D631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28" office:value-type="float" office:value="17668" calcext:value-type="float">
            <text:p>17668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204490740740741" calcext:value-type="float">
            <text:p>0,00204490740740741000</text:p>
          </table:table-cell>
          <table:table-cell table:formula="of:=[.D633]-[.D63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28" office:value-type="float" office:value="17696" calcext:value-type="float">
            <text:p>17696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204814814814815" calcext:value-type="float">
            <text:p>0,00204814814814815000</text:p>
          </table:table-cell>
          <table:table-cell table:formula="of:=[.D634]-[.D63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28" office:value-type="float" office:value="17724" calcext:value-type="float">
            <text:p>17724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205138888888889" calcext:value-type="float">
            <text:p>0,00205138888888889000</text:p>
          </table:table-cell>
          <table:table-cell table:formula="of:=[.D635]-[.D63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28" office:value-type="float" office:value="17752" calcext:value-type="float">
            <text:p>17752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205462962962963" calcext:value-type="float">
            <text:p>0,00205462962962963000</text:p>
          </table:table-cell>
          <table:table-cell table:formula="of:=[.D636]-[.D63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28" office:value-type="float" office:value="17780" calcext:value-type="float">
            <text:p>1778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205787037037037" calcext:value-type="float">
            <text:p>0,00205787037037037000</text:p>
          </table:table-cell>
          <table:table-cell table:formula="of:=[.D637]-[.D63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28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206111111111111" calcext:value-type="float">
            <text:p>0,00206111111111111000</text:p>
          </table:table-cell>
          <table:table-cell table:formula="of:=[.D638]-[.D63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28" office:value-type="float" office:value="17836" calcext:value-type="float">
            <text:p>17836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206435185185185" calcext:value-type="float">
            <text:p>0,00206435185185185000</text:p>
          </table:table-cell>
          <table:table-cell table:formula="of:=[.D639]-[.D63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28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206759259259259" calcext:value-type="float">
            <text:p>0,00206759259259259000</text:p>
          </table:table-cell>
          <table:table-cell table:formula="of:=[.D640]-[.D63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28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207083333333333" calcext:value-type="float">
            <text:p>0,00207083333333333000</text:p>
          </table:table-cell>
          <table:table-cell table:formula="of:=[.D641]-[.D64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28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207407407407407" calcext:value-type="float">
            <text:p>0,00207407407407407000</text:p>
          </table:table-cell>
          <table:table-cell table:formula="of:=[.D642]-[.D64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28" office:value-type="float" office:value="17948" calcext:value-type="float">
            <text:p>17948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207731481481482" calcext:value-type="float">
            <text:p>0,00207731481481482000</text:p>
          </table:table-cell>
          <table:table-cell table:formula="of:=[.D643]-[.D64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28" office:value-type="float" office:value="17976" calcext:value-type="float">
            <text:p>17976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208055555555556" calcext:value-type="float">
            <text:p>0,00208055555555556000</text:p>
          </table:table-cell>
          <table:table-cell table:formula="of:=[.D644]-[.D64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28" office:value-type="float" office:value="18004" calcext:value-type="float">
            <text:p>18004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20837962962963" calcext:value-type="float">
            <text:p>0,00208379629629630000</text:p>
          </table:table-cell>
          <table:table-cell table:formula="of:=[.D645]-[.D64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28" office:value-type="float" office:value="18032" calcext:value-type="float">
            <text:p>18032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208703703703704" calcext:value-type="float">
            <text:p>0,00208703703703704000</text:p>
          </table:table-cell>
          <table:table-cell table:formula="of:=[.D646]-[.D64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28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209027777777778" calcext:value-type="float">
            <text:p>0,00209027777777778000</text:p>
          </table:table-cell>
          <table:table-cell table:formula="of:=[.D647]-[.D64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28" office:value-type="float" office:value="18088" calcext:value-type="float">
            <text:p>18088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209351851851852" calcext:value-type="float">
            <text:p>0,00209351851851852000</text:p>
          </table:table-cell>
          <table:table-cell table:formula="of:=[.D648]-[.D64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28" office:value-type="float" office:value="18116" calcext:value-type="float">
            <text:p>18116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209675925925926" calcext:value-type="float">
            <text:p>0,00209675925925926000</text:p>
          </table:table-cell>
          <table:table-cell table:formula="of:=[.D649]-[.D64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28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21" calcext:value-type="float">
            <text:p>0,00210000000000000000</text:p>
          </table:table-cell>
          <table:table-cell table:formula="of:=[.D650]-[.D64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28" office:value-type="float" office:value="18172" calcext:value-type="float">
            <text:p>18172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210324074074074" calcext:value-type="float">
            <text:p>0,00210324074074074000</text:p>
          </table:table-cell>
          <table:table-cell table:formula="of:=[.D651]-[.D65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28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210648148148148" calcext:value-type="float">
            <text:p>0,00210648148148148000</text:p>
          </table:table-cell>
          <table:table-cell table:formula="of:=[.D652]-[.D65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28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210972222222222" calcext:value-type="float">
            <text:p>0,00210972222222222000</text:p>
          </table:table-cell>
          <table:table-cell table:formula="of:=[.D653]-[.D65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28" office:value-type="float" office:value="18256" calcext:value-type="float">
            <text:p>18256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211296296296296" calcext:value-type="float">
            <text:p>0,00211296296296296000</text:p>
          </table:table-cell>
          <table:table-cell table:formula="of:=[.D654]-[.D653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28" office:value-type="float" office:value="18284" calcext:value-type="float">
            <text:p>18284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21162037037037" calcext:value-type="float">
            <text:p>0,00211620370370370000</text:p>
          </table:table-cell>
          <table:table-cell table:formula="of:=[.D655]-[.D65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28" office:value-type="float" office:value="18312" calcext:value-type="float">
            <text:p>18312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211944444444444" calcext:value-type="float">
            <text:p>0,00211944444444444000</text:p>
          </table:table-cell>
          <table:table-cell table:formula="of:=[.D656]-[.D65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28" office:value-type="float" office:value="18340" calcext:value-type="float">
            <text:p>1834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212268518518519" calcext:value-type="float">
            <text:p>0,00212268518518519000</text:p>
          </table:table-cell>
          <table:table-cell table:formula="of:=[.D657]-[.D65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28" office:value-type="float" office:value="18368" calcext:value-type="float">
            <text:p>18368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212592592592593" calcext:value-type="float">
            <text:p>0,00212592592592593000</text:p>
          </table:table-cell>
          <table:table-cell table:formula="of:=[.D658]-[.D65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28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212916666666667" calcext:value-type="float">
            <text:p>0,00212916666666667000</text:p>
          </table:table-cell>
          <table:table-cell table:formula="of:=[.D659]-[.D65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28" office:value-type="float" office:value="18424" calcext:value-type="float">
            <text:p>18424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213240740740741" calcext:value-type="float">
            <text:p>0,00213240740740741000</text:p>
          </table:table-cell>
          <table:table-cell table:formula="of:=[.D660]-[.D65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28" office:value-type="float" office:value="18452" calcext:value-type="float">
            <text:p>18452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213564814814815" calcext:value-type="float">
            <text:p>0,00213564814814815000</text:p>
          </table:table-cell>
          <table:table-cell table:formula="of:=[.D661]-[.D66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28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213888888888889" calcext:value-type="float">
            <text:p>0,00213888888888889000</text:p>
          </table:table-cell>
          <table:table-cell table:formula="of:=[.D662]-[.D66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28" office:value-type="float" office:value="18508" calcext:value-type="float">
            <text:p>18508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214212962962963" calcext:value-type="float">
            <text:p>0,00214212962962963000</text:p>
          </table:table-cell>
          <table:table-cell table:formula="of:=[.D663]-[.D66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28" office:value-type="float" office:value="18536" calcext:value-type="float">
            <text:p>18536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214537037037037" calcext:value-type="float">
            <text:p>0,00214537037037037000</text:p>
          </table:table-cell>
          <table:table-cell table:formula="of:=[.D664]-[.D66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28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214861111111111" calcext:value-type="float">
            <text:p>0,00214861111111111000</text:p>
          </table:table-cell>
          <table:table-cell table:formula="of:=[.D665]-[.D66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28" office:value-type="float" office:value="18592" calcext:value-type="float">
            <text:p>18592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215185185185185" calcext:value-type="float">
            <text:p>0,00215185185185185000</text:p>
          </table:table-cell>
          <table:table-cell table:formula="of:=[.D666]-[.D66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28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215509259259259" calcext:value-type="float">
            <text:p>0,00215509259259259000</text:p>
          </table:table-cell>
          <table:table-cell table:formula="of:=[.D667]-[.D66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28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215833333333333" calcext:value-type="float">
            <text:p>0,00215833333333333000</text:p>
          </table:table-cell>
          <table:table-cell table:formula="of:=[.D668]-[.D66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28" office:value-type="float" office:value="18676" calcext:value-type="float">
            <text:p>18676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216157407407407" calcext:value-type="float">
            <text:p>0,00216157407407407000</text:p>
          </table:table-cell>
          <table:table-cell table:formula="of:=[.D669]-[.D66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28" office:value-type="float" office:value="18704" calcext:value-type="float">
            <text:p>18704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216481481481481" calcext:value-type="float">
            <text:p>0,00216481481481481000</text:p>
          </table:table-cell>
          <table:table-cell table:formula="of:=[.D670]-[.D66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28" office:value-type="float" office:value="18732" calcext:value-type="float">
            <text:p>18732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216805555555556" calcext:value-type="float">
            <text:p>0,00216805555555556000</text:p>
          </table:table-cell>
          <table:table-cell table:formula="of:=[.D671]-[.D67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28" office:value-type="float" office:value="18760" calcext:value-type="float">
            <text:p>1876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21712962962963" calcext:value-type="float">
            <text:p>0,00217129629629630000</text:p>
          </table:table-cell>
          <table:table-cell table:formula="of:=[.D672]-[.D67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28" office:value-type="float" office:value="18788" calcext:value-type="float">
            <text:p>18788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217453703703704" calcext:value-type="float">
            <text:p>0,00217453703703704000</text:p>
          </table:table-cell>
          <table:table-cell table:formula="of:=[.D673]-[.D67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28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217777777777778" calcext:value-type="float">
            <text:p>0,00217777777777778000</text:p>
          </table:table-cell>
          <table:table-cell table:formula="of:=[.D674]-[.D67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28" office:value-type="float" office:value="18844" calcext:value-type="float">
            <text:p>18844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218101851851852" calcext:value-type="float">
            <text:p>0,00218101851851852000</text:p>
          </table:table-cell>
          <table:table-cell table:formula="of:=[.D675]-[.D67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28" office:value-type="float" office:value="18872" calcext:value-type="float">
            <text:p>18872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218425925925926" calcext:value-type="float">
            <text:p>0,00218425925925926000</text:p>
          </table:table-cell>
          <table:table-cell table:formula="of:=[.D676]-[.D675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28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21875" calcext:value-type="float">
            <text:p>0,00218750000000000000</text:p>
          </table:table-cell>
          <table:table-cell table:formula="of:=[.D677]-[.D67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28" office:value-type="float" office:value="18928" calcext:value-type="float">
            <text:p>18928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219074074074074" calcext:value-type="float">
            <text:p>0,00219074074074074000</text:p>
          </table:table-cell>
          <table:table-cell table:formula="of:=[.D678]-[.D67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28" office:value-type="float" office:value="18956" calcext:value-type="float">
            <text:p>18956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219398148148148" calcext:value-type="float">
            <text:p>0,00219398148148148000</text:p>
          </table:table-cell>
          <table:table-cell table:formula="of:=[.D679]-[.D67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28" office:value-type="float" office:value="18984" calcext:value-type="float">
            <text:p>18984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219722222222222" calcext:value-type="float">
            <text:p>0,00219722222222222000</text:p>
          </table:table-cell>
          <table:table-cell table:formula="of:=[.D680]-[.D67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28" office:value-type="float" office:value="19012" calcext:value-type="float">
            <text:p>19012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220046296296296" calcext:value-type="float">
            <text:p>0,00220046296296296000</text:p>
          </table:table-cell>
          <table:table-cell table:formula="of:=[.D681]-[.D68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28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22037037037037" calcext:value-type="float">
            <text:p>0,00220370370370370000</text:p>
          </table:table-cell>
          <table:table-cell table:formula="of:=[.D682]-[.D68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28" office:value-type="float" office:value="19068" calcext:value-type="float">
            <text:p>19068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220694444444444" calcext:value-type="float">
            <text:p>0,00220694444444444000</text:p>
          </table:table-cell>
          <table:table-cell table:formula="of:=[.D683]-[.D68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28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221018518518519" calcext:value-type="float">
            <text:p>0,00221018518518519000</text:p>
          </table:table-cell>
          <table:table-cell table:formula="of:=[.D684]-[.D68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28" office:value-type="float" office:value="19124" calcext:value-type="float">
            <text:p>19124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221342592592593" calcext:value-type="float">
            <text:p>0,00221342592592593000</text:p>
          </table:table-cell>
          <table:table-cell table:formula="of:=[.D685]-[.D68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28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221666666666667" calcext:value-type="float">
            <text:p>0,00221666666666667000</text:p>
          </table:table-cell>
          <table:table-cell table:formula="of:=[.D686]-[.D68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28" office:value-type="float" office:value="19180" calcext:value-type="float">
            <text:p>1918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221990740740741" calcext:value-type="float">
            <text:p>0,00221990740740741000</text:p>
          </table:table-cell>
          <table:table-cell table:formula="of:=[.D687]-[.D68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28" office:value-type="float" office:value="19208" calcext:value-type="float">
            <text:p>19208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222314814814815" calcext:value-type="float">
            <text:p>0,00222314814814815000</text:p>
          </table:table-cell>
          <table:table-cell table:formula="of:=[.D688]-[.D68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28" office:value-type="float" office:value="19236" calcext:value-type="float">
            <text:p>19236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222638888888889" calcext:value-type="float">
            <text:p>0,00222638888888889000</text:p>
          </table:table-cell>
          <table:table-cell table:formula="of:=[.D689]-[.D68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28" office:value-type="float" office:value="19264" calcext:value-type="float">
            <text:p>19264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222962962962963" calcext:value-type="float">
            <text:p>0,00222962962962963000</text:p>
          </table:table-cell>
          <table:table-cell table:formula="of:=[.D690]-[.D68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28" office:value-type="float" office:value="19292" calcext:value-type="float">
            <text:p>19292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223287037037037" calcext:value-type="float">
            <text:p>0,00223287037037037000</text:p>
          </table:table-cell>
          <table:table-cell table:formula="of:=[.D691]-[.D69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28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223611111111111" calcext:value-type="float">
            <text:p>0,00223611111111111000</text:p>
          </table:table-cell>
          <table:table-cell table:formula="of:=[.D692]-[.D69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28" office:value-type="float" office:value="19348" calcext:value-type="float">
            <text:p>19348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223935185185185" calcext:value-type="float">
            <text:p>0,00223935185185185000</text:p>
          </table:table-cell>
          <table:table-cell table:formula="of:=[.D693]-[.D69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28" office:value-type="float" office:value="19376" calcext:value-type="float">
            <text:p>19376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224259259259259" calcext:value-type="float">
            <text:p>0,00224259259259259000</text:p>
          </table:table-cell>
          <table:table-cell table:formula="of:=[.D694]-[.D69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28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224583333333333" calcext:value-type="float">
            <text:p>0,00224583333333333000</text:p>
          </table:table-cell>
          <table:table-cell table:formula="of:=[.D695]-[.D69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28" office:value-type="float" office:value="19432" calcext:value-type="float">
            <text:p>19432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224907407407407" calcext:value-type="float">
            <text:p>0,00224907407407407000</text:p>
          </table:table-cell>
          <table:table-cell table:formula="of:=[.D696]-[.D69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28" office:value-type="float" office:value="19460" calcext:value-type="float">
            <text:p>1946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225231481481481" calcext:value-type="float">
            <text:p>0,00225231481481481000</text:p>
          </table:table-cell>
          <table:table-cell table:formula="of:=[.D697]-[.D69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28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225555555555556" calcext:value-type="float">
            <text:p>0,00225555555555556000</text:p>
          </table:table-cell>
          <table:table-cell table:formula="of:=[.D698]-[.D697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28" office:value-type="float" office:value="19516" calcext:value-type="float">
            <text:p>19516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22587962962963" calcext:value-type="float">
            <text:p>0,00225879629629630000</text:p>
          </table:table-cell>
          <table:table-cell table:formula="of:=[.D699]-[.D69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28" office:value-type="float" office:value="19544" calcext:value-type="float">
            <text:p>19544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226203703703704" calcext:value-type="float">
            <text:p>0,00226203703703704000</text:p>
          </table:table-cell>
          <table:table-cell table:formula="of:=[.D700]-[.D69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28" office:value-type="float" office:value="19572" calcext:value-type="float">
            <text:p>19572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226527777777778" calcext:value-type="float">
            <text:p>0,00226527777777778000</text:p>
          </table:table-cell>
          <table:table-cell table:formula="of:=[.D701]-[.D70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28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226851851851852" calcext:value-type="float">
            <text:p>0,00226851851851852000</text:p>
          </table:table-cell>
          <table:table-cell table:formula="of:=[.D702]-[.D70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28" office:value-type="float" office:value="19628" calcext:value-type="float">
            <text:p>19628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227175925925926" calcext:value-type="float">
            <text:p>0,00227175925925926000</text:p>
          </table:table-cell>
          <table:table-cell table:formula="of:=[.D703]-[.D70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28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2275" calcext:value-type="float">
            <text:p>0,00227500000000000000</text:p>
          </table:table-cell>
          <table:table-cell table:formula="of:=[.D704]-[.D70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28" office:value-type="float" office:value="19684" calcext:value-type="float">
            <text:p>19684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227824074074074" calcext:value-type="float">
            <text:p>0,00227824074074074000</text:p>
          </table:table-cell>
          <table:table-cell table:formula="of:=[.D705]-[.D70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28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228148148148148" calcext:value-type="float">
            <text:p>0,00228148148148148000</text:p>
          </table:table-cell>
          <table:table-cell table:formula="of:=[.D706]-[.D70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28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228472222222222" calcext:value-type="float">
            <text:p>0,00228472222222222000</text:p>
          </table:table-cell>
          <table:table-cell table:formula="of:=[.D707]-[.D70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28" office:value-type="float" office:value="19768" calcext:value-type="float">
            <text:p>19768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228796296296296" calcext:value-type="float">
            <text:p>0,00228796296296296000</text:p>
          </table:table-cell>
          <table:table-cell table:formula="of:=[.D708]-[.D70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28" office:value-type="float" office:value="19796" calcext:value-type="float">
            <text:p>19796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22912037037037" calcext:value-type="float">
            <text:p>0,00229120370370370000</text:p>
          </table:table-cell>
          <table:table-cell table:formula="of:=[.D709]-[.D70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28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229444444444444" calcext:value-type="float">
            <text:p>0,00229444444444444000</text:p>
          </table:table-cell>
          <table:table-cell table:formula="of:=[.D710]-[.D70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28" office:value-type="float" office:value="19852" calcext:value-type="float">
            <text:p>19852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229768518518519" calcext:value-type="float">
            <text:p>0,00229768518518519000</text:p>
          </table:table-cell>
          <table:table-cell table:formula="of:=[.D711]-[.D71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28" office:value-type="float" office:value="19880" calcext:value-type="float">
            <text:p>1988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230092592592593" calcext:value-type="float">
            <text:p>0,00230092592592593000</text:p>
          </table:table-cell>
          <table:table-cell table:formula="of:=[.D712]-[.D71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28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230416666666667" calcext:value-type="float">
            <text:p>0,00230416666666667000</text:p>
          </table:table-cell>
          <table:table-cell table:formula="of:=[.D713]-[.D71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28" office:value-type="float" office:value="19936" calcext:value-type="float">
            <text:p>19936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230740740740741" calcext:value-type="float">
            <text:p>0,00230740740740741000</text:p>
          </table:table-cell>
          <table:table-cell table:formula="of:=[.D714]-[.D71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28" office:value-type="float" office:value="19964" calcext:value-type="float">
            <text:p>19964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231064814814815" calcext:value-type="float">
            <text:p>0,00231064814814815000</text:p>
          </table:table-cell>
          <table:table-cell table:formula="of:=[.D715]-[.D71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28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231388888888889" calcext:value-type="float">
            <text:p>0,00231388888888889000</text:p>
          </table:table-cell>
          <table:table-cell table:formula="of:=[.D716]-[.D71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28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231712962962963" calcext:value-type="float">
            <text:p>0,00231712962962963000</text:p>
          </table:table-cell>
          <table:table-cell table:formula="of:=[.D717]-[.D71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28" office:value-type="float" office:value="20048" calcext:value-type="float">
            <text:p>20048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232037037037037" calcext:value-type="float">
            <text:p>0,00232037037037037000</text:p>
          </table:table-cell>
          <table:table-cell table:formula="of:=[.D718]-[.D71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28" office:value-type="float" office:value="20076" calcext:value-type="float">
            <text:p>20076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232361111111111" calcext:value-type="float">
            <text:p>0,00232361111111111000</text:p>
          </table:table-cell>
          <table:table-cell table:formula="of:=[.D719]-[.D71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28" office:value-type="float" office:value="20104" calcext:value-type="float">
            <text:p>20104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232685185185185" calcext:value-type="float">
            <text:p>0,00232685185185185000</text:p>
          </table:table-cell>
          <table:table-cell table:formula="of:=[.D720]-[.D719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28" office:value-type="float" office:value="20132" calcext:value-type="float">
            <text:p>20132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233009259259259" calcext:value-type="float">
            <text:p>0,00233009259259259000</text:p>
          </table:table-cell>
          <table:table-cell table:formula="of:=[.D721]-[.D72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28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233333333333333" calcext:value-type="float">
            <text:p>0,00233333333333333000</text:p>
          </table:table-cell>
          <table:table-cell table:formula="of:=[.D722]-[.D72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28" office:value-type="float" office:value="20188" calcext:value-type="float">
            <text:p>20188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233657407407407" calcext:value-type="float">
            <text:p>0,00233657407407407000</text:p>
          </table:table-cell>
          <table:table-cell table:formula="of:=[.D723]-[.D72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28" office:value-type="float" office:value="20216" calcext:value-type="float">
            <text:p>20216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233981481481482" calcext:value-type="float">
            <text:p>0,00233981481481482000</text:p>
          </table:table-cell>
          <table:table-cell table:formula="of:=[.D724]-[.D72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28" office:value-type="float" office:value="20244" calcext:value-type="float">
            <text:p>20244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234305555555556" calcext:value-type="float">
            <text:p>0,00234305555555556000</text:p>
          </table:table-cell>
          <table:table-cell table:formula="of:=[.D725]-[.D72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28" office:value-type="float" office:value="20272" calcext:value-type="float">
            <text:p>20272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23462962962963" calcext:value-type="float">
            <text:p>0,00234629629629630000</text:p>
          </table:table-cell>
          <table:table-cell table:formula="of:=[.D726]-[.D72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28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234953703703704" calcext:value-type="float">
            <text:p>0,00234953703703704000</text:p>
          </table:table-cell>
          <table:table-cell table:formula="of:=[.D727]-[.D72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28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235277777777778" calcext:value-type="float">
            <text:p>0,00235277777777778000</text:p>
          </table:table-cell>
          <table:table-cell table:formula="of:=[.D728]-[.D72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28" office:value-type="float" office:value="20356" calcext:value-type="float">
            <text:p>20356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235601851851852" calcext:value-type="float">
            <text:p>0,00235601851851852000</text:p>
          </table:table-cell>
          <table:table-cell table:formula="of:=[.D729]-[.D72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28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235925925925926" calcext:value-type="float">
            <text:p>0,00235925925925926000</text:p>
          </table:table-cell>
          <table:table-cell table:formula="of:=[.D730]-[.D72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28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23625" calcext:value-type="float">
            <text:p>0,00236250000000000000</text:p>
          </table:table-cell>
          <table:table-cell table:formula="of:=[.D731]-[.D73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28" office:value-type="float" office:value="20440" calcext:value-type="float">
            <text:p>2044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236574074074074" calcext:value-type="float">
            <text:p>0,00236574074074074000</text:p>
          </table:table-cell>
          <table:table-cell table:formula="of:=[.D732]-[.D73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28" office:value-type="float" office:value="20468" calcext:value-type="float">
            <text:p>20468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236898148148148" calcext:value-type="float">
            <text:p>0,00236898148148148000</text:p>
          </table:table-cell>
          <table:table-cell table:formula="of:=[.D733]-[.D73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28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237222222222222" calcext:value-type="float">
            <text:p>0,00237222222222222000</text:p>
          </table:table-cell>
          <table:table-cell table:formula="of:=[.D734]-[.D73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28" office:value-type="float" office:value="20524" calcext:value-type="float">
            <text:p>20524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237546296296296" calcext:value-type="float">
            <text:p>0,00237546296296296000</text:p>
          </table:table-cell>
          <table:table-cell table:formula="of:=[.D735]-[.D73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28" office:value-type="float" office:value="20552" calcext:value-type="float">
            <text:p>20552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23787037037037" calcext:value-type="float">
            <text:p>0,00237870370370370000</text:p>
          </table:table-cell>
          <table:table-cell table:formula="of:=[.D736]-[.D73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28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238194444444444" calcext:value-type="float">
            <text:p>0,00238194444444444000</text:p>
          </table:table-cell>
          <table:table-cell table:formula="of:=[.D737]-[.D73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28" office:value-type="float" office:value="20608" calcext:value-type="float">
            <text:p>20608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238518518518519" calcext:value-type="float">
            <text:p>0,00238518518518519000</text:p>
          </table:table-cell>
          <table:table-cell table:formula="of:=[.D738]-[.D73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28" office:value-type="float" office:value="20636" calcext:value-type="float">
            <text:p>20636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238842592592593" calcext:value-type="float">
            <text:p>0,00238842592592593000</text:p>
          </table:table-cell>
          <table:table-cell table:formula="of:=[.D739]-[.D73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28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239166666666667" calcext:value-type="float">
            <text:p>0,00239166666666667000</text:p>
          </table:table-cell>
          <table:table-cell table:formula="of:=[.D740]-[.D73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28" office:value-type="float" office:value="20692" calcext:value-type="float">
            <text:p>20692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239490740740741" calcext:value-type="float">
            <text:p>0,00239490740740741000</text:p>
          </table:table-cell>
          <table:table-cell table:formula="of:=[.D741]-[.D74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28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239814814814815" calcext:value-type="float">
            <text:p>0,00239814814814815000</text:p>
          </table:table-cell>
          <table:table-cell table:formula="of:=[.D742]-[.D741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28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240138888888889" calcext:value-type="float">
            <text:p>0,00240138888888889000</text:p>
          </table:table-cell>
          <table:table-cell table:formula="of:=[.D743]-[.D74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28" office:value-type="float" office:value="20776" calcext:value-type="float">
            <text:p>20776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240462962962963" calcext:value-type="float">
            <text:p>0,00240462962962963000</text:p>
          </table:table-cell>
          <table:table-cell table:formula="of:=[.D744]-[.D74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28" office:value-type="float" office:value="20804" calcext:value-type="float">
            <text:p>20804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240787037037037" calcext:value-type="float">
            <text:p>0,00240787037037037000</text:p>
          </table:table-cell>
          <table:table-cell table:formula="of:=[.D745]-[.D74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28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241111111111111" calcext:value-type="float">
            <text:p>0,00241111111111111000</text:p>
          </table:table-cell>
          <table:table-cell table:formula="of:=[.D746]-[.D74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28" office:value-type="float" office:value="20860" calcext:value-type="float">
            <text:p>2086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241435185185185" calcext:value-type="float">
            <text:p>0,00241435185185185000</text:p>
          </table:table-cell>
          <table:table-cell table:formula="of:=[.D747]-[.D74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28" office:value-type="float" office:value="20888" calcext:value-type="float">
            <text:p>20888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241759259259259" calcext:value-type="float">
            <text:p>0,00241759259259259000</text:p>
          </table:table-cell>
          <table:table-cell table:formula="of:=[.D748]-[.D74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28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242083333333333" calcext:value-type="float">
            <text:p>0,00242083333333333000</text:p>
          </table:table-cell>
          <table:table-cell table:formula="of:=[.D749]-[.D74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28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242407407407407" calcext:value-type="float">
            <text:p>0,00242407407407407000</text:p>
          </table:table-cell>
          <table:table-cell table:formula="of:=[.D750]-[.D74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28" office:value-type="float" office:value="20972" calcext:value-type="float">
            <text:p>20972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242731481481482" calcext:value-type="float">
            <text:p>0,00242731481481482000</text:p>
          </table:table-cell>
          <table:table-cell table:formula="of:=[.D751]-[.D75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28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243055555555556" calcext:value-type="float">
            <text:p>0,00243055555555556000</text:p>
          </table:table-cell>
          <table:table-cell table:formula="of:=[.D752]-[.D75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28" office:value-type="float" office:value="21028" calcext:value-type="float">
            <text:p>21028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24337962962963" calcext:value-type="float">
            <text:p>0,00243379629629630000</text:p>
          </table:table-cell>
          <table:table-cell table:formula="of:=[.D753]-[.D75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28" office:value-type="float" office:value="21056" calcext:value-type="float">
            <text:p>21056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243703703703704" calcext:value-type="float">
            <text:p>0,00243703703703704000</text:p>
          </table:table-cell>
          <table:table-cell table:formula="of:=[.D754]-[.D75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28" office:value-type="float" office:value="21084" calcext:value-type="float">
            <text:p>21084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244027777777778" calcext:value-type="float">
            <text:p>0,00244027777777778000</text:p>
          </table:table-cell>
          <table:table-cell table:formula="of:=[.D755]-[.D75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28" office:value-type="float" office:value="21112" calcext:value-type="float">
            <text:p>21112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244351851851852" calcext:value-type="float">
            <text:p>0,00244351851851852000</text:p>
          </table:table-cell>
          <table:table-cell table:formula="of:=[.D756]-[.D75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28" office:value-type="float" office:value="21140" calcext:value-type="float">
            <text:p>2114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244675925925926" calcext:value-type="float">
            <text:p>0,00244675925925926000</text:p>
          </table:table-cell>
          <table:table-cell table:formula="of:=[.D757]-[.D75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28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245" calcext:value-type="float">
            <text:p>0,00245000000000000000</text:p>
          </table:table-cell>
          <table:table-cell table:formula="of:=[.D758]-[.D75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28" office:value-type="float" office:value="21196" calcext:value-type="float">
            <text:p>21196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245324074074074" calcext:value-type="float">
            <text:p>0,00245324074074074000</text:p>
          </table:table-cell>
          <table:table-cell table:formula="of:=[.D759]-[.D75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28" office:value-type="float" office:value="21224" calcext:value-type="float">
            <text:p>21224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245648148148148" calcext:value-type="float">
            <text:p>0,00245648148148148000</text:p>
          </table:table-cell>
          <table:table-cell table:formula="of:=[.D760]-[.D75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28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245972222222222" calcext:value-type="float">
            <text:p>0,00245972222222222000</text:p>
          </table:table-cell>
          <table:table-cell table:formula="of:=[.D761]-[.D76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28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246296296296296" calcext:value-type="float">
            <text:p>0,00246296296296296000</text:p>
          </table:table-cell>
          <table:table-cell table:formula="of:=[.D762]-[.D76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28" office:value-type="float" office:value="21308" calcext:value-type="float">
            <text:p>21308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24662037037037" calcext:value-type="float">
            <text:p>0,00246620370370370000</text:p>
          </table:table-cell>
          <table:table-cell table:formula="of:=[.D763]-[.D76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28" office:value-type="float" office:value="21336" calcext:value-type="float">
            <text:p>21336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246944444444444" calcext:value-type="float">
            <text:p>0,00246944444444444000</text:p>
          </table:table-cell>
          <table:table-cell table:formula="of:=[.D764]-[.D76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28" office:value-type="float" office:value="21364" calcext:value-type="float">
            <text:p>21364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247268518518519" calcext:value-type="float">
            <text:p>0,00247268518518519000</text:p>
          </table:table-cell>
          <table:table-cell table:formula="of:=[.D765]-[.D764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28" office:value-type="float" office:value="21392" calcext:value-type="float">
            <text:p>21392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247592592592593" calcext:value-type="float">
            <text:p>0,00247592592592593000</text:p>
          </table:table-cell>
          <table:table-cell table:formula="of:=[.D766]-[.D76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28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247916666666667" calcext:value-type="float">
            <text:p>0,00247916666666667000</text:p>
          </table:table-cell>
          <table:table-cell table:formula="of:=[.D767]-[.D76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28" office:value-type="float" office:value="21448" calcext:value-type="float">
            <text:p>21448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248240740740741" calcext:value-type="float">
            <text:p>0,00248240740740741000</text:p>
          </table:table-cell>
          <table:table-cell table:formula="of:=[.D768]-[.D76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28" office:value-type="float" office:value="21476" calcext:value-type="float">
            <text:p>21476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248564814814815" calcext:value-type="float">
            <text:p>0,00248564814814815000</text:p>
          </table:table-cell>
          <table:table-cell table:formula="of:=[.D769]-[.D76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28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248888888888889" calcext:value-type="float">
            <text:p>0,00248888888888889000</text:p>
          </table:table-cell>
          <table:table-cell table:formula="of:=[.D770]-[.D76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28" office:value-type="float" office:value="21532" calcext:value-type="float">
            <text:p>21532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249212962962963" calcext:value-type="float">
            <text:p>0,00249212962962963000</text:p>
          </table:table-cell>
          <table:table-cell table:formula="of:=[.D771]-[.D77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28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249537037037037" calcext:value-type="float">
            <text:p>0,00249537037037037000</text:p>
          </table:table-cell>
          <table:table-cell table:formula="of:=[.D772]-[.D77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28" office:value-type="float" office:value="21588" calcext:value-type="float">
            <text:p>21588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249861111111111" calcext:value-type="float">
            <text:p>0,00249861111111111000</text:p>
          </table:table-cell>
          <table:table-cell table:formula="of:=[.D773]-[.D77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28" office:value-type="float" office:value="21616" calcext:value-type="float">
            <text:p>21616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250185185185185" calcext:value-type="float">
            <text:p>0,00250185185185185000</text:p>
          </table:table-cell>
          <table:table-cell table:formula="of:=[.D774]-[.D77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28" office:value-type="float" office:value="21644" calcext:value-type="float">
            <text:p>21644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250509259259259" calcext:value-type="float">
            <text:p>0,00250509259259259000</text:p>
          </table:table-cell>
          <table:table-cell table:formula="of:=[.D775]-[.D77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28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250833333333333" calcext:value-type="float">
            <text:p>0,00250833333333333000</text:p>
          </table:table-cell>
          <table:table-cell table:formula="of:=[.D776]-[.D77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28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251157407407407" calcext:value-type="float">
            <text:p>0,00251157407407407000</text:p>
          </table:table-cell>
          <table:table-cell table:formula="of:=[.D777]-[.D77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28" office:value-type="float" office:value="21728" calcext:value-type="float">
            <text:p>21728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251481481481481" calcext:value-type="float">
            <text:p>0,00251481481481481000</text:p>
          </table:table-cell>
          <table:table-cell table:formula="of:=[.D778]-[.D77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28" office:value-type="float" office:value="21756" calcext:value-type="float">
            <text:p>21756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251805555555556" calcext:value-type="float">
            <text:p>0,00251805555555556000</text:p>
          </table:table-cell>
          <table:table-cell table:formula="of:=[.D779]-[.D77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28" office:value-type="float" office:value="21784" calcext:value-type="float">
            <text:p>21784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25212962962963" calcext:value-type="float">
            <text:p>0,00252129629629630000</text:p>
          </table:table-cell>
          <table:table-cell table:formula="of:=[.D780]-[.D77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28" office:value-type="float" office:value="21812" calcext:value-type="float">
            <text:p>21812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252453703703704" calcext:value-type="float">
            <text:p>0,00252453703703704000</text:p>
          </table:table-cell>
          <table:table-cell table:formula="of:=[.D781]-[.D78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28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252777777777778" calcext:value-type="float">
            <text:p>0,00252777777777778000</text:p>
          </table:table-cell>
          <table:table-cell table:formula="of:=[.D782]-[.D78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28" office:value-type="float" office:value="21868" calcext:value-type="float">
            <text:p>21868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253101851851852" calcext:value-type="float">
            <text:p>0,00253101851851852000</text:p>
          </table:table-cell>
          <table:table-cell table:formula="of:=[.D783]-[.D78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28" office:value-type="float" office:value="21896" calcext:value-type="float">
            <text:p>21896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253425925925926" calcext:value-type="float">
            <text:p>0,00253425925925926000</text:p>
          </table:table-cell>
          <table:table-cell table:formula="of:=[.D784]-[.D78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28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25375" calcext:value-type="float">
            <text:p>0,00253750000000000000</text:p>
          </table:table-cell>
          <table:table-cell table:formula="of:=[.D785]-[.D78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28" office:value-type="float" office:value="21952" calcext:value-type="float">
            <text:p>21952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254074074074074" calcext:value-type="float">
            <text:p>0,00254074074074074000</text:p>
          </table:table-cell>
          <table:table-cell table:formula="of:=[.D786]-[.D78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28" office:value-type="float" office:value="21980" calcext:value-type="float">
            <text:p>2198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254398148148148" calcext:value-type="float">
            <text:p>0,00254398148148148000</text:p>
          </table:table-cell>
          <table:table-cell table:formula="of:=[.D787]-[.D786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28" office:value-type="float" office:value="22008" calcext:value-type="float">
            <text:p>22008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254722222222222" calcext:value-type="float">
            <text:p>0,00254722222222222000</text:p>
          </table:table-cell>
          <table:table-cell table:formula="of:=[.D788]-[.D78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28" office:value-type="float" office:value="22036" calcext:value-type="float">
            <text:p>22036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255046296296296" calcext:value-type="float">
            <text:p>0,00255046296296296000</text:p>
          </table:table-cell>
          <table:table-cell table:formula="of:=[.D789]-[.D78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28" office:value-type="float" office:value="22064" calcext:value-type="float">
            <text:p>22064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25537037037037" calcext:value-type="float">
            <text:p>0,00255370370370370000</text:p>
          </table:table-cell>
          <table:table-cell table:formula="of:=[.D790]-[.D78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28" office:value-type="float" office:value="22092" calcext:value-type="float">
            <text:p>22092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255694444444444" calcext:value-type="float">
            <text:p>0,00255694444444444000</text:p>
          </table:table-cell>
          <table:table-cell table:formula="of:=[.D791]-[.D79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28" office:value-type="float" office:value="22120" calcext:value-type="float">
            <text:p>2212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256018518518519" calcext:value-type="float">
            <text:p>0,00256018518518519000</text:p>
          </table:table-cell>
          <table:table-cell table:formula="of:=[.D792]-[.D79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28" office:value-type="float" office:value="22148" calcext:value-type="float">
            <text:p>22148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256342592592593" calcext:value-type="float">
            <text:p>0,00256342592592593000</text:p>
          </table:table-cell>
          <table:table-cell table:formula="of:=[.D793]-[.D79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28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256666666666667" calcext:value-type="float">
            <text:p>0,00256666666666667000</text:p>
          </table:table-cell>
          <table:table-cell table:formula="of:=[.D794]-[.D79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28" office:value-type="float" office:value="22204" calcext:value-type="float">
            <text:p>22204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256990740740741" calcext:value-type="float">
            <text:p>0,00256990740740741000</text:p>
          </table:table-cell>
          <table:table-cell table:formula="of:=[.D795]-[.D79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28" office:value-type="float" office:value="22232" calcext:value-type="float">
            <text:p>22232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257314814814815" calcext:value-type="float">
            <text:p>0,00257314814814815000</text:p>
          </table:table-cell>
          <table:table-cell table:formula="of:=[.D796]-[.D79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28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257638888888889" calcext:value-type="float">
            <text:p>0,00257638888888889000</text:p>
          </table:table-cell>
          <table:table-cell table:formula="of:=[.D797]-[.D79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28" office:value-type="float" office:value="22288" calcext:value-type="float">
            <text:p>22288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257962962962963" calcext:value-type="float">
            <text:p>0,00257962962962963000</text:p>
          </table:table-cell>
          <table:table-cell table:formula="of:=[.D798]-[.D79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28" office:value-type="float" office:value="22316" calcext:value-type="float">
            <text:p>22316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258287037037037" calcext:value-type="float">
            <text:p>0,00258287037037037000</text:p>
          </table:table-cell>
          <table:table-cell table:formula="of:=[.D799]-[.D79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28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258611111111111" calcext:value-type="float">
            <text:p>0,00258611111111111000</text:p>
          </table:table-cell>
          <table:table-cell table:formula="of:=[.D800]-[.D79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28" office:value-type="float" office:value="22372" calcext:value-type="float">
            <text:p>22372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258935185185185" calcext:value-type="float">
            <text:p>0,00258935185185185000</text:p>
          </table:table-cell>
          <table:table-cell table:formula="of:=[.D801]-[.D80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28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259259259259259" calcext:value-type="float">
            <text:p>0,00259259259259259000</text:p>
          </table:table-cell>
          <table:table-cell table:formula="of:=[.D802]-[.D80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28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259583333333333" calcext:value-type="float">
            <text:p>0,00259583333333333000</text:p>
          </table:table-cell>
          <table:table-cell table:formula="of:=[.D803]-[.D80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28" office:value-type="float" office:value="22456" calcext:value-type="float">
            <text:p>22456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259907407407407" calcext:value-type="float">
            <text:p>0,00259907407407407000</text:p>
          </table:table-cell>
          <table:table-cell table:formula="of:=[.D804]-[.D80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28" office:value-type="float" office:value="22484" calcext:value-type="float">
            <text:p>22484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260231481481481" calcext:value-type="float">
            <text:p>0,00260231481481481000</text:p>
          </table:table-cell>
          <table:table-cell table:formula="of:=[.D805]-[.D80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28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260555555555556" calcext:value-type="float">
            <text:p>0,00260555555555556000</text:p>
          </table:table-cell>
          <table:table-cell table:formula="of:=[.D806]-[.D80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28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26087962962963" calcext:value-type="float">
            <text:p>0,00260879629629630000</text:p>
          </table:table-cell>
          <table:table-cell table:formula="of:=[.D807]-[.D80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28" office:value-type="float" office:value="22568" calcext:value-type="float">
            <text:p>22568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261203703703704" calcext:value-type="float">
            <text:p>0,00261203703703704000</text:p>
          </table:table-cell>
          <table:table-cell table:formula="of:=[.D808]-[.D80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28" office:value-type="float" office:value="22596" calcext:value-type="float">
            <text:p>22596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261527777777778" calcext:value-type="float">
            <text:p>0,00261527777777778000</text:p>
          </table:table-cell>
          <table:table-cell table:formula="of:=[.D809]-[.D808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28" office:value-type="float" office:value="22624" calcext:value-type="float">
            <text:p>22624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261851851851852" calcext:value-type="float">
            <text:p>0,00261851851851852000</text:p>
          </table:table-cell>
          <table:table-cell table:formula="of:=[.D810]-[.D80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28" office:value-type="float" office:value="22652" calcext:value-type="float">
            <text:p>22652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262175925925926" calcext:value-type="float">
            <text:p>0,00262175925925926000</text:p>
          </table:table-cell>
          <table:table-cell table:formula="of:=[.D811]-[.D81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28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2625" calcext:value-type="float">
            <text:p>0,00262500000000000000</text:p>
          </table:table-cell>
          <table:table-cell table:formula="of:=[.D812]-[.D81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28" office:value-type="float" office:value="22708" calcext:value-type="float">
            <text:p>22708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262824074074074" calcext:value-type="float">
            <text:p>0,00262824074074074000</text:p>
          </table:table-cell>
          <table:table-cell table:formula="of:=[.D813]-[.D81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28" office:value-type="float" office:value="22736" calcext:value-type="float">
            <text:p>22736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263148148148148" calcext:value-type="float">
            <text:p>0,00263148148148148000</text:p>
          </table:table-cell>
          <table:table-cell table:formula="of:=[.D814]-[.D81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28" office:value-type="float" office:value="22764" calcext:value-type="float">
            <text:p>22764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263472222222222" calcext:value-type="float">
            <text:p>0,00263472222222222000</text:p>
          </table:table-cell>
          <table:table-cell table:formula="of:=[.D815]-[.D81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28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263796296296296" calcext:value-type="float">
            <text:p>0,00263796296296296000</text:p>
          </table:table-cell>
          <table:table-cell table:formula="of:=[.D816]-[.D81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28" office:value-type="float" office:value="22820" calcext:value-type="float">
            <text:p>22820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26412037037037" calcext:value-type="float">
            <text:p>0,00264120370370370000</text:p>
          </table:table-cell>
          <table:table-cell table:formula="of:=[.D817]-[.D81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28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264444444444444" calcext:value-type="float">
            <text:p>0,00264444444444444000</text:p>
          </table:table-cell>
          <table:table-cell table:formula="of:=[.D818]-[.D81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28" office:value-type="float" office:value="22876" calcext:value-type="float">
            <text:p>22876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264768518518519" calcext:value-type="float">
            <text:p>0,00264768518518519000</text:p>
          </table:table-cell>
          <table:table-cell table:formula="of:=[.D819]-[.D81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28" office:value-type="float" office:value="22904" calcext:value-type="float">
            <text:p>22904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265092592592593" calcext:value-type="float">
            <text:p>0,00265092592592593000</text:p>
          </table:table-cell>
          <table:table-cell table:formula="of:=[.D820]-[.D81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28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265416666666667" calcext:value-type="float">
            <text:p>0,00265416666666667000</text:p>
          </table:table-cell>
          <table:table-cell table:formula="of:=[.D821]-[.D82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28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265740740740741" calcext:value-type="float">
            <text:p>0,00265740740740741000</text:p>
          </table:table-cell>
          <table:table-cell table:formula="of:=[.D822]-[.D82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28" office:value-type="float" office:value="22988" calcext:value-type="float">
            <text:p>22988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266064814814815" calcext:value-type="float">
            <text:p>0,00266064814814815000</text:p>
          </table:table-cell>
          <table:table-cell table:formula="of:=[.D823]-[.D82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28" office:value-type="float" office:value="23016" calcext:value-type="float">
            <text:p>23016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266388888888889" calcext:value-type="float">
            <text:p>0,00266388888888889000</text:p>
          </table:table-cell>
          <table:table-cell table:formula="of:=[.D824]-[.D82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28" office:value-type="float" office:value="23044" calcext:value-type="float">
            <text:p>23044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266712962962963" calcext:value-type="float">
            <text:p>0,00266712962962963000</text:p>
          </table:table-cell>
          <table:table-cell table:formula="of:=[.D825]-[.D82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28" office:value-type="float" office:value="23072" calcext:value-type="float">
            <text:p>23072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267037037037037" calcext:value-type="float">
            <text:p>0,00267037037037037000</text:p>
          </table:table-cell>
          <table:table-cell table:formula="of:=[.D826]-[.D82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28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267361111111111" calcext:value-type="float">
            <text:p>0,00267361111111111000</text:p>
          </table:table-cell>
          <table:table-cell table:formula="of:=[.D827]-[.D82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28" office:value-type="float" office:value="23128" calcext:value-type="float">
            <text:p>23128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267685185185185" calcext:value-type="float">
            <text:p>0,00267685185185185000</text:p>
          </table:table-cell>
          <table:table-cell table:formula="of:=[.D828]-[.D82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28" office:value-type="float" office:value="23156" calcext:value-type="float">
            <text:p>23156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268009259259259" calcext:value-type="float">
            <text:p>0,00268009259259259000</text:p>
          </table:table-cell>
          <table:table-cell table:formula="of:=[.D829]-[.D82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28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268333333333333" calcext:value-type="float">
            <text:p>0,00268333333333333000</text:p>
          </table:table-cell>
          <table:table-cell table:formula="of:=[.D830]-[.D82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28" office:value-type="float" office:value="23212" calcext:value-type="float">
            <text:p>23212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268657407407407" calcext:value-type="float">
            <text:p>0,00268657407407407000</text:p>
          </table:table-cell>
          <table:table-cell table:formula="of:=[.D831]-[.D830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28" office:value-type="float" office:value="23240" calcext:value-type="float">
            <text:p>2324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268981481481482" calcext:value-type="float">
            <text:p>0,00268981481481482000</text:p>
          </table:table-cell>
          <table:table-cell table:formula="of:=[.D832]-[.D83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28" office:value-type="float" office:value="23268" calcext:value-type="float">
            <text:p>23268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269305555555556" calcext:value-type="float">
            <text:p>0,00269305555555556000</text:p>
          </table:table-cell>
          <table:table-cell table:formula="of:=[.D833]-[.D83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28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26962962962963" calcext:value-type="float">
            <text:p>0,00269629629629630000</text:p>
          </table:table-cell>
          <table:table-cell table:formula="of:=[.D834]-[.D83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28" office:value-type="float" office:value="23324" calcext:value-type="float">
            <text:p>23324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269953703703704" calcext:value-type="float">
            <text:p>0,00269953703703704000</text:p>
          </table:table-cell>
          <table:table-cell table:formula="of:=[.D835]-[.D83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28" office:value-type="float" office:value="23352" calcext:value-type="float">
            <text:p>23352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270277777777778" calcext:value-type="float">
            <text:p>0,00270277777777778000</text:p>
          </table:table-cell>
          <table:table-cell table:formula="of:=[.D836]-[.D83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28" office:value-type="float" office:value="23380" calcext:value-type="float">
            <text:p>23380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270601851851852" calcext:value-type="float">
            <text:p>0,00270601851851852000</text:p>
          </table:table-cell>
          <table:table-cell table:formula="of:=[.D837]-[.D83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28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270925925925926" calcext:value-type="float">
            <text:p>0,00270925925925926000</text:p>
          </table:table-cell>
          <table:table-cell table:formula="of:=[.D838]-[.D83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28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27125" calcext:value-type="float">
            <text:p>0,00271250000000000000</text:p>
          </table:table-cell>
          <table:table-cell table:formula="of:=[.D839]-[.D83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28" office:value-type="float" office:value="23464" calcext:value-type="float">
            <text:p>23464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271574074074074" calcext:value-type="float">
            <text:p>0,00271574074074074000</text:p>
          </table:table-cell>
          <table:table-cell table:formula="of:=[.D840]-[.D83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28" office:value-type="float" office:value="23492" calcext:value-type="float">
            <text:p>23492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271898148148148" calcext:value-type="float">
            <text:p>0,00271898148148148000</text:p>
          </table:table-cell>
          <table:table-cell table:formula="of:=[.D841]-[.D84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28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272222222222222" calcext:value-type="float">
            <text:p>0,00272222222222222000</text:p>
          </table:table-cell>
          <table:table-cell table:formula="of:=[.D842]-[.D84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28" office:value-type="float" office:value="23548" calcext:value-type="float">
            <text:p>23548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272546296296296" calcext:value-type="float">
            <text:p>0,00272546296296296000</text:p>
          </table:table-cell>
          <table:table-cell table:formula="of:=[.D843]-[.D842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28" office:value-type="float" office:value="23576" calcext:value-type="float">
            <text:p>23576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27287037037037" calcext:value-type="float">
            <text:p>0,00272870370370370000</text:p>
          </table:table-cell>
          <table:table-cell table:formula="of:=[.D844]-[.D84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28" office:value-type="float" office:value="23604" calcext:value-type="float">
            <text:p>23604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273194444444444" calcext:value-type="float">
            <text:p>0,00273194444444444000</text:p>
          </table:table-cell>
          <table:table-cell table:formula="of:=[.D845]-[.D84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28" office:value-type="float" office:value="23632" calcext:value-type="float">
            <text:p>23632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273518518518519" calcext:value-type="float">
            <text:p>0,00273518518518519000</text:p>
          </table:table-cell>
          <table:table-cell table:formula="of:=[.D846]-[.D84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28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273842592592593" calcext:value-type="float">
            <text:p>0,00273842592592593000</text:p>
          </table:table-cell>
          <table:table-cell table:formula="of:=[.D847]-[.D84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28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274166666666667" calcext:value-type="float">
            <text:p>0,00274166666666667000</text:p>
          </table:table-cell>
          <table:table-cell table:formula="of:=[.D848]-[.D84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28" office:value-type="float" office:value="23716" calcext:value-type="float">
            <text:p>23716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274490740740741" calcext:value-type="float">
            <text:p>0,00274490740740741000</text:p>
          </table:table-cell>
          <table:table-cell table:formula="of:=[.D849]-[.D848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28" office:value-type="float" office:value="23744" calcext:value-type="float">
            <text:p>23744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274814814814815" calcext:value-type="float">
            <text:p>0,00274814814814815000</text:p>
          </table:table-cell>
          <table:table-cell table:formula="of:=[.D850]-[.D849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28" office:value-type="float" office:value="23772" calcext:value-type="float">
            <text:p>23772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275138888888889" calcext:value-type="float">
            <text:p>0,00275138888888889000</text:p>
          </table:table-cell>
          <table:table-cell table:formula="of:=[.D851]-[.D850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28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275462962962963" calcext:value-type="float">
            <text:p>0,00275462962962963000</text:p>
          </table:table-cell>
          <table:table-cell table:formula="of:=[.D852]-[.D851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28" office:value-type="float" office:value="23828" calcext:value-type="float">
            <text:p>23828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275787037037037" calcext:value-type="float">
            <text:p>0,00275787037037037000</text:p>
          </table:table-cell>
          <table:table-cell table:formula="of:=[.D853]-[.D852]" office:value-type="float" office:value="0.00000324074074074116" calcext:value-type="float">
            <text:p>0,000003240740740741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28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276111111111111" calcext:value-type="float">
            <text:p>0,00276111111111111000</text:p>
          </table:table-cell>
          <table:table-cell table:formula="of:=[.D854]-[.D853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28" office:value-type="float" office:value="23884" calcext:value-type="float">
            <text:p>23884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276435185185185" calcext:value-type="float">
            <text:p>0,00276435185185185000</text:p>
          </table:table-cell>
          <table:table-cell table:formula="of:=[.D855]-[.D854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28" office:value-type="float" office:value="23912" calcext:value-type="float">
            <text:p>23912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276759259259259" calcext:value-type="float">
            <text:p>0,00276759259259259000</text:p>
          </table:table-cell>
          <table:table-cell table:formula="of:=[.D856]-[.D855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28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277083333333333" calcext:value-type="float">
            <text:p>0,00277083333333333000</text:p>
          </table:table-cell>
          <table:table-cell table:formula="of:=[.D857]-[.D856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28" office:value-type="float" office:value="23968" calcext:value-type="float">
            <text:p>23968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277407407407407" calcext:value-type="float">
            <text:p>0,00277407407407407000</text:p>
          </table:table-cell>
          <table:table-cell table:formula="of:=[.D858]-[.D857]" office:value-type="float" office:value="0.00000324074074074072" calcext:value-type="float">
            <text:p>0,0000032407407407407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28" office:value-type="float" office:value="23996" calcext:value-type="float">
            <text:p>23996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277731481481482" calcext:value-type="float">
            <text:p>0,00277731481481482000</text:p>
          </table:table-cell>
          <table:table-cell table:formula="of:=#REF!-[.D858]" office:value-type="string" office:string-value="" calcext:value-type="error">
            <text:p>#REF!</text:p>
          </table:table-cell>
        </table:table-row>
        <table:table-row table:style-name="ro1" table:number-rows-repeated="10477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4:52.215767804</meta:creation-date>
    <dc:date>2026-05-17T15:55:03.166252983</dc:date>
    <meta:editing-duration>PT12S</meta:editing-duration>
    <meta:editing-cycles>1</meta:editing-cycles>
    <meta:document-statistic meta:table-count="1" meta:cell-count="4290" meta:object-count="0"/>
    <meta:generator>LibreOffice/24.2.7.2$Linux_X86_64 LibreOffice_project/420$Build-2</meta:generator>
  </office:meta>
</office:document-meta>
</file>