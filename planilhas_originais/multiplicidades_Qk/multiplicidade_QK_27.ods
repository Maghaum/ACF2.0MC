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9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2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27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3125" calcext:value-type="float">
            <text:p>0,00000312500000000000</text:p>
          </table:table-cell>
          <table:table-cell table:formula="of:=[.D3]-[.D2]" office:value-type="float" office:value="0.000003125" calcext:value-type="float">
            <text:p>0,0000031250000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27" office:value-type="float" office:value="54" calcext:value-type="float">
            <text:p>54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0625" calcext:value-type="float">
            <text:p>0,00000625000000000000</text:p>
          </table:table-cell>
          <table:table-cell table:formula="of:=[.D4]-[.D3]" office:value-type="float" office:value="0.000003125" calcext:value-type="float">
            <text:p>0,00000312500000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27" office:value-type="float" office:value="81" calcext:value-type="float">
            <text:p>81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09375" calcext:value-type="float">
            <text:p>0,00000937500000000000</text:p>
          </table:table-cell>
          <table:table-cell table:formula="of:=[.D5]-[.D4]" office:value-type="float" office:value="0.000003125" calcext:value-type="float">
            <text:p>0,00000312500000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27" office:value-type="float" office:value="108" calcext:value-type="float">
            <text:p>108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125" calcext:value-type="float">
            <text:p>0,00001250000000000000</text:p>
          </table:table-cell>
          <table:table-cell table:formula="of:=[.D6]-[.D5]" office:value-type="float" office:value="0.000003125" calcext:value-type="float">
            <text:p>0,000003125000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27" office:value-type="float" office:value="135" calcext:value-type="float">
            <text:p>13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15625" calcext:value-type="float">
            <text:p>0,00001562500000000000</text:p>
          </table:table-cell>
          <table:table-cell table:formula="of:=[.D7]-[.D6]" office:value-type="float" office:value="0.000003125" calcext:value-type="float">
            <text:p>0,00000312500000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27" office:value-type="float" office:value="162" calcext:value-type="float">
            <text:p>162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1875" calcext:value-type="float">
            <text:p>0,00001875000000000000</text:p>
          </table:table-cell>
          <table:table-cell table:formula="of:=[.D8]-[.D7]" office:value-type="float" office:value="0.000003125" calcext:value-type="float">
            <text:p>0,00000312500000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27" office:value-type="float" office:value="189" calcext:value-type="float">
            <text:p>189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21875" calcext:value-type="float">
            <text:p>0,00002187500000000000</text:p>
          </table:table-cell>
          <table:table-cell table:formula="of:=[.D9]-[.D8]" office:value-type="float" office:value="0.000003125" calcext:value-type="float">
            <text:p>0,000003125000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27" office:value-type="float" office:value="216" calcext:value-type="float">
            <text:p>216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25" calcext:value-type="float">
            <text:p>0,00002500000000000000</text:p>
          </table:table-cell>
          <table:table-cell table:formula="of:=[.D10]-[.D9]" office:value-type="float" office:value="0.000003125" calcext:value-type="float">
            <text:p>0,00000312500000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27" office:value-type="float" office:value="243" calcext:value-type="float">
            <text:p>243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28125" calcext:value-type="float">
            <text:p>0,00002812500000000000</text:p>
          </table:table-cell>
          <table:table-cell table:formula="of:=[.D11]-[.D10]" office:value-type="float" office:value="0.000003125" calcext:value-type="float">
            <text:p>0,00000312500000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27" office:value-type="float" office:value="270" calcext:value-type="float">
            <text:p>27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3125" calcext:value-type="float">
            <text:p>0,00003125000000000000</text:p>
          </table:table-cell>
          <table:table-cell table:formula="of:=[.D12]-[.D11]" office:value-type="float" office:value="0.000003125" calcext:value-type="float">
            <text:p>0,0000031250000000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27" office:value-type="float" office:value="297" calcext:value-type="float">
            <text:p>297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34375" calcext:value-type="float">
            <text:p>0,00003437500000000000</text:p>
          </table:table-cell>
          <table:table-cell table:formula="of:=[.D13]-[.D12]" office:value-type="float" office:value="0.00000312499999999999" calcext:value-type="float">
            <text:p>0,00000312499999999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27" office:value-type="float" office:value="324" calcext:value-type="float">
            <text:p>324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375" calcext:value-type="float">
            <text:p>0,00003750000000000000</text:p>
          </table:table-cell>
          <table:table-cell table:formula="of:=[.D14]-[.D13]" office:value-type="float" office:value="0.000003125" calcext:value-type="float">
            <text:p>0,0000031250000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27" office:value-type="float" office:value="351" calcext:value-type="float">
            <text:p>351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40625" calcext:value-type="float">
            <text:p>0,00004062500000000000</text:p>
          </table:table-cell>
          <table:table-cell table:formula="of:=[.D15]-[.D14]" office:value-type="float" office:value="0.000003125" calcext:value-type="float">
            <text:p>0,0000031250000000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27" office:value-type="float" office:value="378" calcext:value-type="float">
            <text:p>378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4375" calcext:value-type="float">
            <text:p>0,00004375000000000000</text:p>
          </table:table-cell>
          <table:table-cell table:formula="of:=[.D16]-[.D15]" office:value-type="float" office:value="0.000003125" calcext:value-type="float">
            <text:p>0,0000031250000000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27" office:value-type="float" office:value="405" calcext:value-type="float">
            <text:p>40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46875" calcext:value-type="float">
            <text:p>0,00004687500000000000</text:p>
          </table:table-cell>
          <table:table-cell table:formula="of:=[.D17]-[.D16]" office:value-type="float" office:value="0.000003125" calcext:value-type="float">
            <text:p>0,00000312500000000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27" office:value-type="float" office:value="432" calcext:value-type="float">
            <text:p>432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5" calcext:value-type="float">
            <text:p>0,00005000000000000000</text:p>
          </table:table-cell>
          <table:table-cell table:formula="of:=[.D18]-[.D17]" office:value-type="float" office:value="0.00000312499999999999" calcext:value-type="float">
            <text:p>0,000003124999999999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27" office:value-type="float" office:value="459" calcext:value-type="float">
            <text:p>459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053125" calcext:value-type="float">
            <text:p>0,00005312500000000000</text:p>
          </table:table-cell>
          <table:table-cell table:formula="of:=[.D19]-[.D18]" office:value-type="float" office:value="0.000003125" calcext:value-type="float">
            <text:p>0,00000312500000000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27" office:value-type="float" office:value="486" calcext:value-type="float">
            <text:p>486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05625" calcext:value-type="float">
            <text:p>0,00005625000000000000</text:p>
          </table:table-cell>
          <table:table-cell table:formula="of:=[.D20]-[.D19]" office:value-type="float" office:value="0.000003125" calcext:value-type="float">
            <text:p>0,0000031250000000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27" office:value-type="float" office:value="513" calcext:value-type="float">
            <text:p>513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059375" calcext:value-type="float">
            <text:p>0,00005937500000000000</text:p>
          </table:table-cell>
          <table:table-cell table:formula="of:=[.D21]-[.D20]" office:value-type="float" office:value="0.000003125" calcext:value-type="float">
            <text:p>0,00000312500000000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27" office:value-type="float" office:value="540" calcext:value-type="float">
            <text:p>54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0625" calcext:value-type="float">
            <text:p>0,00006250000000000000</text:p>
          </table:table-cell>
          <table:table-cell table:formula="of:=[.D22]-[.D21]" office:value-type="float" office:value="0.00000312499999999999" calcext:value-type="float">
            <text:p>0,000003124999999999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27" office:value-type="float" office:value="567" calcext:value-type="float">
            <text:p>567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065625" calcext:value-type="float">
            <text:p>0,00006562500000000000</text:p>
          </table:table-cell>
          <table:table-cell table:formula="of:=[.D23]-[.D22]" office:value-type="float" office:value="0.00000312500000000001" calcext:value-type="float">
            <text:p>0,000003125000000000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27" office:value-type="float" office:value="594" calcext:value-type="float">
            <text:p>594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06875" calcext:value-type="float">
            <text:p>0,00006875000000000000</text:p>
          </table:table-cell>
          <table:table-cell table:formula="of:=[.D24]-[.D23]" office:value-type="float" office:value="0.00000312499999999999" calcext:value-type="float">
            <text:p>0,000003124999999999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27" office:value-type="float" office:value="621" calcext:value-type="float">
            <text:p>621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071875" calcext:value-type="float">
            <text:p>0,00007187500000000000</text:p>
          </table:table-cell>
          <table:table-cell table:formula="of:=[.D25]-[.D24]" office:value-type="float" office:value="0.00000312499999999999" calcext:value-type="float">
            <text:p>0,000003124999999999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27" office:value-type="float" office:value="648" calcext:value-type="float">
            <text:p>648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075" calcext:value-type="float">
            <text:p>0,00007500000000000000</text:p>
          </table:table-cell>
          <table:table-cell table:formula="of:=[.D26]-[.D25]" office:value-type="float" office:value="0.00000312500000000001" calcext:value-type="float">
            <text:p>0,000003125000000000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27" office:value-type="float" office:value="675" calcext:value-type="float">
            <text:p>67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078125" calcext:value-type="float">
            <text:p>0,00007812500000000000</text:p>
          </table:table-cell>
          <table:table-cell table:formula="of:=[.D27]-[.D26]" office:value-type="float" office:value="0.00000312499999999999" calcext:value-type="float">
            <text:p>0,000003124999999999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27" office:value-type="float" office:value="702" calcext:value-type="float">
            <text:p>702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08125" calcext:value-type="float">
            <text:p>0,00008125000000000000</text:p>
          </table:table-cell>
          <table:table-cell table:formula="of:=[.D28]-[.D27]" office:value-type="float" office:value="0.00000312500000000001" calcext:value-type="float">
            <text:p>0,000003125000000000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27" office:value-type="float" office:value="729" calcext:value-type="float">
            <text:p>729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084375" calcext:value-type="float">
            <text:p>0,00008437500000000000</text:p>
          </table:table-cell>
          <table:table-cell table:formula="of:=[.D29]-[.D28]" office:value-type="float" office:value="0.00000312499999999999" calcext:value-type="float">
            <text:p>0,0000031249999999999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27" office:value-type="float" office:value="756" calcext:value-type="float">
            <text:p>756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0875" calcext:value-type="float">
            <text:p>0,00008750000000000000</text:p>
          </table:table-cell>
          <table:table-cell table:formula="of:=[.D30]-[.D29]" office:value-type="float" office:value="0.00000312499999999999" calcext:value-type="float">
            <text:p>0,000003124999999999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27" office:value-type="float" office:value="783" calcext:value-type="float">
            <text:p>783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090625" calcext:value-type="float">
            <text:p>0,00009062500000000000</text:p>
          </table:table-cell>
          <table:table-cell table:formula="of:=[.D31]-[.D30]" office:value-type="float" office:value="0.00000312500000000001" calcext:value-type="float">
            <text:p>0,000003125000000000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27" office:value-type="float" office:value="810" calcext:value-type="float">
            <text:p>81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09375" calcext:value-type="float">
            <text:p>0,00009375000000000000</text:p>
          </table:table-cell>
          <table:table-cell table:formula="of:=[.D32]-[.D31]" office:value-type="float" office:value="0.00000312499999999999" calcext:value-type="float">
            <text:p>0,000003124999999999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27" office:value-type="float" office:value="837" calcext:value-type="float">
            <text:p>837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096875" calcext:value-type="float">
            <text:p>0,00009687500000000000</text:p>
          </table:table-cell>
          <table:table-cell table:formula="of:=[.D33]-[.D32]" office:value-type="float" office:value="0.00000312500000000001" calcext:value-type="float">
            <text:p>0,000003125000000000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27" office:value-type="float" office:value="864" calcext:value-type="float">
            <text:p>864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1" calcext:value-type="float">
            <text:p>0,00010000000000000000</text:p>
          </table:table-cell>
          <table:table-cell table:formula="of:=[.D34]-[.D33]" office:value-type="float" office:value="0.00000312499999999999" calcext:value-type="float">
            <text:p>0,0000031249999999999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27" office:value-type="float" office:value="891" calcext:value-type="float">
            <text:p>891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103125" calcext:value-type="float">
            <text:p>0,00010312500000000000</text:p>
          </table:table-cell>
          <table:table-cell table:formula="of:=[.D35]-[.D34]" office:value-type="float" office:value="0.00000312499999999999" calcext:value-type="float">
            <text:p>0,0000031249999999999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27" office:value-type="float" office:value="918" calcext:value-type="float">
            <text:p>918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10625" calcext:value-type="float">
            <text:p>0,00010625000000000000</text:p>
          </table:table-cell>
          <table:table-cell table:formula="of:=[.D36]-[.D35]" office:value-type="float" office:value="0.00000312500000000001" calcext:value-type="float">
            <text:p>0,000003125000000000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27" office:value-type="float" office:value="945" calcext:value-type="float">
            <text:p>94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109375" calcext:value-type="float">
            <text:p>0,00010937500000000000</text:p>
          </table:table-cell>
          <table:table-cell table:formula="of:=[.D37]-[.D36]" office:value-type="float" office:value="0.00000312499999999999" calcext:value-type="float">
            <text:p>0,0000031249999999999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27" office:value-type="float" office:value="972" calcext:value-type="float">
            <text:p>972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1125" calcext:value-type="float">
            <text:p>0,00011250000000000000</text:p>
          </table:table-cell>
          <table:table-cell table:formula="of:=[.D38]-[.D37]" office:value-type="float" office:value="0.00000312500000000001" calcext:value-type="float">
            <text:p>0,000003125000000000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27" office:value-type="float" office:value="999" calcext:value-type="float">
            <text:p>999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115625" calcext:value-type="float">
            <text:p>0,00011562500000000000</text:p>
          </table:table-cell>
          <table:table-cell table:formula="of:=[.D39]-[.D38]" office:value-type="float" office:value="0.00000312499999999999" calcext:value-type="float">
            <text:p>0,000003124999999999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27" office:value-type="float" office:value="1026" calcext:value-type="float">
            <text:p>1026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11875" calcext:value-type="float">
            <text:p>0,00011875000000000000</text:p>
          </table:table-cell>
          <table:table-cell table:formula="of:=[.D40]-[.D39]" office:value-type="float" office:value="0.00000312499999999999" calcext:value-type="float">
            <text:p>0,0000031249999999999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27" office:value-type="float" office:value="1053" calcext:value-type="float">
            <text:p>1053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121875" calcext:value-type="float">
            <text:p>0,00012187500000000000</text:p>
          </table:table-cell>
          <table:table-cell table:formula="of:=[.D41]-[.D40]" office:value-type="float" office:value="0.00000312500000000001" calcext:value-type="float">
            <text:p>0,000003125000000000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27" office:value-type="float" office:value="1080" calcext:value-type="float">
            <text:p>108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125" calcext:value-type="float">
            <text:p>0,00012500000000000000</text:p>
          </table:table-cell>
          <table:table-cell table:formula="of:=[.D42]-[.D41]" office:value-type="float" office:value="0.00000312500000000001" calcext:value-type="float">
            <text:p>0,000003125000000000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27" office:value-type="float" office:value="1107" calcext:value-type="float">
            <text:p>1107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128125" calcext:value-type="float">
            <text:p>0,00012812500000000000</text:p>
          </table:table-cell>
          <table:table-cell table:formula="of:=[.D43]-[.D42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27" office:value-type="float" office:value="1134" calcext:value-type="float">
            <text:p>1134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13125" calcext:value-type="float">
            <text:p>0,00013125000000000000</text:p>
          </table:table-cell>
          <table:table-cell table:formula="of:=[.D44]-[.D43]" office:value-type="float" office:value="0.00000312500000000001" calcext:value-type="float">
            <text:p>0,000003125000000000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27" office:value-type="float" office:value="1161" calcext:value-type="float">
            <text:p>1161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134375" calcext:value-type="float">
            <text:p>0,00013437500000000000</text:p>
          </table:table-cell>
          <table:table-cell table:formula="of:=[.D45]-[.D44]" office:value-type="float" office:value="0.00000312500000000001" calcext:value-type="float">
            <text:p>0,000003125000000000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27" office:value-type="float" office:value="1188" calcext:value-type="float">
            <text:p>1188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1375" calcext:value-type="float">
            <text:p>0,00013750000000000000</text:p>
          </table:table-cell>
          <table:table-cell table:formula="of:=[.D46]-[.D45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27" office:value-type="float" office:value="1215" calcext:value-type="float">
            <text:p>121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140625" calcext:value-type="float">
            <text:p>0,00014062500000000000</text:p>
          </table:table-cell>
          <table:table-cell table:formula="of:=[.D47]-[.D46]" office:value-type="float" office:value="0.00000312500000000001" calcext:value-type="float">
            <text:p>0,000003125000000000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27" office:value-type="float" office:value="1242" calcext:value-type="float">
            <text:p>1242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14375" calcext:value-type="float">
            <text:p>0,00014375000000000000</text:p>
          </table:table-cell>
          <table:table-cell table:formula="of:=[.D48]-[.D47]" office:value-type="float" office:value="0.00000312500000000001" calcext:value-type="float">
            <text:p>0,000003125000000000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27" office:value-type="float" office:value="1269" calcext:value-type="float">
            <text:p>1269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146875" calcext:value-type="float">
            <text:p>0,00014687500000000000</text:p>
          </table:table-cell>
          <table:table-cell table:formula="of:=[.D49]-[.D48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27" office:value-type="float" office:value="1296" calcext:value-type="float">
            <text:p>1296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15" calcext:value-type="float">
            <text:p>0,00015000000000000000</text:p>
          </table:table-cell>
          <table:table-cell table:formula="of:=[.D50]-[.D49]" office:value-type="float" office:value="0.00000312500000000001" calcext:value-type="float">
            <text:p>0,000003125000000000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27" office:value-type="float" office:value="1323" calcext:value-type="float">
            <text:p>1323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153125" calcext:value-type="float">
            <text:p>0,00015312500000000000</text:p>
          </table:table-cell>
          <table:table-cell table:formula="of:=[.D51]-[.D50]" office:value-type="float" office:value="0.00000312500000000001" calcext:value-type="float">
            <text:p>0,000003125000000000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27" office:value-type="float" office:value="1350" calcext:value-type="float">
            <text:p>13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15625" calcext:value-type="float">
            <text:p>0,00015625000000000000</text:p>
          </table:table-cell>
          <table:table-cell table:formula="of:=[.D52]-[.D51]" office:value-type="float" office:value="0.00000312500000000001" calcext:value-type="float">
            <text:p>0,000003125000000000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27" office:value-type="float" office:value="1377" calcext:value-type="float">
            <text:p>1377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159375" calcext:value-type="float">
            <text:p>0,00015937500000000000</text:p>
          </table:table-cell>
          <table:table-cell table:formula="of:=[.D53]-[.D52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27" office:value-type="float" office:value="1404" calcext:value-type="float">
            <text:p>1404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1625" calcext:value-type="float">
            <text:p>0,00016250000000000000</text:p>
          </table:table-cell>
          <table:table-cell table:formula="of:=[.D54]-[.D53]" office:value-type="float" office:value="0.00000312500000000001" calcext:value-type="float">
            <text:p>0,0000031250000000000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27" office:value-type="float" office:value="1431" calcext:value-type="float">
            <text:p>1431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165625" calcext:value-type="float">
            <text:p>0,00016562500000000000</text:p>
          </table:table-cell>
          <table:table-cell table:formula="of:=[.D55]-[.D54]" office:value-type="float" office:value="0.00000312500000000001" calcext:value-type="float">
            <text:p>0,000003125000000000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27" office:value-type="float" office:value="1458" calcext:value-type="float">
            <text:p>1458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16875" calcext:value-type="float">
            <text:p>0,00016875000000000000</text:p>
          </table:table-cell>
          <table:table-cell table:formula="of:=[.D56]-[.D55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27" office:value-type="float" office:value="1485" calcext:value-type="float">
            <text:p>148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171875" calcext:value-type="float">
            <text:p>0,00017187500000000000</text:p>
          </table:table-cell>
          <table:table-cell table:formula="of:=[.D57]-[.D56]" office:value-type="float" office:value="0.00000312500000000001" calcext:value-type="float">
            <text:p>0,000003125000000000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27" office:value-type="float" office:value="1512" calcext:value-type="float">
            <text:p>1512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175" calcext:value-type="float">
            <text:p>0,00017500000000000000</text:p>
          </table:table-cell>
          <table:table-cell table:formula="of:=[.D58]-[.D57]" office:value-type="float" office:value="0.00000312500000000001" calcext:value-type="float">
            <text:p>0,000003125000000000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27" office:value-type="float" office:value="1539" calcext:value-type="float">
            <text:p>1539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178125" calcext:value-type="float">
            <text:p>0,00017812500000000000</text:p>
          </table:table-cell>
          <table:table-cell table:formula="of:=[.D59]-[.D58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27" office:value-type="float" office:value="1566" calcext:value-type="float">
            <text:p>1566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18125" calcext:value-type="float">
            <text:p>0,00018125000000000000</text:p>
          </table:table-cell>
          <table:table-cell table:formula="of:=[.D60]-[.D59]" office:value-type="float" office:value="0.00000312500000000001" calcext:value-type="float">
            <text:p>0,000003125000000000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27" office:value-type="float" office:value="1593" calcext:value-type="float">
            <text:p>1593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184375" calcext:value-type="float">
            <text:p>0,00018437500000000000</text:p>
          </table:table-cell>
          <table:table-cell table:formula="of:=[.D61]-[.D60]" office:value-type="float" office:value="0.00000312500000000001" calcext:value-type="float">
            <text:p>0,000003125000000000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27" office:value-type="float" office:value="1620" calcext:value-type="float">
            <text:p>162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1875" calcext:value-type="float">
            <text:p>0,00018750000000000000</text:p>
          </table:table-cell>
          <table:table-cell table:formula="of:=[.D62]-[.D61]" office:value-type="float" office:value="0.00000312500000000001" calcext:value-type="float">
            <text:p>0,000003125000000000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27" office:value-type="float" office:value="1647" calcext:value-type="float">
            <text:p>1647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190625" calcext:value-type="float">
            <text:p>0,00019062500000000000</text:p>
          </table:table-cell>
          <table:table-cell table:formula="of:=[.D63]-[.D62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27" office:value-type="float" office:value="1674" calcext:value-type="float">
            <text:p>1674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19375" calcext:value-type="float">
            <text:p>0,00019375000000000000</text:p>
          </table:table-cell>
          <table:table-cell table:formula="of:=[.D64]-[.D63]" office:value-type="float" office:value="0.00000312500000000001" calcext:value-type="float">
            <text:p>0,000003125000000000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27" office:value-type="float" office:value="1701" calcext:value-type="float">
            <text:p>1701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196875" calcext:value-type="float">
            <text:p>0,00019687500000000000</text:p>
          </table:table-cell>
          <table:table-cell table:formula="of:=[.D65]-[.D64]" office:value-type="float" office:value="0.00000312500000000001" calcext:value-type="float">
            <text:p>0,000003125000000000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27" office:value-type="float" office:value="1728" calcext:value-type="float">
            <text:p>1728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2" calcext:value-type="float">
            <text:p>0,00020000000000000000</text:p>
          </table:table-cell>
          <table:table-cell table:formula="of:=[.D66]-[.D65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27" office:value-type="float" office:value="1755" calcext:value-type="float">
            <text:p>175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203125" calcext:value-type="float">
            <text:p>0,00020312500000000000</text:p>
          </table:table-cell>
          <table:table-cell table:formula="of:=[.D67]-[.D66]" office:value-type="float" office:value="0.00000312500000000001" calcext:value-type="float">
            <text:p>0,000003125000000000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27" office:value-type="float" office:value="1782" calcext:value-type="float">
            <text:p>1782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20625" calcext:value-type="float">
            <text:p>0,00020625000000000000</text:p>
          </table:table-cell>
          <table:table-cell table:formula="of:=[.D68]-[.D67]" office:value-type="float" office:value="0.00000312500000000001" calcext:value-type="float">
            <text:p>0,0000031250000000000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27" office:value-type="float" office:value="1809" calcext:value-type="float">
            <text:p>1809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209375" calcext:value-type="float">
            <text:p>0,00020937500000000000</text:p>
          </table:table-cell>
          <table:table-cell table:formula="of:=[.D69]-[.D68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27" office:value-type="float" office:value="1836" calcext:value-type="float">
            <text:p>1836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2125" calcext:value-type="float">
            <text:p>0,00021250000000000000</text:p>
          </table:table-cell>
          <table:table-cell table:formula="of:=[.D70]-[.D69]" office:value-type="float" office:value="0.00000312500000000001" calcext:value-type="float">
            <text:p>0,000003125000000000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27" office:value-type="float" office:value="1863" calcext:value-type="float">
            <text:p>1863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215625" calcext:value-type="float">
            <text:p>0,00021562500000000000</text:p>
          </table:table-cell>
          <table:table-cell table:formula="of:=[.D71]-[.D70]" office:value-type="float" office:value="0.00000312500000000001" calcext:value-type="float">
            <text:p>0,000003125000000000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27" office:value-type="float" office:value="1890" calcext:value-type="float">
            <text:p>189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21875" calcext:value-type="float">
            <text:p>0,00021875000000000000</text:p>
          </table:table-cell>
          <table:table-cell table:formula="of:=[.D72]-[.D71]" office:value-type="float" office:value="0.00000312500000000001" calcext:value-type="float">
            <text:p>0,000003125000000000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27" office:value-type="float" office:value="1917" calcext:value-type="float">
            <text:p>1917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221875" calcext:value-type="float">
            <text:p>0,00022187500000000000</text:p>
          </table:table-cell>
          <table:table-cell table:formula="of:=[.D73]-[.D72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27" office:value-type="float" office:value="1944" calcext:value-type="float">
            <text:p>1944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225" calcext:value-type="float">
            <text:p>0,00022500000000000000</text:p>
          </table:table-cell>
          <table:table-cell table:formula="of:=[.D74]-[.D73]" office:value-type="float" office:value="0.00000312500000000001" calcext:value-type="float">
            <text:p>0,000003125000000000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27" office:value-type="float" office:value="1971" calcext:value-type="float">
            <text:p>1971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228125" calcext:value-type="float">
            <text:p>0,00022812500000000000</text:p>
          </table:table-cell>
          <table:table-cell table:formula="of:=[.D75]-[.D74]" office:value-type="float" office:value="0.00000312500000000001" calcext:value-type="float">
            <text:p>0,000003125000000000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27" office:value-type="float" office:value="1998" calcext:value-type="float">
            <text:p>1998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23125" calcext:value-type="float">
            <text:p>0,00023125000000000000</text:p>
          </table:table-cell>
          <table:table-cell table:formula="of:=[.D76]-[.D75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27" office:value-type="float" office:value="2025" calcext:value-type="float">
            <text:p>202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234375" calcext:value-type="float">
            <text:p>0,00023437500000000000</text:p>
          </table:table-cell>
          <table:table-cell table:formula="of:=[.D77]-[.D76]" office:value-type="float" office:value="0.00000312500000000001" calcext:value-type="float">
            <text:p>0,000003125000000000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27" office:value-type="float" office:value="2052" calcext:value-type="float">
            <text:p>2052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2375" calcext:value-type="float">
            <text:p>0,00023750000000000000</text:p>
          </table:table-cell>
          <table:table-cell table:formula="of:=[.D78]-[.D77]" office:value-type="float" office:value="0.00000312500000000001" calcext:value-type="float">
            <text:p>0,0000031250000000000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27" office:value-type="float" office:value="2079" calcext:value-type="float">
            <text:p>2079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240625" calcext:value-type="float">
            <text:p>0,00024062500000000000</text:p>
          </table:table-cell>
          <table:table-cell table:formula="of:=[.D79]-[.D78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27" office:value-type="float" office:value="2106" calcext:value-type="float">
            <text:p>2106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24375" calcext:value-type="float">
            <text:p>0,00024375000000000000</text:p>
          </table:table-cell>
          <table:table-cell table:formula="of:=[.D80]-[.D79]" office:value-type="float" office:value="0.00000312500000000004" calcext:value-type="float">
            <text:p>0,0000031250000000000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27" office:value-type="float" office:value="2133" calcext:value-type="float">
            <text:p>2133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246875" calcext:value-type="float">
            <text:p>0,00024687500000000000</text:p>
          </table:table-cell>
          <table:table-cell table:formula="of:=[.D81]-[.D80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27" office:value-type="float" office:value="2160" calcext:value-type="float">
            <text:p>216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25" calcext:value-type="float">
            <text:p>0,00025000000000000000</text:p>
          </table:table-cell>
          <table:table-cell table:formula="of:=[.D82]-[.D81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27" office:value-type="float" office:value="2187" calcext:value-type="float">
            <text:p>2187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253125" calcext:value-type="float">
            <text:p>0,00025312500000000000</text:p>
          </table:table-cell>
          <table:table-cell table:formula="of:=[.D83]-[.D82]" office:value-type="float" office:value="0.00000312500000000004" calcext:value-type="float">
            <text:p>0,0000031250000000000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27" office:value-type="float" office:value="2214" calcext:value-type="float">
            <text:p>2214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25625" calcext:value-type="float">
            <text:p>0,00025625000000000000</text:p>
          </table:table-cell>
          <table:table-cell table:formula="of:=[.D84]-[.D83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27" office:value-type="float" office:value="2241" calcext:value-type="float">
            <text:p>2241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259375" calcext:value-type="float">
            <text:p>0,00025937500000000000</text:p>
          </table:table-cell>
          <table:table-cell table:formula="of:=[.D85]-[.D84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27" office:value-type="float" office:value="2268" calcext:value-type="float">
            <text:p>2268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2625" calcext:value-type="float">
            <text:p>0,00026250000000000000</text:p>
          </table:table-cell>
          <table:table-cell table:formula="of:=[.D86]-[.D85]" office:value-type="float" office:value="0.00000312500000000004" calcext:value-type="float">
            <text:p>0,0000031250000000000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27" office:value-type="float" office:value="2295" calcext:value-type="float">
            <text:p>229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265625" calcext:value-type="float">
            <text:p>0,00026562500000000000</text:p>
          </table:table-cell>
          <table:table-cell table:formula="of:=[.D87]-[.D86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27" office:value-type="float" office:value="2322" calcext:value-type="float">
            <text:p>2322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26875" calcext:value-type="float">
            <text:p>0,00026875000000000000</text:p>
          </table:table-cell>
          <table:table-cell table:formula="of:=[.D88]-[.D87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27" office:value-type="float" office:value="2349" calcext:value-type="float">
            <text:p>2349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271875" calcext:value-type="float">
            <text:p>0,00027187500000000000</text:p>
          </table:table-cell>
          <table:table-cell table:formula="of:=[.D89]-[.D88]" office:value-type="float" office:value="0.00000312500000000004" calcext:value-type="float">
            <text:p>0,0000031250000000000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27" office:value-type="float" office:value="2376" calcext:value-type="float">
            <text:p>2376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275" calcext:value-type="float">
            <text:p>0,00027500000000000000</text:p>
          </table:table-cell>
          <table:table-cell table:formula="of:=[.D90]-[.D89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27" office:value-type="float" office:value="2403" calcext:value-type="float">
            <text:p>2403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278125" calcext:value-type="float">
            <text:p>0,00027812500000000000</text:p>
          </table:table-cell>
          <table:table-cell table:formula="of:=[.D91]-[.D90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27" office:value-type="float" office:value="2430" calcext:value-type="float">
            <text:p>243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28125" calcext:value-type="float">
            <text:p>0,00028125000000000000</text:p>
          </table:table-cell>
          <table:table-cell table:formula="of:=[.D92]-[.D91]" office:value-type="float" office:value="0.00000312500000000004" calcext:value-type="float">
            <text:p>0,0000031250000000000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27" office:value-type="float" office:value="2457" calcext:value-type="float">
            <text:p>2457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284375" calcext:value-type="float">
            <text:p>0,00028437500000000000</text:p>
          </table:table-cell>
          <table:table-cell table:formula="of:=[.D93]-[.D92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27" office:value-type="float" office:value="2484" calcext:value-type="float">
            <text:p>2484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2875" calcext:value-type="float">
            <text:p>0,00028750000000000000</text:p>
          </table:table-cell>
          <table:table-cell table:formula="of:=[.D94]-[.D93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27" office:value-type="float" office:value="2511" calcext:value-type="float">
            <text:p>2511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290625" calcext:value-type="float">
            <text:p>0,00029062500000000000</text:p>
          </table:table-cell>
          <table:table-cell table:formula="of:=[.D95]-[.D94]" office:value-type="float" office:value="0.00000312500000000004" calcext:value-type="float">
            <text:p>0,0000031250000000000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27" office:value-type="float" office:value="2538" calcext:value-type="float">
            <text:p>2538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29375" calcext:value-type="float">
            <text:p>0,00029375000000000000</text:p>
          </table:table-cell>
          <table:table-cell table:formula="of:=[.D96]-[.D95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27" office:value-type="float" office:value="2565" calcext:value-type="float">
            <text:p>256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296875" calcext:value-type="float">
            <text:p>0,00029687500000000000</text:p>
          </table:table-cell>
          <table:table-cell table:formula="of:=[.D97]-[.D96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27" office:value-type="float" office:value="2592" calcext:value-type="float">
            <text:p>2592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3" calcext:value-type="float">
            <text:p>0,00030000000000000000</text:p>
          </table:table-cell>
          <table:table-cell table:formula="of:=[.D98]-[.D97]" office:value-type="float" office:value="0.00000312500000000004" calcext:value-type="float">
            <text:p>0,0000031250000000000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27" office:value-type="float" office:value="2619" calcext:value-type="float">
            <text:p>2619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303125" calcext:value-type="float">
            <text:p>0,00030312500000000000</text:p>
          </table:table-cell>
          <table:table-cell table:formula="of:=[.D99]-[.D98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27" office:value-type="float" office:value="2646" calcext:value-type="float">
            <text:p>2646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30625" calcext:value-type="float">
            <text:p>0,00030625000000000000</text:p>
          </table:table-cell>
          <table:table-cell table:formula="of:=[.D100]-[.D99]" office:value-type="float" office:value="0.00000312500000000004" calcext:value-type="float">
            <text:p>0,0000031250000000000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27" office:value-type="float" office:value="2673" calcext:value-type="float">
            <text:p>2673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309375" calcext:value-type="float">
            <text:p>0,00030937500000000000</text:p>
          </table:table-cell>
          <table:table-cell table:formula="of:=[.D101]-[.D100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27" office:value-type="float" office:value="2700" calcext:value-type="float">
            <text:p>27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3125" calcext:value-type="float">
            <text:p>0,00031250000000000000</text:p>
          </table:table-cell>
          <table:table-cell table:formula="of:=[.D102]-[.D101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27" office:value-type="float" office:value="2727" calcext:value-type="float">
            <text:p>2727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315625" calcext:value-type="float">
            <text:p>0,00031562500000000000</text:p>
          </table:table-cell>
          <table:table-cell table:formula="of:=[.D103]-[.D102]" office:value-type="float" office:value="0.00000312500000000004" calcext:value-type="float">
            <text:p>0,0000031250000000000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27" office:value-type="float" office:value="2754" calcext:value-type="float">
            <text:p>2754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31875" calcext:value-type="float">
            <text:p>0,00031875000000000000</text:p>
          </table:table-cell>
          <table:table-cell table:formula="of:=[.D104]-[.D103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27" office:value-type="float" office:value="2781" calcext:value-type="float">
            <text:p>2781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321875" calcext:value-type="float">
            <text:p>0,00032187500000000000</text:p>
          </table:table-cell>
          <table:table-cell table:formula="of:=[.D105]-[.D104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27" office:value-type="float" office:value="2808" calcext:value-type="float">
            <text:p>2808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325" calcext:value-type="float">
            <text:p>0,00032500000000000000</text:p>
          </table:table-cell>
          <table:table-cell table:formula="of:=[.D106]-[.D105]" office:value-type="float" office:value="0.00000312500000000004" calcext:value-type="float">
            <text:p>0,000003125000000000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27" office:value-type="float" office:value="2835" calcext:value-type="float">
            <text:p>283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328125" calcext:value-type="float">
            <text:p>0,00032812500000000000</text:p>
          </table:table-cell>
          <table:table-cell table:formula="of:=[.D107]-[.D106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27" office:value-type="float" office:value="2862" calcext:value-type="float">
            <text:p>2862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33125" calcext:value-type="float">
            <text:p>0,00033125000000000000</text:p>
          </table:table-cell>
          <table:table-cell table:formula="of:=[.D108]-[.D107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27" office:value-type="float" office:value="2889" calcext:value-type="float">
            <text:p>2889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334375" calcext:value-type="float">
            <text:p>0,00033437500000000000</text:p>
          </table:table-cell>
          <table:table-cell table:formula="of:=[.D109]-[.D108]" office:value-type="float" office:value="0.00000312500000000004" calcext:value-type="float">
            <text:p>0,0000031250000000000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27" office:value-type="float" office:value="2916" calcext:value-type="float">
            <text:p>2916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3375" calcext:value-type="float">
            <text:p>0,00033750000000000000</text:p>
          </table:table-cell>
          <table:table-cell table:formula="of:=[.D110]-[.D109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27" office:value-type="float" office:value="2943" calcext:value-type="float">
            <text:p>2943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340625" calcext:value-type="float">
            <text:p>0,00034062500000000000</text:p>
          </table:table-cell>
          <table:table-cell table:formula="of:=[.D111]-[.D110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27" office:value-type="float" office:value="2970" calcext:value-type="float">
            <text:p>297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34375" calcext:value-type="float">
            <text:p>0,00034375000000000000</text:p>
          </table:table-cell>
          <table:table-cell table:formula="of:=[.D112]-[.D111]" office:value-type="float" office:value="0.00000312500000000004" calcext:value-type="float">
            <text:p>0,0000031250000000000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27" office:value-type="float" office:value="2997" calcext:value-type="float">
            <text:p>2997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346875" calcext:value-type="float">
            <text:p>0,00034687500000000000</text:p>
          </table:table-cell>
          <table:table-cell table:formula="of:=[.D113]-[.D112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27" office:value-type="float" office:value="3024" calcext:value-type="float">
            <text:p>3024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35" calcext:value-type="float">
            <text:p>0,00035000000000000000</text:p>
          </table:table-cell>
          <table:table-cell table:formula="of:=[.D114]-[.D113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27" office:value-type="float" office:value="3051" calcext:value-type="float">
            <text:p>3051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353125" calcext:value-type="float">
            <text:p>0,00035312500000000000</text:p>
          </table:table-cell>
          <table:table-cell table:formula="of:=[.D115]-[.D114]" office:value-type="float" office:value="0.00000312500000000004" calcext:value-type="float">
            <text:p>0,0000031250000000000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27" office:value-type="float" office:value="3078" calcext:value-type="float">
            <text:p>3078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35625" calcext:value-type="float">
            <text:p>0,00035625000000000000</text:p>
          </table:table-cell>
          <table:table-cell table:formula="of:=[.D116]-[.D115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27" office:value-type="float" office:value="3105" calcext:value-type="float">
            <text:p>310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359375" calcext:value-type="float">
            <text:p>0,00035937500000000000</text:p>
          </table:table-cell>
          <table:table-cell table:formula="of:=[.D117]-[.D116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27" office:value-type="float" office:value="3132" calcext:value-type="float">
            <text:p>3132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3625" calcext:value-type="float">
            <text:p>0,00036250000000000000</text:p>
          </table:table-cell>
          <table:table-cell table:formula="of:=[.D118]-[.D117]" office:value-type="float" office:value="0.00000312500000000004" calcext:value-type="float">
            <text:p>0,0000031250000000000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27" office:value-type="float" office:value="3159" calcext:value-type="float">
            <text:p>3159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365625" calcext:value-type="float">
            <text:p>0,00036562500000000000</text:p>
          </table:table-cell>
          <table:table-cell table:formula="of:=[.D119]-[.D118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27" office:value-type="float" office:value="3186" calcext:value-type="float">
            <text:p>3186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36875" calcext:value-type="float">
            <text:p>0,00036875000000000000</text:p>
          </table:table-cell>
          <table:table-cell table:formula="of:=[.D120]-[.D119]" office:value-type="float" office:value="0.00000312500000000004" calcext:value-type="float">
            <text:p>0,0000031250000000000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27" office:value-type="float" office:value="3213" calcext:value-type="float">
            <text:p>3213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371875" calcext:value-type="float">
            <text:p>0,00037187500000000000</text:p>
          </table:table-cell>
          <table:table-cell table:formula="of:=[.D121]-[.D120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27" office:value-type="float" office:value="3240" calcext:value-type="float">
            <text:p>324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375" calcext:value-type="float">
            <text:p>0,00037500000000000000</text:p>
          </table:table-cell>
          <table:table-cell table:formula="of:=[.D122]-[.D121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27" office:value-type="float" office:value="3267" calcext:value-type="float">
            <text:p>3267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378125" calcext:value-type="float">
            <text:p>0,00037812500000000000</text:p>
          </table:table-cell>
          <table:table-cell table:formula="of:=[.D123]-[.D122]" office:value-type="float" office:value="0.00000312500000000004" calcext:value-type="float">
            <text:p>0,0000031250000000000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27" office:value-type="float" office:value="3294" calcext:value-type="float">
            <text:p>3294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38125" calcext:value-type="float">
            <text:p>0,00038125000000000000</text:p>
          </table:table-cell>
          <table:table-cell table:formula="of:=[.D124]-[.D123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27" office:value-type="float" office:value="3321" calcext:value-type="float">
            <text:p>3321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384375" calcext:value-type="float">
            <text:p>0,00038437500000000000</text:p>
          </table:table-cell>
          <table:table-cell table:formula="of:=[.D125]-[.D124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27" office:value-type="float" office:value="3348" calcext:value-type="float">
            <text:p>3348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3875" calcext:value-type="float">
            <text:p>0,00038750000000000000</text:p>
          </table:table-cell>
          <table:table-cell table:formula="of:=[.D126]-[.D125]" office:value-type="float" office:value="0.00000312500000000004" calcext:value-type="float">
            <text:p>0,0000031250000000000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27" office:value-type="float" office:value="3375" calcext:value-type="float">
            <text:p>337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390625" calcext:value-type="float">
            <text:p>0,00039062500000000000</text:p>
          </table:table-cell>
          <table:table-cell table:formula="of:=[.D127]-[.D126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27" office:value-type="float" office:value="3402" calcext:value-type="float">
            <text:p>3402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39375" calcext:value-type="float">
            <text:p>0,00039375000000000000</text:p>
          </table:table-cell>
          <table:table-cell table:formula="of:=[.D128]-[.D127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27" office:value-type="float" office:value="3429" calcext:value-type="float">
            <text:p>3429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396875" calcext:value-type="float">
            <text:p>0,00039687500000000000</text:p>
          </table:table-cell>
          <table:table-cell table:formula="of:=[.D129]-[.D128]" office:value-type="float" office:value="0.00000312500000000004" calcext:value-type="float">
            <text:p>0,000003125000000000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27" office:value-type="float" office:value="3456" calcext:value-type="float">
            <text:p>3456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4" calcext:value-type="float">
            <text:p>0,00040000000000000000</text:p>
          </table:table-cell>
          <table:table-cell table:formula="of:=[.D130]-[.D129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27" office:value-type="float" office:value="3483" calcext:value-type="float">
            <text:p>3483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403125" calcext:value-type="float">
            <text:p>0,00040312500000000000</text:p>
          </table:table-cell>
          <table:table-cell table:formula="of:=[.D131]-[.D130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27" office:value-type="float" office:value="3510" calcext:value-type="float">
            <text:p>351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40625" calcext:value-type="float">
            <text:p>0,00040625000000000000</text:p>
          </table:table-cell>
          <table:table-cell table:formula="of:=[.D132]-[.D131]" office:value-type="float" office:value="0.00000312500000000004" calcext:value-type="float">
            <text:p>0,0000031250000000000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27" office:value-type="float" office:value="3537" calcext:value-type="float">
            <text:p>3537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409375" calcext:value-type="float">
            <text:p>0,00040937500000000000</text:p>
          </table:table-cell>
          <table:table-cell table:formula="of:=[.D133]-[.D132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27" office:value-type="float" office:value="3564" calcext:value-type="float">
            <text:p>3564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4125" calcext:value-type="float">
            <text:p>0,00041250000000000000</text:p>
          </table:table-cell>
          <table:table-cell table:formula="of:=[.D134]-[.D133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27" office:value-type="float" office:value="3591" calcext:value-type="float">
            <text:p>3591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415625" calcext:value-type="float">
            <text:p>0,00041562500000000000</text:p>
          </table:table-cell>
          <table:table-cell table:formula="of:=[.D135]-[.D134]" office:value-type="float" office:value="0.00000312500000000004" calcext:value-type="float">
            <text:p>0,0000031250000000000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27" office:value-type="float" office:value="3618" calcext:value-type="float">
            <text:p>3618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41875" calcext:value-type="float">
            <text:p>0,00041875000000000000</text:p>
          </table:table-cell>
          <table:table-cell table:formula="of:=[.D136]-[.D135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27" office:value-type="float" office:value="3645" calcext:value-type="float">
            <text:p>364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421875" calcext:value-type="float">
            <text:p>0,00042187500000000000</text:p>
          </table:table-cell>
          <table:table-cell table:formula="of:=[.D137]-[.D136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27" office:value-type="float" office:value="3672" calcext:value-type="float">
            <text:p>3672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425" calcext:value-type="float">
            <text:p>0,00042500000000000000</text:p>
          </table:table-cell>
          <table:table-cell table:formula="of:=[.D138]-[.D137]" office:value-type="float" office:value="0.00000312500000000004" calcext:value-type="float">
            <text:p>0,0000031250000000000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27" office:value-type="float" office:value="3699" calcext:value-type="float">
            <text:p>3699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428125" calcext:value-type="float">
            <text:p>0,00042812500000000000</text:p>
          </table:table-cell>
          <table:table-cell table:formula="of:=[.D139]-[.D138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27" office:value-type="float" office:value="3726" calcext:value-type="float">
            <text:p>3726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43125" calcext:value-type="float">
            <text:p>0,00043125000000000000</text:p>
          </table:table-cell>
          <table:table-cell table:formula="of:=[.D140]-[.D139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27" office:value-type="float" office:value="3753" calcext:value-type="float">
            <text:p>3753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434375" calcext:value-type="float">
            <text:p>0,00043437500000000000</text:p>
          </table:table-cell>
          <table:table-cell table:formula="of:=[.D141]-[.D140]" office:value-type="float" office:value="0.00000312500000000004" calcext:value-type="float">
            <text:p>0,0000031250000000000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27" office:value-type="float" office:value="3780" calcext:value-type="float">
            <text:p>378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4375" calcext:value-type="float">
            <text:p>0,00043750000000000000</text:p>
          </table:table-cell>
          <table:table-cell table:formula="of:=[.D142]-[.D141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27" office:value-type="float" office:value="3807" calcext:value-type="float">
            <text:p>3807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440625" calcext:value-type="float">
            <text:p>0,00044062500000000000</text:p>
          </table:table-cell>
          <table:table-cell table:formula="of:=[.D143]-[.D142]" office:value-type="float" office:value="0.00000312500000000004" calcext:value-type="float">
            <text:p>0,0000031250000000000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27" office:value-type="float" office:value="3834" calcext:value-type="float">
            <text:p>3834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44375" calcext:value-type="float">
            <text:p>0,00044375000000000000</text:p>
          </table:table-cell>
          <table:table-cell table:formula="of:=[.D144]-[.D143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27" office:value-type="float" office:value="3861" calcext:value-type="float">
            <text:p>3861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446875" calcext:value-type="float">
            <text:p>0,00044687500000000000</text:p>
          </table:table-cell>
          <table:table-cell table:formula="of:=[.D145]-[.D144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27" office:value-type="float" office:value="3888" calcext:value-type="float">
            <text:p>3888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45" calcext:value-type="float">
            <text:p>0,00045000000000000000</text:p>
          </table:table-cell>
          <table:table-cell table:formula="of:=[.D146]-[.D145]" office:value-type="float" office:value="0.00000312500000000004" calcext:value-type="float">
            <text:p>0,0000031250000000000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27" office:value-type="float" office:value="3915" calcext:value-type="float">
            <text:p>391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453125" calcext:value-type="float">
            <text:p>0,00045312500000000000</text:p>
          </table:table-cell>
          <table:table-cell table:formula="of:=[.D147]-[.D146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27" office:value-type="float" office:value="3942" calcext:value-type="float">
            <text:p>3942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45625" calcext:value-type="float">
            <text:p>0,00045625000000000000</text:p>
          </table:table-cell>
          <table:table-cell table:formula="of:=[.D148]-[.D147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27" office:value-type="float" office:value="3969" calcext:value-type="float">
            <text:p>3969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459375" calcext:value-type="float">
            <text:p>0,00045937500000000000</text:p>
          </table:table-cell>
          <table:table-cell table:formula="of:=[.D149]-[.D148]" office:value-type="float" office:value="0.00000312500000000004" calcext:value-type="float">
            <text:p>0,0000031250000000000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27" office:value-type="float" office:value="3996" calcext:value-type="float">
            <text:p>3996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4625" calcext:value-type="float">
            <text:p>0,00046250000000000000</text:p>
          </table:table-cell>
          <table:table-cell table:formula="of:=[.D150]-[.D149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27" office:value-type="float" office:value="4023" calcext:value-type="float">
            <text:p>4023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465625" calcext:value-type="float">
            <text:p>0,00046562500000000000</text:p>
          </table:table-cell>
          <table:table-cell table:formula="of:=[.D151]-[.D150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27" office:value-type="float" office:value="4050" calcext:value-type="float">
            <text:p>40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46875" calcext:value-type="float">
            <text:p>0,00046875000000000000</text:p>
          </table:table-cell>
          <table:table-cell table:formula="of:=[.D152]-[.D151]" office:value-type="float" office:value="0.00000312500000000004" calcext:value-type="float">
            <text:p>0,0000031250000000000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27" office:value-type="float" office:value="4077" calcext:value-type="float">
            <text:p>4077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471875" calcext:value-type="float">
            <text:p>0,00047187500000000000</text:p>
          </table:table-cell>
          <table:table-cell table:formula="of:=[.D153]-[.D152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27" office:value-type="float" office:value="4104" calcext:value-type="float">
            <text:p>4104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475" calcext:value-type="float">
            <text:p>0,00047500000000000000</text:p>
          </table:table-cell>
          <table:table-cell table:formula="of:=[.D154]-[.D153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27" office:value-type="float" office:value="4131" calcext:value-type="float">
            <text:p>4131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478125" calcext:value-type="float">
            <text:p>0,00047812500000000000</text:p>
          </table:table-cell>
          <table:table-cell table:formula="of:=[.D155]-[.D154]" office:value-type="float" office:value="0.00000312500000000004" calcext:value-type="float">
            <text:p>0,0000031250000000000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27" office:value-type="float" office:value="4158" calcext:value-type="float">
            <text:p>4158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48125" calcext:value-type="float">
            <text:p>0,00048125000000000000</text:p>
          </table:table-cell>
          <table:table-cell table:formula="of:=[.D156]-[.D155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27" office:value-type="float" office:value="4185" calcext:value-type="float">
            <text:p>418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484375" calcext:value-type="float">
            <text:p>0,00048437500000000000</text:p>
          </table:table-cell>
          <table:table-cell table:formula="of:=[.D157]-[.D156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27" office:value-type="float" office:value="4212" calcext:value-type="float">
            <text:p>4212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4875" calcext:value-type="float">
            <text:p>0,00048750000000000000</text:p>
          </table:table-cell>
          <table:table-cell table:formula="of:=[.D158]-[.D157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27" office:value-type="float" office:value="4239" calcext:value-type="float">
            <text:p>4239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490625" calcext:value-type="float">
            <text:p>0,00049062500000000000</text:p>
          </table:table-cell>
          <table:table-cell table:formula="of:=[.D159]-[.D158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27" office:value-type="float" office:value="4266" calcext:value-type="float">
            <text:p>4266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49375" calcext:value-type="float">
            <text:p>0,00049375000000000000</text:p>
          </table:table-cell>
          <table:table-cell table:formula="of:=[.D160]-[.D159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27" office:value-type="float" office:value="4293" calcext:value-type="float">
            <text:p>4293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496875" calcext:value-type="float">
            <text:p>0,00049687500000000000</text:p>
          </table:table-cell>
          <table:table-cell table:formula="of:=[.D161]-[.D160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27" office:value-type="float" office:value="4320" calcext:value-type="float">
            <text:p>432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5" calcext:value-type="float">
            <text:p>0,00050000000000000000</text:p>
          </table:table-cell>
          <table:table-cell table:formula="of:=[.D162]-[.D161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27" office:value-type="float" office:value="4347" calcext:value-type="float">
            <text:p>4347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503125" calcext:value-type="float">
            <text:p>0,00050312500000000000</text:p>
          </table:table-cell>
          <table:table-cell table:formula="of:=[.D163]-[.D162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27" office:value-type="float" office:value="4374" calcext:value-type="float">
            <text:p>4374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50625" calcext:value-type="float">
            <text:p>0,00050625000000000000</text:p>
          </table:table-cell>
          <table:table-cell table:formula="of:=[.D164]-[.D163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27" office:value-type="float" office:value="4401" calcext:value-type="float">
            <text:p>4401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509375" calcext:value-type="float">
            <text:p>0,00050937500000000000</text:p>
          </table:table-cell>
          <table:table-cell table:formula="of:=[.D165]-[.D16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27" office:value-type="float" office:value="4428" calcext:value-type="float">
            <text:p>4428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5125" calcext:value-type="float">
            <text:p>0,00051250000000000000</text:p>
          </table:table-cell>
          <table:table-cell table:formula="of:=[.D166]-[.D165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27" office:value-type="float" office:value="4455" calcext:value-type="float">
            <text:p>445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515625" calcext:value-type="float">
            <text:p>0,00051562500000000000</text:p>
          </table:table-cell>
          <table:table-cell table:formula="of:=[.D167]-[.D166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27" office:value-type="float" office:value="4482" calcext:value-type="float">
            <text:p>4482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51875" calcext:value-type="float">
            <text:p>0,00051875000000000000</text:p>
          </table:table-cell>
          <table:table-cell table:formula="of:=[.D168]-[.D167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27" office:value-type="float" office:value="4509" calcext:value-type="float">
            <text:p>4509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521875" calcext:value-type="float">
            <text:p>0,00052187500000000000</text:p>
          </table:table-cell>
          <table:table-cell table:formula="of:=[.D169]-[.D168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27" office:value-type="float" office:value="4536" calcext:value-type="float">
            <text:p>4536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525" calcext:value-type="float">
            <text:p>0,00052500000000000000</text:p>
          </table:table-cell>
          <table:table-cell table:formula="of:=[.D170]-[.D169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27" office:value-type="float" office:value="4563" calcext:value-type="float">
            <text:p>4563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528125" calcext:value-type="float">
            <text:p>0,00052812500000000000</text:p>
          </table:table-cell>
          <table:table-cell table:formula="of:=[.D171]-[.D170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27" office:value-type="float" office:value="4590" calcext:value-type="float">
            <text:p>459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053125" calcext:value-type="float">
            <text:p>0,00053125000000000000</text:p>
          </table:table-cell>
          <table:table-cell table:formula="of:=[.D172]-[.D171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27" office:value-type="float" office:value="4617" calcext:value-type="float">
            <text:p>4617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0534375" calcext:value-type="float">
            <text:p>0,00053437500000000000</text:p>
          </table:table-cell>
          <table:table-cell table:formula="of:=[.D173]-[.D172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27" office:value-type="float" office:value="4644" calcext:value-type="float">
            <text:p>4644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05375" calcext:value-type="float">
            <text:p>0,00053750000000000000</text:p>
          </table:table-cell>
          <table:table-cell table:formula="of:=[.D174]-[.D173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27" office:value-type="float" office:value="4671" calcext:value-type="float">
            <text:p>4671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0540625" calcext:value-type="float">
            <text:p>0,00054062500000000000</text:p>
          </table:table-cell>
          <table:table-cell table:formula="of:=[.D175]-[.D174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27" office:value-type="float" office:value="4698" calcext:value-type="float">
            <text:p>4698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054375" calcext:value-type="float">
            <text:p>0,00054375000000000000</text:p>
          </table:table-cell>
          <table:table-cell table:formula="of:=[.D176]-[.D175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27" office:value-type="float" office:value="4725" calcext:value-type="float">
            <text:p>472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0546875" calcext:value-type="float">
            <text:p>0,00054687500000000000</text:p>
          </table:table-cell>
          <table:table-cell table:formula="of:=[.D177]-[.D176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27" office:value-type="float" office:value="4752" calcext:value-type="float">
            <text:p>4752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055" calcext:value-type="float">
            <text:p>0,00055000000000000000</text:p>
          </table:table-cell>
          <table:table-cell table:formula="of:=[.D178]-[.D177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27" office:value-type="float" office:value="4779" calcext:value-type="float">
            <text:p>4779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0553125" calcext:value-type="float">
            <text:p>0,00055312500000000000</text:p>
          </table:table-cell>
          <table:table-cell table:formula="of:=[.D179]-[.D178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27" office:value-type="float" office:value="4806" calcext:value-type="float">
            <text:p>4806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055625" calcext:value-type="float">
            <text:p>0,00055625000000000000</text:p>
          </table:table-cell>
          <table:table-cell table:formula="of:=[.D180]-[.D179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27" office:value-type="float" office:value="4833" calcext:value-type="float">
            <text:p>4833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0559375" calcext:value-type="float">
            <text:p>0,00055937500000000000</text:p>
          </table:table-cell>
          <table:table-cell table:formula="of:=[.D181]-[.D180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27" office:value-type="float" office:value="4860" calcext:value-type="float">
            <text:p>486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05625" calcext:value-type="float">
            <text:p>0,00056250000000000000</text:p>
          </table:table-cell>
          <table:table-cell table:formula="of:=[.D182]-[.D181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27" office:value-type="float" office:value="4887" calcext:value-type="float">
            <text:p>4887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0565625" calcext:value-type="float">
            <text:p>0,00056562500000000000</text:p>
          </table:table-cell>
          <table:table-cell table:formula="of:=[.D183]-[.D182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27" office:value-type="float" office:value="4914" calcext:value-type="float">
            <text:p>4914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056875" calcext:value-type="float">
            <text:p>0,00056875000000000000</text:p>
          </table:table-cell>
          <table:table-cell table:formula="of:=[.D184]-[.D183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27" office:value-type="float" office:value="4941" calcext:value-type="float">
            <text:p>4941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0571875" calcext:value-type="float">
            <text:p>0,00057187500000000000</text:p>
          </table:table-cell>
          <table:table-cell table:formula="of:=[.D185]-[.D184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27" office:value-type="float" office:value="4968" calcext:value-type="float">
            <text:p>4968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0575" calcext:value-type="float">
            <text:p>0,00057500000000000000</text:p>
          </table:table-cell>
          <table:table-cell table:formula="of:=[.D186]-[.D185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27" office:value-type="float" office:value="4995" calcext:value-type="float">
            <text:p>499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0578125" calcext:value-type="float">
            <text:p>0,00057812500000000000</text:p>
          </table:table-cell>
          <table:table-cell table:formula="of:=[.D187]-[.D186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27" office:value-type="float" office:value="5022" calcext:value-type="float">
            <text:p>5022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058125" calcext:value-type="float">
            <text:p>0,00058125000000000000</text:p>
          </table:table-cell>
          <table:table-cell table:formula="of:=[.D188]-[.D187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27" office:value-type="float" office:value="5049" calcext:value-type="float">
            <text:p>5049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0584375" calcext:value-type="float">
            <text:p>0,00058437500000000000</text:p>
          </table:table-cell>
          <table:table-cell table:formula="of:=[.D189]-[.D188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27" office:value-type="float" office:value="5076" calcext:value-type="float">
            <text:p>5076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05875" calcext:value-type="float">
            <text:p>0,00058750000000000000</text:p>
          </table:table-cell>
          <table:table-cell table:formula="of:=[.D190]-[.D189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27" office:value-type="float" office:value="5103" calcext:value-type="float">
            <text:p>5103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0590625" calcext:value-type="float">
            <text:p>0,00059062500000000000</text:p>
          </table:table-cell>
          <table:table-cell table:formula="of:=[.D191]-[.D190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27" office:value-type="float" office:value="5130" calcext:value-type="float">
            <text:p>513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059375" calcext:value-type="float">
            <text:p>0,00059375000000000000</text:p>
          </table:table-cell>
          <table:table-cell table:formula="of:=[.D192]-[.D191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27" office:value-type="float" office:value="5157" calcext:value-type="float">
            <text:p>5157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0596875" calcext:value-type="float">
            <text:p>0,00059687500000000000</text:p>
          </table:table-cell>
          <table:table-cell table:formula="of:=[.D193]-[.D192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27" office:value-type="float" office:value="5184" calcext:value-type="float">
            <text:p>5184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06" calcext:value-type="float">
            <text:p>0,00060000000000000000</text:p>
          </table:table-cell>
          <table:table-cell table:formula="of:=[.D194]-[.D193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27" office:value-type="float" office:value="5211" calcext:value-type="float">
            <text:p>5211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0603125" calcext:value-type="float">
            <text:p>0,00060312500000000000</text:p>
          </table:table-cell>
          <table:table-cell table:formula="of:=[.D195]-[.D194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27" office:value-type="float" office:value="5238" calcext:value-type="float">
            <text:p>5238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060625" calcext:value-type="float">
            <text:p>0,00060625000000000000</text:p>
          </table:table-cell>
          <table:table-cell table:formula="of:=[.D196]-[.D195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27" office:value-type="float" office:value="5265" calcext:value-type="float">
            <text:p>526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0609375" calcext:value-type="float">
            <text:p>0,00060937500000000000</text:p>
          </table:table-cell>
          <table:table-cell table:formula="of:=[.D197]-[.D196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27" office:value-type="float" office:value="5292" calcext:value-type="float">
            <text:p>5292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06125" calcext:value-type="float">
            <text:p>0,00061250000000000000</text:p>
          </table:table-cell>
          <table:table-cell table:formula="of:=[.D198]-[.D197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27" office:value-type="float" office:value="5319" calcext:value-type="float">
            <text:p>5319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0615625" calcext:value-type="float">
            <text:p>0,00061562500000000000</text:p>
          </table:table-cell>
          <table:table-cell table:formula="of:=[.D199]-[.D198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27" office:value-type="float" office:value="5346" calcext:value-type="float">
            <text:p>5346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061875" calcext:value-type="float">
            <text:p>0,00061875000000000000</text:p>
          </table:table-cell>
          <table:table-cell table:formula="of:=[.D200]-[.D199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27" office:value-type="float" office:value="5373" calcext:value-type="float">
            <text:p>5373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0621875" calcext:value-type="float">
            <text:p>0,00062187500000000000</text:p>
          </table:table-cell>
          <table:table-cell table:formula="of:=[.D201]-[.D200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27" office:value-type="float" office:value="5400" calcext:value-type="float">
            <text:p>54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0625" calcext:value-type="float">
            <text:p>0,00062500000000000000</text:p>
          </table:table-cell>
          <table:table-cell table:formula="of:=[.D202]-[.D201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27" office:value-type="float" office:value="5427" calcext:value-type="float">
            <text:p>5427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0628125" calcext:value-type="float">
            <text:p>0,00062812500000000000</text:p>
          </table:table-cell>
          <table:table-cell table:formula="of:=[.D203]-[.D202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27" office:value-type="float" office:value="5454" calcext:value-type="float">
            <text:p>5454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063125" calcext:value-type="float">
            <text:p>0,00063125000000000000</text:p>
          </table:table-cell>
          <table:table-cell table:formula="of:=[.D204]-[.D203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27" office:value-type="float" office:value="5481" calcext:value-type="float">
            <text:p>5481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0634375" calcext:value-type="float">
            <text:p>0,00063437500000000000</text:p>
          </table:table-cell>
          <table:table-cell table:formula="of:=[.D205]-[.D20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27" office:value-type="float" office:value="5508" calcext:value-type="float">
            <text:p>5508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06375" calcext:value-type="float">
            <text:p>0,00063750000000000000</text:p>
          </table:table-cell>
          <table:table-cell table:formula="of:=[.D206]-[.D205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27" office:value-type="float" office:value="5535" calcext:value-type="float">
            <text:p>553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0640625" calcext:value-type="float">
            <text:p>0,00064062500000000000</text:p>
          </table:table-cell>
          <table:table-cell table:formula="of:=[.D207]-[.D206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27" office:value-type="float" office:value="5562" calcext:value-type="float">
            <text:p>5562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064375" calcext:value-type="float">
            <text:p>0,00064375000000000000</text:p>
          </table:table-cell>
          <table:table-cell table:formula="of:=[.D208]-[.D207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27" office:value-type="float" office:value="5589" calcext:value-type="float">
            <text:p>5589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0646875" calcext:value-type="float">
            <text:p>0,00064687500000000000</text:p>
          </table:table-cell>
          <table:table-cell table:formula="of:=[.D209]-[.D208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27" office:value-type="float" office:value="5616" calcext:value-type="float">
            <text:p>5616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065" calcext:value-type="float">
            <text:p>0,00065000000000000000</text:p>
          </table:table-cell>
          <table:table-cell table:formula="of:=[.D210]-[.D209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27" office:value-type="float" office:value="5643" calcext:value-type="float">
            <text:p>5643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0653125" calcext:value-type="float">
            <text:p>0,00065312500000000000</text:p>
          </table:table-cell>
          <table:table-cell table:formula="of:=[.D211]-[.D210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27" office:value-type="float" office:value="5670" calcext:value-type="float">
            <text:p>567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065625" calcext:value-type="float">
            <text:p>0,00065625000000000000</text:p>
          </table:table-cell>
          <table:table-cell table:formula="of:=[.D212]-[.D211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27" office:value-type="float" office:value="5697" calcext:value-type="float">
            <text:p>5697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0659375" calcext:value-type="float">
            <text:p>0,00065937500000000000</text:p>
          </table:table-cell>
          <table:table-cell table:formula="of:=[.D213]-[.D212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27" office:value-type="float" office:value="5724" calcext:value-type="float">
            <text:p>5724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06625" calcext:value-type="float">
            <text:p>0,00066250000000000000</text:p>
          </table:table-cell>
          <table:table-cell table:formula="of:=[.D214]-[.D213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27" office:value-type="float" office:value="5751" calcext:value-type="float">
            <text:p>5751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0665625" calcext:value-type="float">
            <text:p>0,00066562500000000000</text:p>
          </table:table-cell>
          <table:table-cell table:formula="of:=[.D215]-[.D214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27" office:value-type="float" office:value="5778" calcext:value-type="float">
            <text:p>5778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066875" calcext:value-type="float">
            <text:p>0,00066875000000000000</text:p>
          </table:table-cell>
          <table:table-cell table:formula="of:=[.D216]-[.D215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27" office:value-type="float" office:value="5805" calcext:value-type="float">
            <text:p>580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0671875" calcext:value-type="float">
            <text:p>0,00067187500000000000</text:p>
          </table:table-cell>
          <table:table-cell table:formula="of:=[.D217]-[.D216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27" office:value-type="float" office:value="5832" calcext:value-type="float">
            <text:p>5832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0675" calcext:value-type="float">
            <text:p>0,00067500000000000000</text:p>
          </table:table-cell>
          <table:table-cell table:formula="of:=[.D218]-[.D217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27" office:value-type="float" office:value="5859" calcext:value-type="float">
            <text:p>5859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0678125" calcext:value-type="float">
            <text:p>0,00067812500000000000</text:p>
          </table:table-cell>
          <table:table-cell table:formula="of:=[.D219]-[.D218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27" office:value-type="float" office:value="5886" calcext:value-type="float">
            <text:p>5886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068125" calcext:value-type="float">
            <text:p>0,00068125000000000000</text:p>
          </table:table-cell>
          <table:table-cell table:formula="of:=[.D220]-[.D219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27" office:value-type="float" office:value="5913" calcext:value-type="float">
            <text:p>5913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0684375" calcext:value-type="float">
            <text:p>0,00068437500000000000</text:p>
          </table:table-cell>
          <table:table-cell table:formula="of:=[.D221]-[.D220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27" office:value-type="float" office:value="5940" calcext:value-type="float">
            <text:p>594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06875" calcext:value-type="float">
            <text:p>0,00068750000000000000</text:p>
          </table:table-cell>
          <table:table-cell table:formula="of:=[.D222]-[.D221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27" office:value-type="float" office:value="5967" calcext:value-type="float">
            <text:p>5967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0690625" calcext:value-type="float">
            <text:p>0,00069062500000000000</text:p>
          </table:table-cell>
          <table:table-cell table:formula="of:=[.D223]-[.D222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27" office:value-type="float" office:value="5994" calcext:value-type="float">
            <text:p>5994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069375" calcext:value-type="float">
            <text:p>0,00069375000000000000</text:p>
          </table:table-cell>
          <table:table-cell table:formula="of:=[.D224]-[.D223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27" office:value-type="float" office:value="6021" calcext:value-type="float">
            <text:p>6021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0696875" calcext:value-type="float">
            <text:p>0,00069687500000000000</text:p>
          </table:table-cell>
          <table:table-cell table:formula="of:=[.D225]-[.D224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27" office:value-type="float" office:value="6048" calcext:value-type="float">
            <text:p>6048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07" calcext:value-type="float">
            <text:p>0,00070000000000000000</text:p>
          </table:table-cell>
          <table:table-cell table:formula="of:=[.D226]-[.D225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27" office:value-type="float" office:value="6075" calcext:value-type="float">
            <text:p>607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0703125" calcext:value-type="float">
            <text:p>0,00070312500000000000</text:p>
          </table:table-cell>
          <table:table-cell table:formula="of:=[.D227]-[.D226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27" office:value-type="float" office:value="6102" calcext:value-type="float">
            <text:p>6102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070625" calcext:value-type="float">
            <text:p>0,00070625000000000000</text:p>
          </table:table-cell>
          <table:table-cell table:formula="of:=[.D228]-[.D227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27" office:value-type="float" office:value="6129" calcext:value-type="float">
            <text:p>6129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0709375" calcext:value-type="float">
            <text:p>0,00070937500000000000</text:p>
          </table:table-cell>
          <table:table-cell table:formula="of:=[.D229]-[.D228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27" office:value-type="float" office:value="6156" calcext:value-type="float">
            <text:p>6156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07125" calcext:value-type="float">
            <text:p>0,00071250000000000000</text:p>
          </table:table-cell>
          <table:table-cell table:formula="of:=[.D230]-[.D229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27" office:value-type="float" office:value="6183" calcext:value-type="float">
            <text:p>6183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0715625" calcext:value-type="float">
            <text:p>0,00071562500000000000</text:p>
          </table:table-cell>
          <table:table-cell table:formula="of:=[.D231]-[.D230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27" office:value-type="float" office:value="6210" calcext:value-type="float">
            <text:p>621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071875" calcext:value-type="float">
            <text:p>0,00071875000000000000</text:p>
          </table:table-cell>
          <table:table-cell table:formula="of:=[.D232]-[.D231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27" office:value-type="float" office:value="6237" calcext:value-type="float">
            <text:p>6237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0721875" calcext:value-type="float">
            <text:p>0,00072187500000000000</text:p>
          </table:table-cell>
          <table:table-cell table:formula="of:=[.D233]-[.D232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27" office:value-type="float" office:value="6264" calcext:value-type="float">
            <text:p>6264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0725" calcext:value-type="float">
            <text:p>0,00072500000000000000</text:p>
          </table:table-cell>
          <table:table-cell table:formula="of:=[.D234]-[.D233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27" office:value-type="float" office:value="6291" calcext:value-type="float">
            <text:p>6291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0728125" calcext:value-type="float">
            <text:p>0,00072812500000000000</text:p>
          </table:table-cell>
          <table:table-cell table:formula="of:=[.D235]-[.D234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27" office:value-type="float" office:value="6318" calcext:value-type="float">
            <text:p>6318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073125" calcext:value-type="float">
            <text:p>0,00073125000000000000</text:p>
          </table:table-cell>
          <table:table-cell table:formula="of:=[.D236]-[.D235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27" office:value-type="float" office:value="6345" calcext:value-type="float">
            <text:p>634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0734375" calcext:value-type="float">
            <text:p>0,00073437500000000000</text:p>
          </table:table-cell>
          <table:table-cell table:formula="of:=[.D237]-[.D236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27" office:value-type="float" office:value="6372" calcext:value-type="float">
            <text:p>6372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07375" calcext:value-type="float">
            <text:p>0,00073750000000000000</text:p>
          </table:table-cell>
          <table:table-cell table:formula="of:=[.D238]-[.D237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27" office:value-type="float" office:value="6399" calcext:value-type="float">
            <text:p>6399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0740625" calcext:value-type="float">
            <text:p>0,00074062500000000000</text:p>
          </table:table-cell>
          <table:table-cell table:formula="of:=[.D239]-[.D238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27" office:value-type="float" office:value="6426" calcext:value-type="float">
            <text:p>6426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074375" calcext:value-type="float">
            <text:p>0,00074375000000000000</text:p>
          </table:table-cell>
          <table:table-cell table:formula="of:=[.D240]-[.D239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27" office:value-type="float" office:value="6453" calcext:value-type="float">
            <text:p>6453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0746875" calcext:value-type="float">
            <text:p>0,00074687500000000000</text:p>
          </table:table-cell>
          <table:table-cell table:formula="of:=[.D241]-[.D240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27" office:value-type="float" office:value="6480" calcext:value-type="float">
            <text:p>648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075" calcext:value-type="float">
            <text:p>0,00075000000000000000</text:p>
          </table:table-cell>
          <table:table-cell table:formula="of:=[.D242]-[.D241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27" office:value-type="float" office:value="6507" calcext:value-type="float">
            <text:p>6507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0753125" calcext:value-type="float">
            <text:p>0,00075312500000000000</text:p>
          </table:table-cell>
          <table:table-cell table:formula="of:=[.D243]-[.D242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27" office:value-type="float" office:value="6534" calcext:value-type="float">
            <text:p>6534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075625" calcext:value-type="float">
            <text:p>0,00075625000000000000</text:p>
          </table:table-cell>
          <table:table-cell table:formula="of:=[.D244]-[.D243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27" office:value-type="float" office:value="6561" calcext:value-type="float">
            <text:p>6561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0759375" calcext:value-type="float">
            <text:p>0,00075937500000000000</text:p>
          </table:table-cell>
          <table:table-cell table:formula="of:=[.D245]-[.D24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27" office:value-type="float" office:value="6588" calcext:value-type="float">
            <text:p>6588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07625" calcext:value-type="float">
            <text:p>0,00076250000000000000</text:p>
          </table:table-cell>
          <table:table-cell table:formula="of:=[.D246]-[.D245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27" office:value-type="float" office:value="6615" calcext:value-type="float">
            <text:p>661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0765625" calcext:value-type="float">
            <text:p>0,00076562500000000000</text:p>
          </table:table-cell>
          <table:table-cell table:formula="of:=[.D247]-[.D246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27" office:value-type="float" office:value="6642" calcext:value-type="float">
            <text:p>6642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076875" calcext:value-type="float">
            <text:p>0,00076875000000000000</text:p>
          </table:table-cell>
          <table:table-cell table:formula="of:=[.D248]-[.D247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27" office:value-type="float" office:value="6669" calcext:value-type="float">
            <text:p>6669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0771875" calcext:value-type="float">
            <text:p>0,00077187500000000000</text:p>
          </table:table-cell>
          <table:table-cell table:formula="of:=[.D249]-[.D248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27" office:value-type="float" office:value="6696" calcext:value-type="float">
            <text:p>6696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0775" calcext:value-type="float">
            <text:p>0,00077500000000000000</text:p>
          </table:table-cell>
          <table:table-cell table:formula="of:=[.D250]-[.D249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27" office:value-type="float" office:value="6723" calcext:value-type="float">
            <text:p>6723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0778125" calcext:value-type="float">
            <text:p>0,00077812500000000000</text:p>
          </table:table-cell>
          <table:table-cell table:formula="of:=[.D251]-[.D250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27" office:value-type="float" office:value="6750" calcext:value-type="float">
            <text:p>67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078125" calcext:value-type="float">
            <text:p>0,00078125000000000000</text:p>
          </table:table-cell>
          <table:table-cell table:formula="of:=[.D252]-[.D251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27" office:value-type="float" office:value="6777" calcext:value-type="float">
            <text:p>6777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0784375" calcext:value-type="float">
            <text:p>0,00078437500000000000</text:p>
          </table:table-cell>
          <table:table-cell table:formula="of:=[.D253]-[.D252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27" office:value-type="float" office:value="6804" calcext:value-type="float">
            <text:p>6804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07875" calcext:value-type="float">
            <text:p>0,00078750000000000000</text:p>
          </table:table-cell>
          <table:table-cell table:formula="of:=[.D254]-[.D253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27" office:value-type="float" office:value="6831" calcext:value-type="float">
            <text:p>6831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0790625" calcext:value-type="float">
            <text:p>0,00079062500000000000</text:p>
          </table:table-cell>
          <table:table-cell table:formula="of:=[.D255]-[.D254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27" office:value-type="float" office:value="6858" calcext:value-type="float">
            <text:p>6858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079375" calcext:value-type="float">
            <text:p>0,00079375000000000000</text:p>
          </table:table-cell>
          <table:table-cell table:formula="of:=[.D256]-[.D255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27" office:value-type="float" office:value="6885" calcext:value-type="float">
            <text:p>6885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0796875" calcext:value-type="float">
            <text:p>0,00079687500000000000</text:p>
          </table:table-cell>
          <table:table-cell table:formula="of:=[.D257]-[.D256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27" office:value-type="float" office:value="6912" calcext:value-type="float">
            <text:p>6912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08" calcext:value-type="float">
            <text:p>0,00080000000000000000</text:p>
          </table:table-cell>
          <table:table-cell table:formula="of:=[.D258]-[.D257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27" office:value-type="float" office:value="6939" calcext:value-type="float">
            <text:p>6939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0803125" calcext:value-type="float">
            <text:p>0,00080312500000000000</text:p>
          </table:table-cell>
          <table:table-cell table:formula="of:=[.D259]-[.D258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27" office:value-type="float" office:value="6966" calcext:value-type="float">
            <text:p>6966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080625" calcext:value-type="float">
            <text:p>0,00080625000000000000</text:p>
          </table:table-cell>
          <table:table-cell table:formula="of:=[.D260]-[.D259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27" office:value-type="float" office:value="6993" calcext:value-type="float">
            <text:p>6993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0809375" calcext:value-type="float">
            <text:p>0,00080937500000000000</text:p>
          </table:table-cell>
          <table:table-cell table:formula="of:=[.D261]-[.D260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27" office:value-type="float" office:value="7020" calcext:value-type="float">
            <text:p>702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08125" calcext:value-type="float">
            <text:p>0,00081250000000000000</text:p>
          </table:table-cell>
          <table:table-cell table:formula="of:=[.D262]-[.D261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27" office:value-type="float" office:value="7047" calcext:value-type="float">
            <text:p>7047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0815625" calcext:value-type="float">
            <text:p>0,00081562500000000000</text:p>
          </table:table-cell>
          <table:table-cell table:formula="of:=[.D263]-[.D262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27" office:value-type="float" office:value="7074" calcext:value-type="float">
            <text:p>7074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081875" calcext:value-type="float">
            <text:p>0,00081875000000000000</text:p>
          </table:table-cell>
          <table:table-cell table:formula="of:=[.D264]-[.D263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27" office:value-type="float" office:value="7101" calcext:value-type="float">
            <text:p>7101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0821875" calcext:value-type="float">
            <text:p>0,00082187500000000000</text:p>
          </table:table-cell>
          <table:table-cell table:formula="of:=[.D265]-[.D264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27" office:value-type="float" office:value="7128" calcext:value-type="float">
            <text:p>7128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0825" calcext:value-type="float">
            <text:p>0,00082500000000000000</text:p>
          </table:table-cell>
          <table:table-cell table:formula="of:=[.D266]-[.D265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27" office:value-type="float" office:value="7155" calcext:value-type="float">
            <text:p>7155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0828125" calcext:value-type="float">
            <text:p>0,00082812500000000000</text:p>
          </table:table-cell>
          <table:table-cell table:formula="of:=[.D267]-[.D266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27" office:value-type="float" office:value="7182" calcext:value-type="float">
            <text:p>7182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083125" calcext:value-type="float">
            <text:p>0,00083125000000000000</text:p>
          </table:table-cell>
          <table:table-cell table:formula="of:=[.D268]-[.D267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27" office:value-type="float" office:value="7209" calcext:value-type="float">
            <text:p>7209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0834375" calcext:value-type="float">
            <text:p>0,00083437500000000000</text:p>
          </table:table-cell>
          <table:table-cell table:formula="of:=[.D269]-[.D268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27" office:value-type="float" office:value="7236" calcext:value-type="float">
            <text:p>7236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08375" calcext:value-type="float">
            <text:p>0,00083750000000000000</text:p>
          </table:table-cell>
          <table:table-cell table:formula="of:=[.D270]-[.D269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27" office:value-type="float" office:value="7263" calcext:value-type="float">
            <text:p>7263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0840625" calcext:value-type="float">
            <text:p>0,00084062500000000000</text:p>
          </table:table-cell>
          <table:table-cell table:formula="of:=[.D271]-[.D270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27" office:value-type="float" office:value="7290" calcext:value-type="float">
            <text:p>729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084375" calcext:value-type="float">
            <text:p>0,00084375000000000000</text:p>
          </table:table-cell>
          <table:table-cell table:formula="of:=[.D272]-[.D271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27" office:value-type="float" office:value="7317" calcext:value-type="float">
            <text:p>7317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0846875" calcext:value-type="float">
            <text:p>0,00084687500000000000</text:p>
          </table:table-cell>
          <table:table-cell table:formula="of:=[.D273]-[.D272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27" office:value-type="float" office:value="7344" calcext:value-type="float">
            <text:p>7344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085" calcext:value-type="float">
            <text:p>0,00085000000000000000</text:p>
          </table:table-cell>
          <table:table-cell table:formula="of:=[.D274]-[.D273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27" office:value-type="float" office:value="7371" calcext:value-type="float">
            <text:p>7371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0853125" calcext:value-type="float">
            <text:p>0,00085312500000000000</text:p>
          </table:table-cell>
          <table:table-cell table:formula="of:=[.D275]-[.D274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27" office:value-type="float" office:value="7398" calcext:value-type="float">
            <text:p>7398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085625" calcext:value-type="float">
            <text:p>0,00085625000000000000</text:p>
          </table:table-cell>
          <table:table-cell table:formula="of:=[.D276]-[.D275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27" office:value-type="float" office:value="7425" calcext:value-type="float">
            <text:p>7425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0859375" calcext:value-type="float">
            <text:p>0,00085937500000000000</text:p>
          </table:table-cell>
          <table:table-cell table:formula="of:=[.D277]-[.D276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27" office:value-type="float" office:value="7452" calcext:value-type="float">
            <text:p>7452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08625" calcext:value-type="float">
            <text:p>0,00086250000000000000</text:p>
          </table:table-cell>
          <table:table-cell table:formula="of:=[.D278]-[.D277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27" office:value-type="float" office:value="7479" calcext:value-type="float">
            <text:p>7479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0865625" calcext:value-type="float">
            <text:p>0,00086562500000000000</text:p>
          </table:table-cell>
          <table:table-cell table:formula="of:=[.D279]-[.D278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27" office:value-type="float" office:value="7506" calcext:value-type="float">
            <text:p>7506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086875" calcext:value-type="float">
            <text:p>0,00086875000000000000</text:p>
          </table:table-cell>
          <table:table-cell table:formula="of:=[.D280]-[.D279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27" office:value-type="float" office:value="7533" calcext:value-type="float">
            <text:p>7533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0871875" calcext:value-type="float">
            <text:p>0,00087187500000000000</text:p>
          </table:table-cell>
          <table:table-cell table:formula="of:=[.D281]-[.D280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27" office:value-type="float" office:value="7560" calcext:value-type="float">
            <text:p>756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0875" calcext:value-type="float">
            <text:p>0,00087500000000000000</text:p>
          </table:table-cell>
          <table:table-cell table:formula="of:=[.D282]-[.D281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27" office:value-type="float" office:value="7587" calcext:value-type="float">
            <text:p>7587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0878125" calcext:value-type="float">
            <text:p>0,00087812500000000000</text:p>
          </table:table-cell>
          <table:table-cell table:formula="of:=[.D283]-[.D282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27" office:value-type="float" office:value="7614" calcext:value-type="float">
            <text:p>7614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088125" calcext:value-type="float">
            <text:p>0,00088125000000000000</text:p>
          </table:table-cell>
          <table:table-cell table:formula="of:=[.D284]-[.D283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27" office:value-type="float" office:value="7641" calcext:value-type="float">
            <text:p>7641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0884375" calcext:value-type="float">
            <text:p>0,00088437500000000000</text:p>
          </table:table-cell>
          <table:table-cell table:formula="of:=[.D285]-[.D28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27" office:value-type="float" office:value="7668" calcext:value-type="float">
            <text:p>7668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08875" calcext:value-type="float">
            <text:p>0,00088750000000000000</text:p>
          </table:table-cell>
          <table:table-cell table:formula="of:=[.D286]-[.D285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27" office:value-type="float" office:value="7695" calcext:value-type="float">
            <text:p>7695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0890625" calcext:value-type="float">
            <text:p>0,00089062500000000000</text:p>
          </table:table-cell>
          <table:table-cell table:formula="of:=[.D287]-[.D286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27" office:value-type="float" office:value="7722" calcext:value-type="float">
            <text:p>7722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089375" calcext:value-type="float">
            <text:p>0,00089375000000000000</text:p>
          </table:table-cell>
          <table:table-cell table:formula="of:=[.D288]-[.D287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27" office:value-type="float" office:value="7749" calcext:value-type="float">
            <text:p>7749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0896875" calcext:value-type="float">
            <text:p>0,00089687500000000000</text:p>
          </table:table-cell>
          <table:table-cell table:formula="of:=[.D289]-[.D288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27" office:value-type="float" office:value="7776" calcext:value-type="float">
            <text:p>7776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09" calcext:value-type="float">
            <text:p>0,00090000000000000000</text:p>
          </table:table-cell>
          <table:table-cell table:formula="of:=[.D290]-[.D289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27" office:value-type="float" office:value="7803" calcext:value-type="float">
            <text:p>7803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0903125" calcext:value-type="float">
            <text:p>0,00090312500000000000</text:p>
          </table:table-cell>
          <table:table-cell table:formula="of:=[.D291]-[.D290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27" office:value-type="float" office:value="7830" calcext:value-type="float">
            <text:p>783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090625" calcext:value-type="float">
            <text:p>0,00090625000000000000</text:p>
          </table:table-cell>
          <table:table-cell table:formula="of:=[.D292]-[.D291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27" office:value-type="float" office:value="7857" calcext:value-type="float">
            <text:p>7857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0909375" calcext:value-type="float">
            <text:p>0,00090937500000000000</text:p>
          </table:table-cell>
          <table:table-cell table:formula="of:=[.D293]-[.D292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27" office:value-type="float" office:value="7884" calcext:value-type="float">
            <text:p>7884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09125" calcext:value-type="float">
            <text:p>0,00091250000000000000</text:p>
          </table:table-cell>
          <table:table-cell table:formula="of:=[.D294]-[.D293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27" office:value-type="float" office:value="7911" calcext:value-type="float">
            <text:p>7911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0915625" calcext:value-type="float">
            <text:p>0,00091562500000000000</text:p>
          </table:table-cell>
          <table:table-cell table:formula="of:=[.D295]-[.D294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27" office:value-type="float" office:value="7938" calcext:value-type="float">
            <text:p>7938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091875" calcext:value-type="float">
            <text:p>0,00091875000000000000</text:p>
          </table:table-cell>
          <table:table-cell table:formula="of:=[.D296]-[.D295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27" office:value-type="float" office:value="7965" calcext:value-type="float">
            <text:p>7965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0921875" calcext:value-type="float">
            <text:p>0,00092187500000000000</text:p>
          </table:table-cell>
          <table:table-cell table:formula="of:=[.D297]-[.D296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27" office:value-type="float" office:value="7992" calcext:value-type="float">
            <text:p>7992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0925" calcext:value-type="float">
            <text:p>0,00092500000000000000</text:p>
          </table:table-cell>
          <table:table-cell table:formula="of:=[.D298]-[.D297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27" office:value-type="float" office:value="8019" calcext:value-type="float">
            <text:p>8019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0928125" calcext:value-type="float">
            <text:p>0,00092812500000000000</text:p>
          </table:table-cell>
          <table:table-cell table:formula="of:=[.D299]-[.D298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27" office:value-type="float" office:value="8046" calcext:value-type="float">
            <text:p>8046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093125" calcext:value-type="float">
            <text:p>0,00093125000000000000</text:p>
          </table:table-cell>
          <table:table-cell table:formula="of:=[.D300]-[.D299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27" office:value-type="float" office:value="8073" calcext:value-type="float">
            <text:p>8073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0934375" calcext:value-type="float">
            <text:p>0,00093437500000000000</text:p>
          </table:table-cell>
          <table:table-cell table:formula="of:=[.D301]-[.D300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27" office:value-type="float" office:value="8100" calcext:value-type="float">
            <text:p>81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09375" calcext:value-type="float">
            <text:p>0,00093750000000000000</text:p>
          </table:table-cell>
          <table:table-cell table:formula="of:=[.D302]-[.D301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27" office:value-type="float" office:value="8127" calcext:value-type="float">
            <text:p>8127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0940625" calcext:value-type="float">
            <text:p>0,00094062500000000000</text:p>
          </table:table-cell>
          <table:table-cell table:formula="of:=[.D303]-[.D302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27" office:value-type="float" office:value="8154" calcext:value-type="float">
            <text:p>8154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094375" calcext:value-type="float">
            <text:p>0,00094375000000000000</text:p>
          </table:table-cell>
          <table:table-cell table:formula="of:=[.D304]-[.D303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27" office:value-type="float" office:value="8181" calcext:value-type="float">
            <text:p>8181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0946875" calcext:value-type="float">
            <text:p>0,00094687500000000000</text:p>
          </table:table-cell>
          <table:table-cell table:formula="of:=[.D305]-[.D304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27" office:value-type="float" office:value="8208" calcext:value-type="float">
            <text:p>8208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095" calcext:value-type="float">
            <text:p>0,00095000000000000000</text:p>
          </table:table-cell>
          <table:table-cell table:formula="of:=[.D306]-[.D305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27" office:value-type="float" office:value="8235" calcext:value-type="float">
            <text:p>8235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0953125" calcext:value-type="float">
            <text:p>0,00095312500000000000</text:p>
          </table:table-cell>
          <table:table-cell table:formula="of:=[.D307]-[.D306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27" office:value-type="float" office:value="8262" calcext:value-type="float">
            <text:p>8262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095625" calcext:value-type="float">
            <text:p>0,00095625000000000000</text:p>
          </table:table-cell>
          <table:table-cell table:formula="of:=[.D308]-[.D307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27" office:value-type="float" office:value="8289" calcext:value-type="float">
            <text:p>8289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0959375" calcext:value-type="float">
            <text:p>0,00095937500000000000</text:p>
          </table:table-cell>
          <table:table-cell table:formula="of:=[.D309]-[.D308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27" office:value-type="float" office:value="8316" calcext:value-type="float">
            <text:p>8316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09625" calcext:value-type="float">
            <text:p>0,00096250000000000000</text:p>
          </table:table-cell>
          <table:table-cell table:formula="of:=[.D310]-[.D309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27" office:value-type="float" office:value="8343" calcext:value-type="float">
            <text:p>8343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0965625" calcext:value-type="float">
            <text:p>0,00096562500000000000</text:p>
          </table:table-cell>
          <table:table-cell table:formula="of:=[.D311]-[.D310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27" office:value-type="float" office:value="8370" calcext:value-type="float">
            <text:p>837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096875" calcext:value-type="float">
            <text:p>0,00096875000000000000</text:p>
          </table:table-cell>
          <table:table-cell table:formula="of:=[.D312]-[.D311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27" office:value-type="float" office:value="8397" calcext:value-type="float">
            <text:p>8397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0971875" calcext:value-type="float">
            <text:p>0,00097187500000000000</text:p>
          </table:table-cell>
          <table:table-cell table:formula="of:=[.D313]-[.D312]" office:value-type="float" office:value="0.00000312499999999998" calcext:value-type="float">
            <text:p>0,0000031249999999999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27" office:value-type="float" office:value="8424" calcext:value-type="float">
            <text:p>8424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0975" calcext:value-type="float">
            <text:p>0,00097500000000000000</text:p>
          </table:table-cell>
          <table:table-cell table:formula="of:=[.D314]-[.D313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27" office:value-type="float" office:value="8451" calcext:value-type="float">
            <text:p>8451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0978125" calcext:value-type="float">
            <text:p>0,00097812500000000000</text:p>
          </table:table-cell>
          <table:table-cell table:formula="of:=[.D315]-[.D314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27" office:value-type="float" office:value="8478" calcext:value-type="float">
            <text:p>8478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098125" calcext:value-type="float">
            <text:p>0,00098125000000000000</text:p>
          </table:table-cell>
          <table:table-cell table:formula="of:=[.D316]-[.D315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27" office:value-type="float" office:value="8505" calcext:value-type="float">
            <text:p>8505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0984375" calcext:value-type="float">
            <text:p>0,00098437500000000000</text:p>
          </table:table-cell>
          <table:table-cell table:formula="of:=[.D317]-[.D316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27" office:value-type="float" office:value="8532" calcext:value-type="float">
            <text:p>8532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09875" calcext:value-type="float">
            <text:p>0,00098750000000000000</text:p>
          </table:table-cell>
          <table:table-cell table:formula="of:=[.D318]-[.D317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27" office:value-type="float" office:value="8559" calcext:value-type="float">
            <text:p>8559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0990625" calcext:value-type="float">
            <text:p>0,00099062500000000000</text:p>
          </table:table-cell>
          <table:table-cell table:formula="of:=[.D319]-[.D318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27" office:value-type="float" office:value="8586" calcext:value-type="float">
            <text:p>8586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099375" calcext:value-type="float">
            <text:p>0,00099375000000000000</text:p>
          </table:table-cell>
          <table:table-cell table:formula="of:=[.D320]-[.D319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27" office:value-type="float" office:value="8613" calcext:value-type="float">
            <text:p>8613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0996875" calcext:value-type="float">
            <text:p>0,00099687500000000000</text:p>
          </table:table-cell>
          <table:table-cell table:formula="of:=[.D321]-[.D320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27" office:value-type="float" office:value="8640" calcext:value-type="float">
            <text:p>864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1" calcext:value-type="float">
            <text:p>0,00100000000000000000</text:p>
          </table:table-cell>
          <table:table-cell table:formula="of:=[.D322]-[.D321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27" office:value-type="float" office:value="8667" calcext:value-type="float">
            <text:p>8667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1003125" calcext:value-type="float">
            <text:p>0,00100312500000000000</text:p>
          </table:table-cell>
          <table:table-cell table:formula="of:=[.D323]-[.D322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27" office:value-type="float" office:value="8694" calcext:value-type="float">
            <text:p>8694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100625" calcext:value-type="float">
            <text:p>0,00100625000000000000</text:p>
          </table:table-cell>
          <table:table-cell table:formula="of:=[.D324]-[.D323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27" office:value-type="float" office:value="8721" calcext:value-type="float">
            <text:p>8721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1009375" calcext:value-type="float">
            <text:p>0,00100937500000000000</text:p>
          </table:table-cell>
          <table:table-cell table:formula="of:=[.D325]-[.D324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27" office:value-type="float" office:value="8748" calcext:value-type="float">
            <text:p>8748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10125" calcext:value-type="float">
            <text:p>0,00101250000000000000</text:p>
          </table:table-cell>
          <table:table-cell table:formula="of:=[.D326]-[.D325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27" office:value-type="float" office:value="8775" calcext:value-type="float">
            <text:p>8775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1015625" calcext:value-type="float">
            <text:p>0,00101562500000000000</text:p>
          </table:table-cell>
          <table:table-cell table:formula="of:=[.D327]-[.D326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27" office:value-type="float" office:value="8802" calcext:value-type="float">
            <text:p>8802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101875" calcext:value-type="float">
            <text:p>0,00101875000000000000</text:p>
          </table:table-cell>
          <table:table-cell table:formula="of:=[.D328]-[.D327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27" office:value-type="float" office:value="8829" calcext:value-type="float">
            <text:p>8829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1021875" calcext:value-type="float">
            <text:p>0,00102187500000000000</text:p>
          </table:table-cell>
          <table:table-cell table:formula="of:=[.D329]-[.D328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27" office:value-type="float" office:value="8856" calcext:value-type="float">
            <text:p>8856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1025" calcext:value-type="float">
            <text:p>0,00102500000000000000</text:p>
          </table:table-cell>
          <table:table-cell table:formula="of:=[.D330]-[.D329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27" office:value-type="float" office:value="8883" calcext:value-type="float">
            <text:p>8883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1028125" calcext:value-type="float">
            <text:p>0,00102812500000000000</text:p>
          </table:table-cell>
          <table:table-cell table:formula="of:=[.D331]-[.D330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27" office:value-type="float" office:value="8910" calcext:value-type="float">
            <text:p>891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103125" calcext:value-type="float">
            <text:p>0,00103125000000000000</text:p>
          </table:table-cell>
          <table:table-cell table:formula="of:=[.D332]-[.D331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27" office:value-type="float" office:value="8937" calcext:value-type="float">
            <text:p>8937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1034375" calcext:value-type="float">
            <text:p>0,00103437500000000000</text:p>
          </table:table-cell>
          <table:table-cell table:formula="of:=[.D333]-[.D332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27" office:value-type="float" office:value="8964" calcext:value-type="float">
            <text:p>8964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10375" calcext:value-type="float">
            <text:p>0,00103750000000000000</text:p>
          </table:table-cell>
          <table:table-cell table:formula="of:=[.D334]-[.D333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27" office:value-type="float" office:value="8991" calcext:value-type="float">
            <text:p>8991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1040625" calcext:value-type="float">
            <text:p>0,00104062500000000000</text:p>
          </table:table-cell>
          <table:table-cell table:formula="of:=[.D335]-[.D334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27" office:value-type="float" office:value="9018" calcext:value-type="float">
            <text:p>9018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104375" calcext:value-type="float">
            <text:p>0,00104375000000000000</text:p>
          </table:table-cell>
          <table:table-cell table:formula="of:=[.D336]-[.D335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27" office:value-type="float" office:value="9045" calcext:value-type="float">
            <text:p>9045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1046875" calcext:value-type="float">
            <text:p>0,00104687500000000000</text:p>
          </table:table-cell>
          <table:table-cell table:formula="of:=[.D337]-[.D336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27" office:value-type="float" office:value="9072" calcext:value-type="float">
            <text:p>9072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105" calcext:value-type="float">
            <text:p>0,00105000000000000000</text:p>
          </table:table-cell>
          <table:table-cell table:formula="of:=[.D338]-[.D337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27" office:value-type="float" office:value="9099" calcext:value-type="float">
            <text:p>9099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1053125" calcext:value-type="float">
            <text:p>0,00105312500000000000</text:p>
          </table:table-cell>
          <table:table-cell table:formula="of:=[.D339]-[.D338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27" office:value-type="float" office:value="9126" calcext:value-type="float">
            <text:p>9126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105625" calcext:value-type="float">
            <text:p>0,00105625000000000000</text:p>
          </table:table-cell>
          <table:table-cell table:formula="of:=[.D340]-[.D339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27" office:value-type="float" office:value="9153" calcext:value-type="float">
            <text:p>9153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1059375" calcext:value-type="float">
            <text:p>0,00105937500000000000</text:p>
          </table:table-cell>
          <table:table-cell table:formula="of:=[.D341]-[.D340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27" office:value-type="float" office:value="9180" calcext:value-type="float">
            <text:p>918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10625" calcext:value-type="float">
            <text:p>0,00106250000000000000</text:p>
          </table:table-cell>
          <table:table-cell table:formula="of:=[.D342]-[.D341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27" office:value-type="float" office:value="9207" calcext:value-type="float">
            <text:p>9207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1065625" calcext:value-type="float">
            <text:p>0,00106562500000000000</text:p>
          </table:table-cell>
          <table:table-cell table:formula="of:=[.D343]-[.D342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27" office:value-type="float" office:value="9234" calcext:value-type="float">
            <text:p>9234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106875" calcext:value-type="float">
            <text:p>0,00106875000000000000</text:p>
          </table:table-cell>
          <table:table-cell table:formula="of:=[.D344]-[.D343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27" office:value-type="float" office:value="9261" calcext:value-type="float">
            <text:p>9261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1071875" calcext:value-type="float">
            <text:p>0,00107187500000000000</text:p>
          </table:table-cell>
          <table:table-cell table:formula="of:=[.D345]-[.D34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27" office:value-type="float" office:value="9288" calcext:value-type="float">
            <text:p>9288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1075" calcext:value-type="float">
            <text:p>0,00107500000000000000</text:p>
          </table:table-cell>
          <table:table-cell table:formula="of:=[.D346]-[.D345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27" office:value-type="float" office:value="9315" calcext:value-type="float">
            <text:p>9315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1078125" calcext:value-type="float">
            <text:p>0,00107812500000000000</text:p>
          </table:table-cell>
          <table:table-cell table:formula="of:=[.D347]-[.D346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27" office:value-type="float" office:value="9342" calcext:value-type="float">
            <text:p>9342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108125" calcext:value-type="float">
            <text:p>0,00108125000000000000</text:p>
          </table:table-cell>
          <table:table-cell table:formula="of:=[.D348]-[.D347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27" office:value-type="float" office:value="9369" calcext:value-type="float">
            <text:p>9369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1084375" calcext:value-type="float">
            <text:p>0,00108437500000000000</text:p>
          </table:table-cell>
          <table:table-cell table:formula="of:=[.D349]-[.D348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27" office:value-type="float" office:value="9396" calcext:value-type="float">
            <text:p>9396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10875" calcext:value-type="float">
            <text:p>0,00108750000000000000</text:p>
          </table:table-cell>
          <table:table-cell table:formula="of:=[.D350]-[.D349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27" office:value-type="float" office:value="9423" calcext:value-type="float">
            <text:p>9423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1090625" calcext:value-type="float">
            <text:p>0,00109062500000000000</text:p>
          </table:table-cell>
          <table:table-cell table:formula="of:=[.D351]-[.D350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27" office:value-type="float" office:value="9450" calcext:value-type="float">
            <text:p>945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109375" calcext:value-type="float">
            <text:p>0,00109375000000000000</text:p>
          </table:table-cell>
          <table:table-cell table:formula="of:=[.D352]-[.D351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27" office:value-type="float" office:value="9477" calcext:value-type="float">
            <text:p>9477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1096875" calcext:value-type="float">
            <text:p>0,00109687500000000000</text:p>
          </table:table-cell>
          <table:table-cell table:formula="of:=[.D353]-[.D352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27" office:value-type="float" office:value="9504" calcext:value-type="float">
            <text:p>9504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11" calcext:value-type="float">
            <text:p>0,00110000000000000000</text:p>
          </table:table-cell>
          <table:table-cell table:formula="of:=[.D354]-[.D353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27" office:value-type="float" office:value="9531" calcext:value-type="float">
            <text:p>9531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1103125" calcext:value-type="float">
            <text:p>0,00110312500000000000</text:p>
          </table:table-cell>
          <table:table-cell table:formula="of:=[.D355]-[.D35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27" office:value-type="float" office:value="9558" calcext:value-type="float">
            <text:p>9558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110625" calcext:value-type="float">
            <text:p>0,00110625000000000000</text:p>
          </table:table-cell>
          <table:table-cell table:formula="of:=[.D356]-[.D355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27" office:value-type="float" office:value="9585" calcext:value-type="float">
            <text:p>9585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1109375" calcext:value-type="float">
            <text:p>0,00110937500000000000</text:p>
          </table:table-cell>
          <table:table-cell table:formula="of:=[.D357]-[.D356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27" office:value-type="float" office:value="9612" calcext:value-type="float">
            <text:p>9612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11125" calcext:value-type="float">
            <text:p>0,00111250000000000000</text:p>
          </table:table-cell>
          <table:table-cell table:formula="of:=[.D358]-[.D357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27" office:value-type="float" office:value="9639" calcext:value-type="float">
            <text:p>9639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1115625" calcext:value-type="float">
            <text:p>0,00111562500000000000</text:p>
          </table:table-cell>
          <table:table-cell table:formula="of:=[.D359]-[.D358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27" office:value-type="float" office:value="9666" calcext:value-type="float">
            <text:p>9666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111875" calcext:value-type="float">
            <text:p>0,00111875000000000000</text:p>
          </table:table-cell>
          <table:table-cell table:formula="of:=[.D360]-[.D359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27" office:value-type="float" office:value="9693" calcext:value-type="float">
            <text:p>9693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1121875" calcext:value-type="float">
            <text:p>0,00112187500000000000</text:p>
          </table:table-cell>
          <table:table-cell table:formula="of:=[.D361]-[.D360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27" office:value-type="float" office:value="9720" calcext:value-type="float">
            <text:p>972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1125" calcext:value-type="float">
            <text:p>0,00112500000000000000</text:p>
          </table:table-cell>
          <table:table-cell table:formula="of:=[.D362]-[.D361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27" office:value-type="float" office:value="9747" calcext:value-type="float">
            <text:p>9747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1128125" calcext:value-type="float">
            <text:p>0,00112812500000000000</text:p>
          </table:table-cell>
          <table:table-cell table:formula="of:=[.D363]-[.D362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27" office:value-type="float" office:value="9774" calcext:value-type="float">
            <text:p>9774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113125" calcext:value-type="float">
            <text:p>0,00113125000000000000</text:p>
          </table:table-cell>
          <table:table-cell table:formula="of:=[.D364]-[.D363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27" office:value-type="float" office:value="9801" calcext:value-type="float">
            <text:p>9801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1134375" calcext:value-type="float">
            <text:p>0,00113437500000000000</text:p>
          </table:table-cell>
          <table:table-cell table:formula="of:=[.D365]-[.D36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27" office:value-type="float" office:value="9828" calcext:value-type="float">
            <text:p>9828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11375" calcext:value-type="float">
            <text:p>0,00113750000000000000</text:p>
          </table:table-cell>
          <table:table-cell table:formula="of:=[.D366]-[.D365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27" office:value-type="float" office:value="9855" calcext:value-type="float">
            <text:p>9855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1140625" calcext:value-type="float">
            <text:p>0,00114062500000000000</text:p>
          </table:table-cell>
          <table:table-cell table:formula="of:=[.D367]-[.D366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27" office:value-type="float" office:value="9882" calcext:value-type="float">
            <text:p>9882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114375" calcext:value-type="float">
            <text:p>0,00114375000000000000</text:p>
          </table:table-cell>
          <table:table-cell table:formula="of:=[.D368]-[.D367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27" office:value-type="float" office:value="9909" calcext:value-type="float">
            <text:p>9909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1146875" calcext:value-type="float">
            <text:p>0,00114687500000000000</text:p>
          </table:table-cell>
          <table:table-cell table:formula="of:=[.D369]-[.D368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27" office:value-type="float" office:value="9936" calcext:value-type="float">
            <text:p>9936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115" calcext:value-type="float">
            <text:p>0,00115000000000000000</text:p>
          </table:table-cell>
          <table:table-cell table:formula="of:=[.D370]-[.D369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27" office:value-type="float" office:value="9963" calcext:value-type="float">
            <text:p>9963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1153125" calcext:value-type="float">
            <text:p>0,00115312500000000000</text:p>
          </table:table-cell>
          <table:table-cell table:formula="of:=[.D371]-[.D370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27" office:value-type="float" office:value="9990" calcext:value-type="float">
            <text:p>999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115625" calcext:value-type="float">
            <text:p>0,00115625000000000000</text:p>
          </table:table-cell>
          <table:table-cell table:formula="of:=[.D372]-[.D371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27" office:value-type="float" office:value="10017" calcext:value-type="float">
            <text:p>10017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1159375" calcext:value-type="float">
            <text:p>0,00115937500000000000</text:p>
          </table:table-cell>
          <table:table-cell table:formula="of:=[.D373]-[.D372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27" office:value-type="float" office:value="10044" calcext:value-type="float">
            <text:p>10044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11625" calcext:value-type="float">
            <text:p>0,00116250000000000000</text:p>
          </table:table-cell>
          <table:table-cell table:formula="of:=[.D374]-[.D373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27" office:value-type="float" office:value="10071" calcext:value-type="float">
            <text:p>10071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1165625" calcext:value-type="float">
            <text:p>0,00116562500000000000</text:p>
          </table:table-cell>
          <table:table-cell table:formula="of:=[.D375]-[.D37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27" office:value-type="float" office:value="10098" calcext:value-type="float">
            <text:p>10098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116875" calcext:value-type="float">
            <text:p>0,00116875000000000000</text:p>
          </table:table-cell>
          <table:table-cell table:formula="of:=[.D376]-[.D375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27" office:value-type="float" office:value="10125" calcext:value-type="float">
            <text:p>10125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1171875" calcext:value-type="float">
            <text:p>0,00117187500000000000</text:p>
          </table:table-cell>
          <table:table-cell table:formula="of:=[.D377]-[.D376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27" office:value-type="float" office:value="10152" calcext:value-type="float">
            <text:p>10152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1175" calcext:value-type="float">
            <text:p>0,00117500000000000000</text:p>
          </table:table-cell>
          <table:table-cell table:formula="of:=[.D378]-[.D377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27" office:value-type="float" office:value="10179" calcext:value-type="float">
            <text:p>10179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1178125" calcext:value-type="float">
            <text:p>0,00117812500000000000</text:p>
          </table:table-cell>
          <table:table-cell table:formula="of:=[.D379]-[.D378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27" office:value-type="float" office:value="10206" calcext:value-type="float">
            <text:p>10206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118125" calcext:value-type="float">
            <text:p>0,00118125000000000000</text:p>
          </table:table-cell>
          <table:table-cell table:formula="of:=[.D380]-[.D379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27" office:value-type="float" office:value="10233" calcext:value-type="float">
            <text:p>10233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1184375" calcext:value-type="float">
            <text:p>0,00118437500000000000</text:p>
          </table:table-cell>
          <table:table-cell table:formula="of:=[.D381]-[.D380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27" office:value-type="float" office:value="10260" calcext:value-type="float">
            <text:p>1026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11875" calcext:value-type="float">
            <text:p>0,00118750000000000000</text:p>
          </table:table-cell>
          <table:table-cell table:formula="of:=[.D382]-[.D381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27" office:value-type="float" office:value="10287" calcext:value-type="float">
            <text:p>10287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1190625" calcext:value-type="float">
            <text:p>0,00119062500000000000</text:p>
          </table:table-cell>
          <table:table-cell table:formula="of:=[.D383]-[.D382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27" office:value-type="float" office:value="10314" calcext:value-type="float">
            <text:p>10314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119375" calcext:value-type="float">
            <text:p>0,00119375000000000000</text:p>
          </table:table-cell>
          <table:table-cell table:formula="of:=[.D384]-[.D383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27" office:value-type="float" office:value="10341" calcext:value-type="float">
            <text:p>10341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1196875" calcext:value-type="float">
            <text:p>0,00119687500000000000</text:p>
          </table:table-cell>
          <table:table-cell table:formula="of:=[.D385]-[.D384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27" office:value-type="float" office:value="10368" calcext:value-type="float">
            <text:p>10368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12" calcext:value-type="float">
            <text:p>0,00120000000000000000</text:p>
          </table:table-cell>
          <table:table-cell table:formula="of:=[.D386]-[.D385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27" office:value-type="float" office:value="10395" calcext:value-type="float">
            <text:p>10395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1203125" calcext:value-type="float">
            <text:p>0,00120312500000000000</text:p>
          </table:table-cell>
          <table:table-cell table:formula="of:=[.D387]-[.D386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27" office:value-type="float" office:value="10422" calcext:value-type="float">
            <text:p>10422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120625" calcext:value-type="float">
            <text:p>0,00120625000000000000</text:p>
          </table:table-cell>
          <table:table-cell table:formula="of:=[.D388]-[.D387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27" office:value-type="float" office:value="10449" calcext:value-type="float">
            <text:p>10449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1209375" calcext:value-type="float">
            <text:p>0,00120937500000000000</text:p>
          </table:table-cell>
          <table:table-cell table:formula="of:=[.D389]-[.D388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27" office:value-type="float" office:value="10476" calcext:value-type="float">
            <text:p>10476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12125" calcext:value-type="float">
            <text:p>0,00121250000000000000</text:p>
          </table:table-cell>
          <table:table-cell table:formula="of:=[.D390]-[.D389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27" office:value-type="float" office:value="10503" calcext:value-type="float">
            <text:p>10503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1215625" calcext:value-type="float">
            <text:p>0,00121562500000000000</text:p>
          </table:table-cell>
          <table:table-cell table:formula="of:=[.D391]-[.D390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27" office:value-type="float" office:value="10530" calcext:value-type="float">
            <text:p>1053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121875" calcext:value-type="float">
            <text:p>0,00121875000000000000</text:p>
          </table:table-cell>
          <table:table-cell table:formula="of:=[.D392]-[.D391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27" office:value-type="float" office:value="10557" calcext:value-type="float">
            <text:p>10557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1221875" calcext:value-type="float">
            <text:p>0,00122187500000000000</text:p>
          </table:table-cell>
          <table:table-cell table:formula="of:=[.D393]-[.D392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27" office:value-type="float" office:value="10584" calcext:value-type="float">
            <text:p>10584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1225" calcext:value-type="float">
            <text:p>0,00122500000000000000</text:p>
          </table:table-cell>
          <table:table-cell table:formula="of:=[.D394]-[.D393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27" office:value-type="float" office:value="10611" calcext:value-type="float">
            <text:p>10611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1228125" calcext:value-type="float">
            <text:p>0,00122812500000000000</text:p>
          </table:table-cell>
          <table:table-cell table:formula="of:=[.D395]-[.D394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27" office:value-type="float" office:value="10638" calcext:value-type="float">
            <text:p>10638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123125" calcext:value-type="float">
            <text:p>0,00123125000000000000</text:p>
          </table:table-cell>
          <table:table-cell table:formula="of:=[.D396]-[.D395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27" office:value-type="float" office:value="10665" calcext:value-type="float">
            <text:p>10665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1234375" calcext:value-type="float">
            <text:p>0,00123437500000000000</text:p>
          </table:table-cell>
          <table:table-cell table:formula="of:=[.D397]-[.D396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27" office:value-type="float" office:value="10692" calcext:value-type="float">
            <text:p>10692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12375" calcext:value-type="float">
            <text:p>0,00123750000000000000</text:p>
          </table:table-cell>
          <table:table-cell table:formula="of:=[.D398]-[.D397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27" office:value-type="float" office:value="10719" calcext:value-type="float">
            <text:p>10719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1240625" calcext:value-type="float">
            <text:p>0,00124062500000000000</text:p>
          </table:table-cell>
          <table:table-cell table:formula="of:=[.D399]-[.D398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27" office:value-type="float" office:value="10746" calcext:value-type="float">
            <text:p>10746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124375" calcext:value-type="float">
            <text:p>0,00124375000000000000</text:p>
          </table:table-cell>
          <table:table-cell table:formula="of:=[.D400]-[.D399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27" office:value-type="float" office:value="10773" calcext:value-type="float">
            <text:p>10773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1246875" calcext:value-type="float">
            <text:p>0,00124687500000000000</text:p>
          </table:table-cell>
          <table:table-cell table:formula="of:=[.D401]-[.D400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27" office:value-type="float" office:value="10800" calcext:value-type="float">
            <text:p>108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125" calcext:value-type="float">
            <text:p>0,00125000000000000000</text:p>
          </table:table-cell>
          <table:table-cell table:formula="of:=[.D402]-[.D401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27" office:value-type="float" office:value="10827" calcext:value-type="float">
            <text:p>10827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1253125" calcext:value-type="float">
            <text:p>0,00125312500000000000</text:p>
          </table:table-cell>
          <table:table-cell table:formula="of:=[.D403]-[.D402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27" office:value-type="float" office:value="10854" calcext:value-type="float">
            <text:p>10854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125625" calcext:value-type="float">
            <text:p>0,00125625000000000000</text:p>
          </table:table-cell>
          <table:table-cell table:formula="of:=[.D404]-[.D403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27" office:value-type="float" office:value="10881" calcext:value-type="float">
            <text:p>10881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1259375" calcext:value-type="float">
            <text:p>0,00125937500000000000</text:p>
          </table:table-cell>
          <table:table-cell table:formula="of:=[.D405]-[.D404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27" office:value-type="float" office:value="10908" calcext:value-type="float">
            <text:p>10908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12625" calcext:value-type="float">
            <text:p>0,00126250000000000000</text:p>
          </table:table-cell>
          <table:table-cell table:formula="of:=[.D406]-[.D405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27" office:value-type="float" office:value="10935" calcext:value-type="float">
            <text:p>10935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1265625" calcext:value-type="float">
            <text:p>0,00126562500000000000</text:p>
          </table:table-cell>
          <table:table-cell table:formula="of:=[.D407]-[.D406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27" office:value-type="float" office:value="10962" calcext:value-type="float">
            <text:p>10962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126875" calcext:value-type="float">
            <text:p>0,00126875000000000000</text:p>
          </table:table-cell>
          <table:table-cell table:formula="of:=[.D408]-[.D407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27" office:value-type="float" office:value="10989" calcext:value-type="float">
            <text:p>10989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1271875" calcext:value-type="float">
            <text:p>0,00127187500000000000</text:p>
          </table:table-cell>
          <table:table-cell table:formula="of:=[.D409]-[.D408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27" office:value-type="float" office:value="11016" calcext:value-type="float">
            <text:p>11016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1275" calcext:value-type="float">
            <text:p>0,00127500000000000000</text:p>
          </table:table-cell>
          <table:table-cell table:formula="of:=[.D410]-[.D409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27" office:value-type="float" office:value="11043" calcext:value-type="float">
            <text:p>11043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1278125" calcext:value-type="float">
            <text:p>0,00127812500000000000</text:p>
          </table:table-cell>
          <table:table-cell table:formula="of:=[.D411]-[.D410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27" office:value-type="float" office:value="11070" calcext:value-type="float">
            <text:p>1107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128125" calcext:value-type="float">
            <text:p>0,00128125000000000000</text:p>
          </table:table-cell>
          <table:table-cell table:formula="of:=[.D412]-[.D411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27" office:value-type="float" office:value="11097" calcext:value-type="float">
            <text:p>11097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1284375" calcext:value-type="float">
            <text:p>0,00128437500000000000</text:p>
          </table:table-cell>
          <table:table-cell table:formula="of:=[.D413]-[.D412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27" office:value-type="float" office:value="11124" calcext:value-type="float">
            <text:p>11124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12875" calcext:value-type="float">
            <text:p>0,00128750000000000000</text:p>
          </table:table-cell>
          <table:table-cell table:formula="of:=[.D414]-[.D413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27" office:value-type="float" office:value="11151" calcext:value-type="float">
            <text:p>11151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1290625" calcext:value-type="float">
            <text:p>0,00129062500000000000</text:p>
          </table:table-cell>
          <table:table-cell table:formula="of:=[.D415]-[.D414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27" office:value-type="float" office:value="11178" calcext:value-type="float">
            <text:p>11178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129375" calcext:value-type="float">
            <text:p>0,00129375000000000000</text:p>
          </table:table-cell>
          <table:table-cell table:formula="of:=[.D416]-[.D415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27" office:value-type="float" office:value="11205" calcext:value-type="float">
            <text:p>11205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1296875" calcext:value-type="float">
            <text:p>0,00129687500000000000</text:p>
          </table:table-cell>
          <table:table-cell table:formula="of:=[.D417]-[.D416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27" office:value-type="float" office:value="11232" calcext:value-type="float">
            <text:p>11232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13" calcext:value-type="float">
            <text:p>0,00130000000000000000</text:p>
          </table:table-cell>
          <table:table-cell table:formula="of:=[.D418]-[.D417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27" office:value-type="float" office:value="11259" calcext:value-type="float">
            <text:p>11259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1303125" calcext:value-type="float">
            <text:p>0,00130312500000000000</text:p>
          </table:table-cell>
          <table:table-cell table:formula="of:=[.D419]-[.D418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27" office:value-type="float" office:value="11286" calcext:value-type="float">
            <text:p>11286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130625" calcext:value-type="float">
            <text:p>0,00130625000000000000</text:p>
          </table:table-cell>
          <table:table-cell table:formula="of:=[.D420]-[.D419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27" office:value-type="float" office:value="11313" calcext:value-type="float">
            <text:p>11313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1309375" calcext:value-type="float">
            <text:p>0,00130937500000000000</text:p>
          </table:table-cell>
          <table:table-cell table:formula="of:=[.D421]-[.D420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27" office:value-type="float" office:value="11340" calcext:value-type="float">
            <text:p>1134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13125" calcext:value-type="float">
            <text:p>0,00131250000000000000</text:p>
          </table:table-cell>
          <table:table-cell table:formula="of:=[.D422]-[.D421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27" office:value-type="float" office:value="11367" calcext:value-type="float">
            <text:p>11367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1315625" calcext:value-type="float">
            <text:p>0,00131562500000000000</text:p>
          </table:table-cell>
          <table:table-cell table:formula="of:=[.D423]-[.D422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27" office:value-type="float" office:value="11394" calcext:value-type="float">
            <text:p>11394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131875" calcext:value-type="float">
            <text:p>0,00131875000000000000</text:p>
          </table:table-cell>
          <table:table-cell table:formula="of:=[.D424]-[.D423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27" office:value-type="float" office:value="11421" calcext:value-type="float">
            <text:p>11421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1321875" calcext:value-type="float">
            <text:p>0,00132187500000000000</text:p>
          </table:table-cell>
          <table:table-cell table:formula="of:=[.D425]-[.D42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27" office:value-type="float" office:value="11448" calcext:value-type="float">
            <text:p>11448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1325" calcext:value-type="float">
            <text:p>0,00132500000000000000</text:p>
          </table:table-cell>
          <table:table-cell table:formula="of:=[.D426]-[.D425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27" office:value-type="float" office:value="11475" calcext:value-type="float">
            <text:p>11475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1328125" calcext:value-type="float">
            <text:p>0,00132812500000000000</text:p>
          </table:table-cell>
          <table:table-cell table:formula="of:=[.D427]-[.D426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27" office:value-type="float" office:value="11502" calcext:value-type="float">
            <text:p>11502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133125" calcext:value-type="float">
            <text:p>0,00133125000000000000</text:p>
          </table:table-cell>
          <table:table-cell table:formula="of:=[.D428]-[.D427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27" office:value-type="float" office:value="11529" calcext:value-type="float">
            <text:p>11529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1334375" calcext:value-type="float">
            <text:p>0,00133437500000000000</text:p>
          </table:table-cell>
          <table:table-cell table:formula="of:=[.D429]-[.D428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27" office:value-type="float" office:value="11556" calcext:value-type="float">
            <text:p>11556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13375" calcext:value-type="float">
            <text:p>0,00133750000000000000</text:p>
          </table:table-cell>
          <table:table-cell table:formula="of:=[.D430]-[.D429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27" office:value-type="float" office:value="11583" calcext:value-type="float">
            <text:p>11583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1340625" calcext:value-type="float">
            <text:p>0,00134062500000000000</text:p>
          </table:table-cell>
          <table:table-cell table:formula="of:=[.D431]-[.D430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27" office:value-type="float" office:value="11610" calcext:value-type="float">
            <text:p>1161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134375" calcext:value-type="float">
            <text:p>0,00134375000000000000</text:p>
          </table:table-cell>
          <table:table-cell table:formula="of:=[.D432]-[.D431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27" office:value-type="float" office:value="11637" calcext:value-type="float">
            <text:p>11637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1346875" calcext:value-type="float">
            <text:p>0,00134687500000000000</text:p>
          </table:table-cell>
          <table:table-cell table:formula="of:=[.D433]-[.D432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27" office:value-type="float" office:value="11664" calcext:value-type="float">
            <text:p>11664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135" calcext:value-type="float">
            <text:p>0,00135000000000000000</text:p>
          </table:table-cell>
          <table:table-cell table:formula="of:=[.D434]-[.D433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27" office:value-type="float" office:value="11691" calcext:value-type="float">
            <text:p>11691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1353125" calcext:value-type="float">
            <text:p>0,00135312500000000000</text:p>
          </table:table-cell>
          <table:table-cell table:formula="of:=[.D435]-[.D43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27" office:value-type="float" office:value="11718" calcext:value-type="float">
            <text:p>11718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135625" calcext:value-type="float">
            <text:p>0,00135625000000000000</text:p>
          </table:table-cell>
          <table:table-cell table:formula="of:=[.D436]-[.D435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27" office:value-type="float" office:value="11745" calcext:value-type="float">
            <text:p>11745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1359375" calcext:value-type="float">
            <text:p>0,00135937500000000000</text:p>
          </table:table-cell>
          <table:table-cell table:formula="of:=[.D437]-[.D436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27" office:value-type="float" office:value="11772" calcext:value-type="float">
            <text:p>11772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13625" calcext:value-type="float">
            <text:p>0,00136250000000000000</text:p>
          </table:table-cell>
          <table:table-cell table:formula="of:=[.D438]-[.D437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27" office:value-type="float" office:value="11799" calcext:value-type="float">
            <text:p>11799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1365625" calcext:value-type="float">
            <text:p>0,00136562500000000000</text:p>
          </table:table-cell>
          <table:table-cell table:formula="of:=[.D439]-[.D438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27" office:value-type="float" office:value="11826" calcext:value-type="float">
            <text:p>11826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136875" calcext:value-type="float">
            <text:p>0,00136875000000000000</text:p>
          </table:table-cell>
          <table:table-cell table:formula="of:=[.D440]-[.D439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27" office:value-type="float" office:value="11853" calcext:value-type="float">
            <text:p>11853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1371875" calcext:value-type="float">
            <text:p>0,00137187500000000000</text:p>
          </table:table-cell>
          <table:table-cell table:formula="of:=[.D441]-[.D440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27" office:value-type="float" office:value="11880" calcext:value-type="float">
            <text:p>1188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1375" calcext:value-type="float">
            <text:p>0,00137500000000000000</text:p>
          </table:table-cell>
          <table:table-cell table:formula="of:=[.D442]-[.D441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27" office:value-type="float" office:value="11907" calcext:value-type="float">
            <text:p>11907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1378125" calcext:value-type="float">
            <text:p>0,00137812500000000000</text:p>
          </table:table-cell>
          <table:table-cell table:formula="of:=[.D443]-[.D442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27" office:value-type="float" office:value="11934" calcext:value-type="float">
            <text:p>11934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138125" calcext:value-type="float">
            <text:p>0,00138125000000000000</text:p>
          </table:table-cell>
          <table:table-cell table:formula="of:=[.D444]-[.D443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27" office:value-type="float" office:value="11961" calcext:value-type="float">
            <text:p>11961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1384375" calcext:value-type="float">
            <text:p>0,00138437500000000000</text:p>
          </table:table-cell>
          <table:table-cell table:formula="of:=[.D445]-[.D44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27" office:value-type="float" office:value="11988" calcext:value-type="float">
            <text:p>11988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13875" calcext:value-type="float">
            <text:p>0,00138750000000000000</text:p>
          </table:table-cell>
          <table:table-cell table:formula="of:=[.D446]-[.D445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27" office:value-type="float" office:value="12015" calcext:value-type="float">
            <text:p>12015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1390625" calcext:value-type="float">
            <text:p>0,00139062500000000000</text:p>
          </table:table-cell>
          <table:table-cell table:formula="of:=[.D447]-[.D446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27" office:value-type="float" office:value="12042" calcext:value-type="float">
            <text:p>12042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139375" calcext:value-type="float">
            <text:p>0,00139375000000000000</text:p>
          </table:table-cell>
          <table:table-cell table:formula="of:=[.D448]-[.D447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27" office:value-type="float" office:value="12069" calcext:value-type="float">
            <text:p>12069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1396875" calcext:value-type="float">
            <text:p>0,00139687500000000000</text:p>
          </table:table-cell>
          <table:table-cell table:formula="of:=[.D449]-[.D448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27" office:value-type="float" office:value="12096" calcext:value-type="float">
            <text:p>12096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14" calcext:value-type="float">
            <text:p>0,00140000000000000000</text:p>
          </table:table-cell>
          <table:table-cell table:formula="of:=[.D450]-[.D449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27" office:value-type="float" office:value="12123" calcext:value-type="float">
            <text:p>12123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1403125" calcext:value-type="float">
            <text:p>0,00140312500000000000</text:p>
          </table:table-cell>
          <table:table-cell table:formula="of:=[.D451]-[.D450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27" office:value-type="float" office:value="12150" calcext:value-type="float">
            <text:p>1215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140625" calcext:value-type="float">
            <text:p>0,00140625000000000000</text:p>
          </table:table-cell>
          <table:table-cell table:formula="of:=[.D452]-[.D451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27" office:value-type="float" office:value="12177" calcext:value-type="float">
            <text:p>12177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1409375" calcext:value-type="float">
            <text:p>0,00140937500000000000</text:p>
          </table:table-cell>
          <table:table-cell table:formula="of:=[.D453]-[.D452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27" office:value-type="float" office:value="12204" calcext:value-type="float">
            <text:p>12204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14125" calcext:value-type="float">
            <text:p>0,00141250000000000000</text:p>
          </table:table-cell>
          <table:table-cell table:formula="of:=[.D454]-[.D453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27" office:value-type="float" office:value="12231" calcext:value-type="float">
            <text:p>12231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1415625" calcext:value-type="float">
            <text:p>0,00141562500000000000</text:p>
          </table:table-cell>
          <table:table-cell table:formula="of:=[.D455]-[.D45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27" office:value-type="float" office:value="12258" calcext:value-type="float">
            <text:p>12258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141875" calcext:value-type="float">
            <text:p>0,00141875000000000000</text:p>
          </table:table-cell>
          <table:table-cell table:formula="of:=[.D456]-[.D455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27" office:value-type="float" office:value="12285" calcext:value-type="float">
            <text:p>12285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1421875" calcext:value-type="float">
            <text:p>0,00142187500000000000</text:p>
          </table:table-cell>
          <table:table-cell table:formula="of:=[.D457]-[.D456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27" office:value-type="float" office:value="12312" calcext:value-type="float">
            <text:p>12312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1425" calcext:value-type="float">
            <text:p>0,00142500000000000000</text:p>
          </table:table-cell>
          <table:table-cell table:formula="of:=[.D458]-[.D457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27" office:value-type="float" office:value="12339" calcext:value-type="float">
            <text:p>12339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1428125" calcext:value-type="float">
            <text:p>0,00142812500000000000</text:p>
          </table:table-cell>
          <table:table-cell table:formula="of:=[.D459]-[.D458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27" office:value-type="float" office:value="12366" calcext:value-type="float">
            <text:p>12366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143125" calcext:value-type="float">
            <text:p>0,00143125000000000000</text:p>
          </table:table-cell>
          <table:table-cell table:formula="of:=[.D460]-[.D459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27" office:value-type="float" office:value="12393" calcext:value-type="float">
            <text:p>12393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1434375" calcext:value-type="float">
            <text:p>0,00143437500000000000</text:p>
          </table:table-cell>
          <table:table-cell table:formula="of:=[.D461]-[.D460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27" office:value-type="float" office:value="12420" calcext:value-type="float">
            <text:p>1242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14375" calcext:value-type="float">
            <text:p>0,00143750000000000000</text:p>
          </table:table-cell>
          <table:table-cell table:formula="of:=[.D462]-[.D461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27" office:value-type="float" office:value="12447" calcext:value-type="float">
            <text:p>12447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1440625" calcext:value-type="float">
            <text:p>0,00144062500000000000</text:p>
          </table:table-cell>
          <table:table-cell table:formula="of:=[.D463]-[.D462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27" office:value-type="float" office:value="12474" calcext:value-type="float">
            <text:p>12474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144375" calcext:value-type="float">
            <text:p>0,00144375000000000000</text:p>
          </table:table-cell>
          <table:table-cell table:formula="of:=[.D464]-[.D463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27" office:value-type="float" office:value="12501" calcext:value-type="float">
            <text:p>12501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1446875" calcext:value-type="float">
            <text:p>0,00144687500000000000</text:p>
          </table:table-cell>
          <table:table-cell table:formula="of:=[.D465]-[.D464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27" office:value-type="float" office:value="12528" calcext:value-type="float">
            <text:p>12528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145" calcext:value-type="float">
            <text:p>0,00145000000000000000</text:p>
          </table:table-cell>
          <table:table-cell table:formula="of:=[.D466]-[.D465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27" office:value-type="float" office:value="12555" calcext:value-type="float">
            <text:p>12555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1453125" calcext:value-type="float">
            <text:p>0,00145312500000000000</text:p>
          </table:table-cell>
          <table:table-cell table:formula="of:=[.D467]-[.D466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27" office:value-type="float" office:value="12582" calcext:value-type="float">
            <text:p>12582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145625" calcext:value-type="float">
            <text:p>0,00145625000000000000</text:p>
          </table:table-cell>
          <table:table-cell table:formula="of:=[.D468]-[.D467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27" office:value-type="float" office:value="12609" calcext:value-type="float">
            <text:p>12609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1459375" calcext:value-type="float">
            <text:p>0,00145937500000000000</text:p>
          </table:table-cell>
          <table:table-cell table:formula="of:=[.D469]-[.D468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27" office:value-type="float" office:value="12636" calcext:value-type="float">
            <text:p>12636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14625" calcext:value-type="float">
            <text:p>0,00146250000000000000</text:p>
          </table:table-cell>
          <table:table-cell table:formula="of:=[.D470]-[.D469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27" office:value-type="float" office:value="12663" calcext:value-type="float">
            <text:p>12663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1465625" calcext:value-type="float">
            <text:p>0,00146562500000000000</text:p>
          </table:table-cell>
          <table:table-cell table:formula="of:=[.D471]-[.D470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27" office:value-type="float" office:value="12690" calcext:value-type="float">
            <text:p>1269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146875" calcext:value-type="float">
            <text:p>0,00146875000000000000</text:p>
          </table:table-cell>
          <table:table-cell table:formula="of:=[.D472]-[.D471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27" office:value-type="float" office:value="12717" calcext:value-type="float">
            <text:p>12717</text:p>
          </table:table-cell>
          <table:table-cell office:value-type="float" office:value="8640000" calcext:value-type="float">
            <text:p>8640000</text:p>
          </table:table-cell>
          <table:table-cell table:formula="of:=[.B472]/[.C472]" office:value-type="float" office:value="0.001471875" calcext:value-type="float">
            <text:p>0,00147187500000000000</text:p>
          </table:table-cell>
          <table:table-cell table:formula="of:=[.D473]-[.D472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27" office:value-type="float" office:value="12744" calcext:value-type="float">
            <text:p>12744</text:p>
          </table:table-cell>
          <table:table-cell office:value-type="float" office:value="8640000" calcext:value-type="float">
            <text:p>8640000</text:p>
          </table:table-cell>
          <table:table-cell table:formula="of:=[.B473]/[.C473]" office:value-type="float" office:value="0.001475" calcext:value-type="float">
            <text:p>0,00147500000000000000</text:p>
          </table:table-cell>
          <table:table-cell table:formula="of:=[.D474]-[.D473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27" office:value-type="float" office:value="12771" calcext:value-type="float">
            <text:p>12771</text:p>
          </table:table-cell>
          <table:table-cell office:value-type="float" office:value="8640000" calcext:value-type="float">
            <text:p>8640000</text:p>
          </table:table-cell>
          <table:table-cell table:formula="of:=[.B474]/[.C474]" office:value-type="float" office:value="0.001478125" calcext:value-type="float">
            <text:p>0,00147812500000000000</text:p>
          </table:table-cell>
          <table:table-cell table:formula="of:=[.D475]-[.D474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27" office:value-type="float" office:value="12798" calcext:value-type="float">
            <text:p>12798</text:p>
          </table:table-cell>
          <table:table-cell office:value-type="float" office:value="8640000" calcext:value-type="float">
            <text:p>8640000</text:p>
          </table:table-cell>
          <table:table-cell table:formula="of:=[.B475]/[.C475]" office:value-type="float" office:value="0.00148125" calcext:value-type="float">
            <text:p>0,00148125000000000000</text:p>
          </table:table-cell>
          <table:table-cell table:formula="of:=[.D476]-[.D475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27" office:value-type="float" office:value="12825" calcext:value-type="float">
            <text:p>12825</text:p>
          </table:table-cell>
          <table:table-cell office:value-type="float" office:value="8640000" calcext:value-type="float">
            <text:p>8640000</text:p>
          </table:table-cell>
          <table:table-cell table:formula="of:=[.B476]/[.C476]" office:value-type="float" office:value="0.001484375" calcext:value-type="float">
            <text:p>0,00148437500000000000</text:p>
          </table:table-cell>
          <table:table-cell table:formula="of:=[.D477]-[.D476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27" office:value-type="float" office:value="12852" calcext:value-type="float">
            <text:p>12852</text:p>
          </table:table-cell>
          <table:table-cell office:value-type="float" office:value="8640000" calcext:value-type="float">
            <text:p>8640000</text:p>
          </table:table-cell>
          <table:table-cell table:formula="of:=[.B477]/[.C477]" office:value-type="float" office:value="0.0014875" calcext:value-type="float">
            <text:p>0,00148750000000000000</text:p>
          </table:table-cell>
          <table:table-cell table:formula="of:=[.D478]-[.D477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27" office:value-type="float" office:value="12879" calcext:value-type="float">
            <text:p>12879</text:p>
          </table:table-cell>
          <table:table-cell office:value-type="float" office:value="8640000" calcext:value-type="float">
            <text:p>8640000</text:p>
          </table:table-cell>
          <table:table-cell table:formula="of:=[.B478]/[.C478]" office:value-type="float" office:value="0.001490625" calcext:value-type="float">
            <text:p>0,00149062500000000000</text:p>
          </table:table-cell>
          <table:table-cell table:formula="of:=[.D479]-[.D478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27" office:value-type="float" office:value="12906" calcext:value-type="float">
            <text:p>12906</text:p>
          </table:table-cell>
          <table:table-cell office:value-type="float" office:value="8640000" calcext:value-type="float">
            <text:p>8640000</text:p>
          </table:table-cell>
          <table:table-cell table:formula="of:=[.B479]/[.C479]" office:value-type="float" office:value="0.00149375" calcext:value-type="float">
            <text:p>0,00149375000000000000</text:p>
          </table:table-cell>
          <table:table-cell table:formula="of:=[.D480]-[.D479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27" office:value-type="float" office:value="12933" calcext:value-type="float">
            <text:p>12933</text:p>
          </table:table-cell>
          <table:table-cell office:value-type="float" office:value="8640000" calcext:value-type="float">
            <text:p>8640000</text:p>
          </table:table-cell>
          <table:table-cell table:formula="of:=[.B480]/[.C480]" office:value-type="float" office:value="0.001496875" calcext:value-type="float">
            <text:p>0,00149687500000000000</text:p>
          </table:table-cell>
          <table:table-cell table:formula="of:=[.D481]-[.D480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27" office:value-type="float" office:value="12960" calcext:value-type="float">
            <text:p>12960</text:p>
          </table:table-cell>
          <table:table-cell office:value-type="float" office:value="8640000" calcext:value-type="float">
            <text:p>8640000</text:p>
          </table:table-cell>
          <table:table-cell table:formula="of:=[.B481]/[.C481]" office:value-type="float" office:value="0.0015" calcext:value-type="float">
            <text:p>0,00150000000000000000</text:p>
          </table:table-cell>
          <table:table-cell table:formula="of:=[.D482]-[.D481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+27" office:value-type="float" office:value="12987" calcext:value-type="float">
            <text:p>12987</text:p>
          </table:table-cell>
          <table:table-cell office:value-type="float" office:value="8640000" calcext:value-type="float">
            <text:p>8640000</text:p>
          </table:table-cell>
          <table:table-cell table:formula="of:=[.B482]/[.C482]" office:value-type="float" office:value="0.001503125" calcext:value-type="float">
            <text:p>0,00150312500000000000</text:p>
          </table:table-cell>
          <table:table-cell table:formula="of:=[.D483]-[.D482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+27" office:value-type="float" office:value="13014" calcext:value-type="float">
            <text:p>13014</text:p>
          </table:table-cell>
          <table:table-cell office:value-type="float" office:value="8640000" calcext:value-type="float">
            <text:p>8640000</text:p>
          </table:table-cell>
          <table:table-cell table:formula="of:=[.B483]/[.C483]" office:value-type="float" office:value="0.00150625" calcext:value-type="float">
            <text:p>0,00150625000000000000</text:p>
          </table:table-cell>
          <table:table-cell table:formula="of:=[.D484]-[.D483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+27" office:value-type="float" office:value="13041" calcext:value-type="float">
            <text:p>13041</text:p>
          </table:table-cell>
          <table:table-cell office:value-type="float" office:value="8640000" calcext:value-type="float">
            <text:p>8640000</text:p>
          </table:table-cell>
          <table:table-cell table:formula="of:=[.B484]/[.C484]" office:value-type="float" office:value="0.001509375" calcext:value-type="float">
            <text:p>0,00150937500000000000</text:p>
          </table:table-cell>
          <table:table-cell table:formula="of:=[.D485]-[.D484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+27" office:value-type="float" office:value="13068" calcext:value-type="float">
            <text:p>13068</text:p>
          </table:table-cell>
          <table:table-cell office:value-type="float" office:value="8640000" calcext:value-type="float">
            <text:p>8640000</text:p>
          </table:table-cell>
          <table:table-cell table:formula="of:=[.B485]/[.C485]" office:value-type="float" office:value="0.0015125" calcext:value-type="float">
            <text:p>0,00151250000000000000</text:p>
          </table:table-cell>
          <table:table-cell table:formula="of:=[.D486]-[.D485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+27" office:value-type="float" office:value="13095" calcext:value-type="float">
            <text:p>13095</text:p>
          </table:table-cell>
          <table:table-cell office:value-type="float" office:value="8640000" calcext:value-type="float">
            <text:p>8640000</text:p>
          </table:table-cell>
          <table:table-cell table:formula="of:=[.B486]/[.C486]" office:value-type="float" office:value="0.001515625" calcext:value-type="float">
            <text:p>0,00151562500000000000</text:p>
          </table:table-cell>
          <table:table-cell table:formula="of:=[.D487]-[.D486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+27" office:value-type="float" office:value="13122" calcext:value-type="float">
            <text:p>13122</text:p>
          </table:table-cell>
          <table:table-cell office:value-type="float" office:value="8640000" calcext:value-type="float">
            <text:p>8640000</text:p>
          </table:table-cell>
          <table:table-cell table:formula="of:=[.B487]/[.C487]" office:value-type="float" office:value="0.00151875" calcext:value-type="float">
            <text:p>0,00151875000000000000</text:p>
          </table:table-cell>
          <table:table-cell table:formula="of:=[.D488]-[.D487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+27" office:value-type="float" office:value="13149" calcext:value-type="float">
            <text:p>13149</text:p>
          </table:table-cell>
          <table:table-cell office:value-type="float" office:value="8640000" calcext:value-type="float">
            <text:p>8640000</text:p>
          </table:table-cell>
          <table:table-cell table:formula="of:=[.B488]/[.C488]" office:value-type="float" office:value="0.001521875" calcext:value-type="float">
            <text:p>0,00152187500000000000</text:p>
          </table:table-cell>
          <table:table-cell table:formula="of:=[.D489]-[.D488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+27" office:value-type="float" office:value="13176" calcext:value-type="float">
            <text:p>13176</text:p>
          </table:table-cell>
          <table:table-cell office:value-type="float" office:value="8640000" calcext:value-type="float">
            <text:p>8640000</text:p>
          </table:table-cell>
          <table:table-cell table:formula="of:=[.B489]/[.C489]" office:value-type="float" office:value="0.001525" calcext:value-type="float">
            <text:p>0,00152500000000000000</text:p>
          </table:table-cell>
          <table:table-cell table:formula="of:=[.D490]-[.D489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+27" office:value-type="float" office:value="13203" calcext:value-type="float">
            <text:p>13203</text:p>
          </table:table-cell>
          <table:table-cell office:value-type="float" office:value="8640000" calcext:value-type="float">
            <text:p>8640000</text:p>
          </table:table-cell>
          <table:table-cell table:formula="of:=[.B490]/[.C490]" office:value-type="float" office:value="0.001528125" calcext:value-type="float">
            <text:p>0,00152812500000000000</text:p>
          </table:table-cell>
          <table:table-cell table:formula="of:=[.D491]-[.D490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0]+27" office:value-type="float" office:value="13230" calcext:value-type="float">
            <text:p>13230</text:p>
          </table:table-cell>
          <table:table-cell office:value-type="float" office:value="8640000" calcext:value-type="float">
            <text:p>8640000</text:p>
          </table:table-cell>
          <table:table-cell table:formula="of:=[.B491]/[.C491]" office:value-type="float" office:value="0.00153125" calcext:value-type="float">
            <text:p>0,00153125000000000000</text:p>
          </table:table-cell>
          <table:table-cell table:formula="of:=[.D492]-[.D491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+27" office:value-type="float" office:value="13257" calcext:value-type="float">
            <text:p>13257</text:p>
          </table:table-cell>
          <table:table-cell office:value-type="float" office:value="8640000" calcext:value-type="float">
            <text:p>8640000</text:p>
          </table:table-cell>
          <table:table-cell table:formula="of:=[.B492]/[.C492]" office:value-type="float" office:value="0.001534375" calcext:value-type="float">
            <text:p>0,00153437500000000000</text:p>
          </table:table-cell>
          <table:table-cell table:formula="of:=[.D493]-[.D492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+27" office:value-type="float" office:value="13284" calcext:value-type="float">
            <text:p>13284</text:p>
          </table:table-cell>
          <table:table-cell office:value-type="float" office:value="8640000" calcext:value-type="float">
            <text:p>8640000</text:p>
          </table:table-cell>
          <table:table-cell table:formula="of:=[.B493]/[.C493]" office:value-type="float" office:value="0.0015375" calcext:value-type="float">
            <text:p>0,00153750000000000000</text:p>
          </table:table-cell>
          <table:table-cell table:formula="of:=[.D494]-[.D493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+27" office:value-type="float" office:value="13311" calcext:value-type="float">
            <text:p>13311</text:p>
          </table:table-cell>
          <table:table-cell office:value-type="float" office:value="8640000" calcext:value-type="float">
            <text:p>8640000</text:p>
          </table:table-cell>
          <table:table-cell table:formula="of:=[.B494]/[.C494]" office:value-type="float" office:value="0.001540625" calcext:value-type="float">
            <text:p>0,00154062500000000000</text:p>
          </table:table-cell>
          <table:table-cell table:formula="of:=[.D495]-[.D49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+27" office:value-type="float" office:value="13338" calcext:value-type="float">
            <text:p>13338</text:p>
          </table:table-cell>
          <table:table-cell office:value-type="float" office:value="8640000" calcext:value-type="float">
            <text:p>8640000</text:p>
          </table:table-cell>
          <table:table-cell table:formula="of:=[.B495]/[.C495]" office:value-type="float" office:value="0.00154375" calcext:value-type="float">
            <text:p>0,00154375000000000000</text:p>
          </table:table-cell>
          <table:table-cell table:formula="of:=[.D496]-[.D495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+27" office:value-type="float" office:value="13365" calcext:value-type="float">
            <text:p>13365</text:p>
          </table:table-cell>
          <table:table-cell office:value-type="float" office:value="8640000" calcext:value-type="float">
            <text:p>8640000</text:p>
          </table:table-cell>
          <table:table-cell table:formula="of:=[.B496]/[.C496]" office:value-type="float" office:value="0.001546875" calcext:value-type="float">
            <text:p>0,00154687500000000000</text:p>
          </table:table-cell>
          <table:table-cell table:formula="of:=[.D497]-[.D496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+27" office:value-type="float" office:value="13392" calcext:value-type="float">
            <text:p>13392</text:p>
          </table:table-cell>
          <table:table-cell office:value-type="float" office:value="8640000" calcext:value-type="float">
            <text:p>8640000</text:p>
          </table:table-cell>
          <table:table-cell table:formula="of:=[.B497]/[.C497]" office:value-type="float" office:value="0.00155" calcext:value-type="float">
            <text:p>0,00155000000000000000</text:p>
          </table:table-cell>
          <table:table-cell table:formula="of:=[.D498]-[.D497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+27" office:value-type="float" office:value="13419" calcext:value-type="float">
            <text:p>13419</text:p>
          </table:table-cell>
          <table:table-cell office:value-type="float" office:value="8640000" calcext:value-type="float">
            <text:p>8640000</text:p>
          </table:table-cell>
          <table:table-cell table:formula="of:=[.B498]/[.C498]" office:value-type="float" office:value="0.001553125" calcext:value-type="float">
            <text:p>0,00155312500000000000</text:p>
          </table:table-cell>
          <table:table-cell table:formula="of:=[.D499]-[.D498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+27" office:value-type="float" office:value="13446" calcext:value-type="float">
            <text:p>13446</text:p>
          </table:table-cell>
          <table:table-cell office:value-type="float" office:value="8640000" calcext:value-type="float">
            <text:p>8640000</text:p>
          </table:table-cell>
          <table:table-cell table:formula="of:=[.B499]/[.C499]" office:value-type="float" office:value="0.00155625" calcext:value-type="float">
            <text:p>0,00155625000000000000</text:p>
          </table:table-cell>
          <table:table-cell table:formula="of:=[.D500]-[.D499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+27" office:value-type="float" office:value="13473" calcext:value-type="float">
            <text:p>13473</text:p>
          </table:table-cell>
          <table:table-cell office:value-type="float" office:value="8640000" calcext:value-type="float">
            <text:p>8640000</text:p>
          </table:table-cell>
          <table:table-cell table:formula="of:=[.B500]/[.C500]" office:value-type="float" office:value="0.001559375" calcext:value-type="float">
            <text:p>0,00155937500000000000</text:p>
          </table:table-cell>
          <table:table-cell table:formula="of:=[.D501]-[.D500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+27" office:value-type="float" office:value="13500" calcext:value-type="float">
            <text:p>13500</text:p>
          </table:table-cell>
          <table:table-cell office:value-type="float" office:value="8640000" calcext:value-type="float">
            <text:p>8640000</text:p>
          </table:table-cell>
          <table:table-cell table:formula="of:=[.B501]/[.C501]" office:value-type="float" office:value="0.0015625" calcext:value-type="float">
            <text:p>0,00156250000000000000</text:p>
          </table:table-cell>
          <table:table-cell table:formula="of:=[.D502]-[.D501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1]+27" office:value-type="float" office:value="13527" calcext:value-type="float">
            <text:p>13527</text:p>
          </table:table-cell>
          <table:table-cell office:value-type="float" office:value="8640000" calcext:value-type="float">
            <text:p>8640000</text:p>
          </table:table-cell>
          <table:table-cell table:formula="of:=[.B502]/[.C502]" office:value-type="float" office:value="0.001565625" calcext:value-type="float">
            <text:p>0,00156562500000000000</text:p>
          </table:table-cell>
          <table:table-cell table:formula="of:=[.D503]-[.D502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2]+27" office:value-type="float" office:value="13554" calcext:value-type="float">
            <text:p>13554</text:p>
          </table:table-cell>
          <table:table-cell office:value-type="float" office:value="8640000" calcext:value-type="float">
            <text:p>8640000</text:p>
          </table:table-cell>
          <table:table-cell table:formula="of:=[.B503]/[.C503]" office:value-type="float" office:value="0.00156875" calcext:value-type="float">
            <text:p>0,00156875000000000000</text:p>
          </table:table-cell>
          <table:table-cell table:formula="of:=[.D504]-[.D503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3]+27" office:value-type="float" office:value="13581" calcext:value-type="float">
            <text:p>13581</text:p>
          </table:table-cell>
          <table:table-cell office:value-type="float" office:value="8640000" calcext:value-type="float">
            <text:p>8640000</text:p>
          </table:table-cell>
          <table:table-cell table:formula="of:=[.B504]/[.C504]" office:value-type="float" office:value="0.001571875" calcext:value-type="float">
            <text:p>0,00157187500000000000</text:p>
          </table:table-cell>
          <table:table-cell table:formula="of:=[.D505]-[.D50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4]+27" office:value-type="float" office:value="13608" calcext:value-type="float">
            <text:p>13608</text:p>
          </table:table-cell>
          <table:table-cell office:value-type="float" office:value="8640000" calcext:value-type="float">
            <text:p>8640000</text:p>
          </table:table-cell>
          <table:table-cell table:formula="of:=[.B505]/[.C505]" office:value-type="float" office:value="0.001575" calcext:value-type="float">
            <text:p>0,00157500000000000000</text:p>
          </table:table-cell>
          <table:table-cell table:formula="of:=[.D506]-[.D505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5]+27" office:value-type="float" office:value="13635" calcext:value-type="float">
            <text:p>13635</text:p>
          </table:table-cell>
          <table:table-cell office:value-type="float" office:value="8640000" calcext:value-type="float">
            <text:p>8640000</text:p>
          </table:table-cell>
          <table:table-cell table:formula="of:=[.B506]/[.C506]" office:value-type="float" office:value="0.001578125" calcext:value-type="float">
            <text:p>0,00157812500000000000</text:p>
          </table:table-cell>
          <table:table-cell table:formula="of:=[.D507]-[.D506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6]+27" office:value-type="float" office:value="13662" calcext:value-type="float">
            <text:p>13662</text:p>
          </table:table-cell>
          <table:table-cell office:value-type="float" office:value="8640000" calcext:value-type="float">
            <text:p>8640000</text:p>
          </table:table-cell>
          <table:table-cell table:formula="of:=[.B507]/[.C507]" office:value-type="float" office:value="0.00158125" calcext:value-type="float">
            <text:p>0,00158125000000000000</text:p>
          </table:table-cell>
          <table:table-cell table:formula="of:=[.D508]-[.D507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07]+27" office:value-type="float" office:value="13689" calcext:value-type="float">
            <text:p>13689</text:p>
          </table:table-cell>
          <table:table-cell office:value-type="float" office:value="8640000" calcext:value-type="float">
            <text:p>8640000</text:p>
          </table:table-cell>
          <table:table-cell table:formula="of:=[.B508]/[.C508]" office:value-type="float" office:value="0.001584375" calcext:value-type="float">
            <text:p>0,00158437500000000000</text:p>
          </table:table-cell>
          <table:table-cell table:formula="of:=[.D509]-[.D508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08]+27" office:value-type="float" office:value="13716" calcext:value-type="float">
            <text:p>13716</text:p>
          </table:table-cell>
          <table:table-cell office:value-type="float" office:value="8640000" calcext:value-type="float">
            <text:p>8640000</text:p>
          </table:table-cell>
          <table:table-cell table:formula="of:=[.B509]/[.C509]" office:value-type="float" office:value="0.0015875" calcext:value-type="float">
            <text:p>0,00158750000000000000</text:p>
          </table:table-cell>
          <table:table-cell table:formula="of:=[.D510]-[.D509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509]+27" office:value-type="float" office:value="13743" calcext:value-type="float">
            <text:p>13743</text:p>
          </table:table-cell>
          <table:table-cell office:value-type="float" office:value="8640000" calcext:value-type="float">
            <text:p>8640000</text:p>
          </table:table-cell>
          <table:table-cell table:formula="of:=[.B510]/[.C510]" office:value-type="float" office:value="0.001590625" calcext:value-type="float">
            <text:p>0,00159062500000000000</text:p>
          </table:table-cell>
          <table:table-cell table:formula="of:=[.D511]-[.D510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0]+27" office:value-type="float" office:value="13770" calcext:value-type="float">
            <text:p>13770</text:p>
          </table:table-cell>
          <table:table-cell office:value-type="float" office:value="8640000" calcext:value-type="float">
            <text:p>8640000</text:p>
          </table:table-cell>
          <table:table-cell table:formula="of:=[.B511]/[.C511]" office:value-type="float" office:value="0.00159375" calcext:value-type="float">
            <text:p>0,00159375000000000000</text:p>
          </table:table-cell>
          <table:table-cell table:formula="of:=[.D512]-[.D511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511]+27" office:value-type="float" office:value="13797" calcext:value-type="float">
            <text:p>13797</text:p>
          </table:table-cell>
          <table:table-cell office:value-type="float" office:value="8640000" calcext:value-type="float">
            <text:p>8640000</text:p>
          </table:table-cell>
          <table:table-cell table:formula="of:=[.B512]/[.C512]" office:value-type="float" office:value="0.001596875" calcext:value-type="float">
            <text:p>0,00159687500000000000</text:p>
          </table:table-cell>
          <table:table-cell table:formula="of:=[.D513]-[.D512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12]+27" office:value-type="float" office:value="13824" calcext:value-type="float">
            <text:p>13824</text:p>
          </table:table-cell>
          <table:table-cell office:value-type="float" office:value="8640000" calcext:value-type="float">
            <text:p>8640000</text:p>
          </table:table-cell>
          <table:table-cell table:formula="of:=[.B513]/[.C513]" office:value-type="float" office:value="0.0016" calcext:value-type="float">
            <text:p>0,00160000000000000000</text:p>
          </table:table-cell>
          <table:table-cell table:formula="of:=[.D514]-[.D513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513]+27" office:value-type="float" office:value="13851" calcext:value-type="float">
            <text:p>13851</text:p>
          </table:table-cell>
          <table:table-cell office:value-type="float" office:value="8640000" calcext:value-type="float">
            <text:p>8640000</text:p>
          </table:table-cell>
          <table:table-cell table:formula="of:=[.B514]/[.C514]" office:value-type="float" office:value="0.001603125" calcext:value-type="float">
            <text:p>0,00160312500000000000</text:p>
          </table:table-cell>
          <table:table-cell table:formula="of:=[.D515]-[.D51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514]+27" office:value-type="float" office:value="13878" calcext:value-type="float">
            <text:p>13878</text:p>
          </table:table-cell>
          <table:table-cell office:value-type="float" office:value="8640000" calcext:value-type="float">
            <text:p>8640000</text:p>
          </table:table-cell>
          <table:table-cell table:formula="of:=[.B515]/[.C515]" office:value-type="float" office:value="0.00160625" calcext:value-type="float">
            <text:p>0,00160625000000000000</text:p>
          </table:table-cell>
          <table:table-cell table:formula="of:=[.D516]-[.D515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515]+27" office:value-type="float" office:value="13905" calcext:value-type="float">
            <text:p>13905</text:p>
          </table:table-cell>
          <table:table-cell office:value-type="float" office:value="8640000" calcext:value-type="float">
            <text:p>8640000</text:p>
          </table:table-cell>
          <table:table-cell table:formula="of:=[.B516]/[.C516]" office:value-type="float" office:value="0.001609375" calcext:value-type="float">
            <text:p>0,00160937500000000000</text:p>
          </table:table-cell>
          <table:table-cell table:formula="of:=[.D517]-[.D516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516]+27" office:value-type="float" office:value="13932" calcext:value-type="float">
            <text:p>13932</text:p>
          </table:table-cell>
          <table:table-cell office:value-type="float" office:value="8640000" calcext:value-type="float">
            <text:p>8640000</text:p>
          </table:table-cell>
          <table:table-cell table:formula="of:=[.B517]/[.C517]" office:value-type="float" office:value="0.0016125" calcext:value-type="float">
            <text:p>0,00161250000000000000</text:p>
          </table:table-cell>
          <table:table-cell table:formula="of:=[.D518]-[.D517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517]+27" office:value-type="float" office:value="13959" calcext:value-type="float">
            <text:p>13959</text:p>
          </table:table-cell>
          <table:table-cell office:value-type="float" office:value="8640000" calcext:value-type="float">
            <text:p>8640000</text:p>
          </table:table-cell>
          <table:table-cell table:formula="of:=[.B518]/[.C518]" office:value-type="float" office:value="0.001615625" calcext:value-type="float">
            <text:p>0,00161562500000000000</text:p>
          </table:table-cell>
          <table:table-cell table:formula="of:=[.D519]-[.D518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518]+27" office:value-type="float" office:value="13986" calcext:value-type="float">
            <text:p>13986</text:p>
          </table:table-cell>
          <table:table-cell office:value-type="float" office:value="8640000" calcext:value-type="float">
            <text:p>8640000</text:p>
          </table:table-cell>
          <table:table-cell table:formula="of:=[.B519]/[.C519]" office:value-type="float" office:value="0.00161875" calcext:value-type="float">
            <text:p>0,00161875000000000000</text:p>
          </table:table-cell>
          <table:table-cell table:formula="of:=[.D520]-[.D519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519]+27" office:value-type="float" office:value="14013" calcext:value-type="float">
            <text:p>14013</text:p>
          </table:table-cell>
          <table:table-cell office:value-type="float" office:value="8640000" calcext:value-type="float">
            <text:p>8640000</text:p>
          </table:table-cell>
          <table:table-cell table:formula="of:=[.B520]/[.C520]" office:value-type="float" office:value="0.001621875" calcext:value-type="float">
            <text:p>0,00162187500000000000</text:p>
          </table:table-cell>
          <table:table-cell table:formula="of:=[.D521]-[.D520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520]+27" office:value-type="float" office:value="14040" calcext:value-type="float">
            <text:p>14040</text:p>
          </table:table-cell>
          <table:table-cell office:value-type="float" office:value="8640000" calcext:value-type="float">
            <text:p>8640000</text:p>
          </table:table-cell>
          <table:table-cell table:formula="of:=[.B521]/[.C521]" office:value-type="float" office:value="0.001625" calcext:value-type="float">
            <text:p>0,00162500000000000000</text:p>
          </table:table-cell>
          <table:table-cell table:formula="of:=[.D522]-[.D521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521]+27" office:value-type="float" office:value="14067" calcext:value-type="float">
            <text:p>14067</text:p>
          </table:table-cell>
          <table:table-cell office:value-type="float" office:value="8640000" calcext:value-type="float">
            <text:p>8640000</text:p>
          </table:table-cell>
          <table:table-cell table:formula="of:=[.B522]/[.C522]" office:value-type="float" office:value="0.001628125" calcext:value-type="float">
            <text:p>0,00162812500000000000</text:p>
          </table:table-cell>
          <table:table-cell table:formula="of:=[.D523]-[.D522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B522]+27" office:value-type="float" office:value="14094" calcext:value-type="float">
            <text:p>14094</text:p>
          </table:table-cell>
          <table:table-cell office:value-type="float" office:value="8640000" calcext:value-type="float">
            <text:p>8640000</text:p>
          </table:table-cell>
          <table:table-cell table:formula="of:=[.B523]/[.C523]" office:value-type="float" office:value="0.00163125" calcext:value-type="float">
            <text:p>0,00163125000000000000</text:p>
          </table:table-cell>
          <table:table-cell table:formula="of:=[.D524]-[.D523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523]+27" office:value-type="float" office:value="14121" calcext:value-type="float">
            <text:p>14121</text:p>
          </table:table-cell>
          <table:table-cell office:value-type="float" office:value="8640000" calcext:value-type="float">
            <text:p>8640000</text:p>
          </table:table-cell>
          <table:table-cell table:formula="of:=[.B524]/[.C524]" office:value-type="float" office:value="0.001634375" calcext:value-type="float">
            <text:p>0,00163437500000000000</text:p>
          </table:table-cell>
          <table:table-cell table:formula="of:=[.D525]-[.D52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B524]+27" office:value-type="float" office:value="14148" calcext:value-type="float">
            <text:p>14148</text:p>
          </table:table-cell>
          <table:table-cell office:value-type="float" office:value="8640000" calcext:value-type="float">
            <text:p>8640000</text:p>
          </table:table-cell>
          <table:table-cell table:formula="of:=[.B525]/[.C525]" office:value-type="float" office:value="0.0016375" calcext:value-type="float">
            <text:p>0,00163750000000000000</text:p>
          </table:table-cell>
          <table:table-cell table:formula="of:=[.D526]-[.D525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B525]+27" office:value-type="float" office:value="14175" calcext:value-type="float">
            <text:p>14175</text:p>
          </table:table-cell>
          <table:table-cell office:value-type="float" office:value="8640000" calcext:value-type="float">
            <text:p>8640000</text:p>
          </table:table-cell>
          <table:table-cell table:formula="of:=[.B526]/[.C526]" office:value-type="float" office:value="0.001640625" calcext:value-type="float">
            <text:p>0,00164062500000000000</text:p>
          </table:table-cell>
          <table:table-cell table:formula="of:=[.D527]-[.D526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B526]+27" office:value-type="float" office:value="14202" calcext:value-type="float">
            <text:p>14202</text:p>
          </table:table-cell>
          <table:table-cell office:value-type="float" office:value="8640000" calcext:value-type="float">
            <text:p>8640000</text:p>
          </table:table-cell>
          <table:table-cell table:formula="of:=[.B527]/[.C527]" office:value-type="float" office:value="0.00164375" calcext:value-type="float">
            <text:p>0,00164375000000000000</text:p>
          </table:table-cell>
          <table:table-cell table:formula="of:=[.D528]-[.D527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B527]+27" office:value-type="float" office:value="14229" calcext:value-type="float">
            <text:p>14229</text:p>
          </table:table-cell>
          <table:table-cell office:value-type="float" office:value="8640000" calcext:value-type="float">
            <text:p>8640000</text:p>
          </table:table-cell>
          <table:table-cell table:formula="of:=[.B528]/[.C528]" office:value-type="float" office:value="0.001646875" calcext:value-type="float">
            <text:p>0,00164687500000000000</text:p>
          </table:table-cell>
          <table:table-cell table:formula="of:=[.D529]-[.D528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528]+27" office:value-type="float" office:value="14256" calcext:value-type="float">
            <text:p>14256</text:p>
          </table:table-cell>
          <table:table-cell office:value-type="float" office:value="8640000" calcext:value-type="float">
            <text:p>8640000</text:p>
          </table:table-cell>
          <table:table-cell table:formula="of:=[.B529]/[.C529]" office:value-type="float" office:value="0.00165" calcext:value-type="float">
            <text:p>0,00165000000000000000</text:p>
          </table:table-cell>
          <table:table-cell table:formula="of:=[.D530]-[.D529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B529]+27" office:value-type="float" office:value="14283" calcext:value-type="float">
            <text:p>14283</text:p>
          </table:table-cell>
          <table:table-cell office:value-type="float" office:value="8640000" calcext:value-type="float">
            <text:p>8640000</text:p>
          </table:table-cell>
          <table:table-cell table:formula="of:=[.B530]/[.C530]" office:value-type="float" office:value="0.001653125" calcext:value-type="float">
            <text:p>0,00165312500000000000</text:p>
          </table:table-cell>
          <table:table-cell table:formula="of:=[.D531]-[.D530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530]+27" office:value-type="float" office:value="14310" calcext:value-type="float">
            <text:p>14310</text:p>
          </table:table-cell>
          <table:table-cell office:value-type="float" office:value="8640000" calcext:value-type="float">
            <text:p>8640000</text:p>
          </table:table-cell>
          <table:table-cell table:formula="of:=[.B531]/[.C531]" office:value-type="float" office:value="0.00165625" calcext:value-type="float">
            <text:p>0,00165625000000000000</text:p>
          </table:table-cell>
          <table:table-cell table:formula="of:=[.D532]-[.D531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B531]+27" office:value-type="float" office:value="14337" calcext:value-type="float">
            <text:p>14337</text:p>
          </table:table-cell>
          <table:table-cell office:value-type="float" office:value="8640000" calcext:value-type="float">
            <text:p>8640000</text:p>
          </table:table-cell>
          <table:table-cell table:formula="of:=[.B532]/[.C532]" office:value-type="float" office:value="0.001659375" calcext:value-type="float">
            <text:p>0,00165937500000000000</text:p>
          </table:table-cell>
          <table:table-cell table:formula="of:=[.D533]-[.D532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B532]+27" office:value-type="float" office:value="14364" calcext:value-type="float">
            <text:p>14364</text:p>
          </table:table-cell>
          <table:table-cell office:value-type="float" office:value="8640000" calcext:value-type="float">
            <text:p>8640000</text:p>
          </table:table-cell>
          <table:table-cell table:formula="of:=[.B533]/[.C533]" office:value-type="float" office:value="0.0016625" calcext:value-type="float">
            <text:p>0,00166250000000000000</text:p>
          </table:table-cell>
          <table:table-cell table:formula="of:=[.D534]-[.D533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533]+27" office:value-type="float" office:value="14391" calcext:value-type="float">
            <text:p>14391</text:p>
          </table:table-cell>
          <table:table-cell office:value-type="float" office:value="8640000" calcext:value-type="float">
            <text:p>8640000</text:p>
          </table:table-cell>
          <table:table-cell table:formula="of:=[.B534]/[.C534]" office:value-type="float" office:value="0.001665625" calcext:value-type="float">
            <text:p>0,00166562500000000000</text:p>
          </table:table-cell>
          <table:table-cell table:formula="of:=[.D535]-[.D53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534]+27" office:value-type="float" office:value="14418" calcext:value-type="float">
            <text:p>14418</text:p>
          </table:table-cell>
          <table:table-cell office:value-type="float" office:value="8640000" calcext:value-type="float">
            <text:p>8640000</text:p>
          </table:table-cell>
          <table:table-cell table:formula="of:=[.B535]/[.C535]" office:value-type="float" office:value="0.00166875" calcext:value-type="float">
            <text:p>0,00166875000000000000</text:p>
          </table:table-cell>
          <table:table-cell table:formula="of:=[.D536]-[.D535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535]+27" office:value-type="float" office:value="14445" calcext:value-type="float">
            <text:p>14445</text:p>
          </table:table-cell>
          <table:table-cell office:value-type="float" office:value="8640000" calcext:value-type="float">
            <text:p>8640000</text:p>
          </table:table-cell>
          <table:table-cell table:formula="of:=[.B536]/[.C536]" office:value-type="float" office:value="0.001671875" calcext:value-type="float">
            <text:p>0,00167187500000000000</text:p>
          </table:table-cell>
          <table:table-cell table:formula="of:=[.D537]-[.D536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B536]+27" office:value-type="float" office:value="14472" calcext:value-type="float">
            <text:p>14472</text:p>
          </table:table-cell>
          <table:table-cell office:value-type="float" office:value="8640000" calcext:value-type="float">
            <text:p>8640000</text:p>
          </table:table-cell>
          <table:table-cell table:formula="of:=[.B537]/[.C537]" office:value-type="float" office:value="0.001675" calcext:value-type="float">
            <text:p>0,00167500000000000000</text:p>
          </table:table-cell>
          <table:table-cell table:formula="of:=[.D538]-[.D537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B537]+27" office:value-type="float" office:value="14499" calcext:value-type="float">
            <text:p>14499</text:p>
          </table:table-cell>
          <table:table-cell office:value-type="float" office:value="8640000" calcext:value-type="float">
            <text:p>8640000</text:p>
          </table:table-cell>
          <table:table-cell table:formula="of:=[.B538]/[.C538]" office:value-type="float" office:value="0.001678125" calcext:value-type="float">
            <text:p>0,00167812500000000000</text:p>
          </table:table-cell>
          <table:table-cell table:formula="of:=[.D539]-[.D538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B538]+27" office:value-type="float" office:value="14526" calcext:value-type="float">
            <text:p>14526</text:p>
          </table:table-cell>
          <table:table-cell office:value-type="float" office:value="8640000" calcext:value-type="float">
            <text:p>8640000</text:p>
          </table:table-cell>
          <table:table-cell table:formula="of:=[.B539]/[.C539]" office:value-type="float" office:value="0.00168125" calcext:value-type="float">
            <text:p>0,00168125000000000000</text:p>
          </table:table-cell>
          <table:table-cell table:formula="of:=[.D540]-[.D539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539]+27" office:value-type="float" office:value="14553" calcext:value-type="float">
            <text:p>14553</text:p>
          </table:table-cell>
          <table:table-cell office:value-type="float" office:value="8640000" calcext:value-type="float">
            <text:p>8640000</text:p>
          </table:table-cell>
          <table:table-cell table:formula="of:=[.B540]/[.C540]" office:value-type="float" office:value="0.001684375" calcext:value-type="float">
            <text:p>0,00168437500000000000</text:p>
          </table:table-cell>
          <table:table-cell table:formula="of:=[.D541]-[.D540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B540]+27" office:value-type="float" office:value="14580" calcext:value-type="float">
            <text:p>14580</text:p>
          </table:table-cell>
          <table:table-cell office:value-type="float" office:value="8640000" calcext:value-type="float">
            <text:p>8640000</text:p>
          </table:table-cell>
          <table:table-cell table:formula="of:=[.B541]/[.C541]" office:value-type="float" office:value="0.0016875" calcext:value-type="float">
            <text:p>0,00168750000000000000</text:p>
          </table:table-cell>
          <table:table-cell table:formula="of:=[.D542]-[.D541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B541]+27" office:value-type="float" office:value="14607" calcext:value-type="float">
            <text:p>14607</text:p>
          </table:table-cell>
          <table:table-cell office:value-type="float" office:value="8640000" calcext:value-type="float">
            <text:p>8640000</text:p>
          </table:table-cell>
          <table:table-cell table:formula="of:=[.B542]/[.C542]" office:value-type="float" office:value="0.001690625" calcext:value-type="float">
            <text:p>0,00169062500000000000</text:p>
          </table:table-cell>
          <table:table-cell table:formula="of:=[.D543]-[.D542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B542]+27" office:value-type="float" office:value="14634" calcext:value-type="float">
            <text:p>14634</text:p>
          </table:table-cell>
          <table:table-cell office:value-type="float" office:value="8640000" calcext:value-type="float">
            <text:p>8640000</text:p>
          </table:table-cell>
          <table:table-cell table:formula="of:=[.B543]/[.C543]" office:value-type="float" office:value="0.00169375" calcext:value-type="float">
            <text:p>0,00169375000000000000</text:p>
          </table:table-cell>
          <table:table-cell table:formula="of:=[.D544]-[.D543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543]+27" office:value-type="float" office:value="14661" calcext:value-type="float">
            <text:p>14661</text:p>
          </table:table-cell>
          <table:table-cell office:value-type="float" office:value="8640000" calcext:value-type="float">
            <text:p>8640000</text:p>
          </table:table-cell>
          <table:table-cell table:formula="of:=[.B544]/[.C544]" office:value-type="float" office:value="0.001696875" calcext:value-type="float">
            <text:p>0,00169687500000000000</text:p>
          </table:table-cell>
          <table:table-cell table:formula="of:=[.D545]-[.D544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B544]+27" office:value-type="float" office:value="14688" calcext:value-type="float">
            <text:p>14688</text:p>
          </table:table-cell>
          <table:table-cell office:value-type="float" office:value="8640000" calcext:value-type="float">
            <text:p>8640000</text:p>
          </table:table-cell>
          <table:table-cell table:formula="of:=[.B545]/[.C545]" office:value-type="float" office:value="0.0017" calcext:value-type="float">
            <text:p>0,00170000000000000000</text:p>
          </table:table-cell>
          <table:table-cell table:formula="of:=[.D546]-[.D545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B545]+27" office:value-type="float" office:value="14715" calcext:value-type="float">
            <text:p>14715</text:p>
          </table:table-cell>
          <table:table-cell office:value-type="float" office:value="8640000" calcext:value-type="float">
            <text:p>8640000</text:p>
          </table:table-cell>
          <table:table-cell table:formula="of:=[.B546]/[.C546]" office:value-type="float" office:value="0.001703125" calcext:value-type="float">
            <text:p>0,00170312500000000000</text:p>
          </table:table-cell>
          <table:table-cell table:formula="of:=[.D547]-[.D546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B546]+27" office:value-type="float" office:value="14742" calcext:value-type="float">
            <text:p>14742</text:p>
          </table:table-cell>
          <table:table-cell office:value-type="float" office:value="8640000" calcext:value-type="float">
            <text:p>8640000</text:p>
          </table:table-cell>
          <table:table-cell table:formula="of:=[.B547]/[.C547]" office:value-type="float" office:value="0.00170625" calcext:value-type="float">
            <text:p>0,00170625000000000000</text:p>
          </table:table-cell>
          <table:table-cell table:formula="of:=[.D548]-[.D547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B547]+27" office:value-type="float" office:value="14769" calcext:value-type="float">
            <text:p>14769</text:p>
          </table:table-cell>
          <table:table-cell office:value-type="float" office:value="8640000" calcext:value-type="float">
            <text:p>8640000</text:p>
          </table:table-cell>
          <table:table-cell table:formula="of:=[.B548]/[.C548]" office:value-type="float" office:value="0.001709375" calcext:value-type="float">
            <text:p>0,00170937500000000000</text:p>
          </table:table-cell>
          <table:table-cell table:formula="of:=[.D549]-[.D548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B548]+27" office:value-type="float" office:value="14796" calcext:value-type="float">
            <text:p>14796</text:p>
          </table:table-cell>
          <table:table-cell office:value-type="float" office:value="8640000" calcext:value-type="float">
            <text:p>8640000</text:p>
          </table:table-cell>
          <table:table-cell table:formula="of:=[.B549]/[.C549]" office:value-type="float" office:value="0.0017125" calcext:value-type="float">
            <text:p>0,00171250000000000000</text:p>
          </table:table-cell>
          <table:table-cell table:formula="of:=[.D550]-[.D549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B549]+27" office:value-type="float" office:value="14823" calcext:value-type="float">
            <text:p>14823</text:p>
          </table:table-cell>
          <table:table-cell office:value-type="float" office:value="8640000" calcext:value-type="float">
            <text:p>8640000</text:p>
          </table:table-cell>
          <table:table-cell table:formula="of:=[.B550]/[.C550]" office:value-type="float" office:value="0.001715625" calcext:value-type="float">
            <text:p>0,00171562500000000000</text:p>
          </table:table-cell>
          <table:table-cell table:formula="of:=[.D551]-[.D550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550]+27" office:value-type="float" office:value="14850" calcext:value-type="float">
            <text:p>14850</text:p>
          </table:table-cell>
          <table:table-cell office:value-type="float" office:value="8640000" calcext:value-type="float">
            <text:p>8640000</text:p>
          </table:table-cell>
          <table:table-cell table:formula="of:=[.B551]/[.C551]" office:value-type="float" office:value="0.00171875" calcext:value-type="float">
            <text:p>0,00171875000000000000</text:p>
          </table:table-cell>
          <table:table-cell table:formula="of:=[.D552]-[.D551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B551]+27" office:value-type="float" office:value="14877" calcext:value-type="float">
            <text:p>14877</text:p>
          </table:table-cell>
          <table:table-cell office:value-type="float" office:value="8640000" calcext:value-type="float">
            <text:p>8640000</text:p>
          </table:table-cell>
          <table:table-cell table:formula="of:=[.B552]/[.C552]" office:value-type="float" office:value="0.001721875" calcext:value-type="float">
            <text:p>0,00172187500000000000</text:p>
          </table:table-cell>
          <table:table-cell table:formula="of:=[.D553]-[.D552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B552]+27" office:value-type="float" office:value="14904" calcext:value-type="float">
            <text:p>14904</text:p>
          </table:table-cell>
          <table:table-cell office:value-type="float" office:value="8640000" calcext:value-type="float">
            <text:p>8640000</text:p>
          </table:table-cell>
          <table:table-cell table:formula="of:=[.B553]/[.C553]" office:value-type="float" office:value="0.001725" calcext:value-type="float">
            <text:p>0,00172500000000000000</text:p>
          </table:table-cell>
          <table:table-cell table:formula="of:=[.D554]-[.D553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B553]+27" office:value-type="float" office:value="14931" calcext:value-type="float">
            <text:p>14931</text:p>
          </table:table-cell>
          <table:table-cell office:value-type="float" office:value="8640000" calcext:value-type="float">
            <text:p>8640000</text:p>
          </table:table-cell>
          <table:table-cell table:formula="of:=[.B554]/[.C554]" office:value-type="float" office:value="0.001728125" calcext:value-type="float">
            <text:p>0,00172812500000000000</text:p>
          </table:table-cell>
          <table:table-cell table:formula="of:=[.D555]-[.D554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B554]+27" office:value-type="float" office:value="14958" calcext:value-type="float">
            <text:p>14958</text:p>
          </table:table-cell>
          <table:table-cell office:value-type="float" office:value="8640000" calcext:value-type="float">
            <text:p>8640000</text:p>
          </table:table-cell>
          <table:table-cell table:formula="of:=[.B555]/[.C555]" office:value-type="float" office:value="0.00173125" calcext:value-type="float">
            <text:p>0,00173125000000000000</text:p>
          </table:table-cell>
          <table:table-cell table:formula="of:=[.D556]-[.D555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B555]+27" office:value-type="float" office:value="14985" calcext:value-type="float">
            <text:p>14985</text:p>
          </table:table-cell>
          <table:table-cell office:value-type="float" office:value="8640000" calcext:value-type="float">
            <text:p>8640000</text:p>
          </table:table-cell>
          <table:table-cell table:formula="of:=[.B556]/[.C556]" office:value-type="float" office:value="0.001734375" calcext:value-type="float">
            <text:p>0,00173437500000000000</text:p>
          </table:table-cell>
          <table:table-cell table:formula="of:=[.D557]-[.D556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B556]+27" office:value-type="float" office:value="15012" calcext:value-type="float">
            <text:p>15012</text:p>
          </table:table-cell>
          <table:table-cell office:value-type="float" office:value="8640000" calcext:value-type="float">
            <text:p>8640000</text:p>
          </table:table-cell>
          <table:table-cell table:formula="of:=[.B557]/[.C557]" office:value-type="float" office:value="0.0017375" calcext:value-type="float">
            <text:p>0,00173750000000000000</text:p>
          </table:table-cell>
          <table:table-cell table:formula="of:=[.D558]-[.D557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B557]+27" office:value-type="float" office:value="15039" calcext:value-type="float">
            <text:p>15039</text:p>
          </table:table-cell>
          <table:table-cell office:value-type="float" office:value="8640000" calcext:value-type="float">
            <text:p>8640000</text:p>
          </table:table-cell>
          <table:table-cell table:formula="of:=[.B558]/[.C558]" office:value-type="float" office:value="0.001740625" calcext:value-type="float">
            <text:p>0,00174062500000000000</text:p>
          </table:table-cell>
          <table:table-cell table:formula="of:=[.D559]-[.D558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B558]+27" office:value-type="float" office:value="15066" calcext:value-type="float">
            <text:p>15066</text:p>
          </table:table-cell>
          <table:table-cell office:value-type="float" office:value="8640000" calcext:value-type="float">
            <text:p>8640000</text:p>
          </table:table-cell>
          <table:table-cell table:formula="of:=[.B559]/[.C559]" office:value-type="float" office:value="0.00174375" calcext:value-type="float">
            <text:p>0,00174375000000000000</text:p>
          </table:table-cell>
          <table:table-cell table:formula="of:=[.D560]-[.D559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B559]+27" office:value-type="float" office:value="15093" calcext:value-type="float">
            <text:p>15093</text:p>
          </table:table-cell>
          <table:table-cell office:value-type="float" office:value="8640000" calcext:value-type="float">
            <text:p>8640000</text:p>
          </table:table-cell>
          <table:table-cell table:formula="of:=[.B560]/[.C560]" office:value-type="float" office:value="0.001746875" calcext:value-type="float">
            <text:p>0,00174687500000000000</text:p>
          </table:table-cell>
          <table:table-cell table:formula="of:=[.D561]-[.D560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B560]+27" office:value-type="float" office:value="15120" calcext:value-type="float">
            <text:p>15120</text:p>
          </table:table-cell>
          <table:table-cell office:value-type="float" office:value="8640000" calcext:value-type="float">
            <text:p>8640000</text:p>
          </table:table-cell>
          <table:table-cell table:formula="of:=[.B561]/[.C561]" office:value-type="float" office:value="0.00175" calcext:value-type="float">
            <text:p>0,00175000000000000000</text:p>
          </table:table-cell>
          <table:table-cell table:formula="of:=[.D562]-[.D561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B561]+27" office:value-type="float" office:value="15147" calcext:value-type="float">
            <text:p>15147</text:p>
          </table:table-cell>
          <table:table-cell office:value-type="float" office:value="8640000" calcext:value-type="float">
            <text:p>8640000</text:p>
          </table:table-cell>
          <table:table-cell table:formula="of:=[.B562]/[.C562]" office:value-type="float" office:value="0.001753125" calcext:value-type="float">
            <text:p>0,00175312500000000000</text:p>
          </table:table-cell>
          <table:table-cell table:formula="of:=[.D563]-[.D562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B562]+27" office:value-type="float" office:value="15174" calcext:value-type="float">
            <text:p>15174</text:p>
          </table:table-cell>
          <table:table-cell office:value-type="float" office:value="8640000" calcext:value-type="float">
            <text:p>8640000</text:p>
          </table:table-cell>
          <table:table-cell table:formula="of:=[.B563]/[.C563]" office:value-type="float" office:value="0.00175625" calcext:value-type="float">
            <text:p>0,00175625000000000000</text:p>
          </table:table-cell>
          <table:table-cell table:formula="of:=[.D564]-[.D563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B563]+27" office:value-type="float" office:value="15201" calcext:value-type="float">
            <text:p>15201</text:p>
          </table:table-cell>
          <table:table-cell office:value-type="float" office:value="8640000" calcext:value-type="float">
            <text:p>8640000</text:p>
          </table:table-cell>
          <table:table-cell table:formula="of:=[.B564]/[.C564]" office:value-type="float" office:value="0.001759375" calcext:value-type="float">
            <text:p>0,00175937500000000000</text:p>
          </table:table-cell>
          <table:table-cell table:formula="of:=[.D565]-[.D564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B564]+27" office:value-type="float" office:value="15228" calcext:value-type="float">
            <text:p>15228</text:p>
          </table:table-cell>
          <table:table-cell office:value-type="float" office:value="8640000" calcext:value-type="float">
            <text:p>8640000</text:p>
          </table:table-cell>
          <table:table-cell table:formula="of:=[.B565]/[.C565]" office:value-type="float" office:value="0.0017625" calcext:value-type="float">
            <text:p>0,00176250000000000000</text:p>
          </table:table-cell>
          <table:table-cell table:formula="of:=[.D566]-[.D565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B565]+27" office:value-type="float" office:value="15255" calcext:value-type="float">
            <text:p>15255</text:p>
          </table:table-cell>
          <table:table-cell office:value-type="float" office:value="8640000" calcext:value-type="float">
            <text:p>8640000</text:p>
          </table:table-cell>
          <table:table-cell table:formula="of:=[.B566]/[.C566]" office:value-type="float" office:value="0.001765625" calcext:value-type="float">
            <text:p>0,00176562500000000000</text:p>
          </table:table-cell>
          <table:table-cell table:formula="of:=[.D567]-[.D566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B566]+27" office:value-type="float" office:value="15282" calcext:value-type="float">
            <text:p>15282</text:p>
          </table:table-cell>
          <table:table-cell office:value-type="float" office:value="8640000" calcext:value-type="float">
            <text:p>8640000</text:p>
          </table:table-cell>
          <table:table-cell table:formula="of:=[.B567]/[.C567]" office:value-type="float" office:value="0.00176875" calcext:value-type="float">
            <text:p>0,00176875000000000000</text:p>
          </table:table-cell>
          <table:table-cell table:formula="of:=[.D568]-[.D567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B567]+27" office:value-type="float" office:value="15309" calcext:value-type="float">
            <text:p>15309</text:p>
          </table:table-cell>
          <table:table-cell office:value-type="float" office:value="8640000" calcext:value-type="float">
            <text:p>8640000</text:p>
          </table:table-cell>
          <table:table-cell table:formula="of:=[.B568]/[.C568]" office:value-type="float" office:value="0.001771875" calcext:value-type="float">
            <text:p>0,00177187500000000000</text:p>
          </table:table-cell>
          <table:table-cell table:formula="of:=[.D569]-[.D568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B568]+27" office:value-type="float" office:value="15336" calcext:value-type="float">
            <text:p>15336</text:p>
          </table:table-cell>
          <table:table-cell office:value-type="float" office:value="8640000" calcext:value-type="float">
            <text:p>8640000</text:p>
          </table:table-cell>
          <table:table-cell table:formula="of:=[.B569]/[.C569]" office:value-type="float" office:value="0.001775" calcext:value-type="float">
            <text:p>0,00177500000000000000</text:p>
          </table:table-cell>
          <table:table-cell table:formula="of:=[.D570]-[.D569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B569]+27" office:value-type="float" office:value="15363" calcext:value-type="float">
            <text:p>15363</text:p>
          </table:table-cell>
          <table:table-cell office:value-type="float" office:value="8640000" calcext:value-type="float">
            <text:p>8640000</text:p>
          </table:table-cell>
          <table:table-cell table:formula="of:=[.B570]/[.C570]" office:value-type="float" office:value="0.001778125" calcext:value-type="float">
            <text:p>0,00177812500000000000</text:p>
          </table:table-cell>
          <table:table-cell table:formula="of:=[.D571]-[.D570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B570]+27" office:value-type="float" office:value="15390" calcext:value-type="float">
            <text:p>15390</text:p>
          </table:table-cell>
          <table:table-cell office:value-type="float" office:value="8640000" calcext:value-type="float">
            <text:p>8640000</text:p>
          </table:table-cell>
          <table:table-cell table:formula="of:=[.B571]/[.C571]" office:value-type="float" office:value="0.00178125" calcext:value-type="float">
            <text:p>0,00178125000000000000</text:p>
          </table:table-cell>
          <table:table-cell table:formula="of:=[.D572]-[.D571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B571]+27" office:value-type="float" office:value="15417" calcext:value-type="float">
            <text:p>15417</text:p>
          </table:table-cell>
          <table:table-cell office:value-type="float" office:value="8640000" calcext:value-type="float">
            <text:p>8640000</text:p>
          </table:table-cell>
          <table:table-cell table:formula="of:=[.B572]/[.C572]" office:value-type="float" office:value="0.001784375" calcext:value-type="float">
            <text:p>0,00178437500000000000</text:p>
          </table:table-cell>
          <table:table-cell table:formula="of:=[.D573]-[.D572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B572]+27" office:value-type="float" office:value="15444" calcext:value-type="float">
            <text:p>15444</text:p>
          </table:table-cell>
          <table:table-cell office:value-type="float" office:value="8640000" calcext:value-type="float">
            <text:p>8640000</text:p>
          </table:table-cell>
          <table:table-cell table:formula="of:=[.B573]/[.C573]" office:value-type="float" office:value="0.0017875" calcext:value-type="float">
            <text:p>0,00178750000000000000</text:p>
          </table:table-cell>
          <table:table-cell table:formula="of:=[.D574]-[.D573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B573]+27" office:value-type="float" office:value="15471" calcext:value-type="float">
            <text:p>15471</text:p>
          </table:table-cell>
          <table:table-cell office:value-type="float" office:value="8640000" calcext:value-type="float">
            <text:p>8640000</text:p>
          </table:table-cell>
          <table:table-cell table:formula="of:=[.B574]/[.C574]" office:value-type="float" office:value="0.001790625" calcext:value-type="float">
            <text:p>0,00179062500000000000</text:p>
          </table:table-cell>
          <table:table-cell table:formula="of:=[.D575]-[.D57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B574]+27" office:value-type="float" office:value="15498" calcext:value-type="float">
            <text:p>15498</text:p>
          </table:table-cell>
          <table:table-cell office:value-type="float" office:value="8640000" calcext:value-type="float">
            <text:p>8640000</text:p>
          </table:table-cell>
          <table:table-cell table:formula="of:=[.B575]/[.C575]" office:value-type="float" office:value="0.00179375" calcext:value-type="float">
            <text:p>0,00179375000000000000</text:p>
          </table:table-cell>
          <table:table-cell table:formula="of:=[.D576]-[.D575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B575]+27" office:value-type="float" office:value="15525" calcext:value-type="float">
            <text:p>15525</text:p>
          </table:table-cell>
          <table:table-cell office:value-type="float" office:value="8640000" calcext:value-type="float">
            <text:p>8640000</text:p>
          </table:table-cell>
          <table:table-cell table:formula="of:=[.B576]/[.C576]" office:value-type="float" office:value="0.001796875" calcext:value-type="float">
            <text:p>0,00179687500000000000</text:p>
          </table:table-cell>
          <table:table-cell table:formula="of:=[.D577]-[.D576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B576]+27" office:value-type="float" office:value="15552" calcext:value-type="float">
            <text:p>15552</text:p>
          </table:table-cell>
          <table:table-cell office:value-type="float" office:value="8640000" calcext:value-type="float">
            <text:p>8640000</text:p>
          </table:table-cell>
          <table:table-cell table:formula="of:=[.B577]/[.C577]" office:value-type="float" office:value="0.0018" calcext:value-type="float">
            <text:p>0,00180000000000000000</text:p>
          </table:table-cell>
          <table:table-cell table:formula="of:=[.D578]-[.D577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B577]+27" office:value-type="float" office:value="15579" calcext:value-type="float">
            <text:p>15579</text:p>
          </table:table-cell>
          <table:table-cell office:value-type="float" office:value="8640000" calcext:value-type="float">
            <text:p>8640000</text:p>
          </table:table-cell>
          <table:table-cell table:formula="of:=[.B578]/[.C578]" office:value-type="float" office:value="0.001803125" calcext:value-type="float">
            <text:p>0,00180312500000000000</text:p>
          </table:table-cell>
          <table:table-cell table:formula="of:=[.D579]-[.D578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B578]+27" office:value-type="float" office:value="15606" calcext:value-type="float">
            <text:p>15606</text:p>
          </table:table-cell>
          <table:table-cell office:value-type="float" office:value="8640000" calcext:value-type="float">
            <text:p>8640000</text:p>
          </table:table-cell>
          <table:table-cell table:formula="of:=[.B579]/[.C579]" office:value-type="float" office:value="0.00180625" calcext:value-type="float">
            <text:p>0,00180625000000000000</text:p>
          </table:table-cell>
          <table:table-cell table:formula="of:=[.D580]-[.D579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B579]+27" office:value-type="float" office:value="15633" calcext:value-type="float">
            <text:p>15633</text:p>
          </table:table-cell>
          <table:table-cell office:value-type="float" office:value="8640000" calcext:value-type="float">
            <text:p>8640000</text:p>
          </table:table-cell>
          <table:table-cell table:formula="of:=[.B580]/[.C580]" office:value-type="float" office:value="0.001809375" calcext:value-type="float">
            <text:p>0,00180937500000000000</text:p>
          </table:table-cell>
          <table:table-cell table:formula="of:=[.D581]-[.D580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B580]+27" office:value-type="float" office:value="15660" calcext:value-type="float">
            <text:p>15660</text:p>
          </table:table-cell>
          <table:table-cell office:value-type="float" office:value="8640000" calcext:value-type="float">
            <text:p>8640000</text:p>
          </table:table-cell>
          <table:table-cell table:formula="of:=[.B581]/[.C581]" office:value-type="float" office:value="0.0018125" calcext:value-type="float">
            <text:p>0,00181250000000000000</text:p>
          </table:table-cell>
          <table:table-cell table:formula="of:=[.D582]-[.D581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B581]+27" office:value-type="float" office:value="15687" calcext:value-type="float">
            <text:p>15687</text:p>
          </table:table-cell>
          <table:table-cell office:value-type="float" office:value="8640000" calcext:value-type="float">
            <text:p>8640000</text:p>
          </table:table-cell>
          <table:table-cell table:formula="of:=[.B582]/[.C582]" office:value-type="float" office:value="0.001815625" calcext:value-type="float">
            <text:p>0,00181562500000000000</text:p>
          </table:table-cell>
          <table:table-cell table:formula="of:=[.D583]-[.D582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B582]+27" office:value-type="float" office:value="15714" calcext:value-type="float">
            <text:p>15714</text:p>
          </table:table-cell>
          <table:table-cell office:value-type="float" office:value="8640000" calcext:value-type="float">
            <text:p>8640000</text:p>
          </table:table-cell>
          <table:table-cell table:formula="of:=[.B583]/[.C583]" office:value-type="float" office:value="0.00181875" calcext:value-type="float">
            <text:p>0,00181875000000000000</text:p>
          </table:table-cell>
          <table:table-cell table:formula="of:=[.D584]-[.D583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B583]+27" office:value-type="float" office:value="15741" calcext:value-type="float">
            <text:p>15741</text:p>
          </table:table-cell>
          <table:table-cell office:value-type="float" office:value="8640000" calcext:value-type="float">
            <text:p>8640000</text:p>
          </table:table-cell>
          <table:table-cell table:formula="of:=[.B584]/[.C584]" office:value-type="float" office:value="0.001821875" calcext:value-type="float">
            <text:p>0,00182187500000000000</text:p>
          </table:table-cell>
          <table:table-cell table:formula="of:=[.D585]-[.D58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B584]+27" office:value-type="float" office:value="15768" calcext:value-type="float">
            <text:p>15768</text:p>
          </table:table-cell>
          <table:table-cell office:value-type="float" office:value="8640000" calcext:value-type="float">
            <text:p>8640000</text:p>
          </table:table-cell>
          <table:table-cell table:formula="of:=[.B585]/[.C585]" office:value-type="float" office:value="0.001825" calcext:value-type="float">
            <text:p>0,00182500000000000000</text:p>
          </table:table-cell>
          <table:table-cell table:formula="of:=[.D586]-[.D585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B585]+27" office:value-type="float" office:value="15795" calcext:value-type="float">
            <text:p>15795</text:p>
          </table:table-cell>
          <table:table-cell office:value-type="float" office:value="8640000" calcext:value-type="float">
            <text:p>8640000</text:p>
          </table:table-cell>
          <table:table-cell table:formula="of:=[.B586]/[.C586]" office:value-type="float" office:value="0.001828125" calcext:value-type="float">
            <text:p>0,00182812500000000000</text:p>
          </table:table-cell>
          <table:table-cell table:formula="of:=[.D587]-[.D586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B586]+27" office:value-type="float" office:value="15822" calcext:value-type="float">
            <text:p>15822</text:p>
          </table:table-cell>
          <table:table-cell office:value-type="float" office:value="8640000" calcext:value-type="float">
            <text:p>8640000</text:p>
          </table:table-cell>
          <table:table-cell table:formula="of:=[.B587]/[.C587]" office:value-type="float" office:value="0.00183125" calcext:value-type="float">
            <text:p>0,00183125000000000000</text:p>
          </table:table-cell>
          <table:table-cell table:formula="of:=[.D588]-[.D587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B587]+27" office:value-type="float" office:value="15849" calcext:value-type="float">
            <text:p>15849</text:p>
          </table:table-cell>
          <table:table-cell office:value-type="float" office:value="8640000" calcext:value-type="float">
            <text:p>8640000</text:p>
          </table:table-cell>
          <table:table-cell table:formula="of:=[.B588]/[.C588]" office:value-type="float" office:value="0.001834375" calcext:value-type="float">
            <text:p>0,00183437500000000000</text:p>
          </table:table-cell>
          <table:table-cell table:formula="of:=[.D589]-[.D588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B588]+27" office:value-type="float" office:value="15876" calcext:value-type="float">
            <text:p>15876</text:p>
          </table:table-cell>
          <table:table-cell office:value-type="float" office:value="8640000" calcext:value-type="float">
            <text:p>8640000</text:p>
          </table:table-cell>
          <table:table-cell table:formula="of:=[.B589]/[.C589]" office:value-type="float" office:value="0.0018375" calcext:value-type="float">
            <text:p>0,00183750000000000000</text:p>
          </table:table-cell>
          <table:table-cell table:formula="of:=[.D590]-[.D589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B589]+27" office:value-type="float" office:value="15903" calcext:value-type="float">
            <text:p>15903</text:p>
          </table:table-cell>
          <table:table-cell office:value-type="float" office:value="8640000" calcext:value-type="float">
            <text:p>8640000</text:p>
          </table:table-cell>
          <table:table-cell table:formula="of:=[.B590]/[.C590]" office:value-type="float" office:value="0.001840625" calcext:value-type="float">
            <text:p>0,00184062500000000000</text:p>
          </table:table-cell>
          <table:table-cell table:formula="of:=[.D591]-[.D590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B590]+27" office:value-type="float" office:value="15930" calcext:value-type="float">
            <text:p>15930</text:p>
          </table:table-cell>
          <table:table-cell office:value-type="float" office:value="8640000" calcext:value-type="float">
            <text:p>8640000</text:p>
          </table:table-cell>
          <table:table-cell table:formula="of:=[.B591]/[.C591]" office:value-type="float" office:value="0.00184375" calcext:value-type="float">
            <text:p>0,00184375000000000000</text:p>
          </table:table-cell>
          <table:table-cell table:formula="of:=[.D592]-[.D591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B591]+27" office:value-type="float" office:value="15957" calcext:value-type="float">
            <text:p>15957</text:p>
          </table:table-cell>
          <table:table-cell office:value-type="float" office:value="8640000" calcext:value-type="float">
            <text:p>8640000</text:p>
          </table:table-cell>
          <table:table-cell table:formula="of:=[.B592]/[.C592]" office:value-type="float" office:value="0.001846875" calcext:value-type="float">
            <text:p>0,00184687500000000000</text:p>
          </table:table-cell>
          <table:table-cell table:formula="of:=[.D593]-[.D592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B592]+27" office:value-type="float" office:value="15984" calcext:value-type="float">
            <text:p>15984</text:p>
          </table:table-cell>
          <table:table-cell office:value-type="float" office:value="8640000" calcext:value-type="float">
            <text:p>8640000</text:p>
          </table:table-cell>
          <table:table-cell table:formula="of:=[.B593]/[.C593]" office:value-type="float" office:value="0.00185" calcext:value-type="float">
            <text:p>0,00185000000000000000</text:p>
          </table:table-cell>
          <table:table-cell table:formula="of:=[.D594]-[.D593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B593]+27" office:value-type="float" office:value="16011" calcext:value-type="float">
            <text:p>16011</text:p>
          </table:table-cell>
          <table:table-cell office:value-type="float" office:value="8640000" calcext:value-type="float">
            <text:p>8640000</text:p>
          </table:table-cell>
          <table:table-cell table:formula="of:=[.B594]/[.C594]" office:value-type="float" office:value="0.001853125" calcext:value-type="float">
            <text:p>0,00185312500000000000</text:p>
          </table:table-cell>
          <table:table-cell table:formula="of:=[.D595]-[.D59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B594]+27" office:value-type="float" office:value="16038" calcext:value-type="float">
            <text:p>16038</text:p>
          </table:table-cell>
          <table:table-cell office:value-type="float" office:value="8640000" calcext:value-type="float">
            <text:p>8640000</text:p>
          </table:table-cell>
          <table:table-cell table:formula="of:=[.B595]/[.C595]" office:value-type="float" office:value="0.00185625" calcext:value-type="float">
            <text:p>0,00185625000000000000</text:p>
          </table:table-cell>
          <table:table-cell table:formula="of:=[.D596]-[.D595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B595]+27" office:value-type="float" office:value="16065" calcext:value-type="float">
            <text:p>16065</text:p>
          </table:table-cell>
          <table:table-cell office:value-type="float" office:value="8640000" calcext:value-type="float">
            <text:p>8640000</text:p>
          </table:table-cell>
          <table:table-cell table:formula="of:=[.B596]/[.C596]" office:value-type="float" office:value="0.001859375" calcext:value-type="float">
            <text:p>0,00185937500000000000</text:p>
          </table:table-cell>
          <table:table-cell table:formula="of:=[.D597]-[.D596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B596]+27" office:value-type="float" office:value="16092" calcext:value-type="float">
            <text:p>16092</text:p>
          </table:table-cell>
          <table:table-cell office:value-type="float" office:value="8640000" calcext:value-type="float">
            <text:p>8640000</text:p>
          </table:table-cell>
          <table:table-cell table:formula="of:=[.B597]/[.C597]" office:value-type="float" office:value="0.0018625" calcext:value-type="float">
            <text:p>0,00186250000000000000</text:p>
          </table:table-cell>
          <table:table-cell table:formula="of:=[.D598]-[.D597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B597]+27" office:value-type="float" office:value="16119" calcext:value-type="float">
            <text:p>16119</text:p>
          </table:table-cell>
          <table:table-cell office:value-type="float" office:value="8640000" calcext:value-type="float">
            <text:p>8640000</text:p>
          </table:table-cell>
          <table:table-cell table:formula="of:=[.B598]/[.C598]" office:value-type="float" office:value="0.001865625" calcext:value-type="float">
            <text:p>0,00186562500000000000</text:p>
          </table:table-cell>
          <table:table-cell table:formula="of:=[.D599]-[.D598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B598]+27" office:value-type="float" office:value="16146" calcext:value-type="float">
            <text:p>16146</text:p>
          </table:table-cell>
          <table:table-cell office:value-type="float" office:value="8640000" calcext:value-type="float">
            <text:p>8640000</text:p>
          </table:table-cell>
          <table:table-cell table:formula="of:=[.B599]/[.C599]" office:value-type="float" office:value="0.00186875" calcext:value-type="float">
            <text:p>0,00186875000000000000</text:p>
          </table:table-cell>
          <table:table-cell table:formula="of:=[.D600]-[.D599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B599]+27" office:value-type="float" office:value="16173" calcext:value-type="float">
            <text:p>16173</text:p>
          </table:table-cell>
          <table:table-cell office:value-type="float" office:value="8640000" calcext:value-type="float">
            <text:p>8640000</text:p>
          </table:table-cell>
          <table:table-cell table:formula="of:=[.B600]/[.C600]" office:value-type="float" office:value="0.001871875" calcext:value-type="float">
            <text:p>0,00187187500000000000</text:p>
          </table:table-cell>
          <table:table-cell table:formula="of:=[.D601]-[.D600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B600]+27" office:value-type="float" office:value="16200" calcext:value-type="float">
            <text:p>16200</text:p>
          </table:table-cell>
          <table:table-cell office:value-type="float" office:value="8640000" calcext:value-type="float">
            <text:p>8640000</text:p>
          </table:table-cell>
          <table:table-cell table:formula="of:=[.B601]/[.C601]" office:value-type="float" office:value="0.001875" calcext:value-type="float">
            <text:p>0,00187500000000000000</text:p>
          </table:table-cell>
          <table:table-cell table:formula="of:=[.D602]-[.D601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B601]+27" office:value-type="float" office:value="16227" calcext:value-type="float">
            <text:p>16227</text:p>
          </table:table-cell>
          <table:table-cell office:value-type="float" office:value="8640000" calcext:value-type="float">
            <text:p>8640000</text:p>
          </table:table-cell>
          <table:table-cell table:formula="of:=[.B602]/[.C602]" office:value-type="float" office:value="0.001878125" calcext:value-type="float">
            <text:p>0,00187812500000000000</text:p>
          </table:table-cell>
          <table:table-cell table:formula="of:=[.D603]-[.D602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B602]+27" office:value-type="float" office:value="16254" calcext:value-type="float">
            <text:p>16254</text:p>
          </table:table-cell>
          <table:table-cell office:value-type="float" office:value="8640000" calcext:value-type="float">
            <text:p>8640000</text:p>
          </table:table-cell>
          <table:table-cell table:formula="of:=[.B603]/[.C603]" office:value-type="float" office:value="0.00188125" calcext:value-type="float">
            <text:p>0,00188125000000000000</text:p>
          </table:table-cell>
          <table:table-cell table:formula="of:=[.D604]-[.D603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B603]+27" office:value-type="float" office:value="16281" calcext:value-type="float">
            <text:p>16281</text:p>
          </table:table-cell>
          <table:table-cell office:value-type="float" office:value="8640000" calcext:value-type="float">
            <text:p>8640000</text:p>
          </table:table-cell>
          <table:table-cell table:formula="of:=[.B604]/[.C604]" office:value-type="float" office:value="0.001884375" calcext:value-type="float">
            <text:p>0,00188437500000000000</text:p>
          </table:table-cell>
          <table:table-cell table:formula="of:=[.D605]-[.D60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B604]+27" office:value-type="float" office:value="16308" calcext:value-type="float">
            <text:p>16308</text:p>
          </table:table-cell>
          <table:table-cell office:value-type="float" office:value="8640000" calcext:value-type="float">
            <text:p>8640000</text:p>
          </table:table-cell>
          <table:table-cell table:formula="of:=[.B605]/[.C605]" office:value-type="float" office:value="0.0018875" calcext:value-type="float">
            <text:p>0,00188750000000000000</text:p>
          </table:table-cell>
          <table:table-cell table:formula="of:=[.D606]-[.D605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B605]+27" office:value-type="float" office:value="16335" calcext:value-type="float">
            <text:p>16335</text:p>
          </table:table-cell>
          <table:table-cell office:value-type="float" office:value="8640000" calcext:value-type="float">
            <text:p>8640000</text:p>
          </table:table-cell>
          <table:table-cell table:formula="of:=[.B606]/[.C606]" office:value-type="float" office:value="0.001890625" calcext:value-type="float">
            <text:p>0,00189062500000000000</text:p>
          </table:table-cell>
          <table:table-cell table:formula="of:=[.D607]-[.D606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B606]+27" office:value-type="float" office:value="16362" calcext:value-type="float">
            <text:p>16362</text:p>
          </table:table-cell>
          <table:table-cell office:value-type="float" office:value="8640000" calcext:value-type="float">
            <text:p>8640000</text:p>
          </table:table-cell>
          <table:table-cell table:formula="of:=[.B607]/[.C607]" office:value-type="float" office:value="0.00189375" calcext:value-type="float">
            <text:p>0,00189375000000000000</text:p>
          </table:table-cell>
          <table:table-cell table:formula="of:=[.D608]-[.D607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B607]+27" office:value-type="float" office:value="16389" calcext:value-type="float">
            <text:p>16389</text:p>
          </table:table-cell>
          <table:table-cell office:value-type="float" office:value="8640000" calcext:value-type="float">
            <text:p>8640000</text:p>
          </table:table-cell>
          <table:table-cell table:formula="of:=[.B608]/[.C608]" office:value-type="float" office:value="0.001896875" calcext:value-type="float">
            <text:p>0,00189687500000000000</text:p>
          </table:table-cell>
          <table:table-cell table:formula="of:=[.D609]-[.D608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B608]+27" office:value-type="float" office:value="16416" calcext:value-type="float">
            <text:p>16416</text:p>
          </table:table-cell>
          <table:table-cell office:value-type="float" office:value="8640000" calcext:value-type="float">
            <text:p>8640000</text:p>
          </table:table-cell>
          <table:table-cell table:formula="of:=[.B609]/[.C609]" office:value-type="float" office:value="0.0019" calcext:value-type="float">
            <text:p>0,00190000000000000000</text:p>
          </table:table-cell>
          <table:table-cell table:formula="of:=[.D610]-[.D609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B609]+27" office:value-type="float" office:value="16443" calcext:value-type="float">
            <text:p>16443</text:p>
          </table:table-cell>
          <table:table-cell office:value-type="float" office:value="8640000" calcext:value-type="float">
            <text:p>8640000</text:p>
          </table:table-cell>
          <table:table-cell table:formula="of:=[.B610]/[.C610]" office:value-type="float" office:value="0.001903125" calcext:value-type="float">
            <text:p>0,00190312500000000000</text:p>
          </table:table-cell>
          <table:table-cell table:formula="of:=[.D611]-[.D610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B610]+27" office:value-type="float" office:value="16470" calcext:value-type="float">
            <text:p>16470</text:p>
          </table:table-cell>
          <table:table-cell office:value-type="float" office:value="8640000" calcext:value-type="float">
            <text:p>8640000</text:p>
          </table:table-cell>
          <table:table-cell table:formula="of:=[.B611]/[.C611]" office:value-type="float" office:value="0.00190625" calcext:value-type="float">
            <text:p>0,00190625000000000000</text:p>
          </table:table-cell>
          <table:table-cell table:formula="of:=[.D612]-[.D611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B611]+27" office:value-type="float" office:value="16497" calcext:value-type="float">
            <text:p>16497</text:p>
          </table:table-cell>
          <table:table-cell office:value-type="float" office:value="8640000" calcext:value-type="float">
            <text:p>8640000</text:p>
          </table:table-cell>
          <table:table-cell table:formula="of:=[.B612]/[.C612]" office:value-type="float" office:value="0.001909375" calcext:value-type="float">
            <text:p>0,00190937500000000000</text:p>
          </table:table-cell>
          <table:table-cell table:formula="of:=[.D613]-[.D612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B612]+27" office:value-type="float" office:value="16524" calcext:value-type="float">
            <text:p>16524</text:p>
          </table:table-cell>
          <table:table-cell office:value-type="float" office:value="8640000" calcext:value-type="float">
            <text:p>8640000</text:p>
          </table:table-cell>
          <table:table-cell table:formula="of:=[.B613]/[.C613]" office:value-type="float" office:value="0.0019125" calcext:value-type="float">
            <text:p>0,00191250000000000000</text:p>
          </table:table-cell>
          <table:table-cell table:formula="of:=[.D614]-[.D613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B613]+27" office:value-type="float" office:value="16551" calcext:value-type="float">
            <text:p>16551</text:p>
          </table:table-cell>
          <table:table-cell office:value-type="float" office:value="8640000" calcext:value-type="float">
            <text:p>8640000</text:p>
          </table:table-cell>
          <table:table-cell table:formula="of:=[.B614]/[.C614]" office:value-type="float" office:value="0.001915625" calcext:value-type="float">
            <text:p>0,00191562500000000000</text:p>
          </table:table-cell>
          <table:table-cell table:formula="of:=[.D615]-[.D61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B614]+27" office:value-type="float" office:value="16578" calcext:value-type="float">
            <text:p>16578</text:p>
          </table:table-cell>
          <table:table-cell office:value-type="float" office:value="8640000" calcext:value-type="float">
            <text:p>8640000</text:p>
          </table:table-cell>
          <table:table-cell table:formula="of:=[.B615]/[.C615]" office:value-type="float" office:value="0.00191875" calcext:value-type="float">
            <text:p>0,00191875000000000000</text:p>
          </table:table-cell>
          <table:table-cell table:formula="of:=[.D616]-[.D615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B615]+27" office:value-type="float" office:value="16605" calcext:value-type="float">
            <text:p>16605</text:p>
          </table:table-cell>
          <table:table-cell office:value-type="float" office:value="8640000" calcext:value-type="float">
            <text:p>8640000</text:p>
          </table:table-cell>
          <table:table-cell table:formula="of:=[.B616]/[.C616]" office:value-type="float" office:value="0.001921875" calcext:value-type="float">
            <text:p>0,00192187500000000000</text:p>
          </table:table-cell>
          <table:table-cell table:formula="of:=[.D617]-[.D616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B616]+27" office:value-type="float" office:value="16632" calcext:value-type="float">
            <text:p>16632</text:p>
          </table:table-cell>
          <table:table-cell office:value-type="float" office:value="8640000" calcext:value-type="float">
            <text:p>8640000</text:p>
          </table:table-cell>
          <table:table-cell table:formula="of:=[.B617]/[.C617]" office:value-type="float" office:value="0.001925" calcext:value-type="float">
            <text:p>0,00192500000000000000</text:p>
          </table:table-cell>
          <table:table-cell table:formula="of:=[.D618]-[.D617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B617]+27" office:value-type="float" office:value="16659" calcext:value-type="float">
            <text:p>16659</text:p>
          </table:table-cell>
          <table:table-cell office:value-type="float" office:value="8640000" calcext:value-type="float">
            <text:p>8640000</text:p>
          </table:table-cell>
          <table:table-cell table:formula="of:=[.B618]/[.C618]" office:value-type="float" office:value="0.001928125" calcext:value-type="float">
            <text:p>0,00192812500000000000</text:p>
          </table:table-cell>
          <table:table-cell table:formula="of:=[.D619]-[.D618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B618]+27" office:value-type="float" office:value="16686" calcext:value-type="float">
            <text:p>16686</text:p>
          </table:table-cell>
          <table:table-cell office:value-type="float" office:value="8640000" calcext:value-type="float">
            <text:p>8640000</text:p>
          </table:table-cell>
          <table:table-cell table:formula="of:=[.B619]/[.C619]" office:value-type="float" office:value="0.00193125" calcext:value-type="float">
            <text:p>0,00193125000000000000</text:p>
          </table:table-cell>
          <table:table-cell table:formula="of:=[.D620]-[.D619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B619]+27" office:value-type="float" office:value="16713" calcext:value-type="float">
            <text:p>16713</text:p>
          </table:table-cell>
          <table:table-cell office:value-type="float" office:value="8640000" calcext:value-type="float">
            <text:p>8640000</text:p>
          </table:table-cell>
          <table:table-cell table:formula="of:=[.B620]/[.C620]" office:value-type="float" office:value="0.001934375" calcext:value-type="float">
            <text:p>0,00193437500000000000</text:p>
          </table:table-cell>
          <table:table-cell table:formula="of:=[.D621]-[.D620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B620]+27" office:value-type="float" office:value="16740" calcext:value-type="float">
            <text:p>16740</text:p>
          </table:table-cell>
          <table:table-cell office:value-type="float" office:value="8640000" calcext:value-type="float">
            <text:p>8640000</text:p>
          </table:table-cell>
          <table:table-cell table:formula="of:=[.B621]/[.C621]" office:value-type="float" office:value="0.0019375" calcext:value-type="float">
            <text:p>0,00193750000000000000</text:p>
          </table:table-cell>
          <table:table-cell table:formula="of:=[.D622]-[.D621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B621]+27" office:value-type="float" office:value="16767" calcext:value-type="float">
            <text:p>16767</text:p>
          </table:table-cell>
          <table:table-cell office:value-type="float" office:value="8640000" calcext:value-type="float">
            <text:p>8640000</text:p>
          </table:table-cell>
          <table:table-cell table:formula="of:=[.B622]/[.C622]" office:value-type="float" office:value="0.001940625" calcext:value-type="float">
            <text:p>0,00194062500000000000</text:p>
          </table:table-cell>
          <table:table-cell table:formula="of:=[.D623]-[.D622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B622]+27" office:value-type="float" office:value="16794" calcext:value-type="float">
            <text:p>16794</text:p>
          </table:table-cell>
          <table:table-cell office:value-type="float" office:value="8640000" calcext:value-type="float">
            <text:p>8640000</text:p>
          </table:table-cell>
          <table:table-cell table:formula="of:=[.B623]/[.C623]" office:value-type="float" office:value="0.00194375" calcext:value-type="float">
            <text:p>0,00194375000000000000</text:p>
          </table:table-cell>
          <table:table-cell table:formula="of:=[.D624]-[.D623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B623]+27" office:value-type="float" office:value="16821" calcext:value-type="float">
            <text:p>16821</text:p>
          </table:table-cell>
          <table:table-cell office:value-type="float" office:value="8640000" calcext:value-type="float">
            <text:p>8640000</text:p>
          </table:table-cell>
          <table:table-cell table:formula="of:=[.B624]/[.C624]" office:value-type="float" office:value="0.001946875" calcext:value-type="float">
            <text:p>0,00194687500000000000</text:p>
          </table:table-cell>
          <table:table-cell table:formula="of:=[.D625]-[.D624]" office:value-type="float" office:value="0.00000312499999999987" calcext:value-type="float">
            <text:p>0,0000031249999999998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B624]+27" office:value-type="float" office:value="16848" calcext:value-type="float">
            <text:p>16848</text:p>
          </table:table-cell>
          <table:table-cell office:value-type="float" office:value="8640000" calcext:value-type="float">
            <text:p>8640000</text:p>
          </table:table-cell>
          <table:table-cell table:formula="of:=[.B625]/[.C625]" office:value-type="float" office:value="0.00195" calcext:value-type="float">
            <text:p>0,00195000000000000000</text:p>
          </table:table-cell>
          <table:table-cell table:formula="of:=[.D626]-[.D625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B625]+27" office:value-type="float" office:value="16875" calcext:value-type="float">
            <text:p>16875</text:p>
          </table:table-cell>
          <table:table-cell office:value-type="float" office:value="8640000" calcext:value-type="float">
            <text:p>8640000</text:p>
          </table:table-cell>
          <table:table-cell table:formula="of:=[.B626]/[.C626]" office:value-type="float" office:value="0.001953125" calcext:value-type="float">
            <text:p>0,00195312500000000000</text:p>
          </table:table-cell>
          <table:table-cell table:formula="of:=[.D627]-[.D626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B626]+27" office:value-type="float" office:value="16902" calcext:value-type="float">
            <text:p>16902</text:p>
          </table:table-cell>
          <table:table-cell office:value-type="float" office:value="8640000" calcext:value-type="float">
            <text:p>8640000</text:p>
          </table:table-cell>
          <table:table-cell table:formula="of:=[.B627]/[.C627]" office:value-type="float" office:value="0.00195625" calcext:value-type="float">
            <text:p>0,00195625000000000000</text:p>
          </table:table-cell>
          <table:table-cell table:formula="of:=[.D628]-[.D627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B627]+27" office:value-type="float" office:value="16929" calcext:value-type="float">
            <text:p>16929</text:p>
          </table:table-cell>
          <table:table-cell office:value-type="float" office:value="8640000" calcext:value-type="float">
            <text:p>8640000</text:p>
          </table:table-cell>
          <table:table-cell table:formula="of:=[.B628]/[.C628]" office:value-type="float" office:value="0.001959375" calcext:value-type="float">
            <text:p>0,00195937500000000000</text:p>
          </table:table-cell>
          <table:table-cell table:formula="of:=[.D629]-[.D628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B628]+27" office:value-type="float" office:value="16956" calcext:value-type="float">
            <text:p>16956</text:p>
          </table:table-cell>
          <table:table-cell office:value-type="float" office:value="8640000" calcext:value-type="float">
            <text:p>8640000</text:p>
          </table:table-cell>
          <table:table-cell table:formula="of:=[.B629]/[.C629]" office:value-type="float" office:value="0.0019625" calcext:value-type="float">
            <text:p>0,00196250000000000000</text:p>
          </table:table-cell>
          <table:table-cell table:formula="of:=[.D630]-[.D629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B629]+27" office:value-type="float" office:value="16983" calcext:value-type="float">
            <text:p>16983</text:p>
          </table:table-cell>
          <table:table-cell office:value-type="float" office:value="8640000" calcext:value-type="float">
            <text:p>8640000</text:p>
          </table:table-cell>
          <table:table-cell table:formula="of:=[.B630]/[.C630]" office:value-type="float" office:value="0.001965625" calcext:value-type="float">
            <text:p>0,00196562500000000000</text:p>
          </table:table-cell>
          <table:table-cell table:formula="of:=[.D631]-[.D630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B630]+27" office:value-type="float" office:value="17010" calcext:value-type="float">
            <text:p>17010</text:p>
          </table:table-cell>
          <table:table-cell office:value-type="float" office:value="8640000" calcext:value-type="float">
            <text:p>8640000</text:p>
          </table:table-cell>
          <table:table-cell table:formula="of:=[.B631]/[.C631]" office:value-type="float" office:value="0.00196875" calcext:value-type="float">
            <text:p>0,00196875000000000000</text:p>
          </table:table-cell>
          <table:table-cell table:formula="of:=[.D632]-[.D631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B631]+27" office:value-type="float" office:value="17037" calcext:value-type="float">
            <text:p>17037</text:p>
          </table:table-cell>
          <table:table-cell office:value-type="float" office:value="8640000" calcext:value-type="float">
            <text:p>8640000</text:p>
          </table:table-cell>
          <table:table-cell table:formula="of:=[.B632]/[.C632]" office:value-type="float" office:value="0.001971875" calcext:value-type="float">
            <text:p>0,00197187500000000000</text:p>
          </table:table-cell>
          <table:table-cell table:formula="of:=[.D633]-[.D632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B632]+27" office:value-type="float" office:value="17064" calcext:value-type="float">
            <text:p>17064</text:p>
          </table:table-cell>
          <table:table-cell office:value-type="float" office:value="8640000" calcext:value-type="float">
            <text:p>8640000</text:p>
          </table:table-cell>
          <table:table-cell table:formula="of:=[.B633]/[.C633]" office:value-type="float" office:value="0.001975" calcext:value-type="float">
            <text:p>0,00197500000000000000</text:p>
          </table:table-cell>
          <table:table-cell table:formula="of:=[.D634]-[.D633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B633]+27" office:value-type="float" office:value="17091" calcext:value-type="float">
            <text:p>17091</text:p>
          </table:table-cell>
          <table:table-cell office:value-type="float" office:value="8640000" calcext:value-type="float">
            <text:p>8640000</text:p>
          </table:table-cell>
          <table:table-cell table:formula="of:=[.B634]/[.C634]" office:value-type="float" office:value="0.001978125" calcext:value-type="float">
            <text:p>0,00197812500000000000</text:p>
          </table:table-cell>
          <table:table-cell table:formula="of:=[.D635]-[.D63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B634]+27" office:value-type="float" office:value="17118" calcext:value-type="float">
            <text:p>17118</text:p>
          </table:table-cell>
          <table:table-cell office:value-type="float" office:value="8640000" calcext:value-type="float">
            <text:p>8640000</text:p>
          </table:table-cell>
          <table:table-cell table:formula="of:=[.B635]/[.C635]" office:value-type="float" office:value="0.00198125" calcext:value-type="float">
            <text:p>0,00198125000000000000</text:p>
          </table:table-cell>
          <table:table-cell table:formula="of:=[.D636]-[.D635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B635]+27" office:value-type="float" office:value="17145" calcext:value-type="float">
            <text:p>17145</text:p>
          </table:table-cell>
          <table:table-cell office:value-type="float" office:value="8640000" calcext:value-type="float">
            <text:p>8640000</text:p>
          </table:table-cell>
          <table:table-cell table:formula="of:=[.B636]/[.C636]" office:value-type="float" office:value="0.001984375" calcext:value-type="float">
            <text:p>0,00198437500000000000</text:p>
          </table:table-cell>
          <table:table-cell table:formula="of:=[.D637]-[.D636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B636]+27" office:value-type="float" office:value="17172" calcext:value-type="float">
            <text:p>17172</text:p>
          </table:table-cell>
          <table:table-cell office:value-type="float" office:value="8640000" calcext:value-type="float">
            <text:p>8640000</text:p>
          </table:table-cell>
          <table:table-cell table:formula="of:=[.B637]/[.C637]" office:value-type="float" office:value="0.0019875" calcext:value-type="float">
            <text:p>0,00198750000000000000</text:p>
          </table:table-cell>
          <table:table-cell table:formula="of:=[.D638]-[.D637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B637]+27" office:value-type="float" office:value="17199" calcext:value-type="float">
            <text:p>17199</text:p>
          </table:table-cell>
          <table:table-cell office:value-type="float" office:value="8640000" calcext:value-type="float">
            <text:p>8640000</text:p>
          </table:table-cell>
          <table:table-cell table:formula="of:=[.B638]/[.C638]" office:value-type="float" office:value="0.001990625" calcext:value-type="float">
            <text:p>0,00199062500000000000</text:p>
          </table:table-cell>
          <table:table-cell table:formula="of:=[.D639]-[.D638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B638]+27" office:value-type="float" office:value="17226" calcext:value-type="float">
            <text:p>17226</text:p>
          </table:table-cell>
          <table:table-cell office:value-type="float" office:value="8640000" calcext:value-type="float">
            <text:p>8640000</text:p>
          </table:table-cell>
          <table:table-cell table:formula="of:=[.B639]/[.C639]" office:value-type="float" office:value="0.00199375" calcext:value-type="float">
            <text:p>0,00199375000000000000</text:p>
          </table:table-cell>
          <table:table-cell table:formula="of:=[.D640]-[.D639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B639]+27" office:value-type="float" office:value="17253" calcext:value-type="float">
            <text:p>17253</text:p>
          </table:table-cell>
          <table:table-cell office:value-type="float" office:value="8640000" calcext:value-type="float">
            <text:p>8640000</text:p>
          </table:table-cell>
          <table:table-cell table:formula="of:=[.B640]/[.C640]" office:value-type="float" office:value="0.001996875" calcext:value-type="float">
            <text:p>0,00199687500000000000</text:p>
          </table:table-cell>
          <table:table-cell table:formula="of:=[.D641]-[.D640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640]+27" office:value-type="float" office:value="17280" calcext:value-type="float">
            <text:p>17280</text:p>
          </table:table-cell>
          <table:table-cell office:value-type="float" office:value="8640000" calcext:value-type="float">
            <text:p>8640000</text:p>
          </table:table-cell>
          <table:table-cell table:formula="of:=[.B641]/[.C641]" office:value-type="float" office:value="0.002" calcext:value-type="float">
            <text:p>0,00200000000000000000</text:p>
          </table:table-cell>
          <table:table-cell table:formula="of:=[.D642]-[.D641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B641]+27" office:value-type="float" office:value="17307" calcext:value-type="float">
            <text:p>17307</text:p>
          </table:table-cell>
          <table:table-cell office:value-type="float" office:value="8640000" calcext:value-type="float">
            <text:p>8640000</text:p>
          </table:table-cell>
          <table:table-cell table:formula="of:=[.B642]/[.C642]" office:value-type="float" office:value="0.002003125" calcext:value-type="float">
            <text:p>0,00200312500000000000</text:p>
          </table:table-cell>
          <table:table-cell table:formula="of:=[.D643]-[.D642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B642]+27" office:value-type="float" office:value="17334" calcext:value-type="float">
            <text:p>17334</text:p>
          </table:table-cell>
          <table:table-cell office:value-type="float" office:value="8640000" calcext:value-type="float">
            <text:p>8640000</text:p>
          </table:table-cell>
          <table:table-cell table:formula="of:=[.B643]/[.C643]" office:value-type="float" office:value="0.00200625" calcext:value-type="float">
            <text:p>0,00200625000000000000</text:p>
          </table:table-cell>
          <table:table-cell table:formula="of:=[.D644]-[.D643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B643]+27" office:value-type="float" office:value="17361" calcext:value-type="float">
            <text:p>17361</text:p>
          </table:table-cell>
          <table:table-cell office:value-type="float" office:value="8640000" calcext:value-type="float">
            <text:p>8640000</text:p>
          </table:table-cell>
          <table:table-cell table:formula="of:=[.B644]/[.C644]" office:value-type="float" office:value="0.002009375" calcext:value-type="float">
            <text:p>0,00200937500000000000</text:p>
          </table:table-cell>
          <table:table-cell table:formula="of:=[.D645]-[.D64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B644]+27" office:value-type="float" office:value="17388" calcext:value-type="float">
            <text:p>17388</text:p>
          </table:table-cell>
          <table:table-cell office:value-type="float" office:value="8640000" calcext:value-type="float">
            <text:p>8640000</text:p>
          </table:table-cell>
          <table:table-cell table:formula="of:=[.B645]/[.C645]" office:value-type="float" office:value="0.0020125" calcext:value-type="float">
            <text:p>0,00201250000000000000</text:p>
          </table:table-cell>
          <table:table-cell table:formula="of:=[.D646]-[.D645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B645]+27" office:value-type="float" office:value="17415" calcext:value-type="float">
            <text:p>17415</text:p>
          </table:table-cell>
          <table:table-cell office:value-type="float" office:value="8640000" calcext:value-type="float">
            <text:p>8640000</text:p>
          </table:table-cell>
          <table:table-cell table:formula="of:=[.B646]/[.C646]" office:value-type="float" office:value="0.002015625" calcext:value-type="float">
            <text:p>0,00201562500000000000</text:p>
          </table:table-cell>
          <table:table-cell table:formula="of:=[.D647]-[.D646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B646]+27" office:value-type="float" office:value="17442" calcext:value-type="float">
            <text:p>17442</text:p>
          </table:table-cell>
          <table:table-cell office:value-type="float" office:value="8640000" calcext:value-type="float">
            <text:p>8640000</text:p>
          </table:table-cell>
          <table:table-cell table:formula="of:=[.B647]/[.C647]" office:value-type="float" office:value="0.00201875" calcext:value-type="float">
            <text:p>0,00201875000000000000</text:p>
          </table:table-cell>
          <table:table-cell table:formula="of:=[.D648]-[.D647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B647]+27" office:value-type="float" office:value="17469" calcext:value-type="float">
            <text:p>17469</text:p>
          </table:table-cell>
          <table:table-cell office:value-type="float" office:value="8640000" calcext:value-type="float">
            <text:p>8640000</text:p>
          </table:table-cell>
          <table:table-cell table:formula="of:=[.B648]/[.C648]" office:value-type="float" office:value="0.002021875" calcext:value-type="float">
            <text:p>0,00202187500000000000</text:p>
          </table:table-cell>
          <table:table-cell table:formula="of:=[.D649]-[.D648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B648]+27" office:value-type="float" office:value="17496" calcext:value-type="float">
            <text:p>17496</text:p>
          </table:table-cell>
          <table:table-cell office:value-type="float" office:value="8640000" calcext:value-type="float">
            <text:p>8640000</text:p>
          </table:table-cell>
          <table:table-cell table:formula="of:=[.B649]/[.C649]" office:value-type="float" office:value="0.002025" calcext:value-type="float">
            <text:p>0,00202500000000000000</text:p>
          </table:table-cell>
          <table:table-cell table:formula="of:=[.D650]-[.D649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B649]+27" office:value-type="float" office:value="17523" calcext:value-type="float">
            <text:p>17523</text:p>
          </table:table-cell>
          <table:table-cell office:value-type="float" office:value="8640000" calcext:value-type="float">
            <text:p>8640000</text:p>
          </table:table-cell>
          <table:table-cell table:formula="of:=[.B650]/[.C650]" office:value-type="float" office:value="0.002028125" calcext:value-type="float">
            <text:p>0,00202812500000000000</text:p>
          </table:table-cell>
          <table:table-cell table:formula="of:=[.D651]-[.D650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B650]+27" office:value-type="float" office:value="17550" calcext:value-type="float">
            <text:p>17550</text:p>
          </table:table-cell>
          <table:table-cell office:value-type="float" office:value="8640000" calcext:value-type="float">
            <text:p>8640000</text:p>
          </table:table-cell>
          <table:table-cell table:formula="of:=[.B651]/[.C651]" office:value-type="float" office:value="0.00203125" calcext:value-type="float">
            <text:p>0,00203125000000000000</text:p>
          </table:table-cell>
          <table:table-cell table:formula="of:=[.D652]-[.D651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B651]+27" office:value-type="float" office:value="17577" calcext:value-type="float">
            <text:p>17577</text:p>
          </table:table-cell>
          <table:table-cell office:value-type="float" office:value="8640000" calcext:value-type="float">
            <text:p>8640000</text:p>
          </table:table-cell>
          <table:table-cell table:formula="of:=[.B652]/[.C652]" office:value-type="float" office:value="0.002034375" calcext:value-type="float">
            <text:p>0,00203437500000000000</text:p>
          </table:table-cell>
          <table:table-cell table:formula="of:=[.D653]-[.D652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B652]+27" office:value-type="float" office:value="17604" calcext:value-type="float">
            <text:p>17604</text:p>
          </table:table-cell>
          <table:table-cell office:value-type="float" office:value="8640000" calcext:value-type="float">
            <text:p>8640000</text:p>
          </table:table-cell>
          <table:table-cell table:formula="of:=[.B653]/[.C653]" office:value-type="float" office:value="0.0020375" calcext:value-type="float">
            <text:p>0,00203750000000000000</text:p>
          </table:table-cell>
          <table:table-cell table:formula="of:=[.D654]-[.D653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B653]+27" office:value-type="float" office:value="17631" calcext:value-type="float">
            <text:p>17631</text:p>
          </table:table-cell>
          <table:table-cell office:value-type="float" office:value="8640000" calcext:value-type="float">
            <text:p>8640000</text:p>
          </table:table-cell>
          <table:table-cell table:formula="of:=[.B654]/[.C654]" office:value-type="float" office:value="0.002040625" calcext:value-type="float">
            <text:p>0,00204062500000000000</text:p>
          </table:table-cell>
          <table:table-cell table:formula="of:=[.D655]-[.D65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B654]+27" office:value-type="float" office:value="17658" calcext:value-type="float">
            <text:p>17658</text:p>
          </table:table-cell>
          <table:table-cell office:value-type="float" office:value="8640000" calcext:value-type="float">
            <text:p>8640000</text:p>
          </table:table-cell>
          <table:table-cell table:formula="of:=[.B655]/[.C655]" office:value-type="float" office:value="0.00204375" calcext:value-type="float">
            <text:p>0,00204375000000000000</text:p>
          </table:table-cell>
          <table:table-cell table:formula="of:=[.D656]-[.D655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B655]+27" office:value-type="float" office:value="17685" calcext:value-type="float">
            <text:p>17685</text:p>
          </table:table-cell>
          <table:table-cell office:value-type="float" office:value="8640000" calcext:value-type="float">
            <text:p>8640000</text:p>
          </table:table-cell>
          <table:table-cell table:formula="of:=[.B656]/[.C656]" office:value-type="float" office:value="0.002046875" calcext:value-type="float">
            <text:p>0,00204687500000000000</text:p>
          </table:table-cell>
          <table:table-cell table:formula="of:=[.D657]-[.D656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B656]+27" office:value-type="float" office:value="17712" calcext:value-type="float">
            <text:p>17712</text:p>
          </table:table-cell>
          <table:table-cell office:value-type="float" office:value="8640000" calcext:value-type="float">
            <text:p>8640000</text:p>
          </table:table-cell>
          <table:table-cell table:formula="of:=[.B657]/[.C657]" office:value-type="float" office:value="0.00205" calcext:value-type="float">
            <text:p>0,00205000000000000000</text:p>
          </table:table-cell>
          <table:table-cell table:formula="of:=[.D658]-[.D657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B657]+27" office:value-type="float" office:value="17739" calcext:value-type="float">
            <text:p>17739</text:p>
          </table:table-cell>
          <table:table-cell office:value-type="float" office:value="8640000" calcext:value-type="float">
            <text:p>8640000</text:p>
          </table:table-cell>
          <table:table-cell table:formula="of:=[.B658]/[.C658]" office:value-type="float" office:value="0.002053125" calcext:value-type="float">
            <text:p>0,00205312500000000000</text:p>
          </table:table-cell>
          <table:table-cell table:formula="of:=[.D659]-[.D658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B658]+27" office:value-type="float" office:value="17766" calcext:value-type="float">
            <text:p>17766</text:p>
          </table:table-cell>
          <table:table-cell office:value-type="float" office:value="8640000" calcext:value-type="float">
            <text:p>8640000</text:p>
          </table:table-cell>
          <table:table-cell table:formula="of:=[.B659]/[.C659]" office:value-type="float" office:value="0.00205625" calcext:value-type="float">
            <text:p>0,00205625000000000000</text:p>
          </table:table-cell>
          <table:table-cell table:formula="of:=[.D660]-[.D659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B659]+27" office:value-type="float" office:value="17793" calcext:value-type="float">
            <text:p>17793</text:p>
          </table:table-cell>
          <table:table-cell office:value-type="float" office:value="8640000" calcext:value-type="float">
            <text:p>8640000</text:p>
          </table:table-cell>
          <table:table-cell table:formula="of:=[.B660]/[.C660]" office:value-type="float" office:value="0.002059375" calcext:value-type="float">
            <text:p>0,00205937500000000000</text:p>
          </table:table-cell>
          <table:table-cell table:formula="of:=[.D661]-[.D660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B660]+27" office:value-type="float" office:value="17820" calcext:value-type="float">
            <text:p>17820</text:p>
          </table:table-cell>
          <table:table-cell office:value-type="float" office:value="8640000" calcext:value-type="float">
            <text:p>8640000</text:p>
          </table:table-cell>
          <table:table-cell table:formula="of:=[.B661]/[.C661]" office:value-type="float" office:value="0.0020625" calcext:value-type="float">
            <text:p>0,00206250000000000000</text:p>
          </table:table-cell>
          <table:table-cell table:formula="of:=[.D662]-[.D661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B661]+27" office:value-type="float" office:value="17847" calcext:value-type="float">
            <text:p>17847</text:p>
          </table:table-cell>
          <table:table-cell office:value-type="float" office:value="8640000" calcext:value-type="float">
            <text:p>8640000</text:p>
          </table:table-cell>
          <table:table-cell table:formula="of:=[.B662]/[.C662]" office:value-type="float" office:value="0.002065625" calcext:value-type="float">
            <text:p>0,00206562500000000000</text:p>
          </table:table-cell>
          <table:table-cell table:formula="of:=[.D663]-[.D662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B662]+27" office:value-type="float" office:value="17874" calcext:value-type="float">
            <text:p>17874</text:p>
          </table:table-cell>
          <table:table-cell office:value-type="float" office:value="8640000" calcext:value-type="float">
            <text:p>8640000</text:p>
          </table:table-cell>
          <table:table-cell table:formula="of:=[.B663]/[.C663]" office:value-type="float" office:value="0.00206875" calcext:value-type="float">
            <text:p>0,00206875000000000000</text:p>
          </table:table-cell>
          <table:table-cell table:formula="of:=[.D664]-[.D663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B663]+27" office:value-type="float" office:value="17901" calcext:value-type="float">
            <text:p>17901</text:p>
          </table:table-cell>
          <table:table-cell office:value-type="float" office:value="8640000" calcext:value-type="float">
            <text:p>8640000</text:p>
          </table:table-cell>
          <table:table-cell table:formula="of:=[.B664]/[.C664]" office:value-type="float" office:value="0.002071875" calcext:value-type="float">
            <text:p>0,00207187500000000000</text:p>
          </table:table-cell>
          <table:table-cell table:formula="of:=[.D665]-[.D66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B664]+27" office:value-type="float" office:value="17928" calcext:value-type="float">
            <text:p>17928</text:p>
          </table:table-cell>
          <table:table-cell office:value-type="float" office:value="8640000" calcext:value-type="float">
            <text:p>8640000</text:p>
          </table:table-cell>
          <table:table-cell table:formula="of:=[.B665]/[.C665]" office:value-type="float" office:value="0.002075" calcext:value-type="float">
            <text:p>0,00207500000000000000</text:p>
          </table:table-cell>
          <table:table-cell table:formula="of:=[.D666]-[.D665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B665]+27" office:value-type="float" office:value="17955" calcext:value-type="float">
            <text:p>17955</text:p>
          </table:table-cell>
          <table:table-cell office:value-type="float" office:value="8640000" calcext:value-type="float">
            <text:p>8640000</text:p>
          </table:table-cell>
          <table:table-cell table:formula="of:=[.B666]/[.C666]" office:value-type="float" office:value="0.002078125" calcext:value-type="float">
            <text:p>0,00207812500000000000</text:p>
          </table:table-cell>
          <table:table-cell table:formula="of:=[.D667]-[.D666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B666]+27" office:value-type="float" office:value="17982" calcext:value-type="float">
            <text:p>17982</text:p>
          </table:table-cell>
          <table:table-cell office:value-type="float" office:value="8640000" calcext:value-type="float">
            <text:p>8640000</text:p>
          </table:table-cell>
          <table:table-cell table:formula="of:=[.B667]/[.C667]" office:value-type="float" office:value="0.00208125" calcext:value-type="float">
            <text:p>0,00208125000000000000</text:p>
          </table:table-cell>
          <table:table-cell table:formula="of:=[.D668]-[.D667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B667]+27" office:value-type="float" office:value="18009" calcext:value-type="float">
            <text:p>18009</text:p>
          </table:table-cell>
          <table:table-cell office:value-type="float" office:value="8640000" calcext:value-type="float">
            <text:p>8640000</text:p>
          </table:table-cell>
          <table:table-cell table:formula="of:=[.B668]/[.C668]" office:value-type="float" office:value="0.002084375" calcext:value-type="float">
            <text:p>0,00208437500000000000</text:p>
          </table:table-cell>
          <table:table-cell table:formula="of:=[.D669]-[.D668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B668]+27" office:value-type="float" office:value="18036" calcext:value-type="float">
            <text:p>18036</text:p>
          </table:table-cell>
          <table:table-cell office:value-type="float" office:value="8640000" calcext:value-type="float">
            <text:p>8640000</text:p>
          </table:table-cell>
          <table:table-cell table:formula="of:=[.B669]/[.C669]" office:value-type="float" office:value="0.0020875" calcext:value-type="float">
            <text:p>0,00208750000000000000</text:p>
          </table:table-cell>
          <table:table-cell table:formula="of:=[.D670]-[.D669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B669]+27" office:value-type="float" office:value="18063" calcext:value-type="float">
            <text:p>18063</text:p>
          </table:table-cell>
          <table:table-cell office:value-type="float" office:value="8640000" calcext:value-type="float">
            <text:p>8640000</text:p>
          </table:table-cell>
          <table:table-cell table:formula="of:=[.B670]/[.C670]" office:value-type="float" office:value="0.002090625" calcext:value-type="float">
            <text:p>0,00209062500000000000</text:p>
          </table:table-cell>
          <table:table-cell table:formula="of:=[.D671]-[.D670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B670]+27" office:value-type="float" office:value="18090" calcext:value-type="float">
            <text:p>18090</text:p>
          </table:table-cell>
          <table:table-cell office:value-type="float" office:value="8640000" calcext:value-type="float">
            <text:p>8640000</text:p>
          </table:table-cell>
          <table:table-cell table:formula="of:=[.B671]/[.C671]" office:value-type="float" office:value="0.00209375" calcext:value-type="float">
            <text:p>0,00209375000000000000</text:p>
          </table:table-cell>
          <table:table-cell table:formula="of:=[.D672]-[.D671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B671]+27" office:value-type="float" office:value="18117" calcext:value-type="float">
            <text:p>18117</text:p>
          </table:table-cell>
          <table:table-cell office:value-type="float" office:value="8640000" calcext:value-type="float">
            <text:p>8640000</text:p>
          </table:table-cell>
          <table:table-cell table:formula="of:=[.B672]/[.C672]" office:value-type="float" office:value="0.002096875" calcext:value-type="float">
            <text:p>0,00209687500000000000</text:p>
          </table:table-cell>
          <table:table-cell table:formula="of:=[.D673]-[.D672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B672]+27" office:value-type="float" office:value="18144" calcext:value-type="float">
            <text:p>18144</text:p>
          </table:table-cell>
          <table:table-cell office:value-type="float" office:value="8640000" calcext:value-type="float">
            <text:p>8640000</text:p>
          </table:table-cell>
          <table:table-cell table:formula="of:=[.B673]/[.C673]" office:value-type="float" office:value="0.0021" calcext:value-type="float">
            <text:p>0,00210000000000000000</text:p>
          </table:table-cell>
          <table:table-cell table:formula="of:=[.D674]-[.D673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B673]+27" office:value-type="float" office:value="18171" calcext:value-type="float">
            <text:p>18171</text:p>
          </table:table-cell>
          <table:table-cell office:value-type="float" office:value="8640000" calcext:value-type="float">
            <text:p>8640000</text:p>
          </table:table-cell>
          <table:table-cell table:formula="of:=[.B674]/[.C674]" office:value-type="float" office:value="0.002103125" calcext:value-type="float">
            <text:p>0,00210312500000000000</text:p>
          </table:table-cell>
          <table:table-cell table:formula="of:=[.D675]-[.D67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B674]+27" office:value-type="float" office:value="18198" calcext:value-type="float">
            <text:p>18198</text:p>
          </table:table-cell>
          <table:table-cell office:value-type="float" office:value="8640000" calcext:value-type="float">
            <text:p>8640000</text:p>
          </table:table-cell>
          <table:table-cell table:formula="of:=[.B675]/[.C675]" office:value-type="float" office:value="0.00210625" calcext:value-type="float">
            <text:p>0,00210625000000000000</text:p>
          </table:table-cell>
          <table:table-cell table:formula="of:=[.D676]-[.D675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B675]+27" office:value-type="float" office:value="18225" calcext:value-type="float">
            <text:p>18225</text:p>
          </table:table-cell>
          <table:table-cell office:value-type="float" office:value="8640000" calcext:value-type="float">
            <text:p>8640000</text:p>
          </table:table-cell>
          <table:table-cell table:formula="of:=[.B676]/[.C676]" office:value-type="float" office:value="0.002109375" calcext:value-type="float">
            <text:p>0,00210937500000000000</text:p>
          </table:table-cell>
          <table:table-cell table:formula="of:=[.D677]-[.D676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B676]+27" office:value-type="float" office:value="18252" calcext:value-type="float">
            <text:p>18252</text:p>
          </table:table-cell>
          <table:table-cell office:value-type="float" office:value="8640000" calcext:value-type="float">
            <text:p>8640000</text:p>
          </table:table-cell>
          <table:table-cell table:formula="of:=[.B677]/[.C677]" office:value-type="float" office:value="0.0021125" calcext:value-type="float">
            <text:p>0,00211250000000000000</text:p>
          </table:table-cell>
          <table:table-cell table:formula="of:=[.D678]-[.D677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B677]+27" office:value-type="float" office:value="18279" calcext:value-type="float">
            <text:p>18279</text:p>
          </table:table-cell>
          <table:table-cell office:value-type="float" office:value="8640000" calcext:value-type="float">
            <text:p>8640000</text:p>
          </table:table-cell>
          <table:table-cell table:formula="of:=[.B678]/[.C678]" office:value-type="float" office:value="0.002115625" calcext:value-type="float">
            <text:p>0,00211562500000000000</text:p>
          </table:table-cell>
          <table:table-cell table:formula="of:=[.D679]-[.D678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B678]+27" office:value-type="float" office:value="18306" calcext:value-type="float">
            <text:p>18306</text:p>
          </table:table-cell>
          <table:table-cell office:value-type="float" office:value="8640000" calcext:value-type="float">
            <text:p>8640000</text:p>
          </table:table-cell>
          <table:table-cell table:formula="of:=[.B679]/[.C679]" office:value-type="float" office:value="0.00211875" calcext:value-type="float">
            <text:p>0,00211875000000000000</text:p>
          </table:table-cell>
          <table:table-cell table:formula="of:=[.D680]-[.D679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B679]+27" office:value-type="float" office:value="18333" calcext:value-type="float">
            <text:p>18333</text:p>
          </table:table-cell>
          <table:table-cell office:value-type="float" office:value="8640000" calcext:value-type="float">
            <text:p>8640000</text:p>
          </table:table-cell>
          <table:table-cell table:formula="of:=[.B680]/[.C680]" office:value-type="float" office:value="0.002121875" calcext:value-type="float">
            <text:p>0,00212187500000000000</text:p>
          </table:table-cell>
          <table:table-cell table:formula="of:=[.D681]-[.D680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B680]+27" office:value-type="float" office:value="18360" calcext:value-type="float">
            <text:p>18360</text:p>
          </table:table-cell>
          <table:table-cell office:value-type="float" office:value="8640000" calcext:value-type="float">
            <text:p>8640000</text:p>
          </table:table-cell>
          <table:table-cell table:formula="of:=[.B681]/[.C681]" office:value-type="float" office:value="0.002125" calcext:value-type="float">
            <text:p>0,00212500000000000000</text:p>
          </table:table-cell>
          <table:table-cell table:formula="of:=[.D682]-[.D681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B681]+27" office:value-type="float" office:value="18387" calcext:value-type="float">
            <text:p>18387</text:p>
          </table:table-cell>
          <table:table-cell office:value-type="float" office:value="8640000" calcext:value-type="float">
            <text:p>8640000</text:p>
          </table:table-cell>
          <table:table-cell table:formula="of:=[.B682]/[.C682]" office:value-type="float" office:value="0.002128125" calcext:value-type="float">
            <text:p>0,00212812500000000000</text:p>
          </table:table-cell>
          <table:table-cell table:formula="of:=[.D683]-[.D682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B682]+27" office:value-type="float" office:value="18414" calcext:value-type="float">
            <text:p>18414</text:p>
          </table:table-cell>
          <table:table-cell office:value-type="float" office:value="8640000" calcext:value-type="float">
            <text:p>8640000</text:p>
          </table:table-cell>
          <table:table-cell table:formula="of:=[.B683]/[.C683]" office:value-type="float" office:value="0.00213125" calcext:value-type="float">
            <text:p>0,00213125000000000000</text:p>
          </table:table-cell>
          <table:table-cell table:formula="of:=[.D684]-[.D683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B683]+27" office:value-type="float" office:value="18441" calcext:value-type="float">
            <text:p>18441</text:p>
          </table:table-cell>
          <table:table-cell office:value-type="float" office:value="8640000" calcext:value-type="float">
            <text:p>8640000</text:p>
          </table:table-cell>
          <table:table-cell table:formula="of:=[.B684]/[.C684]" office:value-type="float" office:value="0.002134375" calcext:value-type="float">
            <text:p>0,00213437500000000000</text:p>
          </table:table-cell>
          <table:table-cell table:formula="of:=[.D685]-[.D68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B684]+27" office:value-type="float" office:value="18468" calcext:value-type="float">
            <text:p>18468</text:p>
          </table:table-cell>
          <table:table-cell office:value-type="float" office:value="8640000" calcext:value-type="float">
            <text:p>8640000</text:p>
          </table:table-cell>
          <table:table-cell table:formula="of:=[.B685]/[.C685]" office:value-type="float" office:value="0.0021375" calcext:value-type="float">
            <text:p>0,00213750000000000000</text:p>
          </table:table-cell>
          <table:table-cell table:formula="of:=[.D686]-[.D685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B685]+27" office:value-type="float" office:value="18495" calcext:value-type="float">
            <text:p>18495</text:p>
          </table:table-cell>
          <table:table-cell office:value-type="float" office:value="8640000" calcext:value-type="float">
            <text:p>8640000</text:p>
          </table:table-cell>
          <table:table-cell table:formula="of:=[.B686]/[.C686]" office:value-type="float" office:value="0.002140625" calcext:value-type="float">
            <text:p>0,00214062500000000000</text:p>
          </table:table-cell>
          <table:table-cell table:formula="of:=[.D687]-[.D686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B686]+27" office:value-type="float" office:value="18522" calcext:value-type="float">
            <text:p>18522</text:p>
          </table:table-cell>
          <table:table-cell office:value-type="float" office:value="8640000" calcext:value-type="float">
            <text:p>8640000</text:p>
          </table:table-cell>
          <table:table-cell table:formula="of:=[.B687]/[.C687]" office:value-type="float" office:value="0.00214375" calcext:value-type="float">
            <text:p>0,00214375000000000000</text:p>
          </table:table-cell>
          <table:table-cell table:formula="of:=[.D688]-[.D687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B687]+27" office:value-type="float" office:value="18549" calcext:value-type="float">
            <text:p>18549</text:p>
          </table:table-cell>
          <table:table-cell office:value-type="float" office:value="8640000" calcext:value-type="float">
            <text:p>8640000</text:p>
          </table:table-cell>
          <table:table-cell table:formula="of:=[.B688]/[.C688]" office:value-type="float" office:value="0.002146875" calcext:value-type="float">
            <text:p>0,00214687500000000000</text:p>
          </table:table-cell>
          <table:table-cell table:formula="of:=[.D689]-[.D688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B688]+27" office:value-type="float" office:value="18576" calcext:value-type="float">
            <text:p>18576</text:p>
          </table:table-cell>
          <table:table-cell office:value-type="float" office:value="8640000" calcext:value-type="float">
            <text:p>8640000</text:p>
          </table:table-cell>
          <table:table-cell table:formula="of:=[.B689]/[.C689]" office:value-type="float" office:value="0.00215" calcext:value-type="float">
            <text:p>0,00215000000000000000</text:p>
          </table:table-cell>
          <table:table-cell table:formula="of:=[.D690]-[.D689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B689]+27" office:value-type="float" office:value="18603" calcext:value-type="float">
            <text:p>18603</text:p>
          </table:table-cell>
          <table:table-cell office:value-type="float" office:value="8640000" calcext:value-type="float">
            <text:p>8640000</text:p>
          </table:table-cell>
          <table:table-cell table:formula="of:=[.B690]/[.C690]" office:value-type="float" office:value="0.002153125" calcext:value-type="float">
            <text:p>0,00215312500000000000</text:p>
          </table:table-cell>
          <table:table-cell table:formula="of:=[.D691]-[.D690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B690]+27" office:value-type="float" office:value="18630" calcext:value-type="float">
            <text:p>18630</text:p>
          </table:table-cell>
          <table:table-cell office:value-type="float" office:value="8640000" calcext:value-type="float">
            <text:p>8640000</text:p>
          </table:table-cell>
          <table:table-cell table:formula="of:=[.B691]/[.C691]" office:value-type="float" office:value="0.00215625" calcext:value-type="float">
            <text:p>0,00215625000000000000</text:p>
          </table:table-cell>
          <table:table-cell table:formula="of:=[.D692]-[.D691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B691]+27" office:value-type="float" office:value="18657" calcext:value-type="float">
            <text:p>18657</text:p>
          </table:table-cell>
          <table:table-cell office:value-type="float" office:value="8640000" calcext:value-type="float">
            <text:p>8640000</text:p>
          </table:table-cell>
          <table:table-cell table:formula="of:=[.B692]/[.C692]" office:value-type="float" office:value="0.002159375" calcext:value-type="float">
            <text:p>0,00215937500000000000</text:p>
          </table:table-cell>
          <table:table-cell table:formula="of:=[.D693]-[.D692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B692]+27" office:value-type="float" office:value="18684" calcext:value-type="float">
            <text:p>18684</text:p>
          </table:table-cell>
          <table:table-cell office:value-type="float" office:value="8640000" calcext:value-type="float">
            <text:p>8640000</text:p>
          </table:table-cell>
          <table:table-cell table:formula="of:=[.B693]/[.C693]" office:value-type="float" office:value="0.0021625" calcext:value-type="float">
            <text:p>0,00216250000000000000</text:p>
          </table:table-cell>
          <table:table-cell table:formula="of:=[.D694]-[.D693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B693]+27" office:value-type="float" office:value="18711" calcext:value-type="float">
            <text:p>18711</text:p>
          </table:table-cell>
          <table:table-cell office:value-type="float" office:value="8640000" calcext:value-type="float">
            <text:p>8640000</text:p>
          </table:table-cell>
          <table:table-cell table:formula="of:=[.B694]/[.C694]" office:value-type="float" office:value="0.002165625" calcext:value-type="float">
            <text:p>0,00216562500000000000</text:p>
          </table:table-cell>
          <table:table-cell table:formula="of:=[.D695]-[.D69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B694]+27" office:value-type="float" office:value="18738" calcext:value-type="float">
            <text:p>18738</text:p>
          </table:table-cell>
          <table:table-cell office:value-type="float" office:value="8640000" calcext:value-type="float">
            <text:p>8640000</text:p>
          </table:table-cell>
          <table:table-cell table:formula="of:=[.B695]/[.C695]" office:value-type="float" office:value="0.00216875" calcext:value-type="float">
            <text:p>0,00216875000000000000</text:p>
          </table:table-cell>
          <table:table-cell table:formula="of:=[.D696]-[.D695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B695]+27" office:value-type="float" office:value="18765" calcext:value-type="float">
            <text:p>18765</text:p>
          </table:table-cell>
          <table:table-cell office:value-type="float" office:value="8640000" calcext:value-type="float">
            <text:p>8640000</text:p>
          </table:table-cell>
          <table:table-cell table:formula="of:=[.B696]/[.C696]" office:value-type="float" office:value="0.002171875" calcext:value-type="float">
            <text:p>0,00217187500000000000</text:p>
          </table:table-cell>
          <table:table-cell table:formula="of:=[.D697]-[.D696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B696]+27" office:value-type="float" office:value="18792" calcext:value-type="float">
            <text:p>18792</text:p>
          </table:table-cell>
          <table:table-cell office:value-type="float" office:value="8640000" calcext:value-type="float">
            <text:p>8640000</text:p>
          </table:table-cell>
          <table:table-cell table:formula="of:=[.B697]/[.C697]" office:value-type="float" office:value="0.002175" calcext:value-type="float">
            <text:p>0,00217500000000000000</text:p>
          </table:table-cell>
          <table:table-cell table:formula="of:=[.D698]-[.D697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B697]+27" office:value-type="float" office:value="18819" calcext:value-type="float">
            <text:p>18819</text:p>
          </table:table-cell>
          <table:table-cell office:value-type="float" office:value="8640000" calcext:value-type="float">
            <text:p>8640000</text:p>
          </table:table-cell>
          <table:table-cell table:formula="of:=[.B698]/[.C698]" office:value-type="float" office:value="0.002178125" calcext:value-type="float">
            <text:p>0,00217812500000000000</text:p>
          </table:table-cell>
          <table:table-cell table:formula="of:=[.D699]-[.D698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B698]+27" office:value-type="float" office:value="18846" calcext:value-type="float">
            <text:p>18846</text:p>
          </table:table-cell>
          <table:table-cell office:value-type="float" office:value="8640000" calcext:value-type="float">
            <text:p>8640000</text:p>
          </table:table-cell>
          <table:table-cell table:formula="of:=[.B699]/[.C699]" office:value-type="float" office:value="0.00218125" calcext:value-type="float">
            <text:p>0,00218125000000000000</text:p>
          </table:table-cell>
          <table:table-cell table:formula="of:=[.D700]-[.D699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B699]+27" office:value-type="float" office:value="18873" calcext:value-type="float">
            <text:p>18873</text:p>
          </table:table-cell>
          <table:table-cell office:value-type="float" office:value="8640000" calcext:value-type="float">
            <text:p>8640000</text:p>
          </table:table-cell>
          <table:table-cell table:formula="of:=[.B700]/[.C700]" office:value-type="float" office:value="0.002184375" calcext:value-type="float">
            <text:p>0,00218437500000000000</text:p>
          </table:table-cell>
          <table:table-cell table:formula="of:=[.D701]-[.D700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B700]+27" office:value-type="float" office:value="18900" calcext:value-type="float">
            <text:p>18900</text:p>
          </table:table-cell>
          <table:table-cell office:value-type="float" office:value="8640000" calcext:value-type="float">
            <text:p>8640000</text:p>
          </table:table-cell>
          <table:table-cell table:formula="of:=[.B701]/[.C701]" office:value-type="float" office:value="0.0021875" calcext:value-type="float">
            <text:p>0,00218750000000000000</text:p>
          </table:table-cell>
          <table:table-cell table:formula="of:=[.D702]-[.D701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B701]+27" office:value-type="float" office:value="18927" calcext:value-type="float">
            <text:p>18927</text:p>
          </table:table-cell>
          <table:table-cell office:value-type="float" office:value="8640000" calcext:value-type="float">
            <text:p>8640000</text:p>
          </table:table-cell>
          <table:table-cell table:formula="of:=[.B702]/[.C702]" office:value-type="float" office:value="0.002190625" calcext:value-type="float">
            <text:p>0,00219062500000000000</text:p>
          </table:table-cell>
          <table:table-cell table:formula="of:=[.D703]-[.D702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B702]+27" office:value-type="float" office:value="18954" calcext:value-type="float">
            <text:p>18954</text:p>
          </table:table-cell>
          <table:table-cell office:value-type="float" office:value="8640000" calcext:value-type="float">
            <text:p>8640000</text:p>
          </table:table-cell>
          <table:table-cell table:formula="of:=[.B703]/[.C703]" office:value-type="float" office:value="0.00219375" calcext:value-type="float">
            <text:p>0,00219375000000000000</text:p>
          </table:table-cell>
          <table:table-cell table:formula="of:=[.D704]-[.D703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B703]+27" office:value-type="float" office:value="18981" calcext:value-type="float">
            <text:p>18981</text:p>
          </table:table-cell>
          <table:table-cell office:value-type="float" office:value="8640000" calcext:value-type="float">
            <text:p>8640000</text:p>
          </table:table-cell>
          <table:table-cell table:formula="of:=[.B704]/[.C704]" office:value-type="float" office:value="0.002196875" calcext:value-type="float">
            <text:p>0,00219687500000000000</text:p>
          </table:table-cell>
          <table:table-cell table:formula="of:=[.D705]-[.D70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B704]+27" office:value-type="float" office:value="19008" calcext:value-type="float">
            <text:p>19008</text:p>
          </table:table-cell>
          <table:table-cell office:value-type="float" office:value="8640000" calcext:value-type="float">
            <text:p>8640000</text:p>
          </table:table-cell>
          <table:table-cell table:formula="of:=[.B705]/[.C705]" office:value-type="float" office:value="0.0022" calcext:value-type="float">
            <text:p>0,00220000000000000000</text:p>
          </table:table-cell>
          <table:table-cell table:formula="of:=[.D706]-[.D705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B705]+27" office:value-type="float" office:value="19035" calcext:value-type="float">
            <text:p>19035</text:p>
          </table:table-cell>
          <table:table-cell office:value-type="float" office:value="8640000" calcext:value-type="float">
            <text:p>8640000</text:p>
          </table:table-cell>
          <table:table-cell table:formula="of:=[.B706]/[.C706]" office:value-type="float" office:value="0.002203125" calcext:value-type="float">
            <text:p>0,00220312500000000000</text:p>
          </table:table-cell>
          <table:table-cell table:formula="of:=[.D707]-[.D706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B706]+27" office:value-type="float" office:value="19062" calcext:value-type="float">
            <text:p>19062</text:p>
          </table:table-cell>
          <table:table-cell office:value-type="float" office:value="8640000" calcext:value-type="float">
            <text:p>8640000</text:p>
          </table:table-cell>
          <table:table-cell table:formula="of:=[.B707]/[.C707]" office:value-type="float" office:value="0.00220625" calcext:value-type="float">
            <text:p>0,00220625000000000000</text:p>
          </table:table-cell>
          <table:table-cell table:formula="of:=[.D708]-[.D707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B707]+27" office:value-type="float" office:value="19089" calcext:value-type="float">
            <text:p>19089</text:p>
          </table:table-cell>
          <table:table-cell office:value-type="float" office:value="8640000" calcext:value-type="float">
            <text:p>8640000</text:p>
          </table:table-cell>
          <table:table-cell table:formula="of:=[.B708]/[.C708]" office:value-type="float" office:value="0.002209375" calcext:value-type="float">
            <text:p>0,00220937500000000000</text:p>
          </table:table-cell>
          <table:table-cell table:formula="of:=[.D709]-[.D708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B708]+27" office:value-type="float" office:value="19116" calcext:value-type="float">
            <text:p>19116</text:p>
          </table:table-cell>
          <table:table-cell office:value-type="float" office:value="8640000" calcext:value-type="float">
            <text:p>8640000</text:p>
          </table:table-cell>
          <table:table-cell table:formula="of:=[.B709]/[.C709]" office:value-type="float" office:value="0.0022125" calcext:value-type="float">
            <text:p>0,00221250000000000000</text:p>
          </table:table-cell>
          <table:table-cell table:formula="of:=[.D710]-[.D709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B709]+27" office:value-type="float" office:value="19143" calcext:value-type="float">
            <text:p>19143</text:p>
          </table:table-cell>
          <table:table-cell office:value-type="float" office:value="8640000" calcext:value-type="float">
            <text:p>8640000</text:p>
          </table:table-cell>
          <table:table-cell table:formula="of:=[.B710]/[.C710]" office:value-type="float" office:value="0.002215625" calcext:value-type="float">
            <text:p>0,00221562500000000000</text:p>
          </table:table-cell>
          <table:table-cell table:formula="of:=[.D711]-[.D710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B710]+27" office:value-type="float" office:value="19170" calcext:value-type="float">
            <text:p>19170</text:p>
          </table:table-cell>
          <table:table-cell office:value-type="float" office:value="8640000" calcext:value-type="float">
            <text:p>8640000</text:p>
          </table:table-cell>
          <table:table-cell table:formula="of:=[.B711]/[.C711]" office:value-type="float" office:value="0.00221875" calcext:value-type="float">
            <text:p>0,00221875000000000000</text:p>
          </table:table-cell>
          <table:table-cell table:formula="of:=[.D712]-[.D711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B711]+27" office:value-type="float" office:value="19197" calcext:value-type="float">
            <text:p>19197</text:p>
          </table:table-cell>
          <table:table-cell office:value-type="float" office:value="8640000" calcext:value-type="float">
            <text:p>8640000</text:p>
          </table:table-cell>
          <table:table-cell table:formula="of:=[.B712]/[.C712]" office:value-type="float" office:value="0.002221875" calcext:value-type="float">
            <text:p>0,00222187500000000000</text:p>
          </table:table-cell>
          <table:table-cell table:formula="of:=[.D713]-[.D712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B712]+27" office:value-type="float" office:value="19224" calcext:value-type="float">
            <text:p>19224</text:p>
          </table:table-cell>
          <table:table-cell office:value-type="float" office:value="8640000" calcext:value-type="float">
            <text:p>8640000</text:p>
          </table:table-cell>
          <table:table-cell table:formula="of:=[.B713]/[.C713]" office:value-type="float" office:value="0.002225" calcext:value-type="float">
            <text:p>0,00222500000000000000</text:p>
          </table:table-cell>
          <table:table-cell table:formula="of:=[.D714]-[.D713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B713]+27" office:value-type="float" office:value="19251" calcext:value-type="float">
            <text:p>19251</text:p>
          </table:table-cell>
          <table:table-cell office:value-type="float" office:value="8640000" calcext:value-type="float">
            <text:p>8640000</text:p>
          </table:table-cell>
          <table:table-cell table:formula="of:=[.B714]/[.C714]" office:value-type="float" office:value="0.002228125" calcext:value-type="float">
            <text:p>0,00222812500000000000</text:p>
          </table:table-cell>
          <table:table-cell table:formula="of:=[.D715]-[.D71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B714]+27" office:value-type="float" office:value="19278" calcext:value-type="float">
            <text:p>19278</text:p>
          </table:table-cell>
          <table:table-cell office:value-type="float" office:value="8640000" calcext:value-type="float">
            <text:p>8640000</text:p>
          </table:table-cell>
          <table:table-cell table:formula="of:=[.B715]/[.C715]" office:value-type="float" office:value="0.00223125" calcext:value-type="float">
            <text:p>0,00223125000000000000</text:p>
          </table:table-cell>
          <table:table-cell table:formula="of:=[.D716]-[.D715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B715]+27" office:value-type="float" office:value="19305" calcext:value-type="float">
            <text:p>19305</text:p>
          </table:table-cell>
          <table:table-cell office:value-type="float" office:value="8640000" calcext:value-type="float">
            <text:p>8640000</text:p>
          </table:table-cell>
          <table:table-cell table:formula="of:=[.B716]/[.C716]" office:value-type="float" office:value="0.002234375" calcext:value-type="float">
            <text:p>0,00223437500000000000</text:p>
          </table:table-cell>
          <table:table-cell table:formula="of:=[.D717]-[.D716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B716]+27" office:value-type="float" office:value="19332" calcext:value-type="float">
            <text:p>19332</text:p>
          </table:table-cell>
          <table:table-cell office:value-type="float" office:value="8640000" calcext:value-type="float">
            <text:p>8640000</text:p>
          </table:table-cell>
          <table:table-cell table:formula="of:=[.B717]/[.C717]" office:value-type="float" office:value="0.0022375" calcext:value-type="float">
            <text:p>0,00223750000000000000</text:p>
          </table:table-cell>
          <table:table-cell table:formula="of:=[.D718]-[.D717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B717]+27" office:value-type="float" office:value="19359" calcext:value-type="float">
            <text:p>19359</text:p>
          </table:table-cell>
          <table:table-cell office:value-type="float" office:value="8640000" calcext:value-type="float">
            <text:p>8640000</text:p>
          </table:table-cell>
          <table:table-cell table:formula="of:=[.B718]/[.C718]" office:value-type="float" office:value="0.002240625" calcext:value-type="float">
            <text:p>0,00224062500000000000</text:p>
          </table:table-cell>
          <table:table-cell table:formula="of:=[.D719]-[.D718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B718]+27" office:value-type="float" office:value="19386" calcext:value-type="float">
            <text:p>19386</text:p>
          </table:table-cell>
          <table:table-cell office:value-type="float" office:value="8640000" calcext:value-type="float">
            <text:p>8640000</text:p>
          </table:table-cell>
          <table:table-cell table:formula="of:=[.B719]/[.C719]" office:value-type="float" office:value="0.00224375" calcext:value-type="float">
            <text:p>0,00224375000000000000</text:p>
          </table:table-cell>
          <table:table-cell table:formula="of:=[.D720]-[.D719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B719]+27" office:value-type="float" office:value="19413" calcext:value-type="float">
            <text:p>19413</text:p>
          </table:table-cell>
          <table:table-cell office:value-type="float" office:value="8640000" calcext:value-type="float">
            <text:p>8640000</text:p>
          </table:table-cell>
          <table:table-cell table:formula="of:=[.B720]/[.C720]" office:value-type="float" office:value="0.002246875" calcext:value-type="float">
            <text:p>0,00224687500000000000</text:p>
          </table:table-cell>
          <table:table-cell table:formula="of:=[.D721]-[.D720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B720]+27" office:value-type="float" office:value="19440" calcext:value-type="float">
            <text:p>19440</text:p>
          </table:table-cell>
          <table:table-cell office:value-type="float" office:value="8640000" calcext:value-type="float">
            <text:p>8640000</text:p>
          </table:table-cell>
          <table:table-cell table:formula="of:=[.B721]/[.C721]" office:value-type="float" office:value="0.00225" calcext:value-type="float">
            <text:p>0,00225000000000000000</text:p>
          </table:table-cell>
          <table:table-cell table:formula="of:=[.D722]-[.D721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B721]+27" office:value-type="float" office:value="19467" calcext:value-type="float">
            <text:p>19467</text:p>
          </table:table-cell>
          <table:table-cell office:value-type="float" office:value="8640000" calcext:value-type="float">
            <text:p>8640000</text:p>
          </table:table-cell>
          <table:table-cell table:formula="of:=[.B722]/[.C722]" office:value-type="float" office:value="0.002253125" calcext:value-type="float">
            <text:p>0,00225312500000000000</text:p>
          </table:table-cell>
          <table:table-cell table:formula="of:=[.D723]-[.D722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B722]+27" office:value-type="float" office:value="19494" calcext:value-type="float">
            <text:p>19494</text:p>
          </table:table-cell>
          <table:table-cell office:value-type="float" office:value="8640000" calcext:value-type="float">
            <text:p>8640000</text:p>
          </table:table-cell>
          <table:table-cell table:formula="of:=[.B723]/[.C723]" office:value-type="float" office:value="0.00225625" calcext:value-type="float">
            <text:p>0,00225625000000000000</text:p>
          </table:table-cell>
          <table:table-cell table:formula="of:=[.D724]-[.D723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B723]+27" office:value-type="float" office:value="19521" calcext:value-type="float">
            <text:p>19521</text:p>
          </table:table-cell>
          <table:table-cell office:value-type="float" office:value="8640000" calcext:value-type="float">
            <text:p>8640000</text:p>
          </table:table-cell>
          <table:table-cell table:formula="of:=[.B724]/[.C724]" office:value-type="float" office:value="0.002259375" calcext:value-type="float">
            <text:p>0,00225937500000000000</text:p>
          </table:table-cell>
          <table:table-cell table:formula="of:=[.D725]-[.D72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B724]+27" office:value-type="float" office:value="19548" calcext:value-type="float">
            <text:p>19548</text:p>
          </table:table-cell>
          <table:table-cell office:value-type="float" office:value="8640000" calcext:value-type="float">
            <text:p>8640000</text:p>
          </table:table-cell>
          <table:table-cell table:formula="of:=[.B725]/[.C725]" office:value-type="float" office:value="0.0022625" calcext:value-type="float">
            <text:p>0,00226250000000000000</text:p>
          </table:table-cell>
          <table:table-cell table:formula="of:=[.D726]-[.D725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B725]+27" office:value-type="float" office:value="19575" calcext:value-type="float">
            <text:p>19575</text:p>
          </table:table-cell>
          <table:table-cell office:value-type="float" office:value="8640000" calcext:value-type="float">
            <text:p>8640000</text:p>
          </table:table-cell>
          <table:table-cell table:formula="of:=[.B726]/[.C726]" office:value-type="float" office:value="0.002265625" calcext:value-type="float">
            <text:p>0,00226562500000000000</text:p>
          </table:table-cell>
          <table:table-cell table:formula="of:=[.D727]-[.D726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B726]+27" office:value-type="float" office:value="19602" calcext:value-type="float">
            <text:p>19602</text:p>
          </table:table-cell>
          <table:table-cell office:value-type="float" office:value="8640000" calcext:value-type="float">
            <text:p>8640000</text:p>
          </table:table-cell>
          <table:table-cell table:formula="of:=[.B727]/[.C727]" office:value-type="float" office:value="0.00226875" calcext:value-type="float">
            <text:p>0,00226875000000000000</text:p>
          </table:table-cell>
          <table:table-cell table:formula="of:=[.D728]-[.D727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B727]+27" office:value-type="float" office:value="19629" calcext:value-type="float">
            <text:p>19629</text:p>
          </table:table-cell>
          <table:table-cell office:value-type="float" office:value="8640000" calcext:value-type="float">
            <text:p>8640000</text:p>
          </table:table-cell>
          <table:table-cell table:formula="of:=[.B728]/[.C728]" office:value-type="float" office:value="0.002271875" calcext:value-type="float">
            <text:p>0,00227187500000000000</text:p>
          </table:table-cell>
          <table:table-cell table:formula="of:=[.D729]-[.D728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B728]+27" office:value-type="float" office:value="19656" calcext:value-type="float">
            <text:p>19656</text:p>
          </table:table-cell>
          <table:table-cell office:value-type="float" office:value="8640000" calcext:value-type="float">
            <text:p>8640000</text:p>
          </table:table-cell>
          <table:table-cell table:formula="of:=[.B729]/[.C729]" office:value-type="float" office:value="0.002275" calcext:value-type="float">
            <text:p>0,00227500000000000000</text:p>
          </table:table-cell>
          <table:table-cell table:formula="of:=[.D730]-[.D729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B729]+27" office:value-type="float" office:value="19683" calcext:value-type="float">
            <text:p>19683</text:p>
          </table:table-cell>
          <table:table-cell office:value-type="float" office:value="8640000" calcext:value-type="float">
            <text:p>8640000</text:p>
          </table:table-cell>
          <table:table-cell table:formula="of:=[.B730]/[.C730]" office:value-type="float" office:value="0.002278125" calcext:value-type="float">
            <text:p>0,00227812500000000000</text:p>
          </table:table-cell>
          <table:table-cell table:formula="of:=[.D731]-[.D730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B730]+27" office:value-type="float" office:value="19710" calcext:value-type="float">
            <text:p>19710</text:p>
          </table:table-cell>
          <table:table-cell office:value-type="float" office:value="8640000" calcext:value-type="float">
            <text:p>8640000</text:p>
          </table:table-cell>
          <table:table-cell table:formula="of:=[.B731]/[.C731]" office:value-type="float" office:value="0.00228125" calcext:value-type="float">
            <text:p>0,00228125000000000000</text:p>
          </table:table-cell>
          <table:table-cell table:formula="of:=[.D732]-[.D731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B731]+27" office:value-type="float" office:value="19737" calcext:value-type="float">
            <text:p>19737</text:p>
          </table:table-cell>
          <table:table-cell office:value-type="float" office:value="8640000" calcext:value-type="float">
            <text:p>8640000</text:p>
          </table:table-cell>
          <table:table-cell table:formula="of:=[.B732]/[.C732]" office:value-type="float" office:value="0.002284375" calcext:value-type="float">
            <text:p>0,00228437500000000000</text:p>
          </table:table-cell>
          <table:table-cell table:formula="of:=[.D733]-[.D732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B732]+27" office:value-type="float" office:value="19764" calcext:value-type="float">
            <text:p>19764</text:p>
          </table:table-cell>
          <table:table-cell office:value-type="float" office:value="8640000" calcext:value-type="float">
            <text:p>8640000</text:p>
          </table:table-cell>
          <table:table-cell table:formula="of:=[.B733]/[.C733]" office:value-type="float" office:value="0.0022875" calcext:value-type="float">
            <text:p>0,00228750000000000000</text:p>
          </table:table-cell>
          <table:table-cell table:formula="of:=[.D734]-[.D733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B733]+27" office:value-type="float" office:value="19791" calcext:value-type="float">
            <text:p>19791</text:p>
          </table:table-cell>
          <table:table-cell office:value-type="float" office:value="8640000" calcext:value-type="float">
            <text:p>8640000</text:p>
          </table:table-cell>
          <table:table-cell table:formula="of:=[.B734]/[.C734]" office:value-type="float" office:value="0.002290625" calcext:value-type="float">
            <text:p>0,00229062500000000000</text:p>
          </table:table-cell>
          <table:table-cell table:formula="of:=[.D735]-[.D73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B734]+27" office:value-type="float" office:value="19818" calcext:value-type="float">
            <text:p>19818</text:p>
          </table:table-cell>
          <table:table-cell office:value-type="float" office:value="8640000" calcext:value-type="float">
            <text:p>8640000</text:p>
          </table:table-cell>
          <table:table-cell table:formula="of:=[.B735]/[.C735]" office:value-type="float" office:value="0.00229375" calcext:value-type="float">
            <text:p>0,00229375000000000000</text:p>
          </table:table-cell>
          <table:table-cell table:formula="of:=[.D736]-[.D735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B735]+27" office:value-type="float" office:value="19845" calcext:value-type="float">
            <text:p>19845</text:p>
          </table:table-cell>
          <table:table-cell office:value-type="float" office:value="8640000" calcext:value-type="float">
            <text:p>8640000</text:p>
          </table:table-cell>
          <table:table-cell table:formula="of:=[.B736]/[.C736]" office:value-type="float" office:value="0.002296875" calcext:value-type="float">
            <text:p>0,00229687500000000000</text:p>
          </table:table-cell>
          <table:table-cell table:formula="of:=[.D737]-[.D736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B736]+27" office:value-type="float" office:value="19872" calcext:value-type="float">
            <text:p>19872</text:p>
          </table:table-cell>
          <table:table-cell office:value-type="float" office:value="8640000" calcext:value-type="float">
            <text:p>8640000</text:p>
          </table:table-cell>
          <table:table-cell table:formula="of:=[.B737]/[.C737]" office:value-type="float" office:value="0.0023" calcext:value-type="float">
            <text:p>0,00230000000000000000</text:p>
          </table:table-cell>
          <table:table-cell table:formula="of:=[.D738]-[.D737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B737]+27" office:value-type="float" office:value="19899" calcext:value-type="float">
            <text:p>19899</text:p>
          </table:table-cell>
          <table:table-cell office:value-type="float" office:value="8640000" calcext:value-type="float">
            <text:p>8640000</text:p>
          </table:table-cell>
          <table:table-cell table:formula="of:=[.B738]/[.C738]" office:value-type="float" office:value="0.002303125" calcext:value-type="float">
            <text:p>0,00230312500000000000</text:p>
          </table:table-cell>
          <table:table-cell table:formula="of:=[.D739]-[.D738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B738]+27" office:value-type="float" office:value="19926" calcext:value-type="float">
            <text:p>19926</text:p>
          </table:table-cell>
          <table:table-cell office:value-type="float" office:value="8640000" calcext:value-type="float">
            <text:p>8640000</text:p>
          </table:table-cell>
          <table:table-cell table:formula="of:=[.B739]/[.C739]" office:value-type="float" office:value="0.00230625" calcext:value-type="float">
            <text:p>0,00230625000000000000</text:p>
          </table:table-cell>
          <table:table-cell table:formula="of:=[.D740]-[.D739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B739]+27" office:value-type="float" office:value="19953" calcext:value-type="float">
            <text:p>19953</text:p>
          </table:table-cell>
          <table:table-cell office:value-type="float" office:value="8640000" calcext:value-type="float">
            <text:p>8640000</text:p>
          </table:table-cell>
          <table:table-cell table:formula="of:=[.B740]/[.C740]" office:value-type="float" office:value="0.002309375" calcext:value-type="float">
            <text:p>0,00230937500000000000</text:p>
          </table:table-cell>
          <table:table-cell table:formula="of:=[.D741]-[.D740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B740]+27" office:value-type="float" office:value="19980" calcext:value-type="float">
            <text:p>19980</text:p>
          </table:table-cell>
          <table:table-cell office:value-type="float" office:value="8640000" calcext:value-type="float">
            <text:p>8640000</text:p>
          </table:table-cell>
          <table:table-cell table:formula="of:=[.B741]/[.C741]" office:value-type="float" office:value="0.0023125" calcext:value-type="float">
            <text:p>0,00231250000000000000</text:p>
          </table:table-cell>
          <table:table-cell table:formula="of:=[.D742]-[.D741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B741]+27" office:value-type="float" office:value="20007" calcext:value-type="float">
            <text:p>20007</text:p>
          </table:table-cell>
          <table:table-cell office:value-type="float" office:value="8640000" calcext:value-type="float">
            <text:p>8640000</text:p>
          </table:table-cell>
          <table:table-cell table:formula="of:=[.B742]/[.C742]" office:value-type="float" office:value="0.002315625" calcext:value-type="float">
            <text:p>0,00231562500000000000</text:p>
          </table:table-cell>
          <table:table-cell table:formula="of:=[.D743]-[.D742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B742]+27" office:value-type="float" office:value="20034" calcext:value-type="float">
            <text:p>20034</text:p>
          </table:table-cell>
          <table:table-cell office:value-type="float" office:value="8640000" calcext:value-type="float">
            <text:p>8640000</text:p>
          </table:table-cell>
          <table:table-cell table:formula="of:=[.B743]/[.C743]" office:value-type="float" office:value="0.00231875" calcext:value-type="float">
            <text:p>0,00231875000000000000</text:p>
          </table:table-cell>
          <table:table-cell table:formula="of:=[.D744]-[.D743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B743]+27" office:value-type="float" office:value="20061" calcext:value-type="float">
            <text:p>20061</text:p>
          </table:table-cell>
          <table:table-cell office:value-type="float" office:value="8640000" calcext:value-type="float">
            <text:p>8640000</text:p>
          </table:table-cell>
          <table:table-cell table:formula="of:=[.B744]/[.C744]" office:value-type="float" office:value="0.002321875" calcext:value-type="float">
            <text:p>0,00232187500000000000</text:p>
          </table:table-cell>
          <table:table-cell table:formula="of:=[.D745]-[.D744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B744]+27" office:value-type="float" office:value="20088" calcext:value-type="float">
            <text:p>20088</text:p>
          </table:table-cell>
          <table:table-cell office:value-type="float" office:value="8640000" calcext:value-type="float">
            <text:p>8640000</text:p>
          </table:table-cell>
          <table:table-cell table:formula="of:=[.B745]/[.C745]" office:value-type="float" office:value="0.002325" calcext:value-type="float">
            <text:p>0,00232500000000000000</text:p>
          </table:table-cell>
          <table:table-cell table:formula="of:=[.D746]-[.D745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B745]+27" office:value-type="float" office:value="20115" calcext:value-type="float">
            <text:p>20115</text:p>
          </table:table-cell>
          <table:table-cell office:value-type="float" office:value="8640000" calcext:value-type="float">
            <text:p>8640000</text:p>
          </table:table-cell>
          <table:table-cell table:formula="of:=[.B746]/[.C746]" office:value-type="float" office:value="0.002328125" calcext:value-type="float">
            <text:p>0,00232812500000000000</text:p>
          </table:table-cell>
          <table:table-cell table:formula="of:=[.D747]-[.D746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B746]+27" office:value-type="float" office:value="20142" calcext:value-type="float">
            <text:p>20142</text:p>
          </table:table-cell>
          <table:table-cell office:value-type="float" office:value="8640000" calcext:value-type="float">
            <text:p>8640000</text:p>
          </table:table-cell>
          <table:table-cell table:formula="of:=[.B747]/[.C747]" office:value-type="float" office:value="0.00233125" calcext:value-type="float">
            <text:p>0,00233125000000000000</text:p>
          </table:table-cell>
          <table:table-cell table:formula="of:=[.D748]-[.D747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B747]+27" office:value-type="float" office:value="20169" calcext:value-type="float">
            <text:p>20169</text:p>
          </table:table-cell>
          <table:table-cell office:value-type="float" office:value="8640000" calcext:value-type="float">
            <text:p>8640000</text:p>
          </table:table-cell>
          <table:table-cell table:formula="of:=[.B748]/[.C748]" office:value-type="float" office:value="0.002334375" calcext:value-type="float">
            <text:p>0,00233437500000000000</text:p>
          </table:table-cell>
          <table:table-cell table:formula="of:=[.D749]-[.D748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B748]+27" office:value-type="float" office:value="20196" calcext:value-type="float">
            <text:p>20196</text:p>
          </table:table-cell>
          <table:table-cell office:value-type="float" office:value="8640000" calcext:value-type="float">
            <text:p>8640000</text:p>
          </table:table-cell>
          <table:table-cell table:formula="of:=[.B749]/[.C749]" office:value-type="float" office:value="0.0023375" calcext:value-type="float">
            <text:p>0,00233750000000000000</text:p>
          </table:table-cell>
          <table:table-cell table:formula="of:=[.D750]-[.D749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B749]+27" office:value-type="float" office:value="20223" calcext:value-type="float">
            <text:p>20223</text:p>
          </table:table-cell>
          <table:table-cell office:value-type="float" office:value="8640000" calcext:value-type="float">
            <text:p>8640000</text:p>
          </table:table-cell>
          <table:table-cell table:formula="of:=[.B750]/[.C750]" office:value-type="float" office:value="0.002340625" calcext:value-type="float">
            <text:p>0,00234062500000000000</text:p>
          </table:table-cell>
          <table:table-cell table:formula="of:=[.D751]-[.D750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B750]+27" office:value-type="float" office:value="20250" calcext:value-type="float">
            <text:p>20250</text:p>
          </table:table-cell>
          <table:table-cell office:value-type="float" office:value="8640000" calcext:value-type="float">
            <text:p>8640000</text:p>
          </table:table-cell>
          <table:table-cell table:formula="of:=[.B751]/[.C751]" office:value-type="float" office:value="0.00234375" calcext:value-type="float">
            <text:p>0,00234375000000000000</text:p>
          </table:table-cell>
          <table:table-cell table:formula="of:=[.D752]-[.D751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B751]+27" office:value-type="float" office:value="20277" calcext:value-type="float">
            <text:p>20277</text:p>
          </table:table-cell>
          <table:table-cell office:value-type="float" office:value="8640000" calcext:value-type="float">
            <text:p>8640000</text:p>
          </table:table-cell>
          <table:table-cell table:formula="of:=[.B752]/[.C752]" office:value-type="float" office:value="0.002346875" calcext:value-type="float">
            <text:p>0,00234687500000000000</text:p>
          </table:table-cell>
          <table:table-cell table:formula="of:=[.D753]-[.D752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B752]+27" office:value-type="float" office:value="20304" calcext:value-type="float">
            <text:p>20304</text:p>
          </table:table-cell>
          <table:table-cell office:value-type="float" office:value="8640000" calcext:value-type="float">
            <text:p>8640000</text:p>
          </table:table-cell>
          <table:table-cell table:formula="of:=[.B753]/[.C753]" office:value-type="float" office:value="0.00235" calcext:value-type="float">
            <text:p>0,00235000000000000000</text:p>
          </table:table-cell>
          <table:table-cell table:formula="of:=[.D754]-[.D753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B753]+27" office:value-type="float" office:value="20331" calcext:value-type="float">
            <text:p>20331</text:p>
          </table:table-cell>
          <table:table-cell office:value-type="float" office:value="8640000" calcext:value-type="float">
            <text:p>8640000</text:p>
          </table:table-cell>
          <table:table-cell table:formula="of:=[.B754]/[.C754]" office:value-type="float" office:value="0.002353125" calcext:value-type="float">
            <text:p>0,00235312500000000000</text:p>
          </table:table-cell>
          <table:table-cell table:formula="of:=[.D755]-[.D754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B754]+27" office:value-type="float" office:value="20358" calcext:value-type="float">
            <text:p>20358</text:p>
          </table:table-cell>
          <table:table-cell office:value-type="float" office:value="8640000" calcext:value-type="float">
            <text:p>8640000</text:p>
          </table:table-cell>
          <table:table-cell table:formula="of:=[.B755]/[.C755]" office:value-type="float" office:value="0.00235625" calcext:value-type="float">
            <text:p>0,00235625000000000000</text:p>
          </table:table-cell>
          <table:table-cell table:formula="of:=[.D756]-[.D755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B755]+27" office:value-type="float" office:value="20385" calcext:value-type="float">
            <text:p>20385</text:p>
          </table:table-cell>
          <table:table-cell office:value-type="float" office:value="8640000" calcext:value-type="float">
            <text:p>8640000</text:p>
          </table:table-cell>
          <table:table-cell table:formula="of:=[.B756]/[.C756]" office:value-type="float" office:value="0.002359375" calcext:value-type="float">
            <text:p>0,00235937500000000000</text:p>
          </table:table-cell>
          <table:table-cell table:formula="of:=[.D757]-[.D756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B756]+27" office:value-type="float" office:value="20412" calcext:value-type="float">
            <text:p>20412</text:p>
          </table:table-cell>
          <table:table-cell office:value-type="float" office:value="8640000" calcext:value-type="float">
            <text:p>8640000</text:p>
          </table:table-cell>
          <table:table-cell table:formula="of:=[.B757]/[.C757]" office:value-type="float" office:value="0.0023625" calcext:value-type="float">
            <text:p>0,00236250000000000000</text:p>
          </table:table-cell>
          <table:table-cell table:formula="of:=[.D758]-[.D757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B757]+27" office:value-type="float" office:value="20439" calcext:value-type="float">
            <text:p>20439</text:p>
          </table:table-cell>
          <table:table-cell office:value-type="float" office:value="8640000" calcext:value-type="float">
            <text:p>8640000</text:p>
          </table:table-cell>
          <table:table-cell table:formula="of:=[.B758]/[.C758]" office:value-type="float" office:value="0.002365625" calcext:value-type="float">
            <text:p>0,00236562500000000000</text:p>
          </table:table-cell>
          <table:table-cell table:formula="of:=[.D759]-[.D758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B758]+27" office:value-type="float" office:value="20466" calcext:value-type="float">
            <text:p>20466</text:p>
          </table:table-cell>
          <table:table-cell office:value-type="float" office:value="8640000" calcext:value-type="float">
            <text:p>8640000</text:p>
          </table:table-cell>
          <table:table-cell table:formula="of:=[.B759]/[.C759]" office:value-type="float" office:value="0.00236875" calcext:value-type="float">
            <text:p>0,00236875000000000000</text:p>
          </table:table-cell>
          <table:table-cell table:formula="of:=[.D760]-[.D759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B759]+27" office:value-type="float" office:value="20493" calcext:value-type="float">
            <text:p>20493</text:p>
          </table:table-cell>
          <table:table-cell office:value-type="float" office:value="8640000" calcext:value-type="float">
            <text:p>8640000</text:p>
          </table:table-cell>
          <table:table-cell table:formula="of:=[.B760]/[.C760]" office:value-type="float" office:value="0.002371875" calcext:value-type="float">
            <text:p>0,00237187500000000000</text:p>
          </table:table-cell>
          <table:table-cell table:formula="of:=[.D761]-[.D760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B760]+27" office:value-type="float" office:value="20520" calcext:value-type="float">
            <text:p>20520</text:p>
          </table:table-cell>
          <table:table-cell office:value-type="float" office:value="8640000" calcext:value-type="float">
            <text:p>8640000</text:p>
          </table:table-cell>
          <table:table-cell table:formula="of:=[.B761]/[.C761]" office:value-type="float" office:value="0.002375" calcext:value-type="float">
            <text:p>0,00237500000000000000</text:p>
          </table:table-cell>
          <table:table-cell table:formula="of:=[.D762]-[.D761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B761]+27" office:value-type="float" office:value="20547" calcext:value-type="float">
            <text:p>20547</text:p>
          </table:table-cell>
          <table:table-cell office:value-type="float" office:value="8640000" calcext:value-type="float">
            <text:p>8640000</text:p>
          </table:table-cell>
          <table:table-cell table:formula="of:=[.B762]/[.C762]" office:value-type="float" office:value="0.002378125" calcext:value-type="float">
            <text:p>0,00237812500000000000</text:p>
          </table:table-cell>
          <table:table-cell table:formula="of:=[.D763]-[.D762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B762]+27" office:value-type="float" office:value="20574" calcext:value-type="float">
            <text:p>20574</text:p>
          </table:table-cell>
          <table:table-cell office:value-type="float" office:value="8640000" calcext:value-type="float">
            <text:p>8640000</text:p>
          </table:table-cell>
          <table:table-cell table:formula="of:=[.B763]/[.C763]" office:value-type="float" office:value="0.00238125" calcext:value-type="float">
            <text:p>0,00238125000000000000</text:p>
          </table:table-cell>
          <table:table-cell table:formula="of:=[.D764]-[.D763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B763]+27" office:value-type="float" office:value="20601" calcext:value-type="float">
            <text:p>20601</text:p>
          </table:table-cell>
          <table:table-cell office:value-type="float" office:value="8640000" calcext:value-type="float">
            <text:p>8640000</text:p>
          </table:table-cell>
          <table:table-cell table:formula="of:=[.B764]/[.C764]" office:value-type="float" office:value="0.002384375" calcext:value-type="float">
            <text:p>0,00238437500000000000</text:p>
          </table:table-cell>
          <table:table-cell table:formula="of:=[.D765]-[.D764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B764]+27" office:value-type="float" office:value="20628" calcext:value-type="float">
            <text:p>20628</text:p>
          </table:table-cell>
          <table:table-cell office:value-type="float" office:value="8640000" calcext:value-type="float">
            <text:p>8640000</text:p>
          </table:table-cell>
          <table:table-cell table:formula="of:=[.B765]/[.C765]" office:value-type="float" office:value="0.0023875" calcext:value-type="float">
            <text:p>0,00238750000000000000</text:p>
          </table:table-cell>
          <table:table-cell table:formula="of:=[.D766]-[.D765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B765]+27" office:value-type="float" office:value="20655" calcext:value-type="float">
            <text:p>20655</text:p>
          </table:table-cell>
          <table:table-cell office:value-type="float" office:value="8640000" calcext:value-type="float">
            <text:p>8640000</text:p>
          </table:table-cell>
          <table:table-cell table:formula="of:=[.B766]/[.C766]" office:value-type="float" office:value="0.002390625" calcext:value-type="float">
            <text:p>0,00239062500000000000</text:p>
          </table:table-cell>
          <table:table-cell table:formula="of:=[.D767]-[.D766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B766]+27" office:value-type="float" office:value="20682" calcext:value-type="float">
            <text:p>20682</text:p>
          </table:table-cell>
          <table:table-cell office:value-type="float" office:value="8640000" calcext:value-type="float">
            <text:p>8640000</text:p>
          </table:table-cell>
          <table:table-cell table:formula="of:=[.B767]/[.C767]" office:value-type="float" office:value="0.00239375" calcext:value-type="float">
            <text:p>0,00239375000000000000</text:p>
          </table:table-cell>
          <table:table-cell table:formula="of:=[.D768]-[.D767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B767]+27" office:value-type="float" office:value="20709" calcext:value-type="float">
            <text:p>20709</text:p>
          </table:table-cell>
          <table:table-cell office:value-type="float" office:value="8640000" calcext:value-type="float">
            <text:p>8640000</text:p>
          </table:table-cell>
          <table:table-cell table:formula="of:=[.B768]/[.C768]" office:value-type="float" office:value="0.002396875" calcext:value-type="float">
            <text:p>0,00239687500000000000</text:p>
          </table:table-cell>
          <table:table-cell table:formula="of:=[.D769]-[.D768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B768]+27" office:value-type="float" office:value="20736" calcext:value-type="float">
            <text:p>20736</text:p>
          </table:table-cell>
          <table:table-cell office:value-type="float" office:value="8640000" calcext:value-type="float">
            <text:p>8640000</text:p>
          </table:table-cell>
          <table:table-cell table:formula="of:=[.B769]/[.C769]" office:value-type="float" office:value="0.0024" calcext:value-type="float">
            <text:p>0,00240000000000000000</text:p>
          </table:table-cell>
          <table:table-cell table:formula="of:=[.D770]-[.D769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B769]+27" office:value-type="float" office:value="20763" calcext:value-type="float">
            <text:p>20763</text:p>
          </table:table-cell>
          <table:table-cell office:value-type="float" office:value="8640000" calcext:value-type="float">
            <text:p>8640000</text:p>
          </table:table-cell>
          <table:table-cell table:formula="of:=[.B770]/[.C770]" office:value-type="float" office:value="0.002403125" calcext:value-type="float">
            <text:p>0,00240312500000000000</text:p>
          </table:table-cell>
          <table:table-cell table:formula="of:=[.D771]-[.D770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B770]+27" office:value-type="float" office:value="20790" calcext:value-type="float">
            <text:p>20790</text:p>
          </table:table-cell>
          <table:table-cell office:value-type="float" office:value="8640000" calcext:value-type="float">
            <text:p>8640000</text:p>
          </table:table-cell>
          <table:table-cell table:formula="of:=[.B771]/[.C771]" office:value-type="float" office:value="0.00240625" calcext:value-type="float">
            <text:p>0,00240625000000000000</text:p>
          </table:table-cell>
          <table:table-cell table:formula="of:=[.D772]-[.D771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B771]+27" office:value-type="float" office:value="20817" calcext:value-type="float">
            <text:p>20817</text:p>
          </table:table-cell>
          <table:table-cell office:value-type="float" office:value="8640000" calcext:value-type="float">
            <text:p>8640000</text:p>
          </table:table-cell>
          <table:table-cell table:formula="of:=[.B772]/[.C772]" office:value-type="float" office:value="0.002409375" calcext:value-type="float">
            <text:p>0,00240937500000000000</text:p>
          </table:table-cell>
          <table:table-cell table:formula="of:=[.D773]-[.D772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B772]+27" office:value-type="float" office:value="20844" calcext:value-type="float">
            <text:p>20844</text:p>
          </table:table-cell>
          <table:table-cell office:value-type="float" office:value="8640000" calcext:value-type="float">
            <text:p>8640000</text:p>
          </table:table-cell>
          <table:table-cell table:formula="of:=[.B773]/[.C773]" office:value-type="float" office:value="0.0024125" calcext:value-type="float">
            <text:p>0,00241250000000000000</text:p>
          </table:table-cell>
          <table:table-cell table:formula="of:=[.D774]-[.D773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B773]+27" office:value-type="float" office:value="20871" calcext:value-type="float">
            <text:p>20871</text:p>
          </table:table-cell>
          <table:table-cell office:value-type="float" office:value="8640000" calcext:value-type="float">
            <text:p>8640000</text:p>
          </table:table-cell>
          <table:table-cell table:formula="of:=[.B774]/[.C774]" office:value-type="float" office:value="0.002415625" calcext:value-type="float">
            <text:p>0,00241562500000000000</text:p>
          </table:table-cell>
          <table:table-cell table:formula="of:=[.D775]-[.D77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B774]+27" office:value-type="float" office:value="20898" calcext:value-type="float">
            <text:p>20898</text:p>
          </table:table-cell>
          <table:table-cell office:value-type="float" office:value="8640000" calcext:value-type="float">
            <text:p>8640000</text:p>
          </table:table-cell>
          <table:table-cell table:formula="of:=[.B775]/[.C775]" office:value-type="float" office:value="0.00241875" calcext:value-type="float">
            <text:p>0,00241875000000000000</text:p>
          </table:table-cell>
          <table:table-cell table:formula="of:=[.D776]-[.D775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B775]+27" office:value-type="float" office:value="20925" calcext:value-type="float">
            <text:p>20925</text:p>
          </table:table-cell>
          <table:table-cell office:value-type="float" office:value="8640000" calcext:value-type="float">
            <text:p>8640000</text:p>
          </table:table-cell>
          <table:table-cell table:formula="of:=[.B776]/[.C776]" office:value-type="float" office:value="0.002421875" calcext:value-type="float">
            <text:p>0,00242187500000000000</text:p>
          </table:table-cell>
          <table:table-cell table:formula="of:=[.D777]-[.D776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B776]+27" office:value-type="float" office:value="20952" calcext:value-type="float">
            <text:p>20952</text:p>
          </table:table-cell>
          <table:table-cell office:value-type="float" office:value="8640000" calcext:value-type="float">
            <text:p>8640000</text:p>
          </table:table-cell>
          <table:table-cell table:formula="of:=[.B777]/[.C777]" office:value-type="float" office:value="0.002425" calcext:value-type="float">
            <text:p>0,00242500000000000000</text:p>
          </table:table-cell>
          <table:table-cell table:formula="of:=[.D778]-[.D777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B777]+27" office:value-type="float" office:value="20979" calcext:value-type="float">
            <text:p>20979</text:p>
          </table:table-cell>
          <table:table-cell office:value-type="float" office:value="8640000" calcext:value-type="float">
            <text:p>8640000</text:p>
          </table:table-cell>
          <table:table-cell table:formula="of:=[.B778]/[.C778]" office:value-type="float" office:value="0.002428125" calcext:value-type="float">
            <text:p>0,00242812500000000000</text:p>
          </table:table-cell>
          <table:table-cell table:formula="of:=[.D779]-[.D778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B778]+27" office:value-type="float" office:value="21006" calcext:value-type="float">
            <text:p>21006</text:p>
          </table:table-cell>
          <table:table-cell office:value-type="float" office:value="8640000" calcext:value-type="float">
            <text:p>8640000</text:p>
          </table:table-cell>
          <table:table-cell table:formula="of:=[.B779]/[.C779]" office:value-type="float" office:value="0.00243125" calcext:value-type="float">
            <text:p>0,00243125000000000000</text:p>
          </table:table-cell>
          <table:table-cell table:formula="of:=[.D780]-[.D779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B779]+27" office:value-type="float" office:value="21033" calcext:value-type="float">
            <text:p>21033</text:p>
          </table:table-cell>
          <table:table-cell office:value-type="float" office:value="8640000" calcext:value-type="float">
            <text:p>8640000</text:p>
          </table:table-cell>
          <table:table-cell table:formula="of:=[.B780]/[.C780]" office:value-type="float" office:value="0.002434375" calcext:value-type="float">
            <text:p>0,00243437500000000000</text:p>
          </table:table-cell>
          <table:table-cell table:formula="of:=[.D781]-[.D780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B780]+27" office:value-type="float" office:value="21060" calcext:value-type="float">
            <text:p>21060</text:p>
          </table:table-cell>
          <table:table-cell office:value-type="float" office:value="8640000" calcext:value-type="float">
            <text:p>8640000</text:p>
          </table:table-cell>
          <table:table-cell table:formula="of:=[.B781]/[.C781]" office:value-type="float" office:value="0.0024375" calcext:value-type="float">
            <text:p>0,00243750000000000000</text:p>
          </table:table-cell>
          <table:table-cell table:formula="of:=[.D782]-[.D781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B781]+27" office:value-type="float" office:value="21087" calcext:value-type="float">
            <text:p>21087</text:p>
          </table:table-cell>
          <table:table-cell office:value-type="float" office:value="8640000" calcext:value-type="float">
            <text:p>8640000</text:p>
          </table:table-cell>
          <table:table-cell table:formula="of:=[.B782]/[.C782]" office:value-type="float" office:value="0.002440625" calcext:value-type="float">
            <text:p>0,00244062500000000000</text:p>
          </table:table-cell>
          <table:table-cell table:formula="of:=[.D783]-[.D782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B782]+27" office:value-type="float" office:value="21114" calcext:value-type="float">
            <text:p>21114</text:p>
          </table:table-cell>
          <table:table-cell office:value-type="float" office:value="8640000" calcext:value-type="float">
            <text:p>8640000</text:p>
          </table:table-cell>
          <table:table-cell table:formula="of:=[.B783]/[.C783]" office:value-type="float" office:value="0.00244375" calcext:value-type="float">
            <text:p>0,00244375000000000000</text:p>
          </table:table-cell>
          <table:table-cell table:formula="of:=[.D784]-[.D783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B783]+27" office:value-type="float" office:value="21141" calcext:value-type="float">
            <text:p>21141</text:p>
          </table:table-cell>
          <table:table-cell office:value-type="float" office:value="8640000" calcext:value-type="float">
            <text:p>8640000</text:p>
          </table:table-cell>
          <table:table-cell table:formula="of:=[.B784]/[.C784]" office:value-type="float" office:value="0.002446875" calcext:value-type="float">
            <text:p>0,00244687500000000000</text:p>
          </table:table-cell>
          <table:table-cell table:formula="of:=[.D785]-[.D78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B784]+27" office:value-type="float" office:value="21168" calcext:value-type="float">
            <text:p>21168</text:p>
          </table:table-cell>
          <table:table-cell office:value-type="float" office:value="8640000" calcext:value-type="float">
            <text:p>8640000</text:p>
          </table:table-cell>
          <table:table-cell table:formula="of:=[.B785]/[.C785]" office:value-type="float" office:value="0.00245" calcext:value-type="float">
            <text:p>0,00245000000000000000</text:p>
          </table:table-cell>
          <table:table-cell table:formula="of:=[.D786]-[.D785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B785]+27" office:value-type="float" office:value="21195" calcext:value-type="float">
            <text:p>21195</text:p>
          </table:table-cell>
          <table:table-cell office:value-type="float" office:value="8640000" calcext:value-type="float">
            <text:p>8640000</text:p>
          </table:table-cell>
          <table:table-cell table:formula="of:=[.B786]/[.C786]" office:value-type="float" office:value="0.002453125" calcext:value-type="float">
            <text:p>0,00245312500000000000</text:p>
          </table:table-cell>
          <table:table-cell table:formula="of:=[.D787]-[.D786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B786]+27" office:value-type="float" office:value="21222" calcext:value-type="float">
            <text:p>21222</text:p>
          </table:table-cell>
          <table:table-cell office:value-type="float" office:value="8640000" calcext:value-type="float">
            <text:p>8640000</text:p>
          </table:table-cell>
          <table:table-cell table:formula="of:=[.B787]/[.C787]" office:value-type="float" office:value="0.00245625" calcext:value-type="float">
            <text:p>0,00245625000000000000</text:p>
          </table:table-cell>
          <table:table-cell table:formula="of:=[.D788]-[.D787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B787]+27" office:value-type="float" office:value="21249" calcext:value-type="float">
            <text:p>21249</text:p>
          </table:table-cell>
          <table:table-cell office:value-type="float" office:value="8640000" calcext:value-type="float">
            <text:p>8640000</text:p>
          </table:table-cell>
          <table:table-cell table:formula="of:=[.B788]/[.C788]" office:value-type="float" office:value="0.002459375" calcext:value-type="float">
            <text:p>0,00245937500000000000</text:p>
          </table:table-cell>
          <table:table-cell table:formula="of:=[.D789]-[.D788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B788]+27" office:value-type="float" office:value="21276" calcext:value-type="float">
            <text:p>21276</text:p>
          </table:table-cell>
          <table:table-cell office:value-type="float" office:value="8640000" calcext:value-type="float">
            <text:p>8640000</text:p>
          </table:table-cell>
          <table:table-cell table:formula="of:=[.B789]/[.C789]" office:value-type="float" office:value="0.0024625" calcext:value-type="float">
            <text:p>0,00246250000000000000</text:p>
          </table:table-cell>
          <table:table-cell table:formula="of:=[.D790]-[.D789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B789]+27" office:value-type="float" office:value="21303" calcext:value-type="float">
            <text:p>21303</text:p>
          </table:table-cell>
          <table:table-cell office:value-type="float" office:value="8640000" calcext:value-type="float">
            <text:p>8640000</text:p>
          </table:table-cell>
          <table:table-cell table:formula="of:=[.B790]/[.C790]" office:value-type="float" office:value="0.002465625" calcext:value-type="float">
            <text:p>0,00246562500000000000</text:p>
          </table:table-cell>
          <table:table-cell table:formula="of:=[.D791]-[.D790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B790]+27" office:value-type="float" office:value="21330" calcext:value-type="float">
            <text:p>21330</text:p>
          </table:table-cell>
          <table:table-cell office:value-type="float" office:value="8640000" calcext:value-type="float">
            <text:p>8640000</text:p>
          </table:table-cell>
          <table:table-cell table:formula="of:=[.B791]/[.C791]" office:value-type="float" office:value="0.00246875" calcext:value-type="float">
            <text:p>0,00246875000000000000</text:p>
          </table:table-cell>
          <table:table-cell table:formula="of:=[.D792]-[.D791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B791]+27" office:value-type="float" office:value="21357" calcext:value-type="float">
            <text:p>21357</text:p>
          </table:table-cell>
          <table:table-cell office:value-type="float" office:value="8640000" calcext:value-type="float">
            <text:p>8640000</text:p>
          </table:table-cell>
          <table:table-cell table:formula="of:=[.B792]/[.C792]" office:value-type="float" office:value="0.002471875" calcext:value-type="float">
            <text:p>0,00247187500000000000</text:p>
          </table:table-cell>
          <table:table-cell table:formula="of:=[.D793]-[.D792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B792]+27" office:value-type="float" office:value="21384" calcext:value-type="float">
            <text:p>21384</text:p>
          </table:table-cell>
          <table:table-cell office:value-type="float" office:value="8640000" calcext:value-type="float">
            <text:p>8640000</text:p>
          </table:table-cell>
          <table:table-cell table:formula="of:=[.B793]/[.C793]" office:value-type="float" office:value="0.002475" calcext:value-type="float">
            <text:p>0,00247500000000000000</text:p>
          </table:table-cell>
          <table:table-cell table:formula="of:=[.D794]-[.D793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B793]+27" office:value-type="float" office:value="21411" calcext:value-type="float">
            <text:p>21411</text:p>
          </table:table-cell>
          <table:table-cell office:value-type="float" office:value="8640000" calcext:value-type="float">
            <text:p>8640000</text:p>
          </table:table-cell>
          <table:table-cell table:formula="of:=[.B794]/[.C794]" office:value-type="float" office:value="0.002478125" calcext:value-type="float">
            <text:p>0,00247812500000000000</text:p>
          </table:table-cell>
          <table:table-cell table:formula="of:=[.D795]-[.D79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B794]+27" office:value-type="float" office:value="21438" calcext:value-type="float">
            <text:p>21438</text:p>
          </table:table-cell>
          <table:table-cell office:value-type="float" office:value="8640000" calcext:value-type="float">
            <text:p>8640000</text:p>
          </table:table-cell>
          <table:table-cell table:formula="of:=[.B795]/[.C795]" office:value-type="float" office:value="0.00248125" calcext:value-type="float">
            <text:p>0,00248125000000000000</text:p>
          </table:table-cell>
          <table:table-cell table:formula="of:=[.D796]-[.D795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B795]+27" office:value-type="float" office:value="21465" calcext:value-type="float">
            <text:p>21465</text:p>
          </table:table-cell>
          <table:table-cell office:value-type="float" office:value="8640000" calcext:value-type="float">
            <text:p>8640000</text:p>
          </table:table-cell>
          <table:table-cell table:formula="of:=[.B796]/[.C796]" office:value-type="float" office:value="0.002484375" calcext:value-type="float">
            <text:p>0,00248437500000000000</text:p>
          </table:table-cell>
          <table:table-cell table:formula="of:=[.D797]-[.D796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B796]+27" office:value-type="float" office:value="21492" calcext:value-type="float">
            <text:p>21492</text:p>
          </table:table-cell>
          <table:table-cell office:value-type="float" office:value="8640000" calcext:value-type="float">
            <text:p>8640000</text:p>
          </table:table-cell>
          <table:table-cell table:formula="of:=[.B797]/[.C797]" office:value-type="float" office:value="0.0024875" calcext:value-type="float">
            <text:p>0,00248750000000000000</text:p>
          </table:table-cell>
          <table:table-cell table:formula="of:=[.D798]-[.D797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B797]+27" office:value-type="float" office:value="21519" calcext:value-type="float">
            <text:p>21519</text:p>
          </table:table-cell>
          <table:table-cell office:value-type="float" office:value="8640000" calcext:value-type="float">
            <text:p>8640000</text:p>
          </table:table-cell>
          <table:table-cell table:formula="of:=[.B798]/[.C798]" office:value-type="float" office:value="0.002490625" calcext:value-type="float">
            <text:p>0,00249062500000000000</text:p>
          </table:table-cell>
          <table:table-cell table:formula="of:=[.D799]-[.D798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B798]+27" office:value-type="float" office:value="21546" calcext:value-type="float">
            <text:p>21546</text:p>
          </table:table-cell>
          <table:table-cell office:value-type="float" office:value="8640000" calcext:value-type="float">
            <text:p>8640000</text:p>
          </table:table-cell>
          <table:table-cell table:formula="of:=[.B799]/[.C799]" office:value-type="float" office:value="0.00249375" calcext:value-type="float">
            <text:p>0,00249375000000000000</text:p>
          </table:table-cell>
          <table:table-cell table:formula="of:=[.D800]-[.D799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B799]+27" office:value-type="float" office:value="21573" calcext:value-type="float">
            <text:p>21573</text:p>
          </table:table-cell>
          <table:table-cell office:value-type="float" office:value="8640000" calcext:value-type="float">
            <text:p>8640000</text:p>
          </table:table-cell>
          <table:table-cell table:formula="of:=[.B800]/[.C800]" office:value-type="float" office:value="0.002496875" calcext:value-type="float">
            <text:p>0,00249687500000000000</text:p>
          </table:table-cell>
          <table:table-cell table:formula="of:=[.D801]-[.D800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B800]+27" office:value-type="float" office:value="21600" calcext:value-type="float">
            <text:p>21600</text:p>
          </table:table-cell>
          <table:table-cell office:value-type="float" office:value="8640000" calcext:value-type="float">
            <text:p>8640000</text:p>
          </table:table-cell>
          <table:table-cell table:formula="of:=[.B801]/[.C801]" office:value-type="float" office:value="0.0025" calcext:value-type="float">
            <text:p>0,00250000000000000000</text:p>
          </table:table-cell>
          <table:table-cell table:formula="of:=[.D802]-[.D801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B801]+27" office:value-type="float" office:value="21627" calcext:value-type="float">
            <text:p>21627</text:p>
          </table:table-cell>
          <table:table-cell office:value-type="float" office:value="8640000" calcext:value-type="float">
            <text:p>8640000</text:p>
          </table:table-cell>
          <table:table-cell table:formula="of:=[.B802]/[.C802]" office:value-type="float" office:value="0.002503125" calcext:value-type="float">
            <text:p>0,00250312500000000000</text:p>
          </table:table-cell>
          <table:table-cell table:formula="of:=[.D803]-[.D802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B802]+27" office:value-type="float" office:value="21654" calcext:value-type="float">
            <text:p>21654</text:p>
          </table:table-cell>
          <table:table-cell office:value-type="float" office:value="8640000" calcext:value-type="float">
            <text:p>8640000</text:p>
          </table:table-cell>
          <table:table-cell table:formula="of:=[.B803]/[.C803]" office:value-type="float" office:value="0.00250625" calcext:value-type="float">
            <text:p>0,00250625000000000000</text:p>
          </table:table-cell>
          <table:table-cell table:formula="of:=[.D804]-[.D803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B803]+27" office:value-type="float" office:value="21681" calcext:value-type="float">
            <text:p>21681</text:p>
          </table:table-cell>
          <table:table-cell office:value-type="float" office:value="8640000" calcext:value-type="float">
            <text:p>8640000</text:p>
          </table:table-cell>
          <table:table-cell table:formula="of:=[.B804]/[.C804]" office:value-type="float" office:value="0.002509375" calcext:value-type="float">
            <text:p>0,00250937500000000000</text:p>
          </table:table-cell>
          <table:table-cell table:formula="of:=[.D805]-[.D80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B804]+27" office:value-type="float" office:value="21708" calcext:value-type="float">
            <text:p>21708</text:p>
          </table:table-cell>
          <table:table-cell office:value-type="float" office:value="8640000" calcext:value-type="float">
            <text:p>8640000</text:p>
          </table:table-cell>
          <table:table-cell table:formula="of:=[.B805]/[.C805]" office:value-type="float" office:value="0.0025125" calcext:value-type="float">
            <text:p>0,00251250000000000000</text:p>
          </table:table-cell>
          <table:table-cell table:formula="of:=[.D806]-[.D805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B805]+27" office:value-type="float" office:value="21735" calcext:value-type="float">
            <text:p>21735</text:p>
          </table:table-cell>
          <table:table-cell office:value-type="float" office:value="8640000" calcext:value-type="float">
            <text:p>8640000</text:p>
          </table:table-cell>
          <table:table-cell table:formula="of:=[.B806]/[.C806]" office:value-type="float" office:value="0.002515625" calcext:value-type="float">
            <text:p>0,00251562500000000000</text:p>
          </table:table-cell>
          <table:table-cell table:formula="of:=[.D807]-[.D806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B806]+27" office:value-type="float" office:value="21762" calcext:value-type="float">
            <text:p>21762</text:p>
          </table:table-cell>
          <table:table-cell office:value-type="float" office:value="8640000" calcext:value-type="float">
            <text:p>8640000</text:p>
          </table:table-cell>
          <table:table-cell table:formula="of:=[.B807]/[.C807]" office:value-type="float" office:value="0.00251875" calcext:value-type="float">
            <text:p>0,00251875000000000000</text:p>
          </table:table-cell>
          <table:table-cell table:formula="of:=[.D808]-[.D807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B807]+27" office:value-type="float" office:value="21789" calcext:value-type="float">
            <text:p>21789</text:p>
          </table:table-cell>
          <table:table-cell office:value-type="float" office:value="8640000" calcext:value-type="float">
            <text:p>8640000</text:p>
          </table:table-cell>
          <table:table-cell table:formula="of:=[.B808]/[.C808]" office:value-type="float" office:value="0.002521875" calcext:value-type="float">
            <text:p>0,00252187500000000000</text:p>
          </table:table-cell>
          <table:table-cell table:formula="of:=[.D809]-[.D808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B808]+27" office:value-type="float" office:value="21816" calcext:value-type="float">
            <text:p>21816</text:p>
          </table:table-cell>
          <table:table-cell office:value-type="float" office:value="8640000" calcext:value-type="float">
            <text:p>8640000</text:p>
          </table:table-cell>
          <table:table-cell table:formula="of:=[.B809]/[.C809]" office:value-type="float" office:value="0.002525" calcext:value-type="float">
            <text:p>0,00252500000000000000</text:p>
          </table:table-cell>
          <table:table-cell table:formula="of:=[.D810]-[.D809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B809]+27" office:value-type="float" office:value="21843" calcext:value-type="float">
            <text:p>21843</text:p>
          </table:table-cell>
          <table:table-cell office:value-type="float" office:value="8640000" calcext:value-type="float">
            <text:p>8640000</text:p>
          </table:table-cell>
          <table:table-cell table:formula="of:=[.B810]/[.C810]" office:value-type="float" office:value="0.002528125" calcext:value-type="float">
            <text:p>0,00252812500000000000</text:p>
          </table:table-cell>
          <table:table-cell table:formula="of:=[.D811]-[.D810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B810]+27" office:value-type="float" office:value="21870" calcext:value-type="float">
            <text:p>21870</text:p>
          </table:table-cell>
          <table:table-cell office:value-type="float" office:value="8640000" calcext:value-type="float">
            <text:p>8640000</text:p>
          </table:table-cell>
          <table:table-cell table:formula="of:=[.B811]/[.C811]" office:value-type="float" office:value="0.00253125" calcext:value-type="float">
            <text:p>0,00253125000000000000</text:p>
          </table:table-cell>
          <table:table-cell table:formula="of:=[.D812]-[.D811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B811]+27" office:value-type="float" office:value="21897" calcext:value-type="float">
            <text:p>21897</text:p>
          </table:table-cell>
          <table:table-cell office:value-type="float" office:value="8640000" calcext:value-type="float">
            <text:p>8640000</text:p>
          </table:table-cell>
          <table:table-cell table:formula="of:=[.B812]/[.C812]" office:value-type="float" office:value="0.002534375" calcext:value-type="float">
            <text:p>0,00253437500000000000</text:p>
          </table:table-cell>
          <table:table-cell table:formula="of:=[.D813]-[.D812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B812]+27" office:value-type="float" office:value="21924" calcext:value-type="float">
            <text:p>21924</text:p>
          </table:table-cell>
          <table:table-cell office:value-type="float" office:value="8640000" calcext:value-type="float">
            <text:p>8640000</text:p>
          </table:table-cell>
          <table:table-cell table:formula="of:=[.B813]/[.C813]" office:value-type="float" office:value="0.0025375" calcext:value-type="float">
            <text:p>0,00253750000000000000</text:p>
          </table:table-cell>
          <table:table-cell table:formula="of:=[.D814]-[.D813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B813]+27" office:value-type="float" office:value="21951" calcext:value-type="float">
            <text:p>21951</text:p>
          </table:table-cell>
          <table:table-cell office:value-type="float" office:value="8640000" calcext:value-type="float">
            <text:p>8640000</text:p>
          </table:table-cell>
          <table:table-cell table:formula="of:=[.B814]/[.C814]" office:value-type="float" office:value="0.002540625" calcext:value-type="float">
            <text:p>0,00254062500000000000</text:p>
          </table:table-cell>
          <table:table-cell table:formula="of:=[.D815]-[.D81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B814]+27" office:value-type="float" office:value="21978" calcext:value-type="float">
            <text:p>21978</text:p>
          </table:table-cell>
          <table:table-cell office:value-type="float" office:value="8640000" calcext:value-type="float">
            <text:p>8640000</text:p>
          </table:table-cell>
          <table:table-cell table:formula="of:=[.B815]/[.C815]" office:value-type="float" office:value="0.00254375" calcext:value-type="float">
            <text:p>0,00254375000000000000</text:p>
          </table:table-cell>
          <table:table-cell table:formula="of:=[.D816]-[.D815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B815]+27" office:value-type="float" office:value="22005" calcext:value-type="float">
            <text:p>22005</text:p>
          </table:table-cell>
          <table:table-cell office:value-type="float" office:value="8640000" calcext:value-type="float">
            <text:p>8640000</text:p>
          </table:table-cell>
          <table:table-cell table:formula="of:=[.B816]/[.C816]" office:value-type="float" office:value="0.002546875" calcext:value-type="float">
            <text:p>0,00254687500000000000</text:p>
          </table:table-cell>
          <table:table-cell table:formula="of:=[.D817]-[.D816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B816]+27" office:value-type="float" office:value="22032" calcext:value-type="float">
            <text:p>22032</text:p>
          </table:table-cell>
          <table:table-cell office:value-type="float" office:value="8640000" calcext:value-type="float">
            <text:p>8640000</text:p>
          </table:table-cell>
          <table:table-cell table:formula="of:=[.B817]/[.C817]" office:value-type="float" office:value="0.00255" calcext:value-type="float">
            <text:p>0,00255000000000000000</text:p>
          </table:table-cell>
          <table:table-cell table:formula="of:=[.D818]-[.D817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B817]+27" office:value-type="float" office:value="22059" calcext:value-type="float">
            <text:p>22059</text:p>
          </table:table-cell>
          <table:table-cell office:value-type="float" office:value="8640000" calcext:value-type="float">
            <text:p>8640000</text:p>
          </table:table-cell>
          <table:table-cell table:formula="of:=[.B818]/[.C818]" office:value-type="float" office:value="0.002553125" calcext:value-type="float">
            <text:p>0,00255312500000000000</text:p>
          </table:table-cell>
          <table:table-cell table:formula="of:=[.D819]-[.D818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B818]+27" office:value-type="float" office:value="22086" calcext:value-type="float">
            <text:p>22086</text:p>
          </table:table-cell>
          <table:table-cell office:value-type="float" office:value="8640000" calcext:value-type="float">
            <text:p>8640000</text:p>
          </table:table-cell>
          <table:table-cell table:formula="of:=[.B819]/[.C819]" office:value-type="float" office:value="0.00255625" calcext:value-type="float">
            <text:p>0,00255625000000000000</text:p>
          </table:table-cell>
          <table:table-cell table:formula="of:=[.D820]-[.D819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B819]+27" office:value-type="float" office:value="22113" calcext:value-type="float">
            <text:p>22113</text:p>
          </table:table-cell>
          <table:table-cell office:value-type="float" office:value="8640000" calcext:value-type="float">
            <text:p>8640000</text:p>
          </table:table-cell>
          <table:table-cell table:formula="of:=[.B820]/[.C820]" office:value-type="float" office:value="0.002559375" calcext:value-type="float">
            <text:p>0,00255937500000000000</text:p>
          </table:table-cell>
          <table:table-cell table:formula="of:=[.D821]-[.D820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B820]+27" office:value-type="float" office:value="22140" calcext:value-type="float">
            <text:p>22140</text:p>
          </table:table-cell>
          <table:table-cell office:value-type="float" office:value="8640000" calcext:value-type="float">
            <text:p>8640000</text:p>
          </table:table-cell>
          <table:table-cell table:formula="of:=[.B821]/[.C821]" office:value-type="float" office:value="0.0025625" calcext:value-type="float">
            <text:p>0,00256250000000000000</text:p>
          </table:table-cell>
          <table:table-cell table:formula="of:=[.D822]-[.D821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B821]+27" office:value-type="float" office:value="22167" calcext:value-type="float">
            <text:p>22167</text:p>
          </table:table-cell>
          <table:table-cell office:value-type="float" office:value="8640000" calcext:value-type="float">
            <text:p>8640000</text:p>
          </table:table-cell>
          <table:table-cell table:formula="of:=[.B822]/[.C822]" office:value-type="float" office:value="0.002565625" calcext:value-type="float">
            <text:p>0,00256562500000000000</text:p>
          </table:table-cell>
          <table:table-cell table:formula="of:=[.D823]-[.D822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B822]+27" office:value-type="float" office:value="22194" calcext:value-type="float">
            <text:p>22194</text:p>
          </table:table-cell>
          <table:table-cell office:value-type="float" office:value="8640000" calcext:value-type="float">
            <text:p>8640000</text:p>
          </table:table-cell>
          <table:table-cell table:formula="of:=[.B823]/[.C823]" office:value-type="float" office:value="0.00256875" calcext:value-type="float">
            <text:p>0,00256875000000000000</text:p>
          </table:table-cell>
          <table:table-cell table:formula="of:=[.D824]-[.D823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B823]+27" office:value-type="float" office:value="22221" calcext:value-type="float">
            <text:p>22221</text:p>
          </table:table-cell>
          <table:table-cell office:value-type="float" office:value="8640000" calcext:value-type="float">
            <text:p>8640000</text:p>
          </table:table-cell>
          <table:table-cell table:formula="of:=[.B824]/[.C824]" office:value-type="float" office:value="0.002571875" calcext:value-type="float">
            <text:p>0,00257187500000000000</text:p>
          </table:table-cell>
          <table:table-cell table:formula="of:=[.D825]-[.D82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B824]+27" office:value-type="float" office:value="22248" calcext:value-type="float">
            <text:p>22248</text:p>
          </table:table-cell>
          <table:table-cell office:value-type="float" office:value="8640000" calcext:value-type="float">
            <text:p>8640000</text:p>
          </table:table-cell>
          <table:table-cell table:formula="of:=[.B825]/[.C825]" office:value-type="float" office:value="0.002575" calcext:value-type="float">
            <text:p>0,00257500000000000000</text:p>
          </table:table-cell>
          <table:table-cell table:formula="of:=[.D826]-[.D825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B825]+27" office:value-type="float" office:value="22275" calcext:value-type="float">
            <text:p>22275</text:p>
          </table:table-cell>
          <table:table-cell office:value-type="float" office:value="8640000" calcext:value-type="float">
            <text:p>8640000</text:p>
          </table:table-cell>
          <table:table-cell table:formula="of:=[.B826]/[.C826]" office:value-type="float" office:value="0.002578125" calcext:value-type="float">
            <text:p>0,00257812500000000000</text:p>
          </table:table-cell>
          <table:table-cell table:formula="of:=[.D827]-[.D826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B826]+27" office:value-type="float" office:value="22302" calcext:value-type="float">
            <text:p>22302</text:p>
          </table:table-cell>
          <table:table-cell office:value-type="float" office:value="8640000" calcext:value-type="float">
            <text:p>8640000</text:p>
          </table:table-cell>
          <table:table-cell table:formula="of:=[.B827]/[.C827]" office:value-type="float" office:value="0.00258125" calcext:value-type="float">
            <text:p>0,00258125000000000000</text:p>
          </table:table-cell>
          <table:table-cell table:formula="of:=[.D828]-[.D827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B827]+27" office:value-type="float" office:value="22329" calcext:value-type="float">
            <text:p>22329</text:p>
          </table:table-cell>
          <table:table-cell office:value-type="float" office:value="8640000" calcext:value-type="float">
            <text:p>8640000</text:p>
          </table:table-cell>
          <table:table-cell table:formula="of:=[.B828]/[.C828]" office:value-type="float" office:value="0.002584375" calcext:value-type="float">
            <text:p>0,00258437500000000000</text:p>
          </table:table-cell>
          <table:table-cell table:formula="of:=[.D829]-[.D828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B828]+27" office:value-type="float" office:value="22356" calcext:value-type="float">
            <text:p>22356</text:p>
          </table:table-cell>
          <table:table-cell office:value-type="float" office:value="8640000" calcext:value-type="float">
            <text:p>8640000</text:p>
          </table:table-cell>
          <table:table-cell table:formula="of:=[.B829]/[.C829]" office:value-type="float" office:value="0.0025875" calcext:value-type="float">
            <text:p>0,00258750000000000000</text:p>
          </table:table-cell>
          <table:table-cell table:formula="of:=[.D830]-[.D829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B829]+27" office:value-type="float" office:value="22383" calcext:value-type="float">
            <text:p>22383</text:p>
          </table:table-cell>
          <table:table-cell office:value-type="float" office:value="8640000" calcext:value-type="float">
            <text:p>8640000</text:p>
          </table:table-cell>
          <table:table-cell table:formula="of:=[.B830]/[.C830]" office:value-type="float" office:value="0.002590625" calcext:value-type="float">
            <text:p>0,00259062500000000000</text:p>
          </table:table-cell>
          <table:table-cell table:formula="of:=[.D831]-[.D830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B830]+27" office:value-type="float" office:value="22410" calcext:value-type="float">
            <text:p>22410</text:p>
          </table:table-cell>
          <table:table-cell office:value-type="float" office:value="8640000" calcext:value-type="float">
            <text:p>8640000</text:p>
          </table:table-cell>
          <table:table-cell table:formula="of:=[.B831]/[.C831]" office:value-type="float" office:value="0.00259375" calcext:value-type="float">
            <text:p>0,00259375000000000000</text:p>
          </table:table-cell>
          <table:table-cell table:formula="of:=[.D832]-[.D831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B831]+27" office:value-type="float" office:value="22437" calcext:value-type="float">
            <text:p>22437</text:p>
          </table:table-cell>
          <table:table-cell office:value-type="float" office:value="8640000" calcext:value-type="float">
            <text:p>8640000</text:p>
          </table:table-cell>
          <table:table-cell table:formula="of:=[.B832]/[.C832]" office:value-type="float" office:value="0.002596875" calcext:value-type="float">
            <text:p>0,00259687500000000000</text:p>
          </table:table-cell>
          <table:table-cell table:formula="of:=[.D833]-[.D832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B832]+27" office:value-type="float" office:value="22464" calcext:value-type="float">
            <text:p>22464</text:p>
          </table:table-cell>
          <table:table-cell office:value-type="float" office:value="8640000" calcext:value-type="float">
            <text:p>8640000</text:p>
          </table:table-cell>
          <table:table-cell table:formula="of:=[.B833]/[.C833]" office:value-type="float" office:value="0.0026" calcext:value-type="float">
            <text:p>0,00260000000000000000</text:p>
          </table:table-cell>
          <table:table-cell table:formula="of:=[.D834]-[.D833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B833]+27" office:value-type="float" office:value="22491" calcext:value-type="float">
            <text:p>22491</text:p>
          </table:table-cell>
          <table:table-cell office:value-type="float" office:value="8640000" calcext:value-type="float">
            <text:p>8640000</text:p>
          </table:table-cell>
          <table:table-cell table:formula="of:=[.B834]/[.C834]" office:value-type="float" office:value="0.002603125" calcext:value-type="float">
            <text:p>0,00260312500000000000</text:p>
          </table:table-cell>
          <table:table-cell table:formula="of:=[.D835]-[.D83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B834]+27" office:value-type="float" office:value="22518" calcext:value-type="float">
            <text:p>22518</text:p>
          </table:table-cell>
          <table:table-cell office:value-type="float" office:value="8640000" calcext:value-type="float">
            <text:p>8640000</text:p>
          </table:table-cell>
          <table:table-cell table:formula="of:=[.B835]/[.C835]" office:value-type="float" office:value="0.00260625" calcext:value-type="float">
            <text:p>0,00260625000000000000</text:p>
          </table:table-cell>
          <table:table-cell table:formula="of:=[.D836]-[.D835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B835]+27" office:value-type="float" office:value="22545" calcext:value-type="float">
            <text:p>22545</text:p>
          </table:table-cell>
          <table:table-cell office:value-type="float" office:value="8640000" calcext:value-type="float">
            <text:p>8640000</text:p>
          </table:table-cell>
          <table:table-cell table:formula="of:=[.B836]/[.C836]" office:value-type="float" office:value="0.002609375" calcext:value-type="float">
            <text:p>0,00260937500000000000</text:p>
          </table:table-cell>
          <table:table-cell table:formula="of:=[.D837]-[.D836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B836]+27" office:value-type="float" office:value="22572" calcext:value-type="float">
            <text:p>22572</text:p>
          </table:table-cell>
          <table:table-cell office:value-type="float" office:value="8640000" calcext:value-type="float">
            <text:p>8640000</text:p>
          </table:table-cell>
          <table:table-cell table:formula="of:=[.B837]/[.C837]" office:value-type="float" office:value="0.0026125" calcext:value-type="float">
            <text:p>0,00261250000000000000</text:p>
          </table:table-cell>
          <table:table-cell table:formula="of:=[.D838]-[.D837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B837]+27" office:value-type="float" office:value="22599" calcext:value-type="float">
            <text:p>22599</text:p>
          </table:table-cell>
          <table:table-cell office:value-type="float" office:value="8640000" calcext:value-type="float">
            <text:p>8640000</text:p>
          </table:table-cell>
          <table:table-cell table:formula="of:=[.B838]/[.C838]" office:value-type="float" office:value="0.002615625" calcext:value-type="float">
            <text:p>0,00261562500000000000</text:p>
          </table:table-cell>
          <table:table-cell table:formula="of:=[.D839]-[.D838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B838]+27" office:value-type="float" office:value="22626" calcext:value-type="float">
            <text:p>22626</text:p>
          </table:table-cell>
          <table:table-cell office:value-type="float" office:value="8640000" calcext:value-type="float">
            <text:p>8640000</text:p>
          </table:table-cell>
          <table:table-cell table:formula="of:=[.B839]/[.C839]" office:value-type="float" office:value="0.00261875" calcext:value-type="float">
            <text:p>0,00261875000000000000</text:p>
          </table:table-cell>
          <table:table-cell table:formula="of:=[.D840]-[.D839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B839]+27" office:value-type="float" office:value="22653" calcext:value-type="float">
            <text:p>22653</text:p>
          </table:table-cell>
          <table:table-cell office:value-type="float" office:value="8640000" calcext:value-type="float">
            <text:p>8640000</text:p>
          </table:table-cell>
          <table:table-cell table:formula="of:=[.B840]/[.C840]" office:value-type="float" office:value="0.002621875" calcext:value-type="float">
            <text:p>0,00262187500000000000</text:p>
          </table:table-cell>
          <table:table-cell table:formula="of:=[.D841]-[.D840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B840]+27" office:value-type="float" office:value="22680" calcext:value-type="float">
            <text:p>22680</text:p>
          </table:table-cell>
          <table:table-cell office:value-type="float" office:value="8640000" calcext:value-type="float">
            <text:p>8640000</text:p>
          </table:table-cell>
          <table:table-cell table:formula="of:=[.B841]/[.C841]" office:value-type="float" office:value="0.002625" calcext:value-type="float">
            <text:p>0,00262500000000000000</text:p>
          </table:table-cell>
          <table:table-cell table:formula="of:=[.D842]-[.D841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B841]+27" office:value-type="float" office:value="22707" calcext:value-type="float">
            <text:p>22707</text:p>
          </table:table-cell>
          <table:table-cell office:value-type="float" office:value="8640000" calcext:value-type="float">
            <text:p>8640000</text:p>
          </table:table-cell>
          <table:table-cell table:formula="of:=[.B842]/[.C842]" office:value-type="float" office:value="0.002628125" calcext:value-type="float">
            <text:p>0,00262812500000000000</text:p>
          </table:table-cell>
          <table:table-cell table:formula="of:=[.D843]-[.D842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B842]+27" office:value-type="float" office:value="22734" calcext:value-type="float">
            <text:p>22734</text:p>
          </table:table-cell>
          <table:table-cell office:value-type="float" office:value="8640000" calcext:value-type="float">
            <text:p>8640000</text:p>
          </table:table-cell>
          <table:table-cell table:formula="of:=[.B843]/[.C843]" office:value-type="float" office:value="0.00263125" calcext:value-type="float">
            <text:p>0,00263125000000000000</text:p>
          </table:table-cell>
          <table:table-cell table:formula="of:=[.D844]-[.D843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B843]+27" office:value-type="float" office:value="22761" calcext:value-type="float">
            <text:p>22761</text:p>
          </table:table-cell>
          <table:table-cell office:value-type="float" office:value="8640000" calcext:value-type="float">
            <text:p>8640000</text:p>
          </table:table-cell>
          <table:table-cell table:formula="of:=[.B844]/[.C844]" office:value-type="float" office:value="0.002634375" calcext:value-type="float">
            <text:p>0,00263437500000000000</text:p>
          </table:table-cell>
          <table:table-cell table:formula="of:=[.D845]-[.D84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B844]+27" office:value-type="float" office:value="22788" calcext:value-type="float">
            <text:p>22788</text:p>
          </table:table-cell>
          <table:table-cell office:value-type="float" office:value="8640000" calcext:value-type="float">
            <text:p>8640000</text:p>
          </table:table-cell>
          <table:table-cell table:formula="of:=[.B845]/[.C845]" office:value-type="float" office:value="0.0026375" calcext:value-type="float">
            <text:p>0,00263750000000000000</text:p>
          </table:table-cell>
          <table:table-cell table:formula="of:=[.D846]-[.D845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B845]+27" office:value-type="float" office:value="22815" calcext:value-type="float">
            <text:p>22815</text:p>
          </table:table-cell>
          <table:table-cell office:value-type="float" office:value="8640000" calcext:value-type="float">
            <text:p>8640000</text:p>
          </table:table-cell>
          <table:table-cell table:formula="of:=[.B846]/[.C846]" office:value-type="float" office:value="0.002640625" calcext:value-type="float">
            <text:p>0,00264062500000000000</text:p>
          </table:table-cell>
          <table:table-cell table:formula="of:=[.D847]-[.D846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B846]+27" office:value-type="float" office:value="22842" calcext:value-type="float">
            <text:p>22842</text:p>
          </table:table-cell>
          <table:table-cell office:value-type="float" office:value="8640000" calcext:value-type="float">
            <text:p>8640000</text:p>
          </table:table-cell>
          <table:table-cell table:formula="of:=[.B847]/[.C847]" office:value-type="float" office:value="0.00264375" calcext:value-type="float">
            <text:p>0,00264375000000000000</text:p>
          </table:table-cell>
          <table:table-cell table:formula="of:=[.D848]-[.D847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B847]+27" office:value-type="float" office:value="22869" calcext:value-type="float">
            <text:p>22869</text:p>
          </table:table-cell>
          <table:table-cell office:value-type="float" office:value="8640000" calcext:value-type="float">
            <text:p>8640000</text:p>
          </table:table-cell>
          <table:table-cell table:formula="of:=[.B848]/[.C848]" office:value-type="float" office:value="0.002646875" calcext:value-type="float">
            <text:p>0,00264687500000000000</text:p>
          </table:table-cell>
          <table:table-cell table:formula="of:=[.D849]-[.D848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B848]+27" office:value-type="float" office:value="22896" calcext:value-type="float">
            <text:p>22896</text:p>
          </table:table-cell>
          <table:table-cell office:value-type="float" office:value="8640000" calcext:value-type="float">
            <text:p>8640000</text:p>
          </table:table-cell>
          <table:table-cell table:formula="of:=[.B849]/[.C849]" office:value-type="float" office:value="0.00265" calcext:value-type="float">
            <text:p>0,00265000000000000000</text:p>
          </table:table-cell>
          <table:table-cell table:formula="of:=[.D850]-[.D849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B849]+27" office:value-type="float" office:value="22923" calcext:value-type="float">
            <text:p>22923</text:p>
          </table:table-cell>
          <table:table-cell office:value-type="float" office:value="8640000" calcext:value-type="float">
            <text:p>8640000</text:p>
          </table:table-cell>
          <table:table-cell table:formula="of:=[.B850]/[.C850]" office:value-type="float" office:value="0.002653125" calcext:value-type="float">
            <text:p>0,00265312500000000000</text:p>
          </table:table-cell>
          <table:table-cell table:formula="of:=[.D851]-[.D850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B850]+27" office:value-type="float" office:value="22950" calcext:value-type="float">
            <text:p>22950</text:p>
          </table:table-cell>
          <table:table-cell office:value-type="float" office:value="8640000" calcext:value-type="float">
            <text:p>8640000</text:p>
          </table:table-cell>
          <table:table-cell table:formula="of:=[.B851]/[.C851]" office:value-type="float" office:value="0.00265625" calcext:value-type="float">
            <text:p>0,00265625000000000000</text:p>
          </table:table-cell>
          <table:table-cell table:formula="of:=[.D852]-[.D851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B851]+27" office:value-type="float" office:value="22977" calcext:value-type="float">
            <text:p>22977</text:p>
          </table:table-cell>
          <table:table-cell office:value-type="float" office:value="8640000" calcext:value-type="float">
            <text:p>8640000</text:p>
          </table:table-cell>
          <table:table-cell table:formula="of:=[.B852]/[.C852]" office:value-type="float" office:value="0.002659375" calcext:value-type="float">
            <text:p>0,00265937500000000000</text:p>
          </table:table-cell>
          <table:table-cell table:formula="of:=[.D853]-[.D852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B852]+27" office:value-type="float" office:value="23004" calcext:value-type="float">
            <text:p>23004</text:p>
          </table:table-cell>
          <table:table-cell office:value-type="float" office:value="8640000" calcext:value-type="float">
            <text:p>8640000</text:p>
          </table:table-cell>
          <table:table-cell table:formula="of:=[.B853]/[.C853]" office:value-type="float" office:value="0.0026625" calcext:value-type="float">
            <text:p>0,00266250000000000000</text:p>
          </table:table-cell>
          <table:table-cell table:formula="of:=[.D854]-[.D853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B853]+27" office:value-type="float" office:value="23031" calcext:value-type="float">
            <text:p>23031</text:p>
          </table:table-cell>
          <table:table-cell office:value-type="float" office:value="8640000" calcext:value-type="float">
            <text:p>8640000</text:p>
          </table:table-cell>
          <table:table-cell table:formula="of:=[.B854]/[.C854]" office:value-type="float" office:value="0.002665625" calcext:value-type="float">
            <text:p>0,00266562500000000000</text:p>
          </table:table-cell>
          <table:table-cell table:formula="of:=[.D855]-[.D85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B854]+27" office:value-type="float" office:value="23058" calcext:value-type="float">
            <text:p>23058</text:p>
          </table:table-cell>
          <table:table-cell office:value-type="float" office:value="8640000" calcext:value-type="float">
            <text:p>8640000</text:p>
          </table:table-cell>
          <table:table-cell table:formula="of:=[.B855]/[.C855]" office:value-type="float" office:value="0.00266875" calcext:value-type="float">
            <text:p>0,00266875000000000000</text:p>
          </table:table-cell>
          <table:table-cell table:formula="of:=[.D856]-[.D855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B855]+27" office:value-type="float" office:value="23085" calcext:value-type="float">
            <text:p>23085</text:p>
          </table:table-cell>
          <table:table-cell office:value-type="float" office:value="8640000" calcext:value-type="float">
            <text:p>8640000</text:p>
          </table:table-cell>
          <table:table-cell table:formula="of:=[.B856]/[.C856]" office:value-type="float" office:value="0.002671875" calcext:value-type="float">
            <text:p>0,00267187500000000000</text:p>
          </table:table-cell>
          <table:table-cell table:formula="of:=[.D857]-[.D856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B856]+27" office:value-type="float" office:value="23112" calcext:value-type="float">
            <text:p>23112</text:p>
          </table:table-cell>
          <table:table-cell office:value-type="float" office:value="8640000" calcext:value-type="float">
            <text:p>8640000</text:p>
          </table:table-cell>
          <table:table-cell table:formula="of:=[.B857]/[.C857]" office:value-type="float" office:value="0.002675" calcext:value-type="float">
            <text:p>0,00267500000000000000</text:p>
          </table:table-cell>
          <table:table-cell table:formula="of:=[.D858]-[.D857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B857]+27" office:value-type="float" office:value="23139" calcext:value-type="float">
            <text:p>23139</text:p>
          </table:table-cell>
          <table:table-cell office:value-type="float" office:value="8640000" calcext:value-type="float">
            <text:p>8640000</text:p>
          </table:table-cell>
          <table:table-cell table:formula="of:=[.B858]/[.C858]" office:value-type="float" office:value="0.002678125" calcext:value-type="float">
            <text:p>0,00267812500000000000</text:p>
          </table:table-cell>
          <table:table-cell table:formula="of:=[.D859]-[.D858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B858]+27" office:value-type="float" office:value="23166" calcext:value-type="float">
            <text:p>23166</text:p>
          </table:table-cell>
          <table:table-cell office:value-type="float" office:value="8640000" calcext:value-type="float">
            <text:p>8640000</text:p>
          </table:table-cell>
          <table:table-cell table:formula="of:=[.B859]/[.C859]" office:value-type="float" office:value="0.00268125" calcext:value-type="float">
            <text:p>0,00268125000000000000</text:p>
          </table:table-cell>
          <table:table-cell table:formula="of:=[.D860]-[.D859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B859]+27" office:value-type="float" office:value="23193" calcext:value-type="float">
            <text:p>23193</text:p>
          </table:table-cell>
          <table:table-cell office:value-type="float" office:value="8640000" calcext:value-type="float">
            <text:p>8640000</text:p>
          </table:table-cell>
          <table:table-cell table:formula="of:=[.B860]/[.C860]" office:value-type="float" office:value="0.002684375" calcext:value-type="float">
            <text:p>0,00268437500000000000</text:p>
          </table:table-cell>
          <table:table-cell table:formula="of:=[.D861]-[.D860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B860]+27" office:value-type="float" office:value="23220" calcext:value-type="float">
            <text:p>23220</text:p>
          </table:table-cell>
          <table:table-cell office:value-type="float" office:value="8640000" calcext:value-type="float">
            <text:p>8640000</text:p>
          </table:table-cell>
          <table:table-cell table:formula="of:=[.B861]/[.C861]" office:value-type="float" office:value="0.0026875" calcext:value-type="float">
            <text:p>0,00268750000000000000</text:p>
          </table:table-cell>
          <table:table-cell table:formula="of:=[.D862]-[.D861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B861]+27" office:value-type="float" office:value="23247" calcext:value-type="float">
            <text:p>23247</text:p>
          </table:table-cell>
          <table:table-cell office:value-type="float" office:value="8640000" calcext:value-type="float">
            <text:p>8640000</text:p>
          </table:table-cell>
          <table:table-cell table:formula="of:=[.B862]/[.C862]" office:value-type="float" office:value="0.002690625" calcext:value-type="float">
            <text:p>0,00269062500000000000</text:p>
          </table:table-cell>
          <table:table-cell table:formula="of:=[.D863]-[.D862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B862]+27" office:value-type="float" office:value="23274" calcext:value-type="float">
            <text:p>23274</text:p>
          </table:table-cell>
          <table:table-cell office:value-type="float" office:value="8640000" calcext:value-type="float">
            <text:p>8640000</text:p>
          </table:table-cell>
          <table:table-cell table:formula="of:=[.B863]/[.C863]" office:value-type="float" office:value="0.00269375" calcext:value-type="float">
            <text:p>0,00269375000000000000</text:p>
          </table:table-cell>
          <table:table-cell table:formula="of:=[.D864]-[.D863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B863]+27" office:value-type="float" office:value="23301" calcext:value-type="float">
            <text:p>23301</text:p>
          </table:table-cell>
          <table:table-cell office:value-type="float" office:value="8640000" calcext:value-type="float">
            <text:p>8640000</text:p>
          </table:table-cell>
          <table:table-cell table:formula="of:=[.B864]/[.C864]" office:value-type="float" office:value="0.002696875" calcext:value-type="float">
            <text:p>0,00269687500000000000</text:p>
          </table:table-cell>
          <table:table-cell table:formula="of:=[.D865]-[.D86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B864]+27" office:value-type="float" office:value="23328" calcext:value-type="float">
            <text:p>23328</text:p>
          </table:table-cell>
          <table:table-cell office:value-type="float" office:value="8640000" calcext:value-type="float">
            <text:p>8640000</text:p>
          </table:table-cell>
          <table:table-cell table:formula="of:=[.B865]/[.C865]" office:value-type="float" office:value="0.0027" calcext:value-type="float">
            <text:p>0,00270000000000000000</text:p>
          </table:table-cell>
          <table:table-cell table:formula="of:=[.D866]-[.D865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B865]+27" office:value-type="float" office:value="23355" calcext:value-type="float">
            <text:p>23355</text:p>
          </table:table-cell>
          <table:table-cell office:value-type="float" office:value="8640000" calcext:value-type="float">
            <text:p>8640000</text:p>
          </table:table-cell>
          <table:table-cell table:formula="of:=[.B866]/[.C866]" office:value-type="float" office:value="0.002703125" calcext:value-type="float">
            <text:p>0,00270312500000000000</text:p>
          </table:table-cell>
          <table:table-cell table:formula="of:=[.D867]-[.D866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B866]+27" office:value-type="float" office:value="23382" calcext:value-type="float">
            <text:p>23382</text:p>
          </table:table-cell>
          <table:table-cell office:value-type="float" office:value="8640000" calcext:value-type="float">
            <text:p>8640000</text:p>
          </table:table-cell>
          <table:table-cell table:formula="of:=[.B867]/[.C867]" office:value-type="float" office:value="0.00270625" calcext:value-type="float">
            <text:p>0,00270625000000000000</text:p>
          </table:table-cell>
          <table:table-cell table:formula="of:=[.D868]-[.D867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B867]+27" office:value-type="float" office:value="23409" calcext:value-type="float">
            <text:p>23409</text:p>
          </table:table-cell>
          <table:table-cell office:value-type="float" office:value="8640000" calcext:value-type="float">
            <text:p>8640000</text:p>
          </table:table-cell>
          <table:table-cell table:formula="of:=[.B868]/[.C868]" office:value-type="float" office:value="0.002709375" calcext:value-type="float">
            <text:p>0,00270937500000000000</text:p>
          </table:table-cell>
          <table:table-cell table:formula="of:=[.D869]-[.D868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B868]+27" office:value-type="float" office:value="23436" calcext:value-type="float">
            <text:p>23436</text:p>
          </table:table-cell>
          <table:table-cell office:value-type="float" office:value="8640000" calcext:value-type="float">
            <text:p>8640000</text:p>
          </table:table-cell>
          <table:table-cell table:formula="of:=[.B869]/[.C869]" office:value-type="float" office:value="0.0027125" calcext:value-type="float">
            <text:p>0,00271250000000000000</text:p>
          </table:table-cell>
          <table:table-cell table:formula="of:=[.D870]-[.D869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B869]+27" office:value-type="float" office:value="23463" calcext:value-type="float">
            <text:p>23463</text:p>
          </table:table-cell>
          <table:table-cell office:value-type="float" office:value="8640000" calcext:value-type="float">
            <text:p>8640000</text:p>
          </table:table-cell>
          <table:table-cell table:formula="of:=[.B870]/[.C870]" office:value-type="float" office:value="0.002715625" calcext:value-type="float">
            <text:p>0,00271562500000000000</text:p>
          </table:table-cell>
          <table:table-cell table:formula="of:=[.D871]-[.D870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B870]+27" office:value-type="float" office:value="23490" calcext:value-type="float">
            <text:p>23490</text:p>
          </table:table-cell>
          <table:table-cell office:value-type="float" office:value="8640000" calcext:value-type="float">
            <text:p>8640000</text:p>
          </table:table-cell>
          <table:table-cell table:formula="of:=[.B871]/[.C871]" office:value-type="float" office:value="0.00271875" calcext:value-type="float">
            <text:p>0,00271875000000000000</text:p>
          </table:table-cell>
          <table:table-cell table:formula="of:=[.D872]-[.D871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B871]+27" office:value-type="float" office:value="23517" calcext:value-type="float">
            <text:p>23517</text:p>
          </table:table-cell>
          <table:table-cell office:value-type="float" office:value="8640000" calcext:value-type="float">
            <text:p>8640000</text:p>
          </table:table-cell>
          <table:table-cell table:formula="of:=[.B872]/[.C872]" office:value-type="float" office:value="0.002721875" calcext:value-type="float">
            <text:p>0,00272187500000000000</text:p>
          </table:table-cell>
          <table:table-cell table:formula="of:=[.D873]-[.D872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B872]+27" office:value-type="float" office:value="23544" calcext:value-type="float">
            <text:p>23544</text:p>
          </table:table-cell>
          <table:table-cell office:value-type="float" office:value="8640000" calcext:value-type="float">
            <text:p>8640000</text:p>
          </table:table-cell>
          <table:table-cell table:formula="of:=[.B873]/[.C873]" office:value-type="float" office:value="0.002725" calcext:value-type="float">
            <text:p>0,00272500000000000000</text:p>
          </table:table-cell>
          <table:table-cell table:formula="of:=[.D874]-[.D873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B873]+27" office:value-type="float" office:value="23571" calcext:value-type="float">
            <text:p>23571</text:p>
          </table:table-cell>
          <table:table-cell office:value-type="float" office:value="8640000" calcext:value-type="float">
            <text:p>8640000</text:p>
          </table:table-cell>
          <table:table-cell table:formula="of:=[.B874]/[.C874]" office:value-type="float" office:value="0.002728125" calcext:value-type="float">
            <text:p>0,00272812500000000000</text:p>
          </table:table-cell>
          <table:table-cell table:formula="of:=[.D875]-[.D87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B874]+27" office:value-type="float" office:value="23598" calcext:value-type="float">
            <text:p>23598</text:p>
          </table:table-cell>
          <table:table-cell office:value-type="float" office:value="8640000" calcext:value-type="float">
            <text:p>8640000</text:p>
          </table:table-cell>
          <table:table-cell table:formula="of:=[.B875]/[.C875]" office:value-type="float" office:value="0.00273125" calcext:value-type="float">
            <text:p>0,00273125000000000000</text:p>
          </table:table-cell>
          <table:table-cell table:formula="of:=[.D876]-[.D875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B875]+27" office:value-type="float" office:value="23625" calcext:value-type="float">
            <text:p>23625</text:p>
          </table:table-cell>
          <table:table-cell office:value-type="float" office:value="8640000" calcext:value-type="float">
            <text:p>8640000</text:p>
          </table:table-cell>
          <table:table-cell table:formula="of:=[.B876]/[.C876]" office:value-type="float" office:value="0.002734375" calcext:value-type="float">
            <text:p>0,00273437500000000000</text:p>
          </table:table-cell>
          <table:table-cell table:formula="of:=[.D877]-[.D876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B876]+27" office:value-type="float" office:value="23652" calcext:value-type="float">
            <text:p>23652</text:p>
          </table:table-cell>
          <table:table-cell office:value-type="float" office:value="8640000" calcext:value-type="float">
            <text:p>8640000</text:p>
          </table:table-cell>
          <table:table-cell table:formula="of:=[.B877]/[.C877]" office:value-type="float" office:value="0.0027375" calcext:value-type="float">
            <text:p>0,00273750000000000000</text:p>
          </table:table-cell>
          <table:table-cell table:formula="of:=[.D878]-[.D877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B877]+27" office:value-type="float" office:value="23679" calcext:value-type="float">
            <text:p>23679</text:p>
          </table:table-cell>
          <table:table-cell office:value-type="float" office:value="8640000" calcext:value-type="float">
            <text:p>8640000</text:p>
          </table:table-cell>
          <table:table-cell table:formula="of:=[.B878]/[.C878]" office:value-type="float" office:value="0.002740625" calcext:value-type="float">
            <text:p>0,00274062500000000000</text:p>
          </table:table-cell>
          <table:table-cell table:formula="of:=[.D879]-[.D878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B878]+27" office:value-type="float" office:value="23706" calcext:value-type="float">
            <text:p>23706</text:p>
          </table:table-cell>
          <table:table-cell office:value-type="float" office:value="8640000" calcext:value-type="float">
            <text:p>8640000</text:p>
          </table:table-cell>
          <table:table-cell table:formula="of:=[.B879]/[.C879]" office:value-type="float" office:value="0.00274375" calcext:value-type="float">
            <text:p>0,00274375000000000000</text:p>
          </table:table-cell>
          <table:table-cell table:formula="of:=[.D880]-[.D879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B879]+27" office:value-type="float" office:value="23733" calcext:value-type="float">
            <text:p>23733</text:p>
          </table:table-cell>
          <table:table-cell office:value-type="float" office:value="8640000" calcext:value-type="float">
            <text:p>8640000</text:p>
          </table:table-cell>
          <table:table-cell table:formula="of:=[.B880]/[.C880]" office:value-type="float" office:value="0.002746875" calcext:value-type="float">
            <text:p>0,00274687500000000000</text:p>
          </table:table-cell>
          <table:table-cell table:formula="of:=[.D881]-[.D880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B880]+27" office:value-type="float" office:value="23760" calcext:value-type="float">
            <text:p>23760</text:p>
          </table:table-cell>
          <table:table-cell office:value-type="float" office:value="8640000" calcext:value-type="float">
            <text:p>8640000</text:p>
          </table:table-cell>
          <table:table-cell table:formula="of:=[.B881]/[.C881]" office:value-type="float" office:value="0.00275" calcext:value-type="float">
            <text:p>0,00275000000000000000</text:p>
          </table:table-cell>
          <table:table-cell table:formula="of:=[.D882]-[.D881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B881]+27" office:value-type="float" office:value="23787" calcext:value-type="float">
            <text:p>23787</text:p>
          </table:table-cell>
          <table:table-cell office:value-type="float" office:value="8640000" calcext:value-type="float">
            <text:p>8640000</text:p>
          </table:table-cell>
          <table:table-cell table:formula="of:=[.B882]/[.C882]" office:value-type="float" office:value="0.002753125" calcext:value-type="float">
            <text:p>0,00275312500000000000</text:p>
          </table:table-cell>
          <table:table-cell table:formula="of:=[.D883]-[.D882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B882]+27" office:value-type="float" office:value="23814" calcext:value-type="float">
            <text:p>23814</text:p>
          </table:table-cell>
          <table:table-cell office:value-type="float" office:value="8640000" calcext:value-type="float">
            <text:p>8640000</text:p>
          </table:table-cell>
          <table:table-cell table:formula="of:=[.B883]/[.C883]" office:value-type="float" office:value="0.00275625" calcext:value-type="float">
            <text:p>0,00275625000000000000</text:p>
          </table:table-cell>
          <table:table-cell table:formula="of:=[.D884]-[.D883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B883]+27" office:value-type="float" office:value="23841" calcext:value-type="float">
            <text:p>23841</text:p>
          </table:table-cell>
          <table:table-cell office:value-type="float" office:value="8640000" calcext:value-type="float">
            <text:p>8640000</text:p>
          </table:table-cell>
          <table:table-cell table:formula="of:=[.B884]/[.C884]" office:value-type="float" office:value="0.002759375" calcext:value-type="float">
            <text:p>0,00275937500000000000</text:p>
          </table:table-cell>
          <table:table-cell table:formula="of:=[.D885]-[.D884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B884]+27" office:value-type="float" office:value="23868" calcext:value-type="float">
            <text:p>23868</text:p>
          </table:table-cell>
          <table:table-cell office:value-type="float" office:value="8640000" calcext:value-type="float">
            <text:p>8640000</text:p>
          </table:table-cell>
          <table:table-cell table:formula="of:=[.B885]/[.C885]" office:value-type="float" office:value="0.0027625" calcext:value-type="float">
            <text:p>0,00276250000000000000</text:p>
          </table:table-cell>
          <table:table-cell table:formula="of:=[.D886]-[.D885]" office:value-type="float" office:value="0.00000312499999999966" calcext:value-type="float">
            <text:p>0,0000031249999999996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B885]+27" office:value-type="float" office:value="23895" calcext:value-type="float">
            <text:p>23895</text:p>
          </table:table-cell>
          <table:table-cell office:value-type="float" office:value="8640000" calcext:value-type="float">
            <text:p>8640000</text:p>
          </table:table-cell>
          <table:table-cell table:formula="of:=[.B886]/[.C886]" office:value-type="float" office:value="0.002765625" calcext:value-type="float">
            <text:p>0,00276562500000000000</text:p>
          </table:table-cell>
          <table:table-cell table:formula="of:=[.D887]-[.D886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B886]+27" office:value-type="float" office:value="23922" calcext:value-type="float">
            <text:p>23922</text:p>
          </table:table-cell>
          <table:table-cell office:value-type="float" office:value="8640000" calcext:value-type="float">
            <text:p>8640000</text:p>
          </table:table-cell>
          <table:table-cell table:formula="of:=[.B887]/[.C887]" office:value-type="float" office:value="0.00276875" calcext:value-type="float">
            <text:p>0,00276875000000000000</text:p>
          </table:table-cell>
          <table:table-cell table:formula="of:=[.D888]-[.D887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B887]+27" office:value-type="float" office:value="23949" calcext:value-type="float">
            <text:p>23949</text:p>
          </table:table-cell>
          <table:table-cell office:value-type="float" office:value="8640000" calcext:value-type="float">
            <text:p>8640000</text:p>
          </table:table-cell>
          <table:table-cell table:formula="of:=[.B888]/[.C888]" office:value-type="float" office:value="0.002771875" calcext:value-type="float">
            <text:p>0,00277187500000000000</text:p>
          </table:table-cell>
          <table:table-cell table:formula="of:=[.D889]-[.D888]" office:value-type="float" office:value="0.00000312500000000009" calcext:value-type="float">
            <text:p>0,00000312500000000009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B888]+27" office:value-type="float" office:value="23976" calcext:value-type="float">
            <text:p>23976</text:p>
          </table:table-cell>
          <table:table-cell office:value-type="float" office:value="8640000" calcext:value-type="float">
            <text:p>8640000</text:p>
          </table:table-cell>
          <table:table-cell table:formula="of:=[.B889]/[.C889]" office:value-type="float" office:value="0.002775" calcext:value-type="float">
            <text:p>0,00277500000000000000</text:p>
          </table:table-cell>
          <table:table-cell table:formula="of:=#REF!-[.D889]" office:value-type="string" office:string-value="" calcext:value-type="error">
            <text:p>#REF!</text:p>
          </table:table-cell>
        </table:table-row>
        <table:table-row table:style-name="ro1" table:number-rows-repeated="104768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5:54:20.987432537</meta:creation-date>
    <dc:date>2026-05-17T15:54:29.068696139</dc:date>
    <meta:editing-duration>PT9S</meta:editing-duration>
    <meta:editing-cycles>1</meta:editing-cycles>
    <meta:document-statistic meta:table-count="1" meta:cell-count="4445" meta:object-count="0"/>
    <meta:generator>LibreOffice/24.2.7.2$Linux_X86_64 LibreOffice_project/420$Build-2</meta:generator>
  </office:meta>
</office:document-meta>
</file>