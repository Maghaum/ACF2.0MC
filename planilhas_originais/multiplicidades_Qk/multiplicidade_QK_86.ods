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8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86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99537037037037" calcext:value-type="float">
            <text:p>0,00000995370370370371</text:p>
          </table:table-cell>
          <table:table-cell table:formula="of:=[.D3]-[.D2]" office:value-type="float" office:value="0.0000099537037037037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86" office:value-type="float" office:value="172" calcext:value-type="float">
            <text:p>172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99074074074074" calcext:value-type="float">
            <text:p>0,00001990740740740740</text:p>
          </table:table-cell>
          <table:table-cell table:formula="of:=[.D4]-[.D3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86" office:value-type="float" office:value="258" calcext:value-type="float">
            <text:p>258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298611111111111" calcext:value-type="float">
            <text:p>0,00002986111111111110</text:p>
          </table:table-cell>
          <table:table-cell table:formula="of:=[.D5]-[.D4]" office:value-type="float" office:value="0.00000995370370370371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86" office:value-type="float" office:value="344" calcext:value-type="float">
            <text:p>344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398148148148148" calcext:value-type="float">
            <text:p>0,00003981481481481480</text:p>
          </table:table-cell>
          <table:table-cell table:formula="of:=[.D6]-[.D5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86" office:value-type="float" office:value="430" calcext:value-type="float">
            <text:p>430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497685185185185" calcext:value-type="float">
            <text:p>0,00004976851851851850</text:p>
          </table:table-cell>
          <table:table-cell table:formula="of:=[.D7]-[.D6]" office:value-type="float" office:value="0.0000099537037037037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86" office:value-type="float" office:value="516" calcext:value-type="float">
            <text:p>516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597222222222222" calcext:value-type="float">
            <text:p>0,00005972222222222220</text:p>
          </table:table-cell>
          <table:table-cell table:formula="of:=[.D8]-[.D7]" office:value-type="float" office:value="0.0000099537037037037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86" office:value-type="float" office:value="602" calcext:value-type="float">
            <text:p>602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696759259259259" calcext:value-type="float">
            <text:p>0,00006967592592592590</text:p>
          </table:table-cell>
          <table:table-cell table:formula="of:=[.D9]-[.D8]" office:value-type="float" office:value="0.00000995370370370371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86" office:value-type="float" office:value="688" calcext:value-type="float">
            <text:p>688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796296296296296" calcext:value-type="float">
            <text:p>0,00007962962962962960</text:p>
          </table:table-cell>
          <table:table-cell table:formula="of:=[.D10]-[.D9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86" office:value-type="float" office:value="774" calcext:value-type="float">
            <text:p>774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895833333333333" calcext:value-type="float">
            <text:p>0,00008958333333333330</text:p>
          </table:table-cell>
          <table:table-cell table:formula="of:=[.D11]-[.D10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86" office:value-type="float" office:value="860" calcext:value-type="float">
            <text:p>86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99537037037037" calcext:value-type="float">
            <text:p>0,00009953703703703700</text:p>
          </table:table-cell>
          <table:table-cell table:formula="of:=[.D12]-[.D11]" office:value-type="float" office:value="0.00000995370370370371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86" office:value-type="float" office:value="946" calcext:value-type="float">
            <text:p>946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109490740740741" calcext:value-type="float">
            <text:p>0,00010949074074074100</text:p>
          </table:table-cell>
          <table:table-cell table:formula="of:=[.D13]-[.D12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86" office:value-type="float" office:value="1032" calcext:value-type="float">
            <text:p>1032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119444444444444" calcext:value-type="float">
            <text:p>0,00011944444444444400</text:p>
          </table:table-cell>
          <table:table-cell table:formula="of:=[.D14]-[.D13]" office:value-type="float" office:value="0.00000995370370370371" calcext:value-type="float">
            <text:p>0,0000099537037037037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86" office:value-type="float" office:value="1118" calcext:value-type="float">
            <text:p>1118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129398148148148" calcext:value-type="float">
            <text:p>0,00012939814814814800</text:p>
          </table:table-cell>
          <table:table-cell table:formula="of:=[.D15]-[.D14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86" office:value-type="float" office:value="1204" calcext:value-type="float">
            <text:p>1204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139351851851852" calcext:value-type="float">
            <text:p>0,00013935185185185200</text:p>
          </table:table-cell>
          <table:table-cell table:formula="of:=[.D16]-[.D15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86" office:value-type="float" office:value="1290" calcext:value-type="float">
            <text:p>1290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149305555555556" calcext:value-type="float">
            <text:p>0,00014930555555555600</text:p>
          </table:table-cell>
          <table:table-cell table:formula="of:=[.D17]-[.D16]" office:value-type="float" office:value="0.00000995370370370373" calcext:value-type="float">
            <text:p>0,000009953703703703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86" office:value-type="float" office:value="1376" calcext:value-type="float">
            <text:p>1376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59259259259259" calcext:value-type="float">
            <text:p>0,00015925925925925900</text:p>
          </table:table-cell>
          <table:table-cell table:formula="of:=[.D18]-[.D17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86" office:value-type="float" office:value="1462" calcext:value-type="float">
            <text:p>1462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69212962962963" calcext:value-type="float">
            <text:p>0,00016921296296296300</text:p>
          </table:table-cell>
          <table:table-cell table:formula="of:=[.D19]-[.D18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86" office:value-type="float" office:value="1548" calcext:value-type="float">
            <text:p>1548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79166666666667" calcext:value-type="float">
            <text:p>0,00017916666666666700</text:p>
          </table:table-cell>
          <table:table-cell table:formula="of:=[.D20]-[.D19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86" office:value-type="float" office:value="1634" calcext:value-type="float">
            <text:p>1634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8912037037037" calcext:value-type="float">
            <text:p>0,00018912037037037000</text:p>
          </table:table-cell>
          <table:table-cell table:formula="of:=[.D21]-[.D20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86" office:value-type="float" office:value="1720" calcext:value-type="float">
            <text:p>172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99074074074074" calcext:value-type="float">
            <text:p>0,00019907407407407400</text:p>
          </table:table-cell>
          <table:table-cell table:formula="of:=[.D22]-[.D21]" office:value-type="float" office:value="0.00000995370370370373" calcext:value-type="float">
            <text:p>0,0000099537037037037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86" office:value-type="float" office:value="1806" calcext:value-type="float">
            <text:p>1806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209027777777778" calcext:value-type="float">
            <text:p>0,00020902777777777800</text:p>
          </table:table-cell>
          <table:table-cell table:formula="of:=[.D23]-[.D22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86" office:value-type="float" office:value="1892" calcext:value-type="float">
            <text:p>1892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218981481481481" calcext:value-type="float">
            <text:p>0,00021898148148148100</text:p>
          </table:table-cell>
          <table:table-cell table:formula="of:=[.D24]-[.D23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86" office:value-type="float" office:value="1978" calcext:value-type="float">
            <text:p>1978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228935185185185" calcext:value-type="float">
            <text:p>0,00022893518518518500</text:p>
          </table:table-cell>
          <table:table-cell table:formula="of:=[.D25]-[.D24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86" office:value-type="float" office:value="2064" calcext:value-type="float">
            <text:p>2064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238888888888889" calcext:value-type="float">
            <text:p>0,00023888888888888900</text:p>
          </table:table-cell>
          <table:table-cell table:formula="of:=[.D26]-[.D25]" office:value-type="float" office:value="0.00000995370370370373" calcext:value-type="float">
            <text:p>0,0000099537037037037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86" office:value-type="float" office:value="2150" calcext:value-type="float">
            <text:p>2150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248842592592593" calcext:value-type="float">
            <text:p>0,00024884259259259300</text:p>
          </table:table-cell>
          <table:table-cell table:formula="of:=[.D27]-[.D26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86" office:value-type="float" office:value="2236" calcext:value-type="float">
            <text:p>2236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258796296296296" calcext:value-type="float">
            <text:p>0,00025879629629629600</text:p>
          </table:table-cell>
          <table:table-cell table:formula="of:=[.D28]-[.D27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86" office:value-type="float" office:value="2322" calcext:value-type="float">
            <text:p>2322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26875" calcext:value-type="float">
            <text:p>0,00026875000000000000</text:p>
          </table:table-cell>
          <table:table-cell table:formula="of:=[.D29]-[.D28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86" office:value-type="float" office:value="2408" calcext:value-type="float">
            <text:p>2408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278703703703704" calcext:value-type="float">
            <text:p>0,00027870370370370400</text:p>
          </table:table-cell>
          <table:table-cell table:formula="of:=[.D30]-[.D29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86" office:value-type="float" office:value="2494" calcext:value-type="float">
            <text:p>2494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288657407407407" calcext:value-type="float">
            <text:p>0,00028865740740740700</text:p>
          </table:table-cell>
          <table:table-cell table:formula="of:=[.D31]-[.D30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86" office:value-type="float" office:value="2580" calcext:value-type="float">
            <text:p>258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298611111111111" calcext:value-type="float">
            <text:p>0,00029861111111111100</text:p>
          </table:table-cell>
          <table:table-cell table:formula="of:=[.D32]-[.D31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86" office:value-type="float" office:value="2666" calcext:value-type="float">
            <text:p>2666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308564814814815" calcext:value-type="float">
            <text:p>0,00030856481481481500</text:p>
          </table:table-cell>
          <table:table-cell table:formula="of:=[.D33]-[.D32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86" office:value-type="float" office:value="2752" calcext:value-type="float">
            <text:p>2752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318518518518519" calcext:value-type="float">
            <text:p>0,00031851851851851900</text:p>
          </table:table-cell>
          <table:table-cell table:formula="of:=[.D34]-[.D33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86" office:value-type="float" office:value="2838" calcext:value-type="float">
            <text:p>2838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328472222222222" calcext:value-type="float">
            <text:p>0,00032847222222222200</text:p>
          </table:table-cell>
          <table:table-cell table:formula="of:=[.D35]-[.D34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86" office:value-type="float" office:value="2924" calcext:value-type="float">
            <text:p>2924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338425925925926" calcext:value-type="float">
            <text:p>0,00033842592592592600</text:p>
          </table:table-cell>
          <table:table-cell table:formula="of:=[.D36]-[.D35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86" office:value-type="float" office:value="3010" calcext:value-type="float">
            <text:p>3010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34837962962963" calcext:value-type="float">
            <text:p>0,00034837962962963000</text:p>
          </table:table-cell>
          <table:table-cell table:formula="of:=[.D37]-[.D36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86" office:value-type="float" office:value="3096" calcext:value-type="float">
            <text:p>3096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358333333333333" calcext:value-type="float">
            <text:p>0,00035833333333333300</text:p>
          </table:table-cell>
          <table:table-cell table:formula="of:=[.D38]-[.D37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86" office:value-type="float" office:value="3182" calcext:value-type="float">
            <text:p>3182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368287037037037" calcext:value-type="float">
            <text:p>0,00036828703703703700</text:p>
          </table:table-cell>
          <table:table-cell table:formula="of:=[.D39]-[.D38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86" office:value-type="float" office:value="3268" calcext:value-type="float">
            <text:p>3268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378240740740741" calcext:value-type="float">
            <text:p>0,00037824074074074100</text:p>
          </table:table-cell>
          <table:table-cell table:formula="of:=[.D40]-[.D39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86" office:value-type="float" office:value="3354" calcext:value-type="float">
            <text:p>3354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388194444444444" calcext:value-type="float">
            <text:p>0,00038819444444444400</text:p>
          </table:table-cell>
          <table:table-cell table:formula="of:=[.D41]-[.D40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86" office:value-type="float" office:value="3440" calcext:value-type="float">
            <text:p>344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398148148148148" calcext:value-type="float">
            <text:p>0,00039814814814814800</text:p>
          </table:table-cell>
          <table:table-cell table:formula="of:=[.D42]-[.D41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86" office:value-type="float" office:value="3526" calcext:value-type="float">
            <text:p>3526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408101851851852" calcext:value-type="float">
            <text:p>0,00040810185185185200</text:p>
          </table:table-cell>
          <table:table-cell table:formula="of:=[.D43]-[.D42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86" office:value-type="float" office:value="3612" calcext:value-type="float">
            <text:p>3612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418055555555556" calcext:value-type="float">
            <text:p>0,00041805555555555600</text:p>
          </table:table-cell>
          <table:table-cell table:formula="of:=[.D44]-[.D43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86" office:value-type="float" office:value="3698" calcext:value-type="float">
            <text:p>3698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428009259259259" calcext:value-type="float">
            <text:p>0,00042800925925925900</text:p>
          </table:table-cell>
          <table:table-cell table:formula="of:=[.D45]-[.D44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86" office:value-type="float" office:value="3784" calcext:value-type="float">
            <text:p>3784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437962962962963" calcext:value-type="float">
            <text:p>0,00043796296296296300</text:p>
          </table:table-cell>
          <table:table-cell table:formula="of:=[.D46]-[.D45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86" office:value-type="float" office:value="3870" calcext:value-type="float">
            <text:p>3870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447916666666667" calcext:value-type="float">
            <text:p>0,00044791666666666700</text:p>
          </table:table-cell>
          <table:table-cell table:formula="of:=[.D47]-[.D46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86" office:value-type="float" office:value="3956" calcext:value-type="float">
            <text:p>3956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45787037037037" calcext:value-type="float">
            <text:p>0,00045787037037037000</text:p>
          </table:table-cell>
          <table:table-cell table:formula="of:=[.D48]-[.D47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86" office:value-type="float" office:value="4042" calcext:value-type="float">
            <text:p>4042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467824074074074" calcext:value-type="float">
            <text:p>0,00046782407407407400</text:p>
          </table:table-cell>
          <table:table-cell table:formula="of:=[.D49]-[.D48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86" office:value-type="float" office:value="4128" calcext:value-type="float">
            <text:p>4128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477777777777778" calcext:value-type="float">
            <text:p>0,00047777777777777800</text:p>
          </table:table-cell>
          <table:table-cell table:formula="of:=[.D50]-[.D49]" office:value-type="float" office:value="0.0000099537037037037" calcext:value-type="float">
            <text:p>0,0000099537037037037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86" office:value-type="float" office:value="4214" calcext:value-type="float">
            <text:p>4214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487731481481481" calcext:value-type="float">
            <text:p>0,00048773148148148100</text:p>
          </table:table-cell>
          <table:table-cell table:formula="of:=[.D51]-[.D50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86" office:value-type="float" office:value="4300" calcext:value-type="float">
            <text:p>430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497685185185185" calcext:value-type="float">
            <text:p>0,00049768518518518500</text:p>
          </table:table-cell>
          <table:table-cell table:formula="of:=[.D52]-[.D5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86" office:value-type="float" office:value="4386" calcext:value-type="float">
            <text:p>4386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507638888888889" calcext:value-type="float">
            <text:p>0,00050763888888888900</text:p>
          </table:table-cell>
          <table:table-cell table:formula="of:=[.D53]-[.D52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86" office:value-type="float" office:value="4472" calcext:value-type="float">
            <text:p>4472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517592592592593" calcext:value-type="float">
            <text:p>0,00051759259259259300</text:p>
          </table:table-cell>
          <table:table-cell table:formula="of:=[.D54]-[.D5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86" office:value-type="float" office:value="4558" calcext:value-type="float">
            <text:p>4558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527546296296296" calcext:value-type="float">
            <text:p>0,00052754629629629600</text:p>
          </table:table-cell>
          <table:table-cell table:formula="of:=[.D55]-[.D54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86" office:value-type="float" office:value="4644" calcext:value-type="float">
            <text:p>4644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5375" calcext:value-type="float">
            <text:p>0,00053750000000000000</text:p>
          </table:table-cell>
          <table:table-cell table:formula="of:=[.D56]-[.D55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86" office:value-type="float" office:value="4730" calcext:value-type="float">
            <text:p>4730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547453703703704" calcext:value-type="float">
            <text:p>0,00054745370370370400</text:p>
          </table:table-cell>
          <table:table-cell table:formula="of:=[.D57]-[.D5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86" office:value-type="float" office:value="4816" calcext:value-type="float">
            <text:p>4816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557407407407407" calcext:value-type="float">
            <text:p>0,00055740740740740700</text:p>
          </table:table-cell>
          <table:table-cell table:formula="of:=[.D58]-[.D57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86" office:value-type="float" office:value="4902" calcext:value-type="float">
            <text:p>4902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567361111111111" calcext:value-type="float">
            <text:p>0,00056736111111111100</text:p>
          </table:table-cell>
          <table:table-cell table:formula="of:=[.D59]-[.D5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86" office:value-type="float" office:value="4988" calcext:value-type="float">
            <text:p>4988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577314814814815" calcext:value-type="float">
            <text:p>0,00057731481481481500</text:p>
          </table:table-cell>
          <table:table-cell table:formula="of:=[.D60]-[.D59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86" office:value-type="float" office:value="5074" calcext:value-type="float">
            <text:p>5074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587268518518519" calcext:value-type="float">
            <text:p>0,00058726851851851900</text:p>
          </table:table-cell>
          <table:table-cell table:formula="of:=[.D61]-[.D6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86" office:value-type="float" office:value="5160" calcext:value-type="float">
            <text:p>516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597222222222222" calcext:value-type="float">
            <text:p>0,00059722222222222200</text:p>
          </table:table-cell>
          <table:table-cell table:formula="of:=[.D62]-[.D61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86" office:value-type="float" office:value="5246" calcext:value-type="float">
            <text:p>5246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607175925925926" calcext:value-type="float">
            <text:p>0,00060717592592592600</text:p>
          </table:table-cell>
          <table:table-cell table:formula="of:=[.D63]-[.D6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86" office:value-type="float" office:value="5332" calcext:value-type="float">
            <text:p>5332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61712962962963" calcext:value-type="float">
            <text:p>0,00061712962962963000</text:p>
          </table:table-cell>
          <table:table-cell table:formula="of:=[.D64]-[.D63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86" office:value-type="float" office:value="5418" calcext:value-type="float">
            <text:p>5418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627083333333333" calcext:value-type="float">
            <text:p>0,00062708333333333300</text:p>
          </table:table-cell>
          <table:table-cell table:formula="of:=[.D65]-[.D64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86" office:value-type="float" office:value="5504" calcext:value-type="float">
            <text:p>5504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637037037037037" calcext:value-type="float">
            <text:p>0,00063703703703703700</text:p>
          </table:table-cell>
          <table:table-cell table:formula="of:=[.D66]-[.D6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86" office:value-type="float" office:value="5590" calcext:value-type="float">
            <text:p>5590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646990740740741" calcext:value-type="float">
            <text:p>0,00064699074074074100</text:p>
          </table:table-cell>
          <table:table-cell table:formula="of:=[.D67]-[.D66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86" office:value-type="float" office:value="5676" calcext:value-type="float">
            <text:p>5676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656944444444445" calcext:value-type="float">
            <text:p>0,00065694444444444500</text:p>
          </table:table-cell>
          <table:table-cell table:formula="of:=[.D68]-[.D6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86" office:value-type="float" office:value="5762" calcext:value-type="float">
            <text:p>5762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666898148148148" calcext:value-type="float">
            <text:p>0,00066689814814814800</text:p>
          </table:table-cell>
          <table:table-cell table:formula="of:=[.D69]-[.D68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86" office:value-type="float" office:value="5848" calcext:value-type="float">
            <text:p>5848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676851851851852" calcext:value-type="float">
            <text:p>0,00067685185185185200</text:p>
          </table:table-cell>
          <table:table-cell table:formula="of:=[.D70]-[.D6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86" office:value-type="float" office:value="5934" calcext:value-type="float">
            <text:p>5934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686805555555556" calcext:value-type="float">
            <text:p>0,00068680555555555600</text:p>
          </table:table-cell>
          <table:table-cell table:formula="of:=[.D71]-[.D70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86" office:value-type="float" office:value="6020" calcext:value-type="float">
            <text:p>602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696759259259259" calcext:value-type="float">
            <text:p>0,00069675925925925900</text:p>
          </table:table-cell>
          <table:table-cell table:formula="of:=[.D72]-[.D7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86" office:value-type="float" office:value="6106" calcext:value-type="float">
            <text:p>6106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706712962962963" calcext:value-type="float">
            <text:p>0,00070671296296296300</text:p>
          </table:table-cell>
          <table:table-cell table:formula="of:=[.D73]-[.D72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86" office:value-type="float" office:value="6192" calcext:value-type="float">
            <text:p>6192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716666666666667" calcext:value-type="float">
            <text:p>0,00071666666666666700</text:p>
          </table:table-cell>
          <table:table-cell table:formula="of:=[.D74]-[.D73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86" office:value-type="float" office:value="6278" calcext:value-type="float">
            <text:p>6278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72662037037037" calcext:value-type="float">
            <text:p>0,00072662037037037000</text:p>
          </table:table-cell>
          <table:table-cell table:formula="of:=[.D75]-[.D7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86" office:value-type="float" office:value="6364" calcext:value-type="float">
            <text:p>6364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736574074074074" calcext:value-type="float">
            <text:p>0,00073657407407407400</text:p>
          </table:table-cell>
          <table:table-cell table:formula="of:=[.D76]-[.D75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86" office:value-type="float" office:value="6450" calcext:value-type="float">
            <text:p>6450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746527777777778" calcext:value-type="float">
            <text:p>0,00074652777777777800</text:p>
          </table:table-cell>
          <table:table-cell table:formula="of:=[.D77]-[.D7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86" office:value-type="float" office:value="6536" calcext:value-type="float">
            <text:p>6536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756481481481482" calcext:value-type="float">
            <text:p>0,00075648148148148200</text:p>
          </table:table-cell>
          <table:table-cell table:formula="of:=[.D78]-[.D77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86" office:value-type="float" office:value="6622" calcext:value-type="float">
            <text:p>6622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766435185185185" calcext:value-type="float">
            <text:p>0,00076643518518518500</text:p>
          </table:table-cell>
          <table:table-cell table:formula="of:=[.D79]-[.D7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86" office:value-type="float" office:value="6708" calcext:value-type="float">
            <text:p>6708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776388888888889" calcext:value-type="float">
            <text:p>0,00077638888888888900</text:p>
          </table:table-cell>
          <table:table-cell table:formula="of:=[.D80]-[.D79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86" office:value-type="float" office:value="6794" calcext:value-type="float">
            <text:p>6794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786342592592593" calcext:value-type="float">
            <text:p>0,00078634259259259300</text:p>
          </table:table-cell>
          <table:table-cell table:formula="of:=[.D81]-[.D8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86" office:value-type="float" office:value="6880" calcext:value-type="float">
            <text:p>688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796296296296296" calcext:value-type="float">
            <text:p>0,00079629629629629600</text:p>
          </table:table-cell>
          <table:table-cell table:formula="of:=[.D82]-[.D81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86" office:value-type="float" office:value="6966" calcext:value-type="float">
            <text:p>6966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80625" calcext:value-type="float">
            <text:p>0,00080625000000000000</text:p>
          </table:table-cell>
          <table:table-cell table:formula="of:=[.D83]-[.D82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86" office:value-type="float" office:value="7052" calcext:value-type="float">
            <text:p>7052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816203703703704" calcext:value-type="float">
            <text:p>0,00081620370370370400</text:p>
          </table:table-cell>
          <table:table-cell table:formula="of:=[.D84]-[.D8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86" office:value-type="float" office:value="7138" calcext:value-type="float">
            <text:p>7138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826157407407407" calcext:value-type="float">
            <text:p>0,00082615740740740700</text:p>
          </table:table-cell>
          <table:table-cell table:formula="of:=[.D85]-[.D84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86" office:value-type="float" office:value="7224" calcext:value-type="float">
            <text:p>7224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836111111111111" calcext:value-type="float">
            <text:p>0,00083611111111111100</text:p>
          </table:table-cell>
          <table:table-cell table:formula="of:=[.D86]-[.D8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86" office:value-type="float" office:value="7310" calcext:value-type="float">
            <text:p>7310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846064814814815" calcext:value-type="float">
            <text:p>0,00084606481481481500</text:p>
          </table:table-cell>
          <table:table-cell table:formula="of:=[.D87]-[.D86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86" office:value-type="float" office:value="7396" calcext:value-type="float">
            <text:p>7396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856018518518519" calcext:value-type="float">
            <text:p>0,00085601851851851900</text:p>
          </table:table-cell>
          <table:table-cell table:formula="of:=[.D88]-[.D8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86" office:value-type="float" office:value="7482" calcext:value-type="float">
            <text:p>7482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865972222222222" calcext:value-type="float">
            <text:p>0,00086597222222222200</text:p>
          </table:table-cell>
          <table:table-cell table:formula="of:=[.D89]-[.D88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86" office:value-type="float" office:value="7568" calcext:value-type="float">
            <text:p>7568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875925925925926" calcext:value-type="float">
            <text:p>0,00087592592592592600</text:p>
          </table:table-cell>
          <table:table-cell table:formula="of:=[.D90]-[.D8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86" office:value-type="float" office:value="7654" calcext:value-type="float">
            <text:p>7654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88587962962963" calcext:value-type="float">
            <text:p>0,00088587962962963000</text:p>
          </table:table-cell>
          <table:table-cell table:formula="of:=[.D91]-[.D90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86" office:value-type="float" office:value="7740" calcext:value-type="float">
            <text:p>774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895833333333333" calcext:value-type="float">
            <text:p>0,00089583333333333300</text:p>
          </table:table-cell>
          <table:table-cell table:formula="of:=[.D92]-[.D91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86" office:value-type="float" office:value="7826" calcext:value-type="float">
            <text:p>7826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905787037037037" calcext:value-type="float">
            <text:p>0,00090578703703703700</text:p>
          </table:table-cell>
          <table:table-cell table:formula="of:=[.D93]-[.D9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86" office:value-type="float" office:value="7912" calcext:value-type="float">
            <text:p>7912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915740740740741" calcext:value-type="float">
            <text:p>0,00091574074074074100</text:p>
          </table:table-cell>
          <table:table-cell table:formula="of:=[.D94]-[.D93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86" office:value-type="float" office:value="7998" calcext:value-type="float">
            <text:p>7998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925694444444445" calcext:value-type="float">
            <text:p>0,00092569444444444500</text:p>
          </table:table-cell>
          <table:table-cell table:formula="of:=[.D95]-[.D9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86" office:value-type="float" office:value="8084" calcext:value-type="float">
            <text:p>8084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935648148148148" calcext:value-type="float">
            <text:p>0,00093564814814814800</text:p>
          </table:table-cell>
          <table:table-cell table:formula="of:=[.D96]-[.D95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86" office:value-type="float" office:value="8170" calcext:value-type="float">
            <text:p>8170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945601851851852" calcext:value-type="float">
            <text:p>0,00094560185185185200</text:p>
          </table:table-cell>
          <table:table-cell table:formula="of:=[.D97]-[.D9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86" office:value-type="float" office:value="8256" calcext:value-type="float">
            <text:p>8256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955555555555556" calcext:value-type="float">
            <text:p>0,00095555555555555600</text:p>
          </table:table-cell>
          <table:table-cell table:formula="of:=[.D98]-[.D97]" office:value-type="float" office:value="0.00000995370370370375" calcext:value-type="float">
            <text:p>0,000009953703703703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86" office:value-type="float" office:value="8342" calcext:value-type="float">
            <text:p>8342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965509259259259" calcext:value-type="float">
            <text:p>0,00096550925925925900</text:p>
          </table:table-cell>
          <table:table-cell table:formula="of:=[.D99]-[.D9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86" office:value-type="float" office:value="8428" calcext:value-type="float">
            <text:p>8428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975462962962963" calcext:value-type="float">
            <text:p>0,00097546296296296300</text:p>
          </table:table-cell>
          <table:table-cell table:formula="of:=[.D100]-[.D9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86" office:value-type="float" office:value="8514" calcext:value-type="float">
            <text:p>8514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985416666666667" calcext:value-type="float">
            <text:p>0,00098541666666666700</text:p>
          </table:table-cell>
          <table:table-cell table:formula="of:=[.D101]-[.D10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86" office:value-type="float" office:value="8600" calcext:value-type="float">
            <text:p>86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99537037037037" calcext:value-type="float">
            <text:p>0,00099537037037037000</text:p>
          </table:table-cell>
          <table:table-cell table:formula="of:=[.D102]-[.D10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86" office:value-type="float" office:value="8686" calcext:value-type="float">
            <text:p>8686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100532407407407" calcext:value-type="float">
            <text:p>0,00100532407407407000</text:p>
          </table:table-cell>
          <table:table-cell table:formula="of:=[.D103]-[.D10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86" office:value-type="float" office:value="8772" calcext:value-type="float">
            <text:p>8772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101527777777778" calcext:value-type="float">
            <text:p>0,00101527777777778000</text:p>
          </table:table-cell>
          <table:table-cell table:formula="of:=[.D104]-[.D10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86" office:value-type="float" office:value="8858" calcext:value-type="float">
            <text:p>8858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102523148148148" calcext:value-type="float">
            <text:p>0,00102523148148148000</text:p>
          </table:table-cell>
          <table:table-cell table:formula="of:=[.D105]-[.D10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86" office:value-type="float" office:value="8944" calcext:value-type="float">
            <text:p>8944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103518518518519" calcext:value-type="float">
            <text:p>0,00103518518518519000</text:p>
          </table:table-cell>
          <table:table-cell table:formula="of:=[.D106]-[.D10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86" office:value-type="float" office:value="9030" calcext:value-type="float">
            <text:p>9030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104513888888889" calcext:value-type="float">
            <text:p>0,00104513888888889000</text:p>
          </table:table-cell>
          <table:table-cell table:formula="of:=[.D107]-[.D10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86" office:value-type="float" office:value="9116" calcext:value-type="float">
            <text:p>9116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105509259259259" calcext:value-type="float">
            <text:p>0,00105509259259259000</text:p>
          </table:table-cell>
          <table:table-cell table:formula="of:=[.D108]-[.D10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86" office:value-type="float" office:value="9202" calcext:value-type="float">
            <text:p>9202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10650462962963" calcext:value-type="float">
            <text:p>0,00106504629629630000</text:p>
          </table:table-cell>
          <table:table-cell table:formula="of:=[.D109]-[.D10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86" office:value-type="float" office:value="9288" calcext:value-type="float">
            <text:p>9288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1075" calcext:value-type="float">
            <text:p>0,00107500000000000000</text:p>
          </table:table-cell>
          <table:table-cell table:formula="of:=[.D110]-[.D10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86" office:value-type="float" office:value="9374" calcext:value-type="float">
            <text:p>9374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10849537037037" calcext:value-type="float">
            <text:p>0,00108495370370370000</text:p>
          </table:table-cell>
          <table:table-cell table:formula="of:=[.D111]-[.D11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86" office:value-type="float" office:value="9460" calcext:value-type="float">
            <text:p>946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109490740740741" calcext:value-type="float">
            <text:p>0,00109490740740741000</text:p>
          </table:table-cell>
          <table:table-cell table:formula="of:=[.D112]-[.D11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86" office:value-type="float" office:value="9546" calcext:value-type="float">
            <text:p>9546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110486111111111" calcext:value-type="float">
            <text:p>0,00110486111111111000</text:p>
          </table:table-cell>
          <table:table-cell table:formula="of:=[.D113]-[.D11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86" office:value-type="float" office:value="9632" calcext:value-type="float">
            <text:p>9632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111481481481481" calcext:value-type="float">
            <text:p>0,00111481481481481000</text:p>
          </table:table-cell>
          <table:table-cell table:formula="of:=[.D114]-[.D11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86" office:value-type="float" office:value="9718" calcext:value-type="float">
            <text:p>9718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112476851851852" calcext:value-type="float">
            <text:p>0,00112476851851852000</text:p>
          </table:table-cell>
          <table:table-cell table:formula="of:=[.D115]-[.D11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86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113472222222222" calcext:value-type="float">
            <text:p>0,00113472222222222000</text:p>
          </table:table-cell>
          <table:table-cell table:formula="of:=[.D116]-[.D11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86" office:value-type="float" office:value="9890" calcext:value-type="float">
            <text:p>9890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114467592592593" calcext:value-type="float">
            <text:p>0,00114467592592593000</text:p>
          </table:table-cell>
          <table:table-cell table:formula="of:=[.D117]-[.D11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86" office:value-type="float" office:value="9976" calcext:value-type="float">
            <text:p>9976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115462962962963" calcext:value-type="float">
            <text:p>0,00115462962962963000</text:p>
          </table:table-cell>
          <table:table-cell table:formula="of:=[.D118]-[.D11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86" office:value-type="float" office:value="10062" calcext:value-type="float">
            <text:p>10062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116458333333333" calcext:value-type="float">
            <text:p>0,00116458333333333000</text:p>
          </table:table-cell>
          <table:table-cell table:formula="of:=[.D119]-[.D11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86" office:value-type="float" office:value="10148" calcext:value-type="float">
            <text:p>10148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117453703703704" calcext:value-type="float">
            <text:p>0,00117453703703704000</text:p>
          </table:table-cell>
          <table:table-cell table:formula="of:=[.D120]-[.D11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86" office:value-type="float" office:value="10234" calcext:value-type="float">
            <text:p>10234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118449074074074" calcext:value-type="float">
            <text:p>0,00118449074074074000</text:p>
          </table:table-cell>
          <table:table-cell table:formula="of:=[.D121]-[.D12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86" office:value-type="float" office:value="10320" calcext:value-type="float">
            <text:p>1032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119444444444444" calcext:value-type="float">
            <text:p>0,00119444444444444000</text:p>
          </table:table-cell>
          <table:table-cell table:formula="of:=[.D122]-[.D12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86" office:value-type="float" office:value="10406" calcext:value-type="float">
            <text:p>10406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120439814814815" calcext:value-type="float">
            <text:p>0,00120439814814815000</text:p>
          </table:table-cell>
          <table:table-cell table:formula="of:=[.D123]-[.D12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86" office:value-type="float" office:value="10492" calcext:value-type="float">
            <text:p>10492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121435185185185" calcext:value-type="float">
            <text:p>0,00121435185185185000</text:p>
          </table:table-cell>
          <table:table-cell table:formula="of:=[.D124]-[.D12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86" office:value-type="float" office:value="10578" calcext:value-type="float">
            <text:p>10578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122430555555556" calcext:value-type="float">
            <text:p>0,00122430555555556000</text:p>
          </table:table-cell>
          <table:table-cell table:formula="of:=[.D125]-[.D12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86" office:value-type="float" office:value="10664" calcext:value-type="float">
            <text:p>10664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123425925925926" calcext:value-type="float">
            <text:p>0,00123425925925926000</text:p>
          </table:table-cell>
          <table:table-cell table:formula="of:=[.D126]-[.D12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86" office:value-type="float" office:value="10750" calcext:value-type="float">
            <text:p>10750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124421296296296" calcext:value-type="float">
            <text:p>0,00124421296296296000</text:p>
          </table:table-cell>
          <table:table-cell table:formula="of:=[.D127]-[.D12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86" office:value-type="float" office:value="10836" calcext:value-type="float">
            <text:p>10836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125416666666667" calcext:value-type="float">
            <text:p>0,00125416666666667000</text:p>
          </table:table-cell>
          <table:table-cell table:formula="of:=[.D128]-[.D12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86" office:value-type="float" office:value="10922" calcext:value-type="float">
            <text:p>10922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126412037037037" calcext:value-type="float">
            <text:p>0,00126412037037037000</text:p>
          </table:table-cell>
          <table:table-cell table:formula="of:=[.D129]-[.D12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86" office:value-type="float" office:value="11008" calcext:value-type="float">
            <text:p>11008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127407407407407" calcext:value-type="float">
            <text:p>0,00127407407407407000</text:p>
          </table:table-cell>
          <table:table-cell table:formula="of:=[.D130]-[.D12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86" office:value-type="float" office:value="11094" calcext:value-type="float">
            <text:p>11094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128402777777778" calcext:value-type="float">
            <text:p>0,00128402777777778000</text:p>
          </table:table-cell>
          <table:table-cell table:formula="of:=[.D131]-[.D13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86" office:value-type="float" office:value="11180" calcext:value-type="float">
            <text:p>1118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129398148148148" calcext:value-type="float">
            <text:p>0,00129398148148148000</text:p>
          </table:table-cell>
          <table:table-cell table:formula="of:=[.D132]-[.D13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86" office:value-type="float" office:value="11266" calcext:value-type="float">
            <text:p>11266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130393518518519" calcext:value-type="float">
            <text:p>0,00130393518518519000</text:p>
          </table:table-cell>
          <table:table-cell table:formula="of:=[.D133]-[.D13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86" office:value-type="float" office:value="11352" calcext:value-type="float">
            <text:p>11352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131388888888889" calcext:value-type="float">
            <text:p>0,00131388888888889000</text:p>
          </table:table-cell>
          <table:table-cell table:formula="of:=[.D134]-[.D13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86" office:value-type="float" office:value="11438" calcext:value-type="float">
            <text:p>11438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132384259259259" calcext:value-type="float">
            <text:p>0,00132384259259259000</text:p>
          </table:table-cell>
          <table:table-cell table:formula="of:=[.D135]-[.D13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86" office:value-type="float" office:value="11524" calcext:value-type="float">
            <text:p>11524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13337962962963" calcext:value-type="float">
            <text:p>0,00133379629629630000</text:p>
          </table:table-cell>
          <table:table-cell table:formula="of:=[.D136]-[.D13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86" office:value-type="float" office:value="11610" calcext:value-type="float">
            <text:p>11610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134375" calcext:value-type="float">
            <text:p>0,00134375000000000000</text:p>
          </table:table-cell>
          <table:table-cell table:formula="of:=[.D137]-[.D13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86" office:value-type="float" office:value="11696" calcext:value-type="float">
            <text:p>11696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13537037037037" calcext:value-type="float">
            <text:p>0,00135370370370370000</text:p>
          </table:table-cell>
          <table:table-cell table:formula="of:=[.D138]-[.D13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86" office:value-type="float" office:value="11782" calcext:value-type="float">
            <text:p>11782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136365740740741" calcext:value-type="float">
            <text:p>0,00136365740740741000</text:p>
          </table:table-cell>
          <table:table-cell table:formula="of:=[.D139]-[.D13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86" office:value-type="float" office:value="11868" calcext:value-type="float">
            <text:p>11868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137361111111111" calcext:value-type="float">
            <text:p>0,00137361111111111000</text:p>
          </table:table-cell>
          <table:table-cell table:formula="of:=[.D140]-[.D13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86" office:value-type="float" office:value="11954" calcext:value-type="float">
            <text:p>11954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138356481481482" calcext:value-type="float">
            <text:p>0,00138356481481482000</text:p>
          </table:table-cell>
          <table:table-cell table:formula="of:=[.D141]-[.D14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86" office:value-type="float" office:value="12040" calcext:value-type="float">
            <text:p>1204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139351851851852" calcext:value-type="float">
            <text:p>0,00139351851851852000</text:p>
          </table:table-cell>
          <table:table-cell table:formula="of:=[.D142]-[.D14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86" office:value-type="float" office:value="12126" calcext:value-type="float">
            <text:p>12126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140347222222222" calcext:value-type="float">
            <text:p>0,00140347222222222000</text:p>
          </table:table-cell>
          <table:table-cell table:formula="of:=[.D143]-[.D14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86" office:value-type="float" office:value="12212" calcext:value-type="float">
            <text:p>12212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141342592592593" calcext:value-type="float">
            <text:p>0,00141342592592593000</text:p>
          </table:table-cell>
          <table:table-cell table:formula="of:=[.D144]-[.D14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86" office:value-type="float" office:value="12298" calcext:value-type="float">
            <text:p>12298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142337962962963" calcext:value-type="float">
            <text:p>0,00142337962962963000</text:p>
          </table:table-cell>
          <table:table-cell table:formula="of:=[.D145]-[.D14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86" office:value-type="float" office:value="12384" calcext:value-type="float">
            <text:p>12384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143333333333333" calcext:value-type="float">
            <text:p>0,00143333333333333000</text:p>
          </table:table-cell>
          <table:table-cell table:formula="of:=[.D146]-[.D14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86" office:value-type="float" office:value="12470" calcext:value-type="float">
            <text:p>12470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144328703703704" calcext:value-type="float">
            <text:p>0,00144328703703704000</text:p>
          </table:table-cell>
          <table:table-cell table:formula="of:=[.D147]-[.D14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86" office:value-type="float" office:value="12556" calcext:value-type="float">
            <text:p>12556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145324074074074" calcext:value-type="float">
            <text:p>0,00145324074074074000</text:p>
          </table:table-cell>
          <table:table-cell table:formula="of:=[.D148]-[.D14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86" office:value-type="float" office:value="12642" calcext:value-type="float">
            <text:p>12642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146319444444444" calcext:value-type="float">
            <text:p>0,00146319444444444000</text:p>
          </table:table-cell>
          <table:table-cell table:formula="of:=[.D149]-[.D14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86" office:value-type="float" office:value="12728" calcext:value-type="float">
            <text:p>12728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147314814814815" calcext:value-type="float">
            <text:p>0,00147314814814815000</text:p>
          </table:table-cell>
          <table:table-cell table:formula="of:=[.D150]-[.D14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86" office:value-type="float" office:value="12814" calcext:value-type="float">
            <text:p>12814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148310185185185" calcext:value-type="float">
            <text:p>0,00148310185185185000</text:p>
          </table:table-cell>
          <table:table-cell table:formula="of:=[.D151]-[.D15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86" office:value-type="float" office:value="12900" calcext:value-type="float">
            <text:p>1290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149305555555556" calcext:value-type="float">
            <text:p>0,00149305555555556000</text:p>
          </table:table-cell>
          <table:table-cell table:formula="of:=[.D152]-[.D15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86" office:value-type="float" office:value="12986" calcext:value-type="float">
            <text:p>12986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150300925925926" calcext:value-type="float">
            <text:p>0,00150300925925926000</text:p>
          </table:table-cell>
          <table:table-cell table:formula="of:=[.D153]-[.D15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86" office:value-type="float" office:value="13072" calcext:value-type="float">
            <text:p>13072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51296296296296" calcext:value-type="float">
            <text:p>0,00151296296296296000</text:p>
          </table:table-cell>
          <table:table-cell table:formula="of:=[.D154]-[.D15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86" office:value-type="float" office:value="13158" calcext:value-type="float">
            <text:p>13158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52291666666667" calcext:value-type="float">
            <text:p>0,00152291666666667000</text:p>
          </table:table-cell>
          <table:table-cell table:formula="of:=[.D155]-[.D15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86" office:value-type="float" office:value="13244" calcext:value-type="float">
            <text:p>13244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53287037037037" calcext:value-type="float">
            <text:p>0,00153287037037037000</text:p>
          </table:table-cell>
          <table:table-cell table:formula="of:=[.D156]-[.D15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86" office:value-type="float" office:value="13330" calcext:value-type="float">
            <text:p>13330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54282407407407" calcext:value-type="float">
            <text:p>0,00154282407407407000</text:p>
          </table:table-cell>
          <table:table-cell table:formula="of:=[.D157]-[.D15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86" office:value-type="float" office:value="13416" calcext:value-type="float">
            <text:p>13416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55277777777778" calcext:value-type="float">
            <text:p>0,00155277777777778000</text:p>
          </table:table-cell>
          <table:table-cell table:formula="of:=[.D158]-[.D15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86" office:value-type="float" office:value="13502" calcext:value-type="float">
            <text:p>13502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56273148148148" calcext:value-type="float">
            <text:p>0,00156273148148148000</text:p>
          </table:table-cell>
          <table:table-cell table:formula="of:=[.D159]-[.D15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86" office:value-type="float" office:value="13588" calcext:value-type="float">
            <text:p>13588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57268518518519" calcext:value-type="float">
            <text:p>0,00157268518518519000</text:p>
          </table:table-cell>
          <table:table-cell table:formula="of:=[.D160]-[.D15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86" office:value-type="float" office:value="13674" calcext:value-type="float">
            <text:p>13674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58263888888889" calcext:value-type="float">
            <text:p>0,00158263888888889000</text:p>
          </table:table-cell>
          <table:table-cell table:formula="of:=[.D161]-[.D16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86" office:value-type="float" office:value="13760" calcext:value-type="float">
            <text:p>1376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59259259259259" calcext:value-type="float">
            <text:p>0,00159259259259259000</text:p>
          </table:table-cell>
          <table:table-cell table:formula="of:=[.D162]-[.D16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86" office:value-type="float" office:value="13846" calcext:value-type="float">
            <text:p>13846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6025462962963" calcext:value-type="float">
            <text:p>0,00160254629629630000</text:p>
          </table:table-cell>
          <table:table-cell table:formula="of:=[.D163]-[.D16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86" office:value-type="float" office:value="13932" calcext:value-type="float">
            <text:p>13932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6125" calcext:value-type="float">
            <text:p>0,00161250000000000000</text:p>
          </table:table-cell>
          <table:table-cell table:formula="of:=[.D164]-[.D16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86" office:value-type="float" office:value="14018" calcext:value-type="float">
            <text:p>14018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6224537037037" calcext:value-type="float">
            <text:p>0,00162245370370370000</text:p>
          </table:table-cell>
          <table:table-cell table:formula="of:=[.D165]-[.D16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86" office:value-type="float" office:value="14104" calcext:value-type="float">
            <text:p>14104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63240740740741" calcext:value-type="float">
            <text:p>0,00163240740740741000</text:p>
          </table:table-cell>
          <table:table-cell table:formula="of:=[.D166]-[.D16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86" office:value-type="float" office:value="14190" calcext:value-type="float">
            <text:p>14190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64236111111111" calcext:value-type="float">
            <text:p>0,00164236111111111000</text:p>
          </table:table-cell>
          <table:table-cell table:formula="of:=[.D167]-[.D16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86" office:value-type="float" office:value="14276" calcext:value-type="float">
            <text:p>14276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65231481481481" calcext:value-type="float">
            <text:p>0,00165231481481481000</text:p>
          </table:table-cell>
          <table:table-cell table:formula="of:=[.D168]-[.D16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86" office:value-type="float" office:value="14362" calcext:value-type="float">
            <text:p>14362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66226851851852" calcext:value-type="float">
            <text:p>0,00166226851851852000</text:p>
          </table:table-cell>
          <table:table-cell table:formula="of:=[.D169]-[.D16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86" office:value-type="float" office:value="14448" calcext:value-type="float">
            <text:p>14448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67222222222222" calcext:value-type="float">
            <text:p>0,00167222222222222000</text:p>
          </table:table-cell>
          <table:table-cell table:formula="of:=[.D170]-[.D16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86" office:value-type="float" office:value="14534" calcext:value-type="float">
            <text:p>14534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68217592592593" calcext:value-type="float">
            <text:p>0,00168217592592593000</text:p>
          </table:table-cell>
          <table:table-cell table:formula="of:=[.D171]-[.D17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86" office:value-type="float" office:value="14620" calcext:value-type="float">
            <text:p>1462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69212962962963" calcext:value-type="float">
            <text:p>0,00169212962962963000</text:p>
          </table:table-cell>
          <table:table-cell table:formula="of:=[.D172]-[.D17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86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70208333333333" calcext:value-type="float">
            <text:p>0,00170208333333333000</text:p>
          </table:table-cell>
          <table:table-cell table:formula="of:=[.D173]-[.D17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86" office:value-type="float" office:value="14792" calcext:value-type="float">
            <text:p>14792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71203703703704" calcext:value-type="float">
            <text:p>0,00171203703703704000</text:p>
          </table:table-cell>
          <table:table-cell table:formula="of:=[.D174]-[.D17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86" office:value-type="float" office:value="14878" calcext:value-type="float">
            <text:p>14878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72199074074074" calcext:value-type="float">
            <text:p>0,00172199074074074000</text:p>
          </table:table-cell>
          <table:table-cell table:formula="of:=[.D175]-[.D17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86" office:value-type="float" office:value="14964" calcext:value-type="float">
            <text:p>14964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73194444444444" calcext:value-type="float">
            <text:p>0,00173194444444444000</text:p>
          </table:table-cell>
          <table:table-cell table:formula="of:=[.D176]-[.D17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86" office:value-type="float" office:value="15050" calcext:value-type="float">
            <text:p>15050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74189814814815" calcext:value-type="float">
            <text:p>0,00174189814814815000</text:p>
          </table:table-cell>
          <table:table-cell table:formula="of:=[.D177]-[.D17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86" office:value-type="float" office:value="15136" calcext:value-type="float">
            <text:p>15136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75185185185185" calcext:value-type="float">
            <text:p>0,00175185185185185000</text:p>
          </table:table-cell>
          <table:table-cell table:formula="of:=[.D178]-[.D17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86" office:value-type="float" office:value="15222" calcext:value-type="float">
            <text:p>15222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76180555555556" calcext:value-type="float">
            <text:p>0,00176180555555556000</text:p>
          </table:table-cell>
          <table:table-cell table:formula="of:=[.D179]-[.D17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86" office:value-type="float" office:value="15308" calcext:value-type="float">
            <text:p>15308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77175925925926" calcext:value-type="float">
            <text:p>0,00177175925925926000</text:p>
          </table:table-cell>
          <table:table-cell table:formula="of:=[.D180]-[.D17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86" office:value-type="float" office:value="15394" calcext:value-type="float">
            <text:p>15394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78171296296296" calcext:value-type="float">
            <text:p>0,00178171296296296000</text:p>
          </table:table-cell>
          <table:table-cell table:formula="of:=[.D181]-[.D180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86" office:value-type="float" office:value="15480" calcext:value-type="float">
            <text:p>1548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79166666666667" calcext:value-type="float">
            <text:p>0,00179166666666667000</text:p>
          </table:table-cell>
          <table:table-cell table:formula="of:=[.D182]-[.D18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86" office:value-type="float" office:value="15566" calcext:value-type="float">
            <text:p>15566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80162037037037" calcext:value-type="float">
            <text:p>0,00180162037037037000</text:p>
          </table:table-cell>
          <table:table-cell table:formula="of:=[.D183]-[.D18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86" office:value-type="float" office:value="15652" calcext:value-type="float">
            <text:p>15652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81157407407407" calcext:value-type="float">
            <text:p>0,00181157407407407000</text:p>
          </table:table-cell>
          <table:table-cell table:formula="of:=[.D184]-[.D183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86" office:value-type="float" office:value="15738" calcext:value-type="float">
            <text:p>15738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82152777777778" calcext:value-type="float">
            <text:p>0,00182152777777778000</text:p>
          </table:table-cell>
          <table:table-cell table:formula="of:=[.D185]-[.D18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86" office:value-type="float" office:value="15824" calcext:value-type="float">
            <text:p>15824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83148148148148" calcext:value-type="float">
            <text:p>0,00183148148148148000</text:p>
          </table:table-cell>
          <table:table-cell table:formula="of:=[.D186]-[.D18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86" office:value-type="float" office:value="15910" calcext:value-type="float">
            <text:p>15910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84143518518519" calcext:value-type="float">
            <text:p>0,00184143518518518000</text:p>
          </table:table-cell>
          <table:table-cell table:formula="of:=[.D187]-[.D18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86" office:value-type="float" office:value="15996" calcext:value-type="float">
            <text:p>15996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85138888888889" calcext:value-type="float">
            <text:p>0,00185138888888889000</text:p>
          </table:table-cell>
          <table:table-cell table:formula="of:=[.D188]-[.D187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86" office:value-type="float" office:value="16082" calcext:value-type="float">
            <text:p>16082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86134259259259" calcext:value-type="float">
            <text:p>0,00186134259259259000</text:p>
          </table:table-cell>
          <table:table-cell table:formula="of:=[.D189]-[.D188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86" office:value-type="float" office:value="16168" calcext:value-type="float">
            <text:p>16168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8712962962963" calcext:value-type="float">
            <text:p>0,00187129629629630000</text:p>
          </table:table-cell>
          <table:table-cell table:formula="of:=[.D190]-[.D189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86" office:value-type="float" office:value="16254" calcext:value-type="float">
            <text:p>16254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88125" calcext:value-type="float">
            <text:p>0,00188125000000000000</text:p>
          </table:table-cell>
          <table:table-cell table:formula="of:=[.D191]-[.D19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86" office:value-type="float" office:value="16340" calcext:value-type="float">
            <text:p>1634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8912037037037" calcext:value-type="float">
            <text:p>0,00189120370370370000</text:p>
          </table:table-cell>
          <table:table-cell table:formula="of:=[.D192]-[.D191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86" office:value-type="float" office:value="16426" calcext:value-type="float">
            <text:p>16426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90115740740741" calcext:value-type="float">
            <text:p>0,00190115740740741000</text:p>
          </table:table-cell>
          <table:table-cell table:formula="of:=[.D193]-[.D192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86" office:value-type="float" office:value="16512" calcext:value-type="float">
            <text:p>16512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91111111111111" calcext:value-type="float">
            <text:p>0,00191111111111111000</text:p>
          </table:table-cell>
          <table:table-cell table:formula="of:=[.D194]-[.D19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86" office:value-type="float" office:value="16598" calcext:value-type="float">
            <text:p>16598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92106481481482" calcext:value-type="float">
            <text:p>0,00192106481481482000</text:p>
          </table:table-cell>
          <table:table-cell table:formula="of:=[.D195]-[.D194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86" office:value-type="float" office:value="16684" calcext:value-type="float">
            <text:p>16684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93101851851852" calcext:value-type="float">
            <text:p>0,00193101851851852000</text:p>
          </table:table-cell>
          <table:table-cell table:formula="of:=[.D196]-[.D195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86" office:value-type="float" office:value="16770" calcext:value-type="float">
            <text:p>16770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94097222222222" calcext:value-type="float">
            <text:p>0,00194097222222222000</text:p>
          </table:table-cell>
          <table:table-cell table:formula="of:=[.D197]-[.D196]" office:value-type="float" office:value="0.00000995370370370364" calcext:value-type="float">
            <text:p>0,00000995370370370364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86" office:value-type="float" office:value="16856" calcext:value-type="float">
            <text:p>16856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95092592592593" calcext:value-type="float">
            <text:p>0,00195092592592593000</text:p>
          </table:table-cell>
          <table:table-cell table:formula="of:=[.D198]-[.D19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86" office:value-type="float" office:value="16942" calcext:value-type="float">
            <text:p>16942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96087962962963" calcext:value-type="float">
            <text:p>0,00196087962962963000</text:p>
          </table:table-cell>
          <table:table-cell table:formula="of:=[.D199]-[.D198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86" office:value-type="float" office:value="17028" calcext:value-type="float">
            <text:p>17028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97083333333333" calcext:value-type="float">
            <text:p>0,00197083333333333000</text:p>
          </table:table-cell>
          <table:table-cell table:formula="of:=[.D200]-[.D19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86" office:value-type="float" office:value="17114" calcext:value-type="float">
            <text:p>17114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98078703703704" calcext:value-type="float">
            <text:p>0,00198078703703704000</text:p>
          </table:table-cell>
          <table:table-cell table:formula="of:=[.D201]-[.D20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86" office:value-type="float" office:value="17200" calcext:value-type="float">
            <text:p>172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99074074074074" calcext:value-type="float">
            <text:p>0,00199074074074074000</text:p>
          </table:table-cell>
          <table:table-cell table:formula="of:=[.D202]-[.D201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86" office:value-type="float" office:value="17286" calcext:value-type="float">
            <text:p>17286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200069444444444" calcext:value-type="float">
            <text:p>0,00200069444444444000</text:p>
          </table:table-cell>
          <table:table-cell table:formula="of:=[.D203]-[.D20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86" office:value-type="float" office:value="17372" calcext:value-type="float">
            <text:p>17372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201064814814815" calcext:value-type="float">
            <text:p>0,00201064814814815000</text:p>
          </table:table-cell>
          <table:table-cell table:formula="of:=[.D204]-[.D20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86" office:value-type="float" office:value="17458" calcext:value-type="float">
            <text:p>17458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202060185185185" calcext:value-type="float">
            <text:p>0,00202060185185185000</text:p>
          </table:table-cell>
          <table:table-cell table:formula="of:=[.D205]-[.D204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86" office:value-type="float" office:value="17544" calcext:value-type="float">
            <text:p>17544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203055555555556" calcext:value-type="float">
            <text:p>0,00203055555555556000</text:p>
          </table:table-cell>
          <table:table-cell table:formula="of:=[.D206]-[.D20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86" office:value-type="float" office:value="17630" calcext:value-type="float">
            <text:p>17630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204050925925926" calcext:value-type="float">
            <text:p>0,00204050925925926000</text:p>
          </table:table-cell>
          <table:table-cell table:formula="of:=[.D207]-[.D20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86" office:value-type="float" office:value="17716" calcext:value-type="float">
            <text:p>17716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205046296296296" calcext:value-type="float">
            <text:p>0,00205046296296296000</text:p>
          </table:table-cell>
          <table:table-cell table:formula="of:=[.D208]-[.D207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86" office:value-type="float" office:value="17802" calcext:value-type="float">
            <text:p>17802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206041666666667" calcext:value-type="float">
            <text:p>0,00206041666666667000</text:p>
          </table:table-cell>
          <table:table-cell table:formula="of:=[.D209]-[.D20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86" office:value-type="float" office:value="17888" calcext:value-type="float">
            <text:p>17888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207037037037037" calcext:value-type="float">
            <text:p>0,00207037037037037000</text:p>
          </table:table-cell>
          <table:table-cell table:formula="of:=[.D210]-[.D20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86" office:value-type="float" office:value="17974" calcext:value-type="float">
            <text:p>17974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208032407407407" calcext:value-type="float">
            <text:p>0,00208032407407407000</text:p>
          </table:table-cell>
          <table:table-cell table:formula="of:=[.D211]-[.D210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86" office:value-type="float" office:value="18060" calcext:value-type="float">
            <text:p>1806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209027777777778" calcext:value-type="float">
            <text:p>0,00209027777777778000</text:p>
          </table:table-cell>
          <table:table-cell table:formula="of:=[.D212]-[.D21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86" office:value-type="float" office:value="18146" calcext:value-type="float">
            <text:p>18146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210023148148148" calcext:value-type="float">
            <text:p>0,00210023148148148000</text:p>
          </table:table-cell>
          <table:table-cell table:formula="of:=[.D213]-[.D212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86" office:value-type="float" office:value="18232" calcext:value-type="float">
            <text:p>18232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211018518518519" calcext:value-type="float">
            <text:p>0,00211018518518519000</text:p>
          </table:table-cell>
          <table:table-cell table:formula="of:=[.D214]-[.D21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86" office:value-type="float" office:value="18318" calcext:value-type="float">
            <text:p>18318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212013888888889" calcext:value-type="float">
            <text:p>0,00212013888888889000</text:p>
          </table:table-cell>
          <table:table-cell table:formula="of:=[.D215]-[.D21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86" office:value-type="float" office:value="18404" calcext:value-type="float">
            <text:p>18404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213009259259259" calcext:value-type="float">
            <text:p>0,00213009259259259000</text:p>
          </table:table-cell>
          <table:table-cell table:formula="of:=[.D216]-[.D215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86" office:value-type="float" office:value="18490" calcext:value-type="float">
            <text:p>18490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21400462962963" calcext:value-type="float">
            <text:p>0,00214004629629630000</text:p>
          </table:table-cell>
          <table:table-cell table:formula="of:=[.D217]-[.D21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86" office:value-type="float" office:value="18576" calcext:value-type="float">
            <text:p>18576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215" calcext:value-type="float">
            <text:p>0,00215000000000000000</text:p>
          </table:table-cell>
          <table:table-cell table:formula="of:=[.D218]-[.D21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86" office:value-type="float" office:value="18662" calcext:value-type="float">
            <text:p>18662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21599537037037" calcext:value-type="float">
            <text:p>0,00215995370370370000</text:p>
          </table:table-cell>
          <table:table-cell table:formula="of:=[.D219]-[.D218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86" office:value-type="float" office:value="18748" calcext:value-type="float">
            <text:p>18748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216990740740741" calcext:value-type="float">
            <text:p>0,00216990740740741000</text:p>
          </table:table-cell>
          <table:table-cell table:formula="of:=[.D220]-[.D21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86" office:value-type="float" office:value="18834" calcext:value-type="float">
            <text:p>18834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217986111111111" calcext:value-type="float">
            <text:p>0,00217986111111111000</text:p>
          </table:table-cell>
          <table:table-cell table:formula="of:=[.D221]-[.D22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86" office:value-type="float" office:value="18920" calcext:value-type="float">
            <text:p>1892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218981481481482" calcext:value-type="float">
            <text:p>0,00218981481481482000</text:p>
          </table:table-cell>
          <table:table-cell table:formula="of:=[.D222]-[.D221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86" office:value-type="float" office:value="19006" calcext:value-type="float">
            <text:p>19006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219976851851852" calcext:value-type="float">
            <text:p>0,00219976851851852000</text:p>
          </table:table-cell>
          <table:table-cell table:formula="of:=[.D223]-[.D22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86" office:value-type="float" office:value="19092" calcext:value-type="float">
            <text:p>19092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220972222222222" calcext:value-type="float">
            <text:p>0,00220972222222222000</text:p>
          </table:table-cell>
          <table:table-cell table:formula="of:=[.D224]-[.D223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86" office:value-type="float" office:value="19178" calcext:value-type="float">
            <text:p>19178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221967592592593" calcext:value-type="float">
            <text:p>0,00221967592592593000</text:p>
          </table:table-cell>
          <table:table-cell table:formula="of:=[.D225]-[.D22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86" office:value-type="float" office:value="19264" calcext:value-type="float">
            <text:p>19264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222962962962963" calcext:value-type="float">
            <text:p>0,00222962962962963000</text:p>
          </table:table-cell>
          <table:table-cell table:formula="of:=[.D226]-[.D22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86" office:value-type="float" office:value="19350" calcext:value-type="float">
            <text:p>19350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223958333333333" calcext:value-type="float">
            <text:p>0,00223958333333333000</text:p>
          </table:table-cell>
          <table:table-cell table:formula="of:=[.D227]-[.D226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86" office:value-type="float" office:value="19436" calcext:value-type="float">
            <text:p>19436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224953703703704" calcext:value-type="float">
            <text:p>0,00224953703703704000</text:p>
          </table:table-cell>
          <table:table-cell table:formula="of:=[.D228]-[.D22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86" office:value-type="float" office:value="19522" calcext:value-type="float">
            <text:p>19522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225949074074074" calcext:value-type="float">
            <text:p>0,00225949074074074000</text:p>
          </table:table-cell>
          <table:table-cell table:formula="of:=[.D229]-[.D22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86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226944444444444" calcext:value-type="float">
            <text:p>0,00226944444444444000</text:p>
          </table:table-cell>
          <table:table-cell table:formula="of:=[.D230]-[.D229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86" office:value-type="float" office:value="19694" calcext:value-type="float">
            <text:p>19694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227939814814815" calcext:value-type="float">
            <text:p>0,00227939814814815000</text:p>
          </table:table-cell>
          <table:table-cell table:formula="of:=[.D231]-[.D23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86" office:value-type="float" office:value="19780" calcext:value-type="float">
            <text:p>1978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228935185185185" calcext:value-type="float">
            <text:p>0,00228935185185185000</text:p>
          </table:table-cell>
          <table:table-cell table:formula="of:=[.D232]-[.D23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86" office:value-type="float" office:value="19866" calcext:value-type="float">
            <text:p>19866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229930555555556" calcext:value-type="float">
            <text:p>0,00229930555555556000</text:p>
          </table:table-cell>
          <table:table-cell table:formula="of:=[.D233]-[.D232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86" office:value-type="float" office:value="19952" calcext:value-type="float">
            <text:p>19952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230925925925926" calcext:value-type="float">
            <text:p>0,00230925925925926000</text:p>
          </table:table-cell>
          <table:table-cell table:formula="of:=[.D234]-[.D23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86" office:value-type="float" office:value="20038" calcext:value-type="float">
            <text:p>20038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231921296296296" calcext:value-type="float">
            <text:p>0,00231921296296296000</text:p>
          </table:table-cell>
          <table:table-cell table:formula="of:=[.D235]-[.D234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86" office:value-type="float" office:value="20124" calcext:value-type="float">
            <text:p>20124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232916666666667" calcext:value-type="float">
            <text:p>0,00232916666666667000</text:p>
          </table:table-cell>
          <table:table-cell table:formula="of:=[.D236]-[.D23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86" office:value-type="float" office:value="20210" calcext:value-type="float">
            <text:p>20210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233912037037037" calcext:value-type="float">
            <text:p>0,00233912037037037000</text:p>
          </table:table-cell>
          <table:table-cell table:formula="of:=[.D237]-[.D23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86" office:value-type="float" office:value="20296" calcext:value-type="float">
            <text:p>20296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234907407407407" calcext:value-type="float">
            <text:p>0,00234907407407407000</text:p>
          </table:table-cell>
          <table:table-cell table:formula="of:=[.D238]-[.D237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86" office:value-type="float" office:value="20382" calcext:value-type="float">
            <text:p>20382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235902777777778" calcext:value-type="float">
            <text:p>0,00235902777777778000</text:p>
          </table:table-cell>
          <table:table-cell table:formula="of:=[.D239]-[.D23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86" office:value-type="float" office:value="20468" calcext:value-type="float">
            <text:p>20468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236898148148148" calcext:value-type="float">
            <text:p>0,00236898148148148000</text:p>
          </table:table-cell>
          <table:table-cell table:formula="of:=[.D240]-[.D23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86" office:value-type="float" office:value="20554" calcext:value-type="float">
            <text:p>20554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237893518518519" calcext:value-type="float">
            <text:p>0,00237893518518519000</text:p>
          </table:table-cell>
          <table:table-cell table:formula="of:=[.D241]-[.D240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86" office:value-type="float" office:value="20640" calcext:value-type="float">
            <text:p>2064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238888888888889" calcext:value-type="float">
            <text:p>0,00238888888888889000</text:p>
          </table:table-cell>
          <table:table-cell table:formula="of:=[.D242]-[.D24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86" office:value-type="float" office:value="20726" calcext:value-type="float">
            <text:p>20726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239884259259259" calcext:value-type="float">
            <text:p>0,00239884259259259000</text:p>
          </table:table-cell>
          <table:table-cell table:formula="of:=[.D243]-[.D24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86" office:value-type="float" office:value="20812" calcext:value-type="float">
            <text:p>20812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24087962962963" calcext:value-type="float">
            <text:p>0,00240879629629630000</text:p>
          </table:table-cell>
          <table:table-cell table:formula="of:=[.D244]-[.D243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86" office:value-type="float" office:value="20898" calcext:value-type="float">
            <text:p>20898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241875" calcext:value-type="float">
            <text:p>0,00241875000000000000</text:p>
          </table:table-cell>
          <table:table-cell table:formula="of:=[.D245]-[.D24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86" office:value-type="float" office:value="20984" calcext:value-type="float">
            <text:p>20984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24287037037037" calcext:value-type="float">
            <text:p>0,00242870370370370000</text:p>
          </table:table-cell>
          <table:table-cell table:formula="of:=[.D246]-[.D24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86" office:value-type="float" office:value="21070" calcext:value-type="float">
            <text:p>21070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243865740740741" calcext:value-type="float">
            <text:p>0,00243865740740741000</text:p>
          </table:table-cell>
          <table:table-cell table:formula="of:=[.D247]-[.D246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86" office:value-type="float" office:value="21156" calcext:value-type="float">
            <text:p>21156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244861111111111" calcext:value-type="float">
            <text:p>0,00244861111111111000</text:p>
          </table:table-cell>
          <table:table-cell table:formula="of:=[.D248]-[.D24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86" office:value-type="float" office:value="21242" calcext:value-type="float">
            <text:p>21242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245856481481482" calcext:value-type="float">
            <text:p>0,00245856481481482000</text:p>
          </table:table-cell>
          <table:table-cell table:formula="of:=[.D249]-[.D248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86" office:value-type="float" office:value="21328" calcext:value-type="float">
            <text:p>21328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246851851851852" calcext:value-type="float">
            <text:p>0,00246851851851852000</text:p>
          </table:table-cell>
          <table:table-cell table:formula="of:=[.D250]-[.D24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86" office:value-type="float" office:value="21414" calcext:value-type="float">
            <text:p>21414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247847222222222" calcext:value-type="float">
            <text:p>0,00247847222222222000</text:p>
          </table:table-cell>
          <table:table-cell table:formula="of:=[.D251]-[.D25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86" office:value-type="float" office:value="21500" calcext:value-type="float">
            <text:p>2150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248842592592593" calcext:value-type="float">
            <text:p>0,00248842592592593000</text:p>
          </table:table-cell>
          <table:table-cell table:formula="of:=[.D252]-[.D251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86" office:value-type="float" office:value="21586" calcext:value-type="float">
            <text:p>21586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249837962962963" calcext:value-type="float">
            <text:p>0,00249837962962963000</text:p>
          </table:table-cell>
          <table:table-cell table:formula="of:=[.D253]-[.D25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86" office:value-type="float" office:value="21672" calcext:value-type="float">
            <text:p>21672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250833333333333" calcext:value-type="float">
            <text:p>0,00250833333333333000</text:p>
          </table:table-cell>
          <table:table-cell table:formula="of:=[.D254]-[.D25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86" office:value-type="float" office:value="21758" calcext:value-type="float">
            <text:p>21758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251828703703704" calcext:value-type="float">
            <text:p>0,00251828703703704000</text:p>
          </table:table-cell>
          <table:table-cell table:formula="of:=[.D255]-[.D254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86" office:value-type="float" office:value="21844" calcext:value-type="float">
            <text:p>21844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252824074074074" calcext:value-type="float">
            <text:p>0,00252824074074074000</text:p>
          </table:table-cell>
          <table:table-cell table:formula="of:=[.D256]-[.D25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86" office:value-type="float" office:value="21930" calcext:value-type="float">
            <text:p>21930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253819444444444" calcext:value-type="float">
            <text:p>0,00253819444444444000</text:p>
          </table:table-cell>
          <table:table-cell table:formula="of:=[.D257]-[.D25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86" office:value-type="float" office:value="22016" calcext:value-type="float">
            <text:p>22016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254814814814815" calcext:value-type="float">
            <text:p>0,00254814814814815000</text:p>
          </table:table-cell>
          <table:table-cell table:formula="of:=[.D258]-[.D257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86" office:value-type="float" office:value="22102" calcext:value-type="float">
            <text:p>22102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255810185185185" calcext:value-type="float">
            <text:p>0,00255810185185185000</text:p>
          </table:table-cell>
          <table:table-cell table:formula="of:=[.D259]-[.D25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86" office:value-type="float" office:value="22188" calcext:value-type="float">
            <text:p>22188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256805555555556" calcext:value-type="float">
            <text:p>0,00256805555555556000</text:p>
          </table:table-cell>
          <table:table-cell table:formula="of:=[.D260]-[.D259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86" office:value-type="float" office:value="22274" calcext:value-type="float">
            <text:p>22274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257800925925926" calcext:value-type="float">
            <text:p>0,00257800925925926000</text:p>
          </table:table-cell>
          <table:table-cell table:formula="of:=[.D261]-[.D260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86" office:value-type="float" office:value="22360" calcext:value-type="float">
            <text:p>2236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258796296296296" calcext:value-type="float">
            <text:p>0,00258796296296296000</text:p>
          </table:table-cell>
          <table:table-cell table:formula="of:=[.D262]-[.D26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86" office:value-type="float" office:value="22446" calcext:value-type="float">
            <text:p>22446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259791666666667" calcext:value-type="float">
            <text:p>0,00259791666666667000</text:p>
          </table:table-cell>
          <table:table-cell table:formula="of:=[.D263]-[.D262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86" office:value-type="float" office:value="22532" calcext:value-type="float">
            <text:p>22532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260787037037037" calcext:value-type="float">
            <text:p>0,00260787037037037000</text:p>
          </table:table-cell>
          <table:table-cell table:formula="of:=[.D264]-[.D263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86" office:value-type="float" office:value="22618" calcext:value-type="float">
            <text:p>22618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261782407407407" calcext:value-type="float">
            <text:p>0,00261782407407407000</text:p>
          </table:table-cell>
          <table:table-cell table:formula="of:=[.D265]-[.D26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86" office:value-type="float" office:value="22704" calcext:value-type="float">
            <text:p>22704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262777777777778" calcext:value-type="float">
            <text:p>0,00262777777777778000</text:p>
          </table:table-cell>
          <table:table-cell table:formula="of:=[.D266]-[.D265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86" office:value-type="float" office:value="22790" calcext:value-type="float">
            <text:p>22790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263773148148148" calcext:value-type="float">
            <text:p>0,00263773148148148000</text:p>
          </table:table-cell>
          <table:table-cell table:formula="of:=[.D267]-[.D266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86" office:value-type="float" office:value="22876" calcext:value-type="float">
            <text:p>22876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264768518518519" calcext:value-type="float">
            <text:p>0,00264768518518519000</text:p>
          </table:table-cell>
          <table:table-cell table:formula="of:=[.D268]-[.D26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86" office:value-type="float" office:value="22962" calcext:value-type="float">
            <text:p>22962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265763888888889" calcext:value-type="float">
            <text:p>0,00265763888888889000</text:p>
          </table:table-cell>
          <table:table-cell table:formula="of:=[.D269]-[.D268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86" office:value-type="float" office:value="23048" calcext:value-type="float">
            <text:p>23048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266759259259259" calcext:value-type="float">
            <text:p>0,00266759259259259000</text:p>
          </table:table-cell>
          <table:table-cell table:formula="of:=[.D270]-[.D269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86" office:value-type="float" office:value="23134" calcext:value-type="float">
            <text:p>23134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26775462962963" calcext:value-type="float">
            <text:p>0,00267754629629630000</text:p>
          </table:table-cell>
          <table:table-cell table:formula="of:=[.D271]-[.D270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86" office:value-type="float" office:value="23220" calcext:value-type="float">
            <text:p>2322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26875" calcext:value-type="float">
            <text:p>0,00268750000000000000</text:p>
          </table:table-cell>
          <table:table-cell table:formula="of:=[.D272]-[.D271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86" office:value-type="float" office:value="23306" calcext:value-type="float">
            <text:p>23306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26974537037037" calcext:value-type="float">
            <text:p>0,00269745370370370000</text:p>
          </table:table-cell>
          <table:table-cell table:formula="of:=[.D273]-[.D272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86" office:value-type="float" office:value="23392" calcext:value-type="float">
            <text:p>23392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270740740740741" calcext:value-type="float">
            <text:p>0,00270740740740741000</text:p>
          </table:table-cell>
          <table:table-cell table:formula="of:=[.D274]-[.D273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86" office:value-type="float" office:value="23478" calcext:value-type="float">
            <text:p>23478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271736111111111" calcext:value-type="float">
            <text:p>0,00271736111111111000</text:p>
          </table:table-cell>
          <table:table-cell table:formula="of:=[.D275]-[.D274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86" office:value-type="float" office:value="23564" calcext:value-type="float">
            <text:p>23564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272731481481482" calcext:value-type="float">
            <text:p>0,00272731481481482000</text:p>
          </table:table-cell>
          <table:table-cell table:formula="of:=[.D276]-[.D275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86" office:value-type="float" office:value="23650" calcext:value-type="float">
            <text:p>23650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273726851851852" calcext:value-type="float">
            <text:p>0,00273726851851852000</text:p>
          </table:table-cell>
          <table:table-cell table:formula="of:=[.D277]-[.D276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86" office:value-type="float" office:value="23736" calcext:value-type="float">
            <text:p>23736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274722222222222" calcext:value-type="float">
            <text:p>0,00274722222222222000</text:p>
          </table:table-cell>
          <table:table-cell table:formula="of:=[.D278]-[.D277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86" office:value-type="float" office:value="23822" calcext:value-type="float">
            <text:p>23822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275717592592593" calcext:value-type="float">
            <text:p>0,00275717592592593000</text:p>
          </table:table-cell>
          <table:table-cell table:formula="of:=[.D279]-[.D278]" office:value-type="float" office:value="0.00000995370370370386" calcext:value-type="float">
            <text:p>0,0000099537037037038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86" office:value-type="float" office:value="23908" calcext:value-type="float">
            <text:p>23908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276712962962963" calcext:value-type="float">
            <text:p>0,00276712962962963000</text:p>
          </table:table-cell>
          <table:table-cell table:formula="of:=[.D280]-[.D279]" office:value-type="float" office:value="0.00000995370370370343" calcext:value-type="float">
            <text:p>0,0000099537037037034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86" office:value-type="float" office:value="23994" calcext:value-type="float">
            <text:p>23994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277708333333333" calcext:value-type="float">
            <text:p>0,00277708333333333000</text:p>
          </table:table-cell>
          <table:table-cell table:formula="of:=#REF!-[.D280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104829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9:14:14.159759994</meta:creation-date>
    <dc:date>2026-05-17T19:14:24.246656730</dc:date>
    <meta:editing-duration>PT11S</meta:editing-duration>
    <meta:editing-cycles>1</meta:editing-cycles>
    <meta:document-statistic meta:table-count="1" meta:cell-count="1400" meta:object-count="0"/>
    <meta:generator>LibreOffice/24.2.7.2$Linux_X86_64 LibreOffice_project/420$Build-2</meta:generator>
  </office:meta>
</office:document-meta>
</file>