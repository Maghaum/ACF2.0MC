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10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5" office:value-type="string" calcext:value-type="string">
            <text:p>B / C</text:p>
          </table:table-cell>
          <table:table-cell table:style-name="ce5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104166666666667" calcext:value-type="float">
            <text:p>0,00000104166666666667</text:p>
          </table:table-cell>
          <table:table-cell table:formula="of:=[.D3]-[.D2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" office:value-type="float" office:value="18" calcext:value-type="float">
            <text:p>1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208333333333333" calcext:value-type="float">
            <text:p>0,00000208333333333333</text:p>
          </table:table-cell>
          <table:table-cell table:formula="of:=[.D4]-[.D3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" office:value-type="float" office:value="27" calcext:value-type="float">
            <text:p>27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3125" calcext:value-type="float">
            <text:p>0,00000312500000000000</text:p>
          </table:table-cell>
          <table:table-cell table:formula="of:=[.D5]-[.D4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" office:value-type="float" office:value="36" calcext:value-type="float">
            <text:p>3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416666666666667" calcext:value-type="float">
            <text:p>0,00000416666666666667</text:p>
          </table:table-cell>
          <table:table-cell table:formula="of:=[.D6]-[.D5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" office:value-type="float" office:value="45" calcext:value-type="float">
            <text:p>4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520833333333333" calcext:value-type="float">
            <text:p>0,00000520833333333333</text:p>
          </table:table-cell>
          <table:table-cell table:formula="of:=[.D7]-[.D6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" office:value-type="float" office:value="54" calcext:value-type="float">
            <text:p>5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0625" calcext:value-type="float">
            <text:p>0,00000625000000000000</text:p>
          </table:table-cell>
          <table:table-cell table:formula="of:=[.D8]-[.D7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" office:value-type="float" office:value="63" calcext:value-type="float">
            <text:p>63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0729166666666667" calcext:value-type="float">
            <text:p>0,00000729166666666667</text:p>
          </table:table-cell>
          <table:table-cell table:formula="of:=[.D9]-[.D8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" office:value-type="float" office:value="72" calcext:value-type="float">
            <text:p>7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0833333333333333" calcext:value-type="float">
            <text:p>0,00000833333333333333</text:p>
          </table:table-cell>
          <table:table-cell table:formula="of:=[.D10]-[.D9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" office:value-type="float" office:value="81" calcext:value-type="float">
            <text:p>81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09375" calcext:value-type="float">
            <text:p>0,00000937500000000000</text:p>
          </table:table-cell>
          <table:table-cell table:formula="of:=[.D11]-[.D10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" office:value-type="float" office:value="90" calcext:value-type="float">
            <text:p>9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104166666666667" calcext:value-type="float">
            <text:p>0,00001041666666666670</text:p>
          </table:table-cell>
          <table:table-cell table:formula="of:=[.D12]-[.D11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" office:value-type="float" office:value="99" calcext:value-type="float">
            <text:p>99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114583333333333" calcext:value-type="float">
            <text:p>0,00001145833333333330</text:p>
          </table:table-cell>
          <table:table-cell table:formula="of:=[.D13]-[.D12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" office:value-type="float" office:value="108" calcext:value-type="float">
            <text:p>10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125" calcext:value-type="float">
            <text:p>0,00001250000000000000</text:p>
          </table:table-cell>
          <table:table-cell table:formula="of:=[.D14]-[.D13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" office:value-type="float" office:value="117" calcext:value-type="float">
            <text:p>117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135416666666667" calcext:value-type="float">
            <text:p>0,00001354166666666670</text:p>
          </table:table-cell>
          <table:table-cell table:formula="of:=[.D15]-[.D14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" office:value-type="float" office:value="126" calcext:value-type="float">
            <text:p>12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145833333333333" calcext:value-type="float">
            <text:p>0,00001458333333333330</text:p>
          </table:table-cell>
          <table:table-cell table:formula="of:=[.D16]-[.D15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" office:value-type="float" office:value="135" calcext:value-type="float">
            <text:p>13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15625" calcext:value-type="float">
            <text:p>0,00001562500000000000</text:p>
          </table:table-cell>
          <table:table-cell table:formula="of:=[.D17]-[.D16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" office:value-type="float" office:value="144" calcext:value-type="float">
            <text:p>14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166666666666667" calcext:value-type="float">
            <text:p>0,00001666666666666670</text:p>
          </table:table-cell>
          <table:table-cell table:formula="of:=[.D18]-[.D17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" office:value-type="float" office:value="153" calcext:value-type="float">
            <text:p>153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177083333333333" calcext:value-type="float">
            <text:p>0,00001770833333333330</text:p>
          </table:table-cell>
          <table:table-cell table:formula="of:=[.D19]-[.D1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" office:value-type="float" office:value="162" calcext:value-type="float">
            <text:p>16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1875" calcext:value-type="float">
            <text:p>0,00001875000000000000</text:p>
          </table:table-cell>
          <table:table-cell table:formula="of:=[.D20]-[.D19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" office:value-type="float" office:value="171" calcext:value-type="float">
            <text:p>171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197916666666667" calcext:value-type="float">
            <text:p>0,00001979166666666670</text:p>
          </table:table-cell>
          <table:table-cell table:formula="of:=[.D21]-[.D20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208333333333333" calcext:value-type="float">
            <text:p>0,00002083333333333330</text:p>
          </table:table-cell>
          <table:table-cell table:formula="of:=[.D22]-[.D21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" office:value-type="float" office:value="189" calcext:value-type="float">
            <text:p>189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21875" calcext:value-type="float">
            <text:p>0,00002187500000000000</text:p>
          </table:table-cell>
          <table:table-cell table:formula="of:=[.D23]-[.D22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" office:value-type="float" office:value="198" calcext:value-type="float">
            <text:p>19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229166666666667" calcext:value-type="float">
            <text:p>0,00002291666666666670</text:p>
          </table:table-cell>
          <table:table-cell table:formula="of:=[.D24]-[.D23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" office:value-type="float" office:value="207" calcext:value-type="float">
            <text:p>207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239583333333333" calcext:value-type="float">
            <text:p>0,00002395833333333330</text:p>
          </table:table-cell>
          <table:table-cell table:formula="of:=[.D25]-[.D24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" office:value-type="float" office:value="216" calcext:value-type="float">
            <text:p>21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25" calcext:value-type="float">
            <text:p>0,00002500000000000000</text:p>
          </table:table-cell>
          <table:table-cell table:formula="of:=[.D26]-[.D25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" office:value-type="float" office:value="225" calcext:value-type="float">
            <text:p>2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260416666666667" calcext:value-type="float">
            <text:p>0,00002604166666666670</text:p>
          </table:table-cell>
          <table:table-cell table:formula="of:=[.D27]-[.D2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" office:value-type="float" office:value="234" calcext:value-type="float">
            <text:p>23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270833333333333" calcext:value-type="float">
            <text:p>0,00002708333333333330</text:p>
          </table:table-cell>
          <table:table-cell table:formula="of:=[.D28]-[.D27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" office:value-type="float" office:value="243" calcext:value-type="float">
            <text:p>243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28125" calcext:value-type="float">
            <text:p>0,00002812500000000000</text:p>
          </table:table-cell>
          <table:table-cell table:formula="of:=[.D29]-[.D28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291666666666667" calcext:value-type="float">
            <text:p>0,00002916666666666670</text:p>
          </table:table-cell>
          <table:table-cell table:formula="of:=[.D30]-[.D29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" office:value-type="float" office:value="261" calcext:value-type="float">
            <text:p>261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302083333333333" calcext:value-type="float">
            <text:p>0,00003020833333333330</text:p>
          </table:table-cell>
          <table:table-cell table:formula="of:=[.D31]-[.D30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" office:value-type="float" office:value="270" calcext:value-type="float">
            <text:p>27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3125" calcext:value-type="float">
            <text:p>0,00003125000000000000</text:p>
          </table:table-cell>
          <table:table-cell table:formula="of:=[.D32]-[.D31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" office:value-type="float" office:value="279" calcext:value-type="float">
            <text:p>279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322916666666667" calcext:value-type="float">
            <text:p>0,00003229166666666670</text:p>
          </table:table-cell>
          <table:table-cell table:formula="of:=[.D33]-[.D32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333333333333333" calcext:value-type="float">
            <text:p>0,00003333333333333330</text:p>
          </table:table-cell>
          <table:table-cell table:formula="of:=[.D34]-[.D33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" office:value-type="float" office:value="297" calcext:value-type="float">
            <text:p>297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34375" calcext:value-type="float">
            <text:p>0,00003437500000000000</text:p>
          </table:table-cell>
          <table:table-cell table:formula="of:=[.D35]-[.D34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" office:value-type="float" office:value="306" calcext:value-type="float">
            <text:p>30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354166666666667" calcext:value-type="float">
            <text:p>0,00003541666666666670</text:p>
          </table:table-cell>
          <table:table-cell table:formula="of:=[.D36]-[.D35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" office:value-type="float" office:value="315" calcext:value-type="float">
            <text:p>31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364583333333333" calcext:value-type="float">
            <text:p>0,00003645833333333330</text:p>
          </table:table-cell>
          <table:table-cell table:formula="of:=[.D37]-[.D3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" office:value-type="float" office:value="324" calcext:value-type="float">
            <text:p>32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375" calcext:value-type="float">
            <text:p>0,00003750000000000000</text:p>
          </table:table-cell>
          <table:table-cell table:formula="of:=[.D38]-[.D37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" office:value-type="float" office:value="333" calcext:value-type="float">
            <text:p>333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385416666666667" calcext:value-type="float">
            <text:p>0,00003854166666666670</text:p>
          </table:table-cell>
          <table:table-cell table:formula="of:=[.D39]-[.D38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" office:value-type="float" office:value="342" calcext:value-type="float">
            <text:p>34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395833333333333" calcext:value-type="float">
            <text:p>0,00003958333333333330</text:p>
          </table:table-cell>
          <table:table-cell table:formula="of:=[.D40]-[.D39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" office:value-type="float" office:value="351" calcext:value-type="float">
            <text:p>351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40625" calcext:value-type="float">
            <text:p>0,00004062500000000000</text:p>
          </table:table-cell>
          <table:table-cell table:formula="of:=[.D41]-[.D40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416666666666667" calcext:value-type="float">
            <text:p>0,00004166666666666670</text:p>
          </table:table-cell>
          <table:table-cell table:formula="of:=[.D42]-[.D41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" office:value-type="float" office:value="369" calcext:value-type="float">
            <text:p>369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427083333333333" calcext:value-type="float">
            <text:p>0,00004270833333333330</text:p>
          </table:table-cell>
          <table:table-cell table:formula="of:=[.D43]-[.D42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" office:value-type="float" office:value="378" calcext:value-type="float">
            <text:p>37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4375" calcext:value-type="float">
            <text:p>0,00004375000000000000</text:p>
          </table:table-cell>
          <table:table-cell table:formula="of:=[.D44]-[.D43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" office:value-type="float" office:value="387" calcext:value-type="float">
            <text:p>387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447916666666667" calcext:value-type="float">
            <text:p>0,00004479166666666670</text:p>
          </table:table-cell>
          <table:table-cell table:formula="of:=[.D45]-[.D44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" office:value-type="float" office:value="396" calcext:value-type="float">
            <text:p>39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458333333333333" calcext:value-type="float">
            <text:p>0,00004583333333333330</text:p>
          </table:table-cell>
          <table:table-cell table:formula="of:=[.D46]-[.D45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" office:value-type="float" office:value="405" calcext:value-type="float">
            <text:p>40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46875" calcext:value-type="float">
            <text:p>0,00004687500000000000</text:p>
          </table:table-cell>
          <table:table-cell table:formula="of:=[.D47]-[.D46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" office:value-type="float" office:value="414" calcext:value-type="float">
            <text:p>41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479166666666667" calcext:value-type="float">
            <text:p>0,00004791666666666670</text:p>
          </table:table-cell>
          <table:table-cell table:formula="of:=[.D48]-[.D47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" office:value-type="float" office:value="423" calcext:value-type="float">
            <text:p>423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489583333333333" calcext:value-type="float">
            <text:p>0,00004895833333333330</text:p>
          </table:table-cell>
          <table:table-cell table:formula="of:=[.D49]-[.D48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5" calcext:value-type="float">
            <text:p>0,00005000000000000000</text:p>
          </table:table-cell>
          <table:table-cell table:formula="of:=[.D50]-[.D49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" office:value-type="float" office:value="441" calcext:value-type="float">
            <text:p>441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510416666666667" calcext:value-type="float">
            <text:p>0,00005104166666666670</text:p>
          </table:table-cell>
          <table:table-cell table:formula="of:=[.D51]-[.D50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" office:value-type="float" office:value="450" calcext:value-type="float">
            <text:p>4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520833333333333" calcext:value-type="float">
            <text:p>0,00005208333333333330</text:p>
          </table:table-cell>
          <table:table-cell table:formula="of:=[.D52]-[.D5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" office:value-type="float" office:value="459" calcext:value-type="float">
            <text:p>459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053125" calcext:value-type="float">
            <text:p>0,00005312500000000000</text:p>
          </table:table-cell>
          <table:table-cell table:formula="of:=[.D53]-[.D52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" office:value-type="float" office:value="468" calcext:value-type="float">
            <text:p>46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0541666666666667" calcext:value-type="float">
            <text:p>0,00005416666666666670</text:p>
          </table:table-cell>
          <table:table-cell table:formula="of:=[.D54]-[.D53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" office:value-type="float" office:value="477" calcext:value-type="float">
            <text:p>477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0552083333333333" calcext:value-type="float">
            <text:p>0,00005520833333333330</text:p>
          </table:table-cell>
          <table:table-cell table:formula="of:=[.D55]-[.D54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" office:value-type="float" office:value="486" calcext:value-type="float">
            <text:p>48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05625" calcext:value-type="float">
            <text:p>0,00005625000000000000</text:p>
          </table:table-cell>
          <table:table-cell table:formula="of:=[.D56]-[.D55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" office:value-type="float" office:value="495" calcext:value-type="float">
            <text:p>49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0572916666666667" calcext:value-type="float">
            <text:p>0,00005729166666666670</text:p>
          </table:table-cell>
          <table:table-cell table:formula="of:=[.D57]-[.D56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0583333333333333" calcext:value-type="float">
            <text:p>0,00005833333333333330</text:p>
          </table:table-cell>
          <table:table-cell table:formula="of:=[.D58]-[.D57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" office:value-type="float" office:value="513" calcext:value-type="float">
            <text:p>513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059375" calcext:value-type="float">
            <text:p>0,00005937500000000000</text:p>
          </table:table-cell>
          <table:table-cell table:formula="of:=[.D59]-[.D58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" office:value-type="float" office:value="522" calcext:value-type="float">
            <text:p>52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0604166666666667" calcext:value-type="float">
            <text:p>0,00006041666666666670</text:p>
          </table:table-cell>
          <table:table-cell table:formula="of:=[.D60]-[.D5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" office:value-type="float" office:value="531" calcext:value-type="float">
            <text:p>531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0614583333333333" calcext:value-type="float">
            <text:p>0,00006145833333333330</text:p>
          </table:table-cell>
          <table:table-cell table:formula="of:=[.D61]-[.D60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0625" calcext:value-type="float">
            <text:p>0,00006250000000000000</text:p>
          </table:table-cell>
          <table:table-cell table:formula="of:=[.D62]-[.D6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" office:value-type="float" office:value="549" calcext:value-type="float">
            <text:p>549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0635416666666667" calcext:value-type="float">
            <text:p>0,00006354166666666670</text:p>
          </table:table-cell>
          <table:table-cell table:formula="of:=[.D63]-[.D62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" office:value-type="float" office:value="558" calcext:value-type="float">
            <text:p>55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0645833333333333" calcext:value-type="float">
            <text:p>0,00006458333333333330</text:p>
          </table:table-cell>
          <table:table-cell table:formula="of:=[.D64]-[.D6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" office:value-type="float" office:value="567" calcext:value-type="float">
            <text:p>567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065625" calcext:value-type="float">
            <text:p>0,00006562500000000000</text:p>
          </table:table-cell>
          <table:table-cell table:formula="of:=[.D65]-[.D64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0666666666666667" calcext:value-type="float">
            <text:p>0,00006666666666666670</text:p>
          </table:table-cell>
          <table:table-cell table:formula="of:=[.D66]-[.D6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" office:value-type="float" office:value="585" calcext:value-type="float">
            <text:p>58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0677083333333333" calcext:value-type="float">
            <text:p>0,00006770833333333330</text:p>
          </table:table-cell>
          <table:table-cell table:formula="of:=[.D67]-[.D66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" office:value-type="float" office:value="594" calcext:value-type="float">
            <text:p>59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06875" calcext:value-type="float">
            <text:p>0,00006875000000000000</text:p>
          </table:table-cell>
          <table:table-cell table:formula="of:=[.D68]-[.D6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" office:value-type="float" office:value="603" calcext:value-type="float">
            <text:p>603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0697916666666667" calcext:value-type="float">
            <text:p>0,00006979166666666670</text:p>
          </table:table-cell>
          <table:table-cell table:formula="of:=[.D69]-[.D68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" office:value-type="float" office:value="612" calcext:value-type="float">
            <text:p>61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0708333333333333" calcext:value-type="float">
            <text:p>0,00007083333333333330</text:p>
          </table:table-cell>
          <table:table-cell table:formula="of:=[.D70]-[.D6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" office:value-type="float" office:value="621" calcext:value-type="float">
            <text:p>621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071875" calcext:value-type="float">
            <text:p>0,00007187500000000000</text:p>
          </table:table-cell>
          <table:table-cell table:formula="of:=[.D71]-[.D70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0729166666666667" calcext:value-type="float">
            <text:p>0,00007291666666666670</text:p>
          </table:table-cell>
          <table:table-cell table:formula="of:=[.D72]-[.D7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" office:value-type="float" office:value="639" calcext:value-type="float">
            <text:p>639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0739583333333333" calcext:value-type="float">
            <text:p>0,00007395833333333330</text:p>
          </table:table-cell>
          <table:table-cell table:formula="of:=[.D73]-[.D7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" office:value-type="float" office:value="648" calcext:value-type="float">
            <text:p>64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075" calcext:value-type="float">
            <text:p>0,00007500000000000000</text:p>
          </table:table-cell>
          <table:table-cell table:formula="of:=[.D74]-[.D73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" office:value-type="float" office:value="657" calcext:value-type="float">
            <text:p>657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0760416666666667" calcext:value-type="float">
            <text:p>0,00007604166666666670</text:p>
          </table:table-cell>
          <table:table-cell table:formula="of:=[.D75]-[.D7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" office:value-type="float" office:value="666" calcext:value-type="float">
            <text:p>66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0770833333333333" calcext:value-type="float">
            <text:p>0,00007708333333333330</text:p>
          </table:table-cell>
          <table:table-cell table:formula="of:=[.D76]-[.D75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" office:value-type="float" office:value="675" calcext:value-type="float">
            <text:p>6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078125" calcext:value-type="float">
            <text:p>0,00007812500000000000</text:p>
          </table:table-cell>
          <table:table-cell table:formula="of:=[.D77]-[.D7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" office:value-type="float" office:value="684" calcext:value-type="float">
            <text:p>68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0791666666666667" calcext:value-type="float">
            <text:p>0,00007916666666666670</text:p>
          </table:table-cell>
          <table:table-cell table:formula="of:=[.D78]-[.D77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" office:value-type="float" office:value="693" calcext:value-type="float">
            <text:p>693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0802083333333333" calcext:value-type="float">
            <text:p>0,00008020833333333330</text:p>
          </table:table-cell>
          <table:table-cell table:formula="of:=[.D79]-[.D7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" office:value-type="float" office:value="702" calcext:value-type="float">
            <text:p>70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08125" calcext:value-type="float">
            <text:p>0,00008125000000000000</text:p>
          </table:table-cell>
          <table:table-cell table:formula="of:=[.D80]-[.D79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" office:value-type="float" office:value="711" calcext:value-type="float">
            <text:p>711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0822916666666667" calcext:value-type="float">
            <text:p>0,00008229166666666670</text:p>
          </table:table-cell>
          <table:table-cell table:formula="of:=[.D81]-[.D8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0833333333333333" calcext:value-type="float">
            <text:p>0,00008333333333333330</text:p>
          </table:table-cell>
          <table:table-cell table:formula="of:=[.D82]-[.D81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" office:value-type="float" office:value="729" calcext:value-type="float">
            <text:p>729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084375" calcext:value-type="float">
            <text:p>0,00008437500000000000</text:p>
          </table:table-cell>
          <table:table-cell table:formula="of:=[.D83]-[.D8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" office:value-type="float" office:value="738" calcext:value-type="float">
            <text:p>73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0854166666666667" calcext:value-type="float">
            <text:p>0,00008541666666666670</text:p>
          </table:table-cell>
          <table:table-cell table:formula="of:=[.D84]-[.D83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" office:value-type="float" office:value="747" calcext:value-type="float">
            <text:p>747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0864583333333333" calcext:value-type="float">
            <text:p>0,00008645833333333330</text:p>
          </table:table-cell>
          <table:table-cell table:formula="of:=[.D85]-[.D8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0875" calcext:value-type="float">
            <text:p>0,00008750000000000000</text:p>
          </table:table-cell>
          <table:table-cell table:formula="of:=[.D86]-[.D85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" office:value-type="float" office:value="765" calcext:value-type="float">
            <text:p>76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0885416666666667" calcext:value-type="float">
            <text:p>0,00008854166666666670</text:p>
          </table:table-cell>
          <table:table-cell table:formula="of:=[.D87]-[.D8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" office:value-type="float" office:value="774" calcext:value-type="float">
            <text:p>77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0895833333333333" calcext:value-type="float">
            <text:p>0,00008958333333333330</text:p>
          </table:table-cell>
          <table:table-cell table:formula="of:=[.D88]-[.D8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" office:value-type="float" office:value="783" calcext:value-type="float">
            <text:p>783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090625" calcext:value-type="float">
            <text:p>0,00009062500000000000</text:p>
          </table:table-cell>
          <table:table-cell table:formula="of:=[.D89]-[.D88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0916666666666667" calcext:value-type="float">
            <text:p>0,00009166666666666670</text:p>
          </table:table-cell>
          <table:table-cell table:formula="of:=[.D90]-[.D8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" office:value-type="float" office:value="801" calcext:value-type="float">
            <text:p>801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0927083333333333" calcext:value-type="float">
            <text:p>0,00009270833333333330</text:p>
          </table:table-cell>
          <table:table-cell table:formula="of:=[.D91]-[.D90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" office:value-type="float" office:value="810" calcext:value-type="float">
            <text:p>81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09375" calcext:value-type="float">
            <text:p>0,00009375000000000000</text:p>
          </table:table-cell>
          <table:table-cell table:formula="of:=[.D92]-[.D9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" office:value-type="float" office:value="819" calcext:value-type="float">
            <text:p>819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0947916666666667" calcext:value-type="float">
            <text:p>0,00009479166666666670</text:p>
          </table:table-cell>
          <table:table-cell table:formula="of:=[.D93]-[.D92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" office:value-type="float" office:value="828" calcext:value-type="float">
            <text:p>82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0958333333333333" calcext:value-type="float">
            <text:p>0,00009583333333333330</text:p>
          </table:table-cell>
          <table:table-cell table:formula="of:=[.D94]-[.D9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" office:value-type="float" office:value="837" calcext:value-type="float">
            <text:p>837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096875" calcext:value-type="float">
            <text:p>0,00009687500000000000</text:p>
          </table:table-cell>
          <table:table-cell table:formula="of:=[.D95]-[.D94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" office:value-type="float" office:value="846" calcext:value-type="float">
            <text:p>84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0979166666666667" calcext:value-type="float">
            <text:p>0,00009791666666666670</text:p>
          </table:table-cell>
          <table:table-cell table:formula="of:=[.D96]-[.D9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" office:value-type="float" office:value="855" calcext:value-type="float">
            <text:p>85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0989583333333333" calcext:value-type="float">
            <text:p>0,00009895833333333330</text:p>
          </table:table-cell>
          <table:table-cell table:formula="of:=[.D97]-[.D96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1" calcext:value-type="float">
            <text:p>0,00010000000000000000</text:p>
          </table:table-cell>
          <table:table-cell table:formula="of:=[.D98]-[.D9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" office:value-type="float" office:value="873" calcext:value-type="float">
            <text:p>873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101041666666667" calcext:value-type="float">
            <text:p>0,00010104166666666700</text:p>
          </table:table-cell>
          <table:table-cell table:formula="of:=[.D99]-[.D98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" office:value-type="float" office:value="882" calcext:value-type="float">
            <text:p>88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102083333333333" calcext:value-type="float">
            <text:p>0,00010208333333333300</text:p>
          </table:table-cell>
          <table:table-cell table:formula="of:=[.D100]-[.D9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" office:value-type="float" office:value="891" calcext:value-type="float">
            <text:p>891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103125" calcext:value-type="float">
            <text:p>0,00010312500000000000</text:p>
          </table:table-cell>
          <table:table-cell table:formula="of:=[.D101]-[.D100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104166666666667" calcext:value-type="float">
            <text:p>0,00010416666666666700</text:p>
          </table:table-cell>
          <table:table-cell table:formula="of:=[.D102]-[.D10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" office:value-type="float" office:value="909" calcext:value-type="float">
            <text:p>909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105208333333333" calcext:value-type="float">
            <text:p>0,00010520833333333300</text:p>
          </table:table-cell>
          <table:table-cell table:formula="of:=[.D103]-[.D10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" office:value-type="float" office:value="918" calcext:value-type="float">
            <text:p>91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10625" calcext:value-type="float">
            <text:p>0,00010625000000000000</text:p>
          </table:table-cell>
          <table:table-cell table:formula="of:=[.D104]-[.D103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" office:value-type="float" office:value="927" calcext:value-type="float">
            <text:p>927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107291666666667" calcext:value-type="float">
            <text:p>0,00010729166666666700</text:p>
          </table:table-cell>
          <table:table-cell table:formula="of:=[.D105]-[.D10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108333333333333" calcext:value-type="float">
            <text:p>0,00010833333333333300</text:p>
          </table:table-cell>
          <table:table-cell table:formula="of:=[.D106]-[.D105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" office:value-type="float" office:value="945" calcext:value-type="float">
            <text:p>94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109375" calcext:value-type="float">
            <text:p>0,00010937500000000000</text:p>
          </table:table-cell>
          <table:table-cell table:formula="of:=[.D107]-[.D10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" office:value-type="float" office:value="954" calcext:value-type="float">
            <text:p>95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110416666666667" calcext:value-type="float">
            <text:p>0,00011041666666666700</text:p>
          </table:table-cell>
          <table:table-cell table:formula="of:=[.D108]-[.D107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" office:value-type="float" office:value="963" calcext:value-type="float">
            <text:p>963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111458333333333" calcext:value-type="float">
            <text:p>0,00011145833333333300</text:p>
          </table:table-cell>
          <table:table-cell table:formula="of:=[.D109]-[.D10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" office:value-type="float" office:value="972" calcext:value-type="float">
            <text:p>97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1125" calcext:value-type="float">
            <text:p>0,00011250000000000000</text:p>
          </table:table-cell>
          <table:table-cell table:formula="of:=[.D110]-[.D109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" office:value-type="float" office:value="981" calcext:value-type="float">
            <text:p>981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113541666666667" calcext:value-type="float">
            <text:p>0,00011354166666666700</text:p>
          </table:table-cell>
          <table:table-cell table:formula="of:=[.D111]-[.D11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114583333333333" calcext:value-type="float">
            <text:p>0,00011458333333333300</text:p>
          </table:table-cell>
          <table:table-cell table:formula="of:=[.D112]-[.D111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" office:value-type="float" office:value="999" calcext:value-type="float">
            <text:p>999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115625" calcext:value-type="float">
            <text:p>0,00011562500000000000</text:p>
          </table:table-cell>
          <table:table-cell table:formula="of:=[.D113]-[.D11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116666666666667" calcext:value-type="float">
            <text:p>0,00011666666666666700</text:p>
          </table:table-cell>
          <table:table-cell table:formula="of:=[.D114]-[.D113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" office:value-type="float" office:value="1017" calcext:value-type="float">
            <text:p>1017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117708333333333" calcext:value-type="float">
            <text:p>0,00011770833333333300</text:p>
          </table:table-cell>
          <table:table-cell table:formula="of:=[.D115]-[.D11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" office:value-type="float" office:value="1026" calcext:value-type="float">
            <text:p>102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11875" calcext:value-type="float">
            <text:p>0,00011875000000000000</text:p>
          </table:table-cell>
          <table:table-cell table:formula="of:=[.D116]-[.D11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" office:value-type="float" office:value="1035" calcext:value-type="float">
            <text:p>103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119791666666667" calcext:value-type="float">
            <text:p>0,00011979166666666700</text:p>
          </table:table-cell>
          <table:table-cell table:formula="of:=[.D117]-[.D116]" office:value-type="float" office:value="0.00000104166666666667" calcext:value-type="float">
            <text:p>0,000001041666666666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" office:value-type="float" office:value="1044" calcext:value-type="float">
            <text:p>104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120833333333333" calcext:value-type="float">
            <text:p>0,00012083333333333300</text:p>
          </table:table-cell>
          <table:table-cell table:formula="of:=[.D118]-[.D11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" office:value-type="float" office:value="1053" calcext:value-type="float">
            <text:p>1053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121875" calcext:value-type="float">
            <text:p>0,00012187500000000000</text:p>
          </table:table-cell>
          <table:table-cell table:formula="of:=[.D119]-[.D11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" office:value-type="float" office:value="1062" calcext:value-type="float">
            <text:p>106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122916666666667" calcext:value-type="float">
            <text:p>0,00012291666666666700</text:p>
          </table:table-cell>
          <table:table-cell table:formula="of:=[.D120]-[.D119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" office:value-type="float" office:value="1071" calcext:value-type="float">
            <text:p>1071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123958333333333" calcext:value-type="float">
            <text:p>0,00012395833333333300</text:p>
          </table:table-cell>
          <table:table-cell table:formula="of:=[.D121]-[.D12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125" calcext:value-type="float">
            <text:p>0,00012500000000000000</text:p>
          </table:table-cell>
          <table:table-cell table:formula="of:=[.D122]-[.D12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" office:value-type="float" office:value="1089" calcext:value-type="float">
            <text:p>1089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126041666666667" calcext:value-type="float">
            <text:p>0,00012604166666666700</text:p>
          </table:table-cell>
          <table:table-cell table:formula="of:=[.D123]-[.D12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" office:value-type="float" office:value="1098" calcext:value-type="float">
            <text:p>109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127083333333333" calcext:value-type="float">
            <text:p>0,00012708333333333300</text:p>
          </table:table-cell>
          <table:table-cell table:formula="of:=[.D124]-[.D123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" office:value-type="float" office:value="1107" calcext:value-type="float">
            <text:p>1107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128125" calcext:value-type="float">
            <text:p>0,00012812500000000000</text:p>
          </table:table-cell>
          <table:table-cell table:formula="of:=[.D125]-[.D12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" office:value-type="float" office:value="1116" calcext:value-type="float">
            <text:p>111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129166666666667" calcext:value-type="float">
            <text:p>0,00012916666666666700</text:p>
          </table:table-cell>
          <table:table-cell table:formula="of:=[.D126]-[.D12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" office:value-type="float" office:value="1125" calcext:value-type="float">
            <text:p>1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130208333333333" calcext:value-type="float">
            <text:p>0,00013020833333333300</text:p>
          </table:table-cell>
          <table:table-cell table:formula="of:=[.D127]-[.D12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" office:value-type="float" office:value="1134" calcext:value-type="float">
            <text:p>113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13125" calcext:value-type="float">
            <text:p>0,00013125000000000000</text:p>
          </table:table-cell>
          <table:table-cell table:formula="of:=[.D128]-[.D127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" office:value-type="float" office:value="1143" calcext:value-type="float">
            <text:p>1143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132291666666667" calcext:value-type="float">
            <text:p>0,00013229166666666700</text:p>
          </table:table-cell>
          <table:table-cell table:formula="of:=[.D129]-[.D12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133333333333333" calcext:value-type="float">
            <text:p>0,00013333333333333300</text:p>
          </table:table-cell>
          <table:table-cell table:formula="of:=[.D130]-[.D12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" office:value-type="float" office:value="1161" calcext:value-type="float">
            <text:p>1161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134375" calcext:value-type="float">
            <text:p>0,00013437500000000000</text:p>
          </table:table-cell>
          <table:table-cell table:formula="of:=[.D131]-[.D13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135416666666667" calcext:value-type="float">
            <text:p>0,00013541666666666700</text:p>
          </table:table-cell>
          <table:table-cell table:formula="of:=[.D132]-[.D13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" office:value-type="float" office:value="1179" calcext:value-type="float">
            <text:p>1179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136458333333333" calcext:value-type="float">
            <text:p>0,00013645833333333300</text:p>
          </table:table-cell>
          <table:table-cell table:formula="of:=[.D133]-[.D132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1375" calcext:value-type="float">
            <text:p>0,00013750000000000000</text:p>
          </table:table-cell>
          <table:table-cell table:formula="of:=[.D134]-[.D13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" office:value-type="float" office:value="1197" calcext:value-type="float">
            <text:p>1197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138541666666667" calcext:value-type="float">
            <text:p>0,00013854166666666700</text:p>
          </table:table-cell>
          <table:table-cell table:formula="of:=[.D135]-[.D13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" office:value-type="float" office:value="1206" calcext:value-type="float">
            <text:p>120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139583333333333" calcext:value-type="float">
            <text:p>0,00013958333333333300</text:p>
          </table:table-cell>
          <table:table-cell table:formula="of:=[.D136]-[.D13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" office:value-type="float" office:value="1215" calcext:value-type="float">
            <text:p>121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140625" calcext:value-type="float">
            <text:p>0,00014062500000000000</text:p>
          </table:table-cell>
          <table:table-cell table:formula="of:=[.D137]-[.D136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141666666666667" calcext:value-type="float">
            <text:p>0,00014166666666666700</text:p>
          </table:table-cell>
          <table:table-cell table:formula="of:=[.D138]-[.D13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" office:value-type="float" office:value="1233" calcext:value-type="float">
            <text:p>1233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142708333333333" calcext:value-type="float">
            <text:p>0,00014270833333333300</text:p>
          </table:table-cell>
          <table:table-cell table:formula="of:=[.D139]-[.D13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" office:value-type="float" office:value="1242" calcext:value-type="float">
            <text:p>124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14375" calcext:value-type="float">
            <text:p>0,00014375000000000000</text:p>
          </table:table-cell>
          <table:table-cell table:formula="of:=[.D140]-[.D13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" office:value-type="float" office:value="1251" calcext:value-type="float">
            <text:p>1251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144791666666667" calcext:value-type="float">
            <text:p>0,00014479166666666700</text:p>
          </table:table-cell>
          <table:table-cell table:formula="of:=[.D141]-[.D140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145833333333333" calcext:value-type="float">
            <text:p>0,00014583333333333300</text:p>
          </table:table-cell>
          <table:table-cell table:formula="of:=[.D142]-[.D14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" office:value-type="float" office:value="1269" calcext:value-type="float">
            <text:p>1269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146875" calcext:value-type="float">
            <text:p>0,00014687500000000000</text:p>
          </table:table-cell>
          <table:table-cell table:formula="of:=[.D143]-[.D14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" office:value-type="float" office:value="1278" calcext:value-type="float">
            <text:p>127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147916666666667" calcext:value-type="float">
            <text:p>0,00014791666666666700</text:p>
          </table:table-cell>
          <table:table-cell table:formula="of:=[.D144]-[.D14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" office:value-type="float" office:value="1287" calcext:value-type="float">
            <text:p>1287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148958333333333" calcext:value-type="float">
            <text:p>0,00014895833333333300</text:p>
          </table:table-cell>
          <table:table-cell table:formula="of:=[.D145]-[.D14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15" calcext:value-type="float">
            <text:p>0,00015000000000000000</text:p>
          </table:table-cell>
          <table:table-cell table:formula="of:=[.D146]-[.D145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" office:value-type="float" office:value="1305" calcext:value-type="float">
            <text:p>130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151041666666667" calcext:value-type="float">
            <text:p>0,00015104166666666700</text:p>
          </table:table-cell>
          <table:table-cell table:formula="of:=[.D147]-[.D14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" office:value-type="float" office:value="1314" calcext:value-type="float">
            <text:p>131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152083333333333" calcext:value-type="float">
            <text:p>0,00015208333333333300</text:p>
          </table:table-cell>
          <table:table-cell table:formula="of:=[.D148]-[.D14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" office:value-type="float" office:value="1323" calcext:value-type="float">
            <text:p>1323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153125" calcext:value-type="float">
            <text:p>0,00015312500000000000</text:p>
          </table:table-cell>
          <table:table-cell table:formula="of:=[.D149]-[.D14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" office:value-type="float" office:value="1332" calcext:value-type="float">
            <text:p>133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154166666666667" calcext:value-type="float">
            <text:p>0,00015416666666666700</text:p>
          </table:table-cell>
          <table:table-cell table:formula="of:=[.D150]-[.D149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" office:value-type="float" office:value="1341" calcext:value-type="float">
            <text:p>1341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155208333333333" calcext:value-type="float">
            <text:p>0,00015520833333333300</text:p>
          </table:table-cell>
          <table:table-cell table:formula="of:=[.D151]-[.D15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15625" calcext:value-type="float">
            <text:p>0,00015625000000000000</text:p>
          </table:table-cell>
          <table:table-cell table:formula="of:=[.D152]-[.D15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" office:value-type="float" office:value="1359" calcext:value-type="float">
            <text:p>1359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157291666666667" calcext:value-type="float">
            <text:p>0,00015729166666666700</text:p>
          </table:table-cell>
          <table:table-cell table:formula="of:=[.D153]-[.D15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158333333333333" calcext:value-type="float">
            <text:p>0,00015833333333333300</text:p>
          </table:table-cell>
          <table:table-cell table:formula="of:=[.D154]-[.D153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" office:value-type="float" office:value="1377" calcext:value-type="float">
            <text:p>1377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159375" calcext:value-type="float">
            <text:p>0,00015937500000000000</text:p>
          </table:table-cell>
          <table:table-cell table:formula="of:=[.D155]-[.D15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160416666666667" calcext:value-type="float">
            <text:p>0,00016041666666666700</text:p>
          </table:table-cell>
          <table:table-cell table:formula="of:=[.D156]-[.D15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" office:value-type="float" office:value="1395" calcext:value-type="float">
            <text:p>139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161458333333333" calcext:value-type="float">
            <text:p>0,00016145833333333300</text:p>
          </table:table-cell>
          <table:table-cell table:formula="of:=[.D157]-[.D15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1625" calcext:value-type="float">
            <text:p>0,00016250000000000000</text:p>
          </table:table-cell>
          <table:table-cell table:formula="of:=[.D158]-[.D157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" office:value-type="float" office:value="1413" calcext:value-type="float">
            <text:p>1413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163541666666667" calcext:value-type="float">
            <text:p>0,00016354166666666700</text:p>
          </table:table-cell>
          <table:table-cell table:formula="of:=[.D159]-[.D15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" office:value-type="float" office:value="1422" calcext:value-type="float">
            <text:p>142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164583333333333" calcext:value-type="float">
            <text:p>0,00016458333333333300</text:p>
          </table:table-cell>
          <table:table-cell table:formula="of:=[.D160]-[.D15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" office:value-type="float" office:value="1431" calcext:value-type="float">
            <text:p>1431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165625" calcext:value-type="float">
            <text:p>0,00016562500000000000</text:p>
          </table:table-cell>
          <table:table-cell table:formula="of:=[.D161]-[.D16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166666666666667" calcext:value-type="float">
            <text:p>0,00016666666666666700</text:p>
          </table:table-cell>
          <table:table-cell table:formula="of:=[.D162]-[.D16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" office:value-type="float" office:value="1449" calcext:value-type="float">
            <text:p>1449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167708333333333" calcext:value-type="float">
            <text:p>0,00016770833333333300</text:p>
          </table:table-cell>
          <table:table-cell table:formula="of:=[.D163]-[.D162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" office:value-type="float" office:value="1458" calcext:value-type="float">
            <text:p>145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16875" calcext:value-type="float">
            <text:p>0,00016875000000000000</text:p>
          </table:table-cell>
          <table:table-cell table:formula="of:=[.D164]-[.D16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" office:value-type="float" office:value="1467" calcext:value-type="float">
            <text:p>1467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169791666666667" calcext:value-type="float">
            <text:p>0,00016979166666666700</text:p>
          </table:table-cell>
          <table:table-cell table:formula="of:=[.D165]-[.D16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" office:value-type="float" office:value="1476" calcext:value-type="float">
            <text:p>147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170833333333333" calcext:value-type="float">
            <text:p>0,00017083333333333300</text:p>
          </table:table-cell>
          <table:table-cell table:formula="of:=[.D166]-[.D16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" office:value-type="float" office:value="1485" calcext:value-type="float">
            <text:p>148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171875" calcext:value-type="float">
            <text:p>0,00017187500000000000</text:p>
          </table:table-cell>
          <table:table-cell table:formula="of:=[.D167]-[.D166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" office:value-type="float" office:value="1494" calcext:value-type="float">
            <text:p>149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172916666666667" calcext:value-type="float">
            <text:p>0,00017291666666666700</text:p>
          </table:table-cell>
          <table:table-cell table:formula="of:=[.D168]-[.D16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" office:value-type="float" office:value="1503" calcext:value-type="float">
            <text:p>1503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173958333333333" calcext:value-type="float">
            <text:p>0,00017395833333333300</text:p>
          </table:table-cell>
          <table:table-cell table:formula="of:=[.D169]-[.D16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175" calcext:value-type="float">
            <text:p>0,00017500000000000000</text:p>
          </table:table-cell>
          <table:table-cell table:formula="of:=[.D170]-[.D16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" office:value-type="float" office:value="1521" calcext:value-type="float">
            <text:p>1521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176041666666667" calcext:value-type="float">
            <text:p>0,00017604166666666700</text:p>
          </table:table-cell>
          <table:table-cell table:formula="of:=[.D171]-[.D170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177083333333333" calcext:value-type="float">
            <text:p>0,00017708333333333300</text:p>
          </table:table-cell>
          <table:table-cell table:formula="of:=[.D172]-[.D17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" office:value-type="float" office:value="1539" calcext:value-type="float">
            <text:p>1539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178125" calcext:value-type="float">
            <text:p>0,00017812500000000000</text:p>
          </table:table-cell>
          <table:table-cell table:formula="of:=[.D173]-[.D17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" office:value-type="float" office:value="1548" calcext:value-type="float">
            <text:p>154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179166666666667" calcext:value-type="float">
            <text:p>0,00017916666666666700</text:p>
          </table:table-cell>
          <table:table-cell table:formula="of:=[.D174]-[.D17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" office:value-type="float" office:value="1557" calcext:value-type="float">
            <text:p>1557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180208333333333" calcext:value-type="float">
            <text:p>0,00018020833333333300</text:p>
          </table:table-cell>
          <table:table-cell table:formula="of:=[.D175]-[.D17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" office:value-type="float" office:value="1566" calcext:value-type="float">
            <text:p>156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18125" calcext:value-type="float">
            <text:p>0,00018125000000000000</text:p>
          </table:table-cell>
          <table:table-cell table:formula="of:=[.D176]-[.D175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" office:value-type="float" office:value="1575" calcext:value-type="float">
            <text:p>15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182291666666667" calcext:value-type="float">
            <text:p>0,00018229166666666700</text:p>
          </table:table-cell>
          <table:table-cell table:formula="of:=[.D177]-[.D17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183333333333333" calcext:value-type="float">
            <text:p>0,00018333333333333300</text:p>
          </table:table-cell>
          <table:table-cell table:formula="of:=[.D178]-[.D17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" office:value-type="float" office:value="1593" calcext:value-type="float">
            <text:p>1593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184375" calcext:value-type="float">
            <text:p>0,00018437500000000000</text:p>
          </table:table-cell>
          <table:table-cell table:formula="of:=[.D179]-[.D17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" office:value-type="float" office:value="1602" calcext:value-type="float">
            <text:p>160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185416666666667" calcext:value-type="float">
            <text:p>0,00018541666666666700</text:p>
          </table:table-cell>
          <table:table-cell table:formula="of:=[.D180]-[.D179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" office:value-type="float" office:value="1611" calcext:value-type="float">
            <text:p>1611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186458333333333" calcext:value-type="float">
            <text:p>0,00018645833333333300</text:p>
          </table:table-cell>
          <table:table-cell table:formula="of:=[.D181]-[.D18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1875" calcext:value-type="float">
            <text:p>0,00018750000000000000</text:p>
          </table:table-cell>
          <table:table-cell table:formula="of:=[.D182]-[.D18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" office:value-type="float" office:value="1629" calcext:value-type="float">
            <text:p>1629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188541666666667" calcext:value-type="float">
            <text:p>0,00018854166666666700</text:p>
          </table:table-cell>
          <table:table-cell table:formula="of:=[.D183]-[.D18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189583333333333" calcext:value-type="float">
            <text:p>0,00018958333333333300</text:p>
          </table:table-cell>
          <table:table-cell table:formula="of:=[.D184]-[.D183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" office:value-type="float" office:value="1647" calcext:value-type="float">
            <text:p>1647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190625" calcext:value-type="float">
            <text:p>0,00019062500000000000</text:p>
          </table:table-cell>
          <table:table-cell table:formula="of:=[.D185]-[.D18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191666666666667" calcext:value-type="float">
            <text:p>0,00019166666666666700</text:p>
          </table:table-cell>
          <table:table-cell table:formula="of:=[.D186]-[.D18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" office:value-type="float" office:value="1665" calcext:value-type="float">
            <text:p>166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192708333333333" calcext:value-type="float">
            <text:p>0,00019270833333333300</text:p>
          </table:table-cell>
          <table:table-cell table:formula="of:=[.D187]-[.D18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" office:value-type="float" office:value="1674" calcext:value-type="float">
            <text:p>167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19375" calcext:value-type="float">
            <text:p>0,00019375000000000000</text:p>
          </table:table-cell>
          <table:table-cell table:formula="of:=[.D188]-[.D18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" office:value-type="float" office:value="1683" calcext:value-type="float">
            <text:p>1683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194791666666667" calcext:value-type="float">
            <text:p>0,00019479166666666700</text:p>
          </table:table-cell>
          <table:table-cell table:formula="of:=[.D189]-[.D188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" office:value-type="float" office:value="1692" calcext:value-type="float">
            <text:p>169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195833333333333" calcext:value-type="float">
            <text:p>0,00019583333333333300</text:p>
          </table:table-cell>
          <table:table-cell table:formula="of:=[.D190]-[.D18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" office:value-type="float" office:value="1701" calcext:value-type="float">
            <text:p>1701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196875" calcext:value-type="float">
            <text:p>0,00019687500000000000</text:p>
          </table:table-cell>
          <table:table-cell table:formula="of:=[.D191]-[.D19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197916666666667" calcext:value-type="float">
            <text:p>0,00019791666666666700</text:p>
          </table:table-cell>
          <table:table-cell table:formula="of:=[.D192]-[.D19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" office:value-type="float" office:value="1719" calcext:value-type="float">
            <text:p>1719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198958333333333" calcext:value-type="float">
            <text:p>0,00019895833333333300</text:p>
          </table:table-cell>
          <table:table-cell table:formula="of:=[.D193]-[.D192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2" calcext:value-type="float">
            <text:p>0,00020000000000000000</text:p>
          </table:table-cell>
          <table:table-cell table:formula="of:=[.D194]-[.D19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" office:value-type="float" office:value="1737" calcext:value-type="float">
            <text:p>1737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201041666666667" calcext:value-type="float">
            <text:p>0,00020104166666666700</text:p>
          </table:table-cell>
          <table:table-cell table:formula="of:=[.D195]-[.D19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" office:value-type="float" office:value="1746" calcext:value-type="float">
            <text:p>174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202083333333333" calcext:value-type="float">
            <text:p>0,00020208333333333300</text:p>
          </table:table-cell>
          <table:table-cell table:formula="of:=[.D196]-[.D19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" office:value-type="float" office:value="1755" calcext:value-type="float">
            <text:p>175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203125" calcext:value-type="float">
            <text:p>0,00020312500000000000</text:p>
          </table:table-cell>
          <table:table-cell table:formula="of:=[.D197]-[.D196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204166666666667" calcext:value-type="float">
            <text:p>0,00020416666666666700</text:p>
          </table:table-cell>
          <table:table-cell table:formula="of:=[.D198]-[.D19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" office:value-type="float" office:value="1773" calcext:value-type="float">
            <text:p>1773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205208333333333" calcext:value-type="float">
            <text:p>0,00020520833333333300</text:p>
          </table:table-cell>
          <table:table-cell table:formula="of:=[.D199]-[.D19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" office:value-type="float" office:value="1782" calcext:value-type="float">
            <text:p>178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20625" calcext:value-type="float">
            <text:p>0,00020625000000000000</text:p>
          </table:table-cell>
          <table:table-cell table:formula="of:=[.D200]-[.D19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" office:value-type="float" office:value="1791" calcext:value-type="float">
            <text:p>1791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207291666666667" calcext:value-type="float">
            <text:p>0,00020729166666666700</text:p>
          </table:table-cell>
          <table:table-cell table:formula="of:=[.D201]-[.D200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208333333333333" calcext:value-type="float">
            <text:p>0,00020833333333333300</text:p>
          </table:table-cell>
          <table:table-cell table:formula="of:=[.D202]-[.D20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" office:value-type="float" office:value="1809" calcext:value-type="float">
            <text:p>1809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209375" calcext:value-type="float">
            <text:p>0,00020937500000000000</text:p>
          </table:table-cell>
          <table:table-cell table:formula="of:=[.D203]-[.D20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" office:value-type="float" office:value="1818" calcext:value-type="float">
            <text:p>181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210416666666667" calcext:value-type="float">
            <text:p>0,00021041666666666700</text:p>
          </table:table-cell>
          <table:table-cell table:formula="of:=[.D204]-[.D20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" office:value-type="float" office:value="1827" calcext:value-type="float">
            <text:p>1827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211458333333333" calcext:value-type="float">
            <text:p>0,00021145833333333300</text:p>
          </table:table-cell>
          <table:table-cell table:formula="of:=[.D205]-[.D20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" office:value-type="float" office:value="1836" calcext:value-type="float">
            <text:p>183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2125" calcext:value-type="float">
            <text:p>0,00021250000000000000</text:p>
          </table:table-cell>
          <table:table-cell table:formula="of:=[.D206]-[.D205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" office:value-type="float" office:value="1845" calcext:value-type="float">
            <text:p>184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213541666666667" calcext:value-type="float">
            <text:p>0,00021354166666666700</text:p>
          </table:table-cell>
          <table:table-cell table:formula="of:=[.D207]-[.D20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" office:value-type="float" office:value="1854" calcext:value-type="float">
            <text:p>185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214583333333333" calcext:value-type="float">
            <text:p>0,00021458333333333300</text:p>
          </table:table-cell>
          <table:table-cell table:formula="of:=[.D208]-[.D20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" office:value-type="float" office:value="1863" calcext:value-type="float">
            <text:p>1863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215625" calcext:value-type="float">
            <text:p>0,00021562500000000000</text:p>
          </table:table-cell>
          <table:table-cell table:formula="of:=[.D209]-[.D20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216666666666667" calcext:value-type="float">
            <text:p>0,00021666666666666700</text:p>
          </table:table-cell>
          <table:table-cell table:formula="of:=[.D210]-[.D209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" office:value-type="float" office:value="1881" calcext:value-type="float">
            <text:p>1881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217708333333333" calcext:value-type="float">
            <text:p>0,00021770833333333300</text:p>
          </table:table-cell>
          <table:table-cell table:formula="of:=[.D211]-[.D21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21875" calcext:value-type="float">
            <text:p>0,00021875000000000000</text:p>
          </table:table-cell>
          <table:table-cell table:formula="of:=[.D212]-[.D21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" office:value-type="float" office:value="1899" calcext:value-type="float">
            <text:p>1899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219791666666667" calcext:value-type="float">
            <text:p>0,00021979166666666700</text:p>
          </table:table-cell>
          <table:table-cell table:formula="of:=[.D213]-[.D21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" office:value-type="float" office:value="1908" calcext:value-type="float">
            <text:p>190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220833333333333" calcext:value-type="float">
            <text:p>0,00022083333333333300</text:p>
          </table:table-cell>
          <table:table-cell table:formula="of:=[.D214]-[.D213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" office:value-type="float" office:value="1917" calcext:value-type="float">
            <text:p>1917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221875" calcext:value-type="float">
            <text:p>0,00022187500000000000</text:p>
          </table:table-cell>
          <table:table-cell table:formula="of:=[.D215]-[.D21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" office:value-type="float" office:value="1926" calcext:value-type="float">
            <text:p>192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222916666666667" calcext:value-type="float">
            <text:p>0,00022291666666666700</text:p>
          </table:table-cell>
          <table:table-cell table:formula="of:=[.D216]-[.D21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" office:value-type="float" office:value="1935" calcext:value-type="float">
            <text:p>193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223958333333333" calcext:value-type="float">
            <text:p>0,00022395833333333300</text:p>
          </table:table-cell>
          <table:table-cell table:formula="of:=[.D217]-[.D21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" office:value-type="float" office:value="1944" calcext:value-type="float">
            <text:p>194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225" calcext:value-type="float">
            <text:p>0,00022500000000000000</text:p>
          </table:table-cell>
          <table:table-cell table:formula="of:=[.D218]-[.D21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" office:value-type="float" office:value="1953" calcext:value-type="float">
            <text:p>1953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226041666666667" calcext:value-type="float">
            <text:p>0,00022604166666666700</text:p>
          </table:table-cell>
          <table:table-cell table:formula="of:=[.D219]-[.D218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" office:value-type="float" office:value="1962" calcext:value-type="float">
            <text:p>196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227083333333333" calcext:value-type="float">
            <text:p>0,00022708333333333300</text:p>
          </table:table-cell>
          <table:table-cell table:formula="of:=[.D220]-[.D21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" office:value-type="float" office:value="1971" calcext:value-type="float">
            <text:p>1971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228125" calcext:value-type="float">
            <text:p>0,00022812500000000000</text:p>
          </table:table-cell>
          <table:table-cell table:formula="of:=[.D221]-[.D22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229166666666667" calcext:value-type="float">
            <text:p>0,00022916666666666700</text:p>
          </table:table-cell>
          <table:table-cell table:formula="of:=[.D222]-[.D22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" office:value-type="float" office:value="1989" calcext:value-type="float">
            <text:p>1989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230208333333333" calcext:value-type="float">
            <text:p>0,00023020833333333300</text:p>
          </table:table-cell>
          <table:table-cell table:formula="of:=[.D223]-[.D222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" office:value-type="float" office:value="1998" calcext:value-type="float">
            <text:p>199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23125" calcext:value-type="float">
            <text:p>0,00023125000000000000</text:p>
          </table:table-cell>
          <table:table-cell table:formula="of:=[.D224]-[.D22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" office:value-type="float" office:value="2007" calcext:value-type="float">
            <text:p>2007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232291666666667" calcext:value-type="float">
            <text:p>0,00023229166666666700</text:p>
          </table:table-cell>
          <table:table-cell table:formula="of:=[.D225]-[.D22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233333333333333" calcext:value-type="float">
            <text:p>0,00023333333333333300</text:p>
          </table:table-cell>
          <table:table-cell table:formula="of:=[.D226]-[.D22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" office:value-type="float" office:value="2025" calcext:value-type="float">
            <text:p>20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234375" calcext:value-type="float">
            <text:p>0,00023437500000000000</text:p>
          </table:table-cell>
          <table:table-cell table:formula="of:=[.D227]-[.D226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" office:value-type="float" office:value="2034" calcext:value-type="float">
            <text:p>203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235416666666667" calcext:value-type="float">
            <text:p>0,00023541666666666700</text:p>
          </table:table-cell>
          <table:table-cell table:formula="of:=[.D228]-[.D22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" office:value-type="float" office:value="2043" calcext:value-type="float">
            <text:p>2043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236458333333333" calcext:value-type="float">
            <text:p>0,00023645833333333300</text:p>
          </table:table-cell>
          <table:table-cell table:formula="of:=[.D229]-[.D22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" office:value-type="float" office:value="2052" calcext:value-type="float">
            <text:p>205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2375" calcext:value-type="float">
            <text:p>0,00023750000000000000</text:p>
          </table:table-cell>
          <table:table-cell table:formula="of:=[.D230]-[.D22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" office:value-type="float" office:value="2061" calcext:value-type="float">
            <text:p>2061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238541666666667" calcext:value-type="float">
            <text:p>0,00023854166666666700</text:p>
          </table:table-cell>
          <table:table-cell table:formula="of:=[.D231]-[.D23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" office:value-type="float" office:value="2070" calcext:value-type="float">
            <text:p>207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239583333333333" calcext:value-type="float">
            <text:p>0,00023958333333333300</text:p>
          </table:table-cell>
          <table:table-cell table:formula="of:=[.D232]-[.D231]" office:value-type="float" office:value="0.00000104166666666669" calcext:value-type="float">
            <text:p>0,0000010416666666666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" office:value-type="float" office:value="2079" calcext:value-type="float">
            <text:p>2079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240625" calcext:value-type="float">
            <text:p>0,00024062500000000000</text:p>
          </table:table-cell>
          <table:table-cell table:formula="of:=[.D233]-[.D23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" office:value-type="float" office:value="2088" calcext:value-type="float">
            <text:p>208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241666666666667" calcext:value-type="float">
            <text:p>0,00024166666666666700</text:p>
          </table:table-cell>
          <table:table-cell table:formula="of:=[.D234]-[.D23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" office:value-type="float" office:value="2097" calcext:value-type="float">
            <text:p>2097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242708333333333" calcext:value-type="float">
            <text:p>0,00024270833333333300</text:p>
          </table:table-cell>
          <table:table-cell table:formula="of:=[.D235]-[.D23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" office:value-type="float" office:value="2106" calcext:value-type="float">
            <text:p>210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24375" calcext:value-type="float">
            <text:p>0,00024375000000000000</text:p>
          </table:table-cell>
          <table:table-cell table:formula="of:=[.D236]-[.D23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" office:value-type="float" office:value="2115" calcext:value-type="float">
            <text:p>211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244791666666667" calcext:value-type="float">
            <text:p>0,00024479166666666700</text:p>
          </table:table-cell>
          <table:table-cell table:formula="of:=[.D237]-[.D23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" office:value-type="float" office:value="2124" calcext:value-type="float">
            <text:p>212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245833333333333" calcext:value-type="float">
            <text:p>0,00024583333333333300</text:p>
          </table:table-cell>
          <table:table-cell table:formula="of:=[.D238]-[.D237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" office:value-type="float" office:value="2133" calcext:value-type="float">
            <text:p>2133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246875" calcext:value-type="float">
            <text:p>0,00024687500000000000</text:p>
          </table:table-cell>
          <table:table-cell table:formula="of:=[.D239]-[.D23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" office:value-type="float" office:value="2142" calcext:value-type="float">
            <text:p>214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247916666666667" calcext:value-type="float">
            <text:p>0,00024791666666666700</text:p>
          </table:table-cell>
          <table:table-cell table:formula="of:=[.D240]-[.D23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" office:value-type="float" office:value="2151" calcext:value-type="float">
            <text:p>2151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248958333333333" calcext:value-type="float">
            <text:p>0,00024895833333333300</text:p>
          </table:table-cell>
          <table:table-cell table:formula="of:=[.D241]-[.D24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9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25" calcext:value-type="float">
            <text:p>0,00025000000000000000</text:p>
          </table:table-cell>
          <table:table-cell table:formula="of:=[.D242]-[.D24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" office:value-type="float" office:value="2169" calcext:value-type="float">
            <text:p>2169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251041666666667" calcext:value-type="float">
            <text:p>0,00025104166666666700</text:p>
          </table:table-cell>
          <table:table-cell table:formula="of:=[.D243]-[.D24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" office:value-type="float" office:value="2178" calcext:value-type="float">
            <text:p>217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252083333333333" calcext:value-type="float">
            <text:p>0,00025208333333333300</text:p>
          </table:table-cell>
          <table:table-cell table:formula="of:=[.D244]-[.D24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9" office:value-type="float" office:value="2187" calcext:value-type="float">
            <text:p>2187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253125" calcext:value-type="float">
            <text:p>0,00025312500000000000</text:p>
          </table:table-cell>
          <table:table-cell table:formula="of:=[.D245]-[.D24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9" office:value-type="float" office:value="2196" calcext:value-type="float">
            <text:p>219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254166666666667" calcext:value-type="float">
            <text:p>0,00025416666666666700</text:p>
          </table:table-cell>
          <table:table-cell table:formula="of:=[.D246]-[.D24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9" office:value-type="float" office:value="2205" calcext:value-type="float">
            <text:p>220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255208333333333" calcext:value-type="float">
            <text:p>0,00025520833333333300</text:p>
          </table:table-cell>
          <table:table-cell table:formula="of:=[.D247]-[.D246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9" office:value-type="float" office:value="2214" calcext:value-type="float">
            <text:p>221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25625" calcext:value-type="float">
            <text:p>0,00025625000000000000</text:p>
          </table:table-cell>
          <table:table-cell table:formula="of:=[.D248]-[.D24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9" office:value-type="float" office:value="2223" calcext:value-type="float">
            <text:p>2223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257291666666667" calcext:value-type="float">
            <text:p>0,00025729166666666700</text:p>
          </table:table-cell>
          <table:table-cell table:formula="of:=[.D249]-[.D24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9" office:value-type="float" office:value="2232" calcext:value-type="float">
            <text:p>223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258333333333333" calcext:value-type="float">
            <text:p>0,00025833333333333300</text:p>
          </table:table-cell>
          <table:table-cell table:formula="of:=[.D250]-[.D24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9" office:value-type="float" office:value="2241" calcext:value-type="float">
            <text:p>2241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259375" calcext:value-type="float">
            <text:p>0,00025937500000000000</text:p>
          </table:table-cell>
          <table:table-cell table:formula="of:=[.D251]-[.D25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9" office:value-type="float" office:value="2250" calcext:value-type="float">
            <text:p>2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260416666666667" calcext:value-type="float">
            <text:p>0,00026041666666666700</text:p>
          </table:table-cell>
          <table:table-cell table:formula="of:=[.D252]-[.D25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9" office:value-type="float" office:value="2259" calcext:value-type="float">
            <text:p>2259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261458333333333" calcext:value-type="float">
            <text:p>0,00026145833333333300</text:p>
          </table:table-cell>
          <table:table-cell table:formula="of:=[.D253]-[.D25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9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2625" calcext:value-type="float">
            <text:p>0,00026250000000000000</text:p>
          </table:table-cell>
          <table:table-cell table:formula="of:=[.D254]-[.D25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9" office:value-type="float" office:value="2277" calcext:value-type="float">
            <text:p>2277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263541666666667" calcext:value-type="float">
            <text:p>0,00026354166666666700</text:p>
          </table:table-cell>
          <table:table-cell table:formula="of:=[.D255]-[.D254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9" office:value-type="float" office:value="2286" calcext:value-type="float">
            <text:p>228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264583333333333" calcext:value-type="float">
            <text:p>0,00026458333333333300</text:p>
          </table:table-cell>
          <table:table-cell table:formula="of:=[.D256]-[.D25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9" office:value-type="float" office:value="2295" calcext:value-type="float">
            <text:p>229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265625" calcext:value-type="float">
            <text:p>0,00026562500000000000</text:p>
          </table:table-cell>
          <table:table-cell table:formula="of:=[.D257]-[.D25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9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266666666666667" calcext:value-type="float">
            <text:p>0,00026666666666666700</text:p>
          </table:table-cell>
          <table:table-cell table:formula="of:=[.D258]-[.D25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9" office:value-type="float" office:value="2313" calcext:value-type="float">
            <text:p>2313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267708333333333" calcext:value-type="float">
            <text:p>0,00026770833333333300</text:p>
          </table:table-cell>
          <table:table-cell table:formula="of:=[.D259]-[.D25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9" office:value-type="float" office:value="2322" calcext:value-type="float">
            <text:p>232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26875" calcext:value-type="float">
            <text:p>0,00026875000000000000</text:p>
          </table:table-cell>
          <table:table-cell table:formula="of:=[.D260]-[.D25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9" office:value-type="float" office:value="2331" calcext:value-type="float">
            <text:p>2331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269791666666667" calcext:value-type="float">
            <text:p>0,00026979166666666700</text:p>
          </table:table-cell>
          <table:table-cell table:formula="of:=[.D261]-[.D26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9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270833333333333" calcext:value-type="float">
            <text:p>0,00027083333333333300</text:p>
          </table:table-cell>
          <table:table-cell table:formula="of:=[.D262]-[.D26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9" office:value-type="float" office:value="2349" calcext:value-type="float">
            <text:p>2349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271875" calcext:value-type="float">
            <text:p>0,00027187500000000000</text:p>
          </table:table-cell>
          <table:table-cell table:formula="of:=[.D263]-[.D26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9" office:value-type="float" office:value="2358" calcext:value-type="float">
            <text:p>235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272916666666667" calcext:value-type="float">
            <text:p>0,00027291666666666700</text:p>
          </table:table-cell>
          <table:table-cell table:formula="of:=[.D264]-[.D263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9" office:value-type="float" office:value="2367" calcext:value-type="float">
            <text:p>2367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273958333333333" calcext:value-type="float">
            <text:p>0,00027395833333333300</text:p>
          </table:table-cell>
          <table:table-cell table:formula="of:=[.D265]-[.D26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9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275" calcext:value-type="float">
            <text:p>0,00027500000000000000</text:p>
          </table:table-cell>
          <table:table-cell table:formula="of:=[.D266]-[.D26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9" office:value-type="float" office:value="2385" calcext:value-type="float">
            <text:p>238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276041666666667" calcext:value-type="float">
            <text:p>0,00027604166666666700</text:p>
          </table:table-cell>
          <table:table-cell table:formula="of:=[.D267]-[.D26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9" office:value-type="float" office:value="2394" calcext:value-type="float">
            <text:p>239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277083333333333" calcext:value-type="float">
            <text:p>0,00027708333333333300</text:p>
          </table:table-cell>
          <table:table-cell table:formula="of:=[.D268]-[.D26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9" office:value-type="float" office:value="2403" calcext:value-type="float">
            <text:p>2403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278125" calcext:value-type="float">
            <text:p>0,00027812500000000000</text:p>
          </table:table-cell>
          <table:table-cell table:formula="of:=[.D269]-[.D26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9" office:value-type="float" office:value="2412" calcext:value-type="float">
            <text:p>241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279166666666667" calcext:value-type="float">
            <text:p>0,00027916666666666700</text:p>
          </table:table-cell>
          <table:table-cell table:formula="of:=[.D270]-[.D26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9" office:value-type="float" office:value="2421" calcext:value-type="float">
            <text:p>2421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280208333333333" calcext:value-type="float">
            <text:p>0,00028020833333333300</text:p>
          </table:table-cell>
          <table:table-cell table:formula="of:=[.D271]-[.D27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9" office:value-type="float" office:value="2430" calcext:value-type="float">
            <text:p>243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28125" calcext:value-type="float">
            <text:p>0,00028125000000000000</text:p>
          </table:table-cell>
          <table:table-cell table:formula="of:=[.D272]-[.D271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9" office:value-type="float" office:value="2439" calcext:value-type="float">
            <text:p>2439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282291666666667" calcext:value-type="float">
            <text:p>0,00028229166666666700</text:p>
          </table:table-cell>
          <table:table-cell table:formula="of:=[.D273]-[.D27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9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283333333333333" calcext:value-type="float">
            <text:p>0,00028333333333333300</text:p>
          </table:table-cell>
          <table:table-cell table:formula="of:=[.D274]-[.D27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9" office:value-type="float" office:value="2457" calcext:value-type="float">
            <text:p>2457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284375" calcext:value-type="float">
            <text:p>0,00028437500000000000</text:p>
          </table:table-cell>
          <table:table-cell table:formula="of:=[.D275]-[.D27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9" office:value-type="float" office:value="2466" calcext:value-type="float">
            <text:p>246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285416666666667" calcext:value-type="float">
            <text:p>0,00028541666666666700</text:p>
          </table:table-cell>
          <table:table-cell table:formula="of:=[.D276]-[.D27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9" office:value-type="float" office:value="2475" calcext:value-type="float">
            <text:p>24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286458333333333" calcext:value-type="float">
            <text:p>0,00028645833333333300</text:p>
          </table:table-cell>
          <table:table-cell table:formula="of:=[.D277]-[.D27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9" office:value-type="float" office:value="2484" calcext:value-type="float">
            <text:p>248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2875" calcext:value-type="float">
            <text:p>0,00028750000000000000</text:p>
          </table:table-cell>
          <table:table-cell table:formula="of:=[.D278]-[.D27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9" office:value-type="float" office:value="2493" calcext:value-type="float">
            <text:p>2493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288541666666667" calcext:value-type="float">
            <text:p>0,00028854166666666700</text:p>
          </table:table-cell>
          <table:table-cell table:formula="of:=[.D279]-[.D27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9" office:value-type="float" office:value="2502" calcext:value-type="float">
            <text:p>250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289583333333333" calcext:value-type="float">
            <text:p>0,00028958333333333300</text:p>
          </table:table-cell>
          <table:table-cell table:formula="of:=[.D280]-[.D27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9" office:value-type="float" office:value="2511" calcext:value-type="float">
            <text:p>2511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290625" calcext:value-type="float">
            <text:p>0,00029062500000000000</text:p>
          </table:table-cell>
          <table:table-cell table:formula="of:=[.D281]-[.D280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9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291666666666667" calcext:value-type="float">
            <text:p>0,00029166666666666700</text:p>
          </table:table-cell>
          <table:table-cell table:formula="of:=[.D282]-[.D28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9" office:value-type="float" office:value="2529" calcext:value-type="float">
            <text:p>2529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292708333333333" calcext:value-type="float">
            <text:p>0,00029270833333333300</text:p>
          </table:table-cell>
          <table:table-cell table:formula="of:=[.D283]-[.D28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9" office:value-type="float" office:value="2538" calcext:value-type="float">
            <text:p>253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29375" calcext:value-type="float">
            <text:p>0,00029375000000000000</text:p>
          </table:table-cell>
          <table:table-cell table:formula="of:=[.D284]-[.D28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9" office:value-type="float" office:value="2547" calcext:value-type="float">
            <text:p>2547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294791666666667" calcext:value-type="float">
            <text:p>0,00029479166666666700</text:p>
          </table:table-cell>
          <table:table-cell table:formula="of:=[.D285]-[.D28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9" office:value-type="float" office:value="2556" calcext:value-type="float">
            <text:p>255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295833333333333" calcext:value-type="float">
            <text:p>0,00029583333333333300</text:p>
          </table:table-cell>
          <table:table-cell table:formula="of:=[.D286]-[.D28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9" office:value-type="float" office:value="2565" calcext:value-type="float">
            <text:p>256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296875" calcext:value-type="float">
            <text:p>0,00029687500000000000</text:p>
          </table:table-cell>
          <table:table-cell table:formula="of:=[.D287]-[.D28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9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297916666666667" calcext:value-type="float">
            <text:p>0,00029791666666666700</text:p>
          </table:table-cell>
          <table:table-cell table:formula="of:=[.D288]-[.D28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9" office:value-type="float" office:value="2583" calcext:value-type="float">
            <text:p>2583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298958333333333" calcext:value-type="float">
            <text:p>0,00029895833333333300</text:p>
          </table:table-cell>
          <table:table-cell table:formula="of:=[.D289]-[.D28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9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3" calcext:value-type="float">
            <text:p>0,00030000000000000000</text:p>
          </table:table-cell>
          <table:table-cell table:formula="of:=[.D290]-[.D289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9" office:value-type="float" office:value="2601" calcext:value-type="float">
            <text:p>2601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301041666666667" calcext:value-type="float">
            <text:p>0,00030104166666666700</text:p>
          </table:table-cell>
          <table:table-cell table:formula="of:=[.D291]-[.D29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9" office:value-type="float" office:value="2610" calcext:value-type="float">
            <text:p>261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302083333333333" calcext:value-type="float">
            <text:p>0,00030208333333333300</text:p>
          </table:table-cell>
          <table:table-cell table:formula="of:=[.D292]-[.D29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9" office:value-type="float" office:value="2619" calcext:value-type="float">
            <text:p>2619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303125" calcext:value-type="float">
            <text:p>0,00030312500000000000</text:p>
          </table:table-cell>
          <table:table-cell table:formula="of:=[.D293]-[.D29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9" office:value-type="float" office:value="2628" calcext:value-type="float">
            <text:p>262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304166666666667" calcext:value-type="float">
            <text:p>0,00030416666666666700</text:p>
          </table:table-cell>
          <table:table-cell table:formula="of:=[.D294]-[.D29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9" office:value-type="float" office:value="2637" calcext:value-type="float">
            <text:p>2637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305208333333333" calcext:value-type="float">
            <text:p>0,00030520833333333300</text:p>
          </table:table-cell>
          <table:table-cell table:formula="of:=[.D295]-[.D29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9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30625" calcext:value-type="float">
            <text:p>0,00030625000000000000</text:p>
          </table:table-cell>
          <table:table-cell table:formula="of:=[.D296]-[.D29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9" office:value-type="float" office:value="2655" calcext:value-type="float">
            <text:p>265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307291666666667" calcext:value-type="float">
            <text:p>0,00030729166666666700</text:p>
          </table:table-cell>
          <table:table-cell table:formula="of:=[.D297]-[.D29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9" office:value-type="float" office:value="2664" calcext:value-type="float">
            <text:p>266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308333333333333" calcext:value-type="float">
            <text:p>0,00030833333333333300</text:p>
          </table:table-cell>
          <table:table-cell table:formula="of:=[.D298]-[.D297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9" office:value-type="float" office:value="2673" calcext:value-type="float">
            <text:p>2673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309375" calcext:value-type="float">
            <text:p>0,00030937500000000000</text:p>
          </table:table-cell>
          <table:table-cell table:formula="of:=[.D299]-[.D29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9" office:value-type="float" office:value="2682" calcext:value-type="float">
            <text:p>268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310416666666667" calcext:value-type="float">
            <text:p>0,00031041666666666700</text:p>
          </table:table-cell>
          <table:table-cell table:formula="of:=[.D300]-[.D29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9" office:value-type="float" office:value="2691" calcext:value-type="float">
            <text:p>2691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311458333333333" calcext:value-type="float">
            <text:p>0,00031145833333333300</text:p>
          </table:table-cell>
          <table:table-cell table:formula="of:=[.D301]-[.D30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9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3125" calcext:value-type="float">
            <text:p>0,00031250000000000000</text:p>
          </table:table-cell>
          <table:table-cell table:formula="of:=[.D302]-[.D30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9" office:value-type="float" office:value="2709" calcext:value-type="float">
            <text:p>2709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313541666666667" calcext:value-type="float">
            <text:p>0,00031354166666666700</text:p>
          </table:table-cell>
          <table:table-cell table:formula="of:=[.D303]-[.D30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9" office:value-type="float" office:value="2718" calcext:value-type="float">
            <text:p>271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314583333333333" calcext:value-type="float">
            <text:p>0,00031458333333333300</text:p>
          </table:table-cell>
          <table:table-cell table:formula="of:=[.D304]-[.D30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9" office:value-type="float" office:value="2727" calcext:value-type="float">
            <text:p>2727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315625" calcext:value-type="float">
            <text:p>0,00031562500000000000</text:p>
          </table:table-cell>
          <table:table-cell table:formula="of:=[.D305]-[.D30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9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316666666666667" calcext:value-type="float">
            <text:p>0,00031666666666666700</text:p>
          </table:table-cell>
          <table:table-cell table:formula="of:=[.D306]-[.D30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9" office:value-type="float" office:value="2745" calcext:value-type="float">
            <text:p>274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317708333333333" calcext:value-type="float">
            <text:p>0,00031770833333333300</text:p>
          </table:table-cell>
          <table:table-cell table:formula="of:=[.D307]-[.D306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9" office:value-type="float" office:value="2754" calcext:value-type="float">
            <text:p>275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31875" calcext:value-type="float">
            <text:p>0,00031875000000000000</text:p>
          </table:table-cell>
          <table:table-cell table:formula="of:=[.D308]-[.D30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9" office:value-type="float" office:value="2763" calcext:value-type="float">
            <text:p>2763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319791666666667" calcext:value-type="float">
            <text:p>0,00031979166666666700</text:p>
          </table:table-cell>
          <table:table-cell table:formula="of:=[.D309]-[.D30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9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320833333333333" calcext:value-type="float">
            <text:p>0,00032083333333333300</text:p>
          </table:table-cell>
          <table:table-cell table:formula="of:=[.D310]-[.D30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9" office:value-type="float" office:value="2781" calcext:value-type="float">
            <text:p>2781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321875" calcext:value-type="float">
            <text:p>0,00032187500000000000</text:p>
          </table:table-cell>
          <table:table-cell table:formula="of:=[.D311]-[.D31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9" office:value-type="float" office:value="2790" calcext:value-type="float">
            <text:p>279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322916666666667" calcext:value-type="float">
            <text:p>0,00032291666666666700</text:p>
          </table:table-cell>
          <table:table-cell table:formula="of:=[.D312]-[.D31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9" office:value-type="float" office:value="2799" calcext:value-type="float">
            <text:p>2799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323958333333333" calcext:value-type="float">
            <text:p>0,00032395833333333300</text:p>
          </table:table-cell>
          <table:table-cell table:formula="of:=[.D313]-[.D31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9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325" calcext:value-type="float">
            <text:p>0,00032500000000000000</text:p>
          </table:table-cell>
          <table:table-cell table:formula="of:=[.D314]-[.D31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9" office:value-type="float" office:value="2817" calcext:value-type="float">
            <text:p>2817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326041666666667" calcext:value-type="float">
            <text:p>0,00032604166666666700</text:p>
          </table:table-cell>
          <table:table-cell table:formula="of:=[.D315]-[.D314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9" office:value-type="float" office:value="2826" calcext:value-type="float">
            <text:p>282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327083333333333" calcext:value-type="float">
            <text:p>0,00032708333333333300</text:p>
          </table:table-cell>
          <table:table-cell table:formula="of:=[.D316]-[.D31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9" office:value-type="float" office:value="2835" calcext:value-type="float">
            <text:p>283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328125" calcext:value-type="float">
            <text:p>0,00032812500000000000</text:p>
          </table:table-cell>
          <table:table-cell table:formula="of:=[.D317]-[.D31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9" office:value-type="float" office:value="2844" calcext:value-type="float">
            <text:p>284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329166666666667" calcext:value-type="float">
            <text:p>0,00032916666666666700</text:p>
          </table:table-cell>
          <table:table-cell table:formula="of:=[.D318]-[.D31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9" office:value-type="float" office:value="2853" calcext:value-type="float">
            <text:p>2853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330208333333333" calcext:value-type="float">
            <text:p>0,00033020833333333300</text:p>
          </table:table-cell>
          <table:table-cell table:formula="of:=[.D319]-[.D31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9" office:value-type="float" office:value="2862" calcext:value-type="float">
            <text:p>286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33125" calcext:value-type="float">
            <text:p>0,00033125000000000000</text:p>
          </table:table-cell>
          <table:table-cell table:formula="of:=[.D320]-[.D31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9" office:value-type="float" office:value="2871" calcext:value-type="float">
            <text:p>2871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332291666666667" calcext:value-type="float">
            <text:p>0,00033229166666666700</text:p>
          </table:table-cell>
          <table:table-cell table:formula="of:=[.D321]-[.D32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9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333333333333333" calcext:value-type="float">
            <text:p>0,00033333333333333300</text:p>
          </table:table-cell>
          <table:table-cell table:formula="of:=[.D322]-[.D32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9" office:value-type="float" office:value="2889" calcext:value-type="float">
            <text:p>2889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334375" calcext:value-type="float">
            <text:p>0,00033437500000000000</text:p>
          </table:table-cell>
          <table:table-cell table:formula="of:=[.D323]-[.D32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9" office:value-type="float" office:value="2898" calcext:value-type="float">
            <text:p>289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335416666666667" calcext:value-type="float">
            <text:p>0,00033541666666666700</text:p>
          </table:table-cell>
          <table:table-cell table:formula="of:=[.D324]-[.D323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9" office:value-type="float" office:value="2907" calcext:value-type="float">
            <text:p>2907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336458333333333" calcext:value-type="float">
            <text:p>0,00033645833333333300</text:p>
          </table:table-cell>
          <table:table-cell table:formula="of:=[.D325]-[.D32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9" office:value-type="float" office:value="2916" calcext:value-type="float">
            <text:p>291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3375" calcext:value-type="float">
            <text:p>0,00033750000000000000</text:p>
          </table:table-cell>
          <table:table-cell table:formula="of:=[.D326]-[.D32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9" office:value-type="float" office:value="2925" calcext:value-type="float">
            <text:p>29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338541666666667" calcext:value-type="float">
            <text:p>0,00033854166666666700</text:p>
          </table:table-cell>
          <table:table-cell table:formula="of:=[.D327]-[.D32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9" office:value-type="float" office:value="2934" calcext:value-type="float">
            <text:p>293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339583333333333" calcext:value-type="float">
            <text:p>0,00033958333333333300</text:p>
          </table:table-cell>
          <table:table-cell table:formula="of:=[.D328]-[.D32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9" office:value-type="float" office:value="2943" calcext:value-type="float">
            <text:p>2943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340625" calcext:value-type="float">
            <text:p>0,00034062500000000000</text:p>
          </table:table-cell>
          <table:table-cell table:formula="of:=[.D329]-[.D32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9" office:value-type="float" office:value="2952" calcext:value-type="float">
            <text:p>295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341666666666667" calcext:value-type="float">
            <text:p>0,00034166666666666700</text:p>
          </table:table-cell>
          <table:table-cell table:formula="of:=[.D330]-[.D32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9" office:value-type="float" office:value="2961" calcext:value-type="float">
            <text:p>2961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342708333333333" calcext:value-type="float">
            <text:p>0,00034270833333333300</text:p>
          </table:table-cell>
          <table:table-cell table:formula="of:=[.D331]-[.D33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9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34375" calcext:value-type="float">
            <text:p>0,00034375000000000000</text:p>
          </table:table-cell>
          <table:table-cell table:formula="of:=[.D332]-[.D33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9" office:value-type="float" office:value="2979" calcext:value-type="float">
            <text:p>2979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344791666666667" calcext:value-type="float">
            <text:p>0,00034479166666666700</text:p>
          </table:table-cell>
          <table:table-cell table:formula="of:=[.D333]-[.D332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9" office:value-type="float" office:value="2988" calcext:value-type="float">
            <text:p>298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345833333333333" calcext:value-type="float">
            <text:p>0,00034583333333333300</text:p>
          </table:table-cell>
          <table:table-cell table:formula="of:=[.D334]-[.D33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9" office:value-type="float" office:value="2997" calcext:value-type="float">
            <text:p>2997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346875" calcext:value-type="float">
            <text:p>0,00034687500000000000</text:p>
          </table:table-cell>
          <table:table-cell table:formula="of:=[.D335]-[.D33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9" office:value-type="float" office:value="3006" calcext:value-type="float">
            <text:p>300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347916666666667" calcext:value-type="float">
            <text:p>0,00034791666666666700</text:p>
          </table:table-cell>
          <table:table-cell table:formula="of:=[.D336]-[.D33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9" office:value-type="float" office:value="3015" calcext:value-type="float">
            <text:p>301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348958333333333" calcext:value-type="float">
            <text:p>0,00034895833333333300</text:p>
          </table:table-cell>
          <table:table-cell table:formula="of:=[.D337]-[.D33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9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35" calcext:value-type="float">
            <text:p>0,00035000000000000000</text:p>
          </table:table-cell>
          <table:table-cell table:formula="of:=[.D338]-[.D33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9" office:value-type="float" office:value="3033" calcext:value-type="float">
            <text:p>3033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351041666666667" calcext:value-type="float">
            <text:p>0,00035104166666666700</text:p>
          </table:table-cell>
          <table:table-cell table:formula="of:=[.D339]-[.D33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9" office:value-type="float" office:value="3042" calcext:value-type="float">
            <text:p>304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352083333333333" calcext:value-type="float">
            <text:p>0,00035208333333333300</text:p>
          </table:table-cell>
          <table:table-cell table:formula="of:=[.D340]-[.D33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9" office:value-type="float" office:value="3051" calcext:value-type="float">
            <text:p>3051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353125" calcext:value-type="float">
            <text:p>0,00035312500000000000</text:p>
          </table:table-cell>
          <table:table-cell table:formula="of:=[.D341]-[.D340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9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354166666666667" calcext:value-type="float">
            <text:p>0,00035416666666666700</text:p>
          </table:table-cell>
          <table:table-cell table:formula="of:=[.D342]-[.D34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9" office:value-type="float" office:value="3069" calcext:value-type="float">
            <text:p>3069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355208333333333" calcext:value-type="float">
            <text:p>0,00035520833333333300</text:p>
          </table:table-cell>
          <table:table-cell table:formula="of:=[.D343]-[.D34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9" office:value-type="float" office:value="3078" calcext:value-type="float">
            <text:p>307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35625" calcext:value-type="float">
            <text:p>0,00035625000000000000</text:p>
          </table:table-cell>
          <table:table-cell table:formula="of:=[.D344]-[.D34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9" office:value-type="float" office:value="3087" calcext:value-type="float">
            <text:p>3087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357291666666667" calcext:value-type="float">
            <text:p>0,00035729166666666700</text:p>
          </table:table-cell>
          <table:table-cell table:formula="of:=[.D345]-[.D34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9" office:value-type="float" office:value="3096" calcext:value-type="float">
            <text:p>309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358333333333333" calcext:value-type="float">
            <text:p>0,00035833333333333300</text:p>
          </table:table-cell>
          <table:table-cell table:formula="of:=[.D346]-[.D34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9" office:value-type="float" office:value="3105" calcext:value-type="float">
            <text:p>310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359375" calcext:value-type="float">
            <text:p>0,00035937500000000000</text:p>
          </table:table-cell>
          <table:table-cell table:formula="of:=[.D347]-[.D34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9" office:value-type="float" office:value="3114" calcext:value-type="float">
            <text:p>311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360416666666667" calcext:value-type="float">
            <text:p>0,00036041666666666700</text:p>
          </table:table-cell>
          <table:table-cell table:formula="of:=[.D348]-[.D34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9" office:value-type="float" office:value="3123" calcext:value-type="float">
            <text:p>3123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361458333333333" calcext:value-type="float">
            <text:p>0,00036145833333333300</text:p>
          </table:table-cell>
          <table:table-cell table:formula="of:=[.D349]-[.D34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9" office:value-type="float" office:value="3132" calcext:value-type="float">
            <text:p>313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3625" calcext:value-type="float">
            <text:p>0,00036250000000000000</text:p>
          </table:table-cell>
          <table:table-cell table:formula="of:=[.D350]-[.D349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9" office:value-type="float" office:value="3141" calcext:value-type="float">
            <text:p>3141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363541666666667" calcext:value-type="float">
            <text:p>0,00036354166666666700</text:p>
          </table:table-cell>
          <table:table-cell table:formula="of:=[.D351]-[.D35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9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364583333333333" calcext:value-type="float">
            <text:p>0,00036458333333333300</text:p>
          </table:table-cell>
          <table:table-cell table:formula="of:=[.D352]-[.D35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9" office:value-type="float" office:value="3159" calcext:value-type="float">
            <text:p>3159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365625" calcext:value-type="float">
            <text:p>0,00036562500000000000</text:p>
          </table:table-cell>
          <table:table-cell table:formula="of:=[.D353]-[.D35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9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366666666666667" calcext:value-type="float">
            <text:p>0,00036666666666666700</text:p>
          </table:table-cell>
          <table:table-cell table:formula="of:=[.D354]-[.D35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9" office:value-type="float" office:value="3177" calcext:value-type="float">
            <text:p>3177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367708333333333" calcext:value-type="float">
            <text:p>0,00036770833333333300</text:p>
          </table:table-cell>
          <table:table-cell table:formula="of:=[.D355]-[.D35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9" office:value-type="float" office:value="3186" calcext:value-type="float">
            <text:p>318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36875" calcext:value-type="float">
            <text:p>0,00036875000000000000</text:p>
          </table:table-cell>
          <table:table-cell table:formula="of:=[.D356]-[.D35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9" office:value-type="float" office:value="3195" calcext:value-type="float">
            <text:p>319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369791666666667" calcext:value-type="float">
            <text:p>0,00036979166666666700</text:p>
          </table:table-cell>
          <table:table-cell table:formula="of:=[.D357]-[.D35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9" office:value-type="float" office:value="3204" calcext:value-type="float">
            <text:p>320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370833333333333" calcext:value-type="float">
            <text:p>0,00037083333333333300</text:p>
          </table:table-cell>
          <table:table-cell table:formula="of:=[.D358]-[.D357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9" office:value-type="float" office:value="3213" calcext:value-type="float">
            <text:p>3213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371875" calcext:value-type="float">
            <text:p>0,00037187500000000000</text:p>
          </table:table-cell>
          <table:table-cell table:formula="of:=[.D359]-[.D35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9" office:value-type="float" office:value="3222" calcext:value-type="float">
            <text:p>322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372916666666667" calcext:value-type="float">
            <text:p>0,00037291666666666700</text:p>
          </table:table-cell>
          <table:table-cell table:formula="of:=[.D360]-[.D35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9" office:value-type="float" office:value="3231" calcext:value-type="float">
            <text:p>3231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373958333333333" calcext:value-type="float">
            <text:p>0,00037395833333333300</text:p>
          </table:table-cell>
          <table:table-cell table:formula="of:=[.D361]-[.D36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9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375" calcext:value-type="float">
            <text:p>0,00037500000000000000</text:p>
          </table:table-cell>
          <table:table-cell table:formula="of:=[.D362]-[.D36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9" office:value-type="float" office:value="3249" calcext:value-type="float">
            <text:p>3249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376041666666667" calcext:value-type="float">
            <text:p>0,00037604166666666700</text:p>
          </table:table-cell>
          <table:table-cell table:formula="of:=[.D363]-[.D36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9" office:value-type="float" office:value="3258" calcext:value-type="float">
            <text:p>325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377083333333333" calcext:value-type="float">
            <text:p>0,00037708333333333300</text:p>
          </table:table-cell>
          <table:table-cell table:formula="of:=[.D364]-[.D36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9" office:value-type="float" office:value="3267" calcext:value-type="float">
            <text:p>3267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378125" calcext:value-type="float">
            <text:p>0,00037812500000000000</text:p>
          </table:table-cell>
          <table:table-cell table:formula="of:=[.D365]-[.D36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9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379166666666667" calcext:value-type="float">
            <text:p>0,00037916666666666700</text:p>
          </table:table-cell>
          <table:table-cell table:formula="of:=[.D366]-[.D36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9" office:value-type="float" office:value="3285" calcext:value-type="float">
            <text:p>328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380208333333333" calcext:value-type="float">
            <text:p>0,00038020833333333300</text:p>
          </table:table-cell>
          <table:table-cell table:formula="of:=[.D367]-[.D366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9" office:value-type="float" office:value="3294" calcext:value-type="float">
            <text:p>329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38125" calcext:value-type="float">
            <text:p>0,00038125000000000000</text:p>
          </table:table-cell>
          <table:table-cell table:formula="of:=[.D368]-[.D36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9" office:value-type="float" office:value="3303" calcext:value-type="float">
            <text:p>3303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382291666666667" calcext:value-type="float">
            <text:p>0,00038229166666666700</text:p>
          </table:table-cell>
          <table:table-cell table:formula="of:=[.D369]-[.D36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9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383333333333333" calcext:value-type="float">
            <text:p>0,00038333333333333300</text:p>
          </table:table-cell>
          <table:table-cell table:formula="of:=[.D370]-[.D36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9" office:value-type="float" office:value="3321" calcext:value-type="float">
            <text:p>3321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384375" calcext:value-type="float">
            <text:p>0,00038437500000000000</text:p>
          </table:table-cell>
          <table:table-cell table:formula="of:=[.D371]-[.D37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9" office:value-type="float" office:value="3330" calcext:value-type="float">
            <text:p>333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385416666666667" calcext:value-type="float">
            <text:p>0,00038541666666666700</text:p>
          </table:table-cell>
          <table:table-cell table:formula="of:=[.D372]-[.D37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9" office:value-type="float" office:value="3339" calcext:value-type="float">
            <text:p>3339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386458333333333" calcext:value-type="float">
            <text:p>0,00038645833333333300</text:p>
          </table:table-cell>
          <table:table-cell table:formula="of:=[.D373]-[.D37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9" office:value-type="float" office:value="3348" calcext:value-type="float">
            <text:p>334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3875" calcext:value-type="float">
            <text:p>0,00038750000000000000</text:p>
          </table:table-cell>
          <table:table-cell table:formula="of:=[.D374]-[.D37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9" office:value-type="float" office:value="3357" calcext:value-type="float">
            <text:p>3357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388541666666667" calcext:value-type="float">
            <text:p>0,00038854166666666700</text:p>
          </table:table-cell>
          <table:table-cell table:formula="of:=[.D375]-[.D37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9" office:value-type="float" office:value="3366" calcext:value-type="float">
            <text:p>336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389583333333333" calcext:value-type="float">
            <text:p>0,00038958333333333300</text:p>
          </table:table-cell>
          <table:table-cell table:formula="of:=[.D376]-[.D375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9" office:value-type="float" office:value="3375" calcext:value-type="float">
            <text:p>33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390625" calcext:value-type="float">
            <text:p>0,00039062500000000000</text:p>
          </table:table-cell>
          <table:table-cell table:formula="of:=[.D377]-[.D37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9" office:value-type="float" office:value="3384" calcext:value-type="float">
            <text:p>338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391666666666667" calcext:value-type="float">
            <text:p>0,00039166666666666700</text:p>
          </table:table-cell>
          <table:table-cell table:formula="of:=[.D378]-[.D37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9" office:value-type="float" office:value="3393" calcext:value-type="float">
            <text:p>3393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392708333333333" calcext:value-type="float">
            <text:p>0,00039270833333333300</text:p>
          </table:table-cell>
          <table:table-cell table:formula="of:=[.D379]-[.D37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9" office:value-type="float" office:value="3402" calcext:value-type="float">
            <text:p>340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39375" calcext:value-type="float">
            <text:p>0,00039375000000000000</text:p>
          </table:table-cell>
          <table:table-cell table:formula="of:=[.D380]-[.D37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9" office:value-type="float" office:value="3411" calcext:value-type="float">
            <text:p>3411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394791666666667" calcext:value-type="float">
            <text:p>0,00039479166666666700</text:p>
          </table:table-cell>
          <table:table-cell table:formula="of:=[.D381]-[.D38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9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395833333333333" calcext:value-type="float">
            <text:p>0,00039583333333333300</text:p>
          </table:table-cell>
          <table:table-cell table:formula="of:=[.D382]-[.D38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9" office:value-type="float" office:value="3429" calcext:value-type="float">
            <text:p>3429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396875" calcext:value-type="float">
            <text:p>0,00039687500000000000</text:p>
          </table:table-cell>
          <table:table-cell table:formula="of:=[.D383]-[.D38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9" office:value-type="float" office:value="3438" calcext:value-type="float">
            <text:p>343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397916666666667" calcext:value-type="float">
            <text:p>0,00039791666666666700</text:p>
          </table:table-cell>
          <table:table-cell table:formula="of:=[.D384]-[.D383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9" office:value-type="float" office:value="3447" calcext:value-type="float">
            <text:p>3447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398958333333333" calcext:value-type="float">
            <text:p>0,00039895833333333300</text:p>
          </table:table-cell>
          <table:table-cell table:formula="of:=[.D385]-[.D38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9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4" calcext:value-type="float">
            <text:p>0,00040000000000000000</text:p>
          </table:table-cell>
          <table:table-cell table:formula="of:=[.D386]-[.D38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9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401041666666667" calcext:value-type="float">
            <text:p>0,00040104166666666700</text:p>
          </table:table-cell>
          <table:table-cell table:formula="of:=[.D387]-[.D38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9" office:value-type="float" office:value="3474" calcext:value-type="float">
            <text:p>347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402083333333333" calcext:value-type="float">
            <text:p>0,00040208333333333300</text:p>
          </table:table-cell>
          <table:table-cell table:formula="of:=[.D388]-[.D38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9" office:value-type="float" office:value="3483" calcext:value-type="float">
            <text:p>3483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403125" calcext:value-type="float">
            <text:p>0,00040312500000000000</text:p>
          </table:table-cell>
          <table:table-cell table:formula="of:=[.D389]-[.D38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9" office:value-type="float" office:value="3492" calcext:value-type="float">
            <text:p>349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404166666666667" calcext:value-type="float">
            <text:p>0,00040416666666666700</text:p>
          </table:table-cell>
          <table:table-cell table:formula="of:=[.D390]-[.D38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9" office:value-type="float" office:value="3501" calcext:value-type="float">
            <text:p>3501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405208333333333" calcext:value-type="float">
            <text:p>0,00040520833333333300</text:p>
          </table:table-cell>
          <table:table-cell table:formula="of:=[.D391]-[.D39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9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40625" calcext:value-type="float">
            <text:p>0,00040625000000000000</text:p>
          </table:table-cell>
          <table:table-cell table:formula="of:=[.D392]-[.D39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9" office:value-type="float" office:value="3519" calcext:value-type="float">
            <text:p>3519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407291666666667" calcext:value-type="float">
            <text:p>0,00040729166666666700</text:p>
          </table:table-cell>
          <table:table-cell table:formula="of:=[.D393]-[.D392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9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408333333333333" calcext:value-type="float">
            <text:p>0,00040833333333333300</text:p>
          </table:table-cell>
          <table:table-cell table:formula="of:=[.D394]-[.D39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9" office:value-type="float" office:value="3537" calcext:value-type="float">
            <text:p>3537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409375" calcext:value-type="float">
            <text:p>0,00040937500000000000</text:p>
          </table:table-cell>
          <table:table-cell table:formula="of:=[.D395]-[.D39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9" office:value-type="float" office:value="3546" calcext:value-type="float">
            <text:p>354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410416666666667" calcext:value-type="float">
            <text:p>0,00041041666666666700</text:p>
          </table:table-cell>
          <table:table-cell table:formula="of:=[.D396]-[.D39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9" office:value-type="float" office:value="3555" calcext:value-type="float">
            <text:p>355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411458333333333" calcext:value-type="float">
            <text:p>0,00041145833333333300</text:p>
          </table:table-cell>
          <table:table-cell table:formula="of:=[.D397]-[.D39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9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4125" calcext:value-type="float">
            <text:p>0,00041250000000000000</text:p>
          </table:table-cell>
          <table:table-cell table:formula="of:=[.D398]-[.D39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9" office:value-type="float" office:value="3573" calcext:value-type="float">
            <text:p>3573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413541666666667" calcext:value-type="float">
            <text:p>0,00041354166666666700</text:p>
          </table:table-cell>
          <table:table-cell table:formula="of:=[.D399]-[.D39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9" office:value-type="float" office:value="3582" calcext:value-type="float">
            <text:p>358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414583333333333" calcext:value-type="float">
            <text:p>0,00041458333333333300</text:p>
          </table:table-cell>
          <table:table-cell table:formula="of:=[.D400]-[.D39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9" office:value-type="float" office:value="3591" calcext:value-type="float">
            <text:p>3591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415625" calcext:value-type="float">
            <text:p>0,00041562500000000000</text:p>
          </table:table-cell>
          <table:table-cell table:formula="of:=[.D401]-[.D400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9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416666666666667" calcext:value-type="float">
            <text:p>0,00041666666666666700</text:p>
          </table:table-cell>
          <table:table-cell table:formula="of:=[.D402]-[.D40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9" office:value-type="float" office:value="3609" calcext:value-type="float">
            <text:p>3609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417708333333333" calcext:value-type="float">
            <text:p>0,00041770833333333300</text:p>
          </table:table-cell>
          <table:table-cell table:formula="of:=[.D403]-[.D40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9" office:value-type="float" office:value="3618" calcext:value-type="float">
            <text:p>361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41875" calcext:value-type="float">
            <text:p>0,00041875000000000000</text:p>
          </table:table-cell>
          <table:table-cell table:formula="of:=[.D404]-[.D40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9" office:value-type="float" office:value="3627" calcext:value-type="float">
            <text:p>3627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419791666666667" calcext:value-type="float">
            <text:p>0,00041979166666666700</text:p>
          </table:table-cell>
          <table:table-cell table:formula="of:=[.D405]-[.D40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9" office:value-type="float" office:value="3636" calcext:value-type="float">
            <text:p>363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420833333333333" calcext:value-type="float">
            <text:p>0,00042083333333333300</text:p>
          </table:table-cell>
          <table:table-cell table:formula="of:=[.D406]-[.D40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9" office:value-type="float" office:value="3645" calcext:value-type="float">
            <text:p>364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421875" calcext:value-type="float">
            <text:p>0,00042187500000000000</text:p>
          </table:table-cell>
          <table:table-cell table:formula="of:=[.D407]-[.D40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9" office:value-type="float" office:value="3654" calcext:value-type="float">
            <text:p>365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422916666666667" calcext:value-type="float">
            <text:p>0,00042291666666666700</text:p>
          </table:table-cell>
          <table:table-cell table:formula="of:=[.D408]-[.D40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9" office:value-type="float" office:value="3663" calcext:value-type="float">
            <text:p>3663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423958333333333" calcext:value-type="float">
            <text:p>0,00042395833333333300</text:p>
          </table:table-cell>
          <table:table-cell table:formula="of:=[.D409]-[.D40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9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425" calcext:value-type="float">
            <text:p>0,00042500000000000000</text:p>
          </table:table-cell>
          <table:table-cell table:formula="of:=[.D410]-[.D409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9" office:value-type="float" office:value="3681" calcext:value-type="float">
            <text:p>3681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426041666666667" calcext:value-type="float">
            <text:p>0,00042604166666666700</text:p>
          </table:table-cell>
          <table:table-cell table:formula="of:=[.D411]-[.D41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9" office:value-type="float" office:value="3690" calcext:value-type="float">
            <text:p>369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427083333333333" calcext:value-type="float">
            <text:p>0,00042708333333333300</text:p>
          </table:table-cell>
          <table:table-cell table:formula="of:=[.D412]-[.D41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9" office:value-type="float" office:value="3699" calcext:value-type="float">
            <text:p>3699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428125" calcext:value-type="float">
            <text:p>0,00042812500000000000</text:p>
          </table:table-cell>
          <table:table-cell table:formula="of:=[.D413]-[.D41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9" office:value-type="float" office:value="3708" calcext:value-type="float">
            <text:p>3708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429166666666667" calcext:value-type="float">
            <text:p>0,00042916666666666700</text:p>
          </table:table-cell>
          <table:table-cell table:formula="of:=[.D414]-[.D41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9" office:value-type="float" office:value="3717" calcext:value-type="float">
            <text:p>3717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430208333333333" calcext:value-type="float">
            <text:p>0,00043020833333333300</text:p>
          </table:table-cell>
          <table:table-cell table:formula="of:=[.D415]-[.D41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9" office:value-type="float" office:value="3726" calcext:value-type="float">
            <text:p>3726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43125" calcext:value-type="float">
            <text:p>0,00043125000000000000</text:p>
          </table:table-cell>
          <table:table-cell table:formula="of:=[.D416]-[.D41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9" office:value-type="float" office:value="3735" calcext:value-type="float">
            <text:p>373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432291666666667" calcext:value-type="float">
            <text:p>0,00043229166666666700</text:p>
          </table:table-cell>
          <table:table-cell table:formula="of:=[.D417]-[.D41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9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433333333333333" calcext:value-type="float">
            <text:p>0,00043333333333333300</text:p>
          </table:table-cell>
          <table:table-cell table:formula="of:=[.D418]-[.D41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9" office:value-type="float" office:value="3753" calcext:value-type="float">
            <text:p>3753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434375" calcext:value-type="float">
            <text:p>0,00043437500000000000</text:p>
          </table:table-cell>
          <table:table-cell table:formula="of:=[.D419]-[.D418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9" office:value-type="float" office:value="3762" calcext:value-type="float">
            <text:p>3762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435416666666667" calcext:value-type="float">
            <text:p>0,00043541666666666700</text:p>
          </table:table-cell>
          <table:table-cell table:formula="of:=[.D420]-[.D41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9" office:value-type="float" office:value="3771" calcext:value-type="float">
            <text:p>3771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436458333333333" calcext:value-type="float">
            <text:p>0,00043645833333333300</text:p>
          </table:table-cell>
          <table:table-cell table:formula="of:=[.D421]-[.D42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9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4375" calcext:value-type="float">
            <text:p>0,00043750000000000000</text:p>
          </table:table-cell>
          <table:table-cell table:formula="of:=[.D422]-[.D42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9" office:value-type="float" office:value="3789" calcext:value-type="float">
            <text:p>3789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438541666666667" calcext:value-type="float">
            <text:p>0,00043854166666666700</text:p>
          </table:table-cell>
          <table:table-cell table:formula="of:=[.D423]-[.D42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9" office:value-type="float" office:value="3798" calcext:value-type="float">
            <text:p>3798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439583333333333" calcext:value-type="float">
            <text:p>0,00043958333333333300</text:p>
          </table:table-cell>
          <table:table-cell table:formula="of:=[.D424]-[.D42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9" office:value-type="float" office:value="3807" calcext:value-type="float">
            <text:p>3807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440625" calcext:value-type="float">
            <text:p>0,00044062500000000000</text:p>
          </table:table-cell>
          <table:table-cell table:formula="of:=[.D425]-[.D42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9" office:value-type="float" office:value="3816" calcext:value-type="float">
            <text:p>3816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441666666666667" calcext:value-type="float">
            <text:p>0,00044166666666666700</text:p>
          </table:table-cell>
          <table:table-cell table:formula="of:=[.D426]-[.D42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9" office:value-type="float" office:value="3825" calcext:value-type="float">
            <text:p>38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442708333333333" calcext:value-type="float">
            <text:p>0,00044270833333333300</text:p>
          </table:table-cell>
          <table:table-cell table:formula="of:=[.D427]-[.D426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9" office:value-type="float" office:value="3834" calcext:value-type="float">
            <text:p>3834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44375" calcext:value-type="float">
            <text:p>0,00044375000000000000</text:p>
          </table:table-cell>
          <table:table-cell table:formula="of:=[.D428]-[.D42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9" office:value-type="float" office:value="3843" calcext:value-type="float">
            <text:p>3843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444791666666667" calcext:value-type="float">
            <text:p>0,00044479166666666700</text:p>
          </table:table-cell>
          <table:table-cell table:formula="of:=[.D429]-[.D42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9" office:value-type="float" office:value="3852" calcext:value-type="float">
            <text:p>3852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445833333333333" calcext:value-type="float">
            <text:p>0,00044583333333333300</text:p>
          </table:table-cell>
          <table:table-cell table:formula="of:=[.D430]-[.D42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9" office:value-type="float" office:value="3861" calcext:value-type="float">
            <text:p>3861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446875" calcext:value-type="float">
            <text:p>0,00044687500000000000</text:p>
          </table:table-cell>
          <table:table-cell table:formula="of:=[.D431]-[.D43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9" office:value-type="float" office:value="3870" calcext:value-type="float">
            <text:p>387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447916666666667" calcext:value-type="float">
            <text:p>0,00044791666666666700</text:p>
          </table:table-cell>
          <table:table-cell table:formula="of:=[.D432]-[.D43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9" office:value-type="float" office:value="3879" calcext:value-type="float">
            <text:p>3879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448958333333333" calcext:value-type="float">
            <text:p>0,00044895833333333300</text:p>
          </table:table-cell>
          <table:table-cell table:formula="of:=[.D433]-[.D43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9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45" calcext:value-type="float">
            <text:p>0,00045000000000000000</text:p>
          </table:table-cell>
          <table:table-cell table:formula="of:=[.D434]-[.D43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9" office:value-type="float" office:value="3897" calcext:value-type="float">
            <text:p>3897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451041666666667" calcext:value-type="float">
            <text:p>0,00045104166666666700</text:p>
          </table:table-cell>
          <table:table-cell table:formula="of:=[.D435]-[.D43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9" office:value-type="float" office:value="3906" calcext:value-type="float">
            <text:p>3906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452083333333333" calcext:value-type="float">
            <text:p>0,00045208333333333300</text:p>
          </table:table-cell>
          <table:table-cell table:formula="of:=[.D436]-[.D435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9" office:value-type="float" office:value="3915" calcext:value-type="float">
            <text:p>391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453125" calcext:value-type="float">
            <text:p>0,00045312500000000000</text:p>
          </table:table-cell>
          <table:table-cell table:formula="of:=[.D437]-[.D43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9" office:value-type="float" office:value="3924" calcext:value-type="float">
            <text:p>3924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454166666666667" calcext:value-type="float">
            <text:p>0,00045416666666666700</text:p>
          </table:table-cell>
          <table:table-cell table:formula="of:=[.D438]-[.D43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9" office:value-type="float" office:value="3933" calcext:value-type="float">
            <text:p>3933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455208333333333" calcext:value-type="float">
            <text:p>0,00045520833333333300</text:p>
          </table:table-cell>
          <table:table-cell table:formula="of:=[.D439]-[.D43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9" office:value-type="float" office:value="3942" calcext:value-type="float">
            <text:p>3942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45625" calcext:value-type="float">
            <text:p>0,00045625000000000000</text:p>
          </table:table-cell>
          <table:table-cell table:formula="of:=[.D440]-[.D43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9" office:value-type="float" office:value="3951" calcext:value-type="float">
            <text:p>3951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457291666666667" calcext:value-type="float">
            <text:p>0,00045729166666666700</text:p>
          </table:table-cell>
          <table:table-cell table:formula="of:=[.D441]-[.D44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9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458333333333333" calcext:value-type="float">
            <text:p>0,00045833333333333300</text:p>
          </table:table-cell>
          <table:table-cell table:formula="of:=[.D442]-[.D44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9" office:value-type="float" office:value="3969" calcext:value-type="float">
            <text:p>3969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459375" calcext:value-type="float">
            <text:p>0,00045937500000000000</text:p>
          </table:table-cell>
          <table:table-cell table:formula="of:=[.D443]-[.D44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9" office:value-type="float" office:value="3978" calcext:value-type="float">
            <text:p>3978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460416666666667" calcext:value-type="float">
            <text:p>0,00046041666666666700</text:p>
          </table:table-cell>
          <table:table-cell table:formula="of:=[.D444]-[.D443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9" office:value-type="float" office:value="3987" calcext:value-type="float">
            <text:p>3987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461458333333333" calcext:value-type="float">
            <text:p>0,00046145833333333300</text:p>
          </table:table-cell>
          <table:table-cell table:formula="of:=[.D445]-[.D44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9" office:value-type="float" office:value="3996" calcext:value-type="float">
            <text:p>3996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4625" calcext:value-type="float">
            <text:p>0,00046250000000000000</text:p>
          </table:table-cell>
          <table:table-cell table:formula="of:=[.D446]-[.D44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9" office:value-type="float" office:value="4005" calcext:value-type="float">
            <text:p>400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463541666666667" calcext:value-type="float">
            <text:p>0,00046354166666666700</text:p>
          </table:table-cell>
          <table:table-cell table:formula="of:=[.D447]-[.D44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9" office:value-type="float" office:value="4014" calcext:value-type="float">
            <text:p>4014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464583333333333" calcext:value-type="float">
            <text:p>0,00046458333333333300</text:p>
          </table:table-cell>
          <table:table-cell table:formula="of:=[.D448]-[.D44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9" office:value-type="float" office:value="4023" calcext:value-type="float">
            <text:p>4023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465625" calcext:value-type="float">
            <text:p>0,00046562500000000000</text:p>
          </table:table-cell>
          <table:table-cell table:formula="of:=[.D449]-[.D44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9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466666666666667" calcext:value-type="float">
            <text:p>0,00046666666666666700</text:p>
          </table:table-cell>
          <table:table-cell table:formula="of:=[.D450]-[.D44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9" office:value-type="float" office:value="4041" calcext:value-type="float">
            <text:p>4041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467708333333333" calcext:value-type="float">
            <text:p>0,00046770833333333300</text:p>
          </table:table-cell>
          <table:table-cell table:formula="of:=[.D451]-[.D45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9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46875" calcext:value-type="float">
            <text:p>0,00046875000000000000</text:p>
          </table:table-cell>
          <table:table-cell table:formula="of:=[.D452]-[.D45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9" office:value-type="float" office:value="4059" calcext:value-type="float">
            <text:p>4059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469791666666667" calcext:value-type="float">
            <text:p>0,00046979166666666700</text:p>
          </table:table-cell>
          <table:table-cell table:formula="of:=[.D453]-[.D452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9" office:value-type="float" office:value="4068" calcext:value-type="float">
            <text:p>4068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470833333333333" calcext:value-type="float">
            <text:p>0,00047083333333333300</text:p>
          </table:table-cell>
          <table:table-cell table:formula="of:=[.D454]-[.D45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9" office:value-type="float" office:value="4077" calcext:value-type="float">
            <text:p>4077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471875" calcext:value-type="float">
            <text:p>0,00047187500000000000</text:p>
          </table:table-cell>
          <table:table-cell table:formula="of:=[.D455]-[.D45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9" office:value-type="float" office:value="4086" calcext:value-type="float">
            <text:p>4086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472916666666667" calcext:value-type="float">
            <text:p>0,00047291666666666700</text:p>
          </table:table-cell>
          <table:table-cell table:formula="of:=[.D456]-[.D45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9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473958333333333" calcext:value-type="float">
            <text:p>0,00047395833333333300</text:p>
          </table:table-cell>
          <table:table-cell table:formula="of:=[.D457]-[.D45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9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475" calcext:value-type="float">
            <text:p>0,00047500000000000000</text:p>
          </table:table-cell>
          <table:table-cell table:formula="of:=[.D458]-[.D45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9" office:value-type="float" office:value="4113" calcext:value-type="float">
            <text:p>4113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476041666666667" calcext:value-type="float">
            <text:p>0,00047604166666666700</text:p>
          </table:table-cell>
          <table:table-cell table:formula="of:=[.D459]-[.D45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9" office:value-type="float" office:value="4122" calcext:value-type="float">
            <text:p>4122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477083333333333" calcext:value-type="float">
            <text:p>0,00047708333333333300</text:p>
          </table:table-cell>
          <table:table-cell table:formula="of:=[.D460]-[.D45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9" office:value-type="float" office:value="4131" calcext:value-type="float">
            <text:p>4131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478125" calcext:value-type="float">
            <text:p>0,00047812500000000000</text:p>
          </table:table-cell>
          <table:table-cell table:formula="of:=[.D461]-[.D46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9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479166666666667" calcext:value-type="float">
            <text:p>0,00047916666666666700</text:p>
          </table:table-cell>
          <table:table-cell table:formula="of:=[.D462]-[.D461]" office:value-type="float" office:value="0.00000104166666666671" calcext:value-type="float">
            <text:p>0,0000010416666666667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9" office:value-type="float" office:value="4149" calcext:value-type="float">
            <text:p>4149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480208333333333" calcext:value-type="float">
            <text:p>0,00048020833333333300</text:p>
          </table:table-cell>
          <table:table-cell table:formula="of:=[.D463]-[.D46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9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48125" calcext:value-type="float">
            <text:p>0,00048125000000000000</text:p>
          </table:table-cell>
          <table:table-cell table:formula="of:=[.D464]-[.D46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9" office:value-type="float" office:value="4167" calcext:value-type="float">
            <text:p>4167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482291666666667" calcext:value-type="float">
            <text:p>0,00048229166666666700</text:p>
          </table:table-cell>
          <table:table-cell table:formula="of:=[.D465]-[.D46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9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483333333333333" calcext:value-type="float">
            <text:p>0,00048333333333333300</text:p>
          </table:table-cell>
          <table:table-cell table:formula="of:=[.D466]-[.D46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9" office:value-type="float" office:value="4185" calcext:value-type="float">
            <text:p>418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484375" calcext:value-type="float">
            <text:p>0,00048437500000000000</text:p>
          </table:table-cell>
          <table:table-cell table:formula="of:=[.D467]-[.D46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9" office:value-type="float" office:value="4194" calcext:value-type="float">
            <text:p>4194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485416666666667" calcext:value-type="float">
            <text:p>0,00048541666666666700</text:p>
          </table:table-cell>
          <table:table-cell table:formula="of:=[.D468]-[.D46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9" office:value-type="float" office:value="4203" calcext:value-type="float">
            <text:p>4203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486458333333333" calcext:value-type="float">
            <text:p>0,00048645833333333300</text:p>
          </table:table-cell>
          <table:table-cell table:formula="of:=[.D469]-[.D46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9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4875" calcext:value-type="float">
            <text:p>0,00048750000000000000</text:p>
          </table:table-cell>
          <table:table-cell table:formula="of:=[.D470]-[.D46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9" office:value-type="float" office:value="4221" calcext:value-type="float">
            <text:p>4221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488541666666667" calcext:value-type="float">
            <text:p>0,00048854166666666700</text:p>
          </table:table-cell>
          <table:table-cell table:formula="of:=[.D471]-[.D47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9" office:value-type="float" office:value="4230" calcext:value-type="float">
            <text:p>423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489583333333333" calcext:value-type="float">
            <text:p>0,00048958333333333300</text:p>
          </table:table-cell>
          <table:table-cell table:formula="of:=[.D472]-[.D47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9" office:value-type="float" office:value="4239" calcext:value-type="float">
            <text:p>4239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490625" calcext:value-type="float">
            <text:p>0,00049062500000000000</text:p>
          </table:table-cell>
          <table:table-cell table:formula="of:=[.D473]-[.D47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9" office:value-type="float" office:value="4248" calcext:value-type="float">
            <text:p>4248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491666666666667" calcext:value-type="float">
            <text:p>0,00049166666666666700</text:p>
          </table:table-cell>
          <table:table-cell table:formula="of:=[.D474]-[.D47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9" office:value-type="float" office:value="4257" calcext:value-type="float">
            <text:p>4257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492708333333333" calcext:value-type="float">
            <text:p>0,00049270833333333300</text:p>
          </table:table-cell>
          <table:table-cell table:formula="of:=[.D475]-[.D47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9" office:value-type="float" office:value="4266" calcext:value-type="float">
            <text:p>4266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49375" calcext:value-type="float">
            <text:p>0,00049375000000000000</text:p>
          </table:table-cell>
          <table:table-cell table:formula="of:=[.D476]-[.D47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9" office:value-type="float" office:value="4275" calcext:value-type="float">
            <text:p>42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494791666666667" calcext:value-type="float">
            <text:p>0,00049479166666666700</text:p>
          </table:table-cell>
          <table:table-cell table:formula="of:=[.D477]-[.D47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9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495833333333333" calcext:value-type="float">
            <text:p>0,00049583333333333300</text:p>
          </table:table-cell>
          <table:table-cell table:formula="of:=[.D478]-[.D47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9" office:value-type="float" office:value="4293" calcext:value-type="float">
            <text:p>4293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496875" calcext:value-type="float">
            <text:p>0,00049687500000000000</text:p>
          </table:table-cell>
          <table:table-cell table:formula="of:=[.D479]-[.D47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9" office:value-type="float" office:value="4302" calcext:value-type="float">
            <text:p>4302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497916666666667" calcext:value-type="float">
            <text:p>0,00049791666666666700</text:p>
          </table:table-cell>
          <table:table-cell table:formula="of:=[.D480]-[.D47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9" office:value-type="float" office:value="4311" calcext:value-type="float">
            <text:p>4311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498958333333333" calcext:value-type="float">
            <text:p>0,00049895833333333300</text:p>
          </table:table-cell>
          <table:table-cell table:formula="of:=[.D481]-[.D48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9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5" calcext:value-type="float">
            <text:p>0,00050000000000000000</text:p>
          </table:table-cell>
          <table:table-cell table:formula="of:=[.D482]-[.D48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9" office:value-type="float" office:value="4329" calcext:value-type="float">
            <text:p>4329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501041666666667" calcext:value-type="float">
            <text:p>0,00050104166666666700</text:p>
          </table:table-cell>
          <table:table-cell table:formula="of:=[.D483]-[.D48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9" office:value-type="float" office:value="4338" calcext:value-type="float">
            <text:p>4338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502083333333333" calcext:value-type="float">
            <text:p>0,00050208333333333300</text:p>
          </table:table-cell>
          <table:table-cell table:formula="of:=[.D484]-[.D48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9" office:value-type="float" office:value="4347" calcext:value-type="float">
            <text:p>4347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503125" calcext:value-type="float">
            <text:p>0,00050312500000000000</text:p>
          </table:table-cell>
          <table:table-cell table:formula="of:=[.D485]-[.D48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9" office:value-type="float" office:value="4356" calcext:value-type="float">
            <text:p>4356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504166666666667" calcext:value-type="float">
            <text:p>0,00050416666666666700</text:p>
          </table:table-cell>
          <table:table-cell table:formula="of:=[.D486]-[.D48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9" office:value-type="float" office:value="4365" calcext:value-type="float">
            <text:p>436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505208333333333" calcext:value-type="float">
            <text:p>0,00050520833333333300</text:p>
          </table:table-cell>
          <table:table-cell table:formula="of:=[.D487]-[.D48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9" office:value-type="float" office:value="4374" calcext:value-type="float">
            <text:p>4374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50625" calcext:value-type="float">
            <text:p>0,00050625000000000000</text:p>
          </table:table-cell>
          <table:table-cell table:formula="of:=[.D488]-[.D48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9" office:value-type="float" office:value="4383" calcext:value-type="float">
            <text:p>4383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507291666666667" calcext:value-type="float">
            <text:p>0,00050729166666666700</text:p>
          </table:table-cell>
          <table:table-cell table:formula="of:=[.D489]-[.D48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9" office:value-type="float" office:value="4392" calcext:value-type="float">
            <text:p>4392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508333333333333" calcext:value-type="float">
            <text:p>0,00050833333333333300</text:p>
          </table:table-cell>
          <table:table-cell table:formula="of:=[.D490]-[.D48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9" office:value-type="float" office:value="4401" calcext:value-type="float">
            <text:p>4401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509375" calcext:value-type="float">
            <text:p>0,00050937500000000000</text:p>
          </table:table-cell>
          <table:table-cell table:formula="of:=[.D491]-[.D49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9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510416666666667" calcext:value-type="float">
            <text:p>0,00051041666666666700</text:p>
          </table:table-cell>
          <table:table-cell table:formula="of:=[.D492]-[.D49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9" office:value-type="float" office:value="4419" calcext:value-type="float">
            <text:p>4419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511458333333333" calcext:value-type="float">
            <text:p>0,00051145833333333300</text:p>
          </table:table-cell>
          <table:table-cell table:formula="of:=[.D493]-[.D49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9" office:value-type="float" office:value="4428" calcext:value-type="float">
            <text:p>4428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5125" calcext:value-type="float">
            <text:p>0,00051250000000000000</text:p>
          </table:table-cell>
          <table:table-cell table:formula="of:=[.D494]-[.D49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9" office:value-type="float" office:value="4437" calcext:value-type="float">
            <text:p>4437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513541666666667" calcext:value-type="float">
            <text:p>0,00051354166666666700</text:p>
          </table:table-cell>
          <table:table-cell table:formula="of:=[.D495]-[.D49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9" office:value-type="float" office:value="4446" calcext:value-type="float">
            <text:p>4446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514583333333333" calcext:value-type="float">
            <text:p>0,00051458333333333300</text:p>
          </table:table-cell>
          <table:table-cell table:formula="of:=[.D496]-[.D49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9" office:value-type="float" office:value="4455" calcext:value-type="float">
            <text:p>445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515625" calcext:value-type="float">
            <text:p>0,00051562500000000000</text:p>
          </table:table-cell>
          <table:table-cell table:formula="of:=[.D497]-[.D49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9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516666666666667" calcext:value-type="float">
            <text:p>0,00051666666666666700</text:p>
          </table:table-cell>
          <table:table-cell table:formula="of:=[.D498]-[.D49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9" office:value-type="float" office:value="4473" calcext:value-type="float">
            <text:p>4473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517708333333333" calcext:value-type="float">
            <text:p>0,00051770833333333300</text:p>
          </table:table-cell>
          <table:table-cell table:formula="of:=[.D499]-[.D49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9" office:value-type="float" office:value="4482" calcext:value-type="float">
            <text:p>4482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51875" calcext:value-type="float">
            <text:p>0,00051875000000000000</text:p>
          </table:table-cell>
          <table:table-cell table:formula="of:=[.D500]-[.D49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9" office:value-type="float" office:value="4491" calcext:value-type="float">
            <text:p>4491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519791666666667" calcext:value-type="float">
            <text:p>0,00051979166666666700</text:p>
          </table:table-cell>
          <table:table-cell table:formula="of:=[.D501]-[.D50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9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520833333333333" calcext:value-type="float">
            <text:p>0,00052083333333333300</text:p>
          </table:table-cell>
          <table:table-cell table:formula="of:=[.D502]-[.D50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9" office:value-type="float" office:value="4509" calcext:value-type="float">
            <text:p>4509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521875" calcext:value-type="float">
            <text:p>0,00052187500000000000</text:p>
          </table:table-cell>
          <table:table-cell table:formula="of:=[.D503]-[.D50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9" office:value-type="float" office:value="4518" calcext:value-type="float">
            <text:p>4518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522916666666667" calcext:value-type="float">
            <text:p>0,00052291666666666700</text:p>
          </table:table-cell>
          <table:table-cell table:formula="of:=[.D504]-[.D50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9" office:value-type="float" office:value="4527" calcext:value-type="float">
            <text:p>4527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523958333333333" calcext:value-type="float">
            <text:p>0,00052395833333333300</text:p>
          </table:table-cell>
          <table:table-cell table:formula="of:=[.D505]-[.D50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9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525" calcext:value-type="float">
            <text:p>0,00052500000000000000</text:p>
          </table:table-cell>
          <table:table-cell table:formula="of:=[.D506]-[.D50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9" office:value-type="float" office:value="4545" calcext:value-type="float">
            <text:p>454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526041666666667" calcext:value-type="float">
            <text:p>0,00052604166666666700</text:p>
          </table:table-cell>
          <table:table-cell table:formula="of:=[.D507]-[.D50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9" office:value-type="float" office:value="4554" calcext:value-type="float">
            <text:p>4554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527083333333333" calcext:value-type="float">
            <text:p>0,00052708333333333300</text:p>
          </table:table-cell>
          <table:table-cell table:formula="of:=[.D508]-[.D50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9" office:value-type="float" office:value="4563" calcext:value-type="float">
            <text:p>4563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528125" calcext:value-type="float">
            <text:p>0,00052812500000000000</text:p>
          </table:table-cell>
          <table:table-cell table:formula="of:=[.D509]-[.D50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9" office:value-type="float" office:value="4572" calcext:value-type="float">
            <text:p>4572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529166666666667" calcext:value-type="float">
            <text:p>0,00052916666666666700</text:p>
          </table:table-cell>
          <table:table-cell table:formula="of:=[.D510]-[.D50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9" office:value-type="float" office:value="4581" calcext:value-type="float">
            <text:p>4581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0530208333333333" calcext:value-type="float">
            <text:p>0,00053020833333333300</text:p>
          </table:table-cell>
          <table:table-cell table:formula="of:=[.D511]-[.D51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9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053125" calcext:value-type="float">
            <text:p>0,00053125000000000000</text:p>
          </table:table-cell>
          <table:table-cell table:formula="of:=[.D512]-[.D51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9" office:value-type="float" office:value="4599" calcext:value-type="float">
            <text:p>4599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0532291666666667" calcext:value-type="float">
            <text:p>0,00053229166666666700</text:p>
          </table:table-cell>
          <table:table-cell table:formula="of:=[.D513]-[.D51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9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0533333333333333" calcext:value-type="float">
            <text:p>0,00053333333333333300</text:p>
          </table:table-cell>
          <table:table-cell table:formula="of:=[.D514]-[.D51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9" office:value-type="float" office:value="4617" calcext:value-type="float">
            <text:p>4617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0534375" calcext:value-type="float">
            <text:p>0,00053437500000000000</text:p>
          </table:table-cell>
          <table:table-cell table:formula="of:=[.D515]-[.D51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9" office:value-type="float" office:value="4626" calcext:value-type="float">
            <text:p>4626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0535416666666667" calcext:value-type="float">
            <text:p>0,00053541666666666700</text:p>
          </table:table-cell>
          <table:table-cell table:formula="of:=[.D516]-[.D51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9" office:value-type="float" office:value="4635" calcext:value-type="float">
            <text:p>463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0536458333333333" calcext:value-type="float">
            <text:p>0,00053645833333333300</text:p>
          </table:table-cell>
          <table:table-cell table:formula="of:=[.D517]-[.D51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9" office:value-type="float" office:value="4644" calcext:value-type="float">
            <text:p>4644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05375" calcext:value-type="float">
            <text:p>0,00053750000000000000</text:p>
          </table:table-cell>
          <table:table-cell table:formula="of:=[.D518]-[.D51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9" office:value-type="float" office:value="4653" calcext:value-type="float">
            <text:p>4653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0538541666666667" calcext:value-type="float">
            <text:p>0,00053854166666666700</text:p>
          </table:table-cell>
          <table:table-cell table:formula="of:=[.D519]-[.D51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9" office:value-type="float" office:value="4662" calcext:value-type="float">
            <text:p>4662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0539583333333333" calcext:value-type="float">
            <text:p>0,00053958333333333300</text:p>
          </table:table-cell>
          <table:table-cell table:formula="of:=[.D520]-[.D51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9" office:value-type="float" office:value="4671" calcext:value-type="float">
            <text:p>4671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0540625" calcext:value-type="float">
            <text:p>0,00054062500000000000</text:p>
          </table:table-cell>
          <table:table-cell table:formula="of:=[.D521]-[.D52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9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0541666666666667" calcext:value-type="float">
            <text:p>0,00054166666666666700</text:p>
          </table:table-cell>
          <table:table-cell table:formula="of:=[.D522]-[.D52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9" office:value-type="float" office:value="4689" calcext:value-type="float">
            <text:p>4689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0542708333333333" calcext:value-type="float">
            <text:p>0,00054270833333333300</text:p>
          </table:table-cell>
          <table:table-cell table:formula="of:=[.D523]-[.D52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9" office:value-type="float" office:value="4698" calcext:value-type="float">
            <text:p>4698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054375" calcext:value-type="float">
            <text:p>0,00054375000000000000</text:p>
          </table:table-cell>
          <table:table-cell table:formula="of:=[.D524]-[.D52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9" office:value-type="float" office:value="4707" calcext:value-type="float">
            <text:p>4707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0544791666666667" calcext:value-type="float">
            <text:p>0,00054479166666666700</text:p>
          </table:table-cell>
          <table:table-cell table:formula="of:=[.D525]-[.D52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9" office:value-type="float" office:value="4716" calcext:value-type="float">
            <text:p>4716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0545833333333333" calcext:value-type="float">
            <text:p>0,00054583333333333300</text:p>
          </table:table-cell>
          <table:table-cell table:formula="of:=[.D526]-[.D52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9" office:value-type="float" office:value="4725" calcext:value-type="float">
            <text:p>472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0546875" calcext:value-type="float">
            <text:p>0,00054687500000000000</text:p>
          </table:table-cell>
          <table:table-cell table:formula="of:=[.D527]-[.D52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9" office:value-type="float" office:value="4734" calcext:value-type="float">
            <text:p>4734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0547916666666667" calcext:value-type="float">
            <text:p>0,00054791666666666700</text:p>
          </table:table-cell>
          <table:table-cell table:formula="of:=[.D528]-[.D52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9" office:value-type="float" office:value="4743" calcext:value-type="float">
            <text:p>4743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0548958333333333" calcext:value-type="float">
            <text:p>0,00054895833333333300</text:p>
          </table:table-cell>
          <table:table-cell table:formula="of:=[.D529]-[.D52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9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055" calcext:value-type="float">
            <text:p>0,00055000000000000000</text:p>
          </table:table-cell>
          <table:table-cell table:formula="of:=[.D530]-[.D52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9" office:value-type="float" office:value="4761" calcext:value-type="float">
            <text:p>4761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0551041666666667" calcext:value-type="float">
            <text:p>0,00055104166666666700</text:p>
          </table:table-cell>
          <table:table-cell table:formula="of:=[.D531]-[.D53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9" office:value-type="float" office:value="4770" calcext:value-type="float">
            <text:p>477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0552083333333333" calcext:value-type="float">
            <text:p>0,00055208333333333300</text:p>
          </table:table-cell>
          <table:table-cell table:formula="of:=[.D532]-[.D53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9" office:value-type="float" office:value="4779" calcext:value-type="float">
            <text:p>4779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0553125" calcext:value-type="float">
            <text:p>0,00055312500000000000</text:p>
          </table:table-cell>
          <table:table-cell table:formula="of:=[.D533]-[.D53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9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0554166666666667" calcext:value-type="float">
            <text:p>0,00055416666666666700</text:p>
          </table:table-cell>
          <table:table-cell table:formula="of:=[.D534]-[.D53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9" office:value-type="float" office:value="4797" calcext:value-type="float">
            <text:p>4797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0555208333333333" calcext:value-type="float">
            <text:p>0,00055520833333333300</text:p>
          </table:table-cell>
          <table:table-cell table:formula="of:=[.D535]-[.D53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9" office:value-type="float" office:value="4806" calcext:value-type="float">
            <text:p>4806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055625" calcext:value-type="float">
            <text:p>0,00055625000000000000</text:p>
          </table:table-cell>
          <table:table-cell table:formula="of:=[.D536]-[.D53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9" office:value-type="float" office:value="4815" calcext:value-type="float">
            <text:p>481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0557291666666667" calcext:value-type="float">
            <text:p>0,00055729166666666700</text:p>
          </table:table-cell>
          <table:table-cell table:formula="of:=[.D537]-[.D53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9" office:value-type="float" office:value="4824" calcext:value-type="float">
            <text:p>4824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0558333333333333" calcext:value-type="float">
            <text:p>0,00055833333333333300</text:p>
          </table:table-cell>
          <table:table-cell table:formula="of:=[.D538]-[.D53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9" office:value-type="float" office:value="4833" calcext:value-type="float">
            <text:p>4833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0559375" calcext:value-type="float">
            <text:p>0,00055937500000000000</text:p>
          </table:table-cell>
          <table:table-cell table:formula="of:=[.D539]-[.D53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9" office:value-type="float" office:value="4842" calcext:value-type="float">
            <text:p>4842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0560416666666667" calcext:value-type="float">
            <text:p>0,00056041666666666700</text:p>
          </table:table-cell>
          <table:table-cell table:formula="of:=[.D540]-[.D53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9" office:value-type="float" office:value="4851" calcext:value-type="float">
            <text:p>4851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0561458333333333" calcext:value-type="float">
            <text:p>0,00056145833333333300</text:p>
          </table:table-cell>
          <table:table-cell table:formula="of:=[.D541]-[.D54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9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05625" calcext:value-type="float">
            <text:p>0,00056250000000000000</text:p>
          </table:table-cell>
          <table:table-cell table:formula="of:=[.D542]-[.D54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9" office:value-type="float" office:value="4869" calcext:value-type="float">
            <text:p>4869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0563541666666667" calcext:value-type="float">
            <text:p>0,00056354166666666700</text:p>
          </table:table-cell>
          <table:table-cell table:formula="of:=[.D543]-[.D54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9" office:value-type="float" office:value="4878" calcext:value-type="float">
            <text:p>4878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0564583333333333" calcext:value-type="float">
            <text:p>0,00056458333333333300</text:p>
          </table:table-cell>
          <table:table-cell table:formula="of:=[.D544]-[.D54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9" office:value-type="float" office:value="4887" calcext:value-type="float">
            <text:p>4887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0565625" calcext:value-type="float">
            <text:p>0,00056562500000000000</text:p>
          </table:table-cell>
          <table:table-cell table:formula="of:=[.D545]-[.D54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9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0566666666666667" calcext:value-type="float">
            <text:p>0,00056666666666666700</text:p>
          </table:table-cell>
          <table:table-cell table:formula="of:=[.D546]-[.D54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9" office:value-type="float" office:value="4905" calcext:value-type="float">
            <text:p>490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0567708333333333" calcext:value-type="float">
            <text:p>0,00056770833333333300</text:p>
          </table:table-cell>
          <table:table-cell table:formula="of:=[.D547]-[.D54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9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056875" calcext:value-type="float">
            <text:p>0,00056875000000000000</text:p>
          </table:table-cell>
          <table:table-cell table:formula="of:=[.D548]-[.D54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9" office:value-type="float" office:value="4923" calcext:value-type="float">
            <text:p>4923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0569791666666667" calcext:value-type="float">
            <text:p>0,00056979166666666700</text:p>
          </table:table-cell>
          <table:table-cell table:formula="of:=[.D549]-[.D54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9" office:value-type="float" office:value="4932" calcext:value-type="float">
            <text:p>4932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0570833333333333" calcext:value-type="float">
            <text:p>0,00057083333333333300</text:p>
          </table:table-cell>
          <table:table-cell table:formula="of:=[.D550]-[.D54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9" office:value-type="float" office:value="4941" calcext:value-type="float">
            <text:p>4941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0571875" calcext:value-type="float">
            <text:p>0,00057187500000000000</text:p>
          </table:table-cell>
          <table:table-cell table:formula="of:=[.D551]-[.D55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9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0572916666666667" calcext:value-type="float">
            <text:p>0,00057291666666666700</text:p>
          </table:table-cell>
          <table:table-cell table:formula="of:=[.D552]-[.D55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9" office:value-type="float" office:value="4959" calcext:value-type="float">
            <text:p>4959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0573958333333333" calcext:value-type="float">
            <text:p>0,00057395833333333300</text:p>
          </table:table-cell>
          <table:table-cell table:formula="of:=[.D553]-[.D55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9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0575" calcext:value-type="float">
            <text:p>0,00057500000000000000</text:p>
          </table:table-cell>
          <table:table-cell table:formula="of:=[.D554]-[.D55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9" office:value-type="float" office:value="4977" calcext:value-type="float">
            <text:p>4977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0576041666666667" calcext:value-type="float">
            <text:p>0,00057604166666666700</text:p>
          </table:table-cell>
          <table:table-cell table:formula="of:=[.D555]-[.D55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9" office:value-type="float" office:value="4986" calcext:value-type="float">
            <text:p>4986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0577083333333333" calcext:value-type="float">
            <text:p>0,00057708333333333300</text:p>
          </table:table-cell>
          <table:table-cell table:formula="of:=[.D556]-[.D55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9" office:value-type="float" office:value="4995" calcext:value-type="float">
            <text:p>499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0578125" calcext:value-type="float">
            <text:p>0,00057812500000000000</text:p>
          </table:table-cell>
          <table:table-cell table:formula="of:=[.D557]-[.D55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9" office:value-type="float" office:value="5004" calcext:value-type="float">
            <text:p>5004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0579166666666667" calcext:value-type="float">
            <text:p>0,00057916666666666700</text:p>
          </table:table-cell>
          <table:table-cell table:formula="of:=[.D558]-[.D55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9" office:value-type="float" office:value="5013" calcext:value-type="float">
            <text:p>5013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0580208333333333" calcext:value-type="float">
            <text:p>0,00058020833333333300</text:p>
          </table:table-cell>
          <table:table-cell table:formula="of:=[.D559]-[.D55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9" office:value-type="float" office:value="5022" calcext:value-type="float">
            <text:p>5022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058125" calcext:value-type="float">
            <text:p>0,00058125000000000000</text:p>
          </table:table-cell>
          <table:table-cell table:formula="of:=[.D560]-[.D55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9" office:value-type="float" office:value="5031" calcext:value-type="float">
            <text:p>5031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0582291666666667" calcext:value-type="float">
            <text:p>0,00058229166666666700</text:p>
          </table:table-cell>
          <table:table-cell table:formula="of:=[.D561]-[.D56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9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0583333333333333" calcext:value-type="float">
            <text:p>0,00058333333333333300</text:p>
          </table:table-cell>
          <table:table-cell table:formula="of:=[.D562]-[.D56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9" office:value-type="float" office:value="5049" calcext:value-type="float">
            <text:p>5049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0584375" calcext:value-type="float">
            <text:p>0,00058437500000000000</text:p>
          </table:table-cell>
          <table:table-cell table:formula="of:=[.D563]-[.D56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9" office:value-type="float" office:value="5058" calcext:value-type="float">
            <text:p>5058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0585416666666667" calcext:value-type="float">
            <text:p>0,00058541666666666700</text:p>
          </table:table-cell>
          <table:table-cell table:formula="of:=[.D564]-[.D56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9" office:value-type="float" office:value="5067" calcext:value-type="float">
            <text:p>5067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0586458333333333" calcext:value-type="float">
            <text:p>0,00058645833333333300</text:p>
          </table:table-cell>
          <table:table-cell table:formula="of:=[.D565]-[.D56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9" office:value-type="float" office:value="5076" calcext:value-type="float">
            <text:p>5076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05875" calcext:value-type="float">
            <text:p>0,00058750000000000000</text:p>
          </table:table-cell>
          <table:table-cell table:formula="of:=[.D566]-[.D56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9" office:value-type="float" office:value="5085" calcext:value-type="float">
            <text:p>508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0588541666666667" calcext:value-type="float">
            <text:p>0,00058854166666666700</text:p>
          </table:table-cell>
          <table:table-cell table:formula="of:=[.D567]-[.D56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9" office:value-type="float" office:value="5094" calcext:value-type="float">
            <text:p>5094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0589583333333333" calcext:value-type="float">
            <text:p>0,00058958333333333300</text:p>
          </table:table-cell>
          <table:table-cell table:formula="of:=[.D568]-[.D56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9" office:value-type="float" office:value="5103" calcext:value-type="float">
            <text:p>5103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0590625" calcext:value-type="float">
            <text:p>0,00059062500000000000</text:p>
          </table:table-cell>
          <table:table-cell table:formula="of:=[.D569]-[.D56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9" office:value-type="float" office:value="5112" calcext:value-type="float">
            <text:p>5112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0591666666666667" calcext:value-type="float">
            <text:p>0,00059166666666666700</text:p>
          </table:table-cell>
          <table:table-cell table:formula="of:=[.D570]-[.D56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9" office:value-type="float" office:value="5121" calcext:value-type="float">
            <text:p>5121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0592708333333333" calcext:value-type="float">
            <text:p>0,00059270833333333300</text:p>
          </table:table-cell>
          <table:table-cell table:formula="of:=[.D571]-[.D57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9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059375" calcext:value-type="float">
            <text:p>0,00059375000000000000</text:p>
          </table:table-cell>
          <table:table-cell table:formula="of:=[.D572]-[.D57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9" office:value-type="float" office:value="5139" calcext:value-type="float">
            <text:p>5139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0594791666666667" calcext:value-type="float">
            <text:p>0,00059479166666666700</text:p>
          </table:table-cell>
          <table:table-cell table:formula="of:=[.D573]-[.D57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9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0595833333333333" calcext:value-type="float">
            <text:p>0,00059583333333333300</text:p>
          </table:table-cell>
          <table:table-cell table:formula="of:=[.D574]-[.D57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9" office:value-type="float" office:value="5157" calcext:value-type="float">
            <text:p>5157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0596875" calcext:value-type="float">
            <text:p>0,00059687500000000000</text:p>
          </table:table-cell>
          <table:table-cell table:formula="of:=[.D575]-[.D57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9" office:value-type="float" office:value="5166" calcext:value-type="float">
            <text:p>5166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0597916666666667" calcext:value-type="float">
            <text:p>0,00059791666666666700</text:p>
          </table:table-cell>
          <table:table-cell table:formula="of:=[.D576]-[.D57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9" office:value-type="float" office:value="5175" calcext:value-type="float">
            <text:p>517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0598958333333333" calcext:value-type="float">
            <text:p>0,00059895833333333300</text:p>
          </table:table-cell>
          <table:table-cell table:formula="of:=[.D577]-[.D57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9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06" calcext:value-type="float">
            <text:p>0,00060000000000000000</text:p>
          </table:table-cell>
          <table:table-cell table:formula="of:=[.D578]-[.D57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9" office:value-type="float" office:value="5193" calcext:value-type="float">
            <text:p>5193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0601041666666667" calcext:value-type="float">
            <text:p>0,00060104166666666700</text:p>
          </table:table-cell>
          <table:table-cell table:formula="of:=[.D579]-[.D57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9" office:value-type="float" office:value="5202" calcext:value-type="float">
            <text:p>5202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0602083333333333" calcext:value-type="float">
            <text:p>0,00060208333333333300</text:p>
          </table:table-cell>
          <table:table-cell table:formula="of:=[.D580]-[.D57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9" office:value-type="float" office:value="5211" calcext:value-type="float">
            <text:p>5211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0603125" calcext:value-type="float">
            <text:p>0,00060312500000000000</text:p>
          </table:table-cell>
          <table:table-cell table:formula="of:=[.D581]-[.D58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9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0604166666666667" calcext:value-type="float">
            <text:p>0,00060416666666666700</text:p>
          </table:table-cell>
          <table:table-cell table:formula="of:=[.D582]-[.D58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9" office:value-type="float" office:value="5229" calcext:value-type="float">
            <text:p>5229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0605208333333333" calcext:value-type="float">
            <text:p>0,00060520833333333300</text:p>
          </table:table-cell>
          <table:table-cell table:formula="of:=[.D583]-[.D58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9" office:value-type="float" office:value="5238" calcext:value-type="float">
            <text:p>5238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060625" calcext:value-type="float">
            <text:p>0,00060625000000000000</text:p>
          </table:table-cell>
          <table:table-cell table:formula="of:=[.D584]-[.D58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9" office:value-type="float" office:value="5247" calcext:value-type="float">
            <text:p>5247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0607291666666667" calcext:value-type="float">
            <text:p>0,00060729166666666700</text:p>
          </table:table-cell>
          <table:table-cell table:formula="of:=[.D585]-[.D58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9" office:value-type="float" office:value="5256" calcext:value-type="float">
            <text:p>5256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0608333333333333" calcext:value-type="float">
            <text:p>0,00060833333333333300</text:p>
          </table:table-cell>
          <table:table-cell table:formula="of:=[.D586]-[.D58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9" office:value-type="float" office:value="5265" calcext:value-type="float">
            <text:p>526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0609375" calcext:value-type="float">
            <text:p>0,00060937500000000000</text:p>
          </table:table-cell>
          <table:table-cell table:formula="of:=[.D587]-[.D58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9" office:value-type="float" office:value="5274" calcext:value-type="float">
            <text:p>5274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0610416666666667" calcext:value-type="float">
            <text:p>0,00061041666666666700</text:p>
          </table:table-cell>
          <table:table-cell table:formula="of:=[.D588]-[.D58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9" office:value-type="float" office:value="5283" calcext:value-type="float">
            <text:p>5283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0611458333333333" calcext:value-type="float">
            <text:p>0,00061145833333333300</text:p>
          </table:table-cell>
          <table:table-cell table:formula="of:=[.D589]-[.D58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9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06125" calcext:value-type="float">
            <text:p>0,00061250000000000000</text:p>
          </table:table-cell>
          <table:table-cell table:formula="of:=[.D590]-[.D58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9" office:value-type="float" office:value="5301" calcext:value-type="float">
            <text:p>5301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0613541666666667" calcext:value-type="float">
            <text:p>0,00061354166666666700</text:p>
          </table:table-cell>
          <table:table-cell table:formula="of:=[.D591]-[.D59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9" office:value-type="float" office:value="5310" calcext:value-type="float">
            <text:p>531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0614583333333333" calcext:value-type="float">
            <text:p>0,00061458333333333300</text:p>
          </table:table-cell>
          <table:table-cell table:formula="of:=[.D592]-[.D59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9" office:value-type="float" office:value="5319" calcext:value-type="float">
            <text:p>5319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0615625" calcext:value-type="float">
            <text:p>0,00061562500000000000</text:p>
          </table:table-cell>
          <table:table-cell table:formula="of:=[.D593]-[.D59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9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0616666666666667" calcext:value-type="float">
            <text:p>0,00061666666666666700</text:p>
          </table:table-cell>
          <table:table-cell table:formula="of:=[.D594]-[.D59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9" office:value-type="float" office:value="5337" calcext:value-type="float">
            <text:p>5337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0617708333333333" calcext:value-type="float">
            <text:p>0,00061770833333333300</text:p>
          </table:table-cell>
          <table:table-cell table:formula="of:=[.D595]-[.D59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9" office:value-type="float" office:value="5346" calcext:value-type="float">
            <text:p>5346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061875" calcext:value-type="float">
            <text:p>0,00061875000000000000</text:p>
          </table:table-cell>
          <table:table-cell table:formula="of:=[.D596]-[.D59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9" office:value-type="float" office:value="5355" calcext:value-type="float">
            <text:p>535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0619791666666667" calcext:value-type="float">
            <text:p>0,00061979166666666700</text:p>
          </table:table-cell>
          <table:table-cell table:formula="of:=[.D597]-[.D59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9" office:value-type="float" office:value="5364" calcext:value-type="float">
            <text:p>5364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0620833333333333" calcext:value-type="float">
            <text:p>0,00062083333333333300</text:p>
          </table:table-cell>
          <table:table-cell table:formula="of:=[.D598]-[.D59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9" office:value-type="float" office:value="5373" calcext:value-type="float">
            <text:p>5373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0621875" calcext:value-type="float">
            <text:p>0,00062187500000000000</text:p>
          </table:table-cell>
          <table:table-cell table:formula="of:=[.D599]-[.D59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9" office:value-type="float" office:value="5382" calcext:value-type="float">
            <text:p>5382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0622916666666667" calcext:value-type="float">
            <text:p>0,00062291666666666700</text:p>
          </table:table-cell>
          <table:table-cell table:formula="of:=[.D600]-[.D59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9" office:value-type="float" office:value="5391" calcext:value-type="float">
            <text:p>5391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0623958333333333" calcext:value-type="float">
            <text:p>0,00062395833333333300</text:p>
          </table:table-cell>
          <table:table-cell table:formula="of:=[.D601]-[.D60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9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0625" calcext:value-type="float">
            <text:p>0,00062500000000000000</text:p>
          </table:table-cell>
          <table:table-cell table:formula="of:=[.D602]-[.D60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9" office:value-type="float" office:value="5409" calcext:value-type="float">
            <text:p>5409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0626041666666667" calcext:value-type="float">
            <text:p>0,00062604166666666700</text:p>
          </table:table-cell>
          <table:table-cell table:formula="of:=[.D603]-[.D60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9" office:value-type="float" office:value="5418" calcext:value-type="float">
            <text:p>5418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0627083333333333" calcext:value-type="float">
            <text:p>0,00062708333333333300</text:p>
          </table:table-cell>
          <table:table-cell table:formula="of:=[.D604]-[.D60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9" office:value-type="float" office:value="5427" calcext:value-type="float">
            <text:p>5427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0628125" calcext:value-type="float">
            <text:p>0,00062812500000000000</text:p>
          </table:table-cell>
          <table:table-cell table:formula="of:=[.D605]-[.D60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9" office:value-type="float" office:value="5436" calcext:value-type="float">
            <text:p>5436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0629166666666667" calcext:value-type="float">
            <text:p>0,00062916666666666700</text:p>
          </table:table-cell>
          <table:table-cell table:formula="of:=[.D606]-[.D60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9" office:value-type="float" office:value="5445" calcext:value-type="float">
            <text:p>544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0630208333333333" calcext:value-type="float">
            <text:p>0,00063020833333333300</text:p>
          </table:table-cell>
          <table:table-cell table:formula="of:=[.D607]-[.D60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9" office:value-type="float" office:value="5454" calcext:value-type="float">
            <text:p>5454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063125" calcext:value-type="float">
            <text:p>0,00063125000000000000</text:p>
          </table:table-cell>
          <table:table-cell table:formula="of:=[.D608]-[.D60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9" office:value-type="float" office:value="5463" calcext:value-type="float">
            <text:p>5463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0632291666666667" calcext:value-type="float">
            <text:p>0,00063229166666666700</text:p>
          </table:table-cell>
          <table:table-cell table:formula="of:=[.D609]-[.D60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9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0633333333333333" calcext:value-type="float">
            <text:p>0,00063333333333333300</text:p>
          </table:table-cell>
          <table:table-cell table:formula="of:=[.D610]-[.D60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9" office:value-type="float" office:value="5481" calcext:value-type="float">
            <text:p>5481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0634375" calcext:value-type="float">
            <text:p>0,00063437500000000000</text:p>
          </table:table-cell>
          <table:table-cell table:formula="of:=[.D611]-[.D61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9" office:value-type="float" office:value="5490" calcext:value-type="float">
            <text:p>549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0635416666666667" calcext:value-type="float">
            <text:p>0,00063541666666666700</text:p>
          </table:table-cell>
          <table:table-cell table:formula="of:=[.D612]-[.D61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9" office:value-type="float" office:value="5499" calcext:value-type="float">
            <text:p>5499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0636458333333333" calcext:value-type="float">
            <text:p>0,00063645833333333300</text:p>
          </table:table-cell>
          <table:table-cell table:formula="of:=[.D613]-[.D61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9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06375" calcext:value-type="float">
            <text:p>0,00063750000000000000</text:p>
          </table:table-cell>
          <table:table-cell table:formula="of:=[.D614]-[.D61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9" office:value-type="float" office:value="5517" calcext:value-type="float">
            <text:p>5517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0638541666666667" calcext:value-type="float">
            <text:p>0,00063854166666666700</text:p>
          </table:table-cell>
          <table:table-cell table:formula="of:=[.D615]-[.D61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9" office:value-type="float" office:value="5526" calcext:value-type="float">
            <text:p>5526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0639583333333333" calcext:value-type="float">
            <text:p>0,00063958333333333300</text:p>
          </table:table-cell>
          <table:table-cell table:formula="of:=[.D616]-[.D61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9" office:value-type="float" office:value="5535" calcext:value-type="float">
            <text:p>553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0640625" calcext:value-type="float">
            <text:p>0,00064062500000000000</text:p>
          </table:table-cell>
          <table:table-cell table:formula="of:=[.D617]-[.D61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9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0641666666666667" calcext:value-type="float">
            <text:p>0,00064166666666666700</text:p>
          </table:table-cell>
          <table:table-cell table:formula="of:=[.D618]-[.D61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9" office:value-type="float" office:value="5553" calcext:value-type="float">
            <text:p>5553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0642708333333333" calcext:value-type="float">
            <text:p>0,00064270833333333300</text:p>
          </table:table-cell>
          <table:table-cell table:formula="of:=[.D619]-[.D61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9" office:value-type="float" office:value="5562" calcext:value-type="float">
            <text:p>5562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064375" calcext:value-type="float">
            <text:p>0,00064375000000000000</text:p>
          </table:table-cell>
          <table:table-cell table:formula="of:=[.D620]-[.D61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9" office:value-type="float" office:value="5571" calcext:value-type="float">
            <text:p>5571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0644791666666667" calcext:value-type="float">
            <text:p>0,00064479166666666700</text:p>
          </table:table-cell>
          <table:table-cell table:formula="of:=[.D621]-[.D62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9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0645833333333333" calcext:value-type="float">
            <text:p>0,00064583333333333300</text:p>
          </table:table-cell>
          <table:table-cell table:formula="of:=[.D622]-[.D62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9" office:value-type="float" office:value="5589" calcext:value-type="float">
            <text:p>5589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0646875" calcext:value-type="float">
            <text:p>0,00064687500000000000</text:p>
          </table:table-cell>
          <table:table-cell table:formula="of:=[.D623]-[.D62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9" office:value-type="float" office:value="5598" calcext:value-type="float">
            <text:p>5598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0647916666666667" calcext:value-type="float">
            <text:p>0,00064791666666666700</text:p>
          </table:table-cell>
          <table:table-cell table:formula="of:=[.D624]-[.D62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9" office:value-type="float" office:value="5607" calcext:value-type="float">
            <text:p>5607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0648958333333333" calcext:value-type="float">
            <text:p>0,00064895833333333300</text:p>
          </table:table-cell>
          <table:table-cell table:formula="of:=[.D625]-[.D62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9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065" calcext:value-type="float">
            <text:p>0,00065000000000000000</text:p>
          </table:table-cell>
          <table:table-cell table:formula="of:=[.D626]-[.D62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9" office:value-type="float" office:value="5625" calcext:value-type="float">
            <text:p>562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0651041666666667" calcext:value-type="float">
            <text:p>0,00065104166666666700</text:p>
          </table:table-cell>
          <table:table-cell table:formula="of:=[.D627]-[.D62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9" office:value-type="float" office:value="5634" calcext:value-type="float">
            <text:p>5634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0652083333333333" calcext:value-type="float">
            <text:p>0,00065208333333333300</text:p>
          </table:table-cell>
          <table:table-cell table:formula="of:=[.D628]-[.D62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9" office:value-type="float" office:value="5643" calcext:value-type="float">
            <text:p>5643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0653125" calcext:value-type="float">
            <text:p>0,00065312500000000000</text:p>
          </table:table-cell>
          <table:table-cell table:formula="of:=[.D629]-[.D62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9" office:value-type="float" office:value="5652" calcext:value-type="float">
            <text:p>5652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0654166666666667" calcext:value-type="float">
            <text:p>0,00065416666666666700</text:p>
          </table:table-cell>
          <table:table-cell table:formula="of:=[.D630]-[.D62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9" office:value-type="float" office:value="5661" calcext:value-type="float">
            <text:p>5661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0655208333333333" calcext:value-type="float">
            <text:p>0,00065520833333333300</text:p>
          </table:table-cell>
          <table:table-cell table:formula="of:=[.D631]-[.D63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9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065625" calcext:value-type="float">
            <text:p>0,00065625000000000000</text:p>
          </table:table-cell>
          <table:table-cell table:formula="of:=[.D632]-[.D63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9" office:value-type="float" office:value="5679" calcext:value-type="float">
            <text:p>5679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0657291666666667" calcext:value-type="float">
            <text:p>0,00065729166666666700</text:p>
          </table:table-cell>
          <table:table-cell table:formula="of:=[.D633]-[.D63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9" office:value-type="float" office:value="5688" calcext:value-type="float">
            <text:p>5688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0658333333333333" calcext:value-type="float">
            <text:p>0,00065833333333333300</text:p>
          </table:table-cell>
          <table:table-cell table:formula="of:=[.D634]-[.D63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9" office:value-type="float" office:value="5697" calcext:value-type="float">
            <text:p>5697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0659375" calcext:value-type="float">
            <text:p>0,00065937500000000000</text:p>
          </table:table-cell>
          <table:table-cell table:formula="of:=[.D635]-[.D63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9" office:value-type="float" office:value="5706" calcext:value-type="float">
            <text:p>5706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0660416666666667" calcext:value-type="float">
            <text:p>0,00066041666666666700</text:p>
          </table:table-cell>
          <table:table-cell table:formula="of:=[.D636]-[.D63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9" office:value-type="float" office:value="5715" calcext:value-type="float">
            <text:p>571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0661458333333333" calcext:value-type="float">
            <text:p>0,00066145833333333300</text:p>
          </table:table-cell>
          <table:table-cell table:formula="of:=[.D637]-[.D63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9" office:value-type="float" office:value="5724" calcext:value-type="float">
            <text:p>5724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06625" calcext:value-type="float">
            <text:p>0,00066250000000000000</text:p>
          </table:table-cell>
          <table:table-cell table:formula="of:=[.D638]-[.D63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9" office:value-type="float" office:value="5733" calcext:value-type="float">
            <text:p>5733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0663541666666667" calcext:value-type="float">
            <text:p>0,00066354166666666700</text:p>
          </table:table-cell>
          <table:table-cell table:formula="of:=[.D639]-[.D63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9" office:value-type="float" office:value="5742" calcext:value-type="float">
            <text:p>5742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0664583333333333" calcext:value-type="float">
            <text:p>0,00066458333333333300</text:p>
          </table:table-cell>
          <table:table-cell table:formula="of:=[.D640]-[.D63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9" office:value-type="float" office:value="5751" calcext:value-type="float">
            <text:p>5751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0665625" calcext:value-type="float">
            <text:p>0,00066562500000000000</text:p>
          </table:table-cell>
          <table:table-cell table:formula="of:=[.D641]-[.D64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9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0666666666666667" calcext:value-type="float">
            <text:p>0,00066666666666666700</text:p>
          </table:table-cell>
          <table:table-cell table:formula="of:=[.D642]-[.D64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9" office:value-type="float" office:value="5769" calcext:value-type="float">
            <text:p>5769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0667708333333333" calcext:value-type="float">
            <text:p>0,00066770833333333300</text:p>
          </table:table-cell>
          <table:table-cell table:formula="of:=[.D643]-[.D64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9" office:value-type="float" office:value="5778" calcext:value-type="float">
            <text:p>5778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066875" calcext:value-type="float">
            <text:p>0,00066875000000000000</text:p>
          </table:table-cell>
          <table:table-cell table:formula="of:=[.D644]-[.D64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9" office:value-type="float" office:value="5787" calcext:value-type="float">
            <text:p>5787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0669791666666667" calcext:value-type="float">
            <text:p>0,00066979166666666700</text:p>
          </table:table-cell>
          <table:table-cell table:formula="of:=[.D645]-[.D64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9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0670833333333333" calcext:value-type="float">
            <text:p>0,00067083333333333300</text:p>
          </table:table-cell>
          <table:table-cell table:formula="of:=[.D646]-[.D64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9" office:value-type="float" office:value="5805" calcext:value-type="float">
            <text:p>580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0671875" calcext:value-type="float">
            <text:p>0,00067187500000000000</text:p>
          </table:table-cell>
          <table:table-cell table:formula="of:=[.D647]-[.D64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9" office:value-type="float" office:value="5814" calcext:value-type="float">
            <text:p>5814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0672916666666667" calcext:value-type="float">
            <text:p>0,00067291666666666700</text:p>
          </table:table-cell>
          <table:table-cell table:formula="of:=[.D648]-[.D64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9" office:value-type="float" office:value="5823" calcext:value-type="float">
            <text:p>5823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0673958333333333" calcext:value-type="float">
            <text:p>0,00067395833333333300</text:p>
          </table:table-cell>
          <table:table-cell table:formula="of:=[.D649]-[.D64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9" office:value-type="float" office:value="5832" calcext:value-type="float">
            <text:p>5832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0675" calcext:value-type="float">
            <text:p>0,00067500000000000000</text:p>
          </table:table-cell>
          <table:table-cell table:formula="of:=[.D650]-[.D64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9" office:value-type="float" office:value="5841" calcext:value-type="float">
            <text:p>5841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0676041666666667" calcext:value-type="float">
            <text:p>0,00067604166666666700</text:p>
          </table:table-cell>
          <table:table-cell table:formula="of:=[.D651]-[.D65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9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0677083333333333" calcext:value-type="float">
            <text:p>0,00067708333333333300</text:p>
          </table:table-cell>
          <table:table-cell table:formula="of:=[.D652]-[.D65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9" office:value-type="float" office:value="5859" calcext:value-type="float">
            <text:p>5859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0678125" calcext:value-type="float">
            <text:p>0,00067812500000000000</text:p>
          </table:table-cell>
          <table:table-cell table:formula="of:=[.D653]-[.D65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9" office:value-type="float" office:value="5868" calcext:value-type="float">
            <text:p>5868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0679166666666667" calcext:value-type="float">
            <text:p>0,00067916666666666700</text:p>
          </table:table-cell>
          <table:table-cell table:formula="of:=[.D654]-[.D65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9" office:value-type="float" office:value="5877" calcext:value-type="float">
            <text:p>5877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0680208333333333" calcext:value-type="float">
            <text:p>0,00068020833333333300</text:p>
          </table:table-cell>
          <table:table-cell table:formula="of:=[.D655]-[.D65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9" office:value-type="float" office:value="5886" calcext:value-type="float">
            <text:p>5886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068125" calcext:value-type="float">
            <text:p>0,00068125000000000000</text:p>
          </table:table-cell>
          <table:table-cell table:formula="of:=[.D656]-[.D65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9" office:value-type="float" office:value="5895" calcext:value-type="float">
            <text:p>589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0682291666666667" calcext:value-type="float">
            <text:p>0,00068229166666666700</text:p>
          </table:table-cell>
          <table:table-cell table:formula="of:=[.D657]-[.D65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9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0683333333333333" calcext:value-type="float">
            <text:p>0,00068333333333333300</text:p>
          </table:table-cell>
          <table:table-cell table:formula="of:=[.D658]-[.D65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9" office:value-type="float" office:value="5913" calcext:value-type="float">
            <text:p>5913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0684375" calcext:value-type="float">
            <text:p>0,00068437500000000000</text:p>
          </table:table-cell>
          <table:table-cell table:formula="of:=[.D659]-[.D65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9" office:value-type="float" office:value="5922" calcext:value-type="float">
            <text:p>5922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0685416666666667" calcext:value-type="float">
            <text:p>0,00068541666666666700</text:p>
          </table:table-cell>
          <table:table-cell table:formula="of:=[.D660]-[.D65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9" office:value-type="float" office:value="5931" calcext:value-type="float">
            <text:p>5931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0686458333333333" calcext:value-type="float">
            <text:p>0,00068645833333333300</text:p>
          </table:table-cell>
          <table:table-cell table:formula="of:=[.D661]-[.D66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9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06875" calcext:value-type="float">
            <text:p>0,00068750000000000000</text:p>
          </table:table-cell>
          <table:table-cell table:formula="of:=[.D662]-[.D66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9" office:value-type="float" office:value="5949" calcext:value-type="float">
            <text:p>5949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0688541666666667" calcext:value-type="float">
            <text:p>0,00068854166666666700</text:p>
          </table:table-cell>
          <table:table-cell table:formula="of:=[.D663]-[.D66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9" office:value-type="float" office:value="5958" calcext:value-type="float">
            <text:p>5958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0689583333333333" calcext:value-type="float">
            <text:p>0,00068958333333333300</text:p>
          </table:table-cell>
          <table:table-cell table:formula="of:=[.D664]-[.D66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9" office:value-type="float" office:value="5967" calcext:value-type="float">
            <text:p>5967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0690625" calcext:value-type="float">
            <text:p>0,00069062500000000000</text:p>
          </table:table-cell>
          <table:table-cell table:formula="of:=[.D665]-[.D66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9" office:value-type="float" office:value="5976" calcext:value-type="float">
            <text:p>5976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0691666666666667" calcext:value-type="float">
            <text:p>0,00069166666666666700</text:p>
          </table:table-cell>
          <table:table-cell table:formula="of:=[.D666]-[.D66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9" office:value-type="float" office:value="5985" calcext:value-type="float">
            <text:p>598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0692708333333333" calcext:value-type="float">
            <text:p>0,00069270833333333300</text:p>
          </table:table-cell>
          <table:table-cell table:formula="of:=[.D667]-[.D66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9" office:value-type="float" office:value="5994" calcext:value-type="float">
            <text:p>5994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069375" calcext:value-type="float">
            <text:p>0,00069375000000000000</text:p>
          </table:table-cell>
          <table:table-cell table:formula="of:=[.D668]-[.D66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9" office:value-type="float" office:value="6003" calcext:value-type="float">
            <text:p>6003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0694791666666667" calcext:value-type="float">
            <text:p>0,00069479166666666700</text:p>
          </table:table-cell>
          <table:table-cell table:formula="of:=[.D669]-[.D66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9" office:value-type="float" office:value="6012" calcext:value-type="float">
            <text:p>6012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0695833333333333" calcext:value-type="float">
            <text:p>0,00069583333333333300</text:p>
          </table:table-cell>
          <table:table-cell table:formula="of:=[.D670]-[.D66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9" office:value-type="float" office:value="6021" calcext:value-type="float">
            <text:p>6021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0696875" calcext:value-type="float">
            <text:p>0,00069687500000000000</text:p>
          </table:table-cell>
          <table:table-cell table:formula="of:=[.D671]-[.D67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9" office:value-type="float" office:value="6030" calcext:value-type="float">
            <text:p>603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0697916666666667" calcext:value-type="float">
            <text:p>0,00069791666666666700</text:p>
          </table:table-cell>
          <table:table-cell table:formula="of:=[.D672]-[.D67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9" office:value-type="float" office:value="6039" calcext:value-type="float">
            <text:p>6039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0698958333333333" calcext:value-type="float">
            <text:p>0,00069895833333333300</text:p>
          </table:table-cell>
          <table:table-cell table:formula="of:=[.D673]-[.D67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9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07" calcext:value-type="float">
            <text:p>0,00070000000000000000</text:p>
          </table:table-cell>
          <table:table-cell table:formula="of:=[.D674]-[.D67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9" office:value-type="float" office:value="6057" calcext:value-type="float">
            <text:p>6057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0701041666666667" calcext:value-type="float">
            <text:p>0,00070104166666666700</text:p>
          </table:table-cell>
          <table:table-cell table:formula="of:=[.D675]-[.D67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9" office:value-type="float" office:value="6066" calcext:value-type="float">
            <text:p>6066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0702083333333333" calcext:value-type="float">
            <text:p>0,00070208333333333300</text:p>
          </table:table-cell>
          <table:table-cell table:formula="of:=[.D676]-[.D67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9" office:value-type="float" office:value="6075" calcext:value-type="float">
            <text:p>607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0703125" calcext:value-type="float">
            <text:p>0,00070312500000000000</text:p>
          </table:table-cell>
          <table:table-cell table:formula="of:=[.D677]-[.D67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9" office:value-type="float" office:value="6084" calcext:value-type="float">
            <text:p>6084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0704166666666667" calcext:value-type="float">
            <text:p>0,00070416666666666700</text:p>
          </table:table-cell>
          <table:table-cell table:formula="of:=[.D678]-[.D67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9" office:value-type="float" office:value="6093" calcext:value-type="float">
            <text:p>6093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0705208333333333" calcext:value-type="float">
            <text:p>0,00070520833333333300</text:p>
          </table:table-cell>
          <table:table-cell table:formula="of:=[.D679]-[.D67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9" office:value-type="float" office:value="6102" calcext:value-type="float">
            <text:p>6102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070625" calcext:value-type="float">
            <text:p>0,00070625000000000000</text:p>
          </table:table-cell>
          <table:table-cell table:formula="of:=[.D680]-[.D67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9" office:value-type="float" office:value="6111" calcext:value-type="float">
            <text:p>6111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0707291666666667" calcext:value-type="float">
            <text:p>0,00070729166666666700</text:p>
          </table:table-cell>
          <table:table-cell table:formula="of:=[.D681]-[.D68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9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0708333333333333" calcext:value-type="float">
            <text:p>0,00070833333333333300</text:p>
          </table:table-cell>
          <table:table-cell table:formula="of:=[.D682]-[.D68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9" office:value-type="float" office:value="6129" calcext:value-type="float">
            <text:p>6129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0709375" calcext:value-type="float">
            <text:p>0,00070937500000000000</text:p>
          </table:table-cell>
          <table:table-cell table:formula="of:=[.D683]-[.D68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9" office:value-type="float" office:value="6138" calcext:value-type="float">
            <text:p>6138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0710416666666667" calcext:value-type="float">
            <text:p>0,00071041666666666700</text:p>
          </table:table-cell>
          <table:table-cell table:formula="of:=[.D684]-[.D68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9" office:value-type="float" office:value="6147" calcext:value-type="float">
            <text:p>6147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0711458333333333" calcext:value-type="float">
            <text:p>0,00071145833333333300</text:p>
          </table:table-cell>
          <table:table-cell table:formula="of:=[.D685]-[.D68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9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07125" calcext:value-type="float">
            <text:p>0,00071250000000000000</text:p>
          </table:table-cell>
          <table:table-cell table:formula="of:=[.D686]-[.D68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9" office:value-type="float" office:value="6165" calcext:value-type="float">
            <text:p>616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0713541666666667" calcext:value-type="float">
            <text:p>0,00071354166666666700</text:p>
          </table:table-cell>
          <table:table-cell table:formula="of:=[.D687]-[.D68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9" office:value-type="float" office:value="6174" calcext:value-type="float">
            <text:p>6174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0714583333333333" calcext:value-type="float">
            <text:p>0,00071458333333333300</text:p>
          </table:table-cell>
          <table:table-cell table:formula="of:=[.D688]-[.D68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9" office:value-type="float" office:value="6183" calcext:value-type="float">
            <text:p>6183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0715625" calcext:value-type="float">
            <text:p>0,00071562500000000000</text:p>
          </table:table-cell>
          <table:table-cell table:formula="of:=[.D689]-[.D68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9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0716666666666667" calcext:value-type="float">
            <text:p>0,00071666666666666700</text:p>
          </table:table-cell>
          <table:table-cell table:formula="of:=[.D690]-[.D68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9" office:value-type="float" office:value="6201" calcext:value-type="float">
            <text:p>6201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0717708333333333" calcext:value-type="float">
            <text:p>0,00071770833333333300</text:p>
          </table:table-cell>
          <table:table-cell table:formula="of:=[.D691]-[.D69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9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071875" calcext:value-type="float">
            <text:p>0,00071875000000000000</text:p>
          </table:table-cell>
          <table:table-cell table:formula="of:=[.D692]-[.D69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9" office:value-type="float" office:value="6219" calcext:value-type="float">
            <text:p>6219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0719791666666667" calcext:value-type="float">
            <text:p>0,00071979166666666700</text:p>
          </table:table-cell>
          <table:table-cell table:formula="of:=[.D693]-[.D69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9" office:value-type="float" office:value="6228" calcext:value-type="float">
            <text:p>6228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0720833333333333" calcext:value-type="float">
            <text:p>0,00072083333333333300</text:p>
          </table:table-cell>
          <table:table-cell table:formula="of:=[.D694]-[.D69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9" office:value-type="float" office:value="6237" calcext:value-type="float">
            <text:p>6237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0721875" calcext:value-type="float">
            <text:p>0,00072187500000000000</text:p>
          </table:table-cell>
          <table:table-cell table:formula="of:=[.D695]-[.D69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9" office:value-type="float" office:value="6246" calcext:value-type="float">
            <text:p>6246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0722916666666667" calcext:value-type="float">
            <text:p>0,00072291666666666700</text:p>
          </table:table-cell>
          <table:table-cell table:formula="of:=[.D696]-[.D69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9" office:value-type="float" office:value="6255" calcext:value-type="float">
            <text:p>625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0723958333333333" calcext:value-type="float">
            <text:p>0,00072395833333333300</text:p>
          </table:table-cell>
          <table:table-cell table:formula="of:=[.D697]-[.D69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9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0725" calcext:value-type="float">
            <text:p>0,00072500000000000000</text:p>
          </table:table-cell>
          <table:table-cell table:formula="of:=[.D698]-[.D69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9" office:value-type="float" office:value="6273" calcext:value-type="float">
            <text:p>6273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0726041666666667" calcext:value-type="float">
            <text:p>0,00072604166666666700</text:p>
          </table:table-cell>
          <table:table-cell table:formula="of:=[.D699]-[.D69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9" office:value-type="float" office:value="6282" calcext:value-type="float">
            <text:p>6282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0727083333333333" calcext:value-type="float">
            <text:p>0,00072708333333333300</text:p>
          </table:table-cell>
          <table:table-cell table:formula="of:=[.D700]-[.D69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9" office:value-type="float" office:value="6291" calcext:value-type="float">
            <text:p>6291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0728125" calcext:value-type="float">
            <text:p>0,00072812500000000000</text:p>
          </table:table-cell>
          <table:table-cell table:formula="of:=[.D701]-[.D70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9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0729166666666667" calcext:value-type="float">
            <text:p>0,00072916666666666700</text:p>
          </table:table-cell>
          <table:table-cell table:formula="of:=[.D702]-[.D70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9" office:value-type="float" office:value="6309" calcext:value-type="float">
            <text:p>6309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0730208333333333" calcext:value-type="float">
            <text:p>0,00073020833333333300</text:p>
          </table:table-cell>
          <table:table-cell table:formula="of:=[.D703]-[.D70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9" office:value-type="float" office:value="6318" calcext:value-type="float">
            <text:p>6318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073125" calcext:value-type="float">
            <text:p>0,00073125000000000000</text:p>
          </table:table-cell>
          <table:table-cell table:formula="of:=[.D704]-[.D70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9" office:value-type="float" office:value="6327" calcext:value-type="float">
            <text:p>6327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0732291666666667" calcext:value-type="float">
            <text:p>0,00073229166666666700</text:p>
          </table:table-cell>
          <table:table-cell table:formula="of:=[.D705]-[.D70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9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0733333333333333" calcext:value-type="float">
            <text:p>0,00073333333333333300</text:p>
          </table:table-cell>
          <table:table-cell table:formula="of:=[.D706]-[.D70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9" office:value-type="float" office:value="6345" calcext:value-type="float">
            <text:p>634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0734375" calcext:value-type="float">
            <text:p>0,00073437500000000000</text:p>
          </table:table-cell>
          <table:table-cell table:formula="of:=[.D707]-[.D70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9" office:value-type="float" office:value="6354" calcext:value-type="float">
            <text:p>6354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0735416666666667" calcext:value-type="float">
            <text:p>0,00073541666666666700</text:p>
          </table:table-cell>
          <table:table-cell table:formula="of:=[.D708]-[.D70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9" office:value-type="float" office:value="6363" calcext:value-type="float">
            <text:p>6363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0736458333333333" calcext:value-type="float">
            <text:p>0,00073645833333333300</text:p>
          </table:table-cell>
          <table:table-cell table:formula="of:=[.D709]-[.D70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9" office:value-type="float" office:value="6372" calcext:value-type="float">
            <text:p>6372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07375" calcext:value-type="float">
            <text:p>0,00073750000000000000</text:p>
          </table:table-cell>
          <table:table-cell table:formula="of:=[.D710]-[.D70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9" office:value-type="float" office:value="6381" calcext:value-type="float">
            <text:p>6381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0738541666666667" calcext:value-type="float">
            <text:p>0,00073854166666666700</text:p>
          </table:table-cell>
          <table:table-cell table:formula="of:=[.D711]-[.D71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9" office:value-type="float" office:value="6390" calcext:value-type="float">
            <text:p>639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0739583333333333" calcext:value-type="float">
            <text:p>0,00073958333333333300</text:p>
          </table:table-cell>
          <table:table-cell table:formula="of:=[.D712]-[.D71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9" office:value-type="float" office:value="6399" calcext:value-type="float">
            <text:p>6399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0740625" calcext:value-type="float">
            <text:p>0,00074062500000000000</text:p>
          </table:table-cell>
          <table:table-cell table:formula="of:=[.D713]-[.D71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9" office:value-type="float" office:value="6408" calcext:value-type="float">
            <text:p>6408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0741666666666667" calcext:value-type="float">
            <text:p>0,00074166666666666700</text:p>
          </table:table-cell>
          <table:table-cell table:formula="of:=[.D714]-[.D71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9" office:value-type="float" office:value="6417" calcext:value-type="float">
            <text:p>6417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0742708333333333" calcext:value-type="float">
            <text:p>0,00074270833333333300</text:p>
          </table:table-cell>
          <table:table-cell table:formula="of:=[.D715]-[.D71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9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074375" calcext:value-type="float">
            <text:p>0,00074375000000000000</text:p>
          </table:table-cell>
          <table:table-cell table:formula="of:=[.D716]-[.D71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9" office:value-type="float" office:value="6435" calcext:value-type="float">
            <text:p>643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0744791666666667" calcext:value-type="float">
            <text:p>0,00074479166666666700</text:p>
          </table:table-cell>
          <table:table-cell table:formula="of:=[.D717]-[.D71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9" office:value-type="float" office:value="6444" calcext:value-type="float">
            <text:p>6444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0745833333333333" calcext:value-type="float">
            <text:p>0,00074583333333333300</text:p>
          </table:table-cell>
          <table:table-cell table:formula="of:=[.D718]-[.D71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9" office:value-type="float" office:value="6453" calcext:value-type="float">
            <text:p>6453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0746875" calcext:value-type="float">
            <text:p>0,00074687500000000000</text:p>
          </table:table-cell>
          <table:table-cell table:formula="of:=[.D719]-[.D71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9" office:value-type="float" office:value="6462" calcext:value-type="float">
            <text:p>6462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0747916666666667" calcext:value-type="float">
            <text:p>0,00074791666666666700</text:p>
          </table:table-cell>
          <table:table-cell table:formula="of:=[.D720]-[.D71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9" office:value-type="float" office:value="6471" calcext:value-type="float">
            <text:p>6471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0748958333333333" calcext:value-type="float">
            <text:p>0,00074895833333333300</text:p>
          </table:table-cell>
          <table:table-cell table:formula="of:=[.D721]-[.D72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9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075" calcext:value-type="float">
            <text:p>0,00075000000000000000</text:p>
          </table:table-cell>
          <table:table-cell table:formula="of:=[.D722]-[.D72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9" office:value-type="float" office:value="6489" calcext:value-type="float">
            <text:p>6489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0751041666666667" calcext:value-type="float">
            <text:p>0,00075104166666666700</text:p>
          </table:table-cell>
          <table:table-cell table:formula="of:=[.D723]-[.D72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9" office:value-type="float" office:value="6498" calcext:value-type="float">
            <text:p>6498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0752083333333333" calcext:value-type="float">
            <text:p>0,00075208333333333300</text:p>
          </table:table-cell>
          <table:table-cell table:formula="of:=[.D724]-[.D72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9" office:value-type="float" office:value="6507" calcext:value-type="float">
            <text:p>6507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0753125" calcext:value-type="float">
            <text:p>0,00075312500000000000</text:p>
          </table:table-cell>
          <table:table-cell table:formula="of:=[.D725]-[.D72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9" office:value-type="float" office:value="6516" calcext:value-type="float">
            <text:p>6516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0754166666666667" calcext:value-type="float">
            <text:p>0,00075416666666666700</text:p>
          </table:table-cell>
          <table:table-cell table:formula="of:=[.D726]-[.D72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9" office:value-type="float" office:value="6525" calcext:value-type="float">
            <text:p>652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0755208333333333" calcext:value-type="float">
            <text:p>0,00075520833333333300</text:p>
          </table:table-cell>
          <table:table-cell table:formula="of:=[.D727]-[.D72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9" office:value-type="float" office:value="6534" calcext:value-type="float">
            <text:p>6534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075625" calcext:value-type="float">
            <text:p>0,00075625000000000000</text:p>
          </table:table-cell>
          <table:table-cell table:formula="of:=[.D728]-[.D72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9" office:value-type="float" office:value="6543" calcext:value-type="float">
            <text:p>6543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0757291666666667" calcext:value-type="float">
            <text:p>0,00075729166666666700</text:p>
          </table:table-cell>
          <table:table-cell table:formula="of:=[.D729]-[.D72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9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0758333333333333" calcext:value-type="float">
            <text:p>0,00075833333333333300</text:p>
          </table:table-cell>
          <table:table-cell table:formula="of:=[.D730]-[.D72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9" office:value-type="float" office:value="6561" calcext:value-type="float">
            <text:p>6561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0759375" calcext:value-type="float">
            <text:p>0,00075937500000000000</text:p>
          </table:table-cell>
          <table:table-cell table:formula="of:=[.D731]-[.D73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9" office:value-type="float" office:value="6570" calcext:value-type="float">
            <text:p>657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0760416666666667" calcext:value-type="float">
            <text:p>0,00076041666666666700</text:p>
          </table:table-cell>
          <table:table-cell table:formula="of:=[.D732]-[.D73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9" office:value-type="float" office:value="6579" calcext:value-type="float">
            <text:p>6579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0761458333333333" calcext:value-type="float">
            <text:p>0,00076145833333333300</text:p>
          </table:table-cell>
          <table:table-cell table:formula="of:=[.D733]-[.D73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9" office:value-type="float" office:value="6588" calcext:value-type="float">
            <text:p>6588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07625" calcext:value-type="float">
            <text:p>0,00076250000000000000</text:p>
          </table:table-cell>
          <table:table-cell table:formula="of:=[.D734]-[.D73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9" office:value-type="float" office:value="6597" calcext:value-type="float">
            <text:p>6597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0763541666666667" calcext:value-type="float">
            <text:p>0,00076354166666666700</text:p>
          </table:table-cell>
          <table:table-cell table:formula="of:=[.D735]-[.D73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9" office:value-type="float" office:value="6606" calcext:value-type="float">
            <text:p>6606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0764583333333333" calcext:value-type="float">
            <text:p>0,00076458333333333300</text:p>
          </table:table-cell>
          <table:table-cell table:formula="of:=[.D736]-[.D73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9" office:value-type="float" office:value="6615" calcext:value-type="float">
            <text:p>661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0765625" calcext:value-type="float">
            <text:p>0,00076562500000000000</text:p>
          </table:table-cell>
          <table:table-cell table:formula="of:=[.D737]-[.D73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9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0766666666666667" calcext:value-type="float">
            <text:p>0,00076666666666666700</text:p>
          </table:table-cell>
          <table:table-cell table:formula="of:=[.D738]-[.D73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9" office:value-type="float" office:value="6633" calcext:value-type="float">
            <text:p>6633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0767708333333333" calcext:value-type="float">
            <text:p>0,00076770833333333300</text:p>
          </table:table-cell>
          <table:table-cell table:formula="of:=[.D739]-[.D73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9" office:value-type="float" office:value="6642" calcext:value-type="float">
            <text:p>6642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076875" calcext:value-type="float">
            <text:p>0,00076875000000000000</text:p>
          </table:table-cell>
          <table:table-cell table:formula="of:=[.D740]-[.D73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9" office:value-type="float" office:value="6651" calcext:value-type="float">
            <text:p>6651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0769791666666667" calcext:value-type="float">
            <text:p>0,00076979166666666700</text:p>
          </table:table-cell>
          <table:table-cell table:formula="of:=[.D741]-[.D74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9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0770833333333333" calcext:value-type="float">
            <text:p>0,00077083333333333300</text:p>
          </table:table-cell>
          <table:table-cell table:formula="of:=[.D742]-[.D74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9" office:value-type="float" office:value="6669" calcext:value-type="float">
            <text:p>6669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0771875" calcext:value-type="float">
            <text:p>0,00077187500000000000</text:p>
          </table:table-cell>
          <table:table-cell table:formula="of:=[.D743]-[.D74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9" office:value-type="float" office:value="6678" calcext:value-type="float">
            <text:p>6678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0772916666666667" calcext:value-type="float">
            <text:p>0,00077291666666666700</text:p>
          </table:table-cell>
          <table:table-cell table:formula="of:=[.D744]-[.D74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9" office:value-type="float" office:value="6687" calcext:value-type="float">
            <text:p>6687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0773958333333333" calcext:value-type="float">
            <text:p>0,00077395833333333300</text:p>
          </table:table-cell>
          <table:table-cell table:formula="of:=[.D745]-[.D74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9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0775" calcext:value-type="float">
            <text:p>0,00077500000000000000</text:p>
          </table:table-cell>
          <table:table-cell table:formula="of:=[.D746]-[.D74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9" office:value-type="float" office:value="6705" calcext:value-type="float">
            <text:p>670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0776041666666667" calcext:value-type="float">
            <text:p>0,00077604166666666700</text:p>
          </table:table-cell>
          <table:table-cell table:formula="of:=[.D747]-[.D74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9" office:value-type="float" office:value="6714" calcext:value-type="float">
            <text:p>6714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0777083333333333" calcext:value-type="float">
            <text:p>0,00077708333333333300</text:p>
          </table:table-cell>
          <table:table-cell table:formula="of:=[.D748]-[.D74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9" office:value-type="float" office:value="6723" calcext:value-type="float">
            <text:p>6723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0778125" calcext:value-type="float">
            <text:p>0,00077812500000000000</text:p>
          </table:table-cell>
          <table:table-cell table:formula="of:=[.D749]-[.D74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9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0779166666666667" calcext:value-type="float">
            <text:p>0,00077916666666666700</text:p>
          </table:table-cell>
          <table:table-cell table:formula="of:=[.D750]-[.D74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9" office:value-type="float" office:value="6741" calcext:value-type="float">
            <text:p>6741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0780208333333333" calcext:value-type="float">
            <text:p>0,00078020833333333300</text:p>
          </table:table-cell>
          <table:table-cell table:formula="of:=[.D751]-[.D75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9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078125" calcext:value-type="float">
            <text:p>0,00078125000000000000</text:p>
          </table:table-cell>
          <table:table-cell table:formula="of:=[.D752]-[.D75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9" office:value-type="float" office:value="6759" calcext:value-type="float">
            <text:p>6759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0782291666666667" calcext:value-type="float">
            <text:p>0,00078229166666666700</text:p>
          </table:table-cell>
          <table:table-cell table:formula="of:=[.D753]-[.D75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9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0783333333333333" calcext:value-type="float">
            <text:p>0,00078333333333333300</text:p>
          </table:table-cell>
          <table:table-cell table:formula="of:=[.D754]-[.D75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9" office:value-type="float" office:value="6777" calcext:value-type="float">
            <text:p>6777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0784375" calcext:value-type="float">
            <text:p>0,00078437500000000000</text:p>
          </table:table-cell>
          <table:table-cell table:formula="of:=[.D755]-[.D75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9" office:value-type="float" office:value="6786" calcext:value-type="float">
            <text:p>6786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0785416666666667" calcext:value-type="float">
            <text:p>0,00078541666666666700</text:p>
          </table:table-cell>
          <table:table-cell table:formula="of:=[.D756]-[.D75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9" office:value-type="float" office:value="6795" calcext:value-type="float">
            <text:p>679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0786458333333333" calcext:value-type="float">
            <text:p>0,00078645833333333300</text:p>
          </table:table-cell>
          <table:table-cell table:formula="of:=[.D757]-[.D75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9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07875" calcext:value-type="float">
            <text:p>0,00078750000000000000</text:p>
          </table:table-cell>
          <table:table-cell table:formula="of:=[.D758]-[.D75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9" office:value-type="float" office:value="6813" calcext:value-type="float">
            <text:p>6813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0788541666666667" calcext:value-type="float">
            <text:p>0,00078854166666666700</text:p>
          </table:table-cell>
          <table:table-cell table:formula="of:=[.D759]-[.D75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9" office:value-type="float" office:value="6822" calcext:value-type="float">
            <text:p>6822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0789583333333333" calcext:value-type="float">
            <text:p>0,00078958333333333300</text:p>
          </table:table-cell>
          <table:table-cell table:formula="of:=[.D760]-[.D75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9" office:value-type="float" office:value="6831" calcext:value-type="float">
            <text:p>6831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0790625" calcext:value-type="float">
            <text:p>0,00079062500000000000</text:p>
          </table:table-cell>
          <table:table-cell table:formula="of:=[.D761]-[.D76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9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0791666666666667" calcext:value-type="float">
            <text:p>0,00079166666666666700</text:p>
          </table:table-cell>
          <table:table-cell table:formula="of:=[.D762]-[.D76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9" office:value-type="float" office:value="6849" calcext:value-type="float">
            <text:p>6849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0792708333333333" calcext:value-type="float">
            <text:p>0,00079270833333333300</text:p>
          </table:table-cell>
          <table:table-cell table:formula="of:=[.D763]-[.D76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9" office:value-type="float" office:value="6858" calcext:value-type="float">
            <text:p>6858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079375" calcext:value-type="float">
            <text:p>0,00079375000000000000</text:p>
          </table:table-cell>
          <table:table-cell table:formula="of:=[.D764]-[.D76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9" office:value-type="float" office:value="6867" calcext:value-type="float">
            <text:p>6867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0794791666666667" calcext:value-type="float">
            <text:p>0,00079479166666666700</text:p>
          </table:table-cell>
          <table:table-cell table:formula="of:=[.D765]-[.D76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9" office:value-type="float" office:value="6876" calcext:value-type="float">
            <text:p>6876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0795833333333333" calcext:value-type="float">
            <text:p>0,00079583333333333300</text:p>
          </table:table-cell>
          <table:table-cell table:formula="of:=[.D766]-[.D76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9" office:value-type="float" office:value="6885" calcext:value-type="float">
            <text:p>688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0796875" calcext:value-type="float">
            <text:p>0,00079687500000000000</text:p>
          </table:table-cell>
          <table:table-cell table:formula="of:=[.D767]-[.D76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9" office:value-type="float" office:value="6894" calcext:value-type="float">
            <text:p>6894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0797916666666667" calcext:value-type="float">
            <text:p>0,00079791666666666700</text:p>
          </table:table-cell>
          <table:table-cell table:formula="of:=[.D768]-[.D76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9" office:value-type="float" office:value="6903" calcext:value-type="float">
            <text:p>6903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0798958333333333" calcext:value-type="float">
            <text:p>0,00079895833333333300</text:p>
          </table:table-cell>
          <table:table-cell table:formula="of:=[.D769]-[.D76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9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08" calcext:value-type="float">
            <text:p>0,00080000000000000000</text:p>
          </table:table-cell>
          <table:table-cell table:formula="of:=[.D770]-[.D76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9" office:value-type="float" office:value="6921" calcext:value-type="float">
            <text:p>6921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0801041666666667" calcext:value-type="float">
            <text:p>0,00080104166666666700</text:p>
          </table:table-cell>
          <table:table-cell table:formula="of:=[.D771]-[.D77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9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0802083333333333" calcext:value-type="float">
            <text:p>0,00080208333333333300</text:p>
          </table:table-cell>
          <table:table-cell table:formula="of:=[.D772]-[.D77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9" office:value-type="float" office:value="6939" calcext:value-type="float">
            <text:p>6939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0803125" calcext:value-type="float">
            <text:p>0,00080312500000000000</text:p>
          </table:table-cell>
          <table:table-cell table:formula="of:=[.D773]-[.D77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9" office:value-type="float" office:value="6948" calcext:value-type="float">
            <text:p>6948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0804166666666667" calcext:value-type="float">
            <text:p>0,00080416666666666700</text:p>
          </table:table-cell>
          <table:table-cell table:formula="of:=[.D774]-[.D77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9" office:value-type="float" office:value="6957" calcext:value-type="float">
            <text:p>6957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0805208333333333" calcext:value-type="float">
            <text:p>0,00080520833333333300</text:p>
          </table:table-cell>
          <table:table-cell table:formula="of:=[.D775]-[.D77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9" office:value-type="float" office:value="6966" calcext:value-type="float">
            <text:p>6966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080625" calcext:value-type="float">
            <text:p>0,00080625000000000000</text:p>
          </table:table-cell>
          <table:table-cell table:formula="of:=[.D776]-[.D77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9" office:value-type="float" office:value="6975" calcext:value-type="float">
            <text:p>697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0807291666666667" calcext:value-type="float">
            <text:p>0,00080729166666666700</text:p>
          </table:table-cell>
          <table:table-cell table:formula="of:=[.D777]-[.D77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9" office:value-type="float" office:value="6984" calcext:value-type="float">
            <text:p>6984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0808333333333333" calcext:value-type="float">
            <text:p>0,00080833333333333300</text:p>
          </table:table-cell>
          <table:table-cell table:formula="of:=[.D778]-[.D77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9" office:value-type="float" office:value="6993" calcext:value-type="float">
            <text:p>6993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0809375" calcext:value-type="float">
            <text:p>0,00080937500000000000</text:p>
          </table:table-cell>
          <table:table-cell table:formula="of:=[.D779]-[.D77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9" office:value-type="float" office:value="7002" calcext:value-type="float">
            <text:p>7002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0810416666666667" calcext:value-type="float">
            <text:p>0,00081041666666666700</text:p>
          </table:table-cell>
          <table:table-cell table:formula="of:=[.D780]-[.D77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9" office:value-type="float" office:value="7011" calcext:value-type="float">
            <text:p>7011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0811458333333333" calcext:value-type="float">
            <text:p>0,00081145833333333300</text:p>
          </table:table-cell>
          <table:table-cell table:formula="of:=[.D781]-[.D78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9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08125" calcext:value-type="float">
            <text:p>0,00081250000000000000</text:p>
          </table:table-cell>
          <table:table-cell table:formula="of:=[.D782]-[.D78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9" office:value-type="float" office:value="7029" calcext:value-type="float">
            <text:p>7029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0813541666666667" calcext:value-type="float">
            <text:p>0,00081354166666666700</text:p>
          </table:table-cell>
          <table:table-cell table:formula="of:=[.D783]-[.D78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9" office:value-type="float" office:value="7038" calcext:value-type="float">
            <text:p>7038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0814583333333333" calcext:value-type="float">
            <text:p>0,00081458333333333300</text:p>
          </table:table-cell>
          <table:table-cell table:formula="of:=[.D784]-[.D78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9" office:value-type="float" office:value="7047" calcext:value-type="float">
            <text:p>7047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0815625" calcext:value-type="float">
            <text:p>0,00081562500000000000</text:p>
          </table:table-cell>
          <table:table-cell table:formula="of:=[.D785]-[.D78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9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0816666666666667" calcext:value-type="float">
            <text:p>0,00081666666666666700</text:p>
          </table:table-cell>
          <table:table-cell table:formula="of:=[.D786]-[.D78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9" office:value-type="float" office:value="7065" calcext:value-type="float">
            <text:p>706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0817708333333333" calcext:value-type="float">
            <text:p>0,00081770833333333300</text:p>
          </table:table-cell>
          <table:table-cell table:formula="of:=[.D787]-[.D78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9" office:value-type="float" office:value="7074" calcext:value-type="float">
            <text:p>7074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081875" calcext:value-type="float">
            <text:p>0,00081875000000000000</text:p>
          </table:table-cell>
          <table:table-cell table:formula="of:=[.D788]-[.D78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9" office:value-type="float" office:value="7083" calcext:value-type="float">
            <text:p>7083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0819791666666667" calcext:value-type="float">
            <text:p>0,00081979166666666700</text:p>
          </table:table-cell>
          <table:table-cell table:formula="of:=[.D789]-[.D78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9" office:value-type="float" office:value="7092" calcext:value-type="float">
            <text:p>7092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0820833333333333" calcext:value-type="float">
            <text:p>0,00082083333333333300</text:p>
          </table:table-cell>
          <table:table-cell table:formula="of:=[.D790]-[.D78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9" office:value-type="float" office:value="7101" calcext:value-type="float">
            <text:p>7101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0821875" calcext:value-type="float">
            <text:p>0,00082187500000000000</text:p>
          </table:table-cell>
          <table:table-cell table:formula="of:=[.D791]-[.D79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9" office:value-type="float" office:value="7110" calcext:value-type="float">
            <text:p>711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0822916666666667" calcext:value-type="float">
            <text:p>0,00082291666666666700</text:p>
          </table:table-cell>
          <table:table-cell table:formula="of:=[.D792]-[.D79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9" office:value-type="float" office:value="7119" calcext:value-type="float">
            <text:p>7119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0823958333333333" calcext:value-type="float">
            <text:p>0,00082395833333333300</text:p>
          </table:table-cell>
          <table:table-cell table:formula="of:=[.D793]-[.D79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9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0825" calcext:value-type="float">
            <text:p>0,00082500000000000000</text:p>
          </table:table-cell>
          <table:table-cell table:formula="of:=[.D794]-[.D79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9" office:value-type="float" office:value="7137" calcext:value-type="float">
            <text:p>7137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0826041666666667" calcext:value-type="float">
            <text:p>0,00082604166666666700</text:p>
          </table:table-cell>
          <table:table-cell table:formula="of:=[.D795]-[.D79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9" office:value-type="float" office:value="7146" calcext:value-type="float">
            <text:p>7146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0827083333333333" calcext:value-type="float">
            <text:p>0,00082708333333333300</text:p>
          </table:table-cell>
          <table:table-cell table:formula="of:=[.D796]-[.D79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9" office:value-type="float" office:value="7155" calcext:value-type="float">
            <text:p>715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0828125" calcext:value-type="float">
            <text:p>0,00082812500000000000</text:p>
          </table:table-cell>
          <table:table-cell table:formula="of:=[.D797]-[.D79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9" office:value-type="float" office:value="7164" calcext:value-type="float">
            <text:p>7164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0829166666666667" calcext:value-type="float">
            <text:p>0,00082916666666666700</text:p>
          </table:table-cell>
          <table:table-cell table:formula="of:=[.D798]-[.D79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9" office:value-type="float" office:value="7173" calcext:value-type="float">
            <text:p>7173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0830208333333333" calcext:value-type="float">
            <text:p>0,00083020833333333300</text:p>
          </table:table-cell>
          <table:table-cell table:formula="of:=[.D799]-[.D79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9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083125" calcext:value-type="float">
            <text:p>0,00083125000000000000</text:p>
          </table:table-cell>
          <table:table-cell table:formula="of:=[.D800]-[.D79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9" office:value-type="float" office:value="7191" calcext:value-type="float">
            <text:p>7191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0832291666666667" calcext:value-type="float">
            <text:p>0,00083229166666666700</text:p>
          </table:table-cell>
          <table:table-cell table:formula="of:=[.D801]-[.D80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9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0833333333333333" calcext:value-type="float">
            <text:p>0,00083333333333333300</text:p>
          </table:table-cell>
          <table:table-cell table:formula="of:=[.D802]-[.D80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9" office:value-type="float" office:value="7209" calcext:value-type="float">
            <text:p>7209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0834375" calcext:value-type="float">
            <text:p>0,00083437500000000000</text:p>
          </table:table-cell>
          <table:table-cell table:formula="of:=[.D803]-[.D80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9" office:value-type="float" office:value="7218" calcext:value-type="float">
            <text:p>7218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0835416666666667" calcext:value-type="float">
            <text:p>0,00083541666666666700</text:p>
          </table:table-cell>
          <table:table-cell table:formula="of:=[.D804]-[.D80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9" office:value-type="float" office:value="7227" calcext:value-type="float">
            <text:p>7227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0836458333333333" calcext:value-type="float">
            <text:p>0,00083645833333333300</text:p>
          </table:table-cell>
          <table:table-cell table:formula="of:=[.D805]-[.D80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9" office:value-type="float" office:value="7236" calcext:value-type="float">
            <text:p>7236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08375" calcext:value-type="float">
            <text:p>0,00083750000000000000</text:p>
          </table:table-cell>
          <table:table-cell table:formula="of:=[.D806]-[.D80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9" office:value-type="float" office:value="7245" calcext:value-type="float">
            <text:p>724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0838541666666667" calcext:value-type="float">
            <text:p>0,00083854166666666700</text:p>
          </table:table-cell>
          <table:table-cell table:formula="of:=[.D807]-[.D80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9" office:value-type="float" office:value="7254" calcext:value-type="float">
            <text:p>7254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0839583333333333" calcext:value-type="float">
            <text:p>0,00083958333333333300</text:p>
          </table:table-cell>
          <table:table-cell table:formula="of:=[.D808]-[.D80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9" office:value-type="float" office:value="7263" calcext:value-type="float">
            <text:p>7263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0840625" calcext:value-type="float">
            <text:p>0,00084062500000000000</text:p>
          </table:table-cell>
          <table:table-cell table:formula="of:=[.D809]-[.D80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9" office:value-type="float" office:value="7272" calcext:value-type="float">
            <text:p>7272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0841666666666667" calcext:value-type="float">
            <text:p>0,00084166666666666700</text:p>
          </table:table-cell>
          <table:table-cell table:formula="of:=[.D810]-[.D80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9" office:value-type="float" office:value="7281" calcext:value-type="float">
            <text:p>7281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0842708333333333" calcext:value-type="float">
            <text:p>0,00084270833333333300</text:p>
          </table:table-cell>
          <table:table-cell table:formula="of:=[.D811]-[.D81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9" office:value-type="float" office:value="7290" calcext:value-type="float">
            <text:p>729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084375" calcext:value-type="float">
            <text:p>0,00084375000000000000</text:p>
          </table:table-cell>
          <table:table-cell table:formula="of:=[.D812]-[.D81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9" office:value-type="float" office:value="7299" calcext:value-type="float">
            <text:p>7299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0844791666666667" calcext:value-type="float">
            <text:p>0,00084479166666666700</text:p>
          </table:table-cell>
          <table:table-cell table:formula="of:=[.D813]-[.D81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9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0845833333333333" calcext:value-type="float">
            <text:p>0,00084583333333333300</text:p>
          </table:table-cell>
          <table:table-cell table:formula="of:=[.D814]-[.D81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9" office:value-type="float" office:value="7317" calcext:value-type="float">
            <text:p>7317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0846875" calcext:value-type="float">
            <text:p>0,00084687500000000000</text:p>
          </table:table-cell>
          <table:table-cell table:formula="of:=[.D815]-[.D81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9" office:value-type="float" office:value="7326" calcext:value-type="float">
            <text:p>7326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0847916666666667" calcext:value-type="float">
            <text:p>0,00084791666666666700</text:p>
          </table:table-cell>
          <table:table-cell table:formula="of:=[.D816]-[.D81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9" office:value-type="float" office:value="7335" calcext:value-type="float">
            <text:p>733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0848958333333333" calcext:value-type="float">
            <text:p>0,00084895833333333300</text:p>
          </table:table-cell>
          <table:table-cell table:formula="of:=[.D817]-[.D81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9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085" calcext:value-type="float">
            <text:p>0,00085000000000000000</text:p>
          </table:table-cell>
          <table:table-cell table:formula="of:=[.D818]-[.D81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9" office:value-type="float" office:value="7353" calcext:value-type="float">
            <text:p>7353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0851041666666667" calcext:value-type="float">
            <text:p>0,00085104166666666700</text:p>
          </table:table-cell>
          <table:table-cell table:formula="of:=[.D819]-[.D81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9" office:value-type="float" office:value="7362" calcext:value-type="float">
            <text:p>7362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0852083333333333" calcext:value-type="float">
            <text:p>0,00085208333333333300</text:p>
          </table:table-cell>
          <table:table-cell table:formula="of:=[.D820]-[.D81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9" office:value-type="float" office:value="7371" calcext:value-type="float">
            <text:p>7371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0853125" calcext:value-type="float">
            <text:p>0,00085312500000000000</text:p>
          </table:table-cell>
          <table:table-cell table:formula="of:=[.D821]-[.D82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9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0854166666666667" calcext:value-type="float">
            <text:p>0,00085416666666666700</text:p>
          </table:table-cell>
          <table:table-cell table:formula="of:=[.D822]-[.D82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9" office:value-type="float" office:value="7389" calcext:value-type="float">
            <text:p>7389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0855208333333333" calcext:value-type="float">
            <text:p>0,00085520833333333300</text:p>
          </table:table-cell>
          <table:table-cell table:formula="of:=[.D823]-[.D82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9" office:value-type="float" office:value="7398" calcext:value-type="float">
            <text:p>7398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085625" calcext:value-type="float">
            <text:p>0,00085625000000000000</text:p>
          </table:table-cell>
          <table:table-cell table:formula="of:=[.D824]-[.D82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9" office:value-type="float" office:value="7407" calcext:value-type="float">
            <text:p>7407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0857291666666667" calcext:value-type="float">
            <text:p>0,00085729166666666700</text:p>
          </table:table-cell>
          <table:table-cell table:formula="of:=[.D825]-[.D82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9" office:value-type="float" office:value="7416" calcext:value-type="float">
            <text:p>7416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0858333333333333" calcext:value-type="float">
            <text:p>0,00085833333333333300</text:p>
          </table:table-cell>
          <table:table-cell table:formula="of:=[.D826]-[.D82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9" office:value-type="float" office:value="7425" calcext:value-type="float">
            <text:p>742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0859375" calcext:value-type="float">
            <text:p>0,00085937500000000000</text:p>
          </table:table-cell>
          <table:table-cell table:formula="of:=[.D827]-[.D82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9" office:value-type="float" office:value="7434" calcext:value-type="float">
            <text:p>7434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0860416666666667" calcext:value-type="float">
            <text:p>0,00086041666666666700</text:p>
          </table:table-cell>
          <table:table-cell table:formula="of:=[.D828]-[.D82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9" office:value-type="float" office:value="7443" calcext:value-type="float">
            <text:p>7443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0861458333333333" calcext:value-type="float">
            <text:p>0,00086145833333333300</text:p>
          </table:table-cell>
          <table:table-cell table:formula="of:=[.D829]-[.D82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9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08625" calcext:value-type="float">
            <text:p>0,00086250000000000000</text:p>
          </table:table-cell>
          <table:table-cell table:formula="of:=[.D830]-[.D82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9" office:value-type="float" office:value="7461" calcext:value-type="float">
            <text:p>7461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0863541666666667" calcext:value-type="float">
            <text:p>0,00086354166666666700</text:p>
          </table:table-cell>
          <table:table-cell table:formula="of:=[.D831]-[.D83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9" office:value-type="float" office:value="7470" calcext:value-type="float">
            <text:p>747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0864583333333333" calcext:value-type="float">
            <text:p>0,00086458333333333300</text:p>
          </table:table-cell>
          <table:table-cell table:formula="of:=[.D832]-[.D83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9" office:value-type="float" office:value="7479" calcext:value-type="float">
            <text:p>7479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0865625" calcext:value-type="float">
            <text:p>0,00086562500000000000</text:p>
          </table:table-cell>
          <table:table-cell table:formula="of:=[.D833]-[.D83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9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0866666666666667" calcext:value-type="float">
            <text:p>0,00086666666666666700</text:p>
          </table:table-cell>
          <table:table-cell table:formula="of:=[.D834]-[.D83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9" office:value-type="float" office:value="7497" calcext:value-type="float">
            <text:p>7497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0867708333333333" calcext:value-type="float">
            <text:p>0,00086770833333333300</text:p>
          </table:table-cell>
          <table:table-cell table:formula="of:=[.D835]-[.D83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9" office:value-type="float" office:value="7506" calcext:value-type="float">
            <text:p>7506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086875" calcext:value-type="float">
            <text:p>0,00086875000000000000</text:p>
          </table:table-cell>
          <table:table-cell table:formula="of:=[.D836]-[.D83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9" office:value-type="float" office:value="7515" calcext:value-type="float">
            <text:p>751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0869791666666667" calcext:value-type="float">
            <text:p>0,00086979166666666700</text:p>
          </table:table-cell>
          <table:table-cell table:formula="of:=[.D837]-[.D83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9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0870833333333333" calcext:value-type="float">
            <text:p>0,00087083333333333300</text:p>
          </table:table-cell>
          <table:table-cell table:formula="of:=[.D838]-[.D83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9" office:value-type="float" office:value="7533" calcext:value-type="float">
            <text:p>7533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0871875" calcext:value-type="float">
            <text:p>0,00087187500000000000</text:p>
          </table:table-cell>
          <table:table-cell table:formula="of:=[.D839]-[.D83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9" office:value-type="float" office:value="7542" calcext:value-type="float">
            <text:p>7542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0872916666666667" calcext:value-type="float">
            <text:p>0,00087291666666666700</text:p>
          </table:table-cell>
          <table:table-cell table:formula="of:=[.D840]-[.D83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9" office:value-type="float" office:value="7551" calcext:value-type="float">
            <text:p>7551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0873958333333333" calcext:value-type="float">
            <text:p>0,00087395833333333300</text:p>
          </table:table-cell>
          <table:table-cell table:formula="of:=[.D841]-[.D84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9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0875" calcext:value-type="float">
            <text:p>0,00087500000000000000</text:p>
          </table:table-cell>
          <table:table-cell table:formula="of:=[.D842]-[.D84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9" office:value-type="float" office:value="7569" calcext:value-type="float">
            <text:p>7569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0876041666666667" calcext:value-type="float">
            <text:p>0,00087604166666666700</text:p>
          </table:table-cell>
          <table:table-cell table:formula="of:=[.D843]-[.D84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9" office:value-type="float" office:value="7578" calcext:value-type="float">
            <text:p>7578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0877083333333333" calcext:value-type="float">
            <text:p>0,00087708333333333300</text:p>
          </table:table-cell>
          <table:table-cell table:formula="of:=[.D844]-[.D84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9" office:value-type="float" office:value="7587" calcext:value-type="float">
            <text:p>7587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0878125" calcext:value-type="float">
            <text:p>0,00087812500000000000</text:p>
          </table:table-cell>
          <table:table-cell table:formula="of:=[.D845]-[.D84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9" office:value-type="float" office:value="7596" calcext:value-type="float">
            <text:p>7596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0879166666666667" calcext:value-type="float">
            <text:p>0,00087916666666666700</text:p>
          </table:table-cell>
          <table:table-cell table:formula="of:=[.D846]-[.D84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9" office:value-type="float" office:value="7605" calcext:value-type="float">
            <text:p>760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0880208333333333" calcext:value-type="float">
            <text:p>0,00088020833333333300</text:p>
          </table:table-cell>
          <table:table-cell table:formula="of:=[.D847]-[.D84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9" office:value-type="float" office:value="7614" calcext:value-type="float">
            <text:p>7614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088125" calcext:value-type="float">
            <text:p>0,00088125000000000000</text:p>
          </table:table-cell>
          <table:table-cell table:formula="of:=[.D848]-[.D84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9" office:value-type="float" office:value="7623" calcext:value-type="float">
            <text:p>7623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0882291666666667" calcext:value-type="float">
            <text:p>0,00088229166666666700</text:p>
          </table:table-cell>
          <table:table-cell table:formula="of:=[.D849]-[.D84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9" office:value-type="float" office:value="7632" calcext:value-type="float">
            <text:p>7632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0883333333333333" calcext:value-type="float">
            <text:p>0,00088333333333333300</text:p>
          </table:table-cell>
          <table:table-cell table:formula="of:=[.D850]-[.D84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9" office:value-type="float" office:value="7641" calcext:value-type="float">
            <text:p>7641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0884375" calcext:value-type="float">
            <text:p>0,00088437500000000000</text:p>
          </table:table-cell>
          <table:table-cell table:formula="of:=[.D851]-[.D85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9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0885416666666667" calcext:value-type="float">
            <text:p>0,00088541666666666700</text:p>
          </table:table-cell>
          <table:table-cell table:formula="of:=[.D852]-[.D85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9" office:value-type="float" office:value="7659" calcext:value-type="float">
            <text:p>7659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0886458333333333" calcext:value-type="float">
            <text:p>0,00088645833333333300</text:p>
          </table:table-cell>
          <table:table-cell table:formula="of:=[.D853]-[.D85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9" office:value-type="float" office:value="7668" calcext:value-type="float">
            <text:p>7668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08875" calcext:value-type="float">
            <text:p>0,00088750000000000000</text:p>
          </table:table-cell>
          <table:table-cell table:formula="of:=[.D854]-[.D85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9" office:value-type="float" office:value="7677" calcext:value-type="float">
            <text:p>7677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0888541666666667" calcext:value-type="float">
            <text:p>0,00088854166666666700</text:p>
          </table:table-cell>
          <table:table-cell table:formula="of:=[.D855]-[.D85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9" office:value-type="float" office:value="7686" calcext:value-type="float">
            <text:p>7686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0889583333333333" calcext:value-type="float">
            <text:p>0,00088958333333333300</text:p>
          </table:table-cell>
          <table:table-cell table:formula="of:=[.D856]-[.D85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9" office:value-type="float" office:value="7695" calcext:value-type="float">
            <text:p>769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0890625" calcext:value-type="float">
            <text:p>0,00089062500000000000</text:p>
          </table:table-cell>
          <table:table-cell table:formula="of:=[.D857]-[.D85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9" office:value-type="float" office:value="7704" calcext:value-type="float">
            <text:p>7704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0891666666666667" calcext:value-type="float">
            <text:p>0,00089166666666666700</text:p>
          </table:table-cell>
          <table:table-cell table:formula="of:=[.D858]-[.D85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9" office:value-type="float" office:value="7713" calcext:value-type="float">
            <text:p>7713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0892708333333333" calcext:value-type="float">
            <text:p>0,00089270833333333300</text:p>
          </table:table-cell>
          <table:table-cell table:formula="of:=[.D859]-[.D85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9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089375" calcext:value-type="float">
            <text:p>0,00089375000000000000</text:p>
          </table:table-cell>
          <table:table-cell table:formula="of:=[.D860]-[.D85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9" office:value-type="float" office:value="7731" calcext:value-type="float">
            <text:p>7731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0894791666666667" calcext:value-type="float">
            <text:p>0,00089479166666666700</text:p>
          </table:table-cell>
          <table:table-cell table:formula="of:=[.D861]-[.D86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9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0895833333333333" calcext:value-type="float">
            <text:p>0,00089583333333333300</text:p>
          </table:table-cell>
          <table:table-cell table:formula="of:=[.D862]-[.D86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9" office:value-type="float" office:value="7749" calcext:value-type="float">
            <text:p>7749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0896875" calcext:value-type="float">
            <text:p>0,00089687500000000000</text:p>
          </table:table-cell>
          <table:table-cell table:formula="of:=[.D863]-[.D86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9" office:value-type="float" office:value="7758" calcext:value-type="float">
            <text:p>7758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0897916666666667" calcext:value-type="float">
            <text:p>0,00089791666666666700</text:p>
          </table:table-cell>
          <table:table-cell table:formula="of:=[.D864]-[.D86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9" office:value-type="float" office:value="7767" calcext:value-type="float">
            <text:p>7767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0898958333333333" calcext:value-type="float">
            <text:p>0,00089895833333333300</text:p>
          </table:table-cell>
          <table:table-cell table:formula="of:=[.D865]-[.D86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9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09" calcext:value-type="float">
            <text:p>0,00090000000000000000</text:p>
          </table:table-cell>
          <table:table-cell table:formula="of:=[.D866]-[.D86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9" office:value-type="float" office:value="7785" calcext:value-type="float">
            <text:p>778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0901041666666667" calcext:value-type="float">
            <text:p>0,00090104166666666700</text:p>
          </table:table-cell>
          <table:table-cell table:formula="of:=[.D867]-[.D86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9" office:value-type="float" office:value="7794" calcext:value-type="float">
            <text:p>7794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0902083333333333" calcext:value-type="float">
            <text:p>0,00090208333333333300</text:p>
          </table:table-cell>
          <table:table-cell table:formula="of:=[.D868]-[.D86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9" office:value-type="float" office:value="7803" calcext:value-type="float">
            <text:p>7803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0903125" calcext:value-type="float">
            <text:p>0,00090312500000000000</text:p>
          </table:table-cell>
          <table:table-cell table:formula="of:=[.D869]-[.D86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9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0904166666666667" calcext:value-type="float">
            <text:p>0,00090416666666666700</text:p>
          </table:table-cell>
          <table:table-cell table:formula="of:=[.D870]-[.D86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9" office:value-type="float" office:value="7821" calcext:value-type="float">
            <text:p>7821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0905208333333333" calcext:value-type="float">
            <text:p>0,00090520833333333300</text:p>
          </table:table-cell>
          <table:table-cell table:formula="of:=[.D871]-[.D87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9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090625" calcext:value-type="float">
            <text:p>0,00090625000000000000</text:p>
          </table:table-cell>
          <table:table-cell table:formula="of:=[.D872]-[.D87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9" office:value-type="float" office:value="7839" calcext:value-type="float">
            <text:p>7839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0907291666666667" calcext:value-type="float">
            <text:p>0,00090729166666666700</text:p>
          </table:table-cell>
          <table:table-cell table:formula="of:=[.D873]-[.D87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9" office:value-type="float" office:value="7848" calcext:value-type="float">
            <text:p>7848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0908333333333333" calcext:value-type="float">
            <text:p>0,00090833333333333300</text:p>
          </table:table-cell>
          <table:table-cell table:formula="of:=[.D874]-[.D87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9" office:value-type="float" office:value="7857" calcext:value-type="float">
            <text:p>7857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0909375" calcext:value-type="float">
            <text:p>0,00090937500000000000</text:p>
          </table:table-cell>
          <table:table-cell table:formula="of:=[.D875]-[.D87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9" office:value-type="float" office:value="7866" calcext:value-type="float">
            <text:p>7866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0910416666666667" calcext:value-type="float">
            <text:p>0,00091041666666666700</text:p>
          </table:table-cell>
          <table:table-cell table:formula="of:=[.D876]-[.D87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9" office:value-type="float" office:value="7875" calcext:value-type="float">
            <text:p>787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0911458333333333" calcext:value-type="float">
            <text:p>0,00091145833333333300</text:p>
          </table:table-cell>
          <table:table-cell table:formula="of:=[.D877]-[.D87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9" office:value-type="float" office:value="7884" calcext:value-type="float">
            <text:p>7884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09125" calcext:value-type="float">
            <text:p>0,00091250000000000000</text:p>
          </table:table-cell>
          <table:table-cell table:formula="of:=[.D878]-[.D87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9" office:value-type="float" office:value="7893" calcext:value-type="float">
            <text:p>7893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0913541666666667" calcext:value-type="float">
            <text:p>0,00091354166666666700</text:p>
          </table:table-cell>
          <table:table-cell table:formula="of:=[.D879]-[.D87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9" office:value-type="float" office:value="7902" calcext:value-type="float">
            <text:p>7902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0914583333333333" calcext:value-type="float">
            <text:p>0,00091458333333333300</text:p>
          </table:table-cell>
          <table:table-cell table:formula="of:=[.D880]-[.D87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9" office:value-type="float" office:value="7911" calcext:value-type="float">
            <text:p>7911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0915625" calcext:value-type="float">
            <text:p>0,00091562500000000000</text:p>
          </table:table-cell>
          <table:table-cell table:formula="of:=[.D881]-[.D88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9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0916666666666667" calcext:value-type="float">
            <text:p>0,00091666666666666700</text:p>
          </table:table-cell>
          <table:table-cell table:formula="of:=[.D882]-[.D88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9" office:value-type="float" office:value="7929" calcext:value-type="float">
            <text:p>7929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0917708333333333" calcext:value-type="float">
            <text:p>0,00091770833333333300</text:p>
          </table:table-cell>
          <table:table-cell table:formula="of:=[.D883]-[.D88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9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091875" calcext:value-type="float">
            <text:p>0,00091875000000000000</text:p>
          </table:table-cell>
          <table:table-cell table:formula="of:=[.D884]-[.D88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9" office:value-type="float" office:value="7947" calcext:value-type="float">
            <text:p>7947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0919791666666667" calcext:value-type="float">
            <text:p>0,00091979166666666700</text:p>
          </table:table-cell>
          <table:table-cell table:formula="of:=[.D885]-[.D88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9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0920833333333333" calcext:value-type="float">
            <text:p>0,00092083333333333300</text:p>
          </table:table-cell>
          <table:table-cell table:formula="of:=[.D886]-[.D88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9" office:value-type="float" office:value="7965" calcext:value-type="float">
            <text:p>796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0921875" calcext:value-type="float">
            <text:p>0,00092187500000000000</text:p>
          </table:table-cell>
          <table:table-cell table:formula="of:=[.D887]-[.D88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9" office:value-type="float" office:value="7974" calcext:value-type="float">
            <text:p>7974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0922916666666667" calcext:value-type="float">
            <text:p>0,00092291666666666700</text:p>
          </table:table-cell>
          <table:table-cell table:formula="of:=[.D888]-[.D88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9" office:value-type="float" office:value="7983" calcext:value-type="float">
            <text:p>7983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0923958333333333" calcext:value-type="float">
            <text:p>0,00092395833333333300</text:p>
          </table:table-cell>
          <table:table-cell table:formula="of:=[.D889]-[.D88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9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0925" calcext:value-type="float">
            <text:p>0,00092500000000000000</text:p>
          </table:table-cell>
          <table:table-cell table:formula="of:=[.D890]-[.D88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9" office:value-type="float" office:value="8001" calcext:value-type="float">
            <text:p>8001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0926041666666667" calcext:value-type="float">
            <text:p>0,00092604166666666700</text:p>
          </table:table-cell>
          <table:table-cell table:formula="of:=[.D891]-[.D89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9" office:value-type="float" office:value="8010" calcext:value-type="float">
            <text:p>801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0927083333333333" calcext:value-type="float">
            <text:p>0,00092708333333333300</text:p>
          </table:table-cell>
          <table:table-cell table:formula="of:=[.D892]-[.D89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9" office:value-type="float" office:value="8019" calcext:value-type="float">
            <text:p>8019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0928125" calcext:value-type="float">
            <text:p>0,00092812500000000000</text:p>
          </table:table-cell>
          <table:table-cell table:formula="of:=[.D893]-[.D89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9" office:value-type="float" office:value="8028" calcext:value-type="float">
            <text:p>8028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0929166666666667" calcext:value-type="float">
            <text:p>0,00092916666666666700</text:p>
          </table:table-cell>
          <table:table-cell table:formula="of:=[.D894]-[.D89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9" office:value-type="float" office:value="8037" calcext:value-type="float">
            <text:p>8037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0930208333333333" calcext:value-type="float">
            <text:p>0,00093020833333333300</text:p>
          </table:table-cell>
          <table:table-cell table:formula="of:=[.D895]-[.D89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9" office:value-type="float" office:value="8046" calcext:value-type="float">
            <text:p>8046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093125" calcext:value-type="float">
            <text:p>0,00093125000000000000</text:p>
          </table:table-cell>
          <table:table-cell table:formula="of:=[.D896]-[.D89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9" office:value-type="float" office:value="8055" calcext:value-type="float">
            <text:p>8055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0932291666666667" calcext:value-type="float">
            <text:p>0,00093229166666666700</text:p>
          </table:table-cell>
          <table:table-cell table:formula="of:=[.D897]-[.D89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9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0933333333333333" calcext:value-type="float">
            <text:p>0,00093333333333333300</text:p>
          </table:table-cell>
          <table:table-cell table:formula="of:=[.D898]-[.D89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9" office:value-type="float" office:value="8073" calcext:value-type="float">
            <text:p>8073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0934375" calcext:value-type="float">
            <text:p>0,00093437500000000000</text:p>
          </table:table-cell>
          <table:table-cell table:formula="of:=[.D899]-[.D89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9" office:value-type="float" office:value="8082" calcext:value-type="float">
            <text:p>8082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0935416666666667" calcext:value-type="float">
            <text:p>0,00093541666666666700</text:p>
          </table:table-cell>
          <table:table-cell table:formula="of:=[.D900]-[.D89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9" office:value-type="float" office:value="8091" calcext:value-type="float">
            <text:p>8091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0936458333333333" calcext:value-type="float">
            <text:p>0,00093645833333333300</text:p>
          </table:table-cell>
          <table:table-cell table:formula="of:=[.D901]-[.D90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9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09375" calcext:value-type="float">
            <text:p>0,00093750000000000000</text:p>
          </table:table-cell>
          <table:table-cell table:formula="of:=[.D902]-[.D90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9" office:value-type="float" office:value="8109" calcext:value-type="float">
            <text:p>8109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0938541666666667" calcext:value-type="float">
            <text:p>0,00093854166666666700</text:p>
          </table:table-cell>
          <table:table-cell table:formula="of:=[.D903]-[.D90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9" office:value-type="float" office:value="8118" calcext:value-type="float">
            <text:p>8118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0939583333333333" calcext:value-type="float">
            <text:p>0,00093958333333333300</text:p>
          </table:table-cell>
          <table:table-cell table:formula="of:=[.D904]-[.D90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9" office:value-type="float" office:value="8127" calcext:value-type="float">
            <text:p>8127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0940625" calcext:value-type="float">
            <text:p>0,00094062500000000000</text:p>
          </table:table-cell>
          <table:table-cell table:formula="of:=[.D905]-[.D90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9" office:value-type="float" office:value="8136" calcext:value-type="float">
            <text:p>8136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0941666666666667" calcext:value-type="float">
            <text:p>0,00094166666666666700</text:p>
          </table:table-cell>
          <table:table-cell table:formula="of:=[.D906]-[.D90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9" office:value-type="float" office:value="8145" calcext:value-type="float">
            <text:p>8145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0942708333333333" calcext:value-type="float">
            <text:p>0,00094270833333333300</text:p>
          </table:table-cell>
          <table:table-cell table:formula="of:=[.D907]-[.D90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9" office:value-type="float" office:value="8154" calcext:value-type="float">
            <text:p>8154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094375" calcext:value-type="float">
            <text:p>0,00094375000000000000</text:p>
          </table:table-cell>
          <table:table-cell table:formula="of:=[.D908]-[.D90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9" office:value-type="float" office:value="8163" calcext:value-type="float">
            <text:p>8163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0944791666666667" calcext:value-type="float">
            <text:p>0,00094479166666666700</text:p>
          </table:table-cell>
          <table:table-cell table:formula="of:=[.D909]-[.D90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9" office:value-type="float" office:value="8172" calcext:value-type="float">
            <text:p>8172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0945833333333333" calcext:value-type="float">
            <text:p>0,00094583333333333300</text:p>
          </table:table-cell>
          <table:table-cell table:formula="of:=[.D910]-[.D90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9" office:value-type="float" office:value="8181" calcext:value-type="float">
            <text:p>8181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0946875" calcext:value-type="float">
            <text:p>0,00094687500000000000</text:p>
          </table:table-cell>
          <table:table-cell table:formula="of:=[.D911]-[.D91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9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0947916666666667" calcext:value-type="float">
            <text:p>0,00094791666666666700</text:p>
          </table:table-cell>
          <table:table-cell table:formula="of:=[.D912]-[.D91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9" office:value-type="float" office:value="8199" calcext:value-type="float">
            <text:p>8199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0948958333333333" calcext:value-type="float">
            <text:p>0,00094895833333333300</text:p>
          </table:table-cell>
          <table:table-cell table:formula="of:=[.D913]-[.D91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9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095" calcext:value-type="float">
            <text:p>0,00095000000000000000</text:p>
          </table:table-cell>
          <table:table-cell table:formula="of:=[.D914]-[.D91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9" office:value-type="float" office:value="8217" calcext:value-type="float">
            <text:p>8217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0951041666666667" calcext:value-type="float">
            <text:p>0,00095104166666666700</text:p>
          </table:table-cell>
          <table:table-cell table:formula="of:=[.D915]-[.D91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9" office:value-type="float" office:value="8226" calcext:value-type="float">
            <text:p>8226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0952083333333333" calcext:value-type="float">
            <text:p>0,00095208333333333300</text:p>
          </table:table-cell>
          <table:table-cell table:formula="of:=[.D916]-[.D91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9" office:value-type="float" office:value="8235" calcext:value-type="float">
            <text:p>8235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0953125" calcext:value-type="float">
            <text:p>0,00095312500000000000</text:p>
          </table:table-cell>
          <table:table-cell table:formula="of:=[.D917]-[.D91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9" office:value-type="float" office:value="8244" calcext:value-type="float">
            <text:p>8244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0954166666666667" calcext:value-type="float">
            <text:p>0,00095416666666666700</text:p>
          </table:table-cell>
          <table:table-cell table:formula="of:=[.D918]-[.D91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9" office:value-type="float" office:value="8253" calcext:value-type="float">
            <text:p>8253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0955208333333333" calcext:value-type="float">
            <text:p>0,00095520833333333300</text:p>
          </table:table-cell>
          <table:table-cell table:formula="of:=[.D919]-[.D91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9" office:value-type="float" office:value="8262" calcext:value-type="float">
            <text:p>8262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095625" calcext:value-type="float">
            <text:p>0,00095625000000000000</text:p>
          </table:table-cell>
          <table:table-cell table:formula="of:=[.D920]-[.D91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9" office:value-type="float" office:value="8271" calcext:value-type="float">
            <text:p>8271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0957291666666667" calcext:value-type="float">
            <text:p>0,00095729166666666700</text:p>
          </table:table-cell>
          <table:table-cell table:formula="of:=[.D921]-[.D92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9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0958333333333333" calcext:value-type="float">
            <text:p>0,00095833333333333300</text:p>
          </table:table-cell>
          <table:table-cell table:formula="of:=[.D922]-[.D92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9" office:value-type="float" office:value="8289" calcext:value-type="float">
            <text:p>8289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0959375" calcext:value-type="float">
            <text:p>0,00095937500000000000</text:p>
          </table:table-cell>
          <table:table-cell table:formula="of:=[.D923]-[.D92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9" office:value-type="float" office:value="8298" calcext:value-type="float">
            <text:p>8298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0960416666666667" calcext:value-type="float">
            <text:p>0,00096041666666666700</text:p>
          </table:table-cell>
          <table:table-cell table:formula="of:=[.D924]-[.D92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9" office:value-type="float" office:value="8307" calcext:value-type="float">
            <text:p>8307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0961458333333333" calcext:value-type="float">
            <text:p>0,00096145833333333300</text:p>
          </table:table-cell>
          <table:table-cell table:formula="of:=[.D925]-[.D92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9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09625" calcext:value-type="float">
            <text:p>0,00096250000000000000</text:p>
          </table:table-cell>
          <table:table-cell table:formula="of:=[.D926]-[.D92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9" office:value-type="float" office:value="8325" calcext:value-type="float">
            <text:p>8325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0963541666666667" calcext:value-type="float">
            <text:p>0,00096354166666666700</text:p>
          </table:table-cell>
          <table:table-cell table:formula="of:=[.D927]-[.D92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9" office:value-type="float" office:value="8334" calcext:value-type="float">
            <text:p>8334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0964583333333333" calcext:value-type="float">
            <text:p>0,00096458333333333300</text:p>
          </table:table-cell>
          <table:table-cell table:formula="of:=[.D928]-[.D92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9" office:value-type="float" office:value="8343" calcext:value-type="float">
            <text:p>8343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0965625" calcext:value-type="float">
            <text:p>0,00096562500000000000</text:p>
          </table:table-cell>
          <table:table-cell table:formula="of:=[.D929]-[.D92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9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0966666666666667" calcext:value-type="float">
            <text:p>0,00096666666666666700</text:p>
          </table:table-cell>
          <table:table-cell table:formula="of:=[.D930]-[.D929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9" office:value-type="float" office:value="8361" calcext:value-type="float">
            <text:p>8361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0967708333333333" calcext:value-type="float">
            <text:p>0,00096770833333333300</text:p>
          </table:table-cell>
          <table:table-cell table:formula="of:=[.D931]-[.D930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9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096875" calcext:value-type="float">
            <text:p>0,00096875000000000000</text:p>
          </table:table-cell>
          <table:table-cell table:formula="of:=[.D932]-[.D931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9" office:value-type="float" office:value="8379" calcext:value-type="float">
            <text:p>8379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0969791666666667" calcext:value-type="float">
            <text:p>0,00096979166666666700</text:p>
          </table:table-cell>
          <table:table-cell table:formula="of:=[.D933]-[.D932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9" office:value-type="float" office:value="8388" calcext:value-type="float">
            <text:p>8388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0970833333333333" calcext:value-type="float">
            <text:p>0,00097083333333333300</text:p>
          </table:table-cell>
          <table:table-cell table:formula="of:=[.D934]-[.D933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9" office:value-type="float" office:value="8397" calcext:value-type="float">
            <text:p>8397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0971875" calcext:value-type="float">
            <text:p>0,00097187500000000000</text:p>
          </table:table-cell>
          <table:table-cell table:formula="of:=[.D935]-[.D934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9" office:value-type="float" office:value="8406" calcext:value-type="float">
            <text:p>8406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0972916666666667" calcext:value-type="float">
            <text:p>0,00097291666666666700</text:p>
          </table:table-cell>
          <table:table-cell table:formula="of:=[.D936]-[.D935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9" office:value-type="float" office:value="8415" calcext:value-type="float">
            <text:p>8415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0973958333333333" calcext:value-type="float">
            <text:p>0,00097395833333333300</text:p>
          </table:table-cell>
          <table:table-cell table:formula="of:=[.D937]-[.D936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9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0975" calcext:value-type="float">
            <text:p>0,00097500000000000000</text:p>
          </table:table-cell>
          <table:table-cell table:formula="of:=[.D938]-[.D937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9" office:value-type="float" office:value="8433" calcext:value-type="float">
            <text:p>8433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0976041666666667" calcext:value-type="float">
            <text:p>0,00097604166666666700</text:p>
          </table:table-cell>
          <table:table-cell table:formula="of:=[.D939]-[.D938]" office:value-type="float" office:value="0.00000104166666666666" calcext:value-type="float">
            <text:p>0,0000010416666666666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9" office:value-type="float" office:value="8442" calcext:value-type="float">
            <text:p>8442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0977083333333333" calcext:value-type="float">
            <text:p>0,00097708333333333300</text:p>
          </table:table-cell>
          <table:table-cell table:formula="of:=[.D940]-[.D93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9" office:value-type="float" office:value="8451" calcext:value-type="float">
            <text:p>8451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0978125" calcext:value-type="float">
            <text:p>0,00097812500000000000</text:p>
          </table:table-cell>
          <table:table-cell table:formula="of:=[.D941]-[.D9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9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0979166666666667" calcext:value-type="float">
            <text:p>0,00097916666666666700</text:p>
          </table:table-cell>
          <table:table-cell table:formula="of:=[.D942]-[.D94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9" office:value-type="float" office:value="8469" calcext:value-type="float">
            <text:p>8469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0980208333333333" calcext:value-type="float">
            <text:p>0,00098020833333333300</text:p>
          </table:table-cell>
          <table:table-cell table:formula="of:=[.D943]-[.D94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9" office:value-type="float" office:value="8478" calcext:value-type="float">
            <text:p>8478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098125" calcext:value-type="float">
            <text:p>0,00098125000000000000</text:p>
          </table:table-cell>
          <table:table-cell table:formula="of:=[.D944]-[.D94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9" office:value-type="float" office:value="8487" calcext:value-type="float">
            <text:p>8487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0982291666666667" calcext:value-type="float">
            <text:p>0,00098229166666666700</text:p>
          </table:table-cell>
          <table:table-cell table:formula="of:=[.D945]-[.D94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9" office:value-type="float" office:value="8496" calcext:value-type="float">
            <text:p>8496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0983333333333333" calcext:value-type="float">
            <text:p>0,00098333333333333300</text:p>
          </table:table-cell>
          <table:table-cell table:formula="of:=[.D946]-[.D94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9" office:value-type="float" office:value="8505" calcext:value-type="float">
            <text:p>8505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0984375" calcext:value-type="float">
            <text:p>0,00098437500000000000</text:p>
          </table:table-cell>
          <table:table-cell table:formula="of:=[.D947]-[.D9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9" office:value-type="float" office:value="8514" calcext:value-type="float">
            <text:p>8514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0985416666666667" calcext:value-type="float">
            <text:p>0,00098541666666666700</text:p>
          </table:table-cell>
          <table:table-cell table:formula="of:=[.D948]-[.D94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9" office:value-type="float" office:value="8523" calcext:value-type="float">
            <text:p>8523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0986458333333333" calcext:value-type="float">
            <text:p>0,00098645833333333300</text:p>
          </table:table-cell>
          <table:table-cell table:formula="of:=[.D949]-[.D94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9" office:value-type="float" office:value="8532" calcext:value-type="float">
            <text:p>8532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09875" calcext:value-type="float">
            <text:p>0,00098750000000000000</text:p>
          </table:table-cell>
          <table:table-cell table:formula="of:=[.D950]-[.D94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9" office:value-type="float" office:value="8541" calcext:value-type="float">
            <text:p>8541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0988541666666667" calcext:value-type="float">
            <text:p>0,00098854166666666700</text:p>
          </table:table-cell>
          <table:table-cell table:formula="of:=[.D951]-[.D95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9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0989583333333333" calcext:value-type="float">
            <text:p>0,00098958333333333300</text:p>
          </table:table-cell>
          <table:table-cell table:formula="of:=[.D952]-[.D9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9" office:value-type="float" office:value="8559" calcext:value-type="float">
            <text:p>8559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0990625" calcext:value-type="float">
            <text:p>0,00099062500000000000</text:p>
          </table:table-cell>
          <table:table-cell table:formula="of:=[.D953]-[.D95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9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0991666666666667" calcext:value-type="float">
            <text:p>0,00099166666666666700</text:p>
          </table:table-cell>
          <table:table-cell table:formula="of:=[.D954]-[.D95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9" office:value-type="float" office:value="8577" calcext:value-type="float">
            <text:p>8577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0992708333333333" calcext:value-type="float">
            <text:p>0,00099270833333333300</text:p>
          </table:table-cell>
          <table:table-cell table:formula="of:=[.D955]-[.D95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9" office:value-type="float" office:value="8586" calcext:value-type="float">
            <text:p>8586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099375" calcext:value-type="float">
            <text:p>0,00099375000000000000</text:p>
          </table:table-cell>
          <table:table-cell table:formula="of:=[.D956]-[.D95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9" office:value-type="float" office:value="8595" calcext:value-type="float">
            <text:p>8595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0994791666666667" calcext:value-type="float">
            <text:p>0,00099479166666666700</text:p>
          </table:table-cell>
          <table:table-cell table:formula="of:=[.D957]-[.D95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9" office:value-type="float" office:value="8604" calcext:value-type="float">
            <text:p>8604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0995833333333333" calcext:value-type="float">
            <text:p>0,00099583333333333300</text:p>
          </table:table-cell>
          <table:table-cell table:formula="of:=[.D958]-[.D95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9" office:value-type="float" office:value="8613" calcext:value-type="float">
            <text:p>8613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0996875" calcext:value-type="float">
            <text:p>0,00099687500000000000</text:p>
          </table:table-cell>
          <table:table-cell table:formula="of:=[.D959]-[.D95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9" office:value-type="float" office:value="8622" calcext:value-type="float">
            <text:p>8622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0997916666666667" calcext:value-type="float">
            <text:p>0,00099791666666666700</text:p>
          </table:table-cell>
          <table:table-cell table:formula="of:=[.D960]-[.D95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9" office:value-type="float" office:value="8631" calcext:value-type="float">
            <text:p>8631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0998958333333333" calcext:value-type="float">
            <text:p>0,00099895833333333300</text:p>
          </table:table-cell>
          <table:table-cell table:formula="of:=[.D961]-[.D96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9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1" calcext:value-type="float">
            <text:p>0,00100000000000000000</text:p>
          </table:table-cell>
          <table:table-cell table:formula="of:=[.D962]-[.D96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9" office:value-type="float" office:value="8649" calcext:value-type="float">
            <text:p>8649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100104166666667" calcext:value-type="float">
            <text:p>0,00100104166666667000</text:p>
          </table:table-cell>
          <table:table-cell table:formula="of:=[.D963]-[.D96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9" office:value-type="float" office:value="8658" calcext:value-type="float">
            <text:p>8658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100208333333333" calcext:value-type="float">
            <text:p>0,00100208333333333000</text:p>
          </table:table-cell>
          <table:table-cell table:formula="of:=[.D964]-[.D96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9" office:value-type="float" office:value="8667" calcext:value-type="float">
            <text:p>8667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1003125" calcext:value-type="float">
            <text:p>0,00100312500000000000</text:p>
          </table:table-cell>
          <table:table-cell table:formula="of:=[.D965]-[.D96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9" office:value-type="float" office:value="8676" calcext:value-type="float">
            <text:p>8676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100416666666667" calcext:value-type="float">
            <text:p>0,00100416666666667000</text:p>
          </table:table-cell>
          <table:table-cell table:formula="of:=[.D966]-[.D96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9" office:value-type="float" office:value="8685" calcext:value-type="float">
            <text:p>8685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100520833333333" calcext:value-type="float">
            <text:p>0,00100520833333333000</text:p>
          </table:table-cell>
          <table:table-cell table:formula="of:=[.D967]-[.D9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9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100625" calcext:value-type="float">
            <text:p>0,00100625000000000000</text:p>
          </table:table-cell>
          <table:table-cell table:formula="of:=[.D968]-[.D96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9" office:value-type="float" office:value="8703" calcext:value-type="float">
            <text:p>8703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100729166666667" calcext:value-type="float">
            <text:p>0,00100729166666667000</text:p>
          </table:table-cell>
          <table:table-cell table:formula="of:=[.D969]-[.D96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9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100833333333333" calcext:value-type="float">
            <text:p>0,00100833333333333000</text:p>
          </table:table-cell>
          <table:table-cell table:formula="of:=[.D970]-[.D96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9" office:value-type="float" office:value="8721" calcext:value-type="float">
            <text:p>8721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1009375" calcext:value-type="float">
            <text:p>0,00100937500000000000</text:p>
          </table:table-cell>
          <table:table-cell table:formula="of:=[.D971]-[.D97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9" office:value-type="float" office:value="8730" calcext:value-type="float">
            <text:p>873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101041666666667" calcext:value-type="float">
            <text:p>0,00101041666666667000</text:p>
          </table:table-cell>
          <table:table-cell table:formula="of:=[.D972]-[.D97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9" office:value-type="float" office:value="8739" calcext:value-type="float">
            <text:p>8739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101145833333333" calcext:value-type="float">
            <text:p>0,00101145833333333000</text:p>
          </table:table-cell>
          <table:table-cell table:formula="of:=[.D973]-[.D97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9" office:value-type="float" office:value="8748" calcext:value-type="float">
            <text:p>8748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10125" calcext:value-type="float">
            <text:p>0,00101250000000000000</text:p>
          </table:table-cell>
          <table:table-cell table:formula="of:=[.D974]-[.D97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9" office:value-type="float" office:value="8757" calcext:value-type="float">
            <text:p>8757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101354166666667" calcext:value-type="float">
            <text:p>0,00101354166666667000</text:p>
          </table:table-cell>
          <table:table-cell table:formula="of:=[.D975]-[.D97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9" office:value-type="float" office:value="8766" calcext:value-type="float">
            <text:p>8766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101458333333333" calcext:value-type="float">
            <text:p>0,00101458333333333000</text:p>
          </table:table-cell>
          <table:table-cell table:formula="of:=[.D976]-[.D97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9" office:value-type="float" office:value="8775" calcext:value-type="float">
            <text:p>8775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1015625" calcext:value-type="float">
            <text:p>0,00101562500000000000</text:p>
          </table:table-cell>
          <table:table-cell table:formula="of:=[.D977]-[.D97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9" office:value-type="float" office:value="8784" calcext:value-type="float">
            <text:p>8784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101666666666667" calcext:value-type="float">
            <text:p>0,00101666666666667000</text:p>
          </table:table-cell>
          <table:table-cell table:formula="of:=[.D978]-[.D97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9" office:value-type="float" office:value="8793" calcext:value-type="float">
            <text:p>8793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101770833333333" calcext:value-type="float">
            <text:p>0,00101770833333333000</text:p>
          </table:table-cell>
          <table:table-cell table:formula="of:=[.D979]-[.D97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9" office:value-type="float" office:value="8802" calcext:value-type="float">
            <text:p>8802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101875" calcext:value-type="float">
            <text:p>0,00101875000000000000</text:p>
          </table:table-cell>
          <table:table-cell table:formula="of:=[.D980]-[.D97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9" office:value-type="float" office:value="8811" calcext:value-type="float">
            <text:p>8811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101979166666667" calcext:value-type="float">
            <text:p>0,00101979166666667000</text:p>
          </table:table-cell>
          <table:table-cell table:formula="of:=[.D981]-[.D9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9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102083333333333" calcext:value-type="float">
            <text:p>0,00102083333333333000</text:p>
          </table:table-cell>
          <table:table-cell table:formula="of:=[.D982]-[.D98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9" office:value-type="float" office:value="8829" calcext:value-type="float">
            <text:p>8829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1021875" calcext:value-type="float">
            <text:p>0,00102187500000000000</text:p>
          </table:table-cell>
          <table:table-cell table:formula="of:=[.D983]-[.D98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9" office:value-type="float" office:value="8838" calcext:value-type="float">
            <text:p>8838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102291666666667" calcext:value-type="float">
            <text:p>0,00102291666666667000</text:p>
          </table:table-cell>
          <table:table-cell table:formula="of:=[.D984]-[.D98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9" office:value-type="float" office:value="8847" calcext:value-type="float">
            <text:p>8847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102395833333333" calcext:value-type="float">
            <text:p>0,00102395833333333000</text:p>
          </table:table-cell>
          <table:table-cell table:formula="of:=[.D985]-[.D98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9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1025" calcext:value-type="float">
            <text:p>0,00102500000000000000</text:p>
          </table:table-cell>
          <table:table-cell table:formula="of:=[.D986]-[.D98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9" office:value-type="float" office:value="8865" calcext:value-type="float">
            <text:p>8865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102604166666667" calcext:value-type="float">
            <text:p>0,00102604166666667000</text:p>
          </table:table-cell>
          <table:table-cell table:formula="of:=[.D987]-[.D98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9" office:value-type="float" office:value="8874" calcext:value-type="float">
            <text:p>8874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102708333333333" calcext:value-type="float">
            <text:p>0,00102708333333333000</text:p>
          </table:table-cell>
          <table:table-cell table:formula="of:=[.D988]-[.D98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9" office:value-type="float" office:value="8883" calcext:value-type="float">
            <text:p>8883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1028125" calcext:value-type="float">
            <text:p>0,00102812500000000000</text:p>
          </table:table-cell>
          <table:table-cell table:formula="of:=[.D989]-[.D98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9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102916666666667" calcext:value-type="float">
            <text:p>0,00102916666666667000</text:p>
          </table:table-cell>
          <table:table-cell table:formula="of:=[.D990]-[.D98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9" office:value-type="float" office:value="8901" calcext:value-type="float">
            <text:p>8901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103020833333333" calcext:value-type="float">
            <text:p>0,00103020833333333000</text:p>
          </table:table-cell>
          <table:table-cell table:formula="of:=[.D991]-[.D99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9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103125" calcext:value-type="float">
            <text:p>0,00103125000000000000</text:p>
          </table:table-cell>
          <table:table-cell table:formula="of:=[.D992]-[.D99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9" office:value-type="float" office:value="8919" calcext:value-type="float">
            <text:p>8919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103229166666667" calcext:value-type="float">
            <text:p>0,00103229166666667000</text:p>
          </table:table-cell>
          <table:table-cell table:formula="of:=[.D993]-[.D99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9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103333333333333" calcext:value-type="float">
            <text:p>0,00103333333333333000</text:p>
          </table:table-cell>
          <table:table-cell table:formula="of:=[.D994]-[.D99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9" office:value-type="float" office:value="8937" calcext:value-type="float">
            <text:p>8937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1034375" calcext:value-type="float">
            <text:p>0,00103437500000000000</text:p>
          </table:table-cell>
          <table:table-cell table:formula="of:=[.D995]-[.D99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9" office:value-type="float" office:value="8946" calcext:value-type="float">
            <text:p>8946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103541666666667" calcext:value-type="float">
            <text:p>0,00103541666666667000</text:p>
          </table:table-cell>
          <table:table-cell table:formula="of:=[.D996]-[.D99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9" office:value-type="float" office:value="8955" calcext:value-type="float">
            <text:p>8955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103645833333333" calcext:value-type="float">
            <text:p>0,00103645833333333000</text:p>
          </table:table-cell>
          <table:table-cell table:formula="of:=[.D997]-[.D99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9" office:value-type="float" office:value="8964" calcext:value-type="float">
            <text:p>8964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10375" calcext:value-type="float">
            <text:p>0,00103750000000000000</text:p>
          </table:table-cell>
          <table:table-cell table:formula="of:=[.D998]-[.D99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9" office:value-type="float" office:value="8973" calcext:value-type="float">
            <text:p>8973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103854166666667" calcext:value-type="float">
            <text:p>0,00103854166666667000</text:p>
          </table:table-cell>
          <table:table-cell table:formula="of:=[.D999]-[.D99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9" office:value-type="float" office:value="8982" calcext:value-type="float">
            <text:p>8982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103958333333333" calcext:value-type="float">
            <text:p>0,00103958333333333000</text:p>
          </table:table-cell>
          <table:table-cell table:formula="of:=[.D1000]-[.D99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9" office:value-type="float" office:value="8991" calcext:value-type="float">
            <text:p>8991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1040625" calcext:value-type="float">
            <text:p>0,00104062500000000000</text:p>
          </table:table-cell>
          <table:table-cell table:formula="of:=[.D1001]-[.D100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9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104166666666667" calcext:value-type="float">
            <text:p>0,00104166666666667000</text:p>
          </table:table-cell>
          <table:table-cell table:formula="of:=[.D1002]-[.D100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9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104270833333333" calcext:value-type="float">
            <text:p>0,00104270833333333000</text:p>
          </table:table-cell>
          <table:table-cell table:formula="of:=[.D1003]-[.D100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9" office:value-type="float" office:value="9018" calcext:value-type="float">
            <text:p>9018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104375" calcext:value-type="float">
            <text:p>0,00104375000000000000</text:p>
          </table:table-cell>
          <table:table-cell table:formula="of:=[.D1004]-[.D100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9" office:value-type="float" office:value="9027" calcext:value-type="float">
            <text:p>9027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104479166666667" calcext:value-type="float">
            <text:p>0,00104479166666667000</text:p>
          </table:table-cell>
          <table:table-cell table:formula="of:=[.D1005]-[.D100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9" office:value-type="float" office:value="9036" calcext:value-type="float">
            <text:p>9036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104583333333333" calcext:value-type="float">
            <text:p>0,00104583333333333000</text:p>
          </table:table-cell>
          <table:table-cell table:formula="of:=[.D1006]-[.D100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9" office:value-type="float" office:value="9045" calcext:value-type="float">
            <text:p>9045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1046875" calcext:value-type="float">
            <text:p>0,00104687500000000000</text:p>
          </table:table-cell>
          <table:table-cell table:formula="of:=[.D1007]-[.D100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9" office:value-type="float" office:value="9054" calcext:value-type="float">
            <text:p>9054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104791666666667" calcext:value-type="float">
            <text:p>0,00104791666666667000</text:p>
          </table:table-cell>
          <table:table-cell table:formula="of:=[.D1008]-[.D100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9" office:value-type="float" office:value="9063" calcext:value-type="float">
            <text:p>9063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104895833333333" calcext:value-type="float">
            <text:p>0,00104895833333333000</text:p>
          </table:table-cell>
          <table:table-cell table:formula="of:=[.D1009]-[.D100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9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105" calcext:value-type="float">
            <text:p>0,00105000000000000000</text:p>
          </table:table-cell>
          <table:table-cell table:formula="of:=[.D1010]-[.D100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9" office:value-type="float" office:value="9081" calcext:value-type="float">
            <text:p>9081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105104166666667" calcext:value-type="float">
            <text:p>0,00105104166666667000</text:p>
          </table:table-cell>
          <table:table-cell table:formula="of:=[.D1011]-[.D101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9" office:value-type="float" office:value="9090" calcext:value-type="float">
            <text:p>909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105208333333333" calcext:value-type="float">
            <text:p>0,00105208333333333000</text:p>
          </table:table-cell>
          <table:table-cell table:formula="of:=[.D1012]-[.D101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9" office:value-type="float" office:value="9099" calcext:value-type="float">
            <text:p>9099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1053125" calcext:value-type="float">
            <text:p>0,00105312500000000000</text:p>
          </table:table-cell>
          <table:table-cell table:formula="of:=[.D1013]-[.D101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9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105416666666667" calcext:value-type="float">
            <text:p>0,00105416666666667000</text:p>
          </table:table-cell>
          <table:table-cell table:formula="of:=[.D1014]-[.D101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9" office:value-type="float" office:value="9117" calcext:value-type="float">
            <text:p>9117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105520833333333" calcext:value-type="float">
            <text:p>0,00105520833333333000</text:p>
          </table:table-cell>
          <table:table-cell table:formula="of:=[.D1015]-[.D10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9" office:value-type="float" office:value="9126" calcext:value-type="float">
            <text:p>9126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105625" calcext:value-type="float">
            <text:p>0,00105625000000000000</text:p>
          </table:table-cell>
          <table:table-cell table:formula="of:=[.D1016]-[.D101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9" office:value-type="float" office:value="9135" calcext:value-type="float">
            <text:p>9135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105729166666667" calcext:value-type="float">
            <text:p>0,00105729166666667000</text:p>
          </table:table-cell>
          <table:table-cell table:formula="of:=[.D1017]-[.D101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9" office:value-type="float" office:value="9144" calcext:value-type="float">
            <text:p>9144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105833333333333" calcext:value-type="float">
            <text:p>0,00105833333333333000</text:p>
          </table:table-cell>
          <table:table-cell table:formula="of:=[.D1018]-[.D101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9" office:value-type="float" office:value="9153" calcext:value-type="float">
            <text:p>9153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1059375" calcext:value-type="float">
            <text:p>0,00105937500000000000</text:p>
          </table:table-cell>
          <table:table-cell table:formula="of:=[.D1019]-[.D101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9" office:value-type="float" office:value="9162" calcext:value-type="float">
            <text:p>9162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106041666666667" calcext:value-type="float">
            <text:p>0,00106041666666667000</text:p>
          </table:table-cell>
          <table:table-cell table:formula="of:=[.D1020]-[.D101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9" office:value-type="float" office:value="9171" calcext:value-type="float">
            <text:p>9171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106145833333333" calcext:value-type="float">
            <text:p>0,00106145833333333000</text:p>
          </table:table-cell>
          <table:table-cell table:formula="of:=[.D1021]-[.D102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9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10625" calcext:value-type="float">
            <text:p>0,00106250000000000000</text:p>
          </table:table-cell>
          <table:table-cell table:formula="of:=[.D1022]-[.D102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9" office:value-type="float" office:value="9189" calcext:value-type="float">
            <text:p>9189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106354166666667" calcext:value-type="float">
            <text:p>0,00106354166666667000</text:p>
          </table:table-cell>
          <table:table-cell table:formula="of:=[.D1023]-[.D102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9" office:value-type="float" office:value="9198" calcext:value-type="float">
            <text:p>9198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106458333333333" calcext:value-type="float">
            <text:p>0,00106458333333333000</text:p>
          </table:table-cell>
          <table:table-cell table:formula="of:=[.D1024]-[.D102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9" office:value-type="float" office:value="9207" calcext:value-type="float">
            <text:p>9207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1065625" calcext:value-type="float">
            <text:p>0,00106562500000000000</text:p>
          </table:table-cell>
          <table:table-cell table:formula="of:=[.D1025]-[.D102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9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106666666666667" calcext:value-type="float">
            <text:p>0,00106666666666667000</text:p>
          </table:table-cell>
          <table:table-cell table:formula="of:=[.D1026]-[.D102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9" office:value-type="float" office:value="9225" calcext:value-type="float">
            <text:p>9225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106770833333333" calcext:value-type="float">
            <text:p>0,00106770833333333000</text:p>
          </table:table-cell>
          <table:table-cell table:formula="of:=[.D1027]-[.D102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9" office:value-type="float" office:value="9234" calcext:value-type="float">
            <text:p>9234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106875" calcext:value-type="float">
            <text:p>0,00106875000000000000</text:p>
          </table:table-cell>
          <table:table-cell table:formula="of:=[.D1028]-[.D102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9" office:value-type="float" office:value="9243" calcext:value-type="float">
            <text:p>9243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106979166666667" calcext:value-type="float">
            <text:p>0,00106979166666667000</text:p>
          </table:table-cell>
          <table:table-cell table:formula="of:=[.D1029]-[.D102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9" office:value-type="float" office:value="9252" calcext:value-type="float">
            <text:p>9252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107083333333333" calcext:value-type="float">
            <text:p>0,00107083333333333000</text:p>
          </table:table-cell>
          <table:table-cell table:formula="of:=[.D1030]-[.D102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9" office:value-type="float" office:value="9261" calcext:value-type="float">
            <text:p>9261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1071875" calcext:value-type="float">
            <text:p>0,00107187500000000000</text:p>
          </table:table-cell>
          <table:table-cell table:formula="of:=[.D1031]-[.D103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9" office:value-type="float" office:value="9270" calcext:value-type="float">
            <text:p>927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107291666666667" calcext:value-type="float">
            <text:p>0,00107291666666667000</text:p>
          </table:table-cell>
          <table:table-cell table:formula="of:=[.D1032]-[.D103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9" office:value-type="float" office:value="9279" calcext:value-type="float">
            <text:p>9279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107395833333333" calcext:value-type="float">
            <text:p>0,00107395833333333000</text:p>
          </table:table-cell>
          <table:table-cell table:formula="of:=[.D1033]-[.D103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9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1075" calcext:value-type="float">
            <text:p>0,00107500000000000000</text:p>
          </table:table-cell>
          <table:table-cell table:formula="of:=[.D1034]-[.D103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9" office:value-type="float" office:value="9297" calcext:value-type="float">
            <text:p>9297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107604166666667" calcext:value-type="float">
            <text:p>0,00107604166666667000</text:p>
          </table:table-cell>
          <table:table-cell table:formula="of:=[.D1035]-[.D103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9" office:value-type="float" office:value="9306" calcext:value-type="float">
            <text:p>9306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107708333333333" calcext:value-type="float">
            <text:p>0,00107708333333333000</text:p>
          </table:table-cell>
          <table:table-cell table:formula="of:=[.D1036]-[.D103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9" office:value-type="float" office:value="9315" calcext:value-type="float">
            <text:p>9315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1078125" calcext:value-type="float">
            <text:p>0,00107812500000000000</text:p>
          </table:table-cell>
          <table:table-cell table:formula="of:=[.D1037]-[.D103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9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107916666666667" calcext:value-type="float">
            <text:p>0,00107916666666667000</text:p>
          </table:table-cell>
          <table:table-cell table:formula="of:=[.D1038]-[.D103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9" office:value-type="float" office:value="9333" calcext:value-type="float">
            <text:p>9333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108020833333333" calcext:value-type="float">
            <text:p>0,00108020833333333000</text:p>
          </table:table-cell>
          <table:table-cell table:formula="of:=[.D1039]-[.D103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9" office:value-type="float" office:value="9342" calcext:value-type="float">
            <text:p>9342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108125" calcext:value-type="float">
            <text:p>0,00108125000000000000</text:p>
          </table:table-cell>
          <table:table-cell table:formula="of:=[.D1040]-[.D103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9" office:value-type="float" office:value="9351" calcext:value-type="float">
            <text:p>9351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108229166666667" calcext:value-type="float">
            <text:p>0,00108229166666667000</text:p>
          </table:table-cell>
          <table:table-cell table:formula="of:=[.D1041]-[.D10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9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108333333333333" calcext:value-type="float">
            <text:p>0,00108333333333333000</text:p>
          </table:table-cell>
          <table:table-cell table:formula="of:=[.D1042]-[.D104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9" office:value-type="float" office:value="9369" calcext:value-type="float">
            <text:p>9369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1084375" calcext:value-type="float">
            <text:p>0,00108437500000000000</text:p>
          </table:table-cell>
          <table:table-cell table:formula="of:=[.D1043]-[.D104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9" office:value-type="float" office:value="9378" calcext:value-type="float">
            <text:p>9378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108541666666667" calcext:value-type="float">
            <text:p>0,00108541666666667000</text:p>
          </table:table-cell>
          <table:table-cell table:formula="of:=[.D1044]-[.D104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9" office:value-type="float" office:value="9387" calcext:value-type="float">
            <text:p>9387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108645833333333" calcext:value-type="float">
            <text:p>0,00108645833333333000</text:p>
          </table:table-cell>
          <table:table-cell table:formula="of:=[.D1045]-[.D104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9" office:value-type="float" office:value="9396" calcext:value-type="float">
            <text:p>9396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10875" calcext:value-type="float">
            <text:p>0,00108750000000000000</text:p>
          </table:table-cell>
          <table:table-cell table:formula="of:=[.D1046]-[.D104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9" office:value-type="float" office:value="9405" calcext:value-type="float">
            <text:p>9405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108854166666667" calcext:value-type="float">
            <text:p>0,00108854166666667000</text:p>
          </table:table-cell>
          <table:table-cell table:formula="of:=[.D1047]-[.D10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9" office:value-type="float" office:value="9414" calcext:value-type="float">
            <text:p>9414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108958333333333" calcext:value-type="float">
            <text:p>0,00108958333333333000</text:p>
          </table:table-cell>
          <table:table-cell table:formula="of:=[.D1048]-[.D104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9" office:value-type="float" office:value="9423" calcext:value-type="float">
            <text:p>9423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1090625" calcext:value-type="float">
            <text:p>0,00109062500000000000</text:p>
          </table:table-cell>
          <table:table-cell table:formula="of:=[.D1049]-[.D104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9" office:value-type="float" office:value="9432" calcext:value-type="float">
            <text:p>9432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109166666666667" calcext:value-type="float">
            <text:p>0,00109166666666667000</text:p>
          </table:table-cell>
          <table:table-cell table:formula="of:=[.D1050]-[.D104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9" office:value-type="float" office:value="9441" calcext:value-type="float">
            <text:p>9441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109270833333333" calcext:value-type="float">
            <text:p>0,00109270833333333000</text:p>
          </table:table-cell>
          <table:table-cell table:formula="of:=[.D1051]-[.D105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9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109375" calcext:value-type="float">
            <text:p>0,00109375000000000000</text:p>
          </table:table-cell>
          <table:table-cell table:formula="of:=[.D1052]-[.D10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9" office:value-type="float" office:value="9459" calcext:value-type="float">
            <text:p>9459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109479166666667" calcext:value-type="float">
            <text:p>0,00109479166666667000</text:p>
          </table:table-cell>
          <table:table-cell table:formula="of:=[.D1053]-[.D105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9" office:value-type="float" office:value="9468" calcext:value-type="float">
            <text:p>9468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109583333333333" calcext:value-type="float">
            <text:p>0,00109583333333333000</text:p>
          </table:table-cell>
          <table:table-cell table:formula="of:=[.D1054]-[.D105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9" office:value-type="float" office:value="9477" calcext:value-type="float">
            <text:p>9477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1096875" calcext:value-type="float">
            <text:p>0,00109687500000000000</text:p>
          </table:table-cell>
          <table:table-cell table:formula="of:=[.D1055]-[.D105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9" office:value-type="float" office:value="9486" calcext:value-type="float">
            <text:p>9486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109791666666667" calcext:value-type="float">
            <text:p>0,00109791666666667000</text:p>
          </table:table-cell>
          <table:table-cell table:formula="of:=[.D1056]-[.D105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9" office:value-type="float" office:value="9495" calcext:value-type="float">
            <text:p>9495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109895833333333" calcext:value-type="float">
            <text:p>0,00109895833333333000</text:p>
          </table:table-cell>
          <table:table-cell table:formula="of:=[.D1057]-[.D105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9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11" calcext:value-type="float">
            <text:p>0,00110000000000000000</text:p>
          </table:table-cell>
          <table:table-cell table:formula="of:=[.D1058]-[.D105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9" office:value-type="float" office:value="9513" calcext:value-type="float">
            <text:p>9513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110104166666667" calcext:value-type="float">
            <text:p>0,00110104166666667000</text:p>
          </table:table-cell>
          <table:table-cell table:formula="of:=[.D1059]-[.D105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9" office:value-type="float" office:value="9522" calcext:value-type="float">
            <text:p>9522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110208333333333" calcext:value-type="float">
            <text:p>0,00110208333333333000</text:p>
          </table:table-cell>
          <table:table-cell table:formula="of:=[.D1060]-[.D105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9" office:value-type="float" office:value="9531" calcext:value-type="float">
            <text:p>9531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1103125" calcext:value-type="float">
            <text:p>0,00110312500000000000</text:p>
          </table:table-cell>
          <table:table-cell table:formula="of:=[.D1061]-[.D106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9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110416666666667" calcext:value-type="float">
            <text:p>0,00110416666666667000</text:p>
          </table:table-cell>
          <table:table-cell table:formula="of:=[.D1062]-[.D106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9" office:value-type="float" office:value="9549" calcext:value-type="float">
            <text:p>9549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110520833333333" calcext:value-type="float">
            <text:p>0,00110520833333333000</text:p>
          </table:table-cell>
          <table:table-cell table:formula="of:=[.D1063]-[.D106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9" office:value-type="float" office:value="9558" calcext:value-type="float">
            <text:p>9558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110625" calcext:value-type="float">
            <text:p>0,00110625000000000000</text:p>
          </table:table-cell>
          <table:table-cell table:formula="of:=[.D1064]-[.D106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9" office:value-type="float" office:value="9567" calcext:value-type="float">
            <text:p>9567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110729166666667" calcext:value-type="float">
            <text:p>0,00110729166666667000</text:p>
          </table:table-cell>
          <table:table-cell table:formula="of:=[.D1065]-[.D106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9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110833333333333" calcext:value-type="float">
            <text:p>0,00110833333333333000</text:p>
          </table:table-cell>
          <table:table-cell table:formula="of:=[.D1066]-[.D106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9" office:value-type="float" office:value="9585" calcext:value-type="float">
            <text:p>9585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1109375" calcext:value-type="float">
            <text:p>0,00110937500000000000</text:p>
          </table:table-cell>
          <table:table-cell table:formula="of:=[.D1067]-[.D106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9" office:value-type="float" office:value="9594" calcext:value-type="float">
            <text:p>9594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111041666666667" calcext:value-type="float">
            <text:p>0,00111041666666667000</text:p>
          </table:table-cell>
          <table:table-cell table:formula="of:=[.D1068]-[.D106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9" office:value-type="float" office:value="9603" calcext:value-type="float">
            <text:p>9603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111145833333333" calcext:value-type="float">
            <text:p>0,00111145833333333000</text:p>
          </table:table-cell>
          <table:table-cell table:formula="of:=[.D1069]-[.D106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9" office:value-type="float" office:value="9612" calcext:value-type="float">
            <text:p>9612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11125" calcext:value-type="float">
            <text:p>0,00111250000000000000</text:p>
          </table:table-cell>
          <table:table-cell table:formula="of:=[.D1070]-[.D106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9" office:value-type="float" office:value="9621" calcext:value-type="float">
            <text:p>9621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111354166666667" calcext:value-type="float">
            <text:p>0,00111354166666667000</text:p>
          </table:table-cell>
          <table:table-cell table:formula="of:=[.D1071]-[.D107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9" office:value-type="float" office:value="9630" calcext:value-type="float">
            <text:p>963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111458333333333" calcext:value-type="float">
            <text:p>0,00111458333333333000</text:p>
          </table:table-cell>
          <table:table-cell table:formula="of:=[.D1072]-[.D107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9" office:value-type="float" office:value="9639" calcext:value-type="float">
            <text:p>9639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1115625" calcext:value-type="float">
            <text:p>0,00111562500000000000</text:p>
          </table:table-cell>
          <table:table-cell table:formula="of:=[.D1073]-[.D107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9" office:value-type="float" office:value="9648" calcext:value-type="float">
            <text:p>9648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111666666666667" calcext:value-type="float">
            <text:p>0,00111666666666667000</text:p>
          </table:table-cell>
          <table:table-cell table:formula="of:=[.D1074]-[.D107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9" office:value-type="float" office:value="9657" calcext:value-type="float">
            <text:p>9657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111770833333333" calcext:value-type="float">
            <text:p>0,00111770833333333000</text:p>
          </table:table-cell>
          <table:table-cell table:formula="of:=[.D1075]-[.D107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9" office:value-type="float" office:value="9666" calcext:value-type="float">
            <text:p>9666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111875" calcext:value-type="float">
            <text:p>0,00111875000000000000</text:p>
          </table:table-cell>
          <table:table-cell table:formula="of:=[.D1076]-[.D107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9" office:value-type="float" office:value="9675" calcext:value-type="float">
            <text:p>9675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111979166666667" calcext:value-type="float">
            <text:p>0,00111979166666667000</text:p>
          </table:table-cell>
          <table:table-cell table:formula="of:=[.D1077]-[.D107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9" office:value-type="float" office:value="9684" calcext:value-type="float">
            <text:p>9684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112083333333333" calcext:value-type="float">
            <text:p>0,00112083333333333000</text:p>
          </table:table-cell>
          <table:table-cell table:formula="of:=[.D1078]-[.D107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9" office:value-type="float" office:value="9693" calcext:value-type="float">
            <text:p>9693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1121875" calcext:value-type="float">
            <text:p>0,00112187500000000000</text:p>
          </table:table-cell>
          <table:table-cell table:formula="of:=[.D1079]-[.D107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9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112291666666667" calcext:value-type="float">
            <text:p>0,00112291666666667000</text:p>
          </table:table-cell>
          <table:table-cell table:formula="of:=[.D1080]-[.D107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9" office:value-type="float" office:value="9711" calcext:value-type="float">
            <text:p>9711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112395833333333" calcext:value-type="float">
            <text:p>0,00112395833333333000</text:p>
          </table:table-cell>
          <table:table-cell table:formula="of:=[.D1081]-[.D10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9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1125" calcext:value-type="float">
            <text:p>0,00112500000000000000</text:p>
          </table:table-cell>
          <table:table-cell table:formula="of:=[.D1082]-[.D108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9" office:value-type="float" office:value="9729" calcext:value-type="float">
            <text:p>9729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112604166666667" calcext:value-type="float">
            <text:p>0,00112604166666667000</text:p>
          </table:table-cell>
          <table:table-cell table:formula="of:=[.D1083]-[.D108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9" office:value-type="float" office:value="9738" calcext:value-type="float">
            <text:p>9738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112708333333333" calcext:value-type="float">
            <text:p>0,00112708333333333000</text:p>
          </table:table-cell>
          <table:table-cell table:formula="of:=[.D1084]-[.D108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9" office:value-type="float" office:value="9747" calcext:value-type="float">
            <text:p>9747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1128125" calcext:value-type="float">
            <text:p>0,00112812500000000000</text:p>
          </table:table-cell>
          <table:table-cell table:formula="of:=[.D1085]-[.D108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9" office:value-type="float" office:value="9756" calcext:value-type="float">
            <text:p>9756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112916666666667" calcext:value-type="float">
            <text:p>0,00112916666666667000</text:p>
          </table:table-cell>
          <table:table-cell table:formula="of:=[.D1086]-[.D108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9" office:value-type="float" office:value="9765" calcext:value-type="float">
            <text:p>9765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113020833333333" calcext:value-type="float">
            <text:p>0,00113020833333333000</text:p>
          </table:table-cell>
          <table:table-cell table:formula="of:=[.D1087]-[.D108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9" office:value-type="float" office:value="9774" calcext:value-type="float">
            <text:p>9774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113125" calcext:value-type="float">
            <text:p>0,00113125000000000000</text:p>
          </table:table-cell>
          <table:table-cell table:formula="of:=[.D1088]-[.D108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9" office:value-type="float" office:value="9783" calcext:value-type="float">
            <text:p>9783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113229166666667" calcext:value-type="float">
            <text:p>0,00113229166666667000</text:p>
          </table:table-cell>
          <table:table-cell table:formula="of:=[.D1089]-[.D108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9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113333333333333" calcext:value-type="float">
            <text:p>0,00113333333333333000</text:p>
          </table:table-cell>
          <table:table-cell table:formula="of:=[.D1090]-[.D108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9" office:value-type="float" office:value="9801" calcext:value-type="float">
            <text:p>9801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1134375" calcext:value-type="float">
            <text:p>0,00113437500000000000</text:p>
          </table:table-cell>
          <table:table-cell table:formula="of:=[.D1091]-[.D109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9" office:value-type="float" office:value="9810" calcext:value-type="float">
            <text:p>981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113541666666667" calcext:value-type="float">
            <text:p>0,00113541666666667000</text:p>
          </table:table-cell>
          <table:table-cell table:formula="of:=[.D1092]-[.D109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9" office:value-type="float" office:value="9819" calcext:value-type="float">
            <text:p>9819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113645833333333" calcext:value-type="float">
            <text:p>0,00113645833333333000</text:p>
          </table:table-cell>
          <table:table-cell table:formula="of:=[.D1093]-[.D109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9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11375" calcext:value-type="float">
            <text:p>0,00113750000000000000</text:p>
          </table:table-cell>
          <table:table-cell table:formula="of:=[.D1094]-[.D109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9" office:value-type="float" office:value="9837" calcext:value-type="float">
            <text:p>9837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113854166666667" calcext:value-type="float">
            <text:p>0,00113854166666667000</text:p>
          </table:table-cell>
          <table:table-cell table:formula="of:=[.D1095]-[.D109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9" office:value-type="float" office:value="9846" calcext:value-type="float">
            <text:p>9846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113958333333333" calcext:value-type="float">
            <text:p>0,00113958333333333000</text:p>
          </table:table-cell>
          <table:table-cell table:formula="of:=[.D1096]-[.D109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9" office:value-type="float" office:value="9855" calcext:value-type="float">
            <text:p>9855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1140625" calcext:value-type="float">
            <text:p>0,00114062500000000000</text:p>
          </table:table-cell>
          <table:table-cell table:formula="of:=[.D1097]-[.D109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9" office:value-type="float" office:value="9864" calcext:value-type="float">
            <text:p>9864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114166666666667" calcext:value-type="float">
            <text:p>0,00114166666666667000</text:p>
          </table:table-cell>
          <table:table-cell table:formula="of:=[.D1098]-[.D109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9" office:value-type="float" office:value="9873" calcext:value-type="float">
            <text:p>9873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114270833333333" calcext:value-type="float">
            <text:p>0,00114270833333333000</text:p>
          </table:table-cell>
          <table:table-cell table:formula="of:=[.D1099]-[.D109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9" office:value-type="float" office:value="9882" calcext:value-type="float">
            <text:p>9882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114375" calcext:value-type="float">
            <text:p>0,00114375000000000000</text:p>
          </table:table-cell>
          <table:table-cell table:formula="of:=[.D1100]-[.D109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9" office:value-type="float" office:value="9891" calcext:value-type="float">
            <text:p>9891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114479166666667" calcext:value-type="float">
            <text:p>0,00114479166666667000</text:p>
          </table:table-cell>
          <table:table-cell table:formula="of:=[.D1101]-[.D110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9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114583333333333" calcext:value-type="float">
            <text:p>0,00114583333333333000</text:p>
          </table:table-cell>
          <table:table-cell table:formula="of:=[.D1102]-[.D110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9" office:value-type="float" office:value="9909" calcext:value-type="float">
            <text:p>9909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1146875" calcext:value-type="float">
            <text:p>0,00114687500000000000</text:p>
          </table:table-cell>
          <table:table-cell table:formula="of:=[.D1103]-[.D110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9" office:value-type="float" office:value="9918" calcext:value-type="float">
            <text:p>9918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114791666666667" calcext:value-type="float">
            <text:p>0,00114791666666667000</text:p>
          </table:table-cell>
          <table:table-cell table:formula="of:=[.D1104]-[.D110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9" office:value-type="float" office:value="9927" calcext:value-type="float">
            <text:p>9927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114895833333333" calcext:value-type="float">
            <text:p>0,00114895833333333000</text:p>
          </table:table-cell>
          <table:table-cell table:formula="of:=[.D1105]-[.D110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9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115" calcext:value-type="float">
            <text:p>0,00115000000000000000</text:p>
          </table:table-cell>
          <table:table-cell table:formula="of:=[.D1106]-[.D110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9" office:value-type="float" office:value="9945" calcext:value-type="float">
            <text:p>9945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115104166666667" calcext:value-type="float">
            <text:p>0,00115104166666667000</text:p>
          </table:table-cell>
          <table:table-cell table:formula="of:=[.D1107]-[.D110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9" office:value-type="float" office:value="9954" calcext:value-type="float">
            <text:p>9954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115208333333333" calcext:value-type="float">
            <text:p>0,00115208333333333000</text:p>
          </table:table-cell>
          <table:table-cell table:formula="of:=[.D1108]-[.D110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9" office:value-type="float" office:value="9963" calcext:value-type="float">
            <text:p>9963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1153125" calcext:value-type="float">
            <text:p>0,00115312500000000000</text:p>
          </table:table-cell>
          <table:table-cell table:formula="of:=[.D1109]-[.D110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9" office:value-type="float" office:value="9972" calcext:value-type="float">
            <text:p>9972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115416666666667" calcext:value-type="float">
            <text:p>0,00115416666666667000</text:p>
          </table:table-cell>
          <table:table-cell table:formula="of:=[.D1110]-[.D110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9" office:value-type="float" office:value="9981" calcext:value-type="float">
            <text:p>9981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115520833333333" calcext:value-type="float">
            <text:p>0,00115520833333333000</text:p>
          </table:table-cell>
          <table:table-cell table:formula="of:=[.D1111]-[.D111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9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115625" calcext:value-type="float">
            <text:p>0,00115625000000000000</text:p>
          </table:table-cell>
          <table:table-cell table:formula="of:=[.D1112]-[.D111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9" office:value-type="float" office:value="9999" calcext:value-type="float">
            <text:p>9999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115729166666667" calcext:value-type="float">
            <text:p>0,00115729166666667000</text:p>
          </table:table-cell>
          <table:table-cell table:formula="of:=[.D1113]-[.D111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9" office:value-type="float" office:value="10008" calcext:value-type="float">
            <text:p>10008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115833333333333" calcext:value-type="float">
            <text:p>0,00115833333333333000</text:p>
          </table:table-cell>
          <table:table-cell table:formula="of:=[.D1114]-[.D111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9" office:value-type="float" office:value="10017" calcext:value-type="float">
            <text:p>10017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1159375" calcext:value-type="float">
            <text:p>0,00115937500000000000</text:p>
          </table:table-cell>
          <table:table-cell table:formula="of:=[.D1115]-[.D11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9" office:value-type="float" office:value="10026" calcext:value-type="float">
            <text:p>10026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116041666666667" calcext:value-type="float">
            <text:p>0,00116041666666667000</text:p>
          </table:table-cell>
          <table:table-cell table:formula="of:=[.D1116]-[.D111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9" office:value-type="float" office:value="10035" calcext:value-type="float">
            <text:p>10035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116145833333333" calcext:value-type="float">
            <text:p>0,00116145833333333000</text:p>
          </table:table-cell>
          <table:table-cell table:formula="of:=[.D1117]-[.D111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9" office:value-type="float" office:value="10044" calcext:value-type="float">
            <text:p>10044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11625" calcext:value-type="float">
            <text:p>0,00116250000000000000</text:p>
          </table:table-cell>
          <table:table-cell table:formula="of:=[.D1118]-[.D111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9" office:value-type="float" office:value="10053" calcext:value-type="float">
            <text:p>10053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116354166666667" calcext:value-type="float">
            <text:p>0,00116354166666667000</text:p>
          </table:table-cell>
          <table:table-cell table:formula="of:=[.D1119]-[.D11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9" office:value-type="float" office:value="10062" calcext:value-type="float">
            <text:p>10062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116458333333333" calcext:value-type="float">
            <text:p>0,00116458333333333000</text:p>
          </table:table-cell>
          <table:table-cell table:formula="of:=[.D1120]-[.D111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9" office:value-type="float" office:value="10071" calcext:value-type="float">
            <text:p>10071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1165625" calcext:value-type="float">
            <text:p>0,00116562500000000000</text:p>
          </table:table-cell>
          <table:table-cell table:formula="of:=[.D1121]-[.D112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9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116666666666667" calcext:value-type="float">
            <text:p>0,00116666666666667000</text:p>
          </table:table-cell>
          <table:table-cell table:formula="of:=[.D1122]-[.D112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9" office:value-type="float" office:value="10089" calcext:value-type="float">
            <text:p>10089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116770833333333" calcext:value-type="float">
            <text:p>0,00116770833333333000</text:p>
          </table:table-cell>
          <table:table-cell table:formula="of:=[.D1123]-[.D112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9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116875" calcext:value-type="float">
            <text:p>0,00116875000000000000</text:p>
          </table:table-cell>
          <table:table-cell table:formula="of:=[.D1124]-[.D112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9" office:value-type="float" office:value="10107" calcext:value-type="float">
            <text:p>10107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116979166666667" calcext:value-type="float">
            <text:p>0,00116979166666667000</text:p>
          </table:table-cell>
          <table:table-cell table:formula="of:=[.D1125]-[.D112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9" office:value-type="float" office:value="10116" calcext:value-type="float">
            <text:p>10116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117083333333333" calcext:value-type="float">
            <text:p>0,00117083333333333000</text:p>
          </table:table-cell>
          <table:table-cell table:formula="of:=[.D1126]-[.D112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9" office:value-type="float" office:value="10125" calcext:value-type="float">
            <text:p>10125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1171875" calcext:value-type="float">
            <text:p>0,00117187500000000000</text:p>
          </table:table-cell>
          <table:table-cell table:formula="of:=[.D1127]-[.D112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9" office:value-type="float" office:value="10134" calcext:value-type="float">
            <text:p>10134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117291666666667" calcext:value-type="float">
            <text:p>0,00117291666666667000</text:p>
          </table:table-cell>
          <table:table-cell table:formula="of:=[.D1128]-[.D112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9" office:value-type="float" office:value="10143" calcext:value-type="float">
            <text:p>10143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117395833333333" calcext:value-type="float">
            <text:p>0,00117395833333333000</text:p>
          </table:table-cell>
          <table:table-cell table:formula="of:=[.D1129]-[.D112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9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1175" calcext:value-type="float">
            <text:p>0,00117500000000000000</text:p>
          </table:table-cell>
          <table:table-cell table:formula="of:=[.D1130]-[.D112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9" office:value-type="float" office:value="10161" calcext:value-type="float">
            <text:p>10161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117604166666667" calcext:value-type="float">
            <text:p>0,00117604166666667000</text:p>
          </table:table-cell>
          <table:table-cell table:formula="of:=[.D1131]-[.D113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9" office:value-type="float" office:value="10170" calcext:value-type="float">
            <text:p>1017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117708333333333" calcext:value-type="float">
            <text:p>0,00117708333333333000</text:p>
          </table:table-cell>
          <table:table-cell table:formula="of:=[.D1132]-[.D113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9" office:value-type="float" office:value="10179" calcext:value-type="float">
            <text:p>10179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1178125" calcext:value-type="float">
            <text:p>0,00117812500000000000</text:p>
          </table:table-cell>
          <table:table-cell table:formula="of:=[.D1133]-[.D113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9" office:value-type="float" office:value="10188" calcext:value-type="float">
            <text:p>10188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117916666666667" calcext:value-type="float">
            <text:p>0,00117916666666667000</text:p>
          </table:table-cell>
          <table:table-cell table:formula="of:=[.D1134]-[.D113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9" office:value-type="float" office:value="10197" calcext:value-type="float">
            <text:p>10197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118020833333333" calcext:value-type="float">
            <text:p>0,00118020833333333000</text:p>
          </table:table-cell>
          <table:table-cell table:formula="of:=[.D1135]-[.D113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9" office:value-type="float" office:value="10206" calcext:value-type="float">
            <text:p>10206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118125" calcext:value-type="float">
            <text:p>0,00118125000000000000</text:p>
          </table:table-cell>
          <table:table-cell table:formula="of:=[.D1136]-[.D11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9" office:value-type="float" office:value="10215" calcext:value-type="float">
            <text:p>10215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118229166666667" calcext:value-type="float">
            <text:p>0,00118229166666667000</text:p>
          </table:table-cell>
          <table:table-cell table:formula="of:=[.D1137]-[.D113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9" office:value-type="float" office:value="10224" calcext:value-type="float">
            <text:p>10224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118333333333333" calcext:value-type="float">
            <text:p>0,00118333333333333000</text:p>
          </table:table-cell>
          <table:table-cell table:formula="of:=[.D1138]-[.D113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9" office:value-type="float" office:value="10233" calcext:value-type="float">
            <text:p>10233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1184375" calcext:value-type="float">
            <text:p>0,00118437500000000000</text:p>
          </table:table-cell>
          <table:table-cell table:formula="of:=[.D1139]-[.D113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9" office:value-type="float" office:value="10242" calcext:value-type="float">
            <text:p>10242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118541666666667" calcext:value-type="float">
            <text:p>0,00118541666666667000</text:p>
          </table:table-cell>
          <table:table-cell table:formula="of:=[.D1140]-[.D113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9" office:value-type="float" office:value="10251" calcext:value-type="float">
            <text:p>10251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118645833333333" calcext:value-type="float">
            <text:p>0,00118645833333333000</text:p>
          </table:table-cell>
          <table:table-cell table:formula="of:=[.D1141]-[.D11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9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11875" calcext:value-type="float">
            <text:p>0,00118750000000000000</text:p>
          </table:table-cell>
          <table:table-cell table:formula="of:=[.D1142]-[.D114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9" office:value-type="float" office:value="10269" calcext:value-type="float">
            <text:p>10269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118854166666667" calcext:value-type="float">
            <text:p>0,00118854166666667000</text:p>
          </table:table-cell>
          <table:table-cell table:formula="of:=[.D1143]-[.D114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9" office:value-type="float" office:value="10278" calcext:value-type="float">
            <text:p>10278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118958333333333" calcext:value-type="float">
            <text:p>0,00118958333333333000</text:p>
          </table:table-cell>
          <table:table-cell table:formula="of:=[.D1144]-[.D114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9" office:value-type="float" office:value="10287" calcext:value-type="float">
            <text:p>10287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1190625" calcext:value-type="float">
            <text:p>0,00119062500000000000</text:p>
          </table:table-cell>
          <table:table-cell table:formula="of:=[.D1145]-[.D114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9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119166666666667" calcext:value-type="float">
            <text:p>0,00119166666666667000</text:p>
          </table:table-cell>
          <table:table-cell table:formula="of:=[.D1146]-[.D114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9" office:value-type="float" office:value="10305" calcext:value-type="float">
            <text:p>10305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119270833333333" calcext:value-type="float">
            <text:p>0,00119270833333333000</text:p>
          </table:table-cell>
          <table:table-cell table:formula="of:=[.D1147]-[.D11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9" office:value-type="float" office:value="10314" calcext:value-type="float">
            <text:p>10314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119375" calcext:value-type="float">
            <text:p>0,00119375000000000000</text:p>
          </table:table-cell>
          <table:table-cell table:formula="of:=[.D1148]-[.D114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9" office:value-type="float" office:value="10323" calcext:value-type="float">
            <text:p>10323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119479166666667" calcext:value-type="float">
            <text:p>0,00119479166666667000</text:p>
          </table:table-cell>
          <table:table-cell table:formula="of:=[.D1149]-[.D114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9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119583333333333" calcext:value-type="float">
            <text:p>0,00119583333333333000</text:p>
          </table:table-cell>
          <table:table-cell table:formula="of:=[.D1150]-[.D114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9" office:value-type="float" office:value="10341" calcext:value-type="float">
            <text:p>10341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1196875" calcext:value-type="float">
            <text:p>0,00119687500000000000</text:p>
          </table:table-cell>
          <table:table-cell table:formula="of:=[.D1151]-[.D115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9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119791666666667" calcext:value-type="float">
            <text:p>0,00119791666666667000</text:p>
          </table:table-cell>
          <table:table-cell table:formula="of:=[.D1152]-[.D115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9" office:value-type="float" office:value="10359" calcext:value-type="float">
            <text:p>10359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119895833333333" calcext:value-type="float">
            <text:p>0,00119895833333333000</text:p>
          </table:table-cell>
          <table:table-cell table:formula="of:=[.D1153]-[.D115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9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12" calcext:value-type="float">
            <text:p>0,00120000000000000000</text:p>
          </table:table-cell>
          <table:table-cell table:formula="of:=[.D1154]-[.D115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9" office:value-type="float" office:value="10377" calcext:value-type="float">
            <text:p>10377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120104166666667" calcext:value-type="float">
            <text:p>0,00120104166666667000</text:p>
          </table:table-cell>
          <table:table-cell table:formula="of:=[.D1155]-[.D115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9" office:value-type="float" office:value="10386" calcext:value-type="float">
            <text:p>10386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120208333333333" calcext:value-type="float">
            <text:p>0,00120208333333333000</text:p>
          </table:table-cell>
          <table:table-cell table:formula="of:=[.D1156]-[.D115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9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1203125" calcext:value-type="float">
            <text:p>0,00120312500000000000</text:p>
          </table:table-cell>
          <table:table-cell table:formula="of:=[.D1157]-[.D115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9" office:value-type="float" office:value="10404" calcext:value-type="float">
            <text:p>10404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120416666666667" calcext:value-type="float">
            <text:p>0,00120416666666667000</text:p>
          </table:table-cell>
          <table:table-cell table:formula="of:=[.D1158]-[.D115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9" office:value-type="float" office:value="10413" calcext:value-type="float">
            <text:p>10413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120520833333333" calcext:value-type="float">
            <text:p>0,00120520833333333000</text:p>
          </table:table-cell>
          <table:table-cell table:formula="of:=[.D1159]-[.D115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9" office:value-type="float" office:value="10422" calcext:value-type="float">
            <text:p>10422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120625" calcext:value-type="float">
            <text:p>0,00120625000000000000</text:p>
          </table:table-cell>
          <table:table-cell table:formula="of:=[.D1160]-[.D115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9" office:value-type="float" office:value="10431" calcext:value-type="float">
            <text:p>10431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120729166666667" calcext:value-type="float">
            <text:p>0,00120729166666667000</text:p>
          </table:table-cell>
          <table:table-cell table:formula="of:=[.D1161]-[.D116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9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120833333333333" calcext:value-type="float">
            <text:p>0,00120833333333333000</text:p>
          </table:table-cell>
          <table:table-cell table:formula="of:=[.D1162]-[.D116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9" office:value-type="float" office:value="10449" calcext:value-type="float">
            <text:p>10449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1209375" calcext:value-type="float">
            <text:p>0,00120937500000000000</text:p>
          </table:table-cell>
          <table:table-cell table:formula="of:=[.D1163]-[.D116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9" office:value-type="float" office:value="10458" calcext:value-type="float">
            <text:p>10458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121041666666667" calcext:value-type="float">
            <text:p>0,00121041666666667000</text:p>
          </table:table-cell>
          <table:table-cell table:formula="of:=[.D1164]-[.D116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9" office:value-type="float" office:value="10467" calcext:value-type="float">
            <text:p>10467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121145833333333" calcext:value-type="float">
            <text:p>0,00121145833333333000</text:p>
          </table:table-cell>
          <table:table-cell table:formula="of:=[.D1165]-[.D116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9" office:value-type="float" office:value="10476" calcext:value-type="float">
            <text:p>10476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12125" calcext:value-type="float">
            <text:p>0,00121250000000000000</text:p>
          </table:table-cell>
          <table:table-cell table:formula="of:=[.D1166]-[.D116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9" office:value-type="float" office:value="10485" calcext:value-type="float">
            <text:p>10485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121354166666667" calcext:value-type="float">
            <text:p>0,00121354166666667000</text:p>
          </table:table-cell>
          <table:table-cell table:formula="of:=[.D1167]-[.D116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9" office:value-type="float" office:value="10494" calcext:value-type="float">
            <text:p>10494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121458333333333" calcext:value-type="float">
            <text:p>0,00121458333333333000</text:p>
          </table:table-cell>
          <table:table-cell table:formula="of:=[.D1168]-[.D116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9" office:value-type="float" office:value="10503" calcext:value-type="float">
            <text:p>10503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1215625" calcext:value-type="float">
            <text:p>0,00121562500000000000</text:p>
          </table:table-cell>
          <table:table-cell table:formula="of:=[.D1169]-[.D116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9" office:value-type="float" office:value="10512" calcext:value-type="float">
            <text:p>10512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121666666666667" calcext:value-type="float">
            <text:p>0,00121666666666667000</text:p>
          </table:table-cell>
          <table:table-cell table:formula="of:=[.D1170]-[.D116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9" office:value-type="float" office:value="10521" calcext:value-type="float">
            <text:p>10521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121770833333333" calcext:value-type="float">
            <text:p>0,00121770833333333000</text:p>
          </table:table-cell>
          <table:table-cell table:formula="of:=[.D1171]-[.D117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9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121875" calcext:value-type="float">
            <text:p>0,00121875000000000000</text:p>
          </table:table-cell>
          <table:table-cell table:formula="of:=[.D1172]-[.D117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9" office:value-type="float" office:value="10539" calcext:value-type="float">
            <text:p>10539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121979166666667" calcext:value-type="float">
            <text:p>0,00121979166666667000</text:p>
          </table:table-cell>
          <table:table-cell table:formula="of:=[.D1173]-[.D117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9" office:value-type="float" office:value="10548" calcext:value-type="float">
            <text:p>10548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122083333333333" calcext:value-type="float">
            <text:p>0,00122083333333333000</text:p>
          </table:table-cell>
          <table:table-cell table:formula="of:=[.D1174]-[.D117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9" office:value-type="float" office:value="10557" calcext:value-type="float">
            <text:p>10557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1221875" calcext:value-type="float">
            <text:p>0,00122187500000000000</text:p>
          </table:table-cell>
          <table:table-cell table:formula="of:=[.D1175]-[.D117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9" office:value-type="float" office:value="10566" calcext:value-type="float">
            <text:p>10566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122291666666667" calcext:value-type="float">
            <text:p>0,00122291666666667000</text:p>
          </table:table-cell>
          <table:table-cell table:formula="of:=[.D1176]-[.D117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9" office:value-type="float" office:value="10575" calcext:value-type="float">
            <text:p>10575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122395833333333" calcext:value-type="float">
            <text:p>0,00122395833333333000</text:p>
          </table:table-cell>
          <table:table-cell table:formula="of:=[.D1177]-[.D117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9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1225" calcext:value-type="float">
            <text:p>0,00122500000000000000</text:p>
          </table:table-cell>
          <table:table-cell table:formula="of:=[.D1178]-[.D117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9" office:value-type="float" office:value="10593" calcext:value-type="float">
            <text:p>10593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122604166666667" calcext:value-type="float">
            <text:p>0,00122604166666667000</text:p>
          </table:table-cell>
          <table:table-cell table:formula="of:=[.D1179]-[.D117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9" office:value-type="float" office:value="10602" calcext:value-type="float">
            <text:p>10602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122708333333333" calcext:value-type="float">
            <text:p>0,00122708333333333000</text:p>
          </table:table-cell>
          <table:table-cell table:formula="of:=[.D1180]-[.D117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9" office:value-type="float" office:value="10611" calcext:value-type="float">
            <text:p>10611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1228125" calcext:value-type="float">
            <text:p>0,00122812500000000000</text:p>
          </table:table-cell>
          <table:table-cell table:formula="of:=[.D1181]-[.D11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9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122916666666667" calcext:value-type="float">
            <text:p>0,00122916666666667000</text:p>
          </table:table-cell>
          <table:table-cell table:formula="of:=[.D1182]-[.D118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9" office:value-type="float" office:value="10629" calcext:value-type="float">
            <text:p>10629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123020833333333" calcext:value-type="float">
            <text:p>0,00123020833333333000</text:p>
          </table:table-cell>
          <table:table-cell table:formula="of:=[.D1183]-[.D118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9" office:value-type="float" office:value="10638" calcext:value-type="float">
            <text:p>10638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123125" calcext:value-type="float">
            <text:p>0,00123125000000000000</text:p>
          </table:table-cell>
          <table:table-cell table:formula="of:=[.D1184]-[.D118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9" office:value-type="float" office:value="10647" calcext:value-type="float">
            <text:p>10647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123229166666667" calcext:value-type="float">
            <text:p>0,00123229166666667000</text:p>
          </table:table-cell>
          <table:table-cell table:formula="of:=[.D1185]-[.D118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9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123333333333333" calcext:value-type="float">
            <text:p>0,00123333333333333000</text:p>
          </table:table-cell>
          <table:table-cell table:formula="of:=[.D1186]-[.D118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9" office:value-type="float" office:value="10665" calcext:value-type="float">
            <text:p>10665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1234375" calcext:value-type="float">
            <text:p>0,00123437500000000000</text:p>
          </table:table-cell>
          <table:table-cell table:formula="of:=[.D1187]-[.D11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9" office:value-type="float" office:value="10674" calcext:value-type="float">
            <text:p>10674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123541666666667" calcext:value-type="float">
            <text:p>0,00123541666666667000</text:p>
          </table:table-cell>
          <table:table-cell table:formula="of:=[.D1188]-[.D118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9" office:value-type="float" office:value="10683" calcext:value-type="float">
            <text:p>10683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123645833333333" calcext:value-type="float">
            <text:p>0,00123645833333333000</text:p>
          </table:table-cell>
          <table:table-cell table:formula="of:=[.D1189]-[.D118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9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12375" calcext:value-type="float">
            <text:p>0,00123750000000000000</text:p>
          </table:table-cell>
          <table:table-cell table:formula="of:=[.D1190]-[.D118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9" office:value-type="float" office:value="10701" calcext:value-type="float">
            <text:p>10701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123854166666667" calcext:value-type="float">
            <text:p>0,00123854166666667000</text:p>
          </table:table-cell>
          <table:table-cell table:formula="of:=[.D1191]-[.D119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9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123958333333333" calcext:value-type="float">
            <text:p>0,00123958333333333000</text:p>
          </table:table-cell>
          <table:table-cell table:formula="of:=[.D1192]-[.D119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9" office:value-type="float" office:value="10719" calcext:value-type="float">
            <text:p>10719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1240625" calcext:value-type="float">
            <text:p>0,00124062500000000000</text:p>
          </table:table-cell>
          <table:table-cell table:formula="of:=[.D1193]-[.D119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9" office:value-type="float" office:value="10728" calcext:value-type="float">
            <text:p>10728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124166666666667" calcext:value-type="float">
            <text:p>0,00124166666666667000</text:p>
          </table:table-cell>
          <table:table-cell table:formula="of:=[.D1194]-[.D119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9" office:value-type="float" office:value="10737" calcext:value-type="float">
            <text:p>10737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124270833333333" calcext:value-type="float">
            <text:p>0,00124270833333333000</text:p>
          </table:table-cell>
          <table:table-cell table:formula="of:=[.D1195]-[.D119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9" office:value-type="float" office:value="10746" calcext:value-type="float">
            <text:p>10746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124375" calcext:value-type="float">
            <text:p>0,00124375000000000000</text:p>
          </table:table-cell>
          <table:table-cell table:formula="of:=[.D1196]-[.D119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9" office:value-type="float" office:value="10755" calcext:value-type="float">
            <text:p>10755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124479166666667" calcext:value-type="float">
            <text:p>0,00124479166666667000</text:p>
          </table:table-cell>
          <table:table-cell table:formula="of:=[.D1197]-[.D119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9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124583333333333" calcext:value-type="float">
            <text:p>0,00124583333333333000</text:p>
          </table:table-cell>
          <table:table-cell table:formula="of:=[.D1198]-[.D119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9" office:value-type="float" office:value="10773" calcext:value-type="float">
            <text:p>10773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1246875" calcext:value-type="float">
            <text:p>0,00124687500000000000</text:p>
          </table:table-cell>
          <table:table-cell table:formula="of:=[.D1199]-[.D119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9" office:value-type="float" office:value="10782" calcext:value-type="float">
            <text:p>10782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124791666666667" calcext:value-type="float">
            <text:p>0,00124791666666667000</text:p>
          </table:table-cell>
          <table:table-cell table:formula="of:=[.D1200]-[.D119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9" office:value-type="float" office:value="10791" calcext:value-type="float">
            <text:p>10791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124895833333333" calcext:value-type="float">
            <text:p>0,00124895833333333000</text:p>
          </table:table-cell>
          <table:table-cell table:formula="of:=[.D1201]-[.D120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9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125" calcext:value-type="float">
            <text:p>0,00125000000000000000</text:p>
          </table:table-cell>
          <table:table-cell table:formula="of:=[.D1202]-[.D12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9" office:value-type="float" office:value="10809" calcext:value-type="float">
            <text:p>10809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125104166666667" calcext:value-type="float">
            <text:p>0,00125104166666667000</text:p>
          </table:table-cell>
          <table:table-cell table:formula="of:=[.D1203]-[.D120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9" office:value-type="float" office:value="10818" calcext:value-type="float">
            <text:p>10818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125208333333333" calcext:value-type="float">
            <text:p>0,00125208333333333000</text:p>
          </table:table-cell>
          <table:table-cell table:formula="of:=[.D1204]-[.D12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9" office:value-type="float" office:value="10827" calcext:value-type="float">
            <text:p>10827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1253125" calcext:value-type="float">
            <text:p>0,00125312500000000000</text:p>
          </table:table-cell>
          <table:table-cell table:formula="of:=[.D1205]-[.D120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9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125416666666667" calcext:value-type="float">
            <text:p>0,00125416666666667000</text:p>
          </table:table-cell>
          <table:table-cell table:formula="of:=[.D1206]-[.D120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9" office:value-type="float" office:value="10845" calcext:value-type="float">
            <text:p>10845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125520833333333" calcext:value-type="float">
            <text:p>0,00125520833333333000</text:p>
          </table:table-cell>
          <table:table-cell table:formula="of:=[.D1207]-[.D120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9" office:value-type="float" office:value="10854" calcext:value-type="float">
            <text:p>10854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125625" calcext:value-type="float">
            <text:p>0,00125625000000000000</text:p>
          </table:table-cell>
          <table:table-cell table:formula="of:=[.D1208]-[.D120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9" office:value-type="float" office:value="10863" calcext:value-type="float">
            <text:p>10863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125729166666667" calcext:value-type="float">
            <text:p>0,00125729166666667000</text:p>
          </table:table-cell>
          <table:table-cell table:formula="of:=[.D1209]-[.D120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9" office:value-type="float" office:value="10872" calcext:value-type="float">
            <text:p>10872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125833333333333" calcext:value-type="float">
            <text:p>0,00125833333333333000</text:p>
          </table:table-cell>
          <table:table-cell table:formula="of:=[.D1210]-[.D120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9" office:value-type="float" office:value="10881" calcext:value-type="float">
            <text:p>10881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1259375" calcext:value-type="float">
            <text:p>0,00125937500000000000</text:p>
          </table:table-cell>
          <table:table-cell table:formula="of:=[.D1211]-[.D121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9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126041666666667" calcext:value-type="float">
            <text:p>0,00126041666666667000</text:p>
          </table:table-cell>
          <table:table-cell table:formula="of:=[.D1212]-[.D121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9" office:value-type="float" office:value="10899" calcext:value-type="float">
            <text:p>10899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126145833333333" calcext:value-type="float">
            <text:p>0,00126145833333333000</text:p>
          </table:table-cell>
          <table:table-cell table:formula="of:=[.D1213]-[.D121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9" office:value-type="float" office:value="10908" calcext:value-type="float">
            <text:p>10908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12625" calcext:value-type="float">
            <text:p>0,00126250000000000000</text:p>
          </table:table-cell>
          <table:table-cell table:formula="of:=[.D1214]-[.D121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9" office:value-type="float" office:value="10917" calcext:value-type="float">
            <text:p>10917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126354166666667" calcext:value-type="float">
            <text:p>0,00126354166666667000</text:p>
          </table:table-cell>
          <table:table-cell table:formula="of:=[.D1215]-[.D12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9" office:value-type="float" office:value="10926" calcext:value-type="float">
            <text:p>10926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126458333333333" calcext:value-type="float">
            <text:p>0,00126458333333333000</text:p>
          </table:table-cell>
          <table:table-cell table:formula="of:=[.D1216]-[.D121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9" office:value-type="float" office:value="10935" calcext:value-type="float">
            <text:p>10935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1265625" calcext:value-type="float">
            <text:p>0,00126562500000000000</text:p>
          </table:table-cell>
          <table:table-cell table:formula="of:=[.D1217]-[.D121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9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126666666666667" calcext:value-type="float">
            <text:p>0,00126666666666667000</text:p>
          </table:table-cell>
          <table:table-cell table:formula="of:=[.D1218]-[.D121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9" office:value-type="float" office:value="10953" calcext:value-type="float">
            <text:p>10953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126770833333333" calcext:value-type="float">
            <text:p>0,00126770833333333000</text:p>
          </table:table-cell>
          <table:table-cell table:formula="of:=[.D1219]-[.D12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9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126875" calcext:value-type="float">
            <text:p>0,00126875000000000000</text:p>
          </table:table-cell>
          <table:table-cell table:formula="of:=[.D1220]-[.D121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9" office:value-type="float" office:value="10971" calcext:value-type="float">
            <text:p>10971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126979166666667" calcext:value-type="float">
            <text:p>0,00126979166666667000</text:p>
          </table:table-cell>
          <table:table-cell table:formula="of:=[.D1221]-[.D12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9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127083333333333" calcext:value-type="float">
            <text:p>0,00127083333333333000</text:p>
          </table:table-cell>
          <table:table-cell table:formula="of:=[.D1222]-[.D122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9" office:value-type="float" office:value="10989" calcext:value-type="float">
            <text:p>10989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1271875" calcext:value-type="float">
            <text:p>0,00127187500000000000</text:p>
          </table:table-cell>
          <table:table-cell table:formula="of:=[.D1223]-[.D122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9" office:value-type="float" office:value="10998" calcext:value-type="float">
            <text:p>10998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127291666666667" calcext:value-type="float">
            <text:p>0,00127291666666667000</text:p>
          </table:table-cell>
          <table:table-cell table:formula="of:=[.D1224]-[.D122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9" office:value-type="float" office:value="11007" calcext:value-type="float">
            <text:p>11007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127395833333333" calcext:value-type="float">
            <text:p>0,00127395833333333000</text:p>
          </table:table-cell>
          <table:table-cell table:formula="of:=[.D1225]-[.D122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9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1275" calcext:value-type="float">
            <text:p>0,00127500000000000000</text:p>
          </table:table-cell>
          <table:table-cell table:formula="of:=[.D1226]-[.D122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9" office:value-type="float" office:value="11025" calcext:value-type="float">
            <text:p>11025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127604166666667" calcext:value-type="float">
            <text:p>0,00127604166666667000</text:p>
          </table:table-cell>
          <table:table-cell table:formula="of:=[.D1227]-[.D122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9" office:value-type="float" office:value="11034" calcext:value-type="float">
            <text:p>11034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127708333333333" calcext:value-type="float">
            <text:p>0,00127708333333333000</text:p>
          </table:table-cell>
          <table:table-cell table:formula="of:=[.D1228]-[.D122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9" office:value-type="float" office:value="11043" calcext:value-type="float">
            <text:p>11043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1278125" calcext:value-type="float">
            <text:p>0,00127812500000000000</text:p>
          </table:table-cell>
          <table:table-cell table:formula="of:=[.D1229]-[.D122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9" office:value-type="float" office:value="11052" calcext:value-type="float">
            <text:p>11052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127916666666667" calcext:value-type="float">
            <text:p>0,00127916666666667000</text:p>
          </table:table-cell>
          <table:table-cell table:formula="of:=[.D1230]-[.D122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9" office:value-type="float" office:value="11061" calcext:value-type="float">
            <text:p>11061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128020833333333" calcext:value-type="float">
            <text:p>0,00128020833333333000</text:p>
          </table:table-cell>
          <table:table-cell table:formula="of:=[.D1231]-[.D123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9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128125" calcext:value-type="float">
            <text:p>0,00128125000000000000</text:p>
          </table:table-cell>
          <table:table-cell table:formula="of:=[.D1232]-[.D123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9" office:value-type="float" office:value="11079" calcext:value-type="float">
            <text:p>11079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128229166666667" calcext:value-type="float">
            <text:p>0,00128229166666667000</text:p>
          </table:table-cell>
          <table:table-cell table:formula="of:=[.D1233]-[.D123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9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128333333333333" calcext:value-type="float">
            <text:p>0,00128333333333333000</text:p>
          </table:table-cell>
          <table:table-cell table:formula="of:=[.D1234]-[.D123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9" office:value-type="float" office:value="11097" calcext:value-type="float">
            <text:p>11097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1284375" calcext:value-type="float">
            <text:p>0,00128437500000000000</text:p>
          </table:table-cell>
          <table:table-cell table:formula="of:=[.D1235]-[.D123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9" office:value-type="float" office:value="11106" calcext:value-type="float">
            <text:p>11106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128541666666667" calcext:value-type="float">
            <text:p>0,00128541666666667000</text:p>
          </table:table-cell>
          <table:table-cell table:formula="of:=[.D1236]-[.D12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9" office:value-type="float" office:value="11115" calcext:value-type="float">
            <text:p>11115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128645833333333" calcext:value-type="float">
            <text:p>0,00128645833333333000</text:p>
          </table:table-cell>
          <table:table-cell table:formula="of:=[.D1237]-[.D123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9" office:value-type="float" office:value="11124" calcext:value-type="float">
            <text:p>11124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12875" calcext:value-type="float">
            <text:p>0,00128750000000000000</text:p>
          </table:table-cell>
          <table:table-cell table:formula="of:=[.D1238]-[.D123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9" office:value-type="float" office:value="11133" calcext:value-type="float">
            <text:p>11133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128854166666667" calcext:value-type="float">
            <text:p>0,00128854166666667000</text:p>
          </table:table-cell>
          <table:table-cell table:formula="of:=[.D1239]-[.D123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9" office:value-type="float" office:value="11142" calcext:value-type="float">
            <text:p>11142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128958333333333" calcext:value-type="float">
            <text:p>0,00128958333333333000</text:p>
          </table:table-cell>
          <table:table-cell table:formula="of:=[.D1240]-[.D123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9" office:value-type="float" office:value="11151" calcext:value-type="float">
            <text:p>11151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1290625" calcext:value-type="float">
            <text:p>0,00129062500000000000</text:p>
          </table:table-cell>
          <table:table-cell table:formula="of:=[.D1241]-[.D12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9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129166666666667" calcext:value-type="float">
            <text:p>0,00129166666666667000</text:p>
          </table:table-cell>
          <table:table-cell table:formula="of:=[.D1242]-[.D124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9" office:value-type="float" office:value="11169" calcext:value-type="float">
            <text:p>11169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129270833333333" calcext:value-type="float">
            <text:p>0,00129270833333333000</text:p>
          </table:table-cell>
          <table:table-cell table:formula="of:=[.D1243]-[.D124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9" office:value-type="float" office:value="11178" calcext:value-type="float">
            <text:p>11178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129375" calcext:value-type="float">
            <text:p>0,00129375000000000000</text:p>
          </table:table-cell>
          <table:table-cell table:formula="of:=[.D1244]-[.D124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9" office:value-type="float" office:value="11187" calcext:value-type="float">
            <text:p>11187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129479166666667" calcext:value-type="float">
            <text:p>0,00129479166666667000</text:p>
          </table:table-cell>
          <table:table-cell table:formula="of:=[.D1245]-[.D124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9" office:value-type="float" office:value="11196" calcext:value-type="float">
            <text:p>11196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129583333333333" calcext:value-type="float">
            <text:p>0,00129583333333333000</text:p>
          </table:table-cell>
          <table:table-cell table:formula="of:=[.D1246]-[.D124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9" office:value-type="float" office:value="11205" calcext:value-type="float">
            <text:p>11205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1296875" calcext:value-type="float">
            <text:p>0,00129687500000000000</text:p>
          </table:table-cell>
          <table:table-cell table:formula="of:=[.D1247]-[.D12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9" office:value-type="float" office:value="11214" calcext:value-type="float">
            <text:p>11214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129791666666667" calcext:value-type="float">
            <text:p>0,00129791666666667000</text:p>
          </table:table-cell>
          <table:table-cell table:formula="of:=[.D1248]-[.D124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9" office:value-type="float" office:value="11223" calcext:value-type="float">
            <text:p>11223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129895833333333" calcext:value-type="float">
            <text:p>0,00129895833333333000</text:p>
          </table:table-cell>
          <table:table-cell table:formula="of:=[.D1249]-[.D124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9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13" calcext:value-type="float">
            <text:p>0,00130000000000000000</text:p>
          </table:table-cell>
          <table:table-cell table:formula="of:=[.D1250]-[.D124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9" office:value-type="float" office:value="11241" calcext:value-type="float">
            <text:p>11241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130104166666667" calcext:value-type="float">
            <text:p>0,00130104166666667000</text:p>
          </table:table-cell>
          <table:table-cell table:formula="of:=[.D1251]-[.D125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9" office:value-type="float" office:value="11250" calcext:value-type="float">
            <text:p>1125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130208333333333" calcext:value-type="float">
            <text:p>0,00130208333333333000</text:p>
          </table:table-cell>
          <table:table-cell table:formula="of:=[.D1252]-[.D125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9" office:value-type="float" office:value="11259" calcext:value-type="float">
            <text:p>11259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1303125" calcext:value-type="float">
            <text:p>0,00130312500000000000</text:p>
          </table:table-cell>
          <table:table-cell table:formula="of:=[.D1253]-[.D125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9" office:value-type="float" office:value="11268" calcext:value-type="float">
            <text:p>11268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130416666666667" calcext:value-type="float">
            <text:p>0,00130416666666667000</text:p>
          </table:table-cell>
          <table:table-cell table:formula="of:=[.D1254]-[.D125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9" office:value-type="float" office:value="11277" calcext:value-type="float">
            <text:p>11277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130520833333333" calcext:value-type="float">
            <text:p>0,00130520833333333000</text:p>
          </table:table-cell>
          <table:table-cell table:formula="of:=[.D1255]-[.D12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9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130625" calcext:value-type="float">
            <text:p>0,00130625000000000000</text:p>
          </table:table-cell>
          <table:table-cell table:formula="of:=[.D1256]-[.D125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9" office:value-type="float" office:value="11295" calcext:value-type="float">
            <text:p>11295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130729166666667" calcext:value-type="float">
            <text:p>0,00130729166666667000</text:p>
          </table:table-cell>
          <table:table-cell table:formula="of:=[.D1257]-[.D125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9" office:value-type="float" office:value="11304" calcext:value-type="float">
            <text:p>11304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130833333333333" calcext:value-type="float">
            <text:p>0,00130833333333333000</text:p>
          </table:table-cell>
          <table:table-cell table:formula="of:=[.D1258]-[.D125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9" office:value-type="float" office:value="11313" calcext:value-type="float">
            <text:p>11313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1309375" calcext:value-type="float">
            <text:p>0,00130937500000000000</text:p>
          </table:table-cell>
          <table:table-cell table:formula="of:=[.D1259]-[.D125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9" office:value-type="float" office:value="11322" calcext:value-type="float">
            <text:p>11322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131041666666667" calcext:value-type="float">
            <text:p>0,00131041666666667000</text:p>
          </table:table-cell>
          <table:table-cell table:formula="of:=[.D1260]-[.D125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9" office:value-type="float" office:value="11331" calcext:value-type="float">
            <text:p>11331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131145833333333" calcext:value-type="float">
            <text:p>0,00131145833333333000</text:p>
          </table:table-cell>
          <table:table-cell table:formula="of:=[.D1261]-[.D126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9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13125" calcext:value-type="float">
            <text:p>0,00131250000000000000</text:p>
          </table:table-cell>
          <table:table-cell table:formula="of:=[.D1262]-[.D126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9" office:value-type="float" office:value="11349" calcext:value-type="float">
            <text:p>11349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131354166666667" calcext:value-type="float">
            <text:p>0,00131354166666667000</text:p>
          </table:table-cell>
          <table:table-cell table:formula="of:=[.D1263]-[.D126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9" office:value-type="float" office:value="11358" calcext:value-type="float">
            <text:p>11358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131458333333333" calcext:value-type="float">
            <text:p>0,00131458333333333000</text:p>
          </table:table-cell>
          <table:table-cell table:formula="of:=[.D1264]-[.D126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9" office:value-type="float" office:value="11367" calcext:value-type="float">
            <text:p>11367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1315625" calcext:value-type="float">
            <text:p>0,00131562500000000000</text:p>
          </table:table-cell>
          <table:table-cell table:formula="of:=[.D1265]-[.D126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9" office:value-type="float" office:value="11376" calcext:value-type="float">
            <text:p>11376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131666666666667" calcext:value-type="float">
            <text:p>0,00131666666666667000</text:p>
          </table:table-cell>
          <table:table-cell table:formula="of:=[.D1266]-[.D126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9" office:value-type="float" office:value="11385" calcext:value-type="float">
            <text:p>11385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131770833333333" calcext:value-type="float">
            <text:p>0,00131770833333333000</text:p>
          </table:table-cell>
          <table:table-cell table:formula="of:=[.D1267]-[.D126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9" office:value-type="float" office:value="11394" calcext:value-type="float">
            <text:p>11394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131875" calcext:value-type="float">
            <text:p>0,00131875000000000000</text:p>
          </table:table-cell>
          <table:table-cell table:formula="of:=[.D1268]-[.D126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9" office:value-type="float" office:value="11403" calcext:value-type="float">
            <text:p>11403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131979166666667" calcext:value-type="float">
            <text:p>0,00131979166666667000</text:p>
          </table:table-cell>
          <table:table-cell table:formula="of:=[.D1269]-[.D126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9" office:value-type="float" office:value="11412" calcext:value-type="float">
            <text:p>11412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132083333333333" calcext:value-type="float">
            <text:p>0,00132083333333333000</text:p>
          </table:table-cell>
          <table:table-cell table:formula="of:=[.D1270]-[.D126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9" office:value-type="float" office:value="11421" calcext:value-type="float">
            <text:p>11421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1321875" calcext:value-type="float">
            <text:p>0,00132187500000000000</text:p>
          </table:table-cell>
          <table:table-cell table:formula="of:=[.D1271]-[.D127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9" office:value-type="float" office:value="11430" calcext:value-type="float">
            <text:p>1143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132291666666667" calcext:value-type="float">
            <text:p>0,00132291666666667000</text:p>
          </table:table-cell>
          <table:table-cell table:formula="of:=[.D1272]-[.D127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9" office:value-type="float" office:value="11439" calcext:value-type="float">
            <text:p>11439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132395833333333" calcext:value-type="float">
            <text:p>0,00132395833333333000</text:p>
          </table:table-cell>
          <table:table-cell table:formula="of:=[.D1273]-[.D127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9" office:value-type="float" office:value="11448" calcext:value-type="float">
            <text:p>11448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1325" calcext:value-type="float">
            <text:p>0,00132500000000000000</text:p>
          </table:table-cell>
          <table:table-cell table:formula="of:=[.D1274]-[.D127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9" office:value-type="float" office:value="11457" calcext:value-type="float">
            <text:p>11457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132604166666667" calcext:value-type="float">
            <text:p>0,00132604166666667000</text:p>
          </table:table-cell>
          <table:table-cell table:formula="of:=[.D1275]-[.D127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9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132708333333333" calcext:value-type="float">
            <text:p>0,00132708333333333000</text:p>
          </table:table-cell>
          <table:table-cell table:formula="of:=[.D1276]-[.D127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9" office:value-type="float" office:value="11475" calcext:value-type="float">
            <text:p>11475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1328125" calcext:value-type="float">
            <text:p>0,00132812500000000000</text:p>
          </table:table-cell>
          <table:table-cell table:formula="of:=[.D1277]-[.D127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9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132916666666667" calcext:value-type="float">
            <text:p>0,00132916666666667000</text:p>
          </table:table-cell>
          <table:table-cell table:formula="of:=[.D1278]-[.D127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9" office:value-type="float" office:value="11493" calcext:value-type="float">
            <text:p>11493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133020833333333" calcext:value-type="float">
            <text:p>0,00133020833333333000</text:p>
          </table:table-cell>
          <table:table-cell table:formula="of:=[.D1279]-[.D127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9" office:value-type="float" office:value="11502" calcext:value-type="float">
            <text:p>11502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133125" calcext:value-type="float">
            <text:p>0,00133125000000000000</text:p>
          </table:table-cell>
          <table:table-cell table:formula="of:=[.D1280]-[.D127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9" office:value-type="float" office:value="11511" calcext:value-type="float">
            <text:p>11511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133229166666667" calcext:value-type="float">
            <text:p>0,00133229166666667000</text:p>
          </table:table-cell>
          <table:table-cell table:formula="of:=[.D1281]-[.D12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9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133333333333333" calcext:value-type="float">
            <text:p>0,00133333333333333000</text:p>
          </table:table-cell>
          <table:table-cell table:formula="of:=[.D1282]-[.D128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9" office:value-type="float" office:value="11529" calcext:value-type="float">
            <text:p>11529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1334375" calcext:value-type="float">
            <text:p>0,00133437500000000000</text:p>
          </table:table-cell>
          <table:table-cell table:formula="of:=[.D1283]-[.D128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9" office:value-type="float" office:value="11538" calcext:value-type="float">
            <text:p>11538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133541666666667" calcext:value-type="float">
            <text:p>0,00133541666666667000</text:p>
          </table:table-cell>
          <table:table-cell table:formula="of:=[.D1284]-[.D128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9" office:value-type="float" office:value="11547" calcext:value-type="float">
            <text:p>11547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133645833333333" calcext:value-type="float">
            <text:p>0,00133645833333333000</text:p>
          </table:table-cell>
          <table:table-cell table:formula="of:=[.D1285]-[.D128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9" office:value-type="float" office:value="11556" calcext:value-type="float">
            <text:p>11556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13375" calcext:value-type="float">
            <text:p>0,00133750000000000000</text:p>
          </table:table-cell>
          <table:table-cell table:formula="of:=[.D1286]-[.D128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9" office:value-type="float" office:value="11565" calcext:value-type="float">
            <text:p>11565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133854166666667" calcext:value-type="float">
            <text:p>0,00133854166666667000</text:p>
          </table:table-cell>
          <table:table-cell table:formula="of:=[.D1287]-[.D12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9" office:value-type="float" office:value="11574" calcext:value-type="float">
            <text:p>11574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133958333333333" calcext:value-type="float">
            <text:p>0,00133958333333333000</text:p>
          </table:table-cell>
          <table:table-cell table:formula="of:=[.D1288]-[.D128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9" office:value-type="float" office:value="11583" calcext:value-type="float">
            <text:p>11583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1340625" calcext:value-type="float">
            <text:p>0,00134062500000000000</text:p>
          </table:table-cell>
          <table:table-cell table:formula="of:=[.D1289]-[.D12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9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134166666666667" calcext:value-type="float">
            <text:p>0,00134166666666667000</text:p>
          </table:table-cell>
          <table:table-cell table:formula="of:=[.D1290]-[.D128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9" office:value-type="float" office:value="11601" calcext:value-type="float">
            <text:p>11601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134270833333333" calcext:value-type="float">
            <text:p>0,00134270833333333000</text:p>
          </table:table-cell>
          <table:table-cell table:formula="of:=[.D1291]-[.D12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9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134375" calcext:value-type="float">
            <text:p>0,00134375000000000000</text:p>
          </table:table-cell>
          <table:table-cell table:formula="of:=[.D1292]-[.D129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9" office:value-type="float" office:value="11619" calcext:value-type="float">
            <text:p>11619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134479166666667" calcext:value-type="float">
            <text:p>0,00134479166666667000</text:p>
          </table:table-cell>
          <table:table-cell table:formula="of:=[.D1293]-[.D129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9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134583333333333" calcext:value-type="float">
            <text:p>0,00134583333333333000</text:p>
          </table:table-cell>
          <table:table-cell table:formula="of:=[.D1294]-[.D129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9" office:value-type="float" office:value="11637" calcext:value-type="float">
            <text:p>11637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1346875" calcext:value-type="float">
            <text:p>0,00134687500000000000</text:p>
          </table:table-cell>
          <table:table-cell table:formula="of:=[.D1295]-[.D129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9" office:value-type="float" office:value="11646" calcext:value-type="float">
            <text:p>11646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134791666666667" calcext:value-type="float">
            <text:p>0,00134791666666667000</text:p>
          </table:table-cell>
          <table:table-cell table:formula="of:=[.D1296]-[.D129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9" office:value-type="float" office:value="11655" calcext:value-type="float">
            <text:p>11655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134895833333333" calcext:value-type="float">
            <text:p>0,00134895833333333000</text:p>
          </table:table-cell>
          <table:table-cell table:formula="of:=[.D1297]-[.D129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9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135" calcext:value-type="float">
            <text:p>0,00135000000000000000</text:p>
          </table:table-cell>
          <table:table-cell table:formula="of:=[.D1298]-[.D129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9" office:value-type="float" office:value="11673" calcext:value-type="float">
            <text:p>11673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135104166666667" calcext:value-type="float">
            <text:p>0,00135104166666667000</text:p>
          </table:table-cell>
          <table:table-cell table:formula="of:=[.D1299]-[.D129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9" office:value-type="float" office:value="11682" calcext:value-type="float">
            <text:p>11682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135208333333333" calcext:value-type="float">
            <text:p>0,00135208333333333000</text:p>
          </table:table-cell>
          <table:table-cell table:formula="of:=[.D1300]-[.D129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9" office:value-type="float" office:value="11691" calcext:value-type="float">
            <text:p>11691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1353125" calcext:value-type="float">
            <text:p>0,00135312500000000000</text:p>
          </table:table-cell>
          <table:table-cell table:formula="of:=[.D1301]-[.D130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9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135416666666667" calcext:value-type="float">
            <text:p>0,00135416666666667000</text:p>
          </table:table-cell>
          <table:table-cell table:formula="of:=[.D1302]-[.D13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9" office:value-type="float" office:value="11709" calcext:value-type="float">
            <text:p>11709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135520833333333" calcext:value-type="float">
            <text:p>0,00135520833333333000</text:p>
          </table:table-cell>
          <table:table-cell table:formula="of:=[.D1303]-[.D130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9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135625" calcext:value-type="float">
            <text:p>0,00135625000000000000</text:p>
          </table:table-cell>
          <table:table-cell table:formula="of:=[.D1304]-[.D13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9" office:value-type="float" office:value="11727" calcext:value-type="float">
            <text:p>11727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135729166666667" calcext:value-type="float">
            <text:p>0,00135729166666667000</text:p>
          </table:table-cell>
          <table:table-cell table:formula="of:=[.D1305]-[.D130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9" office:value-type="float" office:value="11736" calcext:value-type="float">
            <text:p>11736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135833333333333" calcext:value-type="float">
            <text:p>0,00135833333333333000</text:p>
          </table:table-cell>
          <table:table-cell table:formula="of:=[.D1306]-[.D13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9" office:value-type="float" office:value="11745" calcext:value-type="float">
            <text:p>11745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1359375" calcext:value-type="float">
            <text:p>0,00135937500000000000</text:p>
          </table:table-cell>
          <table:table-cell table:formula="of:=[.D1307]-[.D130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9" office:value-type="float" office:value="11754" calcext:value-type="float">
            <text:p>11754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136041666666667" calcext:value-type="float">
            <text:p>0,00136041666666667000</text:p>
          </table:table-cell>
          <table:table-cell table:formula="of:=[.D1308]-[.D13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9" office:value-type="float" office:value="11763" calcext:value-type="float">
            <text:p>11763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136145833333333" calcext:value-type="float">
            <text:p>0,00136145833333333000</text:p>
          </table:table-cell>
          <table:table-cell table:formula="of:=[.D1309]-[.D130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9" office:value-type="float" office:value="11772" calcext:value-type="float">
            <text:p>11772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13625" calcext:value-type="float">
            <text:p>0,00136250000000000000</text:p>
          </table:table-cell>
          <table:table-cell table:formula="of:=[.D1310]-[.D130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9" office:value-type="float" office:value="11781" calcext:value-type="float">
            <text:p>11781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136354166666667" calcext:value-type="float">
            <text:p>0,00136354166666667000</text:p>
          </table:table-cell>
          <table:table-cell table:formula="of:=[.D1311]-[.D131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9" office:value-type="float" office:value="11790" calcext:value-type="float">
            <text:p>1179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136458333333333" calcext:value-type="float">
            <text:p>0,00136458333333333000</text:p>
          </table:table-cell>
          <table:table-cell table:formula="of:=[.D1312]-[.D131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9" office:value-type="float" office:value="11799" calcext:value-type="float">
            <text:p>11799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1365625" calcext:value-type="float">
            <text:p>0,00136562500000000000</text:p>
          </table:table-cell>
          <table:table-cell table:formula="of:=[.D1313]-[.D131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9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136666666666667" calcext:value-type="float">
            <text:p>0,00136666666666667000</text:p>
          </table:table-cell>
          <table:table-cell table:formula="of:=[.D1314]-[.D131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9" office:value-type="float" office:value="11817" calcext:value-type="float">
            <text:p>11817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136770833333333" calcext:value-type="float">
            <text:p>0,00136770833333333000</text:p>
          </table:table-cell>
          <table:table-cell table:formula="of:=[.D1315]-[.D13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9" office:value-type="float" office:value="11826" calcext:value-type="float">
            <text:p>11826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136875" calcext:value-type="float">
            <text:p>0,00136875000000000000</text:p>
          </table:table-cell>
          <table:table-cell table:formula="of:=[.D1316]-[.D131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9" office:value-type="float" office:value="11835" calcext:value-type="float">
            <text:p>11835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136979166666667" calcext:value-type="float">
            <text:p>0,00136979166666667000</text:p>
          </table:table-cell>
          <table:table-cell table:formula="of:=[.D1317]-[.D131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9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137083333333333" calcext:value-type="float">
            <text:p>0,00137083333333333000</text:p>
          </table:table-cell>
          <table:table-cell table:formula="of:=[.D1318]-[.D131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9" office:value-type="float" office:value="11853" calcext:value-type="float">
            <text:p>11853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1371875" calcext:value-type="float">
            <text:p>0,00137187500000000000</text:p>
          </table:table-cell>
          <table:table-cell table:formula="of:=[.D1319]-[.D13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9" office:value-type="float" office:value="11862" calcext:value-type="float">
            <text:p>11862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137291666666667" calcext:value-type="float">
            <text:p>0,00137291666666667000</text:p>
          </table:table-cell>
          <table:table-cell table:formula="of:=[.D1320]-[.D131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9" office:value-type="float" office:value="11871" calcext:value-type="float">
            <text:p>11871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137395833333333" calcext:value-type="float">
            <text:p>0,00137395833333333000</text:p>
          </table:table-cell>
          <table:table-cell table:formula="of:=[.D1321]-[.D13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9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1375" calcext:value-type="float">
            <text:p>0,00137500000000000000</text:p>
          </table:table-cell>
          <table:table-cell table:formula="of:=[.D1322]-[.D132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9" office:value-type="float" office:value="11889" calcext:value-type="float">
            <text:p>11889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137604166666667" calcext:value-type="float">
            <text:p>0,00137604166666667000</text:p>
          </table:table-cell>
          <table:table-cell table:formula="of:=[.D1323]-[.D13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9" office:value-type="float" office:value="11898" calcext:value-type="float">
            <text:p>11898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137708333333333" calcext:value-type="float">
            <text:p>0,00137708333333333000</text:p>
          </table:table-cell>
          <table:table-cell table:formula="of:=[.D1324]-[.D132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9" office:value-type="float" office:value="11907" calcext:value-type="float">
            <text:p>11907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1378125" calcext:value-type="float">
            <text:p>0,00137812500000000000</text:p>
          </table:table-cell>
          <table:table-cell table:formula="of:=[.D1325]-[.D13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9" office:value-type="float" office:value="11916" calcext:value-type="float">
            <text:p>11916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137916666666667" calcext:value-type="float">
            <text:p>0,00137916666666667000</text:p>
          </table:table-cell>
          <table:table-cell table:formula="of:=[.D1326]-[.D132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9" office:value-type="float" office:value="11925" calcext:value-type="float">
            <text:p>11925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138020833333333" calcext:value-type="float">
            <text:p>0,00138020833333333000</text:p>
          </table:table-cell>
          <table:table-cell table:formula="of:=[.D1327]-[.D132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9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138125" calcext:value-type="float">
            <text:p>0,00138125000000000000</text:p>
          </table:table-cell>
          <table:table-cell table:formula="of:=[.D1328]-[.D132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9" office:value-type="float" office:value="11943" calcext:value-type="float">
            <text:p>11943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138229166666667" calcext:value-type="float">
            <text:p>0,00138229166666667000</text:p>
          </table:table-cell>
          <table:table-cell table:formula="of:=[.D1329]-[.D132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9" office:value-type="float" office:value="11952" calcext:value-type="float">
            <text:p>11952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138333333333333" calcext:value-type="float">
            <text:p>0,00138333333333333000</text:p>
          </table:table-cell>
          <table:table-cell table:formula="of:=[.D1330]-[.D132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9" office:value-type="float" office:value="11961" calcext:value-type="float">
            <text:p>11961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1384375" calcext:value-type="float">
            <text:p>0,00138437500000000000</text:p>
          </table:table-cell>
          <table:table-cell table:formula="of:=[.D1331]-[.D133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9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138541666666667" calcext:value-type="float">
            <text:p>0,00138541666666667000</text:p>
          </table:table-cell>
          <table:table-cell table:formula="of:=[.D1332]-[.D133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9" office:value-type="float" office:value="11979" calcext:value-type="float">
            <text:p>11979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138645833333333" calcext:value-type="float">
            <text:p>0,00138645833333333000</text:p>
          </table:table-cell>
          <table:table-cell table:formula="of:=[.D1333]-[.D133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9" office:value-type="float" office:value="11988" calcext:value-type="float">
            <text:p>11988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13875" calcext:value-type="float">
            <text:p>0,00138750000000000000</text:p>
          </table:table-cell>
          <table:table-cell table:formula="of:=[.D1334]-[.D133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9" office:value-type="float" office:value="11997" calcext:value-type="float">
            <text:p>11997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138854166666667" calcext:value-type="float">
            <text:p>0,00138854166666667000</text:p>
          </table:table-cell>
          <table:table-cell table:formula="of:=[.D1335]-[.D133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9" office:value-type="float" office:value="12006" calcext:value-type="float">
            <text:p>12006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138958333333333" calcext:value-type="float">
            <text:p>0,00138958333333333000</text:p>
          </table:table-cell>
          <table:table-cell table:formula="of:=[.D1336]-[.D13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9" office:value-type="float" office:value="12015" calcext:value-type="float">
            <text:p>12015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1390625" calcext:value-type="float">
            <text:p>0,00139062500000000000</text:p>
          </table:table-cell>
          <table:table-cell table:formula="of:=[.D1337]-[.D133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9" office:value-type="float" office:value="12024" calcext:value-type="float">
            <text:p>12024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139166666666667" calcext:value-type="float">
            <text:p>0,00139166666666667000</text:p>
          </table:table-cell>
          <table:table-cell table:formula="of:=[.D1338]-[.D133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9" office:value-type="float" office:value="12033" calcext:value-type="float">
            <text:p>12033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139270833333333" calcext:value-type="float">
            <text:p>0,00139270833333333000</text:p>
          </table:table-cell>
          <table:table-cell table:formula="of:=[.D1339]-[.D133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9" office:value-type="float" office:value="12042" calcext:value-type="float">
            <text:p>12042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139375" calcext:value-type="float">
            <text:p>0,00139375000000000000</text:p>
          </table:table-cell>
          <table:table-cell table:formula="of:=[.D1340]-[.D13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9" office:value-type="float" office:value="12051" calcext:value-type="float">
            <text:p>12051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139479166666667" calcext:value-type="float">
            <text:p>0,00139479166666667000</text:p>
          </table:table-cell>
          <table:table-cell table:formula="of:=[.D1341]-[.D134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9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139583333333333" calcext:value-type="float">
            <text:p>0,00139583333333333000</text:p>
          </table:table-cell>
          <table:table-cell table:formula="of:=[.D1342]-[.D13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9" office:value-type="float" office:value="12069" calcext:value-type="float">
            <text:p>12069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1396875" calcext:value-type="float">
            <text:p>0,00139687500000000000</text:p>
          </table:table-cell>
          <table:table-cell table:formula="of:=[.D1343]-[.D134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9" office:value-type="float" office:value="12078" calcext:value-type="float">
            <text:p>12078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139791666666667" calcext:value-type="float">
            <text:p>0,00139791666666667000</text:p>
          </table:table-cell>
          <table:table-cell table:formula="of:=[.D1344]-[.D134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9" office:value-type="float" office:value="12087" calcext:value-type="float">
            <text:p>12087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139895833333333" calcext:value-type="float">
            <text:p>0,00139895833333333000</text:p>
          </table:table-cell>
          <table:table-cell table:formula="of:=[.D1345]-[.D134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9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14" calcext:value-type="float">
            <text:p>0,00140000000000000000</text:p>
          </table:table-cell>
          <table:table-cell table:formula="of:=[.D1346]-[.D134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9" office:value-type="float" office:value="12105" calcext:value-type="float">
            <text:p>12105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140104166666667" calcext:value-type="float">
            <text:p>0,00140104166666667000</text:p>
          </table:table-cell>
          <table:table-cell table:formula="of:=[.D1347]-[.D13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9" office:value-type="float" office:value="12114" calcext:value-type="float">
            <text:p>12114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140208333333333" calcext:value-type="float">
            <text:p>0,00140208333333333000</text:p>
          </table:table-cell>
          <table:table-cell table:formula="of:=[.D1348]-[.D134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9" office:value-type="float" office:value="12123" calcext:value-type="float">
            <text:p>12123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1403125" calcext:value-type="float">
            <text:p>0,00140312500000000000</text:p>
          </table:table-cell>
          <table:table-cell table:formula="of:=[.D1349]-[.D134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9" office:value-type="float" office:value="12132" calcext:value-type="float">
            <text:p>12132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140416666666667" calcext:value-type="float">
            <text:p>0,00140416666666667000</text:p>
          </table:table-cell>
          <table:table-cell table:formula="of:=[.D1350]-[.D134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9" office:value-type="float" office:value="12141" calcext:value-type="float">
            <text:p>12141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140520833333333" calcext:value-type="float">
            <text:p>0,00140520833333333000</text:p>
          </table:table-cell>
          <table:table-cell table:formula="of:=[.D1351]-[.D135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9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140625" calcext:value-type="float">
            <text:p>0,00140625000000000000</text:p>
          </table:table-cell>
          <table:table-cell table:formula="of:=[.D1352]-[.D135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9" office:value-type="float" office:value="12159" calcext:value-type="float">
            <text:p>12159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140729166666667" calcext:value-type="float">
            <text:p>0,00140729166666667000</text:p>
          </table:table-cell>
          <table:table-cell table:formula="of:=[.D1353]-[.D135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9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140833333333333" calcext:value-type="float">
            <text:p>0,00140833333333333000</text:p>
          </table:table-cell>
          <table:table-cell table:formula="of:=[.D1354]-[.D135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9" office:value-type="float" office:value="12177" calcext:value-type="float">
            <text:p>12177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1409375" calcext:value-type="float">
            <text:p>0,00140937500000000000</text:p>
          </table:table-cell>
          <table:table-cell table:formula="of:=[.D1355]-[.D13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9" office:value-type="float" office:value="12186" calcext:value-type="float">
            <text:p>12186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141041666666667" calcext:value-type="float">
            <text:p>0,00141041666666667000</text:p>
          </table:table-cell>
          <table:table-cell table:formula="of:=[.D1356]-[.D135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9" office:value-type="float" office:value="12195" calcext:value-type="float">
            <text:p>12195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141145833333333" calcext:value-type="float">
            <text:p>0,00141145833333333000</text:p>
          </table:table-cell>
          <table:table-cell table:formula="of:=[.D1357]-[.D13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9" office:value-type="float" office:value="12204" calcext:value-type="float">
            <text:p>12204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14125" calcext:value-type="float">
            <text:p>0,00141250000000000000</text:p>
          </table:table-cell>
          <table:table-cell table:formula="of:=[.D1358]-[.D135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9" office:value-type="float" office:value="12213" calcext:value-type="float">
            <text:p>12213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141354166666667" calcext:value-type="float">
            <text:p>0,00141354166666667000</text:p>
          </table:table-cell>
          <table:table-cell table:formula="of:=[.D1359]-[.D13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9" office:value-type="float" office:value="12222" calcext:value-type="float">
            <text:p>12222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141458333333333" calcext:value-type="float">
            <text:p>0,00141458333333333000</text:p>
          </table:table-cell>
          <table:table-cell table:formula="of:=[.D1360]-[.D135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9" office:value-type="float" office:value="12231" calcext:value-type="float">
            <text:p>12231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1415625" calcext:value-type="float">
            <text:p>0,00141562500000000000</text:p>
          </table:table-cell>
          <table:table-cell table:formula="of:=[.D1361]-[.D136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9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141666666666667" calcext:value-type="float">
            <text:p>0,00141666666666667000</text:p>
          </table:table-cell>
          <table:table-cell table:formula="of:=[.D1362]-[.D136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9" office:value-type="float" office:value="12249" calcext:value-type="float">
            <text:p>12249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141770833333333" calcext:value-type="float">
            <text:p>0,00141770833333333000</text:p>
          </table:table-cell>
          <table:table-cell table:formula="of:=[.D1363]-[.D136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9" office:value-type="float" office:value="12258" calcext:value-type="float">
            <text:p>12258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141875" calcext:value-type="float">
            <text:p>0,00141875000000000000</text:p>
          </table:table-cell>
          <table:table-cell table:formula="of:=[.D1364]-[.D136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9" office:value-type="float" office:value="12267" calcext:value-type="float">
            <text:p>12267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141979166666667" calcext:value-type="float">
            <text:p>0,00141979166666667000</text:p>
          </table:table-cell>
          <table:table-cell table:formula="of:=[.D1365]-[.D136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9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142083333333333" calcext:value-type="float">
            <text:p>0,00142083333333333000</text:p>
          </table:table-cell>
          <table:table-cell table:formula="of:=[.D1366]-[.D136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9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1421875" calcext:value-type="float">
            <text:p>0,00142187500000000000</text:p>
          </table:table-cell>
          <table:table-cell table:formula="of:=[.D1367]-[.D136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9" office:value-type="float" office:value="12294" calcext:value-type="float">
            <text:p>12294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142291666666667" calcext:value-type="float">
            <text:p>0,00142291666666667000</text:p>
          </table:table-cell>
          <table:table-cell table:formula="of:=[.D1368]-[.D136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9" office:value-type="float" office:value="12303" calcext:value-type="float">
            <text:p>12303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142395833333333" calcext:value-type="float">
            <text:p>0,00142395833333333000</text:p>
          </table:table-cell>
          <table:table-cell table:formula="of:=[.D1369]-[.D136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9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1425" calcext:value-type="float">
            <text:p>0,00142500000000000000</text:p>
          </table:table-cell>
          <table:table-cell table:formula="of:=[.D1370]-[.D136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9" office:value-type="float" office:value="12321" calcext:value-type="float">
            <text:p>12321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142604166666667" calcext:value-type="float">
            <text:p>0,00142604166666667000</text:p>
          </table:table-cell>
          <table:table-cell table:formula="of:=[.D1371]-[.D137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9" office:value-type="float" office:value="12330" calcext:value-type="float">
            <text:p>1233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142708333333333" calcext:value-type="float">
            <text:p>0,00142708333333333000</text:p>
          </table:table-cell>
          <table:table-cell table:formula="of:=[.D1372]-[.D137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9" office:value-type="float" office:value="12339" calcext:value-type="float">
            <text:p>12339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1428125" calcext:value-type="float">
            <text:p>0,00142812500000000000</text:p>
          </table:table-cell>
          <table:table-cell table:formula="of:=[.D1373]-[.D137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9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142916666666667" calcext:value-type="float">
            <text:p>0,00142916666666667000</text:p>
          </table:table-cell>
          <table:table-cell table:formula="of:=[.D1374]-[.D137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9" office:value-type="float" office:value="12357" calcext:value-type="float">
            <text:p>12357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143020833333333" calcext:value-type="float">
            <text:p>0,00143020833333333000</text:p>
          </table:table-cell>
          <table:table-cell table:formula="of:=[.D1375]-[.D137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9" office:value-type="float" office:value="12366" calcext:value-type="float">
            <text:p>12366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143125" calcext:value-type="float">
            <text:p>0,00143125000000000000</text:p>
          </table:table-cell>
          <table:table-cell table:formula="of:=[.D1376]-[.D13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9" office:value-type="float" office:value="12375" calcext:value-type="float">
            <text:p>12375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143229166666667" calcext:value-type="float">
            <text:p>0,00143229166666667000</text:p>
          </table:table-cell>
          <table:table-cell table:formula="of:=[.D1377]-[.D137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9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143333333333333" calcext:value-type="float">
            <text:p>0,00143333333333333000</text:p>
          </table:table-cell>
          <table:table-cell table:formula="of:=[.D1378]-[.D137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9" office:value-type="float" office:value="12393" calcext:value-type="float">
            <text:p>12393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1434375" calcext:value-type="float">
            <text:p>0,00143437500000000000</text:p>
          </table:table-cell>
          <table:table-cell table:formula="of:=[.D1379]-[.D137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9" office:value-type="float" office:value="12402" calcext:value-type="float">
            <text:p>12402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143541666666667" calcext:value-type="float">
            <text:p>0,00143541666666667000</text:p>
          </table:table-cell>
          <table:table-cell table:formula="of:=[.D1380]-[.D137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9" office:value-type="float" office:value="12411" calcext:value-type="float">
            <text:p>12411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143645833333333" calcext:value-type="float">
            <text:p>0,00143645833333333000</text:p>
          </table:table-cell>
          <table:table-cell table:formula="of:=[.D1381]-[.D13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9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14375" calcext:value-type="float">
            <text:p>0,00143750000000000000</text:p>
          </table:table-cell>
          <table:table-cell table:formula="of:=[.D1382]-[.D138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9" office:value-type="float" office:value="12429" calcext:value-type="float">
            <text:p>12429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143854166666667" calcext:value-type="float">
            <text:p>0,00143854166666667000</text:p>
          </table:table-cell>
          <table:table-cell table:formula="of:=[.D1383]-[.D138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9" office:value-type="float" office:value="12438" calcext:value-type="float">
            <text:p>12438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143958333333333" calcext:value-type="float">
            <text:p>0,00143958333333333000</text:p>
          </table:table-cell>
          <table:table-cell table:formula="of:=[.D1384]-[.D138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9" office:value-type="float" office:value="12447" calcext:value-type="float">
            <text:p>12447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1440625" calcext:value-type="float">
            <text:p>0,00144062500000000000</text:p>
          </table:table-cell>
          <table:table-cell table:formula="of:=[.D1385]-[.D138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9" office:value-type="float" office:value="12456" calcext:value-type="float">
            <text:p>12456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144166666666667" calcext:value-type="float">
            <text:p>0,00144166666666667000</text:p>
          </table:table-cell>
          <table:table-cell table:formula="of:=[.D1386]-[.D138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9" office:value-type="float" office:value="12465" calcext:value-type="float">
            <text:p>12465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144270833333333" calcext:value-type="float">
            <text:p>0,00144270833333333000</text:p>
          </table:table-cell>
          <table:table-cell table:formula="of:=[.D1387]-[.D13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9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144375" calcext:value-type="float">
            <text:p>0,00144375000000000000</text:p>
          </table:table-cell>
          <table:table-cell table:formula="of:=[.D1388]-[.D138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9" office:value-type="float" office:value="12483" calcext:value-type="float">
            <text:p>12483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144479166666667" calcext:value-type="float">
            <text:p>0,00144479166666667000</text:p>
          </table:table-cell>
          <table:table-cell table:formula="of:=[.D1389]-[.D13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9" office:value-type="float" office:value="12492" calcext:value-type="float">
            <text:p>12492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144583333333333" calcext:value-type="float">
            <text:p>0,00144583333333333000</text:p>
          </table:table-cell>
          <table:table-cell table:formula="of:=[.D1390]-[.D138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9" office:value-type="float" office:value="12501" calcext:value-type="float">
            <text:p>12501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1446875" calcext:value-type="float">
            <text:p>0,00144687500000000000</text:p>
          </table:table-cell>
          <table:table-cell table:formula="of:=[.D1391]-[.D13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9" office:value-type="float" office:value="12510" calcext:value-type="float">
            <text:p>1251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144791666666667" calcext:value-type="float">
            <text:p>0,00144791666666667000</text:p>
          </table:table-cell>
          <table:table-cell table:formula="of:=[.D1392]-[.D139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9" office:value-type="float" office:value="12519" calcext:value-type="float">
            <text:p>12519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144895833333333" calcext:value-type="float">
            <text:p>0,00144895833333333000</text:p>
          </table:table-cell>
          <table:table-cell table:formula="of:=[.D1393]-[.D13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9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145" calcext:value-type="float">
            <text:p>0,00145000000000000000</text:p>
          </table:table-cell>
          <table:table-cell table:formula="of:=[.D1394]-[.D139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9" office:value-type="float" office:value="12537" calcext:value-type="float">
            <text:p>12537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145104166666667" calcext:value-type="float">
            <text:p>0,00145104166666667000</text:p>
          </table:table-cell>
          <table:table-cell table:formula="of:=[.D1395]-[.D139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9" office:value-type="float" office:value="12546" calcext:value-type="float">
            <text:p>12546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145208333333333" calcext:value-type="float">
            <text:p>0,00145208333333333000</text:p>
          </table:table-cell>
          <table:table-cell table:formula="of:=[.D1396]-[.D139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9" office:value-type="float" office:value="12555" calcext:value-type="float">
            <text:p>12555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1453125" calcext:value-type="float">
            <text:p>0,00145312500000000000</text:p>
          </table:table-cell>
          <table:table-cell table:formula="of:=[.D1397]-[.D139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9" office:value-type="float" office:value="12564" calcext:value-type="float">
            <text:p>12564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145416666666667" calcext:value-type="float">
            <text:p>0,00145416666666667000</text:p>
          </table:table-cell>
          <table:table-cell table:formula="of:=[.D1398]-[.D139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9" office:value-type="float" office:value="12573" calcext:value-type="float">
            <text:p>12573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145520833333333" calcext:value-type="float">
            <text:p>0,00145520833333333000</text:p>
          </table:table-cell>
          <table:table-cell table:formula="of:=[.D1399]-[.D139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9" office:value-type="float" office:value="12582" calcext:value-type="float">
            <text:p>12582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145625" calcext:value-type="float">
            <text:p>0,00145625000000000000</text:p>
          </table:table-cell>
          <table:table-cell table:formula="of:=[.D1400]-[.D139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9" office:value-type="float" office:value="12591" calcext:value-type="float">
            <text:p>12591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145729166666667" calcext:value-type="float">
            <text:p>0,00145729166666667000</text:p>
          </table:table-cell>
          <table:table-cell table:formula="of:=[.D1401]-[.D140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9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145833333333333" calcext:value-type="float">
            <text:p>0,00145833333333333000</text:p>
          </table:table-cell>
          <table:table-cell table:formula="of:=[.D1402]-[.D14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9" office:value-type="float" office:value="12609" calcext:value-type="float">
            <text:p>12609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1459375" calcext:value-type="float">
            <text:p>0,00145937500000000000</text:p>
          </table:table-cell>
          <table:table-cell table:formula="of:=[.D1403]-[.D140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9" office:value-type="float" office:value="12618" calcext:value-type="float">
            <text:p>12618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146041666666667" calcext:value-type="float">
            <text:p>0,00146041666666667000</text:p>
          </table:table-cell>
          <table:table-cell table:formula="of:=[.D1404]-[.D14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9" office:value-type="float" office:value="12627" calcext:value-type="float">
            <text:p>12627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146145833333333" calcext:value-type="float">
            <text:p>0,00146145833333333000</text:p>
          </table:table-cell>
          <table:table-cell table:formula="of:=[.D1405]-[.D140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9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14625" calcext:value-type="float">
            <text:p>0,00146250000000000000</text:p>
          </table:table-cell>
          <table:table-cell table:formula="of:=[.D1406]-[.D14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9" office:value-type="float" office:value="12645" calcext:value-type="float">
            <text:p>12645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146354166666667" calcext:value-type="float">
            <text:p>0,00146354166666667000</text:p>
          </table:table-cell>
          <table:table-cell table:formula="of:=[.D1407]-[.D140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9" office:value-type="float" office:value="12654" calcext:value-type="float">
            <text:p>12654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146458333333333" calcext:value-type="float">
            <text:p>0,00146458333333333000</text:p>
          </table:table-cell>
          <table:table-cell table:formula="of:=[.D1408]-[.D14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9" office:value-type="float" office:value="12663" calcext:value-type="float">
            <text:p>12663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1465625" calcext:value-type="float">
            <text:p>0,00146562500000000000</text:p>
          </table:table-cell>
          <table:table-cell table:formula="of:=[.D1409]-[.D140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9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146666666666667" calcext:value-type="float">
            <text:p>0,00146666666666667000</text:p>
          </table:table-cell>
          <table:table-cell table:formula="of:=[.D1410]-[.D14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9" office:value-type="float" office:value="12681" calcext:value-type="float">
            <text:p>12681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146770833333333" calcext:value-type="float">
            <text:p>0,00146770833333333000</text:p>
          </table:table-cell>
          <table:table-cell table:formula="of:=[.D1411]-[.D141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9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146875" calcext:value-type="float">
            <text:p>0,00146875000000000000</text:p>
          </table:table-cell>
          <table:table-cell table:formula="of:=[.D1412]-[.D141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9" office:value-type="float" office:value="12699" calcext:value-type="float">
            <text:p>12699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146979166666667" calcext:value-type="float">
            <text:p>0,00146979166666667000</text:p>
          </table:table-cell>
          <table:table-cell table:formula="of:=[.D1413]-[.D141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9" office:value-type="float" office:value="12708" calcext:value-type="float">
            <text:p>12708</text:p>
          </table:table-cell>
          <table:table-cell office:value-type="float" office:value="8640000" calcext:value-type="float">
            <text:p>8640000</text:p>
          </table:table-cell>
          <table:table-cell table:formula="of:=[.B1413]/[.C1413]" office:value-type="float" office:value="0.00147083333333333" calcext:value-type="float">
            <text:p>0,00147083333333333000</text:p>
          </table:table-cell>
          <table:table-cell table:formula="of:=[.D1414]-[.D141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9" office:value-type="float" office:value="12717" calcext:value-type="float">
            <text:p>12717</text:p>
          </table:table-cell>
          <table:table-cell office:value-type="float" office:value="8640000" calcext:value-type="float">
            <text:p>8640000</text:p>
          </table:table-cell>
          <table:table-cell table:formula="of:=[.B1414]/[.C1414]" office:value-type="float" office:value="0.001471875" calcext:value-type="float">
            <text:p>0,00147187500000000000</text:p>
          </table:table-cell>
          <table:table-cell table:formula="of:=[.D1415]-[.D14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9" office:value-type="float" office:value="12726" calcext:value-type="float">
            <text:p>12726</text:p>
          </table:table-cell>
          <table:table-cell office:value-type="float" office:value="8640000" calcext:value-type="float">
            <text:p>8640000</text:p>
          </table:table-cell>
          <table:table-cell table:formula="of:=[.B1415]/[.C1415]" office:value-type="float" office:value="0.00147291666666667" calcext:value-type="float">
            <text:p>0,00147291666666667000</text:p>
          </table:table-cell>
          <table:table-cell table:formula="of:=[.D1416]-[.D141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9" office:value-type="float" office:value="12735" calcext:value-type="float">
            <text:p>12735</text:p>
          </table:table-cell>
          <table:table-cell office:value-type="float" office:value="8640000" calcext:value-type="float">
            <text:p>8640000</text:p>
          </table:table-cell>
          <table:table-cell table:formula="of:=[.B1416]/[.C1416]" office:value-type="float" office:value="0.00147395833333333" calcext:value-type="float">
            <text:p>0,00147395833333333000</text:p>
          </table:table-cell>
          <table:table-cell table:formula="of:=[.D1417]-[.D141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9" office:value-type="float" office:value="12744" calcext:value-type="float">
            <text:p>12744</text:p>
          </table:table-cell>
          <table:table-cell office:value-type="float" office:value="8640000" calcext:value-type="float">
            <text:p>8640000</text:p>
          </table:table-cell>
          <table:table-cell table:formula="of:=[.B1417]/[.C1417]" office:value-type="float" office:value="0.001475" calcext:value-type="float">
            <text:p>0,00147500000000000000</text:p>
          </table:table-cell>
          <table:table-cell table:formula="of:=[.D1418]-[.D141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9" office:value-type="float" office:value="12753" calcext:value-type="float">
            <text:p>12753</text:p>
          </table:table-cell>
          <table:table-cell office:value-type="float" office:value="8640000" calcext:value-type="float">
            <text:p>8640000</text:p>
          </table:table-cell>
          <table:table-cell table:formula="of:=[.B1418]/[.C1418]" office:value-type="float" office:value="0.00147604166666667" calcext:value-type="float">
            <text:p>0,00147604166666667000</text:p>
          </table:table-cell>
          <table:table-cell table:formula="of:=[.D1419]-[.D14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9" office:value-type="float" office:value="12762" calcext:value-type="float">
            <text:p>12762</text:p>
          </table:table-cell>
          <table:table-cell office:value-type="float" office:value="8640000" calcext:value-type="float">
            <text:p>8640000</text:p>
          </table:table-cell>
          <table:table-cell table:formula="of:=[.B1419]/[.C1419]" office:value-type="float" office:value="0.00147708333333333" calcext:value-type="float">
            <text:p>0,00147708333333333000</text:p>
          </table:table-cell>
          <table:table-cell table:formula="of:=[.D1420]-[.D141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9" office:value-type="float" office:value="12771" calcext:value-type="float">
            <text:p>12771</text:p>
          </table:table-cell>
          <table:table-cell office:value-type="float" office:value="8640000" calcext:value-type="float">
            <text:p>8640000</text:p>
          </table:table-cell>
          <table:table-cell table:formula="of:=[.B1420]/[.C1420]" office:value-type="float" office:value="0.001478125" calcext:value-type="float">
            <text:p>0,00147812500000000000</text:p>
          </table:table-cell>
          <table:table-cell table:formula="of:=[.D1421]-[.D14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9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1421]/[.C1421]" office:value-type="float" office:value="0.00147916666666667" calcext:value-type="float">
            <text:p>0,00147916666666667000</text:p>
          </table:table-cell>
          <table:table-cell table:formula="of:=[.D1422]-[.D142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9" office:value-type="float" office:value="12789" calcext:value-type="float">
            <text:p>12789</text:p>
          </table:table-cell>
          <table:table-cell office:value-type="float" office:value="8640000" calcext:value-type="float">
            <text:p>8640000</text:p>
          </table:table-cell>
          <table:table-cell table:formula="of:=[.B1422]/[.C1422]" office:value-type="float" office:value="0.00148020833333333" calcext:value-type="float">
            <text:p>0,00148020833333333000</text:p>
          </table:table-cell>
          <table:table-cell table:formula="of:=[.D1423]-[.D14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9" office:value-type="float" office:value="12798" calcext:value-type="float">
            <text:p>12798</text:p>
          </table:table-cell>
          <table:table-cell office:value-type="float" office:value="8640000" calcext:value-type="float">
            <text:p>8640000</text:p>
          </table:table-cell>
          <table:table-cell table:formula="of:=[.B1423]/[.C1423]" office:value-type="float" office:value="0.00148125" calcext:value-type="float">
            <text:p>0,00148125000000000000</text:p>
          </table:table-cell>
          <table:table-cell table:formula="of:=[.D1424]-[.D142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9" office:value-type="float" office:value="12807" calcext:value-type="float">
            <text:p>12807</text:p>
          </table:table-cell>
          <table:table-cell office:value-type="float" office:value="8640000" calcext:value-type="float">
            <text:p>8640000</text:p>
          </table:table-cell>
          <table:table-cell table:formula="of:=[.B1424]/[.C1424]" office:value-type="float" office:value="0.00148229166666667" calcext:value-type="float">
            <text:p>0,00148229166666667000</text:p>
          </table:table-cell>
          <table:table-cell table:formula="of:=[.D1425]-[.D14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9" office:value-type="float" office:value="12816" calcext:value-type="float">
            <text:p>12816</text:p>
          </table:table-cell>
          <table:table-cell office:value-type="float" office:value="8640000" calcext:value-type="float">
            <text:p>8640000</text:p>
          </table:table-cell>
          <table:table-cell table:formula="of:=[.B1425]/[.C1425]" office:value-type="float" office:value="0.00148333333333333" calcext:value-type="float">
            <text:p>0,00148333333333333000</text:p>
          </table:table-cell>
          <table:table-cell table:formula="of:=[.D1426]-[.D142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9" office:value-type="float" office:value="12825" calcext:value-type="float">
            <text:p>12825</text:p>
          </table:table-cell>
          <table:table-cell office:value-type="float" office:value="8640000" calcext:value-type="float">
            <text:p>8640000</text:p>
          </table:table-cell>
          <table:table-cell table:formula="of:=[.B1426]/[.C1426]" office:value-type="float" office:value="0.001484375" calcext:value-type="float">
            <text:p>0,00148437500000000000</text:p>
          </table:table-cell>
          <table:table-cell table:formula="of:=[.D1427]-[.D14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9" office:value-type="float" office:value="12834" calcext:value-type="float">
            <text:p>12834</text:p>
          </table:table-cell>
          <table:table-cell office:value-type="float" office:value="8640000" calcext:value-type="float">
            <text:p>8640000</text:p>
          </table:table-cell>
          <table:table-cell table:formula="of:=[.B1427]/[.C1427]" office:value-type="float" office:value="0.00148541666666667" calcext:value-type="float">
            <text:p>0,00148541666666667000</text:p>
          </table:table-cell>
          <table:table-cell table:formula="of:=[.D1428]-[.D142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9" office:value-type="float" office:value="12843" calcext:value-type="float">
            <text:p>12843</text:p>
          </table:table-cell>
          <table:table-cell office:value-type="float" office:value="8640000" calcext:value-type="float">
            <text:p>8640000</text:p>
          </table:table-cell>
          <table:table-cell table:formula="of:=[.B1428]/[.C1428]" office:value-type="float" office:value="0.00148645833333333" calcext:value-type="float">
            <text:p>0,00148645833333333000</text:p>
          </table:table-cell>
          <table:table-cell table:formula="of:=[.D1429]-[.D142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9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1429]/[.C1429]" office:value-type="float" office:value="0.0014875" calcext:value-type="float">
            <text:p>0,00148750000000000000</text:p>
          </table:table-cell>
          <table:table-cell table:formula="of:=[.D1430]-[.D142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9" office:value-type="float" office:value="12861" calcext:value-type="float">
            <text:p>12861</text:p>
          </table:table-cell>
          <table:table-cell office:value-type="float" office:value="8640000" calcext:value-type="float">
            <text:p>8640000</text:p>
          </table:table-cell>
          <table:table-cell table:formula="of:=[.B1430]/[.C1430]" office:value-type="float" office:value="0.00148854166666667" calcext:value-type="float">
            <text:p>0,00148854166666667000</text:p>
          </table:table-cell>
          <table:table-cell table:formula="of:=[.D1431]-[.D143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9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1431]/[.C1431]" office:value-type="float" office:value="0.00148958333333333" calcext:value-type="float">
            <text:p>0,00148958333333333000</text:p>
          </table:table-cell>
          <table:table-cell table:formula="of:=[.D1432]-[.D143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9" office:value-type="float" office:value="12879" calcext:value-type="float">
            <text:p>12879</text:p>
          </table:table-cell>
          <table:table-cell office:value-type="float" office:value="8640000" calcext:value-type="float">
            <text:p>8640000</text:p>
          </table:table-cell>
          <table:table-cell table:formula="of:=[.B1432]/[.C1432]" office:value-type="float" office:value="0.001490625" calcext:value-type="float">
            <text:p>0,00149062500000000000</text:p>
          </table:table-cell>
          <table:table-cell table:formula="of:=[.D1433]-[.D143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9" office:value-type="float" office:value="12888" calcext:value-type="float">
            <text:p>12888</text:p>
          </table:table-cell>
          <table:table-cell office:value-type="float" office:value="8640000" calcext:value-type="float">
            <text:p>8640000</text:p>
          </table:table-cell>
          <table:table-cell table:formula="of:=[.B1433]/[.C1433]" office:value-type="float" office:value="0.00149166666666667" calcext:value-type="float">
            <text:p>0,00149166666666667000</text:p>
          </table:table-cell>
          <table:table-cell table:formula="of:=[.D1434]-[.D143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9" office:value-type="float" office:value="12897" calcext:value-type="float">
            <text:p>12897</text:p>
          </table:table-cell>
          <table:table-cell office:value-type="float" office:value="8640000" calcext:value-type="float">
            <text:p>8640000</text:p>
          </table:table-cell>
          <table:table-cell table:formula="of:=[.B1434]/[.C1434]" office:value-type="float" office:value="0.00149270833333333" calcext:value-type="float">
            <text:p>0,00149270833333333000</text:p>
          </table:table-cell>
          <table:table-cell table:formula="of:=[.D1435]-[.D143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9" office:value-type="float" office:value="12906" calcext:value-type="float">
            <text:p>12906</text:p>
          </table:table-cell>
          <table:table-cell office:value-type="float" office:value="8640000" calcext:value-type="float">
            <text:p>8640000</text:p>
          </table:table-cell>
          <table:table-cell table:formula="of:=[.B1435]/[.C1435]" office:value-type="float" office:value="0.00149375" calcext:value-type="float">
            <text:p>0,00149375000000000000</text:p>
          </table:table-cell>
          <table:table-cell table:formula="of:=[.D1436]-[.D14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9" office:value-type="float" office:value="12915" calcext:value-type="float">
            <text:p>12915</text:p>
          </table:table-cell>
          <table:table-cell office:value-type="float" office:value="8640000" calcext:value-type="float">
            <text:p>8640000</text:p>
          </table:table-cell>
          <table:table-cell table:formula="of:=[.B1436]/[.C1436]" office:value-type="float" office:value="0.00149479166666667" calcext:value-type="float">
            <text:p>0,00149479166666667000</text:p>
          </table:table-cell>
          <table:table-cell table:formula="of:=[.D1437]-[.D143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9" office:value-type="float" office:value="12924" calcext:value-type="float">
            <text:p>12924</text:p>
          </table:table-cell>
          <table:table-cell office:value-type="float" office:value="8640000" calcext:value-type="float">
            <text:p>8640000</text:p>
          </table:table-cell>
          <table:table-cell table:formula="of:=[.B1437]/[.C1437]" office:value-type="float" office:value="0.00149583333333333" calcext:value-type="float">
            <text:p>0,00149583333333333000</text:p>
          </table:table-cell>
          <table:table-cell table:formula="of:=[.D1438]-[.D143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9" office:value-type="float" office:value="12933" calcext:value-type="float">
            <text:p>12933</text:p>
          </table:table-cell>
          <table:table-cell office:value-type="float" office:value="8640000" calcext:value-type="float">
            <text:p>8640000</text:p>
          </table:table-cell>
          <table:table-cell table:formula="of:=[.B1438]/[.C1438]" office:value-type="float" office:value="0.001496875" calcext:value-type="float">
            <text:p>0,00149687500000000000</text:p>
          </table:table-cell>
          <table:table-cell table:formula="of:=[.D1439]-[.D143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9" office:value-type="float" office:value="12942" calcext:value-type="float">
            <text:p>12942</text:p>
          </table:table-cell>
          <table:table-cell office:value-type="float" office:value="8640000" calcext:value-type="float">
            <text:p>8640000</text:p>
          </table:table-cell>
          <table:table-cell table:formula="of:=[.B1439]/[.C1439]" office:value-type="float" office:value="0.00149791666666667" calcext:value-type="float">
            <text:p>0,00149791666666667000</text:p>
          </table:table-cell>
          <table:table-cell table:formula="of:=[.D1440]-[.D14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9" office:value-type="float" office:value="12951" calcext:value-type="float">
            <text:p>12951</text:p>
          </table:table-cell>
          <table:table-cell office:value-type="float" office:value="8640000" calcext:value-type="float">
            <text:p>8640000</text:p>
          </table:table-cell>
          <table:table-cell table:formula="of:=[.B1440]/[.C1440]" office:value-type="float" office:value="0.00149895833333333" calcext:value-type="float">
            <text:p>0,00149895833333333000</text:p>
          </table:table-cell>
          <table:table-cell table:formula="of:=[.D1441]-[.D144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9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1441]/[.C1441]" office:value-type="float" office:value="0.0015" calcext:value-type="float">
            <text:p>0,00150000000000000000</text:p>
          </table:table-cell>
          <table:table-cell table:formula="of:=[.D1442]-[.D14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9" office:value-type="float" office:value="12969" calcext:value-type="float">
            <text:p>12969</text:p>
          </table:table-cell>
          <table:table-cell office:value-type="float" office:value="8640000" calcext:value-type="float">
            <text:p>8640000</text:p>
          </table:table-cell>
          <table:table-cell table:formula="of:=[.B1442]/[.C1442]" office:value-type="float" office:value="0.00150104166666667" calcext:value-type="float">
            <text:p>0,00150104166666667000</text:p>
          </table:table-cell>
          <table:table-cell table:formula="of:=[.D1443]-[.D144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9" office:value-type="float" office:value="12978" calcext:value-type="float">
            <text:p>12978</text:p>
          </table:table-cell>
          <table:table-cell office:value-type="float" office:value="8640000" calcext:value-type="float">
            <text:p>8640000</text:p>
          </table:table-cell>
          <table:table-cell table:formula="of:=[.B1443]/[.C1443]" office:value-type="float" office:value="0.00150208333333333" calcext:value-type="float">
            <text:p>0,00150208333333333000</text:p>
          </table:table-cell>
          <table:table-cell table:formula="of:=[.D1444]-[.D14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9" office:value-type="float" office:value="12987" calcext:value-type="float">
            <text:p>12987</text:p>
          </table:table-cell>
          <table:table-cell office:value-type="float" office:value="8640000" calcext:value-type="float">
            <text:p>8640000</text:p>
          </table:table-cell>
          <table:table-cell table:formula="of:=[.B1444]/[.C1444]" office:value-type="float" office:value="0.001503125" calcext:value-type="float">
            <text:p>0,00150312500000000000</text:p>
          </table:table-cell>
          <table:table-cell table:formula="of:=[.D1445]-[.D144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9" office:value-type="float" office:value="12996" calcext:value-type="float">
            <text:p>12996</text:p>
          </table:table-cell>
          <table:table-cell office:value-type="float" office:value="8640000" calcext:value-type="float">
            <text:p>8640000</text:p>
          </table:table-cell>
          <table:table-cell table:formula="of:=[.B1445]/[.C1445]" office:value-type="float" office:value="0.00150416666666667" calcext:value-type="float">
            <text:p>0,00150416666666667000</text:p>
          </table:table-cell>
          <table:table-cell table:formula="of:=[.D1446]-[.D144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9" office:value-type="float" office:value="13005" calcext:value-type="float">
            <text:p>13005</text:p>
          </table:table-cell>
          <table:table-cell office:value-type="float" office:value="8640000" calcext:value-type="float">
            <text:p>8640000</text:p>
          </table:table-cell>
          <table:table-cell table:formula="of:=[.B1446]/[.C1446]" office:value-type="float" office:value="0.00150520833333333" calcext:value-type="float">
            <text:p>0,00150520833333333000</text:p>
          </table:table-cell>
          <table:table-cell table:formula="of:=[.D1447]-[.D14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9" office:value-type="float" office:value="13014" calcext:value-type="float">
            <text:p>13014</text:p>
          </table:table-cell>
          <table:table-cell office:value-type="float" office:value="8640000" calcext:value-type="float">
            <text:p>8640000</text:p>
          </table:table-cell>
          <table:table-cell table:formula="of:=[.B1447]/[.C1447]" office:value-type="float" office:value="0.00150625" calcext:value-type="float">
            <text:p>0,00150625000000000000</text:p>
          </table:table-cell>
          <table:table-cell table:formula="of:=[.D1448]-[.D144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9" office:value-type="float" office:value="13023" calcext:value-type="float">
            <text:p>13023</text:p>
          </table:table-cell>
          <table:table-cell office:value-type="float" office:value="8640000" calcext:value-type="float">
            <text:p>8640000</text:p>
          </table:table-cell>
          <table:table-cell table:formula="of:=[.B1448]/[.C1448]" office:value-type="float" office:value="0.00150729166666667" calcext:value-type="float">
            <text:p>0,00150729166666667000</text:p>
          </table:table-cell>
          <table:table-cell table:formula="of:=[.D1449]-[.D144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9" office:value-type="float" office:value="13032" calcext:value-type="float">
            <text:p>13032</text:p>
          </table:table-cell>
          <table:table-cell office:value-type="float" office:value="8640000" calcext:value-type="float">
            <text:p>8640000</text:p>
          </table:table-cell>
          <table:table-cell table:formula="of:=[.B1449]/[.C1449]" office:value-type="float" office:value="0.00150833333333333" calcext:value-type="float">
            <text:p>0,00150833333333333000</text:p>
          </table:table-cell>
          <table:table-cell table:formula="of:=[.D1450]-[.D144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9" office:value-type="float" office:value="13041" calcext:value-type="float">
            <text:p>13041</text:p>
          </table:table-cell>
          <table:table-cell office:value-type="float" office:value="8640000" calcext:value-type="float">
            <text:p>8640000</text:p>
          </table:table-cell>
          <table:table-cell table:formula="of:=[.B1450]/[.C1450]" office:value-type="float" office:value="0.001509375" calcext:value-type="float">
            <text:p>0,00150937500000000000</text:p>
          </table:table-cell>
          <table:table-cell table:formula="of:=[.D1451]-[.D145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9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1451]/[.C1451]" office:value-type="float" office:value="0.00151041666666667" calcext:value-type="float">
            <text:p>0,00151041666666667000</text:p>
          </table:table-cell>
          <table:table-cell table:formula="of:=[.D1452]-[.D145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9" office:value-type="float" office:value="13059" calcext:value-type="float">
            <text:p>13059</text:p>
          </table:table-cell>
          <table:table-cell office:value-type="float" office:value="8640000" calcext:value-type="float">
            <text:p>8640000</text:p>
          </table:table-cell>
          <table:table-cell table:formula="of:=[.B1452]/[.C1452]" office:value-type="float" office:value="0.00151145833333333" calcext:value-type="float">
            <text:p>0,00151145833333333000</text:p>
          </table:table-cell>
          <table:table-cell table:formula="of:=[.D1453]-[.D145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9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1453]/[.C1453]" office:value-type="float" office:value="0.0015125" calcext:value-type="float">
            <text:p>0,00151250000000000000</text:p>
          </table:table-cell>
          <table:table-cell table:formula="of:=[.D1454]-[.D145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9" office:value-type="float" office:value="13077" calcext:value-type="float">
            <text:p>13077</text:p>
          </table:table-cell>
          <table:table-cell office:value-type="float" office:value="8640000" calcext:value-type="float">
            <text:p>8640000</text:p>
          </table:table-cell>
          <table:table-cell table:formula="of:=[.B1454]/[.C1454]" office:value-type="float" office:value="0.00151354166666667" calcext:value-type="float">
            <text:p>0,00151354166666667000</text:p>
          </table:table-cell>
          <table:table-cell table:formula="of:=[.D1455]-[.D14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9" office:value-type="float" office:value="13086" calcext:value-type="float">
            <text:p>13086</text:p>
          </table:table-cell>
          <table:table-cell office:value-type="float" office:value="8640000" calcext:value-type="float">
            <text:p>8640000</text:p>
          </table:table-cell>
          <table:table-cell table:formula="of:=[.B1455]/[.C1455]" office:value-type="float" office:value="0.00151458333333333" calcext:value-type="float">
            <text:p>0,00151458333333333000</text:p>
          </table:table-cell>
          <table:table-cell table:formula="of:=[.D1456]-[.D145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9" office:value-type="float" office:value="13095" calcext:value-type="float">
            <text:p>13095</text:p>
          </table:table-cell>
          <table:table-cell office:value-type="float" office:value="8640000" calcext:value-type="float">
            <text:p>8640000</text:p>
          </table:table-cell>
          <table:table-cell table:formula="of:=[.B1456]/[.C1456]" office:value-type="float" office:value="0.001515625" calcext:value-type="float">
            <text:p>0,00151562500000000000</text:p>
          </table:table-cell>
          <table:table-cell table:formula="of:=[.D1457]-[.D14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9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1457]/[.C1457]" office:value-type="float" office:value="0.00151666666666667" calcext:value-type="float">
            <text:p>0,00151666666666667000</text:p>
          </table:table-cell>
          <table:table-cell table:formula="of:=[.D1458]-[.D145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9" office:value-type="float" office:value="13113" calcext:value-type="float">
            <text:p>13113</text:p>
          </table:table-cell>
          <table:table-cell office:value-type="float" office:value="8640000" calcext:value-type="float">
            <text:p>8640000</text:p>
          </table:table-cell>
          <table:table-cell table:formula="of:=[.B1458]/[.C1458]" office:value-type="float" office:value="0.00151770833333333" calcext:value-type="float">
            <text:p>0,00151770833333333000</text:p>
          </table:table-cell>
          <table:table-cell table:formula="of:=[.D1459]-[.D14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9" office:value-type="float" office:value="13122" calcext:value-type="float">
            <text:p>13122</text:p>
          </table:table-cell>
          <table:table-cell office:value-type="float" office:value="8640000" calcext:value-type="float">
            <text:p>8640000</text:p>
          </table:table-cell>
          <table:table-cell table:formula="of:=[.B1459]/[.C1459]" office:value-type="float" office:value="0.00151875" calcext:value-type="float">
            <text:p>0,00151875000000000000</text:p>
          </table:table-cell>
          <table:table-cell table:formula="of:=[.D1460]-[.D145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9" office:value-type="float" office:value="13131" calcext:value-type="float">
            <text:p>13131</text:p>
          </table:table-cell>
          <table:table-cell office:value-type="float" office:value="8640000" calcext:value-type="float">
            <text:p>8640000</text:p>
          </table:table-cell>
          <table:table-cell table:formula="of:=[.B1460]/[.C1460]" office:value-type="float" office:value="0.00151979166666667" calcext:value-type="float">
            <text:p>0,00151979166666667000</text:p>
          </table:table-cell>
          <table:table-cell table:formula="of:=[.D1461]-[.D14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9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1461]/[.C1461]" office:value-type="float" office:value="0.00152083333333333" calcext:value-type="float">
            <text:p>0,00152083333333333000</text:p>
          </table:table-cell>
          <table:table-cell table:formula="of:=[.D1462]-[.D146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9" office:value-type="float" office:value="13149" calcext:value-type="float">
            <text:p>13149</text:p>
          </table:table-cell>
          <table:table-cell office:value-type="float" office:value="8640000" calcext:value-type="float">
            <text:p>8640000</text:p>
          </table:table-cell>
          <table:table-cell table:formula="of:=[.B1462]/[.C1462]" office:value-type="float" office:value="0.001521875" calcext:value-type="float">
            <text:p>0,00152187500000000000</text:p>
          </table:table-cell>
          <table:table-cell table:formula="of:=[.D1463]-[.D14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9" office:value-type="float" office:value="13158" calcext:value-type="float">
            <text:p>13158</text:p>
          </table:table-cell>
          <table:table-cell office:value-type="float" office:value="8640000" calcext:value-type="float">
            <text:p>8640000</text:p>
          </table:table-cell>
          <table:table-cell table:formula="of:=[.B1463]/[.C1463]" office:value-type="float" office:value="0.00152291666666667" calcext:value-type="float">
            <text:p>0,00152291666666667000</text:p>
          </table:table-cell>
          <table:table-cell table:formula="of:=[.D1464]-[.D146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9" office:value-type="float" office:value="13167" calcext:value-type="float">
            <text:p>13167</text:p>
          </table:table-cell>
          <table:table-cell office:value-type="float" office:value="8640000" calcext:value-type="float">
            <text:p>8640000</text:p>
          </table:table-cell>
          <table:table-cell table:formula="of:=[.B1464]/[.C1464]" office:value-type="float" office:value="0.00152395833333333" calcext:value-type="float">
            <text:p>0,00152395833333333000</text:p>
          </table:table-cell>
          <table:table-cell table:formula="of:=[.D1465]-[.D146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9" office:value-type="float" office:value="13176" calcext:value-type="float">
            <text:p>13176</text:p>
          </table:table-cell>
          <table:table-cell office:value-type="float" office:value="8640000" calcext:value-type="float">
            <text:p>8640000</text:p>
          </table:table-cell>
          <table:table-cell table:formula="of:=[.B1465]/[.C1465]" office:value-type="float" office:value="0.001525" calcext:value-type="float">
            <text:p>0,00152500000000000000</text:p>
          </table:table-cell>
          <table:table-cell table:formula="of:=[.D1466]-[.D146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9" office:value-type="float" office:value="13185" calcext:value-type="float">
            <text:p>13185</text:p>
          </table:table-cell>
          <table:table-cell office:value-type="float" office:value="8640000" calcext:value-type="float">
            <text:p>8640000</text:p>
          </table:table-cell>
          <table:table-cell table:formula="of:=[.B1466]/[.C1466]" office:value-type="float" office:value="0.00152604166666667" calcext:value-type="float">
            <text:p>0,00152604166666667000</text:p>
          </table:table-cell>
          <table:table-cell table:formula="of:=[.D1467]-[.D146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9" office:value-type="float" office:value="13194" calcext:value-type="float">
            <text:p>13194</text:p>
          </table:table-cell>
          <table:table-cell office:value-type="float" office:value="8640000" calcext:value-type="float">
            <text:p>8640000</text:p>
          </table:table-cell>
          <table:table-cell table:formula="of:=[.B1467]/[.C1467]" office:value-type="float" office:value="0.00152708333333333" calcext:value-type="float">
            <text:p>0,00152708333333333000</text:p>
          </table:table-cell>
          <table:table-cell table:formula="of:=[.D1468]-[.D146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9" office:value-type="float" office:value="13203" calcext:value-type="float">
            <text:p>13203</text:p>
          </table:table-cell>
          <table:table-cell office:value-type="float" office:value="8640000" calcext:value-type="float">
            <text:p>8640000</text:p>
          </table:table-cell>
          <table:table-cell table:formula="of:=[.B1468]/[.C1468]" office:value-type="float" office:value="0.001528125" calcext:value-type="float">
            <text:p>0,00152812500000000000</text:p>
          </table:table-cell>
          <table:table-cell table:formula="of:=[.D1469]-[.D146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9" office:value-type="float" office:value="13212" calcext:value-type="float">
            <text:p>13212</text:p>
          </table:table-cell>
          <table:table-cell office:value-type="float" office:value="8640000" calcext:value-type="float">
            <text:p>8640000</text:p>
          </table:table-cell>
          <table:table-cell table:formula="of:=[.B1469]/[.C1469]" office:value-type="float" office:value="0.00152916666666667" calcext:value-type="float">
            <text:p>0,00152916666666667000</text:p>
          </table:table-cell>
          <table:table-cell table:formula="of:=[.D1470]-[.D146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9" office:value-type="float" office:value="13221" calcext:value-type="float">
            <text:p>13221</text:p>
          </table:table-cell>
          <table:table-cell office:value-type="float" office:value="8640000" calcext:value-type="float">
            <text:p>8640000</text:p>
          </table:table-cell>
          <table:table-cell table:formula="of:=[.B1470]/[.C1470]" office:value-type="float" office:value="0.00153020833333333" calcext:value-type="float">
            <text:p>0,00153020833333333000</text:p>
          </table:table-cell>
          <table:table-cell table:formula="of:=[.D1471]-[.D147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9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1471]/[.C1471]" office:value-type="float" office:value="0.00153125" calcext:value-type="float">
            <text:p>0,00153125000000000000</text:p>
          </table:table-cell>
          <table:table-cell table:formula="of:=[.D1472]-[.D147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9" office:value-type="float" office:value="13239" calcext:value-type="float">
            <text:p>13239</text:p>
          </table:table-cell>
          <table:table-cell office:value-type="float" office:value="8640000" calcext:value-type="float">
            <text:p>8640000</text:p>
          </table:table-cell>
          <table:table-cell table:formula="of:=[.B1472]/[.C1472]" office:value-type="float" office:value="0.00153229166666667" calcext:value-type="float">
            <text:p>0,00153229166666667000</text:p>
          </table:table-cell>
          <table:table-cell table:formula="of:=[.D1473]-[.D147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9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1473]/[.C1473]" office:value-type="float" office:value="0.00153333333333333" calcext:value-type="float">
            <text:p>0,00153333333333333000</text:p>
          </table:table-cell>
          <table:table-cell table:formula="of:=[.D1474]-[.D147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9" office:value-type="float" office:value="13257" calcext:value-type="float">
            <text:p>13257</text:p>
          </table:table-cell>
          <table:table-cell office:value-type="float" office:value="8640000" calcext:value-type="float">
            <text:p>8640000</text:p>
          </table:table-cell>
          <table:table-cell table:formula="of:=[.B1474]/[.C1474]" office:value-type="float" office:value="0.001534375" calcext:value-type="float">
            <text:p>0,00153437500000000000</text:p>
          </table:table-cell>
          <table:table-cell table:formula="of:=[.D1475]-[.D147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9" office:value-type="float" office:value="13266" calcext:value-type="float">
            <text:p>13266</text:p>
          </table:table-cell>
          <table:table-cell office:value-type="float" office:value="8640000" calcext:value-type="float">
            <text:p>8640000</text:p>
          </table:table-cell>
          <table:table-cell table:formula="of:=[.B1475]/[.C1475]" office:value-type="float" office:value="0.00153541666666667" calcext:value-type="float">
            <text:p>0,00153541666666667000</text:p>
          </table:table-cell>
          <table:table-cell table:formula="of:=[.D1476]-[.D14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9" office:value-type="float" office:value="13275" calcext:value-type="float">
            <text:p>13275</text:p>
          </table:table-cell>
          <table:table-cell office:value-type="float" office:value="8640000" calcext:value-type="float">
            <text:p>8640000</text:p>
          </table:table-cell>
          <table:table-cell table:formula="of:=[.B1476]/[.C1476]" office:value-type="float" office:value="0.00153645833333333" calcext:value-type="float">
            <text:p>0,00153645833333333000</text:p>
          </table:table-cell>
          <table:table-cell table:formula="of:=[.D1477]-[.D147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9" office:value-type="float" office:value="13284" calcext:value-type="float">
            <text:p>13284</text:p>
          </table:table-cell>
          <table:table-cell office:value-type="float" office:value="8640000" calcext:value-type="float">
            <text:p>8640000</text:p>
          </table:table-cell>
          <table:table-cell table:formula="of:=[.B1477]/[.C1477]" office:value-type="float" office:value="0.0015375" calcext:value-type="float">
            <text:p>0,00153750000000000000</text:p>
          </table:table-cell>
          <table:table-cell table:formula="of:=[.D1478]-[.D147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9" office:value-type="float" office:value="13293" calcext:value-type="float">
            <text:p>13293</text:p>
          </table:table-cell>
          <table:table-cell office:value-type="float" office:value="8640000" calcext:value-type="float">
            <text:p>8640000</text:p>
          </table:table-cell>
          <table:table-cell table:formula="of:=[.B1478]/[.C1478]" office:value-type="float" office:value="0.00153854166666667" calcext:value-type="float">
            <text:p>0,00153854166666667000</text:p>
          </table:table-cell>
          <table:table-cell table:formula="of:=[.D1479]-[.D147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9" office:value-type="float" office:value="13302" calcext:value-type="float">
            <text:p>13302</text:p>
          </table:table-cell>
          <table:table-cell office:value-type="float" office:value="8640000" calcext:value-type="float">
            <text:p>8640000</text:p>
          </table:table-cell>
          <table:table-cell table:formula="of:=[.B1479]/[.C1479]" office:value-type="float" office:value="0.00153958333333333" calcext:value-type="float">
            <text:p>0,00153958333333333000</text:p>
          </table:table-cell>
          <table:table-cell table:formula="of:=[.D1480]-[.D14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9" office:value-type="float" office:value="13311" calcext:value-type="float">
            <text:p>13311</text:p>
          </table:table-cell>
          <table:table-cell office:value-type="float" office:value="8640000" calcext:value-type="float">
            <text:p>8640000</text:p>
          </table:table-cell>
          <table:table-cell table:formula="of:=[.B1480]/[.C1480]" office:value-type="float" office:value="0.001540625" calcext:value-type="float">
            <text:p>0,00154062500000000000</text:p>
          </table:table-cell>
          <table:table-cell table:formula="of:=[.D1481]-[.D148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9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1481]/[.C1481]" office:value-type="float" office:value="0.00154166666666667" calcext:value-type="float">
            <text:p>0,00154166666666667000</text:p>
          </table:table-cell>
          <table:table-cell table:formula="of:=[.D1482]-[.D148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9" office:value-type="float" office:value="13329" calcext:value-type="float">
            <text:p>13329</text:p>
          </table:table-cell>
          <table:table-cell office:value-type="float" office:value="8640000" calcext:value-type="float">
            <text:p>8640000</text:p>
          </table:table-cell>
          <table:table-cell table:formula="of:=[.B1482]/[.C1482]" office:value-type="float" office:value="0.00154270833333333" calcext:value-type="float">
            <text:p>0,00154270833333333000</text:p>
          </table:table-cell>
          <table:table-cell table:formula="of:=[.D1483]-[.D148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9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1483]/[.C1483]" office:value-type="float" office:value="0.00154375" calcext:value-type="float">
            <text:p>0,00154375000000000000</text:p>
          </table:table-cell>
          <table:table-cell table:formula="of:=[.D1484]-[.D148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9" office:value-type="float" office:value="13347" calcext:value-type="float">
            <text:p>13347</text:p>
          </table:table-cell>
          <table:table-cell office:value-type="float" office:value="8640000" calcext:value-type="float">
            <text:p>8640000</text:p>
          </table:table-cell>
          <table:table-cell table:formula="of:=[.B1484]/[.C1484]" office:value-type="float" office:value="0.00154479166666667" calcext:value-type="float">
            <text:p>0,00154479166666667000</text:p>
          </table:table-cell>
          <table:table-cell table:formula="of:=[.D1485]-[.D148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9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1485]/[.C1485]" office:value-type="float" office:value="0.00154583333333333" calcext:value-type="float">
            <text:p>0,00154583333333333000</text:p>
          </table:table-cell>
          <table:table-cell table:formula="of:=[.D1486]-[.D148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9" office:value-type="float" office:value="13365" calcext:value-type="float">
            <text:p>13365</text:p>
          </table:table-cell>
          <table:table-cell office:value-type="float" office:value="8640000" calcext:value-type="float">
            <text:p>8640000</text:p>
          </table:table-cell>
          <table:table-cell table:formula="of:=[.B1486]/[.C1486]" office:value-type="float" office:value="0.001546875" calcext:value-type="float">
            <text:p>0,00154687500000000000</text:p>
          </table:table-cell>
          <table:table-cell table:formula="of:=[.D1487]-[.D14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9" office:value-type="float" office:value="13374" calcext:value-type="float">
            <text:p>13374</text:p>
          </table:table-cell>
          <table:table-cell office:value-type="float" office:value="8640000" calcext:value-type="float">
            <text:p>8640000</text:p>
          </table:table-cell>
          <table:table-cell table:formula="of:=[.B1487]/[.C1487]" office:value-type="float" office:value="0.00154791666666667" calcext:value-type="float">
            <text:p>0,00154791666666667000</text:p>
          </table:table-cell>
          <table:table-cell table:formula="of:=[.D1488]-[.D148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9" office:value-type="float" office:value="13383" calcext:value-type="float">
            <text:p>13383</text:p>
          </table:table-cell>
          <table:table-cell office:value-type="float" office:value="8640000" calcext:value-type="float">
            <text:p>8640000</text:p>
          </table:table-cell>
          <table:table-cell table:formula="of:=[.B1488]/[.C1488]" office:value-type="float" office:value="0.00154895833333333" calcext:value-type="float">
            <text:p>0,00154895833333333000</text:p>
          </table:table-cell>
          <table:table-cell table:formula="of:=[.D1489]-[.D14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9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1489]/[.C1489]" office:value-type="float" office:value="0.00155" calcext:value-type="float">
            <text:p>0,00155000000000000000</text:p>
          </table:table-cell>
          <table:table-cell table:formula="of:=[.D1490]-[.D148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9" office:value-type="float" office:value="13401" calcext:value-type="float">
            <text:p>13401</text:p>
          </table:table-cell>
          <table:table-cell office:value-type="float" office:value="8640000" calcext:value-type="float">
            <text:p>8640000</text:p>
          </table:table-cell>
          <table:table-cell table:formula="of:=[.B1490]/[.C1490]" office:value-type="float" office:value="0.00155104166666667" calcext:value-type="float">
            <text:p>0,00155104166666667000</text:p>
          </table:table-cell>
          <table:table-cell table:formula="of:=[.D1491]-[.D14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9" office:value-type="float" office:value="13410" calcext:value-type="float">
            <text:p>13410</text:p>
          </table:table-cell>
          <table:table-cell office:value-type="float" office:value="8640000" calcext:value-type="float">
            <text:p>8640000</text:p>
          </table:table-cell>
          <table:table-cell table:formula="of:=[.B1491]/[.C1491]" office:value-type="float" office:value="0.00155208333333333" calcext:value-type="float">
            <text:p>0,00155208333333333000</text:p>
          </table:table-cell>
          <table:table-cell table:formula="of:=[.D1492]-[.D149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9" office:value-type="float" office:value="13419" calcext:value-type="float">
            <text:p>13419</text:p>
          </table:table-cell>
          <table:table-cell office:value-type="float" office:value="8640000" calcext:value-type="float">
            <text:p>8640000</text:p>
          </table:table-cell>
          <table:table-cell table:formula="of:=[.B1492]/[.C1492]" office:value-type="float" office:value="0.001553125" calcext:value-type="float">
            <text:p>0,00155312500000000000</text:p>
          </table:table-cell>
          <table:table-cell table:formula="of:=[.D1493]-[.D14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9" office:value-type="float" office:value="13428" calcext:value-type="float">
            <text:p>13428</text:p>
          </table:table-cell>
          <table:table-cell office:value-type="float" office:value="8640000" calcext:value-type="float">
            <text:p>8640000</text:p>
          </table:table-cell>
          <table:table-cell table:formula="of:=[.B1493]/[.C1493]" office:value-type="float" office:value="0.00155416666666667" calcext:value-type="float">
            <text:p>0,00155416666666667000</text:p>
          </table:table-cell>
          <table:table-cell table:formula="of:=[.D1494]-[.D149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9" office:value-type="float" office:value="13437" calcext:value-type="float">
            <text:p>13437</text:p>
          </table:table-cell>
          <table:table-cell office:value-type="float" office:value="8640000" calcext:value-type="float">
            <text:p>8640000</text:p>
          </table:table-cell>
          <table:table-cell table:formula="of:=[.B1494]/[.C1494]" office:value-type="float" office:value="0.00155520833333333" calcext:value-type="float">
            <text:p>0,00155520833333333000</text:p>
          </table:table-cell>
          <table:table-cell table:formula="of:=[.D1495]-[.D14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9" office:value-type="float" office:value="13446" calcext:value-type="float">
            <text:p>13446</text:p>
          </table:table-cell>
          <table:table-cell office:value-type="float" office:value="8640000" calcext:value-type="float">
            <text:p>8640000</text:p>
          </table:table-cell>
          <table:table-cell table:formula="of:=[.B1495]/[.C1495]" office:value-type="float" office:value="0.00155625" calcext:value-type="float">
            <text:p>0,00155625000000000000</text:p>
          </table:table-cell>
          <table:table-cell table:formula="of:=[.D1496]-[.D149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9" office:value-type="float" office:value="13455" calcext:value-type="float">
            <text:p>13455</text:p>
          </table:table-cell>
          <table:table-cell office:value-type="float" office:value="8640000" calcext:value-type="float">
            <text:p>8640000</text:p>
          </table:table-cell>
          <table:table-cell table:formula="of:=[.B1496]/[.C1496]" office:value-type="float" office:value="0.00155729166666667" calcext:value-type="float">
            <text:p>0,00155729166666667000</text:p>
          </table:table-cell>
          <table:table-cell table:formula="of:=[.D1497]-[.D149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9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1497]/[.C1497]" office:value-type="float" office:value="0.00155833333333333" calcext:value-type="float">
            <text:p>0,00155833333333333000</text:p>
          </table:table-cell>
          <table:table-cell table:formula="of:=[.D1498]-[.D149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9" office:value-type="float" office:value="13473" calcext:value-type="float">
            <text:p>13473</text:p>
          </table:table-cell>
          <table:table-cell office:value-type="float" office:value="8640000" calcext:value-type="float">
            <text:p>8640000</text:p>
          </table:table-cell>
          <table:table-cell table:formula="of:=[.B1498]/[.C1498]" office:value-type="float" office:value="0.001559375" calcext:value-type="float">
            <text:p>0,00155937500000000000</text:p>
          </table:table-cell>
          <table:table-cell table:formula="of:=[.D1499]-[.D149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9" office:value-type="float" office:value="13482" calcext:value-type="float">
            <text:p>13482</text:p>
          </table:table-cell>
          <table:table-cell office:value-type="float" office:value="8640000" calcext:value-type="float">
            <text:p>8640000</text:p>
          </table:table-cell>
          <table:table-cell table:formula="of:=[.B1499]/[.C1499]" office:value-type="float" office:value="0.00156041666666667" calcext:value-type="float">
            <text:p>0,00156041666666667000</text:p>
          </table:table-cell>
          <table:table-cell table:formula="of:=[.D1500]-[.D149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9" office:value-type="float" office:value="13491" calcext:value-type="float">
            <text:p>13491</text:p>
          </table:table-cell>
          <table:table-cell office:value-type="float" office:value="8640000" calcext:value-type="float">
            <text:p>8640000</text:p>
          </table:table-cell>
          <table:table-cell table:formula="of:=[.B1500]/[.C1500]" office:value-type="float" office:value="0.00156145833333333" calcext:value-type="float">
            <text:p>0,00156145833333333000</text:p>
          </table:table-cell>
          <table:table-cell table:formula="of:=[.D1501]-[.D150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9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1501]/[.C1501]" office:value-type="float" office:value="0.0015625" calcext:value-type="float">
            <text:p>0,00156250000000000000</text:p>
          </table:table-cell>
          <table:table-cell table:formula="of:=[.D1502]-[.D15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1501]+9" office:value-type="float" office:value="13509" calcext:value-type="float">
            <text:p>13509</text:p>
          </table:table-cell>
          <table:table-cell office:value-type="float" office:value="8640000" calcext:value-type="float">
            <text:p>8640000</text:p>
          </table:table-cell>
          <table:table-cell table:formula="of:=[.B1502]/[.C1502]" office:value-type="float" office:value="0.00156354166666667" calcext:value-type="float">
            <text:p>0,00156354166666667000</text:p>
          </table:table-cell>
          <table:table-cell table:formula="of:=[.D1503]-[.D150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1502]+9" office:value-type="float" office:value="13518" calcext:value-type="float">
            <text:p>13518</text:p>
          </table:table-cell>
          <table:table-cell office:value-type="float" office:value="8640000" calcext:value-type="float">
            <text:p>8640000</text:p>
          </table:table-cell>
          <table:table-cell table:formula="of:=[.B1503]/[.C1503]" office:value-type="float" office:value="0.00156458333333333" calcext:value-type="float">
            <text:p>0,00156458333333333000</text:p>
          </table:table-cell>
          <table:table-cell table:formula="of:=[.D1504]-[.D15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1503]+9" office:value-type="float" office:value="13527" calcext:value-type="float">
            <text:p>13527</text:p>
          </table:table-cell>
          <table:table-cell office:value-type="float" office:value="8640000" calcext:value-type="float">
            <text:p>8640000</text:p>
          </table:table-cell>
          <table:table-cell table:formula="of:=[.B1504]/[.C1504]" office:value-type="float" office:value="0.001565625" calcext:value-type="float">
            <text:p>0,00156562500000000000</text:p>
          </table:table-cell>
          <table:table-cell table:formula="of:=[.D1505]-[.D150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1504]+9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1505]/[.C1505]" office:value-type="float" office:value="0.00156666666666667" calcext:value-type="float">
            <text:p>0,00156666666666667000</text:p>
          </table:table-cell>
          <table:table-cell table:formula="of:=[.D1506]-[.D15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1505]+9" office:value-type="float" office:value="13545" calcext:value-type="float">
            <text:p>13545</text:p>
          </table:table-cell>
          <table:table-cell office:value-type="float" office:value="8640000" calcext:value-type="float">
            <text:p>8640000</text:p>
          </table:table-cell>
          <table:table-cell table:formula="of:=[.B1506]/[.C1506]" office:value-type="float" office:value="0.00156770833333333" calcext:value-type="float">
            <text:p>0,00156770833333333000</text:p>
          </table:table-cell>
          <table:table-cell table:formula="of:=[.D1507]-[.D150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1506]+9" office:value-type="float" office:value="13554" calcext:value-type="float">
            <text:p>13554</text:p>
          </table:table-cell>
          <table:table-cell office:value-type="float" office:value="8640000" calcext:value-type="float">
            <text:p>8640000</text:p>
          </table:table-cell>
          <table:table-cell table:formula="of:=[.B1507]/[.C1507]" office:value-type="float" office:value="0.00156875" calcext:value-type="float">
            <text:p>0,00156875000000000000</text:p>
          </table:table-cell>
          <table:table-cell table:formula="of:=[.D1508]-[.D15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1507]+9" office:value-type="float" office:value="13563" calcext:value-type="float">
            <text:p>13563</text:p>
          </table:table-cell>
          <table:table-cell office:value-type="float" office:value="8640000" calcext:value-type="float">
            <text:p>8640000</text:p>
          </table:table-cell>
          <table:table-cell table:formula="of:=[.B1508]/[.C1508]" office:value-type="float" office:value="0.00156979166666667" calcext:value-type="float">
            <text:p>0,00156979166666667000</text:p>
          </table:table-cell>
          <table:table-cell table:formula="of:=[.D1509]-[.D150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1508]+9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1509]/[.C1509]" office:value-type="float" office:value="0.00157083333333333" calcext:value-type="float">
            <text:p>0,00157083333333333000</text:p>
          </table:table-cell>
          <table:table-cell table:formula="of:=[.D1510]-[.D15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1509]+9" office:value-type="float" office:value="13581" calcext:value-type="float">
            <text:p>13581</text:p>
          </table:table-cell>
          <table:table-cell office:value-type="float" office:value="8640000" calcext:value-type="float">
            <text:p>8640000</text:p>
          </table:table-cell>
          <table:table-cell table:formula="of:=[.B1510]/[.C1510]" office:value-type="float" office:value="0.001571875" calcext:value-type="float">
            <text:p>0,00157187500000000000</text:p>
          </table:table-cell>
          <table:table-cell table:formula="of:=[.D1511]-[.D151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1510]+9" office:value-type="float" office:value="13590" calcext:value-type="float">
            <text:p>13590</text:p>
          </table:table-cell>
          <table:table-cell office:value-type="float" office:value="8640000" calcext:value-type="float">
            <text:p>8640000</text:p>
          </table:table-cell>
          <table:table-cell table:formula="of:=[.B1511]/[.C1511]" office:value-type="float" office:value="0.00157291666666667" calcext:value-type="float">
            <text:p>0,00157291666666667000</text:p>
          </table:table-cell>
          <table:table-cell table:formula="of:=[.D1512]-[.D151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1511]+9" office:value-type="float" office:value="13599" calcext:value-type="float">
            <text:p>13599</text:p>
          </table:table-cell>
          <table:table-cell office:value-type="float" office:value="8640000" calcext:value-type="float">
            <text:p>8640000</text:p>
          </table:table-cell>
          <table:table-cell table:formula="of:=[.B1512]/[.C1512]" office:value-type="float" office:value="0.00157395833333333" calcext:value-type="float">
            <text:p>0,00157395833333333000</text:p>
          </table:table-cell>
          <table:table-cell table:formula="of:=[.D1513]-[.D151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1512]+9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1513]/[.C1513]" office:value-type="float" office:value="0.001575" calcext:value-type="float">
            <text:p>0,00157500000000000000</text:p>
          </table:table-cell>
          <table:table-cell table:formula="of:=[.D1514]-[.D15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1513]+9" office:value-type="float" office:value="13617" calcext:value-type="float">
            <text:p>13617</text:p>
          </table:table-cell>
          <table:table-cell office:value-type="float" office:value="8640000" calcext:value-type="float">
            <text:p>8640000</text:p>
          </table:table-cell>
          <table:table-cell table:formula="of:=[.B1514]/[.C1514]" office:value-type="float" office:value="0.00157604166666667" calcext:value-type="float">
            <text:p>0,00157604166666667000</text:p>
          </table:table-cell>
          <table:table-cell table:formula="of:=[.D1515]-[.D151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1514]+9" office:value-type="float" office:value="13626" calcext:value-type="float">
            <text:p>13626</text:p>
          </table:table-cell>
          <table:table-cell office:value-type="float" office:value="8640000" calcext:value-type="float">
            <text:p>8640000</text:p>
          </table:table-cell>
          <table:table-cell table:formula="of:=[.B1515]/[.C1515]" office:value-type="float" office:value="0.00157708333333333" calcext:value-type="float">
            <text:p>0,00157708333333333000</text:p>
          </table:table-cell>
          <table:table-cell table:formula="of:=[.D1516]-[.D151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1515]+9" office:value-type="float" office:value="13635" calcext:value-type="float">
            <text:p>13635</text:p>
          </table:table-cell>
          <table:table-cell office:value-type="float" office:value="8640000" calcext:value-type="float">
            <text:p>8640000</text:p>
          </table:table-cell>
          <table:table-cell table:formula="of:=[.B1516]/[.C1516]" office:value-type="float" office:value="0.001578125" calcext:value-type="float">
            <text:p>0,00157812500000000000</text:p>
          </table:table-cell>
          <table:table-cell table:formula="of:=[.D1517]-[.D151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1516]+9" office:value-type="float" office:value="13644" calcext:value-type="float">
            <text:p>13644</text:p>
          </table:table-cell>
          <table:table-cell office:value-type="float" office:value="8640000" calcext:value-type="float">
            <text:p>8640000</text:p>
          </table:table-cell>
          <table:table-cell table:formula="of:=[.B1517]/[.C1517]" office:value-type="float" office:value="0.00157916666666667" calcext:value-type="float">
            <text:p>0,00157916666666667000</text:p>
          </table:table-cell>
          <table:table-cell table:formula="of:=[.D1518]-[.D151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1517]+9" office:value-type="float" office:value="13653" calcext:value-type="float">
            <text:p>13653</text:p>
          </table:table-cell>
          <table:table-cell office:value-type="float" office:value="8640000" calcext:value-type="float">
            <text:p>8640000</text:p>
          </table:table-cell>
          <table:table-cell table:formula="of:=[.B1518]/[.C1518]" office:value-type="float" office:value="0.00158020833333333" calcext:value-type="float">
            <text:p>0,00158020833333333000</text:p>
          </table:table-cell>
          <table:table-cell table:formula="of:=[.D1519]-[.D15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1518]+9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1519]/[.C1519]" office:value-type="float" office:value="0.00158125" calcext:value-type="float">
            <text:p>0,00158125000000000000</text:p>
          </table:table-cell>
          <table:table-cell table:formula="of:=[.D1520]-[.D151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1519]+9" office:value-type="float" office:value="13671" calcext:value-type="float">
            <text:p>13671</text:p>
          </table:table-cell>
          <table:table-cell office:value-type="float" office:value="8640000" calcext:value-type="float">
            <text:p>8640000</text:p>
          </table:table-cell>
          <table:table-cell table:formula="of:=[.B1520]/[.C1520]" office:value-type="float" office:value="0.00158229166666667" calcext:value-type="float">
            <text:p>0,00158229166666667000</text:p>
          </table:table-cell>
          <table:table-cell table:formula="of:=[.D1521]-[.D15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1520]+9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1521]/[.C1521]" office:value-type="float" office:value="0.00158333333333333" calcext:value-type="float">
            <text:p>0,00158333333333333000</text:p>
          </table:table-cell>
          <table:table-cell table:formula="of:=[.D1522]-[.D152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1521]+9" office:value-type="float" office:value="13689" calcext:value-type="float">
            <text:p>13689</text:p>
          </table:table-cell>
          <table:table-cell office:value-type="float" office:value="8640000" calcext:value-type="float">
            <text:p>8640000</text:p>
          </table:table-cell>
          <table:table-cell table:formula="of:=[.B1522]/[.C1522]" office:value-type="float" office:value="0.001584375" calcext:value-type="float">
            <text:p>0,00158437500000000000</text:p>
          </table:table-cell>
          <table:table-cell table:formula="of:=[.D1523]-[.D15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1522]+9" office:value-type="float" office:value="13698" calcext:value-type="float">
            <text:p>13698</text:p>
          </table:table-cell>
          <table:table-cell office:value-type="float" office:value="8640000" calcext:value-type="float">
            <text:p>8640000</text:p>
          </table:table-cell>
          <table:table-cell table:formula="of:=[.B1523]/[.C1523]" office:value-type="float" office:value="0.00158541666666667" calcext:value-type="float">
            <text:p>0,00158541666666667000</text:p>
          </table:table-cell>
          <table:table-cell table:formula="of:=[.D1524]-[.D152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1523]+9" office:value-type="float" office:value="13707" calcext:value-type="float">
            <text:p>13707</text:p>
          </table:table-cell>
          <table:table-cell office:value-type="float" office:value="8640000" calcext:value-type="float">
            <text:p>8640000</text:p>
          </table:table-cell>
          <table:table-cell table:formula="of:=[.B1524]/[.C1524]" office:value-type="float" office:value="0.00158645833333333" calcext:value-type="float">
            <text:p>0,00158645833333333000</text:p>
          </table:table-cell>
          <table:table-cell table:formula="of:=[.D1525]-[.D15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1524]+9" office:value-type="float" office:value="13716" calcext:value-type="float">
            <text:p>13716</text:p>
          </table:table-cell>
          <table:table-cell office:value-type="float" office:value="8640000" calcext:value-type="float">
            <text:p>8640000</text:p>
          </table:table-cell>
          <table:table-cell table:formula="of:=[.B1525]/[.C1525]" office:value-type="float" office:value="0.0015875" calcext:value-type="float">
            <text:p>0,00158750000000000000</text:p>
          </table:table-cell>
          <table:table-cell table:formula="of:=[.D1526]-[.D152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1525]+9" office:value-type="float" office:value="13725" calcext:value-type="float">
            <text:p>13725</text:p>
          </table:table-cell>
          <table:table-cell office:value-type="float" office:value="8640000" calcext:value-type="float">
            <text:p>8640000</text:p>
          </table:table-cell>
          <table:table-cell table:formula="of:=[.B1526]/[.C1526]" office:value-type="float" office:value="0.00158854166666667" calcext:value-type="float">
            <text:p>0,00158854166666667000</text:p>
          </table:table-cell>
          <table:table-cell table:formula="of:=[.D1527]-[.D15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1526]+9" office:value-type="float" office:value="13734" calcext:value-type="float">
            <text:p>13734</text:p>
          </table:table-cell>
          <table:table-cell office:value-type="float" office:value="8640000" calcext:value-type="float">
            <text:p>8640000</text:p>
          </table:table-cell>
          <table:table-cell table:formula="of:=[.B1527]/[.C1527]" office:value-type="float" office:value="0.00158958333333333" calcext:value-type="float">
            <text:p>0,00158958333333333000</text:p>
          </table:table-cell>
          <table:table-cell table:formula="of:=[.D1528]-[.D152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1527]+9" office:value-type="float" office:value="13743" calcext:value-type="float">
            <text:p>13743</text:p>
          </table:table-cell>
          <table:table-cell office:value-type="float" office:value="8640000" calcext:value-type="float">
            <text:p>8640000</text:p>
          </table:table-cell>
          <table:table-cell table:formula="of:=[.B1528]/[.C1528]" office:value-type="float" office:value="0.001590625" calcext:value-type="float">
            <text:p>0,00159062500000000000</text:p>
          </table:table-cell>
          <table:table-cell table:formula="of:=[.D1529]-[.D15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1528]+9" office:value-type="float" office:value="13752" calcext:value-type="float">
            <text:p>13752</text:p>
          </table:table-cell>
          <table:table-cell office:value-type="float" office:value="8640000" calcext:value-type="float">
            <text:p>8640000</text:p>
          </table:table-cell>
          <table:table-cell table:formula="of:=[.B1529]/[.C1529]" office:value-type="float" office:value="0.00159166666666667" calcext:value-type="float">
            <text:p>0,00159166666666667000</text:p>
          </table:table-cell>
          <table:table-cell table:formula="of:=[.D1530]-[.D152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1529]+9" office:value-type="float" office:value="13761" calcext:value-type="float">
            <text:p>13761</text:p>
          </table:table-cell>
          <table:table-cell office:value-type="float" office:value="8640000" calcext:value-type="float">
            <text:p>8640000</text:p>
          </table:table-cell>
          <table:table-cell table:formula="of:=[.B1530]/[.C1530]" office:value-type="float" office:value="0.00159270833333333" calcext:value-type="float">
            <text:p>0,00159270833333333000</text:p>
          </table:table-cell>
          <table:table-cell table:formula="of:=[.D1531]-[.D153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1530]+9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1531]/[.C1531]" office:value-type="float" office:value="0.00159375" calcext:value-type="float">
            <text:p>0,00159375000000000000</text:p>
          </table:table-cell>
          <table:table-cell table:formula="of:=[.D1532]-[.D153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1531]+9" office:value-type="float" office:value="13779" calcext:value-type="float">
            <text:p>13779</text:p>
          </table:table-cell>
          <table:table-cell office:value-type="float" office:value="8640000" calcext:value-type="float">
            <text:p>8640000</text:p>
          </table:table-cell>
          <table:table-cell table:formula="of:=[.B1532]/[.C1532]" office:value-type="float" office:value="0.00159479166666667" calcext:value-type="float">
            <text:p>0,00159479166666667000</text:p>
          </table:table-cell>
          <table:table-cell table:formula="of:=[.D1533]-[.D153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1532]+9" office:value-type="float" office:value="13788" calcext:value-type="float">
            <text:p>13788</text:p>
          </table:table-cell>
          <table:table-cell office:value-type="float" office:value="8640000" calcext:value-type="float">
            <text:p>8640000</text:p>
          </table:table-cell>
          <table:table-cell table:formula="of:=[.B1533]/[.C1533]" office:value-type="float" office:value="0.00159583333333333" calcext:value-type="float">
            <text:p>0,00159583333333333000</text:p>
          </table:table-cell>
          <table:table-cell table:formula="of:=[.D1534]-[.D153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1533]+9" office:value-type="float" office:value="13797" calcext:value-type="float">
            <text:p>13797</text:p>
          </table:table-cell>
          <table:table-cell office:value-type="float" office:value="8640000" calcext:value-type="float">
            <text:p>8640000</text:p>
          </table:table-cell>
          <table:table-cell table:formula="of:=[.B1534]/[.C1534]" office:value-type="float" office:value="0.001596875" calcext:value-type="float">
            <text:p>0,00159687500000000000</text:p>
          </table:table-cell>
          <table:table-cell table:formula="of:=[.D1535]-[.D153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1534]+9" office:value-type="float" office:value="13806" calcext:value-type="float">
            <text:p>13806</text:p>
          </table:table-cell>
          <table:table-cell office:value-type="float" office:value="8640000" calcext:value-type="float">
            <text:p>8640000</text:p>
          </table:table-cell>
          <table:table-cell table:formula="of:=[.B1535]/[.C1535]" office:value-type="float" office:value="0.00159791666666667" calcext:value-type="float">
            <text:p>0,00159791666666667000</text:p>
          </table:table-cell>
          <table:table-cell table:formula="of:=[.D1536]-[.D15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1535]+9" office:value-type="float" office:value="13815" calcext:value-type="float">
            <text:p>13815</text:p>
          </table:table-cell>
          <table:table-cell office:value-type="float" office:value="8640000" calcext:value-type="float">
            <text:p>8640000</text:p>
          </table:table-cell>
          <table:table-cell table:formula="of:=[.B1536]/[.C1536]" office:value-type="float" office:value="0.00159895833333333" calcext:value-type="float">
            <text:p>0,00159895833333333000</text:p>
          </table:table-cell>
          <table:table-cell table:formula="of:=[.D1537]-[.D153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1536]+9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1537]/[.C1537]" office:value-type="float" office:value="0.0016" calcext:value-type="float">
            <text:p>0,00160000000000000000</text:p>
          </table:table-cell>
          <table:table-cell table:formula="of:=[.D1538]-[.D153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1537]+9" office:value-type="float" office:value="13833" calcext:value-type="float">
            <text:p>13833</text:p>
          </table:table-cell>
          <table:table-cell office:value-type="float" office:value="8640000" calcext:value-type="float">
            <text:p>8640000</text:p>
          </table:table-cell>
          <table:table-cell table:formula="of:=[.B1538]/[.C1538]" office:value-type="float" office:value="0.00160104166666667" calcext:value-type="float">
            <text:p>0,00160104166666667000</text:p>
          </table:table-cell>
          <table:table-cell table:formula="of:=[.D1539]-[.D153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1538]+9" office:value-type="float" office:value="13842" calcext:value-type="float">
            <text:p>13842</text:p>
          </table:table-cell>
          <table:table-cell office:value-type="float" office:value="8640000" calcext:value-type="float">
            <text:p>8640000</text:p>
          </table:table-cell>
          <table:table-cell table:formula="of:=[.B1539]/[.C1539]" office:value-type="float" office:value="0.00160208333333333" calcext:value-type="float">
            <text:p>0,00160208333333333000</text:p>
          </table:table-cell>
          <table:table-cell table:formula="of:=[.D1540]-[.D15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1539]+9" office:value-type="float" office:value="13851" calcext:value-type="float">
            <text:p>13851</text:p>
          </table:table-cell>
          <table:table-cell office:value-type="float" office:value="8640000" calcext:value-type="float">
            <text:p>8640000</text:p>
          </table:table-cell>
          <table:table-cell table:formula="of:=[.B1540]/[.C1540]" office:value-type="float" office:value="0.001603125" calcext:value-type="float">
            <text:p>0,00160312500000000000</text:p>
          </table:table-cell>
          <table:table-cell table:formula="of:=[.D1541]-[.D154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1540]+9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1541]/[.C1541]" office:value-type="float" office:value="0.00160416666666667" calcext:value-type="float">
            <text:p>0,00160416666666667000</text:p>
          </table:table-cell>
          <table:table-cell table:formula="of:=[.D1542]-[.D15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1541]+9" office:value-type="float" office:value="13869" calcext:value-type="float">
            <text:p>13869</text:p>
          </table:table-cell>
          <table:table-cell office:value-type="float" office:value="8640000" calcext:value-type="float">
            <text:p>8640000</text:p>
          </table:table-cell>
          <table:table-cell table:formula="of:=[.B1542]/[.C1542]" office:value-type="float" office:value="0.00160520833333333" calcext:value-type="float">
            <text:p>0,00160520833333333000</text:p>
          </table:table-cell>
          <table:table-cell table:formula="of:=[.D1543]-[.D154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1542]+9" office:value-type="float" office:value="13878" calcext:value-type="float">
            <text:p>13878</text:p>
          </table:table-cell>
          <table:table-cell office:value-type="float" office:value="8640000" calcext:value-type="float">
            <text:p>8640000</text:p>
          </table:table-cell>
          <table:table-cell table:formula="of:=[.B1543]/[.C1543]" office:value-type="float" office:value="0.00160625" calcext:value-type="float">
            <text:p>0,00160625000000000000</text:p>
          </table:table-cell>
          <table:table-cell table:formula="of:=[.D1544]-[.D15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1543]+9" office:value-type="float" office:value="13887" calcext:value-type="float">
            <text:p>13887</text:p>
          </table:table-cell>
          <table:table-cell office:value-type="float" office:value="8640000" calcext:value-type="float">
            <text:p>8640000</text:p>
          </table:table-cell>
          <table:table-cell table:formula="of:=[.B1544]/[.C1544]" office:value-type="float" office:value="0.00160729166666667" calcext:value-type="float">
            <text:p>0,00160729166666667000</text:p>
          </table:table-cell>
          <table:table-cell table:formula="of:=[.D1545]-[.D154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1544]+9" office:value-type="float" office:value="13896" calcext:value-type="float">
            <text:p>13896</text:p>
          </table:table-cell>
          <table:table-cell office:value-type="float" office:value="8640000" calcext:value-type="float">
            <text:p>8640000</text:p>
          </table:table-cell>
          <table:table-cell table:formula="of:=[.B1545]/[.C1545]" office:value-type="float" office:value="0.00160833333333333" calcext:value-type="float">
            <text:p>0,00160833333333333000</text:p>
          </table:table-cell>
          <table:table-cell table:formula="of:=[.D1546]-[.D154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1545]+9" office:value-type="float" office:value="13905" calcext:value-type="float">
            <text:p>13905</text:p>
          </table:table-cell>
          <table:table-cell office:value-type="float" office:value="8640000" calcext:value-type="float">
            <text:p>8640000</text:p>
          </table:table-cell>
          <table:table-cell table:formula="of:=[.B1546]/[.C1546]" office:value-type="float" office:value="0.001609375" calcext:value-type="float">
            <text:p>0,00160937500000000000</text:p>
          </table:table-cell>
          <table:table-cell table:formula="of:=[.D1547]-[.D154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1546]+9" office:value-type="float" office:value="13914" calcext:value-type="float">
            <text:p>13914</text:p>
          </table:table-cell>
          <table:table-cell office:value-type="float" office:value="8640000" calcext:value-type="float">
            <text:p>8640000</text:p>
          </table:table-cell>
          <table:table-cell table:formula="of:=[.B1547]/[.C1547]" office:value-type="float" office:value="0.00161041666666667" calcext:value-type="float">
            <text:p>0,00161041666666667000</text:p>
          </table:table-cell>
          <table:table-cell table:formula="of:=[.D1548]-[.D15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1547]+9" office:value-type="float" office:value="13923" calcext:value-type="float">
            <text:p>13923</text:p>
          </table:table-cell>
          <table:table-cell office:value-type="float" office:value="8640000" calcext:value-type="float">
            <text:p>8640000</text:p>
          </table:table-cell>
          <table:table-cell table:formula="of:=[.B1548]/[.C1548]" office:value-type="float" office:value="0.00161145833333333" calcext:value-type="float">
            <text:p>0,00161145833333333000</text:p>
          </table:table-cell>
          <table:table-cell table:formula="of:=[.D1549]-[.D154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1548]+9" office:value-type="float" office:value="13932" calcext:value-type="float">
            <text:p>13932</text:p>
          </table:table-cell>
          <table:table-cell office:value-type="float" office:value="8640000" calcext:value-type="float">
            <text:p>8640000</text:p>
          </table:table-cell>
          <table:table-cell table:formula="of:=[.B1549]/[.C1549]" office:value-type="float" office:value="0.0016125" calcext:value-type="float">
            <text:p>0,00161250000000000000</text:p>
          </table:table-cell>
          <table:table-cell table:formula="of:=[.D1550]-[.D154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1549]+9" office:value-type="float" office:value="13941" calcext:value-type="float">
            <text:p>13941</text:p>
          </table:table-cell>
          <table:table-cell office:value-type="float" office:value="8640000" calcext:value-type="float">
            <text:p>8640000</text:p>
          </table:table-cell>
          <table:table-cell table:formula="of:=[.B1550]/[.C1550]" office:value-type="float" office:value="0.00161354166666667" calcext:value-type="float">
            <text:p>0,00161354166666667000</text:p>
          </table:table-cell>
          <table:table-cell table:formula="of:=[.D1551]-[.D155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1550]+9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1551]/[.C1551]" office:value-type="float" office:value="0.00161458333333333" calcext:value-type="float">
            <text:p>0,00161458333333333000</text:p>
          </table:table-cell>
          <table:table-cell table:formula="of:=[.D1552]-[.D155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1551]+9" office:value-type="float" office:value="13959" calcext:value-type="float">
            <text:p>13959</text:p>
          </table:table-cell>
          <table:table-cell office:value-type="float" office:value="8640000" calcext:value-type="float">
            <text:p>8640000</text:p>
          </table:table-cell>
          <table:table-cell table:formula="of:=[.B1552]/[.C1552]" office:value-type="float" office:value="0.001615625" calcext:value-type="float">
            <text:p>0,00161562500000000000</text:p>
          </table:table-cell>
          <table:table-cell table:formula="of:=[.D1553]-[.D155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1552]+9" office:value-type="float" office:value="13968" calcext:value-type="float">
            <text:p>13968</text:p>
          </table:table-cell>
          <table:table-cell office:value-type="float" office:value="8640000" calcext:value-type="float">
            <text:p>8640000</text:p>
          </table:table-cell>
          <table:table-cell table:formula="of:=[.B1553]/[.C1553]" office:value-type="float" office:value="0.00161666666666667" calcext:value-type="float">
            <text:p>0,00161666666666667000</text:p>
          </table:table-cell>
          <table:table-cell table:formula="of:=[.D1554]-[.D155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1553]+9" office:value-type="float" office:value="13977" calcext:value-type="float">
            <text:p>13977</text:p>
          </table:table-cell>
          <table:table-cell office:value-type="float" office:value="8640000" calcext:value-type="float">
            <text:p>8640000</text:p>
          </table:table-cell>
          <table:table-cell table:formula="of:=[.B1554]/[.C1554]" office:value-type="float" office:value="0.00161770833333333" calcext:value-type="float">
            <text:p>0,00161770833333333000</text:p>
          </table:table-cell>
          <table:table-cell table:formula="of:=[.D1555]-[.D15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1554]+9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1555]/[.C1555]" office:value-type="float" office:value="0.00161875" calcext:value-type="float">
            <text:p>0,00161875000000000000</text:p>
          </table:table-cell>
          <table:table-cell table:formula="of:=[.D1556]-[.D155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1555]+9" office:value-type="float" office:value="13995" calcext:value-type="float">
            <text:p>13995</text:p>
          </table:table-cell>
          <table:table-cell office:value-type="float" office:value="8640000" calcext:value-type="float">
            <text:p>8640000</text:p>
          </table:table-cell>
          <table:table-cell table:formula="of:=[.B1556]/[.C1556]" office:value-type="float" office:value="0.00161979166666667" calcext:value-type="float">
            <text:p>0,00161979166666667000</text:p>
          </table:table-cell>
          <table:table-cell table:formula="of:=[.D1557]-[.D15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1556]+9" office:value-type="float" office:value="14004" calcext:value-type="float">
            <text:p>14004</text:p>
          </table:table-cell>
          <table:table-cell office:value-type="float" office:value="8640000" calcext:value-type="float">
            <text:p>8640000</text:p>
          </table:table-cell>
          <table:table-cell table:formula="of:=[.B1557]/[.C1557]" office:value-type="float" office:value="0.00162083333333333" calcext:value-type="float">
            <text:p>0,00162083333333333000</text:p>
          </table:table-cell>
          <table:table-cell table:formula="of:=[.D1558]-[.D155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1557]+9" office:value-type="float" office:value="14013" calcext:value-type="float">
            <text:p>14013</text:p>
          </table:table-cell>
          <table:table-cell office:value-type="float" office:value="8640000" calcext:value-type="float">
            <text:p>8640000</text:p>
          </table:table-cell>
          <table:table-cell table:formula="of:=[.B1558]/[.C1558]" office:value-type="float" office:value="0.001621875" calcext:value-type="float">
            <text:p>0,00162187500000000000</text:p>
          </table:table-cell>
          <table:table-cell table:formula="of:=[.D1559]-[.D15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1558]+9" office:value-type="float" office:value="14022" calcext:value-type="float">
            <text:p>14022</text:p>
          </table:table-cell>
          <table:table-cell office:value-type="float" office:value="8640000" calcext:value-type="float">
            <text:p>8640000</text:p>
          </table:table-cell>
          <table:table-cell table:formula="of:=[.B1559]/[.C1559]" office:value-type="float" office:value="0.00162291666666667" calcext:value-type="float">
            <text:p>0,00162291666666667000</text:p>
          </table:table-cell>
          <table:table-cell table:formula="of:=[.D1560]-[.D155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1559]+9" office:value-type="float" office:value="14031" calcext:value-type="float">
            <text:p>14031</text:p>
          </table:table-cell>
          <table:table-cell office:value-type="float" office:value="8640000" calcext:value-type="float">
            <text:p>8640000</text:p>
          </table:table-cell>
          <table:table-cell table:formula="of:=[.B1560]/[.C1560]" office:value-type="float" office:value="0.00162395833333333" calcext:value-type="float">
            <text:p>0,00162395833333333000</text:p>
          </table:table-cell>
          <table:table-cell table:formula="of:=[.D1561]-[.D15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1560]+9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1561]/[.C1561]" office:value-type="float" office:value="0.001625" calcext:value-type="float">
            <text:p>0,00162500000000000000</text:p>
          </table:table-cell>
          <table:table-cell table:formula="of:=[.D1562]-[.D156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1561]+9" office:value-type="float" office:value="14049" calcext:value-type="float">
            <text:p>14049</text:p>
          </table:table-cell>
          <table:table-cell office:value-type="float" office:value="8640000" calcext:value-type="float">
            <text:p>8640000</text:p>
          </table:table-cell>
          <table:table-cell table:formula="of:=[.B1562]/[.C1562]" office:value-type="float" office:value="0.00162604166666667" calcext:value-type="float">
            <text:p>0,00162604166666667000</text:p>
          </table:table-cell>
          <table:table-cell table:formula="of:=[.D1563]-[.D15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1562]+9" office:value-type="float" office:value="14058" calcext:value-type="float">
            <text:p>14058</text:p>
          </table:table-cell>
          <table:table-cell office:value-type="float" office:value="8640000" calcext:value-type="float">
            <text:p>8640000</text:p>
          </table:table-cell>
          <table:table-cell table:formula="of:=[.B1563]/[.C1563]" office:value-type="float" office:value="0.00162708333333333" calcext:value-type="float">
            <text:p>0,00162708333333333000</text:p>
          </table:table-cell>
          <table:table-cell table:formula="of:=[.D1564]-[.D156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1563]+9" office:value-type="float" office:value="14067" calcext:value-type="float">
            <text:p>14067</text:p>
          </table:table-cell>
          <table:table-cell office:value-type="float" office:value="8640000" calcext:value-type="float">
            <text:p>8640000</text:p>
          </table:table-cell>
          <table:table-cell table:formula="of:=[.B1564]/[.C1564]" office:value-type="float" office:value="0.001628125" calcext:value-type="float">
            <text:p>0,00162812500000000000</text:p>
          </table:table-cell>
          <table:table-cell table:formula="of:=[.D1565]-[.D156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1564]+9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1565]/[.C1565]" office:value-type="float" office:value="0.00162916666666667" calcext:value-type="float">
            <text:p>0,00162916666666667000</text:p>
          </table:table-cell>
          <table:table-cell table:formula="of:=[.D1566]-[.D156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1565]+9" office:value-type="float" office:value="14085" calcext:value-type="float">
            <text:p>14085</text:p>
          </table:table-cell>
          <table:table-cell office:value-type="float" office:value="8640000" calcext:value-type="float">
            <text:p>8640000</text:p>
          </table:table-cell>
          <table:table-cell table:formula="of:=[.B1566]/[.C1566]" office:value-type="float" office:value="0.00163020833333333" calcext:value-type="float">
            <text:p>0,00163020833333333000</text:p>
          </table:table-cell>
          <table:table-cell table:formula="of:=[.D1567]-[.D156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1566]+9" office:value-type="float" office:value="14094" calcext:value-type="float">
            <text:p>14094</text:p>
          </table:table-cell>
          <table:table-cell office:value-type="float" office:value="8640000" calcext:value-type="float">
            <text:p>8640000</text:p>
          </table:table-cell>
          <table:table-cell table:formula="of:=[.B1567]/[.C1567]" office:value-type="float" office:value="0.00163125" calcext:value-type="float">
            <text:p>0,00163125000000000000</text:p>
          </table:table-cell>
          <table:table-cell table:formula="of:=[.D1568]-[.D156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1567]+9" office:value-type="float" office:value="14103" calcext:value-type="float">
            <text:p>14103</text:p>
          </table:table-cell>
          <table:table-cell office:value-type="float" office:value="8640000" calcext:value-type="float">
            <text:p>8640000</text:p>
          </table:table-cell>
          <table:table-cell table:formula="of:=[.B1568]/[.C1568]" office:value-type="float" office:value="0.00163229166666667" calcext:value-type="float">
            <text:p>0,00163229166666667000</text:p>
          </table:table-cell>
          <table:table-cell table:formula="of:=[.D1569]-[.D156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1568]+9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1569]/[.C1569]" office:value-type="float" office:value="0.00163333333333333" calcext:value-type="float">
            <text:p>0,00163333333333333000</text:p>
          </table:table-cell>
          <table:table-cell table:formula="of:=[.D1570]-[.D156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1569]+9" office:value-type="float" office:value="14121" calcext:value-type="float">
            <text:p>14121</text:p>
          </table:table-cell>
          <table:table-cell office:value-type="float" office:value="8640000" calcext:value-type="float">
            <text:p>8640000</text:p>
          </table:table-cell>
          <table:table-cell table:formula="of:=[.B1570]/[.C1570]" office:value-type="float" office:value="0.001634375" calcext:value-type="float">
            <text:p>0,00163437500000000000</text:p>
          </table:table-cell>
          <table:table-cell table:formula="of:=[.D1571]-[.D157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1570]+9" office:value-type="float" office:value="14130" calcext:value-type="float">
            <text:p>14130</text:p>
          </table:table-cell>
          <table:table-cell office:value-type="float" office:value="8640000" calcext:value-type="float">
            <text:p>8640000</text:p>
          </table:table-cell>
          <table:table-cell table:formula="of:=[.B1571]/[.C1571]" office:value-type="float" office:value="0.00163541666666667" calcext:value-type="float">
            <text:p>0,00163541666666667000</text:p>
          </table:table-cell>
          <table:table-cell table:formula="of:=[.D1572]-[.D157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1571]+9" office:value-type="float" office:value="14139" calcext:value-type="float">
            <text:p>14139</text:p>
          </table:table-cell>
          <table:table-cell office:value-type="float" office:value="8640000" calcext:value-type="float">
            <text:p>8640000</text:p>
          </table:table-cell>
          <table:table-cell table:formula="of:=[.B1572]/[.C1572]" office:value-type="float" office:value="0.00163645833333333" calcext:value-type="float">
            <text:p>0,00163645833333333000</text:p>
          </table:table-cell>
          <table:table-cell table:formula="of:=[.D1573]-[.D157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1572]+9" office:value-type="float" office:value="14148" calcext:value-type="float">
            <text:p>14148</text:p>
          </table:table-cell>
          <table:table-cell office:value-type="float" office:value="8640000" calcext:value-type="float">
            <text:p>8640000</text:p>
          </table:table-cell>
          <table:table-cell table:formula="of:=[.B1573]/[.C1573]" office:value-type="float" office:value="0.0016375" calcext:value-type="float">
            <text:p>0,00163750000000000000</text:p>
          </table:table-cell>
          <table:table-cell table:formula="of:=[.D1574]-[.D157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1573]+9" office:value-type="float" office:value="14157" calcext:value-type="float">
            <text:p>14157</text:p>
          </table:table-cell>
          <table:table-cell office:value-type="float" office:value="8640000" calcext:value-type="float">
            <text:p>8640000</text:p>
          </table:table-cell>
          <table:table-cell table:formula="of:=[.B1574]/[.C1574]" office:value-type="float" office:value="0.00163854166666667" calcext:value-type="float">
            <text:p>0,00163854166666667000</text:p>
          </table:table-cell>
          <table:table-cell table:formula="of:=[.D1575]-[.D157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1574]+9" office:value-type="float" office:value="14166" calcext:value-type="float">
            <text:p>14166</text:p>
          </table:table-cell>
          <table:table-cell office:value-type="float" office:value="8640000" calcext:value-type="float">
            <text:p>8640000</text:p>
          </table:table-cell>
          <table:table-cell table:formula="of:=[.B1575]/[.C1575]" office:value-type="float" office:value="0.00163958333333333" calcext:value-type="float">
            <text:p>0,00163958333333333000</text:p>
          </table:table-cell>
          <table:table-cell table:formula="of:=[.D1576]-[.D15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1575]+9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1576]/[.C1576]" office:value-type="float" office:value="0.001640625" calcext:value-type="float">
            <text:p>0,00164062500000000000</text:p>
          </table:table-cell>
          <table:table-cell table:formula="of:=[.D1577]-[.D157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1576]+9" office:value-type="float" office:value="14184" calcext:value-type="float">
            <text:p>14184</text:p>
          </table:table-cell>
          <table:table-cell office:value-type="float" office:value="8640000" calcext:value-type="float">
            <text:p>8640000</text:p>
          </table:table-cell>
          <table:table-cell table:formula="of:=[.B1577]/[.C1577]" office:value-type="float" office:value="0.00164166666666667" calcext:value-type="float">
            <text:p>0,00164166666666667000</text:p>
          </table:table-cell>
          <table:table-cell table:formula="of:=[.D1578]-[.D157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1577]+9" office:value-type="float" office:value="14193" calcext:value-type="float">
            <text:p>14193</text:p>
          </table:table-cell>
          <table:table-cell office:value-type="float" office:value="8640000" calcext:value-type="float">
            <text:p>8640000</text:p>
          </table:table-cell>
          <table:table-cell table:formula="of:=[.B1578]/[.C1578]" office:value-type="float" office:value="0.00164270833333333" calcext:value-type="float">
            <text:p>0,00164270833333333000</text:p>
          </table:table-cell>
          <table:table-cell table:formula="of:=[.D1579]-[.D157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1578]+9" office:value-type="float" office:value="14202" calcext:value-type="float">
            <text:p>14202</text:p>
          </table:table-cell>
          <table:table-cell office:value-type="float" office:value="8640000" calcext:value-type="float">
            <text:p>8640000</text:p>
          </table:table-cell>
          <table:table-cell table:formula="of:=[.B1579]/[.C1579]" office:value-type="float" office:value="0.00164375" calcext:value-type="float">
            <text:p>0,00164375000000000000</text:p>
          </table:table-cell>
          <table:table-cell table:formula="of:=[.D1580]-[.D15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1579]+9" office:value-type="float" office:value="14211" calcext:value-type="float">
            <text:p>14211</text:p>
          </table:table-cell>
          <table:table-cell office:value-type="float" office:value="8640000" calcext:value-type="float">
            <text:p>8640000</text:p>
          </table:table-cell>
          <table:table-cell table:formula="of:=[.B1580]/[.C1580]" office:value-type="float" office:value="0.00164479166666667" calcext:value-type="float">
            <text:p>0,00164479166666667000</text:p>
          </table:table-cell>
          <table:table-cell table:formula="of:=[.D1581]-[.D158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1580]+9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1581]/[.C1581]" office:value-type="float" office:value="0.00164583333333333" calcext:value-type="float">
            <text:p>0,00164583333333333000</text:p>
          </table:table-cell>
          <table:table-cell table:formula="of:=[.D1582]-[.D158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1581]+9" office:value-type="float" office:value="14229" calcext:value-type="float">
            <text:p>14229</text:p>
          </table:table-cell>
          <table:table-cell office:value-type="float" office:value="8640000" calcext:value-type="float">
            <text:p>8640000</text:p>
          </table:table-cell>
          <table:table-cell table:formula="of:=[.B1582]/[.C1582]" office:value-type="float" office:value="0.001646875" calcext:value-type="float">
            <text:p>0,00164687500000000000</text:p>
          </table:table-cell>
          <table:table-cell table:formula="of:=[.D1583]-[.D158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1582]+9" office:value-type="float" office:value="14238" calcext:value-type="float">
            <text:p>14238</text:p>
          </table:table-cell>
          <table:table-cell office:value-type="float" office:value="8640000" calcext:value-type="float">
            <text:p>8640000</text:p>
          </table:table-cell>
          <table:table-cell table:formula="of:=[.B1583]/[.C1583]" office:value-type="float" office:value="0.00164791666666667" calcext:value-type="float">
            <text:p>0,00164791666666667000</text:p>
          </table:table-cell>
          <table:table-cell table:formula="of:=[.D1584]-[.D158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1583]+9" office:value-type="float" office:value="14247" calcext:value-type="float">
            <text:p>14247</text:p>
          </table:table-cell>
          <table:table-cell office:value-type="float" office:value="8640000" calcext:value-type="float">
            <text:p>8640000</text:p>
          </table:table-cell>
          <table:table-cell table:formula="of:=[.B1584]/[.C1584]" office:value-type="float" office:value="0.00164895833333333" calcext:value-type="float">
            <text:p>0,00164895833333333000</text:p>
          </table:table-cell>
          <table:table-cell table:formula="of:=[.D1585]-[.D158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1584]+9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1585]/[.C1585]" office:value-type="float" office:value="0.00165" calcext:value-type="float">
            <text:p>0,00165000000000000000</text:p>
          </table:table-cell>
          <table:table-cell table:formula="of:=[.D1586]-[.D158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1585]+9" office:value-type="float" office:value="14265" calcext:value-type="float">
            <text:p>14265</text:p>
          </table:table-cell>
          <table:table-cell office:value-type="float" office:value="8640000" calcext:value-type="float">
            <text:p>8640000</text:p>
          </table:table-cell>
          <table:table-cell table:formula="of:=[.B1586]/[.C1586]" office:value-type="float" office:value="0.00165104166666667" calcext:value-type="float">
            <text:p>0,00165104166666667000</text:p>
          </table:table-cell>
          <table:table-cell table:formula="of:=[.D1587]-[.D15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1586]+9" office:value-type="float" office:value="14274" calcext:value-type="float">
            <text:p>14274</text:p>
          </table:table-cell>
          <table:table-cell office:value-type="float" office:value="8640000" calcext:value-type="float">
            <text:p>8640000</text:p>
          </table:table-cell>
          <table:table-cell table:formula="of:=[.B1587]/[.C1587]" office:value-type="float" office:value="0.00165208333333333" calcext:value-type="float">
            <text:p>0,00165208333333333000</text:p>
          </table:table-cell>
          <table:table-cell table:formula="of:=[.D1588]-[.D158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1587]+9" office:value-type="float" office:value="14283" calcext:value-type="float">
            <text:p>14283</text:p>
          </table:table-cell>
          <table:table-cell office:value-type="float" office:value="8640000" calcext:value-type="float">
            <text:p>8640000</text:p>
          </table:table-cell>
          <table:table-cell table:formula="of:=[.B1588]/[.C1588]" office:value-type="float" office:value="0.001653125" calcext:value-type="float">
            <text:p>0,00165312500000000000</text:p>
          </table:table-cell>
          <table:table-cell table:formula="of:=[.D1589]-[.D15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1588]+9" office:value-type="float" office:value="14292" calcext:value-type="float">
            <text:p>14292</text:p>
          </table:table-cell>
          <table:table-cell office:value-type="float" office:value="8640000" calcext:value-type="float">
            <text:p>8640000</text:p>
          </table:table-cell>
          <table:table-cell table:formula="of:=[.B1589]/[.C1589]" office:value-type="float" office:value="0.00165416666666667" calcext:value-type="float">
            <text:p>0,00165416666666667000</text:p>
          </table:table-cell>
          <table:table-cell table:formula="of:=[.D1590]-[.D158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1589]+9" office:value-type="float" office:value="14301" calcext:value-type="float">
            <text:p>14301</text:p>
          </table:table-cell>
          <table:table-cell office:value-type="float" office:value="8640000" calcext:value-type="float">
            <text:p>8640000</text:p>
          </table:table-cell>
          <table:table-cell table:formula="of:=[.B1590]/[.C1590]" office:value-type="float" office:value="0.00165520833333333" calcext:value-type="float">
            <text:p>0,00165520833333333000</text:p>
          </table:table-cell>
          <table:table-cell table:formula="of:=[.D1591]-[.D15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1590]+9" office:value-type="float" office:value="14310" calcext:value-type="float">
            <text:p>14310</text:p>
          </table:table-cell>
          <table:table-cell office:value-type="float" office:value="8640000" calcext:value-type="float">
            <text:p>8640000</text:p>
          </table:table-cell>
          <table:table-cell table:formula="of:=[.B1591]/[.C1591]" office:value-type="float" office:value="0.00165625" calcext:value-type="float">
            <text:p>0,00165625000000000000</text:p>
          </table:table-cell>
          <table:table-cell table:formula="of:=[.D1592]-[.D159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1591]+9" office:value-type="float" office:value="14319" calcext:value-type="float">
            <text:p>14319</text:p>
          </table:table-cell>
          <table:table-cell office:value-type="float" office:value="8640000" calcext:value-type="float">
            <text:p>8640000</text:p>
          </table:table-cell>
          <table:table-cell table:formula="of:=[.B1592]/[.C1592]" office:value-type="float" office:value="0.00165729166666667" calcext:value-type="float">
            <text:p>0,00165729166666667000</text:p>
          </table:table-cell>
          <table:table-cell table:formula="of:=[.D1593]-[.D15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1592]+9" office:value-type="float" office:value="14328" calcext:value-type="float">
            <text:p>14328</text:p>
          </table:table-cell>
          <table:table-cell office:value-type="float" office:value="8640000" calcext:value-type="float">
            <text:p>8640000</text:p>
          </table:table-cell>
          <table:table-cell table:formula="of:=[.B1593]/[.C1593]" office:value-type="float" office:value="0.00165833333333333" calcext:value-type="float">
            <text:p>0,00165833333333333000</text:p>
          </table:table-cell>
          <table:table-cell table:formula="of:=[.D1594]-[.D159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1593]+9" office:value-type="float" office:value="14337" calcext:value-type="float">
            <text:p>14337</text:p>
          </table:table-cell>
          <table:table-cell office:value-type="float" office:value="8640000" calcext:value-type="float">
            <text:p>8640000</text:p>
          </table:table-cell>
          <table:table-cell table:formula="of:=[.B1594]/[.C1594]" office:value-type="float" office:value="0.001659375" calcext:value-type="float">
            <text:p>0,00165937500000000000</text:p>
          </table:table-cell>
          <table:table-cell table:formula="of:=[.D1595]-[.D15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1594]+9" office:value-type="float" office:value="14346" calcext:value-type="float">
            <text:p>14346</text:p>
          </table:table-cell>
          <table:table-cell office:value-type="float" office:value="8640000" calcext:value-type="float">
            <text:p>8640000</text:p>
          </table:table-cell>
          <table:table-cell table:formula="of:=[.B1595]/[.C1595]" office:value-type="float" office:value="0.00166041666666667" calcext:value-type="float">
            <text:p>0,00166041666666667000</text:p>
          </table:table-cell>
          <table:table-cell table:formula="of:=[.D1596]-[.D159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1595]+9" office:value-type="float" office:value="14355" calcext:value-type="float">
            <text:p>14355</text:p>
          </table:table-cell>
          <table:table-cell office:value-type="float" office:value="8640000" calcext:value-type="float">
            <text:p>8640000</text:p>
          </table:table-cell>
          <table:table-cell table:formula="of:=[.B1596]/[.C1596]" office:value-type="float" office:value="0.00166145833333333" calcext:value-type="float">
            <text:p>0,00166145833333333000</text:p>
          </table:table-cell>
          <table:table-cell table:formula="of:=[.D1597]-[.D159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1596]+9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1597]/[.C1597]" office:value-type="float" office:value="0.0016625" calcext:value-type="float">
            <text:p>0,00166250000000000000</text:p>
          </table:table-cell>
          <table:table-cell table:formula="of:=[.D1598]-[.D159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597]+9" office:value-type="float" office:value="14373" calcext:value-type="float">
            <text:p>14373</text:p>
          </table:table-cell>
          <table:table-cell office:value-type="float" office:value="8640000" calcext:value-type="float">
            <text:p>8640000</text:p>
          </table:table-cell>
          <table:table-cell table:formula="of:=[.B1598]/[.C1598]" office:value-type="float" office:value="0.00166354166666667" calcext:value-type="float">
            <text:p>0,00166354166666667000</text:p>
          </table:table-cell>
          <table:table-cell table:formula="of:=[.D1599]-[.D159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1598]+9" office:value-type="float" office:value="14382" calcext:value-type="float">
            <text:p>14382</text:p>
          </table:table-cell>
          <table:table-cell office:value-type="float" office:value="8640000" calcext:value-type="float">
            <text:p>8640000</text:p>
          </table:table-cell>
          <table:table-cell table:formula="of:=[.B1599]/[.C1599]" office:value-type="float" office:value="0.00166458333333333" calcext:value-type="float">
            <text:p>0,00166458333333333000</text:p>
          </table:table-cell>
          <table:table-cell table:formula="of:=[.D1600]-[.D159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1599]+9" office:value-type="float" office:value="14391" calcext:value-type="float">
            <text:p>14391</text:p>
          </table:table-cell>
          <table:table-cell office:value-type="float" office:value="8640000" calcext:value-type="float">
            <text:p>8640000</text:p>
          </table:table-cell>
          <table:table-cell table:formula="of:=[.B1600]/[.C1600]" office:value-type="float" office:value="0.001665625" calcext:value-type="float">
            <text:p>0,00166562500000000000</text:p>
          </table:table-cell>
          <table:table-cell table:formula="of:=[.D1601]-[.D160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1600]+9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1601]/[.C1601]" office:value-type="float" office:value="0.00166666666666667" calcext:value-type="float">
            <text:p>0,00166666666666667000</text:p>
          </table:table-cell>
          <table:table-cell table:formula="of:=[.D1602]-[.D16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B1601]+9" office:value-type="float" office:value="14409" calcext:value-type="float">
            <text:p>14409</text:p>
          </table:table-cell>
          <table:table-cell office:value-type="float" office:value="8640000" calcext:value-type="float">
            <text:p>8640000</text:p>
          </table:table-cell>
          <table:table-cell table:formula="of:=[.B1602]/[.C1602]" office:value-type="float" office:value="0.00166770833333333" calcext:value-type="float">
            <text:p>0,00166770833333333000</text:p>
          </table:table-cell>
          <table:table-cell table:formula="of:=[.D1603]-[.D160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B1602]+9" office:value-type="float" office:value="14418" calcext:value-type="float">
            <text:p>14418</text:p>
          </table:table-cell>
          <table:table-cell office:value-type="float" office:value="8640000" calcext:value-type="float">
            <text:p>8640000</text:p>
          </table:table-cell>
          <table:table-cell table:formula="of:=[.B1603]/[.C1603]" office:value-type="float" office:value="0.00166875" calcext:value-type="float">
            <text:p>0,00166875000000000000</text:p>
          </table:table-cell>
          <table:table-cell table:formula="of:=[.D1604]-[.D16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B1603]+9" office:value-type="float" office:value="14427" calcext:value-type="float">
            <text:p>14427</text:p>
          </table:table-cell>
          <table:table-cell office:value-type="float" office:value="8640000" calcext:value-type="float">
            <text:p>8640000</text:p>
          </table:table-cell>
          <table:table-cell table:formula="of:=[.B1604]/[.C1604]" office:value-type="float" office:value="0.00166979166666667" calcext:value-type="float">
            <text:p>0,00166979166666667000</text:p>
          </table:table-cell>
          <table:table-cell table:formula="of:=[.D1605]-[.D160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B1604]+9" office:value-type="float" office:value="14436" calcext:value-type="float">
            <text:p>14436</text:p>
          </table:table-cell>
          <table:table-cell office:value-type="float" office:value="8640000" calcext:value-type="float">
            <text:p>8640000</text:p>
          </table:table-cell>
          <table:table-cell table:formula="of:=[.B1605]/[.C1605]" office:value-type="float" office:value="0.00167083333333333" calcext:value-type="float">
            <text:p>0,00167083333333333000</text:p>
          </table:table-cell>
          <table:table-cell table:formula="of:=[.D1606]-[.D16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B1605]+9" office:value-type="float" office:value="14445" calcext:value-type="float">
            <text:p>14445</text:p>
          </table:table-cell>
          <table:table-cell office:value-type="float" office:value="8640000" calcext:value-type="float">
            <text:p>8640000</text:p>
          </table:table-cell>
          <table:table-cell table:formula="of:=[.B1606]/[.C1606]" office:value-type="float" office:value="0.001671875" calcext:value-type="float">
            <text:p>0,00167187500000000000</text:p>
          </table:table-cell>
          <table:table-cell table:formula="of:=[.D1607]-[.D160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B1606]+9" office:value-type="float" office:value="14454" calcext:value-type="float">
            <text:p>14454</text:p>
          </table:table-cell>
          <table:table-cell office:value-type="float" office:value="8640000" calcext:value-type="float">
            <text:p>8640000</text:p>
          </table:table-cell>
          <table:table-cell table:formula="of:=[.B1607]/[.C1607]" office:value-type="float" office:value="0.00167291666666667" calcext:value-type="float">
            <text:p>0,00167291666666667000</text:p>
          </table:table-cell>
          <table:table-cell table:formula="of:=[.D1608]-[.D16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B1607]+9" office:value-type="float" office:value="14463" calcext:value-type="float">
            <text:p>14463</text:p>
          </table:table-cell>
          <table:table-cell office:value-type="float" office:value="8640000" calcext:value-type="float">
            <text:p>8640000</text:p>
          </table:table-cell>
          <table:table-cell table:formula="of:=[.B1608]/[.C1608]" office:value-type="float" office:value="0.00167395833333333" calcext:value-type="float">
            <text:p>0,00167395833333333000</text:p>
          </table:table-cell>
          <table:table-cell table:formula="of:=[.D1609]-[.D160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B1608]+9" office:value-type="float" office:value="14472" calcext:value-type="float">
            <text:p>14472</text:p>
          </table:table-cell>
          <table:table-cell office:value-type="float" office:value="8640000" calcext:value-type="float">
            <text:p>8640000</text:p>
          </table:table-cell>
          <table:table-cell table:formula="of:=[.B1609]/[.C1609]" office:value-type="float" office:value="0.001675" calcext:value-type="float">
            <text:p>0,00167500000000000000</text:p>
          </table:table-cell>
          <table:table-cell table:formula="of:=[.D1610]-[.D16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B1609]+9" office:value-type="float" office:value="14481" calcext:value-type="float">
            <text:p>14481</text:p>
          </table:table-cell>
          <table:table-cell office:value-type="float" office:value="8640000" calcext:value-type="float">
            <text:p>8640000</text:p>
          </table:table-cell>
          <table:table-cell table:formula="of:=[.B1610]/[.C1610]" office:value-type="float" office:value="0.00167604166666667" calcext:value-type="float">
            <text:p>0,00167604166666667000</text:p>
          </table:table-cell>
          <table:table-cell table:formula="of:=[.D1611]-[.D161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B1610]+9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1611]/[.C1611]" office:value-type="float" office:value="0.00167708333333333" calcext:value-type="float">
            <text:p>0,00167708333333333000</text:p>
          </table:table-cell>
          <table:table-cell table:formula="of:=[.D1612]-[.D161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B1611]+9" office:value-type="float" office:value="14499" calcext:value-type="float">
            <text:p>14499</text:p>
          </table:table-cell>
          <table:table-cell office:value-type="float" office:value="8640000" calcext:value-type="float">
            <text:p>8640000</text:p>
          </table:table-cell>
          <table:table-cell table:formula="of:=[.B1612]/[.C1612]" office:value-type="float" office:value="0.001678125" calcext:value-type="float">
            <text:p>0,00167812500000000000</text:p>
          </table:table-cell>
          <table:table-cell table:formula="of:=[.D1613]-[.D161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B1612]+9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1613]/[.C1613]" office:value-type="float" office:value="0.00167916666666667" calcext:value-type="float">
            <text:p>0,00167916666666667000</text:p>
          </table:table-cell>
          <table:table-cell table:formula="of:=[.D1614]-[.D16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B1613]+9" office:value-type="float" office:value="14517" calcext:value-type="float">
            <text:p>14517</text:p>
          </table:table-cell>
          <table:table-cell office:value-type="float" office:value="8640000" calcext:value-type="float">
            <text:p>8640000</text:p>
          </table:table-cell>
          <table:table-cell table:formula="of:=[.B1614]/[.C1614]" office:value-type="float" office:value="0.00168020833333333" calcext:value-type="float">
            <text:p>0,00168020833333333000</text:p>
          </table:table-cell>
          <table:table-cell table:formula="of:=[.D1615]-[.D161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B1614]+9" office:value-type="float" office:value="14526" calcext:value-type="float">
            <text:p>14526</text:p>
          </table:table-cell>
          <table:table-cell office:value-type="float" office:value="8640000" calcext:value-type="float">
            <text:p>8640000</text:p>
          </table:table-cell>
          <table:table-cell table:formula="of:=[.B1615]/[.C1615]" office:value-type="float" office:value="0.00168125" calcext:value-type="float">
            <text:p>0,00168125000000000000</text:p>
          </table:table-cell>
          <table:table-cell table:formula="of:=[.D1616]-[.D161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B1615]+9" office:value-type="float" office:value="14535" calcext:value-type="float">
            <text:p>14535</text:p>
          </table:table-cell>
          <table:table-cell office:value-type="float" office:value="8640000" calcext:value-type="float">
            <text:p>8640000</text:p>
          </table:table-cell>
          <table:table-cell table:formula="of:=[.B1616]/[.C1616]" office:value-type="float" office:value="0.00168229166666667" calcext:value-type="float">
            <text:p>0,00168229166666667000</text:p>
          </table:table-cell>
          <table:table-cell table:formula="of:=[.D1617]-[.D161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B1616]+9" office:value-type="float" office:value="14544" calcext:value-type="float">
            <text:p>14544</text:p>
          </table:table-cell>
          <table:table-cell office:value-type="float" office:value="8640000" calcext:value-type="float">
            <text:p>8640000</text:p>
          </table:table-cell>
          <table:table-cell table:formula="of:=[.B1617]/[.C1617]" office:value-type="float" office:value="0.00168333333333333" calcext:value-type="float">
            <text:p>0,00168333333333333000</text:p>
          </table:table-cell>
          <table:table-cell table:formula="of:=[.D1618]-[.D161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B1617]+9" office:value-type="float" office:value="14553" calcext:value-type="float">
            <text:p>14553</text:p>
          </table:table-cell>
          <table:table-cell office:value-type="float" office:value="8640000" calcext:value-type="float">
            <text:p>8640000</text:p>
          </table:table-cell>
          <table:table-cell table:formula="of:=[.B1618]/[.C1618]" office:value-type="float" office:value="0.001684375" calcext:value-type="float">
            <text:p>0,00168437500000000000</text:p>
          </table:table-cell>
          <table:table-cell table:formula="of:=[.D1619]-[.D16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B1618]+9" office:value-type="float" office:value="14562" calcext:value-type="float">
            <text:p>14562</text:p>
          </table:table-cell>
          <table:table-cell office:value-type="float" office:value="8640000" calcext:value-type="float">
            <text:p>8640000</text:p>
          </table:table-cell>
          <table:table-cell table:formula="of:=[.B1619]/[.C1619]" office:value-type="float" office:value="0.00168541666666667" calcext:value-type="float">
            <text:p>0,00168541666666667000</text:p>
          </table:table-cell>
          <table:table-cell table:formula="of:=[.D1620]-[.D161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B1619]+9" office:value-type="float" office:value="14571" calcext:value-type="float">
            <text:p>14571</text:p>
          </table:table-cell>
          <table:table-cell office:value-type="float" office:value="8640000" calcext:value-type="float">
            <text:p>8640000</text:p>
          </table:table-cell>
          <table:table-cell table:formula="of:=[.B1620]/[.C1620]" office:value-type="float" office:value="0.00168645833333333" calcext:value-type="float">
            <text:p>0,00168645833333333000</text:p>
          </table:table-cell>
          <table:table-cell table:formula="of:=[.D1621]-[.D16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B1620]+9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1621]/[.C1621]" office:value-type="float" office:value="0.0016875" calcext:value-type="float">
            <text:p>0,00168750000000000000</text:p>
          </table:table-cell>
          <table:table-cell table:formula="of:=[.D1622]-[.D162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B1621]+9" office:value-type="float" office:value="14589" calcext:value-type="float">
            <text:p>14589</text:p>
          </table:table-cell>
          <table:table-cell office:value-type="float" office:value="8640000" calcext:value-type="float">
            <text:p>8640000</text:p>
          </table:table-cell>
          <table:table-cell table:formula="of:=[.B1622]/[.C1622]" office:value-type="float" office:value="0.00168854166666667" calcext:value-type="float">
            <text:p>0,00168854166666667000</text:p>
          </table:table-cell>
          <table:table-cell table:formula="of:=[.D1623]-[.D16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B1622]+9" office:value-type="float" office:value="14598" calcext:value-type="float">
            <text:p>14598</text:p>
          </table:table-cell>
          <table:table-cell office:value-type="float" office:value="8640000" calcext:value-type="float">
            <text:p>8640000</text:p>
          </table:table-cell>
          <table:table-cell table:formula="of:=[.B1623]/[.C1623]" office:value-type="float" office:value="0.00168958333333333" calcext:value-type="float">
            <text:p>0,00168958333333333000</text:p>
          </table:table-cell>
          <table:table-cell table:formula="of:=[.D1624]-[.D162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B1623]+9" office:value-type="float" office:value="14607" calcext:value-type="float">
            <text:p>14607</text:p>
          </table:table-cell>
          <table:table-cell office:value-type="float" office:value="8640000" calcext:value-type="float">
            <text:p>8640000</text:p>
          </table:table-cell>
          <table:table-cell table:formula="of:=[.B1624]/[.C1624]" office:value-type="float" office:value="0.001690625" calcext:value-type="float">
            <text:p>0,00169062500000000000</text:p>
          </table:table-cell>
          <table:table-cell table:formula="of:=[.D1625]-[.D16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B1624]+9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1625]/[.C1625]" office:value-type="float" office:value="0.00169166666666667" calcext:value-type="float">
            <text:p>0,00169166666666667000</text:p>
          </table:table-cell>
          <table:table-cell table:formula="of:=[.D1626]-[.D162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B1625]+9" office:value-type="float" office:value="14625" calcext:value-type="float">
            <text:p>14625</text:p>
          </table:table-cell>
          <table:table-cell office:value-type="float" office:value="8640000" calcext:value-type="float">
            <text:p>8640000</text:p>
          </table:table-cell>
          <table:table-cell table:formula="of:=[.B1626]/[.C1626]" office:value-type="float" office:value="0.00169270833333333" calcext:value-type="float">
            <text:p>0,00169270833333333000</text:p>
          </table:table-cell>
          <table:table-cell table:formula="of:=[.D1627]-[.D16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B1626]+9" office:value-type="float" office:value="14634" calcext:value-type="float">
            <text:p>14634</text:p>
          </table:table-cell>
          <table:table-cell office:value-type="float" office:value="8640000" calcext:value-type="float">
            <text:p>8640000</text:p>
          </table:table-cell>
          <table:table-cell table:formula="of:=[.B1627]/[.C1627]" office:value-type="float" office:value="0.00169375" calcext:value-type="float">
            <text:p>0,00169375000000000000</text:p>
          </table:table-cell>
          <table:table-cell table:formula="of:=[.D1628]-[.D162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B1627]+9" office:value-type="float" office:value="14643" calcext:value-type="float">
            <text:p>14643</text:p>
          </table:table-cell>
          <table:table-cell office:value-type="float" office:value="8640000" calcext:value-type="float">
            <text:p>8640000</text:p>
          </table:table-cell>
          <table:table-cell table:formula="of:=[.B1628]/[.C1628]" office:value-type="float" office:value="0.00169479166666667" calcext:value-type="float">
            <text:p>0,00169479166666667000</text:p>
          </table:table-cell>
          <table:table-cell table:formula="of:=[.D1629]-[.D16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B1628]+9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1629]/[.C1629]" office:value-type="float" office:value="0.00169583333333333" calcext:value-type="float">
            <text:p>0,00169583333333333000</text:p>
          </table:table-cell>
          <table:table-cell table:formula="of:=[.D1630]-[.D162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B1629]+9" office:value-type="float" office:value="14661" calcext:value-type="float">
            <text:p>14661</text:p>
          </table:table-cell>
          <table:table-cell office:value-type="float" office:value="8640000" calcext:value-type="float">
            <text:p>8640000</text:p>
          </table:table-cell>
          <table:table-cell table:formula="of:=[.B1630]/[.C1630]" office:value-type="float" office:value="0.001696875" calcext:value-type="float">
            <text:p>0,00169687500000000000</text:p>
          </table:table-cell>
          <table:table-cell table:formula="of:=[.D1631]-[.D163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B1630]+9" office:value-type="float" office:value="14670" calcext:value-type="float">
            <text:p>14670</text:p>
          </table:table-cell>
          <table:table-cell office:value-type="float" office:value="8640000" calcext:value-type="float">
            <text:p>8640000</text:p>
          </table:table-cell>
          <table:table-cell table:formula="of:=[.B1631]/[.C1631]" office:value-type="float" office:value="0.00169791666666667" calcext:value-type="float">
            <text:p>0,00169791666666667000</text:p>
          </table:table-cell>
          <table:table-cell table:formula="of:=[.D1632]-[.D163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B1631]+9" office:value-type="float" office:value="14679" calcext:value-type="float">
            <text:p>14679</text:p>
          </table:table-cell>
          <table:table-cell office:value-type="float" office:value="8640000" calcext:value-type="float">
            <text:p>8640000</text:p>
          </table:table-cell>
          <table:table-cell table:formula="of:=[.B1632]/[.C1632]" office:value-type="float" office:value="0.00169895833333333" calcext:value-type="float">
            <text:p>0,00169895833333333000</text:p>
          </table:table-cell>
          <table:table-cell table:formula="of:=[.D1633]-[.D163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B1632]+9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1633]/[.C1633]" office:value-type="float" office:value="0.0017" calcext:value-type="float">
            <text:p>0,00170000000000000000</text:p>
          </table:table-cell>
          <table:table-cell table:formula="of:=[.D1634]-[.D163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B1633]+9" office:value-type="float" office:value="14697" calcext:value-type="float">
            <text:p>14697</text:p>
          </table:table-cell>
          <table:table-cell office:value-type="float" office:value="8640000" calcext:value-type="float">
            <text:p>8640000</text:p>
          </table:table-cell>
          <table:table-cell table:formula="of:=[.B1634]/[.C1634]" office:value-type="float" office:value="0.00170104166666667" calcext:value-type="float">
            <text:p>0,00170104166666667000</text:p>
          </table:table-cell>
          <table:table-cell table:formula="of:=[.D1635]-[.D163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B1634]+9" office:value-type="float" office:value="14706" calcext:value-type="float">
            <text:p>14706</text:p>
          </table:table-cell>
          <table:table-cell office:value-type="float" office:value="8640000" calcext:value-type="float">
            <text:p>8640000</text:p>
          </table:table-cell>
          <table:table-cell table:formula="of:=[.B1635]/[.C1635]" office:value-type="float" office:value="0.00170208333333333" calcext:value-type="float">
            <text:p>0,00170208333333333000</text:p>
          </table:table-cell>
          <table:table-cell table:formula="of:=[.D1636]-[.D163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B1635]+9" office:value-type="float" office:value="14715" calcext:value-type="float">
            <text:p>14715</text:p>
          </table:table-cell>
          <table:table-cell office:value-type="float" office:value="8640000" calcext:value-type="float">
            <text:p>8640000</text:p>
          </table:table-cell>
          <table:table-cell table:formula="of:=[.B1636]/[.C1636]" office:value-type="float" office:value="0.001703125" calcext:value-type="float">
            <text:p>0,00170312500000000000</text:p>
          </table:table-cell>
          <table:table-cell table:formula="of:=[.D1637]-[.D163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B1636]+9" office:value-type="float" office:value="14724" calcext:value-type="float">
            <text:p>14724</text:p>
          </table:table-cell>
          <table:table-cell office:value-type="float" office:value="8640000" calcext:value-type="float">
            <text:p>8640000</text:p>
          </table:table-cell>
          <table:table-cell table:formula="of:=[.B1637]/[.C1637]" office:value-type="float" office:value="0.00170416666666667" calcext:value-type="float">
            <text:p>0,00170416666666667000</text:p>
          </table:table-cell>
          <table:table-cell table:formula="of:=[.D1638]-[.D163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B1637]+9" office:value-type="float" office:value="14733" calcext:value-type="float">
            <text:p>14733</text:p>
          </table:table-cell>
          <table:table-cell office:value-type="float" office:value="8640000" calcext:value-type="float">
            <text:p>8640000</text:p>
          </table:table-cell>
          <table:table-cell table:formula="of:=[.B1638]/[.C1638]" office:value-type="float" office:value="0.00170520833333333" calcext:value-type="float">
            <text:p>0,00170520833333333000</text:p>
          </table:table-cell>
          <table:table-cell table:formula="of:=[.D1639]-[.D163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B1638]+9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1639]/[.C1639]" office:value-type="float" office:value="0.00170625" calcext:value-type="float">
            <text:p>0,00170625000000000000</text:p>
          </table:table-cell>
          <table:table-cell table:formula="of:=[.D1640]-[.D16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B1639]+9" office:value-type="float" office:value="14751" calcext:value-type="float">
            <text:p>14751</text:p>
          </table:table-cell>
          <table:table-cell office:value-type="float" office:value="8640000" calcext:value-type="float">
            <text:p>8640000</text:p>
          </table:table-cell>
          <table:table-cell table:formula="of:=[.B1640]/[.C1640]" office:value-type="float" office:value="0.00170729166666667" calcext:value-type="float">
            <text:p>0,00170729166666667000</text:p>
          </table:table-cell>
          <table:table-cell table:formula="of:=[.D1641]-[.D164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B1640]+9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1641]/[.C1641]" office:value-type="float" office:value="0.00170833333333333" calcext:value-type="float">
            <text:p>0,00170833333333333000</text:p>
          </table:table-cell>
          <table:table-cell table:formula="of:=[.D1642]-[.D16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B1641]+9" office:value-type="float" office:value="14769" calcext:value-type="float">
            <text:p>14769</text:p>
          </table:table-cell>
          <table:table-cell office:value-type="float" office:value="8640000" calcext:value-type="float">
            <text:p>8640000</text:p>
          </table:table-cell>
          <table:table-cell table:formula="of:=[.B1642]/[.C1642]" office:value-type="float" office:value="0.001709375" calcext:value-type="float">
            <text:p>0,00170937500000000000</text:p>
          </table:table-cell>
          <table:table-cell table:formula="of:=[.D1643]-[.D164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B1642]+9" office:value-type="float" office:value="14778" calcext:value-type="float">
            <text:p>14778</text:p>
          </table:table-cell>
          <table:table-cell office:value-type="float" office:value="8640000" calcext:value-type="float">
            <text:p>8640000</text:p>
          </table:table-cell>
          <table:table-cell table:formula="of:=[.B1643]/[.C1643]" office:value-type="float" office:value="0.00171041666666667" calcext:value-type="float">
            <text:p>0,00171041666666667000</text:p>
          </table:table-cell>
          <table:table-cell table:formula="of:=[.D1644]-[.D16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B1643]+9" office:value-type="float" office:value="14787" calcext:value-type="float">
            <text:p>14787</text:p>
          </table:table-cell>
          <table:table-cell office:value-type="float" office:value="8640000" calcext:value-type="float">
            <text:p>8640000</text:p>
          </table:table-cell>
          <table:table-cell table:formula="of:=[.B1644]/[.C1644]" office:value-type="float" office:value="0.00171145833333333" calcext:value-type="float">
            <text:p>0,00171145833333333000</text:p>
          </table:table-cell>
          <table:table-cell table:formula="of:=[.D1645]-[.D164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B1644]+9" office:value-type="float" office:value="14796" calcext:value-type="float">
            <text:p>14796</text:p>
          </table:table-cell>
          <table:table-cell office:value-type="float" office:value="8640000" calcext:value-type="float">
            <text:p>8640000</text:p>
          </table:table-cell>
          <table:table-cell table:formula="of:=[.B1645]/[.C1645]" office:value-type="float" office:value="0.0017125" calcext:value-type="float">
            <text:p>0,00171250000000000000</text:p>
          </table:table-cell>
          <table:table-cell table:formula="of:=[.D1646]-[.D164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B1645]+9" office:value-type="float" office:value="14805" calcext:value-type="float">
            <text:p>14805</text:p>
          </table:table-cell>
          <table:table-cell office:value-type="float" office:value="8640000" calcext:value-type="float">
            <text:p>8640000</text:p>
          </table:table-cell>
          <table:table-cell table:formula="of:=[.B1646]/[.C1646]" office:value-type="float" office:value="0.00171354166666667" calcext:value-type="float">
            <text:p>0,00171354166666667000</text:p>
          </table:table-cell>
          <table:table-cell table:formula="of:=[.D1647]-[.D164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B1646]+9" office:value-type="float" office:value="14814" calcext:value-type="float">
            <text:p>14814</text:p>
          </table:table-cell>
          <table:table-cell office:value-type="float" office:value="8640000" calcext:value-type="float">
            <text:p>8640000</text:p>
          </table:table-cell>
          <table:table-cell table:formula="of:=[.B1647]/[.C1647]" office:value-type="float" office:value="0.00171458333333333" calcext:value-type="float">
            <text:p>0,00171458333333333000</text:p>
          </table:table-cell>
          <table:table-cell table:formula="of:=[.D1648]-[.D16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B1647]+9" office:value-type="float" office:value="14823" calcext:value-type="float">
            <text:p>14823</text:p>
          </table:table-cell>
          <table:table-cell office:value-type="float" office:value="8640000" calcext:value-type="float">
            <text:p>8640000</text:p>
          </table:table-cell>
          <table:table-cell table:formula="of:=[.B1648]/[.C1648]" office:value-type="float" office:value="0.001715625" calcext:value-type="float">
            <text:p>0,00171562500000000000</text:p>
          </table:table-cell>
          <table:table-cell table:formula="of:=[.D1649]-[.D164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B1648]+9" office:value-type="float" office:value="14832" calcext:value-type="float">
            <text:p>14832</text:p>
          </table:table-cell>
          <table:table-cell office:value-type="float" office:value="8640000" calcext:value-type="float">
            <text:p>8640000</text:p>
          </table:table-cell>
          <table:table-cell table:formula="of:=[.B1649]/[.C1649]" office:value-type="float" office:value="0.00171666666666667" calcext:value-type="float">
            <text:p>0,00171666666666667000</text:p>
          </table:table-cell>
          <table:table-cell table:formula="of:=[.D1650]-[.D164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B1649]+9" office:value-type="float" office:value="14841" calcext:value-type="float">
            <text:p>14841</text:p>
          </table:table-cell>
          <table:table-cell office:value-type="float" office:value="8640000" calcext:value-type="float">
            <text:p>8640000</text:p>
          </table:table-cell>
          <table:table-cell table:formula="of:=[.B1650]/[.C1650]" office:value-type="float" office:value="0.00171770833333333" calcext:value-type="float">
            <text:p>0,00171770833333333000</text:p>
          </table:table-cell>
          <table:table-cell table:formula="of:=[.D1651]-[.D165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1650]+9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1651]/[.C1651]" office:value-type="float" office:value="0.00171875" calcext:value-type="float">
            <text:p>0,00171875000000000000</text:p>
          </table:table-cell>
          <table:table-cell table:formula="of:=[.D1652]-[.D16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B1651]+9" office:value-type="float" office:value="14859" calcext:value-type="float">
            <text:p>14859</text:p>
          </table:table-cell>
          <table:table-cell office:value-type="float" office:value="8640000" calcext:value-type="float">
            <text:p>8640000</text:p>
          </table:table-cell>
          <table:table-cell table:formula="of:=[.B1652]/[.C1652]" office:value-type="float" office:value="0.00171979166666667" calcext:value-type="float">
            <text:p>0,00171979166666667000</text:p>
          </table:table-cell>
          <table:table-cell table:formula="of:=[.D1653]-[.D165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B1652]+9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1653]/[.C1653]" office:value-type="float" office:value="0.00172083333333333" calcext:value-type="float">
            <text:p>0,00172083333333333000</text:p>
          </table:table-cell>
          <table:table-cell table:formula="of:=[.D1654]-[.D165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B1653]+9" office:value-type="float" office:value="14877" calcext:value-type="float">
            <text:p>14877</text:p>
          </table:table-cell>
          <table:table-cell office:value-type="float" office:value="8640000" calcext:value-type="float">
            <text:p>8640000</text:p>
          </table:table-cell>
          <table:table-cell table:formula="of:=[.B1654]/[.C1654]" office:value-type="float" office:value="0.001721875" calcext:value-type="float">
            <text:p>0,00172187500000000000</text:p>
          </table:table-cell>
          <table:table-cell table:formula="of:=[.D1655]-[.D16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B1654]+9" office:value-type="float" office:value="14886" calcext:value-type="float">
            <text:p>14886</text:p>
          </table:table-cell>
          <table:table-cell office:value-type="float" office:value="8640000" calcext:value-type="float">
            <text:p>8640000</text:p>
          </table:table-cell>
          <table:table-cell table:formula="of:=[.B1655]/[.C1655]" office:value-type="float" office:value="0.00172291666666667" calcext:value-type="float">
            <text:p>0,00172291666666667000</text:p>
          </table:table-cell>
          <table:table-cell table:formula="of:=[.D1656]-[.D165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B1655]+9" office:value-type="float" office:value="14895" calcext:value-type="float">
            <text:p>14895</text:p>
          </table:table-cell>
          <table:table-cell office:value-type="float" office:value="8640000" calcext:value-type="float">
            <text:p>8640000</text:p>
          </table:table-cell>
          <table:table-cell table:formula="of:=[.B1656]/[.C1656]" office:value-type="float" office:value="0.00172395833333333" calcext:value-type="float">
            <text:p>0,00172395833333333000</text:p>
          </table:table-cell>
          <table:table-cell table:formula="of:=[.D1657]-[.D16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B1656]+9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1657]/[.C1657]" office:value-type="float" office:value="0.001725" calcext:value-type="float">
            <text:p>0,00172500000000000000</text:p>
          </table:table-cell>
          <table:table-cell table:formula="of:=[.D1658]-[.D165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B1657]+9" office:value-type="float" office:value="14913" calcext:value-type="float">
            <text:p>14913</text:p>
          </table:table-cell>
          <table:table-cell office:value-type="float" office:value="8640000" calcext:value-type="float">
            <text:p>8640000</text:p>
          </table:table-cell>
          <table:table-cell table:formula="of:=[.B1658]/[.C1658]" office:value-type="float" office:value="0.00172604166666667" calcext:value-type="float">
            <text:p>0,00172604166666667000</text:p>
          </table:table-cell>
          <table:table-cell table:formula="of:=[.D1659]-[.D16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B1658]+9" office:value-type="float" office:value="14922" calcext:value-type="float">
            <text:p>14922</text:p>
          </table:table-cell>
          <table:table-cell office:value-type="float" office:value="8640000" calcext:value-type="float">
            <text:p>8640000</text:p>
          </table:table-cell>
          <table:table-cell table:formula="of:=[.B1659]/[.C1659]" office:value-type="float" office:value="0.00172708333333333" calcext:value-type="float">
            <text:p>0,00172708333333333000</text:p>
          </table:table-cell>
          <table:table-cell table:formula="of:=[.D1660]-[.D165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B1659]+9" office:value-type="float" office:value="14931" calcext:value-type="float">
            <text:p>14931</text:p>
          </table:table-cell>
          <table:table-cell office:value-type="float" office:value="8640000" calcext:value-type="float">
            <text:p>8640000</text:p>
          </table:table-cell>
          <table:table-cell table:formula="of:=[.B1660]/[.C1660]" office:value-type="float" office:value="0.001728125" calcext:value-type="float">
            <text:p>0,00172812500000000000</text:p>
          </table:table-cell>
          <table:table-cell table:formula="of:=[.D1661]-[.D16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B1660]+9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1661]/[.C1661]" office:value-type="float" office:value="0.00172916666666667" calcext:value-type="float">
            <text:p>0,00172916666666667000</text:p>
          </table:table-cell>
          <table:table-cell table:formula="of:=[.D1662]-[.D166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B1661]+9" office:value-type="float" office:value="14949" calcext:value-type="float">
            <text:p>14949</text:p>
          </table:table-cell>
          <table:table-cell office:value-type="float" office:value="8640000" calcext:value-type="float">
            <text:p>8640000</text:p>
          </table:table-cell>
          <table:table-cell table:formula="of:=[.B1662]/[.C1662]" office:value-type="float" office:value="0.00173020833333333" calcext:value-type="float">
            <text:p>0,00173020833333333000</text:p>
          </table:table-cell>
          <table:table-cell table:formula="of:=[.D1663]-[.D16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B1662]+9" office:value-type="float" office:value="14958" calcext:value-type="float">
            <text:p>14958</text:p>
          </table:table-cell>
          <table:table-cell office:value-type="float" office:value="8640000" calcext:value-type="float">
            <text:p>8640000</text:p>
          </table:table-cell>
          <table:table-cell table:formula="of:=[.B1663]/[.C1663]" office:value-type="float" office:value="0.00173125" calcext:value-type="float">
            <text:p>0,00173125000000000000</text:p>
          </table:table-cell>
          <table:table-cell table:formula="of:=[.D1664]-[.D166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B1663]+9" office:value-type="float" office:value="14967" calcext:value-type="float">
            <text:p>14967</text:p>
          </table:table-cell>
          <table:table-cell office:value-type="float" office:value="8640000" calcext:value-type="float">
            <text:p>8640000</text:p>
          </table:table-cell>
          <table:table-cell table:formula="of:=[.B1664]/[.C1664]" office:value-type="float" office:value="0.00173229166666667" calcext:value-type="float">
            <text:p>0,00173229166666667000</text:p>
          </table:table-cell>
          <table:table-cell table:formula="of:=[.D1665]-[.D166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B1664]+9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1665]/[.C1665]" office:value-type="float" office:value="0.00173333333333333" calcext:value-type="float">
            <text:p>0,00173333333333333000</text:p>
          </table:table-cell>
          <table:table-cell table:formula="of:=[.D1666]-[.D166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B1665]+9" office:value-type="float" office:value="14985" calcext:value-type="float">
            <text:p>14985</text:p>
          </table:table-cell>
          <table:table-cell office:value-type="float" office:value="8640000" calcext:value-type="float">
            <text:p>8640000</text:p>
          </table:table-cell>
          <table:table-cell table:formula="of:=[.B1666]/[.C1666]" office:value-type="float" office:value="0.001734375" calcext:value-type="float">
            <text:p>0,00173437500000000000</text:p>
          </table:table-cell>
          <table:table-cell table:formula="of:=[.D1667]-[.D16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B1666]+9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1667]/[.C1667]" office:value-type="float" office:value="0.00173541666666667" calcext:value-type="float">
            <text:p>0,00173541666666667000</text:p>
          </table:table-cell>
          <table:table-cell table:formula="of:=[.D1668]-[.D166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B1667]+9" office:value-type="float" office:value="15003" calcext:value-type="float">
            <text:p>15003</text:p>
          </table:table-cell>
          <table:table-cell office:value-type="float" office:value="8640000" calcext:value-type="float">
            <text:p>8640000</text:p>
          </table:table-cell>
          <table:table-cell table:formula="of:=[.B1668]/[.C1668]" office:value-type="float" office:value="0.00173645833333333" calcext:value-type="float">
            <text:p>0,00173645833333333000</text:p>
          </table:table-cell>
          <table:table-cell table:formula="of:=[.D1669]-[.D166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B1668]+9" office:value-type="float" office:value="15012" calcext:value-type="float">
            <text:p>15012</text:p>
          </table:table-cell>
          <table:table-cell office:value-type="float" office:value="8640000" calcext:value-type="float">
            <text:p>8640000</text:p>
          </table:table-cell>
          <table:table-cell table:formula="of:=[.B1669]/[.C1669]" office:value-type="float" office:value="0.0017375" calcext:value-type="float">
            <text:p>0,00173750000000000000</text:p>
          </table:table-cell>
          <table:table-cell table:formula="of:=[.D1670]-[.D166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B1669]+9" office:value-type="float" office:value="15021" calcext:value-type="float">
            <text:p>15021</text:p>
          </table:table-cell>
          <table:table-cell office:value-type="float" office:value="8640000" calcext:value-type="float">
            <text:p>8640000</text:p>
          </table:table-cell>
          <table:table-cell table:formula="of:=[.B1670]/[.C1670]" office:value-type="float" office:value="0.00173854166666667" calcext:value-type="float">
            <text:p>0,00173854166666667000</text:p>
          </table:table-cell>
          <table:table-cell table:formula="of:=[.D1671]-[.D167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1670]+9" office:value-type="float" office:value="15030" calcext:value-type="float">
            <text:p>15030</text:p>
          </table:table-cell>
          <table:table-cell office:value-type="float" office:value="8640000" calcext:value-type="float">
            <text:p>8640000</text:p>
          </table:table-cell>
          <table:table-cell table:formula="of:=[.B1671]/[.C1671]" office:value-type="float" office:value="0.00173958333333333" calcext:value-type="float">
            <text:p>0,00173958333333333000</text:p>
          </table:table-cell>
          <table:table-cell table:formula="of:=[.D1672]-[.D167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B1671]+9" office:value-type="float" office:value="15039" calcext:value-type="float">
            <text:p>15039</text:p>
          </table:table-cell>
          <table:table-cell office:value-type="float" office:value="8640000" calcext:value-type="float">
            <text:p>8640000</text:p>
          </table:table-cell>
          <table:table-cell table:formula="of:=[.B1672]/[.C1672]" office:value-type="float" office:value="0.001740625" calcext:value-type="float">
            <text:p>0,00174062500000000000</text:p>
          </table:table-cell>
          <table:table-cell table:formula="of:=[.D1673]-[.D167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B1672]+9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1673]/[.C1673]" office:value-type="float" office:value="0.00174166666666667" calcext:value-type="float">
            <text:p>0,00174166666666667000</text:p>
          </table:table-cell>
          <table:table-cell table:formula="of:=[.D1674]-[.D167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B1673]+9" office:value-type="float" office:value="15057" calcext:value-type="float">
            <text:p>15057</text:p>
          </table:table-cell>
          <table:table-cell office:value-type="float" office:value="8640000" calcext:value-type="float">
            <text:p>8640000</text:p>
          </table:table-cell>
          <table:table-cell table:formula="of:=[.B1674]/[.C1674]" office:value-type="float" office:value="0.00174270833333333" calcext:value-type="float">
            <text:p>0,00174270833333333000</text:p>
          </table:table-cell>
          <table:table-cell table:formula="of:=[.D1675]-[.D167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B1674]+9" office:value-type="float" office:value="15066" calcext:value-type="float">
            <text:p>15066</text:p>
          </table:table-cell>
          <table:table-cell office:value-type="float" office:value="8640000" calcext:value-type="float">
            <text:p>8640000</text:p>
          </table:table-cell>
          <table:table-cell table:formula="of:=[.B1675]/[.C1675]" office:value-type="float" office:value="0.00174375" calcext:value-type="float">
            <text:p>0,00174375000000000000</text:p>
          </table:table-cell>
          <table:table-cell table:formula="of:=[.D1676]-[.D16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B1675]+9" office:value-type="float" office:value="15075" calcext:value-type="float">
            <text:p>15075</text:p>
          </table:table-cell>
          <table:table-cell office:value-type="float" office:value="8640000" calcext:value-type="float">
            <text:p>8640000</text:p>
          </table:table-cell>
          <table:table-cell table:formula="of:=[.B1676]/[.C1676]" office:value-type="float" office:value="0.00174479166666667" calcext:value-type="float">
            <text:p>0,00174479166666667000</text:p>
          </table:table-cell>
          <table:table-cell table:formula="of:=[.D1677]-[.D167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B1676]+9" office:value-type="float" office:value="15084" calcext:value-type="float">
            <text:p>15084</text:p>
          </table:table-cell>
          <table:table-cell office:value-type="float" office:value="8640000" calcext:value-type="float">
            <text:p>8640000</text:p>
          </table:table-cell>
          <table:table-cell table:formula="of:=[.B1677]/[.C1677]" office:value-type="float" office:value="0.00174583333333333" calcext:value-type="float">
            <text:p>0,00174583333333333000</text:p>
          </table:table-cell>
          <table:table-cell table:formula="of:=[.D1678]-[.D167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B1677]+9" office:value-type="float" office:value="15093" calcext:value-type="float">
            <text:p>15093</text:p>
          </table:table-cell>
          <table:table-cell office:value-type="float" office:value="8640000" calcext:value-type="float">
            <text:p>8640000</text:p>
          </table:table-cell>
          <table:table-cell table:formula="of:=[.B1678]/[.C1678]" office:value-type="float" office:value="0.001746875" calcext:value-type="float">
            <text:p>0,00174687500000000000</text:p>
          </table:table-cell>
          <table:table-cell table:formula="of:=[.D1679]-[.D167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B1678]+9" office:value-type="float" office:value="15102" calcext:value-type="float">
            <text:p>15102</text:p>
          </table:table-cell>
          <table:table-cell office:value-type="float" office:value="8640000" calcext:value-type="float">
            <text:p>8640000</text:p>
          </table:table-cell>
          <table:table-cell table:formula="of:=[.B1679]/[.C1679]" office:value-type="float" office:value="0.00174791666666667" calcext:value-type="float">
            <text:p>0,00174791666666667000</text:p>
          </table:table-cell>
          <table:table-cell table:formula="of:=[.D1680]-[.D16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B1679]+9" office:value-type="float" office:value="15111" calcext:value-type="float">
            <text:p>15111</text:p>
          </table:table-cell>
          <table:table-cell office:value-type="float" office:value="8640000" calcext:value-type="float">
            <text:p>8640000</text:p>
          </table:table-cell>
          <table:table-cell table:formula="of:=[.B1680]/[.C1680]" office:value-type="float" office:value="0.00174895833333333" calcext:value-type="float">
            <text:p>0,00174895833333333000</text:p>
          </table:table-cell>
          <table:table-cell table:formula="of:=[.D1681]-[.D168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B1680]+9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1681]/[.C1681]" office:value-type="float" office:value="0.00175" calcext:value-type="float">
            <text:p>0,00175000000000000000</text:p>
          </table:table-cell>
          <table:table-cell table:formula="of:=[.D1682]-[.D168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B1681]+9" office:value-type="float" office:value="15129" calcext:value-type="float">
            <text:p>15129</text:p>
          </table:table-cell>
          <table:table-cell office:value-type="float" office:value="8640000" calcext:value-type="float">
            <text:p>8640000</text:p>
          </table:table-cell>
          <table:table-cell table:formula="of:=[.B1682]/[.C1682]" office:value-type="float" office:value="0.00175104166666667" calcext:value-type="float">
            <text:p>0,00175104166666667000</text:p>
          </table:table-cell>
          <table:table-cell table:formula="of:=[.D1683]-[.D168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B1682]+9" office:value-type="float" office:value="15138" calcext:value-type="float">
            <text:p>15138</text:p>
          </table:table-cell>
          <table:table-cell office:value-type="float" office:value="8640000" calcext:value-type="float">
            <text:p>8640000</text:p>
          </table:table-cell>
          <table:table-cell table:formula="of:=[.B1683]/[.C1683]" office:value-type="float" office:value="0.00175208333333333" calcext:value-type="float">
            <text:p>0,00175208333333333000</text:p>
          </table:table-cell>
          <table:table-cell table:formula="of:=[.D1684]-[.D168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B1683]+9" office:value-type="float" office:value="15147" calcext:value-type="float">
            <text:p>15147</text:p>
          </table:table-cell>
          <table:table-cell office:value-type="float" office:value="8640000" calcext:value-type="float">
            <text:p>8640000</text:p>
          </table:table-cell>
          <table:table-cell table:formula="of:=[.B1684]/[.C1684]" office:value-type="float" office:value="0.001753125" calcext:value-type="float">
            <text:p>0,00175312500000000000</text:p>
          </table:table-cell>
          <table:table-cell table:formula="of:=[.D1685]-[.D168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B1684]+9" office:value-type="float" office:value="15156" calcext:value-type="float">
            <text:p>15156</text:p>
          </table:table-cell>
          <table:table-cell office:value-type="float" office:value="8640000" calcext:value-type="float">
            <text:p>8640000</text:p>
          </table:table-cell>
          <table:table-cell table:formula="of:=[.B1685]/[.C1685]" office:value-type="float" office:value="0.00175416666666667" calcext:value-type="float">
            <text:p>0,00175416666666667000</text:p>
          </table:table-cell>
          <table:table-cell table:formula="of:=[.D1686]-[.D168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B1685]+9" office:value-type="float" office:value="15165" calcext:value-type="float">
            <text:p>15165</text:p>
          </table:table-cell>
          <table:table-cell office:value-type="float" office:value="8640000" calcext:value-type="float">
            <text:p>8640000</text:p>
          </table:table-cell>
          <table:table-cell table:formula="of:=[.B1686]/[.C1686]" office:value-type="float" office:value="0.00175520833333333" calcext:value-type="float">
            <text:p>0,00175520833333333000</text:p>
          </table:table-cell>
          <table:table-cell table:formula="of:=[.D1687]-[.D168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B1686]+9" office:value-type="float" office:value="15174" calcext:value-type="float">
            <text:p>15174</text:p>
          </table:table-cell>
          <table:table-cell office:value-type="float" office:value="8640000" calcext:value-type="float">
            <text:p>8640000</text:p>
          </table:table-cell>
          <table:table-cell table:formula="of:=[.B1687]/[.C1687]" office:value-type="float" office:value="0.00175625" calcext:value-type="float">
            <text:p>0,00175625000000000000</text:p>
          </table:table-cell>
          <table:table-cell table:formula="of:=[.D1688]-[.D168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B1687]+9" office:value-type="float" office:value="15183" calcext:value-type="float">
            <text:p>15183</text:p>
          </table:table-cell>
          <table:table-cell office:value-type="float" office:value="8640000" calcext:value-type="float">
            <text:p>8640000</text:p>
          </table:table-cell>
          <table:table-cell table:formula="of:=[.B1688]/[.C1688]" office:value-type="float" office:value="0.00175729166666667" calcext:value-type="float">
            <text:p>0,00175729166666667000</text:p>
          </table:table-cell>
          <table:table-cell table:formula="of:=[.D1689]-[.D16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B1688]+9" office:value-type="float" office:value="15192" calcext:value-type="float">
            <text:p>15192</text:p>
          </table:table-cell>
          <table:table-cell office:value-type="float" office:value="8640000" calcext:value-type="float">
            <text:p>8640000</text:p>
          </table:table-cell>
          <table:table-cell table:formula="of:=[.B1689]/[.C1689]" office:value-type="float" office:value="0.00175833333333333" calcext:value-type="float">
            <text:p>0,00175833333333333000</text:p>
          </table:table-cell>
          <table:table-cell table:formula="of:=[.D1690]-[.D168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B1689]+9" office:value-type="float" office:value="15201" calcext:value-type="float">
            <text:p>15201</text:p>
          </table:table-cell>
          <table:table-cell office:value-type="float" office:value="8640000" calcext:value-type="float">
            <text:p>8640000</text:p>
          </table:table-cell>
          <table:table-cell table:formula="of:=[.B1690]/[.C1690]" office:value-type="float" office:value="0.001759375" calcext:value-type="float">
            <text:p>0,00175937500000000000</text:p>
          </table:table-cell>
          <table:table-cell table:formula="of:=[.D1691]-[.D16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B1690]+9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1691]/[.C1691]" office:value-type="float" office:value="0.00176041666666667" calcext:value-type="float">
            <text:p>0,00176041666666667000</text:p>
          </table:table-cell>
          <table:table-cell table:formula="of:=[.D1692]-[.D169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B1691]+9" office:value-type="float" office:value="15219" calcext:value-type="float">
            <text:p>15219</text:p>
          </table:table-cell>
          <table:table-cell office:value-type="float" office:value="8640000" calcext:value-type="float">
            <text:p>8640000</text:p>
          </table:table-cell>
          <table:table-cell table:formula="of:=[.B1692]/[.C1692]" office:value-type="float" office:value="0.00176145833333333" calcext:value-type="float">
            <text:p>0,00176145833333333000</text:p>
          </table:table-cell>
          <table:table-cell table:formula="of:=[.D1693]-[.D16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B1692]+9" office:value-type="float" office:value="15228" calcext:value-type="float">
            <text:p>15228</text:p>
          </table:table-cell>
          <table:table-cell office:value-type="float" office:value="8640000" calcext:value-type="float">
            <text:p>8640000</text:p>
          </table:table-cell>
          <table:table-cell table:formula="of:=[.B1693]/[.C1693]" office:value-type="float" office:value="0.0017625" calcext:value-type="float">
            <text:p>0,00176250000000000000</text:p>
          </table:table-cell>
          <table:table-cell table:formula="of:=[.D1694]-[.D169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B1693]+9" office:value-type="float" office:value="15237" calcext:value-type="float">
            <text:p>15237</text:p>
          </table:table-cell>
          <table:table-cell office:value-type="float" office:value="8640000" calcext:value-type="float">
            <text:p>8640000</text:p>
          </table:table-cell>
          <table:table-cell table:formula="of:=[.B1694]/[.C1694]" office:value-type="float" office:value="0.00176354166666667" calcext:value-type="float">
            <text:p>0,00176354166666667000</text:p>
          </table:table-cell>
          <table:table-cell table:formula="of:=[.D1695]-[.D16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B1694]+9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1695]/[.C1695]" office:value-type="float" office:value="0.00176458333333333" calcext:value-type="float">
            <text:p>0,00176458333333333000</text:p>
          </table:table-cell>
          <table:table-cell table:formula="of:=[.D1696]-[.D169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B1695]+9" office:value-type="float" office:value="15255" calcext:value-type="float">
            <text:p>15255</text:p>
          </table:table-cell>
          <table:table-cell office:value-type="float" office:value="8640000" calcext:value-type="float">
            <text:p>8640000</text:p>
          </table:table-cell>
          <table:table-cell table:formula="of:=[.B1696]/[.C1696]" office:value-type="float" office:value="0.001765625" calcext:value-type="float">
            <text:p>0,00176562500000000000</text:p>
          </table:table-cell>
          <table:table-cell table:formula="of:=[.D1697]-[.D169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B1696]+9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1697]/[.C1697]" office:value-type="float" office:value="0.00176666666666667" calcext:value-type="float">
            <text:p>0,00176666666666667000</text:p>
          </table:table-cell>
          <table:table-cell table:formula="of:=[.D1698]-[.D169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B1697]+9" office:value-type="float" office:value="15273" calcext:value-type="float">
            <text:p>15273</text:p>
          </table:table-cell>
          <table:table-cell office:value-type="float" office:value="8640000" calcext:value-type="float">
            <text:p>8640000</text:p>
          </table:table-cell>
          <table:table-cell table:formula="of:=[.B1698]/[.C1698]" office:value-type="float" office:value="0.00176770833333333" calcext:value-type="float">
            <text:p>0,00176770833333333000</text:p>
          </table:table-cell>
          <table:table-cell table:formula="of:=[.D1699]-[.D169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B1698]+9" office:value-type="float" office:value="15282" calcext:value-type="float">
            <text:p>15282</text:p>
          </table:table-cell>
          <table:table-cell office:value-type="float" office:value="8640000" calcext:value-type="float">
            <text:p>8640000</text:p>
          </table:table-cell>
          <table:table-cell table:formula="of:=[.B1699]/[.C1699]" office:value-type="float" office:value="0.00176875" calcext:value-type="float">
            <text:p>0,00176875000000000000</text:p>
          </table:table-cell>
          <table:table-cell table:formula="of:=[.D1700]-[.D169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B1699]+9" office:value-type="float" office:value="15291" calcext:value-type="float">
            <text:p>15291</text:p>
          </table:table-cell>
          <table:table-cell office:value-type="float" office:value="8640000" calcext:value-type="float">
            <text:p>8640000</text:p>
          </table:table-cell>
          <table:table-cell table:formula="of:=[.B1700]/[.C1700]" office:value-type="float" office:value="0.00176979166666667" calcext:value-type="float">
            <text:p>0,00176979166666667000</text:p>
          </table:table-cell>
          <table:table-cell table:formula="of:=[.D1701]-[.D170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1700]+9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1701]/[.C1701]" office:value-type="float" office:value="0.00177083333333333" calcext:value-type="float">
            <text:p>0,00177083333333333000</text:p>
          </table:table-cell>
          <table:table-cell table:formula="of:=[.D1702]-[.D170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B1701]+9" office:value-type="float" office:value="15309" calcext:value-type="float">
            <text:p>15309</text:p>
          </table:table-cell>
          <table:table-cell office:value-type="float" office:value="8640000" calcext:value-type="float">
            <text:p>8640000</text:p>
          </table:table-cell>
          <table:table-cell table:formula="of:=[.B1702]/[.C1702]" office:value-type="float" office:value="0.001771875" calcext:value-type="float">
            <text:p>0,00177187500000000000</text:p>
          </table:table-cell>
          <table:table-cell table:formula="of:=[.D1703]-[.D170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B1702]+9" office:value-type="float" office:value="15318" calcext:value-type="float">
            <text:p>15318</text:p>
          </table:table-cell>
          <table:table-cell office:value-type="float" office:value="8640000" calcext:value-type="float">
            <text:p>8640000</text:p>
          </table:table-cell>
          <table:table-cell table:formula="of:=[.B1703]/[.C1703]" office:value-type="float" office:value="0.00177291666666667" calcext:value-type="float">
            <text:p>0,00177291666666667000</text:p>
          </table:table-cell>
          <table:table-cell table:formula="of:=[.D1704]-[.D170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B1703]+9" office:value-type="float" office:value="15327" calcext:value-type="float">
            <text:p>15327</text:p>
          </table:table-cell>
          <table:table-cell office:value-type="float" office:value="8640000" calcext:value-type="float">
            <text:p>8640000</text:p>
          </table:table-cell>
          <table:table-cell table:formula="of:=[.B1704]/[.C1704]" office:value-type="float" office:value="0.00177395833333333" calcext:value-type="float">
            <text:p>0,00177395833333333000</text:p>
          </table:table-cell>
          <table:table-cell table:formula="of:=[.D1705]-[.D170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1704]+9" office:value-type="float" office:value="15336" calcext:value-type="float">
            <text:p>15336</text:p>
          </table:table-cell>
          <table:table-cell office:value-type="float" office:value="8640000" calcext:value-type="float">
            <text:p>8640000</text:p>
          </table:table-cell>
          <table:table-cell table:formula="of:=[.B1705]/[.C1705]" office:value-type="float" office:value="0.001775" calcext:value-type="float">
            <text:p>0,00177500000000000000</text:p>
          </table:table-cell>
          <table:table-cell table:formula="of:=[.D1706]-[.D17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B1705]+9" office:value-type="float" office:value="15345" calcext:value-type="float">
            <text:p>15345</text:p>
          </table:table-cell>
          <table:table-cell office:value-type="float" office:value="8640000" calcext:value-type="float">
            <text:p>8640000</text:p>
          </table:table-cell>
          <table:table-cell table:formula="of:=[.B1706]/[.C1706]" office:value-type="float" office:value="0.00177604166666667" calcext:value-type="float">
            <text:p>0,00177604166666667000</text:p>
          </table:table-cell>
          <table:table-cell table:formula="of:=[.D1707]-[.D170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B1706]+9" office:value-type="float" office:value="15354" calcext:value-type="float">
            <text:p>15354</text:p>
          </table:table-cell>
          <table:table-cell office:value-type="float" office:value="8640000" calcext:value-type="float">
            <text:p>8640000</text:p>
          </table:table-cell>
          <table:table-cell table:formula="of:=[.B1707]/[.C1707]" office:value-type="float" office:value="0.00177708333333333" calcext:value-type="float">
            <text:p>0,00177708333333333000</text:p>
          </table:table-cell>
          <table:table-cell table:formula="of:=[.D1708]-[.D17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B1707]+9" office:value-type="float" office:value="15363" calcext:value-type="float">
            <text:p>15363</text:p>
          </table:table-cell>
          <table:table-cell office:value-type="float" office:value="8640000" calcext:value-type="float">
            <text:p>8640000</text:p>
          </table:table-cell>
          <table:table-cell table:formula="of:=[.B1708]/[.C1708]" office:value-type="float" office:value="0.001778125" calcext:value-type="float">
            <text:p>0,00177812500000000000</text:p>
          </table:table-cell>
          <table:table-cell table:formula="of:=[.D1709]-[.D170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B1708]+9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1709]/[.C1709]" office:value-type="float" office:value="0.00177916666666667" calcext:value-type="float">
            <text:p>0,00177916666666667000</text:p>
          </table:table-cell>
          <table:table-cell table:formula="of:=[.D1710]-[.D17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B1709]+9" office:value-type="float" office:value="15381" calcext:value-type="float">
            <text:p>15381</text:p>
          </table:table-cell>
          <table:table-cell office:value-type="float" office:value="8640000" calcext:value-type="float">
            <text:p>8640000</text:p>
          </table:table-cell>
          <table:table-cell table:formula="of:=[.B1710]/[.C1710]" office:value-type="float" office:value="0.00178020833333333" calcext:value-type="float">
            <text:p>0,00178020833333333000</text:p>
          </table:table-cell>
          <table:table-cell table:formula="of:=[.D1711]-[.D171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B1710]+9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1711]/[.C1711]" office:value-type="float" office:value="0.00178125" calcext:value-type="float">
            <text:p>0,00178125000000000000</text:p>
          </table:table-cell>
          <table:table-cell table:formula="of:=[.D1712]-[.D171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B1711]+9" office:value-type="float" office:value="15399" calcext:value-type="float">
            <text:p>15399</text:p>
          </table:table-cell>
          <table:table-cell office:value-type="float" office:value="8640000" calcext:value-type="float">
            <text:p>8640000</text:p>
          </table:table-cell>
          <table:table-cell table:formula="of:=[.B1712]/[.C1712]" office:value-type="float" office:value="0.00178229166666667" calcext:value-type="float">
            <text:p>0,00178229166666667000</text:p>
          </table:table-cell>
          <table:table-cell table:formula="of:=[.D1713]-[.D171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B1712]+9" office:value-type="float" office:value="15408" calcext:value-type="float">
            <text:p>15408</text:p>
          </table:table-cell>
          <table:table-cell office:value-type="float" office:value="8640000" calcext:value-type="float">
            <text:p>8640000</text:p>
          </table:table-cell>
          <table:table-cell table:formula="of:=[.B1713]/[.C1713]" office:value-type="float" office:value="0.00178333333333333" calcext:value-type="float">
            <text:p>0,00178333333333333000</text:p>
          </table:table-cell>
          <table:table-cell table:formula="of:=[.D1714]-[.D17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B1713]+9" office:value-type="float" office:value="15417" calcext:value-type="float">
            <text:p>15417</text:p>
          </table:table-cell>
          <table:table-cell office:value-type="float" office:value="8640000" calcext:value-type="float">
            <text:p>8640000</text:p>
          </table:table-cell>
          <table:table-cell table:formula="of:=[.B1714]/[.C1714]" office:value-type="float" office:value="0.001784375" calcext:value-type="float">
            <text:p>0,00178437500000000000</text:p>
          </table:table-cell>
          <table:table-cell table:formula="of:=[.D1715]-[.D171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B1714]+9" office:value-type="float" office:value="15426" calcext:value-type="float">
            <text:p>15426</text:p>
          </table:table-cell>
          <table:table-cell office:value-type="float" office:value="8640000" calcext:value-type="float">
            <text:p>8640000</text:p>
          </table:table-cell>
          <table:table-cell table:formula="of:=[.B1715]/[.C1715]" office:value-type="float" office:value="0.00178541666666667" calcext:value-type="float">
            <text:p>0,00178541666666667000</text:p>
          </table:table-cell>
          <table:table-cell table:formula="of:=[.D1716]-[.D171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B1715]+9" office:value-type="float" office:value="15435" calcext:value-type="float">
            <text:p>15435</text:p>
          </table:table-cell>
          <table:table-cell office:value-type="float" office:value="8640000" calcext:value-type="float">
            <text:p>8640000</text:p>
          </table:table-cell>
          <table:table-cell table:formula="of:=[.B1716]/[.C1716]" office:value-type="float" office:value="0.00178645833333333" calcext:value-type="float">
            <text:p>0,00178645833333333000</text:p>
          </table:table-cell>
          <table:table-cell table:formula="of:=[.D1717]-[.D171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B1716]+9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1717]/[.C1717]" office:value-type="float" office:value="0.0017875" calcext:value-type="float">
            <text:p>0,00178750000000000000</text:p>
          </table:table-cell>
          <table:table-cell table:formula="of:=[.D1718]-[.D171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B1717]+9" office:value-type="float" office:value="15453" calcext:value-type="float">
            <text:p>15453</text:p>
          </table:table-cell>
          <table:table-cell office:value-type="float" office:value="8640000" calcext:value-type="float">
            <text:p>8640000</text:p>
          </table:table-cell>
          <table:table-cell table:formula="of:=[.B1718]/[.C1718]" office:value-type="float" office:value="0.00178854166666667" calcext:value-type="float">
            <text:p>0,00178854166666667000</text:p>
          </table:table-cell>
          <table:table-cell table:formula="of:=[.D1719]-[.D171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B1718]+9" office:value-type="float" office:value="15462" calcext:value-type="float">
            <text:p>15462</text:p>
          </table:table-cell>
          <table:table-cell office:value-type="float" office:value="8640000" calcext:value-type="float">
            <text:p>8640000</text:p>
          </table:table-cell>
          <table:table-cell table:formula="of:=[.B1719]/[.C1719]" office:value-type="float" office:value="0.00178958333333333" calcext:value-type="float">
            <text:p>0,00178958333333333000</text:p>
          </table:table-cell>
          <table:table-cell table:formula="of:=[.D1720]-[.D171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B1719]+9" office:value-type="float" office:value="15471" calcext:value-type="float">
            <text:p>15471</text:p>
          </table:table-cell>
          <table:table-cell office:value-type="float" office:value="8640000" calcext:value-type="float">
            <text:p>8640000</text:p>
          </table:table-cell>
          <table:table-cell table:formula="of:=[.B1720]/[.C1720]" office:value-type="float" office:value="0.001790625" calcext:value-type="float">
            <text:p>0,00179062500000000000</text:p>
          </table:table-cell>
          <table:table-cell table:formula="of:=[.D1721]-[.D172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B1720]+9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1721]/[.C1721]" office:value-type="float" office:value="0.00179166666666667" calcext:value-type="float">
            <text:p>0,00179166666666667000</text:p>
          </table:table-cell>
          <table:table-cell table:formula="of:=[.D1722]-[.D172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B1721]+9" office:value-type="float" office:value="15489" calcext:value-type="float">
            <text:p>15489</text:p>
          </table:table-cell>
          <table:table-cell office:value-type="float" office:value="8640000" calcext:value-type="float">
            <text:p>8640000</text:p>
          </table:table-cell>
          <table:table-cell table:formula="of:=[.B1722]/[.C1722]" office:value-type="float" office:value="0.00179270833333333" calcext:value-type="float">
            <text:p>0,00179270833333333000</text:p>
          </table:table-cell>
          <table:table-cell table:formula="of:=[.D1723]-[.D17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B1722]+9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1723]/[.C1723]" office:value-type="float" office:value="0.00179375" calcext:value-type="float">
            <text:p>0,00179375000000000000</text:p>
          </table:table-cell>
          <table:table-cell table:formula="of:=[.D1724]-[.D172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B1723]+9" office:value-type="float" office:value="15507" calcext:value-type="float">
            <text:p>15507</text:p>
          </table:table-cell>
          <table:table-cell office:value-type="float" office:value="8640000" calcext:value-type="float">
            <text:p>8640000</text:p>
          </table:table-cell>
          <table:table-cell table:formula="of:=[.B1724]/[.C1724]" office:value-type="float" office:value="0.00179479166666667" calcext:value-type="float">
            <text:p>0,00179479166666667000</text:p>
          </table:table-cell>
          <table:table-cell table:formula="of:=[.D1725]-[.D17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B1724]+9" office:value-type="float" office:value="15516" calcext:value-type="float">
            <text:p>15516</text:p>
          </table:table-cell>
          <table:table-cell office:value-type="float" office:value="8640000" calcext:value-type="float">
            <text:p>8640000</text:p>
          </table:table-cell>
          <table:table-cell table:formula="of:=[.B1725]/[.C1725]" office:value-type="float" office:value="0.00179583333333333" calcext:value-type="float">
            <text:p>0,00179583333333333000</text:p>
          </table:table-cell>
          <table:table-cell table:formula="of:=[.D1726]-[.D172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B1725]+9" office:value-type="float" office:value="15525" calcext:value-type="float">
            <text:p>15525</text:p>
          </table:table-cell>
          <table:table-cell office:value-type="float" office:value="8640000" calcext:value-type="float">
            <text:p>8640000</text:p>
          </table:table-cell>
          <table:table-cell table:formula="of:=[.B1726]/[.C1726]" office:value-type="float" office:value="0.001796875" calcext:value-type="float">
            <text:p>0,00179687500000000000</text:p>
          </table:table-cell>
          <table:table-cell table:formula="of:=[.D1727]-[.D17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B1726]+9" office:value-type="float" office:value="15534" calcext:value-type="float">
            <text:p>15534</text:p>
          </table:table-cell>
          <table:table-cell office:value-type="float" office:value="8640000" calcext:value-type="float">
            <text:p>8640000</text:p>
          </table:table-cell>
          <table:table-cell table:formula="of:=[.B1727]/[.C1727]" office:value-type="float" office:value="0.00179791666666667" calcext:value-type="float">
            <text:p>0,00179791666666667000</text:p>
          </table:table-cell>
          <table:table-cell table:formula="of:=[.D1728]-[.D172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B1727]+9" office:value-type="float" office:value="15543" calcext:value-type="float">
            <text:p>15543</text:p>
          </table:table-cell>
          <table:table-cell office:value-type="float" office:value="8640000" calcext:value-type="float">
            <text:p>8640000</text:p>
          </table:table-cell>
          <table:table-cell table:formula="of:=[.B1728]/[.C1728]" office:value-type="float" office:value="0.00179895833333333" calcext:value-type="float">
            <text:p>0,00179895833333333000</text:p>
          </table:table-cell>
          <table:table-cell table:formula="of:=[.D1729]-[.D17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B1728]+9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1729]/[.C1729]" office:value-type="float" office:value="0.0018" calcext:value-type="float">
            <text:p>0,00180000000000000000</text:p>
          </table:table-cell>
          <table:table-cell table:formula="of:=[.D1730]-[.D172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B1729]+9" office:value-type="float" office:value="15561" calcext:value-type="float">
            <text:p>15561</text:p>
          </table:table-cell>
          <table:table-cell office:value-type="float" office:value="8640000" calcext:value-type="float">
            <text:p>8640000</text:p>
          </table:table-cell>
          <table:table-cell table:formula="of:=[.B1730]/[.C1730]" office:value-type="float" office:value="0.00180104166666667" calcext:value-type="float">
            <text:p>0,00180104166666667000</text:p>
          </table:table-cell>
          <table:table-cell table:formula="of:=[.D1731]-[.D173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B1730]+9" office:value-type="float" office:value="15570" calcext:value-type="float">
            <text:p>15570</text:p>
          </table:table-cell>
          <table:table-cell office:value-type="float" office:value="8640000" calcext:value-type="float">
            <text:p>8640000</text:p>
          </table:table-cell>
          <table:table-cell table:formula="of:=[.B1731]/[.C1731]" office:value-type="float" office:value="0.00180208333333333" calcext:value-type="float">
            <text:p>0,00180208333333333000</text:p>
          </table:table-cell>
          <table:table-cell table:formula="of:=[.D1732]-[.D173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B1731]+9" office:value-type="float" office:value="15579" calcext:value-type="float">
            <text:p>15579</text:p>
          </table:table-cell>
          <table:table-cell office:value-type="float" office:value="8640000" calcext:value-type="float">
            <text:p>8640000</text:p>
          </table:table-cell>
          <table:table-cell table:formula="of:=[.B1732]/[.C1732]" office:value-type="float" office:value="0.001803125" calcext:value-type="float">
            <text:p>0,00180312500000000000</text:p>
          </table:table-cell>
          <table:table-cell table:formula="of:=[.D1733]-[.D173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B1732]+9" office:value-type="float" office:value="15588" calcext:value-type="float">
            <text:p>15588</text:p>
          </table:table-cell>
          <table:table-cell office:value-type="float" office:value="8640000" calcext:value-type="float">
            <text:p>8640000</text:p>
          </table:table-cell>
          <table:table-cell table:formula="of:=[.B1733]/[.C1733]" office:value-type="float" office:value="0.00180416666666667" calcext:value-type="float">
            <text:p>0,00180416666666667000</text:p>
          </table:table-cell>
          <table:table-cell table:formula="of:=[.D1734]-[.D173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B1733]+9" office:value-type="float" office:value="15597" calcext:value-type="float">
            <text:p>15597</text:p>
          </table:table-cell>
          <table:table-cell office:value-type="float" office:value="8640000" calcext:value-type="float">
            <text:p>8640000</text:p>
          </table:table-cell>
          <table:table-cell table:formula="of:=[.B1734]/[.C1734]" office:value-type="float" office:value="0.00180520833333333" calcext:value-type="float">
            <text:p>0,00180520833333333000</text:p>
          </table:table-cell>
          <table:table-cell table:formula="of:=[.D1735]-[.D173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B1734]+9" office:value-type="float" office:value="15606" calcext:value-type="float">
            <text:p>15606</text:p>
          </table:table-cell>
          <table:table-cell office:value-type="float" office:value="8640000" calcext:value-type="float">
            <text:p>8640000</text:p>
          </table:table-cell>
          <table:table-cell table:formula="of:=[.B1735]/[.C1735]" office:value-type="float" office:value="0.00180625" calcext:value-type="float">
            <text:p>0,00180625000000000000</text:p>
          </table:table-cell>
          <table:table-cell table:formula="of:=[.D1736]-[.D173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B1735]+9" office:value-type="float" office:value="15615" calcext:value-type="float">
            <text:p>15615</text:p>
          </table:table-cell>
          <table:table-cell office:value-type="float" office:value="8640000" calcext:value-type="float">
            <text:p>8640000</text:p>
          </table:table-cell>
          <table:table-cell table:formula="of:=[.B1736]/[.C1736]" office:value-type="float" office:value="0.00180729166666667" calcext:value-type="float">
            <text:p>0,00180729166666667000</text:p>
          </table:table-cell>
          <table:table-cell table:formula="of:=[.D1737]-[.D173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B1736]+9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1737]/[.C1737]" office:value-type="float" office:value="0.00180833333333333" calcext:value-type="float">
            <text:p>0,00180833333333333000</text:p>
          </table:table-cell>
          <table:table-cell table:formula="of:=[.D1738]-[.D173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B1737]+9" office:value-type="float" office:value="15633" calcext:value-type="float">
            <text:p>15633</text:p>
          </table:table-cell>
          <table:table-cell office:value-type="float" office:value="8640000" calcext:value-type="float">
            <text:p>8640000</text:p>
          </table:table-cell>
          <table:table-cell table:formula="of:=[.B1738]/[.C1738]" office:value-type="float" office:value="0.001809375" calcext:value-type="float">
            <text:p>0,00180937500000000000</text:p>
          </table:table-cell>
          <table:table-cell table:formula="of:=[.D1739]-[.D173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B1738]+9" office:value-type="float" office:value="15642" calcext:value-type="float">
            <text:p>15642</text:p>
          </table:table-cell>
          <table:table-cell office:value-type="float" office:value="8640000" calcext:value-type="float">
            <text:p>8640000</text:p>
          </table:table-cell>
          <table:table-cell table:formula="of:=[.B1739]/[.C1739]" office:value-type="float" office:value="0.00181041666666667" calcext:value-type="float">
            <text:p>0,00181041666666667000</text:p>
          </table:table-cell>
          <table:table-cell table:formula="of:=[.D1740]-[.D17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B1739]+9" office:value-type="float" office:value="15651" calcext:value-type="float">
            <text:p>15651</text:p>
          </table:table-cell>
          <table:table-cell office:value-type="float" office:value="8640000" calcext:value-type="float">
            <text:p>8640000</text:p>
          </table:table-cell>
          <table:table-cell table:formula="of:=[.B1740]/[.C1740]" office:value-type="float" office:value="0.00181145833333333" calcext:value-type="float">
            <text:p>0,00181145833333333000</text:p>
          </table:table-cell>
          <table:table-cell table:formula="of:=[.D1741]-[.D174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B1740]+9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1741]/[.C1741]" office:value-type="float" office:value="0.0018125" calcext:value-type="float">
            <text:p>0,00181250000000000000</text:p>
          </table:table-cell>
          <table:table-cell table:formula="of:=[.D1742]-[.D17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B1741]+9" office:value-type="float" office:value="15669" calcext:value-type="float">
            <text:p>15669</text:p>
          </table:table-cell>
          <table:table-cell office:value-type="float" office:value="8640000" calcext:value-type="float">
            <text:p>8640000</text:p>
          </table:table-cell>
          <table:table-cell table:formula="of:=[.B1742]/[.C1742]" office:value-type="float" office:value="0.00181354166666667" calcext:value-type="float">
            <text:p>0,00181354166666667000</text:p>
          </table:table-cell>
          <table:table-cell table:formula="of:=[.D1743]-[.D174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B1742]+9" office:value-type="float" office:value="15678" calcext:value-type="float">
            <text:p>15678</text:p>
          </table:table-cell>
          <table:table-cell office:value-type="float" office:value="8640000" calcext:value-type="float">
            <text:p>8640000</text:p>
          </table:table-cell>
          <table:table-cell table:formula="of:=[.B1743]/[.C1743]" office:value-type="float" office:value="0.00181458333333333" calcext:value-type="float">
            <text:p>0,00181458333333333000</text:p>
          </table:table-cell>
          <table:table-cell table:formula="of:=[.D1744]-[.D17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B1743]+9" office:value-type="float" office:value="15687" calcext:value-type="float">
            <text:p>15687</text:p>
          </table:table-cell>
          <table:table-cell office:value-type="float" office:value="8640000" calcext:value-type="float">
            <text:p>8640000</text:p>
          </table:table-cell>
          <table:table-cell table:formula="of:=[.B1744]/[.C1744]" office:value-type="float" office:value="0.001815625" calcext:value-type="float">
            <text:p>0,00181562500000000000</text:p>
          </table:table-cell>
          <table:table-cell table:formula="of:=[.D1745]-[.D174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B1744]+9" office:value-type="float" office:value="15696" calcext:value-type="float">
            <text:p>15696</text:p>
          </table:table-cell>
          <table:table-cell office:value-type="float" office:value="8640000" calcext:value-type="float">
            <text:p>8640000</text:p>
          </table:table-cell>
          <table:table-cell table:formula="of:=[.B1745]/[.C1745]" office:value-type="float" office:value="0.00181666666666667" calcext:value-type="float">
            <text:p>0,00181666666666667000</text:p>
          </table:table-cell>
          <table:table-cell table:formula="of:=[.D1746]-[.D174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B1745]+9" office:value-type="float" office:value="15705" calcext:value-type="float">
            <text:p>15705</text:p>
          </table:table-cell>
          <table:table-cell office:value-type="float" office:value="8640000" calcext:value-type="float">
            <text:p>8640000</text:p>
          </table:table-cell>
          <table:table-cell table:formula="of:=[.B1746]/[.C1746]" office:value-type="float" office:value="0.00181770833333333" calcext:value-type="float">
            <text:p>0,00181770833333333000</text:p>
          </table:table-cell>
          <table:table-cell table:formula="of:=[.D1747]-[.D174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B1746]+9" office:value-type="float" office:value="15714" calcext:value-type="float">
            <text:p>15714</text:p>
          </table:table-cell>
          <table:table-cell office:value-type="float" office:value="8640000" calcext:value-type="float">
            <text:p>8640000</text:p>
          </table:table-cell>
          <table:table-cell table:formula="of:=[.B1747]/[.C1747]" office:value-type="float" office:value="0.00181875" calcext:value-type="float">
            <text:p>0,00181875000000000000</text:p>
          </table:table-cell>
          <table:table-cell table:formula="of:=[.D1748]-[.D17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B1747]+9" office:value-type="float" office:value="15723" calcext:value-type="float">
            <text:p>15723</text:p>
          </table:table-cell>
          <table:table-cell office:value-type="float" office:value="8640000" calcext:value-type="float">
            <text:p>8640000</text:p>
          </table:table-cell>
          <table:table-cell table:formula="of:=[.B1748]/[.C1748]" office:value-type="float" office:value="0.00181979166666667" calcext:value-type="float">
            <text:p>0,00181979166666667000</text:p>
          </table:table-cell>
          <table:table-cell table:formula="of:=[.D1749]-[.D174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B1748]+9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1749]/[.C1749]" office:value-type="float" office:value="0.00182083333333333" calcext:value-type="float">
            <text:p>0,00182083333333333000</text:p>
          </table:table-cell>
          <table:table-cell table:formula="of:=[.D1750]-[.D174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B1749]+9" office:value-type="float" office:value="15741" calcext:value-type="float">
            <text:p>15741</text:p>
          </table:table-cell>
          <table:table-cell office:value-type="float" office:value="8640000" calcext:value-type="float">
            <text:p>8640000</text:p>
          </table:table-cell>
          <table:table-cell table:formula="of:=[.B1750]/[.C1750]" office:value-type="float" office:value="0.001821875" calcext:value-type="float">
            <text:p>0,00182187500000000000</text:p>
          </table:table-cell>
          <table:table-cell table:formula="of:=[.D1751]-[.D175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1750]+9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1751]/[.C1751]" office:value-type="float" office:value="0.00182291666666667" calcext:value-type="float">
            <text:p>0,00182291666666667000</text:p>
          </table:table-cell>
          <table:table-cell table:formula="of:=[.D1752]-[.D17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B1751]+9" office:value-type="float" office:value="15759" calcext:value-type="float">
            <text:p>15759</text:p>
          </table:table-cell>
          <table:table-cell office:value-type="float" office:value="8640000" calcext:value-type="float">
            <text:p>8640000</text:p>
          </table:table-cell>
          <table:table-cell table:formula="of:=[.B1752]/[.C1752]" office:value-type="float" office:value="0.00182395833333333" calcext:value-type="float">
            <text:p>0,00182395833333333000</text:p>
          </table:table-cell>
          <table:table-cell table:formula="of:=[.D1753]-[.D175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B1752]+9" office:value-type="float" office:value="15768" calcext:value-type="float">
            <text:p>15768</text:p>
          </table:table-cell>
          <table:table-cell office:value-type="float" office:value="8640000" calcext:value-type="float">
            <text:p>8640000</text:p>
          </table:table-cell>
          <table:table-cell table:formula="of:=[.B1753]/[.C1753]" office:value-type="float" office:value="0.001825" calcext:value-type="float">
            <text:p>0,00182500000000000000</text:p>
          </table:table-cell>
          <table:table-cell table:formula="of:=[.D1754]-[.D175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B1753]+9" office:value-type="float" office:value="15777" calcext:value-type="float">
            <text:p>15777</text:p>
          </table:table-cell>
          <table:table-cell office:value-type="float" office:value="8640000" calcext:value-type="float">
            <text:p>8640000</text:p>
          </table:table-cell>
          <table:table-cell table:formula="of:=[.B1754]/[.C1754]" office:value-type="float" office:value="0.00182604166666667" calcext:value-type="float">
            <text:p>0,00182604166666667000</text:p>
          </table:table-cell>
          <table:table-cell table:formula="of:=[.D1755]-[.D175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B1754]+9" office:value-type="float" office:value="15786" calcext:value-type="float">
            <text:p>15786</text:p>
          </table:table-cell>
          <table:table-cell office:value-type="float" office:value="8640000" calcext:value-type="float">
            <text:p>8640000</text:p>
          </table:table-cell>
          <table:table-cell table:formula="of:=[.B1755]/[.C1755]" office:value-type="float" office:value="0.00182708333333333" calcext:value-type="float">
            <text:p>0,00182708333333333000</text:p>
          </table:table-cell>
          <table:table-cell table:formula="of:=[.D1756]-[.D175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B1755]+9" office:value-type="float" office:value="15795" calcext:value-type="float">
            <text:p>15795</text:p>
          </table:table-cell>
          <table:table-cell office:value-type="float" office:value="8640000" calcext:value-type="float">
            <text:p>8640000</text:p>
          </table:table-cell>
          <table:table-cell table:formula="of:=[.B1756]/[.C1756]" office:value-type="float" office:value="0.001828125" calcext:value-type="float">
            <text:p>0,00182812500000000000</text:p>
          </table:table-cell>
          <table:table-cell table:formula="of:=[.D1757]-[.D17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B1756]+9" office:value-type="float" office:value="15804" calcext:value-type="float">
            <text:p>15804</text:p>
          </table:table-cell>
          <table:table-cell office:value-type="float" office:value="8640000" calcext:value-type="float">
            <text:p>8640000</text:p>
          </table:table-cell>
          <table:table-cell table:formula="of:=[.B1757]/[.C1757]" office:value-type="float" office:value="0.00182916666666667" calcext:value-type="float">
            <text:p>0,00182916666666667000</text:p>
          </table:table-cell>
          <table:table-cell table:formula="of:=[.D1758]-[.D175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B1757]+9" office:value-type="float" office:value="15813" calcext:value-type="float">
            <text:p>15813</text:p>
          </table:table-cell>
          <table:table-cell office:value-type="float" office:value="8640000" calcext:value-type="float">
            <text:p>8640000</text:p>
          </table:table-cell>
          <table:table-cell table:formula="of:=[.B1758]/[.C1758]" office:value-type="float" office:value="0.00183020833333333" calcext:value-type="float">
            <text:p>0,00183020833333333000</text:p>
          </table:table-cell>
          <table:table-cell table:formula="of:=[.D1759]-[.D17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B1758]+9" office:value-type="float" office:value="15822" calcext:value-type="float">
            <text:p>15822</text:p>
          </table:table-cell>
          <table:table-cell office:value-type="float" office:value="8640000" calcext:value-type="float">
            <text:p>8640000</text:p>
          </table:table-cell>
          <table:table-cell table:formula="of:=[.B1759]/[.C1759]" office:value-type="float" office:value="0.00183125" calcext:value-type="float">
            <text:p>0,00183125000000000000</text:p>
          </table:table-cell>
          <table:table-cell table:formula="of:=[.D1760]-[.D175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B1759]+9" office:value-type="float" office:value="15831" calcext:value-type="float">
            <text:p>15831</text:p>
          </table:table-cell>
          <table:table-cell office:value-type="float" office:value="8640000" calcext:value-type="float">
            <text:p>8640000</text:p>
          </table:table-cell>
          <table:table-cell table:formula="of:=[.B1760]/[.C1760]" office:value-type="float" office:value="0.00183229166666667" calcext:value-type="float">
            <text:p>0,00183229166666667000</text:p>
          </table:table-cell>
          <table:table-cell table:formula="of:=[.D1761]-[.D17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B1760]+9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761]/[.C1761]" office:value-type="float" office:value="0.00183333333333333" calcext:value-type="float">
            <text:p>0,00183333333333333000</text:p>
          </table:table-cell>
          <table:table-cell table:formula="of:=[.D1762]-[.D176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B1761]+9" office:value-type="float" office:value="15849" calcext:value-type="float">
            <text:p>15849</text:p>
          </table:table-cell>
          <table:table-cell office:value-type="float" office:value="8640000" calcext:value-type="float">
            <text:p>8640000</text:p>
          </table:table-cell>
          <table:table-cell table:formula="of:=[.B1762]/[.C1762]" office:value-type="float" office:value="0.001834375" calcext:value-type="float">
            <text:p>0,00183437500000000000</text:p>
          </table:table-cell>
          <table:table-cell table:formula="of:=[.D1763]-[.D17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B1762]+9" office:value-type="float" office:value="15858" calcext:value-type="float">
            <text:p>15858</text:p>
          </table:table-cell>
          <table:table-cell office:value-type="float" office:value="8640000" calcext:value-type="float">
            <text:p>8640000</text:p>
          </table:table-cell>
          <table:table-cell table:formula="of:=[.B1763]/[.C1763]" office:value-type="float" office:value="0.00183541666666667" calcext:value-type="float">
            <text:p>0,00183541666666667000</text:p>
          </table:table-cell>
          <table:table-cell table:formula="of:=[.D1764]-[.D176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B1763]+9" office:value-type="float" office:value="15867" calcext:value-type="float">
            <text:p>15867</text:p>
          </table:table-cell>
          <table:table-cell office:value-type="float" office:value="8640000" calcext:value-type="float">
            <text:p>8640000</text:p>
          </table:table-cell>
          <table:table-cell table:formula="of:=[.B1764]/[.C1764]" office:value-type="float" office:value="0.00183645833333333" calcext:value-type="float">
            <text:p>0,00183645833333333000</text:p>
          </table:table-cell>
          <table:table-cell table:formula="of:=[.D1765]-[.D176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B1764]+9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1765]/[.C1765]" office:value-type="float" office:value="0.0018375" calcext:value-type="float">
            <text:p>0,00183750000000000000</text:p>
          </table:table-cell>
          <table:table-cell table:formula="of:=[.D1766]-[.D176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B1765]+9" office:value-type="float" office:value="15885" calcext:value-type="float">
            <text:p>15885</text:p>
          </table:table-cell>
          <table:table-cell office:value-type="float" office:value="8640000" calcext:value-type="float">
            <text:p>8640000</text:p>
          </table:table-cell>
          <table:table-cell table:formula="of:=[.B1766]/[.C1766]" office:value-type="float" office:value="0.00183854166666667" calcext:value-type="float">
            <text:p>0,00183854166666667000</text:p>
          </table:table-cell>
          <table:table-cell table:formula="of:=[.D1767]-[.D17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B1766]+9" office:value-type="float" office:value="15894" calcext:value-type="float">
            <text:p>15894</text:p>
          </table:table-cell>
          <table:table-cell office:value-type="float" office:value="8640000" calcext:value-type="float">
            <text:p>8640000</text:p>
          </table:table-cell>
          <table:table-cell table:formula="of:=[.B1767]/[.C1767]" office:value-type="float" office:value="0.00183958333333333" calcext:value-type="float">
            <text:p>0,00183958333333333000</text:p>
          </table:table-cell>
          <table:table-cell table:formula="of:=[.D1768]-[.D176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B1767]+9" office:value-type="float" office:value="15903" calcext:value-type="float">
            <text:p>15903</text:p>
          </table:table-cell>
          <table:table-cell office:value-type="float" office:value="8640000" calcext:value-type="float">
            <text:p>8640000</text:p>
          </table:table-cell>
          <table:table-cell table:formula="of:=[.B1768]/[.C1768]" office:value-type="float" office:value="0.001840625" calcext:value-type="float">
            <text:p>0,00184062500000000000</text:p>
          </table:table-cell>
          <table:table-cell table:formula="of:=[.D1769]-[.D176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B1768]+9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1769]/[.C1769]" office:value-type="float" office:value="0.00184166666666667" calcext:value-type="float">
            <text:p>0,00184166666666667000</text:p>
          </table:table-cell>
          <table:table-cell table:formula="of:=[.D1770]-[.D176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B1769]+9" office:value-type="float" office:value="15921" calcext:value-type="float">
            <text:p>15921</text:p>
          </table:table-cell>
          <table:table-cell office:value-type="float" office:value="8640000" calcext:value-type="float">
            <text:p>8640000</text:p>
          </table:table-cell>
          <table:table-cell table:formula="of:=[.B1770]/[.C1770]" office:value-type="float" office:value="0.00184270833333333" calcext:value-type="float">
            <text:p>0,00184270833333333000</text:p>
          </table:table-cell>
          <table:table-cell table:formula="of:=[.D1771]-[.D177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B1770]+9" office:value-type="float" office:value="15930" calcext:value-type="float">
            <text:p>15930</text:p>
          </table:table-cell>
          <table:table-cell office:value-type="float" office:value="8640000" calcext:value-type="float">
            <text:p>8640000</text:p>
          </table:table-cell>
          <table:table-cell table:formula="of:=[.B1771]/[.C1771]" office:value-type="float" office:value="0.00184375" calcext:value-type="float">
            <text:p>0,00184375000000000000</text:p>
          </table:table-cell>
          <table:table-cell table:formula="of:=[.D1772]-[.D177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B1771]+9" office:value-type="float" office:value="15939" calcext:value-type="float">
            <text:p>15939</text:p>
          </table:table-cell>
          <table:table-cell office:value-type="float" office:value="8640000" calcext:value-type="float">
            <text:p>8640000</text:p>
          </table:table-cell>
          <table:table-cell table:formula="of:=[.B1772]/[.C1772]" office:value-type="float" office:value="0.00184479166666667" calcext:value-type="float">
            <text:p>0,00184479166666667000</text:p>
          </table:table-cell>
          <table:table-cell table:formula="of:=[.D1773]-[.D177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B1772]+9" office:value-type="float" office:value="15948" calcext:value-type="float">
            <text:p>15948</text:p>
          </table:table-cell>
          <table:table-cell office:value-type="float" office:value="8640000" calcext:value-type="float">
            <text:p>8640000</text:p>
          </table:table-cell>
          <table:table-cell table:formula="of:=[.B1773]/[.C1773]" office:value-type="float" office:value="0.00184583333333333" calcext:value-type="float">
            <text:p>0,00184583333333333000</text:p>
          </table:table-cell>
          <table:table-cell table:formula="of:=[.D1774]-[.D177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1773]+9" office:value-type="float" office:value="15957" calcext:value-type="float">
            <text:p>15957</text:p>
          </table:table-cell>
          <table:table-cell office:value-type="float" office:value="8640000" calcext:value-type="float">
            <text:p>8640000</text:p>
          </table:table-cell>
          <table:table-cell table:formula="of:=[.B1774]/[.C1774]" office:value-type="float" office:value="0.001846875" calcext:value-type="float">
            <text:p>0,00184687500000000000</text:p>
          </table:table-cell>
          <table:table-cell table:formula="of:=[.D1775]-[.D177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B1774]+9" office:value-type="float" office:value="15966" calcext:value-type="float">
            <text:p>15966</text:p>
          </table:table-cell>
          <table:table-cell office:value-type="float" office:value="8640000" calcext:value-type="float">
            <text:p>8640000</text:p>
          </table:table-cell>
          <table:table-cell table:formula="of:=[.B1775]/[.C1775]" office:value-type="float" office:value="0.00184791666666667" calcext:value-type="float">
            <text:p>0,00184791666666667000</text:p>
          </table:table-cell>
          <table:table-cell table:formula="of:=[.D1776]-[.D17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B1775]+9" office:value-type="float" office:value="15975" calcext:value-type="float">
            <text:p>15975</text:p>
          </table:table-cell>
          <table:table-cell office:value-type="float" office:value="8640000" calcext:value-type="float">
            <text:p>8640000</text:p>
          </table:table-cell>
          <table:table-cell table:formula="of:=[.B1776]/[.C1776]" office:value-type="float" office:value="0.00184895833333333" calcext:value-type="float">
            <text:p>0,00184895833333333000</text:p>
          </table:table-cell>
          <table:table-cell table:formula="of:=[.D1777]-[.D177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B1776]+9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1777]/[.C1777]" office:value-type="float" office:value="0.00185" calcext:value-type="float">
            <text:p>0,00185000000000000000</text:p>
          </table:table-cell>
          <table:table-cell table:formula="of:=[.D1778]-[.D177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B1777]+9" office:value-type="float" office:value="15993" calcext:value-type="float">
            <text:p>15993</text:p>
          </table:table-cell>
          <table:table-cell office:value-type="float" office:value="8640000" calcext:value-type="float">
            <text:p>8640000</text:p>
          </table:table-cell>
          <table:table-cell table:formula="of:=[.B1778]/[.C1778]" office:value-type="float" office:value="0.00185104166666667" calcext:value-type="float">
            <text:p>0,00185104166666667000</text:p>
          </table:table-cell>
          <table:table-cell table:formula="of:=[.D1779]-[.D177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B1778]+9" office:value-type="float" office:value="16002" calcext:value-type="float">
            <text:p>16002</text:p>
          </table:table-cell>
          <table:table-cell office:value-type="float" office:value="8640000" calcext:value-type="float">
            <text:p>8640000</text:p>
          </table:table-cell>
          <table:table-cell table:formula="of:=[.B1779]/[.C1779]" office:value-type="float" office:value="0.00185208333333333" calcext:value-type="float">
            <text:p>0,00185208333333333000</text:p>
          </table:table-cell>
          <table:table-cell table:formula="of:=[.D1780]-[.D17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B1779]+9" office:value-type="float" office:value="16011" calcext:value-type="float">
            <text:p>16011</text:p>
          </table:table-cell>
          <table:table-cell office:value-type="float" office:value="8640000" calcext:value-type="float">
            <text:p>8640000</text:p>
          </table:table-cell>
          <table:table-cell table:formula="of:=[.B1780]/[.C1780]" office:value-type="float" office:value="0.001853125" calcext:value-type="float">
            <text:p>0,00185312500000000000</text:p>
          </table:table-cell>
          <table:table-cell table:formula="of:=[.D1781]-[.D178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B1780]+9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1781]/[.C1781]" office:value-type="float" office:value="0.00185416666666667" calcext:value-type="float">
            <text:p>0,00185416666666667000</text:p>
          </table:table-cell>
          <table:table-cell table:formula="of:=[.D1782]-[.D178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1781]+9" office:value-type="float" office:value="16029" calcext:value-type="float">
            <text:p>16029</text:p>
          </table:table-cell>
          <table:table-cell office:value-type="float" office:value="8640000" calcext:value-type="float">
            <text:p>8640000</text:p>
          </table:table-cell>
          <table:table-cell table:formula="of:=[.B1782]/[.C1782]" office:value-type="float" office:value="0.00185520833333333" calcext:value-type="float">
            <text:p>0,00185520833333333000</text:p>
          </table:table-cell>
          <table:table-cell table:formula="of:=[.D1783]-[.D178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B1782]+9" office:value-type="float" office:value="16038" calcext:value-type="float">
            <text:p>16038</text:p>
          </table:table-cell>
          <table:table-cell office:value-type="float" office:value="8640000" calcext:value-type="float">
            <text:p>8640000</text:p>
          </table:table-cell>
          <table:table-cell table:formula="of:=[.B1783]/[.C1783]" office:value-type="float" office:value="0.00185625" calcext:value-type="float">
            <text:p>0,00185625000000000000</text:p>
          </table:table-cell>
          <table:table-cell table:formula="of:=[.D1784]-[.D178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B1783]+9" office:value-type="float" office:value="16047" calcext:value-type="float">
            <text:p>16047</text:p>
          </table:table-cell>
          <table:table-cell office:value-type="float" office:value="8640000" calcext:value-type="float">
            <text:p>8640000</text:p>
          </table:table-cell>
          <table:table-cell table:formula="of:=[.B1784]/[.C1784]" office:value-type="float" office:value="0.00185729166666667" calcext:value-type="float">
            <text:p>0,00185729166666667000</text:p>
          </table:table-cell>
          <table:table-cell table:formula="of:=[.D1785]-[.D178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B1784]+9" office:value-type="float" office:value="16056" calcext:value-type="float">
            <text:p>16056</text:p>
          </table:table-cell>
          <table:table-cell office:value-type="float" office:value="8640000" calcext:value-type="float">
            <text:p>8640000</text:p>
          </table:table-cell>
          <table:table-cell table:formula="of:=[.B1785]/[.C1785]" office:value-type="float" office:value="0.00185833333333333" calcext:value-type="float">
            <text:p>0,00185833333333333000</text:p>
          </table:table-cell>
          <table:table-cell table:formula="of:=[.D1786]-[.D178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B1785]+9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1786]/[.C1786]" office:value-type="float" office:value="0.001859375" calcext:value-type="float">
            <text:p>0,00185937500000000000</text:p>
          </table:table-cell>
          <table:table-cell table:formula="of:=[.D1787]-[.D178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B1786]+9" office:value-type="float" office:value="16074" calcext:value-type="float">
            <text:p>16074</text:p>
          </table:table-cell>
          <table:table-cell office:value-type="float" office:value="8640000" calcext:value-type="float">
            <text:p>8640000</text:p>
          </table:table-cell>
          <table:table-cell table:formula="of:=[.B1787]/[.C1787]" office:value-type="float" office:value="0.00186041666666667" calcext:value-type="float">
            <text:p>0,00186041666666667000</text:p>
          </table:table-cell>
          <table:table-cell table:formula="of:=[.D1788]-[.D178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B1787]+9" office:value-type="float" office:value="16083" calcext:value-type="float">
            <text:p>16083</text:p>
          </table:table-cell>
          <table:table-cell office:value-type="float" office:value="8640000" calcext:value-type="float">
            <text:p>8640000</text:p>
          </table:table-cell>
          <table:table-cell table:formula="of:=[.B1788]/[.C1788]" office:value-type="float" office:value="0.00186145833333333" calcext:value-type="float">
            <text:p>0,00186145833333333000</text:p>
          </table:table-cell>
          <table:table-cell table:formula="of:=[.D1789]-[.D178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B1788]+9" office:value-type="float" office:value="16092" calcext:value-type="float">
            <text:p>16092</text:p>
          </table:table-cell>
          <table:table-cell office:value-type="float" office:value="8640000" calcext:value-type="float">
            <text:p>8640000</text:p>
          </table:table-cell>
          <table:table-cell table:formula="of:=[.B1789]/[.C1789]" office:value-type="float" office:value="0.0018625" calcext:value-type="float">
            <text:p>0,00186250000000000000</text:p>
          </table:table-cell>
          <table:table-cell table:formula="of:=[.D1790]-[.D178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B1789]+9" office:value-type="float" office:value="16101" calcext:value-type="float">
            <text:p>16101</text:p>
          </table:table-cell>
          <table:table-cell office:value-type="float" office:value="8640000" calcext:value-type="float">
            <text:p>8640000</text:p>
          </table:table-cell>
          <table:table-cell table:formula="of:=[.B1790]/[.C1790]" office:value-type="float" office:value="0.00186354166666667" calcext:value-type="float">
            <text:p>0,00186354166666667000</text:p>
          </table:table-cell>
          <table:table-cell table:formula="of:=[.D1791]-[.D17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B1790]+9" office:value-type="float" office:value="16110" calcext:value-type="float">
            <text:p>16110</text:p>
          </table:table-cell>
          <table:table-cell office:value-type="float" office:value="8640000" calcext:value-type="float">
            <text:p>8640000</text:p>
          </table:table-cell>
          <table:table-cell table:formula="of:=[.B1791]/[.C1791]" office:value-type="float" office:value="0.00186458333333333" calcext:value-type="float">
            <text:p>0,00186458333333333000</text:p>
          </table:table-cell>
          <table:table-cell table:formula="of:=[.D1792]-[.D179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B1791]+9" office:value-type="float" office:value="16119" calcext:value-type="float">
            <text:p>16119</text:p>
          </table:table-cell>
          <table:table-cell office:value-type="float" office:value="8640000" calcext:value-type="float">
            <text:p>8640000</text:p>
          </table:table-cell>
          <table:table-cell table:formula="of:=[.B1792]/[.C1792]" office:value-type="float" office:value="0.001865625" calcext:value-type="float">
            <text:p>0,00186562500000000000</text:p>
          </table:table-cell>
          <table:table-cell table:formula="of:=[.D1793]-[.D17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B1792]+9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1793]/[.C1793]" office:value-type="float" office:value="0.00186666666666667" calcext:value-type="float">
            <text:p>0,00186666666666667000</text:p>
          </table:table-cell>
          <table:table-cell table:formula="of:=[.D1794]-[.D179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B1793]+9" office:value-type="float" office:value="16137" calcext:value-type="float">
            <text:p>16137</text:p>
          </table:table-cell>
          <table:table-cell office:value-type="float" office:value="8640000" calcext:value-type="float">
            <text:p>8640000</text:p>
          </table:table-cell>
          <table:table-cell table:formula="of:=[.B1794]/[.C1794]" office:value-type="float" office:value="0.00186770833333333" calcext:value-type="float">
            <text:p>0,00186770833333333000</text:p>
          </table:table-cell>
          <table:table-cell table:formula="of:=[.D1795]-[.D17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B1794]+9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1795]/[.C1795]" office:value-type="float" office:value="0.00186875" calcext:value-type="float">
            <text:p>0,00186875000000000000</text:p>
          </table:table-cell>
          <table:table-cell table:formula="of:=[.D1796]-[.D179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B1795]+9" office:value-type="float" office:value="16155" calcext:value-type="float">
            <text:p>16155</text:p>
          </table:table-cell>
          <table:table-cell office:value-type="float" office:value="8640000" calcext:value-type="float">
            <text:p>8640000</text:p>
          </table:table-cell>
          <table:table-cell table:formula="of:=[.B1796]/[.C1796]" office:value-type="float" office:value="0.00186979166666667" calcext:value-type="float">
            <text:p>0,00186979166666667000</text:p>
          </table:table-cell>
          <table:table-cell table:formula="of:=[.D1797]-[.D179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B1796]+9" office:value-type="float" office:value="16164" calcext:value-type="float">
            <text:p>16164</text:p>
          </table:table-cell>
          <table:table-cell office:value-type="float" office:value="8640000" calcext:value-type="float">
            <text:p>8640000</text:p>
          </table:table-cell>
          <table:table-cell table:formula="of:=[.B1797]/[.C1797]" office:value-type="float" office:value="0.00187083333333333" calcext:value-type="float">
            <text:p>0,00187083333333333000</text:p>
          </table:table-cell>
          <table:table-cell table:formula="of:=[.D1798]-[.D179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B1797]+9" office:value-type="float" office:value="16173" calcext:value-type="float">
            <text:p>16173</text:p>
          </table:table-cell>
          <table:table-cell office:value-type="float" office:value="8640000" calcext:value-type="float">
            <text:p>8640000</text:p>
          </table:table-cell>
          <table:table-cell table:formula="of:=[.B1798]/[.C1798]" office:value-type="float" office:value="0.001871875" calcext:value-type="float">
            <text:p>0,00187187500000000000</text:p>
          </table:table-cell>
          <table:table-cell table:formula="of:=[.D1799]-[.D179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B1798]+9" office:value-type="float" office:value="16182" calcext:value-type="float">
            <text:p>16182</text:p>
          </table:table-cell>
          <table:table-cell office:value-type="float" office:value="8640000" calcext:value-type="float">
            <text:p>8640000</text:p>
          </table:table-cell>
          <table:table-cell table:formula="of:=[.B1799]/[.C1799]" office:value-type="float" office:value="0.00187291666666667" calcext:value-type="float">
            <text:p>0,00187291666666667000</text:p>
          </table:table-cell>
          <table:table-cell table:formula="of:=[.D1800]-[.D179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1799]+9" office:value-type="float" office:value="16191" calcext:value-type="float">
            <text:p>16191</text:p>
          </table:table-cell>
          <table:table-cell office:value-type="float" office:value="8640000" calcext:value-type="float">
            <text:p>8640000</text:p>
          </table:table-cell>
          <table:table-cell table:formula="of:=[.B1800]/[.C1800]" office:value-type="float" office:value="0.00187395833333333" calcext:value-type="float">
            <text:p>0,00187395833333333000</text:p>
          </table:table-cell>
          <table:table-cell table:formula="of:=[.D1801]-[.D180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1800]+9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1801]/[.C1801]" office:value-type="float" office:value="0.001875" calcext:value-type="float">
            <text:p>0,00187500000000000000</text:p>
          </table:table-cell>
          <table:table-cell table:formula="of:=[.D1802]-[.D180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B1801]+9" office:value-type="float" office:value="16209" calcext:value-type="float">
            <text:p>16209</text:p>
          </table:table-cell>
          <table:table-cell office:value-type="float" office:value="8640000" calcext:value-type="float">
            <text:p>8640000</text:p>
          </table:table-cell>
          <table:table-cell table:formula="of:=[.B1802]/[.C1802]" office:value-type="float" office:value="0.00187604166666667" calcext:value-type="float">
            <text:p>0,00187604166666667000</text:p>
          </table:table-cell>
          <table:table-cell table:formula="of:=[.D1803]-[.D180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B1802]+9" office:value-type="float" office:value="16218" calcext:value-type="float">
            <text:p>16218</text:p>
          </table:table-cell>
          <table:table-cell office:value-type="float" office:value="8640000" calcext:value-type="float">
            <text:p>8640000</text:p>
          </table:table-cell>
          <table:table-cell table:formula="of:=[.B1803]/[.C1803]" office:value-type="float" office:value="0.00187708333333333" calcext:value-type="float">
            <text:p>0,00187708333333333000</text:p>
          </table:table-cell>
          <table:table-cell table:formula="of:=[.D1804]-[.D180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B1803]+9" office:value-type="float" office:value="16227" calcext:value-type="float">
            <text:p>16227</text:p>
          </table:table-cell>
          <table:table-cell office:value-type="float" office:value="8640000" calcext:value-type="float">
            <text:p>8640000</text:p>
          </table:table-cell>
          <table:table-cell table:formula="of:=[.B1804]/[.C1804]" office:value-type="float" office:value="0.001878125" calcext:value-type="float">
            <text:p>0,00187812500000000000</text:p>
          </table:table-cell>
          <table:table-cell table:formula="of:=[.D1805]-[.D180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B1804]+9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1805]/[.C1805]" office:value-type="float" office:value="0.00187916666666667" calcext:value-type="float">
            <text:p>0,00187916666666667000</text:p>
          </table:table-cell>
          <table:table-cell table:formula="of:=[.D1806]-[.D180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B1805]+9" office:value-type="float" office:value="16245" calcext:value-type="float">
            <text:p>16245</text:p>
          </table:table-cell>
          <table:table-cell office:value-type="float" office:value="8640000" calcext:value-type="float">
            <text:p>8640000</text:p>
          </table:table-cell>
          <table:table-cell table:formula="of:=[.B1806]/[.C1806]" office:value-type="float" office:value="0.00188020833333333" calcext:value-type="float">
            <text:p>0,00188020833333333000</text:p>
          </table:table-cell>
          <table:table-cell table:formula="of:=[.D1807]-[.D180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B1806]+9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1807]/[.C1807]" office:value-type="float" office:value="0.00188125" calcext:value-type="float">
            <text:p>0,00188125000000000000</text:p>
          </table:table-cell>
          <table:table-cell table:formula="of:=[.D1808]-[.D180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B1807]+9" office:value-type="float" office:value="16263" calcext:value-type="float">
            <text:p>16263</text:p>
          </table:table-cell>
          <table:table-cell office:value-type="float" office:value="8640000" calcext:value-type="float">
            <text:p>8640000</text:p>
          </table:table-cell>
          <table:table-cell table:formula="of:=[.B1808]/[.C1808]" office:value-type="float" office:value="0.00188229166666667" calcext:value-type="float">
            <text:p>0,00188229166666667000</text:p>
          </table:table-cell>
          <table:table-cell table:formula="of:=[.D1809]-[.D180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B1808]+9" office:value-type="float" office:value="16272" calcext:value-type="float">
            <text:p>16272</text:p>
          </table:table-cell>
          <table:table-cell office:value-type="float" office:value="8640000" calcext:value-type="float">
            <text:p>8640000</text:p>
          </table:table-cell>
          <table:table-cell table:formula="of:=[.B1809]/[.C1809]" office:value-type="float" office:value="0.00188333333333333" calcext:value-type="float">
            <text:p>0,00188333333333333000</text:p>
          </table:table-cell>
          <table:table-cell table:formula="of:=[.D1810]-[.D18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B1809]+9" office:value-type="float" office:value="16281" calcext:value-type="float">
            <text:p>16281</text:p>
          </table:table-cell>
          <table:table-cell office:value-type="float" office:value="8640000" calcext:value-type="float">
            <text:p>8640000</text:p>
          </table:table-cell>
          <table:table-cell table:formula="of:=[.B1810]/[.C1810]" office:value-type="float" office:value="0.001884375" calcext:value-type="float">
            <text:p>0,00188437500000000000</text:p>
          </table:table-cell>
          <table:table-cell table:formula="of:=[.D1811]-[.D181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B1810]+9" office:value-type="float" office:value="16290" calcext:value-type="float">
            <text:p>16290</text:p>
          </table:table-cell>
          <table:table-cell office:value-type="float" office:value="8640000" calcext:value-type="float">
            <text:p>8640000</text:p>
          </table:table-cell>
          <table:table-cell table:formula="of:=[.B1811]/[.C1811]" office:value-type="float" office:value="0.00188541666666667" calcext:value-type="float">
            <text:p>0,00188541666666667000</text:p>
          </table:table-cell>
          <table:table-cell table:formula="of:=[.D1812]-[.D181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B1811]+9" office:value-type="float" office:value="16299" calcext:value-type="float">
            <text:p>16299</text:p>
          </table:table-cell>
          <table:table-cell office:value-type="float" office:value="8640000" calcext:value-type="float">
            <text:p>8640000</text:p>
          </table:table-cell>
          <table:table-cell table:formula="of:=[.B1812]/[.C1812]" office:value-type="float" office:value="0.00188645833333333" calcext:value-type="float">
            <text:p>0,00188645833333333000</text:p>
          </table:table-cell>
          <table:table-cell table:formula="of:=[.D1813]-[.D181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B1812]+9" office:value-type="float" office:value="16308" calcext:value-type="float">
            <text:p>16308</text:p>
          </table:table-cell>
          <table:table-cell office:value-type="float" office:value="8640000" calcext:value-type="float">
            <text:p>8640000</text:p>
          </table:table-cell>
          <table:table-cell table:formula="of:=[.B1813]/[.C1813]" office:value-type="float" office:value="0.0018875" calcext:value-type="float">
            <text:p>0,00188750000000000000</text:p>
          </table:table-cell>
          <table:table-cell table:formula="of:=[.D1814]-[.D18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B1813]+9" office:value-type="float" office:value="16317" calcext:value-type="float">
            <text:p>16317</text:p>
          </table:table-cell>
          <table:table-cell office:value-type="float" office:value="8640000" calcext:value-type="float">
            <text:p>8640000</text:p>
          </table:table-cell>
          <table:table-cell table:formula="of:=[.B1814]/[.C1814]" office:value-type="float" office:value="0.00188854166666667" calcext:value-type="float">
            <text:p>0,00188854166666667000</text:p>
          </table:table-cell>
          <table:table-cell table:formula="of:=[.D1815]-[.D181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B1814]+9" office:value-type="float" office:value="16326" calcext:value-type="float">
            <text:p>16326</text:p>
          </table:table-cell>
          <table:table-cell office:value-type="float" office:value="8640000" calcext:value-type="float">
            <text:p>8640000</text:p>
          </table:table-cell>
          <table:table-cell table:formula="of:=[.B1815]/[.C1815]" office:value-type="float" office:value="0.00188958333333333" calcext:value-type="float">
            <text:p>0,00188958333333333000</text:p>
          </table:table-cell>
          <table:table-cell table:formula="of:=[.D1816]-[.D181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B1815]+9" office:value-type="float" office:value="16335" calcext:value-type="float">
            <text:p>16335</text:p>
          </table:table-cell>
          <table:table-cell office:value-type="float" office:value="8640000" calcext:value-type="float">
            <text:p>8640000</text:p>
          </table:table-cell>
          <table:table-cell table:formula="of:=[.B1816]/[.C1816]" office:value-type="float" office:value="0.001890625" calcext:value-type="float">
            <text:p>0,00189062500000000000</text:p>
          </table:table-cell>
          <table:table-cell table:formula="of:=[.D1817]-[.D181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B1816]+9" office:value-type="float" office:value="16344" calcext:value-type="float">
            <text:p>16344</text:p>
          </table:table-cell>
          <table:table-cell office:value-type="float" office:value="8640000" calcext:value-type="float">
            <text:p>8640000</text:p>
          </table:table-cell>
          <table:table-cell table:formula="of:=[.B1817]/[.C1817]" office:value-type="float" office:value="0.00189166666666667" calcext:value-type="float">
            <text:p>0,00189166666666667000</text:p>
          </table:table-cell>
          <table:table-cell table:formula="of:=[.D1818]-[.D181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B1817]+9" office:value-type="float" office:value="16353" calcext:value-type="float">
            <text:p>16353</text:p>
          </table:table-cell>
          <table:table-cell office:value-type="float" office:value="8640000" calcext:value-type="float">
            <text:p>8640000</text:p>
          </table:table-cell>
          <table:table-cell table:formula="of:=[.B1818]/[.C1818]" office:value-type="float" office:value="0.00189270833333333" calcext:value-type="float">
            <text:p>0,00189270833333333000</text:p>
          </table:table-cell>
          <table:table-cell table:formula="of:=[.D1819]-[.D181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B1818]+9" office:value-type="float" office:value="16362" calcext:value-type="float">
            <text:p>16362</text:p>
          </table:table-cell>
          <table:table-cell office:value-type="float" office:value="8640000" calcext:value-type="float">
            <text:p>8640000</text:p>
          </table:table-cell>
          <table:table-cell table:formula="of:=[.B1819]/[.C1819]" office:value-type="float" office:value="0.00189375" calcext:value-type="float">
            <text:p>0,00189375000000000000</text:p>
          </table:table-cell>
          <table:table-cell table:formula="of:=[.D1820]-[.D181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B1819]+9" office:value-type="float" office:value="16371" calcext:value-type="float">
            <text:p>16371</text:p>
          </table:table-cell>
          <table:table-cell office:value-type="float" office:value="8640000" calcext:value-type="float">
            <text:p>8640000</text:p>
          </table:table-cell>
          <table:table-cell table:formula="of:=[.B1820]/[.C1820]" office:value-type="float" office:value="0.00189479166666667" calcext:value-type="float">
            <text:p>0,00189479166666667000</text:p>
          </table:table-cell>
          <table:table-cell table:formula="of:=[.D1821]-[.D182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B1820]+9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1821]/[.C1821]" office:value-type="float" office:value="0.00189583333333333" calcext:value-type="float">
            <text:p>0,00189583333333333000</text:p>
          </table:table-cell>
          <table:table-cell table:formula="of:=[.D1822]-[.D182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B1821]+9" office:value-type="float" office:value="16389" calcext:value-type="float">
            <text:p>16389</text:p>
          </table:table-cell>
          <table:table-cell office:value-type="float" office:value="8640000" calcext:value-type="float">
            <text:p>8640000</text:p>
          </table:table-cell>
          <table:table-cell table:formula="of:=[.B1822]/[.C1822]" office:value-type="float" office:value="0.001896875" calcext:value-type="float">
            <text:p>0,00189687500000000000</text:p>
          </table:table-cell>
          <table:table-cell table:formula="of:=[.D1823]-[.D182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B1822]+9" office:value-type="float" office:value="16398" calcext:value-type="float">
            <text:p>16398</text:p>
          </table:table-cell>
          <table:table-cell office:value-type="float" office:value="8640000" calcext:value-type="float">
            <text:p>8640000</text:p>
          </table:table-cell>
          <table:table-cell table:formula="of:=[.B1823]/[.C1823]" office:value-type="float" office:value="0.00189791666666667" calcext:value-type="float">
            <text:p>0,00189791666666667000</text:p>
          </table:table-cell>
          <table:table-cell table:formula="of:=[.D1824]-[.D182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B1823]+9" office:value-type="float" office:value="16407" calcext:value-type="float">
            <text:p>16407</text:p>
          </table:table-cell>
          <table:table-cell office:value-type="float" office:value="8640000" calcext:value-type="float">
            <text:p>8640000</text:p>
          </table:table-cell>
          <table:table-cell table:formula="of:=[.B1824]/[.C1824]" office:value-type="float" office:value="0.00189895833333333" calcext:value-type="float">
            <text:p>0,00189895833333333000</text:p>
          </table:table-cell>
          <table:table-cell table:formula="of:=[.D1825]-[.D182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B1824]+9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1825]/[.C1825]" office:value-type="float" office:value="0.0019" calcext:value-type="float">
            <text:p>0,00190000000000000000</text:p>
          </table:table-cell>
          <table:table-cell table:formula="of:=[.D1826]-[.D182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B1825]+9" office:value-type="float" office:value="16425" calcext:value-type="float">
            <text:p>16425</text:p>
          </table:table-cell>
          <table:table-cell office:value-type="float" office:value="8640000" calcext:value-type="float">
            <text:p>8640000</text:p>
          </table:table-cell>
          <table:table-cell table:formula="of:=[.B1826]/[.C1826]" office:value-type="float" office:value="0.00190104166666667" calcext:value-type="float">
            <text:p>0,00190104166666667000</text:p>
          </table:table-cell>
          <table:table-cell table:formula="of:=[.D1827]-[.D18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B1826]+9" office:value-type="float" office:value="16434" calcext:value-type="float">
            <text:p>16434</text:p>
          </table:table-cell>
          <table:table-cell office:value-type="float" office:value="8640000" calcext:value-type="float">
            <text:p>8640000</text:p>
          </table:table-cell>
          <table:table-cell table:formula="of:=[.B1827]/[.C1827]" office:value-type="float" office:value="0.00190208333333333" calcext:value-type="float">
            <text:p>0,00190208333333333000</text:p>
          </table:table-cell>
          <table:table-cell table:formula="of:=[.D1828]-[.D182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B1827]+9" office:value-type="float" office:value="16443" calcext:value-type="float">
            <text:p>16443</text:p>
          </table:table-cell>
          <table:table-cell office:value-type="float" office:value="8640000" calcext:value-type="float">
            <text:p>8640000</text:p>
          </table:table-cell>
          <table:table-cell table:formula="of:=[.B1828]/[.C1828]" office:value-type="float" office:value="0.001903125" calcext:value-type="float">
            <text:p>0,00190312500000000000</text:p>
          </table:table-cell>
          <table:table-cell table:formula="of:=[.D1829]-[.D18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B1828]+9" office:value-type="float" office:value="16452" calcext:value-type="float">
            <text:p>16452</text:p>
          </table:table-cell>
          <table:table-cell office:value-type="float" office:value="8640000" calcext:value-type="float">
            <text:p>8640000</text:p>
          </table:table-cell>
          <table:table-cell table:formula="of:=[.B1829]/[.C1829]" office:value-type="float" office:value="0.00190416666666667" calcext:value-type="float">
            <text:p>0,00190416666666667000</text:p>
          </table:table-cell>
          <table:table-cell table:formula="of:=[.D1830]-[.D182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B1829]+9" office:value-type="float" office:value="16461" calcext:value-type="float">
            <text:p>16461</text:p>
          </table:table-cell>
          <table:table-cell office:value-type="float" office:value="8640000" calcext:value-type="float">
            <text:p>8640000</text:p>
          </table:table-cell>
          <table:table-cell table:formula="of:=[.B1830]/[.C1830]" office:value-type="float" office:value="0.00190520833333333" calcext:value-type="float">
            <text:p>0,00190520833333333000</text:p>
          </table:table-cell>
          <table:table-cell table:formula="of:=[.D1831]-[.D183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B1830]+9" office:value-type="float" office:value="16470" calcext:value-type="float">
            <text:p>16470</text:p>
          </table:table-cell>
          <table:table-cell office:value-type="float" office:value="8640000" calcext:value-type="float">
            <text:p>8640000</text:p>
          </table:table-cell>
          <table:table-cell table:formula="of:=[.B1831]/[.C1831]" office:value-type="float" office:value="0.00190625" calcext:value-type="float">
            <text:p>0,00190625000000000000</text:p>
          </table:table-cell>
          <table:table-cell table:formula="of:=[.D1832]-[.D183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B1831]+9" office:value-type="float" office:value="16479" calcext:value-type="float">
            <text:p>16479</text:p>
          </table:table-cell>
          <table:table-cell office:value-type="float" office:value="8640000" calcext:value-type="float">
            <text:p>8640000</text:p>
          </table:table-cell>
          <table:table-cell table:formula="of:=[.B1832]/[.C1832]" office:value-type="float" office:value="0.00190729166666667" calcext:value-type="float">
            <text:p>0,00190729166666667000</text:p>
          </table:table-cell>
          <table:table-cell table:formula="of:=[.D1833]-[.D183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B1832]+9" office:value-type="float" office:value="16488" calcext:value-type="float">
            <text:p>16488</text:p>
          </table:table-cell>
          <table:table-cell office:value-type="float" office:value="8640000" calcext:value-type="float">
            <text:p>8640000</text:p>
          </table:table-cell>
          <table:table-cell table:formula="of:=[.B1833]/[.C1833]" office:value-type="float" office:value="0.00190833333333333" calcext:value-type="float">
            <text:p>0,00190833333333333000</text:p>
          </table:table-cell>
          <table:table-cell table:formula="of:=[.D1834]-[.D183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B1833]+9" office:value-type="float" office:value="16497" calcext:value-type="float">
            <text:p>16497</text:p>
          </table:table-cell>
          <table:table-cell office:value-type="float" office:value="8640000" calcext:value-type="float">
            <text:p>8640000</text:p>
          </table:table-cell>
          <table:table-cell table:formula="of:=[.B1834]/[.C1834]" office:value-type="float" office:value="0.001909375" calcext:value-type="float">
            <text:p>0,00190937500000000000</text:p>
          </table:table-cell>
          <table:table-cell table:formula="of:=[.D1835]-[.D183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B1834]+9" office:value-type="float" office:value="16506" calcext:value-type="float">
            <text:p>16506</text:p>
          </table:table-cell>
          <table:table-cell office:value-type="float" office:value="8640000" calcext:value-type="float">
            <text:p>8640000</text:p>
          </table:table-cell>
          <table:table-cell table:formula="of:=[.B1835]/[.C1835]" office:value-type="float" office:value="0.00191041666666667" calcext:value-type="float">
            <text:p>0,00191041666666667000</text:p>
          </table:table-cell>
          <table:table-cell table:formula="of:=[.D1836]-[.D183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B1835]+9" office:value-type="float" office:value="16515" calcext:value-type="float">
            <text:p>16515</text:p>
          </table:table-cell>
          <table:table-cell office:value-type="float" office:value="8640000" calcext:value-type="float">
            <text:p>8640000</text:p>
          </table:table-cell>
          <table:table-cell table:formula="of:=[.B1836]/[.C1836]" office:value-type="float" office:value="0.00191145833333333" calcext:value-type="float">
            <text:p>0,00191145833333333000</text:p>
          </table:table-cell>
          <table:table-cell table:formula="of:=[.D1837]-[.D183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B1836]+9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1837]/[.C1837]" office:value-type="float" office:value="0.0019125" calcext:value-type="float">
            <text:p>0,00191250000000000000</text:p>
          </table:table-cell>
          <table:table-cell table:formula="of:=[.D1838]-[.D183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B1837]+9" office:value-type="float" office:value="16533" calcext:value-type="float">
            <text:p>16533</text:p>
          </table:table-cell>
          <table:table-cell office:value-type="float" office:value="8640000" calcext:value-type="float">
            <text:p>8640000</text:p>
          </table:table-cell>
          <table:table-cell table:formula="of:=[.B1838]/[.C1838]" office:value-type="float" office:value="0.00191354166666667" calcext:value-type="float">
            <text:p>0,00191354166666667000</text:p>
          </table:table-cell>
          <table:table-cell table:formula="of:=[.D1839]-[.D183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B1838]+9" office:value-type="float" office:value="16542" calcext:value-type="float">
            <text:p>16542</text:p>
          </table:table-cell>
          <table:table-cell office:value-type="float" office:value="8640000" calcext:value-type="float">
            <text:p>8640000</text:p>
          </table:table-cell>
          <table:table-cell table:formula="of:=[.B1839]/[.C1839]" office:value-type="float" office:value="0.00191458333333333" calcext:value-type="float">
            <text:p>0,00191458333333333000</text:p>
          </table:table-cell>
          <table:table-cell table:formula="of:=[.D1840]-[.D183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B1839]+9" office:value-type="float" office:value="16551" calcext:value-type="float">
            <text:p>16551</text:p>
          </table:table-cell>
          <table:table-cell office:value-type="float" office:value="8640000" calcext:value-type="float">
            <text:p>8640000</text:p>
          </table:table-cell>
          <table:table-cell table:formula="of:=[.B1840]/[.C1840]" office:value-type="float" office:value="0.001915625" calcext:value-type="float">
            <text:p>0,00191562500000000000</text:p>
          </table:table-cell>
          <table:table-cell table:formula="of:=[.D1841]-[.D18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B1840]+9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1841]/[.C1841]" office:value-type="float" office:value="0.00191666666666667" calcext:value-type="float">
            <text:p>0,00191666666666667000</text:p>
          </table:table-cell>
          <table:table-cell table:formula="of:=[.D1842]-[.D184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B1841]+9" office:value-type="float" office:value="16569" calcext:value-type="float">
            <text:p>16569</text:p>
          </table:table-cell>
          <table:table-cell office:value-type="float" office:value="8640000" calcext:value-type="float">
            <text:p>8640000</text:p>
          </table:table-cell>
          <table:table-cell table:formula="of:=[.B1842]/[.C1842]" office:value-type="float" office:value="0.00191770833333333" calcext:value-type="float">
            <text:p>0,00191770833333333000</text:p>
          </table:table-cell>
          <table:table-cell table:formula="of:=[.D1843]-[.D184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B1842]+9" office:value-type="float" office:value="16578" calcext:value-type="float">
            <text:p>16578</text:p>
          </table:table-cell>
          <table:table-cell office:value-type="float" office:value="8640000" calcext:value-type="float">
            <text:p>8640000</text:p>
          </table:table-cell>
          <table:table-cell table:formula="of:=[.B1843]/[.C1843]" office:value-type="float" office:value="0.00191875" calcext:value-type="float">
            <text:p>0,00191875000000000000</text:p>
          </table:table-cell>
          <table:table-cell table:formula="of:=[.D1844]-[.D18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B1843]+9" office:value-type="float" office:value="16587" calcext:value-type="float">
            <text:p>16587</text:p>
          </table:table-cell>
          <table:table-cell office:value-type="float" office:value="8640000" calcext:value-type="float">
            <text:p>8640000</text:p>
          </table:table-cell>
          <table:table-cell table:formula="of:=[.B1844]/[.C1844]" office:value-type="float" office:value="0.00191979166666667" calcext:value-type="float">
            <text:p>0,00191979166666667000</text:p>
          </table:table-cell>
          <table:table-cell table:formula="of:=[.D1845]-[.D184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B1844]+9" office:value-type="float" office:value="16596" calcext:value-type="float">
            <text:p>16596</text:p>
          </table:table-cell>
          <table:table-cell office:value-type="float" office:value="8640000" calcext:value-type="float">
            <text:p>8640000</text:p>
          </table:table-cell>
          <table:table-cell table:formula="of:=[.B1845]/[.C1845]" office:value-type="float" office:value="0.00192083333333333" calcext:value-type="float">
            <text:p>0,00192083333333333000</text:p>
          </table:table-cell>
          <table:table-cell table:formula="of:=[.D1846]-[.D184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B1845]+9" office:value-type="float" office:value="16605" calcext:value-type="float">
            <text:p>16605</text:p>
          </table:table-cell>
          <table:table-cell office:value-type="float" office:value="8640000" calcext:value-type="float">
            <text:p>8640000</text:p>
          </table:table-cell>
          <table:table-cell table:formula="of:=[.B1846]/[.C1846]" office:value-type="float" office:value="0.001921875" calcext:value-type="float">
            <text:p>0,00192187500000000000</text:p>
          </table:table-cell>
          <table:table-cell table:formula="of:=[.D1847]-[.D184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B1846]+9" office:value-type="float" office:value="16614" calcext:value-type="float">
            <text:p>16614</text:p>
          </table:table-cell>
          <table:table-cell office:value-type="float" office:value="8640000" calcext:value-type="float">
            <text:p>8640000</text:p>
          </table:table-cell>
          <table:table-cell table:formula="of:=[.B1847]/[.C1847]" office:value-type="float" office:value="0.00192291666666667" calcext:value-type="float">
            <text:p>0,00192291666666667000</text:p>
          </table:table-cell>
          <table:table-cell table:formula="of:=[.D1848]-[.D18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B1847]+9" office:value-type="float" office:value="16623" calcext:value-type="float">
            <text:p>16623</text:p>
          </table:table-cell>
          <table:table-cell office:value-type="float" office:value="8640000" calcext:value-type="float">
            <text:p>8640000</text:p>
          </table:table-cell>
          <table:table-cell table:formula="of:=[.B1848]/[.C1848]" office:value-type="float" office:value="0.00192395833333333" calcext:value-type="float">
            <text:p>0,00192395833333333000</text:p>
          </table:table-cell>
          <table:table-cell table:formula="of:=[.D1849]-[.D184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B1848]+9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1849]/[.C1849]" office:value-type="float" office:value="0.001925" calcext:value-type="float">
            <text:p>0,00192500000000000000</text:p>
          </table:table-cell>
          <table:table-cell table:formula="of:=[.D1850]-[.D184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.B1849]+9" office:value-type="float" office:value="16641" calcext:value-type="float">
            <text:p>16641</text:p>
          </table:table-cell>
          <table:table-cell office:value-type="float" office:value="8640000" calcext:value-type="float">
            <text:p>8640000</text:p>
          </table:table-cell>
          <table:table-cell table:formula="of:=[.B1850]/[.C1850]" office:value-type="float" office:value="0.00192604166666667" calcext:value-type="float">
            <text:p>0,00192604166666667000</text:p>
          </table:table-cell>
          <table:table-cell table:formula="of:=[.D1851]-[.D1850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B1850]+9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1851]/[.C1851]" office:value-type="float" office:value="0.00192708333333333" calcext:value-type="float">
            <text:p>0,00192708333333333000</text:p>
          </table:table-cell>
          <table:table-cell table:formula="of:=[.D1852]-[.D18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B1851]+9" office:value-type="float" office:value="16659" calcext:value-type="float">
            <text:p>16659</text:p>
          </table:table-cell>
          <table:table-cell office:value-type="float" office:value="8640000" calcext:value-type="float">
            <text:p>8640000</text:p>
          </table:table-cell>
          <table:table-cell table:formula="of:=[.B1852]/[.C1852]" office:value-type="float" office:value="0.001928125" calcext:value-type="float">
            <text:p>0,00192812500000000000</text:p>
          </table:table-cell>
          <table:table-cell table:formula="of:=[.D1853]-[.D1852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B1852]+9" office:value-type="float" office:value="16668" calcext:value-type="float">
            <text:p>16668</text:p>
          </table:table-cell>
          <table:table-cell office:value-type="float" office:value="8640000" calcext:value-type="float">
            <text:p>8640000</text:p>
          </table:table-cell>
          <table:table-cell table:formula="of:=[.B1853]/[.C1853]" office:value-type="float" office:value="0.00192916666666667" calcext:value-type="float">
            <text:p>0,00192916666666667000</text:p>
          </table:table-cell>
          <table:table-cell table:formula="of:=[.D1854]-[.D185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B1853]+9" office:value-type="float" office:value="16677" calcext:value-type="float">
            <text:p>16677</text:p>
          </table:table-cell>
          <table:table-cell office:value-type="float" office:value="8640000" calcext:value-type="float">
            <text:p>8640000</text:p>
          </table:table-cell>
          <table:table-cell table:formula="of:=[.B1854]/[.C1854]" office:value-type="float" office:value="0.00193020833333333" calcext:value-type="float">
            <text:p>0,00193020833333333000</text:p>
          </table:table-cell>
          <table:table-cell table:formula="of:=[.D1855]-[.D1854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B1854]+9" office:value-type="float" office:value="16686" calcext:value-type="float">
            <text:p>16686</text:p>
          </table:table-cell>
          <table:table-cell office:value-type="float" office:value="8640000" calcext:value-type="float">
            <text:p>8640000</text:p>
          </table:table-cell>
          <table:table-cell table:formula="of:=[.B1855]/[.C1855]" office:value-type="float" office:value="0.00193125" calcext:value-type="float">
            <text:p>0,00193125000000000000</text:p>
          </table:table-cell>
          <table:table-cell table:formula="of:=[.D1856]-[.D185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B1855]+9" office:value-type="float" office:value="16695" calcext:value-type="float">
            <text:p>16695</text:p>
          </table:table-cell>
          <table:table-cell office:value-type="float" office:value="8640000" calcext:value-type="float">
            <text:p>8640000</text:p>
          </table:table-cell>
          <table:table-cell table:formula="of:=[.B1856]/[.C1856]" office:value-type="float" office:value="0.00193229166666667" calcext:value-type="float">
            <text:p>0,00193229166666667000</text:p>
          </table:table-cell>
          <table:table-cell table:formula="of:=[.D1857]-[.D1856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B1856]+9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1857]/[.C1857]" office:value-type="float" office:value="0.00193333333333333" calcext:value-type="float">
            <text:p>0,00193333333333333000</text:p>
          </table:table-cell>
          <table:table-cell table:formula="of:=[.D1858]-[.D185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B1857]+9" office:value-type="float" office:value="16713" calcext:value-type="float">
            <text:p>16713</text:p>
          </table:table-cell>
          <table:table-cell office:value-type="float" office:value="8640000" calcext:value-type="float">
            <text:p>8640000</text:p>
          </table:table-cell>
          <table:table-cell table:formula="of:=[.B1858]/[.C1858]" office:value-type="float" office:value="0.001934375" calcext:value-type="float">
            <text:p>0,00193437500000000000</text:p>
          </table:table-cell>
          <table:table-cell table:formula="of:=[.D1859]-[.D1858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B1858]+9" office:value-type="float" office:value="16722" calcext:value-type="float">
            <text:p>16722</text:p>
          </table:table-cell>
          <table:table-cell office:value-type="float" office:value="8640000" calcext:value-type="float">
            <text:p>8640000</text:p>
          </table:table-cell>
          <table:table-cell table:formula="of:=[.B1859]/[.C1859]" office:value-type="float" office:value="0.00193541666666667" calcext:value-type="float">
            <text:p>0,00193541666666667000</text:p>
          </table:table-cell>
          <table:table-cell table:formula="of:=[.D1860]-[.D185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B1859]+9" office:value-type="float" office:value="16731" calcext:value-type="float">
            <text:p>16731</text:p>
          </table:table-cell>
          <table:table-cell office:value-type="float" office:value="8640000" calcext:value-type="float">
            <text:p>8640000</text:p>
          </table:table-cell>
          <table:table-cell table:formula="of:=[.B1860]/[.C1860]" office:value-type="float" office:value="0.00193645833333333" calcext:value-type="float">
            <text:p>0,00193645833333333000</text:p>
          </table:table-cell>
          <table:table-cell table:formula="of:=[.D1861]-[.D18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B1860]+9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1861]/[.C1861]" office:value-type="float" office:value="0.0019375" calcext:value-type="float">
            <text:p>0,00193750000000000000</text:p>
          </table:table-cell>
          <table:table-cell table:formula="of:=[.D1862]-[.D186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B1861]+9" office:value-type="float" office:value="16749" calcext:value-type="float">
            <text:p>16749</text:p>
          </table:table-cell>
          <table:table-cell office:value-type="float" office:value="8640000" calcext:value-type="float">
            <text:p>8640000</text:p>
          </table:table-cell>
          <table:table-cell table:formula="of:=[.B1862]/[.C1862]" office:value-type="float" office:value="0.00193854166666667" calcext:value-type="float">
            <text:p>0,00193854166666667000</text:p>
          </table:table-cell>
          <table:table-cell table:formula="of:=[.D1863]-[.D18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B1862]+9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1863]/[.C1863]" office:value-type="float" office:value="0.00193958333333333" calcext:value-type="float">
            <text:p>0,00193958333333333000</text:p>
          </table:table-cell>
          <table:table-cell table:formula="of:=[.D1864]-[.D186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B1863]+9" office:value-type="float" office:value="16767" calcext:value-type="float">
            <text:p>16767</text:p>
          </table:table-cell>
          <table:table-cell office:value-type="float" office:value="8640000" calcext:value-type="float">
            <text:p>8640000</text:p>
          </table:table-cell>
          <table:table-cell table:formula="of:=[.B1864]/[.C1864]" office:value-type="float" office:value="0.001940625" calcext:value-type="float">
            <text:p>0,00194062500000000000</text:p>
          </table:table-cell>
          <table:table-cell table:formula="of:=[.D1865]-[.D186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B1864]+9" office:value-type="float" office:value="16776" calcext:value-type="float">
            <text:p>16776</text:p>
          </table:table-cell>
          <table:table-cell office:value-type="float" office:value="8640000" calcext:value-type="float">
            <text:p>8640000</text:p>
          </table:table-cell>
          <table:table-cell table:formula="of:=[.B1865]/[.C1865]" office:value-type="float" office:value="0.00194166666666667" calcext:value-type="float">
            <text:p>0,00194166666666667000</text:p>
          </table:table-cell>
          <table:table-cell table:formula="of:=[.D1866]-[.D186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B1865]+9" office:value-type="float" office:value="16785" calcext:value-type="float">
            <text:p>16785</text:p>
          </table:table-cell>
          <table:table-cell office:value-type="float" office:value="8640000" calcext:value-type="float">
            <text:p>8640000</text:p>
          </table:table-cell>
          <table:table-cell table:formula="of:=[.B1866]/[.C1866]" office:value-type="float" office:value="0.00194270833333333" calcext:value-type="float">
            <text:p>0,00194270833333333000</text:p>
          </table:table-cell>
          <table:table-cell table:formula="of:=[.D1867]-[.D18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B1866]+9" office:value-type="float" office:value="16794" calcext:value-type="float">
            <text:p>16794</text:p>
          </table:table-cell>
          <table:table-cell office:value-type="float" office:value="8640000" calcext:value-type="float">
            <text:p>8640000</text:p>
          </table:table-cell>
          <table:table-cell table:formula="of:=[.B1867]/[.C1867]" office:value-type="float" office:value="0.00194375" calcext:value-type="float">
            <text:p>0,00194375000000000000</text:p>
          </table:table-cell>
          <table:table-cell table:formula="of:=[.D1868]-[.D1867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B1867]+9" office:value-type="float" office:value="16803" calcext:value-type="float">
            <text:p>16803</text:p>
          </table:table-cell>
          <table:table-cell office:value-type="float" office:value="8640000" calcext:value-type="float">
            <text:p>8640000</text:p>
          </table:table-cell>
          <table:table-cell table:formula="of:=[.B1868]/[.C1868]" office:value-type="float" office:value="0.00194479166666667" calcext:value-type="float">
            <text:p>0,00194479166666667000</text:p>
          </table:table-cell>
          <table:table-cell table:formula="of:=[.D1869]-[.D186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B1868]+9" office:value-type="float" office:value="16812" calcext:value-type="float">
            <text:p>16812</text:p>
          </table:table-cell>
          <table:table-cell office:value-type="float" office:value="8640000" calcext:value-type="float">
            <text:p>8640000</text:p>
          </table:table-cell>
          <table:table-cell table:formula="of:=[.B1869]/[.C1869]" office:value-type="float" office:value="0.00194583333333333" calcext:value-type="float">
            <text:p>0,00194583333333333000</text:p>
          </table:table-cell>
          <table:table-cell table:formula="of:=[.D1870]-[.D1869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[.B1869]+9" office:value-type="float" office:value="16821" calcext:value-type="float">
            <text:p>16821</text:p>
          </table:table-cell>
          <table:table-cell office:value-type="float" office:value="8640000" calcext:value-type="float">
            <text:p>8640000</text:p>
          </table:table-cell>
          <table:table-cell table:formula="of:=[.B1870]/[.C1870]" office:value-type="float" office:value="0.001946875" calcext:value-type="float">
            <text:p>0,00194687500000000000</text:p>
          </table:table-cell>
          <table:table-cell table:formula="of:=[.D1871]-[.D187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B1870]+9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1871]/[.C1871]" office:value-type="float" office:value="0.00194791666666667" calcext:value-type="float">
            <text:p>0,00194791666666667000</text:p>
          </table:table-cell>
          <table:table-cell table:formula="of:=[.D1872]-[.D1871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B1871]+9" office:value-type="float" office:value="16839" calcext:value-type="float">
            <text:p>16839</text:p>
          </table:table-cell>
          <table:table-cell office:value-type="float" office:value="8640000" calcext:value-type="float">
            <text:p>8640000</text:p>
          </table:table-cell>
          <table:table-cell table:formula="of:=[.B1872]/[.C1872]" office:value-type="float" office:value="0.00194895833333333" calcext:value-type="float">
            <text:p>0,00194895833333333000</text:p>
          </table:table-cell>
          <table:table-cell table:formula="of:=[.D1873]-[.D187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B1872]+9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1873]/[.C1873]" office:value-type="float" office:value="0.00195" calcext:value-type="float">
            <text:p>0,00195000000000000000</text:p>
          </table:table-cell>
          <table:table-cell table:formula="of:=[.D1874]-[.D1873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B1873]+9" office:value-type="float" office:value="16857" calcext:value-type="float">
            <text:p>16857</text:p>
          </table:table-cell>
          <table:table-cell office:value-type="float" office:value="8640000" calcext:value-type="float">
            <text:p>8640000</text:p>
          </table:table-cell>
          <table:table-cell table:formula="of:=[.B1874]/[.C1874]" office:value-type="float" office:value="0.00195104166666667" calcext:value-type="float">
            <text:p>0,00195104166666667000</text:p>
          </table:table-cell>
          <table:table-cell table:formula="of:=[.D1875]-[.D187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B1874]+9" office:value-type="float" office:value="16866" calcext:value-type="float">
            <text:p>16866</text:p>
          </table:table-cell>
          <table:table-cell office:value-type="float" office:value="8640000" calcext:value-type="float">
            <text:p>8640000</text:p>
          </table:table-cell>
          <table:table-cell table:formula="of:=[.B1875]/[.C1875]" office:value-type="float" office:value="0.00195208333333333" calcext:value-type="float">
            <text:p>0,00195208333333333000</text:p>
          </table:table-cell>
          <table:table-cell table:formula="of:=[.D1876]-[.D1875]" office:value-type="float" office:value="0.00000104166666666677" calcext:value-type="float">
            <text:p>0,0000010416666666667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B1875]+9" office:value-type="float" office:value="16875" calcext:value-type="float">
            <text:p>16875</text:p>
          </table:table-cell>
          <table:table-cell office:value-type="float" office:value="8640000" calcext:value-type="float">
            <text:p>8640000</text:p>
          </table:table-cell>
          <table:table-cell table:formula="of:=[.B1876]/[.C1876]" office:value-type="float" office:value="0.001953125" calcext:value-type="float">
            <text:p>0,00195312500000000000</text:p>
          </table:table-cell>
          <table:table-cell table:formula="of:=[.D1877]-[.D187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B1876]+9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1877]/[.C1877]" office:value-type="float" office:value="0.00195416666666667" calcext:value-type="float">
            <text:p>0,00195416666666667000</text:p>
          </table:table-cell>
          <table:table-cell table:formula="of:=[.D1878]-[.D187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B1877]+9" office:value-type="float" office:value="16893" calcext:value-type="float">
            <text:p>16893</text:p>
          </table:table-cell>
          <table:table-cell office:value-type="float" office:value="8640000" calcext:value-type="float">
            <text:p>8640000</text:p>
          </table:table-cell>
          <table:table-cell table:formula="of:=[.B1878]/[.C1878]" office:value-type="float" office:value="0.00195520833333333" calcext:value-type="float">
            <text:p>0,00195520833333333000</text:p>
          </table:table-cell>
          <table:table-cell table:formula="of:=[.D1879]-[.D187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B1878]+9" office:value-type="float" office:value="16902" calcext:value-type="float">
            <text:p>16902</text:p>
          </table:table-cell>
          <table:table-cell office:value-type="float" office:value="8640000" calcext:value-type="float">
            <text:p>8640000</text:p>
          </table:table-cell>
          <table:table-cell table:formula="of:=[.B1879]/[.C1879]" office:value-type="float" office:value="0.00195625" calcext:value-type="float">
            <text:p>0,00195625000000000000</text:p>
          </table:table-cell>
          <table:table-cell table:formula="of:=[.D1880]-[.D18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B1879]+9" office:value-type="float" office:value="16911" calcext:value-type="float">
            <text:p>16911</text:p>
          </table:table-cell>
          <table:table-cell office:value-type="float" office:value="8640000" calcext:value-type="float">
            <text:p>8640000</text:p>
          </table:table-cell>
          <table:table-cell table:formula="of:=[.B1880]/[.C1880]" office:value-type="float" office:value="0.00195729166666667" calcext:value-type="float">
            <text:p>0,00195729166666667000</text:p>
          </table:table-cell>
          <table:table-cell table:formula="of:=[.D1881]-[.D18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B1880]+9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1881]/[.C1881]" office:value-type="float" office:value="0.00195833333333333" calcext:value-type="float">
            <text:p>0,00195833333333333000</text:p>
          </table:table-cell>
          <table:table-cell table:formula="of:=[.D1882]-[.D188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B1881]+9" office:value-type="float" office:value="16929" calcext:value-type="float">
            <text:p>16929</text:p>
          </table:table-cell>
          <table:table-cell office:value-type="float" office:value="8640000" calcext:value-type="float">
            <text:p>8640000</text:p>
          </table:table-cell>
          <table:table-cell table:formula="of:=[.B1882]/[.C1882]" office:value-type="float" office:value="0.001959375" calcext:value-type="float">
            <text:p>0,00195937500000000000</text:p>
          </table:table-cell>
          <table:table-cell table:formula="of:=[.D1883]-[.D188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B1882]+9" office:value-type="float" office:value="16938" calcext:value-type="float">
            <text:p>16938</text:p>
          </table:table-cell>
          <table:table-cell office:value-type="float" office:value="8640000" calcext:value-type="float">
            <text:p>8640000</text:p>
          </table:table-cell>
          <table:table-cell table:formula="of:=[.B1883]/[.C1883]" office:value-type="float" office:value="0.00196041666666667" calcext:value-type="float">
            <text:p>0,00196041666666667000</text:p>
          </table:table-cell>
          <table:table-cell table:formula="of:=[.D1884]-[.D188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B1883]+9" office:value-type="float" office:value="16947" calcext:value-type="float">
            <text:p>16947</text:p>
          </table:table-cell>
          <table:table-cell office:value-type="float" office:value="8640000" calcext:value-type="float">
            <text:p>8640000</text:p>
          </table:table-cell>
          <table:table-cell table:formula="of:=[.B1884]/[.C1884]" office:value-type="float" office:value="0.00196145833333333" calcext:value-type="float">
            <text:p>0,00196145833333333000</text:p>
          </table:table-cell>
          <table:table-cell table:formula="of:=[.D1885]-[.D188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B1884]+9" office:value-type="float" office:value="16956" calcext:value-type="float">
            <text:p>16956</text:p>
          </table:table-cell>
          <table:table-cell office:value-type="float" office:value="8640000" calcext:value-type="float">
            <text:p>8640000</text:p>
          </table:table-cell>
          <table:table-cell table:formula="of:=[.B1885]/[.C1885]" office:value-type="float" office:value="0.0019625" calcext:value-type="float">
            <text:p>0,00196250000000000000</text:p>
          </table:table-cell>
          <table:table-cell table:formula="of:=[.D1886]-[.D188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B1885]+9" office:value-type="float" office:value="16965" calcext:value-type="float">
            <text:p>16965</text:p>
          </table:table-cell>
          <table:table-cell office:value-type="float" office:value="8640000" calcext:value-type="float">
            <text:p>8640000</text:p>
          </table:table-cell>
          <table:table-cell table:formula="of:=[.B1886]/[.C1886]" office:value-type="float" office:value="0.00196354166666667" calcext:value-type="float">
            <text:p>0,00196354166666667000</text:p>
          </table:table-cell>
          <table:table-cell table:formula="of:=[.D1887]-[.D18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B1886]+9" office:value-type="float" office:value="16974" calcext:value-type="float">
            <text:p>16974</text:p>
          </table:table-cell>
          <table:table-cell office:value-type="float" office:value="8640000" calcext:value-type="float">
            <text:p>8640000</text:p>
          </table:table-cell>
          <table:table-cell table:formula="of:=[.B1887]/[.C1887]" office:value-type="float" office:value="0.00196458333333333" calcext:value-type="float">
            <text:p>0,00196458333333333000</text:p>
          </table:table-cell>
          <table:table-cell table:formula="of:=[.D1888]-[.D188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B1887]+9" office:value-type="float" office:value="16983" calcext:value-type="float">
            <text:p>16983</text:p>
          </table:table-cell>
          <table:table-cell office:value-type="float" office:value="8640000" calcext:value-type="float">
            <text:p>8640000</text:p>
          </table:table-cell>
          <table:table-cell table:formula="of:=[.B1888]/[.C1888]" office:value-type="float" office:value="0.001965625" calcext:value-type="float">
            <text:p>0,00196562500000000000</text:p>
          </table:table-cell>
          <table:table-cell table:formula="of:=[.D1889]-[.D18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B1888]+9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1889]/[.C1889]" office:value-type="float" office:value="0.00196666666666667" calcext:value-type="float">
            <text:p>0,00196666666666667000</text:p>
          </table:table-cell>
          <table:table-cell table:formula="of:=[.D1890]-[.D188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B1889]+9" office:value-type="float" office:value="17001" calcext:value-type="float">
            <text:p>17001</text:p>
          </table:table-cell>
          <table:table-cell office:value-type="float" office:value="8640000" calcext:value-type="float">
            <text:p>8640000</text:p>
          </table:table-cell>
          <table:table-cell table:formula="of:=[.B1890]/[.C1890]" office:value-type="float" office:value="0.00196770833333333" calcext:value-type="float">
            <text:p>0,00196770833333333000</text:p>
          </table:table-cell>
          <table:table-cell table:formula="of:=[.D1891]-[.D18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B1890]+9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1891]/[.C1891]" office:value-type="float" office:value="0.00196875" calcext:value-type="float">
            <text:p>0,00196875000000000000</text:p>
          </table:table-cell>
          <table:table-cell table:formula="of:=[.D1892]-[.D189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B1891]+9" office:value-type="float" office:value="17019" calcext:value-type="float">
            <text:p>17019</text:p>
          </table:table-cell>
          <table:table-cell office:value-type="float" office:value="8640000" calcext:value-type="float">
            <text:p>8640000</text:p>
          </table:table-cell>
          <table:table-cell table:formula="of:=[.B1892]/[.C1892]" office:value-type="float" office:value="0.00196979166666667" calcext:value-type="float">
            <text:p>0,00196979166666667000</text:p>
          </table:table-cell>
          <table:table-cell table:formula="of:=[.D1893]-[.D18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B1892]+9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1893]/[.C1893]" office:value-type="float" office:value="0.00197083333333333" calcext:value-type="float">
            <text:p>0,00197083333333333000</text:p>
          </table:table-cell>
          <table:table-cell table:formula="of:=[.D1894]-[.D189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B1893]+9" office:value-type="float" office:value="17037" calcext:value-type="float">
            <text:p>17037</text:p>
          </table:table-cell>
          <table:table-cell office:value-type="float" office:value="8640000" calcext:value-type="float">
            <text:p>8640000</text:p>
          </table:table-cell>
          <table:table-cell table:formula="of:=[.B1894]/[.C1894]" office:value-type="float" office:value="0.001971875" calcext:value-type="float">
            <text:p>0,00197187500000000000</text:p>
          </table:table-cell>
          <table:table-cell table:formula="of:=[.D1895]-[.D18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B1894]+9" office:value-type="float" office:value="17046" calcext:value-type="float">
            <text:p>17046</text:p>
          </table:table-cell>
          <table:table-cell office:value-type="float" office:value="8640000" calcext:value-type="float">
            <text:p>8640000</text:p>
          </table:table-cell>
          <table:table-cell table:formula="of:=[.B1895]/[.C1895]" office:value-type="float" office:value="0.00197291666666667" calcext:value-type="float">
            <text:p>0,00197291666666667000</text:p>
          </table:table-cell>
          <table:table-cell table:formula="of:=[.D1896]-[.D189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B1895]+9" office:value-type="float" office:value="17055" calcext:value-type="float">
            <text:p>17055</text:p>
          </table:table-cell>
          <table:table-cell office:value-type="float" office:value="8640000" calcext:value-type="float">
            <text:p>8640000</text:p>
          </table:table-cell>
          <table:table-cell table:formula="of:=[.B1896]/[.C1896]" office:value-type="float" office:value="0.00197395833333333" calcext:value-type="float">
            <text:p>0,00197395833333333000</text:p>
          </table:table-cell>
          <table:table-cell table:formula="of:=[.D1897]-[.D189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B1896]+9" office:value-type="float" office:value="17064" calcext:value-type="float">
            <text:p>17064</text:p>
          </table:table-cell>
          <table:table-cell office:value-type="float" office:value="8640000" calcext:value-type="float">
            <text:p>8640000</text:p>
          </table:table-cell>
          <table:table-cell table:formula="of:=[.B1897]/[.C1897]" office:value-type="float" office:value="0.001975" calcext:value-type="float">
            <text:p>0,00197500000000000000</text:p>
          </table:table-cell>
          <table:table-cell table:formula="of:=[.D1898]-[.D189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B1897]+9" office:value-type="float" office:value="17073" calcext:value-type="float">
            <text:p>17073</text:p>
          </table:table-cell>
          <table:table-cell office:value-type="float" office:value="8640000" calcext:value-type="float">
            <text:p>8640000</text:p>
          </table:table-cell>
          <table:table-cell table:formula="of:=[.B1898]/[.C1898]" office:value-type="float" office:value="0.00197604166666667" calcext:value-type="float">
            <text:p>0,00197604166666667000</text:p>
          </table:table-cell>
          <table:table-cell table:formula="of:=[.D1899]-[.D189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B1898]+9" office:value-type="float" office:value="17082" calcext:value-type="float">
            <text:p>17082</text:p>
          </table:table-cell>
          <table:table-cell office:value-type="float" office:value="8640000" calcext:value-type="float">
            <text:p>8640000</text:p>
          </table:table-cell>
          <table:table-cell table:formula="of:=[.B1899]/[.C1899]" office:value-type="float" office:value="0.00197708333333333" calcext:value-type="float">
            <text:p>0,00197708333333333000</text:p>
          </table:table-cell>
          <table:table-cell table:formula="of:=[.D1900]-[.D189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B1899]+9" office:value-type="float" office:value="17091" calcext:value-type="float">
            <text:p>17091</text:p>
          </table:table-cell>
          <table:table-cell office:value-type="float" office:value="8640000" calcext:value-type="float">
            <text:p>8640000</text:p>
          </table:table-cell>
          <table:table-cell table:formula="of:=[.B1900]/[.C1900]" office:value-type="float" office:value="0.001978125" calcext:value-type="float">
            <text:p>0,00197812500000000000</text:p>
          </table:table-cell>
          <table:table-cell table:formula="of:=[.D1901]-[.D190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1900]+9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1901]/[.C1901]" office:value-type="float" office:value="0.00197916666666667" calcext:value-type="float">
            <text:p>0,00197916666666667000</text:p>
          </table:table-cell>
          <table:table-cell table:formula="of:=[.D1902]-[.D19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B1901]+9" office:value-type="float" office:value="17109" calcext:value-type="float">
            <text:p>17109</text:p>
          </table:table-cell>
          <table:table-cell office:value-type="float" office:value="8640000" calcext:value-type="float">
            <text:p>8640000</text:p>
          </table:table-cell>
          <table:table-cell table:formula="of:=[.B1902]/[.C1902]" office:value-type="float" office:value="0.00198020833333333" calcext:value-type="float">
            <text:p>0,00198020833333333000</text:p>
          </table:table-cell>
          <table:table-cell table:formula="of:=[.D1903]-[.D190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B1902]+9" office:value-type="float" office:value="17118" calcext:value-type="float">
            <text:p>17118</text:p>
          </table:table-cell>
          <table:table-cell office:value-type="float" office:value="8640000" calcext:value-type="float">
            <text:p>8640000</text:p>
          </table:table-cell>
          <table:table-cell table:formula="of:=[.B1903]/[.C1903]" office:value-type="float" office:value="0.00198125" calcext:value-type="float">
            <text:p>0,00198125000000000000</text:p>
          </table:table-cell>
          <table:table-cell table:formula="of:=[.D1904]-[.D19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B1903]+9" office:value-type="float" office:value="17127" calcext:value-type="float">
            <text:p>17127</text:p>
          </table:table-cell>
          <table:table-cell office:value-type="float" office:value="8640000" calcext:value-type="float">
            <text:p>8640000</text:p>
          </table:table-cell>
          <table:table-cell table:formula="of:=[.B1904]/[.C1904]" office:value-type="float" office:value="0.00198229166666667" calcext:value-type="float">
            <text:p>0,00198229166666667000</text:p>
          </table:table-cell>
          <table:table-cell table:formula="of:=[.D1905]-[.D190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B1904]+9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1905]/[.C1905]" office:value-type="float" office:value="0.00198333333333333" calcext:value-type="float">
            <text:p>0,00198333333333333000</text:p>
          </table:table-cell>
          <table:table-cell table:formula="of:=[.D1906]-[.D19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B1905]+9" office:value-type="float" office:value="17145" calcext:value-type="float">
            <text:p>17145</text:p>
          </table:table-cell>
          <table:table-cell office:value-type="float" office:value="8640000" calcext:value-type="float">
            <text:p>8640000</text:p>
          </table:table-cell>
          <table:table-cell table:formula="of:=[.B1906]/[.C1906]" office:value-type="float" office:value="0.001984375" calcext:value-type="float">
            <text:p>0,00198437500000000000</text:p>
          </table:table-cell>
          <table:table-cell table:formula="of:=[.D1907]-[.D190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B1906]+9" office:value-type="float" office:value="17154" calcext:value-type="float">
            <text:p>17154</text:p>
          </table:table-cell>
          <table:table-cell office:value-type="float" office:value="8640000" calcext:value-type="float">
            <text:p>8640000</text:p>
          </table:table-cell>
          <table:table-cell table:formula="of:=[.B1907]/[.C1907]" office:value-type="float" office:value="0.00198541666666667" calcext:value-type="float">
            <text:p>0,00198541666666667000</text:p>
          </table:table-cell>
          <table:table-cell table:formula="of:=[.D1908]-[.D19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B1907]+9" office:value-type="float" office:value="17163" calcext:value-type="float">
            <text:p>17163</text:p>
          </table:table-cell>
          <table:table-cell office:value-type="float" office:value="8640000" calcext:value-type="float">
            <text:p>8640000</text:p>
          </table:table-cell>
          <table:table-cell table:formula="of:=[.B1908]/[.C1908]" office:value-type="float" office:value="0.00198645833333333" calcext:value-type="float">
            <text:p>0,00198645833333333000</text:p>
          </table:table-cell>
          <table:table-cell table:formula="of:=[.D1909]-[.D190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B1908]+9" office:value-type="float" office:value="17172" calcext:value-type="float">
            <text:p>17172</text:p>
          </table:table-cell>
          <table:table-cell office:value-type="float" office:value="8640000" calcext:value-type="float">
            <text:p>8640000</text:p>
          </table:table-cell>
          <table:table-cell table:formula="of:=[.B1909]/[.C1909]" office:value-type="float" office:value="0.0019875" calcext:value-type="float">
            <text:p>0,00198750000000000000</text:p>
          </table:table-cell>
          <table:table-cell table:formula="of:=[.D1910]-[.D19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B1909]+9" office:value-type="float" office:value="17181" calcext:value-type="float">
            <text:p>17181</text:p>
          </table:table-cell>
          <table:table-cell office:value-type="float" office:value="8640000" calcext:value-type="float">
            <text:p>8640000</text:p>
          </table:table-cell>
          <table:table-cell table:formula="of:=[.B1910]/[.C1910]" office:value-type="float" office:value="0.00198854166666667" calcext:value-type="float">
            <text:p>0,00198854166666667000</text:p>
          </table:table-cell>
          <table:table-cell table:formula="of:=[.D1911]-[.D191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B1910]+9" office:value-type="float" office:value="17190" calcext:value-type="float">
            <text:p>17190</text:p>
          </table:table-cell>
          <table:table-cell office:value-type="float" office:value="8640000" calcext:value-type="float">
            <text:p>8640000</text:p>
          </table:table-cell>
          <table:table-cell table:formula="of:=[.B1911]/[.C1911]" office:value-type="float" office:value="0.00198958333333333" calcext:value-type="float">
            <text:p>0,00198958333333333000</text:p>
          </table:table-cell>
          <table:table-cell table:formula="of:=[.D1912]-[.D191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B1911]+9" office:value-type="float" office:value="17199" calcext:value-type="float">
            <text:p>17199</text:p>
          </table:table-cell>
          <table:table-cell office:value-type="float" office:value="8640000" calcext:value-type="float">
            <text:p>8640000</text:p>
          </table:table-cell>
          <table:table-cell table:formula="of:=[.B1912]/[.C1912]" office:value-type="float" office:value="0.001990625" calcext:value-type="float">
            <text:p>0,00199062500000000000</text:p>
          </table:table-cell>
          <table:table-cell table:formula="of:=[.D1913]-[.D191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B1912]+9" office:value-type="float" office:value="17208" calcext:value-type="float">
            <text:p>17208</text:p>
          </table:table-cell>
          <table:table-cell office:value-type="float" office:value="8640000" calcext:value-type="float">
            <text:p>8640000</text:p>
          </table:table-cell>
          <table:table-cell table:formula="of:=[.B1913]/[.C1913]" office:value-type="float" office:value="0.00199166666666667" calcext:value-type="float">
            <text:p>0,00199166666666667000</text:p>
          </table:table-cell>
          <table:table-cell table:formula="of:=[.D1914]-[.D19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B1913]+9" office:value-type="float" office:value="17217" calcext:value-type="float">
            <text:p>17217</text:p>
          </table:table-cell>
          <table:table-cell office:value-type="float" office:value="8640000" calcext:value-type="float">
            <text:p>8640000</text:p>
          </table:table-cell>
          <table:table-cell table:formula="of:=[.B1914]/[.C1914]" office:value-type="float" office:value="0.00199270833333333" calcext:value-type="float">
            <text:p>0,00199270833333333000</text:p>
          </table:table-cell>
          <table:table-cell table:formula="of:=[.D1915]-[.D19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B1914]+9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1915]/[.C1915]" office:value-type="float" office:value="0.00199375" calcext:value-type="float">
            <text:p>0,00199375000000000000</text:p>
          </table:table-cell>
          <table:table-cell table:formula="of:=[.D1916]-[.D191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B1915]+9" office:value-type="float" office:value="17235" calcext:value-type="float">
            <text:p>17235</text:p>
          </table:table-cell>
          <table:table-cell office:value-type="float" office:value="8640000" calcext:value-type="float">
            <text:p>8640000</text:p>
          </table:table-cell>
          <table:table-cell table:formula="of:=[.B1916]/[.C1916]" office:value-type="float" office:value="0.00199479166666667" calcext:value-type="float">
            <text:p>0,00199479166666667000</text:p>
          </table:table-cell>
          <table:table-cell table:formula="of:=[.D1917]-[.D191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B1916]+9" office:value-type="float" office:value="17244" calcext:value-type="float">
            <text:p>17244</text:p>
          </table:table-cell>
          <table:table-cell office:value-type="float" office:value="8640000" calcext:value-type="float">
            <text:p>8640000</text:p>
          </table:table-cell>
          <table:table-cell table:formula="of:=[.B1917]/[.C1917]" office:value-type="float" office:value="0.00199583333333333" calcext:value-type="float">
            <text:p>0,00199583333333333000</text:p>
          </table:table-cell>
          <table:table-cell table:formula="of:=[.D1918]-[.D191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B1917]+9" office:value-type="float" office:value="17253" calcext:value-type="float">
            <text:p>17253</text:p>
          </table:table-cell>
          <table:table-cell office:value-type="float" office:value="8640000" calcext:value-type="float">
            <text:p>8640000</text:p>
          </table:table-cell>
          <table:table-cell table:formula="of:=[.B1918]/[.C1918]" office:value-type="float" office:value="0.001996875" calcext:value-type="float">
            <text:p>0,00199687500000000000</text:p>
          </table:table-cell>
          <table:table-cell table:formula="of:=[.D1919]-[.D19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B1918]+9" office:value-type="float" office:value="17262" calcext:value-type="float">
            <text:p>17262</text:p>
          </table:table-cell>
          <table:table-cell office:value-type="float" office:value="8640000" calcext:value-type="float">
            <text:p>8640000</text:p>
          </table:table-cell>
          <table:table-cell table:formula="of:=[.B1919]/[.C1919]" office:value-type="float" office:value="0.00199791666666667" calcext:value-type="float">
            <text:p>0,00199791666666667000</text:p>
          </table:table-cell>
          <table:table-cell table:formula="of:=[.D1920]-[.D191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B1919]+9" office:value-type="float" office:value="17271" calcext:value-type="float">
            <text:p>17271</text:p>
          </table:table-cell>
          <table:table-cell office:value-type="float" office:value="8640000" calcext:value-type="float">
            <text:p>8640000</text:p>
          </table:table-cell>
          <table:table-cell table:formula="of:=[.B1920]/[.C1920]" office:value-type="float" office:value="0.00199895833333333" calcext:value-type="float">
            <text:p>0,00199895833333333000</text:p>
          </table:table-cell>
          <table:table-cell table:formula="of:=[.D1921]-[.D19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B1920]+9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1921]/[.C1921]" office:value-type="float" office:value="0.002" calcext:value-type="float">
            <text:p>0,00200000000000000000</text:p>
          </table:table-cell>
          <table:table-cell table:formula="of:=[.D1922]-[.D192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B1921]+9" office:value-type="float" office:value="17289" calcext:value-type="float">
            <text:p>17289</text:p>
          </table:table-cell>
          <table:table-cell office:value-type="float" office:value="8640000" calcext:value-type="float">
            <text:p>8640000</text:p>
          </table:table-cell>
          <table:table-cell table:formula="of:=[.B1922]/[.C1922]" office:value-type="float" office:value="0.00200104166666667" calcext:value-type="float">
            <text:p>0,00200104166666667000</text:p>
          </table:table-cell>
          <table:table-cell table:formula="of:=[.D1923]-[.D19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B1922]+9" office:value-type="float" office:value="17298" calcext:value-type="float">
            <text:p>17298</text:p>
          </table:table-cell>
          <table:table-cell office:value-type="float" office:value="8640000" calcext:value-type="float">
            <text:p>8640000</text:p>
          </table:table-cell>
          <table:table-cell table:formula="of:=[.B1923]/[.C1923]" office:value-type="float" office:value="0.00200208333333333" calcext:value-type="float">
            <text:p>0,00200208333333333000</text:p>
          </table:table-cell>
          <table:table-cell table:formula="of:=[.D1924]-[.D192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B1923]+9" office:value-type="float" office:value="17307" calcext:value-type="float">
            <text:p>17307</text:p>
          </table:table-cell>
          <table:table-cell office:value-type="float" office:value="8640000" calcext:value-type="float">
            <text:p>8640000</text:p>
          </table:table-cell>
          <table:table-cell table:formula="of:=[.B1924]/[.C1924]" office:value-type="float" office:value="0.002003125" calcext:value-type="float">
            <text:p>0,00200312500000000000</text:p>
          </table:table-cell>
          <table:table-cell table:formula="of:=[.D1925]-[.D19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B1924]+9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1925]/[.C1925]" office:value-type="float" office:value="0.00200416666666667" calcext:value-type="float">
            <text:p>0,00200416666666667000</text:p>
          </table:table-cell>
          <table:table-cell table:formula="of:=[.D1926]-[.D192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B1925]+9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1926]/[.C1926]" office:value-type="float" office:value="0.00200520833333333" calcext:value-type="float">
            <text:p>0,00200520833333333000</text:p>
          </table:table-cell>
          <table:table-cell table:formula="of:=[.D1927]-[.D19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B1926]+9" office:value-type="float" office:value="17334" calcext:value-type="float">
            <text:p>17334</text:p>
          </table:table-cell>
          <table:table-cell office:value-type="float" office:value="8640000" calcext:value-type="float">
            <text:p>8640000</text:p>
          </table:table-cell>
          <table:table-cell table:formula="of:=[.B1927]/[.C1927]" office:value-type="float" office:value="0.00200625" calcext:value-type="float">
            <text:p>0,00200625000000000000</text:p>
          </table:table-cell>
          <table:table-cell table:formula="of:=[.D1928]-[.D192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B1927]+9" office:value-type="float" office:value="17343" calcext:value-type="float">
            <text:p>17343</text:p>
          </table:table-cell>
          <table:table-cell office:value-type="float" office:value="8640000" calcext:value-type="float">
            <text:p>8640000</text:p>
          </table:table-cell>
          <table:table-cell table:formula="of:=[.B1928]/[.C1928]" office:value-type="float" office:value="0.00200729166666667" calcext:value-type="float">
            <text:p>0,00200729166666667000</text:p>
          </table:table-cell>
          <table:table-cell table:formula="of:=[.D1929]-[.D19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B1928]+9" office:value-type="float" office:value="17352" calcext:value-type="float">
            <text:p>17352</text:p>
          </table:table-cell>
          <table:table-cell office:value-type="float" office:value="8640000" calcext:value-type="float">
            <text:p>8640000</text:p>
          </table:table-cell>
          <table:table-cell table:formula="of:=[.B1929]/[.C1929]" office:value-type="float" office:value="0.00200833333333333" calcext:value-type="float">
            <text:p>0,00200833333333333000</text:p>
          </table:table-cell>
          <table:table-cell table:formula="of:=[.D1930]-[.D192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B1929]+9" office:value-type="float" office:value="17361" calcext:value-type="float">
            <text:p>17361</text:p>
          </table:table-cell>
          <table:table-cell office:value-type="float" office:value="8640000" calcext:value-type="float">
            <text:p>8640000</text:p>
          </table:table-cell>
          <table:table-cell table:formula="of:=[.B1930]/[.C1930]" office:value-type="float" office:value="0.002009375" calcext:value-type="float">
            <text:p>0,00200937500000000000</text:p>
          </table:table-cell>
          <table:table-cell table:formula="of:=[.D1931]-[.D193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B1930]+9" office:value-type="float" office:value="17370" calcext:value-type="float">
            <text:p>17370</text:p>
          </table:table-cell>
          <table:table-cell office:value-type="float" office:value="8640000" calcext:value-type="float">
            <text:p>8640000</text:p>
          </table:table-cell>
          <table:table-cell table:formula="of:=[.B1931]/[.C1931]" office:value-type="float" office:value="0.00201041666666667" calcext:value-type="float">
            <text:p>0,00201041666666667000</text:p>
          </table:table-cell>
          <table:table-cell table:formula="of:=[.D1932]-[.D193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B1931]+9" office:value-type="float" office:value="17379" calcext:value-type="float">
            <text:p>17379</text:p>
          </table:table-cell>
          <table:table-cell office:value-type="float" office:value="8640000" calcext:value-type="float">
            <text:p>8640000</text:p>
          </table:table-cell>
          <table:table-cell table:formula="of:=[.B1932]/[.C1932]" office:value-type="float" office:value="0.00201145833333333" calcext:value-type="float">
            <text:p>0,00201145833333333000</text:p>
          </table:table-cell>
          <table:table-cell table:formula="of:=[.D1933]-[.D193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B1932]+9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1933]/[.C1933]" office:value-type="float" office:value="0.0020125" calcext:value-type="float">
            <text:p>0,00201250000000000000</text:p>
          </table:table-cell>
          <table:table-cell table:formula="of:=[.D1934]-[.D193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B1933]+9" office:value-type="float" office:value="17397" calcext:value-type="float">
            <text:p>17397</text:p>
          </table:table-cell>
          <table:table-cell office:value-type="float" office:value="8640000" calcext:value-type="float">
            <text:p>8640000</text:p>
          </table:table-cell>
          <table:table-cell table:formula="of:=[.B1934]/[.C1934]" office:value-type="float" office:value="0.00201354166666667" calcext:value-type="float">
            <text:p>0,00201354166666667000</text:p>
          </table:table-cell>
          <table:table-cell table:formula="of:=[.D1935]-[.D193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B1934]+9" office:value-type="float" office:value="17406" calcext:value-type="float">
            <text:p>17406</text:p>
          </table:table-cell>
          <table:table-cell office:value-type="float" office:value="8640000" calcext:value-type="float">
            <text:p>8640000</text:p>
          </table:table-cell>
          <table:table-cell table:formula="of:=[.B1935]/[.C1935]" office:value-type="float" office:value="0.00201458333333333" calcext:value-type="float">
            <text:p>0,00201458333333333000</text:p>
          </table:table-cell>
          <table:table-cell table:formula="of:=[.D1936]-[.D19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B1935]+9" office:value-type="float" office:value="17415" calcext:value-type="float">
            <text:p>17415</text:p>
          </table:table-cell>
          <table:table-cell office:value-type="float" office:value="8640000" calcext:value-type="float">
            <text:p>8640000</text:p>
          </table:table-cell>
          <table:table-cell table:formula="of:=[.B1936]/[.C1936]" office:value-type="float" office:value="0.002015625" calcext:value-type="float">
            <text:p>0,00201562500000000000</text:p>
          </table:table-cell>
          <table:table-cell table:formula="of:=[.D1937]-[.D193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B1936]+9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1937]/[.C1937]" office:value-type="float" office:value="0.00201666666666667" calcext:value-type="float">
            <text:p>0,00201666666666667000</text:p>
          </table:table-cell>
          <table:table-cell table:formula="of:=[.D1938]-[.D193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B1937]+9" office:value-type="float" office:value="17433" calcext:value-type="float">
            <text:p>17433</text:p>
          </table:table-cell>
          <table:table-cell office:value-type="float" office:value="8640000" calcext:value-type="float">
            <text:p>8640000</text:p>
          </table:table-cell>
          <table:table-cell table:formula="of:=[.B1938]/[.C1938]" office:value-type="float" office:value="0.00201770833333333" calcext:value-type="float">
            <text:p>0,00201770833333333000</text:p>
          </table:table-cell>
          <table:table-cell table:formula="of:=[.D1939]-[.D193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B1938]+9" office:value-type="float" office:value="17442" calcext:value-type="float">
            <text:p>17442</text:p>
          </table:table-cell>
          <table:table-cell office:value-type="float" office:value="8640000" calcext:value-type="float">
            <text:p>8640000</text:p>
          </table:table-cell>
          <table:table-cell table:formula="of:=[.B1939]/[.C1939]" office:value-type="float" office:value="0.00201875" calcext:value-type="float">
            <text:p>0,00201875000000000000</text:p>
          </table:table-cell>
          <table:table-cell table:formula="of:=[.D1940]-[.D19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B1939]+9" office:value-type="float" office:value="17451" calcext:value-type="float">
            <text:p>17451</text:p>
          </table:table-cell>
          <table:table-cell office:value-type="float" office:value="8640000" calcext:value-type="float">
            <text:p>8640000</text:p>
          </table:table-cell>
          <table:table-cell table:formula="of:=[.B1940]/[.C1940]" office:value-type="float" office:value="0.00201979166666667" calcext:value-type="float">
            <text:p>0,00201979166666667000</text:p>
          </table:table-cell>
          <table:table-cell table:formula="of:=[.D1941]-[.D19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B1940]+9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1941]/[.C1941]" office:value-type="float" office:value="0.00202083333333333" calcext:value-type="float">
            <text:p>0,00202083333333333000</text:p>
          </table:table-cell>
          <table:table-cell table:formula="of:=[.D1942]-[.D19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B1941]+9" office:value-type="float" office:value="17469" calcext:value-type="float">
            <text:p>17469</text:p>
          </table:table-cell>
          <table:table-cell office:value-type="float" office:value="8640000" calcext:value-type="float">
            <text:p>8640000</text:p>
          </table:table-cell>
          <table:table-cell table:formula="of:=[.B1942]/[.C1942]" office:value-type="float" office:value="0.002021875" calcext:value-type="float">
            <text:p>0,00202187500000000000</text:p>
          </table:table-cell>
          <table:table-cell table:formula="of:=[.D1943]-[.D194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B1942]+9" office:value-type="float" office:value="17478" calcext:value-type="float">
            <text:p>17478</text:p>
          </table:table-cell>
          <table:table-cell office:value-type="float" office:value="8640000" calcext:value-type="float">
            <text:p>8640000</text:p>
          </table:table-cell>
          <table:table-cell table:formula="of:=[.B1943]/[.C1943]" office:value-type="float" office:value="0.00202291666666667" calcext:value-type="float">
            <text:p>0,00202291666666667000</text:p>
          </table:table-cell>
          <table:table-cell table:formula="of:=[.D1944]-[.D19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B1943]+9" office:value-type="float" office:value="17487" calcext:value-type="float">
            <text:p>17487</text:p>
          </table:table-cell>
          <table:table-cell office:value-type="float" office:value="8640000" calcext:value-type="float">
            <text:p>8640000</text:p>
          </table:table-cell>
          <table:table-cell table:formula="of:=[.B1944]/[.C1944]" office:value-type="float" office:value="0.00202395833333333" calcext:value-type="float">
            <text:p>0,00202395833333333000</text:p>
          </table:table-cell>
          <table:table-cell table:formula="of:=[.D1945]-[.D194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B1944]+9" office:value-type="float" office:value="17496" calcext:value-type="float">
            <text:p>17496</text:p>
          </table:table-cell>
          <table:table-cell office:value-type="float" office:value="8640000" calcext:value-type="float">
            <text:p>8640000</text:p>
          </table:table-cell>
          <table:table-cell table:formula="of:=[.B1945]/[.C1945]" office:value-type="float" office:value="0.002025" calcext:value-type="float">
            <text:p>0,00202500000000000000</text:p>
          </table:table-cell>
          <table:table-cell table:formula="of:=[.D1946]-[.D194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B1945]+9" office:value-type="float" office:value="17505" calcext:value-type="float">
            <text:p>17505</text:p>
          </table:table-cell>
          <table:table-cell office:value-type="float" office:value="8640000" calcext:value-type="float">
            <text:p>8640000</text:p>
          </table:table-cell>
          <table:table-cell table:formula="of:=[.B1946]/[.C1946]" office:value-type="float" office:value="0.00202604166666667" calcext:value-type="float">
            <text:p>0,00202604166666667000</text:p>
          </table:table-cell>
          <table:table-cell table:formula="of:=[.D1947]-[.D19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B1946]+9" office:value-type="float" office:value="17514" calcext:value-type="float">
            <text:p>17514</text:p>
          </table:table-cell>
          <table:table-cell office:value-type="float" office:value="8640000" calcext:value-type="float">
            <text:p>8640000</text:p>
          </table:table-cell>
          <table:table-cell table:formula="of:=[.B1947]/[.C1947]" office:value-type="float" office:value="0.00202708333333333" calcext:value-type="float">
            <text:p>0,00202708333333333000</text:p>
          </table:table-cell>
          <table:table-cell table:formula="of:=[.D1948]-[.D19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B1947]+9" office:value-type="float" office:value="17523" calcext:value-type="float">
            <text:p>17523</text:p>
          </table:table-cell>
          <table:table-cell office:value-type="float" office:value="8640000" calcext:value-type="float">
            <text:p>8640000</text:p>
          </table:table-cell>
          <table:table-cell table:formula="of:=[.B1948]/[.C1948]" office:value-type="float" office:value="0.002028125" calcext:value-type="float">
            <text:p>0,00202812500000000000</text:p>
          </table:table-cell>
          <table:table-cell table:formula="of:=[.D1949]-[.D194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B1948]+9" office:value-type="float" office:value="17532" calcext:value-type="float">
            <text:p>17532</text:p>
          </table:table-cell>
          <table:table-cell office:value-type="float" office:value="8640000" calcext:value-type="float">
            <text:p>8640000</text:p>
          </table:table-cell>
          <table:table-cell table:formula="of:=[.B1949]/[.C1949]" office:value-type="float" office:value="0.00202916666666667" calcext:value-type="float">
            <text:p>0,00202916666666667000</text:p>
          </table:table-cell>
          <table:table-cell table:formula="of:=[.D1950]-[.D194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B1949]+9" office:value-type="float" office:value="17541" calcext:value-type="float">
            <text:p>17541</text:p>
          </table:table-cell>
          <table:table-cell office:value-type="float" office:value="8640000" calcext:value-type="float">
            <text:p>8640000</text:p>
          </table:table-cell>
          <table:table-cell table:formula="of:=[.B1950]/[.C1950]" office:value-type="float" office:value="0.00203020833333333" calcext:value-type="float">
            <text:p>0,00203020833333333000</text:p>
          </table:table-cell>
          <table:table-cell table:formula="of:=[.D1951]-[.D195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B1950]+9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1951]/[.C1951]" office:value-type="float" office:value="0.00203125" calcext:value-type="float">
            <text:p>0,00203125000000000000</text:p>
          </table:table-cell>
          <table:table-cell table:formula="of:=[.D1952]-[.D19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B1951]+9" office:value-type="float" office:value="17559" calcext:value-type="float">
            <text:p>17559</text:p>
          </table:table-cell>
          <table:table-cell office:value-type="float" office:value="8640000" calcext:value-type="float">
            <text:p>8640000</text:p>
          </table:table-cell>
          <table:table-cell table:formula="of:=[.B1952]/[.C1952]" office:value-type="float" office:value="0.00203229166666667" calcext:value-type="float">
            <text:p>0,00203229166666667000</text:p>
          </table:table-cell>
          <table:table-cell table:formula="of:=[.D1953]-[.D195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B1952]+9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1953]/[.C1953]" office:value-type="float" office:value="0.00203333333333333" calcext:value-type="float">
            <text:p>0,00203333333333333000</text:p>
          </table:table-cell>
          <table:table-cell table:formula="of:=[.D1954]-[.D195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B1953]+9" office:value-type="float" office:value="17577" calcext:value-type="float">
            <text:p>17577</text:p>
          </table:table-cell>
          <table:table-cell office:value-type="float" office:value="8640000" calcext:value-type="float">
            <text:p>8640000</text:p>
          </table:table-cell>
          <table:table-cell table:formula="of:=[.B1954]/[.C1954]" office:value-type="float" office:value="0.002034375" calcext:value-type="float">
            <text:p>0,00203437500000000000</text:p>
          </table:table-cell>
          <table:table-cell table:formula="of:=[.D1955]-[.D19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B1954]+9" office:value-type="float" office:value="17586" calcext:value-type="float">
            <text:p>17586</text:p>
          </table:table-cell>
          <table:table-cell office:value-type="float" office:value="8640000" calcext:value-type="float">
            <text:p>8640000</text:p>
          </table:table-cell>
          <table:table-cell table:formula="of:=[.B1955]/[.C1955]" office:value-type="float" office:value="0.00203541666666667" calcext:value-type="float">
            <text:p>0,00203541666666667000</text:p>
          </table:table-cell>
          <table:table-cell table:formula="of:=[.D1956]-[.D195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B1955]+9" office:value-type="float" office:value="17595" calcext:value-type="float">
            <text:p>17595</text:p>
          </table:table-cell>
          <table:table-cell office:value-type="float" office:value="8640000" calcext:value-type="float">
            <text:p>8640000</text:p>
          </table:table-cell>
          <table:table-cell table:formula="of:=[.B1956]/[.C1956]" office:value-type="float" office:value="0.00203645833333333" calcext:value-type="float">
            <text:p>0,00203645833333333000</text:p>
          </table:table-cell>
          <table:table-cell table:formula="of:=[.D1957]-[.D19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B1956]+9" office:value-type="float" office:value="17604" calcext:value-type="float">
            <text:p>17604</text:p>
          </table:table-cell>
          <table:table-cell office:value-type="float" office:value="8640000" calcext:value-type="float">
            <text:p>8640000</text:p>
          </table:table-cell>
          <table:table-cell table:formula="of:=[.B1957]/[.C1957]" office:value-type="float" office:value="0.0020375" calcext:value-type="float">
            <text:p>0,00203750000000000000</text:p>
          </table:table-cell>
          <table:table-cell table:formula="of:=[.D1958]-[.D195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B1957]+9" office:value-type="float" office:value="17613" calcext:value-type="float">
            <text:p>17613</text:p>
          </table:table-cell>
          <table:table-cell office:value-type="float" office:value="8640000" calcext:value-type="float">
            <text:p>8640000</text:p>
          </table:table-cell>
          <table:table-cell table:formula="of:=[.B1958]/[.C1958]" office:value-type="float" office:value="0.00203854166666667" calcext:value-type="float">
            <text:p>0,00203854166666667000</text:p>
          </table:table-cell>
          <table:table-cell table:formula="of:=[.D1959]-[.D19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B1958]+9" office:value-type="float" office:value="17622" calcext:value-type="float">
            <text:p>17622</text:p>
          </table:table-cell>
          <table:table-cell office:value-type="float" office:value="8640000" calcext:value-type="float">
            <text:p>8640000</text:p>
          </table:table-cell>
          <table:table-cell table:formula="of:=[.B1959]/[.C1959]" office:value-type="float" office:value="0.00203958333333333" calcext:value-type="float">
            <text:p>0,00203958333333333000</text:p>
          </table:table-cell>
          <table:table-cell table:formula="of:=[.D1960]-[.D195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B1959]+9" office:value-type="float" office:value="17631" calcext:value-type="float">
            <text:p>17631</text:p>
          </table:table-cell>
          <table:table-cell office:value-type="float" office:value="8640000" calcext:value-type="float">
            <text:p>8640000</text:p>
          </table:table-cell>
          <table:table-cell table:formula="of:=[.B1960]/[.C1960]" office:value-type="float" office:value="0.002040625" calcext:value-type="float">
            <text:p>0,00204062500000000000</text:p>
          </table:table-cell>
          <table:table-cell table:formula="of:=[.D1961]-[.D19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B1960]+9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1961]/[.C1961]" office:value-type="float" office:value="0.00204166666666667" calcext:value-type="float">
            <text:p>0,00204166666666667000</text:p>
          </table:table-cell>
          <table:table-cell table:formula="of:=[.D1962]-[.D196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B1961]+9" office:value-type="float" office:value="17649" calcext:value-type="float">
            <text:p>17649</text:p>
          </table:table-cell>
          <table:table-cell office:value-type="float" office:value="8640000" calcext:value-type="float">
            <text:p>8640000</text:p>
          </table:table-cell>
          <table:table-cell table:formula="of:=[.B1962]/[.C1962]" office:value-type="float" office:value="0.00204270833333333" calcext:value-type="float">
            <text:p>0,00204270833333333000</text:p>
          </table:table-cell>
          <table:table-cell table:formula="of:=[.D1963]-[.D19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B1962]+9" office:value-type="float" office:value="17658" calcext:value-type="float">
            <text:p>17658</text:p>
          </table:table-cell>
          <table:table-cell office:value-type="float" office:value="8640000" calcext:value-type="float">
            <text:p>8640000</text:p>
          </table:table-cell>
          <table:table-cell table:formula="of:=[.B1963]/[.C1963]" office:value-type="float" office:value="0.00204375" calcext:value-type="float">
            <text:p>0,00204375000000000000</text:p>
          </table:table-cell>
          <table:table-cell table:formula="of:=[.D1964]-[.D196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B1963]+9" office:value-type="float" office:value="17667" calcext:value-type="float">
            <text:p>17667</text:p>
          </table:table-cell>
          <table:table-cell office:value-type="float" office:value="8640000" calcext:value-type="float">
            <text:p>8640000</text:p>
          </table:table-cell>
          <table:table-cell table:formula="of:=[.B1964]/[.C1964]" office:value-type="float" office:value="0.00204479166666667" calcext:value-type="float">
            <text:p>0,00204479166666667000</text:p>
          </table:table-cell>
          <table:table-cell table:formula="of:=[.D1965]-[.D196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B1964]+9" office:value-type="float" office:value="17676" calcext:value-type="float">
            <text:p>17676</text:p>
          </table:table-cell>
          <table:table-cell office:value-type="float" office:value="8640000" calcext:value-type="float">
            <text:p>8640000</text:p>
          </table:table-cell>
          <table:table-cell table:formula="of:=[.B1965]/[.C1965]" office:value-type="float" office:value="0.00204583333333333" calcext:value-type="float">
            <text:p>0,00204583333333333000</text:p>
          </table:table-cell>
          <table:table-cell table:formula="of:=[.D1966]-[.D196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B1965]+9" office:value-type="float" office:value="17685" calcext:value-type="float">
            <text:p>17685</text:p>
          </table:table-cell>
          <table:table-cell office:value-type="float" office:value="8640000" calcext:value-type="float">
            <text:p>8640000</text:p>
          </table:table-cell>
          <table:table-cell table:formula="of:=[.B1966]/[.C1966]" office:value-type="float" office:value="0.002046875" calcext:value-type="float">
            <text:p>0,00204687500000000000</text:p>
          </table:table-cell>
          <table:table-cell table:formula="of:=[.D1967]-[.D19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B1966]+9" office:value-type="float" office:value="17694" calcext:value-type="float">
            <text:p>17694</text:p>
          </table:table-cell>
          <table:table-cell office:value-type="float" office:value="8640000" calcext:value-type="float">
            <text:p>8640000</text:p>
          </table:table-cell>
          <table:table-cell table:formula="of:=[.B1967]/[.C1967]" office:value-type="float" office:value="0.00204791666666667" calcext:value-type="float">
            <text:p>0,00204791666666667000</text:p>
          </table:table-cell>
          <table:table-cell table:formula="of:=[.D1968]-[.D196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B1967]+9" office:value-type="float" office:value="17703" calcext:value-type="float">
            <text:p>17703</text:p>
          </table:table-cell>
          <table:table-cell office:value-type="float" office:value="8640000" calcext:value-type="float">
            <text:p>8640000</text:p>
          </table:table-cell>
          <table:table-cell table:formula="of:=[.B1968]/[.C1968]" office:value-type="float" office:value="0.00204895833333333" calcext:value-type="float">
            <text:p>0,00204895833333333000</text:p>
          </table:table-cell>
          <table:table-cell table:formula="of:=[.D1969]-[.D196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B1968]+9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1969]/[.C1969]" office:value-type="float" office:value="0.00205" calcext:value-type="float">
            <text:p>0,00205000000000000000</text:p>
          </table:table-cell>
          <table:table-cell table:formula="of:=[.D1970]-[.D196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B1969]+9" office:value-type="float" office:value="17721" calcext:value-type="float">
            <text:p>17721</text:p>
          </table:table-cell>
          <table:table-cell office:value-type="float" office:value="8640000" calcext:value-type="float">
            <text:p>8640000</text:p>
          </table:table-cell>
          <table:table-cell table:formula="of:=[.B1970]/[.C1970]" office:value-type="float" office:value="0.00205104166666667" calcext:value-type="float">
            <text:p>0,00205104166666667000</text:p>
          </table:table-cell>
          <table:table-cell table:formula="of:=[.D1971]-[.D197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B1970]+9" office:value-type="float" office:value="17730" calcext:value-type="float">
            <text:p>17730</text:p>
          </table:table-cell>
          <table:table-cell office:value-type="float" office:value="8640000" calcext:value-type="float">
            <text:p>8640000</text:p>
          </table:table-cell>
          <table:table-cell table:formula="of:=[.B1971]/[.C1971]" office:value-type="float" office:value="0.00205208333333333" calcext:value-type="float">
            <text:p>0,00205208333333333000</text:p>
          </table:table-cell>
          <table:table-cell table:formula="of:=[.D1972]-[.D197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B1971]+9" office:value-type="float" office:value="17739" calcext:value-type="float">
            <text:p>17739</text:p>
          </table:table-cell>
          <table:table-cell office:value-type="float" office:value="8640000" calcext:value-type="float">
            <text:p>8640000</text:p>
          </table:table-cell>
          <table:table-cell table:formula="of:=[.B1972]/[.C1972]" office:value-type="float" office:value="0.002053125" calcext:value-type="float">
            <text:p>0,00205312500000000000</text:p>
          </table:table-cell>
          <table:table-cell table:formula="of:=[.D1973]-[.D197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B1972]+9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1973]/[.C1973]" office:value-type="float" office:value="0.00205416666666667" calcext:value-type="float">
            <text:p>0,00205416666666667000</text:p>
          </table:table-cell>
          <table:table-cell table:formula="of:=[.D1974]-[.D197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B1973]+9" office:value-type="float" office:value="17757" calcext:value-type="float">
            <text:p>17757</text:p>
          </table:table-cell>
          <table:table-cell office:value-type="float" office:value="8640000" calcext:value-type="float">
            <text:p>8640000</text:p>
          </table:table-cell>
          <table:table-cell table:formula="of:=[.B1974]/[.C1974]" office:value-type="float" office:value="0.00205520833333333" calcext:value-type="float">
            <text:p>0,00205520833333333000</text:p>
          </table:table-cell>
          <table:table-cell table:formula="of:=[.D1975]-[.D197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B1974]+9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1975]/[.C1975]" office:value-type="float" office:value="0.00205625" calcext:value-type="float">
            <text:p>0,00205625000000000000</text:p>
          </table:table-cell>
          <table:table-cell table:formula="of:=[.D1976]-[.D19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B1975]+9" office:value-type="float" office:value="17775" calcext:value-type="float">
            <text:p>17775</text:p>
          </table:table-cell>
          <table:table-cell office:value-type="float" office:value="8640000" calcext:value-type="float">
            <text:p>8640000</text:p>
          </table:table-cell>
          <table:table-cell table:formula="of:=[.B1976]/[.C1976]" office:value-type="float" office:value="0.00205729166666667" calcext:value-type="float">
            <text:p>0,00205729166666667000</text:p>
          </table:table-cell>
          <table:table-cell table:formula="of:=[.D1977]-[.D197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B1976]+9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1977]/[.C1977]" office:value-type="float" office:value="0.00205833333333333" calcext:value-type="float">
            <text:p>0,00205833333333333000</text:p>
          </table:table-cell>
          <table:table-cell table:formula="of:=[.D1978]-[.D197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B1977]+9" office:value-type="float" office:value="17793" calcext:value-type="float">
            <text:p>17793</text:p>
          </table:table-cell>
          <table:table-cell office:value-type="float" office:value="8640000" calcext:value-type="float">
            <text:p>8640000</text:p>
          </table:table-cell>
          <table:table-cell table:formula="of:=[.B1978]/[.C1978]" office:value-type="float" office:value="0.002059375" calcext:value-type="float">
            <text:p>0,00205937500000000000</text:p>
          </table:table-cell>
          <table:table-cell table:formula="of:=[.D1979]-[.D197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B1978]+9" office:value-type="float" office:value="17802" calcext:value-type="float">
            <text:p>17802</text:p>
          </table:table-cell>
          <table:table-cell office:value-type="float" office:value="8640000" calcext:value-type="float">
            <text:p>8640000</text:p>
          </table:table-cell>
          <table:table-cell table:formula="of:=[.B1979]/[.C1979]" office:value-type="float" office:value="0.00206041666666667" calcext:value-type="float">
            <text:p>0,00206041666666667000</text:p>
          </table:table-cell>
          <table:table-cell table:formula="of:=[.D1980]-[.D197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B1979]+9" office:value-type="float" office:value="17811" calcext:value-type="float">
            <text:p>17811</text:p>
          </table:table-cell>
          <table:table-cell office:value-type="float" office:value="8640000" calcext:value-type="float">
            <text:p>8640000</text:p>
          </table:table-cell>
          <table:table-cell table:formula="of:=[.B1980]/[.C1980]" office:value-type="float" office:value="0.00206145833333333" calcext:value-type="float">
            <text:p>0,00206145833333333000</text:p>
          </table:table-cell>
          <table:table-cell table:formula="of:=[.D1981]-[.D19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B1980]+9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1981]/[.C1981]" office:value-type="float" office:value="0.0020625" calcext:value-type="float">
            <text:p>0,00206250000000000000</text:p>
          </table:table-cell>
          <table:table-cell table:formula="of:=[.D1982]-[.D198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B1981]+9" office:value-type="float" office:value="17829" calcext:value-type="float">
            <text:p>17829</text:p>
          </table:table-cell>
          <table:table-cell office:value-type="float" office:value="8640000" calcext:value-type="float">
            <text:p>8640000</text:p>
          </table:table-cell>
          <table:table-cell table:formula="of:=[.B1982]/[.C1982]" office:value-type="float" office:value="0.00206354166666667" calcext:value-type="float">
            <text:p>0,00206354166666667000</text:p>
          </table:table-cell>
          <table:table-cell table:formula="of:=[.D1983]-[.D198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B1982]+9" office:value-type="float" office:value="17838" calcext:value-type="float">
            <text:p>17838</text:p>
          </table:table-cell>
          <table:table-cell office:value-type="float" office:value="8640000" calcext:value-type="float">
            <text:p>8640000</text:p>
          </table:table-cell>
          <table:table-cell table:formula="of:=[.B1983]/[.C1983]" office:value-type="float" office:value="0.00206458333333333" calcext:value-type="float">
            <text:p>0,00206458333333333000</text:p>
          </table:table-cell>
          <table:table-cell table:formula="of:=[.D1984]-[.D198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B1983]+9" office:value-type="float" office:value="17847" calcext:value-type="float">
            <text:p>17847</text:p>
          </table:table-cell>
          <table:table-cell office:value-type="float" office:value="8640000" calcext:value-type="float">
            <text:p>8640000</text:p>
          </table:table-cell>
          <table:table-cell table:formula="of:=[.B1984]/[.C1984]" office:value-type="float" office:value="0.002065625" calcext:value-type="float">
            <text:p>0,00206562500000000000</text:p>
          </table:table-cell>
          <table:table-cell table:formula="of:=[.D1985]-[.D198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B1984]+9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1985]/[.C1985]" office:value-type="float" office:value="0.00206666666666667" calcext:value-type="float">
            <text:p>0,00206666666666667000</text:p>
          </table:table-cell>
          <table:table-cell table:formula="of:=[.D1986]-[.D198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B1985]+9" office:value-type="float" office:value="17865" calcext:value-type="float">
            <text:p>17865</text:p>
          </table:table-cell>
          <table:table-cell office:value-type="float" office:value="8640000" calcext:value-type="float">
            <text:p>8640000</text:p>
          </table:table-cell>
          <table:table-cell table:formula="of:=[.B1986]/[.C1986]" office:value-type="float" office:value="0.00206770833333333" calcext:value-type="float">
            <text:p>0,00206770833333333000</text:p>
          </table:table-cell>
          <table:table-cell table:formula="of:=[.D1987]-[.D19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B1986]+9" office:value-type="float" office:value="17874" calcext:value-type="float">
            <text:p>17874</text:p>
          </table:table-cell>
          <table:table-cell office:value-type="float" office:value="8640000" calcext:value-type="float">
            <text:p>8640000</text:p>
          </table:table-cell>
          <table:table-cell table:formula="of:=[.B1987]/[.C1987]" office:value-type="float" office:value="0.00206875" calcext:value-type="float">
            <text:p>0,00206875000000000000</text:p>
          </table:table-cell>
          <table:table-cell table:formula="of:=[.D1988]-[.D198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B1987]+9" office:value-type="float" office:value="17883" calcext:value-type="float">
            <text:p>17883</text:p>
          </table:table-cell>
          <table:table-cell office:value-type="float" office:value="8640000" calcext:value-type="float">
            <text:p>8640000</text:p>
          </table:table-cell>
          <table:table-cell table:formula="of:=[.B1988]/[.C1988]" office:value-type="float" office:value="0.00206979166666667" calcext:value-type="float">
            <text:p>0,00206979166666667000</text:p>
          </table:table-cell>
          <table:table-cell table:formula="of:=[.D1989]-[.D19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B1988]+9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1989]/[.C1989]" office:value-type="float" office:value="0.00207083333333333" calcext:value-type="float">
            <text:p>0,00207083333333333000</text:p>
          </table:table-cell>
          <table:table-cell table:formula="of:=[.D1990]-[.D198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B1989]+9" office:value-type="float" office:value="17901" calcext:value-type="float">
            <text:p>17901</text:p>
          </table:table-cell>
          <table:table-cell office:value-type="float" office:value="8640000" calcext:value-type="float">
            <text:p>8640000</text:p>
          </table:table-cell>
          <table:table-cell table:formula="of:=[.B1990]/[.C1990]" office:value-type="float" office:value="0.002071875" calcext:value-type="float">
            <text:p>0,00207187500000000000</text:p>
          </table:table-cell>
          <table:table-cell table:formula="of:=[.D1991]-[.D19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B1990]+9" office:value-type="float" office:value="17910" calcext:value-type="float">
            <text:p>17910</text:p>
          </table:table-cell>
          <table:table-cell office:value-type="float" office:value="8640000" calcext:value-type="float">
            <text:p>8640000</text:p>
          </table:table-cell>
          <table:table-cell table:formula="of:=[.B1991]/[.C1991]" office:value-type="float" office:value="0.00207291666666667" calcext:value-type="float">
            <text:p>0,00207291666666667000</text:p>
          </table:table-cell>
          <table:table-cell table:formula="of:=[.D1992]-[.D199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B1991]+9" office:value-type="float" office:value="17919" calcext:value-type="float">
            <text:p>17919</text:p>
          </table:table-cell>
          <table:table-cell office:value-type="float" office:value="8640000" calcext:value-type="float">
            <text:p>8640000</text:p>
          </table:table-cell>
          <table:table-cell table:formula="of:=[.B1992]/[.C1992]" office:value-type="float" office:value="0.00207395833333333" calcext:value-type="float">
            <text:p>0,00207395833333333000</text:p>
          </table:table-cell>
          <table:table-cell table:formula="of:=[.D1993]-[.D19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B1992]+9" office:value-type="float" office:value="17928" calcext:value-type="float">
            <text:p>17928</text:p>
          </table:table-cell>
          <table:table-cell office:value-type="float" office:value="8640000" calcext:value-type="float">
            <text:p>8640000</text:p>
          </table:table-cell>
          <table:table-cell table:formula="of:=[.B1993]/[.C1993]" office:value-type="float" office:value="0.002075" calcext:value-type="float">
            <text:p>0,00207500000000000000</text:p>
          </table:table-cell>
          <table:table-cell table:formula="of:=[.D1994]-[.D199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B1993]+9" office:value-type="float" office:value="17937" calcext:value-type="float">
            <text:p>17937</text:p>
          </table:table-cell>
          <table:table-cell office:value-type="float" office:value="8640000" calcext:value-type="float">
            <text:p>8640000</text:p>
          </table:table-cell>
          <table:table-cell table:formula="of:=[.B1994]/[.C1994]" office:value-type="float" office:value="0.00207604166666667" calcext:value-type="float">
            <text:p>0,00207604166666667000</text:p>
          </table:table-cell>
          <table:table-cell table:formula="of:=[.D1995]-[.D19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B1994]+9" office:value-type="float" office:value="17946" calcext:value-type="float">
            <text:p>17946</text:p>
          </table:table-cell>
          <table:table-cell office:value-type="float" office:value="8640000" calcext:value-type="float">
            <text:p>8640000</text:p>
          </table:table-cell>
          <table:table-cell table:formula="of:=[.B1995]/[.C1995]" office:value-type="float" office:value="0.00207708333333333" calcext:value-type="float">
            <text:p>0,00207708333333333000</text:p>
          </table:table-cell>
          <table:table-cell table:formula="of:=[.D1996]-[.D199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B1995]+9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1996]/[.C1996]" office:value-type="float" office:value="0.002078125" calcext:value-type="float">
            <text:p>0,00207812500000000000</text:p>
          </table:table-cell>
          <table:table-cell table:formula="of:=[.D1997]-[.D199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B1996]+9" office:value-type="float" office:value="17964" calcext:value-type="float">
            <text:p>17964</text:p>
          </table:table-cell>
          <table:table-cell office:value-type="float" office:value="8640000" calcext:value-type="float">
            <text:p>8640000</text:p>
          </table:table-cell>
          <table:table-cell table:formula="of:=[.B1997]/[.C1997]" office:value-type="float" office:value="0.00207916666666667" calcext:value-type="float">
            <text:p>0,00207916666666667000</text:p>
          </table:table-cell>
          <table:table-cell table:formula="of:=[.D1998]-[.D199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B1997]+9" office:value-type="float" office:value="17973" calcext:value-type="float">
            <text:p>17973</text:p>
          </table:table-cell>
          <table:table-cell office:value-type="float" office:value="8640000" calcext:value-type="float">
            <text:p>8640000</text:p>
          </table:table-cell>
          <table:table-cell table:formula="of:=[.B1998]/[.C1998]" office:value-type="float" office:value="0.00208020833333333" calcext:value-type="float">
            <text:p>0,00208020833333333000</text:p>
          </table:table-cell>
          <table:table-cell table:formula="of:=[.D1999]-[.D199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B1998]+9" office:value-type="float" office:value="17982" calcext:value-type="float">
            <text:p>17982</text:p>
          </table:table-cell>
          <table:table-cell office:value-type="float" office:value="8640000" calcext:value-type="float">
            <text:p>8640000</text:p>
          </table:table-cell>
          <table:table-cell table:formula="of:=[.B1999]/[.C1999]" office:value-type="float" office:value="0.00208125" calcext:value-type="float">
            <text:p>0,00208125000000000000</text:p>
          </table:table-cell>
          <table:table-cell table:formula="of:=[.D2000]-[.D199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B1999]+9" office:value-type="float" office:value="17991" calcext:value-type="float">
            <text:p>17991</text:p>
          </table:table-cell>
          <table:table-cell office:value-type="float" office:value="8640000" calcext:value-type="float">
            <text:p>8640000</text:p>
          </table:table-cell>
          <table:table-cell table:formula="of:=[.B2000]/[.C2000]" office:value-type="float" office:value="0.00208229166666667" calcext:value-type="float">
            <text:p>0,00208229166666667000</text:p>
          </table:table-cell>
          <table:table-cell table:formula="of:=[.D2001]-[.D200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000]+9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2001]/[.C2001]" office:value-type="float" office:value="0.00208333333333333" calcext:value-type="float">
            <text:p>0,00208333333333333000</text:p>
          </table:table-cell>
          <table:table-cell table:formula="of:=[.D2002]-[.D20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B2001]+9" office:value-type="float" office:value="18009" calcext:value-type="float">
            <text:p>18009</text:p>
          </table:table-cell>
          <table:table-cell office:value-type="float" office:value="8640000" calcext:value-type="float">
            <text:p>8640000</text:p>
          </table:table-cell>
          <table:table-cell table:formula="of:=[.B2002]/[.C2002]" office:value-type="float" office:value="0.002084375" calcext:value-type="float">
            <text:p>0,00208437500000000000</text:p>
          </table:table-cell>
          <table:table-cell table:formula="of:=[.D2003]-[.D200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B2002]+9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2003]/[.C2003]" office:value-type="float" office:value="0.00208541666666667" calcext:value-type="float">
            <text:p>0,00208541666666667000</text:p>
          </table:table-cell>
          <table:table-cell table:formula="of:=[.D2004]-[.D20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B2003]+9" office:value-type="float" office:value="18027" calcext:value-type="float">
            <text:p>18027</text:p>
          </table:table-cell>
          <table:table-cell office:value-type="float" office:value="8640000" calcext:value-type="float">
            <text:p>8640000</text:p>
          </table:table-cell>
          <table:table-cell table:formula="of:=[.B2004]/[.C2004]" office:value-type="float" office:value="0.00208645833333333" calcext:value-type="float">
            <text:p>0,00208645833333333000</text:p>
          </table:table-cell>
          <table:table-cell table:formula="of:=[.D2005]-[.D200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B2004]+9" office:value-type="float" office:value="18036" calcext:value-type="float">
            <text:p>18036</text:p>
          </table:table-cell>
          <table:table-cell office:value-type="float" office:value="8640000" calcext:value-type="float">
            <text:p>8640000</text:p>
          </table:table-cell>
          <table:table-cell table:formula="of:=[.B2005]/[.C2005]" office:value-type="float" office:value="0.0020875" calcext:value-type="float">
            <text:p>0,00208750000000000000</text:p>
          </table:table-cell>
          <table:table-cell table:formula="of:=[.D2006]-[.D20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B2005]+9" office:value-type="float" office:value="18045" calcext:value-type="float">
            <text:p>18045</text:p>
          </table:table-cell>
          <table:table-cell office:value-type="float" office:value="8640000" calcext:value-type="float">
            <text:p>8640000</text:p>
          </table:table-cell>
          <table:table-cell table:formula="of:=[.B2006]/[.C2006]" office:value-type="float" office:value="0.00208854166666667" calcext:value-type="float">
            <text:p>0,00208854166666667000</text:p>
          </table:table-cell>
          <table:table-cell table:formula="of:=[.D2007]-[.D200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B2006]+9" office:value-type="float" office:value="18054" calcext:value-type="float">
            <text:p>18054</text:p>
          </table:table-cell>
          <table:table-cell office:value-type="float" office:value="8640000" calcext:value-type="float">
            <text:p>8640000</text:p>
          </table:table-cell>
          <table:table-cell table:formula="of:=[.B2007]/[.C2007]" office:value-type="float" office:value="0.00208958333333333" calcext:value-type="float">
            <text:p>0,00208958333333333000</text:p>
          </table:table-cell>
          <table:table-cell table:formula="of:=[.D2008]-[.D20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2007]+9" office:value-type="float" office:value="18063" calcext:value-type="float">
            <text:p>18063</text:p>
          </table:table-cell>
          <table:table-cell office:value-type="float" office:value="8640000" calcext:value-type="float">
            <text:p>8640000</text:p>
          </table:table-cell>
          <table:table-cell table:formula="of:=[.B2008]/[.C2008]" office:value-type="float" office:value="0.002090625" calcext:value-type="float">
            <text:p>0,00209062500000000000</text:p>
          </table:table-cell>
          <table:table-cell table:formula="of:=[.D2009]-[.D200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2008]+9" office:value-type="float" office:value="18072" calcext:value-type="float">
            <text:p>18072</text:p>
          </table:table-cell>
          <table:table-cell office:value-type="float" office:value="8640000" calcext:value-type="float">
            <text:p>8640000</text:p>
          </table:table-cell>
          <table:table-cell table:formula="of:=[.B2009]/[.C2009]" office:value-type="float" office:value="0.00209166666666667" calcext:value-type="float">
            <text:p>0,00209166666666667000</text:p>
          </table:table-cell>
          <table:table-cell table:formula="of:=[.D2010]-[.D20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2009]+9" office:value-type="float" office:value="18081" calcext:value-type="float">
            <text:p>18081</text:p>
          </table:table-cell>
          <table:table-cell office:value-type="float" office:value="8640000" calcext:value-type="float">
            <text:p>8640000</text:p>
          </table:table-cell>
          <table:table-cell table:formula="of:=[.B2010]/[.C2010]" office:value-type="float" office:value="0.00209270833333333" calcext:value-type="float">
            <text:p>0,00209270833333333000</text:p>
          </table:table-cell>
          <table:table-cell table:formula="of:=[.D2011]-[.D201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2010]+9" office:value-type="float" office:value="18090" calcext:value-type="float">
            <text:p>18090</text:p>
          </table:table-cell>
          <table:table-cell office:value-type="float" office:value="8640000" calcext:value-type="float">
            <text:p>8640000</text:p>
          </table:table-cell>
          <table:table-cell table:formula="of:=[.B2011]/[.C2011]" office:value-type="float" office:value="0.00209375" calcext:value-type="float">
            <text:p>0,00209375000000000000</text:p>
          </table:table-cell>
          <table:table-cell table:formula="of:=[.D2012]-[.D201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2011]+9" office:value-type="float" office:value="18099" calcext:value-type="float">
            <text:p>18099</text:p>
          </table:table-cell>
          <table:table-cell office:value-type="float" office:value="8640000" calcext:value-type="float">
            <text:p>8640000</text:p>
          </table:table-cell>
          <table:table-cell table:formula="of:=[.B2012]/[.C2012]" office:value-type="float" office:value="0.00209479166666667" calcext:value-type="float">
            <text:p>0,00209479166666667000</text:p>
          </table:table-cell>
          <table:table-cell table:formula="of:=[.D2013]-[.D201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2012]+9" office:value-type="float" office:value="18108" calcext:value-type="float">
            <text:p>18108</text:p>
          </table:table-cell>
          <table:table-cell office:value-type="float" office:value="8640000" calcext:value-type="float">
            <text:p>8640000</text:p>
          </table:table-cell>
          <table:table-cell table:formula="of:=[.B2013]/[.C2013]" office:value-type="float" office:value="0.00209583333333333" calcext:value-type="float">
            <text:p>0,00209583333333333000</text:p>
          </table:table-cell>
          <table:table-cell table:formula="of:=[.D2014]-[.D201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2013]+9" office:value-type="float" office:value="18117" calcext:value-type="float">
            <text:p>18117</text:p>
          </table:table-cell>
          <table:table-cell office:value-type="float" office:value="8640000" calcext:value-type="float">
            <text:p>8640000</text:p>
          </table:table-cell>
          <table:table-cell table:formula="of:=[.B2014]/[.C2014]" office:value-type="float" office:value="0.002096875" calcext:value-type="float">
            <text:p>0,00209687500000000000</text:p>
          </table:table-cell>
          <table:table-cell table:formula="of:=[.D2015]-[.D20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2014]+9" office:value-type="float" office:value="18126" calcext:value-type="float">
            <text:p>18126</text:p>
          </table:table-cell>
          <table:table-cell office:value-type="float" office:value="8640000" calcext:value-type="float">
            <text:p>8640000</text:p>
          </table:table-cell>
          <table:table-cell table:formula="of:=[.B2015]/[.C2015]" office:value-type="float" office:value="0.00209791666666667" calcext:value-type="float">
            <text:p>0,00209791666666667000</text:p>
          </table:table-cell>
          <table:table-cell table:formula="of:=[.D2016]-[.D201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2015]+9" office:value-type="float" office:value="18135" calcext:value-type="float">
            <text:p>18135</text:p>
          </table:table-cell>
          <table:table-cell office:value-type="float" office:value="8640000" calcext:value-type="float">
            <text:p>8640000</text:p>
          </table:table-cell>
          <table:table-cell table:formula="of:=[.B2016]/[.C2016]" office:value-type="float" office:value="0.00209895833333333" calcext:value-type="float">
            <text:p>0,00209895833333333000</text:p>
          </table:table-cell>
          <table:table-cell table:formula="of:=[.D2017]-[.D201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2016]+9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2017]/[.C2017]" office:value-type="float" office:value="0.0021" calcext:value-type="float">
            <text:p>0,00210000000000000000</text:p>
          </table:table-cell>
          <table:table-cell table:formula="of:=[.D2018]-[.D201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2017]+9" office:value-type="float" office:value="18153" calcext:value-type="float">
            <text:p>18153</text:p>
          </table:table-cell>
          <table:table-cell office:value-type="float" office:value="8640000" calcext:value-type="float">
            <text:p>8640000</text:p>
          </table:table-cell>
          <table:table-cell table:formula="of:=[.B2018]/[.C2018]" office:value-type="float" office:value="0.00210104166666667" calcext:value-type="float">
            <text:p>0,00210104166666667000</text:p>
          </table:table-cell>
          <table:table-cell table:formula="of:=[.D2019]-[.D20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2018]+9" office:value-type="float" office:value="18162" calcext:value-type="float">
            <text:p>18162</text:p>
          </table:table-cell>
          <table:table-cell office:value-type="float" office:value="8640000" calcext:value-type="float">
            <text:p>8640000</text:p>
          </table:table-cell>
          <table:table-cell table:formula="of:=[.B2019]/[.C2019]" office:value-type="float" office:value="0.00210208333333333" calcext:value-type="float">
            <text:p>0,00210208333333333000</text:p>
          </table:table-cell>
          <table:table-cell table:formula="of:=[.D2020]-[.D201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2019]+9" office:value-type="float" office:value="18171" calcext:value-type="float">
            <text:p>18171</text:p>
          </table:table-cell>
          <table:table-cell office:value-type="float" office:value="8640000" calcext:value-type="float">
            <text:p>8640000</text:p>
          </table:table-cell>
          <table:table-cell table:formula="of:=[.B2020]/[.C2020]" office:value-type="float" office:value="0.002103125" calcext:value-type="float">
            <text:p>0,00210312500000000000</text:p>
          </table:table-cell>
          <table:table-cell table:formula="of:=[.D2021]-[.D20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2020]+9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2021]/[.C2021]" office:value-type="float" office:value="0.00210416666666667" calcext:value-type="float">
            <text:p>0,00210416666666667000</text:p>
          </table:table-cell>
          <table:table-cell table:formula="of:=[.D2022]-[.D202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2021]+9" office:value-type="float" office:value="18189" calcext:value-type="float">
            <text:p>18189</text:p>
          </table:table-cell>
          <table:table-cell office:value-type="float" office:value="8640000" calcext:value-type="float">
            <text:p>8640000</text:p>
          </table:table-cell>
          <table:table-cell table:formula="of:=[.B2022]/[.C2022]" office:value-type="float" office:value="0.00210520833333333" calcext:value-type="float">
            <text:p>0,00210520833333333000</text:p>
          </table:table-cell>
          <table:table-cell table:formula="of:=[.D2023]-[.D20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2022]+9" office:value-type="float" office:value="18198" calcext:value-type="float">
            <text:p>18198</text:p>
          </table:table-cell>
          <table:table-cell office:value-type="float" office:value="8640000" calcext:value-type="float">
            <text:p>8640000</text:p>
          </table:table-cell>
          <table:table-cell table:formula="of:=[.B2023]/[.C2023]" office:value-type="float" office:value="0.00210625" calcext:value-type="float">
            <text:p>0,00210625000000000000</text:p>
          </table:table-cell>
          <table:table-cell table:formula="of:=[.D2024]-[.D202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B2023]+9" office:value-type="float" office:value="18207" calcext:value-type="float">
            <text:p>18207</text:p>
          </table:table-cell>
          <table:table-cell office:value-type="float" office:value="8640000" calcext:value-type="float">
            <text:p>8640000</text:p>
          </table:table-cell>
          <table:table-cell table:formula="of:=[.B2024]/[.C2024]" office:value-type="float" office:value="0.00210729166666667" calcext:value-type="float">
            <text:p>0,00210729166666667000</text:p>
          </table:table-cell>
          <table:table-cell table:formula="of:=[.D2025]-[.D20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B2024]+9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2025]/[.C2025]" office:value-type="float" office:value="0.00210833333333333" calcext:value-type="float">
            <text:p>0,00210833333333333000</text:p>
          </table:table-cell>
          <table:table-cell table:formula="of:=[.D2026]-[.D202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B2025]+9" office:value-type="float" office:value="18225" calcext:value-type="float">
            <text:p>18225</text:p>
          </table:table-cell>
          <table:table-cell office:value-type="float" office:value="8640000" calcext:value-type="float">
            <text:p>8640000</text:p>
          </table:table-cell>
          <table:table-cell table:formula="of:=[.B2026]/[.C2026]" office:value-type="float" office:value="0.002109375" calcext:value-type="float">
            <text:p>0,00210937500000000000</text:p>
          </table:table-cell>
          <table:table-cell table:formula="of:=[.D2027]-[.D20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B2026]+9" office:value-type="float" office:value="18234" calcext:value-type="float">
            <text:p>18234</text:p>
          </table:table-cell>
          <table:table-cell office:value-type="float" office:value="8640000" calcext:value-type="float">
            <text:p>8640000</text:p>
          </table:table-cell>
          <table:table-cell table:formula="of:=[.B2027]/[.C2027]" office:value-type="float" office:value="0.00211041666666667" calcext:value-type="float">
            <text:p>0,00211041666666667000</text:p>
          </table:table-cell>
          <table:table-cell table:formula="of:=[.D2028]-[.D202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B2027]+9" office:value-type="float" office:value="18243" calcext:value-type="float">
            <text:p>18243</text:p>
          </table:table-cell>
          <table:table-cell office:value-type="float" office:value="8640000" calcext:value-type="float">
            <text:p>8640000</text:p>
          </table:table-cell>
          <table:table-cell table:formula="of:=[.B2028]/[.C2028]" office:value-type="float" office:value="0.00211145833333333" calcext:value-type="float">
            <text:p>0,00211145833333333000</text:p>
          </table:table-cell>
          <table:table-cell table:formula="of:=[.D2029]-[.D20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B2028]+9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2029]/[.C2029]" office:value-type="float" office:value="0.0021125" calcext:value-type="float">
            <text:p>0,00211250000000000000</text:p>
          </table:table-cell>
          <table:table-cell table:formula="of:=[.D2030]-[.D202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B2029]+9" office:value-type="float" office:value="18261" calcext:value-type="float">
            <text:p>18261</text:p>
          </table:table-cell>
          <table:table-cell office:value-type="float" office:value="8640000" calcext:value-type="float">
            <text:p>8640000</text:p>
          </table:table-cell>
          <table:table-cell table:formula="of:=[.B2030]/[.C2030]" office:value-type="float" office:value="0.00211354166666667" calcext:value-type="float">
            <text:p>0,00211354166666667000</text:p>
          </table:table-cell>
          <table:table-cell table:formula="of:=[.D2031]-[.D203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B2030]+9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2031]/[.C2031]" office:value-type="float" office:value="0.00211458333333333" calcext:value-type="float">
            <text:p>0,00211458333333333000</text:p>
          </table:table-cell>
          <table:table-cell table:formula="of:=[.D2032]-[.D203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B2031]+9" office:value-type="float" office:value="18279" calcext:value-type="float">
            <text:p>18279</text:p>
          </table:table-cell>
          <table:table-cell office:value-type="float" office:value="8640000" calcext:value-type="float">
            <text:p>8640000</text:p>
          </table:table-cell>
          <table:table-cell table:formula="of:=[.B2032]/[.C2032]" office:value-type="float" office:value="0.002115625" calcext:value-type="float">
            <text:p>0,00211562500000000000</text:p>
          </table:table-cell>
          <table:table-cell table:formula="of:=[.D2033]-[.D203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B2032]+9" office:value-type="float" office:value="18288" calcext:value-type="float">
            <text:p>18288</text:p>
          </table:table-cell>
          <table:table-cell office:value-type="float" office:value="8640000" calcext:value-type="float">
            <text:p>8640000</text:p>
          </table:table-cell>
          <table:table-cell table:formula="of:=[.B2033]/[.C2033]" office:value-type="float" office:value="0.00211666666666667" calcext:value-type="float">
            <text:p>0,00211666666666667000</text:p>
          </table:table-cell>
          <table:table-cell table:formula="of:=[.D2034]-[.D203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B2033]+9" office:value-type="float" office:value="18297" calcext:value-type="float">
            <text:p>18297</text:p>
          </table:table-cell>
          <table:table-cell office:value-type="float" office:value="8640000" calcext:value-type="float">
            <text:p>8640000</text:p>
          </table:table-cell>
          <table:table-cell table:formula="of:=[.B2034]/[.C2034]" office:value-type="float" office:value="0.00211770833333333" calcext:value-type="float">
            <text:p>0,00211770833333333000</text:p>
          </table:table-cell>
          <table:table-cell table:formula="of:=[.D2035]-[.D203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B2034]+9" office:value-type="float" office:value="18306" calcext:value-type="float">
            <text:p>18306</text:p>
          </table:table-cell>
          <table:table-cell office:value-type="float" office:value="8640000" calcext:value-type="float">
            <text:p>8640000</text:p>
          </table:table-cell>
          <table:table-cell table:formula="of:=[.B2035]/[.C2035]" office:value-type="float" office:value="0.00211875" calcext:value-type="float">
            <text:p>0,00211875000000000000</text:p>
          </table:table-cell>
          <table:table-cell table:formula="of:=[.D2036]-[.D20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B2035]+9" office:value-type="float" office:value="18315" calcext:value-type="float">
            <text:p>18315</text:p>
          </table:table-cell>
          <table:table-cell office:value-type="float" office:value="8640000" calcext:value-type="float">
            <text:p>8640000</text:p>
          </table:table-cell>
          <table:table-cell table:formula="of:=[.B2036]/[.C2036]" office:value-type="float" office:value="0.00211979166666667" calcext:value-type="float">
            <text:p>0,00211979166666667000</text:p>
          </table:table-cell>
          <table:table-cell table:formula="of:=[.D2037]-[.D203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B2036]+9" office:value-type="float" office:value="18324" calcext:value-type="float">
            <text:p>18324</text:p>
          </table:table-cell>
          <table:table-cell office:value-type="float" office:value="8640000" calcext:value-type="float">
            <text:p>8640000</text:p>
          </table:table-cell>
          <table:table-cell table:formula="of:=[.B2037]/[.C2037]" office:value-type="float" office:value="0.00212083333333333" calcext:value-type="float">
            <text:p>0,00212083333333333000</text:p>
          </table:table-cell>
          <table:table-cell table:formula="of:=[.D2038]-[.D203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B2037]+9" office:value-type="float" office:value="18333" calcext:value-type="float">
            <text:p>18333</text:p>
          </table:table-cell>
          <table:table-cell office:value-type="float" office:value="8640000" calcext:value-type="float">
            <text:p>8640000</text:p>
          </table:table-cell>
          <table:table-cell table:formula="of:=[.B2038]/[.C2038]" office:value-type="float" office:value="0.002121875" calcext:value-type="float">
            <text:p>0,00212187500000000000</text:p>
          </table:table-cell>
          <table:table-cell table:formula="of:=[.D2039]-[.D203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B2038]+9" office:value-type="float" office:value="18342" calcext:value-type="float">
            <text:p>18342</text:p>
          </table:table-cell>
          <table:table-cell office:value-type="float" office:value="8640000" calcext:value-type="float">
            <text:p>8640000</text:p>
          </table:table-cell>
          <table:table-cell table:formula="of:=[.B2039]/[.C2039]" office:value-type="float" office:value="0.00212291666666667" calcext:value-type="float">
            <text:p>0,00212291666666667000</text:p>
          </table:table-cell>
          <table:table-cell table:formula="of:=[.D2040]-[.D20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[.B2039]+9" office:value-type="float" office:value="18351" calcext:value-type="float">
            <text:p>18351</text:p>
          </table:table-cell>
          <table:table-cell office:value-type="float" office:value="8640000" calcext:value-type="float">
            <text:p>8640000</text:p>
          </table:table-cell>
          <table:table-cell table:formula="of:=[.B2040]/[.C2040]" office:value-type="float" office:value="0.00212395833333333" calcext:value-type="float">
            <text:p>0,00212395833333333000</text:p>
          </table:table-cell>
          <table:table-cell table:formula="of:=[.D2041]-[.D204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B2040]+9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2041]/[.C2041]" office:value-type="float" office:value="0.002125" calcext:value-type="float">
            <text:p>0,00212500000000000000</text:p>
          </table:table-cell>
          <table:table-cell table:formula="of:=[.D2042]-[.D20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B2041]+9" office:value-type="float" office:value="18369" calcext:value-type="float">
            <text:p>18369</text:p>
          </table:table-cell>
          <table:table-cell office:value-type="float" office:value="8640000" calcext:value-type="float">
            <text:p>8640000</text:p>
          </table:table-cell>
          <table:table-cell table:formula="of:=[.B2042]/[.C2042]" office:value-type="float" office:value="0.00212604166666667" calcext:value-type="float">
            <text:p>0,00212604166666667000</text:p>
          </table:table-cell>
          <table:table-cell table:formula="of:=[.D2043]-[.D204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B2042]+9" office:value-type="float" office:value="18378" calcext:value-type="float">
            <text:p>18378</text:p>
          </table:table-cell>
          <table:table-cell office:value-type="float" office:value="8640000" calcext:value-type="float">
            <text:p>8640000</text:p>
          </table:table-cell>
          <table:table-cell table:formula="of:=[.B2043]/[.C2043]" office:value-type="float" office:value="0.00212708333333333" calcext:value-type="float">
            <text:p>0,00212708333333333000</text:p>
          </table:table-cell>
          <table:table-cell table:formula="of:=[.D2044]-[.D20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B2043]+9" office:value-type="float" office:value="18387" calcext:value-type="float">
            <text:p>18387</text:p>
          </table:table-cell>
          <table:table-cell office:value-type="float" office:value="8640000" calcext:value-type="float">
            <text:p>8640000</text:p>
          </table:table-cell>
          <table:table-cell table:formula="of:=[.B2044]/[.C2044]" office:value-type="float" office:value="0.002128125" calcext:value-type="float">
            <text:p>0,00212812500000000000</text:p>
          </table:table-cell>
          <table:table-cell table:formula="of:=[.D2045]-[.D204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B2044]+9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2045]/[.C2045]" office:value-type="float" office:value="0.00212916666666667" calcext:value-type="float">
            <text:p>0,00212916666666667000</text:p>
          </table:table-cell>
          <table:table-cell table:formula="of:=[.D2046]-[.D204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B2045]+9" office:value-type="float" office:value="18405" calcext:value-type="float">
            <text:p>18405</text:p>
          </table:table-cell>
          <table:table-cell office:value-type="float" office:value="8640000" calcext:value-type="float">
            <text:p>8640000</text:p>
          </table:table-cell>
          <table:table-cell table:formula="of:=[.B2046]/[.C2046]" office:value-type="float" office:value="0.00213020833333333" calcext:value-type="float">
            <text:p>0,00213020833333333000</text:p>
          </table:table-cell>
          <table:table-cell table:formula="of:=[.D2047]-[.D20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B2046]+9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2047]/[.C2047]" office:value-type="float" office:value="0.00213125" calcext:value-type="float">
            <text:p>0,00213125000000000000</text:p>
          </table:table-cell>
          <table:table-cell table:formula="of:=[.D2048]-[.D20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B2047]+9" office:value-type="float" office:value="18423" calcext:value-type="float">
            <text:p>18423</text:p>
          </table:table-cell>
          <table:table-cell office:value-type="float" office:value="8640000" calcext:value-type="float">
            <text:p>8640000</text:p>
          </table:table-cell>
          <table:table-cell table:formula="of:=[.B2048]/[.C2048]" office:value-type="float" office:value="0.00213229166666667" calcext:value-type="float">
            <text:p>0,00213229166666667000</text:p>
          </table:table-cell>
          <table:table-cell table:formula="of:=[.D2049]-[.D204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2048]+9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2049]/[.C2049]" office:value-type="float" office:value="0.00213333333333333" calcext:value-type="float">
            <text:p>0,00213333333333333000</text:p>
          </table:table-cell>
          <table:table-cell table:formula="of:=[.D2050]-[.D204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B2049]+9" office:value-type="float" office:value="18441" calcext:value-type="float">
            <text:p>18441</text:p>
          </table:table-cell>
          <table:table-cell office:value-type="float" office:value="8640000" calcext:value-type="float">
            <text:p>8640000</text:p>
          </table:table-cell>
          <table:table-cell table:formula="of:=[.B2050]/[.C2050]" office:value-type="float" office:value="0.002134375" calcext:value-type="float">
            <text:p>0,00213437500000000000</text:p>
          </table:table-cell>
          <table:table-cell table:formula="of:=[.D2051]-[.D205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B2050]+9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2051]/[.C2051]" office:value-type="float" office:value="0.00213541666666667" calcext:value-type="float">
            <text:p>0,00213541666666667000</text:p>
          </table:table-cell>
          <table:table-cell table:formula="of:=[.D2052]-[.D205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B2051]+9" office:value-type="float" office:value="18459" calcext:value-type="float">
            <text:p>18459</text:p>
          </table:table-cell>
          <table:table-cell office:value-type="float" office:value="8640000" calcext:value-type="float">
            <text:p>8640000</text:p>
          </table:table-cell>
          <table:table-cell table:formula="of:=[.B2052]/[.C2052]" office:value-type="float" office:value="0.00213645833333333" calcext:value-type="float">
            <text:p>0,00213645833333333000</text:p>
          </table:table-cell>
          <table:table-cell table:formula="of:=[.D2053]-[.D205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B2052]+9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2053]/[.C2053]" office:value-type="float" office:value="0.0021375" calcext:value-type="float">
            <text:p>0,00213750000000000000</text:p>
          </table:table-cell>
          <table:table-cell table:formula="of:=[.D2054]-[.D205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B2053]+9" office:value-type="float" office:value="18477" calcext:value-type="float">
            <text:p>18477</text:p>
          </table:table-cell>
          <table:table-cell office:value-type="float" office:value="8640000" calcext:value-type="float">
            <text:p>8640000</text:p>
          </table:table-cell>
          <table:table-cell table:formula="of:=[.B2054]/[.C2054]" office:value-type="float" office:value="0.00213854166666667" calcext:value-type="float">
            <text:p>0,00213854166666667000</text:p>
          </table:table-cell>
          <table:table-cell table:formula="of:=[.D2055]-[.D20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B2054]+9" office:value-type="float" office:value="18486" calcext:value-type="float">
            <text:p>18486</text:p>
          </table:table-cell>
          <table:table-cell office:value-type="float" office:value="8640000" calcext:value-type="float">
            <text:p>8640000</text:p>
          </table:table-cell>
          <table:table-cell table:formula="of:=[.B2055]/[.C2055]" office:value-type="float" office:value="0.00213958333333333" calcext:value-type="float">
            <text:p>0,00213958333333333000</text:p>
          </table:table-cell>
          <table:table-cell table:formula="of:=[.D2056]-[.D205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B2055]+9" office:value-type="float" office:value="18495" calcext:value-type="float">
            <text:p>18495</text:p>
          </table:table-cell>
          <table:table-cell office:value-type="float" office:value="8640000" calcext:value-type="float">
            <text:p>8640000</text:p>
          </table:table-cell>
          <table:table-cell table:formula="of:=[.B2056]/[.C2056]" office:value-type="float" office:value="0.002140625" calcext:value-type="float">
            <text:p>0,00214062500000000000</text:p>
          </table:table-cell>
          <table:table-cell table:formula="of:=[.D2057]-[.D20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B2056]+9" office:value-type="float" office:value="18504" calcext:value-type="float">
            <text:p>18504</text:p>
          </table:table-cell>
          <table:table-cell office:value-type="float" office:value="8640000" calcext:value-type="float">
            <text:p>8640000</text:p>
          </table:table-cell>
          <table:table-cell table:formula="of:=[.B2057]/[.C2057]" office:value-type="float" office:value="0.00214166666666667" calcext:value-type="float">
            <text:p>0,00214166666666667000</text:p>
          </table:table-cell>
          <table:table-cell table:formula="of:=[.D2058]-[.D205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B2057]+9" office:value-type="float" office:value="18513" calcext:value-type="float">
            <text:p>18513</text:p>
          </table:table-cell>
          <table:table-cell office:value-type="float" office:value="8640000" calcext:value-type="float">
            <text:p>8640000</text:p>
          </table:table-cell>
          <table:table-cell table:formula="of:=[.B2058]/[.C2058]" office:value-type="float" office:value="0.00214270833333333" calcext:value-type="float">
            <text:p>0,00214270833333333000</text:p>
          </table:table-cell>
          <table:table-cell table:formula="of:=[.D2059]-[.D20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B2058]+9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2059]/[.C2059]" office:value-type="float" office:value="0.00214375" calcext:value-type="float">
            <text:p>0,00214375000000000000</text:p>
          </table:table-cell>
          <table:table-cell table:formula="of:=[.D2060]-[.D205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B2059]+9" office:value-type="float" office:value="18531" calcext:value-type="float">
            <text:p>18531</text:p>
          </table:table-cell>
          <table:table-cell office:value-type="float" office:value="8640000" calcext:value-type="float">
            <text:p>8640000</text:p>
          </table:table-cell>
          <table:table-cell table:formula="of:=[.B2060]/[.C2060]" office:value-type="float" office:value="0.00214479166666667" calcext:value-type="float">
            <text:p>0,00214479166666667000</text:p>
          </table:table-cell>
          <table:table-cell table:formula="of:=[.D2061]-[.D20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B2060]+9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2061]/[.C2061]" office:value-type="float" office:value="0.00214583333333333" calcext:value-type="float">
            <text:p>0,00214583333333333000</text:p>
          </table:table-cell>
          <table:table-cell table:formula="of:=[.D2062]-[.D206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B2061]+9" office:value-type="float" office:value="18549" calcext:value-type="float">
            <text:p>18549</text:p>
          </table:table-cell>
          <table:table-cell office:value-type="float" office:value="8640000" calcext:value-type="float">
            <text:p>8640000</text:p>
          </table:table-cell>
          <table:table-cell table:formula="of:=[.B2062]/[.C2062]" office:value-type="float" office:value="0.002146875" calcext:value-type="float">
            <text:p>0,00214687500000000000</text:p>
          </table:table-cell>
          <table:table-cell table:formula="of:=[.D2063]-[.D20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B2062]+9" office:value-type="float" office:value="18558" calcext:value-type="float">
            <text:p>18558</text:p>
          </table:table-cell>
          <table:table-cell office:value-type="float" office:value="8640000" calcext:value-type="float">
            <text:p>8640000</text:p>
          </table:table-cell>
          <table:table-cell table:formula="of:=[.B2063]/[.C2063]" office:value-type="float" office:value="0.00214791666666667" calcext:value-type="float">
            <text:p>0,00214791666666667000</text:p>
          </table:table-cell>
          <table:table-cell table:formula="of:=[.D2064]-[.D206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B2063]+9" office:value-type="float" office:value="18567" calcext:value-type="float">
            <text:p>18567</text:p>
          </table:table-cell>
          <table:table-cell office:value-type="float" office:value="8640000" calcext:value-type="float">
            <text:p>8640000</text:p>
          </table:table-cell>
          <table:table-cell table:formula="of:=[.B2064]/[.C2064]" office:value-type="float" office:value="0.00214895833333333" calcext:value-type="float">
            <text:p>0,00214895833333333000</text:p>
          </table:table-cell>
          <table:table-cell table:formula="of:=[.D2065]-[.D206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B2064]+9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2065]/[.C2065]" office:value-type="float" office:value="0.00215" calcext:value-type="float">
            <text:p>0,00215000000000000000</text:p>
          </table:table-cell>
          <table:table-cell table:formula="of:=[.D2066]-[.D206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B2065]+9" office:value-type="float" office:value="18585" calcext:value-type="float">
            <text:p>18585</text:p>
          </table:table-cell>
          <table:table-cell office:value-type="float" office:value="8640000" calcext:value-type="float">
            <text:p>8640000</text:p>
          </table:table-cell>
          <table:table-cell table:formula="of:=[.B2066]/[.C2066]" office:value-type="float" office:value="0.00215104166666667" calcext:value-type="float">
            <text:p>0,00215104166666667000</text:p>
          </table:table-cell>
          <table:table-cell table:formula="of:=[.D2067]-[.D206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B2066]+9" office:value-type="float" office:value="18594" calcext:value-type="float">
            <text:p>18594</text:p>
          </table:table-cell>
          <table:table-cell office:value-type="float" office:value="8640000" calcext:value-type="float">
            <text:p>8640000</text:p>
          </table:table-cell>
          <table:table-cell table:formula="of:=[.B2067]/[.C2067]" office:value-type="float" office:value="0.00215208333333333" calcext:value-type="float">
            <text:p>0,00215208333333333000</text:p>
          </table:table-cell>
          <table:table-cell table:formula="of:=[.D2068]-[.D206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B2067]+9" office:value-type="float" office:value="18603" calcext:value-type="float">
            <text:p>18603</text:p>
          </table:table-cell>
          <table:table-cell office:value-type="float" office:value="8640000" calcext:value-type="float">
            <text:p>8640000</text:p>
          </table:table-cell>
          <table:table-cell table:formula="of:=[.B2068]/[.C2068]" office:value-type="float" office:value="0.002153125" calcext:value-type="float">
            <text:p>0,00215312500000000000</text:p>
          </table:table-cell>
          <table:table-cell table:formula="of:=[.D2069]-[.D206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B2068]+9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2069]/[.C2069]" office:value-type="float" office:value="0.00215416666666667" calcext:value-type="float">
            <text:p>0,00215416666666667000</text:p>
          </table:table-cell>
          <table:table-cell table:formula="of:=[.D2070]-[.D206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B2069]+9" office:value-type="float" office:value="18621" calcext:value-type="float">
            <text:p>18621</text:p>
          </table:table-cell>
          <table:table-cell office:value-type="float" office:value="8640000" calcext:value-type="float">
            <text:p>8640000</text:p>
          </table:table-cell>
          <table:table-cell table:formula="of:=[.B2070]/[.C2070]" office:value-type="float" office:value="0.00215520833333333" calcext:value-type="float">
            <text:p>0,00215520833333333000</text:p>
          </table:table-cell>
          <table:table-cell table:formula="of:=[.D2071]-[.D207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B2070]+9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2071]/[.C2071]" office:value-type="float" office:value="0.00215625" calcext:value-type="float">
            <text:p>0,00215625000000000000</text:p>
          </table:table-cell>
          <table:table-cell table:formula="of:=[.D2072]-[.D207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B2071]+9" office:value-type="float" office:value="18639" calcext:value-type="float">
            <text:p>18639</text:p>
          </table:table-cell>
          <table:table-cell office:value-type="float" office:value="8640000" calcext:value-type="float">
            <text:p>8640000</text:p>
          </table:table-cell>
          <table:table-cell table:formula="of:=[.B2072]/[.C2072]" office:value-type="float" office:value="0.00215729166666667" calcext:value-type="float">
            <text:p>0,00215729166666667000</text:p>
          </table:table-cell>
          <table:table-cell table:formula="of:=[.D2073]-[.D207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B2072]+9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2073]/[.C2073]" office:value-type="float" office:value="0.00215833333333333" calcext:value-type="float">
            <text:p>0,00215833333333333000</text:p>
          </table:table-cell>
          <table:table-cell table:formula="of:=[.D2074]-[.D207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B2073]+9" office:value-type="float" office:value="18657" calcext:value-type="float">
            <text:p>18657</text:p>
          </table:table-cell>
          <table:table-cell office:value-type="float" office:value="8640000" calcext:value-type="float">
            <text:p>8640000</text:p>
          </table:table-cell>
          <table:table-cell table:formula="of:=[.B2074]/[.C2074]" office:value-type="float" office:value="0.002159375" calcext:value-type="float">
            <text:p>0,00215937500000000000</text:p>
          </table:table-cell>
          <table:table-cell table:formula="of:=[.D2075]-[.D207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B2074]+9" office:value-type="float" office:value="18666" calcext:value-type="float">
            <text:p>18666</text:p>
          </table:table-cell>
          <table:table-cell office:value-type="float" office:value="8640000" calcext:value-type="float">
            <text:p>8640000</text:p>
          </table:table-cell>
          <table:table-cell table:formula="of:=[.B2075]/[.C2075]" office:value-type="float" office:value="0.00216041666666667" calcext:value-type="float">
            <text:p>0,00216041666666667000</text:p>
          </table:table-cell>
          <table:table-cell table:formula="of:=[.D2076]-[.D20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B2075]+9" office:value-type="float" office:value="18675" calcext:value-type="float">
            <text:p>18675</text:p>
          </table:table-cell>
          <table:table-cell office:value-type="float" office:value="8640000" calcext:value-type="float">
            <text:p>8640000</text:p>
          </table:table-cell>
          <table:table-cell table:formula="of:=[.B2076]/[.C2076]" office:value-type="float" office:value="0.00216145833333333" calcext:value-type="float">
            <text:p>0,00216145833333333000</text:p>
          </table:table-cell>
          <table:table-cell table:formula="of:=[.D2077]-[.D207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B2076]+9" office:value-type="float" office:value="18684" calcext:value-type="float">
            <text:p>18684</text:p>
          </table:table-cell>
          <table:table-cell office:value-type="float" office:value="8640000" calcext:value-type="float">
            <text:p>8640000</text:p>
          </table:table-cell>
          <table:table-cell table:formula="of:=[.B2077]/[.C2077]" office:value-type="float" office:value="0.0021625" calcext:value-type="float">
            <text:p>0,00216250000000000000</text:p>
          </table:table-cell>
          <table:table-cell table:formula="of:=[.D2078]-[.D207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B2077]+9" office:value-type="float" office:value="18693" calcext:value-type="float">
            <text:p>18693</text:p>
          </table:table-cell>
          <table:table-cell office:value-type="float" office:value="8640000" calcext:value-type="float">
            <text:p>8640000</text:p>
          </table:table-cell>
          <table:table-cell table:formula="of:=[.B2078]/[.C2078]" office:value-type="float" office:value="0.00216354166666667" calcext:value-type="float">
            <text:p>0,00216354166666667000</text:p>
          </table:table-cell>
          <table:table-cell table:formula="of:=[.D2079]-[.D207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B2078]+9" office:value-type="float" office:value="18702" calcext:value-type="float">
            <text:p>18702</text:p>
          </table:table-cell>
          <table:table-cell office:value-type="float" office:value="8640000" calcext:value-type="float">
            <text:p>8640000</text:p>
          </table:table-cell>
          <table:table-cell table:formula="of:=[.B2079]/[.C2079]" office:value-type="float" office:value="0.00216458333333333" calcext:value-type="float">
            <text:p>0,00216458333333333000</text:p>
          </table:table-cell>
          <table:table-cell table:formula="of:=[.D2080]-[.D20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B2079]+9" office:value-type="float" office:value="18711" calcext:value-type="float">
            <text:p>18711</text:p>
          </table:table-cell>
          <table:table-cell office:value-type="float" office:value="8640000" calcext:value-type="float">
            <text:p>8640000</text:p>
          </table:table-cell>
          <table:table-cell table:formula="of:=[.B2080]/[.C2080]" office:value-type="float" office:value="0.002165625" calcext:value-type="float">
            <text:p>0,00216562500000000000</text:p>
          </table:table-cell>
          <table:table-cell table:formula="of:=[.D2081]-[.D20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[.B2080]+9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2081]/[.C2081]" office:value-type="float" office:value="0.00216666666666667" calcext:value-type="float">
            <text:p>0,00216666666666667000</text:p>
          </table:table-cell>
          <table:table-cell table:formula="of:=[.D2082]-[.D208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B2081]+9" office:value-type="float" office:value="18729" calcext:value-type="float">
            <text:p>18729</text:p>
          </table:table-cell>
          <table:table-cell office:value-type="float" office:value="8640000" calcext:value-type="float">
            <text:p>8640000</text:p>
          </table:table-cell>
          <table:table-cell table:formula="of:=[.B2082]/[.C2082]" office:value-type="float" office:value="0.00216770833333333" calcext:value-type="float">
            <text:p>0,00216770833333333000</text:p>
          </table:table-cell>
          <table:table-cell table:formula="of:=[.D2083]-[.D208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B2082]+9" office:value-type="float" office:value="18738" calcext:value-type="float">
            <text:p>18738</text:p>
          </table:table-cell>
          <table:table-cell office:value-type="float" office:value="8640000" calcext:value-type="float">
            <text:p>8640000</text:p>
          </table:table-cell>
          <table:table-cell table:formula="of:=[.B2083]/[.C2083]" office:value-type="float" office:value="0.00216875" calcext:value-type="float">
            <text:p>0,00216875000000000000</text:p>
          </table:table-cell>
          <table:table-cell table:formula="of:=[.D2084]-[.D208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[.B2083]+9" office:value-type="float" office:value="18747" calcext:value-type="float">
            <text:p>18747</text:p>
          </table:table-cell>
          <table:table-cell office:value-type="float" office:value="8640000" calcext:value-type="float">
            <text:p>8640000</text:p>
          </table:table-cell>
          <table:table-cell table:formula="of:=[.B2084]/[.C2084]" office:value-type="float" office:value="0.00216979166666667" calcext:value-type="float">
            <text:p>0,00216979166666667000</text:p>
          </table:table-cell>
          <table:table-cell table:formula="of:=[.D2085]-[.D208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B2084]+9" office:value-type="float" office:value="18756" calcext:value-type="float">
            <text:p>18756</text:p>
          </table:table-cell>
          <table:table-cell office:value-type="float" office:value="8640000" calcext:value-type="float">
            <text:p>8640000</text:p>
          </table:table-cell>
          <table:table-cell table:formula="of:=[.B2085]/[.C2085]" office:value-type="float" office:value="0.00217083333333333" calcext:value-type="float">
            <text:p>0,00217083333333333000</text:p>
          </table:table-cell>
          <table:table-cell table:formula="of:=[.D2086]-[.D208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B2085]+9" office:value-type="float" office:value="18765" calcext:value-type="float">
            <text:p>18765</text:p>
          </table:table-cell>
          <table:table-cell office:value-type="float" office:value="8640000" calcext:value-type="float">
            <text:p>8640000</text:p>
          </table:table-cell>
          <table:table-cell table:formula="of:=[.B2086]/[.C2086]" office:value-type="float" office:value="0.002171875" calcext:value-type="float">
            <text:p>0,00217187500000000000</text:p>
          </table:table-cell>
          <table:table-cell table:formula="of:=[.D2087]-[.D20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[.B2086]+9" office:value-type="float" office:value="18774" calcext:value-type="float">
            <text:p>18774</text:p>
          </table:table-cell>
          <table:table-cell office:value-type="float" office:value="8640000" calcext:value-type="float">
            <text:p>8640000</text:p>
          </table:table-cell>
          <table:table-cell table:formula="of:=[.B2087]/[.C2087]" office:value-type="float" office:value="0.00217291666666667" calcext:value-type="float">
            <text:p>0,00217291666666667000</text:p>
          </table:table-cell>
          <table:table-cell table:formula="of:=[.D2088]-[.D208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B2087]+9" office:value-type="float" office:value="18783" calcext:value-type="float">
            <text:p>18783</text:p>
          </table:table-cell>
          <table:table-cell office:value-type="float" office:value="8640000" calcext:value-type="float">
            <text:p>8640000</text:p>
          </table:table-cell>
          <table:table-cell table:formula="of:=[.B2088]/[.C2088]" office:value-type="float" office:value="0.00217395833333333" calcext:value-type="float">
            <text:p>0,00217395833333333000</text:p>
          </table:table-cell>
          <table:table-cell table:formula="of:=[.D2089]-[.D20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B2088]+9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2089]/[.C2089]" office:value-type="float" office:value="0.002175" calcext:value-type="float">
            <text:p>0,00217500000000000000</text:p>
          </table:table-cell>
          <table:table-cell table:formula="of:=[.D2090]-[.D208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B2089]+9" office:value-type="float" office:value="18801" calcext:value-type="float">
            <text:p>18801</text:p>
          </table:table-cell>
          <table:table-cell office:value-type="float" office:value="8640000" calcext:value-type="float">
            <text:p>8640000</text:p>
          </table:table-cell>
          <table:table-cell table:formula="of:=[.B2090]/[.C2090]" office:value-type="float" office:value="0.00217604166666667" calcext:value-type="float">
            <text:p>0,00217604166666667000</text:p>
          </table:table-cell>
          <table:table-cell table:formula="of:=[.D2091]-[.D20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B2090]+9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2091]/[.C2091]" office:value-type="float" office:value="0.00217708333333333" calcext:value-type="float">
            <text:p>0,00217708333333333000</text:p>
          </table:table-cell>
          <table:table-cell table:formula="of:=[.D2092]-[.D209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[.B2091]+9" office:value-type="float" office:value="18819" calcext:value-type="float">
            <text:p>18819</text:p>
          </table:table-cell>
          <table:table-cell office:value-type="float" office:value="8640000" calcext:value-type="float">
            <text:p>8640000</text:p>
          </table:table-cell>
          <table:table-cell table:formula="of:=[.B2092]/[.C2092]" office:value-type="float" office:value="0.002178125" calcext:value-type="float">
            <text:p>0,00217812500000000000</text:p>
          </table:table-cell>
          <table:table-cell table:formula="of:=[.D2093]-[.D20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[.B2092]+9" office:value-type="float" office:value="18828" calcext:value-type="float">
            <text:p>18828</text:p>
          </table:table-cell>
          <table:table-cell office:value-type="float" office:value="8640000" calcext:value-type="float">
            <text:p>8640000</text:p>
          </table:table-cell>
          <table:table-cell table:formula="of:=[.B2093]/[.C2093]" office:value-type="float" office:value="0.00217916666666667" calcext:value-type="float">
            <text:p>0,00217916666666667000</text:p>
          </table:table-cell>
          <table:table-cell table:formula="of:=[.D2094]-[.D209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B2093]+9" office:value-type="float" office:value="18837" calcext:value-type="float">
            <text:p>18837</text:p>
          </table:table-cell>
          <table:table-cell office:value-type="float" office:value="8640000" calcext:value-type="float">
            <text:p>8640000</text:p>
          </table:table-cell>
          <table:table-cell table:formula="of:=[.B2094]/[.C2094]" office:value-type="float" office:value="0.00218020833333333" calcext:value-type="float">
            <text:p>0,00218020833333333000</text:p>
          </table:table-cell>
          <table:table-cell table:formula="of:=[.D2095]-[.D20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[.B2094]+9" office:value-type="float" office:value="18846" calcext:value-type="float">
            <text:p>18846</text:p>
          </table:table-cell>
          <table:table-cell office:value-type="float" office:value="8640000" calcext:value-type="float">
            <text:p>8640000</text:p>
          </table:table-cell>
          <table:table-cell table:formula="of:=[.B2095]/[.C2095]" office:value-type="float" office:value="0.00218125" calcext:value-type="float">
            <text:p>0,00218125000000000000</text:p>
          </table:table-cell>
          <table:table-cell table:formula="of:=[.D2096]-[.D209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[.B2095]+9" office:value-type="float" office:value="18855" calcext:value-type="float">
            <text:p>18855</text:p>
          </table:table-cell>
          <table:table-cell office:value-type="float" office:value="8640000" calcext:value-type="float">
            <text:p>8640000</text:p>
          </table:table-cell>
          <table:table-cell table:formula="of:=[.B2096]/[.C2096]" office:value-type="float" office:value="0.00218229166666667" calcext:value-type="float">
            <text:p>0,00218229166666667000</text:p>
          </table:table-cell>
          <table:table-cell table:formula="of:=[.D2097]-[.D209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[.B2096]+9" office:value-type="float" office:value="18864" calcext:value-type="float">
            <text:p>18864</text:p>
          </table:table-cell>
          <table:table-cell office:value-type="float" office:value="8640000" calcext:value-type="float">
            <text:p>8640000</text:p>
          </table:table-cell>
          <table:table-cell table:formula="of:=[.B2097]/[.C2097]" office:value-type="float" office:value="0.00218333333333333" calcext:value-type="float">
            <text:p>0,00218333333333333000</text:p>
          </table:table-cell>
          <table:table-cell table:formula="of:=[.D2098]-[.D209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[.B2097]+9" office:value-type="float" office:value="18873" calcext:value-type="float">
            <text:p>18873</text:p>
          </table:table-cell>
          <table:table-cell office:value-type="float" office:value="8640000" calcext:value-type="float">
            <text:p>8640000</text:p>
          </table:table-cell>
          <table:table-cell table:formula="of:=[.B2098]/[.C2098]" office:value-type="float" office:value="0.002184375" calcext:value-type="float">
            <text:p>0,00218437500000000000</text:p>
          </table:table-cell>
          <table:table-cell table:formula="of:=[.D2099]-[.D209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[.B2098]+9" office:value-type="float" office:value="18882" calcext:value-type="float">
            <text:p>18882</text:p>
          </table:table-cell>
          <table:table-cell office:value-type="float" office:value="8640000" calcext:value-type="float">
            <text:p>8640000</text:p>
          </table:table-cell>
          <table:table-cell table:formula="of:=[.B2099]/[.C2099]" office:value-type="float" office:value="0.00218541666666667" calcext:value-type="float">
            <text:p>0,00218541666666667000</text:p>
          </table:table-cell>
          <table:table-cell table:formula="of:=[.D2100]-[.D209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[.B2099]+9" office:value-type="float" office:value="18891" calcext:value-type="float">
            <text:p>18891</text:p>
          </table:table-cell>
          <table:table-cell office:value-type="float" office:value="8640000" calcext:value-type="float">
            <text:p>8640000</text:p>
          </table:table-cell>
          <table:table-cell table:formula="of:=[.B2100]/[.C2100]" office:value-type="float" office:value="0.00218645833333333" calcext:value-type="float">
            <text:p>0,00218645833333333000</text:p>
          </table:table-cell>
          <table:table-cell table:formula="of:=[.D2101]-[.D210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B2100]+9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2101]/[.C2101]" office:value-type="float" office:value="0.0021875" calcext:value-type="float">
            <text:p>0,00218750000000000000</text:p>
          </table:table-cell>
          <table:table-cell table:formula="of:=[.D2102]-[.D21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[.B2101]+9" office:value-type="float" office:value="18909" calcext:value-type="float">
            <text:p>18909</text:p>
          </table:table-cell>
          <table:table-cell office:value-type="float" office:value="8640000" calcext:value-type="float">
            <text:p>8640000</text:p>
          </table:table-cell>
          <table:table-cell table:formula="of:=[.B2102]/[.C2102]" office:value-type="float" office:value="0.00218854166666667" calcext:value-type="float">
            <text:p>0,00218854166666667000</text:p>
          </table:table-cell>
          <table:table-cell table:formula="of:=[.D2103]-[.D210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[.B2102]+9" office:value-type="float" office:value="18918" calcext:value-type="float">
            <text:p>18918</text:p>
          </table:table-cell>
          <table:table-cell office:value-type="float" office:value="8640000" calcext:value-type="float">
            <text:p>8640000</text:p>
          </table:table-cell>
          <table:table-cell table:formula="of:=[.B2103]/[.C2103]" office:value-type="float" office:value="0.00218958333333333" calcext:value-type="float">
            <text:p>0,00218958333333333000</text:p>
          </table:table-cell>
          <table:table-cell table:formula="of:=[.D2104]-[.D21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[.B2103]+9" office:value-type="float" office:value="18927" calcext:value-type="float">
            <text:p>18927</text:p>
          </table:table-cell>
          <table:table-cell office:value-type="float" office:value="8640000" calcext:value-type="float">
            <text:p>8640000</text:p>
          </table:table-cell>
          <table:table-cell table:formula="of:=[.B2104]/[.C2104]" office:value-type="float" office:value="0.002190625" calcext:value-type="float">
            <text:p>0,00219062500000000000</text:p>
          </table:table-cell>
          <table:table-cell table:formula="of:=[.D2105]-[.D210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[.B2104]+9" office:value-type="float" office:value="18936" calcext:value-type="float">
            <text:p>18936</text:p>
          </table:table-cell>
          <table:table-cell office:value-type="float" office:value="8640000" calcext:value-type="float">
            <text:p>8640000</text:p>
          </table:table-cell>
          <table:table-cell table:formula="of:=[.B2105]/[.C2105]" office:value-type="float" office:value="0.00219166666666667" calcext:value-type="float">
            <text:p>0,00219166666666667000</text:p>
          </table:table-cell>
          <table:table-cell table:formula="of:=[.D2106]-[.D21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[.B2105]+9" office:value-type="float" office:value="18945" calcext:value-type="float">
            <text:p>18945</text:p>
          </table:table-cell>
          <table:table-cell office:value-type="float" office:value="8640000" calcext:value-type="float">
            <text:p>8640000</text:p>
          </table:table-cell>
          <table:table-cell table:formula="of:=[.B2106]/[.C2106]" office:value-type="float" office:value="0.00219270833333333" calcext:value-type="float">
            <text:p>0,00219270833333333000</text:p>
          </table:table-cell>
          <table:table-cell table:formula="of:=[.D2107]-[.D210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[.B2106]+9" office:value-type="float" office:value="18954" calcext:value-type="float">
            <text:p>18954</text:p>
          </table:table-cell>
          <table:table-cell office:value-type="float" office:value="8640000" calcext:value-type="float">
            <text:p>8640000</text:p>
          </table:table-cell>
          <table:table-cell table:formula="of:=[.B2107]/[.C2107]" office:value-type="float" office:value="0.00219375" calcext:value-type="float">
            <text:p>0,00219375000000000000</text:p>
          </table:table-cell>
          <table:table-cell table:formula="of:=[.D2108]-[.D21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[.B2107]+9" office:value-type="float" office:value="18963" calcext:value-type="float">
            <text:p>18963</text:p>
          </table:table-cell>
          <table:table-cell office:value-type="float" office:value="8640000" calcext:value-type="float">
            <text:p>8640000</text:p>
          </table:table-cell>
          <table:table-cell table:formula="of:=[.B2108]/[.C2108]" office:value-type="float" office:value="0.00219479166666667" calcext:value-type="float">
            <text:p>0,00219479166666667000</text:p>
          </table:table-cell>
          <table:table-cell table:formula="of:=[.D2109]-[.D210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[.B2108]+9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2109]/[.C2109]" office:value-type="float" office:value="0.00219583333333333" calcext:value-type="float">
            <text:p>0,00219583333333333000</text:p>
          </table:table-cell>
          <table:table-cell table:formula="of:=[.D2110]-[.D21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[.B2109]+9" office:value-type="float" office:value="18981" calcext:value-type="float">
            <text:p>18981</text:p>
          </table:table-cell>
          <table:table-cell office:value-type="float" office:value="8640000" calcext:value-type="float">
            <text:p>8640000</text:p>
          </table:table-cell>
          <table:table-cell table:formula="of:=[.B2110]/[.C2110]" office:value-type="float" office:value="0.002196875" calcext:value-type="float">
            <text:p>0,00219687500000000000</text:p>
          </table:table-cell>
          <table:table-cell table:formula="of:=[.D2111]-[.D211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B2110]+9" office:value-type="float" office:value="18990" calcext:value-type="float">
            <text:p>18990</text:p>
          </table:table-cell>
          <table:table-cell office:value-type="float" office:value="8640000" calcext:value-type="float">
            <text:p>8640000</text:p>
          </table:table-cell>
          <table:table-cell table:formula="of:=[.B2111]/[.C2111]" office:value-type="float" office:value="0.00219791666666667" calcext:value-type="float">
            <text:p>0,00219791666666667000</text:p>
          </table:table-cell>
          <table:table-cell table:formula="of:=[.D2112]-[.D211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[.B2111]+9" office:value-type="float" office:value="18999" calcext:value-type="float">
            <text:p>18999</text:p>
          </table:table-cell>
          <table:table-cell office:value-type="float" office:value="8640000" calcext:value-type="float">
            <text:p>8640000</text:p>
          </table:table-cell>
          <table:table-cell table:formula="of:=[.B2112]/[.C2112]" office:value-type="float" office:value="0.00219895833333333" calcext:value-type="float">
            <text:p>0,00219895833333333000</text:p>
          </table:table-cell>
          <table:table-cell table:formula="of:=[.D2113]-[.D211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B2112]+9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2113]/[.C2113]" office:value-type="float" office:value="0.0022" calcext:value-type="float">
            <text:p>0,00220000000000000000</text:p>
          </table:table-cell>
          <table:table-cell table:formula="of:=[.D2114]-[.D21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[.B2113]+9" office:value-type="float" office:value="19017" calcext:value-type="float">
            <text:p>19017</text:p>
          </table:table-cell>
          <table:table-cell office:value-type="float" office:value="8640000" calcext:value-type="float">
            <text:p>8640000</text:p>
          </table:table-cell>
          <table:table-cell table:formula="of:=[.B2114]/[.C2114]" office:value-type="float" office:value="0.00220104166666667" calcext:value-type="float">
            <text:p>0,00220104166666667000</text:p>
          </table:table-cell>
          <table:table-cell table:formula="of:=[.D2115]-[.D21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B2114]+9" office:value-type="float" office:value="19026" calcext:value-type="float">
            <text:p>19026</text:p>
          </table:table-cell>
          <table:table-cell office:value-type="float" office:value="8640000" calcext:value-type="float">
            <text:p>8640000</text:p>
          </table:table-cell>
          <table:table-cell table:formula="of:=[.B2115]/[.C2115]" office:value-type="float" office:value="0.00220208333333333" calcext:value-type="float">
            <text:p>0,00220208333333333000</text:p>
          </table:table-cell>
          <table:table-cell table:formula="of:=[.D2116]-[.D211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[.B2115]+9" office:value-type="float" office:value="19035" calcext:value-type="float">
            <text:p>19035</text:p>
          </table:table-cell>
          <table:table-cell office:value-type="float" office:value="8640000" calcext:value-type="float">
            <text:p>8640000</text:p>
          </table:table-cell>
          <table:table-cell table:formula="of:=[.B2116]/[.C2116]" office:value-type="float" office:value="0.002203125" calcext:value-type="float">
            <text:p>0,00220312500000000000</text:p>
          </table:table-cell>
          <table:table-cell table:formula="of:=[.D2117]-[.D211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[.B2116]+9" office:value-type="float" office:value="19044" calcext:value-type="float">
            <text:p>19044</text:p>
          </table:table-cell>
          <table:table-cell office:value-type="float" office:value="8640000" calcext:value-type="float">
            <text:p>8640000</text:p>
          </table:table-cell>
          <table:table-cell table:formula="of:=[.B2117]/[.C2117]" office:value-type="float" office:value="0.00220416666666667" calcext:value-type="float">
            <text:p>0,00220416666666667000</text:p>
          </table:table-cell>
          <table:table-cell table:formula="of:=[.D2118]-[.D211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[.B2117]+9" office:value-type="float" office:value="19053" calcext:value-type="float">
            <text:p>19053</text:p>
          </table:table-cell>
          <table:table-cell office:value-type="float" office:value="8640000" calcext:value-type="float">
            <text:p>8640000</text:p>
          </table:table-cell>
          <table:table-cell table:formula="of:=[.B2118]/[.C2118]" office:value-type="float" office:value="0.00220520833333333" calcext:value-type="float">
            <text:p>0,00220520833333333000</text:p>
          </table:table-cell>
          <table:table-cell table:formula="of:=[.D2119]-[.D21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[.B2118]+9" office:value-type="float" office:value="19062" calcext:value-type="float">
            <text:p>19062</text:p>
          </table:table-cell>
          <table:table-cell office:value-type="float" office:value="8640000" calcext:value-type="float">
            <text:p>8640000</text:p>
          </table:table-cell>
          <table:table-cell table:formula="of:=[.B2119]/[.C2119]" office:value-type="float" office:value="0.00220625" calcext:value-type="float">
            <text:p>0,00220625000000000000</text:p>
          </table:table-cell>
          <table:table-cell table:formula="of:=[.D2120]-[.D211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[.B2119]+9" office:value-type="float" office:value="19071" calcext:value-type="float">
            <text:p>19071</text:p>
          </table:table-cell>
          <table:table-cell office:value-type="float" office:value="8640000" calcext:value-type="float">
            <text:p>8640000</text:p>
          </table:table-cell>
          <table:table-cell table:formula="of:=[.B2120]/[.C2120]" office:value-type="float" office:value="0.00220729166666667" calcext:value-type="float">
            <text:p>0,00220729166666667000</text:p>
          </table:table-cell>
          <table:table-cell table:formula="of:=[.D2121]-[.D21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[.B2120]+9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2121]/[.C2121]" office:value-type="float" office:value="0.00220833333333333" calcext:value-type="float">
            <text:p>0,00220833333333333000</text:p>
          </table:table-cell>
          <table:table-cell table:formula="of:=[.D2122]-[.D212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[.B2121]+9" office:value-type="float" office:value="19089" calcext:value-type="float">
            <text:p>19089</text:p>
          </table:table-cell>
          <table:table-cell office:value-type="float" office:value="8640000" calcext:value-type="float">
            <text:p>8640000</text:p>
          </table:table-cell>
          <table:table-cell table:formula="of:=[.B2122]/[.C2122]" office:value-type="float" office:value="0.002209375" calcext:value-type="float">
            <text:p>0,00220937500000000000</text:p>
          </table:table-cell>
          <table:table-cell table:formula="of:=[.D2123]-[.D21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B2122]+9" office:value-type="float" office:value="19098" calcext:value-type="float">
            <text:p>19098</text:p>
          </table:table-cell>
          <table:table-cell office:value-type="float" office:value="8640000" calcext:value-type="float">
            <text:p>8640000</text:p>
          </table:table-cell>
          <table:table-cell table:formula="of:=[.B2123]/[.C2123]" office:value-type="float" office:value="0.00221041666666667" calcext:value-type="float">
            <text:p>0,00221041666666667000</text:p>
          </table:table-cell>
          <table:table-cell table:formula="of:=[.D2124]-[.D212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[.B2123]+9" office:value-type="float" office:value="19107" calcext:value-type="float">
            <text:p>19107</text:p>
          </table:table-cell>
          <table:table-cell office:value-type="float" office:value="8640000" calcext:value-type="float">
            <text:p>8640000</text:p>
          </table:table-cell>
          <table:table-cell table:formula="of:=[.B2124]/[.C2124]" office:value-type="float" office:value="0.00221145833333333" calcext:value-type="float">
            <text:p>0,00221145833333333000</text:p>
          </table:table-cell>
          <table:table-cell table:formula="of:=[.D2125]-[.D21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[.B2124]+9" office:value-type="float" office:value="19116" calcext:value-type="float">
            <text:p>19116</text:p>
          </table:table-cell>
          <table:table-cell office:value-type="float" office:value="8640000" calcext:value-type="float">
            <text:p>8640000</text:p>
          </table:table-cell>
          <table:table-cell table:formula="of:=[.B2125]/[.C2125]" office:value-type="float" office:value="0.0022125" calcext:value-type="float">
            <text:p>0,00221250000000000000</text:p>
          </table:table-cell>
          <table:table-cell table:formula="of:=[.D2126]-[.D212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B2125]+9" office:value-type="float" office:value="19125" calcext:value-type="float">
            <text:p>19125</text:p>
          </table:table-cell>
          <table:table-cell office:value-type="float" office:value="8640000" calcext:value-type="float">
            <text:p>8640000</text:p>
          </table:table-cell>
          <table:table-cell table:formula="of:=[.B2126]/[.C2126]" office:value-type="float" office:value="0.00221354166666667" calcext:value-type="float">
            <text:p>0,00221354166666667000</text:p>
          </table:table-cell>
          <table:table-cell table:formula="of:=[.D2127]-[.D21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[.B2126]+9" office:value-type="float" office:value="19134" calcext:value-type="float">
            <text:p>19134</text:p>
          </table:table-cell>
          <table:table-cell office:value-type="float" office:value="8640000" calcext:value-type="float">
            <text:p>8640000</text:p>
          </table:table-cell>
          <table:table-cell table:formula="of:=[.B2127]/[.C2127]" office:value-type="float" office:value="0.00221458333333333" calcext:value-type="float">
            <text:p>0,00221458333333333000</text:p>
          </table:table-cell>
          <table:table-cell table:formula="of:=[.D2128]-[.D212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[.B2127]+9" office:value-type="float" office:value="19143" calcext:value-type="float">
            <text:p>19143</text:p>
          </table:table-cell>
          <table:table-cell office:value-type="float" office:value="8640000" calcext:value-type="float">
            <text:p>8640000</text:p>
          </table:table-cell>
          <table:table-cell table:formula="of:=[.B2128]/[.C2128]" office:value-type="float" office:value="0.002215625" calcext:value-type="float">
            <text:p>0,00221562500000000000</text:p>
          </table:table-cell>
          <table:table-cell table:formula="of:=[.D2129]-[.D21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B2128]+9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2129]/[.C2129]" office:value-type="float" office:value="0.00221666666666667" calcext:value-type="float">
            <text:p>0,00221666666666667000</text:p>
          </table:table-cell>
          <table:table-cell table:formula="of:=[.D2130]-[.D212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B2129]+9" office:value-type="float" office:value="19161" calcext:value-type="float">
            <text:p>19161</text:p>
          </table:table-cell>
          <table:table-cell office:value-type="float" office:value="8640000" calcext:value-type="float">
            <text:p>8640000</text:p>
          </table:table-cell>
          <table:table-cell table:formula="of:=[.B2130]/[.C2130]" office:value-type="float" office:value="0.00221770833333333" calcext:value-type="float">
            <text:p>0,00221770833333333000</text:p>
          </table:table-cell>
          <table:table-cell table:formula="of:=[.D2131]-[.D213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B2130]+9" office:value-type="float" office:value="19170" calcext:value-type="float">
            <text:p>19170</text:p>
          </table:table-cell>
          <table:table-cell office:value-type="float" office:value="8640000" calcext:value-type="float">
            <text:p>8640000</text:p>
          </table:table-cell>
          <table:table-cell table:formula="of:=[.B2131]/[.C2131]" office:value-type="float" office:value="0.00221875" calcext:value-type="float">
            <text:p>0,00221875000000000000</text:p>
          </table:table-cell>
          <table:table-cell table:formula="of:=[.D2132]-[.D213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B2131]+9" office:value-type="float" office:value="19179" calcext:value-type="float">
            <text:p>19179</text:p>
          </table:table-cell>
          <table:table-cell office:value-type="float" office:value="8640000" calcext:value-type="float">
            <text:p>8640000</text:p>
          </table:table-cell>
          <table:table-cell table:formula="of:=[.B2132]/[.C2132]" office:value-type="float" office:value="0.00221979166666667" calcext:value-type="float">
            <text:p>0,00221979166666667000</text:p>
          </table:table-cell>
          <table:table-cell table:formula="of:=[.D2133]-[.D213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[.B2132]+9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2133]/[.C2133]" office:value-type="float" office:value="0.00222083333333333" calcext:value-type="float">
            <text:p>0,00222083333333333000</text:p>
          </table:table-cell>
          <table:table-cell table:formula="of:=[.D2134]-[.D213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[.B2133]+9" office:value-type="float" office:value="19197" calcext:value-type="float">
            <text:p>19197</text:p>
          </table:table-cell>
          <table:table-cell office:value-type="float" office:value="8640000" calcext:value-type="float">
            <text:p>8640000</text:p>
          </table:table-cell>
          <table:table-cell table:formula="of:=[.B2134]/[.C2134]" office:value-type="float" office:value="0.002221875" calcext:value-type="float">
            <text:p>0,00222187500000000000</text:p>
          </table:table-cell>
          <table:table-cell table:formula="of:=[.D2135]-[.D213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[.B2134]+9" office:value-type="float" office:value="19206" calcext:value-type="float">
            <text:p>19206</text:p>
          </table:table-cell>
          <table:table-cell office:value-type="float" office:value="8640000" calcext:value-type="float">
            <text:p>8640000</text:p>
          </table:table-cell>
          <table:table-cell table:formula="of:=[.B2135]/[.C2135]" office:value-type="float" office:value="0.00222291666666667" calcext:value-type="float">
            <text:p>0,00222291666666667000</text:p>
          </table:table-cell>
          <table:table-cell table:formula="of:=[.D2136]-[.D21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[.B2135]+9" office:value-type="float" office:value="19215" calcext:value-type="float">
            <text:p>19215</text:p>
          </table:table-cell>
          <table:table-cell office:value-type="float" office:value="8640000" calcext:value-type="float">
            <text:p>8640000</text:p>
          </table:table-cell>
          <table:table-cell table:formula="of:=[.B2136]/[.C2136]" office:value-type="float" office:value="0.00222395833333333" calcext:value-type="float">
            <text:p>0,00222395833333333000</text:p>
          </table:table-cell>
          <table:table-cell table:formula="of:=[.D2137]-[.D213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[.B2136]+9" office:value-type="float" office:value="19224" calcext:value-type="float">
            <text:p>19224</text:p>
          </table:table-cell>
          <table:table-cell office:value-type="float" office:value="8640000" calcext:value-type="float">
            <text:p>8640000</text:p>
          </table:table-cell>
          <table:table-cell table:formula="of:=[.B2137]/[.C2137]" office:value-type="float" office:value="0.002225" calcext:value-type="float">
            <text:p>0,00222500000000000000</text:p>
          </table:table-cell>
          <table:table-cell table:formula="of:=[.D2138]-[.D213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B2137]+9" office:value-type="float" office:value="19233" calcext:value-type="float">
            <text:p>19233</text:p>
          </table:table-cell>
          <table:table-cell office:value-type="float" office:value="8640000" calcext:value-type="float">
            <text:p>8640000</text:p>
          </table:table-cell>
          <table:table-cell table:formula="of:=[.B2138]/[.C2138]" office:value-type="float" office:value="0.00222604166666667" calcext:value-type="float">
            <text:p>0,00222604166666667000</text:p>
          </table:table-cell>
          <table:table-cell table:formula="of:=[.D2139]-[.D213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[.B2138]+9" office:value-type="float" office:value="19242" calcext:value-type="float">
            <text:p>19242</text:p>
          </table:table-cell>
          <table:table-cell office:value-type="float" office:value="8640000" calcext:value-type="float">
            <text:p>8640000</text:p>
          </table:table-cell>
          <table:table-cell table:formula="of:=[.B2139]/[.C2139]" office:value-type="float" office:value="0.00222708333333333" calcext:value-type="float">
            <text:p>0,00222708333333333000</text:p>
          </table:table-cell>
          <table:table-cell table:formula="of:=[.D2140]-[.D21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[.B2139]+9" office:value-type="float" office:value="19251" calcext:value-type="float">
            <text:p>19251</text:p>
          </table:table-cell>
          <table:table-cell office:value-type="float" office:value="8640000" calcext:value-type="float">
            <text:p>8640000</text:p>
          </table:table-cell>
          <table:table-cell table:formula="of:=[.B2140]/[.C2140]" office:value-type="float" office:value="0.002228125" calcext:value-type="float">
            <text:p>0,00222812500000000000</text:p>
          </table:table-cell>
          <table:table-cell table:formula="of:=[.D2141]-[.D21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B2140]+9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2141]/[.C2141]" office:value-type="float" office:value="0.00222916666666667" calcext:value-type="float">
            <text:p>0,00222916666666667000</text:p>
          </table:table-cell>
          <table:table-cell table:formula="of:=[.D2142]-[.D21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[.B2141]+9" office:value-type="float" office:value="19269" calcext:value-type="float">
            <text:p>19269</text:p>
          </table:table-cell>
          <table:table-cell office:value-type="float" office:value="8640000" calcext:value-type="float">
            <text:p>8640000</text:p>
          </table:table-cell>
          <table:table-cell table:formula="of:=[.B2142]/[.C2142]" office:value-type="float" office:value="0.00223020833333333" calcext:value-type="float">
            <text:p>0,00223020833333333000</text:p>
          </table:table-cell>
          <table:table-cell table:formula="of:=[.D2143]-[.D214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[.B2142]+9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2143]/[.C2143]" office:value-type="float" office:value="0.00223125" calcext:value-type="float">
            <text:p>0,00223125000000000000</text:p>
          </table:table-cell>
          <table:table-cell table:formula="of:=[.D2144]-[.D21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[.B2143]+9" office:value-type="float" office:value="19287" calcext:value-type="float">
            <text:p>19287</text:p>
          </table:table-cell>
          <table:table-cell office:value-type="float" office:value="8640000" calcext:value-type="float">
            <text:p>8640000</text:p>
          </table:table-cell>
          <table:table-cell table:formula="of:=[.B2144]/[.C2144]" office:value-type="float" office:value="0.00223229166666667" calcext:value-type="float">
            <text:p>0,00223229166666667000</text:p>
          </table:table-cell>
          <table:table-cell table:formula="of:=[.D2145]-[.D214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[.B2144]+9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2145]/[.C2145]" office:value-type="float" office:value="0.00223333333333333" calcext:value-type="float">
            <text:p>0,00223333333333333000</text:p>
          </table:table-cell>
          <table:table-cell table:formula="of:=[.D2146]-[.D214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B2145]+9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2146]/[.C2146]" office:value-type="float" office:value="0.002234375" calcext:value-type="float">
            <text:p>0,00223437500000000000</text:p>
          </table:table-cell>
          <table:table-cell table:formula="of:=[.D2147]-[.D214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[.B2146]+9" office:value-type="float" office:value="19314" calcext:value-type="float">
            <text:p>19314</text:p>
          </table:table-cell>
          <table:table-cell office:value-type="float" office:value="8640000" calcext:value-type="float">
            <text:p>8640000</text:p>
          </table:table-cell>
          <table:table-cell table:formula="of:=[.B2147]/[.C2147]" office:value-type="float" office:value="0.00223541666666667" calcext:value-type="float">
            <text:p>0,00223541666666667000</text:p>
          </table:table-cell>
          <table:table-cell table:formula="of:=[.D2148]-[.D21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[.B2147]+9" office:value-type="float" office:value="19323" calcext:value-type="float">
            <text:p>19323</text:p>
          </table:table-cell>
          <table:table-cell office:value-type="float" office:value="8640000" calcext:value-type="float">
            <text:p>8640000</text:p>
          </table:table-cell>
          <table:table-cell table:formula="of:=[.B2148]/[.C2148]" office:value-type="float" office:value="0.00223645833333333" calcext:value-type="float">
            <text:p>0,00223645833333333000</text:p>
          </table:table-cell>
          <table:table-cell table:formula="of:=[.D2149]-[.D214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[.B2148]+9" office:value-type="float" office:value="19332" calcext:value-type="float">
            <text:p>19332</text:p>
          </table:table-cell>
          <table:table-cell office:value-type="float" office:value="8640000" calcext:value-type="float">
            <text:p>8640000</text:p>
          </table:table-cell>
          <table:table-cell table:formula="of:=[.B2149]/[.C2149]" office:value-type="float" office:value="0.0022375" calcext:value-type="float">
            <text:p>0,00223750000000000000</text:p>
          </table:table-cell>
          <table:table-cell table:formula="of:=[.D2150]-[.D214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[.B2149]+9" office:value-type="float" office:value="19341" calcext:value-type="float">
            <text:p>19341</text:p>
          </table:table-cell>
          <table:table-cell office:value-type="float" office:value="8640000" calcext:value-type="float">
            <text:p>8640000</text:p>
          </table:table-cell>
          <table:table-cell table:formula="of:=[.B2150]/[.C2150]" office:value-type="float" office:value="0.00223854166666667" calcext:value-type="float">
            <text:p>0,00223854166666667000</text:p>
          </table:table-cell>
          <table:table-cell table:formula="of:=[.D2151]-[.D215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B2150]+9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2151]/[.C2151]" office:value-type="float" office:value="0.00223958333333333" calcext:value-type="float">
            <text:p>0,00223958333333333000</text:p>
          </table:table-cell>
          <table:table-cell table:formula="of:=[.D2152]-[.D21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[.B2151]+9" office:value-type="float" office:value="19359" calcext:value-type="float">
            <text:p>19359</text:p>
          </table:table-cell>
          <table:table-cell office:value-type="float" office:value="8640000" calcext:value-type="float">
            <text:p>8640000</text:p>
          </table:table-cell>
          <table:table-cell table:formula="of:=[.B2152]/[.C2152]" office:value-type="float" office:value="0.002240625" calcext:value-type="float">
            <text:p>0,00224062500000000000</text:p>
          </table:table-cell>
          <table:table-cell table:formula="of:=[.D2153]-[.D215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B2152]+9" office:value-type="float" office:value="19368" calcext:value-type="float">
            <text:p>19368</text:p>
          </table:table-cell>
          <table:table-cell office:value-type="float" office:value="8640000" calcext:value-type="float">
            <text:p>8640000</text:p>
          </table:table-cell>
          <table:table-cell table:formula="of:=[.B2153]/[.C2153]" office:value-type="float" office:value="0.00224166666666667" calcext:value-type="float">
            <text:p>0,00224166666666667000</text:p>
          </table:table-cell>
          <table:table-cell table:formula="of:=[.D2154]-[.D215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[.B2153]+9" office:value-type="float" office:value="19377" calcext:value-type="float">
            <text:p>19377</text:p>
          </table:table-cell>
          <table:table-cell office:value-type="float" office:value="8640000" calcext:value-type="float">
            <text:p>8640000</text:p>
          </table:table-cell>
          <table:table-cell table:formula="of:=[.B2154]/[.C2154]" office:value-type="float" office:value="0.00224270833333333" calcext:value-type="float">
            <text:p>0,00224270833333333000</text:p>
          </table:table-cell>
          <table:table-cell table:formula="of:=[.D2155]-[.D21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[.B2154]+9" office:value-type="float" office:value="19386" calcext:value-type="float">
            <text:p>19386</text:p>
          </table:table-cell>
          <table:table-cell office:value-type="float" office:value="8640000" calcext:value-type="float">
            <text:p>8640000</text:p>
          </table:table-cell>
          <table:table-cell table:formula="of:=[.B2155]/[.C2155]" office:value-type="float" office:value="0.00224375" calcext:value-type="float">
            <text:p>0,00224375000000000000</text:p>
          </table:table-cell>
          <table:table-cell table:formula="of:=[.D2156]-[.D215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B2155]+9" office:value-type="float" office:value="19395" calcext:value-type="float">
            <text:p>19395</text:p>
          </table:table-cell>
          <table:table-cell office:value-type="float" office:value="8640000" calcext:value-type="float">
            <text:p>8640000</text:p>
          </table:table-cell>
          <table:table-cell table:formula="of:=[.B2156]/[.C2156]" office:value-type="float" office:value="0.00224479166666667" calcext:value-type="float">
            <text:p>0,00224479166666667000</text:p>
          </table:table-cell>
          <table:table-cell table:formula="of:=[.D2157]-[.D21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[.B2156]+9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2157]/[.C2157]" office:value-type="float" office:value="0.00224583333333333" calcext:value-type="float">
            <text:p>0,00224583333333333000</text:p>
          </table:table-cell>
          <table:table-cell table:formula="of:=[.D2158]-[.D215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[.B2157]+9" office:value-type="float" office:value="19413" calcext:value-type="float">
            <text:p>19413</text:p>
          </table:table-cell>
          <table:table-cell office:value-type="float" office:value="8640000" calcext:value-type="float">
            <text:p>8640000</text:p>
          </table:table-cell>
          <table:table-cell table:formula="of:=[.B2158]/[.C2158]" office:value-type="float" office:value="0.002246875" calcext:value-type="float">
            <text:p>0,00224687500000000000</text:p>
          </table:table-cell>
          <table:table-cell table:formula="of:=[.D2159]-[.D21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B2158]+9" office:value-type="float" office:value="19422" calcext:value-type="float">
            <text:p>19422</text:p>
          </table:table-cell>
          <table:table-cell office:value-type="float" office:value="8640000" calcext:value-type="float">
            <text:p>8640000</text:p>
          </table:table-cell>
          <table:table-cell table:formula="of:=[.B2159]/[.C2159]" office:value-type="float" office:value="0.00224791666666667" calcext:value-type="float">
            <text:p>0,00224791666666667000</text:p>
          </table:table-cell>
          <table:table-cell table:formula="of:=[.D2160]-[.D215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[.B2159]+9" office:value-type="float" office:value="19431" calcext:value-type="float">
            <text:p>19431</text:p>
          </table:table-cell>
          <table:table-cell office:value-type="float" office:value="8640000" calcext:value-type="float">
            <text:p>8640000</text:p>
          </table:table-cell>
          <table:table-cell table:formula="of:=[.B2160]/[.C2160]" office:value-type="float" office:value="0.00224895833333333" calcext:value-type="float">
            <text:p>0,00224895833333333000</text:p>
          </table:table-cell>
          <table:table-cell table:formula="of:=[.D2161]-[.D21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B2160]+9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2161]/[.C2161]" office:value-type="float" office:value="0.00225" calcext:value-type="float">
            <text:p>0,00225000000000000000</text:p>
          </table:table-cell>
          <table:table-cell table:formula="of:=[.D2162]-[.D216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B2161]+9" office:value-type="float" office:value="19449" calcext:value-type="float">
            <text:p>19449</text:p>
          </table:table-cell>
          <table:table-cell office:value-type="float" office:value="8640000" calcext:value-type="float">
            <text:p>8640000</text:p>
          </table:table-cell>
          <table:table-cell table:formula="of:=[.B2162]/[.C2162]" office:value-type="float" office:value="0.00225104166666667" calcext:value-type="float">
            <text:p>0,00225104166666667000</text:p>
          </table:table-cell>
          <table:table-cell table:formula="of:=[.D2163]-[.D21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B2162]+9" office:value-type="float" office:value="19458" calcext:value-type="float">
            <text:p>19458</text:p>
          </table:table-cell>
          <table:table-cell office:value-type="float" office:value="8640000" calcext:value-type="float">
            <text:p>8640000</text:p>
          </table:table-cell>
          <table:table-cell table:formula="of:=[.B2163]/[.C2163]" office:value-type="float" office:value="0.00225208333333333" calcext:value-type="float">
            <text:p>0,00225208333333333000</text:p>
          </table:table-cell>
          <table:table-cell table:formula="of:=[.D2164]-[.D216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[.B2163]+9" office:value-type="float" office:value="19467" calcext:value-type="float">
            <text:p>19467</text:p>
          </table:table-cell>
          <table:table-cell office:value-type="float" office:value="8640000" calcext:value-type="float">
            <text:p>8640000</text:p>
          </table:table-cell>
          <table:table-cell table:formula="of:=[.B2164]/[.C2164]" office:value-type="float" office:value="0.002253125" calcext:value-type="float">
            <text:p>0,00225312500000000000</text:p>
          </table:table-cell>
          <table:table-cell table:formula="of:=[.D2165]-[.D216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[.B2164]+9" office:value-type="float" office:value="19476" calcext:value-type="float">
            <text:p>19476</text:p>
          </table:table-cell>
          <table:table-cell office:value-type="float" office:value="8640000" calcext:value-type="float">
            <text:p>8640000</text:p>
          </table:table-cell>
          <table:table-cell table:formula="of:=[.B2165]/[.C2165]" office:value-type="float" office:value="0.00225416666666667" calcext:value-type="float">
            <text:p>0,00225416666666667000</text:p>
          </table:table-cell>
          <table:table-cell table:formula="of:=[.D2166]-[.D216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B2165]+9" office:value-type="float" office:value="19485" calcext:value-type="float">
            <text:p>19485</text:p>
          </table:table-cell>
          <table:table-cell office:value-type="float" office:value="8640000" calcext:value-type="float">
            <text:p>8640000</text:p>
          </table:table-cell>
          <table:table-cell table:formula="of:=[.B2166]/[.C2166]" office:value-type="float" office:value="0.00225520833333333" calcext:value-type="float">
            <text:p>0,00225520833333333000</text:p>
          </table:table-cell>
          <table:table-cell table:formula="of:=[.D2167]-[.D21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[.B2166]+9" office:value-type="float" office:value="19494" calcext:value-type="float">
            <text:p>19494</text:p>
          </table:table-cell>
          <table:table-cell office:value-type="float" office:value="8640000" calcext:value-type="float">
            <text:p>8640000</text:p>
          </table:table-cell>
          <table:table-cell table:formula="of:=[.B2167]/[.C2167]" office:value-type="float" office:value="0.00225625" calcext:value-type="float">
            <text:p>0,00225625000000000000</text:p>
          </table:table-cell>
          <table:table-cell table:formula="of:=[.D2168]-[.D216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B2167]+9" office:value-type="float" office:value="19503" calcext:value-type="float">
            <text:p>19503</text:p>
          </table:table-cell>
          <table:table-cell office:value-type="float" office:value="8640000" calcext:value-type="float">
            <text:p>8640000</text:p>
          </table:table-cell>
          <table:table-cell table:formula="of:=[.B2168]/[.C2168]" office:value-type="float" office:value="0.00225729166666667" calcext:value-type="float">
            <text:p>0,00225729166666667000</text:p>
          </table:table-cell>
          <table:table-cell table:formula="of:=[.D2169]-[.D216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B2168]+9" office:value-type="float" office:value="19512" calcext:value-type="float">
            <text:p>19512</text:p>
          </table:table-cell>
          <table:table-cell office:value-type="float" office:value="8640000" calcext:value-type="float">
            <text:p>8640000</text:p>
          </table:table-cell>
          <table:table-cell table:formula="of:=[.B2169]/[.C2169]" office:value-type="float" office:value="0.00225833333333333" calcext:value-type="float">
            <text:p>0,00225833333333333000</text:p>
          </table:table-cell>
          <table:table-cell table:formula="of:=[.D2170]-[.D216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B2169]+9" office:value-type="float" office:value="19521" calcext:value-type="float">
            <text:p>19521</text:p>
          </table:table-cell>
          <table:table-cell office:value-type="float" office:value="8640000" calcext:value-type="float">
            <text:p>8640000</text:p>
          </table:table-cell>
          <table:table-cell table:formula="of:=[.B2170]/[.C2170]" office:value-type="float" office:value="0.002259375" calcext:value-type="float">
            <text:p>0,00225937500000000000</text:p>
          </table:table-cell>
          <table:table-cell table:formula="of:=[.D2171]-[.D217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[.B2170]+9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2171]/[.C2171]" office:value-type="float" office:value="0.00226041666666667" calcext:value-type="float">
            <text:p>0,00226041666666667000</text:p>
          </table:table-cell>
          <table:table-cell table:formula="of:=[.D2172]-[.D217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[.B2171]+9" office:value-type="float" office:value="19539" calcext:value-type="float">
            <text:p>19539</text:p>
          </table:table-cell>
          <table:table-cell office:value-type="float" office:value="8640000" calcext:value-type="float">
            <text:p>8640000</text:p>
          </table:table-cell>
          <table:table-cell table:formula="of:=[.B2172]/[.C2172]" office:value-type="float" office:value="0.00226145833333333" calcext:value-type="float">
            <text:p>0,00226145833333333000</text:p>
          </table:table-cell>
          <table:table-cell table:formula="of:=[.D2173]-[.D217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[.B2172]+9" office:value-type="float" office:value="19548" calcext:value-type="float">
            <text:p>19548</text:p>
          </table:table-cell>
          <table:table-cell office:value-type="float" office:value="8640000" calcext:value-type="float">
            <text:p>8640000</text:p>
          </table:table-cell>
          <table:table-cell table:formula="of:=[.B2173]/[.C2173]" office:value-type="float" office:value="0.0022625" calcext:value-type="float">
            <text:p>0,00226250000000000000</text:p>
          </table:table-cell>
          <table:table-cell table:formula="of:=[.D2174]-[.D217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[.B2173]+9" office:value-type="float" office:value="19557" calcext:value-type="float">
            <text:p>19557</text:p>
          </table:table-cell>
          <table:table-cell office:value-type="float" office:value="8640000" calcext:value-type="float">
            <text:p>8640000</text:p>
          </table:table-cell>
          <table:table-cell table:formula="of:=[.B2174]/[.C2174]" office:value-type="float" office:value="0.00226354166666667" calcext:value-type="float">
            <text:p>0,00226354166666667000</text:p>
          </table:table-cell>
          <table:table-cell table:formula="of:=[.D2175]-[.D217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[.B2174]+9" office:value-type="float" office:value="19566" calcext:value-type="float">
            <text:p>19566</text:p>
          </table:table-cell>
          <table:table-cell office:value-type="float" office:value="8640000" calcext:value-type="float">
            <text:p>8640000</text:p>
          </table:table-cell>
          <table:table-cell table:formula="of:=[.B2175]/[.C2175]" office:value-type="float" office:value="0.00226458333333333" calcext:value-type="float">
            <text:p>0,00226458333333333000</text:p>
          </table:table-cell>
          <table:table-cell table:formula="of:=[.D2176]-[.D21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[.B2175]+9" office:value-type="float" office:value="19575" calcext:value-type="float">
            <text:p>19575</text:p>
          </table:table-cell>
          <table:table-cell office:value-type="float" office:value="8640000" calcext:value-type="float">
            <text:p>8640000</text:p>
          </table:table-cell>
          <table:table-cell table:formula="of:=[.B2176]/[.C2176]" office:value-type="float" office:value="0.002265625" calcext:value-type="float">
            <text:p>0,00226562500000000000</text:p>
          </table:table-cell>
          <table:table-cell table:formula="of:=[.D2177]-[.D217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B2176]+9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2177]/[.C2177]" office:value-type="float" office:value="0.00226666666666667" calcext:value-type="float">
            <text:p>0,00226666666666667000</text:p>
          </table:table-cell>
          <table:table-cell table:formula="of:=[.D2178]-[.D217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[.B2177]+9" office:value-type="float" office:value="19593" calcext:value-type="float">
            <text:p>19593</text:p>
          </table:table-cell>
          <table:table-cell office:value-type="float" office:value="8640000" calcext:value-type="float">
            <text:p>8640000</text:p>
          </table:table-cell>
          <table:table-cell table:formula="of:=[.B2178]/[.C2178]" office:value-type="float" office:value="0.00226770833333333" calcext:value-type="float">
            <text:p>0,00226770833333333000</text:p>
          </table:table-cell>
          <table:table-cell table:formula="of:=[.D2179]-[.D217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B2178]+9" office:value-type="float" office:value="19602" calcext:value-type="float">
            <text:p>19602</text:p>
          </table:table-cell>
          <table:table-cell office:value-type="float" office:value="8640000" calcext:value-type="float">
            <text:p>8640000</text:p>
          </table:table-cell>
          <table:table-cell table:formula="of:=[.B2179]/[.C2179]" office:value-type="float" office:value="0.00226875" calcext:value-type="float">
            <text:p>0,00226875000000000000</text:p>
          </table:table-cell>
          <table:table-cell table:formula="of:=[.D2180]-[.D21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[.B2179]+9" office:value-type="float" office:value="19611" calcext:value-type="float">
            <text:p>19611</text:p>
          </table:table-cell>
          <table:table-cell office:value-type="float" office:value="8640000" calcext:value-type="float">
            <text:p>8640000</text:p>
          </table:table-cell>
          <table:table-cell table:formula="of:=[.B2180]/[.C2180]" office:value-type="float" office:value="0.00226979166666667" calcext:value-type="float">
            <text:p>0,00226979166666667000</text:p>
          </table:table-cell>
          <table:table-cell table:formula="of:=[.D2181]-[.D218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B2180]+9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2181]/[.C2181]" office:value-type="float" office:value="0.00227083333333333" calcext:value-type="float">
            <text:p>0,00227083333333333000</text:p>
          </table:table-cell>
          <table:table-cell table:formula="of:=[.D2182]-[.D218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[.B2181]+9" office:value-type="float" office:value="19629" calcext:value-type="float">
            <text:p>19629</text:p>
          </table:table-cell>
          <table:table-cell office:value-type="float" office:value="8640000" calcext:value-type="float">
            <text:p>8640000</text:p>
          </table:table-cell>
          <table:table-cell table:formula="of:=[.B2182]/[.C2182]" office:value-type="float" office:value="0.002271875" calcext:value-type="float">
            <text:p>0,00227187500000000000</text:p>
          </table:table-cell>
          <table:table-cell table:formula="of:=[.D2183]-[.D218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[.B2182]+9" office:value-type="float" office:value="19638" calcext:value-type="float">
            <text:p>19638</text:p>
          </table:table-cell>
          <table:table-cell office:value-type="float" office:value="8640000" calcext:value-type="float">
            <text:p>8640000</text:p>
          </table:table-cell>
          <table:table-cell table:formula="of:=[.B2183]/[.C2183]" office:value-type="float" office:value="0.00227291666666667" calcext:value-type="float">
            <text:p>0,00227291666666667000</text:p>
          </table:table-cell>
          <table:table-cell table:formula="of:=[.D2184]-[.D218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[.B2183]+9" office:value-type="float" office:value="19647" calcext:value-type="float">
            <text:p>19647</text:p>
          </table:table-cell>
          <table:table-cell office:value-type="float" office:value="8640000" calcext:value-type="float">
            <text:p>8640000</text:p>
          </table:table-cell>
          <table:table-cell table:formula="of:=[.B2184]/[.C2184]" office:value-type="float" office:value="0.00227395833333333" calcext:value-type="float">
            <text:p>0,00227395833333333000</text:p>
          </table:table-cell>
          <table:table-cell table:formula="of:=[.D2185]-[.D218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[.B2184]+9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2185]/[.C2185]" office:value-type="float" office:value="0.002275" calcext:value-type="float">
            <text:p>0,00227500000000000000</text:p>
          </table:table-cell>
          <table:table-cell table:formula="of:=[.D2186]-[.D218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[.B2185]+9" office:value-type="float" office:value="19665" calcext:value-type="float">
            <text:p>19665</text:p>
          </table:table-cell>
          <table:table-cell office:value-type="float" office:value="8640000" calcext:value-type="float">
            <text:p>8640000</text:p>
          </table:table-cell>
          <table:table-cell table:formula="of:=[.B2186]/[.C2186]" office:value-type="float" office:value="0.00227604166666667" calcext:value-type="float">
            <text:p>0,00227604166666667000</text:p>
          </table:table-cell>
          <table:table-cell table:formula="of:=[.D2187]-[.D21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[.B2186]+9" office:value-type="float" office:value="19674" calcext:value-type="float">
            <text:p>19674</text:p>
          </table:table-cell>
          <table:table-cell office:value-type="float" office:value="8640000" calcext:value-type="float">
            <text:p>8640000</text:p>
          </table:table-cell>
          <table:table-cell table:formula="of:=[.B2187]/[.C2187]" office:value-type="float" office:value="0.00227708333333333" calcext:value-type="float">
            <text:p>0,00227708333333333000</text:p>
          </table:table-cell>
          <table:table-cell table:formula="of:=[.D2188]-[.D218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[.B2187]+9" office:value-type="float" office:value="19683" calcext:value-type="float">
            <text:p>19683</text:p>
          </table:table-cell>
          <table:table-cell office:value-type="float" office:value="8640000" calcext:value-type="float">
            <text:p>8640000</text:p>
          </table:table-cell>
          <table:table-cell table:formula="of:=[.B2188]/[.C2188]" office:value-type="float" office:value="0.002278125" calcext:value-type="float">
            <text:p>0,00227812500000000000</text:p>
          </table:table-cell>
          <table:table-cell table:formula="of:=[.D2189]-[.D21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B2188]+9" office:value-type="float" office:value="19692" calcext:value-type="float">
            <text:p>19692</text:p>
          </table:table-cell>
          <table:table-cell office:value-type="float" office:value="8640000" calcext:value-type="float">
            <text:p>8640000</text:p>
          </table:table-cell>
          <table:table-cell table:formula="of:=[.B2189]/[.C2189]" office:value-type="float" office:value="0.00227916666666667" calcext:value-type="float">
            <text:p>0,00227916666666667000</text:p>
          </table:table-cell>
          <table:table-cell table:formula="of:=[.D2190]-[.D218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[.B2189]+9" office:value-type="float" office:value="19701" calcext:value-type="float">
            <text:p>19701</text:p>
          </table:table-cell>
          <table:table-cell office:value-type="float" office:value="8640000" calcext:value-type="float">
            <text:p>8640000</text:p>
          </table:table-cell>
          <table:table-cell table:formula="of:=[.B2190]/[.C2190]" office:value-type="float" office:value="0.00228020833333333" calcext:value-type="float">
            <text:p>0,00228020833333333000</text:p>
          </table:table-cell>
          <table:table-cell table:formula="of:=[.D2191]-[.D21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[.B2190]+9" office:value-type="float" office:value="19710" calcext:value-type="float">
            <text:p>19710</text:p>
          </table:table-cell>
          <table:table-cell office:value-type="float" office:value="8640000" calcext:value-type="float">
            <text:p>8640000</text:p>
          </table:table-cell>
          <table:table-cell table:formula="of:=[.B2191]/[.C2191]" office:value-type="float" office:value="0.00228125" calcext:value-type="float">
            <text:p>0,00228125000000000000</text:p>
          </table:table-cell>
          <table:table-cell table:formula="of:=[.D2192]-[.D219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[.B2191]+9" office:value-type="float" office:value="19719" calcext:value-type="float">
            <text:p>19719</text:p>
          </table:table-cell>
          <table:table-cell office:value-type="float" office:value="8640000" calcext:value-type="float">
            <text:p>8640000</text:p>
          </table:table-cell>
          <table:table-cell table:formula="of:=[.B2192]/[.C2192]" office:value-type="float" office:value="0.00228229166666667" calcext:value-type="float">
            <text:p>0,00228229166666667000</text:p>
          </table:table-cell>
          <table:table-cell table:formula="of:=[.D2193]-[.D21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B2192]+9" office:value-type="float" office:value="19728" calcext:value-type="float">
            <text:p>19728</text:p>
          </table:table-cell>
          <table:table-cell office:value-type="float" office:value="8640000" calcext:value-type="float">
            <text:p>8640000</text:p>
          </table:table-cell>
          <table:table-cell table:formula="of:=[.B2193]/[.C2193]" office:value-type="float" office:value="0.00228333333333333" calcext:value-type="float">
            <text:p>0,00228333333333333000</text:p>
          </table:table-cell>
          <table:table-cell table:formula="of:=[.D2194]-[.D219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[.B2193]+9" office:value-type="float" office:value="19737" calcext:value-type="float">
            <text:p>19737</text:p>
          </table:table-cell>
          <table:table-cell office:value-type="float" office:value="8640000" calcext:value-type="float">
            <text:p>8640000</text:p>
          </table:table-cell>
          <table:table-cell table:formula="of:=[.B2194]/[.C2194]" office:value-type="float" office:value="0.002284375" calcext:value-type="float">
            <text:p>0,00228437500000000000</text:p>
          </table:table-cell>
          <table:table-cell table:formula="of:=[.D2195]-[.D21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[.B2194]+9" office:value-type="float" office:value="19746" calcext:value-type="float">
            <text:p>19746</text:p>
          </table:table-cell>
          <table:table-cell office:value-type="float" office:value="8640000" calcext:value-type="float">
            <text:p>8640000</text:p>
          </table:table-cell>
          <table:table-cell table:formula="of:=[.B2195]/[.C2195]" office:value-type="float" office:value="0.00228541666666667" calcext:value-type="float">
            <text:p>0,00228541666666667000</text:p>
          </table:table-cell>
          <table:table-cell table:formula="of:=[.D2196]-[.D219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[.B2195]+9" office:value-type="float" office:value="19755" calcext:value-type="float">
            <text:p>19755</text:p>
          </table:table-cell>
          <table:table-cell office:value-type="float" office:value="8640000" calcext:value-type="float">
            <text:p>8640000</text:p>
          </table:table-cell>
          <table:table-cell table:formula="of:=[.B2196]/[.C2196]" office:value-type="float" office:value="0.00228645833333333" calcext:value-type="float">
            <text:p>0,00228645833333333000</text:p>
          </table:table-cell>
          <table:table-cell table:formula="of:=[.D2197]-[.D219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[.B2196]+9" office:value-type="float" office:value="19764" calcext:value-type="float">
            <text:p>19764</text:p>
          </table:table-cell>
          <table:table-cell office:value-type="float" office:value="8640000" calcext:value-type="float">
            <text:p>8640000</text:p>
          </table:table-cell>
          <table:table-cell table:formula="of:=[.B2197]/[.C2197]" office:value-type="float" office:value="0.0022875" calcext:value-type="float">
            <text:p>0,00228750000000000000</text:p>
          </table:table-cell>
          <table:table-cell table:formula="of:=[.D2198]-[.D219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B2197]+9" office:value-type="float" office:value="19773" calcext:value-type="float">
            <text:p>19773</text:p>
          </table:table-cell>
          <table:table-cell office:value-type="float" office:value="8640000" calcext:value-type="float">
            <text:p>8640000</text:p>
          </table:table-cell>
          <table:table-cell table:formula="of:=[.B2198]/[.C2198]" office:value-type="float" office:value="0.00228854166666667" calcext:value-type="float">
            <text:p>0,00228854166666667000</text:p>
          </table:table-cell>
          <table:table-cell table:formula="of:=[.D2199]-[.D219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[.B2198]+9" office:value-type="float" office:value="19782" calcext:value-type="float">
            <text:p>19782</text:p>
          </table:table-cell>
          <table:table-cell office:value-type="float" office:value="8640000" calcext:value-type="float">
            <text:p>8640000</text:p>
          </table:table-cell>
          <table:table-cell table:formula="of:=[.B2199]/[.C2199]" office:value-type="float" office:value="0.00228958333333333" calcext:value-type="float">
            <text:p>0,00228958333333333000</text:p>
          </table:table-cell>
          <table:table-cell table:formula="of:=[.D2200]-[.D219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B2199]+9" office:value-type="float" office:value="19791" calcext:value-type="float">
            <text:p>19791</text:p>
          </table:table-cell>
          <table:table-cell office:value-type="float" office:value="8640000" calcext:value-type="float">
            <text:p>8640000</text:p>
          </table:table-cell>
          <table:table-cell table:formula="of:=[.B2200]/[.C2200]" office:value-type="float" office:value="0.002290625" calcext:value-type="float">
            <text:p>0,00229062500000000000</text:p>
          </table:table-cell>
          <table:table-cell table:formula="of:=[.D2201]-[.D220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B2200]+9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2201]/[.C2201]" office:value-type="float" office:value="0.00229166666666667" calcext:value-type="float">
            <text:p>0,00229166666666667000</text:p>
          </table:table-cell>
          <table:table-cell table:formula="of:=[.D2202]-[.D22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[.B2201]+9" office:value-type="float" office:value="19809" calcext:value-type="float">
            <text:p>19809</text:p>
          </table:table-cell>
          <table:table-cell office:value-type="float" office:value="8640000" calcext:value-type="float">
            <text:p>8640000</text:p>
          </table:table-cell>
          <table:table-cell table:formula="of:=[.B2202]/[.C2202]" office:value-type="float" office:value="0.00229270833333333" calcext:value-type="float">
            <text:p>0,00229270833333333000</text:p>
          </table:table-cell>
          <table:table-cell table:formula="of:=[.D2203]-[.D220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[.B2202]+9" office:value-type="float" office:value="19818" calcext:value-type="float">
            <text:p>19818</text:p>
          </table:table-cell>
          <table:table-cell office:value-type="float" office:value="8640000" calcext:value-type="float">
            <text:p>8640000</text:p>
          </table:table-cell>
          <table:table-cell table:formula="of:=[.B2203]/[.C2203]" office:value-type="float" office:value="0.00229375" calcext:value-type="float">
            <text:p>0,00229375000000000000</text:p>
          </table:table-cell>
          <table:table-cell table:formula="of:=[.D2204]-[.D22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[.B2203]+9" office:value-type="float" office:value="19827" calcext:value-type="float">
            <text:p>19827</text:p>
          </table:table-cell>
          <table:table-cell office:value-type="float" office:value="8640000" calcext:value-type="float">
            <text:p>8640000</text:p>
          </table:table-cell>
          <table:table-cell table:formula="of:=[.B2204]/[.C2204]" office:value-type="float" office:value="0.00229479166666667" calcext:value-type="float">
            <text:p>0,00229479166666667000</text:p>
          </table:table-cell>
          <table:table-cell table:formula="of:=[.D2205]-[.D220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[.B2204]+9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2205]/[.C2205]" office:value-type="float" office:value="0.00229583333333333" calcext:value-type="float">
            <text:p>0,00229583333333333000</text:p>
          </table:table-cell>
          <table:table-cell table:formula="of:=[.D2206]-[.D22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B2205]+9" office:value-type="float" office:value="19845" calcext:value-type="float">
            <text:p>19845</text:p>
          </table:table-cell>
          <table:table-cell office:value-type="float" office:value="8640000" calcext:value-type="float">
            <text:p>8640000</text:p>
          </table:table-cell>
          <table:table-cell table:formula="of:=[.B2206]/[.C2206]" office:value-type="float" office:value="0.002296875" calcext:value-type="float">
            <text:p>0,00229687500000000000</text:p>
          </table:table-cell>
          <table:table-cell table:formula="of:=[.D2207]-[.D220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[.B2206]+9" office:value-type="float" office:value="19854" calcext:value-type="float">
            <text:p>19854</text:p>
          </table:table-cell>
          <table:table-cell office:value-type="float" office:value="8640000" calcext:value-type="float">
            <text:p>8640000</text:p>
          </table:table-cell>
          <table:table-cell table:formula="of:=[.B2207]/[.C2207]" office:value-type="float" office:value="0.00229791666666667" calcext:value-type="float">
            <text:p>0,00229791666666667000</text:p>
          </table:table-cell>
          <table:table-cell table:formula="of:=[.D2208]-[.D22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[.B2207]+9" office:value-type="float" office:value="19863" calcext:value-type="float">
            <text:p>19863</text:p>
          </table:table-cell>
          <table:table-cell office:value-type="float" office:value="8640000" calcext:value-type="float">
            <text:p>8640000</text:p>
          </table:table-cell>
          <table:table-cell table:formula="of:=[.B2208]/[.C2208]" office:value-type="float" office:value="0.00229895833333333" calcext:value-type="float">
            <text:p>0,00229895833333333000</text:p>
          </table:table-cell>
          <table:table-cell table:formula="of:=[.D2209]-[.D220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[.B2208]+9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2209]/[.C2209]" office:value-type="float" office:value="0.0023" calcext:value-type="float">
            <text:p>0,00230000000000000000</text:p>
          </table:table-cell>
          <table:table-cell table:formula="of:=[.D2210]-[.D22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[.B2209]+9" office:value-type="float" office:value="19881" calcext:value-type="float">
            <text:p>19881</text:p>
          </table:table-cell>
          <table:table-cell office:value-type="float" office:value="8640000" calcext:value-type="float">
            <text:p>8640000</text:p>
          </table:table-cell>
          <table:table-cell table:formula="of:=[.B2210]/[.C2210]" office:value-type="float" office:value="0.00230104166666667" calcext:value-type="float">
            <text:p>0,00230104166666667000</text:p>
          </table:table-cell>
          <table:table-cell table:formula="of:=[.D2211]-[.D221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[.B2210]+9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2211]/[.C2211]" office:value-type="float" office:value="0.00230208333333333" calcext:value-type="float">
            <text:p>0,00230208333333333000</text:p>
          </table:table-cell>
          <table:table-cell table:formula="of:=[.D2212]-[.D221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[.B2211]+9" office:value-type="float" office:value="19899" calcext:value-type="float">
            <text:p>19899</text:p>
          </table:table-cell>
          <table:table-cell office:value-type="float" office:value="8640000" calcext:value-type="float">
            <text:p>8640000</text:p>
          </table:table-cell>
          <table:table-cell table:formula="of:=[.B2212]/[.C2212]" office:value-type="float" office:value="0.002303125" calcext:value-type="float">
            <text:p>0,00230312500000000000</text:p>
          </table:table-cell>
          <table:table-cell table:formula="of:=[.D2213]-[.D221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[.B2212]+9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2213]/[.C2213]" office:value-type="float" office:value="0.00230416666666667" calcext:value-type="float">
            <text:p>0,00230416666666667000</text:p>
          </table:table-cell>
          <table:table-cell table:formula="of:=[.D2214]-[.D22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B2213]+9" office:value-type="float" office:value="19917" calcext:value-type="float">
            <text:p>19917</text:p>
          </table:table-cell>
          <table:table-cell office:value-type="float" office:value="8640000" calcext:value-type="float">
            <text:p>8640000</text:p>
          </table:table-cell>
          <table:table-cell table:formula="of:=[.B2214]/[.C2214]" office:value-type="float" office:value="0.00230520833333333" calcext:value-type="float">
            <text:p>0,00230520833333333000</text:p>
          </table:table-cell>
          <table:table-cell table:formula="of:=[.D2215]-[.D221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[.B2214]+9" office:value-type="float" office:value="19926" calcext:value-type="float">
            <text:p>19926</text:p>
          </table:table-cell>
          <table:table-cell office:value-type="float" office:value="8640000" calcext:value-type="float">
            <text:p>8640000</text:p>
          </table:table-cell>
          <table:table-cell table:formula="of:=[.B2215]/[.C2215]" office:value-type="float" office:value="0.00230625" calcext:value-type="float">
            <text:p>0,00230625000000000000</text:p>
          </table:table-cell>
          <table:table-cell table:formula="of:=[.D2216]-[.D221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[.B2215]+9" office:value-type="float" office:value="19935" calcext:value-type="float">
            <text:p>19935</text:p>
          </table:table-cell>
          <table:table-cell office:value-type="float" office:value="8640000" calcext:value-type="float">
            <text:p>8640000</text:p>
          </table:table-cell>
          <table:table-cell table:formula="of:=[.B2216]/[.C2216]" office:value-type="float" office:value="0.00230729166666667" calcext:value-type="float">
            <text:p>0,00230729166666667000</text:p>
          </table:table-cell>
          <table:table-cell table:formula="of:=[.D2217]-[.D221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[.B2216]+9" office:value-type="float" office:value="19944" calcext:value-type="float">
            <text:p>19944</text:p>
          </table:table-cell>
          <table:table-cell office:value-type="float" office:value="8640000" calcext:value-type="float">
            <text:p>8640000</text:p>
          </table:table-cell>
          <table:table-cell table:formula="of:=[.B2217]/[.C2217]" office:value-type="float" office:value="0.00230833333333333" calcext:value-type="float">
            <text:p>0,00230833333333333000</text:p>
          </table:table-cell>
          <table:table-cell table:formula="of:=[.D2218]-[.D221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[.B2217]+9" office:value-type="float" office:value="19953" calcext:value-type="float">
            <text:p>19953</text:p>
          </table:table-cell>
          <table:table-cell office:value-type="float" office:value="8640000" calcext:value-type="float">
            <text:p>8640000</text:p>
          </table:table-cell>
          <table:table-cell table:formula="of:=[.B2218]/[.C2218]" office:value-type="float" office:value="0.002309375" calcext:value-type="float">
            <text:p>0,00230937500000000000</text:p>
          </table:table-cell>
          <table:table-cell table:formula="of:=[.D2219]-[.D221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[.B2218]+9" office:value-type="float" office:value="19962" calcext:value-type="float">
            <text:p>19962</text:p>
          </table:table-cell>
          <table:table-cell office:value-type="float" office:value="8640000" calcext:value-type="float">
            <text:p>8640000</text:p>
          </table:table-cell>
          <table:table-cell table:formula="of:=[.B2219]/[.C2219]" office:value-type="float" office:value="0.00231041666666667" calcext:value-type="float">
            <text:p>0,00231041666666667000</text:p>
          </table:table-cell>
          <table:table-cell table:formula="of:=[.D2220]-[.D221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[.B2219]+9" office:value-type="float" office:value="19971" calcext:value-type="float">
            <text:p>19971</text:p>
          </table:table-cell>
          <table:table-cell office:value-type="float" office:value="8640000" calcext:value-type="float">
            <text:p>8640000</text:p>
          </table:table-cell>
          <table:table-cell table:formula="of:=[.B2220]/[.C2220]" office:value-type="float" office:value="0.00231145833333333" calcext:value-type="float">
            <text:p>0,00231145833333333000</text:p>
          </table:table-cell>
          <table:table-cell table:formula="of:=[.D2221]-[.D22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[.B2220]+9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2221]/[.C2221]" office:value-type="float" office:value="0.0023125" calcext:value-type="float">
            <text:p>0,00231250000000000000</text:p>
          </table:table-cell>
          <table:table-cell table:formula="of:=[.D2222]-[.D222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[.B2221]+9" office:value-type="float" office:value="19989" calcext:value-type="float">
            <text:p>19989</text:p>
          </table:table-cell>
          <table:table-cell office:value-type="float" office:value="8640000" calcext:value-type="float">
            <text:p>8640000</text:p>
          </table:table-cell>
          <table:table-cell table:formula="of:=[.B2222]/[.C2222]" office:value-type="float" office:value="0.00231354166666667" calcext:value-type="float">
            <text:p>0,00231354166666667000</text:p>
          </table:table-cell>
          <table:table-cell table:formula="of:=[.D2223]-[.D22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[.B2222]+9" office:value-type="float" office:value="19998" calcext:value-type="float">
            <text:p>19998</text:p>
          </table:table-cell>
          <table:table-cell office:value-type="float" office:value="8640000" calcext:value-type="float">
            <text:p>8640000</text:p>
          </table:table-cell>
          <table:table-cell table:formula="of:=[.B2223]/[.C2223]" office:value-type="float" office:value="0.00231458333333333" calcext:value-type="float">
            <text:p>0,00231458333333333000</text:p>
          </table:table-cell>
          <table:table-cell table:formula="of:=[.D2224]-[.D222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[.B2223]+9" office:value-type="float" office:value="20007" calcext:value-type="float">
            <text:p>20007</text:p>
          </table:table-cell>
          <table:table-cell office:value-type="float" office:value="8640000" calcext:value-type="float">
            <text:p>8640000</text:p>
          </table:table-cell>
          <table:table-cell table:formula="of:=[.B2224]/[.C2224]" office:value-type="float" office:value="0.002315625" calcext:value-type="float">
            <text:p>0,00231562500000000000</text:p>
          </table:table-cell>
          <table:table-cell table:formula="of:=[.D2225]-[.D22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[.B2224]+9" office:value-type="float" office:value="20016" calcext:value-type="float">
            <text:p>20016</text:p>
          </table:table-cell>
          <table:table-cell office:value-type="float" office:value="8640000" calcext:value-type="float">
            <text:p>8640000</text:p>
          </table:table-cell>
          <table:table-cell table:formula="of:=[.B2225]/[.C2225]" office:value-type="float" office:value="0.00231666666666667" calcext:value-type="float">
            <text:p>0,00231666666666667000</text:p>
          </table:table-cell>
          <table:table-cell table:formula="of:=[.D2226]-[.D222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[.B2225]+9" office:value-type="float" office:value="20025" calcext:value-type="float">
            <text:p>20025</text:p>
          </table:table-cell>
          <table:table-cell office:value-type="float" office:value="8640000" calcext:value-type="float">
            <text:p>8640000</text:p>
          </table:table-cell>
          <table:table-cell table:formula="of:=[.B2226]/[.C2226]" office:value-type="float" office:value="0.00231770833333333" calcext:value-type="float">
            <text:p>0,00231770833333333000</text:p>
          </table:table-cell>
          <table:table-cell table:formula="of:=[.D2227]-[.D22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[.B2226]+9" office:value-type="float" office:value="20034" calcext:value-type="float">
            <text:p>20034</text:p>
          </table:table-cell>
          <table:table-cell office:value-type="float" office:value="8640000" calcext:value-type="float">
            <text:p>8640000</text:p>
          </table:table-cell>
          <table:table-cell table:formula="of:=[.B2227]/[.C2227]" office:value-type="float" office:value="0.00231875" calcext:value-type="float">
            <text:p>0,00231875000000000000</text:p>
          </table:table-cell>
          <table:table-cell table:formula="of:=[.D2228]-[.D222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[.B2227]+9" office:value-type="float" office:value="20043" calcext:value-type="float">
            <text:p>20043</text:p>
          </table:table-cell>
          <table:table-cell office:value-type="float" office:value="8640000" calcext:value-type="float">
            <text:p>8640000</text:p>
          </table:table-cell>
          <table:table-cell table:formula="of:=[.B2228]/[.C2228]" office:value-type="float" office:value="0.00231979166666667" calcext:value-type="float">
            <text:p>0,00231979166666667000</text:p>
          </table:table-cell>
          <table:table-cell table:formula="of:=[.D2229]-[.D22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[.B2228]+9" office:value-type="float" office:value="20052" calcext:value-type="float">
            <text:p>20052</text:p>
          </table:table-cell>
          <table:table-cell office:value-type="float" office:value="8640000" calcext:value-type="float">
            <text:p>8640000</text:p>
          </table:table-cell>
          <table:table-cell table:formula="of:=[.B2229]/[.C2229]" office:value-type="float" office:value="0.00232083333333333" calcext:value-type="float">
            <text:p>0,00232083333333333000</text:p>
          </table:table-cell>
          <table:table-cell table:formula="of:=[.D2230]-[.D222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[.B2229]+9" office:value-type="float" office:value="20061" calcext:value-type="float">
            <text:p>20061</text:p>
          </table:table-cell>
          <table:table-cell office:value-type="float" office:value="8640000" calcext:value-type="float">
            <text:p>8640000</text:p>
          </table:table-cell>
          <table:table-cell table:formula="of:=[.B2230]/[.C2230]" office:value-type="float" office:value="0.002321875" calcext:value-type="float">
            <text:p>0,00232187500000000000</text:p>
          </table:table-cell>
          <table:table-cell table:formula="of:=[.D2231]-[.D223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[.B2230]+9" office:value-type="float" office:value="20070" calcext:value-type="float">
            <text:p>20070</text:p>
          </table:table-cell>
          <table:table-cell office:value-type="float" office:value="8640000" calcext:value-type="float">
            <text:p>8640000</text:p>
          </table:table-cell>
          <table:table-cell table:formula="of:=[.B2231]/[.C2231]" office:value-type="float" office:value="0.00232291666666667" calcext:value-type="float">
            <text:p>0,00232291666666667000</text:p>
          </table:table-cell>
          <table:table-cell table:formula="of:=[.D2232]-[.D223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[.B2231]+9" office:value-type="float" office:value="20079" calcext:value-type="float">
            <text:p>20079</text:p>
          </table:table-cell>
          <table:table-cell office:value-type="float" office:value="8640000" calcext:value-type="float">
            <text:p>8640000</text:p>
          </table:table-cell>
          <table:table-cell table:formula="of:=[.B2232]/[.C2232]" office:value-type="float" office:value="0.00232395833333333" calcext:value-type="float">
            <text:p>0,00232395833333333000</text:p>
          </table:table-cell>
          <table:table-cell table:formula="of:=[.D2233]-[.D223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[.B2232]+9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2233]/[.C2233]" office:value-type="float" office:value="0.002325" calcext:value-type="float">
            <text:p>0,00232500000000000000</text:p>
          </table:table-cell>
          <table:table-cell table:formula="of:=[.D2234]-[.D223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[.B2233]+9" office:value-type="float" office:value="20097" calcext:value-type="float">
            <text:p>20097</text:p>
          </table:table-cell>
          <table:table-cell office:value-type="float" office:value="8640000" calcext:value-type="float">
            <text:p>8640000</text:p>
          </table:table-cell>
          <table:table-cell table:formula="of:=[.B2234]/[.C2234]" office:value-type="float" office:value="0.00232604166666667" calcext:value-type="float">
            <text:p>0,00232604166666667000</text:p>
          </table:table-cell>
          <table:table-cell table:formula="of:=[.D2235]-[.D223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[.B2234]+9" office:value-type="float" office:value="20106" calcext:value-type="float">
            <text:p>20106</text:p>
          </table:table-cell>
          <table:table-cell office:value-type="float" office:value="8640000" calcext:value-type="float">
            <text:p>8640000</text:p>
          </table:table-cell>
          <table:table-cell table:formula="of:=[.B2235]/[.C2235]" office:value-type="float" office:value="0.00232708333333333" calcext:value-type="float">
            <text:p>0,00232708333333333000</text:p>
          </table:table-cell>
          <table:table-cell table:formula="of:=[.D2236]-[.D22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[.B2235]+9" office:value-type="float" office:value="20115" calcext:value-type="float">
            <text:p>20115</text:p>
          </table:table-cell>
          <table:table-cell office:value-type="float" office:value="8640000" calcext:value-type="float">
            <text:p>8640000</text:p>
          </table:table-cell>
          <table:table-cell table:formula="of:=[.B2236]/[.C2236]" office:value-type="float" office:value="0.002328125" calcext:value-type="float">
            <text:p>0,00232812500000000000</text:p>
          </table:table-cell>
          <table:table-cell table:formula="of:=[.D2237]-[.D223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[.B2236]+9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2237]/[.C2237]" office:value-type="float" office:value="0.00232916666666667" calcext:value-type="float">
            <text:p>0,00232916666666667000</text:p>
          </table:table-cell>
          <table:table-cell table:formula="of:=[.D2238]-[.D223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[.B2237]+9" office:value-type="float" office:value="20133" calcext:value-type="float">
            <text:p>20133</text:p>
          </table:table-cell>
          <table:table-cell office:value-type="float" office:value="8640000" calcext:value-type="float">
            <text:p>8640000</text:p>
          </table:table-cell>
          <table:table-cell table:formula="of:=[.B2238]/[.C2238]" office:value-type="float" office:value="0.00233020833333333" calcext:value-type="float">
            <text:p>0,00233020833333333000</text:p>
          </table:table-cell>
          <table:table-cell table:formula="of:=[.D2239]-[.D223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[.B2238]+9" office:value-type="float" office:value="20142" calcext:value-type="float">
            <text:p>20142</text:p>
          </table:table-cell>
          <table:table-cell office:value-type="float" office:value="8640000" calcext:value-type="float">
            <text:p>8640000</text:p>
          </table:table-cell>
          <table:table-cell table:formula="of:=[.B2239]/[.C2239]" office:value-type="float" office:value="0.00233125" calcext:value-type="float">
            <text:p>0,00233125000000000000</text:p>
          </table:table-cell>
          <table:table-cell table:formula="of:=[.D2240]-[.D22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[.B2239]+9" office:value-type="float" office:value="20151" calcext:value-type="float">
            <text:p>20151</text:p>
          </table:table-cell>
          <table:table-cell office:value-type="float" office:value="8640000" calcext:value-type="float">
            <text:p>8640000</text:p>
          </table:table-cell>
          <table:table-cell table:formula="of:=[.B2240]/[.C2240]" office:value-type="float" office:value="0.00233229166666667" calcext:value-type="float">
            <text:p>0,00233229166666667000</text:p>
          </table:table-cell>
          <table:table-cell table:formula="of:=[.D2241]-[.D224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B2240]+9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2241]/[.C2241]" office:value-type="float" office:value="0.00233333333333333" calcext:value-type="float">
            <text:p>0,00233333333333333000</text:p>
          </table:table-cell>
          <table:table-cell table:formula="of:=[.D2242]-[.D22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[.B2241]+9" office:value-type="float" office:value="20169" calcext:value-type="float">
            <text:p>20169</text:p>
          </table:table-cell>
          <table:table-cell office:value-type="float" office:value="8640000" calcext:value-type="float">
            <text:p>8640000</text:p>
          </table:table-cell>
          <table:table-cell table:formula="of:=[.B2242]/[.C2242]" office:value-type="float" office:value="0.002334375" calcext:value-type="float">
            <text:p>0,00233437500000000000</text:p>
          </table:table-cell>
          <table:table-cell table:formula="of:=[.D2243]-[.D224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[.B2242]+9" office:value-type="float" office:value="20178" calcext:value-type="float">
            <text:p>20178</text:p>
          </table:table-cell>
          <table:table-cell office:value-type="float" office:value="8640000" calcext:value-type="float">
            <text:p>8640000</text:p>
          </table:table-cell>
          <table:table-cell table:formula="of:=[.B2243]/[.C2243]" office:value-type="float" office:value="0.00233541666666667" calcext:value-type="float">
            <text:p>0,00233541666666667000</text:p>
          </table:table-cell>
          <table:table-cell table:formula="of:=[.D2244]-[.D22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[.B2243]+9" office:value-type="float" office:value="20187" calcext:value-type="float">
            <text:p>20187</text:p>
          </table:table-cell>
          <table:table-cell office:value-type="float" office:value="8640000" calcext:value-type="float">
            <text:p>8640000</text:p>
          </table:table-cell>
          <table:table-cell table:formula="of:=[.B2244]/[.C2244]" office:value-type="float" office:value="0.00233645833333333" calcext:value-type="float">
            <text:p>0,00233645833333333000</text:p>
          </table:table-cell>
          <table:table-cell table:formula="of:=[.D2245]-[.D224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[.B2244]+9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2245]/[.C2245]" office:value-type="float" office:value="0.0023375" calcext:value-type="float">
            <text:p>0,00233750000000000000</text:p>
          </table:table-cell>
          <table:table-cell table:formula="of:=[.D2246]-[.D224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[.B2245]+9" office:value-type="float" office:value="20205" calcext:value-type="float">
            <text:p>20205</text:p>
          </table:table-cell>
          <table:table-cell office:value-type="float" office:value="8640000" calcext:value-type="float">
            <text:p>8640000</text:p>
          </table:table-cell>
          <table:table-cell table:formula="of:=[.B2246]/[.C2246]" office:value-type="float" office:value="0.00233854166666667" calcext:value-type="float">
            <text:p>0,00233854166666667000</text:p>
          </table:table-cell>
          <table:table-cell table:formula="of:=[.D2247]-[.D22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[.B2246]+9" office:value-type="float" office:value="20214" calcext:value-type="float">
            <text:p>20214</text:p>
          </table:table-cell>
          <table:table-cell office:value-type="float" office:value="8640000" calcext:value-type="float">
            <text:p>8640000</text:p>
          </table:table-cell>
          <table:table-cell table:formula="of:=[.B2247]/[.C2247]" office:value-type="float" office:value="0.00233958333333333" calcext:value-type="float">
            <text:p>0,00233958333333333000</text:p>
          </table:table-cell>
          <table:table-cell table:formula="of:=[.D2248]-[.D22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B2247]+9" office:value-type="float" office:value="20223" calcext:value-type="float">
            <text:p>20223</text:p>
          </table:table-cell>
          <table:table-cell office:value-type="float" office:value="8640000" calcext:value-type="float">
            <text:p>8640000</text:p>
          </table:table-cell>
          <table:table-cell table:formula="of:=[.B2248]/[.C2248]" office:value-type="float" office:value="0.002340625" calcext:value-type="float">
            <text:p>0,00234062500000000000</text:p>
          </table:table-cell>
          <table:table-cell table:formula="of:=[.D2249]-[.D224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[.B2248]+9" office:value-type="float" office:value="20232" calcext:value-type="float">
            <text:p>20232</text:p>
          </table:table-cell>
          <table:table-cell office:value-type="float" office:value="8640000" calcext:value-type="float">
            <text:p>8640000</text:p>
          </table:table-cell>
          <table:table-cell table:formula="of:=[.B2249]/[.C2249]" office:value-type="float" office:value="0.00234166666666667" calcext:value-type="float">
            <text:p>0,00234166666666667000</text:p>
          </table:table-cell>
          <table:table-cell table:formula="of:=[.D2250]-[.D224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B2249]+9" office:value-type="float" office:value="20241" calcext:value-type="float">
            <text:p>20241</text:p>
          </table:table-cell>
          <table:table-cell office:value-type="float" office:value="8640000" calcext:value-type="float">
            <text:p>8640000</text:p>
          </table:table-cell>
          <table:table-cell table:formula="of:=[.B2250]/[.C2250]" office:value-type="float" office:value="0.00234270833333333" calcext:value-type="float">
            <text:p>0,00234270833333333000</text:p>
          </table:table-cell>
          <table:table-cell table:formula="of:=[.D2251]-[.D225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B2250]+9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2251]/[.C2251]" office:value-type="float" office:value="0.00234375" calcext:value-type="float">
            <text:p>0,00234375000000000000</text:p>
          </table:table-cell>
          <table:table-cell table:formula="of:=[.D2252]-[.D22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[.B2251]+9" office:value-type="float" office:value="20259" calcext:value-type="float">
            <text:p>20259</text:p>
          </table:table-cell>
          <table:table-cell office:value-type="float" office:value="8640000" calcext:value-type="float">
            <text:p>8640000</text:p>
          </table:table-cell>
          <table:table-cell table:formula="of:=[.B2252]/[.C2252]" office:value-type="float" office:value="0.00234479166666667" calcext:value-type="float">
            <text:p>0,00234479166666667000</text:p>
          </table:table-cell>
          <table:table-cell table:formula="of:=[.D2253]-[.D225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[.B2252]+9" office:value-type="float" office:value="20268" calcext:value-type="float">
            <text:p>20268</text:p>
          </table:table-cell>
          <table:table-cell office:value-type="float" office:value="8640000" calcext:value-type="float">
            <text:p>8640000</text:p>
          </table:table-cell>
          <table:table-cell table:formula="of:=[.B2253]/[.C2253]" office:value-type="float" office:value="0.00234583333333333" calcext:value-type="float">
            <text:p>0,00234583333333333000</text:p>
          </table:table-cell>
          <table:table-cell table:formula="of:=[.D2254]-[.D225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[.B2253]+9" office:value-type="float" office:value="20277" calcext:value-type="float">
            <text:p>20277</text:p>
          </table:table-cell>
          <table:table-cell office:value-type="float" office:value="8640000" calcext:value-type="float">
            <text:p>8640000</text:p>
          </table:table-cell>
          <table:table-cell table:formula="of:=[.B2254]/[.C2254]" office:value-type="float" office:value="0.002346875" calcext:value-type="float">
            <text:p>0,00234687500000000000</text:p>
          </table:table-cell>
          <table:table-cell table:formula="of:=[.D2255]-[.D22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[.B2254]+9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2255]/[.C2255]" office:value-type="float" office:value="0.00234791666666667" calcext:value-type="float">
            <text:p>0,00234791666666667000</text:p>
          </table:table-cell>
          <table:table-cell table:formula="of:=[.D2256]-[.D225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[.B2255]+9" office:value-type="float" office:value="20295" calcext:value-type="float">
            <text:p>20295</text:p>
          </table:table-cell>
          <table:table-cell office:value-type="float" office:value="8640000" calcext:value-type="float">
            <text:p>8640000</text:p>
          </table:table-cell>
          <table:table-cell table:formula="of:=[.B2256]/[.C2256]" office:value-type="float" office:value="0.00234895833333333" calcext:value-type="float">
            <text:p>0,00234895833333333000</text:p>
          </table:table-cell>
          <table:table-cell table:formula="of:=[.D2257]-[.D22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B2256]+9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2257]/[.C2257]" office:value-type="float" office:value="0.00235" calcext:value-type="float">
            <text:p>0,00235000000000000000</text:p>
          </table:table-cell>
          <table:table-cell table:formula="of:=[.D2258]-[.D225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[.B2257]+9" office:value-type="float" office:value="20313" calcext:value-type="float">
            <text:p>20313</text:p>
          </table:table-cell>
          <table:table-cell office:value-type="float" office:value="8640000" calcext:value-type="float">
            <text:p>8640000</text:p>
          </table:table-cell>
          <table:table-cell table:formula="of:=[.B2258]/[.C2258]" office:value-type="float" office:value="0.00235104166666667" calcext:value-type="float">
            <text:p>0,00235104166666667000</text:p>
          </table:table-cell>
          <table:table-cell table:formula="of:=[.D2259]-[.D22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[.B2258]+9" office:value-type="float" office:value="20322" calcext:value-type="float">
            <text:p>20322</text:p>
          </table:table-cell>
          <table:table-cell office:value-type="float" office:value="8640000" calcext:value-type="float">
            <text:p>8640000</text:p>
          </table:table-cell>
          <table:table-cell table:formula="of:=[.B2259]/[.C2259]" office:value-type="float" office:value="0.00235208333333333" calcext:value-type="float">
            <text:p>0,00235208333333333000</text:p>
          </table:table-cell>
          <table:table-cell table:formula="of:=[.D2260]-[.D225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B2259]+9" office:value-type="float" office:value="20331" calcext:value-type="float">
            <text:p>20331</text:p>
          </table:table-cell>
          <table:table-cell office:value-type="float" office:value="8640000" calcext:value-type="float">
            <text:p>8640000</text:p>
          </table:table-cell>
          <table:table-cell table:formula="of:=[.B2260]/[.C2260]" office:value-type="float" office:value="0.002353125" calcext:value-type="float">
            <text:p>0,00235312500000000000</text:p>
          </table:table-cell>
          <table:table-cell table:formula="of:=[.D2261]-[.D22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[.B2260]+9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2261]/[.C2261]" office:value-type="float" office:value="0.00235416666666667" calcext:value-type="float">
            <text:p>0,00235416666666667000</text:p>
          </table:table-cell>
          <table:table-cell table:formula="of:=[.D2262]-[.D226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[.B2261]+9" office:value-type="float" office:value="20349" calcext:value-type="float">
            <text:p>20349</text:p>
          </table:table-cell>
          <table:table-cell office:value-type="float" office:value="8640000" calcext:value-type="float">
            <text:p>8640000</text:p>
          </table:table-cell>
          <table:table-cell table:formula="of:=[.B2262]/[.C2262]" office:value-type="float" office:value="0.00235520833333333" calcext:value-type="float">
            <text:p>0,00235520833333333000</text:p>
          </table:table-cell>
          <table:table-cell table:formula="of:=[.D2263]-[.D22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[.B2262]+9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2263]/[.C2263]" office:value-type="float" office:value="0.00235625" calcext:value-type="float">
            <text:p>0,00235625000000000000</text:p>
          </table:table-cell>
          <table:table-cell table:formula="of:=[.D2264]-[.D226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B2263]+9" office:value-type="float" office:value="20367" calcext:value-type="float">
            <text:p>20367</text:p>
          </table:table-cell>
          <table:table-cell office:value-type="float" office:value="8640000" calcext:value-type="float">
            <text:p>8640000</text:p>
          </table:table-cell>
          <table:table-cell table:formula="of:=[.B2264]/[.C2264]" office:value-type="float" office:value="0.00235729166666667" calcext:value-type="float">
            <text:p>0,00235729166666667000</text:p>
          </table:table-cell>
          <table:table-cell table:formula="of:=[.D2265]-[.D226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[.B2264]+9" office:value-type="float" office:value="20376" calcext:value-type="float">
            <text:p>20376</text:p>
          </table:table-cell>
          <table:table-cell office:value-type="float" office:value="8640000" calcext:value-type="float">
            <text:p>8640000</text:p>
          </table:table-cell>
          <table:table-cell table:formula="of:=[.B2265]/[.C2265]" office:value-type="float" office:value="0.00235833333333333" calcext:value-type="float">
            <text:p>0,00235833333333333000</text:p>
          </table:table-cell>
          <table:table-cell table:formula="of:=[.D2266]-[.D226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[.B2265]+9" office:value-type="float" office:value="20385" calcext:value-type="float">
            <text:p>20385</text:p>
          </table:table-cell>
          <table:table-cell office:value-type="float" office:value="8640000" calcext:value-type="float">
            <text:p>8640000</text:p>
          </table:table-cell>
          <table:table-cell table:formula="of:=[.B2266]/[.C2266]" office:value-type="float" office:value="0.002359375" calcext:value-type="float">
            <text:p>0,00235937500000000000</text:p>
          </table:table-cell>
          <table:table-cell table:formula="of:=[.D2267]-[.D22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B2266]+9" office:value-type="float" office:value="20394" calcext:value-type="float">
            <text:p>20394</text:p>
          </table:table-cell>
          <table:table-cell office:value-type="float" office:value="8640000" calcext:value-type="float">
            <text:p>8640000</text:p>
          </table:table-cell>
          <table:table-cell table:formula="of:=[.B2267]/[.C2267]" office:value-type="float" office:value="0.00236041666666667" calcext:value-type="float">
            <text:p>0,00236041666666667000</text:p>
          </table:table-cell>
          <table:table-cell table:formula="of:=[.D2268]-[.D226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B2267]+9" office:value-type="float" office:value="20403" calcext:value-type="float">
            <text:p>20403</text:p>
          </table:table-cell>
          <table:table-cell office:value-type="float" office:value="8640000" calcext:value-type="float">
            <text:p>8640000</text:p>
          </table:table-cell>
          <table:table-cell table:formula="of:=[.B2268]/[.C2268]" office:value-type="float" office:value="0.00236145833333333" calcext:value-type="float">
            <text:p>0,00236145833333333000</text:p>
          </table:table-cell>
          <table:table-cell table:formula="of:=[.D2269]-[.D226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[.B2268]+9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2269]/[.C2269]" office:value-type="float" office:value="0.0023625" calcext:value-type="float">
            <text:p>0,00236250000000000000</text:p>
          </table:table-cell>
          <table:table-cell table:formula="of:=[.D2270]-[.D226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[.B2269]+9" office:value-type="float" office:value="20421" calcext:value-type="float">
            <text:p>20421</text:p>
          </table:table-cell>
          <table:table-cell office:value-type="float" office:value="8640000" calcext:value-type="float">
            <text:p>8640000</text:p>
          </table:table-cell>
          <table:table-cell table:formula="of:=[.B2270]/[.C2270]" office:value-type="float" office:value="0.00236354166666667" calcext:value-type="float">
            <text:p>0,00236354166666667000</text:p>
          </table:table-cell>
          <table:table-cell table:formula="of:=[.D2271]-[.D227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B2270]+9" office:value-type="float" office:value="20430" calcext:value-type="float">
            <text:p>20430</text:p>
          </table:table-cell>
          <table:table-cell office:value-type="float" office:value="8640000" calcext:value-type="float">
            <text:p>8640000</text:p>
          </table:table-cell>
          <table:table-cell table:formula="of:=[.B2271]/[.C2271]" office:value-type="float" office:value="0.00236458333333333" calcext:value-type="float">
            <text:p>0,00236458333333333000</text:p>
          </table:table-cell>
          <table:table-cell table:formula="of:=[.D2272]-[.D227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[.B2271]+9" office:value-type="float" office:value="20439" calcext:value-type="float">
            <text:p>20439</text:p>
          </table:table-cell>
          <table:table-cell office:value-type="float" office:value="8640000" calcext:value-type="float">
            <text:p>8640000</text:p>
          </table:table-cell>
          <table:table-cell table:formula="of:=[.B2272]/[.C2272]" office:value-type="float" office:value="0.002365625" calcext:value-type="float">
            <text:p>0,00236562500000000000</text:p>
          </table:table-cell>
          <table:table-cell table:formula="of:=[.D2273]-[.D227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[.B2272]+9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2273]/[.C2273]" office:value-type="float" office:value="0.00236666666666667" calcext:value-type="float">
            <text:p>0,00236666666666667000</text:p>
          </table:table-cell>
          <table:table-cell table:formula="of:=[.D2274]-[.D227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B2273]+9" office:value-type="float" office:value="20457" calcext:value-type="float">
            <text:p>20457</text:p>
          </table:table-cell>
          <table:table-cell office:value-type="float" office:value="8640000" calcext:value-type="float">
            <text:p>8640000</text:p>
          </table:table-cell>
          <table:table-cell table:formula="of:=[.B2274]/[.C2274]" office:value-type="float" office:value="0.00236770833333333" calcext:value-type="float">
            <text:p>0,00236770833333333000</text:p>
          </table:table-cell>
          <table:table-cell table:formula="of:=[.D2275]-[.D227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[.B2274]+9" office:value-type="float" office:value="20466" calcext:value-type="float">
            <text:p>20466</text:p>
          </table:table-cell>
          <table:table-cell office:value-type="float" office:value="8640000" calcext:value-type="float">
            <text:p>8640000</text:p>
          </table:table-cell>
          <table:table-cell table:formula="of:=[.B2275]/[.C2275]" office:value-type="float" office:value="0.00236875" calcext:value-type="float">
            <text:p>0,00236875000000000000</text:p>
          </table:table-cell>
          <table:table-cell table:formula="of:=[.D2276]-[.D22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.B2275]+9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2276]/[.C2276]" office:value-type="float" office:value="0.00236979166666667" calcext:value-type="float">
            <text:p>0,00236979166666667000</text:p>
          </table:table-cell>
          <table:table-cell table:formula="of:=[.D2277]-[.D227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[.B2276]+9" office:value-type="float" office:value="20484" calcext:value-type="float">
            <text:p>20484</text:p>
          </table:table-cell>
          <table:table-cell office:value-type="float" office:value="8640000" calcext:value-type="float">
            <text:p>8640000</text:p>
          </table:table-cell>
          <table:table-cell table:formula="of:=[.B2277]/[.C2277]" office:value-type="float" office:value="0.00237083333333333" calcext:value-type="float">
            <text:p>0,00237083333333333000</text:p>
          </table:table-cell>
          <table:table-cell table:formula="of:=[.D2278]-[.D227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[.B2277]+9" office:value-type="float" office:value="20493" calcext:value-type="float">
            <text:p>20493</text:p>
          </table:table-cell>
          <table:table-cell office:value-type="float" office:value="8640000" calcext:value-type="float">
            <text:p>8640000</text:p>
          </table:table-cell>
          <table:table-cell table:formula="of:=[.B2278]/[.C2278]" office:value-type="float" office:value="0.002371875" calcext:value-type="float">
            <text:p>0,00237187500000000000</text:p>
          </table:table-cell>
          <table:table-cell table:formula="of:=[.D2279]-[.D227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[.B2278]+9" office:value-type="float" office:value="20502" calcext:value-type="float">
            <text:p>20502</text:p>
          </table:table-cell>
          <table:table-cell office:value-type="float" office:value="8640000" calcext:value-type="float">
            <text:p>8640000</text:p>
          </table:table-cell>
          <table:table-cell table:formula="of:=[.B2279]/[.C2279]" office:value-type="float" office:value="0.00237291666666667" calcext:value-type="float">
            <text:p>0,00237291666666667000</text:p>
          </table:table-cell>
          <table:table-cell table:formula="of:=[.D2280]-[.D22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B2279]+9" office:value-type="float" office:value="20511" calcext:value-type="float">
            <text:p>20511</text:p>
          </table:table-cell>
          <table:table-cell office:value-type="float" office:value="8640000" calcext:value-type="float">
            <text:p>8640000</text:p>
          </table:table-cell>
          <table:table-cell table:formula="of:=[.B2280]/[.C2280]" office:value-type="float" office:value="0.00237395833333333" calcext:value-type="float">
            <text:p>0,00237395833333333000</text:p>
          </table:table-cell>
          <table:table-cell table:formula="of:=[.D2281]-[.D22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[.B2280]+9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2281]/[.C2281]" office:value-type="float" office:value="0.002375" calcext:value-type="float">
            <text:p>0,00237500000000000000</text:p>
          </table:table-cell>
          <table:table-cell table:formula="of:=[.D2282]-[.D228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[.B2281]+9" office:value-type="float" office:value="20529" calcext:value-type="float">
            <text:p>20529</text:p>
          </table:table-cell>
          <table:table-cell office:value-type="float" office:value="8640000" calcext:value-type="float">
            <text:p>8640000</text:p>
          </table:table-cell>
          <table:table-cell table:formula="of:=[.B2282]/[.C2282]" office:value-type="float" office:value="0.00237604166666667" calcext:value-type="float">
            <text:p>0,00237604166666667000</text:p>
          </table:table-cell>
          <table:table-cell table:formula="of:=[.D2283]-[.D228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[.B2282]+9" office:value-type="float" office:value="20538" calcext:value-type="float">
            <text:p>20538</text:p>
          </table:table-cell>
          <table:table-cell office:value-type="float" office:value="8640000" calcext:value-type="float">
            <text:p>8640000</text:p>
          </table:table-cell>
          <table:table-cell table:formula="of:=[.B2283]/[.C2283]" office:value-type="float" office:value="0.00237708333333333" calcext:value-type="float">
            <text:p>0,00237708333333333000</text:p>
          </table:table-cell>
          <table:table-cell table:formula="of:=[.D2284]-[.D228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[.B2283]+9" office:value-type="float" office:value="20547" calcext:value-type="float">
            <text:p>20547</text:p>
          </table:table-cell>
          <table:table-cell office:value-type="float" office:value="8640000" calcext:value-type="float">
            <text:p>8640000</text:p>
          </table:table-cell>
          <table:table-cell table:formula="of:=[.B2284]/[.C2284]" office:value-type="float" office:value="0.002378125" calcext:value-type="float">
            <text:p>0,00237812500000000000</text:p>
          </table:table-cell>
          <table:table-cell table:formula="of:=[.D2285]-[.D228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[.B2284]+9" office:value-type="float" office:value="20556" calcext:value-type="float">
            <text:p>20556</text:p>
          </table:table-cell>
          <table:table-cell office:value-type="float" office:value="8640000" calcext:value-type="float">
            <text:p>8640000</text:p>
          </table:table-cell>
          <table:table-cell table:formula="of:=[.B2285]/[.C2285]" office:value-type="float" office:value="0.00237916666666667" calcext:value-type="float">
            <text:p>0,00237916666666667000</text:p>
          </table:table-cell>
          <table:table-cell table:formula="of:=[.D2286]-[.D228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[.B2285]+9" office:value-type="float" office:value="20565" calcext:value-type="float">
            <text:p>20565</text:p>
          </table:table-cell>
          <table:table-cell office:value-type="float" office:value="8640000" calcext:value-type="float">
            <text:p>8640000</text:p>
          </table:table-cell>
          <table:table-cell table:formula="of:=[.B2286]/[.C2286]" office:value-type="float" office:value="0.00238020833333333" calcext:value-type="float">
            <text:p>0,00238020833333333000</text:p>
          </table:table-cell>
          <table:table-cell table:formula="of:=[.D2287]-[.D228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[.B2286]+9" office:value-type="float" office:value="20574" calcext:value-type="float">
            <text:p>20574</text:p>
          </table:table-cell>
          <table:table-cell office:value-type="float" office:value="8640000" calcext:value-type="float">
            <text:p>8640000</text:p>
          </table:table-cell>
          <table:table-cell table:formula="of:=[.B2287]/[.C2287]" office:value-type="float" office:value="0.00238125" calcext:value-type="float">
            <text:p>0,00238125000000000000</text:p>
          </table:table-cell>
          <table:table-cell table:formula="of:=[.D2288]-[.D228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B2287]+9" office:value-type="float" office:value="20583" calcext:value-type="float">
            <text:p>20583</text:p>
          </table:table-cell>
          <table:table-cell office:value-type="float" office:value="8640000" calcext:value-type="float">
            <text:p>8640000</text:p>
          </table:table-cell>
          <table:table-cell table:formula="of:=[.B2288]/[.C2288]" office:value-type="float" office:value="0.00238229166666667" calcext:value-type="float">
            <text:p>0,00238229166666667000</text:p>
          </table:table-cell>
          <table:table-cell table:formula="of:=[.D2289]-[.D22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[.B2288]+9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2289]/[.C2289]" office:value-type="float" office:value="0.00238333333333333" calcext:value-type="float">
            <text:p>0,00238333333333333000</text:p>
          </table:table-cell>
          <table:table-cell table:formula="of:=[.D2290]-[.D228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[.B2289]+9" office:value-type="float" office:value="20601" calcext:value-type="float">
            <text:p>20601</text:p>
          </table:table-cell>
          <table:table-cell office:value-type="float" office:value="8640000" calcext:value-type="float">
            <text:p>8640000</text:p>
          </table:table-cell>
          <table:table-cell table:formula="of:=[.B2290]/[.C2290]" office:value-type="float" office:value="0.002384375" calcext:value-type="float">
            <text:p>0,00238437500000000000</text:p>
          </table:table-cell>
          <table:table-cell table:formula="of:=[.D2291]-[.D22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[.B2290]+9" office:value-type="float" office:value="20610" calcext:value-type="float">
            <text:p>20610</text:p>
          </table:table-cell>
          <table:table-cell office:value-type="float" office:value="8640000" calcext:value-type="float">
            <text:p>8640000</text:p>
          </table:table-cell>
          <table:table-cell table:formula="of:=[.B2291]/[.C2291]" office:value-type="float" office:value="0.00238541666666667" calcext:value-type="float">
            <text:p>0,00238541666666667000</text:p>
          </table:table-cell>
          <table:table-cell table:formula="of:=[.D2292]-[.D229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B2291]+9" office:value-type="float" office:value="20619" calcext:value-type="float">
            <text:p>20619</text:p>
          </table:table-cell>
          <table:table-cell office:value-type="float" office:value="8640000" calcext:value-type="float">
            <text:p>8640000</text:p>
          </table:table-cell>
          <table:table-cell table:formula="of:=[.B2292]/[.C2292]" office:value-type="float" office:value="0.00238645833333333" calcext:value-type="float">
            <text:p>0,00238645833333333000</text:p>
          </table:table-cell>
          <table:table-cell table:formula="of:=[.D2293]-[.D22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[.B2292]+9" office:value-type="float" office:value="20628" calcext:value-type="float">
            <text:p>20628</text:p>
          </table:table-cell>
          <table:table-cell office:value-type="float" office:value="8640000" calcext:value-type="float">
            <text:p>8640000</text:p>
          </table:table-cell>
          <table:table-cell table:formula="of:=[.B2293]/[.C2293]" office:value-type="float" office:value="0.0023875" calcext:value-type="float">
            <text:p>0,00238750000000000000</text:p>
          </table:table-cell>
          <table:table-cell table:formula="of:=[.D2294]-[.D229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[.B2293]+9" office:value-type="float" office:value="20637" calcext:value-type="float">
            <text:p>20637</text:p>
          </table:table-cell>
          <table:table-cell office:value-type="float" office:value="8640000" calcext:value-type="float">
            <text:p>8640000</text:p>
          </table:table-cell>
          <table:table-cell table:formula="of:=[.B2294]/[.C2294]" office:value-type="float" office:value="0.00238854166666667" calcext:value-type="float">
            <text:p>0,00238854166666667000</text:p>
          </table:table-cell>
          <table:table-cell table:formula="of:=[.D2295]-[.D22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[.B2294]+9" office:value-type="float" office:value="20646" calcext:value-type="float">
            <text:p>20646</text:p>
          </table:table-cell>
          <table:table-cell office:value-type="float" office:value="8640000" calcext:value-type="float">
            <text:p>8640000</text:p>
          </table:table-cell>
          <table:table-cell table:formula="of:=[.B2295]/[.C2295]" office:value-type="float" office:value="0.00238958333333333" calcext:value-type="float">
            <text:p>0,00238958333333333000</text:p>
          </table:table-cell>
          <table:table-cell table:formula="of:=[.D2296]-[.D229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B2295]+9" office:value-type="float" office:value="20655" calcext:value-type="float">
            <text:p>20655</text:p>
          </table:table-cell>
          <table:table-cell office:value-type="float" office:value="8640000" calcext:value-type="float">
            <text:p>8640000</text:p>
          </table:table-cell>
          <table:table-cell table:formula="of:=[.B2296]/[.C2296]" office:value-type="float" office:value="0.002390625" calcext:value-type="float">
            <text:p>0,00239062500000000000</text:p>
          </table:table-cell>
          <table:table-cell table:formula="of:=[.D2297]-[.D229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[.B2296]+9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2297]/[.C2297]" office:value-type="float" office:value="0.00239166666666667" calcext:value-type="float">
            <text:p>0,00239166666666667000</text:p>
          </table:table-cell>
          <table:table-cell table:formula="of:=[.D2298]-[.D229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[.B2297]+9" office:value-type="float" office:value="20673" calcext:value-type="float">
            <text:p>20673</text:p>
          </table:table-cell>
          <table:table-cell office:value-type="float" office:value="8640000" calcext:value-type="float">
            <text:p>8640000</text:p>
          </table:table-cell>
          <table:table-cell table:formula="of:=[.B2298]/[.C2298]" office:value-type="float" office:value="0.00239270833333333" calcext:value-type="float">
            <text:p>0,00239270833333333000</text:p>
          </table:table-cell>
          <table:table-cell table:formula="of:=[.D2299]-[.D229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[.B2298]+9" office:value-type="float" office:value="20682" calcext:value-type="float">
            <text:p>20682</text:p>
          </table:table-cell>
          <table:table-cell office:value-type="float" office:value="8640000" calcext:value-type="float">
            <text:p>8640000</text:p>
          </table:table-cell>
          <table:table-cell table:formula="of:=[.B2299]/[.C2299]" office:value-type="float" office:value="0.00239375" calcext:value-type="float">
            <text:p>0,00239375000000000000</text:p>
          </table:table-cell>
          <table:table-cell table:formula="of:=[.D2300]-[.D229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[.B2299]+9" office:value-type="float" office:value="20691" calcext:value-type="float">
            <text:p>20691</text:p>
          </table:table-cell>
          <table:table-cell office:value-type="float" office:value="8640000" calcext:value-type="float">
            <text:p>8640000</text:p>
          </table:table-cell>
          <table:table-cell table:formula="of:=[.B2300]/[.C2300]" office:value-type="float" office:value="0.00239479166666667" calcext:value-type="float">
            <text:p>0,00239479166666667000</text:p>
          </table:table-cell>
          <table:table-cell table:formula="of:=[.D2301]-[.D230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B2300]+9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2301]/[.C2301]" office:value-type="float" office:value="0.00239583333333333" calcext:value-type="float">
            <text:p>0,00239583333333333000</text:p>
          </table:table-cell>
          <table:table-cell table:formula="of:=[.D2302]-[.D230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[.B2301]+9" office:value-type="float" office:value="20709" calcext:value-type="float">
            <text:p>20709</text:p>
          </table:table-cell>
          <table:table-cell office:value-type="float" office:value="8640000" calcext:value-type="float">
            <text:p>8640000</text:p>
          </table:table-cell>
          <table:table-cell table:formula="of:=[.B2302]/[.C2302]" office:value-type="float" office:value="0.002396875" calcext:value-type="float">
            <text:p>0,00239687500000000000</text:p>
          </table:table-cell>
          <table:table-cell table:formula="of:=[.D2303]-[.D230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[.B2302]+9" office:value-type="float" office:value="20718" calcext:value-type="float">
            <text:p>20718</text:p>
          </table:table-cell>
          <table:table-cell office:value-type="float" office:value="8640000" calcext:value-type="float">
            <text:p>8640000</text:p>
          </table:table-cell>
          <table:table-cell table:formula="of:=[.B2303]/[.C2303]" office:value-type="float" office:value="0.00239791666666667" calcext:value-type="float">
            <text:p>0,00239791666666667000</text:p>
          </table:table-cell>
          <table:table-cell table:formula="of:=[.D2304]-[.D23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[.B2303]+9" office:value-type="float" office:value="20727" calcext:value-type="float">
            <text:p>20727</text:p>
          </table:table-cell>
          <table:table-cell office:value-type="float" office:value="8640000" calcext:value-type="float">
            <text:p>8640000</text:p>
          </table:table-cell>
          <table:table-cell table:formula="of:=[.B2304]/[.C2304]" office:value-type="float" office:value="0.00239895833333333" calcext:value-type="float">
            <text:p>0,00239895833333333000</text:p>
          </table:table-cell>
          <table:table-cell table:formula="of:=[.D2305]-[.D230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[.B2304]+9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2305]/[.C2305]" office:value-type="float" office:value="0.0024" calcext:value-type="float">
            <text:p>0,00240000000000000000</text:p>
          </table:table-cell>
          <table:table-cell table:formula="of:=[.D2306]-[.D230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[.B2305]+9" office:value-type="float" office:value="20745" calcext:value-type="float">
            <text:p>20745</text:p>
          </table:table-cell>
          <table:table-cell office:value-type="float" office:value="8640000" calcext:value-type="float">
            <text:p>8640000</text:p>
          </table:table-cell>
          <table:table-cell table:formula="of:=[.B2306]/[.C2306]" office:value-type="float" office:value="0.00240104166666667" calcext:value-type="float">
            <text:p>0,00240104166666667000</text:p>
          </table:table-cell>
          <table:table-cell table:formula="of:=[.D2307]-[.D230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[.B2306]+9" office:value-type="float" office:value="20754" calcext:value-type="float">
            <text:p>20754</text:p>
          </table:table-cell>
          <table:table-cell office:value-type="float" office:value="8640000" calcext:value-type="float">
            <text:p>8640000</text:p>
          </table:table-cell>
          <table:table-cell table:formula="of:=[.B2307]/[.C2307]" office:value-type="float" office:value="0.00240208333333333" calcext:value-type="float">
            <text:p>0,00240208333333333000</text:p>
          </table:table-cell>
          <table:table-cell table:formula="of:=[.D2308]-[.D23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[.B2307]+9" office:value-type="float" office:value="20763" calcext:value-type="float">
            <text:p>20763</text:p>
          </table:table-cell>
          <table:table-cell office:value-type="float" office:value="8640000" calcext:value-type="float">
            <text:p>8640000</text:p>
          </table:table-cell>
          <table:table-cell table:formula="of:=[.B2308]/[.C2308]" office:value-type="float" office:value="0.002403125" calcext:value-type="float">
            <text:p>0,00240312500000000000</text:p>
          </table:table-cell>
          <table:table-cell table:formula="of:=[.D2309]-[.D230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[.B2308]+9" office:value-type="float" office:value="20772" calcext:value-type="float">
            <text:p>20772</text:p>
          </table:table-cell>
          <table:table-cell office:value-type="float" office:value="8640000" calcext:value-type="float">
            <text:p>8640000</text:p>
          </table:table-cell>
          <table:table-cell table:formula="of:=[.B2309]/[.C2309]" office:value-type="float" office:value="0.00240416666666667" calcext:value-type="float">
            <text:p>0,00240416666666667000</text:p>
          </table:table-cell>
          <table:table-cell table:formula="of:=[.D2310]-[.D23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[.B2309]+9" office:value-type="float" office:value="20781" calcext:value-type="float">
            <text:p>20781</text:p>
          </table:table-cell>
          <table:table-cell office:value-type="float" office:value="8640000" calcext:value-type="float">
            <text:p>8640000</text:p>
          </table:table-cell>
          <table:table-cell table:formula="of:=[.B2310]/[.C2310]" office:value-type="float" office:value="0.00240520833333333" calcext:value-type="float">
            <text:p>0,00240520833333333000</text:p>
          </table:table-cell>
          <table:table-cell table:formula="of:=[.D2311]-[.D231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B2310]+9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2311]/[.C2311]" office:value-type="float" office:value="0.00240625" calcext:value-type="float">
            <text:p>0,00240625000000000000</text:p>
          </table:table-cell>
          <table:table-cell table:formula="of:=[.D2312]-[.D231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B2311]+9" office:value-type="float" office:value="20799" calcext:value-type="float">
            <text:p>20799</text:p>
          </table:table-cell>
          <table:table-cell office:value-type="float" office:value="8640000" calcext:value-type="float">
            <text:p>8640000</text:p>
          </table:table-cell>
          <table:table-cell table:formula="of:=[.B2312]/[.C2312]" office:value-type="float" office:value="0.00240729166666667" calcext:value-type="float">
            <text:p>0,00240729166666667000</text:p>
          </table:table-cell>
          <table:table-cell table:formula="of:=[.D2313]-[.D231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B2312]+9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2313]/[.C2313]" office:value-type="float" office:value="0.00240833333333333" calcext:value-type="float">
            <text:p>0,00240833333333333000</text:p>
          </table:table-cell>
          <table:table-cell table:formula="of:=[.D2314]-[.D23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[.B2313]+9" office:value-type="float" office:value="20817" calcext:value-type="float">
            <text:p>20817</text:p>
          </table:table-cell>
          <table:table-cell office:value-type="float" office:value="8640000" calcext:value-type="float">
            <text:p>8640000</text:p>
          </table:table-cell>
          <table:table-cell table:formula="of:=[.B2314]/[.C2314]" office:value-type="float" office:value="0.002409375" calcext:value-type="float">
            <text:p>0,00240937500000000000</text:p>
          </table:table-cell>
          <table:table-cell table:formula="of:=[.D2315]-[.D23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[.B2314]+9" office:value-type="float" office:value="20826" calcext:value-type="float">
            <text:p>20826</text:p>
          </table:table-cell>
          <table:table-cell office:value-type="float" office:value="8640000" calcext:value-type="float">
            <text:p>8640000</text:p>
          </table:table-cell>
          <table:table-cell table:formula="of:=[.B2315]/[.C2315]" office:value-type="float" office:value="0.00241041666666667" calcext:value-type="float">
            <text:p>0,00241041666666667000</text:p>
          </table:table-cell>
          <table:table-cell table:formula="of:=[.D2316]-[.D231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[.B2315]+9" office:value-type="float" office:value="20835" calcext:value-type="float">
            <text:p>20835</text:p>
          </table:table-cell>
          <table:table-cell office:value-type="float" office:value="8640000" calcext:value-type="float">
            <text:p>8640000</text:p>
          </table:table-cell>
          <table:table-cell table:formula="of:=[.B2316]/[.C2316]" office:value-type="float" office:value="0.00241145833333333" calcext:value-type="float">
            <text:p>0,00241145833333333000</text:p>
          </table:table-cell>
          <table:table-cell table:formula="of:=[.D2317]-[.D231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[.B2316]+9" office:value-type="float" office:value="20844" calcext:value-type="float">
            <text:p>20844</text:p>
          </table:table-cell>
          <table:table-cell office:value-type="float" office:value="8640000" calcext:value-type="float">
            <text:p>8640000</text:p>
          </table:table-cell>
          <table:table-cell table:formula="of:=[.B2317]/[.C2317]" office:value-type="float" office:value="0.0024125" calcext:value-type="float">
            <text:p>0,00241250000000000000</text:p>
          </table:table-cell>
          <table:table-cell table:formula="of:=[.D2318]-[.D231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B2317]+9" office:value-type="float" office:value="20853" calcext:value-type="float">
            <text:p>20853</text:p>
          </table:table-cell>
          <table:table-cell office:value-type="float" office:value="8640000" calcext:value-type="float">
            <text:p>8640000</text:p>
          </table:table-cell>
          <table:table-cell table:formula="of:=[.B2318]/[.C2318]" office:value-type="float" office:value="0.00241354166666667" calcext:value-type="float">
            <text:p>0,00241354166666667000</text:p>
          </table:table-cell>
          <table:table-cell table:formula="of:=[.D2319]-[.D23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[.B2318]+9" office:value-type="float" office:value="20862" calcext:value-type="float">
            <text:p>20862</text:p>
          </table:table-cell>
          <table:table-cell office:value-type="float" office:value="8640000" calcext:value-type="float">
            <text:p>8640000</text:p>
          </table:table-cell>
          <table:table-cell table:formula="of:=[.B2319]/[.C2319]" office:value-type="float" office:value="0.00241458333333333" calcext:value-type="float">
            <text:p>0,00241458333333333000</text:p>
          </table:table-cell>
          <table:table-cell table:formula="of:=[.D2320]-[.D231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[.B2319]+9" office:value-type="float" office:value="20871" calcext:value-type="float">
            <text:p>20871</text:p>
          </table:table-cell>
          <table:table-cell office:value-type="float" office:value="8640000" calcext:value-type="float">
            <text:p>8640000</text:p>
          </table:table-cell>
          <table:table-cell table:formula="of:=[.B2320]/[.C2320]" office:value-type="float" office:value="0.002415625" calcext:value-type="float">
            <text:p>0,00241562500000000000</text:p>
          </table:table-cell>
          <table:table-cell table:formula="of:=[.D2321]-[.D232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[.B2320]+9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2321]/[.C2321]" office:value-type="float" office:value="0.00241666666666667" calcext:value-type="float">
            <text:p>0,00241666666666667000</text:p>
          </table:table-cell>
          <table:table-cell table:formula="of:=[.D2322]-[.D232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[.B2321]+9" office:value-type="float" office:value="20889" calcext:value-type="float">
            <text:p>20889</text:p>
          </table:table-cell>
          <table:table-cell office:value-type="float" office:value="8640000" calcext:value-type="float">
            <text:p>8640000</text:p>
          </table:table-cell>
          <table:table-cell table:formula="of:=[.B2322]/[.C2322]" office:value-type="float" office:value="0.00241770833333333" calcext:value-type="float">
            <text:p>0,00241770833333333000</text:p>
          </table:table-cell>
          <table:table-cell table:formula="of:=[.D2323]-[.D23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[.B2322]+9" office:value-type="float" office:value="20898" calcext:value-type="float">
            <text:p>20898</text:p>
          </table:table-cell>
          <table:table-cell office:value-type="float" office:value="8640000" calcext:value-type="float">
            <text:p>8640000</text:p>
          </table:table-cell>
          <table:table-cell table:formula="of:=[.B2323]/[.C2323]" office:value-type="float" office:value="0.00241875" calcext:value-type="float">
            <text:p>0,00241875000000000000</text:p>
          </table:table-cell>
          <table:table-cell table:formula="of:=[.D2324]-[.D232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[.B2323]+9" office:value-type="float" office:value="20907" calcext:value-type="float">
            <text:p>20907</text:p>
          </table:table-cell>
          <table:table-cell office:value-type="float" office:value="8640000" calcext:value-type="float">
            <text:p>8640000</text:p>
          </table:table-cell>
          <table:table-cell table:formula="of:=[.B2324]/[.C2324]" office:value-type="float" office:value="0.00241979166666667" calcext:value-type="float">
            <text:p>0,00241979166666667000</text:p>
          </table:table-cell>
          <table:table-cell table:formula="of:=[.D2325]-[.D23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[.B2324]+9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2325]/[.C2325]" office:value-type="float" office:value="0.00242083333333333" calcext:value-type="float">
            <text:p>0,00242083333333333000</text:p>
          </table:table-cell>
          <table:table-cell table:formula="of:=[.D2326]-[.D232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[.B2325]+9" office:value-type="float" office:value="20925" calcext:value-type="float">
            <text:p>20925</text:p>
          </table:table-cell>
          <table:table-cell office:value-type="float" office:value="8640000" calcext:value-type="float">
            <text:p>8640000</text:p>
          </table:table-cell>
          <table:table-cell table:formula="of:=[.B2326]/[.C2326]" office:value-type="float" office:value="0.002421875" calcext:value-type="float">
            <text:p>0,00242187500000000000</text:p>
          </table:table-cell>
          <table:table-cell table:formula="of:=[.D2327]-[.D23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[.B2326]+9" office:value-type="float" office:value="20934" calcext:value-type="float">
            <text:p>20934</text:p>
          </table:table-cell>
          <table:table-cell office:value-type="float" office:value="8640000" calcext:value-type="float">
            <text:p>8640000</text:p>
          </table:table-cell>
          <table:table-cell table:formula="of:=[.B2327]/[.C2327]" office:value-type="float" office:value="0.00242291666666667" calcext:value-type="float">
            <text:p>0,00242291666666667000</text:p>
          </table:table-cell>
          <table:table-cell table:formula="of:=[.D2328]-[.D232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[.B2327]+9" office:value-type="float" office:value="20943" calcext:value-type="float">
            <text:p>20943</text:p>
          </table:table-cell>
          <table:table-cell office:value-type="float" office:value="8640000" calcext:value-type="float">
            <text:p>8640000</text:p>
          </table:table-cell>
          <table:table-cell table:formula="of:=[.B2328]/[.C2328]" office:value-type="float" office:value="0.00242395833333333" calcext:value-type="float">
            <text:p>0,00242395833333333000</text:p>
          </table:table-cell>
          <table:table-cell table:formula="of:=[.D2329]-[.D23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[.B2328]+9" office:value-type="float" office:value="20952" calcext:value-type="float">
            <text:p>20952</text:p>
          </table:table-cell>
          <table:table-cell office:value-type="float" office:value="8640000" calcext:value-type="float">
            <text:p>8640000</text:p>
          </table:table-cell>
          <table:table-cell table:formula="of:=[.B2329]/[.C2329]" office:value-type="float" office:value="0.002425" calcext:value-type="float">
            <text:p>0,00242500000000000000</text:p>
          </table:table-cell>
          <table:table-cell table:formula="of:=[.D2330]-[.D232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[.B2329]+9" office:value-type="float" office:value="20961" calcext:value-type="float">
            <text:p>20961</text:p>
          </table:table-cell>
          <table:table-cell office:value-type="float" office:value="8640000" calcext:value-type="float">
            <text:p>8640000</text:p>
          </table:table-cell>
          <table:table-cell table:formula="of:=[.B2330]/[.C2330]" office:value-type="float" office:value="0.00242604166666667" calcext:value-type="float">
            <text:p>0,00242604166666667000</text:p>
          </table:table-cell>
          <table:table-cell table:formula="of:=[.D2331]-[.D233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[.B2330]+9" office:value-type="float" office:value="20970" calcext:value-type="float">
            <text:p>20970</text:p>
          </table:table-cell>
          <table:table-cell office:value-type="float" office:value="8640000" calcext:value-type="float">
            <text:p>8640000</text:p>
          </table:table-cell>
          <table:table-cell table:formula="of:=[.B2331]/[.C2331]" office:value-type="float" office:value="0.00242708333333333" calcext:value-type="float">
            <text:p>0,00242708333333333000</text:p>
          </table:table-cell>
          <table:table-cell table:formula="of:=[.D2332]-[.D233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[.B2331]+9" office:value-type="float" office:value="20979" calcext:value-type="float">
            <text:p>20979</text:p>
          </table:table-cell>
          <table:table-cell office:value-type="float" office:value="8640000" calcext:value-type="float">
            <text:p>8640000</text:p>
          </table:table-cell>
          <table:table-cell table:formula="of:=[.B2332]/[.C2332]" office:value-type="float" office:value="0.002428125" calcext:value-type="float">
            <text:p>0,00242812500000000000</text:p>
          </table:table-cell>
          <table:table-cell table:formula="of:=[.D2333]-[.D233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[.B2332]+9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2333]/[.C2333]" office:value-type="float" office:value="0.00242916666666667" calcext:value-type="float">
            <text:p>0,00242916666666667000</text:p>
          </table:table-cell>
          <table:table-cell table:formula="of:=[.D2334]-[.D233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[.B2333]+9" office:value-type="float" office:value="20997" calcext:value-type="float">
            <text:p>20997</text:p>
          </table:table-cell>
          <table:table-cell office:value-type="float" office:value="8640000" calcext:value-type="float">
            <text:p>8640000</text:p>
          </table:table-cell>
          <table:table-cell table:formula="of:=[.B2334]/[.C2334]" office:value-type="float" office:value="0.00243020833333333" calcext:value-type="float">
            <text:p>0,00243020833333333000</text:p>
          </table:table-cell>
          <table:table-cell table:formula="of:=[.D2335]-[.D233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[.B2334]+9" office:value-type="float" office:value="21006" calcext:value-type="float">
            <text:p>21006</text:p>
          </table:table-cell>
          <table:table-cell office:value-type="float" office:value="8640000" calcext:value-type="float">
            <text:p>8640000</text:p>
          </table:table-cell>
          <table:table-cell table:formula="of:=[.B2335]/[.C2335]" office:value-type="float" office:value="0.00243125" calcext:value-type="float">
            <text:p>0,00243125000000000000</text:p>
          </table:table-cell>
          <table:table-cell table:formula="of:=[.D2336]-[.D233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[.B2335]+9" office:value-type="float" office:value="21015" calcext:value-type="float">
            <text:p>21015</text:p>
          </table:table-cell>
          <table:table-cell office:value-type="float" office:value="8640000" calcext:value-type="float">
            <text:p>8640000</text:p>
          </table:table-cell>
          <table:table-cell table:formula="of:=[.B2336]/[.C2336]" office:value-type="float" office:value="0.00243229166666667" calcext:value-type="float">
            <text:p>0,00243229166666667000</text:p>
          </table:table-cell>
          <table:table-cell table:formula="of:=[.D2337]-[.D233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[.B2336]+9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2337]/[.C2337]" office:value-type="float" office:value="0.00243333333333333" calcext:value-type="float">
            <text:p>0,00243333333333333000</text:p>
          </table:table-cell>
          <table:table-cell table:formula="of:=[.D2338]-[.D233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[.B2337]+9" office:value-type="float" office:value="21033" calcext:value-type="float">
            <text:p>21033</text:p>
          </table:table-cell>
          <table:table-cell office:value-type="float" office:value="8640000" calcext:value-type="float">
            <text:p>8640000</text:p>
          </table:table-cell>
          <table:table-cell table:formula="of:=[.B2338]/[.C2338]" office:value-type="float" office:value="0.002434375" calcext:value-type="float">
            <text:p>0,00243437500000000000</text:p>
          </table:table-cell>
          <table:table-cell table:formula="of:=[.D2339]-[.D233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[.B2338]+9" office:value-type="float" office:value="21042" calcext:value-type="float">
            <text:p>21042</text:p>
          </table:table-cell>
          <table:table-cell office:value-type="float" office:value="8640000" calcext:value-type="float">
            <text:p>8640000</text:p>
          </table:table-cell>
          <table:table-cell table:formula="of:=[.B2339]/[.C2339]" office:value-type="float" office:value="0.00243541666666667" calcext:value-type="float">
            <text:p>0,00243541666666667000</text:p>
          </table:table-cell>
          <table:table-cell table:formula="of:=[.D2340]-[.D233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[.B2339]+9" office:value-type="float" office:value="21051" calcext:value-type="float">
            <text:p>21051</text:p>
          </table:table-cell>
          <table:table-cell office:value-type="float" office:value="8640000" calcext:value-type="float">
            <text:p>8640000</text:p>
          </table:table-cell>
          <table:table-cell table:formula="of:=[.B2340]/[.C2340]" office:value-type="float" office:value="0.00243645833333333" calcext:value-type="float">
            <text:p>0,00243645833333333000</text:p>
          </table:table-cell>
          <table:table-cell table:formula="of:=[.D2341]-[.D23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B2340]+9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2341]/[.C2341]" office:value-type="float" office:value="0.0024375" calcext:value-type="float">
            <text:p>0,00243750000000000000</text:p>
          </table:table-cell>
          <table:table-cell table:formula="of:=[.D2342]-[.D23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[.B2341]+9" office:value-type="float" office:value="21069" calcext:value-type="float">
            <text:p>21069</text:p>
          </table:table-cell>
          <table:table-cell office:value-type="float" office:value="8640000" calcext:value-type="float">
            <text:p>8640000</text:p>
          </table:table-cell>
          <table:table-cell table:formula="of:=[.B2342]/[.C2342]" office:value-type="float" office:value="0.00243854166666667" calcext:value-type="float">
            <text:p>0,00243854166666667000</text:p>
          </table:table-cell>
          <table:table-cell table:formula="of:=[.D2343]-[.D234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[.B2342]+9" office:value-type="float" office:value="21078" calcext:value-type="float">
            <text:p>21078</text:p>
          </table:table-cell>
          <table:table-cell office:value-type="float" office:value="8640000" calcext:value-type="float">
            <text:p>8640000</text:p>
          </table:table-cell>
          <table:table-cell table:formula="of:=[.B2343]/[.C2343]" office:value-type="float" office:value="0.00243958333333333" calcext:value-type="float">
            <text:p>0,00243958333333333000</text:p>
          </table:table-cell>
          <table:table-cell table:formula="of:=[.D2344]-[.D23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[.B2343]+9" office:value-type="float" office:value="21087" calcext:value-type="float">
            <text:p>21087</text:p>
          </table:table-cell>
          <table:table-cell office:value-type="float" office:value="8640000" calcext:value-type="float">
            <text:p>8640000</text:p>
          </table:table-cell>
          <table:table-cell table:formula="of:=[.B2344]/[.C2344]" office:value-type="float" office:value="0.002440625" calcext:value-type="float">
            <text:p>0,00244062500000000000</text:p>
          </table:table-cell>
          <table:table-cell table:formula="of:=[.D2345]-[.D234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[.B2344]+9" office:value-type="float" office:value="21096" calcext:value-type="float">
            <text:p>21096</text:p>
          </table:table-cell>
          <table:table-cell office:value-type="float" office:value="8640000" calcext:value-type="float">
            <text:p>8640000</text:p>
          </table:table-cell>
          <table:table-cell table:formula="of:=[.B2345]/[.C2345]" office:value-type="float" office:value="0.00244166666666667" calcext:value-type="float">
            <text:p>0,00244166666666667000</text:p>
          </table:table-cell>
          <table:table-cell table:formula="of:=[.D2346]-[.D234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[.B2345]+9" office:value-type="float" office:value="21105" calcext:value-type="float">
            <text:p>21105</text:p>
          </table:table-cell>
          <table:table-cell office:value-type="float" office:value="8640000" calcext:value-type="float">
            <text:p>8640000</text:p>
          </table:table-cell>
          <table:table-cell table:formula="of:=[.B2346]/[.C2346]" office:value-type="float" office:value="0.00244270833333333" calcext:value-type="float">
            <text:p>0,00244270833333333000</text:p>
          </table:table-cell>
          <table:table-cell table:formula="of:=[.D2347]-[.D234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[.B2346]+9" office:value-type="float" office:value="21114" calcext:value-type="float">
            <text:p>21114</text:p>
          </table:table-cell>
          <table:table-cell office:value-type="float" office:value="8640000" calcext:value-type="float">
            <text:p>8640000</text:p>
          </table:table-cell>
          <table:table-cell table:formula="of:=[.B2347]/[.C2347]" office:value-type="float" office:value="0.00244375" calcext:value-type="float">
            <text:p>0,00244375000000000000</text:p>
          </table:table-cell>
          <table:table-cell table:formula="of:=[.D2348]-[.D23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[.B2347]+9" office:value-type="float" office:value="21123" calcext:value-type="float">
            <text:p>21123</text:p>
          </table:table-cell>
          <table:table-cell office:value-type="float" office:value="8640000" calcext:value-type="float">
            <text:p>8640000</text:p>
          </table:table-cell>
          <table:table-cell table:formula="of:=[.B2348]/[.C2348]" office:value-type="float" office:value="0.00244479166666667" calcext:value-type="float">
            <text:p>0,00244479166666667000</text:p>
          </table:table-cell>
          <table:table-cell table:formula="of:=[.D2349]-[.D234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[.B2348]+9" office:value-type="float" office:value="21132" calcext:value-type="float">
            <text:p>21132</text:p>
          </table:table-cell>
          <table:table-cell office:value-type="float" office:value="8640000" calcext:value-type="float">
            <text:p>8640000</text:p>
          </table:table-cell>
          <table:table-cell table:formula="of:=[.B2349]/[.C2349]" office:value-type="float" office:value="0.00244583333333333" calcext:value-type="float">
            <text:p>0,00244583333333333000</text:p>
          </table:table-cell>
          <table:table-cell table:formula="of:=[.D2350]-[.D234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[.B2349]+9" office:value-type="float" office:value="21141" calcext:value-type="float">
            <text:p>21141</text:p>
          </table:table-cell>
          <table:table-cell office:value-type="float" office:value="8640000" calcext:value-type="float">
            <text:p>8640000</text:p>
          </table:table-cell>
          <table:table-cell table:formula="of:=[.B2350]/[.C2350]" office:value-type="float" office:value="0.002446875" calcext:value-type="float">
            <text:p>0,00244687500000000000</text:p>
          </table:table-cell>
          <table:table-cell table:formula="of:=[.D2351]-[.D235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.B2350]+9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2351]/[.C2351]" office:value-type="float" office:value="0.00244791666666667" calcext:value-type="float">
            <text:p>0,00244791666666667000</text:p>
          </table:table-cell>
          <table:table-cell table:formula="of:=[.D2352]-[.D23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[.B2351]+9" office:value-type="float" office:value="21159" calcext:value-type="float">
            <text:p>21159</text:p>
          </table:table-cell>
          <table:table-cell office:value-type="float" office:value="8640000" calcext:value-type="float">
            <text:p>8640000</text:p>
          </table:table-cell>
          <table:table-cell table:formula="of:=[.B2352]/[.C2352]" office:value-type="float" office:value="0.00244895833333333" calcext:value-type="float">
            <text:p>0,00244895833333333000</text:p>
          </table:table-cell>
          <table:table-cell table:formula="of:=[.D2353]-[.D235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[.B2352]+9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2353]/[.C2353]" office:value-type="float" office:value="0.00245" calcext:value-type="float">
            <text:p>0,00245000000000000000</text:p>
          </table:table-cell>
          <table:table-cell table:formula="of:=[.D2354]-[.D235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[.B2353]+9" office:value-type="float" office:value="21177" calcext:value-type="float">
            <text:p>21177</text:p>
          </table:table-cell>
          <table:table-cell office:value-type="float" office:value="8640000" calcext:value-type="float">
            <text:p>8640000</text:p>
          </table:table-cell>
          <table:table-cell table:formula="of:=[.B2354]/[.C2354]" office:value-type="float" office:value="0.00245104166666667" calcext:value-type="float">
            <text:p>0,00245104166666667000</text:p>
          </table:table-cell>
          <table:table-cell table:formula="of:=[.D2355]-[.D235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[.B2354]+9" office:value-type="float" office:value="21186" calcext:value-type="float">
            <text:p>21186</text:p>
          </table:table-cell>
          <table:table-cell office:value-type="float" office:value="8640000" calcext:value-type="float">
            <text:p>8640000</text:p>
          </table:table-cell>
          <table:table-cell table:formula="of:=[.B2355]/[.C2355]" office:value-type="float" office:value="0.00245208333333333" calcext:value-type="float">
            <text:p>0,00245208333333333000</text:p>
          </table:table-cell>
          <table:table-cell table:formula="of:=[.D2356]-[.D235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[.B2355]+9" office:value-type="float" office:value="21195" calcext:value-type="float">
            <text:p>21195</text:p>
          </table:table-cell>
          <table:table-cell office:value-type="float" office:value="8640000" calcext:value-type="float">
            <text:p>8640000</text:p>
          </table:table-cell>
          <table:table-cell table:formula="of:=[.B2356]/[.C2356]" office:value-type="float" office:value="0.002453125" calcext:value-type="float">
            <text:p>0,00245312500000000000</text:p>
          </table:table-cell>
          <table:table-cell table:formula="of:=[.D2357]-[.D23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[.B2356]+9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2357]/[.C2357]" office:value-type="float" office:value="0.00245416666666667" calcext:value-type="float">
            <text:p>0,00245416666666667000</text:p>
          </table:table-cell>
          <table:table-cell table:formula="of:=[.D2358]-[.D235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B2357]+9" office:value-type="float" office:value="21213" calcext:value-type="float">
            <text:p>21213</text:p>
          </table:table-cell>
          <table:table-cell office:value-type="float" office:value="8640000" calcext:value-type="float">
            <text:p>8640000</text:p>
          </table:table-cell>
          <table:table-cell table:formula="of:=[.B2358]/[.C2358]" office:value-type="float" office:value="0.00245520833333333" calcext:value-type="float">
            <text:p>0,00245520833333333000</text:p>
          </table:table-cell>
          <table:table-cell table:formula="of:=[.D2359]-[.D23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[.B2358]+9" office:value-type="float" office:value="21222" calcext:value-type="float">
            <text:p>21222</text:p>
          </table:table-cell>
          <table:table-cell office:value-type="float" office:value="8640000" calcext:value-type="float">
            <text:p>8640000</text:p>
          </table:table-cell>
          <table:table-cell table:formula="of:=[.B2359]/[.C2359]" office:value-type="float" office:value="0.00245625" calcext:value-type="float">
            <text:p>0,00245625000000000000</text:p>
          </table:table-cell>
          <table:table-cell table:formula="of:=[.D2360]-[.D235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[.B2359]+9" office:value-type="float" office:value="21231" calcext:value-type="float">
            <text:p>21231</text:p>
          </table:table-cell>
          <table:table-cell office:value-type="float" office:value="8640000" calcext:value-type="float">
            <text:p>8640000</text:p>
          </table:table-cell>
          <table:table-cell table:formula="of:=[.B2360]/[.C2360]" office:value-type="float" office:value="0.00245729166666667" calcext:value-type="float">
            <text:p>0,00245729166666667000</text:p>
          </table:table-cell>
          <table:table-cell table:formula="of:=[.D2361]-[.D23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[.B2360]+9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2361]/[.C2361]" office:value-type="float" office:value="0.00245833333333333" calcext:value-type="float">
            <text:p>0,00245833333333333000</text:p>
          </table:table-cell>
          <table:table-cell table:formula="of:=[.D2362]-[.D236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B2361]+9" office:value-type="float" office:value="21249" calcext:value-type="float">
            <text:p>21249</text:p>
          </table:table-cell>
          <table:table-cell office:value-type="float" office:value="8640000" calcext:value-type="float">
            <text:p>8640000</text:p>
          </table:table-cell>
          <table:table-cell table:formula="of:=[.B2362]/[.C2362]" office:value-type="float" office:value="0.002459375" calcext:value-type="float">
            <text:p>0,00245937500000000000</text:p>
          </table:table-cell>
          <table:table-cell table:formula="of:=[.D2363]-[.D23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[.B2362]+9" office:value-type="float" office:value="21258" calcext:value-type="float">
            <text:p>21258</text:p>
          </table:table-cell>
          <table:table-cell office:value-type="float" office:value="8640000" calcext:value-type="float">
            <text:p>8640000</text:p>
          </table:table-cell>
          <table:table-cell table:formula="of:=[.B2363]/[.C2363]" office:value-type="float" office:value="0.00246041666666667" calcext:value-type="float">
            <text:p>0,00246041666666667000</text:p>
          </table:table-cell>
          <table:table-cell table:formula="of:=[.D2364]-[.D236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[.B2363]+9" office:value-type="float" office:value="21267" calcext:value-type="float">
            <text:p>21267</text:p>
          </table:table-cell>
          <table:table-cell office:value-type="float" office:value="8640000" calcext:value-type="float">
            <text:p>8640000</text:p>
          </table:table-cell>
          <table:table-cell table:formula="of:=[.B2364]/[.C2364]" office:value-type="float" office:value="0.00246145833333333" calcext:value-type="float">
            <text:p>0,00246145833333333000</text:p>
          </table:table-cell>
          <table:table-cell table:formula="of:=[.D2365]-[.D236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[.B2364]+9" office:value-type="float" office:value="21276" calcext:value-type="float">
            <text:p>21276</text:p>
          </table:table-cell>
          <table:table-cell office:value-type="float" office:value="8640000" calcext:value-type="float">
            <text:p>8640000</text:p>
          </table:table-cell>
          <table:table-cell table:formula="of:=[.B2365]/[.C2365]" office:value-type="float" office:value="0.0024625" calcext:value-type="float">
            <text:p>0,00246250000000000000</text:p>
          </table:table-cell>
          <table:table-cell table:formula="of:=[.D2366]-[.D236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[.B2365]+9" office:value-type="float" office:value="21285" calcext:value-type="float">
            <text:p>21285</text:p>
          </table:table-cell>
          <table:table-cell office:value-type="float" office:value="8640000" calcext:value-type="float">
            <text:p>8640000</text:p>
          </table:table-cell>
          <table:table-cell table:formula="of:=[.B2366]/[.C2366]" office:value-type="float" office:value="0.00246354166666667" calcext:value-type="float">
            <text:p>0,00246354166666667000</text:p>
          </table:table-cell>
          <table:table-cell table:formula="of:=[.D2367]-[.D23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[.B2366]+9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2367]/[.C2367]" office:value-type="float" office:value="0.00246458333333333" calcext:value-type="float">
            <text:p>0,00246458333333333000</text:p>
          </table:table-cell>
          <table:table-cell table:formula="of:=[.D2368]-[.D236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[.B2367]+9" office:value-type="float" office:value="21303" calcext:value-type="float">
            <text:p>21303</text:p>
          </table:table-cell>
          <table:table-cell office:value-type="float" office:value="8640000" calcext:value-type="float">
            <text:p>8640000</text:p>
          </table:table-cell>
          <table:table-cell table:formula="of:=[.B2368]/[.C2368]" office:value-type="float" office:value="0.002465625" calcext:value-type="float">
            <text:p>0,00246562500000000000</text:p>
          </table:table-cell>
          <table:table-cell table:formula="of:=[.D2369]-[.D236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[.B2368]+9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2369]/[.C2369]" office:value-type="float" office:value="0.00246666666666667" calcext:value-type="float">
            <text:p>0,00246666666666667000</text:p>
          </table:table-cell>
          <table:table-cell table:formula="of:=[.D2370]-[.D236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[.B2369]+9" office:value-type="float" office:value="21321" calcext:value-type="float">
            <text:p>21321</text:p>
          </table:table-cell>
          <table:table-cell office:value-type="float" office:value="8640000" calcext:value-type="float">
            <text:p>8640000</text:p>
          </table:table-cell>
          <table:table-cell table:formula="of:=[.B2370]/[.C2370]" office:value-type="float" office:value="0.00246770833333333" calcext:value-type="float">
            <text:p>0,00246770833333333000</text:p>
          </table:table-cell>
          <table:table-cell table:formula="of:=[.D2371]-[.D237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[.B2370]+9" office:value-type="float" office:value="21330" calcext:value-type="float">
            <text:p>21330</text:p>
          </table:table-cell>
          <table:table-cell office:value-type="float" office:value="8640000" calcext:value-type="float">
            <text:p>8640000</text:p>
          </table:table-cell>
          <table:table-cell table:formula="of:=[.B2371]/[.C2371]" office:value-type="float" office:value="0.00246875" calcext:value-type="float">
            <text:p>0,00246875000000000000</text:p>
          </table:table-cell>
          <table:table-cell table:formula="of:=[.D2372]-[.D237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B2371]+9" office:value-type="float" office:value="21339" calcext:value-type="float">
            <text:p>21339</text:p>
          </table:table-cell>
          <table:table-cell office:value-type="float" office:value="8640000" calcext:value-type="float">
            <text:p>8640000</text:p>
          </table:table-cell>
          <table:table-cell table:formula="of:=[.B2372]/[.C2372]" office:value-type="float" office:value="0.00246979166666667" calcext:value-type="float">
            <text:p>0,00246979166666667000</text:p>
          </table:table-cell>
          <table:table-cell table:formula="of:=[.D2373]-[.D237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[.B2372]+9" office:value-type="float" office:value="21348" calcext:value-type="float">
            <text:p>21348</text:p>
          </table:table-cell>
          <table:table-cell office:value-type="float" office:value="8640000" calcext:value-type="float">
            <text:p>8640000</text:p>
          </table:table-cell>
          <table:table-cell table:formula="of:=[.B2373]/[.C2373]" office:value-type="float" office:value="0.00247083333333333" calcext:value-type="float">
            <text:p>0,00247083333333333000</text:p>
          </table:table-cell>
          <table:table-cell table:formula="of:=[.D2374]-[.D237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[.B2373]+9" office:value-type="float" office:value="21357" calcext:value-type="float">
            <text:p>21357</text:p>
          </table:table-cell>
          <table:table-cell office:value-type="float" office:value="8640000" calcext:value-type="float">
            <text:p>8640000</text:p>
          </table:table-cell>
          <table:table-cell table:formula="of:=[.B2374]/[.C2374]" office:value-type="float" office:value="0.002471875" calcext:value-type="float">
            <text:p>0,00247187500000000000</text:p>
          </table:table-cell>
          <table:table-cell table:formula="of:=[.D2375]-[.D237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[.B2374]+9" office:value-type="float" office:value="21366" calcext:value-type="float">
            <text:p>21366</text:p>
          </table:table-cell>
          <table:table-cell office:value-type="float" office:value="8640000" calcext:value-type="float">
            <text:p>8640000</text:p>
          </table:table-cell>
          <table:table-cell table:formula="of:=[.B2375]/[.C2375]" office:value-type="float" office:value="0.00247291666666667" calcext:value-type="float">
            <text:p>0,00247291666666667000</text:p>
          </table:table-cell>
          <table:table-cell table:formula="of:=[.D2376]-[.D23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[.B2375]+9" office:value-type="float" office:value="21375" calcext:value-type="float">
            <text:p>21375</text:p>
          </table:table-cell>
          <table:table-cell office:value-type="float" office:value="8640000" calcext:value-type="float">
            <text:p>8640000</text:p>
          </table:table-cell>
          <table:table-cell table:formula="of:=[.B2376]/[.C2376]" office:value-type="float" office:value="0.00247395833333333" calcext:value-type="float">
            <text:p>0,00247395833333333000</text:p>
          </table:table-cell>
          <table:table-cell table:formula="of:=[.D2377]-[.D237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[.B2376]+9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2377]/[.C2377]" office:value-type="float" office:value="0.002475" calcext:value-type="float">
            <text:p>0,00247500000000000000</text:p>
          </table:table-cell>
          <table:table-cell table:formula="of:=[.D2378]-[.D237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[.B2377]+9" office:value-type="float" office:value="21393" calcext:value-type="float">
            <text:p>21393</text:p>
          </table:table-cell>
          <table:table-cell office:value-type="float" office:value="8640000" calcext:value-type="float">
            <text:p>8640000</text:p>
          </table:table-cell>
          <table:table-cell table:formula="of:=[.B2378]/[.C2378]" office:value-type="float" office:value="0.00247604166666667" calcext:value-type="float">
            <text:p>0,00247604166666667000</text:p>
          </table:table-cell>
          <table:table-cell table:formula="of:=[.D2379]-[.D237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[.B2378]+9" office:value-type="float" office:value="21402" calcext:value-type="float">
            <text:p>21402</text:p>
          </table:table-cell>
          <table:table-cell office:value-type="float" office:value="8640000" calcext:value-type="float">
            <text:p>8640000</text:p>
          </table:table-cell>
          <table:table-cell table:formula="of:=[.B2379]/[.C2379]" office:value-type="float" office:value="0.00247708333333333" calcext:value-type="float">
            <text:p>0,00247708333333333000</text:p>
          </table:table-cell>
          <table:table-cell table:formula="of:=[.D2380]-[.D23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[.B2379]+9" office:value-type="float" office:value="21411" calcext:value-type="float">
            <text:p>21411</text:p>
          </table:table-cell>
          <table:table-cell office:value-type="float" office:value="8640000" calcext:value-type="float">
            <text:p>8640000</text:p>
          </table:table-cell>
          <table:table-cell table:formula="of:=[.B2380]/[.C2380]" office:value-type="float" office:value="0.002478125" calcext:value-type="float">
            <text:p>0,00247812500000000000</text:p>
          </table:table-cell>
          <table:table-cell table:formula="of:=[.D2381]-[.D238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B2380]+9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2381]/[.C2381]" office:value-type="float" office:value="0.00247916666666667" calcext:value-type="float">
            <text:p>0,00247916666666667000</text:p>
          </table:table-cell>
          <table:table-cell table:formula="of:=[.D2382]-[.D238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[.B2381]+9" office:value-type="float" office:value="21429" calcext:value-type="float">
            <text:p>21429</text:p>
          </table:table-cell>
          <table:table-cell office:value-type="float" office:value="8640000" calcext:value-type="float">
            <text:p>8640000</text:p>
          </table:table-cell>
          <table:table-cell table:formula="of:=[.B2382]/[.C2382]" office:value-type="float" office:value="0.00248020833333333" calcext:value-type="float">
            <text:p>0,00248020833333333000</text:p>
          </table:table-cell>
          <table:table-cell table:formula="of:=[.D2383]-[.D238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[.B2382]+9" office:value-type="float" office:value="21438" calcext:value-type="float">
            <text:p>21438</text:p>
          </table:table-cell>
          <table:table-cell office:value-type="float" office:value="8640000" calcext:value-type="float">
            <text:p>8640000</text:p>
          </table:table-cell>
          <table:table-cell table:formula="of:=[.B2383]/[.C2383]" office:value-type="float" office:value="0.00248125" calcext:value-type="float">
            <text:p>0,00248125000000000000</text:p>
          </table:table-cell>
          <table:table-cell table:formula="of:=[.D2384]-[.D238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[.B2383]+9" office:value-type="float" office:value="21447" calcext:value-type="float">
            <text:p>21447</text:p>
          </table:table-cell>
          <table:table-cell office:value-type="float" office:value="8640000" calcext:value-type="float">
            <text:p>8640000</text:p>
          </table:table-cell>
          <table:table-cell table:formula="of:=[.B2384]/[.C2384]" office:value-type="float" office:value="0.00248229166666667" calcext:value-type="float">
            <text:p>0,00248229166666667000</text:p>
          </table:table-cell>
          <table:table-cell table:formula="of:=[.D2385]-[.D238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[.B2384]+9" office:value-type="float" office:value="21456" calcext:value-type="float">
            <text:p>21456</text:p>
          </table:table-cell>
          <table:table-cell office:value-type="float" office:value="8640000" calcext:value-type="float">
            <text:p>8640000</text:p>
          </table:table-cell>
          <table:table-cell table:formula="of:=[.B2385]/[.C2385]" office:value-type="float" office:value="0.00248333333333333" calcext:value-type="float">
            <text:p>0,00248333333333333000</text:p>
          </table:table-cell>
          <table:table-cell table:formula="of:=[.D2386]-[.D238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[.B2385]+9" office:value-type="float" office:value="21465" calcext:value-type="float">
            <text:p>21465</text:p>
          </table:table-cell>
          <table:table-cell office:value-type="float" office:value="8640000" calcext:value-type="float">
            <text:p>8640000</text:p>
          </table:table-cell>
          <table:table-cell table:formula="of:=[.B2386]/[.C2386]" office:value-type="float" office:value="0.002484375" calcext:value-type="float">
            <text:p>0,00248437500000000000</text:p>
          </table:table-cell>
          <table:table-cell table:formula="of:=[.D2387]-[.D23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[.B2386]+9" office:value-type="float" office:value="21474" calcext:value-type="float">
            <text:p>21474</text:p>
          </table:table-cell>
          <table:table-cell office:value-type="float" office:value="8640000" calcext:value-type="float">
            <text:p>8640000</text:p>
          </table:table-cell>
          <table:table-cell table:formula="of:=[.B2387]/[.C2387]" office:value-type="float" office:value="0.00248541666666667" calcext:value-type="float">
            <text:p>0,00248541666666667000</text:p>
          </table:table-cell>
          <table:table-cell table:formula="of:=[.D2388]-[.D238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[.B2387]+9" office:value-type="float" office:value="21483" calcext:value-type="float">
            <text:p>21483</text:p>
          </table:table-cell>
          <table:table-cell office:value-type="float" office:value="8640000" calcext:value-type="float">
            <text:p>8640000</text:p>
          </table:table-cell>
          <table:table-cell table:formula="of:=[.B2388]/[.C2388]" office:value-type="float" office:value="0.00248645833333333" calcext:value-type="float">
            <text:p>0,00248645833333333000</text:p>
          </table:table-cell>
          <table:table-cell table:formula="of:=[.D2389]-[.D238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[.B2388]+9" office:value-type="float" office:value="21492" calcext:value-type="float">
            <text:p>21492</text:p>
          </table:table-cell>
          <table:table-cell office:value-type="float" office:value="8640000" calcext:value-type="float">
            <text:p>8640000</text:p>
          </table:table-cell>
          <table:table-cell table:formula="of:=[.B2389]/[.C2389]" office:value-type="float" office:value="0.0024875" calcext:value-type="float">
            <text:p>0,00248750000000000000</text:p>
          </table:table-cell>
          <table:table-cell table:formula="of:=[.D2390]-[.D238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[.B2389]+9" office:value-type="float" office:value="21501" calcext:value-type="float">
            <text:p>21501</text:p>
          </table:table-cell>
          <table:table-cell office:value-type="float" office:value="8640000" calcext:value-type="float">
            <text:p>8640000</text:p>
          </table:table-cell>
          <table:table-cell table:formula="of:=[.B2390]/[.C2390]" office:value-type="float" office:value="0.00248854166666667" calcext:value-type="float">
            <text:p>0,00248854166666667000</text:p>
          </table:table-cell>
          <table:table-cell table:formula="of:=[.D2391]-[.D23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[.B2390]+9" office:value-type="float" office:value="21510" calcext:value-type="float">
            <text:p>21510</text:p>
          </table:table-cell>
          <table:table-cell office:value-type="float" office:value="8640000" calcext:value-type="float">
            <text:p>8640000</text:p>
          </table:table-cell>
          <table:table-cell table:formula="of:=[.B2391]/[.C2391]" office:value-type="float" office:value="0.00248958333333333" calcext:value-type="float">
            <text:p>0,00248958333333333000</text:p>
          </table:table-cell>
          <table:table-cell table:formula="of:=[.D2392]-[.D239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[.B2391]+9" office:value-type="float" office:value="21519" calcext:value-type="float">
            <text:p>21519</text:p>
          </table:table-cell>
          <table:table-cell office:value-type="float" office:value="8640000" calcext:value-type="float">
            <text:p>8640000</text:p>
          </table:table-cell>
          <table:table-cell table:formula="of:=[.B2392]/[.C2392]" office:value-type="float" office:value="0.002490625" calcext:value-type="float">
            <text:p>0,00249062500000000000</text:p>
          </table:table-cell>
          <table:table-cell table:formula="of:=[.D2393]-[.D239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[.B2392]+9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2393]/[.C2393]" office:value-type="float" office:value="0.00249166666666667" calcext:value-type="float">
            <text:p>0,00249166666666667000</text:p>
          </table:table-cell>
          <table:table-cell table:formula="of:=[.D2394]-[.D239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[.B2393]+9" office:value-type="float" office:value="21537" calcext:value-type="float">
            <text:p>21537</text:p>
          </table:table-cell>
          <table:table-cell office:value-type="float" office:value="8640000" calcext:value-type="float">
            <text:p>8640000</text:p>
          </table:table-cell>
          <table:table-cell table:formula="of:=[.B2394]/[.C2394]" office:value-type="float" office:value="0.00249270833333333" calcext:value-type="float">
            <text:p>0,00249270833333333000</text:p>
          </table:table-cell>
          <table:table-cell table:formula="of:=[.D2395]-[.D23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[.B2394]+9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2395]/[.C2395]" office:value-type="float" office:value="0.00249375" calcext:value-type="float">
            <text:p>0,00249375000000000000</text:p>
          </table:table-cell>
          <table:table-cell table:formula="of:=[.D2396]-[.D239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[.B2395]+9" office:value-type="float" office:value="21555" calcext:value-type="float">
            <text:p>21555</text:p>
          </table:table-cell>
          <table:table-cell office:value-type="float" office:value="8640000" calcext:value-type="float">
            <text:p>8640000</text:p>
          </table:table-cell>
          <table:table-cell table:formula="of:=[.B2396]/[.C2396]" office:value-type="float" office:value="0.00249479166666667" calcext:value-type="float">
            <text:p>0,00249479166666667000</text:p>
          </table:table-cell>
          <table:table-cell table:formula="of:=[.D2397]-[.D239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[.B2396]+9" office:value-type="float" office:value="21564" calcext:value-type="float">
            <text:p>21564</text:p>
          </table:table-cell>
          <table:table-cell office:value-type="float" office:value="8640000" calcext:value-type="float">
            <text:p>8640000</text:p>
          </table:table-cell>
          <table:table-cell table:formula="of:=[.B2397]/[.C2397]" office:value-type="float" office:value="0.00249583333333333" calcext:value-type="float">
            <text:p>0,00249583333333333000</text:p>
          </table:table-cell>
          <table:table-cell table:formula="of:=[.D2398]-[.D239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B2397]+9" office:value-type="float" office:value="21573" calcext:value-type="float">
            <text:p>21573</text:p>
          </table:table-cell>
          <table:table-cell office:value-type="float" office:value="8640000" calcext:value-type="float">
            <text:p>8640000</text:p>
          </table:table-cell>
          <table:table-cell table:formula="of:=[.B2398]/[.C2398]" office:value-type="float" office:value="0.002496875" calcext:value-type="float">
            <text:p>0,00249687500000000000</text:p>
          </table:table-cell>
          <table:table-cell table:formula="of:=[.D2399]-[.D239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[.B2398]+9" office:value-type="float" office:value="21582" calcext:value-type="float">
            <text:p>21582</text:p>
          </table:table-cell>
          <table:table-cell office:value-type="float" office:value="8640000" calcext:value-type="float">
            <text:p>8640000</text:p>
          </table:table-cell>
          <table:table-cell table:formula="of:=[.B2399]/[.C2399]" office:value-type="float" office:value="0.00249791666666667" calcext:value-type="float">
            <text:p>0,00249791666666667000</text:p>
          </table:table-cell>
          <table:table-cell table:formula="of:=[.D2400]-[.D239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[.B2399]+9" office:value-type="float" office:value="21591" calcext:value-type="float">
            <text:p>21591</text:p>
          </table:table-cell>
          <table:table-cell office:value-type="float" office:value="8640000" calcext:value-type="float">
            <text:p>8640000</text:p>
          </table:table-cell>
          <table:table-cell table:formula="of:=[.B2400]/[.C2400]" office:value-type="float" office:value="0.00249895833333333" calcext:value-type="float">
            <text:p>0,00249895833333333000</text:p>
          </table:table-cell>
          <table:table-cell table:formula="of:=[.D2401]-[.D240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B2400]+9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2401]/[.C2401]" office:value-type="float" office:value="0.0025" calcext:value-type="float">
            <text:p>0,00250000000000000000</text:p>
          </table:table-cell>
          <table:table-cell table:formula="of:=[.D2402]-[.D24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[.B2401]+9" office:value-type="float" office:value="21609" calcext:value-type="float">
            <text:p>21609</text:p>
          </table:table-cell>
          <table:table-cell office:value-type="float" office:value="8640000" calcext:value-type="float">
            <text:p>8640000</text:p>
          </table:table-cell>
          <table:table-cell table:formula="of:=[.B2402]/[.C2402]" office:value-type="float" office:value="0.00250104166666667" calcext:value-type="float">
            <text:p>0,00250104166666667000</text:p>
          </table:table-cell>
          <table:table-cell table:formula="of:=[.D2403]-[.D240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[.B2402]+9" office:value-type="float" office:value="21618" calcext:value-type="float">
            <text:p>21618</text:p>
          </table:table-cell>
          <table:table-cell office:value-type="float" office:value="8640000" calcext:value-type="float">
            <text:p>8640000</text:p>
          </table:table-cell>
          <table:table-cell table:formula="of:=[.B2403]/[.C2403]" office:value-type="float" office:value="0.00250208333333333" calcext:value-type="float">
            <text:p>0,00250208333333333000</text:p>
          </table:table-cell>
          <table:table-cell table:formula="of:=[.D2404]-[.D240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[.B2403]+9" office:value-type="float" office:value="21627" calcext:value-type="float">
            <text:p>21627</text:p>
          </table:table-cell>
          <table:table-cell office:value-type="float" office:value="8640000" calcext:value-type="float">
            <text:p>8640000</text:p>
          </table:table-cell>
          <table:table-cell table:formula="of:=[.B2404]/[.C2404]" office:value-type="float" office:value="0.002503125" calcext:value-type="float">
            <text:p>0,00250312500000000000</text:p>
          </table:table-cell>
          <table:table-cell table:formula="of:=[.D2405]-[.D240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[.B2404]+9" office:value-type="float" office:value="21636" calcext:value-type="float">
            <text:p>21636</text:p>
          </table:table-cell>
          <table:table-cell office:value-type="float" office:value="8640000" calcext:value-type="float">
            <text:p>8640000</text:p>
          </table:table-cell>
          <table:table-cell table:formula="of:=[.B2405]/[.C2405]" office:value-type="float" office:value="0.00250416666666667" calcext:value-type="float">
            <text:p>0,00250416666666667000</text:p>
          </table:table-cell>
          <table:table-cell table:formula="of:=[.D2406]-[.D24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[.B2405]+9" office:value-type="float" office:value="21645" calcext:value-type="float">
            <text:p>21645</text:p>
          </table:table-cell>
          <table:table-cell office:value-type="float" office:value="8640000" calcext:value-type="float">
            <text:p>8640000</text:p>
          </table:table-cell>
          <table:table-cell table:formula="of:=[.B2406]/[.C2406]" office:value-type="float" office:value="0.00250520833333333" calcext:value-type="float">
            <text:p>0,00250520833333333000</text:p>
          </table:table-cell>
          <table:table-cell table:formula="of:=[.D2407]-[.D240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[.B2406]+9" office:value-type="float" office:value="21654" calcext:value-type="float">
            <text:p>21654</text:p>
          </table:table-cell>
          <table:table-cell office:value-type="float" office:value="8640000" calcext:value-type="float">
            <text:p>8640000</text:p>
          </table:table-cell>
          <table:table-cell table:formula="of:=[.B2407]/[.C2407]" office:value-type="float" office:value="0.00250625" calcext:value-type="float">
            <text:p>0,00250625000000000000</text:p>
          </table:table-cell>
          <table:table-cell table:formula="of:=[.D2408]-[.D240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[.B2407]+9" office:value-type="float" office:value="21663" calcext:value-type="float">
            <text:p>21663</text:p>
          </table:table-cell>
          <table:table-cell office:value-type="float" office:value="8640000" calcext:value-type="float">
            <text:p>8640000</text:p>
          </table:table-cell>
          <table:table-cell table:formula="of:=[.B2408]/[.C2408]" office:value-type="float" office:value="0.00250729166666667" calcext:value-type="float">
            <text:p>0,00250729166666667000</text:p>
          </table:table-cell>
          <table:table-cell table:formula="of:=[.D2409]-[.D240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[.B2408]+9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2409]/[.C2409]" office:value-type="float" office:value="0.00250833333333333" calcext:value-type="float">
            <text:p>0,00250833333333333000</text:p>
          </table:table-cell>
          <table:table-cell table:formula="of:=[.D2410]-[.D24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[.B2409]+9" office:value-type="float" office:value="21681" calcext:value-type="float">
            <text:p>21681</text:p>
          </table:table-cell>
          <table:table-cell office:value-type="float" office:value="8640000" calcext:value-type="float">
            <text:p>8640000</text:p>
          </table:table-cell>
          <table:table-cell table:formula="of:=[.B2410]/[.C2410]" office:value-type="float" office:value="0.002509375" calcext:value-type="float">
            <text:p>0,00250937500000000000</text:p>
          </table:table-cell>
          <table:table-cell table:formula="of:=[.D2411]-[.D241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[.B2410]+9" office:value-type="float" office:value="21690" calcext:value-type="float">
            <text:p>21690</text:p>
          </table:table-cell>
          <table:table-cell office:value-type="float" office:value="8640000" calcext:value-type="float">
            <text:p>8640000</text:p>
          </table:table-cell>
          <table:table-cell table:formula="of:=[.B2411]/[.C2411]" office:value-type="float" office:value="0.00251041666666667" calcext:value-type="float">
            <text:p>0,00251041666666667000</text:p>
          </table:table-cell>
          <table:table-cell table:formula="of:=[.D2412]-[.D241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[.B2411]+9" office:value-type="float" office:value="21699" calcext:value-type="float">
            <text:p>21699</text:p>
          </table:table-cell>
          <table:table-cell office:value-type="float" office:value="8640000" calcext:value-type="float">
            <text:p>8640000</text:p>
          </table:table-cell>
          <table:table-cell table:formula="of:=[.B2412]/[.C2412]" office:value-type="float" office:value="0.00251145833333333" calcext:value-type="float">
            <text:p>0,00251145833333333000</text:p>
          </table:table-cell>
          <table:table-cell table:formula="of:=[.D2413]-[.D241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[.B2412]+9" office:value-type="float" office:value="21708" calcext:value-type="float">
            <text:p>21708</text:p>
          </table:table-cell>
          <table:table-cell office:value-type="float" office:value="8640000" calcext:value-type="float">
            <text:p>8640000</text:p>
          </table:table-cell>
          <table:table-cell table:formula="of:=[.B2413]/[.C2413]" office:value-type="float" office:value="0.0025125" calcext:value-type="float">
            <text:p>0,00251250000000000000</text:p>
          </table:table-cell>
          <table:table-cell table:formula="of:=[.D2414]-[.D24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[.B2413]+9" office:value-type="float" office:value="21717" calcext:value-type="float">
            <text:p>21717</text:p>
          </table:table-cell>
          <table:table-cell office:value-type="float" office:value="8640000" calcext:value-type="float">
            <text:p>8640000</text:p>
          </table:table-cell>
          <table:table-cell table:formula="of:=[.B2414]/[.C2414]" office:value-type="float" office:value="0.00251354166666667" calcext:value-type="float">
            <text:p>0,00251354166666667000</text:p>
          </table:table-cell>
          <table:table-cell table:formula="of:=[.D2415]-[.D241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[.B2414]+9" office:value-type="float" office:value="21726" calcext:value-type="float">
            <text:p>21726</text:p>
          </table:table-cell>
          <table:table-cell office:value-type="float" office:value="8640000" calcext:value-type="float">
            <text:p>8640000</text:p>
          </table:table-cell>
          <table:table-cell table:formula="of:=[.B2415]/[.C2415]" office:value-type="float" office:value="0.00251458333333333" calcext:value-type="float">
            <text:p>0,00251458333333333000</text:p>
          </table:table-cell>
          <table:table-cell table:formula="of:=[.D2416]-[.D241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[.B2415]+9" office:value-type="float" office:value="21735" calcext:value-type="float">
            <text:p>21735</text:p>
          </table:table-cell>
          <table:table-cell office:value-type="float" office:value="8640000" calcext:value-type="float">
            <text:p>8640000</text:p>
          </table:table-cell>
          <table:table-cell table:formula="of:=[.B2416]/[.C2416]" office:value-type="float" office:value="0.002515625" calcext:value-type="float">
            <text:p>0,00251562500000000000</text:p>
          </table:table-cell>
          <table:table-cell table:formula="of:=[.D2417]-[.D241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[.B2416]+9" office:value-type="float" office:value="21744" calcext:value-type="float">
            <text:p>21744</text:p>
          </table:table-cell>
          <table:table-cell office:value-type="float" office:value="8640000" calcext:value-type="float">
            <text:p>8640000</text:p>
          </table:table-cell>
          <table:table-cell table:formula="of:=[.B2417]/[.C2417]" office:value-type="float" office:value="0.00251666666666667" calcext:value-type="float">
            <text:p>0,00251666666666667000</text:p>
          </table:table-cell>
          <table:table-cell table:formula="of:=[.D2418]-[.D241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B2417]+9" office:value-type="float" office:value="21753" calcext:value-type="float">
            <text:p>21753</text:p>
          </table:table-cell>
          <table:table-cell office:value-type="float" office:value="8640000" calcext:value-type="float">
            <text:p>8640000</text:p>
          </table:table-cell>
          <table:table-cell table:formula="of:=[.B2418]/[.C2418]" office:value-type="float" office:value="0.00251770833333333" calcext:value-type="float">
            <text:p>0,00251770833333333000</text:p>
          </table:table-cell>
          <table:table-cell table:formula="of:=[.D2419]-[.D241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[.B2418]+9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2419]/[.C2419]" office:value-type="float" office:value="0.00251875" calcext:value-type="float">
            <text:p>0,00251875000000000000</text:p>
          </table:table-cell>
          <table:table-cell table:formula="of:=[.D2420]-[.D241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[.B2419]+9" office:value-type="float" office:value="21771" calcext:value-type="float">
            <text:p>21771</text:p>
          </table:table-cell>
          <table:table-cell office:value-type="float" office:value="8640000" calcext:value-type="float">
            <text:p>8640000</text:p>
          </table:table-cell>
          <table:table-cell table:formula="of:=[.B2420]/[.C2420]" office:value-type="float" office:value="0.00251979166666667" calcext:value-type="float">
            <text:p>0,00251979166666667000</text:p>
          </table:table-cell>
          <table:table-cell table:formula="of:=[.D2421]-[.D24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B2420]+9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2421]/[.C2421]" office:value-type="float" office:value="0.00252083333333333" calcext:value-type="float">
            <text:p>0,00252083333333333000</text:p>
          </table:table-cell>
          <table:table-cell table:formula="of:=[.D2422]-[.D242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[.B2421]+9" office:value-type="float" office:value="21789" calcext:value-type="float">
            <text:p>21789</text:p>
          </table:table-cell>
          <table:table-cell office:value-type="float" office:value="8640000" calcext:value-type="float">
            <text:p>8640000</text:p>
          </table:table-cell>
          <table:table-cell table:formula="of:=[.B2422]/[.C2422]" office:value-type="float" office:value="0.002521875" calcext:value-type="float">
            <text:p>0,00252187500000000000</text:p>
          </table:table-cell>
          <table:table-cell table:formula="of:=[.D2423]-[.D242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[.B2422]+9" office:value-type="float" office:value="21798" calcext:value-type="float">
            <text:p>21798</text:p>
          </table:table-cell>
          <table:table-cell office:value-type="float" office:value="8640000" calcext:value-type="float">
            <text:p>8640000</text:p>
          </table:table-cell>
          <table:table-cell table:formula="of:=[.B2423]/[.C2423]" office:value-type="float" office:value="0.00252291666666667" calcext:value-type="float">
            <text:p>0,00252291666666667000</text:p>
          </table:table-cell>
          <table:table-cell table:formula="of:=[.D2424]-[.D242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[.B2423]+9" office:value-type="float" office:value="21807" calcext:value-type="float">
            <text:p>21807</text:p>
          </table:table-cell>
          <table:table-cell office:value-type="float" office:value="8640000" calcext:value-type="float">
            <text:p>8640000</text:p>
          </table:table-cell>
          <table:table-cell table:formula="of:=[.B2424]/[.C2424]" office:value-type="float" office:value="0.00252395833333333" calcext:value-type="float">
            <text:p>0,00252395833333333000</text:p>
          </table:table-cell>
          <table:table-cell table:formula="of:=[.D2425]-[.D24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[.B2424]+9" office:value-type="float" office:value="21816" calcext:value-type="float">
            <text:p>21816</text:p>
          </table:table-cell>
          <table:table-cell office:value-type="float" office:value="8640000" calcext:value-type="float">
            <text:p>8640000</text:p>
          </table:table-cell>
          <table:table-cell table:formula="of:=[.B2425]/[.C2425]" office:value-type="float" office:value="0.002525" calcext:value-type="float">
            <text:p>0,00252500000000000000</text:p>
          </table:table-cell>
          <table:table-cell table:formula="of:=[.D2426]-[.D242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[.B2425]+9" office:value-type="float" office:value="21825" calcext:value-type="float">
            <text:p>21825</text:p>
          </table:table-cell>
          <table:table-cell office:value-type="float" office:value="8640000" calcext:value-type="float">
            <text:p>8640000</text:p>
          </table:table-cell>
          <table:table-cell table:formula="of:=[.B2426]/[.C2426]" office:value-type="float" office:value="0.00252604166666667" calcext:value-type="float">
            <text:p>0,00252604166666667000</text:p>
          </table:table-cell>
          <table:table-cell table:formula="of:=[.D2427]-[.D242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[.B2426]+9" office:value-type="float" office:value="21834" calcext:value-type="float">
            <text:p>21834</text:p>
          </table:table-cell>
          <table:table-cell office:value-type="float" office:value="8640000" calcext:value-type="float">
            <text:p>8640000</text:p>
          </table:table-cell>
          <table:table-cell table:formula="of:=[.B2427]/[.C2427]" office:value-type="float" office:value="0.00252708333333333" calcext:value-type="float">
            <text:p>0,00252708333333333000</text:p>
          </table:table-cell>
          <table:table-cell table:formula="of:=[.D2428]-[.D242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[.B2427]+9" office:value-type="float" office:value="21843" calcext:value-type="float">
            <text:p>21843</text:p>
          </table:table-cell>
          <table:table-cell office:value-type="float" office:value="8640000" calcext:value-type="float">
            <text:p>8640000</text:p>
          </table:table-cell>
          <table:table-cell table:formula="of:=[.B2428]/[.C2428]" office:value-type="float" office:value="0.002528125" calcext:value-type="float">
            <text:p>0,00252812500000000000</text:p>
          </table:table-cell>
          <table:table-cell table:formula="of:=[.D2429]-[.D24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[.B2428]+9" office:value-type="float" office:value="21852" calcext:value-type="float">
            <text:p>21852</text:p>
          </table:table-cell>
          <table:table-cell office:value-type="float" office:value="8640000" calcext:value-type="float">
            <text:p>8640000</text:p>
          </table:table-cell>
          <table:table-cell table:formula="of:=[.B2429]/[.C2429]" office:value-type="float" office:value="0.00252916666666667" calcext:value-type="float">
            <text:p>0,00252916666666667000</text:p>
          </table:table-cell>
          <table:table-cell table:formula="of:=[.D2430]-[.D242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[.B2429]+9" office:value-type="float" office:value="21861" calcext:value-type="float">
            <text:p>21861</text:p>
          </table:table-cell>
          <table:table-cell office:value-type="float" office:value="8640000" calcext:value-type="float">
            <text:p>8640000</text:p>
          </table:table-cell>
          <table:table-cell table:formula="of:=[.B2430]/[.C2430]" office:value-type="float" office:value="0.00253020833333333" calcext:value-type="float">
            <text:p>0,00253020833333333000</text:p>
          </table:table-cell>
          <table:table-cell table:formula="of:=[.D2431]-[.D243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[.B2430]+9" office:value-type="float" office:value="21870" calcext:value-type="float">
            <text:p>21870</text:p>
          </table:table-cell>
          <table:table-cell office:value-type="float" office:value="8640000" calcext:value-type="float">
            <text:p>8640000</text:p>
          </table:table-cell>
          <table:table-cell table:formula="of:=[.B2431]/[.C2431]" office:value-type="float" office:value="0.00253125" calcext:value-type="float">
            <text:p>0,00253125000000000000</text:p>
          </table:table-cell>
          <table:table-cell table:formula="of:=[.D2432]-[.D243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[.B2431]+9" office:value-type="float" office:value="21879" calcext:value-type="float">
            <text:p>21879</text:p>
          </table:table-cell>
          <table:table-cell office:value-type="float" office:value="8640000" calcext:value-type="float">
            <text:p>8640000</text:p>
          </table:table-cell>
          <table:table-cell table:formula="of:=[.B2432]/[.C2432]" office:value-type="float" office:value="0.00253229166666667" calcext:value-type="float">
            <text:p>0,00253229166666667000</text:p>
          </table:table-cell>
          <table:table-cell table:formula="of:=[.D2433]-[.D243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B2432]+9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2433]/[.C2433]" office:value-type="float" office:value="0.00253333333333333" calcext:value-type="float">
            <text:p>0,00253333333333333000</text:p>
          </table:table-cell>
          <table:table-cell table:formula="of:=[.D2434]-[.D243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[.B2433]+9" office:value-type="float" office:value="21897" calcext:value-type="float">
            <text:p>21897</text:p>
          </table:table-cell>
          <table:table-cell office:value-type="float" office:value="8640000" calcext:value-type="float">
            <text:p>8640000</text:p>
          </table:table-cell>
          <table:table-cell table:formula="of:=[.B2434]/[.C2434]" office:value-type="float" office:value="0.002534375" calcext:value-type="float">
            <text:p>0,00253437500000000000</text:p>
          </table:table-cell>
          <table:table-cell table:formula="of:=[.D2435]-[.D243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[.B2434]+9" office:value-type="float" office:value="21906" calcext:value-type="float">
            <text:p>21906</text:p>
          </table:table-cell>
          <table:table-cell office:value-type="float" office:value="8640000" calcext:value-type="float">
            <text:p>8640000</text:p>
          </table:table-cell>
          <table:table-cell table:formula="of:=[.B2435]/[.C2435]" office:value-type="float" office:value="0.00253541666666667" calcext:value-type="float">
            <text:p>0,00253541666666667000</text:p>
          </table:table-cell>
          <table:table-cell table:formula="of:=[.D2436]-[.D24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[.B2435]+9" office:value-type="float" office:value="21915" calcext:value-type="float">
            <text:p>21915</text:p>
          </table:table-cell>
          <table:table-cell office:value-type="float" office:value="8640000" calcext:value-type="float">
            <text:p>8640000</text:p>
          </table:table-cell>
          <table:table-cell table:formula="of:=[.B2436]/[.C2436]" office:value-type="float" office:value="0.00253645833333333" calcext:value-type="float">
            <text:p>0,00253645833333333000</text:p>
          </table:table-cell>
          <table:table-cell table:formula="of:=[.D2437]-[.D243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[.B2436]+9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2437]/[.C2437]" office:value-type="float" office:value="0.0025375" calcext:value-type="float">
            <text:p>0,00253750000000000000</text:p>
          </table:table-cell>
          <table:table-cell table:formula="of:=[.D2438]-[.D243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[.B2437]+9" office:value-type="float" office:value="21933" calcext:value-type="float">
            <text:p>21933</text:p>
          </table:table-cell>
          <table:table-cell office:value-type="float" office:value="8640000" calcext:value-type="float">
            <text:p>8640000</text:p>
          </table:table-cell>
          <table:table-cell table:formula="of:=[.B2438]/[.C2438]" office:value-type="float" office:value="0.00253854166666667" calcext:value-type="float">
            <text:p>0,00253854166666667000</text:p>
          </table:table-cell>
          <table:table-cell table:formula="of:=[.D2439]-[.D243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[.B2438]+9" office:value-type="float" office:value="21942" calcext:value-type="float">
            <text:p>21942</text:p>
          </table:table-cell>
          <table:table-cell office:value-type="float" office:value="8640000" calcext:value-type="float">
            <text:p>8640000</text:p>
          </table:table-cell>
          <table:table-cell table:formula="of:=[.B2439]/[.C2439]" office:value-type="float" office:value="0.00253958333333333" calcext:value-type="float">
            <text:p>0,00253958333333333000</text:p>
          </table:table-cell>
          <table:table-cell table:formula="of:=[.D2440]-[.D24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[.B2439]+9" office:value-type="float" office:value="21951" calcext:value-type="float">
            <text:p>21951</text:p>
          </table:table-cell>
          <table:table-cell office:value-type="float" office:value="8640000" calcext:value-type="float">
            <text:p>8640000</text:p>
          </table:table-cell>
          <table:table-cell table:formula="of:=[.B2440]/[.C2440]" office:value-type="float" office:value="0.002540625" calcext:value-type="float">
            <text:p>0,00254062500000000000</text:p>
          </table:table-cell>
          <table:table-cell table:formula="of:=[.D2441]-[.D24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[.B2440]+9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2441]/[.C2441]" office:value-type="float" office:value="0.00254166666666667" calcext:value-type="float">
            <text:p>0,00254166666666667000</text:p>
          </table:table-cell>
          <table:table-cell table:formula="of:=[.D2442]-[.D244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[.B2441]+9" office:value-type="float" office:value="21969" calcext:value-type="float">
            <text:p>21969</text:p>
          </table:table-cell>
          <table:table-cell office:value-type="float" office:value="8640000" calcext:value-type="float">
            <text:p>8640000</text:p>
          </table:table-cell>
          <table:table-cell table:formula="of:=[.B2442]/[.C2442]" office:value-type="float" office:value="0.00254270833333333" calcext:value-type="float">
            <text:p>0,00254270833333333000</text:p>
          </table:table-cell>
          <table:table-cell table:formula="of:=[.D2443]-[.D244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[.B2442]+9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2443]/[.C2443]" office:value-type="float" office:value="0.00254375" calcext:value-type="float">
            <text:p>0,00254375000000000000</text:p>
          </table:table-cell>
          <table:table-cell table:formula="of:=[.D2444]-[.D24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[.B2443]+9" office:value-type="float" office:value="21987" calcext:value-type="float">
            <text:p>21987</text:p>
          </table:table-cell>
          <table:table-cell office:value-type="float" office:value="8640000" calcext:value-type="float">
            <text:p>8640000</text:p>
          </table:table-cell>
          <table:table-cell table:formula="of:=[.B2444]/[.C2444]" office:value-type="float" office:value="0.00254479166666667" calcext:value-type="float">
            <text:p>0,00254479166666667000</text:p>
          </table:table-cell>
          <table:table-cell table:formula="of:=[.D2445]-[.D244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B2444]+9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2445]/[.C2445]" office:value-type="float" office:value="0.00254583333333333" calcext:value-type="float">
            <text:p>0,00254583333333333000</text:p>
          </table:table-cell>
          <table:table-cell table:formula="of:=[.D2446]-[.D244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[.B2445]+9" office:value-type="float" office:value="22005" calcext:value-type="float">
            <text:p>22005</text:p>
          </table:table-cell>
          <table:table-cell office:value-type="float" office:value="8640000" calcext:value-type="float">
            <text:p>8640000</text:p>
          </table:table-cell>
          <table:table-cell table:formula="of:=[.B2446]/[.C2446]" office:value-type="float" office:value="0.002546875" calcext:value-type="float">
            <text:p>0,00254687500000000000</text:p>
          </table:table-cell>
          <table:table-cell table:formula="of:=[.D2447]-[.D24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[.B2446]+9" office:value-type="float" office:value="22014" calcext:value-type="float">
            <text:p>22014</text:p>
          </table:table-cell>
          <table:table-cell office:value-type="float" office:value="8640000" calcext:value-type="float">
            <text:p>8640000</text:p>
          </table:table-cell>
          <table:table-cell table:formula="of:=[.B2447]/[.C2447]" office:value-type="float" office:value="0.00254791666666667" calcext:value-type="float">
            <text:p>0,00254791666666667000</text:p>
          </table:table-cell>
          <table:table-cell table:formula="of:=[.D2448]-[.D24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[.B2447]+9" office:value-type="float" office:value="22023" calcext:value-type="float">
            <text:p>22023</text:p>
          </table:table-cell>
          <table:table-cell office:value-type="float" office:value="8640000" calcext:value-type="float">
            <text:p>8640000</text:p>
          </table:table-cell>
          <table:table-cell table:formula="of:=[.B2448]/[.C2448]" office:value-type="float" office:value="0.00254895833333333" calcext:value-type="float">
            <text:p>0,00254895833333333000</text:p>
          </table:table-cell>
          <table:table-cell table:formula="of:=[.D2449]-[.D244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[.B2448]+9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2449]/[.C2449]" office:value-type="float" office:value="0.00255" calcext:value-type="float">
            <text:p>0,00255000000000000000</text:p>
          </table:table-cell>
          <table:table-cell table:formula="of:=[.D2450]-[.D244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[.B2449]+9" office:value-type="float" office:value="22041" calcext:value-type="float">
            <text:p>22041</text:p>
          </table:table-cell>
          <table:table-cell office:value-type="float" office:value="8640000" calcext:value-type="float">
            <text:p>8640000</text:p>
          </table:table-cell>
          <table:table-cell table:formula="of:=[.B2450]/[.C2450]" office:value-type="float" office:value="0.00255104166666667" calcext:value-type="float">
            <text:p>0,00255104166666667000</text:p>
          </table:table-cell>
          <table:table-cell table:formula="of:=[.D2451]-[.D245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.B2450]+9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2451]/[.C2451]" office:value-type="float" office:value="0.00255208333333333" calcext:value-type="float">
            <text:p>0,00255208333333333000</text:p>
          </table:table-cell>
          <table:table-cell table:formula="of:=[.D2452]-[.D24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[.B2451]+9" office:value-type="float" office:value="22059" calcext:value-type="float">
            <text:p>22059</text:p>
          </table:table-cell>
          <table:table-cell office:value-type="float" office:value="8640000" calcext:value-type="float">
            <text:p>8640000</text:p>
          </table:table-cell>
          <table:table-cell table:formula="of:=[.B2452]/[.C2452]" office:value-type="float" office:value="0.002553125" calcext:value-type="float">
            <text:p>0,00255312500000000000</text:p>
          </table:table-cell>
          <table:table-cell table:formula="of:=[.D2453]-[.D245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[.B2452]+9" office:value-type="float" office:value="22068" calcext:value-type="float">
            <text:p>22068</text:p>
          </table:table-cell>
          <table:table-cell office:value-type="float" office:value="8640000" calcext:value-type="float">
            <text:p>8640000</text:p>
          </table:table-cell>
          <table:table-cell table:formula="of:=[.B2453]/[.C2453]" office:value-type="float" office:value="0.00255416666666667" calcext:value-type="float">
            <text:p>0,00255416666666667000</text:p>
          </table:table-cell>
          <table:table-cell table:formula="of:=[.D2454]-[.D245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[.B2453]+9" office:value-type="float" office:value="22077" calcext:value-type="float">
            <text:p>22077</text:p>
          </table:table-cell>
          <table:table-cell office:value-type="float" office:value="8640000" calcext:value-type="float">
            <text:p>8640000</text:p>
          </table:table-cell>
          <table:table-cell table:formula="of:=[.B2454]/[.C2454]" office:value-type="float" office:value="0.00255520833333333" calcext:value-type="float">
            <text:p>0,00255520833333333000</text:p>
          </table:table-cell>
          <table:table-cell table:formula="of:=[.D2455]-[.D24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[.B2454]+9" office:value-type="float" office:value="22086" calcext:value-type="float">
            <text:p>22086</text:p>
          </table:table-cell>
          <table:table-cell office:value-type="float" office:value="8640000" calcext:value-type="float">
            <text:p>8640000</text:p>
          </table:table-cell>
          <table:table-cell table:formula="of:=[.B2455]/[.C2455]" office:value-type="float" office:value="0.00255625" calcext:value-type="float">
            <text:p>0,00255625000000000000</text:p>
          </table:table-cell>
          <table:table-cell table:formula="of:=[.D2456]-[.D245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[.B2455]+9" office:value-type="float" office:value="22095" calcext:value-type="float">
            <text:p>22095</text:p>
          </table:table-cell>
          <table:table-cell office:value-type="float" office:value="8640000" calcext:value-type="float">
            <text:p>8640000</text:p>
          </table:table-cell>
          <table:table-cell table:formula="of:=[.B2456]/[.C2456]" office:value-type="float" office:value="0.00255729166666667" calcext:value-type="float">
            <text:p>0,00255729166666667000</text:p>
          </table:table-cell>
          <table:table-cell table:formula="of:=[.D2457]-[.D245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[.B2456]+9" office:value-type="float" office:value="22104" calcext:value-type="float">
            <text:p>22104</text:p>
          </table:table-cell>
          <table:table-cell office:value-type="float" office:value="8640000" calcext:value-type="float">
            <text:p>8640000</text:p>
          </table:table-cell>
          <table:table-cell table:formula="of:=[.B2457]/[.C2457]" office:value-type="float" office:value="0.00255833333333333" calcext:value-type="float">
            <text:p>0,00255833333333333000</text:p>
          </table:table-cell>
          <table:table-cell table:formula="of:=[.D2458]-[.D245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[.B2457]+9" office:value-type="float" office:value="22113" calcext:value-type="float">
            <text:p>22113</text:p>
          </table:table-cell>
          <table:table-cell office:value-type="float" office:value="8640000" calcext:value-type="float">
            <text:p>8640000</text:p>
          </table:table-cell>
          <table:table-cell table:formula="of:=[.B2458]/[.C2458]" office:value-type="float" office:value="0.002559375" calcext:value-type="float">
            <text:p>0,00255937500000000000</text:p>
          </table:table-cell>
          <table:table-cell table:formula="of:=[.D2459]-[.D24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[.B2458]+9" office:value-type="float" office:value="22122" calcext:value-type="float">
            <text:p>22122</text:p>
          </table:table-cell>
          <table:table-cell office:value-type="float" office:value="8640000" calcext:value-type="float">
            <text:p>8640000</text:p>
          </table:table-cell>
          <table:table-cell table:formula="of:=[.B2459]/[.C2459]" office:value-type="float" office:value="0.00256041666666667" calcext:value-type="float">
            <text:p>0,00256041666666667000</text:p>
          </table:table-cell>
          <table:table-cell table:formula="of:=[.D2460]-[.D245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[.B2459]+9" office:value-type="float" office:value="22131" calcext:value-type="float">
            <text:p>22131</text:p>
          </table:table-cell>
          <table:table-cell office:value-type="float" office:value="8640000" calcext:value-type="float">
            <text:p>8640000</text:p>
          </table:table-cell>
          <table:table-cell table:formula="of:=[.B2460]/[.C2460]" office:value-type="float" office:value="0.00256145833333333" calcext:value-type="float">
            <text:p>0,00256145833333333000</text:p>
          </table:table-cell>
          <table:table-cell table:formula="of:=[.D2461]-[.D246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[.B2460]+9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2461]/[.C2461]" office:value-type="float" office:value="0.0025625" calcext:value-type="float">
            <text:p>0,00256250000000000000</text:p>
          </table:table-cell>
          <table:table-cell table:formula="of:=[.D2462]-[.D246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[.B2461]+9" office:value-type="float" office:value="22149" calcext:value-type="float">
            <text:p>22149</text:p>
          </table:table-cell>
          <table:table-cell office:value-type="float" office:value="8640000" calcext:value-type="float">
            <text:p>8640000</text:p>
          </table:table-cell>
          <table:table-cell table:formula="of:=[.B2462]/[.C2462]" office:value-type="float" office:value="0.00256354166666667" calcext:value-type="float">
            <text:p>0,00256354166666667000</text:p>
          </table:table-cell>
          <table:table-cell table:formula="of:=[.D2463]-[.D24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[.B2462]+9" office:value-type="float" office:value="22158" calcext:value-type="float">
            <text:p>22158</text:p>
          </table:table-cell>
          <table:table-cell office:value-type="float" office:value="8640000" calcext:value-type="float">
            <text:p>8640000</text:p>
          </table:table-cell>
          <table:table-cell table:formula="of:=[.B2463]/[.C2463]" office:value-type="float" office:value="0.00256458333333333" calcext:value-type="float">
            <text:p>0,00256458333333333000</text:p>
          </table:table-cell>
          <table:table-cell table:formula="of:=[.D2464]-[.D246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[.B2463]+9" office:value-type="float" office:value="22167" calcext:value-type="float">
            <text:p>22167</text:p>
          </table:table-cell>
          <table:table-cell office:value-type="float" office:value="8640000" calcext:value-type="float">
            <text:p>8640000</text:p>
          </table:table-cell>
          <table:table-cell table:formula="of:=[.B2464]/[.C2464]" office:value-type="float" office:value="0.002565625" calcext:value-type="float">
            <text:p>0,00256562500000000000</text:p>
          </table:table-cell>
          <table:table-cell table:formula="of:=[.D2465]-[.D246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[.B2464]+9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2465]/[.C2465]" office:value-type="float" office:value="0.00256666666666667" calcext:value-type="float">
            <text:p>0,00256666666666667000</text:p>
          </table:table-cell>
          <table:table-cell table:formula="of:=[.D2466]-[.D246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[.B2465]+9" office:value-type="float" office:value="22185" calcext:value-type="float">
            <text:p>22185</text:p>
          </table:table-cell>
          <table:table-cell office:value-type="float" office:value="8640000" calcext:value-type="float">
            <text:p>8640000</text:p>
          </table:table-cell>
          <table:table-cell table:formula="of:=[.B2466]/[.C2466]" office:value-type="float" office:value="0.00256770833333333" calcext:value-type="float">
            <text:p>0,00256770833333333000</text:p>
          </table:table-cell>
          <table:table-cell table:formula="of:=[.D2467]-[.D24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[.B2466]+9" office:value-type="float" office:value="22194" calcext:value-type="float">
            <text:p>22194</text:p>
          </table:table-cell>
          <table:table-cell office:value-type="float" office:value="8640000" calcext:value-type="float">
            <text:p>8640000</text:p>
          </table:table-cell>
          <table:table-cell table:formula="of:=[.B2467]/[.C2467]" office:value-type="float" office:value="0.00256875" calcext:value-type="float">
            <text:p>0,00256875000000000000</text:p>
          </table:table-cell>
          <table:table-cell table:formula="of:=[.D2468]-[.D246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[.B2467]+9" office:value-type="float" office:value="22203" calcext:value-type="float">
            <text:p>22203</text:p>
          </table:table-cell>
          <table:table-cell office:value-type="float" office:value="8640000" calcext:value-type="float">
            <text:p>8640000</text:p>
          </table:table-cell>
          <table:table-cell table:formula="of:=[.B2468]/[.C2468]" office:value-type="float" office:value="0.00256979166666667" calcext:value-type="float">
            <text:p>0,00256979166666667000</text:p>
          </table:table-cell>
          <table:table-cell table:formula="of:=[.D2469]-[.D246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[.B2468]+9" office:value-type="float" office:value="22212" calcext:value-type="float">
            <text:p>22212</text:p>
          </table:table-cell>
          <table:table-cell office:value-type="float" office:value="8640000" calcext:value-type="float">
            <text:p>8640000</text:p>
          </table:table-cell>
          <table:table-cell table:formula="of:=[.B2469]/[.C2469]" office:value-type="float" office:value="0.00257083333333333" calcext:value-type="float">
            <text:p>0,00257083333333333000</text:p>
          </table:table-cell>
          <table:table-cell table:formula="of:=[.D2470]-[.D246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[.B2469]+9" office:value-type="float" office:value="22221" calcext:value-type="float">
            <text:p>22221</text:p>
          </table:table-cell>
          <table:table-cell office:value-type="float" office:value="8640000" calcext:value-type="float">
            <text:p>8640000</text:p>
          </table:table-cell>
          <table:table-cell table:formula="of:=[.B2470]/[.C2470]" office:value-type="float" office:value="0.002571875" calcext:value-type="float">
            <text:p>0,00257187500000000000</text:p>
          </table:table-cell>
          <table:table-cell table:formula="of:=[.D2471]-[.D247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[.B2470]+9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2471]/[.C2471]" office:value-type="float" office:value="0.00257291666666667" calcext:value-type="float">
            <text:p>0,00257291666666667000</text:p>
          </table:table-cell>
          <table:table-cell table:formula="of:=[.D2472]-[.D247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[.B2471]+9" office:value-type="float" office:value="22239" calcext:value-type="float">
            <text:p>22239</text:p>
          </table:table-cell>
          <table:table-cell office:value-type="float" office:value="8640000" calcext:value-type="float">
            <text:p>8640000</text:p>
          </table:table-cell>
          <table:table-cell table:formula="of:=[.B2472]/[.C2472]" office:value-type="float" office:value="0.00257395833333333" calcext:value-type="float">
            <text:p>0,00257395833333333000</text:p>
          </table:table-cell>
          <table:table-cell table:formula="of:=[.D2473]-[.D247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[.B2472]+9" office:value-type="float" office:value="22248" calcext:value-type="float">
            <text:p>22248</text:p>
          </table:table-cell>
          <table:table-cell office:value-type="float" office:value="8640000" calcext:value-type="float">
            <text:p>8640000</text:p>
          </table:table-cell>
          <table:table-cell table:formula="of:=[.B2473]/[.C2473]" office:value-type="float" office:value="0.002575" calcext:value-type="float">
            <text:p>0,00257500000000000000</text:p>
          </table:table-cell>
          <table:table-cell table:formula="of:=[.D2474]-[.D247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[.B2473]+9" office:value-type="float" office:value="22257" calcext:value-type="float">
            <text:p>22257</text:p>
          </table:table-cell>
          <table:table-cell office:value-type="float" office:value="8640000" calcext:value-type="float">
            <text:p>8640000</text:p>
          </table:table-cell>
          <table:table-cell table:formula="of:=[.B2474]/[.C2474]" office:value-type="float" office:value="0.00257604166666667" calcext:value-type="float">
            <text:p>0,00257604166666667000</text:p>
          </table:table-cell>
          <table:table-cell table:formula="of:=[.D2475]-[.D247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[.B2474]+9" office:value-type="float" office:value="22266" calcext:value-type="float">
            <text:p>22266</text:p>
          </table:table-cell>
          <table:table-cell office:value-type="float" office:value="8640000" calcext:value-type="float">
            <text:p>8640000</text:p>
          </table:table-cell>
          <table:table-cell table:formula="of:=[.B2475]/[.C2475]" office:value-type="float" office:value="0.00257708333333333" calcext:value-type="float">
            <text:p>0,00257708333333333000</text:p>
          </table:table-cell>
          <table:table-cell table:formula="of:=[.D2476]-[.D247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[.B2475]+9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2476]/[.C2476]" office:value-type="float" office:value="0.002578125" calcext:value-type="float">
            <text:p>0,00257812500000000000</text:p>
          </table:table-cell>
          <table:table-cell table:formula="of:=[.D2477]-[.D247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[.B2476]+9" office:value-type="float" office:value="22284" calcext:value-type="float">
            <text:p>22284</text:p>
          </table:table-cell>
          <table:table-cell office:value-type="float" office:value="8640000" calcext:value-type="float">
            <text:p>8640000</text:p>
          </table:table-cell>
          <table:table-cell table:formula="of:=[.B2477]/[.C2477]" office:value-type="float" office:value="0.00257916666666667" calcext:value-type="float">
            <text:p>0,00257916666666667000</text:p>
          </table:table-cell>
          <table:table-cell table:formula="of:=[.D2478]-[.D247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[.B2477]+9" office:value-type="float" office:value="22293" calcext:value-type="float">
            <text:p>22293</text:p>
          </table:table-cell>
          <table:table-cell office:value-type="float" office:value="8640000" calcext:value-type="float">
            <text:p>8640000</text:p>
          </table:table-cell>
          <table:table-cell table:formula="of:=[.B2478]/[.C2478]" office:value-type="float" office:value="0.00258020833333333" calcext:value-type="float">
            <text:p>0,00258020833333333000</text:p>
          </table:table-cell>
          <table:table-cell table:formula="of:=[.D2479]-[.D247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[.B2478]+9" office:value-type="float" office:value="22302" calcext:value-type="float">
            <text:p>22302</text:p>
          </table:table-cell>
          <table:table-cell office:value-type="float" office:value="8640000" calcext:value-type="float">
            <text:p>8640000</text:p>
          </table:table-cell>
          <table:table-cell table:formula="of:=[.B2479]/[.C2479]" office:value-type="float" office:value="0.00258125" calcext:value-type="float">
            <text:p>0,00258125000000000000</text:p>
          </table:table-cell>
          <table:table-cell table:formula="of:=[.D2480]-[.D24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[.B2479]+9" office:value-type="float" office:value="22311" calcext:value-type="float">
            <text:p>22311</text:p>
          </table:table-cell>
          <table:table-cell office:value-type="float" office:value="8640000" calcext:value-type="float">
            <text:p>8640000</text:p>
          </table:table-cell>
          <table:table-cell table:formula="of:=[.B2480]/[.C2480]" office:value-type="float" office:value="0.00258229166666667" calcext:value-type="float">
            <text:p>0,00258229166666667000</text:p>
          </table:table-cell>
          <table:table-cell table:formula="of:=[.D2481]-[.D24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[.B2480]+9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2481]/[.C2481]" office:value-type="float" office:value="0.00258333333333333" calcext:value-type="float">
            <text:p>0,00258333333333333000</text:p>
          </table:table-cell>
          <table:table-cell table:formula="of:=[.D2482]-[.D248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[.B2481]+9" office:value-type="float" office:value="22329" calcext:value-type="float">
            <text:p>22329</text:p>
          </table:table-cell>
          <table:table-cell office:value-type="float" office:value="8640000" calcext:value-type="float">
            <text:p>8640000</text:p>
          </table:table-cell>
          <table:table-cell table:formula="of:=[.B2482]/[.C2482]" office:value-type="float" office:value="0.002584375" calcext:value-type="float">
            <text:p>0,00258437500000000000</text:p>
          </table:table-cell>
          <table:table-cell table:formula="of:=[.D2483]-[.D248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[.B2482]+9" office:value-type="float" office:value="22338" calcext:value-type="float">
            <text:p>22338</text:p>
          </table:table-cell>
          <table:table-cell office:value-type="float" office:value="8640000" calcext:value-type="float">
            <text:p>8640000</text:p>
          </table:table-cell>
          <table:table-cell table:formula="of:=[.B2483]/[.C2483]" office:value-type="float" office:value="0.00258541666666667" calcext:value-type="float">
            <text:p>0,00258541666666667000</text:p>
          </table:table-cell>
          <table:table-cell table:formula="of:=[.D2484]-[.D248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[.B2483]+9" office:value-type="float" office:value="22347" calcext:value-type="float">
            <text:p>22347</text:p>
          </table:table-cell>
          <table:table-cell office:value-type="float" office:value="8640000" calcext:value-type="float">
            <text:p>8640000</text:p>
          </table:table-cell>
          <table:table-cell table:formula="of:=[.B2484]/[.C2484]" office:value-type="float" office:value="0.00258645833333333" calcext:value-type="float">
            <text:p>0,00258645833333333000</text:p>
          </table:table-cell>
          <table:table-cell table:formula="of:=[.D2485]-[.D248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[.B2484]+9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2485]/[.C2485]" office:value-type="float" office:value="0.0025875" calcext:value-type="float">
            <text:p>0,00258750000000000000</text:p>
          </table:table-cell>
          <table:table-cell table:formula="of:=[.D2486]-[.D248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[.B2485]+9" office:value-type="float" office:value="22365" calcext:value-type="float">
            <text:p>22365</text:p>
          </table:table-cell>
          <table:table-cell office:value-type="float" office:value="8640000" calcext:value-type="float">
            <text:p>8640000</text:p>
          </table:table-cell>
          <table:table-cell table:formula="of:=[.B2486]/[.C2486]" office:value-type="float" office:value="0.00258854166666667" calcext:value-type="float">
            <text:p>0,00258854166666667000</text:p>
          </table:table-cell>
          <table:table-cell table:formula="of:=[.D2487]-[.D248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[.B2486]+9" office:value-type="float" office:value="22374" calcext:value-type="float">
            <text:p>22374</text:p>
          </table:table-cell>
          <table:table-cell office:value-type="float" office:value="8640000" calcext:value-type="float">
            <text:p>8640000</text:p>
          </table:table-cell>
          <table:table-cell table:formula="of:=[.B2487]/[.C2487]" office:value-type="float" office:value="0.00258958333333333" calcext:value-type="float">
            <text:p>0,00258958333333333000</text:p>
          </table:table-cell>
          <table:table-cell table:formula="of:=[.D2488]-[.D248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[.B2487]+9" office:value-type="float" office:value="22383" calcext:value-type="float">
            <text:p>22383</text:p>
          </table:table-cell>
          <table:table-cell office:value-type="float" office:value="8640000" calcext:value-type="float">
            <text:p>8640000</text:p>
          </table:table-cell>
          <table:table-cell table:formula="of:=[.B2488]/[.C2488]" office:value-type="float" office:value="0.002590625" calcext:value-type="float">
            <text:p>0,00259062500000000000</text:p>
          </table:table-cell>
          <table:table-cell table:formula="of:=[.D2489]-[.D248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[.B2488]+9" office:value-type="float" office:value="22392" calcext:value-type="float">
            <text:p>22392</text:p>
          </table:table-cell>
          <table:table-cell office:value-type="float" office:value="8640000" calcext:value-type="float">
            <text:p>8640000</text:p>
          </table:table-cell>
          <table:table-cell table:formula="of:=[.B2489]/[.C2489]" office:value-type="float" office:value="0.00259166666666667" calcext:value-type="float">
            <text:p>0,00259166666666667000</text:p>
          </table:table-cell>
          <table:table-cell table:formula="of:=[.D2490]-[.D248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[.B2489]+9" office:value-type="float" office:value="22401" calcext:value-type="float">
            <text:p>22401</text:p>
          </table:table-cell>
          <table:table-cell office:value-type="float" office:value="8640000" calcext:value-type="float">
            <text:p>8640000</text:p>
          </table:table-cell>
          <table:table-cell table:formula="of:=[.B2490]/[.C2490]" office:value-type="float" office:value="0.00259270833333333" calcext:value-type="float">
            <text:p>0,00259270833333333000</text:p>
          </table:table-cell>
          <table:table-cell table:formula="of:=[.D2491]-[.D249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[.B2490]+9" office:value-type="float" office:value="22410" calcext:value-type="float">
            <text:p>22410</text:p>
          </table:table-cell>
          <table:table-cell office:value-type="float" office:value="8640000" calcext:value-type="float">
            <text:p>8640000</text:p>
          </table:table-cell>
          <table:table-cell table:formula="of:=[.B2491]/[.C2491]" office:value-type="float" office:value="0.00259375" calcext:value-type="float">
            <text:p>0,00259375000000000000</text:p>
          </table:table-cell>
          <table:table-cell table:formula="of:=[.D2492]-[.D249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[.B2491]+9" office:value-type="float" office:value="22419" calcext:value-type="float">
            <text:p>22419</text:p>
          </table:table-cell>
          <table:table-cell office:value-type="float" office:value="8640000" calcext:value-type="float">
            <text:p>8640000</text:p>
          </table:table-cell>
          <table:table-cell table:formula="of:=[.B2492]/[.C2492]" office:value-type="float" office:value="0.00259479166666667" calcext:value-type="float">
            <text:p>0,00259479166666667000</text:p>
          </table:table-cell>
          <table:table-cell table:formula="of:=[.D2493]-[.D249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[.B2492]+9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2493]/[.C2493]" office:value-type="float" office:value="0.00259583333333333" calcext:value-type="float">
            <text:p>0,00259583333333333000</text:p>
          </table:table-cell>
          <table:table-cell table:formula="of:=[.D2494]-[.D249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[.B2493]+9" office:value-type="float" office:value="22437" calcext:value-type="float">
            <text:p>22437</text:p>
          </table:table-cell>
          <table:table-cell office:value-type="float" office:value="8640000" calcext:value-type="float">
            <text:p>8640000</text:p>
          </table:table-cell>
          <table:table-cell table:formula="of:=[.B2494]/[.C2494]" office:value-type="float" office:value="0.002596875" calcext:value-type="float">
            <text:p>0,00259687500000000000</text:p>
          </table:table-cell>
          <table:table-cell table:formula="of:=[.D2495]-[.D249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[.B2494]+9" office:value-type="float" office:value="22446" calcext:value-type="float">
            <text:p>22446</text:p>
          </table:table-cell>
          <table:table-cell office:value-type="float" office:value="8640000" calcext:value-type="float">
            <text:p>8640000</text:p>
          </table:table-cell>
          <table:table-cell table:formula="of:=[.B2495]/[.C2495]" office:value-type="float" office:value="0.00259791666666667" calcext:value-type="float">
            <text:p>0,00259791666666667000</text:p>
          </table:table-cell>
          <table:table-cell table:formula="of:=[.D2496]-[.D249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[.B2495]+9" office:value-type="float" office:value="22455" calcext:value-type="float">
            <text:p>22455</text:p>
          </table:table-cell>
          <table:table-cell office:value-type="float" office:value="8640000" calcext:value-type="float">
            <text:p>8640000</text:p>
          </table:table-cell>
          <table:table-cell table:formula="of:=[.B2496]/[.C2496]" office:value-type="float" office:value="0.00259895833333333" calcext:value-type="float">
            <text:p>0,00259895833333333000</text:p>
          </table:table-cell>
          <table:table-cell table:formula="of:=[.D2497]-[.D249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[.B2496]+9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2497]/[.C2497]" office:value-type="float" office:value="0.0026" calcext:value-type="float">
            <text:p>0,00260000000000000000</text:p>
          </table:table-cell>
          <table:table-cell table:formula="of:=[.D2498]-[.D249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[.B2497]+9" office:value-type="float" office:value="22473" calcext:value-type="float">
            <text:p>22473</text:p>
          </table:table-cell>
          <table:table-cell office:value-type="float" office:value="8640000" calcext:value-type="float">
            <text:p>8640000</text:p>
          </table:table-cell>
          <table:table-cell table:formula="of:=[.B2498]/[.C2498]" office:value-type="float" office:value="0.00260104166666667" calcext:value-type="float">
            <text:p>0,00260104166666667000</text:p>
          </table:table-cell>
          <table:table-cell table:formula="of:=[.D2499]-[.D249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B2498]+9" office:value-type="float" office:value="22482" calcext:value-type="float">
            <text:p>22482</text:p>
          </table:table-cell>
          <table:table-cell office:value-type="float" office:value="8640000" calcext:value-type="float">
            <text:p>8640000</text:p>
          </table:table-cell>
          <table:table-cell table:formula="of:=[.B2499]/[.C2499]" office:value-type="float" office:value="0.00260208333333333" calcext:value-type="float">
            <text:p>0,00260208333333333000</text:p>
          </table:table-cell>
          <table:table-cell table:formula="of:=[.D2500]-[.D249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[.B2499]+9" office:value-type="float" office:value="22491" calcext:value-type="float">
            <text:p>22491</text:p>
          </table:table-cell>
          <table:table-cell office:value-type="float" office:value="8640000" calcext:value-type="float">
            <text:p>8640000</text:p>
          </table:table-cell>
          <table:table-cell table:formula="of:=[.B2500]/[.C2500]" office:value-type="float" office:value="0.002603125" calcext:value-type="float">
            <text:p>0,00260312500000000000</text:p>
          </table:table-cell>
          <table:table-cell table:formula="of:=[.D2501]-[.D250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2500]+9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2501]/[.C2501]" office:value-type="float" office:value="0.00260416666666667" calcext:value-type="float">
            <text:p>0,00260416666666667000</text:p>
          </table:table-cell>
          <table:table-cell table:formula="of:=[.D2502]-[.D250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[.B2501]+9" office:value-type="float" office:value="22509" calcext:value-type="float">
            <text:p>22509</text:p>
          </table:table-cell>
          <table:table-cell office:value-type="float" office:value="8640000" calcext:value-type="float">
            <text:p>8640000</text:p>
          </table:table-cell>
          <table:table-cell table:formula="of:=[.B2502]/[.C2502]" office:value-type="float" office:value="0.00260520833333333" calcext:value-type="float">
            <text:p>0,00260520833333333000</text:p>
          </table:table-cell>
          <table:table-cell table:formula="of:=[.D2503]-[.D250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[.B2502]+9" office:value-type="float" office:value="22518" calcext:value-type="float">
            <text:p>22518</text:p>
          </table:table-cell>
          <table:table-cell office:value-type="float" office:value="8640000" calcext:value-type="float">
            <text:p>8640000</text:p>
          </table:table-cell>
          <table:table-cell table:formula="of:=[.B2503]/[.C2503]" office:value-type="float" office:value="0.00260625" calcext:value-type="float">
            <text:p>0,00260625000000000000</text:p>
          </table:table-cell>
          <table:table-cell table:formula="of:=[.D2504]-[.D250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[.B2503]+9" office:value-type="float" office:value="22527" calcext:value-type="float">
            <text:p>22527</text:p>
          </table:table-cell>
          <table:table-cell office:value-type="float" office:value="8640000" calcext:value-type="float">
            <text:p>8640000</text:p>
          </table:table-cell>
          <table:table-cell table:formula="of:=[.B2504]/[.C2504]" office:value-type="float" office:value="0.00260729166666667" calcext:value-type="float">
            <text:p>0,00260729166666667000</text:p>
          </table:table-cell>
          <table:table-cell table:formula="of:=[.D2505]-[.D250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[.B2504]+9" office:value-type="float" office:value="22536" calcext:value-type="float">
            <text:p>22536</text:p>
          </table:table-cell>
          <table:table-cell office:value-type="float" office:value="8640000" calcext:value-type="float">
            <text:p>8640000</text:p>
          </table:table-cell>
          <table:table-cell table:formula="of:=[.B2505]/[.C2505]" office:value-type="float" office:value="0.00260833333333333" calcext:value-type="float">
            <text:p>0,00260833333333333000</text:p>
          </table:table-cell>
          <table:table-cell table:formula="of:=[.D2506]-[.D250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[.B2505]+9" office:value-type="float" office:value="22545" calcext:value-type="float">
            <text:p>22545</text:p>
          </table:table-cell>
          <table:table-cell office:value-type="float" office:value="8640000" calcext:value-type="float">
            <text:p>8640000</text:p>
          </table:table-cell>
          <table:table-cell table:formula="of:=[.B2506]/[.C2506]" office:value-type="float" office:value="0.002609375" calcext:value-type="float">
            <text:p>0,00260937500000000000</text:p>
          </table:table-cell>
          <table:table-cell table:formula="of:=[.D2507]-[.D250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table:formula="of:=[.B2506]+9" office:value-type="float" office:value="22554" calcext:value-type="float">
            <text:p>22554</text:p>
          </table:table-cell>
          <table:table-cell office:value-type="float" office:value="8640000" calcext:value-type="float">
            <text:p>8640000</text:p>
          </table:table-cell>
          <table:table-cell table:formula="of:=[.B2507]/[.C2507]" office:value-type="float" office:value="0.00261041666666667" calcext:value-type="float">
            <text:p>0,00261041666666667000</text:p>
          </table:table-cell>
          <table:table-cell table:formula="of:=[.D2508]-[.D250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[.B2507]+9" office:value-type="float" office:value="22563" calcext:value-type="float">
            <text:p>22563</text:p>
          </table:table-cell>
          <table:table-cell office:value-type="float" office:value="8640000" calcext:value-type="float">
            <text:p>8640000</text:p>
          </table:table-cell>
          <table:table-cell table:formula="of:=[.B2508]/[.C2508]" office:value-type="float" office:value="0.00261145833333333" calcext:value-type="float">
            <text:p>0,00261145833333333000</text:p>
          </table:table-cell>
          <table:table-cell table:formula="of:=[.D2509]-[.D250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[.B2508]+9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2509]/[.C2509]" office:value-type="float" office:value="0.0026125" calcext:value-type="float">
            <text:p>0,00261250000000000000</text:p>
          </table:table-cell>
          <table:table-cell table:formula="of:=[.D2510]-[.D250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[.B2509]+9" office:value-type="float" office:value="22581" calcext:value-type="float">
            <text:p>22581</text:p>
          </table:table-cell>
          <table:table-cell office:value-type="float" office:value="8640000" calcext:value-type="float">
            <text:p>8640000</text:p>
          </table:table-cell>
          <table:table-cell table:formula="of:=[.B2510]/[.C2510]" office:value-type="float" office:value="0.00261354166666667" calcext:value-type="float">
            <text:p>0,00261354166666667000</text:p>
          </table:table-cell>
          <table:table-cell table:formula="of:=[.D2511]-[.D251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B2510]+9" office:value-type="float" office:value="22590" calcext:value-type="float">
            <text:p>22590</text:p>
          </table:table-cell>
          <table:table-cell office:value-type="float" office:value="8640000" calcext:value-type="float">
            <text:p>8640000</text:p>
          </table:table-cell>
          <table:table-cell table:formula="of:=[.B2511]/[.C2511]" office:value-type="float" office:value="0.00261458333333333" calcext:value-type="float">
            <text:p>0,00261458333333333000</text:p>
          </table:table-cell>
          <table:table-cell table:formula="of:=[.D2512]-[.D251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[.B2511]+9" office:value-type="float" office:value="22599" calcext:value-type="float">
            <text:p>22599</text:p>
          </table:table-cell>
          <table:table-cell office:value-type="float" office:value="8640000" calcext:value-type="float">
            <text:p>8640000</text:p>
          </table:table-cell>
          <table:table-cell table:formula="of:=[.B2512]/[.C2512]" office:value-type="float" office:value="0.002615625" calcext:value-type="float">
            <text:p>0,00261562500000000000</text:p>
          </table:table-cell>
          <table:table-cell table:formula="of:=[.D2513]-[.D251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[.B2512]+9" office:value-type="float" office:value="22608" calcext:value-type="float">
            <text:p>22608</text:p>
          </table:table-cell>
          <table:table-cell office:value-type="float" office:value="8640000" calcext:value-type="float">
            <text:p>8640000</text:p>
          </table:table-cell>
          <table:table-cell table:formula="of:=[.B2513]/[.C2513]" office:value-type="float" office:value="0.00261666666666667" calcext:value-type="float">
            <text:p>0,00261666666666667000</text:p>
          </table:table-cell>
          <table:table-cell table:formula="of:=[.D2514]-[.D25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table:formula="of:=[.B2513]+9" office:value-type="float" office:value="22617" calcext:value-type="float">
            <text:p>22617</text:p>
          </table:table-cell>
          <table:table-cell office:value-type="float" office:value="8640000" calcext:value-type="float">
            <text:p>8640000</text:p>
          </table:table-cell>
          <table:table-cell table:formula="of:=[.B2514]/[.C2514]" office:value-type="float" office:value="0.00261770833333333" calcext:value-type="float">
            <text:p>0,00261770833333333000</text:p>
          </table:table-cell>
          <table:table-cell table:formula="of:=[.D2515]-[.D25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[.B2514]+9" office:value-type="float" office:value="22626" calcext:value-type="float">
            <text:p>22626</text:p>
          </table:table-cell>
          <table:table-cell office:value-type="float" office:value="8640000" calcext:value-type="float">
            <text:p>8640000</text:p>
          </table:table-cell>
          <table:table-cell table:formula="of:=[.B2515]/[.C2515]" office:value-type="float" office:value="0.00261875" calcext:value-type="float">
            <text:p>0,00261875000000000000</text:p>
          </table:table-cell>
          <table:table-cell table:formula="of:=[.D2516]-[.D251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[.B2515]+9" office:value-type="float" office:value="22635" calcext:value-type="float">
            <text:p>22635</text:p>
          </table:table-cell>
          <table:table-cell office:value-type="float" office:value="8640000" calcext:value-type="float">
            <text:p>8640000</text:p>
          </table:table-cell>
          <table:table-cell table:formula="of:=[.B2516]/[.C2516]" office:value-type="float" office:value="0.00261979166666667" calcext:value-type="float">
            <text:p>0,00261979166666667000</text:p>
          </table:table-cell>
          <table:table-cell table:formula="of:=[.D2517]-[.D251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[.B2516]+9" office:value-type="float" office:value="22644" calcext:value-type="float">
            <text:p>22644</text:p>
          </table:table-cell>
          <table:table-cell office:value-type="float" office:value="8640000" calcext:value-type="float">
            <text:p>8640000</text:p>
          </table:table-cell>
          <table:table-cell table:formula="of:=[.B2517]/[.C2517]" office:value-type="float" office:value="0.00262083333333333" calcext:value-type="float">
            <text:p>0,00262083333333333000</text:p>
          </table:table-cell>
          <table:table-cell table:formula="of:=[.D2518]-[.D251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[.B2517]+9" office:value-type="float" office:value="22653" calcext:value-type="float">
            <text:p>22653</text:p>
          </table:table-cell>
          <table:table-cell office:value-type="float" office:value="8640000" calcext:value-type="float">
            <text:p>8640000</text:p>
          </table:table-cell>
          <table:table-cell table:formula="of:=[.B2518]/[.C2518]" office:value-type="float" office:value="0.002621875" calcext:value-type="float">
            <text:p>0,00262187500000000000</text:p>
          </table:table-cell>
          <table:table-cell table:formula="of:=[.D2519]-[.D251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[.B2518]+9" office:value-type="float" office:value="22662" calcext:value-type="float">
            <text:p>22662</text:p>
          </table:table-cell>
          <table:table-cell office:value-type="float" office:value="8640000" calcext:value-type="float">
            <text:p>8640000</text:p>
          </table:table-cell>
          <table:table-cell table:formula="of:=[.B2519]/[.C2519]" office:value-type="float" office:value="0.00262291666666667" calcext:value-type="float">
            <text:p>0,00262291666666667000</text:p>
          </table:table-cell>
          <table:table-cell table:formula="of:=[.D2520]-[.D251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[.B2519]+9" office:value-type="float" office:value="22671" calcext:value-type="float">
            <text:p>22671</text:p>
          </table:table-cell>
          <table:table-cell office:value-type="float" office:value="8640000" calcext:value-type="float">
            <text:p>8640000</text:p>
          </table:table-cell>
          <table:table-cell table:formula="of:=[.B2520]/[.C2520]" office:value-type="float" office:value="0.00262395833333333" calcext:value-type="float">
            <text:p>0,00262395833333333000</text:p>
          </table:table-cell>
          <table:table-cell table:formula="of:=[.D2521]-[.D252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[.B2520]+9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2521]/[.C2521]" office:value-type="float" office:value="0.002625" calcext:value-type="float">
            <text:p>0,00262500000000000000</text:p>
          </table:table-cell>
          <table:table-cell table:formula="of:=[.D2522]-[.D252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[.B2521]+9" office:value-type="float" office:value="22689" calcext:value-type="float">
            <text:p>22689</text:p>
          </table:table-cell>
          <table:table-cell office:value-type="float" office:value="8640000" calcext:value-type="float">
            <text:p>8640000</text:p>
          </table:table-cell>
          <table:table-cell table:formula="of:=[.B2522]/[.C2522]" office:value-type="float" office:value="0.00262604166666667" calcext:value-type="float">
            <text:p>0,00262604166666667000</text:p>
          </table:table-cell>
          <table:table-cell table:formula="of:=[.D2523]-[.D252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B2522]+9" office:value-type="float" office:value="22698" calcext:value-type="float">
            <text:p>22698</text:p>
          </table:table-cell>
          <table:table-cell office:value-type="float" office:value="8640000" calcext:value-type="float">
            <text:p>8640000</text:p>
          </table:table-cell>
          <table:table-cell table:formula="of:=[.B2523]/[.C2523]" office:value-type="float" office:value="0.00262708333333333" calcext:value-type="float">
            <text:p>0,00262708333333333000</text:p>
          </table:table-cell>
          <table:table-cell table:formula="of:=[.D2524]-[.D252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B2523]+9" office:value-type="float" office:value="22707" calcext:value-type="float">
            <text:p>22707</text:p>
          </table:table-cell>
          <table:table-cell office:value-type="float" office:value="8640000" calcext:value-type="float">
            <text:p>8640000</text:p>
          </table:table-cell>
          <table:table-cell table:formula="of:=[.B2524]/[.C2524]" office:value-type="float" office:value="0.002628125" calcext:value-type="float">
            <text:p>0,00262812500000000000</text:p>
          </table:table-cell>
          <table:table-cell table:formula="of:=[.D2525]-[.D252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[.B2524]+9" office:value-type="float" office:value="22716" calcext:value-type="float">
            <text:p>22716</text:p>
          </table:table-cell>
          <table:table-cell office:value-type="float" office:value="8640000" calcext:value-type="float">
            <text:p>8640000</text:p>
          </table:table-cell>
          <table:table-cell table:formula="of:=[.B2525]/[.C2525]" office:value-type="float" office:value="0.00262916666666667" calcext:value-type="float">
            <text:p>0,00262916666666667000</text:p>
          </table:table-cell>
          <table:table-cell table:formula="of:=[.D2526]-[.D252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[.B2525]+9" office:value-type="float" office:value="22725" calcext:value-type="float">
            <text:p>22725</text:p>
          </table:table-cell>
          <table:table-cell office:value-type="float" office:value="8640000" calcext:value-type="float">
            <text:p>8640000</text:p>
          </table:table-cell>
          <table:table-cell table:formula="of:=[.B2526]/[.C2526]" office:value-type="float" office:value="0.00263020833333333" calcext:value-type="float">
            <text:p>0,00263020833333333000</text:p>
          </table:table-cell>
          <table:table-cell table:formula="of:=[.D2527]-[.D252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[.B2526]+9" office:value-type="float" office:value="22734" calcext:value-type="float">
            <text:p>22734</text:p>
          </table:table-cell>
          <table:table-cell office:value-type="float" office:value="8640000" calcext:value-type="float">
            <text:p>8640000</text:p>
          </table:table-cell>
          <table:table-cell table:formula="of:=[.B2527]/[.C2527]" office:value-type="float" office:value="0.00263125" calcext:value-type="float">
            <text:p>0,00263125000000000000</text:p>
          </table:table-cell>
          <table:table-cell table:formula="of:=[.D2528]-[.D252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[.B2527]+9" office:value-type="float" office:value="22743" calcext:value-type="float">
            <text:p>22743</text:p>
          </table:table-cell>
          <table:table-cell office:value-type="float" office:value="8640000" calcext:value-type="float">
            <text:p>8640000</text:p>
          </table:table-cell>
          <table:table-cell table:formula="of:=[.B2528]/[.C2528]" office:value-type="float" office:value="0.00263229166666667" calcext:value-type="float">
            <text:p>0,00263229166666667000</text:p>
          </table:table-cell>
          <table:table-cell table:formula="of:=[.D2529]-[.D252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[.B2528]+9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2529]/[.C2529]" office:value-type="float" office:value="0.00263333333333333" calcext:value-type="float">
            <text:p>0,00263333333333333000</text:p>
          </table:table-cell>
          <table:table-cell table:formula="of:=[.D2530]-[.D252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[.B2529]+9" office:value-type="float" office:value="22761" calcext:value-type="float">
            <text:p>22761</text:p>
          </table:table-cell>
          <table:table-cell office:value-type="float" office:value="8640000" calcext:value-type="float">
            <text:p>8640000</text:p>
          </table:table-cell>
          <table:table-cell table:formula="of:=[.B2530]/[.C2530]" office:value-type="float" office:value="0.002634375" calcext:value-type="float">
            <text:p>0,00263437500000000000</text:p>
          </table:table-cell>
          <table:table-cell table:formula="of:=[.D2531]-[.D253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[.B2530]+9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2531]/[.C2531]" office:value-type="float" office:value="0.00263541666666667" calcext:value-type="float">
            <text:p>0,00263541666666667000</text:p>
          </table:table-cell>
          <table:table-cell table:formula="of:=[.D2532]-[.D253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[.B2531]+9" office:value-type="float" office:value="22779" calcext:value-type="float">
            <text:p>22779</text:p>
          </table:table-cell>
          <table:table-cell office:value-type="float" office:value="8640000" calcext:value-type="float">
            <text:p>8640000</text:p>
          </table:table-cell>
          <table:table-cell table:formula="of:=[.B2532]/[.C2532]" office:value-type="float" office:value="0.00263645833333333" calcext:value-type="float">
            <text:p>0,00263645833333333000</text:p>
          </table:table-cell>
          <table:table-cell table:formula="of:=[.D2533]-[.D253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[.B2532]+9" office:value-type="float" office:value="22788" calcext:value-type="float">
            <text:p>22788</text:p>
          </table:table-cell>
          <table:table-cell office:value-type="float" office:value="8640000" calcext:value-type="float">
            <text:p>8640000</text:p>
          </table:table-cell>
          <table:table-cell table:formula="of:=[.B2533]/[.C2533]" office:value-type="float" office:value="0.0026375" calcext:value-type="float">
            <text:p>0,00263750000000000000</text:p>
          </table:table-cell>
          <table:table-cell table:formula="of:=[.D2534]-[.D253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[.B2533]+9" office:value-type="float" office:value="22797" calcext:value-type="float">
            <text:p>22797</text:p>
          </table:table-cell>
          <table:table-cell office:value-type="float" office:value="8640000" calcext:value-type="float">
            <text:p>8640000</text:p>
          </table:table-cell>
          <table:table-cell table:formula="of:=[.B2534]/[.C2534]" office:value-type="float" office:value="0.00263854166666667" calcext:value-type="float">
            <text:p>0,00263854166666667000</text:p>
          </table:table-cell>
          <table:table-cell table:formula="of:=[.D2535]-[.D253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[.B2534]+9" office:value-type="float" office:value="22806" calcext:value-type="float">
            <text:p>22806</text:p>
          </table:table-cell>
          <table:table-cell office:value-type="float" office:value="8640000" calcext:value-type="float">
            <text:p>8640000</text:p>
          </table:table-cell>
          <table:table-cell table:formula="of:=[.B2535]/[.C2535]" office:value-type="float" office:value="0.00263958333333333" calcext:value-type="float">
            <text:p>0,00263958333333333000</text:p>
          </table:table-cell>
          <table:table-cell table:formula="of:=[.D2536]-[.D253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[.B2535]+9" office:value-type="float" office:value="22815" calcext:value-type="float">
            <text:p>22815</text:p>
          </table:table-cell>
          <table:table-cell office:value-type="float" office:value="8640000" calcext:value-type="float">
            <text:p>8640000</text:p>
          </table:table-cell>
          <table:table-cell table:formula="of:=[.B2536]/[.C2536]" office:value-type="float" office:value="0.002640625" calcext:value-type="float">
            <text:p>0,00264062500000000000</text:p>
          </table:table-cell>
          <table:table-cell table:formula="of:=[.D2537]-[.D253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[.B2536]+9" office:value-type="float" office:value="22824" calcext:value-type="float">
            <text:p>22824</text:p>
          </table:table-cell>
          <table:table-cell office:value-type="float" office:value="8640000" calcext:value-type="float">
            <text:p>8640000</text:p>
          </table:table-cell>
          <table:table-cell table:formula="of:=[.B2537]/[.C2537]" office:value-type="float" office:value="0.00264166666666667" calcext:value-type="float">
            <text:p>0,00264166666666667000</text:p>
          </table:table-cell>
          <table:table-cell table:formula="of:=[.D2538]-[.D253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[.B2537]+9" office:value-type="float" office:value="22833" calcext:value-type="float">
            <text:p>22833</text:p>
          </table:table-cell>
          <table:table-cell office:value-type="float" office:value="8640000" calcext:value-type="float">
            <text:p>8640000</text:p>
          </table:table-cell>
          <table:table-cell table:formula="of:=[.B2538]/[.C2538]" office:value-type="float" office:value="0.00264270833333333" calcext:value-type="float">
            <text:p>0,00264270833333333000</text:p>
          </table:table-cell>
          <table:table-cell table:formula="of:=[.D2539]-[.D253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[.B2538]+9" office:value-type="float" office:value="22842" calcext:value-type="float">
            <text:p>22842</text:p>
          </table:table-cell>
          <table:table-cell office:value-type="float" office:value="8640000" calcext:value-type="float">
            <text:p>8640000</text:p>
          </table:table-cell>
          <table:table-cell table:formula="of:=[.B2539]/[.C2539]" office:value-type="float" office:value="0.00264375" calcext:value-type="float">
            <text:p>0,00264375000000000000</text:p>
          </table:table-cell>
          <table:table-cell table:formula="of:=[.D2540]-[.D253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[.B2539]+9" office:value-type="float" office:value="22851" calcext:value-type="float">
            <text:p>22851</text:p>
          </table:table-cell>
          <table:table-cell office:value-type="float" office:value="8640000" calcext:value-type="float">
            <text:p>8640000</text:p>
          </table:table-cell>
          <table:table-cell table:formula="of:=[.B2540]/[.C2540]" office:value-type="float" office:value="0.00264479166666667" calcext:value-type="float">
            <text:p>0,00264479166666667000</text:p>
          </table:table-cell>
          <table:table-cell table:formula="of:=[.D2541]-[.D25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[.B2540]+9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2541]/[.C2541]" office:value-type="float" office:value="0.00264583333333333" calcext:value-type="float">
            <text:p>0,00264583333333333000</text:p>
          </table:table-cell>
          <table:table-cell table:formula="of:=[.D2542]-[.D254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[.B2541]+9" office:value-type="float" office:value="22869" calcext:value-type="float">
            <text:p>22869</text:p>
          </table:table-cell>
          <table:table-cell office:value-type="float" office:value="8640000" calcext:value-type="float">
            <text:p>8640000</text:p>
          </table:table-cell>
          <table:table-cell table:formula="of:=[.B2542]/[.C2542]" office:value-type="float" office:value="0.002646875" calcext:value-type="float">
            <text:p>0,00264687500000000000</text:p>
          </table:table-cell>
          <table:table-cell table:formula="of:=[.D2543]-[.D254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[.B2542]+9" office:value-type="float" office:value="22878" calcext:value-type="float">
            <text:p>22878</text:p>
          </table:table-cell>
          <table:table-cell office:value-type="float" office:value="8640000" calcext:value-type="float">
            <text:p>8640000</text:p>
          </table:table-cell>
          <table:table-cell table:formula="of:=[.B2543]/[.C2543]" office:value-type="float" office:value="0.00264791666666667" calcext:value-type="float">
            <text:p>0,00264791666666667000</text:p>
          </table:table-cell>
          <table:table-cell table:formula="of:=[.D2544]-[.D254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[.B2543]+9" office:value-type="float" office:value="22887" calcext:value-type="float">
            <text:p>22887</text:p>
          </table:table-cell>
          <table:table-cell office:value-type="float" office:value="8640000" calcext:value-type="float">
            <text:p>8640000</text:p>
          </table:table-cell>
          <table:table-cell table:formula="of:=[.B2544]/[.C2544]" office:value-type="float" office:value="0.00264895833333333" calcext:value-type="float">
            <text:p>0,00264895833333333000</text:p>
          </table:table-cell>
          <table:table-cell table:formula="of:=[.D2545]-[.D254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[.B2544]+9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2545]/[.C2545]" office:value-type="float" office:value="0.00265" calcext:value-type="float">
            <text:p>0,00265000000000000000</text:p>
          </table:table-cell>
          <table:table-cell table:formula="of:=[.D2546]-[.D254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[.B2545]+9" office:value-type="float" office:value="22905" calcext:value-type="float">
            <text:p>22905</text:p>
          </table:table-cell>
          <table:table-cell office:value-type="float" office:value="8640000" calcext:value-type="float">
            <text:p>8640000</text:p>
          </table:table-cell>
          <table:table-cell table:formula="of:=[.B2546]/[.C2546]" office:value-type="float" office:value="0.00265104166666667" calcext:value-type="float">
            <text:p>0,00265104166666667000</text:p>
          </table:table-cell>
          <table:table-cell table:formula="of:=[.D2547]-[.D254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[.B2546]+9" office:value-type="float" office:value="22914" calcext:value-type="float">
            <text:p>22914</text:p>
          </table:table-cell>
          <table:table-cell office:value-type="float" office:value="8640000" calcext:value-type="float">
            <text:p>8640000</text:p>
          </table:table-cell>
          <table:table-cell table:formula="of:=[.B2547]/[.C2547]" office:value-type="float" office:value="0.00265208333333333" calcext:value-type="float">
            <text:p>0,00265208333333333000</text:p>
          </table:table-cell>
          <table:table-cell table:formula="of:=[.D2548]-[.D25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[.B2547]+9" office:value-type="float" office:value="22923" calcext:value-type="float">
            <text:p>22923</text:p>
          </table:table-cell>
          <table:table-cell office:value-type="float" office:value="8640000" calcext:value-type="float">
            <text:p>8640000</text:p>
          </table:table-cell>
          <table:table-cell table:formula="of:=[.B2548]/[.C2548]" office:value-type="float" office:value="0.002653125" calcext:value-type="float">
            <text:p>0,00265312500000000000</text:p>
          </table:table-cell>
          <table:table-cell table:formula="of:=[.D2549]-[.D254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[.B2548]+9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2549]/[.C2549]" office:value-type="float" office:value="0.00265416666666667" calcext:value-type="float">
            <text:p>0,00265416666666667000</text:p>
          </table:table-cell>
          <table:table-cell table:formula="of:=[.D2550]-[.D254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[.B2549]+9" office:value-type="float" office:value="22941" calcext:value-type="float">
            <text:p>22941</text:p>
          </table:table-cell>
          <table:table-cell office:value-type="float" office:value="8640000" calcext:value-type="float">
            <text:p>8640000</text:p>
          </table:table-cell>
          <table:table-cell table:formula="of:=[.B2550]/[.C2550]" office:value-type="float" office:value="0.00265520833333333" calcext:value-type="float">
            <text:p>0,00265520833333333000</text:p>
          </table:table-cell>
          <table:table-cell table:formula="of:=[.D2551]-[.D255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[.B2550]+9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2551]/[.C2551]" office:value-type="float" office:value="0.00265625" calcext:value-type="float">
            <text:p>0,00265625000000000000</text:p>
          </table:table-cell>
          <table:table-cell table:formula="of:=[.D2552]-[.D25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[.B2551]+9" office:value-type="float" office:value="22959" calcext:value-type="float">
            <text:p>22959</text:p>
          </table:table-cell>
          <table:table-cell office:value-type="float" office:value="8640000" calcext:value-type="float">
            <text:p>8640000</text:p>
          </table:table-cell>
          <table:table-cell table:formula="of:=[.B2552]/[.C2552]" office:value-type="float" office:value="0.00265729166666667" calcext:value-type="float">
            <text:p>0,00265729166666667000</text:p>
          </table:table-cell>
          <table:table-cell table:formula="of:=[.D2553]-[.D255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table:formula="of:=[.B2552]+9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2553]/[.C2553]" office:value-type="float" office:value="0.00265833333333333" calcext:value-type="float">
            <text:p>0,00265833333333333000</text:p>
          </table:table-cell>
          <table:table-cell table:formula="of:=[.D2554]-[.D255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[.B2553]+9" office:value-type="float" office:value="22977" calcext:value-type="float">
            <text:p>22977</text:p>
          </table:table-cell>
          <table:table-cell office:value-type="float" office:value="8640000" calcext:value-type="float">
            <text:p>8640000</text:p>
          </table:table-cell>
          <table:table-cell table:formula="of:=[.B2554]/[.C2554]" office:value-type="float" office:value="0.002659375" calcext:value-type="float">
            <text:p>0,00265937500000000000</text:p>
          </table:table-cell>
          <table:table-cell table:formula="of:=[.D2555]-[.D255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[.B2554]+9" office:value-type="float" office:value="22986" calcext:value-type="float">
            <text:p>22986</text:p>
          </table:table-cell>
          <table:table-cell office:value-type="float" office:value="8640000" calcext:value-type="float">
            <text:p>8640000</text:p>
          </table:table-cell>
          <table:table-cell table:formula="of:=[.B2555]/[.C2555]" office:value-type="float" office:value="0.00266041666666667" calcext:value-type="float">
            <text:p>0,00266041666666667000</text:p>
          </table:table-cell>
          <table:table-cell table:formula="of:=[.D2556]-[.D255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[.B2555]+9" office:value-type="float" office:value="22995" calcext:value-type="float">
            <text:p>22995</text:p>
          </table:table-cell>
          <table:table-cell office:value-type="float" office:value="8640000" calcext:value-type="float">
            <text:p>8640000</text:p>
          </table:table-cell>
          <table:table-cell table:formula="of:=[.B2556]/[.C2556]" office:value-type="float" office:value="0.00266145833333333" calcext:value-type="float">
            <text:p>0,00266145833333333000</text:p>
          </table:table-cell>
          <table:table-cell table:formula="of:=[.D2557]-[.D255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[.B2556]+9" office:value-type="float" office:value="23004" calcext:value-type="float">
            <text:p>23004</text:p>
          </table:table-cell>
          <table:table-cell office:value-type="float" office:value="8640000" calcext:value-type="float">
            <text:p>8640000</text:p>
          </table:table-cell>
          <table:table-cell table:formula="of:=[.B2557]/[.C2557]" office:value-type="float" office:value="0.0026625" calcext:value-type="float">
            <text:p>0,00266250000000000000</text:p>
          </table:table-cell>
          <table:table-cell table:formula="of:=[.D2558]-[.D255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[.B2557]+9" office:value-type="float" office:value="23013" calcext:value-type="float">
            <text:p>23013</text:p>
          </table:table-cell>
          <table:table-cell office:value-type="float" office:value="8640000" calcext:value-type="float">
            <text:p>8640000</text:p>
          </table:table-cell>
          <table:table-cell table:formula="of:=[.B2558]/[.C2558]" office:value-type="float" office:value="0.00266354166666667" calcext:value-type="float">
            <text:p>0,00266354166666667000</text:p>
          </table:table-cell>
          <table:table-cell table:formula="of:=[.D2559]-[.D255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[.B2558]+9" office:value-type="float" office:value="23022" calcext:value-type="float">
            <text:p>23022</text:p>
          </table:table-cell>
          <table:table-cell office:value-type="float" office:value="8640000" calcext:value-type="float">
            <text:p>8640000</text:p>
          </table:table-cell>
          <table:table-cell table:formula="of:=[.B2559]/[.C2559]" office:value-type="float" office:value="0.00266458333333333" calcext:value-type="float">
            <text:p>0,00266458333333333000</text:p>
          </table:table-cell>
          <table:table-cell table:formula="of:=[.D2560]-[.D255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[.B2559]+9" office:value-type="float" office:value="23031" calcext:value-type="float">
            <text:p>23031</text:p>
          </table:table-cell>
          <table:table-cell office:value-type="float" office:value="8640000" calcext:value-type="float">
            <text:p>8640000</text:p>
          </table:table-cell>
          <table:table-cell table:formula="of:=[.B2560]/[.C2560]" office:value-type="float" office:value="0.002665625" calcext:value-type="float">
            <text:p>0,00266562500000000000</text:p>
          </table:table-cell>
          <table:table-cell table:formula="of:=[.D2561]-[.D256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B2560]+9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2561]/[.C2561]" office:value-type="float" office:value="0.00266666666666667" calcext:value-type="float">
            <text:p>0,00266666666666667000</text:p>
          </table:table-cell>
          <table:table-cell table:formula="of:=[.D2562]-[.D256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[.B2561]+9" office:value-type="float" office:value="23049" calcext:value-type="float">
            <text:p>23049</text:p>
          </table:table-cell>
          <table:table-cell office:value-type="float" office:value="8640000" calcext:value-type="float">
            <text:p>8640000</text:p>
          </table:table-cell>
          <table:table-cell table:formula="of:=[.B2562]/[.C2562]" office:value-type="float" office:value="0.00266770833333333" calcext:value-type="float">
            <text:p>0,00266770833333333000</text:p>
          </table:table-cell>
          <table:table-cell table:formula="of:=[.D2563]-[.D256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[.B2562]+9" office:value-type="float" office:value="23058" calcext:value-type="float">
            <text:p>23058</text:p>
          </table:table-cell>
          <table:table-cell office:value-type="float" office:value="8640000" calcext:value-type="float">
            <text:p>8640000</text:p>
          </table:table-cell>
          <table:table-cell table:formula="of:=[.B2563]/[.C2563]" office:value-type="float" office:value="0.00266875" calcext:value-type="float">
            <text:p>0,00266875000000000000</text:p>
          </table:table-cell>
          <table:table-cell table:formula="of:=[.D2564]-[.D256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[.B2563]+9" office:value-type="float" office:value="23067" calcext:value-type="float">
            <text:p>23067</text:p>
          </table:table-cell>
          <table:table-cell office:value-type="float" office:value="8640000" calcext:value-type="float">
            <text:p>8640000</text:p>
          </table:table-cell>
          <table:table-cell table:formula="of:=[.B2564]/[.C2564]" office:value-type="float" office:value="0.00266979166666667" calcext:value-type="float">
            <text:p>0,00266979166666667000</text:p>
          </table:table-cell>
          <table:table-cell table:formula="of:=[.D2565]-[.D256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[.B2564]+9" office:value-type="float" office:value="23076" calcext:value-type="float">
            <text:p>23076</text:p>
          </table:table-cell>
          <table:table-cell office:value-type="float" office:value="8640000" calcext:value-type="float">
            <text:p>8640000</text:p>
          </table:table-cell>
          <table:table-cell table:formula="of:=[.B2565]/[.C2565]" office:value-type="float" office:value="0.00267083333333333" calcext:value-type="float">
            <text:p>0,00267083333333333000</text:p>
          </table:table-cell>
          <table:table-cell table:formula="of:=[.D2566]-[.D256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[.B2565]+9" office:value-type="float" office:value="23085" calcext:value-type="float">
            <text:p>23085</text:p>
          </table:table-cell>
          <table:table-cell office:value-type="float" office:value="8640000" calcext:value-type="float">
            <text:p>8640000</text:p>
          </table:table-cell>
          <table:table-cell table:formula="of:=[.B2566]/[.C2566]" office:value-type="float" office:value="0.002671875" calcext:value-type="float">
            <text:p>0,00267187500000000000</text:p>
          </table:table-cell>
          <table:table-cell table:formula="of:=[.D2567]-[.D25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[.B2566]+9" office:value-type="float" office:value="23094" calcext:value-type="float">
            <text:p>23094</text:p>
          </table:table-cell>
          <table:table-cell office:value-type="float" office:value="8640000" calcext:value-type="float">
            <text:p>8640000</text:p>
          </table:table-cell>
          <table:table-cell table:formula="of:=[.B2567]/[.C2567]" office:value-type="float" office:value="0.00267291666666667" calcext:value-type="float">
            <text:p>0,00267291666666667000</text:p>
          </table:table-cell>
          <table:table-cell table:formula="of:=[.D2568]-[.D256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[.B2567]+9" office:value-type="float" office:value="23103" calcext:value-type="float">
            <text:p>23103</text:p>
          </table:table-cell>
          <table:table-cell office:value-type="float" office:value="8640000" calcext:value-type="float">
            <text:p>8640000</text:p>
          </table:table-cell>
          <table:table-cell table:formula="of:=[.B2568]/[.C2568]" office:value-type="float" office:value="0.00267395833333333" calcext:value-type="float">
            <text:p>0,00267395833333333000</text:p>
          </table:table-cell>
          <table:table-cell table:formula="of:=[.D2569]-[.D256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[.B2568]+9" office:value-type="float" office:value="23112" calcext:value-type="float">
            <text:p>23112</text:p>
          </table:table-cell>
          <table:table-cell office:value-type="float" office:value="8640000" calcext:value-type="float">
            <text:p>8640000</text:p>
          </table:table-cell>
          <table:table-cell table:formula="of:=[.B2569]/[.C2569]" office:value-type="float" office:value="0.002675" calcext:value-type="float">
            <text:p>0,00267500000000000000</text:p>
          </table:table-cell>
          <table:table-cell table:formula="of:=[.D2570]-[.D256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[.B2569]+9" office:value-type="float" office:value="23121" calcext:value-type="float">
            <text:p>23121</text:p>
          </table:table-cell>
          <table:table-cell office:value-type="float" office:value="8640000" calcext:value-type="float">
            <text:p>8640000</text:p>
          </table:table-cell>
          <table:table-cell table:formula="of:=[.B2570]/[.C2570]" office:value-type="float" office:value="0.00267604166666667" calcext:value-type="float">
            <text:p>0,00267604166666667000</text:p>
          </table:table-cell>
          <table:table-cell table:formula="of:=[.D2571]-[.D257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B2570]+9" office:value-type="float" office:value="23130" calcext:value-type="float">
            <text:p>23130</text:p>
          </table:table-cell>
          <table:table-cell office:value-type="float" office:value="8640000" calcext:value-type="float">
            <text:p>8640000</text:p>
          </table:table-cell>
          <table:table-cell table:formula="of:=[.B2571]/[.C2571]" office:value-type="float" office:value="0.00267708333333333" calcext:value-type="float">
            <text:p>0,00267708333333333000</text:p>
          </table:table-cell>
          <table:table-cell table:formula="of:=[.D2572]-[.D257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[.B2571]+9" office:value-type="float" office:value="23139" calcext:value-type="float">
            <text:p>23139</text:p>
          </table:table-cell>
          <table:table-cell office:value-type="float" office:value="8640000" calcext:value-type="float">
            <text:p>8640000</text:p>
          </table:table-cell>
          <table:table-cell table:formula="of:=[.B2572]/[.C2572]" office:value-type="float" office:value="0.002678125" calcext:value-type="float">
            <text:p>0,00267812500000000000</text:p>
          </table:table-cell>
          <table:table-cell table:formula="of:=[.D2573]-[.D257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[.B2572]+9" office:value-type="float" office:value="23148" calcext:value-type="float">
            <text:p>23148</text:p>
          </table:table-cell>
          <table:table-cell office:value-type="float" office:value="8640000" calcext:value-type="float">
            <text:p>8640000</text:p>
          </table:table-cell>
          <table:table-cell table:formula="of:=[.B2573]/[.C2573]" office:value-type="float" office:value="0.00267916666666667" calcext:value-type="float">
            <text:p>0,00267916666666667000</text:p>
          </table:table-cell>
          <table:table-cell table:formula="of:=[.D2574]-[.D257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[.B2573]+9" office:value-type="float" office:value="23157" calcext:value-type="float">
            <text:p>23157</text:p>
          </table:table-cell>
          <table:table-cell office:value-type="float" office:value="8640000" calcext:value-type="float">
            <text:p>8640000</text:p>
          </table:table-cell>
          <table:table-cell table:formula="of:=[.B2574]/[.C2574]" office:value-type="float" office:value="0.00268020833333333" calcext:value-type="float">
            <text:p>0,00268020833333333000</text:p>
          </table:table-cell>
          <table:table-cell table:formula="of:=[.D2575]-[.D257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[.B2574]+9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2575]/[.C2575]" office:value-type="float" office:value="0.00268125" calcext:value-type="float">
            <text:p>0,00268125000000000000</text:p>
          </table:table-cell>
          <table:table-cell table:formula="of:=[.D2576]-[.D257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B2575]+9" office:value-type="float" office:value="23175" calcext:value-type="float">
            <text:p>23175</text:p>
          </table:table-cell>
          <table:table-cell office:value-type="float" office:value="8640000" calcext:value-type="float">
            <text:p>8640000</text:p>
          </table:table-cell>
          <table:table-cell table:formula="of:=[.B2576]/[.C2576]" office:value-type="float" office:value="0.00268229166666667" calcext:value-type="float">
            <text:p>0,00268229166666667000</text:p>
          </table:table-cell>
          <table:table-cell table:formula="of:=[.D2577]-[.D257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[.B2576]+9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2577]/[.C2577]" office:value-type="float" office:value="0.00268333333333333" calcext:value-type="float">
            <text:p>0,00268333333333333000</text:p>
          </table:table-cell>
          <table:table-cell table:formula="of:=[.D2578]-[.D257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[.B2577]+9" office:value-type="float" office:value="23193" calcext:value-type="float">
            <text:p>23193</text:p>
          </table:table-cell>
          <table:table-cell office:value-type="float" office:value="8640000" calcext:value-type="float">
            <text:p>8640000</text:p>
          </table:table-cell>
          <table:table-cell table:formula="of:=[.B2578]/[.C2578]" office:value-type="float" office:value="0.002684375" calcext:value-type="float">
            <text:p>0,00268437500000000000</text:p>
          </table:table-cell>
          <table:table-cell table:formula="of:=[.D2579]-[.D257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[.B2578]+9" office:value-type="float" office:value="23202" calcext:value-type="float">
            <text:p>23202</text:p>
          </table:table-cell>
          <table:table-cell office:value-type="float" office:value="8640000" calcext:value-type="float">
            <text:p>8640000</text:p>
          </table:table-cell>
          <table:table-cell table:formula="of:=[.B2579]/[.C2579]" office:value-type="float" office:value="0.00268541666666667" calcext:value-type="float">
            <text:p>0,00268541666666667000</text:p>
          </table:table-cell>
          <table:table-cell table:formula="of:=[.D2580]-[.D257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[.B2579]+9" office:value-type="float" office:value="23211" calcext:value-type="float">
            <text:p>23211</text:p>
          </table:table-cell>
          <table:table-cell office:value-type="float" office:value="8640000" calcext:value-type="float">
            <text:p>8640000</text:p>
          </table:table-cell>
          <table:table-cell table:formula="of:=[.B2580]/[.C2580]" office:value-type="float" office:value="0.00268645833333333" calcext:value-type="float">
            <text:p>0,00268645833333333000</text:p>
          </table:table-cell>
          <table:table-cell table:formula="of:=[.D2581]-[.D258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[.B2580]+9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2581]/[.C2581]" office:value-type="float" office:value="0.0026875" calcext:value-type="float">
            <text:p>0,00268750000000000000</text:p>
          </table:table-cell>
          <table:table-cell table:formula="of:=[.D2582]-[.D258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[.B2581]+9" office:value-type="float" office:value="23229" calcext:value-type="float">
            <text:p>23229</text:p>
          </table:table-cell>
          <table:table-cell office:value-type="float" office:value="8640000" calcext:value-type="float">
            <text:p>8640000</text:p>
          </table:table-cell>
          <table:table-cell table:formula="of:=[.B2582]/[.C2582]" office:value-type="float" office:value="0.00268854166666667" calcext:value-type="float">
            <text:p>0,00268854166666667000</text:p>
          </table:table-cell>
          <table:table-cell table:formula="of:=[.D2583]-[.D258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[.B2582]+9" office:value-type="float" office:value="23238" calcext:value-type="float">
            <text:p>23238</text:p>
          </table:table-cell>
          <table:table-cell office:value-type="float" office:value="8640000" calcext:value-type="float">
            <text:p>8640000</text:p>
          </table:table-cell>
          <table:table-cell table:formula="of:=[.B2583]/[.C2583]" office:value-type="float" office:value="0.00268958333333333" calcext:value-type="float">
            <text:p>0,00268958333333333000</text:p>
          </table:table-cell>
          <table:table-cell table:formula="of:=[.D2584]-[.D258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B2583]+9" office:value-type="float" office:value="23247" calcext:value-type="float">
            <text:p>23247</text:p>
          </table:table-cell>
          <table:table-cell office:value-type="float" office:value="8640000" calcext:value-type="float">
            <text:p>8640000</text:p>
          </table:table-cell>
          <table:table-cell table:formula="of:=[.B2584]/[.C2584]" office:value-type="float" office:value="0.002690625" calcext:value-type="float">
            <text:p>0,00269062500000000000</text:p>
          </table:table-cell>
          <table:table-cell table:formula="of:=[.D2585]-[.D258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[.B2584]+9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2585]/[.C2585]" office:value-type="float" office:value="0.00269166666666667" calcext:value-type="float">
            <text:p>0,00269166666666667000</text:p>
          </table:table-cell>
          <table:table-cell table:formula="of:=[.D2586]-[.D258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B2585]+9" office:value-type="float" office:value="23265" calcext:value-type="float">
            <text:p>23265</text:p>
          </table:table-cell>
          <table:table-cell office:value-type="float" office:value="8640000" calcext:value-type="float">
            <text:p>8640000</text:p>
          </table:table-cell>
          <table:table-cell table:formula="of:=[.B2586]/[.C2586]" office:value-type="float" office:value="0.00269270833333333" calcext:value-type="float">
            <text:p>0,00269270833333333000</text:p>
          </table:table-cell>
          <table:table-cell table:formula="of:=[.D2587]-[.D258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[.B2586]+9" office:value-type="float" office:value="23274" calcext:value-type="float">
            <text:p>23274</text:p>
          </table:table-cell>
          <table:table-cell office:value-type="float" office:value="8640000" calcext:value-type="float">
            <text:p>8640000</text:p>
          </table:table-cell>
          <table:table-cell table:formula="of:=[.B2587]/[.C2587]" office:value-type="float" office:value="0.00269375" calcext:value-type="float">
            <text:p>0,00269375000000000000</text:p>
          </table:table-cell>
          <table:table-cell table:formula="of:=[.D2588]-[.D258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[.B2587]+9" office:value-type="float" office:value="23283" calcext:value-type="float">
            <text:p>23283</text:p>
          </table:table-cell>
          <table:table-cell office:value-type="float" office:value="8640000" calcext:value-type="float">
            <text:p>8640000</text:p>
          </table:table-cell>
          <table:table-cell table:formula="of:=[.B2588]/[.C2588]" office:value-type="float" office:value="0.00269479166666667" calcext:value-type="float">
            <text:p>0,00269479166666667000</text:p>
          </table:table-cell>
          <table:table-cell table:formula="of:=[.D2589]-[.D258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[.B2588]+9" office:value-type="float" office:value="23292" calcext:value-type="float">
            <text:p>23292</text:p>
          </table:table-cell>
          <table:table-cell office:value-type="float" office:value="8640000" calcext:value-type="float">
            <text:p>8640000</text:p>
          </table:table-cell>
          <table:table-cell table:formula="of:=[.B2589]/[.C2589]" office:value-type="float" office:value="0.00269583333333333" calcext:value-type="float">
            <text:p>0,00269583333333333000</text:p>
          </table:table-cell>
          <table:table-cell table:formula="of:=[.D2590]-[.D258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B2589]+9" office:value-type="float" office:value="23301" calcext:value-type="float">
            <text:p>23301</text:p>
          </table:table-cell>
          <table:table-cell office:value-type="float" office:value="8640000" calcext:value-type="float">
            <text:p>8640000</text:p>
          </table:table-cell>
          <table:table-cell table:formula="of:=[.B2590]/[.C2590]" office:value-type="float" office:value="0.002696875" calcext:value-type="float">
            <text:p>0,00269687500000000000</text:p>
          </table:table-cell>
          <table:table-cell table:formula="of:=[.D2591]-[.D259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[.B2590]+9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2591]/[.C2591]" office:value-type="float" office:value="0.00269791666666667" calcext:value-type="float">
            <text:p>0,00269791666666667000</text:p>
          </table:table-cell>
          <table:table-cell table:formula="of:=[.D2592]-[.D259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[.B2591]+9" office:value-type="float" office:value="23319" calcext:value-type="float">
            <text:p>23319</text:p>
          </table:table-cell>
          <table:table-cell office:value-type="float" office:value="8640000" calcext:value-type="float">
            <text:p>8640000</text:p>
          </table:table-cell>
          <table:table-cell table:formula="of:=[.B2592]/[.C2592]" office:value-type="float" office:value="0.00269895833333333" calcext:value-type="float">
            <text:p>0,00269895833333333000</text:p>
          </table:table-cell>
          <table:table-cell table:formula="of:=[.D2593]-[.D259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[.B2592]+9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2593]/[.C2593]" office:value-type="float" office:value="0.0027" calcext:value-type="float">
            <text:p>0,00270000000000000000</text:p>
          </table:table-cell>
          <table:table-cell table:formula="of:=[.D2594]-[.D259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[.B2593]+9" office:value-type="float" office:value="23337" calcext:value-type="float">
            <text:p>23337</text:p>
          </table:table-cell>
          <table:table-cell office:value-type="float" office:value="8640000" calcext:value-type="float">
            <text:p>8640000</text:p>
          </table:table-cell>
          <table:table-cell table:formula="of:=[.B2594]/[.C2594]" office:value-type="float" office:value="0.00270104166666667" calcext:value-type="float">
            <text:p>0,00270104166666667000</text:p>
          </table:table-cell>
          <table:table-cell table:formula="of:=[.D2595]-[.D259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[.B2594]+9" office:value-type="float" office:value="23346" calcext:value-type="float">
            <text:p>23346</text:p>
          </table:table-cell>
          <table:table-cell office:value-type="float" office:value="8640000" calcext:value-type="float">
            <text:p>8640000</text:p>
          </table:table-cell>
          <table:table-cell table:formula="of:=[.B2595]/[.C2595]" office:value-type="float" office:value="0.00270208333333333" calcext:value-type="float">
            <text:p>0,00270208333333333000</text:p>
          </table:table-cell>
          <table:table-cell table:formula="of:=[.D2596]-[.D259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table:formula="of:=[.B2595]+9" office:value-type="float" office:value="23355" calcext:value-type="float">
            <text:p>23355</text:p>
          </table:table-cell>
          <table:table-cell office:value-type="float" office:value="8640000" calcext:value-type="float">
            <text:p>8640000</text:p>
          </table:table-cell>
          <table:table-cell table:formula="of:=[.B2596]/[.C2596]" office:value-type="float" office:value="0.002703125" calcext:value-type="float">
            <text:p>0,00270312500000000000</text:p>
          </table:table-cell>
          <table:table-cell table:formula="of:=[.D2597]-[.D259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[.B2596]+9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2597]/[.C2597]" office:value-type="float" office:value="0.00270416666666667" calcext:value-type="float">
            <text:p>0,00270416666666667000</text:p>
          </table:table-cell>
          <table:table-cell table:formula="of:=[.D2598]-[.D259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table:formula="of:=[.B2597]+9" office:value-type="float" office:value="23373" calcext:value-type="float">
            <text:p>23373</text:p>
          </table:table-cell>
          <table:table-cell office:value-type="float" office:value="8640000" calcext:value-type="float">
            <text:p>8640000</text:p>
          </table:table-cell>
          <table:table-cell table:formula="of:=[.B2598]/[.C2598]" office:value-type="float" office:value="0.00270520833333333" calcext:value-type="float">
            <text:p>0,00270520833333333000</text:p>
          </table:table-cell>
          <table:table-cell table:formula="of:=[.D2599]-[.D259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[.B2598]+9" office:value-type="float" office:value="23382" calcext:value-type="float">
            <text:p>23382</text:p>
          </table:table-cell>
          <table:table-cell office:value-type="float" office:value="8640000" calcext:value-type="float">
            <text:p>8640000</text:p>
          </table:table-cell>
          <table:table-cell table:formula="of:=[.B2599]/[.C2599]" office:value-type="float" office:value="0.00270625" calcext:value-type="float">
            <text:p>0,00270625000000000000</text:p>
          </table:table-cell>
          <table:table-cell table:formula="of:=[.D2600]-[.D259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[.B2599]+9" office:value-type="float" office:value="23391" calcext:value-type="float">
            <text:p>23391</text:p>
          </table:table-cell>
          <table:table-cell office:value-type="float" office:value="8640000" calcext:value-type="float">
            <text:p>8640000</text:p>
          </table:table-cell>
          <table:table-cell table:formula="of:=[.B2600]/[.C2600]" office:value-type="float" office:value="0.00270729166666667" calcext:value-type="float">
            <text:p>0,00270729166666667000</text:p>
          </table:table-cell>
          <table:table-cell table:formula="of:=[.D2601]-[.D260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B2600]+9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2601]/[.C2601]" office:value-type="float" office:value="0.00270833333333333" calcext:value-type="float">
            <text:p>0,00270833333333333000</text:p>
          </table:table-cell>
          <table:table-cell table:formula="of:=[.D2602]-[.D260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[.B2601]+9" office:value-type="float" office:value="23409" calcext:value-type="float">
            <text:p>23409</text:p>
          </table:table-cell>
          <table:table-cell office:value-type="float" office:value="8640000" calcext:value-type="float">
            <text:p>8640000</text:p>
          </table:table-cell>
          <table:table-cell table:formula="of:=[.B2602]/[.C2602]" office:value-type="float" office:value="0.002709375" calcext:value-type="float">
            <text:p>0,00270937500000000000</text:p>
          </table:table-cell>
          <table:table-cell table:formula="of:=[.D2603]-[.D260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B2602]+9" office:value-type="float" office:value="23418" calcext:value-type="float">
            <text:p>23418</text:p>
          </table:table-cell>
          <table:table-cell office:value-type="float" office:value="8640000" calcext:value-type="float">
            <text:p>8640000</text:p>
          </table:table-cell>
          <table:table-cell table:formula="of:=[.B2603]/[.C2603]" office:value-type="float" office:value="0.00271041666666667" calcext:value-type="float">
            <text:p>0,00271041666666667000</text:p>
          </table:table-cell>
          <table:table-cell table:formula="of:=[.D2604]-[.D260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B2603]+9" office:value-type="float" office:value="23427" calcext:value-type="float">
            <text:p>23427</text:p>
          </table:table-cell>
          <table:table-cell office:value-type="float" office:value="8640000" calcext:value-type="float">
            <text:p>8640000</text:p>
          </table:table-cell>
          <table:table-cell table:formula="of:=[.B2604]/[.C2604]" office:value-type="float" office:value="0.00271145833333333" calcext:value-type="float">
            <text:p>0,00271145833333333000</text:p>
          </table:table-cell>
          <table:table-cell table:formula="of:=[.D2605]-[.D260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[.B2604]+9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2605]/[.C2605]" office:value-type="float" office:value="0.0027125" calcext:value-type="float">
            <text:p>0,00271250000000000000</text:p>
          </table:table-cell>
          <table:table-cell table:formula="of:=[.D2606]-[.D260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[.B2605]+9" office:value-type="float" office:value="23445" calcext:value-type="float">
            <text:p>23445</text:p>
          </table:table-cell>
          <table:table-cell office:value-type="float" office:value="8640000" calcext:value-type="float">
            <text:p>8640000</text:p>
          </table:table-cell>
          <table:table-cell table:formula="of:=[.B2606]/[.C2606]" office:value-type="float" office:value="0.00271354166666667" calcext:value-type="float">
            <text:p>0,00271354166666667000</text:p>
          </table:table-cell>
          <table:table-cell table:formula="of:=[.D2607]-[.D260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[.B2606]+9" office:value-type="float" office:value="23454" calcext:value-type="float">
            <text:p>23454</text:p>
          </table:table-cell>
          <table:table-cell office:value-type="float" office:value="8640000" calcext:value-type="float">
            <text:p>8640000</text:p>
          </table:table-cell>
          <table:table-cell table:formula="of:=[.B2607]/[.C2607]" office:value-type="float" office:value="0.00271458333333333" calcext:value-type="float">
            <text:p>0,00271458333333333000</text:p>
          </table:table-cell>
          <table:table-cell table:formula="of:=[.D2608]-[.D260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[.B2607]+9" office:value-type="float" office:value="23463" calcext:value-type="float">
            <text:p>23463</text:p>
          </table:table-cell>
          <table:table-cell office:value-type="float" office:value="8640000" calcext:value-type="float">
            <text:p>8640000</text:p>
          </table:table-cell>
          <table:table-cell table:formula="of:=[.B2608]/[.C2608]" office:value-type="float" office:value="0.002715625" calcext:value-type="float">
            <text:p>0,00271562500000000000</text:p>
          </table:table-cell>
          <table:table-cell table:formula="of:=[.D2609]-[.D260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[.B2608]+9" office:value-type="float" office:value="23472" calcext:value-type="float">
            <text:p>23472</text:p>
          </table:table-cell>
          <table:table-cell office:value-type="float" office:value="8640000" calcext:value-type="float">
            <text:p>8640000</text:p>
          </table:table-cell>
          <table:table-cell table:formula="of:=[.B2609]/[.C2609]" office:value-type="float" office:value="0.00271666666666667" calcext:value-type="float">
            <text:p>0,00271666666666667000</text:p>
          </table:table-cell>
          <table:table-cell table:formula="of:=[.D2610]-[.D260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[.B2609]+9" office:value-type="float" office:value="23481" calcext:value-type="float">
            <text:p>23481</text:p>
          </table:table-cell>
          <table:table-cell office:value-type="float" office:value="8640000" calcext:value-type="float">
            <text:p>8640000</text:p>
          </table:table-cell>
          <table:table-cell table:formula="of:=[.B2610]/[.C2610]" office:value-type="float" office:value="0.00271770833333333" calcext:value-type="float">
            <text:p>0,00271770833333333000</text:p>
          </table:table-cell>
          <table:table-cell table:formula="of:=[.D2611]-[.D261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[.B2610]+9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2611]/[.C2611]" office:value-type="float" office:value="0.00271875" calcext:value-type="float">
            <text:p>0,00271875000000000000</text:p>
          </table:table-cell>
          <table:table-cell table:formula="of:=[.D2612]-[.D261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table:formula="of:=[.B2611]+9" office:value-type="float" office:value="23499" calcext:value-type="float">
            <text:p>23499</text:p>
          </table:table-cell>
          <table:table-cell office:value-type="float" office:value="8640000" calcext:value-type="float">
            <text:p>8640000</text:p>
          </table:table-cell>
          <table:table-cell table:formula="of:=[.B2612]/[.C2612]" office:value-type="float" office:value="0.00271979166666667" calcext:value-type="float">
            <text:p>0,00271979166666667000</text:p>
          </table:table-cell>
          <table:table-cell table:formula="of:=[.D2613]-[.D261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[.B2612]+9" office:value-type="float" office:value="23508" calcext:value-type="float">
            <text:p>23508</text:p>
          </table:table-cell>
          <table:table-cell office:value-type="float" office:value="8640000" calcext:value-type="float">
            <text:p>8640000</text:p>
          </table:table-cell>
          <table:table-cell table:formula="of:=[.B2613]/[.C2613]" office:value-type="float" office:value="0.00272083333333333" calcext:value-type="float">
            <text:p>0,00272083333333333000</text:p>
          </table:table-cell>
          <table:table-cell table:formula="of:=[.D2614]-[.D261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B2613]+9" office:value-type="float" office:value="23517" calcext:value-type="float">
            <text:p>23517</text:p>
          </table:table-cell>
          <table:table-cell office:value-type="float" office:value="8640000" calcext:value-type="float">
            <text:p>8640000</text:p>
          </table:table-cell>
          <table:table-cell table:formula="of:=[.B2614]/[.C2614]" office:value-type="float" office:value="0.002721875" calcext:value-type="float">
            <text:p>0,00272187500000000000</text:p>
          </table:table-cell>
          <table:table-cell table:formula="of:=[.D2615]-[.D261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[.B2614]+9" office:value-type="float" office:value="23526" calcext:value-type="float">
            <text:p>23526</text:p>
          </table:table-cell>
          <table:table-cell office:value-type="float" office:value="8640000" calcext:value-type="float">
            <text:p>8640000</text:p>
          </table:table-cell>
          <table:table-cell table:formula="of:=[.B2615]/[.C2615]" office:value-type="float" office:value="0.00272291666666667" calcext:value-type="float">
            <text:p>0,00272291666666667000</text:p>
          </table:table-cell>
          <table:table-cell table:formula="of:=[.D2616]-[.D261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[.B2615]+9" office:value-type="float" office:value="23535" calcext:value-type="float">
            <text:p>23535</text:p>
          </table:table-cell>
          <table:table-cell office:value-type="float" office:value="8640000" calcext:value-type="float">
            <text:p>8640000</text:p>
          </table:table-cell>
          <table:table-cell table:formula="of:=[.B2616]/[.C2616]" office:value-type="float" office:value="0.00272395833333333" calcext:value-type="float">
            <text:p>0,00272395833333333000</text:p>
          </table:table-cell>
          <table:table-cell table:formula="of:=[.D2617]-[.D261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[.B2616]+9" office:value-type="float" office:value="23544" calcext:value-type="float">
            <text:p>23544</text:p>
          </table:table-cell>
          <table:table-cell office:value-type="float" office:value="8640000" calcext:value-type="float">
            <text:p>8640000</text:p>
          </table:table-cell>
          <table:table-cell table:formula="of:=[.B2617]/[.C2617]" office:value-type="float" office:value="0.002725" calcext:value-type="float">
            <text:p>0,00272500000000000000</text:p>
          </table:table-cell>
          <table:table-cell table:formula="of:=[.D2618]-[.D261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[.B2617]+9" office:value-type="float" office:value="23553" calcext:value-type="float">
            <text:p>23553</text:p>
          </table:table-cell>
          <table:table-cell office:value-type="float" office:value="8640000" calcext:value-type="float">
            <text:p>8640000</text:p>
          </table:table-cell>
          <table:table-cell table:formula="of:=[.B2618]/[.C2618]" office:value-type="float" office:value="0.00272604166666667" calcext:value-type="float">
            <text:p>0,00272604166666667000</text:p>
          </table:table-cell>
          <table:table-cell table:formula="of:=[.D2619]-[.D2618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[.B2618]+9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2619]/[.C2619]" office:value-type="float" office:value="0.00272708333333333" calcext:value-type="float">
            <text:p>0,00272708333333333000</text:p>
          </table:table-cell>
          <table:table-cell table:formula="of:=[.D2620]-[.D261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B2619]+9" office:value-type="float" office:value="23571" calcext:value-type="float">
            <text:p>23571</text:p>
          </table:table-cell>
          <table:table-cell office:value-type="float" office:value="8640000" calcext:value-type="float">
            <text:p>8640000</text:p>
          </table:table-cell>
          <table:table-cell table:formula="of:=[.B2620]/[.C2620]" office:value-type="float" office:value="0.002728125" calcext:value-type="float">
            <text:p>0,00272812500000000000</text:p>
          </table:table-cell>
          <table:table-cell table:formula="of:=[.D2621]-[.D262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[.B2620]+9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2621]/[.C2621]" office:value-type="float" office:value="0.00272916666666667" calcext:value-type="float">
            <text:p>0,00272916666666667000</text:p>
          </table:table-cell>
          <table:table-cell table:formula="of:=[.D2622]-[.D262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[.B2621]+9" office:value-type="float" office:value="23589" calcext:value-type="float">
            <text:p>23589</text:p>
          </table:table-cell>
          <table:table-cell office:value-type="float" office:value="8640000" calcext:value-type="float">
            <text:p>8640000</text:p>
          </table:table-cell>
          <table:table-cell table:formula="of:=[.B2622]/[.C2622]" office:value-type="float" office:value="0.00273020833333333" calcext:value-type="float">
            <text:p>0,00273020833333333000</text:p>
          </table:table-cell>
          <table:table-cell table:formula="of:=[.D2623]-[.D262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[.B2622]+9" office:value-type="float" office:value="23598" calcext:value-type="float">
            <text:p>23598</text:p>
          </table:table-cell>
          <table:table-cell office:value-type="float" office:value="8640000" calcext:value-type="float">
            <text:p>8640000</text:p>
          </table:table-cell>
          <table:table-cell table:formula="of:=[.B2623]/[.C2623]" office:value-type="float" office:value="0.00273125" calcext:value-type="float">
            <text:p>0,00273125000000000000</text:p>
          </table:table-cell>
          <table:table-cell table:formula="of:=[.D2624]-[.D262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[.B2623]+9" office:value-type="float" office:value="23607" calcext:value-type="float">
            <text:p>23607</text:p>
          </table:table-cell>
          <table:table-cell office:value-type="float" office:value="8640000" calcext:value-type="float">
            <text:p>8640000</text:p>
          </table:table-cell>
          <table:table-cell table:formula="of:=[.B2624]/[.C2624]" office:value-type="float" office:value="0.00273229166666667" calcext:value-type="float">
            <text:p>0,00273229166666667000</text:p>
          </table:table-cell>
          <table:table-cell table:formula="of:=[.D2625]-[.D262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[.B2624]+9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2625]/[.C2625]" office:value-type="float" office:value="0.00273333333333333" calcext:value-type="float">
            <text:p>0,00273333333333333000</text:p>
          </table:table-cell>
          <table:table-cell table:formula="of:=[.D2626]-[.D262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[.B2625]+9" office:value-type="float" office:value="23625" calcext:value-type="float">
            <text:p>23625</text:p>
          </table:table-cell>
          <table:table-cell office:value-type="float" office:value="8640000" calcext:value-type="float">
            <text:p>8640000</text:p>
          </table:table-cell>
          <table:table-cell table:formula="of:=[.B2626]/[.C2626]" office:value-type="float" office:value="0.002734375" calcext:value-type="float">
            <text:p>0,00273437500000000000</text:p>
          </table:table-cell>
          <table:table-cell table:formula="of:=[.D2627]-[.D262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[.B2626]+9" office:value-type="float" office:value="23634" calcext:value-type="float">
            <text:p>23634</text:p>
          </table:table-cell>
          <table:table-cell office:value-type="float" office:value="8640000" calcext:value-type="float">
            <text:p>8640000</text:p>
          </table:table-cell>
          <table:table-cell table:formula="of:=[.B2627]/[.C2627]" office:value-type="float" office:value="0.00273541666666667" calcext:value-type="float">
            <text:p>0,00273541666666667000</text:p>
          </table:table-cell>
          <table:table-cell table:formula="of:=[.D2628]-[.D262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[.B2627]+9" office:value-type="float" office:value="23643" calcext:value-type="float">
            <text:p>23643</text:p>
          </table:table-cell>
          <table:table-cell office:value-type="float" office:value="8640000" calcext:value-type="float">
            <text:p>8640000</text:p>
          </table:table-cell>
          <table:table-cell table:formula="of:=[.B2628]/[.C2628]" office:value-type="float" office:value="0.00273645833333333" calcext:value-type="float">
            <text:p>0,00273645833333333000</text:p>
          </table:table-cell>
          <table:table-cell table:formula="of:=[.D2629]-[.D262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[.B2628]+9" office:value-type="float" office:value="23652" calcext:value-type="float">
            <text:p>23652</text:p>
          </table:table-cell>
          <table:table-cell office:value-type="float" office:value="8640000" calcext:value-type="float">
            <text:p>8640000</text:p>
          </table:table-cell>
          <table:table-cell table:formula="of:=[.B2629]/[.C2629]" office:value-type="float" office:value="0.0027375" calcext:value-type="float">
            <text:p>0,00273750000000000000</text:p>
          </table:table-cell>
          <table:table-cell table:formula="of:=[.D2630]-[.D262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[.B2629]+9" office:value-type="float" office:value="23661" calcext:value-type="float">
            <text:p>23661</text:p>
          </table:table-cell>
          <table:table-cell office:value-type="float" office:value="8640000" calcext:value-type="float">
            <text:p>8640000</text:p>
          </table:table-cell>
          <table:table-cell table:formula="of:=[.B2630]/[.C2630]" office:value-type="float" office:value="0.00273854166666667" calcext:value-type="float">
            <text:p>0,00273854166666667000</text:p>
          </table:table-cell>
          <table:table-cell table:formula="of:=[.D2631]-[.D263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B2630]+9" office:value-type="float" office:value="23670" calcext:value-type="float">
            <text:p>23670</text:p>
          </table:table-cell>
          <table:table-cell office:value-type="float" office:value="8640000" calcext:value-type="float">
            <text:p>8640000</text:p>
          </table:table-cell>
          <table:table-cell table:formula="of:=[.B2631]/[.C2631]" office:value-type="float" office:value="0.00273958333333333" calcext:value-type="float">
            <text:p>0,00273958333333333000</text:p>
          </table:table-cell>
          <table:table-cell table:formula="of:=[.D2632]-[.D263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[.B2631]+9" office:value-type="float" office:value="23679" calcext:value-type="float">
            <text:p>23679</text:p>
          </table:table-cell>
          <table:table-cell office:value-type="float" office:value="8640000" calcext:value-type="float">
            <text:p>8640000</text:p>
          </table:table-cell>
          <table:table-cell table:formula="of:=[.B2632]/[.C2632]" office:value-type="float" office:value="0.002740625" calcext:value-type="float">
            <text:p>0,00274062500000000000</text:p>
          </table:table-cell>
          <table:table-cell table:formula="of:=[.D2633]-[.D263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table:formula="of:=[.B2632]+9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2633]/[.C2633]" office:value-type="float" office:value="0.00274166666666667" calcext:value-type="float">
            <text:p>0,00274166666666667000</text:p>
          </table:table-cell>
          <table:table-cell table:formula="of:=[.D2634]-[.D2633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table:formula="of:=[.B2633]+9" office:value-type="float" office:value="23697" calcext:value-type="float">
            <text:p>23697</text:p>
          </table:table-cell>
          <table:table-cell office:value-type="float" office:value="8640000" calcext:value-type="float">
            <text:p>8640000</text:p>
          </table:table-cell>
          <table:table-cell table:formula="of:=[.B2634]/[.C2634]" office:value-type="float" office:value="0.00274270833333333" calcext:value-type="float">
            <text:p>0,00274270833333333000</text:p>
          </table:table-cell>
          <table:table-cell table:formula="of:=[.D2635]-[.D263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[.B2634]+9" office:value-type="float" office:value="23706" calcext:value-type="float">
            <text:p>23706</text:p>
          </table:table-cell>
          <table:table-cell office:value-type="float" office:value="8640000" calcext:value-type="float">
            <text:p>8640000</text:p>
          </table:table-cell>
          <table:table-cell table:formula="of:=[.B2635]/[.C2635]" office:value-type="float" office:value="0.00274375" calcext:value-type="float">
            <text:p>0,00274375000000000000</text:p>
          </table:table-cell>
          <table:table-cell table:formula="of:=[.D2636]-[.D263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[.B2635]+9" office:value-type="float" office:value="23715" calcext:value-type="float">
            <text:p>23715</text:p>
          </table:table-cell>
          <table:table-cell office:value-type="float" office:value="8640000" calcext:value-type="float">
            <text:p>8640000</text:p>
          </table:table-cell>
          <table:table-cell table:formula="of:=[.B2636]/[.C2636]" office:value-type="float" office:value="0.00274479166666667" calcext:value-type="float">
            <text:p>0,00274479166666667000</text:p>
          </table:table-cell>
          <table:table-cell table:formula="of:=[.D2637]-[.D263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[.B2636]+9" office:value-type="float" office:value="23724" calcext:value-type="float">
            <text:p>23724</text:p>
          </table:table-cell>
          <table:table-cell office:value-type="float" office:value="8640000" calcext:value-type="float">
            <text:p>8640000</text:p>
          </table:table-cell>
          <table:table-cell table:formula="of:=[.B2637]/[.C2637]" office:value-type="float" office:value="0.00274583333333333" calcext:value-type="float">
            <text:p>0,00274583333333333000</text:p>
          </table:table-cell>
          <table:table-cell table:formula="of:=[.D2638]-[.D2637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[.B2637]+9" office:value-type="float" office:value="23733" calcext:value-type="float">
            <text:p>23733</text:p>
          </table:table-cell>
          <table:table-cell office:value-type="float" office:value="8640000" calcext:value-type="float">
            <text:p>8640000</text:p>
          </table:table-cell>
          <table:table-cell table:formula="of:=[.B2638]/[.C2638]" office:value-type="float" office:value="0.002746875" calcext:value-type="float">
            <text:p>0,00274687500000000000</text:p>
          </table:table-cell>
          <table:table-cell table:formula="of:=[.D2639]-[.D263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[.B2638]+9" office:value-type="float" office:value="23742" calcext:value-type="float">
            <text:p>23742</text:p>
          </table:table-cell>
          <table:table-cell office:value-type="float" office:value="8640000" calcext:value-type="float">
            <text:p>8640000</text:p>
          </table:table-cell>
          <table:table-cell table:formula="of:=[.B2639]/[.C2639]" office:value-type="float" office:value="0.00274791666666667" calcext:value-type="float">
            <text:p>0,00274791666666667000</text:p>
          </table:table-cell>
          <table:table-cell table:formula="of:=[.D2640]-[.D263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[.B2639]+9" office:value-type="float" office:value="23751" calcext:value-type="float">
            <text:p>23751</text:p>
          </table:table-cell>
          <table:table-cell office:value-type="float" office:value="8640000" calcext:value-type="float">
            <text:p>8640000</text:p>
          </table:table-cell>
          <table:table-cell table:formula="of:=[.B2640]/[.C2640]" office:value-type="float" office:value="0.00274895833333333" calcext:value-type="float">
            <text:p>0,00274895833333333000</text:p>
          </table:table-cell>
          <table:table-cell table:formula="of:=[.D2641]-[.D264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[.B2640]+9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2641]/[.C2641]" office:value-type="float" office:value="0.00275" calcext:value-type="float">
            <text:p>0,00275000000000000000</text:p>
          </table:table-cell>
          <table:table-cell table:formula="of:=[.D2642]-[.D2641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[.B2641]+9" office:value-type="float" office:value="23769" calcext:value-type="float">
            <text:p>23769</text:p>
          </table:table-cell>
          <table:table-cell office:value-type="float" office:value="8640000" calcext:value-type="float">
            <text:p>8640000</text:p>
          </table:table-cell>
          <table:table-cell table:formula="of:=[.B2642]/[.C2642]" office:value-type="float" office:value="0.00275104166666667" calcext:value-type="float">
            <text:p>0,00275104166666667000</text:p>
          </table:table-cell>
          <table:table-cell table:formula="of:=[.D2643]-[.D264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[.B2642]+9" office:value-type="float" office:value="23778" calcext:value-type="float">
            <text:p>23778</text:p>
          </table:table-cell>
          <table:table-cell office:value-type="float" office:value="8640000" calcext:value-type="float">
            <text:p>8640000</text:p>
          </table:table-cell>
          <table:table-cell table:formula="of:=[.B2643]/[.C2643]" office:value-type="float" office:value="0.00275208333333333" calcext:value-type="float">
            <text:p>0,00275208333333333000</text:p>
          </table:table-cell>
          <table:table-cell table:formula="of:=[.D2644]-[.D264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[.B2643]+9" office:value-type="float" office:value="23787" calcext:value-type="float">
            <text:p>23787</text:p>
          </table:table-cell>
          <table:table-cell office:value-type="float" office:value="8640000" calcext:value-type="float">
            <text:p>8640000</text:p>
          </table:table-cell>
          <table:table-cell table:formula="of:=[.B2644]/[.C2644]" office:value-type="float" office:value="0.002753125" calcext:value-type="float">
            <text:p>0,00275312500000000000</text:p>
          </table:table-cell>
          <table:table-cell table:formula="of:=[.D2645]-[.D264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table:formula="of:=[.B2644]+9" office:value-type="float" office:value="23796" calcext:value-type="float">
            <text:p>23796</text:p>
          </table:table-cell>
          <table:table-cell office:value-type="float" office:value="8640000" calcext:value-type="float">
            <text:p>8640000</text:p>
          </table:table-cell>
          <table:table-cell table:formula="of:=[.B2645]/[.C2645]" office:value-type="float" office:value="0.00275416666666667" calcext:value-type="float">
            <text:p>0,00275416666666667000</text:p>
          </table:table-cell>
          <table:table-cell table:formula="of:=[.D2646]-[.D2645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[.B2645]+9" office:value-type="float" office:value="23805" calcext:value-type="float">
            <text:p>23805</text:p>
          </table:table-cell>
          <table:table-cell office:value-type="float" office:value="8640000" calcext:value-type="float">
            <text:p>8640000</text:p>
          </table:table-cell>
          <table:table-cell table:formula="of:=[.B2646]/[.C2646]" office:value-type="float" office:value="0.00275520833333333" calcext:value-type="float">
            <text:p>0,00275520833333333000</text:p>
          </table:table-cell>
          <table:table-cell table:formula="of:=[.D2647]-[.D264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[.B2646]+9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2647]/[.C2647]" office:value-type="float" office:value="0.00275625" calcext:value-type="float">
            <text:p>0,00275625000000000000</text:p>
          </table:table-cell>
          <table:table-cell table:formula="of:=[.D2648]-[.D264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[.B2647]+9" office:value-type="float" office:value="23823" calcext:value-type="float">
            <text:p>23823</text:p>
          </table:table-cell>
          <table:table-cell office:value-type="float" office:value="8640000" calcext:value-type="float">
            <text:p>8640000</text:p>
          </table:table-cell>
          <table:table-cell table:formula="of:=[.B2648]/[.C2648]" office:value-type="float" office:value="0.00275729166666667" calcext:value-type="float">
            <text:p>0,00275729166666667000</text:p>
          </table:table-cell>
          <table:table-cell table:formula="of:=[.D2649]-[.D264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[.B2648]+9" office:value-type="float" office:value="23832" calcext:value-type="float">
            <text:p>23832</text:p>
          </table:table-cell>
          <table:table-cell office:value-type="float" office:value="8640000" calcext:value-type="float">
            <text:p>8640000</text:p>
          </table:table-cell>
          <table:table-cell table:formula="of:=[.B2649]/[.C2649]" office:value-type="float" office:value="0.00275833333333333" calcext:value-type="float">
            <text:p>0,00275833333333333000</text:p>
          </table:table-cell>
          <table:table-cell table:formula="of:=[.D2650]-[.D2649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[.B2649]+9" office:value-type="float" office:value="23841" calcext:value-type="float">
            <text:p>23841</text:p>
          </table:table-cell>
          <table:table-cell office:value-type="float" office:value="8640000" calcext:value-type="float">
            <text:p>8640000</text:p>
          </table:table-cell>
          <table:table-cell table:formula="of:=[.B2650]/[.C2650]" office:value-type="float" office:value="0.002759375" calcext:value-type="float">
            <text:p>0,00275937500000000000</text:p>
          </table:table-cell>
          <table:table-cell table:formula="of:=[.D2651]-[.D2650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[.B2650]+9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2651]/[.C2651]" office:value-type="float" office:value="0.00276041666666667" calcext:value-type="float">
            <text:p>0,00276041666666667000</text:p>
          </table:table-cell>
          <table:table-cell table:formula="of:=[.D2652]-[.D265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[.B2651]+9" office:value-type="float" office:value="23859" calcext:value-type="float">
            <text:p>23859</text:p>
          </table:table-cell>
          <table:table-cell office:value-type="float" office:value="8640000" calcext:value-type="float">
            <text:p>8640000</text:p>
          </table:table-cell>
          <table:table-cell table:formula="of:=[.B2652]/[.C2652]" office:value-type="float" office:value="0.00276145833333333" calcext:value-type="float">
            <text:p>0,00276145833333333000</text:p>
          </table:table-cell>
          <table:table-cell table:formula="of:=[.D2653]-[.D2652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[.B2652]+9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2653]/[.C2653]" office:value-type="float" office:value="0.0027625" calcext:value-type="float">
            <text:p>0,00276250000000000000</text:p>
          </table:table-cell>
          <table:table-cell table:formula="of:=[.D2654]-[.D265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B2653]+9" office:value-type="float" office:value="23877" calcext:value-type="float">
            <text:p>23877</text:p>
          </table:table-cell>
          <table:table-cell office:value-type="float" office:value="8640000" calcext:value-type="float">
            <text:p>8640000</text:p>
          </table:table-cell>
          <table:table-cell table:formula="of:=[.B2654]/[.C2654]" office:value-type="float" office:value="0.00276354166666667" calcext:value-type="float">
            <text:p>0,00276354166666667000</text:p>
          </table:table-cell>
          <table:table-cell table:formula="of:=[.D2655]-[.D2654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[.B2654]+9" office:value-type="float" office:value="23886" calcext:value-type="float">
            <text:p>23886</text:p>
          </table:table-cell>
          <table:table-cell office:value-type="float" office:value="8640000" calcext:value-type="float">
            <text:p>8640000</text:p>
          </table:table-cell>
          <table:table-cell table:formula="of:=[.B2655]/[.C2655]" office:value-type="float" office:value="0.00276458333333333" calcext:value-type="float">
            <text:p>0,00276458333333333000</text:p>
          </table:table-cell>
          <table:table-cell table:formula="of:=[.D2656]-[.D265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[.B2655]+9" office:value-type="float" office:value="23895" calcext:value-type="float">
            <text:p>23895</text:p>
          </table:table-cell>
          <table:table-cell office:value-type="float" office:value="8640000" calcext:value-type="float">
            <text:p>8640000</text:p>
          </table:table-cell>
          <table:table-cell table:formula="of:=[.B2656]/[.C2656]" office:value-type="float" office:value="0.002765625" calcext:value-type="float">
            <text:p>0,00276562500000000000</text:p>
          </table:table-cell>
          <table:table-cell table:formula="of:=[.D2657]-[.D2656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[.B2656]+9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2657]/[.C2657]" office:value-type="float" office:value="0.00276666666666667" calcext:value-type="float">
            <text:p>0,00276666666666667000</text:p>
          </table:table-cell>
          <table:table-cell table:formula="of:=[.D2658]-[.D2657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[.B2657]+9" office:value-type="float" office:value="23913" calcext:value-type="float">
            <text:p>23913</text:p>
          </table:table-cell>
          <table:table-cell office:value-type="float" office:value="8640000" calcext:value-type="float">
            <text:p>8640000</text:p>
          </table:table-cell>
          <table:table-cell table:formula="of:=[.B2658]/[.C2658]" office:value-type="float" office:value="0.00276770833333333" calcext:value-type="float">
            <text:p>0,00276770833333333000</text:p>
          </table:table-cell>
          <table:table-cell table:formula="of:=[.D2659]-[.D2658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[.B2658]+9" office:value-type="float" office:value="23922" calcext:value-type="float">
            <text:p>23922</text:p>
          </table:table-cell>
          <table:table-cell office:value-type="float" office:value="8640000" calcext:value-type="float">
            <text:p>8640000</text:p>
          </table:table-cell>
          <table:table-cell table:formula="of:=[.B2659]/[.C2659]" office:value-type="float" office:value="0.00276875" calcext:value-type="float">
            <text:p>0,00276875000000000000</text:p>
          </table:table-cell>
          <table:table-cell table:formula="of:=[.D2660]-[.D2659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[.B2659]+9" office:value-type="float" office:value="23931" calcext:value-type="float">
            <text:p>23931</text:p>
          </table:table-cell>
          <table:table-cell office:value-type="float" office:value="8640000" calcext:value-type="float">
            <text:p>8640000</text:p>
          </table:table-cell>
          <table:table-cell table:formula="of:=[.B2660]/[.C2660]" office:value-type="float" office:value="0.00276979166666667" calcext:value-type="float">
            <text:p>0,00276979166666667000</text:p>
          </table:table-cell>
          <table:table-cell table:formula="of:=[.D2661]-[.D2660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[.B2660]+9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2661]/[.C2661]" office:value-type="float" office:value="0.00277083333333333" calcext:value-type="float">
            <text:p>0,00277083333333333000</text:p>
          </table:table-cell>
          <table:table-cell table:formula="of:=[.D2662]-[.D2661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[.B2661]+9" office:value-type="float" office:value="23949" calcext:value-type="float">
            <text:p>23949</text:p>
          </table:table-cell>
          <table:table-cell office:value-type="float" office:value="8640000" calcext:value-type="float">
            <text:p>8640000</text:p>
          </table:table-cell>
          <table:table-cell table:formula="of:=[.B2662]/[.C2662]" office:value-type="float" office:value="0.002771875" calcext:value-type="float">
            <text:p>0,00277187500000000000</text:p>
          </table:table-cell>
          <table:table-cell table:formula="of:=[.D2663]-[.D2662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[.B2662]+9" office:value-type="float" office:value="23958" calcext:value-type="float">
            <text:p>23958</text:p>
          </table:table-cell>
          <table:table-cell office:value-type="float" office:value="8640000" calcext:value-type="float">
            <text:p>8640000</text:p>
          </table:table-cell>
          <table:table-cell table:formula="of:=[.B2663]/[.C2663]" office:value-type="float" office:value="0.00277291666666667" calcext:value-type="float">
            <text:p>0,00277291666666667000</text:p>
          </table:table-cell>
          <table:table-cell table:formula="of:=[.D2664]-[.D2663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[.B2663]+9" office:value-type="float" office:value="23967" calcext:value-type="float">
            <text:p>23967</text:p>
          </table:table-cell>
          <table:table-cell office:value-type="float" office:value="8640000" calcext:value-type="float">
            <text:p>8640000</text:p>
          </table:table-cell>
          <table:table-cell table:formula="of:=[.B2664]/[.C2664]" office:value-type="float" office:value="0.00277395833333333" calcext:value-type="float">
            <text:p>0,00277395833333333000</text:p>
          </table:table-cell>
          <table:table-cell table:formula="of:=[.D2665]-[.D2664]" office:value-type="float" office:value="0.00000104166666666699" calcext:value-type="float">
            <text:p>0,00000104166666666699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[.B2664]+9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2665]/[.C2665]" office:value-type="float" office:value="0.002775" calcext:value-type="float">
            <text:p>0,00277500000000000000</text:p>
          </table:table-cell>
          <table:table-cell table:formula="of:=[.D2666]-[.D2665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[.B2665]+9" office:value-type="float" office:value="23985" calcext:value-type="float">
            <text:p>23985</text:p>
          </table:table-cell>
          <table:table-cell office:value-type="float" office:value="8640000" calcext:value-type="float">
            <text:p>8640000</text:p>
          </table:table-cell>
          <table:table-cell table:formula="of:=[.B2666]/[.C2666]" office:value-type="float" office:value="0.00277604166666667" calcext:value-type="float">
            <text:p>0,00277604166666667000</text:p>
          </table:table-cell>
          <table:table-cell table:formula="of:=[.D2667]-[.D2666]" office:value-type="float" office:value="0.00000104166666666655" calcext:value-type="float">
            <text:p>0,00000104166666666655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[.B2666]+9" office:value-type="float" office:value="23994" calcext:value-type="float">
            <text:p>23994</text:p>
          </table:table-cell>
          <table:table-cell office:value-type="float" office:value="8640000" calcext:value-type="float">
            <text:p>8640000</text:p>
          </table:table-cell>
          <table:table-cell table:formula="of:=[.B2667]/[.C2667]" office:value-type="float" office:value="0.00277708333333333" calcext:value-type="float">
            <text:p>0,00277708333333333000</text:p>
          </table:table-cell>
          <table:table-cell table:formula="of:=#REF!-[.D2667]" office:value-type="string" office:string-value="" calcext:value-type="error">
            <text:p>#REF!</text:p>
          </table:table-cell>
        </table:table-row>
        <table:table-row table:style-name="ro1" table:number-rows-repeated="104590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16:24:27.7899118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2:03.054658084</meta:creation-date>
    <dc:date>2026-05-17T16:25:22.528848958</dc:date>
    <meta:editing-duration>PT1M</meta:editing-duration>
    <meta:editing-cycles>2</meta:editing-cycles>
    <meta:generator>LibreOffice/24.2.7.2$Linux_X86_64 LibreOffice_project/420$Build-2</meta:generator>
    <meta:document-statistic meta:table-count="1" meta:cell-count="13335" meta:object-count="0"/>
  </office:meta>
</office:document-meta>
</file>