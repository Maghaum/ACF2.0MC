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6712962962963" calcext:value-type="float">
            <text:p>0,00000567129629629630</text:p>
          </table:table-cell>
          <table:table-cell table:formula="of:=[.D3]-[.D2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9" office:value-type="float" office:value="98" calcext:value-type="float">
            <text:p>9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13425925925926" calcext:value-type="float">
            <text:p>0,00001134259259259260</text:p>
          </table:table-cell>
          <table:table-cell table:formula="of:=[.D4]-[.D3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9" office:value-type="float" office:value="147" calcext:value-type="float">
            <text:p>14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70138888888889" calcext:value-type="float">
            <text:p>0,00001701388888888890</text:p>
          </table:table-cell>
          <table:table-cell table:formula="of:=[.D5]-[.D4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9" office:value-type="float" office:value="196" calcext:value-type="float">
            <text:p>19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26851851851852" calcext:value-type="float">
            <text:p>0,00002268518518518520</text:p>
          </table:table-cell>
          <table:table-cell table:formula="of:=[.D6]-[.D5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9" office:value-type="float" office:value="245" calcext:value-type="float">
            <text:p>24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83564814814815" calcext:value-type="float">
            <text:p>0,00002835648148148150</text:p>
          </table:table-cell>
          <table:table-cell table:formula="of:=[.D7]-[.D6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9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40277777777778" calcext:value-type="float">
            <text:p>0,00003402777777777780</text:p>
          </table:table-cell>
          <table:table-cell table:formula="of:=[.D8]-[.D7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9" office:value-type="float" office:value="343" calcext:value-type="float">
            <text:p>34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96990740740741" calcext:value-type="float">
            <text:p>0,00003969907407407410</text:p>
          </table:table-cell>
          <table:table-cell table:formula="of:=[.D9]-[.D8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9" office:value-type="float" office:value="392" calcext:value-type="float">
            <text:p>39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53703703703704" calcext:value-type="float">
            <text:p>0,00004537037037037040</text:p>
          </table:table-cell>
          <table:table-cell table:formula="of:=[.D10]-[.D9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9" office:value-type="float" office:value="441" calcext:value-type="float">
            <text:p>44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10416666666667" calcext:value-type="float">
            <text:p>0,00005104166666666670</text:p>
          </table:table-cell>
          <table:table-cell table:formula="of:=[.D11]-[.D10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9" office:value-type="float" office:value="490" calcext:value-type="float">
            <text:p>4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6712962962963" calcext:value-type="float">
            <text:p>0,00005671296296296300</text:p>
          </table:table-cell>
          <table:table-cell table:formula="of:=[.D12]-[.D11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9" office:value-type="float" office:value="539" calcext:value-type="float">
            <text:p>53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23842592592593" calcext:value-type="float">
            <text:p>0,00006238425925925930</text:p>
          </table:table-cell>
          <table:table-cell table:formula="of:=[.D13]-[.D12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9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80555555555556" calcext:value-type="float">
            <text:p>0,00006805555555555560</text:p>
          </table:table-cell>
          <table:table-cell table:formula="of:=[.D14]-[.D13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9" office:value-type="float" office:value="637" calcext:value-type="float">
            <text:p>63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37268518518519" calcext:value-type="float">
            <text:p>0,00007372685185185190</text:p>
          </table:table-cell>
          <table:table-cell table:formula="of:=[.D15]-[.D14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9" office:value-type="float" office:value="686" calcext:value-type="float">
            <text:p>68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93981481481481" calcext:value-type="float">
            <text:p>0,00007939814814814810</text:p>
          </table:table-cell>
          <table:table-cell table:formula="of:=[.D16]-[.D15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9" office:value-type="float" office:value="735" calcext:value-type="float">
            <text:p>73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850694444444444" calcext:value-type="float">
            <text:p>0,00008506944444444440</text:p>
          </table:table-cell>
          <table:table-cell table:formula="of:=[.D17]-[.D16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9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907407407407408" calcext:value-type="float">
            <text:p>0,00009074074074074070</text:p>
          </table:table-cell>
          <table:table-cell table:formula="of:=[.D18]-[.D17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9" office:value-type="float" office:value="833" calcext:value-type="float">
            <text:p>83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96412037037037" calcext:value-type="float">
            <text:p>0,00009641203703703700</text:p>
          </table:table-cell>
          <table:table-cell table:formula="of:=[.D19]-[.D18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9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02083333333333" calcext:value-type="float">
            <text:p>0,00010208333333333300</text:p>
          </table:table-cell>
          <table:table-cell table:formula="of:=[.D20]-[.D19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9" office:value-type="float" office:value="931" calcext:value-type="float">
            <text:p>93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0775462962963" calcext:value-type="float">
            <text:p>0,00010775462962963000</text:p>
          </table:table-cell>
          <table:table-cell table:formula="of:=[.D21]-[.D20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9" office:value-type="float" office:value="980" calcext:value-type="float">
            <text:p>9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13425925925926" calcext:value-type="float">
            <text:p>0,00011342592592592600</text:p>
          </table:table-cell>
          <table:table-cell table:formula="of:=[.D22]-[.D21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9" office:value-type="float" office:value="1029" calcext:value-type="float">
            <text:p>102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19097222222222" calcext:value-type="float">
            <text:p>0,00011909722222222200</text:p>
          </table:table-cell>
          <table:table-cell table:formula="of:=[.D23]-[.D22]" office:value-type="float" office:value="0.0000056712962962963" calcext:value-type="float">
            <text:p>0,0000056712962962963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9" office:value-type="float" office:value="1078" calcext:value-type="float">
            <text:p>107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24768518518519" calcext:value-type="float">
            <text:p>0,00012476851851851900</text:p>
          </table:table-cell>
          <table:table-cell table:formula="of:=[.D24]-[.D23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9" office:value-type="float" office:value="1127" calcext:value-type="float">
            <text:p>112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30439814814815" calcext:value-type="float">
            <text:p>0,00013043981481481500</text:p>
          </table:table-cell>
          <table:table-cell table:formula="of:=[.D25]-[.D24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9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36111111111111" calcext:value-type="float">
            <text:p>0,00013611111111111100</text:p>
          </table:table-cell>
          <table:table-cell table:formula="of:=[.D26]-[.D25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9" office:value-type="float" office:value="1225" calcext:value-type="float">
            <text:p>12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41782407407407" calcext:value-type="float">
            <text:p>0,00014178240740740700</text:p>
          </table:table-cell>
          <table:table-cell table:formula="of:=[.D27]-[.D26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9" office:value-type="float" office:value="1274" calcext:value-type="float">
            <text:p>127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47453703703704" calcext:value-type="float">
            <text:p>0,00014745370370370400</text:p>
          </table:table-cell>
          <table:table-cell table:formula="of:=[.D28]-[.D27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9" office:value-type="float" office:value="1323" calcext:value-type="float">
            <text:p>132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53125" calcext:value-type="float">
            <text:p>0,00015312500000000000</text:p>
          </table:table-cell>
          <table:table-cell table:formula="of:=[.D29]-[.D28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9" office:value-type="float" office:value="1372" calcext:value-type="float">
            <text:p>137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58796296296296" calcext:value-type="float">
            <text:p>0,00015879629629629600</text:p>
          </table:table-cell>
          <table:table-cell table:formula="of:=[.D30]-[.D29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9" office:value-type="float" office:value="1421" calcext:value-type="float">
            <text:p>142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64467592592593" calcext:value-type="float">
            <text:p>0,00016446759259259300</text:p>
          </table:table-cell>
          <table:table-cell table:formula="of:=[.D31]-[.D30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9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70138888888889" calcext:value-type="float">
            <text:p>0,00017013888888888900</text:p>
          </table:table-cell>
          <table:table-cell table:formula="of:=[.D32]-[.D31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9" office:value-type="float" office:value="1519" calcext:value-type="float">
            <text:p>151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75810185185185" calcext:value-type="float">
            <text:p>0,00017581018518518500</text:p>
          </table:table-cell>
          <table:table-cell table:formula="of:=[.D33]-[.D32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9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81481481481482" calcext:value-type="float">
            <text:p>0,00018148148148148100</text:p>
          </table:table-cell>
          <table:table-cell table:formula="of:=[.D34]-[.D33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9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87152777777778" calcext:value-type="float">
            <text:p>0,00018715277777777800</text:p>
          </table:table-cell>
          <table:table-cell table:formula="of:=[.D35]-[.D34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9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92824074074074" calcext:value-type="float">
            <text:p>0,00019282407407407400</text:p>
          </table:table-cell>
          <table:table-cell table:formula="of:=[.D36]-[.D35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9" office:value-type="float" office:value="1715" calcext:value-type="float">
            <text:p>171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9849537037037" calcext:value-type="float">
            <text:p>0,00019849537037037000</text:p>
          </table:table-cell>
          <table:table-cell table:formula="of:=[.D37]-[.D36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9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04166666666667" calcext:value-type="float">
            <text:p>0,00020416666666666700</text:p>
          </table:table-cell>
          <table:table-cell table:formula="of:=[.D38]-[.D37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9" office:value-type="float" office:value="1813" calcext:value-type="float">
            <text:p>181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09837962962963" calcext:value-type="float">
            <text:p>0,00020983796296296300</text:p>
          </table:table-cell>
          <table:table-cell table:formula="of:=[.D39]-[.D38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9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15509259259259" calcext:value-type="float">
            <text:p>0,00021550925925925900</text:p>
          </table:table-cell>
          <table:table-cell table:formula="of:=[.D40]-[.D39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9" office:value-type="float" office:value="1911" calcext:value-type="float">
            <text:p>191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21180555555556" calcext:value-type="float">
            <text:p>0,00022118055555555600</text:p>
          </table:table-cell>
          <table:table-cell table:formula="of:=[.D41]-[.D40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9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26851851851852" calcext:value-type="float">
            <text:p>0,00022685185185185200</text:p>
          </table:table-cell>
          <table:table-cell table:formula="of:=[.D42]-[.D41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9" office:value-type="float" office:value="2009" calcext:value-type="float">
            <text:p>200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32523148148148" calcext:value-type="float">
            <text:p>0,00023252314814814800</text:p>
          </table:table-cell>
          <table:table-cell table:formula="of:=[.D43]-[.D42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9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38194444444444" calcext:value-type="float">
            <text:p>0,00023819444444444400</text:p>
          </table:table-cell>
          <table:table-cell table:formula="of:=[.D44]-[.D43]" office:value-type="float" office:value="0.00000567129629629629" calcext:value-type="float">
            <text:p>0,00000567129629629629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9" office:value-type="float" office:value="2107" calcext:value-type="float">
            <text:p>210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43865740740741" calcext:value-type="float">
            <text:p>0,00024386574074074100</text:p>
          </table:table-cell>
          <table:table-cell table:formula="of:=[.D45]-[.D44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9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49537037037037" calcext:value-type="float">
            <text:p>0,00024953703703703700</text:p>
          </table:table-cell>
          <table:table-cell table:formula="of:=[.D46]-[.D4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9" office:value-type="float" office:value="2205" calcext:value-type="float">
            <text:p>220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55208333333333" calcext:value-type="float">
            <text:p>0,00025520833333333300</text:p>
          </table:table-cell>
          <table:table-cell table:formula="of:=[.D47]-[.D46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9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6087962962963" calcext:value-type="float">
            <text:p>0,00026087962962963000</text:p>
          </table:table-cell>
          <table:table-cell table:formula="of:=[.D48]-[.D47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9" office:value-type="float" office:value="2303" calcext:value-type="float">
            <text:p>230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66550925925926" calcext:value-type="float">
            <text:p>0,00026655092592592600</text:p>
          </table:table-cell>
          <table:table-cell table:formula="of:=[.D49]-[.D4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9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72222222222222" calcext:value-type="float">
            <text:p>0,00027222222222222200</text:p>
          </table:table-cell>
          <table:table-cell table:formula="of:=[.D50]-[.D49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9" office:value-type="float" office:value="2401" calcext:value-type="float">
            <text:p>240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77893518518519" calcext:value-type="float">
            <text:p>0,00027789351851851900</text:p>
          </table:table-cell>
          <table:table-cell table:formula="of:=[.D51]-[.D50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9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83564814814815" calcext:value-type="float">
            <text:p>0,00028356481481481500</text:p>
          </table:table-cell>
          <table:table-cell table:formula="of:=[.D52]-[.D5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9" office:value-type="float" office:value="2499" calcext:value-type="float">
            <text:p>249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89236111111111" calcext:value-type="float">
            <text:p>0,00028923611111111100</text:p>
          </table:table-cell>
          <table:table-cell table:formula="of:=[.D53]-[.D52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9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94907407407407" calcext:value-type="float">
            <text:p>0,00029490740740740700</text:p>
          </table:table-cell>
          <table:table-cell table:formula="of:=[.D54]-[.D53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9" office:value-type="float" office:value="2597" calcext:value-type="float">
            <text:p>259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00578703703704" calcext:value-type="float">
            <text:p>0,00030057870370370400</text:p>
          </table:table-cell>
          <table:table-cell table:formula="of:=[.D55]-[.D5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9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0625" calcext:value-type="float">
            <text:p>0,00030625000000000000</text:p>
          </table:table-cell>
          <table:table-cell table:formula="of:=[.D56]-[.D55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9" office:value-type="float" office:value="2695" calcext:value-type="float">
            <text:p>269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11921296296296" calcext:value-type="float">
            <text:p>0,00031192129629629600</text:p>
          </table:table-cell>
          <table:table-cell table:formula="of:=[.D57]-[.D5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9" office:value-type="float" office:value="2744" calcext:value-type="float">
            <text:p>274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17592592592593" calcext:value-type="float">
            <text:p>0,00031759259259259300</text:p>
          </table:table-cell>
          <table:table-cell table:formula="of:=[.D58]-[.D57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9" office:value-type="float" office:value="2793" calcext:value-type="float">
            <text:p>279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23263888888889" calcext:value-type="float">
            <text:p>0,00032326388888888900</text:p>
          </table:table-cell>
          <table:table-cell table:formula="of:=[.D59]-[.D58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9" office:value-type="float" office:value="2842" calcext:value-type="float">
            <text:p>284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28935185185185" calcext:value-type="float">
            <text:p>0,00032893518518518500</text:p>
          </table:table-cell>
          <table:table-cell table:formula="of:=[.D60]-[.D5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9" office:value-type="float" office:value="2891" calcext:value-type="float">
            <text:p>289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34606481481481" calcext:value-type="float">
            <text:p>0,00033460648148148100</text:p>
          </table:table-cell>
          <table:table-cell table:formula="of:=[.D61]-[.D60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9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40277777777778" calcext:value-type="float">
            <text:p>0,00034027777777777800</text:p>
          </table:table-cell>
          <table:table-cell table:formula="of:=[.D62]-[.D61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9" office:value-type="float" office:value="2989" calcext:value-type="float">
            <text:p>298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45949074074074" calcext:value-type="float">
            <text:p>0,00034594907407407400</text:p>
          </table:table-cell>
          <table:table-cell table:formula="of:=[.D63]-[.D6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9" office:value-type="float" office:value="3038" calcext:value-type="float">
            <text:p>303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5162037037037" calcext:value-type="float">
            <text:p>0,00035162037037037000</text:p>
          </table:table-cell>
          <table:table-cell table:formula="of:=[.D64]-[.D63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9" office:value-type="float" office:value="3087" calcext:value-type="float">
            <text:p>308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57291666666667" calcext:value-type="float">
            <text:p>0,00035729166666666700</text:p>
          </table:table-cell>
          <table:table-cell table:formula="of:=[.D65]-[.D64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9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62962962962963" calcext:value-type="float">
            <text:p>0,00036296296296296300</text:p>
          </table:table-cell>
          <table:table-cell table:formula="of:=[.D66]-[.D6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9" office:value-type="float" office:value="3185" calcext:value-type="float">
            <text:p>318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68634259259259" calcext:value-type="float">
            <text:p>0,00036863425925925900</text:p>
          </table:table-cell>
          <table:table-cell table:formula="of:=[.D67]-[.D66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9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74305555555556" calcext:value-type="float">
            <text:p>0,00037430555555555600</text:p>
          </table:table-cell>
          <table:table-cell table:formula="of:=[.D68]-[.D6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9" office:value-type="float" office:value="3283" calcext:value-type="float">
            <text:p>328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79976851851852" calcext:value-type="float">
            <text:p>0,00037997685185185200</text:p>
          </table:table-cell>
          <table:table-cell table:formula="of:=[.D69]-[.D68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9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85648148148148" calcext:value-type="float">
            <text:p>0,00038564814814814800</text:p>
          </table:table-cell>
          <table:table-cell table:formula="of:=[.D70]-[.D69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9" office:value-type="float" office:value="3381" calcext:value-type="float">
            <text:p>338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91319444444444" calcext:value-type="float">
            <text:p>0,00039131944444444400</text:p>
          </table:table-cell>
          <table:table-cell table:formula="of:=[.D71]-[.D7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9" office:value-type="float" office:value="3430" calcext:value-type="float">
            <text:p>34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96990740740741" calcext:value-type="float">
            <text:p>0,00039699074074074100</text:p>
          </table:table-cell>
          <table:table-cell table:formula="of:=[.D72]-[.D71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9" office:value-type="float" office:value="3479" calcext:value-type="float">
            <text:p>347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02662037037037" calcext:value-type="float">
            <text:p>0,00040266203703703700</text:p>
          </table:table-cell>
          <table:table-cell table:formula="of:=[.D73]-[.D72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9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08333333333333" calcext:value-type="float">
            <text:p>0,00040833333333333300</text:p>
          </table:table-cell>
          <table:table-cell table:formula="of:=[.D74]-[.D7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9" office:value-type="float" office:value="3577" calcext:value-type="float">
            <text:p>357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1400462962963" calcext:value-type="float">
            <text:p>0,00041400462962963000</text:p>
          </table:table-cell>
          <table:table-cell table:formula="of:=[.D75]-[.D74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9" office:value-type="float" office:value="3626" calcext:value-type="float">
            <text:p>362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19675925925926" calcext:value-type="float">
            <text:p>0,00041967592592592600</text:p>
          </table:table-cell>
          <table:table-cell table:formula="of:=[.D76]-[.D7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9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25347222222222" calcext:value-type="float">
            <text:p>0,00042534722222222200</text:p>
          </table:table-cell>
          <table:table-cell table:formula="of:=[.D77]-[.D76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9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31018518518519" calcext:value-type="float">
            <text:p>0,00043101851851851800</text:p>
          </table:table-cell>
          <table:table-cell table:formula="of:=[.D78]-[.D77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9" office:value-type="float" office:value="3773" calcext:value-type="float">
            <text:p>377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36689814814815" calcext:value-type="float">
            <text:p>0,00043668981481481500</text:p>
          </table:table-cell>
          <table:table-cell table:formula="of:=[.D79]-[.D7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9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42361111111111" calcext:value-type="float">
            <text:p>0,00044236111111111100</text:p>
          </table:table-cell>
          <table:table-cell table:formula="of:=[.D80]-[.D79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9" office:value-type="float" office:value="3871" calcext:value-type="float">
            <text:p>387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48032407407407" calcext:value-type="float">
            <text:p>0,00044803240740740700</text:p>
          </table:table-cell>
          <table:table-cell table:formula="of:=[.D81]-[.D80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9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53703703703704" calcext:value-type="float">
            <text:p>0,00045370370370370400</text:p>
          </table:table-cell>
          <table:table-cell table:formula="of:=[.D82]-[.D8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9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59375" calcext:value-type="float">
            <text:p>0,00045937500000000000</text:p>
          </table:table-cell>
          <table:table-cell table:formula="of:=[.D83]-[.D82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9" office:value-type="float" office:value="4018" calcext:value-type="float">
            <text:p>401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65046296296296" calcext:value-type="float">
            <text:p>0,00046504629629629600</text:p>
          </table:table-cell>
          <table:table-cell table:formula="of:=[.D84]-[.D83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9" office:value-type="float" office:value="4067" calcext:value-type="float">
            <text:p>406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70717592592593" calcext:value-type="float">
            <text:p>0,00047071759259259300</text:p>
          </table:table-cell>
          <table:table-cell table:formula="of:=[.D85]-[.D8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9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76388888888889" calcext:value-type="float">
            <text:p>0,00047638888888888900</text:p>
          </table:table-cell>
          <table:table-cell table:formula="of:=[.D86]-[.D85]" office:value-type="float" office:value="0.00000567129629629632" calcext:value-type="float">
            <text:p>0,00000567129629629632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9" office:value-type="float" office:value="4165" calcext:value-type="float">
            <text:p>416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82060185185185" calcext:value-type="float">
            <text:p>0,00048206018518518500</text:p>
          </table:table-cell>
          <table:table-cell table:formula="of:=[.D87]-[.D8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9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87731481481481" calcext:value-type="float">
            <text:p>0,00048773148148148100</text:p>
          </table:table-cell>
          <table:table-cell table:formula="of:=[.D88]-[.D8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9" office:value-type="float" office:value="4263" calcext:value-type="float">
            <text:p>426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93402777777778" calcext:value-type="float">
            <text:p>0,00049340277777777800</text:p>
          </table:table-cell>
          <table:table-cell table:formula="of:=[.D89]-[.D8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9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99074074074074" calcext:value-type="float">
            <text:p>0,00049907407407407400</text:p>
          </table:table-cell>
          <table:table-cell table:formula="of:=[.D90]-[.D8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9" office:value-type="float" office:value="4361" calcext:value-type="float">
            <text:p>436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0474537037037" calcext:value-type="float">
            <text:p>0,00050474537037037000</text:p>
          </table:table-cell>
          <table:table-cell table:formula="of:=[.D91]-[.D9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9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10416666666667" calcext:value-type="float">
            <text:p>0,00051041666666666700</text:p>
          </table:table-cell>
          <table:table-cell table:formula="of:=[.D92]-[.D9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9" office:value-type="float" office:value="4459" calcext:value-type="float">
            <text:p>445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16087962962963" calcext:value-type="float">
            <text:p>0,00051608796296296300</text:p>
          </table:table-cell>
          <table:table-cell table:formula="of:=[.D93]-[.D9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9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21759259259259" calcext:value-type="float">
            <text:p>0,00052175925925925900</text:p>
          </table:table-cell>
          <table:table-cell table:formula="of:=[.D94]-[.D9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9" office:value-type="float" office:value="4557" calcext:value-type="float">
            <text:p>455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27430555555556" calcext:value-type="float">
            <text:p>0,00052743055555555600</text:p>
          </table:table-cell>
          <table:table-cell table:formula="of:=[.D95]-[.D9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9" office:value-type="float" office:value="4606" calcext:value-type="float">
            <text:p>460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33101851851852" calcext:value-type="float">
            <text:p>0,00053310185185185200</text:p>
          </table:table-cell>
          <table:table-cell table:formula="of:=[.D96]-[.D9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9" office:value-type="float" office:value="4655" calcext:value-type="float">
            <text:p>465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38773148148148" calcext:value-type="float">
            <text:p>0,00053877314814814800</text:p>
          </table:table-cell>
          <table:table-cell table:formula="of:=[.D97]-[.D9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9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44444444444444" calcext:value-type="float">
            <text:p>0,00054444444444444400</text:p>
          </table:table-cell>
          <table:table-cell table:formula="of:=[.D98]-[.D9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9" office:value-type="float" office:value="4753" calcext:value-type="float">
            <text:p>475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50115740740741" calcext:value-type="float">
            <text:p>0,00055011574074074100</text:p>
          </table:table-cell>
          <table:table-cell table:formula="of:=[.D99]-[.D9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9" office:value-type="float" office:value="4802" calcext:value-type="float">
            <text:p>480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55787037037037" calcext:value-type="float">
            <text:p>0,00055578703703703700</text:p>
          </table:table-cell>
          <table:table-cell table:formula="of:=[.D100]-[.D9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9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61458333333333" calcext:value-type="float">
            <text:p>0,00056145833333333300</text:p>
          </table:table-cell>
          <table:table-cell table:formula="of:=[.D101]-[.D10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9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6712962962963" calcext:value-type="float">
            <text:p>0,00056712962962963000</text:p>
          </table:table-cell>
          <table:table-cell table:formula="of:=[.D102]-[.D10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9" office:value-type="float" office:value="4949" calcext:value-type="float">
            <text:p>494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72800925925926" calcext:value-type="float">
            <text:p>0,00057280092592592600</text:p>
          </table:table-cell>
          <table:table-cell table:formula="of:=[.D103]-[.D10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9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78472222222222" calcext:value-type="float">
            <text:p>0,00057847222222222200</text:p>
          </table:table-cell>
          <table:table-cell table:formula="of:=[.D104]-[.D10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9" office:value-type="float" office:value="5047" calcext:value-type="float">
            <text:p>504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84143518518519" calcext:value-type="float">
            <text:p>0,00058414351851851900</text:p>
          </table:table-cell>
          <table:table-cell table:formula="of:=[.D105]-[.D10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9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89814814814815" calcext:value-type="float">
            <text:p>0,00058981481481481500</text:p>
          </table:table-cell>
          <table:table-cell table:formula="of:=[.D106]-[.D10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9" office:value-type="float" office:value="5145" calcext:value-type="float">
            <text:p>514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95486111111111" calcext:value-type="float">
            <text:p>0,00059548611111111100</text:p>
          </table:table-cell>
          <table:table-cell table:formula="of:=[.D107]-[.D10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9" office:value-type="float" office:value="5194" calcext:value-type="float">
            <text:p>519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01157407407408" calcext:value-type="float">
            <text:p>0,00060115740740740800</text:p>
          </table:table-cell>
          <table:table-cell table:formula="of:=[.D108]-[.D10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9" office:value-type="float" office:value="5243" calcext:value-type="float">
            <text:p>524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06828703703704" calcext:value-type="float">
            <text:p>0,00060682870370370400</text:p>
          </table:table-cell>
          <table:table-cell table:formula="of:=[.D109]-[.D10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9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125" calcext:value-type="float">
            <text:p>0,00061250000000000000</text:p>
          </table:table-cell>
          <table:table-cell table:formula="of:=[.D110]-[.D10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9" office:value-type="float" office:value="5341" calcext:value-type="float">
            <text:p>534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18171296296296" calcext:value-type="float">
            <text:p>0,00061817129629629600</text:p>
          </table:table-cell>
          <table:table-cell table:formula="of:=[.D111]-[.D11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9" office:value-type="float" office:value="5390" calcext:value-type="float">
            <text:p>53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23842592592593" calcext:value-type="float">
            <text:p>0,00062384259259259300</text:p>
          </table:table-cell>
          <table:table-cell table:formula="of:=[.D112]-[.D11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9" office:value-type="float" office:value="5439" calcext:value-type="float">
            <text:p>543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29513888888889" calcext:value-type="float">
            <text:p>0,00062951388888888900</text:p>
          </table:table-cell>
          <table:table-cell table:formula="of:=[.D113]-[.D11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9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35185185185185" calcext:value-type="float">
            <text:p>0,00063518518518518500</text:p>
          </table:table-cell>
          <table:table-cell table:formula="of:=[.D114]-[.D11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9" office:value-type="float" office:value="5537" calcext:value-type="float">
            <text:p>553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40856481481482" calcext:value-type="float">
            <text:p>0,00064085648148148200</text:p>
          </table:table-cell>
          <table:table-cell table:formula="of:=[.D115]-[.D11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9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46527777777778" calcext:value-type="float">
            <text:p>0,00064652777777777800</text:p>
          </table:table-cell>
          <table:table-cell table:formula="of:=[.D116]-[.D11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9" office:value-type="float" office:value="5635" calcext:value-type="float">
            <text:p>563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52199074074074" calcext:value-type="float">
            <text:p>0,00065219907407407400</text:p>
          </table:table-cell>
          <table:table-cell table:formula="of:=[.D117]-[.D11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9" office:value-type="float" office:value="5684" calcext:value-type="float">
            <text:p>568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5787037037037" calcext:value-type="float">
            <text:p>0,00065787037037037000</text:p>
          </table:table-cell>
          <table:table-cell table:formula="of:=[.D118]-[.D11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9" office:value-type="float" office:value="5733" calcext:value-type="float">
            <text:p>573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63541666666667" calcext:value-type="float">
            <text:p>0,00066354166666666700</text:p>
          </table:table-cell>
          <table:table-cell table:formula="of:=[.D119]-[.D11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9" office:value-type="float" office:value="5782" calcext:value-type="float">
            <text:p>578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69212962962963" calcext:value-type="float">
            <text:p>0,00066921296296296300</text:p>
          </table:table-cell>
          <table:table-cell table:formula="of:=[.D120]-[.D11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9" office:value-type="float" office:value="5831" calcext:value-type="float">
            <text:p>583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74884259259259" calcext:value-type="float">
            <text:p>0,00067488425925925900</text:p>
          </table:table-cell>
          <table:table-cell table:formula="of:=[.D121]-[.D12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9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80555555555556" calcext:value-type="float">
            <text:p>0,00068055555555555600</text:p>
          </table:table-cell>
          <table:table-cell table:formula="of:=[.D122]-[.D12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9" office:value-type="float" office:value="5929" calcext:value-type="float">
            <text:p>592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86226851851852" calcext:value-type="float">
            <text:p>0,00068622685185185200</text:p>
          </table:table-cell>
          <table:table-cell table:formula="of:=[.D123]-[.D12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9" office:value-type="float" office:value="5978" calcext:value-type="float">
            <text:p>597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91898148148148" calcext:value-type="float">
            <text:p>0,00069189814814814800</text:p>
          </table:table-cell>
          <table:table-cell table:formula="of:=[.D124]-[.D12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9" office:value-type="float" office:value="6027" calcext:value-type="float">
            <text:p>602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97569444444445" calcext:value-type="float">
            <text:p>0,00069756944444444500</text:p>
          </table:table-cell>
          <table:table-cell table:formula="of:=[.D125]-[.D12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9" office:value-type="float" office:value="6076" calcext:value-type="float">
            <text:p>607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03240740740741" calcext:value-type="float">
            <text:p>0,00070324074074074100</text:p>
          </table:table-cell>
          <table:table-cell table:formula="of:=[.D126]-[.D12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9" office:value-type="float" office:value="6125" calcext:value-type="float">
            <text:p>6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08912037037037" calcext:value-type="float">
            <text:p>0,00070891203703703700</text:p>
          </table:table-cell>
          <table:table-cell table:formula="of:=[.D127]-[.D12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9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14583333333333" calcext:value-type="float">
            <text:p>0,00071458333333333300</text:p>
          </table:table-cell>
          <table:table-cell table:formula="of:=[.D128]-[.D12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9" office:value-type="float" office:value="6223" calcext:value-type="float">
            <text:p>622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2025462962963" calcext:value-type="float">
            <text:p>0,00072025462962963000</text:p>
          </table:table-cell>
          <table:table-cell table:formula="of:=[.D129]-[.D12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9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25925925925926" calcext:value-type="float">
            <text:p>0,00072592592592592600</text:p>
          </table:table-cell>
          <table:table-cell table:formula="of:=[.D130]-[.D12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9" office:value-type="float" office:value="6321" calcext:value-type="float">
            <text:p>632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31597222222222" calcext:value-type="float">
            <text:p>0,00073159722222222200</text:p>
          </table:table-cell>
          <table:table-cell table:formula="of:=[.D131]-[.D13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9" office:value-type="float" office:value="6370" calcext:value-type="float">
            <text:p>63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37268518518519" calcext:value-type="float">
            <text:p>0,00073726851851851900</text:p>
          </table:table-cell>
          <table:table-cell table:formula="of:=[.D132]-[.D13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9" office:value-type="float" office:value="6419" calcext:value-type="float">
            <text:p>641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42939814814815" calcext:value-type="float">
            <text:p>0,00074293981481481500</text:p>
          </table:table-cell>
          <table:table-cell table:formula="of:=[.D133]-[.D13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9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48611111111111" calcext:value-type="float">
            <text:p>0,00074861111111111100</text:p>
          </table:table-cell>
          <table:table-cell table:formula="of:=[.D134]-[.D13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9" office:value-type="float" office:value="6517" calcext:value-type="float">
            <text:p>651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54282407407407" calcext:value-type="float">
            <text:p>0,00075428240740740700</text:p>
          </table:table-cell>
          <table:table-cell table:formula="of:=[.D135]-[.D13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9" office:value-type="float" office:value="6566" calcext:value-type="float">
            <text:p>656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59953703703704" calcext:value-type="float">
            <text:p>0,00075995370370370400</text:p>
          </table:table-cell>
          <table:table-cell table:formula="of:=[.D136]-[.D13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9" office:value-type="float" office:value="6615" calcext:value-type="float">
            <text:p>661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65625" calcext:value-type="float">
            <text:p>0,00076562500000000000</text:p>
          </table:table-cell>
          <table:table-cell table:formula="of:=[.D137]-[.D13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9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771296296296296" calcext:value-type="float">
            <text:p>0,00077129629629629600</text:p>
          </table:table-cell>
          <table:table-cell table:formula="of:=[.D138]-[.D13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9" office:value-type="float" office:value="6713" calcext:value-type="float">
            <text:p>671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776967592592593" calcext:value-type="float">
            <text:p>0,00077696759259259200</text:p>
          </table:table-cell>
          <table:table-cell table:formula="of:=[.D139]-[.D13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9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82638888888889" calcext:value-type="float">
            <text:p>0,00078263888888888900</text:p>
          </table:table-cell>
          <table:table-cell table:formula="of:=[.D140]-[.D13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9" office:value-type="float" office:value="6811" calcext:value-type="float">
            <text:p>681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88310185185185" calcext:value-type="float">
            <text:p>0,00078831018518518500</text:p>
          </table:table-cell>
          <table:table-cell table:formula="of:=[.D141]-[.D14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9" office:value-type="float" office:value="6860" calcext:value-type="float">
            <text:p>68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93981481481481" calcext:value-type="float">
            <text:p>0,00079398148148148100</text:p>
          </table:table-cell>
          <table:table-cell table:formula="of:=[.D142]-[.D14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9" office:value-type="float" office:value="6909" calcext:value-type="float">
            <text:p>690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99652777777778" calcext:value-type="float">
            <text:p>0,00079965277777777800</text:p>
          </table:table-cell>
          <table:table-cell table:formula="of:=[.D143]-[.D14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9" office:value-type="float" office:value="6958" calcext:value-type="float">
            <text:p>695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05324074074074" calcext:value-type="float">
            <text:p>0,00080532407407407400</text:p>
          </table:table-cell>
          <table:table-cell table:formula="of:=[.D144]-[.D14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9" office:value-type="float" office:value="7007" calcext:value-type="float">
            <text:p>700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1099537037037" calcext:value-type="float">
            <text:p>0,00081099537037037100</text:p>
          </table:table-cell>
          <table:table-cell table:formula="of:=[.D145]-[.D14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9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16666666666667" calcext:value-type="float">
            <text:p>0,00081666666666666700</text:p>
          </table:table-cell>
          <table:table-cell table:formula="of:=[.D146]-[.D14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9" office:value-type="float" office:value="7105" calcext:value-type="float">
            <text:p>710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22337962962963" calcext:value-type="float">
            <text:p>0,00082233796296296300</text:p>
          </table:table-cell>
          <table:table-cell table:formula="of:=[.D147]-[.D14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9" office:value-type="float" office:value="7154" calcext:value-type="float">
            <text:p>715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28009259259259" calcext:value-type="float">
            <text:p>0,00082800925925925900</text:p>
          </table:table-cell>
          <table:table-cell table:formula="of:=[.D148]-[.D14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9" office:value-type="float" office:value="7203" calcext:value-type="float">
            <text:p>720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833680555555556" calcext:value-type="float">
            <text:p>0,00083368055555555600</text:p>
          </table:table-cell>
          <table:table-cell table:formula="of:=[.D149]-[.D14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9" office:value-type="float" office:value="7252" calcext:value-type="float">
            <text:p>725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39351851851852" calcext:value-type="float">
            <text:p>0,00083935185185185200</text:p>
          </table:table-cell>
          <table:table-cell table:formula="of:=[.D150]-[.D14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9" office:value-type="float" office:value="7301" calcext:value-type="float">
            <text:p>730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45023148148148" calcext:value-type="float">
            <text:p>0,00084502314814814800</text:p>
          </table:table-cell>
          <table:table-cell table:formula="of:=[.D151]-[.D150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9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850694444444444" calcext:value-type="float">
            <text:p>0,00085069444444444400</text:p>
          </table:table-cell>
          <table:table-cell table:formula="of:=[.D152]-[.D15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9" office:value-type="float" office:value="7399" calcext:value-type="float">
            <text:p>739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56365740740741" calcext:value-type="float">
            <text:p>0,00085636574074074100</text:p>
          </table:table-cell>
          <table:table-cell table:formula="of:=[.D153]-[.D15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9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62037037037037" calcext:value-type="float">
            <text:p>0,00086203703703703700</text:p>
          </table:table-cell>
          <table:table-cell table:formula="of:=[.D154]-[.D153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9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867708333333333" calcext:value-type="float">
            <text:p>0,00086770833333333300</text:p>
          </table:table-cell>
          <table:table-cell table:formula="of:=[.D155]-[.D15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9" office:value-type="float" office:value="7546" calcext:value-type="float">
            <text:p>754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87337962962963" calcext:value-type="float">
            <text:p>0,00087337962962963000</text:p>
          </table:table-cell>
          <table:table-cell table:formula="of:=[.D156]-[.D15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9" office:value-type="float" office:value="7595" calcext:value-type="float">
            <text:p>759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879050925925926" calcext:value-type="float">
            <text:p>0,00087905092592592600</text:p>
          </table:table-cell>
          <table:table-cell table:formula="of:=[.D157]-[.D156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9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884722222222222" calcext:value-type="float">
            <text:p>0,00088472222222222200</text:p>
          </table:table-cell>
          <table:table-cell table:formula="of:=[.D158]-[.D15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9" office:value-type="float" office:value="7693" calcext:value-type="float">
            <text:p>769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890393518518519" calcext:value-type="float">
            <text:p>0,00089039351851851900</text:p>
          </table:table-cell>
          <table:table-cell table:formula="of:=[.D159]-[.D15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9" office:value-type="float" office:value="7742" calcext:value-type="float">
            <text:p>774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96064814814815" calcext:value-type="float">
            <text:p>0,00089606481481481500</text:p>
          </table:table-cell>
          <table:table-cell table:formula="of:=[.D160]-[.D15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9" office:value-type="float" office:value="7791" calcext:value-type="float">
            <text:p>779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01736111111111" calcext:value-type="float">
            <text:p>0,00090173611111111100</text:p>
          </table:table-cell>
          <table:table-cell table:formula="of:=[.D161]-[.D16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9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907407407407407" calcext:value-type="float">
            <text:p>0,00090740740740740800</text:p>
          </table:table-cell>
          <table:table-cell table:formula="of:=[.D162]-[.D16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9" office:value-type="float" office:value="7889" calcext:value-type="float">
            <text:p>788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913078703703704" calcext:value-type="float">
            <text:p>0,00091307870370370400</text:p>
          </table:table-cell>
          <table:table-cell table:formula="of:=[.D163]-[.D16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9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1875" calcext:value-type="float">
            <text:p>0,00091875000000000000</text:p>
          </table:table-cell>
          <table:table-cell table:formula="of:=[.D164]-[.D16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9" office:value-type="float" office:value="7987" calcext:value-type="float">
            <text:p>798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24421296296296" calcext:value-type="float">
            <text:p>0,00092442129629629600</text:p>
          </table:table-cell>
          <table:table-cell table:formula="of:=[.D165]-[.D164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9" office:value-type="float" office:value="8036" calcext:value-type="float">
            <text:p>803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930092592592593" calcext:value-type="float">
            <text:p>0,00093009259259259300</text:p>
          </table:table-cell>
          <table:table-cell table:formula="of:=[.D166]-[.D165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9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935763888888889" calcext:value-type="float">
            <text:p>0,00093576388888888900</text:p>
          </table:table-cell>
          <table:table-cell table:formula="of:=[.D167]-[.D16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9" office:value-type="float" office:value="8134" calcext:value-type="float">
            <text:p>813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41435185185185" calcext:value-type="float">
            <text:p>0,00094143518518518500</text:p>
          </table:table-cell>
          <table:table-cell table:formula="of:=[.D168]-[.D167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9" office:value-type="float" office:value="8183" calcext:value-type="float">
            <text:p>818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947106481481482" calcext:value-type="float">
            <text:p>0,00094710648148148100</text:p>
          </table:table-cell>
          <table:table-cell table:formula="of:=[.D169]-[.D168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9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952777777777778" calcext:value-type="float">
            <text:p>0,00095277777777777800</text:p>
          </table:table-cell>
          <table:table-cell table:formula="of:=[.D170]-[.D169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9" office:value-type="float" office:value="8281" calcext:value-type="float">
            <text:p>828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958449074074074" calcext:value-type="float">
            <text:p>0,00095844907407407400</text:p>
          </table:table-cell>
          <table:table-cell table:formula="of:=[.D171]-[.D17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9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96412037037037" calcext:value-type="float">
            <text:p>0,00096412037037037000</text:p>
          </table:table-cell>
          <table:table-cell table:formula="of:=[.D172]-[.D171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9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969791666666667" calcext:value-type="float">
            <text:p>0,00096979166666666700</text:p>
          </table:table-cell>
          <table:table-cell table:formula="of:=[.D173]-[.D172]" office:value-type="float" office:value="0.00000567129629629626" calcext:value-type="float">
            <text:p>0,00000567129629629626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9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975462962962963" calcext:value-type="float">
            <text:p>0,00097546296296296300</text:p>
          </table:table-cell>
          <table:table-cell table:formula="of:=[.D174]-[.D17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9" office:value-type="float" office:value="8477" calcext:value-type="float">
            <text:p>847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981134259259259" calcext:value-type="float">
            <text:p>0,00098113425925925900</text:p>
          </table:table-cell>
          <table:table-cell table:formula="of:=[.D175]-[.D17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9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986805555555556" calcext:value-type="float">
            <text:p>0,00098680555555555600</text:p>
          </table:table-cell>
          <table:table-cell table:formula="of:=[.D176]-[.D17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9" office:value-type="float" office:value="8575" calcext:value-type="float">
            <text:p>85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992476851851852" calcext:value-type="float">
            <text:p>0,00099247685185185200</text:p>
          </table:table-cell>
          <table:table-cell table:formula="of:=[.D177]-[.D17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9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998148148148148" calcext:value-type="float">
            <text:p>0,00099814814814814800</text:p>
          </table:table-cell>
          <table:table-cell table:formula="of:=[.D178]-[.D17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9" office:value-type="float" office:value="8673" calcext:value-type="float">
            <text:p>867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00381944444444" calcext:value-type="float">
            <text:p>0,00100381944444444000</text:p>
          </table:table-cell>
          <table:table-cell table:formula="of:=[.D179]-[.D17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9" office:value-type="float" office:value="8722" calcext:value-type="float">
            <text:p>872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00949074074074" calcext:value-type="float">
            <text:p>0,00100949074074074000</text:p>
          </table:table-cell>
          <table:table-cell table:formula="of:=[.D180]-[.D17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9" office:value-type="float" office:value="8771" calcext:value-type="float">
            <text:p>877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01516203703704" calcext:value-type="float">
            <text:p>0,00101516203703704000</text:p>
          </table:table-cell>
          <table:table-cell table:formula="of:=[.D181]-[.D18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9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02083333333333" calcext:value-type="float">
            <text:p>0,00102083333333333000</text:p>
          </table:table-cell>
          <table:table-cell table:formula="of:=[.D182]-[.D18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9" office:value-type="float" office:value="8869" calcext:value-type="float">
            <text:p>886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02650462962963" calcext:value-type="float">
            <text:p>0,00102650462962963000</text:p>
          </table:table-cell>
          <table:table-cell table:formula="of:=[.D183]-[.D18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9" office:value-type="float" office:value="8918" calcext:value-type="float">
            <text:p>891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03217592592593" calcext:value-type="float">
            <text:p>0,00103217592592593000</text:p>
          </table:table-cell>
          <table:table-cell table:formula="of:=[.D184]-[.D18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9" office:value-type="float" office:value="8967" calcext:value-type="float">
            <text:p>896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03784722222222" calcext:value-type="float">
            <text:p>0,00103784722222222000</text:p>
          </table:table-cell>
          <table:table-cell table:formula="of:=[.D185]-[.D18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9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04351851851852" calcext:value-type="float">
            <text:p>0,00104351851851852000</text:p>
          </table:table-cell>
          <table:table-cell table:formula="of:=[.D186]-[.D18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9" office:value-type="float" office:value="9065" calcext:value-type="float">
            <text:p>906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04918981481481" calcext:value-type="float">
            <text:p>0,00104918981481481000</text:p>
          </table:table-cell>
          <table:table-cell table:formula="of:=[.D187]-[.D18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9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05486111111111" calcext:value-type="float">
            <text:p>0,00105486111111111000</text:p>
          </table:table-cell>
          <table:table-cell table:formula="of:=[.D188]-[.D18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9" office:value-type="float" office:value="9163" calcext:value-type="float">
            <text:p>916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06053240740741" calcext:value-type="float">
            <text:p>0,00106053240740741000</text:p>
          </table:table-cell>
          <table:table-cell table:formula="of:=[.D189]-[.D18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9" office:value-type="float" office:value="9212" calcext:value-type="float">
            <text:p>921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0662037037037" calcext:value-type="float">
            <text:p>0,00106620370370370000</text:p>
          </table:table-cell>
          <table:table-cell table:formula="of:=[.D190]-[.D18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9" office:value-type="float" office:value="9261" calcext:value-type="float">
            <text:p>926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071875" calcext:value-type="float">
            <text:p>0,00107187500000000000</text:p>
          </table:table-cell>
          <table:table-cell table:formula="of:=[.D191]-[.D19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9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0775462962963" calcext:value-type="float">
            <text:p>0,00107754629629630000</text:p>
          </table:table-cell>
          <table:table-cell table:formula="of:=[.D192]-[.D19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9" office:value-type="float" office:value="9359" calcext:value-type="float">
            <text:p>935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08321759259259" calcext:value-type="float">
            <text:p>0,00108321759259259000</text:p>
          </table:table-cell>
          <table:table-cell table:formula="of:=[.D193]-[.D19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9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08888888888889" calcext:value-type="float">
            <text:p>0,00108888888888889000</text:p>
          </table:table-cell>
          <table:table-cell table:formula="of:=[.D194]-[.D19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9" office:value-type="float" office:value="9457" calcext:value-type="float">
            <text:p>945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09456018518519" calcext:value-type="float">
            <text:p>0,00109456018518519000</text:p>
          </table:table-cell>
          <table:table-cell table:formula="of:=[.D195]-[.D19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9" office:value-type="float" office:value="9506" calcext:value-type="float">
            <text:p>950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10023148148148" calcext:value-type="float">
            <text:p>0,00110023148148148000</text:p>
          </table:table-cell>
          <table:table-cell table:formula="of:=[.D196]-[.D19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9" office:value-type="float" office:value="9555" calcext:value-type="float">
            <text:p>955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10590277777778" calcext:value-type="float">
            <text:p>0,00110590277777778000</text:p>
          </table:table-cell>
          <table:table-cell table:formula="of:=[.D197]-[.D19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9" office:value-type="float" office:value="9604" calcext:value-type="float">
            <text:p>960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11157407407407" calcext:value-type="float">
            <text:p>0,00111157407407407000</text:p>
          </table:table-cell>
          <table:table-cell table:formula="of:=[.D198]-[.D19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9" office:value-type="float" office:value="9653" calcext:value-type="float">
            <text:p>965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11724537037037" calcext:value-type="float">
            <text:p>0,00111724537037037000</text:p>
          </table:table-cell>
          <table:table-cell table:formula="of:=[.D199]-[.D19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9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12291666666667" calcext:value-type="float">
            <text:p>0,00112291666666667000</text:p>
          </table:table-cell>
          <table:table-cell table:formula="of:=[.D200]-[.D19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9" office:value-type="float" office:value="9751" calcext:value-type="float">
            <text:p>975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12858796296296" calcext:value-type="float">
            <text:p>0,00112858796296296000</text:p>
          </table:table-cell>
          <table:table-cell table:formula="of:=[.D201]-[.D20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9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13425925925926" calcext:value-type="float">
            <text:p>0,00113425925925926000</text:p>
          </table:table-cell>
          <table:table-cell table:formula="of:=[.D202]-[.D20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9" office:value-type="float" office:value="9849" calcext:value-type="float">
            <text:p>984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13993055555556" calcext:value-type="float">
            <text:p>0,00113993055555556000</text:p>
          </table:table-cell>
          <table:table-cell table:formula="of:=[.D203]-[.D20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9" office:value-type="float" office:value="9898" calcext:value-type="float">
            <text:p>989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14560185185185" calcext:value-type="float">
            <text:p>0,00114560185185185000</text:p>
          </table:table-cell>
          <table:table-cell table:formula="of:=[.D204]-[.D20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9" office:value-type="float" office:value="9947" calcext:value-type="float">
            <text:p>994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15127314814815" calcext:value-type="float">
            <text:p>0,00115127314814815000</text:p>
          </table:table-cell>
          <table:table-cell table:formula="of:=[.D205]-[.D20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9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15694444444444" calcext:value-type="float">
            <text:p>0,00115694444444444000</text:p>
          </table:table-cell>
          <table:table-cell table:formula="of:=[.D206]-[.D20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9" office:value-type="float" office:value="10045" calcext:value-type="float">
            <text:p>1004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16261574074074" calcext:value-type="float">
            <text:p>0,00116261574074074000</text:p>
          </table:table-cell>
          <table:table-cell table:formula="of:=[.D207]-[.D20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9" office:value-type="float" office:value="10094" calcext:value-type="float">
            <text:p>1009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16828703703704" calcext:value-type="float">
            <text:p>0,00116828703703704000</text:p>
          </table:table-cell>
          <table:table-cell table:formula="of:=[.D208]-[.D20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9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17395833333333" calcext:value-type="float">
            <text:p>0,00117395833333333000</text:p>
          </table:table-cell>
          <table:table-cell table:formula="of:=[.D209]-[.D20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9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17962962962963" calcext:value-type="float">
            <text:p>0,00117962962962963000</text:p>
          </table:table-cell>
          <table:table-cell table:formula="of:=[.D210]-[.D20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9" office:value-type="float" office:value="10241" calcext:value-type="float">
            <text:p>1024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18530092592593" calcext:value-type="float">
            <text:p>0,00118530092592593000</text:p>
          </table:table-cell>
          <table:table-cell table:formula="of:=[.D211]-[.D21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9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19097222222222" calcext:value-type="float">
            <text:p>0,00119097222222222000</text:p>
          </table:table-cell>
          <table:table-cell table:formula="of:=[.D212]-[.D21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9" office:value-type="float" office:value="10339" calcext:value-type="float">
            <text:p>1033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19664351851852" calcext:value-type="float">
            <text:p>0,00119664351851852000</text:p>
          </table:table-cell>
          <table:table-cell table:formula="of:=[.D213]-[.D21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9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20231481481482" calcext:value-type="float">
            <text:p>0,00120231481481482000</text:p>
          </table:table-cell>
          <table:table-cell table:formula="of:=[.D214]-[.D21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9" office:value-type="float" office:value="10437" calcext:value-type="float">
            <text:p>1043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20798611111111" calcext:value-type="float">
            <text:p>0,00120798611111111000</text:p>
          </table:table-cell>
          <table:table-cell table:formula="of:=[.D215]-[.D21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9" office:value-type="float" office:value="10486" calcext:value-type="float">
            <text:p>1048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21365740740741" calcext:value-type="float">
            <text:p>0,00121365740740741000</text:p>
          </table:table-cell>
          <table:table-cell table:formula="of:=[.D216]-[.D21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9" office:value-type="float" office:value="10535" calcext:value-type="float">
            <text:p>1053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2193287037037" calcext:value-type="float">
            <text:p>0,00121932870370370000</text:p>
          </table:table-cell>
          <table:table-cell table:formula="of:=[.D217]-[.D21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9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225" calcext:value-type="float">
            <text:p>0,00122500000000000000</text:p>
          </table:table-cell>
          <table:table-cell table:formula="of:=[.D218]-[.D21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9" office:value-type="float" office:value="10633" calcext:value-type="float">
            <text:p>1063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2306712962963" calcext:value-type="float">
            <text:p>0,00123067129629630000</text:p>
          </table:table-cell>
          <table:table-cell table:formula="of:=[.D219]-[.D21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9" office:value-type="float" office:value="10682" calcext:value-type="float">
            <text:p>1068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23634259259259" calcext:value-type="float">
            <text:p>0,00123634259259259000</text:p>
          </table:table-cell>
          <table:table-cell table:formula="of:=[.D220]-[.D21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9" office:value-type="float" office:value="10731" calcext:value-type="float">
            <text:p>1073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24201388888889" calcext:value-type="float">
            <text:p>0,00124201388888889000</text:p>
          </table:table-cell>
          <table:table-cell table:formula="of:=[.D221]-[.D22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9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24768518518519" calcext:value-type="float">
            <text:p>0,00124768518518519000</text:p>
          </table:table-cell>
          <table:table-cell table:formula="of:=[.D222]-[.D22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9" office:value-type="float" office:value="10829" calcext:value-type="float">
            <text:p>1082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25335648148148" calcext:value-type="float">
            <text:p>0,00125335648148148000</text:p>
          </table:table-cell>
          <table:table-cell table:formula="of:=[.D223]-[.D22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9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25902777777778" calcext:value-type="float">
            <text:p>0,00125902777777778000</text:p>
          </table:table-cell>
          <table:table-cell table:formula="of:=[.D224]-[.D22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9" office:value-type="float" office:value="10927" calcext:value-type="float">
            <text:p>1092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26469907407407" calcext:value-type="float">
            <text:p>0,00126469907407407000</text:p>
          </table:table-cell>
          <table:table-cell table:formula="of:=[.D225]-[.D22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9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27037037037037" calcext:value-type="float">
            <text:p>0,00127037037037037000</text:p>
          </table:table-cell>
          <table:table-cell table:formula="of:=[.D226]-[.D22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9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27604166666667" calcext:value-type="float">
            <text:p>0,00127604166666667000</text:p>
          </table:table-cell>
          <table:table-cell table:formula="of:=[.D227]-[.D22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9" office:value-type="float" office:value="11074" calcext:value-type="float">
            <text:p>1107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28171296296296" calcext:value-type="float">
            <text:p>0,00128171296296296000</text:p>
          </table:table-cell>
          <table:table-cell table:formula="of:=[.D228]-[.D22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9" office:value-type="float" office:value="11123" calcext:value-type="float">
            <text:p>1112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28738425925926" calcext:value-type="float">
            <text:p>0,00128738425925926000</text:p>
          </table:table-cell>
          <table:table-cell table:formula="of:=[.D229]-[.D22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9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29305555555556" calcext:value-type="float">
            <text:p>0,00129305555555556000</text:p>
          </table:table-cell>
          <table:table-cell table:formula="of:=[.D230]-[.D22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9" office:value-type="float" office:value="11221" calcext:value-type="float">
            <text:p>1122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29872685185185" calcext:value-type="float">
            <text:p>0,00129872685185185000</text:p>
          </table:table-cell>
          <table:table-cell table:formula="of:=[.D231]-[.D23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9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30439814814815" calcext:value-type="float">
            <text:p>0,00130439814814815000</text:p>
          </table:table-cell>
          <table:table-cell table:formula="of:=[.D232]-[.D23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9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31006944444444" calcext:value-type="float">
            <text:p>0,00131006944444444000</text:p>
          </table:table-cell>
          <table:table-cell table:formula="of:=[.D233]-[.D23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9" office:value-type="float" office:value="11368" calcext:value-type="float">
            <text:p>1136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31574074074074" calcext:value-type="float">
            <text:p>0,00131574074074074000</text:p>
          </table:table-cell>
          <table:table-cell table:formula="of:=[.D234]-[.D23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9" office:value-type="float" office:value="11417" calcext:value-type="float">
            <text:p>1141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32141203703704" calcext:value-type="float">
            <text:p>0,00132141203703704000</text:p>
          </table:table-cell>
          <table:table-cell table:formula="of:=[.D235]-[.D23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9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32708333333333" calcext:value-type="float">
            <text:p>0,00132708333333333000</text:p>
          </table:table-cell>
          <table:table-cell table:formula="of:=[.D236]-[.D23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9" office:value-type="float" office:value="11515" calcext:value-type="float">
            <text:p>1151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33275462962963" calcext:value-type="float">
            <text:p>0,00133275462962963000</text:p>
          </table:table-cell>
          <table:table-cell table:formula="of:=[.D237]-[.D23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9" office:value-type="float" office:value="11564" calcext:value-type="float">
            <text:p>1156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33842592592593" calcext:value-type="float">
            <text:p>0,00133842592592593000</text:p>
          </table:table-cell>
          <table:table-cell table:formula="of:=[.D238]-[.D23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9" office:value-type="float" office:value="11613" calcext:value-type="float">
            <text:p>1161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34409722222222" calcext:value-type="float">
            <text:p>0,00134409722222222000</text:p>
          </table:table-cell>
          <table:table-cell table:formula="of:=[.D239]-[.D23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9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34976851851852" calcext:value-type="float">
            <text:p>0,00134976851851852000</text:p>
          </table:table-cell>
          <table:table-cell table:formula="of:=[.D240]-[.D23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9" office:value-type="float" office:value="11711" calcext:value-type="float">
            <text:p>1171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35543981481481" calcext:value-type="float">
            <text:p>0,00135543981481481000</text:p>
          </table:table-cell>
          <table:table-cell table:formula="of:=[.D241]-[.D24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9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36111111111111" calcext:value-type="float">
            <text:p>0,00136111111111111000</text:p>
          </table:table-cell>
          <table:table-cell table:formula="of:=[.D242]-[.D24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9" office:value-type="float" office:value="11809" calcext:value-type="float">
            <text:p>1180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36678240740741" calcext:value-type="float">
            <text:p>0,00136678240740741000</text:p>
          </table:table-cell>
          <table:table-cell table:formula="of:=[.D243]-[.D24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9" office:value-type="float" office:value="11858" calcext:value-type="float">
            <text:p>1185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3724537037037" calcext:value-type="float">
            <text:p>0,00137245370370370000</text:p>
          </table:table-cell>
          <table:table-cell table:formula="of:=[.D244]-[.D24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9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378125" calcext:value-type="float">
            <text:p>0,00137812500000000000</text:p>
          </table:table-cell>
          <table:table-cell table:formula="of:=[.D245]-[.D24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9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3837962962963" calcext:value-type="float">
            <text:p>0,00138379629629630000</text:p>
          </table:table-cell>
          <table:table-cell table:formula="of:=[.D246]-[.D24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9" office:value-type="float" office:value="12005" calcext:value-type="float">
            <text:p>1200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38946759259259" calcext:value-type="float">
            <text:p>0,00138946759259259000</text:p>
          </table:table-cell>
          <table:table-cell table:formula="of:=[.D247]-[.D24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9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39513888888889" calcext:value-type="float">
            <text:p>0,00139513888888889000</text:p>
          </table:table-cell>
          <table:table-cell table:formula="of:=[.D248]-[.D24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9" office:value-type="float" office:value="12103" calcext:value-type="float">
            <text:p>1210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40081018518519" calcext:value-type="float">
            <text:p>0,00140081018518519000</text:p>
          </table:table-cell>
          <table:table-cell table:formula="of:=[.D249]-[.D24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9" office:value-type="float" office:value="12152" calcext:value-type="float">
            <text:p>1215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40648148148148" calcext:value-type="float">
            <text:p>0,00140648148148148000</text:p>
          </table:table-cell>
          <table:table-cell table:formula="of:=[.D250]-[.D24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9" office:value-type="float" office:value="12201" calcext:value-type="float">
            <text:p>1220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41215277777778" calcext:value-type="float">
            <text:p>0,00141215277777778000</text:p>
          </table:table-cell>
          <table:table-cell table:formula="of:=[.D251]-[.D25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9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41782407407407" calcext:value-type="float">
            <text:p>0,00141782407407407000</text:p>
          </table:table-cell>
          <table:table-cell table:formula="of:=[.D252]-[.D25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9" office:value-type="float" office:value="12299" calcext:value-type="float">
            <text:p>1229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42349537037037" calcext:value-type="float">
            <text:p>0,00142349537037037000</text:p>
          </table:table-cell>
          <table:table-cell table:formula="of:=[.D253]-[.D25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9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42916666666667" calcext:value-type="float">
            <text:p>0,00142916666666667000</text:p>
          </table:table-cell>
          <table:table-cell table:formula="of:=[.D254]-[.D25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9" office:value-type="float" office:value="12397" calcext:value-type="float">
            <text:p>1239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43483796296296" calcext:value-type="float">
            <text:p>0,00143483796296296000</text:p>
          </table:table-cell>
          <table:table-cell table:formula="of:=[.D255]-[.D25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9" office:value-type="float" office:value="12446" calcext:value-type="float">
            <text:p>1244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44050925925926" calcext:value-type="float">
            <text:p>0,00144050925925926000</text:p>
          </table:table-cell>
          <table:table-cell table:formula="of:=[.D256]-[.D25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9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44618055555556" calcext:value-type="float">
            <text:p>0,00144618055555556000</text:p>
          </table:table-cell>
          <table:table-cell table:formula="of:=[.D257]-[.D25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9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45185185185185" calcext:value-type="float">
            <text:p>0,00145185185185185000</text:p>
          </table:table-cell>
          <table:table-cell table:formula="of:=[.D258]-[.D25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9" office:value-type="float" office:value="12593" calcext:value-type="float">
            <text:p>1259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45752314814815" calcext:value-type="float">
            <text:p>0,00145752314814815000</text:p>
          </table:table-cell>
          <table:table-cell table:formula="of:=[.D259]-[.D25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9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46319444444444" calcext:value-type="float">
            <text:p>0,00146319444444444000</text:p>
          </table:table-cell>
          <table:table-cell table:formula="of:=[.D260]-[.D25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9" office:value-type="float" office:value="12691" calcext:value-type="float">
            <text:p>1269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46886574074074" calcext:value-type="float">
            <text:p>0,00146886574074074000</text:p>
          </table:table-cell>
          <table:table-cell table:formula="of:=[.D261]-[.D26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9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47453703703704" calcext:value-type="float">
            <text:p>0,00147453703703704000</text:p>
          </table:table-cell>
          <table:table-cell table:formula="of:=[.D262]-[.D26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9" office:value-type="float" office:value="12789" calcext:value-type="float">
            <text:p>1278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48020833333333" calcext:value-type="float">
            <text:p>0,00148020833333333000</text:p>
          </table:table-cell>
          <table:table-cell table:formula="of:=[.D263]-[.D26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9" office:value-type="float" office:value="12838" calcext:value-type="float">
            <text:p>1283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48587962962963" calcext:value-type="float">
            <text:p>0,00148587962962963000</text:p>
          </table:table-cell>
          <table:table-cell table:formula="of:=[.D264]-[.D26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9" office:value-type="float" office:value="12887" calcext:value-type="float">
            <text:p>1288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49155092592593" calcext:value-type="float">
            <text:p>0,00149155092592593000</text:p>
          </table:table-cell>
          <table:table-cell table:formula="of:=[.D265]-[.D26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9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49722222222222" calcext:value-type="float">
            <text:p>0,00149722222222222000</text:p>
          </table:table-cell>
          <table:table-cell table:formula="of:=[.D266]-[.D26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9" office:value-type="float" office:value="12985" calcext:value-type="float">
            <text:p>1298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50289351851852" calcext:value-type="float">
            <text:p>0,00150289351851852000</text:p>
          </table:table-cell>
          <table:table-cell table:formula="of:=[.D267]-[.D26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9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50856481481481" calcext:value-type="float">
            <text:p>0,00150856481481481000</text:p>
          </table:table-cell>
          <table:table-cell table:formula="of:=[.D268]-[.D26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9" office:value-type="float" office:value="13083" calcext:value-type="float">
            <text:p>1308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51423611111111" calcext:value-type="float">
            <text:p>0,00151423611111111000</text:p>
          </table:table-cell>
          <table:table-cell table:formula="of:=[.D269]-[.D26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9" office:value-type="float" office:value="13132" calcext:value-type="float">
            <text:p>1313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51990740740741" calcext:value-type="float">
            <text:p>0,00151990740740741000</text:p>
          </table:table-cell>
          <table:table-cell table:formula="of:=[.D270]-[.D26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9" office:value-type="float" office:value="13181" calcext:value-type="float">
            <text:p>1318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5255787037037" calcext:value-type="float">
            <text:p>0,00152557870370370000</text:p>
          </table:table-cell>
          <table:table-cell table:formula="of:=[.D271]-[.D27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9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53125" calcext:value-type="float">
            <text:p>0,00153125000000000000</text:p>
          </table:table-cell>
          <table:table-cell table:formula="of:=[.D272]-[.D27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9" office:value-type="float" office:value="13279" calcext:value-type="float">
            <text:p>1327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5369212962963" calcext:value-type="float">
            <text:p>0,00153692129629630000</text:p>
          </table:table-cell>
          <table:table-cell table:formula="of:=[.D273]-[.D27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9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54259259259259" calcext:value-type="float">
            <text:p>0,00154259259259259000</text:p>
          </table:table-cell>
          <table:table-cell table:formula="of:=[.D274]-[.D27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9" office:value-type="float" office:value="13377" calcext:value-type="float">
            <text:p>1337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54826388888889" calcext:value-type="float">
            <text:p>0,00154826388888889000</text:p>
          </table:table-cell>
          <table:table-cell table:formula="of:=[.D275]-[.D27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9" office:value-type="float" office:value="13426" calcext:value-type="float">
            <text:p>1342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55393518518519" calcext:value-type="float">
            <text:p>0,00155393518518518000</text:p>
          </table:table-cell>
          <table:table-cell table:formula="of:=[.D276]-[.D27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9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55960648148148" calcext:value-type="float">
            <text:p>0,00155960648148148000</text:p>
          </table:table-cell>
          <table:table-cell table:formula="of:=[.D277]-[.D27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9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56527777777778" calcext:value-type="float">
            <text:p>0,00156527777777778000</text:p>
          </table:table-cell>
          <table:table-cell table:formula="of:=[.D278]-[.D27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9" office:value-type="float" office:value="13573" calcext:value-type="float">
            <text:p>1357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57094907407407" calcext:value-type="float">
            <text:p>0,00157094907407407000</text:p>
          </table:table-cell>
          <table:table-cell table:formula="of:=[.D279]-[.D27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9" office:value-type="float" office:value="13622" calcext:value-type="float">
            <text:p>1362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57662037037037" calcext:value-type="float">
            <text:p>0,00157662037037037000</text:p>
          </table:table-cell>
          <table:table-cell table:formula="of:=[.D280]-[.D27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9" office:value-type="float" office:value="13671" calcext:value-type="float">
            <text:p>1367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58229166666667" calcext:value-type="float">
            <text:p>0,00158229166666667000</text:p>
          </table:table-cell>
          <table:table-cell table:formula="of:=[.D281]-[.D28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9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58796296296296" calcext:value-type="float">
            <text:p>0,00158796296296296000</text:p>
          </table:table-cell>
          <table:table-cell table:formula="of:=[.D282]-[.D28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9" office:value-type="float" office:value="13769" calcext:value-type="float">
            <text:p>1376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59363425925926" calcext:value-type="float">
            <text:p>0,00159363425925926000</text:p>
          </table:table-cell>
          <table:table-cell table:formula="of:=[.D283]-[.D28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9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59930555555556" calcext:value-type="float">
            <text:p>0,00159930555555556000</text:p>
          </table:table-cell>
          <table:table-cell table:formula="of:=[.D284]-[.D28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9" office:value-type="float" office:value="13867" calcext:value-type="float">
            <text:p>1386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60497685185185" calcext:value-type="float">
            <text:p>0,00160497685185185000</text:p>
          </table:table-cell>
          <table:table-cell table:formula="of:=[.D285]-[.D28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9" office:value-type="float" office:value="13916" calcext:value-type="float">
            <text:p>1391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61064814814815" calcext:value-type="float">
            <text:p>0,00161064814814815000</text:p>
          </table:table-cell>
          <table:table-cell table:formula="of:=[.D286]-[.D28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9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61631944444444" calcext:value-type="float">
            <text:p>0,00161631944444444000</text:p>
          </table:table-cell>
          <table:table-cell table:formula="of:=[.D287]-[.D28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9" office:value-type="float" office:value="14014" calcext:value-type="float">
            <text:p>1401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62199074074074" calcext:value-type="float">
            <text:p>0,00162199074074074000</text:p>
          </table:table-cell>
          <table:table-cell table:formula="of:=[.D288]-[.D28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9" office:value-type="float" office:value="14063" calcext:value-type="float">
            <text:p>1406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62766203703704" calcext:value-type="float">
            <text:p>0,00162766203703704000</text:p>
          </table:table-cell>
          <table:table-cell table:formula="of:=[.D289]-[.D28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9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63333333333333" calcext:value-type="float">
            <text:p>0,00163333333333333000</text:p>
          </table:table-cell>
          <table:table-cell table:formula="of:=[.D290]-[.D28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9" office:value-type="float" office:value="14161" calcext:value-type="float">
            <text:p>1416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63900462962963" calcext:value-type="float">
            <text:p>0,00163900462962963000</text:p>
          </table:table-cell>
          <table:table-cell table:formula="of:=[.D291]-[.D29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9" office:value-type="float" office:value="14210" calcext:value-type="float">
            <text:p>142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64467592592593" calcext:value-type="float">
            <text:p>0,00164467592592593000</text:p>
          </table:table-cell>
          <table:table-cell table:formula="of:=[.D292]-[.D29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9" office:value-type="float" office:value="14259" calcext:value-type="float">
            <text:p>1425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65034722222222" calcext:value-type="float">
            <text:p>0,00165034722222222000</text:p>
          </table:table-cell>
          <table:table-cell table:formula="of:=[.D293]-[.D29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9" office:value-type="float" office:value="14308" calcext:value-type="float">
            <text:p>1430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65601851851852" calcext:value-type="float">
            <text:p>0,00165601851851852000</text:p>
          </table:table-cell>
          <table:table-cell table:formula="of:=[.D294]-[.D29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9" office:value-type="float" office:value="14357" calcext:value-type="float">
            <text:p>1435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66168981481481" calcext:value-type="float">
            <text:p>0,00166168981481481000</text:p>
          </table:table-cell>
          <table:table-cell table:formula="of:=[.D295]-[.D29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9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66736111111111" calcext:value-type="float">
            <text:p>0,00166736111111111000</text:p>
          </table:table-cell>
          <table:table-cell table:formula="of:=[.D296]-[.D29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9" office:value-type="float" office:value="14455" calcext:value-type="float">
            <text:p>1445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67303240740741" calcext:value-type="float">
            <text:p>0,00167303240740741000</text:p>
          </table:table-cell>
          <table:table-cell table:formula="of:=[.D297]-[.D29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9" office:value-type="float" office:value="14504" calcext:value-type="float">
            <text:p>1450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6787037037037" calcext:value-type="float">
            <text:p>0,00167870370370370000</text:p>
          </table:table-cell>
          <table:table-cell table:formula="of:=[.D298]-[.D29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9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684375" calcext:value-type="float">
            <text:p>0,00168437500000000000</text:p>
          </table:table-cell>
          <table:table-cell table:formula="of:=[.D299]-[.D29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9" office:value-type="float" office:value="14602" calcext:value-type="float">
            <text:p>1460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6900462962963" calcext:value-type="float">
            <text:p>0,00169004629629630000</text:p>
          </table:table-cell>
          <table:table-cell table:formula="of:=[.D300]-[.D29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9" office:value-type="float" office:value="14651" calcext:value-type="float">
            <text:p>1465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69571759259259" calcext:value-type="float">
            <text:p>0,00169571759259259000</text:p>
          </table:table-cell>
          <table:table-cell table:formula="of:=[.D301]-[.D30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9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70138888888889" calcext:value-type="float">
            <text:p>0,00170138888888889000</text:p>
          </table:table-cell>
          <table:table-cell table:formula="of:=[.D302]-[.D30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9" office:value-type="float" office:value="14749" calcext:value-type="float">
            <text:p>1474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70706018518519" calcext:value-type="float">
            <text:p>0,00170706018518519000</text:p>
          </table:table-cell>
          <table:table-cell table:formula="of:=[.D303]-[.D30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9" office:value-type="float" office:value="14798" calcext:value-type="float">
            <text:p>1479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71273148148148" calcext:value-type="float">
            <text:p>0,00171273148148148000</text:p>
          </table:table-cell>
          <table:table-cell table:formula="of:=[.D304]-[.D30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9" office:value-type="float" office:value="14847" calcext:value-type="float">
            <text:p>1484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71840277777778" calcext:value-type="float">
            <text:p>0,00171840277777778000</text:p>
          </table:table-cell>
          <table:table-cell table:formula="of:=[.D305]-[.D30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9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72407407407407" calcext:value-type="float">
            <text:p>0,00172407407407407000</text:p>
          </table:table-cell>
          <table:table-cell table:formula="of:=[.D306]-[.D30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9" office:value-type="float" office:value="14945" calcext:value-type="float">
            <text:p>1494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72974537037037" calcext:value-type="float">
            <text:p>0,00172974537037037000</text:p>
          </table:table-cell>
          <table:table-cell table:formula="of:=[.D307]-[.D30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9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73541666666667" calcext:value-type="float">
            <text:p>0,00173541666666667000</text:p>
          </table:table-cell>
          <table:table-cell table:formula="of:=[.D308]-[.D30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9" office:value-type="float" office:value="15043" calcext:value-type="float">
            <text:p>1504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74108796296296" calcext:value-type="float">
            <text:p>0,00174108796296296000</text:p>
          </table:table-cell>
          <table:table-cell table:formula="of:=[.D309]-[.D30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9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74675925925926" calcext:value-type="float">
            <text:p>0,00174675925925926000</text:p>
          </table:table-cell>
          <table:table-cell table:formula="of:=[.D310]-[.D30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9" office:value-type="float" office:value="15141" calcext:value-type="float">
            <text:p>1514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75243055555556" calcext:value-type="float">
            <text:p>0,00175243055555556000</text:p>
          </table:table-cell>
          <table:table-cell table:formula="of:=[.D311]-[.D31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9" office:value-type="float" office:value="15190" calcext:value-type="float">
            <text:p>151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75810185185185" calcext:value-type="float">
            <text:p>0,00175810185185185000</text:p>
          </table:table-cell>
          <table:table-cell table:formula="of:=[.D312]-[.D31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9" office:value-type="float" office:value="15239" calcext:value-type="float">
            <text:p>1523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76377314814815" calcext:value-type="float">
            <text:p>0,00176377314814815000</text:p>
          </table:table-cell>
          <table:table-cell table:formula="of:=[.D313]-[.D31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9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76944444444444" calcext:value-type="float">
            <text:p>0,00176944444444444000</text:p>
          </table:table-cell>
          <table:table-cell table:formula="of:=[.D314]-[.D31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9" office:value-type="float" office:value="15337" calcext:value-type="float">
            <text:p>1533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77511574074074" calcext:value-type="float">
            <text:p>0,00177511574074074000</text:p>
          </table:table-cell>
          <table:table-cell table:formula="of:=[.D315]-[.D31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9" office:value-type="float" office:value="15386" calcext:value-type="float">
            <text:p>1538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78078703703704" calcext:value-type="float">
            <text:p>0,00178078703703704000</text:p>
          </table:table-cell>
          <table:table-cell table:formula="of:=[.D316]-[.D31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9" office:value-type="float" office:value="15435" calcext:value-type="float">
            <text:p>1543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78645833333333" calcext:value-type="float">
            <text:p>0,00178645833333333000</text:p>
          </table:table-cell>
          <table:table-cell table:formula="of:=[.D317]-[.D31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9" office:value-type="float" office:value="15484" calcext:value-type="float">
            <text:p>1548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79212962962963" calcext:value-type="float">
            <text:p>0,00179212962962963000</text:p>
          </table:table-cell>
          <table:table-cell table:formula="of:=[.D318]-[.D31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9" office:value-type="float" office:value="15533" calcext:value-type="float">
            <text:p>1553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79780092592593" calcext:value-type="float">
            <text:p>0,00179780092592593000</text:p>
          </table:table-cell>
          <table:table-cell table:formula="of:=[.D319]-[.D31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9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80347222222222" calcext:value-type="float">
            <text:p>0,00180347222222222000</text:p>
          </table:table-cell>
          <table:table-cell table:formula="of:=[.D320]-[.D31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9" office:value-type="float" office:value="15631" calcext:value-type="float">
            <text:p>1563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80914351851852" calcext:value-type="float">
            <text:p>0,00180914351851852000</text:p>
          </table:table-cell>
          <table:table-cell table:formula="of:=[.D321]-[.D32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9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81481481481482" calcext:value-type="float">
            <text:p>0,00181481481481482000</text:p>
          </table:table-cell>
          <table:table-cell table:formula="of:=[.D322]-[.D32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9" office:value-type="float" office:value="15729" calcext:value-type="float">
            <text:p>1572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82048611111111" calcext:value-type="float">
            <text:p>0,00182048611111111000</text:p>
          </table:table-cell>
          <table:table-cell table:formula="of:=[.D323]-[.D32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9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82615740740741" calcext:value-type="float">
            <text:p>0,00182615740740741000</text:p>
          </table:table-cell>
          <table:table-cell table:formula="of:=[.D324]-[.D32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9" office:value-type="float" office:value="15827" calcext:value-type="float">
            <text:p>1582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8318287037037" calcext:value-type="float">
            <text:p>0,00183182870370370000</text:p>
          </table:table-cell>
          <table:table-cell table:formula="of:=[.D325]-[.D32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9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8375" calcext:value-type="float">
            <text:p>0,00183750000000000000</text:p>
          </table:table-cell>
          <table:table-cell table:formula="of:=[.D326]-[.D32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9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8431712962963" calcext:value-type="float">
            <text:p>0,00184317129629630000</text:p>
          </table:table-cell>
          <table:table-cell table:formula="of:=[.D327]-[.D326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9" office:value-type="float" office:value="15974" calcext:value-type="float">
            <text:p>1597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84884259259259" calcext:value-type="float">
            <text:p>0,00184884259259259000</text:p>
          </table:table-cell>
          <table:table-cell table:formula="of:=[.D328]-[.D32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9" office:value-type="float" office:value="16023" calcext:value-type="float">
            <text:p>1602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85451388888889" calcext:value-type="float">
            <text:p>0,00185451388888889000</text:p>
          </table:table-cell>
          <table:table-cell table:formula="of:=[.D329]-[.D328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9" office:value-type="float" office:value="16072" calcext:value-type="float">
            <text:p>1607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86018518518519" calcext:value-type="float">
            <text:p>0,00186018518518519000</text:p>
          </table:table-cell>
          <table:table-cell table:formula="of:=[.D330]-[.D32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9" office:value-type="float" office:value="16121" calcext:value-type="float">
            <text:p>1612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86585648148148" calcext:value-type="float">
            <text:p>0,00186585648148148000</text:p>
          </table:table-cell>
          <table:table-cell table:formula="of:=[.D331]-[.D33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9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87152777777778" calcext:value-type="float">
            <text:p>0,00187152777777778000</text:p>
          </table:table-cell>
          <table:table-cell table:formula="of:=[.D332]-[.D331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9" office:value-type="float" office:value="16219" calcext:value-type="float">
            <text:p>1621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87719907407407" calcext:value-type="float">
            <text:p>0,00187719907407407000</text:p>
          </table:table-cell>
          <table:table-cell table:formula="of:=[.D333]-[.D33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9" office:value-type="float" office:value="16268" calcext:value-type="float">
            <text:p>1626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88287037037037" calcext:value-type="float">
            <text:p>0,00188287037037037000</text:p>
          </table:table-cell>
          <table:table-cell table:formula="of:=[.D334]-[.D33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9" office:value-type="float" office:value="16317" calcext:value-type="float">
            <text:p>1631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88854166666667" calcext:value-type="float">
            <text:p>0,00188854166666667000</text:p>
          </table:table-cell>
          <table:table-cell table:formula="of:=[.D335]-[.D334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9" office:value-type="float" office:value="16366" calcext:value-type="float">
            <text:p>1636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89421296296296" calcext:value-type="float">
            <text:p>0,00189421296296296000</text:p>
          </table:table-cell>
          <table:table-cell table:formula="of:=[.D336]-[.D335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9" office:value-type="float" office:value="16415" calcext:value-type="float">
            <text:p>1641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89988425925926" calcext:value-type="float">
            <text:p>0,00189988425925926000</text:p>
          </table:table-cell>
          <table:table-cell table:formula="of:=[.D337]-[.D33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9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90555555555556" calcext:value-type="float">
            <text:p>0,00190555555555556000</text:p>
          </table:table-cell>
          <table:table-cell table:formula="of:=[.D338]-[.D337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9" office:value-type="float" office:value="16513" calcext:value-type="float">
            <text:p>1651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91122685185185" calcext:value-type="float">
            <text:p>0,00191122685185185000</text:p>
          </table:table-cell>
          <table:table-cell table:formula="of:=[.D339]-[.D33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9" office:value-type="float" office:value="16562" calcext:value-type="float">
            <text:p>1656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91689814814815" calcext:value-type="float">
            <text:p>0,00191689814814815000</text:p>
          </table:table-cell>
          <table:table-cell table:formula="of:=[.D340]-[.D339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9" office:value-type="float" office:value="16611" calcext:value-type="float">
            <text:p>1661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92256944444444" calcext:value-type="float">
            <text:p>0,00192256944444444000</text:p>
          </table:table-cell>
          <table:table-cell table:formula="of:=[.D341]-[.D340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9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92824074074074" calcext:value-type="float">
            <text:p>0,00192824074074074000</text:p>
          </table:table-cell>
          <table:table-cell table:formula="of:=[.D342]-[.D34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9" office:value-type="float" office:value="16709" calcext:value-type="float">
            <text:p>1670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93391203703704" calcext:value-type="float">
            <text:p>0,00193391203703704000</text:p>
          </table:table-cell>
          <table:table-cell table:formula="of:=[.D343]-[.D342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9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93958333333333" calcext:value-type="float">
            <text:p>0,00193958333333333000</text:p>
          </table:table-cell>
          <table:table-cell table:formula="of:=[.D344]-[.D343]" office:value-type="float" office:value="0.00000567129629629637" calcext:value-type="float">
            <text:p>0,00000567129629629637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9" office:value-type="float" office:value="16807" calcext:value-type="float">
            <text:p>1680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94525462962963" calcext:value-type="float">
            <text:p>0,00194525462962963000</text:p>
          </table:table-cell>
          <table:table-cell table:formula="of:=[.D345]-[.D34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9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95092592592593" calcext:value-type="float">
            <text:p>0,00195092592592593000</text:p>
          </table:table-cell>
          <table:table-cell table:formula="of:=[.D346]-[.D345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9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95659722222222" calcext:value-type="float">
            <text:p>0,00195659722222222000</text:p>
          </table:table-cell>
          <table:table-cell table:formula="of:=[.D347]-[.D34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9" office:value-type="float" office:value="16954" calcext:value-type="float">
            <text:p>1695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96226851851852" calcext:value-type="float">
            <text:p>0,00196226851851852000</text:p>
          </table:table-cell>
          <table:table-cell table:formula="of:=[.D348]-[.D34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9" office:value-type="float" office:value="17003" calcext:value-type="float">
            <text:p>1700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96793981481481" calcext:value-type="float">
            <text:p>0,00196793981481481000</text:p>
          </table:table-cell>
          <table:table-cell table:formula="of:=[.D349]-[.D34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9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97361111111111" calcext:value-type="float">
            <text:p>0,00197361111111111000</text:p>
          </table:table-cell>
          <table:table-cell table:formula="of:=[.D350]-[.D34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9" office:value-type="float" office:value="17101" calcext:value-type="float">
            <text:p>1710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97928240740741" calcext:value-type="float">
            <text:p>0,00197928240740741000</text:p>
          </table:table-cell>
          <table:table-cell table:formula="of:=[.D351]-[.D35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9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9849537037037" calcext:value-type="float">
            <text:p>0,00198495370370370000</text:p>
          </table:table-cell>
          <table:table-cell table:formula="of:=[.D352]-[.D351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9" office:value-type="float" office:value="17199" calcext:value-type="float">
            <text:p>1719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990625" calcext:value-type="float">
            <text:p>0,00199062500000000000</text:p>
          </table:table-cell>
          <table:table-cell table:formula="of:=[.D353]-[.D35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9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9962962962963" calcext:value-type="float">
            <text:p>0,00199629629629630000</text:p>
          </table:table-cell>
          <table:table-cell table:formula="of:=[.D354]-[.D35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9" office:value-type="float" office:value="17297" calcext:value-type="float">
            <text:p>1729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00196759259259" calcext:value-type="float">
            <text:p>0,00200196759259259000</text:p>
          </table:table-cell>
          <table:table-cell table:formula="of:=[.D355]-[.D354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9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00763888888889" calcext:value-type="float">
            <text:p>0,00200763888888889000</text:p>
          </table:table-cell>
          <table:table-cell table:formula="of:=[.D356]-[.D35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9" office:value-type="float" office:value="17395" calcext:value-type="float">
            <text:p>1739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01331018518519" calcext:value-type="float">
            <text:p>0,00201331018518519000</text:p>
          </table:table-cell>
          <table:table-cell table:formula="of:=[.D357]-[.D35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9" office:value-type="float" office:value="17444" calcext:value-type="float">
            <text:p>1744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01898148148148" calcext:value-type="float">
            <text:p>0,00201898148148148000</text:p>
          </table:table-cell>
          <table:table-cell table:formula="of:=[.D358]-[.D35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9" office:value-type="float" office:value="17493" calcext:value-type="float">
            <text:p>1749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02465277777778" calcext:value-type="float">
            <text:p>0,00202465277777778000</text:p>
          </table:table-cell>
          <table:table-cell table:formula="of:=[.D359]-[.D35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9" office:value-type="float" office:value="17542" calcext:value-type="float">
            <text:p>1754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03032407407407" calcext:value-type="float">
            <text:p>0,00203032407407407000</text:p>
          </table:table-cell>
          <table:table-cell table:formula="of:=[.D360]-[.D35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9" office:value-type="float" office:value="17591" calcext:value-type="float">
            <text:p>1759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03599537037037" calcext:value-type="float">
            <text:p>0,00203599537037037000</text:p>
          </table:table-cell>
          <table:table-cell table:formula="of:=[.D361]-[.D36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9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04166666666667" calcext:value-type="float">
            <text:p>0,00204166666666667000</text:p>
          </table:table-cell>
          <table:table-cell table:formula="of:=[.D362]-[.D361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9" office:value-type="float" office:value="17689" calcext:value-type="float">
            <text:p>1768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04733796296296" calcext:value-type="float">
            <text:p>0,00204733796296296000</text:p>
          </table:table-cell>
          <table:table-cell table:formula="of:=[.D363]-[.D36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9" office:value-type="float" office:value="17738" calcext:value-type="float">
            <text:p>1773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05300925925926" calcext:value-type="float">
            <text:p>0,00205300925925926000</text:p>
          </table:table-cell>
          <table:table-cell table:formula="of:=[.D364]-[.D36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9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05868055555556" calcext:value-type="float">
            <text:p>0,00205868055555556000</text:p>
          </table:table-cell>
          <table:table-cell table:formula="of:=[.D365]-[.D364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9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06435185185185" calcext:value-type="float">
            <text:p>0,00206435185185185000</text:p>
          </table:table-cell>
          <table:table-cell table:formula="of:=[.D366]-[.D36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9" office:value-type="float" office:value="17885" calcext:value-type="float">
            <text:p>1788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07002314814815" calcext:value-type="float">
            <text:p>0,00207002314814815000</text:p>
          </table:table-cell>
          <table:table-cell table:formula="of:=[.D367]-[.D36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9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07569444444444" calcext:value-type="float">
            <text:p>0,00207569444444444000</text:p>
          </table:table-cell>
          <table:table-cell table:formula="of:=[.D368]-[.D367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9" office:value-type="float" office:value="17983" calcext:value-type="float">
            <text:p>1798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08136574074074" calcext:value-type="float">
            <text:p>0,00208136574074074000</text:p>
          </table:table-cell>
          <table:table-cell table:formula="of:=[.D369]-[.D36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9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08703703703704" calcext:value-type="float">
            <text:p>0,00208703703703704000</text:p>
          </table:table-cell>
          <table:table-cell table:formula="of:=[.D370]-[.D36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9" office:value-type="float" office:value="18081" calcext:value-type="float">
            <text:p>1808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09270833333333" calcext:value-type="float">
            <text:p>0,00209270833333333000</text:p>
          </table:table-cell>
          <table:table-cell table:formula="of:=[.D371]-[.D370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9" office:value-type="float" office:value="18130" calcext:value-type="float">
            <text:p>181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09837962962963" calcext:value-type="float">
            <text:p>0,00209837962962963000</text:p>
          </table:table-cell>
          <table:table-cell table:formula="of:=[.D372]-[.D37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9" office:value-type="float" office:value="18179" calcext:value-type="float">
            <text:p>1817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10405092592593" calcext:value-type="float">
            <text:p>0,00210405092592593000</text:p>
          </table:table-cell>
          <table:table-cell table:formula="of:=[.D373]-[.D37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9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10972222222222" calcext:value-type="float">
            <text:p>0,00210972222222222000</text:p>
          </table:table-cell>
          <table:table-cell table:formula="of:=[.D374]-[.D373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9" office:value-type="float" office:value="18277" calcext:value-type="float">
            <text:p>1827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11539351851852" calcext:value-type="float">
            <text:p>0,00211539351851852000</text:p>
          </table:table-cell>
          <table:table-cell table:formula="of:=[.D375]-[.D37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9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12106481481481" calcext:value-type="float">
            <text:p>0,00212106481481481000</text:p>
          </table:table-cell>
          <table:table-cell table:formula="of:=[.D376]-[.D37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9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12673611111111" calcext:value-type="float">
            <text:p>0,00212673611111111000</text:p>
          </table:table-cell>
          <table:table-cell table:formula="of:=[.D377]-[.D376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9" office:value-type="float" office:value="18424" calcext:value-type="float">
            <text:p>1842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13240740740741" calcext:value-type="float">
            <text:p>0,00213240740740741000</text:p>
          </table:table-cell>
          <table:table-cell table:formula="of:=[.D378]-[.D37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9" office:value-type="float" office:value="18473" calcext:value-type="float">
            <text:p>1847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1380787037037" calcext:value-type="float">
            <text:p>0,00213807870370370000</text:p>
          </table:table-cell>
          <table:table-cell table:formula="of:=[.D379]-[.D37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9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14375" calcext:value-type="float">
            <text:p>0,00214375000000000000</text:p>
          </table:table-cell>
          <table:table-cell table:formula="of:=[.D380]-[.D379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9" office:value-type="float" office:value="18571" calcext:value-type="float">
            <text:p>1857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1494212962963" calcext:value-type="float">
            <text:p>0,00214942129629630000</text:p>
          </table:table-cell>
          <table:table-cell table:formula="of:=[.D381]-[.D38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9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15509259259259" calcext:value-type="float">
            <text:p>0,00215509259259259000</text:p>
          </table:table-cell>
          <table:table-cell table:formula="of:=[.D382]-[.D38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9" office:value-type="float" office:value="18669" calcext:value-type="float">
            <text:p>1866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16076388888889" calcext:value-type="float">
            <text:p>0,00216076388888889000</text:p>
          </table:table-cell>
          <table:table-cell table:formula="of:=[.D383]-[.D382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9" office:value-type="float" office:value="18718" calcext:value-type="float">
            <text:p>1871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16643518518519" calcext:value-type="float">
            <text:p>0,00216643518518519000</text:p>
          </table:table-cell>
          <table:table-cell table:formula="of:=[.D384]-[.D38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9" office:value-type="float" office:value="18767" calcext:value-type="float">
            <text:p>1876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17210648148148" calcext:value-type="float">
            <text:p>0,00217210648148148000</text:p>
          </table:table-cell>
          <table:table-cell table:formula="of:=[.D385]-[.D38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9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17777777777778" calcext:value-type="float">
            <text:p>0,00217777777777778000</text:p>
          </table:table-cell>
          <table:table-cell table:formula="of:=[.D386]-[.D385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9" office:value-type="float" office:value="18865" calcext:value-type="float">
            <text:p>1886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18344907407407" calcext:value-type="float">
            <text:p>0,00218344907407407000</text:p>
          </table:table-cell>
          <table:table-cell table:formula="of:=[.D387]-[.D38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9" office:value-type="float" office:value="18914" calcext:value-type="float">
            <text:p>1891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18912037037037" calcext:value-type="float">
            <text:p>0,00218912037037037000</text:p>
          </table:table-cell>
          <table:table-cell table:formula="of:=[.D388]-[.D38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9" office:value-type="float" office:value="18963" calcext:value-type="float">
            <text:p>1896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19479166666667" calcext:value-type="float">
            <text:p>0,00219479166666667000</text:p>
          </table:table-cell>
          <table:table-cell table:formula="of:=[.D389]-[.D38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9" office:value-type="float" office:value="19012" calcext:value-type="float">
            <text:p>1901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20046296296296" calcext:value-type="float">
            <text:p>0,00220046296296296000</text:p>
          </table:table-cell>
          <table:table-cell table:formula="of:=[.D390]-[.D38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9" office:value-type="float" office:value="19061" calcext:value-type="float">
            <text:p>1906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20613425925926" calcext:value-type="float">
            <text:p>0,00220613425925926000</text:p>
          </table:table-cell>
          <table:table-cell table:formula="of:=[.D391]-[.D39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9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21180555555556" calcext:value-type="float">
            <text:p>0,00221180555555556000</text:p>
          </table:table-cell>
          <table:table-cell table:formula="of:=[.D392]-[.D391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9" office:value-type="float" office:value="19159" calcext:value-type="float">
            <text:p>1915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21747685185185" calcext:value-type="float">
            <text:p>0,00221747685185185000</text:p>
          </table:table-cell>
          <table:table-cell table:formula="of:=[.D393]-[.D39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9" office:value-type="float" office:value="19208" calcext:value-type="float">
            <text:p>1920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22314814814815" calcext:value-type="float">
            <text:p>0,00222314814814815000</text:p>
          </table:table-cell>
          <table:table-cell table:formula="of:=[.D394]-[.D39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9" office:value-type="float" office:value="19257" calcext:value-type="float">
            <text:p>1925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22881944444444" calcext:value-type="float">
            <text:p>0,00222881944444444000</text:p>
          </table:table-cell>
          <table:table-cell table:formula="of:=[.D395]-[.D394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9" office:value-type="float" office:value="19306" calcext:value-type="float">
            <text:p>1930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23449074074074" calcext:value-type="float">
            <text:p>0,00223449074074074000</text:p>
          </table:table-cell>
          <table:table-cell table:formula="of:=[.D396]-[.D39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9" office:value-type="float" office:value="19355" calcext:value-type="float">
            <text:p>1935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24016203703704" calcext:value-type="float">
            <text:p>0,00224016203703704000</text:p>
          </table:table-cell>
          <table:table-cell table:formula="of:=[.D397]-[.D39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9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24583333333333" calcext:value-type="float">
            <text:p>0,00224583333333333000</text:p>
          </table:table-cell>
          <table:table-cell table:formula="of:=[.D398]-[.D397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9" office:value-type="float" office:value="19453" calcext:value-type="float">
            <text:p>1945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25150462962963" calcext:value-type="float">
            <text:p>0,00225150462962963000</text:p>
          </table:table-cell>
          <table:table-cell table:formula="of:=[.D399]-[.D39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9" office:value-type="float" office:value="19502" calcext:value-type="float">
            <text:p>1950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25717592592593" calcext:value-type="float">
            <text:p>0,00225717592592593000</text:p>
          </table:table-cell>
          <table:table-cell table:formula="of:=[.D400]-[.D39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9" office:value-type="float" office:value="19551" calcext:value-type="float">
            <text:p>1955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26284722222222" calcext:value-type="float">
            <text:p>0,00226284722222222000</text:p>
          </table:table-cell>
          <table:table-cell table:formula="of:=[.D401]-[.D400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9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26851851851852" calcext:value-type="float">
            <text:p>0,00226851851851852000</text:p>
          </table:table-cell>
          <table:table-cell table:formula="of:=[.D402]-[.D40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9" office:value-type="float" office:value="19649" calcext:value-type="float">
            <text:p>1964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27418981481482" calcext:value-type="float">
            <text:p>0,00227418981481482000</text:p>
          </table:table-cell>
          <table:table-cell table:formula="of:=[.D403]-[.D40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9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27986111111111" calcext:value-type="float">
            <text:p>0,00227986111111111000</text:p>
          </table:table-cell>
          <table:table-cell table:formula="of:=[.D404]-[.D403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9" office:value-type="float" office:value="19747" calcext:value-type="float">
            <text:p>1974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28553240740741" calcext:value-type="float">
            <text:p>0,00228553240740741000</text:p>
          </table:table-cell>
          <table:table-cell table:formula="of:=[.D405]-[.D40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9" office:value-type="float" office:value="19796" calcext:value-type="float">
            <text:p>1979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2912037037037" calcext:value-type="float">
            <text:p>0,00229120370370370000</text:p>
          </table:table-cell>
          <table:table-cell table:formula="of:=[.D406]-[.D40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9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296875" calcext:value-type="float">
            <text:p>0,00229687500000000000</text:p>
          </table:table-cell>
          <table:table-cell table:formula="of:=[.D407]-[.D406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9" office:value-type="float" office:value="19894" calcext:value-type="float">
            <text:p>1989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3025462962963" calcext:value-type="float">
            <text:p>0,00230254629629630000</text:p>
          </table:table-cell>
          <table:table-cell table:formula="of:=[.D408]-[.D40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9" office:value-type="float" office:value="19943" calcext:value-type="float">
            <text:p>19943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30821759259259" calcext:value-type="float">
            <text:p>0,00230821759259259000</text:p>
          </table:table-cell>
          <table:table-cell table:formula="of:=[.D409]-[.D40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9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31388888888889" calcext:value-type="float">
            <text:p>0,00231388888888889000</text:p>
          </table:table-cell>
          <table:table-cell table:formula="of:=[.D410]-[.D409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9" office:value-type="float" office:value="20041" calcext:value-type="float">
            <text:p>20041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31956018518519" calcext:value-type="float">
            <text:p>0,00231956018518519000</text:p>
          </table:table-cell>
          <table:table-cell table:formula="of:=[.D411]-[.D41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9" office:value-type="float" office:value="20090" calcext:value-type="float">
            <text:p>2009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32523148148148" calcext:value-type="float">
            <text:p>0,00232523148148148000</text:p>
          </table:table-cell>
          <table:table-cell table:formula="of:=[.D412]-[.D41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9" office:value-type="float" office:value="20139" calcext:value-type="float">
            <text:p>20139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33090277777778" calcext:value-type="float">
            <text:p>0,00233090277777778000</text:p>
          </table:table-cell>
          <table:table-cell table:formula="of:=[.D413]-[.D412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9" office:value-type="float" office:value="20188" calcext:value-type="float">
            <text:p>2018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33657407407407" calcext:value-type="float">
            <text:p>0,00233657407407407000</text:p>
          </table:table-cell>
          <table:table-cell table:formula="of:=[.D414]-[.D41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9" office:value-type="float" office:value="20237" calcext:value-type="float">
            <text:p>20237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34224537037037" calcext:value-type="float">
            <text:p>0,00234224537037037000</text:p>
          </table:table-cell>
          <table:table-cell table:formula="of:=[.D415]-[.D41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9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34791666666667" calcext:value-type="float">
            <text:p>0,00234791666666667000</text:p>
          </table:table-cell>
          <table:table-cell table:formula="of:=[.D416]-[.D415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9" office:value-type="float" office:value="20335" calcext:value-type="float">
            <text:p>2033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35358796296296" calcext:value-type="float">
            <text:p>0,00235358796296296000</text:p>
          </table:table-cell>
          <table:table-cell table:formula="of:=[.D417]-[.D41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9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35925925925926" calcext:value-type="float">
            <text:p>0,00235925925925926000</text:p>
          </table:table-cell>
          <table:table-cell table:formula="of:=[.D418]-[.D41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9" office:value-type="float" office:value="20433" calcext:value-type="float">
            <text:p>20433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36493055555556" calcext:value-type="float">
            <text:p>0,00236493055555556000</text:p>
          </table:table-cell>
          <table:table-cell table:formula="of:=[.D419]-[.D41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9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37060185185185" calcext:value-type="float">
            <text:p>0,00237060185185185000</text:p>
          </table:table-cell>
          <table:table-cell table:formula="of:=[.D420]-[.D41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9" office:value-type="float" office:value="20531" calcext:value-type="float">
            <text:p>20531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37627314814815" calcext:value-type="float">
            <text:p>0,00237627314814815000</text:p>
          </table:table-cell>
          <table:table-cell table:formula="of:=[.D421]-[.D42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9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38194444444444" calcext:value-type="float">
            <text:p>0,00238194444444444000</text:p>
          </table:table-cell>
          <table:table-cell table:formula="of:=[.D422]-[.D421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9" office:value-type="float" office:value="20629" calcext:value-type="float">
            <text:p>20629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38761574074074" calcext:value-type="float">
            <text:p>0,00238761574074074000</text:p>
          </table:table-cell>
          <table:table-cell table:formula="of:=[.D423]-[.D42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9" office:value-type="float" office:value="20678" calcext:value-type="float">
            <text:p>2067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39328703703704" calcext:value-type="float">
            <text:p>0,00239328703703704000</text:p>
          </table:table-cell>
          <table:table-cell table:formula="of:=[.D424]-[.D42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9" office:value-type="float" office:value="20727" calcext:value-type="float">
            <text:p>20727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39895833333333" calcext:value-type="float">
            <text:p>0,00239895833333333000</text:p>
          </table:table-cell>
          <table:table-cell table:formula="of:=[.D425]-[.D424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9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40462962962963" calcext:value-type="float">
            <text:p>0,00240462962962963000</text:p>
          </table:table-cell>
          <table:table-cell table:formula="of:=[.D426]-[.D42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9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41030092592593" calcext:value-type="float">
            <text:p>0,00241030092592593000</text:p>
          </table:table-cell>
          <table:table-cell table:formula="of:=[.D427]-[.D42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9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41597222222222" calcext:value-type="float">
            <text:p>0,00241597222222222000</text:p>
          </table:table-cell>
          <table:table-cell table:formula="of:=[.D428]-[.D427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9" office:value-type="float" office:value="20923" calcext:value-type="float">
            <text:p>20923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42164351851852" calcext:value-type="float">
            <text:p>0,00242164351851852000</text:p>
          </table:table-cell>
          <table:table-cell table:formula="of:=[.D429]-[.D42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9" office:value-type="float" office:value="20972" calcext:value-type="float">
            <text:p>2097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42731481481482" calcext:value-type="float">
            <text:p>0,00242731481481482000</text:p>
          </table:table-cell>
          <table:table-cell table:formula="of:=[.D430]-[.D42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9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43298611111111" calcext:value-type="float">
            <text:p>0,00243298611111111000</text:p>
          </table:table-cell>
          <table:table-cell table:formula="of:=[.D431]-[.D430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9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43865740740741" calcext:value-type="float">
            <text:p>0,00243865740740741000</text:p>
          </table:table-cell>
          <table:table-cell table:formula="of:=[.D432]-[.D43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9" office:value-type="float" office:value="21119" calcext:value-type="float">
            <text:p>21119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4443287037037" calcext:value-type="float">
            <text:p>0,00244432870370370000</text:p>
          </table:table-cell>
          <table:table-cell table:formula="of:=[.D433]-[.D43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9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45" calcext:value-type="float">
            <text:p>0,00245000000000000000</text:p>
          </table:table-cell>
          <table:table-cell table:formula="of:=[.D434]-[.D433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9" office:value-type="float" office:value="21217" calcext:value-type="float">
            <text:p>21217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4556712962963" calcext:value-type="float">
            <text:p>0,00245567129629630000</text:p>
          </table:table-cell>
          <table:table-cell table:formula="of:=[.D435]-[.D43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9" office:value-type="float" office:value="21266" calcext:value-type="float">
            <text:p>2126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46134259259259" calcext:value-type="float">
            <text:p>0,00246134259259259000</text:p>
          </table:table-cell>
          <table:table-cell table:formula="of:=[.D436]-[.D43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9" office:value-type="float" office:value="21315" calcext:value-type="float">
            <text:p>2131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46701388888889" calcext:value-type="float">
            <text:p>0,00246701388888889000</text:p>
          </table:table-cell>
          <table:table-cell table:formula="of:=[.D437]-[.D43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9" office:value-type="float" office:value="21364" calcext:value-type="float">
            <text:p>2136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47268518518519" calcext:value-type="float">
            <text:p>0,00247268518518519000</text:p>
          </table:table-cell>
          <table:table-cell table:formula="of:=[.D438]-[.D437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9" office:value-type="float" office:value="21413" calcext:value-type="float">
            <text:p>21413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47835648148148" calcext:value-type="float">
            <text:p>0,00247835648148148000</text:p>
          </table:table-cell>
          <table:table-cell table:formula="of:=[.D439]-[.D43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9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48402777777778" calcext:value-type="float">
            <text:p>0,00248402777777778000</text:p>
          </table:table-cell>
          <table:table-cell table:formula="of:=[.D440]-[.D43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9" office:value-type="float" office:value="21511" calcext:value-type="float">
            <text:p>21511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48969907407407" calcext:value-type="float">
            <text:p>0,00248969907407407000</text:p>
          </table:table-cell>
          <table:table-cell table:formula="of:=[.D441]-[.D440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9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49537037037037" calcext:value-type="float">
            <text:p>0,00249537037037037000</text:p>
          </table:table-cell>
          <table:table-cell table:formula="of:=[.D442]-[.D44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9" office:value-type="float" office:value="21609" calcext:value-type="float">
            <text:p>21609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50104166666667" calcext:value-type="float">
            <text:p>0,00250104166666667000</text:p>
          </table:table-cell>
          <table:table-cell table:formula="of:=[.D443]-[.D44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9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50671296296296" calcext:value-type="float">
            <text:p>0,00250671296296296000</text:p>
          </table:table-cell>
          <table:table-cell table:formula="of:=[.D444]-[.D443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9" office:value-type="float" office:value="21707" calcext:value-type="float">
            <text:p>21707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51238425925926" calcext:value-type="float">
            <text:p>0,00251238425925926000</text:p>
          </table:table-cell>
          <table:table-cell table:formula="of:=[.D445]-[.D44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9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51805555555556" calcext:value-type="float">
            <text:p>0,00251805555555556000</text:p>
          </table:table-cell>
          <table:table-cell table:formula="of:=[.D446]-[.D44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9" office:value-type="float" office:value="21805" calcext:value-type="float">
            <text:p>2180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52372685185185" calcext:value-type="float">
            <text:p>0,00252372685185185000</text:p>
          </table:table-cell>
          <table:table-cell table:formula="of:=[.D447]-[.D446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9" office:value-type="float" office:value="21854" calcext:value-type="float">
            <text:p>2185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52939814814815" calcext:value-type="float">
            <text:p>0,00252939814814815000</text:p>
          </table:table-cell>
          <table:table-cell table:formula="of:=[.D448]-[.D44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9" office:value-type="float" office:value="21903" calcext:value-type="float">
            <text:p>21903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53506944444444" calcext:value-type="float">
            <text:p>0,00253506944444444000</text:p>
          </table:table-cell>
          <table:table-cell table:formula="of:=[.D449]-[.D44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9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54074074074074" calcext:value-type="float">
            <text:p>0,00254074074074074000</text:p>
          </table:table-cell>
          <table:table-cell table:formula="of:=[.D450]-[.D449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9" office:value-type="float" office:value="22001" calcext:value-type="float">
            <text:p>22001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54641203703704" calcext:value-type="float">
            <text:p>0,00254641203703704000</text:p>
          </table:table-cell>
          <table:table-cell table:formula="of:=[.D451]-[.D45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9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55208333333333" calcext:value-type="float">
            <text:p>0,00255208333333333000</text:p>
          </table:table-cell>
          <table:table-cell table:formula="of:=[.D452]-[.D45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9" office:value-type="float" office:value="22099" calcext:value-type="float">
            <text:p>22099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55775462962963" calcext:value-type="float">
            <text:p>0,00255775462962963000</text:p>
          </table:table-cell>
          <table:table-cell table:formula="of:=[.D453]-[.D452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9" office:value-type="float" office:value="22148" calcext:value-type="float">
            <text:p>2214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56342592592593" calcext:value-type="float">
            <text:p>0,00256342592592593000</text:p>
          </table:table-cell>
          <table:table-cell table:formula="of:=[.D454]-[.D45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9" office:value-type="float" office:value="22197" calcext:value-type="float">
            <text:p>22197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56909722222222" calcext:value-type="float">
            <text:p>0,00256909722222222000</text:p>
          </table:table-cell>
          <table:table-cell table:formula="of:=[.D455]-[.D45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9" office:value-type="float" office:value="22246" calcext:value-type="float">
            <text:p>2224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57476851851852" calcext:value-type="float">
            <text:p>0,00257476851851852000</text:p>
          </table:table-cell>
          <table:table-cell table:formula="of:=[.D456]-[.D455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9" office:value-type="float" office:value="22295" calcext:value-type="float">
            <text:p>2229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58043981481482" calcext:value-type="float">
            <text:p>0,00258043981481482000</text:p>
          </table:table-cell>
          <table:table-cell table:formula="of:=[.D457]-[.D45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9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58611111111111" calcext:value-type="float">
            <text:p>0,00258611111111111000</text:p>
          </table:table-cell>
          <table:table-cell table:formula="of:=[.D458]-[.D45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9" office:value-type="float" office:value="22393" calcext:value-type="float">
            <text:p>22393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59178240740741" calcext:value-type="float">
            <text:p>0,00259178240740741000</text:p>
          </table:table-cell>
          <table:table-cell table:formula="of:=[.D459]-[.D45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9" office:value-type="float" office:value="22442" calcext:value-type="float">
            <text:p>2244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5974537037037" calcext:value-type="float">
            <text:p>0,00259745370370370000</text:p>
          </table:table-cell>
          <table:table-cell table:formula="of:=[.D460]-[.D45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9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603125" calcext:value-type="float">
            <text:p>0,00260312500000000000</text:p>
          </table:table-cell>
          <table:table-cell table:formula="of:=[.D461]-[.D46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9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6087962962963" calcext:value-type="float">
            <text:p>0,00260879629629630000</text:p>
          </table:table-cell>
          <table:table-cell table:formula="of:=[.D462]-[.D461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9" office:value-type="float" office:value="22589" calcext:value-type="float">
            <text:p>22589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61446759259259" calcext:value-type="float">
            <text:p>0,00261446759259259000</text:p>
          </table:table-cell>
          <table:table-cell table:formula="of:=[.D463]-[.D46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9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62013888888889" calcext:value-type="float">
            <text:p>0,00262013888888889000</text:p>
          </table:table-cell>
          <table:table-cell table:formula="of:=[.D464]-[.D46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9" office:value-type="float" office:value="22687" calcext:value-type="float">
            <text:p>22687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62581018518519" calcext:value-type="float">
            <text:p>0,00262581018518519000</text:p>
          </table:table-cell>
          <table:table-cell table:formula="of:=[.D465]-[.D464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9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63148148148148" calcext:value-type="float">
            <text:p>0,00263148148148148000</text:p>
          </table:table-cell>
          <table:table-cell table:formula="of:=[.D466]-[.D46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9" office:value-type="float" office:value="22785" calcext:value-type="float">
            <text:p>2278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63715277777778" calcext:value-type="float">
            <text:p>0,00263715277777778000</text:p>
          </table:table-cell>
          <table:table-cell table:formula="of:=[.D467]-[.D46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9" office:value-type="float" office:value="22834" calcext:value-type="float">
            <text:p>2283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64282407407407" calcext:value-type="float">
            <text:p>0,00264282407407407000</text:p>
          </table:table-cell>
          <table:table-cell table:formula="of:=[.D468]-[.D467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9" office:value-type="float" office:value="22883" calcext:value-type="float">
            <text:p>22883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64849537037037" calcext:value-type="float">
            <text:p>0,00264849537037037000</text:p>
          </table:table-cell>
          <table:table-cell table:formula="of:=[.D469]-[.D46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9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65416666666667" calcext:value-type="float">
            <text:p>0,00265416666666667000</text:p>
          </table:table-cell>
          <table:table-cell table:formula="of:=[.D470]-[.D46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9" office:value-type="float" office:value="22981" calcext:value-type="float">
            <text:p>22981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65983796296296" calcext:value-type="float">
            <text:p>0,00265983796296296000</text:p>
          </table:table-cell>
          <table:table-cell table:formula="of:=[.D471]-[.D470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9" office:value-type="float" office:value="23030" calcext:value-type="float">
            <text:p>2303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66550925925926" calcext:value-type="float">
            <text:p>0,00266550925925926000</text:p>
          </table:table-cell>
          <table:table-cell table:formula="of:=[.D472]-[.D47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9" office:value-type="float" office:value="23079" calcext:value-type="float">
            <text:p>23079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67118055555556" calcext:value-type="float">
            <text:p>0,00267118055555556000</text:p>
          </table:table-cell>
          <table:table-cell table:formula="of:=[.D473]-[.D472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9" office:value-type="float" office:value="23128" calcext:value-type="float">
            <text:p>2312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67685185185185" calcext:value-type="float">
            <text:p>0,00267685185185185000</text:p>
          </table:table-cell>
          <table:table-cell table:formula="of:=[.D474]-[.D473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9" office:value-type="float" office:value="23177" calcext:value-type="float">
            <text:p>23177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68252314814815" calcext:value-type="float">
            <text:p>0,00268252314814815000</text:p>
          </table:table-cell>
          <table:table-cell table:formula="of:=[.D475]-[.D47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9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68819444444444" calcext:value-type="float">
            <text:p>0,00268819444444444000</text:p>
          </table:table-cell>
          <table:table-cell table:formula="of:=[.D476]-[.D475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9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69386574074074" calcext:value-type="float">
            <text:p>0,00269386574074074000</text:p>
          </table:table-cell>
          <table:table-cell table:formula="of:=[.D477]-[.D476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9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69953703703704" calcext:value-type="float">
            <text:p>0,00269953703703704000</text:p>
          </table:table-cell>
          <table:table-cell table:formula="of:=[.D478]-[.D47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9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70520833333333" calcext:value-type="float">
            <text:p>0,00270520833333333000</text:p>
          </table:table-cell>
          <table:table-cell table:formula="of:=[.D479]-[.D478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9" office:value-type="float" office:value="23422" calcext:value-type="float">
            <text:p>2342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71087962962963" calcext:value-type="float">
            <text:p>0,00271087962962963000</text:p>
          </table:table-cell>
          <table:table-cell table:formula="of:=[.D480]-[.D479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9" office:value-type="float" office:value="23471" calcext:value-type="float">
            <text:p>23471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71655092592593" calcext:value-type="float">
            <text:p>0,00271655092592593000</text:p>
          </table:table-cell>
          <table:table-cell table:formula="of:=[.D481]-[.D480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9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72222222222222" calcext:value-type="float">
            <text:p>0,00272222222222222000</text:p>
          </table:table-cell>
          <table:table-cell table:formula="of:=[.D482]-[.D481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9" office:value-type="float" office:value="23569" calcext:value-type="float">
            <text:p>23569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72789351851852" calcext:value-type="float">
            <text:p>0,00272789351851852000</text:p>
          </table:table-cell>
          <table:table-cell table:formula="of:=[.D483]-[.D482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9" office:value-type="float" office:value="23618" calcext:value-type="float">
            <text:p>2361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73356481481482" calcext:value-type="float">
            <text:p>0,00273356481481482000</text:p>
          </table:table-cell>
          <table:table-cell table:formula="of:=[.D484]-[.D483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9" office:value-type="float" office:value="23667" calcext:value-type="float">
            <text:p>23667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73923611111111" calcext:value-type="float">
            <text:p>0,00273923611111111000</text:p>
          </table:table-cell>
          <table:table-cell table:formula="of:=[.D485]-[.D484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9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74490740740741" calcext:value-type="float">
            <text:p>0,00274490740740741000</text:p>
          </table:table-cell>
          <table:table-cell table:formula="of:=[.D486]-[.D485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9" office:value-type="float" office:value="23765" calcext:value-type="float">
            <text:p>2376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7505787037037" calcext:value-type="float">
            <text:p>0,00275057870370370000</text:p>
          </table:table-cell>
          <table:table-cell table:formula="of:=[.D487]-[.D486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9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75625" calcext:value-type="float">
            <text:p>0,00275625000000000000</text:p>
          </table:table-cell>
          <table:table-cell table:formula="of:=[.D488]-[.D487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9" office:value-type="float" office:value="23863" calcext:value-type="float">
            <text:p>23863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7619212962963" calcext:value-type="float">
            <text:p>0,00276192129629630000</text:p>
          </table:table-cell>
          <table:table-cell table:formula="of:=[.D489]-[.D488]" office:value-type="float" office:value="0.00000567129629629659" calcext:value-type="float">
            <text:p>0,00000567129629629659</text:p>
          </table:table-cell>
          <table:table-cell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9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76759259259259" calcext:value-type="float">
            <text:p>0,00276759259259259000</text:p>
          </table:table-cell>
          <table:table-cell table:formula="of:=[.D490]-[.D489]" office:value-type="float" office:value="0.00000567129629629615" calcext:value-type="float">
            <text:p>0,00000567129629629615</text:p>
          </table:table-cell>
          <table:table-cell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9" office:value-type="float" office:value="23961" calcext:value-type="float">
            <text:p>23961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77326388888889" calcext:value-type="float">
            <text:p>0,00277326388888889000</text:p>
          </table:table-cell>
          <table:table-cell table:formula="of:=#REF!-[.D490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0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5:10.600055616</meta:creation-date>
    <dc:date>2026-05-17T17:45:17.204095589</dc:date>
    <meta:editing-duration>PT8S</meta:editing-duration>
    <meta:editing-cycles>1</meta:editing-cycles>
    <meta:document-statistic meta:table-count="1" meta:cell-count="2450" meta:object-count="0"/>
    <meta:generator>LibreOffice/24.2.7.2$Linux_X86_64 LibreOffice_project/420$Build-2</meta:generator>
  </office:meta>
</office:document-meta>
</file>