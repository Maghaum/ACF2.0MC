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31481481481481" calcext:value-type="float">
            <text:p>0,00000231481481481481</text:p>
          </table:table-cell>
          <table:table-cell table:formula="of:=[.D3]-[.D2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0" office:value-type="float" office:value="40" calcext:value-type="float">
            <text:p>4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462962962962963" calcext:value-type="float">
            <text:p>0,00000462962962962963</text:p>
          </table:table-cell>
          <table:table-cell table:formula="of:=[.D4]-[.D3]" office:value-type="float" office:value="0.00000231481481481482" calcext:value-type="float">
            <text:p>0,00000231481481481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0"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694444444444445" calcext:value-type="float">
            <text:p>0,00000694444444444445</text:p>
          </table:table-cell>
          <table:table-cell table:formula="of:=[.D5]-[.D4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0"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925925925925926" calcext:value-type="float">
            <text:p>0,00000925925925925926</text:p>
          </table:table-cell>
          <table:table-cell table:formula="of:=[.D6]-[.D5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0" office:value-type="float" office:value="100" calcext:value-type="float">
            <text:p>10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15740740740741" calcext:value-type="float">
            <text:p>0,00001157407407407410</text:p>
          </table:table-cell>
          <table:table-cell table:formula="of:=[.D7]-[.D6]" office:value-type="float" office:value="0.00000231481481481482" calcext:value-type="float">
            <text:p>0,00000231481481481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0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38888888888889" calcext:value-type="float">
            <text:p>0,00001388888888888890</text:p>
          </table:table-cell>
          <table:table-cell table:formula="of:=[.D8]-[.D7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0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62037037037037" calcext:value-type="float">
            <text:p>0,00001620370370370370</text:p>
          </table:table-cell>
          <table:table-cell table:formula="of:=[.D9]-[.D8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0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85185185185185" calcext:value-type="float">
            <text:p>0,00001851851851851850</text:p>
          </table:table-cell>
          <table:table-cell table:formula="of:=[.D10]-[.D9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0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08333333333333" calcext:value-type="float">
            <text:p>0,00002083333333333330</text:p>
          </table:table-cell>
          <table:table-cell table:formula="of:=[.D11]-[.D10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0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31481481481481" calcext:value-type="float">
            <text:p>0,00002314814814814820</text:p>
          </table:table-cell>
          <table:table-cell table:formula="of:=[.D12]-[.D11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0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5462962962963" calcext:value-type="float">
            <text:p>0,00002546296296296300</text:p>
          </table:table-cell>
          <table:table-cell table:formula="of:=[.D13]-[.D12]" office:value-type="float" office:value="0.00000231481481481482" calcext:value-type="float">
            <text:p>0,00000231481481481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77777777777778" calcext:value-type="float">
            <text:p>0,00002777777777777780</text:p>
          </table:table-cell>
          <table:table-cell table:formula="of:=[.D14]-[.D13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0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00925925925926" calcext:value-type="float">
            <text:p>0,00003009259259259260</text:p>
          </table:table-cell>
          <table:table-cell table:formula="of:=[.D15]-[.D14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0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24074074074074" calcext:value-type="float">
            <text:p>0,00003240740740740740</text:p>
          </table:table-cell>
          <table:table-cell table:formula="of:=[.D16]-[.D15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47222222222222" calcext:value-type="float">
            <text:p>0,00003472222222222220</text:p>
          </table:table-cell>
          <table:table-cell table:formula="of:=[.D17]-[.D16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0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37037037037037" calcext:value-type="float">
            <text:p>0,00003703703703703700</text:p>
          </table:table-cell>
          <table:table-cell table:formula="of:=[.D18]-[.D17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0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393518518518519" calcext:value-type="float">
            <text:p>0,00003935185185185190</text:p>
          </table:table-cell>
          <table:table-cell table:formula="of:=[.D19]-[.D18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416666666666667" calcext:value-type="float">
            <text:p>0,00004166666666666670</text:p>
          </table:table-cell>
          <table:table-cell table:formula="of:=[.D20]-[.D19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0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439814814814815" calcext:value-type="float">
            <text:p>0,00004398148148148150</text:p>
          </table:table-cell>
          <table:table-cell table:formula="of:=[.D21]-[.D20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462962962962963" calcext:value-type="float">
            <text:p>0,00004629629629629630</text:p>
          </table:table-cell>
          <table:table-cell table:formula="of:=[.D22]-[.D21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0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486111111111111" calcext:value-type="float">
            <text:p>0,00004861111111111110</text:p>
          </table:table-cell>
          <table:table-cell table:formula="of:=[.D23]-[.D22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0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509259259259259" calcext:value-type="float">
            <text:p>0,00005092592592592590</text:p>
          </table:table-cell>
          <table:table-cell table:formula="of:=[.D24]-[.D23]" office:value-type="float" office:value="0.00000231481481481482" calcext:value-type="float">
            <text:p>0,00000231481481481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0" office:value-type="float" office:value="460" calcext:value-type="float">
            <text:p>46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532407407407407" calcext:value-type="float">
            <text:p>0,00005324074074074070</text:p>
          </table:table-cell>
          <table:table-cell table:formula="of:=[.D25]-[.D24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555555555555556" calcext:value-type="float">
            <text:p>0,00005555555555555560</text:p>
          </table:table-cell>
          <table:table-cell table:formula="of:=[.D26]-[.D25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0" office:value-type="float" office:value="500" calcext:value-type="float">
            <text:p>5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578703703703704" calcext:value-type="float">
            <text:p>0,00005787037037037040</text:p>
          </table:table-cell>
          <table:table-cell table:formula="of:=[.D27]-[.D26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0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601851851851852" calcext:value-type="float">
            <text:p>0,00006018518518518520</text:p>
          </table:table-cell>
          <table:table-cell table:formula="of:=[.D28]-[.D27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0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625" calcext:value-type="float">
            <text:p>0,00006250000000000000</text:p>
          </table:table-cell>
          <table:table-cell table:formula="of:=[.D29]-[.D28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0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648148148148148" calcext:value-type="float">
            <text:p>0,00006481481481481480</text:p>
          </table:table-cell>
          <table:table-cell table:formula="of:=[.D30]-[.D29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0" office:value-type="float" office:value="580" calcext:value-type="float">
            <text:p>58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671296296296296" calcext:value-type="float">
            <text:p>0,00006712962962962960</text:p>
          </table:table-cell>
          <table:table-cell table:formula="of:=[.D31]-[.D30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694444444444444" calcext:value-type="float">
            <text:p>0,00006944444444444440</text:p>
          </table:table-cell>
          <table:table-cell table:formula="of:=[.D32]-[.D31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0" office:value-type="float" office:value="620" calcext:value-type="float">
            <text:p>62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717592592592593" calcext:value-type="float">
            <text:p>0,00007175925925925930</text:p>
          </table:table-cell>
          <table:table-cell table:formula="of:=[.D33]-[.D32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0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740740740740741" calcext:value-type="float">
            <text:p>0,00007407407407407410</text:p>
          </table:table-cell>
          <table:table-cell table:formula="of:=[.D34]-[.D33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0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763888888888889" calcext:value-type="float">
            <text:p>0,00007638888888888890</text:p>
          </table:table-cell>
          <table:table-cell table:formula="of:=[.D35]-[.D34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0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787037037037037" calcext:value-type="float">
            <text:p>0,00007870370370370370</text:p>
          </table:table-cell>
          <table:table-cell table:formula="of:=[.D36]-[.D35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0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810185185185185" calcext:value-type="float">
            <text:p>0,00008101851851851850</text:p>
          </table:table-cell>
          <table:table-cell table:formula="of:=[.D37]-[.D36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833333333333333" calcext:value-type="float">
            <text:p>0,00008333333333333330</text:p>
          </table:table-cell>
          <table:table-cell table:formula="of:=[.D38]-[.D37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0" office:value-type="float" office:value="740" calcext:value-type="float">
            <text:p>74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856481481481481" calcext:value-type="float">
            <text:p>0,00008564814814814810</text:p>
          </table:table-cell>
          <table:table-cell table:formula="of:=[.D39]-[.D38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0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87962962962963" calcext:value-type="float">
            <text:p>0,00008796296296296300</text:p>
          </table:table-cell>
          <table:table-cell table:formula="of:=[.D40]-[.D39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0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902777777777778" calcext:value-type="float">
            <text:p>0,00009027777777777780</text:p>
          </table:table-cell>
          <table:table-cell table:formula="of:=[.D41]-[.D40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925925925925926" calcext:value-type="float">
            <text:p>0,00009259259259259260</text:p>
          </table:table-cell>
          <table:table-cell table:formula="of:=[.D42]-[.D41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0" office:value-type="float" office:value="820" calcext:value-type="float">
            <text:p>82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949074074074074" calcext:value-type="float">
            <text:p>0,00009490740740740740</text:p>
          </table:table-cell>
          <table:table-cell table:formula="of:=[.D43]-[.D42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972222222222222" calcext:value-type="float">
            <text:p>0,00009722222222222220</text:p>
          </table:table-cell>
          <table:table-cell table:formula="of:=[.D44]-[.D43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0" office:value-type="float" office:value="860" calcext:value-type="float">
            <text:p>86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99537037037037" calcext:value-type="float">
            <text:p>0,00009953703703703700</text:p>
          </table:table-cell>
          <table:table-cell table:formula="of:=[.D45]-[.D44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0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01851851851852" calcext:value-type="float">
            <text:p>0,00010185185185185200</text:p>
          </table:table-cell>
          <table:table-cell table:formula="of:=[.D46]-[.D45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04166666666667" calcext:value-type="float">
            <text:p>0,00010416666666666700</text:p>
          </table:table-cell>
          <table:table-cell table:formula="of:=[.D47]-[.D46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0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06481481481481" calcext:value-type="float">
            <text:p>0,00010648148148148100</text:p>
          </table:table-cell>
          <table:table-cell table:formula="of:=[.D48]-[.D47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0" office:value-type="float" office:value="940" calcext:value-type="float">
            <text:p>94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08796296296296" calcext:value-type="float">
            <text:p>0,00010879629629629600</text:p>
          </table:table-cell>
          <table:table-cell table:formula="of:=[.D49]-[.D48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11111111111111" calcext:value-type="float">
            <text:p>0,00011111111111111100</text:p>
          </table:table-cell>
          <table:table-cell table:formula="of:=[.D50]-[.D49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0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13425925925926" calcext:value-type="float">
            <text:p>0,00011342592592592600</text:p>
          </table:table-cell>
          <table:table-cell table:formula="of:=[.D51]-[.D50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0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15740740740741" calcext:value-type="float">
            <text:p>0,00011574074074074100</text:p>
          </table:table-cell>
          <table:table-cell table:formula="of:=[.D52]-[.D51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0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18055555555556" calcext:value-type="float">
            <text:p>0,00011805555555555600</text:p>
          </table:table-cell>
          <table:table-cell table:formula="of:=[.D53]-[.D52]" office:value-type="float" office:value="0.00000231481481481481" calcext:value-type="float">
            <text:p>0,00000231481481481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0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2037037037037" calcext:value-type="float">
            <text:p>0,00012037037037037000</text:p>
          </table:table-cell>
          <table:table-cell table:formula="of:=[.D54]-[.D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0" office:value-type="float" office:value="1060" calcext:value-type="float">
            <text:p>106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22685185185185" calcext:value-type="float">
            <text:p>0,00012268518518518500</text:p>
          </table:table-cell>
          <table:table-cell table:formula="of:=[.D55]-[.D54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25" calcext:value-type="float">
            <text:p>0,00012500000000000000</text:p>
          </table:table-cell>
          <table:table-cell table:formula="of:=[.D56]-[.D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0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27314814814815" calcext:value-type="float">
            <text:p>0,00012731481481481500</text:p>
          </table:table-cell>
          <table:table-cell table:formula="of:=[.D57]-[.D56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0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2962962962963" calcext:value-type="float">
            <text:p>0,00012962962962963000</text:p>
          </table:table-cell>
          <table:table-cell table:formula="of:=[.D58]-[.D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0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31944444444444" calcext:value-type="float">
            <text:p>0,00013194444444444400</text:p>
          </table:table-cell>
          <table:table-cell table:formula="of:=[.D59]-[.D58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0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34259259259259" calcext:value-type="float">
            <text:p>0,00013425925925925900</text:p>
          </table:table-cell>
          <table:table-cell table:formula="of:=[.D60]-[.D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0" office:value-type="float" office:value="1180" calcext:value-type="float">
            <text:p>118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36574074074074" calcext:value-type="float">
            <text:p>0,00013657407407407400</text:p>
          </table:table-cell>
          <table:table-cell table:formula="of:=[.D61]-[.D60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38888888888889" calcext:value-type="float">
            <text:p>0,00013888888888888900</text:p>
          </table:table-cell>
          <table:table-cell table:formula="of:=[.D62]-[.D61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0" office:value-type="float" office:value="1220" calcext:value-type="float">
            <text:p>122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41203703703704" calcext:value-type="float">
            <text:p>0,00014120370370370400</text:p>
          </table:table-cell>
          <table:table-cell table:formula="of:=[.D63]-[.D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0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43518518518519" calcext:value-type="float">
            <text:p>0,00014351851851851900</text:p>
          </table:table-cell>
          <table:table-cell table:formula="of:=[.D64]-[.D63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45833333333333" calcext:value-type="float">
            <text:p>0,00014583333333333300</text:p>
          </table:table-cell>
          <table:table-cell table:formula="of:=[.D65]-[.D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0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48148148148148" calcext:value-type="float">
            <text:p>0,00014814814814814800</text:p>
          </table:table-cell>
          <table:table-cell table:formula="of:=[.D66]-[.D65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0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50462962962963" calcext:value-type="float">
            <text:p>0,00015046296296296300</text:p>
          </table:table-cell>
          <table:table-cell table:formula="of:=[.D67]-[.D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0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52777777777778" calcext:value-type="float">
            <text:p>0,00015277777777777800</text:p>
          </table:table-cell>
          <table:table-cell table:formula="of:=[.D68]-[.D67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0" office:value-type="float" office:value="1340" calcext:value-type="float">
            <text:p>134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55092592592593" calcext:value-type="float">
            <text:p>0,00015509259259259300</text:p>
          </table:table-cell>
          <table:table-cell table:formula="of:=[.D69]-[.D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0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57407407407407" calcext:value-type="float">
            <text:p>0,00015740740740740700</text:p>
          </table:table-cell>
          <table:table-cell table:formula="of:=[.D70]-[.D69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0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59722222222222" calcext:value-type="float">
            <text:p>0,00015972222222222200</text:p>
          </table:table-cell>
          <table:table-cell table:formula="of:=[.D71]-[.D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62037037037037" calcext:value-type="float">
            <text:p>0,00016203703703703700</text:p>
          </table:table-cell>
          <table:table-cell table:formula="of:=[.D72]-[.D71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0" office:value-type="float" office:value="1420" calcext:value-type="float">
            <text:p>142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64351851851852" calcext:value-type="float">
            <text:p>0,00016435185185185200</text:p>
          </table:table-cell>
          <table:table-cell table:formula="of:=[.D73]-[.D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66666666666667" calcext:value-type="float">
            <text:p>0,00016666666666666700</text:p>
          </table:table-cell>
          <table:table-cell table:formula="of:=[.D74]-[.D73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0" office:value-type="float" office:value="1460" calcext:value-type="float">
            <text:p>146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68981481481482" calcext:value-type="float">
            <text:p>0,00016898148148148200</text:p>
          </table:table-cell>
          <table:table-cell table:formula="of:=[.D75]-[.D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0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71296296296296" calcext:value-type="float">
            <text:p>0,00017129629629629600</text:p>
          </table:table-cell>
          <table:table-cell table:formula="of:=[.D76]-[.D75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73611111111111" calcext:value-type="float">
            <text:p>0,00017361111111111100</text:p>
          </table:table-cell>
          <table:table-cell table:formula="of:=[.D77]-[.D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0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75925925925926" calcext:value-type="float">
            <text:p>0,00017592592592592600</text:p>
          </table:table-cell>
          <table:table-cell table:formula="of:=[.D78]-[.D77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0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78240740740741" calcext:value-type="float">
            <text:p>0,00017824074074074100</text:p>
          </table:table-cell>
          <table:table-cell table:formula="of:=[.D79]-[.D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0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80555555555556" calcext:value-type="float">
            <text:p>0,00018055555555555600</text:p>
          </table:table-cell>
          <table:table-cell table:formula="of:=[.D80]-[.D79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0" office:value-type="float" office:value="1580" calcext:value-type="float">
            <text:p>158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8287037037037" calcext:value-type="float">
            <text:p>0,00018287037037037000</text:p>
          </table:table-cell>
          <table:table-cell table:formula="of:=[.D81]-[.D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85185185185185" calcext:value-type="float">
            <text:p>0,00018518518518518500</text:p>
          </table:table-cell>
          <table:table-cell table:formula="of:=[.D82]-[.D81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0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875" calcext:value-type="float">
            <text:p>0,00018750000000000000</text:p>
          </table:table-cell>
          <table:table-cell table:formula="of:=[.D83]-[.D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0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89814814814815" calcext:value-type="float">
            <text:p>0,00018981481481481500</text:p>
          </table:table-cell>
          <table:table-cell table:formula="of:=[.D84]-[.D83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0" office:value-type="float" office:value="1660" calcext:value-type="float">
            <text:p>166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9212962962963" calcext:value-type="float">
            <text:p>0,00019212962962963000</text:p>
          </table:table-cell>
          <table:table-cell table:formula="of:=[.D85]-[.D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94444444444444" calcext:value-type="float">
            <text:p>0,00019444444444444400</text:p>
          </table:table-cell>
          <table:table-cell table:formula="of:=[.D86]-[.D85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0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96759259259259" calcext:value-type="float">
            <text:p>0,00019675925925925900</text:p>
          </table:table-cell>
          <table:table-cell table:formula="of:=[.D87]-[.D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0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99074074074074" calcext:value-type="float">
            <text:p>0,00019907407407407400</text:p>
          </table:table-cell>
          <table:table-cell table:formula="of:=[.D88]-[.D87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0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01388888888889" calcext:value-type="float">
            <text:p>0,00020138888888888900</text:p>
          </table:table-cell>
          <table:table-cell table:formula="of:=[.D89]-[.D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0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03703703703704" calcext:value-type="float">
            <text:p>0,00020370370370370400</text:p>
          </table:table-cell>
          <table:table-cell table:formula="of:=[.D90]-[.D89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0" office:value-type="float" office:value="1780" calcext:value-type="float">
            <text:p>178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06018518518519" calcext:value-type="float">
            <text:p>0,00020601851851851900</text:p>
          </table:table-cell>
          <table:table-cell table:formula="of:=[.D91]-[.D90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08333333333333" calcext:value-type="float">
            <text:p>0,00020833333333333300</text:p>
          </table:table-cell>
          <table:table-cell table:formula="of:=[.D92]-[.D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0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10648148148148" calcext:value-type="float">
            <text:p>0,00021064814814814800</text:p>
          </table:table-cell>
          <table:table-cell table:formula="of:=[.D93]-[.D92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0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12962962962963" calcext:value-type="float">
            <text:p>0,00021296296296296300</text:p>
          </table:table-cell>
          <table:table-cell table:formula="of:=[.D94]-[.D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0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15277777777778" calcext:value-type="float">
            <text:p>0,00021527777777777800</text:p>
          </table:table-cell>
          <table:table-cell table:formula="of:=[.D95]-[.D94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0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17592592592593" calcext:value-type="float">
            <text:p>0,00021759259259259300</text:p>
          </table:table-cell>
          <table:table-cell table:formula="of:=[.D96]-[.D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0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19907407407407" calcext:value-type="float">
            <text:p>0,00021990740740740700</text:p>
          </table:table-cell>
          <table:table-cell table:formula="of:=[.D97]-[.D96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22222222222222" calcext:value-type="float">
            <text:p>0,00022222222222222200</text:p>
          </table:table-cell>
          <table:table-cell table:formula="of:=[.D98]-[.D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0" office:value-type="float" office:value="1940" calcext:value-type="float">
            <text:p>194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24537037037037" calcext:value-type="float">
            <text:p>0,00022453703703703700</text:p>
          </table:table-cell>
          <table:table-cell table:formula="of:=[.D99]-[.D98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0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26851851851852" calcext:value-type="float">
            <text:p>0,00022685185185185200</text:p>
          </table:table-cell>
          <table:table-cell table:formula="of:=[.D100]-[.D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0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29166666666667" calcext:value-type="float">
            <text:p>0,00022916666666666700</text:p>
          </table:table-cell>
          <table:table-cell table:formula="of:=[.D101]-[.D100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31481481481482" calcext:value-type="float">
            <text:p>0,00023148148148148200</text:p>
          </table:table-cell>
          <table:table-cell table:formula="of:=[.D102]-[.D1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0" office:value-type="float" office:value="2020" calcext:value-type="float">
            <text:p>202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33796296296296" calcext:value-type="float">
            <text:p>0,00023379629629629600</text:p>
          </table:table-cell>
          <table:table-cell table:formula="of:=[.D103]-[.D102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0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36111111111111" calcext:value-type="float">
            <text:p>0,00023611111111111100</text:p>
          </table:table-cell>
          <table:table-cell table:formula="of:=[.D104]-[.D1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0" office:value-type="float" office:value="2060" calcext:value-type="float">
            <text:p>206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38425925925926" calcext:value-type="float">
            <text:p>0,00023842592592592600</text:p>
          </table:table-cell>
          <table:table-cell table:formula="of:=[.D105]-[.D104]" office:value-type="float" office:value="0.00000231481481481483" calcext:value-type="float">
            <text:p>0,000002314814814814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0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40740740740741" calcext:value-type="float">
            <text:p>0,00024074074074074100</text:p>
          </table:table-cell>
          <table:table-cell table:formula="of:=[.D106]-[.D1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43055555555556" calcext:value-type="float">
            <text:p>0,00024305555555555600</text:p>
          </table:table-cell>
          <table:table-cell table:formula="of:=[.D107]-[.D1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0" office:value-type="float" office:value="2120" calcext:value-type="float">
            <text:p>212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4537037037037" calcext:value-type="float">
            <text:p>0,00024537037037037000</text:p>
          </table:table-cell>
          <table:table-cell table:formula="of:=[.D108]-[.D107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0" office:value-type="float" office:value="2140" calcext:value-type="float">
            <text:p>214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47685185185185" calcext:value-type="float">
            <text:p>0,00024768518518518500</text:p>
          </table:table-cell>
          <table:table-cell table:formula="of:=[.D109]-[.D1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5" calcext:value-type="float">
            <text:p>0,00025000000000000000</text:p>
          </table:table-cell>
          <table:table-cell table:formula="of:=[.D110]-[.D1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0" office:value-type="float" office:value="2180" calcext:value-type="float">
            <text:p>218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52314814814815" calcext:value-type="float">
            <text:p>0,00025231481481481500</text:p>
          </table:table-cell>
          <table:table-cell table:formula="of:=[.D111]-[.D1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0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5462962962963" calcext:value-type="float">
            <text:p>0,00025462962962963000</text:p>
          </table:table-cell>
          <table:table-cell table:formula="of:=[.D112]-[.D111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0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56944444444444" calcext:value-type="float">
            <text:p>0,00025694444444444400</text:p>
          </table:table-cell>
          <table:table-cell table:formula="of:=[.D113]-[.D1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0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59259259259259" calcext:value-type="float">
            <text:p>0,00025925925925925900</text:p>
          </table:table-cell>
          <table:table-cell table:formula="of:=[.D114]-[.D1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0" office:value-type="float" office:value="2260" calcext:value-type="float">
            <text:p>226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61574074074074" calcext:value-type="float">
            <text:p>0,00026157407407407400</text:p>
          </table:table-cell>
          <table:table-cell table:formula="of:=[.D115]-[.D1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0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63888888888889" calcext:value-type="float">
            <text:p>0,00026388888888888900</text:p>
          </table:table-cell>
          <table:table-cell table:formula="of:=[.D116]-[.D115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0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66203703703704" calcext:value-type="float">
            <text:p>0,00026620370370370400</text:p>
          </table:table-cell>
          <table:table-cell table:formula="of:=[.D117]-[.D1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0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68518518518519" calcext:value-type="float">
            <text:p>0,00026851851851851900</text:p>
          </table:table-cell>
          <table:table-cell table:formula="of:=[.D118]-[.D1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0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70833333333333" calcext:value-type="float">
            <text:p>0,00027083333333333300</text:p>
          </table:table-cell>
          <table:table-cell table:formula="of:=[.D119]-[.D1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0" office:value-type="float" office:value="2360" calcext:value-type="float">
            <text:p>236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73148148148148" calcext:value-type="float">
            <text:p>0,00027314814814814800</text:p>
          </table:table-cell>
          <table:table-cell table:formula="of:=[.D120]-[.D119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0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75462962962963" calcext:value-type="float">
            <text:p>0,00027546296296296300</text:p>
          </table:table-cell>
          <table:table-cell table:formula="of:=[.D121]-[.D1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77777777777778" calcext:value-type="float">
            <text:p>0,00027777777777777800</text:p>
          </table:table-cell>
          <table:table-cell table:formula="of:=[.D122]-[.D1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0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80092592592593" calcext:value-type="float">
            <text:p>0,00028009259259259300</text:p>
          </table:table-cell>
          <table:table-cell table:formula="of:=[.D123]-[.D122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0" office:value-type="float" office:value="2440" calcext:value-type="float">
            <text:p>244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82407407407407" calcext:value-type="float">
            <text:p>0,00028240740740740700</text:p>
          </table:table-cell>
          <table:table-cell table:formula="of:=[.D124]-[.D1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0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84722222222222" calcext:value-type="float">
            <text:p>0,00028472222222222200</text:p>
          </table:table-cell>
          <table:table-cell table:formula="of:=[.D125]-[.D1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0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87037037037037" calcext:value-type="float">
            <text:p>0,00028703703703703700</text:p>
          </table:table-cell>
          <table:table-cell table:formula="of:=[.D126]-[.D1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0" office:value-type="float" office:value="2500" calcext:value-type="float">
            <text:p>2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89351851851852" calcext:value-type="float">
            <text:p>0,00028935185185185200</text:p>
          </table:table-cell>
          <table:table-cell table:formula="of:=[.D127]-[.D126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91666666666667" calcext:value-type="float">
            <text:p>0,00029166666666666700</text:p>
          </table:table-cell>
          <table:table-cell table:formula="of:=[.D128]-[.D1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0" office:value-type="float" office:value="2540" calcext:value-type="float">
            <text:p>254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93981481481482" calcext:value-type="float">
            <text:p>0,00029398148148148200</text:p>
          </table:table-cell>
          <table:table-cell table:formula="of:=[.D129]-[.D1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0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96296296296296" calcext:value-type="float">
            <text:p>0,00029629629629629600</text:p>
          </table:table-cell>
          <table:table-cell table:formula="of:=[.D130]-[.D1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0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98611111111111" calcext:value-type="float">
            <text:p>0,00029861111111111100</text:p>
          </table:table-cell>
          <table:table-cell table:formula="of:=[.D131]-[.D130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0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00925925925926" calcext:value-type="float">
            <text:p>0,00030092592592592600</text:p>
          </table:table-cell>
          <table:table-cell table:formula="of:=[.D132]-[.D1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0" office:value-type="float" office:value="2620" calcext:value-type="float">
            <text:p>262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03240740740741" calcext:value-type="float">
            <text:p>0,00030324074074074100</text:p>
          </table:table-cell>
          <table:table-cell table:formula="of:=[.D133]-[.D1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05555555555556" calcext:value-type="float">
            <text:p>0,00030555555555555600</text:p>
          </table:table-cell>
          <table:table-cell table:formula="of:=[.D134]-[.D1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0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0787037037037" calcext:value-type="float">
            <text:p>0,00030787037037037000</text:p>
          </table:table-cell>
          <table:table-cell table:formula="of:=[.D135]-[.D134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0" office:value-type="float" office:value="2680" calcext:value-type="float">
            <text:p>268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10185185185185" calcext:value-type="float">
            <text:p>0,00031018518518518500</text:p>
          </table:table-cell>
          <table:table-cell table:formula="of:=[.D136]-[.D1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125" calcext:value-type="float">
            <text:p>0,00031250000000000000</text:p>
          </table:table-cell>
          <table:table-cell table:formula="of:=[.D137]-[.D1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0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14814814814815" calcext:value-type="float">
            <text:p>0,00031481481481481500</text:p>
          </table:table-cell>
          <table:table-cell table:formula="of:=[.D138]-[.D1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0" office:value-type="float" office:value="2740" calcext:value-type="float">
            <text:p>274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1712962962963" calcext:value-type="float">
            <text:p>0,00031712962962963000</text:p>
          </table:table-cell>
          <table:table-cell table:formula="of:=[.D139]-[.D138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0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19444444444444" calcext:value-type="float">
            <text:p>0,00031944444444444400</text:p>
          </table:table-cell>
          <table:table-cell table:formula="of:=[.D140]-[.D1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0" office:value-type="float" office:value="2780" calcext:value-type="float">
            <text:p>278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21759259259259" calcext:value-type="float">
            <text:p>0,00032175925925925900</text:p>
          </table:table-cell>
          <table:table-cell table:formula="of:=[.D141]-[.D1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24074074074074" calcext:value-type="float">
            <text:p>0,00032407407407407400</text:p>
          </table:table-cell>
          <table:table-cell table:formula="of:=[.D142]-[.D1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0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26388888888889" calcext:value-type="float">
            <text:p>0,00032638888888888900</text:p>
          </table:table-cell>
          <table:table-cell table:formula="of:=[.D143]-[.D142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0" office:value-type="float" office:value="2840" calcext:value-type="float">
            <text:p>284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28703703703704" calcext:value-type="float">
            <text:p>0,00032870370370370400</text:p>
          </table:table-cell>
          <table:table-cell table:formula="of:=[.D144]-[.D1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0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31018518518519" calcext:value-type="float">
            <text:p>0,00033101851851851900</text:p>
          </table:table-cell>
          <table:table-cell table:formula="of:=[.D145]-[.D1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33333333333333" calcext:value-type="float">
            <text:p>0,00033333333333333300</text:p>
          </table:table-cell>
          <table:table-cell table:formula="of:=[.D146]-[.D1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0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35648148148148" calcext:value-type="float">
            <text:p>0,00033564814814814800</text:p>
          </table:table-cell>
          <table:table-cell table:formula="of:=[.D147]-[.D146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0" office:value-type="float" office:value="2920" calcext:value-type="float">
            <text:p>292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37962962962963" calcext:value-type="float">
            <text:p>0,00033796296296296300</text:p>
          </table:table-cell>
          <table:table-cell table:formula="of:=[.D148]-[.D1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0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40277777777778" calcext:value-type="float">
            <text:p>0,00034027777777777800</text:p>
          </table:table-cell>
          <table:table-cell table:formula="of:=[.D149]-[.D1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0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42592592592593" calcext:value-type="float">
            <text:p>0,00034259259259259300</text:p>
          </table:table-cell>
          <table:table-cell table:formula="of:=[.D150]-[.D1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0" office:value-type="float" office:value="2980" calcext:value-type="float">
            <text:p>298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44907407407407" calcext:value-type="float">
            <text:p>0,00034490740740740700</text:p>
          </table:table-cell>
          <table:table-cell table:formula="of:=[.D151]-[.D150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47222222222222" calcext:value-type="float">
            <text:p>0,00034722222222222200</text:p>
          </table:table-cell>
          <table:table-cell table:formula="of:=[.D152]-[.D1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0" office:value-type="float" office:value="3020" calcext:value-type="float">
            <text:p>302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349537037037037" calcext:value-type="float">
            <text:p>0,00034953703703703700</text:p>
          </table:table-cell>
          <table:table-cell table:formula="of:=[.D153]-[.D1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0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351851851851852" calcext:value-type="float">
            <text:p>0,00035185185185185200</text:p>
          </table:table-cell>
          <table:table-cell table:formula="of:=[.D154]-[.D153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0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54166666666667" calcext:value-type="float">
            <text:p>0,00035416666666666700</text:p>
          </table:table-cell>
          <table:table-cell table:formula="of:=[.D155]-[.D1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0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56481481481482" calcext:value-type="float">
            <text:p>0,00035648148148148200</text:p>
          </table:table-cell>
          <table:table-cell table:formula="of:=[.D156]-[.D1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0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58796296296296" calcext:value-type="float">
            <text:p>0,00035879629629629600</text:p>
          </table:table-cell>
          <table:table-cell table:formula="of:=[.D157]-[.D1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61111111111111" calcext:value-type="float">
            <text:p>0,00036111111111111100</text:p>
          </table:table-cell>
          <table:table-cell table:formula="of:=[.D158]-[.D157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0" office:value-type="float" office:value="3140" calcext:value-type="float">
            <text:p>314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63425925925926" calcext:value-type="float">
            <text:p>0,00036342592592592600</text:p>
          </table:table-cell>
          <table:table-cell table:formula="of:=[.D159]-[.D1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0" office:value-type="float" office:value="3160" calcext:value-type="float">
            <text:p>316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365740740740741" calcext:value-type="float">
            <text:p>0,00036574074074074100</text:p>
          </table:table-cell>
          <table:table-cell table:formula="of:=[.D160]-[.D1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0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368055555555556" calcext:value-type="float">
            <text:p>0,00036805555555555600</text:p>
          </table:table-cell>
          <table:table-cell table:formula="of:=[.D161]-[.D1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37037037037037" calcext:value-type="float">
            <text:p>0,00037037037037037000</text:p>
          </table:table-cell>
          <table:table-cell table:formula="of:=[.D162]-[.D161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0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372685185185185" calcext:value-type="float">
            <text:p>0,00037268518518518500</text:p>
          </table:table-cell>
          <table:table-cell table:formula="of:=[.D163]-[.D1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75" calcext:value-type="float">
            <text:p>0,00037500000000000000</text:p>
          </table:table-cell>
          <table:table-cell table:formula="of:=[.D164]-[.D1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0" office:value-type="float" office:value="3260" calcext:value-type="float">
            <text:p>326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77314814814815" calcext:value-type="float">
            <text:p>0,00037731481481481500</text:p>
          </table:table-cell>
          <table:table-cell table:formula="of:=[.D165]-[.D1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0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7962962962963" calcext:value-type="float">
            <text:p>0,00037962962962963000</text:p>
          </table:table-cell>
          <table:table-cell table:formula="of:=[.D166]-[.D165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381944444444444" calcext:value-type="float">
            <text:p>0,00038194444444444400</text:p>
          </table:table-cell>
          <table:table-cell table:formula="of:=[.D167]-[.D1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0" office:value-type="float" office:value="3320" calcext:value-type="float">
            <text:p>332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384259259259259" calcext:value-type="float">
            <text:p>0,00038425925925925900</text:p>
          </table:table-cell>
          <table:table-cell table:formula="of:=[.D168]-[.D1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0" office:value-type="float" office:value="3340" calcext:value-type="float">
            <text:p>334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386574074074074" calcext:value-type="float">
            <text:p>0,00038657407407407400</text:p>
          </table:table-cell>
          <table:table-cell table:formula="of:=[.D169]-[.D1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388888888888889" calcext:value-type="float">
            <text:p>0,00038888888888888900</text:p>
          </table:table-cell>
          <table:table-cell table:formula="of:=[.D170]-[.D169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0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391203703703704" calcext:value-type="float">
            <text:p>0,00039120370370370400</text:p>
          </table:table-cell>
          <table:table-cell table:formula="of:=[.D171]-[.D1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0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393518518518519" calcext:value-type="float">
            <text:p>0,00039351851851851900</text:p>
          </table:table-cell>
          <table:table-cell table:formula="of:=[.D172]-[.D1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0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395833333333333" calcext:value-type="float">
            <text:p>0,00039583333333333300</text:p>
          </table:table-cell>
          <table:table-cell table:formula="of:=[.D173]-[.D1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0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398148148148148" calcext:value-type="float">
            <text:p>0,00039814814814814800</text:p>
          </table:table-cell>
          <table:table-cell table:formula="of:=[.D174]-[.D173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0" office:value-type="float" office:value="3460" calcext:value-type="float">
            <text:p>346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400462962962963" calcext:value-type="float">
            <text:p>0,00040046296296296300</text:p>
          </table:table-cell>
          <table:table-cell table:formula="of:=[.D175]-[.D1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0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402777777777778" calcext:value-type="float">
            <text:p>0,00040277777777777800</text:p>
          </table:table-cell>
          <table:table-cell table:formula="of:=[.D176]-[.D1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0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405092592592593" calcext:value-type="float">
            <text:p>0,00040509259259259300</text:p>
          </table:table-cell>
          <table:table-cell table:formula="of:=[.D177]-[.D1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0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407407407407407" calcext:value-type="float">
            <text:p>0,00040740740740740700</text:p>
          </table:table-cell>
          <table:table-cell table:formula="of:=[.D178]-[.D177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0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409722222222222" calcext:value-type="float">
            <text:p>0,00040972222222222200</text:p>
          </table:table-cell>
          <table:table-cell table:formula="of:=[.D179]-[.D1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0" office:value-type="float" office:value="3560" calcext:value-type="float">
            <text:p>356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412037037037037" calcext:value-type="float">
            <text:p>0,00041203703703703700</text:p>
          </table:table-cell>
          <table:table-cell table:formula="of:=[.D180]-[.D1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0" office:value-type="float" office:value="3580" calcext:value-type="float">
            <text:p>358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414351851851852" calcext:value-type="float">
            <text:p>0,00041435185185185200</text:p>
          </table:table-cell>
          <table:table-cell table:formula="of:=[.D181]-[.D180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416666666666667" calcext:value-type="float">
            <text:p>0,00041666666666666700</text:p>
          </table:table-cell>
          <table:table-cell table:formula="of:=[.D182]-[.D1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0" office:value-type="float" office:value="3620" calcext:value-type="float">
            <text:p>362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418981481481482" calcext:value-type="float">
            <text:p>0,00041898148148148200</text:p>
          </table:table-cell>
          <table:table-cell table:formula="of:=[.D183]-[.D1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0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421296296296296" calcext:value-type="float">
            <text:p>0,00042129629629629600</text:p>
          </table:table-cell>
          <table:table-cell table:formula="of:=[.D184]-[.D1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0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423611111111111" calcext:value-type="float">
            <text:p>0,00042361111111111100</text:p>
          </table:table-cell>
          <table:table-cell table:formula="of:=[.D185]-[.D184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0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425925925925926" calcext:value-type="float">
            <text:p>0,00042592592592592600</text:p>
          </table:table-cell>
          <table:table-cell table:formula="of:=[.D186]-[.D1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0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428240740740741" calcext:value-type="float">
            <text:p>0,00042824074074074100</text:p>
          </table:table-cell>
          <table:table-cell table:formula="of:=[.D187]-[.D1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0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430555555555556" calcext:value-type="float">
            <text:p>0,00043055555555555600</text:p>
          </table:table-cell>
          <table:table-cell table:formula="of:=[.D188]-[.D1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0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43287037037037" calcext:value-type="float">
            <text:p>0,00043287037037037000</text:p>
          </table:table-cell>
          <table:table-cell table:formula="of:=[.D189]-[.D188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0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435185185185185" calcext:value-type="float">
            <text:p>0,00043518518518518500</text:p>
          </table:table-cell>
          <table:table-cell table:formula="of:=[.D190]-[.D1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4375" calcext:value-type="float">
            <text:p>0,00043750000000000000</text:p>
          </table:table-cell>
          <table:table-cell table:formula="of:=[.D191]-[.D1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0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439814814814815" calcext:value-type="float">
            <text:p>0,00043981481481481500</text:p>
          </table:table-cell>
          <table:table-cell table:formula="of:=[.D192]-[.D1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0" office:value-type="float" office:value="3820" calcext:value-type="float">
            <text:p>382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44212962962963" calcext:value-type="float">
            <text:p>0,00044212962962963000</text:p>
          </table:table-cell>
          <table:table-cell table:formula="of:=[.D193]-[.D192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444444444444444" calcext:value-type="float">
            <text:p>0,00044444444444444400</text:p>
          </table:table-cell>
          <table:table-cell table:formula="of:=[.D194]-[.D1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0" office:value-type="float" office:value="3860" calcext:value-type="float">
            <text:p>386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446759259259259" calcext:value-type="float">
            <text:p>0,00044675925925925900</text:p>
          </table:table-cell>
          <table:table-cell table:formula="of:=[.D195]-[.D1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0" office:value-type="float" office:value="3880" calcext:value-type="float">
            <text:p>388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449074074074074" calcext:value-type="float">
            <text:p>0,00044907407407407400</text:p>
          </table:table-cell>
          <table:table-cell table:formula="of:=[.D196]-[.D1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451388888888889" calcext:value-type="float">
            <text:p>0,00045138888888888900</text:p>
          </table:table-cell>
          <table:table-cell table:formula="of:=[.D197]-[.D196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0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453703703703704" calcext:value-type="float">
            <text:p>0,00045370370370370400</text:p>
          </table:table-cell>
          <table:table-cell table:formula="of:=[.D198]-[.D1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0" office:value-type="float" office:value="3940" calcext:value-type="float">
            <text:p>394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456018518518519" calcext:value-type="float">
            <text:p>0,00045601851851851900</text:p>
          </table:table-cell>
          <table:table-cell table:formula="of:=[.D199]-[.D1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458333333333333" calcext:value-type="float">
            <text:p>0,00045833333333333300</text:p>
          </table:table-cell>
          <table:table-cell table:formula="of:=[.D200]-[.D1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0" office:value-type="float" office:value="3980" calcext:value-type="float">
            <text:p>398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460648148148148" calcext:value-type="float">
            <text:p>0,00046064814814814800</text:p>
          </table:table-cell>
          <table:table-cell table:formula="of:=[.D201]-[.D200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462962962962963" calcext:value-type="float">
            <text:p>0,00046296296296296300</text:p>
          </table:table-cell>
          <table:table-cell table:formula="of:=[.D202]-[.D2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0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465277777777778" calcext:value-type="float">
            <text:p>0,00046527777777777800</text:p>
          </table:table-cell>
          <table:table-cell table:formula="of:=[.D203]-[.D2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0" office:value-type="float" office:value="4040" calcext:value-type="float">
            <text:p>404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467592592592593" calcext:value-type="float">
            <text:p>0,00046759259259259300</text:p>
          </table:table-cell>
          <table:table-cell table:formula="of:=[.D204]-[.D2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0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469907407407407" calcext:value-type="float">
            <text:p>0,00046990740740740700</text:p>
          </table:table-cell>
          <table:table-cell table:formula="of:=[.D205]-[.D204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472222222222222" calcext:value-type="float">
            <text:p>0,00047222222222222200</text:p>
          </table:table-cell>
          <table:table-cell table:formula="of:=[.D206]-[.D2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0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474537037037037" calcext:value-type="float">
            <text:p>0,00047453703703703700</text:p>
          </table:table-cell>
          <table:table-cell table:formula="of:=[.D207]-[.D2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0" office:value-type="float" office:value="4120" calcext:value-type="float">
            <text:p>412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476851851851852" calcext:value-type="float">
            <text:p>0,00047685185185185200</text:p>
          </table:table-cell>
          <table:table-cell table:formula="of:=[.D208]-[.D2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0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479166666666667" calcext:value-type="float">
            <text:p>0,00047916666666666700</text:p>
          </table:table-cell>
          <table:table-cell table:formula="of:=[.D209]-[.D208]" office:value-type="float" office:value="0.00000231481481481486" calcext:value-type="float">
            <text:p>0,000002314814814814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0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481481481481482" calcext:value-type="float">
            <text:p>0,00048148148148148200</text:p>
          </table:table-cell>
          <table:table-cell table:formula="of:=[.D210]-[.D2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0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483796296296296" calcext:value-type="float">
            <text:p>0,00048379629629629600</text:p>
          </table:table-cell>
          <table:table-cell table:formula="of:=[.D211]-[.D2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486111111111111" calcext:value-type="float">
            <text:p>0,00048611111111111100</text:p>
          </table:table-cell>
          <table:table-cell table:formula="of:=[.D212]-[.D2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0" office:value-type="float" office:value="4220" calcext:value-type="float">
            <text:p>422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488425925925926" calcext:value-type="float">
            <text:p>0,00048842592592592600</text:p>
          </table:table-cell>
          <table:table-cell table:formula="of:=[.D213]-[.D2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0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490740740740741" calcext:value-type="float">
            <text:p>0,00049074074074074100</text:p>
          </table:table-cell>
          <table:table-cell table:formula="of:=[.D214]-[.D213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0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493055555555556" calcext:value-type="float">
            <text:p>0,00049305555555555600</text:p>
          </table:table-cell>
          <table:table-cell table:formula="of:=[.D215]-[.D2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0" office:value-type="float" office:value="4280" calcext:value-type="float">
            <text:p>428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49537037037037" calcext:value-type="float">
            <text:p>0,00049537037037037000</text:p>
          </table:table-cell>
          <table:table-cell table:formula="of:=[.D216]-[.D2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0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497685185185185" calcext:value-type="float">
            <text:p>0,00049768518518518500</text:p>
          </table:table-cell>
          <table:table-cell table:formula="of:=[.D217]-[.D2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5" calcext:value-type="float">
            <text:p>0,00050000000000000000</text:p>
          </table:table-cell>
          <table:table-cell table:formula="of:=[.D218]-[.D2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0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502314814814815" calcext:value-type="float">
            <text:p>0,00050231481481481500</text:p>
          </table:table-cell>
          <table:table-cell table:formula="of:=[.D219]-[.D2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0" office:value-type="float" office:value="4360" calcext:value-type="float">
            <text:p>436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50462962962963" calcext:value-type="float">
            <text:p>0,00050462962962963000</text:p>
          </table:table-cell>
          <table:table-cell table:formula="of:=[.D220]-[.D2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0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506944444444444" calcext:value-type="float">
            <text:p>0,00050694444444444400</text:p>
          </table:table-cell>
          <table:table-cell table:formula="of:=[.D221]-[.D2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509259259259259" calcext:value-type="float">
            <text:p>0,00050925925925925900</text:p>
          </table:table-cell>
          <table:table-cell table:formula="of:=[.D222]-[.D221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0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511574074074074" calcext:value-type="float">
            <text:p>0,00051157407407407400</text:p>
          </table:table-cell>
          <table:table-cell table:formula="of:=[.D223]-[.D2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0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513888888888889" calcext:value-type="float">
            <text:p>0,00051388888888888900</text:p>
          </table:table-cell>
          <table:table-cell table:formula="of:=[.D224]-[.D2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0" office:value-type="float" office:value="4460" calcext:value-type="float">
            <text:p>446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516203703703704" calcext:value-type="float">
            <text:p>0,00051620370370370400</text:p>
          </table:table-cell>
          <table:table-cell table:formula="of:=[.D225]-[.D2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0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518518518518519" calcext:value-type="float">
            <text:p>0,00051851851851851900</text:p>
          </table:table-cell>
          <table:table-cell table:formula="of:=[.D226]-[.D2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520833333333333" calcext:value-type="float">
            <text:p>0,00052083333333333300</text:p>
          </table:table-cell>
          <table:table-cell table:formula="of:=[.D227]-[.D2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0" office:value-type="float" office:value="4520" calcext:value-type="float">
            <text:p>452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523148148148148" calcext:value-type="float">
            <text:p>0,00052314814814814800</text:p>
          </table:table-cell>
          <table:table-cell table:formula="of:=[.D228]-[.D2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0" office:value-type="float" office:value="4540" calcext:value-type="float">
            <text:p>454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525462962962963" calcext:value-type="float">
            <text:p>0,00052546296296296300</text:p>
          </table:table-cell>
          <table:table-cell table:formula="of:=[.D229]-[.D2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527777777777778" calcext:value-type="float">
            <text:p>0,00052777777777777800</text:p>
          </table:table-cell>
          <table:table-cell table:formula="of:=[.D230]-[.D229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0" office:value-type="float" office:value="4580" calcext:value-type="float">
            <text:p>458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530092592592593" calcext:value-type="float">
            <text:p>0,00053009259259259300</text:p>
          </table:table-cell>
          <table:table-cell table:formula="of:=[.D231]-[.D2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0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532407407407407" calcext:value-type="float">
            <text:p>0,00053240740740740700</text:p>
          </table:table-cell>
          <table:table-cell table:formula="of:=[.D232]-[.D2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0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534722222222222" calcext:value-type="float">
            <text:p>0,00053472222222222200</text:p>
          </table:table-cell>
          <table:table-cell table:formula="of:=[.D233]-[.D2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0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537037037037037" calcext:value-type="float">
            <text:p>0,00053703703703703700</text:p>
          </table:table-cell>
          <table:table-cell table:formula="of:=[.D234]-[.D2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0" office:value-type="float" office:value="4660" calcext:value-type="float">
            <text:p>466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539351851851852" calcext:value-type="float">
            <text:p>0,00053935185185185200</text:p>
          </table:table-cell>
          <table:table-cell table:formula="of:=[.D235]-[.D2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541666666666667" calcext:value-type="float">
            <text:p>0,00054166666666666700</text:p>
          </table:table-cell>
          <table:table-cell table:formula="of:=[.D236]-[.D2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0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543981481481481" calcext:value-type="float">
            <text:p>0,00054398148148148100</text:p>
          </table:table-cell>
          <table:table-cell table:formula="of:=[.D237]-[.D2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0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546296296296296" calcext:value-type="float">
            <text:p>0,00054629629629629600</text:p>
          </table:table-cell>
          <table:table-cell table:formula="of:=[.D238]-[.D237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0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548611111111111" calcext:value-type="float">
            <text:p>0,00054861111111111100</text:p>
          </table:table-cell>
          <table:table-cell table:formula="of:=[.D239]-[.D2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0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550925925925926" calcext:value-type="float">
            <text:p>0,00055092592592592600</text:p>
          </table:table-cell>
          <table:table-cell table:formula="of:=[.D240]-[.D2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0" office:value-type="float" office:value="4780" calcext:value-type="float">
            <text:p>478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553240740740741" calcext:value-type="float">
            <text:p>0,00055324074074074100</text:p>
          </table:table-cell>
          <table:table-cell table:formula="of:=[.D241]-[.D2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555555555555556" calcext:value-type="float">
            <text:p>0,00055555555555555600</text:p>
          </table:table-cell>
          <table:table-cell table:formula="of:=[.D242]-[.D2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0" office:value-type="float" office:value="4820" calcext:value-type="float">
            <text:p>482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55787037037037" calcext:value-type="float">
            <text:p>0,00055787037037037000</text:p>
          </table:table-cell>
          <table:table-cell table:formula="of:=[.D243]-[.D2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0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560185185185185" calcext:value-type="float">
            <text:p>0,00056018518518518500</text:p>
          </table:table-cell>
          <table:table-cell table:formula="of:=[.D244]-[.D2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0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5625" calcext:value-type="float">
            <text:p>0,00056250000000000000</text:p>
          </table:table-cell>
          <table:table-cell table:formula="of:=[.D245]-[.D244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0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564814814814815" calcext:value-type="float">
            <text:p>0,00056481481481481500</text:p>
          </table:table-cell>
          <table:table-cell table:formula="of:=[.D246]-[.D2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0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56712962962963" calcext:value-type="float">
            <text:p>0,00056712962962963000</text:p>
          </table:table-cell>
          <table:table-cell table:formula="of:=[.D247]-[.D2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0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569444444444445" calcext:value-type="float">
            <text:p>0,00056944444444444500</text:p>
          </table:table-cell>
          <table:table-cell table:formula="of:=[.D248]-[.D2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0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571759259259259" calcext:value-type="float">
            <text:p>0,00057175925925925900</text:p>
          </table:table-cell>
          <table:table-cell table:formula="of:=[.D249]-[.D2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0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574074074074074" calcext:value-type="float">
            <text:p>0,00057407407407407400</text:p>
          </table:table-cell>
          <table:table-cell table:formula="of:=[.D250]-[.D2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0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576388888888889" calcext:value-type="float">
            <text:p>0,00057638888888888900</text:p>
          </table:table-cell>
          <table:table-cell table:formula="of:=[.D251]-[.D2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0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578703703703704" calcext:value-type="float">
            <text:p>0,00057870370370370400</text:p>
          </table:table-cell>
          <table:table-cell table:formula="of:=[.D252]-[.D2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0" office:value-type="float" office:value="5020" calcext:value-type="float">
            <text:p>502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581018518518519" calcext:value-type="float">
            <text:p>0,00058101851851851900</text:p>
          </table:table-cell>
          <table:table-cell table:formula="of:=[.D253]-[.D252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583333333333333" calcext:value-type="float">
            <text:p>0,00058333333333333300</text:p>
          </table:table-cell>
          <table:table-cell table:formula="of:=[.D254]-[.D2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0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585648148148148" calcext:value-type="float">
            <text:p>0,00058564814814814800</text:p>
          </table:table-cell>
          <table:table-cell table:formula="of:=[.D255]-[.D2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0" office:value-type="float" office:value="5080" calcext:value-type="float">
            <text:p>508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587962962962963" calcext:value-type="float">
            <text:p>0,00058796296296296300</text:p>
          </table:table-cell>
          <table:table-cell table:formula="of:=[.D256]-[.D2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590277777777778" calcext:value-type="float">
            <text:p>0,00059027777777777800</text:p>
          </table:table-cell>
          <table:table-cell table:formula="of:=[.D257]-[.D2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0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592592592592593" calcext:value-type="float">
            <text:p>0,00059259259259259300</text:p>
          </table:table-cell>
          <table:table-cell table:formula="of:=[.D258]-[.D2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0" office:value-type="float" office:value="5140" calcext:value-type="float">
            <text:p>514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594907407407407" calcext:value-type="float">
            <text:p>0,00059490740740740700</text:p>
          </table:table-cell>
          <table:table-cell table:formula="of:=[.D259]-[.D2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0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597222222222222" calcext:value-type="float">
            <text:p>0,00059722222222222200</text:p>
          </table:table-cell>
          <table:table-cell table:formula="of:=[.D260]-[.D2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0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599537037037037" calcext:value-type="float">
            <text:p>0,00059953703703703700</text:p>
          </table:table-cell>
          <table:table-cell table:formula="of:=[.D261]-[.D260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601851851851852" calcext:value-type="float">
            <text:p>0,00060185185185185200</text:p>
          </table:table-cell>
          <table:table-cell table:formula="of:=[.D262]-[.D2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0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604166666666667" calcext:value-type="float">
            <text:p>0,00060416666666666700</text:p>
          </table:table-cell>
          <table:table-cell table:formula="of:=[.D263]-[.D2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0" office:value-type="float" office:value="5240" calcext:value-type="float">
            <text:p>524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606481481481482" calcext:value-type="float">
            <text:p>0,00060648148148148200</text:p>
          </table:table-cell>
          <table:table-cell table:formula="of:=[.D264]-[.D2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0" office:value-type="float" office:value="5260" calcext:value-type="float">
            <text:p>526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608796296296296" calcext:value-type="float">
            <text:p>0,00060879629629629600</text:p>
          </table:table-cell>
          <table:table-cell table:formula="of:=[.D265]-[.D2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611111111111111" calcext:value-type="float">
            <text:p>0,00061111111111111100</text:p>
          </table:table-cell>
          <table:table-cell table:formula="of:=[.D266]-[.D2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0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613425925925926" calcext:value-type="float">
            <text:p>0,00061342592592592600</text:p>
          </table:table-cell>
          <table:table-cell table:formula="of:=[.D267]-[.D2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0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615740740740741" calcext:value-type="float">
            <text:p>0,00061574074074074100</text:p>
          </table:table-cell>
          <table:table-cell table:formula="of:=[.D268]-[.D2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0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618055555555556" calcext:value-type="float">
            <text:p>0,00061805555555555600</text:p>
          </table:table-cell>
          <table:table-cell table:formula="of:=[.D269]-[.D268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0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62037037037037" calcext:value-type="float">
            <text:p>0,00062037037037037000</text:p>
          </table:table-cell>
          <table:table-cell table:formula="of:=[.D270]-[.D2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0" office:value-type="float" office:value="5380" calcext:value-type="float">
            <text:p>538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622685185185185" calcext:value-type="float">
            <text:p>0,00062268518518518500</text:p>
          </table:table-cell>
          <table:table-cell table:formula="of:=[.D271]-[.D2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625" calcext:value-type="float">
            <text:p>0,00062500000000000000</text:p>
          </table:table-cell>
          <table:table-cell table:formula="of:=[.D272]-[.D2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0" office:value-type="float" office:value="5420" calcext:value-type="float">
            <text:p>542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627314814814815" calcext:value-type="float">
            <text:p>0,00062731481481481500</text:p>
          </table:table-cell>
          <table:table-cell table:formula="of:=[.D273]-[.D2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0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62962962962963" calcext:value-type="float">
            <text:p>0,00062962962962963000</text:p>
          </table:table-cell>
          <table:table-cell table:formula="of:=[.D274]-[.D2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0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631944444444444" calcext:value-type="float">
            <text:p>0,00063194444444444400</text:p>
          </table:table-cell>
          <table:table-cell table:formula="of:=[.D275]-[.D2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0" office:value-type="float" office:value="5480" calcext:value-type="float">
            <text:p>548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634259259259259" calcext:value-type="float">
            <text:p>0,00063425925925925900</text:p>
          </table:table-cell>
          <table:table-cell table:formula="of:=[.D276]-[.D275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0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636574074074074" calcext:value-type="float">
            <text:p>0,00063657407407407400</text:p>
          </table:table-cell>
          <table:table-cell table:formula="of:=[.D277]-[.D2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638888888888889" calcext:value-type="float">
            <text:p>0,00063888888888888900</text:p>
          </table:table-cell>
          <table:table-cell table:formula="of:=[.D278]-[.D2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0" office:value-type="float" office:value="5540" calcext:value-type="float">
            <text:p>554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641203703703704" calcext:value-type="float">
            <text:p>0,00064120370370370400</text:p>
          </table:table-cell>
          <table:table-cell table:formula="of:=[.D279]-[.D2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0" office:value-type="float" office:value="5560" calcext:value-type="float">
            <text:p>556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643518518518519" calcext:value-type="float">
            <text:p>0,00064351851851851900</text:p>
          </table:table-cell>
          <table:table-cell table:formula="of:=[.D280]-[.D2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0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645833333333333" calcext:value-type="float">
            <text:p>0,00064583333333333300</text:p>
          </table:table-cell>
          <table:table-cell table:formula="of:=[.D281]-[.D2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648148148148148" calcext:value-type="float">
            <text:p>0,00064814814814814800</text:p>
          </table:table-cell>
          <table:table-cell table:formula="of:=[.D282]-[.D2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0" office:value-type="float" office:value="5620" calcext:value-type="float">
            <text:p>562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650462962962963" calcext:value-type="float">
            <text:p>0,00065046296296296300</text:p>
          </table:table-cell>
          <table:table-cell table:formula="of:=[.D283]-[.D2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0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652777777777778" calcext:value-type="float">
            <text:p>0,00065277777777777800</text:p>
          </table:table-cell>
          <table:table-cell table:formula="of:=[.D284]-[.D283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0" office:value-type="float" office:value="5660" calcext:value-type="float">
            <text:p>566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655092592592593" calcext:value-type="float">
            <text:p>0,00065509259259259300</text:p>
          </table:table-cell>
          <table:table-cell table:formula="of:=[.D285]-[.D2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0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657407407407407" calcext:value-type="float">
            <text:p>0,00065740740740740700</text:p>
          </table:table-cell>
          <table:table-cell table:formula="of:=[.D286]-[.D2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659722222222222" calcext:value-type="float">
            <text:p>0,00065972222222222200</text:p>
          </table:table-cell>
          <table:table-cell table:formula="of:=[.D287]-[.D2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0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662037037037037" calcext:value-type="float">
            <text:p>0,00066203703703703700</text:p>
          </table:table-cell>
          <table:table-cell table:formula="of:=[.D288]-[.D2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0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664351851851852" calcext:value-type="float">
            <text:p>0,00066435185185185200</text:p>
          </table:table-cell>
          <table:table-cell table:formula="of:=[.D289]-[.D2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666666666666667" calcext:value-type="float">
            <text:p>0,00066666666666666700</text:p>
          </table:table-cell>
          <table:table-cell table:formula="of:=[.D290]-[.D2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0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668981481481481" calcext:value-type="float">
            <text:p>0,00066898148148148100</text:p>
          </table:table-cell>
          <table:table-cell table:formula="of:=[.D291]-[.D2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0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671296296296296" calcext:value-type="float">
            <text:p>0,00067129629629629600</text:p>
          </table:table-cell>
          <table:table-cell table:formula="of:=[.D292]-[.D291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0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673611111111111" calcext:value-type="float">
            <text:p>0,00067361111111111100</text:p>
          </table:table-cell>
          <table:table-cell table:formula="of:=[.D293]-[.D2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0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675925925925926" calcext:value-type="float">
            <text:p>0,00067592592592592600</text:p>
          </table:table-cell>
          <table:table-cell table:formula="of:=[.D294]-[.D2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0" office:value-type="float" office:value="5860" calcext:value-type="float">
            <text:p>586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678240740740741" calcext:value-type="float">
            <text:p>0,00067824074074074100</text:p>
          </table:table-cell>
          <table:table-cell table:formula="of:=[.D295]-[.D2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680555555555556" calcext:value-type="float">
            <text:p>0,00068055555555555600</text:p>
          </table:table-cell>
          <table:table-cell table:formula="of:=[.D296]-[.D2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0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68287037037037" calcext:value-type="float">
            <text:p>0,00068287037037037000</text:p>
          </table:table-cell>
          <table:table-cell table:formula="of:=[.D297]-[.D2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0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685185185185185" calcext:value-type="float">
            <text:p>0,00068518518518518500</text:p>
          </table:table-cell>
          <table:table-cell table:formula="of:=[.D298]-[.D2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0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6875" calcext:value-type="float">
            <text:p>0,00068750000000000000</text:p>
          </table:table-cell>
          <table:table-cell table:formula="of:=[.D299]-[.D2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0" office:value-type="float" office:value="5960" calcext:value-type="float">
            <text:p>596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689814814814815" calcext:value-type="float">
            <text:p>0,00068981481481481500</text:p>
          </table:table-cell>
          <table:table-cell table:formula="of:=[.D300]-[.D299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0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69212962962963" calcext:value-type="float">
            <text:p>0,00069212962962963000</text:p>
          </table:table-cell>
          <table:table-cell table:formula="of:=[.D301]-[.D3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694444444444445" calcext:value-type="float">
            <text:p>0,00069444444444444500</text:p>
          </table:table-cell>
          <table:table-cell table:formula="of:=[.D302]-[.D3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0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696759259259259" calcext:value-type="float">
            <text:p>0,00069675925925925900</text:p>
          </table:table-cell>
          <table:table-cell table:formula="of:=[.D303]-[.D3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0" office:value-type="float" office:value="6040" calcext:value-type="float">
            <text:p>604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699074074074074" calcext:value-type="float">
            <text:p>0,00069907407407407400</text:p>
          </table:table-cell>
          <table:table-cell table:formula="of:=[.D304]-[.D3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0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701388888888889" calcext:value-type="float">
            <text:p>0,00070138888888888900</text:p>
          </table:table-cell>
          <table:table-cell table:formula="of:=[.D305]-[.D3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0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703703703703704" calcext:value-type="float">
            <text:p>0,00070370370370370400</text:p>
          </table:table-cell>
          <table:table-cell table:formula="of:=[.D306]-[.D3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0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706018518518519" calcext:value-type="float">
            <text:p>0,00070601851851851900</text:p>
          </table:table-cell>
          <table:table-cell table:formula="of:=[.D307]-[.D306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708333333333333" calcext:value-type="float">
            <text:p>0,00070833333333333300</text:p>
          </table:table-cell>
          <table:table-cell table:formula="of:=[.D308]-[.D3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0" office:value-type="float" office:value="6140" calcext:value-type="float">
            <text:p>614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710648148148148" calcext:value-type="float">
            <text:p>0,00071064814814814800</text:p>
          </table:table-cell>
          <table:table-cell table:formula="of:=[.D309]-[.D3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0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712962962962963" calcext:value-type="float">
            <text:p>0,00071296296296296300</text:p>
          </table:table-cell>
          <table:table-cell table:formula="of:=[.D310]-[.D3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0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715277777777778" calcext:value-type="float">
            <text:p>0,00071527777777777800</text:p>
          </table:table-cell>
          <table:table-cell table:formula="of:=[.D311]-[.D3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0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717592592592593" calcext:value-type="float">
            <text:p>0,00071759259259259300</text:p>
          </table:table-cell>
          <table:table-cell table:formula="of:=[.D312]-[.D3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0" office:value-type="float" office:value="6220" calcext:value-type="float">
            <text:p>622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719907407407407" calcext:value-type="float">
            <text:p>0,00071990740740740700</text:p>
          </table:table-cell>
          <table:table-cell table:formula="of:=[.D313]-[.D3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722222222222222" calcext:value-type="float">
            <text:p>0,00072222222222222200</text:p>
          </table:table-cell>
          <table:table-cell table:formula="of:=[.D314]-[.D3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0" office:value-type="float" office:value="6260" calcext:value-type="float">
            <text:p>626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724537037037037" calcext:value-type="float">
            <text:p>0,00072453703703703700</text:p>
          </table:table-cell>
          <table:table-cell table:formula="of:=[.D315]-[.D314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0" office:value-type="float" office:value="6280" calcext:value-type="float">
            <text:p>628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726851851851852" calcext:value-type="float">
            <text:p>0,00072685185185185200</text:p>
          </table:table-cell>
          <table:table-cell table:formula="of:=[.D316]-[.D3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729166666666667" calcext:value-type="float">
            <text:p>0,00072916666666666700</text:p>
          </table:table-cell>
          <table:table-cell table:formula="of:=[.D317]-[.D3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0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731481481481482" calcext:value-type="float">
            <text:p>0,00073148148148148100</text:p>
          </table:table-cell>
          <table:table-cell table:formula="of:=[.D318]-[.D3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0" office:value-type="float" office:value="6340" calcext:value-type="float">
            <text:p>634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733796296296296" calcext:value-type="float">
            <text:p>0,00073379629629629600</text:p>
          </table:table-cell>
          <table:table-cell table:formula="of:=[.D319]-[.D3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0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736111111111111" calcext:value-type="float">
            <text:p>0,00073611111111111100</text:p>
          </table:table-cell>
          <table:table-cell table:formula="of:=[.D320]-[.D3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0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738425925925926" calcext:value-type="float">
            <text:p>0,00073842592592592600</text:p>
          </table:table-cell>
          <table:table-cell table:formula="of:=[.D321]-[.D3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740740740740741" calcext:value-type="float">
            <text:p>0,00074074074074074100</text:p>
          </table:table-cell>
          <table:table-cell table:formula="of:=[.D322]-[.D3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0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743055555555556" calcext:value-type="float">
            <text:p>0,00074305555555555600</text:p>
          </table:table-cell>
          <table:table-cell table:formula="of:=[.D323]-[.D322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0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74537037037037" calcext:value-type="float">
            <text:p>0,00074537037037037000</text:p>
          </table:table-cell>
          <table:table-cell table:formula="of:=[.D324]-[.D3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0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747685185185185" calcext:value-type="float">
            <text:p>0,00074768518518518500</text:p>
          </table:table-cell>
          <table:table-cell table:formula="of:=[.D325]-[.D3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75" calcext:value-type="float">
            <text:p>0,00075000000000000000</text:p>
          </table:table-cell>
          <table:table-cell table:formula="of:=[.D326]-[.D3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0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752314814814815" calcext:value-type="float">
            <text:p>0,00075231481481481500</text:p>
          </table:table-cell>
          <table:table-cell table:formula="of:=[.D327]-[.D3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0" office:value-type="float" office:value="6520" calcext:value-type="float">
            <text:p>652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75462962962963" calcext:value-type="float">
            <text:p>0,00075462962962963000</text:p>
          </table:table-cell>
          <table:table-cell table:formula="of:=[.D328]-[.D3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0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756944444444444" calcext:value-type="float">
            <text:p>0,00075694444444444500</text:p>
          </table:table-cell>
          <table:table-cell table:formula="of:=[.D329]-[.D3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0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759259259259259" calcext:value-type="float">
            <text:p>0,00075925925925925900</text:p>
          </table:table-cell>
          <table:table-cell table:formula="of:=[.D330]-[.D329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0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761574074074074" calcext:value-type="float">
            <text:p>0,00076157407407407400</text:p>
          </table:table-cell>
          <table:table-cell table:formula="of:=[.D331]-[.D3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763888888888889" calcext:value-type="float">
            <text:p>0,00076388888888888900</text:p>
          </table:table-cell>
          <table:table-cell table:formula="of:=[.D332]-[.D3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0" office:value-type="float" office:value="6620" calcext:value-type="float">
            <text:p>662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766203703703704" calcext:value-type="float">
            <text:p>0,00076620370370370400</text:p>
          </table:table-cell>
          <table:table-cell table:formula="of:=[.D333]-[.D3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0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768518518518519" calcext:value-type="float">
            <text:p>0,00076851851851851900</text:p>
          </table:table-cell>
          <table:table-cell table:formula="of:=[.D334]-[.D3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0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770833333333333" calcext:value-type="float">
            <text:p>0,00077083333333333300</text:p>
          </table:table-cell>
          <table:table-cell table:formula="of:=[.D335]-[.D3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0" office:value-type="float" office:value="6680" calcext:value-type="float">
            <text:p>668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773148148148148" calcext:value-type="float">
            <text:p>0,00077314814814814800</text:p>
          </table:table-cell>
          <table:table-cell table:formula="of:=[.D336]-[.D3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0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775462962962963" calcext:value-type="float">
            <text:p>0,00077546296296296300</text:p>
          </table:table-cell>
          <table:table-cell table:formula="of:=[.D337]-[.D3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777777777777778" calcext:value-type="float">
            <text:p>0,00077777777777777800</text:p>
          </table:table-cell>
          <table:table-cell table:formula="of:=[.D338]-[.D337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0" office:value-type="float" office:value="6740" calcext:value-type="float">
            <text:p>674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780092592592593" calcext:value-type="float">
            <text:p>0,00078009259259259300</text:p>
          </table:table-cell>
          <table:table-cell table:formula="of:=[.D339]-[.D3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0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782407407407407" calcext:value-type="float">
            <text:p>0,00078240740740740800</text:p>
          </table:table-cell>
          <table:table-cell table:formula="of:=[.D340]-[.D3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0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784722222222222" calcext:value-type="float">
            <text:p>0,00078472222222222200</text:p>
          </table:table-cell>
          <table:table-cell table:formula="of:=[.D341]-[.D3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787037037037037" calcext:value-type="float">
            <text:p>0,00078703703703703700</text:p>
          </table:table-cell>
          <table:table-cell table:formula="of:=[.D342]-[.D3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0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789351851851852" calcext:value-type="float">
            <text:p>0,00078935185185185200</text:p>
          </table:table-cell>
          <table:table-cell table:formula="of:=[.D343]-[.D3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791666666666667" calcext:value-type="float">
            <text:p>0,00079166666666666700</text:p>
          </table:table-cell>
          <table:table-cell table:formula="of:=[.D344]-[.D3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0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793981481481481" calcext:value-type="float">
            <text:p>0,00079398148148148100</text:p>
          </table:table-cell>
          <table:table-cell table:formula="of:=[.D345]-[.D3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0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796296296296296" calcext:value-type="float">
            <text:p>0,00079629629629629600</text:p>
          </table:table-cell>
          <table:table-cell table:formula="of:=[.D346]-[.D345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798611111111111" calcext:value-type="float">
            <text:p>0,00079861111111111100</text:p>
          </table:table-cell>
          <table:table-cell table:formula="of:=[.D347]-[.D3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0" office:value-type="float" office:value="6920" calcext:value-type="float">
            <text:p>692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800925925925926" calcext:value-type="float">
            <text:p>0,00080092592592592600</text:p>
          </table:table-cell>
          <table:table-cell table:formula="of:=[.D348]-[.D3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0" office:value-type="float" office:value="6940" calcext:value-type="float">
            <text:p>694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803240740740741" calcext:value-type="float">
            <text:p>0,00080324074074074100</text:p>
          </table:table-cell>
          <table:table-cell table:formula="of:=[.D349]-[.D3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805555555555556" calcext:value-type="float">
            <text:p>0,00080555555555555600</text:p>
          </table:table-cell>
          <table:table-cell table:formula="of:=[.D350]-[.D3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0" office:value-type="float" office:value="6980" calcext:value-type="float">
            <text:p>698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80787037037037" calcext:value-type="float">
            <text:p>0,00080787037037037000</text:p>
          </table:table-cell>
          <table:table-cell table:formula="of:=[.D351]-[.D3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810185185185185" calcext:value-type="float">
            <text:p>0,00081018518518518500</text:p>
          </table:table-cell>
          <table:table-cell table:formula="of:=[.D352]-[.D3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0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8125" calcext:value-type="float">
            <text:p>0,00081250000000000000</text:p>
          </table:table-cell>
          <table:table-cell table:formula="of:=[.D353]-[.D3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0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814814814814815" calcext:value-type="float">
            <text:p>0,00081481481481481500</text:p>
          </table:table-cell>
          <table:table-cell table:formula="of:=[.D354]-[.D353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0" office:value-type="float" office:value="7060" calcext:value-type="float">
            <text:p>706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81712962962963" calcext:value-type="float">
            <text:p>0,00081712962962963000</text:p>
          </table:table-cell>
          <table:table-cell table:formula="of:=[.D355]-[.D3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0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819444444444445" calcext:value-type="float">
            <text:p>0,00081944444444444500</text:p>
          </table:table-cell>
          <table:table-cell table:formula="of:=[.D356]-[.D3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0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821759259259259" calcext:value-type="float">
            <text:p>0,00082175925925925900</text:p>
          </table:table-cell>
          <table:table-cell table:formula="of:=[.D357]-[.D3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0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824074074074074" calcext:value-type="float">
            <text:p>0,00082407407407407400</text:p>
          </table:table-cell>
          <table:table-cell table:formula="of:=[.D358]-[.D3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0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826388888888889" calcext:value-type="float">
            <text:p>0,00082638888888888900</text:p>
          </table:table-cell>
          <table:table-cell table:formula="of:=[.D359]-[.D3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0" office:value-type="float" office:value="7160" calcext:value-type="float">
            <text:p>716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828703703703704" calcext:value-type="float">
            <text:p>0,00082870370370370400</text:p>
          </table:table-cell>
          <table:table-cell table:formula="of:=[.D360]-[.D3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0" office:value-type="float" office:value="7180" calcext:value-type="float">
            <text:p>718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831018518518519" calcext:value-type="float">
            <text:p>0,00083101851851851800</text:p>
          </table:table-cell>
          <table:table-cell table:formula="of:=[.D361]-[.D360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833333333333333" calcext:value-type="float">
            <text:p>0,00083333333333333300</text:p>
          </table:table-cell>
          <table:table-cell table:formula="of:=[.D362]-[.D3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0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835648148148148" calcext:value-type="float">
            <text:p>0,00083564814814814800</text:p>
          </table:table-cell>
          <table:table-cell table:formula="of:=[.D363]-[.D3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0" office:value-type="float" office:value="7240" calcext:value-type="float">
            <text:p>724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837962962962963" calcext:value-type="float">
            <text:p>0,00083796296296296300</text:p>
          </table:table-cell>
          <table:table-cell table:formula="of:=[.D364]-[.D3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0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840277777777778" calcext:value-type="float">
            <text:p>0,00084027777777777800</text:p>
          </table:table-cell>
          <table:table-cell table:formula="of:=[.D365]-[.D3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0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842592592592593" calcext:value-type="float">
            <text:p>0,00084259259259259300</text:p>
          </table:table-cell>
          <table:table-cell table:formula="of:=[.D366]-[.D3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0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844907407407407" calcext:value-type="float">
            <text:p>0,00084490740740740700</text:p>
          </table:table-cell>
          <table:table-cell table:formula="of:=[.D367]-[.D3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0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847222222222222" calcext:value-type="float">
            <text:p>0,00084722222222222200</text:p>
          </table:table-cell>
          <table:table-cell table:formula="of:=[.D368]-[.D3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0" office:value-type="float" office:value="7340" calcext:value-type="float">
            <text:p>734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849537037037037" calcext:value-type="float">
            <text:p>0,00084953703703703700</text:p>
          </table:table-cell>
          <table:table-cell table:formula="of:=[.D369]-[.D368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0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851851851851852" calcext:value-type="float">
            <text:p>0,00085185185185185200</text:p>
          </table:table-cell>
          <table:table-cell table:formula="of:=[.D370]-[.D3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0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854166666666667" calcext:value-type="float">
            <text:p>0,00085416666666666700</text:p>
          </table:table-cell>
          <table:table-cell table:formula="of:=[.D371]-[.D3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0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856481481481482" calcext:value-type="float">
            <text:p>0,00085648148148148100</text:p>
          </table:table-cell>
          <table:table-cell table:formula="of:=[.D372]-[.D3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0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858796296296296" calcext:value-type="float">
            <text:p>0,00085879629629629600</text:p>
          </table:table-cell>
          <table:table-cell table:formula="of:=[.D373]-[.D3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861111111111111" calcext:value-type="float">
            <text:p>0,00086111111111111100</text:p>
          </table:table-cell>
          <table:table-cell table:formula="of:=[.D374]-[.D3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0" office:value-type="float" office:value="7460" calcext:value-type="float">
            <text:p>746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863425925925926" calcext:value-type="float">
            <text:p>0,00086342592592592600</text:p>
          </table:table-cell>
          <table:table-cell table:formula="of:=[.D375]-[.D3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0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865740740740741" calcext:value-type="float">
            <text:p>0,00086574074074074100</text:p>
          </table:table-cell>
          <table:table-cell table:formula="of:=[.D376]-[.D3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868055555555556" calcext:value-type="float">
            <text:p>0,00086805555555555600</text:p>
          </table:table-cell>
          <table:table-cell table:formula="of:=[.D377]-[.D376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0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87037037037037" calcext:value-type="float">
            <text:p>0,00087037037037037000</text:p>
          </table:table-cell>
          <table:table-cell table:formula="of:=[.D378]-[.D3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0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872685185185185" calcext:value-type="float">
            <text:p>0,00087268518518518500</text:p>
          </table:table-cell>
          <table:table-cell table:formula="of:=[.D379]-[.D3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875" calcext:value-type="float">
            <text:p>0,00087500000000000000</text:p>
          </table:table-cell>
          <table:table-cell table:formula="of:=[.D380]-[.D3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0" office:value-type="float" office:value="7580" calcext:value-type="float">
            <text:p>758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877314814814815" calcext:value-type="float">
            <text:p>0,00087731481481481500</text:p>
          </table:table-cell>
          <table:table-cell table:formula="of:=[.D381]-[.D3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87962962962963" calcext:value-type="float">
            <text:p>0,00087962962962963000</text:p>
          </table:table-cell>
          <table:table-cell table:formula="of:=[.D382]-[.D3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0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881944444444444" calcext:value-type="float">
            <text:p>0,00088194444444444500</text:p>
          </table:table-cell>
          <table:table-cell table:formula="of:=[.D383]-[.D3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0" office:value-type="float" office:value="7640" calcext:value-type="float">
            <text:p>764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884259259259259" calcext:value-type="float">
            <text:p>0,00088425925925925900</text:p>
          </table:table-cell>
          <table:table-cell table:formula="of:=[.D384]-[.D3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0" office:value-type="float" office:value="7660" calcext:value-type="float">
            <text:p>766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886574074074074" calcext:value-type="float">
            <text:p>0,00088657407407407400</text:p>
          </table:table-cell>
          <table:table-cell table:formula="of:=[.D385]-[.D384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888888888888889" calcext:value-type="float">
            <text:p>0,00088888888888888900</text:p>
          </table:table-cell>
          <table:table-cell table:formula="of:=[.D386]-[.D3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0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891203703703704" calcext:value-type="float">
            <text:p>0,00089120370370370400</text:p>
          </table:table-cell>
          <table:table-cell table:formula="of:=[.D387]-[.D3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0" office:value-type="float" office:value="7720" calcext:value-type="float">
            <text:p>772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893518518518519" calcext:value-type="float">
            <text:p>0,00089351851851851900</text:p>
          </table:table-cell>
          <table:table-cell table:formula="of:=[.D388]-[.D3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0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895833333333333" calcext:value-type="float">
            <text:p>0,00089583333333333300</text:p>
          </table:table-cell>
          <table:table-cell table:formula="of:=[.D389]-[.D3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0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898148148148148" calcext:value-type="float">
            <text:p>0,00089814814814814800</text:p>
          </table:table-cell>
          <table:table-cell table:formula="of:=[.D390]-[.D3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0" office:value-type="float" office:value="7780" calcext:value-type="float">
            <text:p>778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900462962962963" calcext:value-type="float">
            <text:p>0,00090046296296296300</text:p>
          </table:table-cell>
          <table:table-cell table:formula="of:=[.D391]-[.D3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902777777777778" calcext:value-type="float">
            <text:p>0,00090277777777777800</text:p>
          </table:table-cell>
          <table:table-cell table:formula="of:=[.D392]-[.D391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0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905092592592593" calcext:value-type="float">
            <text:p>0,00090509259259259300</text:p>
          </table:table-cell>
          <table:table-cell table:formula="of:=[.D393]-[.D3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0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907407407407407" calcext:value-type="float">
            <text:p>0,00090740740740740800</text:p>
          </table:table-cell>
          <table:table-cell table:formula="of:=[.D394]-[.D3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0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909722222222222" calcext:value-type="float">
            <text:p>0,00090972222222222200</text:p>
          </table:table-cell>
          <table:table-cell table:formula="of:=[.D395]-[.D3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0" office:value-type="float" office:value="7880" calcext:value-type="float">
            <text:p>788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912037037037037" calcext:value-type="float">
            <text:p>0,00091203703703703700</text:p>
          </table:table-cell>
          <table:table-cell table:formula="of:=[.D396]-[.D3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0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914351851851852" calcext:value-type="float">
            <text:p>0,00091435185185185200</text:p>
          </table:table-cell>
          <table:table-cell table:formula="of:=[.D397]-[.D3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916666666666667" calcext:value-type="float">
            <text:p>0,00091666666666666700</text:p>
          </table:table-cell>
          <table:table-cell table:formula="of:=[.D398]-[.D3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0" office:value-type="float" office:value="7940" calcext:value-type="float">
            <text:p>794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918981481481482" calcext:value-type="float">
            <text:p>0,00091898148148148200</text:p>
          </table:table-cell>
          <table:table-cell table:formula="of:=[.D399]-[.D3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0" office:value-type="float" office:value="7960" calcext:value-type="float">
            <text:p>796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921296296296296" calcext:value-type="float">
            <text:p>0,00092129629629629600</text:p>
          </table:table-cell>
          <table:table-cell table:formula="of:=[.D400]-[.D399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0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923611111111111" calcext:value-type="float">
            <text:p>0,00092361111111111100</text:p>
          </table:table-cell>
          <table:table-cell table:formula="of:=[.D401]-[.D4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925925925925926" calcext:value-type="float">
            <text:p>0,00092592592592592600</text:p>
          </table:table-cell>
          <table:table-cell table:formula="of:=[.D402]-[.D4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0" office:value-type="float" office:value="8020" calcext:value-type="float">
            <text:p>8020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928240740740741" calcext:value-type="float">
            <text:p>0,00092824074074074100</text:p>
          </table:table-cell>
          <table:table-cell table:formula="of:=[.D403]-[.D4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0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930555555555556" calcext:value-type="float">
            <text:p>0,00093055555555555600</text:p>
          </table:table-cell>
          <table:table-cell table:formula="of:=[.D404]-[.D4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0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93287037037037" calcext:value-type="float">
            <text:p>0,00093287037037037000</text:p>
          </table:table-cell>
          <table:table-cell table:formula="of:=[.D405]-[.D4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0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935185185185185" calcext:value-type="float">
            <text:p>0,00093518518518518500</text:p>
          </table:table-cell>
          <table:table-cell table:formula="of:=[.D406]-[.D4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9375" calcext:value-type="float">
            <text:p>0,00093750000000000000</text:p>
          </table:table-cell>
          <table:table-cell table:formula="of:=[.D407]-[.D4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0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939814814814815" calcext:value-type="float">
            <text:p>0,00093981481481481500</text:p>
          </table:table-cell>
          <table:table-cell table:formula="of:=[.D408]-[.D407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0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94212962962963" calcext:value-type="float">
            <text:p>0,00094212962962963000</text:p>
          </table:table-cell>
          <table:table-cell table:formula="of:=[.D409]-[.D4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944444444444445" calcext:value-type="float">
            <text:p>0,00094444444444444500</text:p>
          </table:table-cell>
          <table:table-cell table:formula="of:=[.D410]-[.D4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0" office:value-type="float" office:value="8180" calcext:value-type="float">
            <text:p>8180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946759259259259" calcext:value-type="float">
            <text:p>0,00094675925925925900</text:p>
          </table:table-cell>
          <table:table-cell table:formula="of:=[.D411]-[.D4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0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949074074074074" calcext:value-type="float">
            <text:p>0,00094907407407407400</text:p>
          </table:table-cell>
          <table:table-cell table:formula="of:=[.D412]-[.D4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0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951388888888889" calcext:value-type="float">
            <text:p>0,00095138888888888900</text:p>
          </table:table-cell>
          <table:table-cell table:formula="of:=[.D413]-[.D4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0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953703703703704" calcext:value-type="float">
            <text:p>0,00095370370370370400</text:p>
          </table:table-cell>
          <table:table-cell table:formula="of:=[.D414]-[.D4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0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956018518518519" calcext:value-type="float">
            <text:p>0,00095601851851851900</text:p>
          </table:table-cell>
          <table:table-cell table:formula="of:=[.D415]-[.D4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958333333333333" calcext:value-type="float">
            <text:p>0,00095833333333333300</text:p>
          </table:table-cell>
          <table:table-cell table:formula="of:=[.D416]-[.D415]" office:value-type="float" office:value="0.00000231481481481491" calcext:value-type="float">
            <text:p>0,000002314814814814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0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960648148148148" calcext:value-type="float">
            <text:p>0,00096064814814814800</text:p>
          </table:table-cell>
          <table:table-cell table:formula="of:=[.D417]-[.D4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0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962962962962963" calcext:value-type="float">
            <text:p>0,00096296296296296300</text:p>
          </table:table-cell>
          <table:table-cell table:formula="of:=[.D418]-[.D4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0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965277777777778" calcext:value-type="float">
            <text:p>0,00096527777777777800</text:p>
          </table:table-cell>
          <table:table-cell table:formula="of:=[.D419]-[.D4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0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967592592592593" calcext:value-type="float">
            <text:p>0,00096759259259259300</text:p>
          </table:table-cell>
          <table:table-cell table:formula="of:=[.D420]-[.D4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0" office:value-type="float" office:value="8380" calcext:value-type="float">
            <text:p>8380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969907407407407" calcext:value-type="float">
            <text:p>0,00096990740740740700</text:p>
          </table:table-cell>
          <table:table-cell table:formula="of:=[.D421]-[.D4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972222222222222" calcext:value-type="float">
            <text:p>0,00097222222222222200</text:p>
          </table:table-cell>
          <table:table-cell table:formula="of:=[.D422]-[.D4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0" office:value-type="float" office:value="8420" calcext:value-type="float">
            <text:p>8420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974537037037037" calcext:value-type="float">
            <text:p>0,00097453703703703700</text:p>
          </table:table-cell>
          <table:table-cell table:formula="of:=[.D423]-[.D4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0" office:value-type="float" office:value="8440" calcext:value-type="float">
            <text:p>844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976851851851852" calcext:value-type="float">
            <text:p>0,00097685185185185200</text:p>
          </table:table-cell>
          <table:table-cell table:formula="of:=[.D424]-[.D4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0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979166666666667" calcext:value-type="float">
            <text:p>0,00097916666666666700</text:p>
          </table:table-cell>
          <table:table-cell table:formula="of:=[.D425]-[.D4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0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981481481481481" calcext:value-type="float">
            <text:p>0,00098148148148148100</text:p>
          </table:table-cell>
          <table:table-cell table:formula="of:=[.D426]-[.D4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0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983796296296296" calcext:value-type="float">
            <text:p>0,00098379629629629600</text:p>
          </table:table-cell>
          <table:table-cell table:formula="of:=[.D427]-[.D426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0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986111111111111" calcext:value-type="float">
            <text:p>0,00098611111111111100</text:p>
          </table:table-cell>
          <table:table-cell table:formula="of:=[.D428]-[.D4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0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988425925925926" calcext:value-type="float">
            <text:p>0,00098842592592592600</text:p>
          </table:table-cell>
          <table:table-cell table:formula="of:=[.D429]-[.D4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0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990740740740741" calcext:value-type="float">
            <text:p>0,00099074074074074100</text:p>
          </table:table-cell>
          <table:table-cell table:formula="of:=[.D430]-[.D4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0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993055555555556" calcext:value-type="float">
            <text:p>0,00099305555555555600</text:p>
          </table:table-cell>
          <table:table-cell table:formula="of:=[.D431]-[.D4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0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99537037037037" calcext:value-type="float">
            <text:p>0,00099537037037037000</text:p>
          </table:table-cell>
          <table:table-cell table:formula="of:=[.D432]-[.D4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0" office:value-type="float" office:value="8620" calcext:value-type="float">
            <text:p>8620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997685185185185" calcext:value-type="float">
            <text:p>0,00099768518518518500</text:p>
          </table:table-cell>
          <table:table-cell table:formula="of:=[.D433]-[.D4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" calcext:value-type="float">
            <text:p>0,00100000000000000000</text:p>
          </table:table-cell>
          <table:table-cell table:formula="of:=[.D434]-[.D4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0" office:value-type="float" office:value="8660" calcext:value-type="float">
            <text:p>8660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00231481481481" calcext:value-type="float">
            <text:p>0,00100231481481481000</text:p>
          </table:table-cell>
          <table:table-cell table:formula="of:=[.D435]-[.D4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0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00462962962963" calcext:value-type="float">
            <text:p>0,00100462962962963000</text:p>
          </table:table-cell>
          <table:table-cell table:formula="of:=[.D436]-[.D4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00694444444444" calcext:value-type="float">
            <text:p>0,00100694444444444000</text:p>
          </table:table-cell>
          <table:table-cell table:formula="of:=[.D437]-[.D4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0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00925925925926" calcext:value-type="float">
            <text:p>0,00100925925925926000</text:p>
          </table:table-cell>
          <table:table-cell table:formula="of:=[.D438]-[.D4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0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01157407407407" calcext:value-type="float">
            <text:p>0,00101157407407407000</text:p>
          </table:table-cell>
          <table:table-cell table:formula="of:=[.D439]-[.D4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0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01388888888889" calcext:value-type="float">
            <text:p>0,00101388888888889000</text:p>
          </table:table-cell>
          <table:table-cell table:formula="of:=[.D440]-[.D4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0" office:value-type="float" office:value="8780" calcext:value-type="float">
            <text:p>8780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0162037037037" calcext:value-type="float">
            <text:p>0,00101620370370370000</text:p>
          </table:table-cell>
          <table:table-cell table:formula="of:=[.D441]-[.D4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01851851851852" calcext:value-type="float">
            <text:p>0,00101851851851852000</text:p>
          </table:table-cell>
          <table:table-cell table:formula="of:=[.D442]-[.D4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02083333333333" calcext:value-type="float">
            <text:p>0,00102083333333333000</text:p>
          </table:table-cell>
          <table:table-cell table:formula="of:=[.D443]-[.D442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0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02314814814815" calcext:value-type="float">
            <text:p>0,00102314814814815000</text:p>
          </table:table-cell>
          <table:table-cell table:formula="of:=[.D444]-[.D4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0" office:value-type="float" office:value="8860" calcext:value-type="float">
            <text:p>8860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02546296296296" calcext:value-type="float">
            <text:p>0,00102546296296296000</text:p>
          </table:table-cell>
          <table:table-cell table:formula="of:=[.D445]-[.D4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02777777777778" calcext:value-type="float">
            <text:p>0,00102777777777778000</text:p>
          </table:table-cell>
          <table:table-cell table:formula="of:=[.D446]-[.D4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0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03009259259259" calcext:value-type="float">
            <text:p>0,00103009259259259000</text:p>
          </table:table-cell>
          <table:table-cell table:formula="of:=[.D447]-[.D4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0" office:value-type="float" office:value="8920" calcext:value-type="float">
            <text:p>892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03240740740741" calcext:value-type="float">
            <text:p>0,00103240740740741000</text:p>
          </table:table-cell>
          <table:table-cell table:formula="of:=[.D448]-[.D4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0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03472222222222" calcext:value-type="float">
            <text:p>0,00103472222222222000</text:p>
          </table:table-cell>
          <table:table-cell table:formula="of:=[.D449]-[.D4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0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03703703703704" calcext:value-type="float">
            <text:p>0,00103703703703704000</text:p>
          </table:table-cell>
          <table:table-cell table:formula="of:=[.D450]-[.D4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0" office:value-type="float" office:value="8980" calcext:value-type="float">
            <text:p>8980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03935185185185" calcext:value-type="float">
            <text:p>0,00103935185185185000</text:p>
          </table:table-cell>
          <table:table-cell table:formula="of:=[.D451]-[.D4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04166666666667" calcext:value-type="float">
            <text:p>0,00104166666666667000</text:p>
          </table:table-cell>
          <table:table-cell table:formula="of:=[.D452]-[.D4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0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04398148148148" calcext:value-type="float">
            <text:p>0,00104398148148148000</text:p>
          </table:table-cell>
          <table:table-cell table:formula="of:=[.D453]-[.D4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0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0462962962963" calcext:value-type="float">
            <text:p>0,00104629629629630000</text:p>
          </table:table-cell>
          <table:table-cell table:formula="of:=[.D454]-[.D4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0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04861111111111" calcext:value-type="float">
            <text:p>0,00104861111111111000</text:p>
          </table:table-cell>
          <table:table-cell table:formula="of:=[.D455]-[.D4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0" office:value-type="float" office:value="9080" calcext:value-type="float">
            <text:p>908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05092592592593" calcext:value-type="float">
            <text:p>0,00105092592592593000</text:p>
          </table:table-cell>
          <table:table-cell table:formula="of:=[.D456]-[.D4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0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05324074074074" calcext:value-type="float">
            <text:p>0,00105324074074074000</text:p>
          </table:table-cell>
          <table:table-cell table:formula="of:=[.D457]-[.D4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05555555555556" calcext:value-type="float">
            <text:p>0,00105555555555556000</text:p>
          </table:table-cell>
          <table:table-cell table:formula="of:=[.D458]-[.D457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0" office:value-type="float" office:value="9140" calcext:value-type="float">
            <text:p>9140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05787037037037" calcext:value-type="float">
            <text:p>0,00105787037037037000</text:p>
          </table:table-cell>
          <table:table-cell table:formula="of:=[.D459]-[.D4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0" office:value-type="float" office:value="9160" calcext:value-type="float">
            <text:p>916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06018518518519" calcext:value-type="float">
            <text:p>0,00106018518518519000</text:p>
          </table:table-cell>
          <table:table-cell table:formula="of:=[.D460]-[.D4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0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0625" calcext:value-type="float">
            <text:p>0,00106250000000000000</text:p>
          </table:table-cell>
          <table:table-cell table:formula="of:=[.D461]-[.D4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06481481481481" calcext:value-type="float">
            <text:p>0,00106481481481481000</text:p>
          </table:table-cell>
          <table:table-cell table:formula="of:=[.D462]-[.D4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0" office:value-type="float" office:value="9220" calcext:value-type="float">
            <text:p>9220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06712962962963" calcext:value-type="float">
            <text:p>0,00106712962962963000</text:p>
          </table:table-cell>
          <table:table-cell table:formula="of:=[.D463]-[.D4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06944444444444" calcext:value-type="float">
            <text:p>0,00106944444444444000</text:p>
          </table:table-cell>
          <table:table-cell table:formula="of:=[.D464]-[.D4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0" office:value-type="float" office:value="9260" calcext:value-type="float">
            <text:p>9260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07175925925926" calcext:value-type="float">
            <text:p>0,00107175925925926000</text:p>
          </table:table-cell>
          <table:table-cell table:formula="of:=[.D465]-[.D4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0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07407407407407" calcext:value-type="float">
            <text:p>0,00107407407407407000</text:p>
          </table:table-cell>
          <table:table-cell table:formula="of:=[.D466]-[.D4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07638888888889" calcext:value-type="float">
            <text:p>0,00107638888888889000</text:p>
          </table:table-cell>
          <table:table-cell table:formula="of:=[.D467]-[.D4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0" office:value-type="float" office:value="9320" calcext:value-type="float">
            <text:p>932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0787037037037" calcext:value-type="float">
            <text:p>0,00107870370370370000</text:p>
          </table:table-cell>
          <table:table-cell table:formula="of:=[.D468]-[.D4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0" office:value-type="float" office:value="9340" calcext:value-type="float">
            <text:p>9340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08101851851852" calcext:value-type="float">
            <text:p>0,00108101851851852000</text:p>
          </table:table-cell>
          <table:table-cell table:formula="of:=[.D469]-[.D4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08333333333333" calcext:value-type="float">
            <text:p>0,00108333333333333000</text:p>
          </table:table-cell>
          <table:table-cell table:formula="of:=[.D470]-[.D4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0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08564814814815" calcext:value-type="float">
            <text:p>0,00108564814814815000</text:p>
          </table:table-cell>
          <table:table-cell table:formula="of:=[.D471]-[.D4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0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08796296296296" calcext:value-type="float">
            <text:p>0,00108796296296296000</text:p>
          </table:table-cell>
          <table:table-cell table:formula="of:=[.D472]-[.D4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0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09027777777778" calcext:value-type="float">
            <text:p>0,00109027777777778000</text:p>
          </table:table-cell>
          <table:table-cell table:formula="of:=[.D473]-[.D4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0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09259259259259" calcext:value-type="float">
            <text:p>0,00109259259259259000</text:p>
          </table:table-cell>
          <table:table-cell table:formula="of:=[.D474]-[.D473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0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09490740740741" calcext:value-type="float">
            <text:p>0,00109490740740741000</text:p>
          </table:table-cell>
          <table:table-cell table:formula="of:=[.D475]-[.D4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0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09722222222222" calcext:value-type="float">
            <text:p>0,00109722222222222000</text:p>
          </table:table-cell>
          <table:table-cell table:formula="of:=[.D476]-[.D4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0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09953703703704" calcext:value-type="float">
            <text:p>0,00109953703703704000</text:p>
          </table:table-cell>
          <table:table-cell table:formula="of:=[.D477]-[.D4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0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10185185185185" calcext:value-type="float">
            <text:p>0,00110185185185185000</text:p>
          </table:table-cell>
          <table:table-cell table:formula="of:=[.D478]-[.D4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0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10416666666667" calcext:value-type="float">
            <text:p>0,00110416666666667000</text:p>
          </table:table-cell>
          <table:table-cell table:formula="of:=[.D479]-[.D4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0" office:value-type="float" office:value="9560" calcext:value-type="float">
            <text:p>956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10648148148148" calcext:value-type="float">
            <text:p>0,00110648148148148000</text:p>
          </table:table-cell>
          <table:table-cell table:formula="of:=[.D480]-[.D4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0" office:value-type="float" office:value="9580" calcext:value-type="float">
            <text:p>9580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1087962962963" calcext:value-type="float">
            <text:p>0,00110879629629630000</text:p>
          </table:table-cell>
          <table:table-cell table:formula="of:=[.D481]-[.D4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11111111111111" calcext:value-type="float">
            <text:p>0,00111111111111111000</text:p>
          </table:table-cell>
          <table:table-cell table:formula="of:=[.D482]-[.D4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0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11342592592593" calcext:value-type="float">
            <text:p>0,00111342592592593000</text:p>
          </table:table-cell>
          <table:table-cell table:formula="of:=[.D483]-[.D4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0" office:value-type="float" office:value="9640" calcext:value-type="float">
            <text:p>964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11574074074074" calcext:value-type="float">
            <text:p>0,00111574074074074000</text:p>
          </table:table-cell>
          <table:table-cell table:formula="of:=[.D484]-[.D4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0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11805555555556" calcext:value-type="float">
            <text:p>0,00111805555555556000</text:p>
          </table:table-cell>
          <table:table-cell table:formula="of:=[.D485]-[.D4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0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12037037037037" calcext:value-type="float">
            <text:p>0,00112037037037037000</text:p>
          </table:table-cell>
          <table:table-cell table:formula="of:=[.D486]-[.D4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0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12268518518519" calcext:value-type="float">
            <text:p>0,00112268518518519000</text:p>
          </table:table-cell>
          <table:table-cell table:formula="of:=[.D487]-[.D4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125" calcext:value-type="float">
            <text:p>0,00112500000000000000</text:p>
          </table:table-cell>
          <table:table-cell table:formula="of:=[.D488]-[.D4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0" office:value-type="float" office:value="9740" calcext:value-type="float">
            <text:p>9740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12731481481481" calcext:value-type="float">
            <text:p>0,00112731481481481000</text:p>
          </table:table-cell>
          <table:table-cell table:formula="of:=[.D489]-[.D488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0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12962962962963" calcext:value-type="float">
            <text:p>0,00112962962962963000</text:p>
          </table:table-cell>
          <table:table-cell table:formula="of:=[.D490]-[.D4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0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13194444444444" calcext:value-type="float">
            <text:p>0,00113194444444444000</text:p>
          </table:table-cell>
          <table:table-cell table:formula="of:=[.D491]-[.D4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13425925925926" calcext:value-type="float">
            <text:p>0,00113425925925926000</text:p>
          </table:table-cell>
          <table:table-cell table:formula="of:=[.D492]-[.D4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0" office:value-type="float" office:value="9820" calcext:value-type="float">
            <text:p>9820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13657407407407" calcext:value-type="float">
            <text:p>0,00113657407407407000</text:p>
          </table:table-cell>
          <table:table-cell table:formula="of:=[.D493]-[.D4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13888888888889" calcext:value-type="float">
            <text:p>0,00113888888888889000</text:p>
          </table:table-cell>
          <table:table-cell table:formula="of:=[.D494]-[.D4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0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1412037037037" calcext:value-type="float">
            <text:p>0,00114120370370370000</text:p>
          </table:table-cell>
          <table:table-cell table:formula="of:=[.D495]-[.D4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0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14351851851852" calcext:value-type="float">
            <text:p>0,00114351851851852000</text:p>
          </table:table-cell>
          <table:table-cell table:formula="of:=[.D496]-[.D4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14583333333333" calcext:value-type="float">
            <text:p>0,00114583333333333000</text:p>
          </table:table-cell>
          <table:table-cell table:formula="of:=[.D497]-[.D4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0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14814814814815" calcext:value-type="float">
            <text:p>0,00114814814814815000</text:p>
          </table:table-cell>
          <table:table-cell table:formula="of:=[.D498]-[.D4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0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15046296296296" calcext:value-type="float">
            <text:p>0,00115046296296296000</text:p>
          </table:table-cell>
          <table:table-cell table:formula="of:=[.D499]-[.D4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0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15277777777778" calcext:value-type="float">
            <text:p>0,00115277777777778000</text:p>
          </table:table-cell>
          <table:table-cell table:formula="of:=[.D500]-[.D4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0" office:value-type="float" office:value="9980" calcext:value-type="float">
            <text:p>9980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15509259259259" calcext:value-type="float">
            <text:p>0,00115509259259259000</text:p>
          </table:table-cell>
          <table:table-cell table:formula="of:=[.D501]-[.D5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15740740740741" calcext:value-type="float">
            <text:p>0,00115740740740741000</text:p>
          </table:table-cell>
          <table:table-cell table:formula="of:=[.D502]-[.D5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0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15972222222222" calcext:value-type="float">
            <text:p>0,00115972222222222000</text:p>
          </table:table-cell>
          <table:table-cell table:formula="of:=[.D503]-[.D5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0" office:value-type="float" office:value="10040" calcext:value-type="float">
            <text:p>1004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16203703703704" calcext:value-type="float">
            <text:p>0,00116203703703704000</text:p>
          </table:table-cell>
          <table:table-cell table:formula="of:=[.D504]-[.D5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0" office:value-type="float" office:value="10060" calcext:value-type="float">
            <text:p>10060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16435185185185" calcext:value-type="float">
            <text:p>0,00116435185185185000</text:p>
          </table:table-cell>
          <table:table-cell table:formula="of:=[.D505]-[.D504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16666666666667" calcext:value-type="float">
            <text:p>0,00116666666666667000</text:p>
          </table:table-cell>
          <table:table-cell table:formula="of:=[.D506]-[.D5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0" office:value-type="float" office:value="10100" calcext:value-type="float">
            <text:p>1010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16898148148148" calcext:value-type="float">
            <text:p>0,00116898148148148000</text:p>
          </table:table-cell>
          <table:table-cell table:formula="of:=[.D507]-[.D5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0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1712962962963" calcext:value-type="float">
            <text:p>0,00117129629629630000</text:p>
          </table:table-cell>
          <table:table-cell table:formula="of:=[.D508]-[.D5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0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17361111111111" calcext:value-type="float">
            <text:p>0,00117361111111111000</text:p>
          </table:table-cell>
          <table:table-cell table:formula="of:=[.D509]-[.D5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0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17592592592593" calcext:value-type="float">
            <text:p>0,00117592592592593000</text:p>
          </table:table-cell>
          <table:table-cell table:formula="of:=[.D510]-[.D5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0" office:value-type="float" office:value="10180" calcext:value-type="float">
            <text:p>10180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17824074074074" calcext:value-type="float">
            <text:p>0,00117824074074074000</text:p>
          </table:table-cell>
          <table:table-cell table:formula="of:=[.D511]-[.D5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18055555555556" calcext:value-type="float">
            <text:p>0,00118055555555556000</text:p>
          </table:table-cell>
          <table:table-cell table:formula="of:=[.D512]-[.D5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0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18287037037037" calcext:value-type="float">
            <text:p>0,00118287037037037000</text:p>
          </table:table-cell>
          <table:table-cell table:formula="of:=[.D513]-[.D5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0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18518518518519" calcext:value-type="float">
            <text:p>0,00118518518518519000</text:p>
          </table:table-cell>
          <table:table-cell table:formula="of:=[.D514]-[.D5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0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1875" calcext:value-type="float">
            <text:p>0,00118750000000000000</text:p>
          </table:table-cell>
          <table:table-cell table:formula="of:=[.D515]-[.D5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0" office:value-type="float" office:value="10280" calcext:value-type="float">
            <text:p>1028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18981481481481" calcext:value-type="float">
            <text:p>0,00118981481481481000</text:p>
          </table:table-cell>
          <table:table-cell table:formula="of:=[.D516]-[.D5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0" office:value-type="float" office:value="10300" calcext:value-type="float">
            <text:p>1030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19212962962963" calcext:value-type="float">
            <text:p>0,00119212962962963000</text:p>
          </table:table-cell>
          <table:table-cell table:formula="of:=[.D517]-[.D5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19444444444444" calcext:value-type="float">
            <text:p>0,00119444444444444000</text:p>
          </table:table-cell>
          <table:table-cell table:formula="of:=[.D518]-[.D5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0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19675925925926" calcext:value-type="float">
            <text:p>0,00119675925925926000</text:p>
          </table:table-cell>
          <table:table-cell table:formula="of:=[.D519]-[.D5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0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19907407407407" calcext:value-type="float">
            <text:p>0,00119907407407407000</text:p>
          </table:table-cell>
          <table:table-cell table:formula="of:=[.D520]-[.D519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0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20138888888889" calcext:value-type="float">
            <text:p>0,00120138888888889000</text:p>
          </table:table-cell>
          <table:table-cell table:formula="of:=[.D521]-[.D5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2037037037037" calcext:value-type="float">
            <text:p>0,00120370370370370000</text:p>
          </table:table-cell>
          <table:table-cell table:formula="of:=[.D522]-[.D5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0" office:value-type="float" office:value="10420" calcext:value-type="float">
            <text:p>10420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20601851851852" calcext:value-type="float">
            <text:p>0,00120601851851852000</text:p>
          </table:table-cell>
          <table:table-cell table:formula="of:=[.D523]-[.D5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20833333333333" calcext:value-type="float">
            <text:p>0,00120833333333333000</text:p>
          </table:table-cell>
          <table:table-cell table:formula="of:=[.D524]-[.D5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0" office:value-type="float" office:value="10460" calcext:value-type="float">
            <text:p>10460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21064814814815" calcext:value-type="float">
            <text:p>0,00121064814814815000</text:p>
          </table:table-cell>
          <table:table-cell table:formula="of:=[.D525]-[.D5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0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21296296296296" calcext:value-type="float">
            <text:p>0,00121296296296296000</text:p>
          </table:table-cell>
          <table:table-cell table:formula="of:=[.D526]-[.D5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21527777777778" calcext:value-type="float">
            <text:p>0,00121527777777778000</text:p>
          </table:table-cell>
          <table:table-cell table:formula="of:=[.D527]-[.D5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0" office:value-type="float" office:value="10520" calcext:value-type="float">
            <text:p>1052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21759259259259" calcext:value-type="float">
            <text:p>0,00121759259259259000</text:p>
          </table:table-cell>
          <table:table-cell table:formula="of:=[.D528]-[.D5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0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21990740740741" calcext:value-type="float">
            <text:p>0,00121990740740741000</text:p>
          </table:table-cell>
          <table:table-cell table:formula="of:=[.D529]-[.D5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22222222222222" calcext:value-type="float">
            <text:p>0,00122222222222222000</text:p>
          </table:table-cell>
          <table:table-cell table:formula="of:=[.D530]-[.D5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0" office:value-type="float" office:value="10580" calcext:value-type="float">
            <text:p>10580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22453703703704" calcext:value-type="float">
            <text:p>0,00122453703703704000</text:p>
          </table:table-cell>
          <table:table-cell table:formula="of:=[.D531]-[.D5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0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22685185185185" calcext:value-type="float">
            <text:p>0,00122685185185185000</text:p>
          </table:table-cell>
          <table:table-cell table:formula="of:=[.D532]-[.D5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0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22916666666667" calcext:value-type="float">
            <text:p>0,00122916666666667000</text:p>
          </table:table-cell>
          <table:table-cell table:formula="of:=[.D533]-[.D5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0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23148148148148" calcext:value-type="float">
            <text:p>0,00123148148148148000</text:p>
          </table:table-cell>
          <table:table-cell table:formula="of:=[.D534]-[.D5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0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2337962962963" calcext:value-type="float">
            <text:p>0,00123379629629630000</text:p>
          </table:table-cell>
          <table:table-cell table:formula="of:=[.D535]-[.D5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0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23611111111111" calcext:value-type="float">
            <text:p>0,00123611111111111000</text:p>
          </table:table-cell>
          <table:table-cell table:formula="of:=[.D536]-[.D535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0" office:value-type="float" office:value="10700" calcext:value-type="float">
            <text:p>1070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23842592592593" calcext:value-type="float">
            <text:p>0,00123842592592593000</text:p>
          </table:table-cell>
          <table:table-cell table:formula="of:=[.D537]-[.D5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0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24074074074074" calcext:value-type="float">
            <text:p>0,00124074074074074000</text:p>
          </table:table-cell>
          <table:table-cell table:formula="of:=[.D538]-[.D5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0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24305555555556" calcext:value-type="float">
            <text:p>0,00124305555555556000</text:p>
          </table:table-cell>
          <table:table-cell table:formula="of:=[.D539]-[.D5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0" office:value-type="float" office:value="10760" calcext:value-type="float">
            <text:p>1076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24537037037037" calcext:value-type="float">
            <text:p>0,00124537037037037000</text:p>
          </table:table-cell>
          <table:table-cell table:formula="of:=[.D540]-[.D5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0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24768518518519" calcext:value-type="float">
            <text:p>0,00124768518518519000</text:p>
          </table:table-cell>
          <table:table-cell table:formula="of:=[.D541]-[.D5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25" calcext:value-type="float">
            <text:p>0,00125000000000000000</text:p>
          </table:table-cell>
          <table:table-cell table:formula="of:=[.D542]-[.D5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0" office:value-type="float" office:value="10820" calcext:value-type="float">
            <text:p>10820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25231481481481" calcext:value-type="float">
            <text:p>0,00125231481481481000</text:p>
          </table:table-cell>
          <table:table-cell table:formula="of:=[.D543]-[.D5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0" office:value-type="float" office:value="10840" calcext:value-type="float">
            <text:p>1084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25462962962963" calcext:value-type="float">
            <text:p>0,00125462962962963000</text:p>
          </table:table-cell>
          <table:table-cell table:formula="of:=[.D544]-[.D5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0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25694444444444" calcext:value-type="float">
            <text:p>0,00125694444444444000</text:p>
          </table:table-cell>
          <table:table-cell table:formula="of:=[.D545]-[.D5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0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25925925925926" calcext:value-type="float">
            <text:p>0,00125925925925926000</text:p>
          </table:table-cell>
          <table:table-cell table:formula="of:=[.D546]-[.D5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0" office:value-type="float" office:value="10900" calcext:value-type="float">
            <text:p>1090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26157407407407" calcext:value-type="float">
            <text:p>0,00126157407407407000</text:p>
          </table:table-cell>
          <table:table-cell table:formula="of:=[.D547]-[.D5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26388888888889" calcext:value-type="float">
            <text:p>0,00126388888888889000</text:p>
          </table:table-cell>
          <table:table-cell table:formula="of:=[.D548]-[.D5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0" office:value-type="float" office:value="10940" calcext:value-type="float">
            <text:p>10940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2662037037037" calcext:value-type="float">
            <text:p>0,00126620370370370000</text:p>
          </table:table-cell>
          <table:table-cell table:formula="of:=[.D549]-[.D5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0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26851851851852" calcext:value-type="float">
            <text:p>0,00126851851851852000</text:p>
          </table:table-cell>
          <table:table-cell table:formula="of:=[.D550]-[.D5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0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27083333333333" calcext:value-type="float">
            <text:p>0,00127083333333333000</text:p>
          </table:table-cell>
          <table:table-cell table:formula="of:=[.D551]-[.D550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0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27314814814815" calcext:value-type="float">
            <text:p>0,00127314814814815000</text:p>
          </table:table-cell>
          <table:table-cell table:formula="of:=[.D552]-[.D5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0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27546296296296" calcext:value-type="float">
            <text:p>0,00127546296296296000</text:p>
          </table:table-cell>
          <table:table-cell table:formula="of:=[.D553]-[.D5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27777777777778" calcext:value-type="float">
            <text:p>0,00127777777777778000</text:p>
          </table:table-cell>
          <table:table-cell table:formula="of:=[.D554]-[.D5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0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28009259259259" calcext:value-type="float">
            <text:p>0,00128009259259259000</text:p>
          </table:table-cell>
          <table:table-cell table:formula="of:=[.D555]-[.D5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0" office:value-type="float" office:value="11080" calcext:value-type="float">
            <text:p>1108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28240740740741" calcext:value-type="float">
            <text:p>0,00128240740740741000</text:p>
          </table:table-cell>
          <table:table-cell table:formula="of:=[.D556]-[.D5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28472222222222" calcext:value-type="float">
            <text:p>0,00128472222222222000</text:p>
          </table:table-cell>
          <table:table-cell table:formula="of:=[.D557]-[.D5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0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28703703703704" calcext:value-type="float">
            <text:p>0,00128703703703704000</text:p>
          </table:table-cell>
          <table:table-cell table:formula="of:=[.D558]-[.D5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0" office:value-type="float" office:value="11140" calcext:value-type="float">
            <text:p>11140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28935185185185" calcext:value-type="float">
            <text:p>0,00128935185185185000</text:p>
          </table:table-cell>
          <table:table-cell table:formula="of:=[.D559]-[.D5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29166666666667" calcext:value-type="float">
            <text:p>0,00129166666666667000</text:p>
          </table:table-cell>
          <table:table-cell table:formula="of:=[.D560]-[.D5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0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29398148148148" calcext:value-type="float">
            <text:p>0,00129398148148148000</text:p>
          </table:table-cell>
          <table:table-cell table:formula="of:=[.D561]-[.D5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2962962962963" calcext:value-type="float">
            <text:p>0,00129629629629630000</text:p>
          </table:table-cell>
          <table:table-cell table:formula="of:=[.D562]-[.D5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0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29861111111111" calcext:value-type="float">
            <text:p>0,00129861111111111000</text:p>
          </table:table-cell>
          <table:table-cell table:formula="of:=[.D563]-[.D5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0" office:value-type="float" office:value="11240" calcext:value-type="float">
            <text:p>1124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30092592592593" calcext:value-type="float">
            <text:p>0,00130092592592593000</text:p>
          </table:table-cell>
          <table:table-cell table:formula="of:=[.D564]-[.D5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0" office:value-type="float" office:value="11260" calcext:value-type="float">
            <text:p>11260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30324074074074" calcext:value-type="float">
            <text:p>0,00130324074074074000</text:p>
          </table:table-cell>
          <table:table-cell table:formula="of:=[.D565]-[.D5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30555555555556" calcext:value-type="float">
            <text:p>0,00130555555555556000</text:p>
          </table:table-cell>
          <table:table-cell table:formula="of:=[.D566]-[.D5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0" office:value-type="float" office:value="11300" calcext:value-type="float">
            <text:p>1130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30787037037037" calcext:value-type="float">
            <text:p>0,00130787037037037000</text:p>
          </table:table-cell>
          <table:table-cell table:formula="of:=[.D567]-[.D566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0" office:value-type="float" office:value="11320" calcext:value-type="float">
            <text:p>1132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31018518518519" calcext:value-type="float">
            <text:p>0,00131018518518519000</text:p>
          </table:table-cell>
          <table:table-cell table:formula="of:=[.D568]-[.D5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3125" calcext:value-type="float">
            <text:p>0,00131250000000000000</text:p>
          </table:table-cell>
          <table:table-cell table:formula="of:=[.D569]-[.D5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0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31481481481481" calcext:value-type="float">
            <text:p>0,00131481481481481000</text:p>
          </table:table-cell>
          <table:table-cell table:formula="of:=[.D570]-[.D5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0" office:value-type="float" office:value="11380" calcext:value-type="float">
            <text:p>11380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31712962962963" calcext:value-type="float">
            <text:p>0,00131712962962963000</text:p>
          </table:table-cell>
          <table:table-cell table:formula="of:=[.D571]-[.D5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31944444444444" calcext:value-type="float">
            <text:p>0,00131944444444444000</text:p>
          </table:table-cell>
          <table:table-cell table:formula="of:=[.D572]-[.D5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0" office:value-type="float" office:value="11420" calcext:value-type="float">
            <text:p>11420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32175925925926" calcext:value-type="float">
            <text:p>0,00132175925925926000</text:p>
          </table:table-cell>
          <table:table-cell table:formula="of:=[.D573]-[.D5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0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32407407407407" calcext:value-type="float">
            <text:p>0,00132407407407407000</text:p>
          </table:table-cell>
          <table:table-cell table:formula="of:=[.D574]-[.D5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0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32638888888889" calcext:value-type="float">
            <text:p>0,00132638888888889000</text:p>
          </table:table-cell>
          <table:table-cell table:formula="of:=[.D575]-[.D5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0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3287037037037" calcext:value-type="float">
            <text:p>0,00132870370370370000</text:p>
          </table:table-cell>
          <table:table-cell table:formula="of:=[.D576]-[.D5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0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33101851851852" calcext:value-type="float">
            <text:p>0,00133101851851852000</text:p>
          </table:table-cell>
          <table:table-cell table:formula="of:=[.D577]-[.D5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33333333333333" calcext:value-type="float">
            <text:p>0,00133333333333333000</text:p>
          </table:table-cell>
          <table:table-cell table:formula="of:=[.D578]-[.D5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0" office:value-type="float" office:value="11540" calcext:value-type="float">
            <text:p>11540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33564814814815" calcext:value-type="float">
            <text:p>0,00133564814814815000</text:p>
          </table:table-cell>
          <table:table-cell table:formula="of:=[.D579]-[.D5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0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33796296296296" calcext:value-type="float">
            <text:p>0,00133796296296296000</text:p>
          </table:table-cell>
          <table:table-cell table:formula="of:=[.D580]-[.D5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0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34027777777778" calcext:value-type="float">
            <text:p>0,00134027777777778000</text:p>
          </table:table-cell>
          <table:table-cell table:formula="of:=[.D581]-[.D5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34259259259259" calcext:value-type="float">
            <text:p>0,00134259259259259000</text:p>
          </table:table-cell>
          <table:table-cell table:formula="of:=[.D582]-[.D581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0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34490740740741" calcext:value-type="float">
            <text:p>0,00134490740740741000</text:p>
          </table:table-cell>
          <table:table-cell table:formula="of:=[.D583]-[.D5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0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34722222222222" calcext:value-type="float">
            <text:p>0,00134722222222222000</text:p>
          </table:table-cell>
          <table:table-cell table:formula="of:=[.D584]-[.D5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0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34953703703704" calcext:value-type="float">
            <text:p>0,00134953703703704000</text:p>
          </table:table-cell>
          <table:table-cell table:formula="of:=[.D585]-[.D5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0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35185185185185" calcext:value-type="float">
            <text:p>0,00135185185185185000</text:p>
          </table:table-cell>
          <table:table-cell table:formula="of:=[.D586]-[.D5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35416666666667" calcext:value-type="float">
            <text:p>0,00135416666666667000</text:p>
          </table:table-cell>
          <table:table-cell table:formula="of:=[.D587]-[.D5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0" office:value-type="float" office:value="11720" calcext:value-type="float">
            <text:p>1172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35648148148148" calcext:value-type="float">
            <text:p>0,00135648148148148000</text:p>
          </table:table-cell>
          <table:table-cell table:formula="of:=[.D588]-[.D5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0" office:value-type="float" office:value="11740" calcext:value-type="float">
            <text:p>11740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3587962962963" calcext:value-type="float">
            <text:p>0,00135879629629630000</text:p>
          </table:table-cell>
          <table:table-cell table:formula="of:=[.D589]-[.D5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36111111111111" calcext:value-type="float">
            <text:p>0,00136111111111111000</text:p>
          </table:table-cell>
          <table:table-cell table:formula="of:=[.D590]-[.D5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0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36342592592593" calcext:value-type="float">
            <text:p>0,00136342592592593000</text:p>
          </table:table-cell>
          <table:table-cell table:formula="of:=[.D591]-[.D5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0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36574074074074" calcext:value-type="float">
            <text:p>0,00136574074074074000</text:p>
          </table:table-cell>
          <table:table-cell table:formula="of:=[.D592]-[.D5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0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36805555555556" calcext:value-type="float">
            <text:p>0,00136805555555556000</text:p>
          </table:table-cell>
          <table:table-cell table:formula="of:=[.D593]-[.D5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0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37037037037037" calcext:value-type="float">
            <text:p>0,00137037037037037000</text:p>
          </table:table-cell>
          <table:table-cell table:formula="of:=[.D594]-[.D5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0" office:value-type="float" office:value="11860" calcext:value-type="float">
            <text:p>11860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37268518518519" calcext:value-type="float">
            <text:p>0,00137268518518519000</text:p>
          </table:table-cell>
          <table:table-cell table:formula="of:=[.D595]-[.D5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375" calcext:value-type="float">
            <text:p>0,00137500000000000000</text:p>
          </table:table-cell>
          <table:table-cell table:formula="of:=[.D596]-[.D5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0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37731481481481" calcext:value-type="float">
            <text:p>0,00137731481481481000</text:p>
          </table:table-cell>
          <table:table-cell table:formula="of:=[.D597]-[.D5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0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37962962962963" calcext:value-type="float">
            <text:p>0,00137962962962963000</text:p>
          </table:table-cell>
          <table:table-cell table:formula="of:=[.D598]-[.D597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0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38194444444444" calcext:value-type="float">
            <text:p>0,00138194444444444000</text:p>
          </table:table-cell>
          <table:table-cell table:formula="of:=[.D599]-[.D5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0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38425925925926" calcext:value-type="float">
            <text:p>0,00138425925925926000</text:p>
          </table:table-cell>
          <table:table-cell table:formula="of:=[.D600]-[.D5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0" office:value-type="float" office:value="11980" calcext:value-type="float">
            <text:p>11980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38657407407407" calcext:value-type="float">
            <text:p>0,00138657407407407000</text:p>
          </table:table-cell>
          <table:table-cell table:formula="of:=[.D601]-[.D6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38888888888889" calcext:value-type="float">
            <text:p>0,00138888888888889000</text:p>
          </table:table-cell>
          <table:table-cell table:formula="of:=[.D602]-[.D6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0" office:value-type="float" office:value="12020" calcext:value-type="float">
            <text:p>12020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3912037037037" calcext:value-type="float">
            <text:p>0,00139120370370370000</text:p>
          </table:table-cell>
          <table:table-cell table:formula="of:=[.D603]-[.D6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0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39351851851852" calcext:value-type="float">
            <text:p>0,00139351851851852000</text:p>
          </table:table-cell>
          <table:table-cell table:formula="of:=[.D604]-[.D6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0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39583333333333" calcext:value-type="float">
            <text:p>0,00139583333333333000</text:p>
          </table:table-cell>
          <table:table-cell table:formula="of:=[.D605]-[.D6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0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39814814814815" calcext:value-type="float">
            <text:p>0,00139814814814815000</text:p>
          </table:table-cell>
          <table:table-cell table:formula="of:=[.D606]-[.D6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0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40046296296296" calcext:value-type="float">
            <text:p>0,00140046296296296000</text:p>
          </table:table-cell>
          <table:table-cell table:formula="of:=[.D607]-[.D6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0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40277777777778" calcext:value-type="float">
            <text:p>0,00140277777777778000</text:p>
          </table:table-cell>
          <table:table-cell table:formula="of:=[.D608]-[.D6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0" office:value-type="float" office:value="12140" calcext:value-type="float">
            <text:p>12140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40509259259259" calcext:value-type="float">
            <text:p>0,00140509259259259000</text:p>
          </table:table-cell>
          <table:table-cell table:formula="of:=[.D609]-[.D6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0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40740740740741" calcext:value-type="float">
            <text:p>0,00140740740740741000</text:p>
          </table:table-cell>
          <table:table-cell table:formula="of:=[.D610]-[.D6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0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40972222222222" calcext:value-type="float">
            <text:p>0,00140972222222222000</text:p>
          </table:table-cell>
          <table:table-cell table:formula="of:=[.D611]-[.D6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0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41203703703704" calcext:value-type="float">
            <text:p>0,00141203703703704000</text:p>
          </table:table-cell>
          <table:table-cell table:formula="of:=[.D612]-[.D6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0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41435185185185" calcext:value-type="float">
            <text:p>0,00141435185185185000</text:p>
          </table:table-cell>
          <table:table-cell table:formula="of:=[.D613]-[.D612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41666666666667" calcext:value-type="float">
            <text:p>0,00141666666666667000</text:p>
          </table:table-cell>
          <table:table-cell table:formula="of:=[.D614]-[.D6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0" office:value-type="float" office:value="12260" calcext:value-type="float">
            <text:p>12260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41898148148148" calcext:value-type="float">
            <text:p>0,00141898148148148000</text:p>
          </table:table-cell>
          <table:table-cell table:formula="of:=[.D615]-[.D6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0" office:value-type="float" office:value="12280" calcext:value-type="float">
            <text:p>1228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4212962962963" calcext:value-type="float">
            <text:p>0,00142129629629630000</text:p>
          </table:table-cell>
          <table:table-cell table:formula="of:=[.D616]-[.D6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42361111111111" calcext:value-type="float">
            <text:p>0,00142361111111111000</text:p>
          </table:table-cell>
          <table:table-cell table:formula="of:=[.D617]-[.D6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0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42592592592593" calcext:value-type="float">
            <text:p>0,00142592592592593000</text:p>
          </table:table-cell>
          <table:table-cell table:formula="of:=[.D618]-[.D6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0" office:value-type="float" office:value="12340" calcext:value-type="float">
            <text:p>12340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42824074074074" calcext:value-type="float">
            <text:p>0,00142824074074074000</text:p>
          </table:table-cell>
          <table:table-cell table:formula="of:=[.D619]-[.D6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0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43055555555556" calcext:value-type="float">
            <text:p>0,00143055555555556000</text:p>
          </table:table-cell>
          <table:table-cell table:formula="of:=[.D620]-[.D6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0" office:value-type="float" office:value="12380" calcext:value-type="float">
            <text:p>12380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43287037037037" calcext:value-type="float">
            <text:p>0,00143287037037037000</text:p>
          </table:table-cell>
          <table:table-cell table:formula="of:=[.D621]-[.D6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43518518518519" calcext:value-type="float">
            <text:p>0,00143518518518519000</text:p>
          </table:table-cell>
          <table:table-cell table:formula="of:=[.D622]-[.D6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0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4375" calcext:value-type="float">
            <text:p>0,00143750000000000000</text:p>
          </table:table-cell>
          <table:table-cell table:formula="of:=[.D623]-[.D6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0" office:value-type="float" office:value="12440" calcext:value-type="float">
            <text:p>1244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43981481481481" calcext:value-type="float">
            <text:p>0,00143981481481481000</text:p>
          </table:table-cell>
          <table:table-cell table:formula="of:=[.D624]-[.D6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0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44212962962963" calcext:value-type="float">
            <text:p>0,00144212962962963000</text:p>
          </table:table-cell>
          <table:table-cell table:formula="of:=[.D625]-[.D6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44444444444444" calcext:value-type="float">
            <text:p>0,00144444444444444000</text:p>
          </table:table-cell>
          <table:table-cell table:formula="of:=[.D626]-[.D6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0" office:value-type="float" office:value="12500" calcext:value-type="float">
            <text:p>125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44675925925926" calcext:value-type="float">
            <text:p>0,00144675925925926000</text:p>
          </table:table-cell>
          <table:table-cell table:formula="of:=[.D627]-[.D6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0" office:value-type="float" office:value="12520" calcext:value-type="float">
            <text:p>1252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44907407407407" calcext:value-type="float">
            <text:p>0,00144907407407407000</text:p>
          </table:table-cell>
          <table:table-cell table:formula="of:=[.D628]-[.D6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0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45138888888889" calcext:value-type="float">
            <text:p>0,00145138888888889000</text:p>
          </table:table-cell>
          <table:table-cell table:formula="of:=[.D629]-[.D628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0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4537037037037" calcext:value-type="float">
            <text:p>0,00145370370370370000</text:p>
          </table:table-cell>
          <table:table-cell table:formula="of:=[.D630]-[.D6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0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45601851851852" calcext:value-type="float">
            <text:p>0,00145601851851852000</text:p>
          </table:table-cell>
          <table:table-cell table:formula="of:=[.D631]-[.D6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45833333333333" calcext:value-type="float">
            <text:p>0,00145833333333333000</text:p>
          </table:table-cell>
          <table:table-cell table:formula="of:=[.D632]-[.D6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0" office:value-type="float" office:value="12620" calcext:value-type="float">
            <text:p>12620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46064814814815" calcext:value-type="float">
            <text:p>0,00146064814814815000</text:p>
          </table:table-cell>
          <table:table-cell table:formula="of:=[.D633]-[.D6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0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46296296296296" calcext:value-type="float">
            <text:p>0,00146296296296296000</text:p>
          </table:table-cell>
          <table:table-cell table:formula="of:=[.D634]-[.D6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0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46527777777778" calcext:value-type="float">
            <text:p>0,00146527777777778000</text:p>
          </table:table-cell>
          <table:table-cell table:formula="of:=[.D635]-[.D6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0" office:value-type="float" office:value="12680" calcext:value-type="float">
            <text:p>1268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46759259259259" calcext:value-type="float">
            <text:p>0,00146759259259259000</text:p>
          </table:table-cell>
          <table:table-cell table:formula="of:=[.D636]-[.D6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0" office:value-type="float" office:value="12700" calcext:value-type="float">
            <text:p>1270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46990740740741" calcext:value-type="float">
            <text:p>0,00146990740740741000</text:p>
          </table:table-cell>
          <table:table-cell table:formula="of:=[.D637]-[.D6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47222222222222" calcext:value-type="float">
            <text:p>0,00147222222222222000</text:p>
          </table:table-cell>
          <table:table-cell table:formula="of:=[.D638]-[.D6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0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47453703703704" calcext:value-type="float">
            <text:p>0,00147453703703704000</text:p>
          </table:table-cell>
          <table:table-cell table:formula="of:=[.D639]-[.D6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0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47685185185185" calcext:value-type="float">
            <text:p>0,00147685185185185000</text:p>
          </table:table-cell>
          <table:table-cell table:formula="of:=[.D640]-[.D6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0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47916666666667" calcext:value-type="float">
            <text:p>0,00147916666666667000</text:p>
          </table:table-cell>
          <table:table-cell table:formula="of:=[.D641]-[.D6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48148148148148" calcext:value-type="float">
            <text:p>0,00148148148148148000</text:p>
          </table:table-cell>
          <table:table-cell table:formula="of:=[.D642]-[.D6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0" office:value-type="float" office:value="12820" calcext:value-type="float">
            <text:p>12820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4837962962963" calcext:value-type="float">
            <text:p>0,00148379629629630000</text:p>
          </table:table-cell>
          <table:table-cell table:formula="of:=[.D643]-[.D6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0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48611111111111" calcext:value-type="float">
            <text:p>0,00148611111111111000</text:p>
          </table:table-cell>
          <table:table-cell table:formula="of:=[.D644]-[.D643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0" office:value-type="float" office:value="12860" calcext:value-type="float">
            <text:p>12860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48842592592593" calcext:value-type="float">
            <text:p>0,00148842592592593000</text:p>
          </table:table-cell>
          <table:table-cell table:formula="of:=[.D645]-[.D6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0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49074074074074" calcext:value-type="float">
            <text:p>0,00149074074074074000</text:p>
          </table:table-cell>
          <table:table-cell table:formula="of:=[.D646]-[.D6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49305555555556" calcext:value-type="float">
            <text:p>0,00149305555555556000</text:p>
          </table:table-cell>
          <table:table-cell table:formula="of:=[.D647]-[.D6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0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49537037037037" calcext:value-type="float">
            <text:p>0,00149537037037037000</text:p>
          </table:table-cell>
          <table:table-cell table:formula="of:=[.D648]-[.D6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0" office:value-type="float" office:value="12940" calcext:value-type="float">
            <text:p>12940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49768518518519" calcext:value-type="float">
            <text:p>0,00149768518518519000</text:p>
          </table:table-cell>
          <table:table-cell table:formula="of:=[.D649]-[.D6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5" calcext:value-type="float">
            <text:p>0,00150000000000000000</text:p>
          </table:table-cell>
          <table:table-cell table:formula="of:=[.D650]-[.D6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0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50231481481481" calcext:value-type="float">
            <text:p>0,00150231481481481000</text:p>
          </table:table-cell>
          <table:table-cell table:formula="of:=[.D651]-[.D6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0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50462962962963" calcext:value-type="float">
            <text:p>0,00150462962962963000</text:p>
          </table:table-cell>
          <table:table-cell table:formula="of:=[.D652]-[.D6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0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50694444444444" calcext:value-type="float">
            <text:p>0,00150694444444444000</text:p>
          </table:table-cell>
          <table:table-cell table:formula="of:=[.D653]-[.D6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0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50925925925926" calcext:value-type="float">
            <text:p>0,00150925925925926000</text:p>
          </table:table-cell>
          <table:table-cell table:formula="of:=[.D654]-[.D6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0" office:value-type="float" office:value="13060" calcext:value-type="float">
            <text:p>13060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51157407407407" calcext:value-type="float">
            <text:p>0,00151157407407407000</text:p>
          </table:table-cell>
          <table:table-cell table:formula="of:=[.D655]-[.D6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0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51388888888889" calcext:value-type="float">
            <text:p>0,00151388888888889000</text:p>
          </table:table-cell>
          <table:table-cell table:formula="of:=[.D656]-[.D6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0" office:value-type="float" office:value="13100" calcext:value-type="float">
            <text:p>1310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5162037037037" calcext:value-type="float">
            <text:p>0,00151620370370370000</text:p>
          </table:table-cell>
          <table:table-cell table:formula="of:=[.D657]-[.D6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0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51851851851852" calcext:value-type="float">
            <text:p>0,00151851851851852000</text:p>
          </table:table-cell>
          <table:table-cell table:formula="of:=[.D658]-[.D6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0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52083333333333" calcext:value-type="float">
            <text:p>0,00152083333333333000</text:p>
          </table:table-cell>
          <table:table-cell table:formula="of:=[.D659]-[.D658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0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52314814814815" calcext:value-type="float">
            <text:p>0,00152314814814815000</text:p>
          </table:table-cell>
          <table:table-cell table:formula="of:=[.D660]-[.D6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0" office:value-type="float" office:value="13180" calcext:value-type="float">
            <text:p>13180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52546296296296" calcext:value-type="float">
            <text:p>0,00152546296296296000</text:p>
          </table:table-cell>
          <table:table-cell table:formula="of:=[.D661]-[.D6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52777777777778" calcext:value-type="float">
            <text:p>0,00152777777777778000</text:p>
          </table:table-cell>
          <table:table-cell table:formula="of:=[.D662]-[.D6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0" office:value-type="float" office:value="13220" calcext:value-type="float">
            <text:p>13220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53009259259259" calcext:value-type="float">
            <text:p>0,00153009259259259000</text:p>
          </table:table-cell>
          <table:table-cell table:formula="of:=[.D663]-[.D6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0" office:value-type="float" office:value="13240" calcext:value-type="float">
            <text:p>1324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53240740740741" calcext:value-type="float">
            <text:p>0,00153240740740741000</text:p>
          </table:table-cell>
          <table:table-cell table:formula="of:=[.D664]-[.D6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0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53472222222222" calcext:value-type="float">
            <text:p>0,00153472222222222000</text:p>
          </table:table-cell>
          <table:table-cell table:formula="of:=[.D665]-[.D6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0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53703703703704" calcext:value-type="float">
            <text:p>0,00153703703703704000</text:p>
          </table:table-cell>
          <table:table-cell table:formula="of:=[.D666]-[.D6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0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53935185185185" calcext:value-type="float">
            <text:p>0,00153935185185185000</text:p>
          </table:table-cell>
          <table:table-cell table:formula="of:=[.D667]-[.D6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54166666666667" calcext:value-type="float">
            <text:p>0,00154166666666667000</text:p>
          </table:table-cell>
          <table:table-cell table:formula="of:=[.D668]-[.D6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0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54398148148148" calcext:value-type="float">
            <text:p>0,00154398148148148000</text:p>
          </table:table-cell>
          <table:table-cell table:formula="of:=[.D669]-[.D6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0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5462962962963" calcext:value-type="float">
            <text:p>0,00154629629629630000</text:p>
          </table:table-cell>
          <table:table-cell table:formula="of:=[.D670]-[.D6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0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54861111111111" calcext:value-type="float">
            <text:p>0,00154861111111111000</text:p>
          </table:table-cell>
          <table:table-cell table:formula="of:=[.D671]-[.D6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0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55092592592593" calcext:value-type="float">
            <text:p>0,00155092592592593000</text:p>
          </table:table-cell>
          <table:table-cell table:formula="of:=[.D672]-[.D6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0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55324074074074" calcext:value-type="float">
            <text:p>0,00155324074074074000</text:p>
          </table:table-cell>
          <table:table-cell table:formula="of:=[.D673]-[.D6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55555555555556" calcext:value-type="float">
            <text:p>0,00155555555555556000</text:p>
          </table:table-cell>
          <table:table-cell table:formula="of:=[.D674]-[.D6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0" office:value-type="float" office:value="13460" calcext:value-type="float">
            <text:p>13460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55787037037037" calcext:value-type="float">
            <text:p>0,00155787037037037000</text:p>
          </table:table-cell>
          <table:table-cell table:formula="of:=[.D675]-[.D674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0" office:value-type="float" office:value="13480" calcext:value-type="float">
            <text:p>1348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56018518518519" calcext:value-type="float">
            <text:p>0,00156018518518519000</text:p>
          </table:table-cell>
          <table:table-cell table:formula="of:=[.D676]-[.D6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5625" calcext:value-type="float">
            <text:p>0,00156250000000000000</text:p>
          </table:table-cell>
          <table:table-cell table:formula="of:=[.D677]-[.D6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0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56481481481481" calcext:value-type="float">
            <text:p>0,00156481481481482000</text:p>
          </table:table-cell>
          <table:table-cell table:formula="of:=[.D678]-[.D6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0" office:value-type="float" office:value="13540" calcext:value-type="float">
            <text:p>13540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56712962962963" calcext:value-type="float">
            <text:p>0,00156712962962963000</text:p>
          </table:table-cell>
          <table:table-cell table:formula="of:=[.D679]-[.D6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0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56944444444444" calcext:value-type="float">
            <text:p>0,00156944444444444000</text:p>
          </table:table-cell>
          <table:table-cell table:formula="of:=[.D680]-[.D6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0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57175925925926" calcext:value-type="float">
            <text:p>0,00157175925925926000</text:p>
          </table:table-cell>
          <table:table-cell table:formula="of:=[.D681]-[.D6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57407407407407" calcext:value-type="float">
            <text:p>0,00157407407407407000</text:p>
          </table:table-cell>
          <table:table-cell table:formula="of:=[.D682]-[.D6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0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57638888888889" calcext:value-type="float">
            <text:p>0,00157638888888889000</text:p>
          </table:table-cell>
          <table:table-cell table:formula="of:=[.D683]-[.D6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0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5787037037037" calcext:value-type="float">
            <text:p>0,00157870370370370000</text:p>
          </table:table-cell>
          <table:table-cell table:formula="of:=[.D684]-[.D6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0" office:value-type="float" office:value="13660" calcext:value-type="float">
            <text:p>13660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58101851851852" calcext:value-type="float">
            <text:p>0,00158101851851852000</text:p>
          </table:table-cell>
          <table:table-cell table:formula="of:=[.D685]-[.D6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58333333333333" calcext:value-type="float">
            <text:p>0,00158333333333333000</text:p>
          </table:table-cell>
          <table:table-cell table:formula="of:=[.D686]-[.D6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0" office:value-type="float" office:value="13700" calcext:value-type="float">
            <text:p>1370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58564814814815" calcext:value-type="float">
            <text:p>0,00158564814814815000</text:p>
          </table:table-cell>
          <table:table-cell table:formula="of:=[.D687]-[.D6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0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58796296296296" calcext:value-type="float">
            <text:p>0,00158796296296296000</text:p>
          </table:table-cell>
          <table:table-cell table:formula="of:=[.D688]-[.D6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0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59027777777778" calcext:value-type="float">
            <text:p>0,00159027777777778000</text:p>
          </table:table-cell>
          <table:table-cell table:formula="of:=[.D689]-[.D6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0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59259259259259" calcext:value-type="float">
            <text:p>0,00159259259259259000</text:p>
          </table:table-cell>
          <table:table-cell table:formula="of:=[.D690]-[.D689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0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59490740740741" calcext:value-type="float">
            <text:p>0,00159490740740741000</text:p>
          </table:table-cell>
          <table:table-cell table:formula="of:=[.D691]-[.D6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59722222222222" calcext:value-type="float">
            <text:p>0,00159722222222222000</text:p>
          </table:table-cell>
          <table:table-cell table:formula="of:=[.D692]-[.D6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0" office:value-type="float" office:value="13820" calcext:value-type="float">
            <text:p>13820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59953703703704" calcext:value-type="float">
            <text:p>0,00159953703703704000</text:p>
          </table:table-cell>
          <table:table-cell table:formula="of:=[.D693]-[.D6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0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60185185185185" calcext:value-type="float">
            <text:p>0,00160185185185185000</text:p>
          </table:table-cell>
          <table:table-cell table:formula="of:=[.D694]-[.D6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60416666666667" calcext:value-type="float">
            <text:p>0,00160416666666667000</text:p>
          </table:table-cell>
          <table:table-cell table:formula="of:=[.D695]-[.D6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0" office:value-type="float" office:value="13880" calcext:value-type="float">
            <text:p>13880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60648148148148" calcext:value-type="float">
            <text:p>0,00160648148148148000</text:p>
          </table:table-cell>
          <table:table-cell table:formula="of:=[.D696]-[.D6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0" office:value-type="float" office:value="13900" calcext:value-type="float">
            <text:p>1390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6087962962963" calcext:value-type="float">
            <text:p>0,00160879629629630000</text:p>
          </table:table-cell>
          <table:table-cell table:formula="of:=[.D697]-[.D6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61111111111111" calcext:value-type="float">
            <text:p>0,00161111111111111000</text:p>
          </table:table-cell>
          <table:table-cell table:formula="of:=[.D698]-[.D6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0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61342592592593" calcext:value-type="float">
            <text:p>0,00161342592592593000</text:p>
          </table:table-cell>
          <table:table-cell table:formula="of:=[.D699]-[.D6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0" office:value-type="float" office:value="13960" calcext:value-type="float">
            <text:p>13960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61574074074074" calcext:value-type="float">
            <text:p>0,00161574074074074000</text:p>
          </table:table-cell>
          <table:table-cell table:formula="of:=[.D700]-[.D6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0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61805555555556" calcext:value-type="float">
            <text:p>0,00161805555555556000</text:p>
          </table:table-cell>
          <table:table-cell table:formula="of:=[.D701]-[.D7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62037037037037" calcext:value-type="float">
            <text:p>0,00162037037037037000</text:p>
          </table:table-cell>
          <table:table-cell table:formula="of:=[.D702]-[.D7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0" office:value-type="float" office:value="14020" calcext:value-type="float">
            <text:p>14020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62268518518519" calcext:value-type="float">
            <text:p>0,00162268518518519000</text:p>
          </table:table-cell>
          <table:table-cell table:formula="of:=[.D703]-[.D7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625" calcext:value-type="float">
            <text:p>0,00162500000000000000</text:p>
          </table:table-cell>
          <table:table-cell table:formula="of:=[.D704]-[.D7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0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62731481481481" calcext:value-type="float">
            <text:p>0,00162731481481481000</text:p>
          </table:table-cell>
          <table:table-cell table:formula="of:=[.D705]-[.D7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0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62962962962963" calcext:value-type="float">
            <text:p>0,00162962962962963000</text:p>
          </table:table-cell>
          <table:table-cell table:formula="of:=[.D706]-[.D705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63194444444444" calcext:value-type="float">
            <text:p>0,00163194444444444000</text:p>
          </table:table-cell>
          <table:table-cell table:formula="of:=[.D707]-[.D7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0" office:value-type="float" office:value="14120" calcext:value-type="float">
            <text:p>14120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63425925925926" calcext:value-type="float">
            <text:p>0,00163425925925926000</text:p>
          </table:table-cell>
          <table:table-cell table:formula="of:=[.D708]-[.D7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0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63657407407407" calcext:value-type="float">
            <text:p>0,00163657407407407000</text:p>
          </table:table-cell>
          <table:table-cell table:formula="of:=[.D709]-[.D7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63888888888889" calcext:value-type="float">
            <text:p>0,00163888888888889000</text:p>
          </table:table-cell>
          <table:table-cell table:formula="of:=[.D710]-[.D7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0" office:value-type="float" office:value="14180" calcext:value-type="float">
            <text:p>14180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6412037037037" calcext:value-type="float">
            <text:p>0,00164120370370370000</text:p>
          </table:table-cell>
          <table:table-cell table:formula="of:=[.D711]-[.D7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0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64351851851852" calcext:value-type="float">
            <text:p>0,00164351851851852000</text:p>
          </table:table-cell>
          <table:table-cell table:formula="of:=[.D712]-[.D7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0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64583333333333" calcext:value-type="float">
            <text:p>0,00164583333333333000</text:p>
          </table:table-cell>
          <table:table-cell table:formula="of:=[.D713]-[.D7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0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64814814814815" calcext:value-type="float">
            <text:p>0,00164814814814815000</text:p>
          </table:table-cell>
          <table:table-cell table:formula="of:=[.D714]-[.D7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0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65046296296296" calcext:value-type="float">
            <text:p>0,00165046296296296000</text:p>
          </table:table-cell>
          <table:table-cell table:formula="of:=[.D715]-[.D7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65277777777778" calcext:value-type="float">
            <text:p>0,00165277777777778000</text:p>
          </table:table-cell>
          <table:table-cell table:formula="of:=[.D716]-[.D7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0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65509259259259" calcext:value-type="float">
            <text:p>0,00165509259259259000</text:p>
          </table:table-cell>
          <table:table-cell table:formula="of:=[.D717]-[.D7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0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65740740740741" calcext:value-type="float">
            <text:p>0,00165740740740741000</text:p>
          </table:table-cell>
          <table:table-cell table:formula="of:=[.D718]-[.D7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0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65972222222222" calcext:value-type="float">
            <text:p>0,00165972222222222000</text:p>
          </table:table-cell>
          <table:table-cell table:formula="of:=[.D719]-[.D7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0" office:value-type="float" office:value="14360" calcext:value-type="float">
            <text:p>14360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66203703703704" calcext:value-type="float">
            <text:p>0,00166203703703704000</text:p>
          </table:table-cell>
          <table:table-cell table:formula="of:=[.D720]-[.D7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0" office:value-type="float" office:value="14380" calcext:value-type="float">
            <text:p>14380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66435185185185" calcext:value-type="float">
            <text:p>0,00166435185185185000</text:p>
          </table:table-cell>
          <table:table-cell table:formula="of:=[.D721]-[.D720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66666666666667" calcext:value-type="float">
            <text:p>0,00166666666666667000</text:p>
          </table:table-cell>
          <table:table-cell table:formula="of:=[.D722]-[.D7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0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66898148148148" calcext:value-type="float">
            <text:p>0,00166898148148148000</text:p>
          </table:table-cell>
          <table:table-cell table:formula="of:=[.D723]-[.D7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0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6712962962963" calcext:value-type="float">
            <text:p>0,00167129629629630000</text:p>
          </table:table-cell>
          <table:table-cell table:formula="of:=[.D724]-[.D7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0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67361111111111" calcext:value-type="float">
            <text:p>0,00167361111111111000</text:p>
          </table:table-cell>
          <table:table-cell table:formula="of:=[.D725]-[.D7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0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67592592592593" calcext:value-type="float">
            <text:p>0,00167592592592593000</text:p>
          </table:table-cell>
          <table:table-cell table:formula="of:=[.D726]-[.D7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0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67824074074074" calcext:value-type="float">
            <text:p>0,00167824074074074000</text:p>
          </table:table-cell>
          <table:table-cell table:formula="of:=[.D727]-[.D7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0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68055555555556" calcext:value-type="float">
            <text:p>0,00168055555555556000</text:p>
          </table:table-cell>
          <table:table-cell table:formula="of:=[.D728]-[.D7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0" office:value-type="float" office:value="14540" calcext:value-type="float">
            <text:p>14540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68287037037037" calcext:value-type="float">
            <text:p>0,00168287037037037000</text:p>
          </table:table-cell>
          <table:table-cell table:formula="of:=[.D729]-[.D7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0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68518518518519" calcext:value-type="float">
            <text:p>0,00168518518518519000</text:p>
          </table:table-cell>
          <table:table-cell table:formula="of:=[.D730]-[.D7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0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6875" calcext:value-type="float">
            <text:p>0,00168750000000000000</text:p>
          </table:table-cell>
          <table:table-cell table:formula="of:=[.D731]-[.D7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0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68981481481481" calcext:value-type="float">
            <text:p>0,00168981481481481000</text:p>
          </table:table-cell>
          <table:table-cell table:formula="of:=[.D732]-[.D7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0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69212962962963" calcext:value-type="float">
            <text:p>0,00169212962962963000</text:p>
          </table:table-cell>
          <table:table-cell table:formula="of:=[.D733]-[.D7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69444444444444" calcext:value-type="float">
            <text:p>0,00169444444444444000</text:p>
          </table:table-cell>
          <table:table-cell table:formula="of:=[.D734]-[.D7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0" office:value-type="float" office:value="14660" calcext:value-type="float">
            <text:p>14660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69675925925926" calcext:value-type="float">
            <text:p>0,00169675925925926000</text:p>
          </table:table-cell>
          <table:table-cell table:formula="of:=[.D735]-[.D7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0" office:value-type="float" office:value="14680" calcext:value-type="float">
            <text:p>14680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69907407407407" calcext:value-type="float">
            <text:p>0,00169907407407407000</text:p>
          </table:table-cell>
          <table:table-cell table:formula="of:=[.D736]-[.D7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70138888888889" calcext:value-type="float">
            <text:p>0,00170138888888889000</text:p>
          </table:table-cell>
          <table:table-cell table:formula="of:=[.D737]-[.D736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0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7037037037037" calcext:value-type="float">
            <text:p>0,00170370370370370000</text:p>
          </table:table-cell>
          <table:table-cell table:formula="of:=[.D738]-[.D7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0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70601851851852" calcext:value-type="float">
            <text:p>0,00170601851851852000</text:p>
          </table:table-cell>
          <table:table-cell table:formula="of:=[.D739]-[.D7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70833333333333" calcext:value-type="float">
            <text:p>0,00170833333333333000</text:p>
          </table:table-cell>
          <table:table-cell table:formula="of:=[.D740]-[.D7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0" office:value-type="float" office:value="14780" calcext:value-type="float">
            <text:p>14780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71064814814815" calcext:value-type="float">
            <text:p>0,00171064814814815000</text:p>
          </table:table-cell>
          <table:table-cell table:formula="of:=[.D741]-[.D7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71296296296296" calcext:value-type="float">
            <text:p>0,00171296296296296000</text:p>
          </table:table-cell>
          <table:table-cell table:formula="of:=[.D742]-[.D7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0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71527777777778" calcext:value-type="float">
            <text:p>0,00171527777777778000</text:p>
          </table:table-cell>
          <table:table-cell table:formula="of:=[.D743]-[.D7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0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71759259259259" calcext:value-type="float">
            <text:p>0,00171759259259259000</text:p>
          </table:table-cell>
          <table:table-cell table:formula="of:=[.D744]-[.D7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0" office:value-type="float" office:value="14860" calcext:value-type="float">
            <text:p>14860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71990740740741" calcext:value-type="float">
            <text:p>0,00171990740740741000</text:p>
          </table:table-cell>
          <table:table-cell table:formula="of:=[.D745]-[.D7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72222222222222" calcext:value-type="float">
            <text:p>0,00172222222222222000</text:p>
          </table:table-cell>
          <table:table-cell table:formula="of:=[.D746]-[.D7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0" office:value-type="float" office:value="14900" calcext:value-type="float">
            <text:p>1490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72453703703704" calcext:value-type="float">
            <text:p>0,00172453703703704000</text:p>
          </table:table-cell>
          <table:table-cell table:formula="of:=[.D747]-[.D7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0" office:value-type="float" office:value="14920" calcext:value-type="float">
            <text:p>14920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72685185185185" calcext:value-type="float">
            <text:p>0,00172685185185185000</text:p>
          </table:table-cell>
          <table:table-cell table:formula="of:=[.D748]-[.D7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0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72916666666667" calcext:value-type="float">
            <text:p>0,00172916666666667000</text:p>
          </table:table-cell>
          <table:table-cell table:formula="of:=[.D749]-[.D7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0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73148148148148" calcext:value-type="float">
            <text:p>0,00173148148148148000</text:p>
          </table:table-cell>
          <table:table-cell table:formula="of:=[.D750]-[.D7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0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7337962962963" calcext:value-type="float">
            <text:p>0,00173379629629630000</text:p>
          </table:table-cell>
          <table:table-cell table:formula="of:=[.D751]-[.D7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73611111111111" calcext:value-type="float">
            <text:p>0,00173611111111111000</text:p>
          </table:table-cell>
          <table:table-cell table:formula="of:=[.D752]-[.D751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0" office:value-type="float" office:value="15020" calcext:value-type="float">
            <text:p>15020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73842592592593" calcext:value-type="float">
            <text:p>0,00173842592592593000</text:p>
          </table:table-cell>
          <table:table-cell table:formula="of:=[.D753]-[.D7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0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74074074074074" calcext:value-type="float">
            <text:p>0,00174074074074074000</text:p>
          </table:table-cell>
          <table:table-cell table:formula="of:=[.D754]-[.D7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0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74305555555556" calcext:value-type="float">
            <text:p>0,00174305555555556000</text:p>
          </table:table-cell>
          <table:table-cell table:formula="of:=[.D755]-[.D7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0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74537037037037" calcext:value-type="float">
            <text:p>0,00174537037037037000</text:p>
          </table:table-cell>
          <table:table-cell table:formula="of:=[.D756]-[.D7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0" office:value-type="float" office:value="15100" calcext:value-type="float">
            <text:p>1510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74768518518519" calcext:value-type="float">
            <text:p>0,00174768518518519000</text:p>
          </table:table-cell>
          <table:table-cell table:formula="of:=[.D757]-[.D7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75" calcext:value-type="float">
            <text:p>0,00175000000000000000</text:p>
          </table:table-cell>
          <table:table-cell table:formula="of:=[.D758]-[.D7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0" office:value-type="float" office:value="15140" calcext:value-type="float">
            <text:p>15140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75231481481481" calcext:value-type="float">
            <text:p>0,00175231481481481000</text:p>
          </table:table-cell>
          <table:table-cell table:formula="of:=[.D759]-[.D7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0" office:value-type="float" office:value="15160" calcext:value-type="float">
            <text:p>15160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75462962962963" calcext:value-type="float">
            <text:p>0,00175462962962963000</text:p>
          </table:table-cell>
          <table:table-cell table:formula="of:=[.D760]-[.D7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0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75694444444444" calcext:value-type="float">
            <text:p>0,00175694444444444000</text:p>
          </table:table-cell>
          <table:table-cell table:formula="of:=[.D761]-[.D7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75925925925926" calcext:value-type="float">
            <text:p>0,00175925925925926000</text:p>
          </table:table-cell>
          <table:table-cell table:formula="of:=[.D762]-[.D7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0" office:value-type="float" office:value="15220" calcext:value-type="float">
            <text:p>15220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76157407407407" calcext:value-type="float">
            <text:p>0,00176157407407407000</text:p>
          </table:table-cell>
          <table:table-cell table:formula="of:=[.D763]-[.D7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0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76388888888889" calcext:value-type="float">
            <text:p>0,00176388888888889000</text:p>
          </table:table-cell>
          <table:table-cell table:formula="of:=[.D764]-[.D7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0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7662037037037" calcext:value-type="float">
            <text:p>0,00176620370370370000</text:p>
          </table:table-cell>
          <table:table-cell table:formula="of:=[.D765]-[.D7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0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76851851851852" calcext:value-type="float">
            <text:p>0,00176851851851852000</text:p>
          </table:table-cell>
          <table:table-cell table:formula="of:=[.D766]-[.D7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77083333333333" calcext:value-type="float">
            <text:p>0,00177083333333333000</text:p>
          </table:table-cell>
          <table:table-cell table:formula="of:=[.D767]-[.D7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0" office:value-type="float" office:value="15320" calcext:value-type="float">
            <text:p>15320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77314814814815" calcext:value-type="float">
            <text:p>0,00177314814814815000</text:p>
          </table:table-cell>
          <table:table-cell table:formula="of:=[.D768]-[.D767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0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77546296296296" calcext:value-type="float">
            <text:p>0,00177546296296296000</text:p>
          </table:table-cell>
          <table:table-cell table:formula="of:=[.D769]-[.D7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77777777777778" calcext:value-type="float">
            <text:p>0,00177777777777778000</text:p>
          </table:table-cell>
          <table:table-cell table:formula="of:=[.D770]-[.D7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0" office:value-type="float" office:value="15380" calcext:value-type="float">
            <text:p>15380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78009259259259" calcext:value-type="float">
            <text:p>0,00178009259259259000</text:p>
          </table:table-cell>
          <table:table-cell table:formula="of:=[.D771]-[.D7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78240740740741" calcext:value-type="float">
            <text:p>0,00178240740740741000</text:p>
          </table:table-cell>
          <table:table-cell table:formula="of:=[.D772]-[.D7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0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78472222222222" calcext:value-type="float">
            <text:p>0,00178472222222222000</text:p>
          </table:table-cell>
          <table:table-cell table:formula="of:=[.D773]-[.D7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0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78703703703704" calcext:value-type="float">
            <text:p>0,00178703703703704000</text:p>
          </table:table-cell>
          <table:table-cell table:formula="of:=[.D774]-[.D7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0" office:value-type="float" office:value="15460" calcext:value-type="float">
            <text:p>15460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78935185185185" calcext:value-type="float">
            <text:p>0,00178935185185185000</text:p>
          </table:table-cell>
          <table:table-cell table:formula="of:=[.D775]-[.D7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79166666666667" calcext:value-type="float">
            <text:p>0,00179166666666667000</text:p>
          </table:table-cell>
          <table:table-cell table:formula="of:=[.D776]-[.D7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0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79398148148148" calcext:value-type="float">
            <text:p>0,00179398148148148000</text:p>
          </table:table-cell>
          <table:table-cell table:formula="of:=[.D777]-[.D7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0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7962962962963" calcext:value-type="float">
            <text:p>0,00179629629629630000</text:p>
          </table:table-cell>
          <table:table-cell table:formula="of:=[.D778]-[.D7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0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79861111111111" calcext:value-type="float">
            <text:p>0,00179861111111111000</text:p>
          </table:table-cell>
          <table:table-cell table:formula="of:=[.D779]-[.D7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0" office:value-type="float" office:value="15560" calcext:value-type="float">
            <text:p>15560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80092592592593" calcext:value-type="float">
            <text:p>0,00180092592592593000</text:p>
          </table:table-cell>
          <table:table-cell table:formula="of:=[.D780]-[.D7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0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80324074074074" calcext:value-type="float">
            <text:p>0,00180324074074074000</text:p>
          </table:table-cell>
          <table:table-cell table:formula="of:=[.D781]-[.D7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80555555555556" calcext:value-type="float">
            <text:p>0,00180555555555556000</text:p>
          </table:table-cell>
          <table:table-cell table:formula="of:=[.D782]-[.D7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0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80787037037037" calcext:value-type="float">
            <text:p>0,00180787037037037000</text:p>
          </table:table-cell>
          <table:table-cell table:formula="of:=[.D783]-[.D782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0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81018518518519" calcext:value-type="float">
            <text:p>0,00181018518518519000</text:p>
          </table:table-cell>
          <table:table-cell table:formula="of:=[.D784]-[.D7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0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8125" calcext:value-type="float">
            <text:p>0,00181250000000000000</text:p>
          </table:table-cell>
          <table:table-cell table:formula="of:=[.D785]-[.D7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0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81481481481482" calcext:value-type="float">
            <text:p>0,00181481481481482000</text:p>
          </table:table-cell>
          <table:table-cell table:formula="of:=[.D786]-[.D7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0" office:value-type="float" office:value="15700" calcext:value-type="float">
            <text:p>1570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81712962962963" calcext:value-type="float">
            <text:p>0,00181712962962963000</text:p>
          </table:table-cell>
          <table:table-cell table:formula="of:=[.D787]-[.D7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0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81944444444444" calcext:value-type="float">
            <text:p>0,00181944444444444000</text:p>
          </table:table-cell>
          <table:table-cell table:formula="of:=[.D788]-[.D7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0" office:value-type="float" office:value="15740" calcext:value-type="float">
            <text:p>15740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82175925925926" calcext:value-type="float">
            <text:p>0,00182175925925926000</text:p>
          </table:table-cell>
          <table:table-cell table:formula="of:=[.D789]-[.D7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0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82407407407407" calcext:value-type="float">
            <text:p>0,00182407407407407000</text:p>
          </table:table-cell>
          <table:table-cell table:formula="of:=[.D790]-[.D7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0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82638888888889" calcext:value-type="float">
            <text:p>0,00182638888888889000</text:p>
          </table:table-cell>
          <table:table-cell table:formula="of:=[.D791]-[.D7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0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8287037037037" calcext:value-type="float">
            <text:p>0,00182870370370370000</text:p>
          </table:table-cell>
          <table:table-cell table:formula="of:=[.D792]-[.D7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0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83101851851852" calcext:value-type="float">
            <text:p>0,00183101851851852000</text:p>
          </table:table-cell>
          <table:table-cell table:formula="of:=[.D793]-[.D7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83333333333333" calcext:value-type="float">
            <text:p>0,00183333333333333000</text:p>
          </table:table-cell>
          <table:table-cell table:formula="of:=[.D794]-[.D7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0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83564814814815" calcext:value-type="float">
            <text:p>0,00183564814814815000</text:p>
          </table:table-cell>
          <table:table-cell table:formula="of:=[.D795]-[.D7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0" office:value-type="float" office:value="15880" calcext:value-type="float">
            <text:p>15880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83796296296296" calcext:value-type="float">
            <text:p>0,00183796296296296000</text:p>
          </table:table-cell>
          <table:table-cell table:formula="of:=[.D796]-[.D7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84027777777778" calcext:value-type="float">
            <text:p>0,00184027777777778000</text:p>
          </table:table-cell>
          <table:table-cell table:formula="of:=[.D797]-[.D7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0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84259259259259" calcext:value-type="float">
            <text:p>0,00184259259259259000</text:p>
          </table:table-cell>
          <table:table-cell table:formula="of:=[.D798]-[.D7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0" office:value-type="float" office:value="15940" calcext:value-type="float">
            <text:p>15940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84490740740741" calcext:value-type="float">
            <text:p>0,00184490740740741000</text:p>
          </table:table-cell>
          <table:table-cell table:formula="of:=[.D799]-[.D798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84722222222222" calcext:value-type="float">
            <text:p>0,00184722222222222000</text:p>
          </table:table-cell>
          <table:table-cell table:formula="of:=[.D800]-[.D7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0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84953703703704" calcext:value-type="float">
            <text:p>0,00184953703703704000</text:p>
          </table:table-cell>
          <table:table-cell table:formula="of:=[.D801]-[.D8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85185185185185" calcext:value-type="float">
            <text:p>0,00185185185185185000</text:p>
          </table:table-cell>
          <table:table-cell table:formula="of:=[.D802]-[.D8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0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85416666666667" calcext:value-type="float">
            <text:p>0,00185416666666667000</text:p>
          </table:table-cell>
          <table:table-cell table:formula="of:=[.D803]-[.D8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0" office:value-type="float" office:value="16040" calcext:value-type="float">
            <text:p>16040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85648148148148" calcext:value-type="float">
            <text:p>0,00185648148148148000</text:p>
          </table:table-cell>
          <table:table-cell table:formula="of:=[.D804]-[.D8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0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8587962962963" calcext:value-type="float">
            <text:p>0,00185879629629630000</text:p>
          </table:table-cell>
          <table:table-cell table:formula="of:=[.D805]-[.D8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86111111111111" calcext:value-type="float">
            <text:p>0,00186111111111111000</text:p>
          </table:table-cell>
          <table:table-cell table:formula="of:=[.D806]-[.D8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0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86342592592593" calcext:value-type="float">
            <text:p>0,00186342592592593000</text:p>
          </table:table-cell>
          <table:table-cell table:formula="of:=[.D807]-[.D8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0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86574074074074" calcext:value-type="float">
            <text:p>0,00186574074074074000</text:p>
          </table:table-cell>
          <table:table-cell table:formula="of:=[.D808]-[.D8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0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86805555555556" calcext:value-type="float">
            <text:p>0,00186805555555556000</text:p>
          </table:table-cell>
          <table:table-cell table:formula="of:=[.D809]-[.D8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0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87037037037037" calcext:value-type="float">
            <text:p>0,00187037037037037000</text:p>
          </table:table-cell>
          <table:table-cell table:formula="of:=[.D810]-[.D8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0" office:value-type="float" office:value="16180" calcext:value-type="float">
            <text:p>16180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87268518518519" calcext:value-type="float">
            <text:p>0,00187268518518519000</text:p>
          </table:table-cell>
          <table:table-cell table:formula="of:=[.D811]-[.D8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875" calcext:value-type="float">
            <text:p>0,00187500000000000000</text:p>
          </table:table-cell>
          <table:table-cell table:formula="of:=[.D812]-[.D8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0" office:value-type="float" office:value="16220" calcext:value-type="float">
            <text:p>16220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87731481481481" calcext:value-type="float">
            <text:p>0,00187731481481481000</text:p>
          </table:table-cell>
          <table:table-cell table:formula="of:=[.D813]-[.D8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0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87962962962963" calcext:value-type="float">
            <text:p>0,00187962962962963000</text:p>
          </table:table-cell>
          <table:table-cell table:formula="of:=[.D814]-[.D813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0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88194444444444" calcext:value-type="float">
            <text:p>0,00188194444444444000</text:p>
          </table:table-cell>
          <table:table-cell table:formula="of:=[.D815]-[.D8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0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88425925925926" calcext:value-type="float">
            <text:p>0,00188425925925926000</text:p>
          </table:table-cell>
          <table:table-cell table:formula="of:=[.D816]-[.D8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0" office:value-type="float" office:value="16300" calcext:value-type="float">
            <text:p>1630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88657407407407" calcext:value-type="float">
            <text:p>0,00188657407407407000</text:p>
          </table:table-cell>
          <table:table-cell table:formula="of:=[.D817]-[.D8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88888888888889" calcext:value-type="float">
            <text:p>0,00188888888888889000</text:p>
          </table:table-cell>
          <table:table-cell table:formula="of:=[.D818]-[.D8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0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8912037037037" calcext:value-type="float">
            <text:p>0,00189120370370370000</text:p>
          </table:table-cell>
          <table:table-cell table:formula="of:=[.D819]-[.D8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0" office:value-type="float" office:value="16360" calcext:value-type="float">
            <text:p>16360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89351851851852" calcext:value-type="float">
            <text:p>0,00189351851851852000</text:p>
          </table:table-cell>
          <table:table-cell table:formula="of:=[.D820]-[.D8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89583333333333" calcext:value-type="float">
            <text:p>0,00189583333333333000</text:p>
          </table:table-cell>
          <table:table-cell table:formula="of:=[.D821]-[.D8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89814814814815" calcext:value-type="float">
            <text:p>0,00189814814814815000</text:p>
          </table:table-cell>
          <table:table-cell table:formula="of:=[.D822]-[.D8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0" office:value-type="float" office:value="16420" calcext:value-type="float">
            <text:p>16420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90046296296296" calcext:value-type="float">
            <text:p>0,00190046296296296000</text:p>
          </table:table-cell>
          <table:table-cell table:formula="of:=[.D823]-[.D8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0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90277777777778" calcext:value-type="float">
            <text:p>0,00190277777777778000</text:p>
          </table:table-cell>
          <table:table-cell table:formula="of:=[.D824]-[.D8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0" office:value-type="float" office:value="16460" calcext:value-type="float">
            <text:p>16460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90509259259259" calcext:value-type="float">
            <text:p>0,00190509259259259000</text:p>
          </table:table-cell>
          <table:table-cell table:formula="of:=[.D825]-[.D8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0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90740740740741" calcext:value-type="float">
            <text:p>0,00190740740740741000</text:p>
          </table:table-cell>
          <table:table-cell table:formula="of:=[.D826]-[.D8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90972222222222" calcext:value-type="float">
            <text:p>0,00190972222222222000</text:p>
          </table:table-cell>
          <table:table-cell table:formula="of:=[.D827]-[.D8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0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91203703703704" calcext:value-type="float">
            <text:p>0,00191203703703704000</text:p>
          </table:table-cell>
          <table:table-cell table:formula="of:=[.D828]-[.D8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0" office:value-type="float" office:value="16540" calcext:value-type="float">
            <text:p>16540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91435185185185" calcext:value-type="float">
            <text:p>0,00191435185185185000</text:p>
          </table:table-cell>
          <table:table-cell table:formula="of:=[.D829]-[.D8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91666666666667" calcext:value-type="float">
            <text:p>0,00191666666666667000</text:p>
          </table:table-cell>
          <table:table-cell table:formula="of:=[.D830]-[.D829]" office:value-type="float" office:value="0.00000231481481481502" calcext:value-type="float">
            <text:p>0,000002314814814815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0" office:value-type="float" office:value="16580" calcext:value-type="float">
            <text:p>16580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91898148148148" calcext:value-type="float">
            <text:p>0,00191898148148148000</text:p>
          </table:table-cell>
          <table:table-cell table:formula="of:=[.D831]-[.D8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0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9212962962963" calcext:value-type="float">
            <text:p>0,00192129629629630000</text:p>
          </table:table-cell>
          <table:table-cell table:formula="of:=[.D832]-[.D8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0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92361111111111" calcext:value-type="float">
            <text:p>0,00192361111111111000</text:p>
          </table:table-cell>
          <table:table-cell table:formula="of:=[.D833]-[.D8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0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92592592592593" calcext:value-type="float">
            <text:p>0,00192592592592593000</text:p>
          </table:table-cell>
          <table:table-cell table:formula="of:=[.D834]-[.D8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0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92824074074074" calcext:value-type="float">
            <text:p>0,00192824074074074000</text:p>
          </table:table-cell>
          <table:table-cell table:formula="of:=[.D835]-[.D8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0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93055555555556" calcext:value-type="float">
            <text:p>0,00193055555555556000</text:p>
          </table:table-cell>
          <table:table-cell table:formula="of:=[.D836]-[.D8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0" office:value-type="float" office:value="16700" calcext:value-type="float">
            <text:p>1670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93287037037037" calcext:value-type="float">
            <text:p>0,00193287037037037000</text:p>
          </table:table-cell>
          <table:table-cell table:formula="of:=[.D837]-[.D8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0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93518518518519" calcext:value-type="float">
            <text:p>0,00193518518518519000</text:p>
          </table:table-cell>
          <table:table-cell table:formula="of:=[.D838]-[.D8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0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9375" calcext:value-type="float">
            <text:p>0,00193750000000000000</text:p>
          </table:table-cell>
          <table:table-cell table:formula="of:=[.D839]-[.D8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0" office:value-type="float" office:value="16760" calcext:value-type="float">
            <text:p>16760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93981481481481" calcext:value-type="float">
            <text:p>0,00193981481481481000</text:p>
          </table:table-cell>
          <table:table-cell table:formula="of:=[.D840]-[.D8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0" office:value-type="float" office:value="16780" calcext:value-type="float">
            <text:p>16780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94212962962963" calcext:value-type="float">
            <text:p>0,00194212962962963000</text:p>
          </table:table-cell>
          <table:table-cell table:formula="of:=[.D841]-[.D8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94444444444444" calcext:value-type="float">
            <text:p>0,00194444444444444000</text:p>
          </table:table-cell>
          <table:table-cell table:formula="of:=[.D842]-[.D8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0" office:value-type="float" office:value="16820" calcext:value-type="float">
            <text:p>16820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94675925925926" calcext:value-type="float">
            <text:p>0,00194675925925926000</text:p>
          </table:table-cell>
          <table:table-cell table:formula="of:=[.D843]-[.D8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0" office:value-type="float" office:value="16840" calcext:value-type="float">
            <text:p>16840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94907407407407" calcext:value-type="float">
            <text:p>0,00194907407407407000</text:p>
          </table:table-cell>
          <table:table-cell table:formula="of:=[.D844]-[.D8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0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95138888888889" calcext:value-type="float">
            <text:p>0,00195138888888889000</text:p>
          </table:table-cell>
          <table:table-cell table:formula="of:=[.D845]-[.D8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0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9537037037037" calcext:value-type="float">
            <text:p>0,00195370370370370000</text:p>
          </table:table-cell>
          <table:table-cell table:formula="of:=[.D846]-[.D8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0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95601851851852" calcext:value-type="float">
            <text:p>0,00195601851851852000</text:p>
          </table:table-cell>
          <table:table-cell table:formula="of:=[.D847]-[.D8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95833333333333" calcext:value-type="float">
            <text:p>0,00195833333333333000</text:p>
          </table:table-cell>
          <table:table-cell table:formula="of:=[.D848]-[.D8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0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96064814814815" calcext:value-type="float">
            <text:p>0,00196064814814815000</text:p>
          </table:table-cell>
          <table:table-cell table:formula="of:=[.D849]-[.D8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0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96296296296296" calcext:value-type="float">
            <text:p>0,00196296296296296000</text:p>
          </table:table-cell>
          <table:table-cell table:formula="of:=[.D850]-[.D8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0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96527777777778" calcext:value-type="float">
            <text:p>0,00196527777777778000</text:p>
          </table:table-cell>
          <table:table-cell table:formula="of:=[.D851]-[.D8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0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96759259259259" calcext:value-type="float">
            <text:p>0,00196759259259259000</text:p>
          </table:table-cell>
          <table:table-cell table:formula="of:=[.D852]-[.D8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0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96990740740741" calcext:value-type="float">
            <text:p>0,00196990740740741000</text:p>
          </table:table-cell>
          <table:table-cell table:formula="of:=[.D853]-[.D852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97222222222222" calcext:value-type="float">
            <text:p>0,00197222222222222000</text:p>
          </table:table-cell>
          <table:table-cell table:formula="of:=[.D854]-[.D8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0" office:value-type="float" office:value="17060" calcext:value-type="float">
            <text:p>17060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97453703703704" calcext:value-type="float">
            <text:p>0,00197453703703704000</text:p>
          </table:table-cell>
          <table:table-cell table:formula="of:=[.D855]-[.D8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0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97685185185185" calcext:value-type="float">
            <text:p>0,00197685185185185000</text:p>
          </table:table-cell>
          <table:table-cell table:formula="of:=[.D856]-[.D8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97916666666667" calcext:value-type="float">
            <text:p>0,00197916666666667000</text:p>
          </table:table-cell>
          <table:table-cell table:formula="of:=[.D857]-[.D8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0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98148148148148" calcext:value-type="float">
            <text:p>0,00198148148148148000</text:p>
          </table:table-cell>
          <table:table-cell table:formula="of:=[.D858]-[.D8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0" office:value-type="float" office:value="17140" calcext:value-type="float">
            <text:p>17140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9837962962963" calcext:value-type="float">
            <text:p>0,00198379629629630000</text:p>
          </table:table-cell>
          <table:table-cell table:formula="of:=[.D859]-[.D8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0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98611111111111" calcext:value-type="float">
            <text:p>0,00198611111111111000</text:p>
          </table:table-cell>
          <table:table-cell table:formula="of:=[.D860]-[.D8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0" office:value-type="float" office:value="17180" calcext:value-type="float">
            <text:p>17180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98842592592593" calcext:value-type="float">
            <text:p>0,00198842592592593000</text:p>
          </table:table-cell>
          <table:table-cell table:formula="of:=[.D861]-[.D8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99074074074074" calcext:value-type="float">
            <text:p>0,00199074074074074000</text:p>
          </table:table-cell>
          <table:table-cell table:formula="of:=[.D862]-[.D8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0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99305555555556" calcext:value-type="float">
            <text:p>0,00199305555555556000</text:p>
          </table:table-cell>
          <table:table-cell table:formula="of:=[.D863]-[.D8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0" office:value-type="float" office:value="17240" calcext:value-type="float">
            <text:p>17240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99537037037037" calcext:value-type="float">
            <text:p>0,00199537037037037000</text:p>
          </table:table-cell>
          <table:table-cell table:formula="of:=[.D864]-[.D8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0" office:value-type="float" office:value="17260" calcext:value-type="float">
            <text:p>17260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99768518518519" calcext:value-type="float">
            <text:p>0,00199768518518519000</text:p>
          </table:table-cell>
          <table:table-cell table:formula="of:=[.D865]-[.D8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" calcext:value-type="float">
            <text:p>0,00200000000000000000</text:p>
          </table:table-cell>
          <table:table-cell table:formula="of:=[.D866]-[.D8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0" office:value-type="float" office:value="17300" calcext:value-type="float">
            <text:p>1730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00231481481482" calcext:value-type="float">
            <text:p>0,00200231481481482000</text:p>
          </table:table-cell>
          <table:table-cell table:formula="of:=[.D867]-[.D8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0" office:value-type="float" office:value="17320" calcext:value-type="float">
            <text:p>17320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00462962962963" calcext:value-type="float">
            <text:p>0,00200462962962963000</text:p>
          </table:table-cell>
          <table:table-cell table:formula="of:=[.D868]-[.D8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0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00694444444444" calcext:value-type="float">
            <text:p>0,00200694444444444000</text:p>
          </table:table-cell>
          <table:table-cell table:formula="of:=[.D869]-[.D8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0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00925925925926" calcext:value-type="float">
            <text:p>0,00200925925925926000</text:p>
          </table:table-cell>
          <table:table-cell table:formula="of:=[.D870]-[.D8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0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01157407407407" calcext:value-type="float">
            <text:p>0,00201157407407407000</text:p>
          </table:table-cell>
          <table:table-cell table:formula="of:=[.D871]-[.D8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01388888888889" calcext:value-type="float">
            <text:p>0,00201388888888889000</text:p>
          </table:table-cell>
          <table:table-cell table:formula="of:=[.D872]-[.D8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0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0162037037037" calcext:value-type="float">
            <text:p>0,00201620370370370000</text:p>
          </table:table-cell>
          <table:table-cell table:formula="of:=[.D873]-[.D8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0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01851851851852" calcext:value-type="float">
            <text:p>0,00201851851851852000</text:p>
          </table:table-cell>
          <table:table-cell table:formula="of:=[.D874]-[.D8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0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02083333333333" calcext:value-type="float">
            <text:p>0,00202083333333333000</text:p>
          </table:table-cell>
          <table:table-cell table:formula="of:=[.D875]-[.D8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0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02314814814815" calcext:value-type="float">
            <text:p>0,00202314814814815000</text:p>
          </table:table-cell>
          <table:table-cell table:formula="of:=[.D876]-[.D8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0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02546296296296" calcext:value-type="float">
            <text:p>0,00202546296296296000</text:p>
          </table:table-cell>
          <table:table-cell table:formula="of:=[.D877]-[.D8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02777777777778" calcext:value-type="float">
            <text:p>0,00202777777777778000</text:p>
          </table:table-cell>
          <table:table-cell table:formula="of:=[.D878]-[.D8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0" office:value-type="float" office:value="17540" calcext:value-type="float">
            <text:p>17540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03009259259259" calcext:value-type="float">
            <text:p>0,00203009259259259000</text:p>
          </table:table-cell>
          <table:table-cell table:formula="of:=[.D879]-[.D8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0" office:value-type="float" office:value="17560" calcext:value-type="float">
            <text:p>17560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03240740740741" calcext:value-type="float">
            <text:p>0,00203240740740741000</text:p>
          </table:table-cell>
          <table:table-cell table:formula="of:=[.D880]-[.D8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0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03472222222222" calcext:value-type="float">
            <text:p>0,00203472222222222000</text:p>
          </table:table-cell>
          <table:table-cell table:formula="of:=[.D881]-[.D8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03703703703704" calcext:value-type="float">
            <text:p>0,00203703703703704000</text:p>
          </table:table-cell>
          <table:table-cell table:formula="of:=[.D882]-[.D8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0" office:value-type="float" office:value="17620" calcext:value-type="float">
            <text:p>17620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03935185185185" calcext:value-type="float">
            <text:p>0,00203935185185185000</text:p>
          </table:table-cell>
          <table:table-cell table:formula="of:=[.D883]-[.D8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04166666666667" calcext:value-type="float">
            <text:p>0,00204166666666667000</text:p>
          </table:table-cell>
          <table:table-cell table:formula="of:=[.D884]-[.D883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0" office:value-type="float" office:value="17660" calcext:value-type="float">
            <text:p>17660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04398148148148" calcext:value-type="float">
            <text:p>0,00204398148148148000</text:p>
          </table:table-cell>
          <table:table-cell table:formula="of:=[.D885]-[.D8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0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0462962962963" calcext:value-type="float">
            <text:p>0,00204629629629630000</text:p>
          </table:table-cell>
          <table:table-cell table:formula="of:=[.D886]-[.D8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04861111111111" calcext:value-type="float">
            <text:p>0,00204861111111111000</text:p>
          </table:table-cell>
          <table:table-cell table:formula="of:=[.D887]-[.D8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0" office:value-type="float" office:value="17720" calcext:value-type="float">
            <text:p>17720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05092592592593" calcext:value-type="float">
            <text:p>0,00205092592592593000</text:p>
          </table:table-cell>
          <table:table-cell table:formula="of:=[.D888]-[.D8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0" office:value-type="float" office:value="17740" calcext:value-type="float">
            <text:p>17740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05324074074074" calcext:value-type="float">
            <text:p>0,00205324074074074000</text:p>
          </table:table-cell>
          <table:table-cell table:formula="of:=[.D889]-[.D8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05555555555556" calcext:value-type="float">
            <text:p>0,00205555555555556000</text:p>
          </table:table-cell>
          <table:table-cell table:formula="of:=[.D890]-[.D8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0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05787037037037" calcext:value-type="float">
            <text:p>0,00205787037037037000</text:p>
          </table:table-cell>
          <table:table-cell table:formula="of:=[.D891]-[.D8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0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06018518518519" calcext:value-type="float">
            <text:p>0,00206018518518519000</text:p>
          </table:table-cell>
          <table:table-cell table:formula="of:=[.D892]-[.D8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0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0625" calcext:value-type="float">
            <text:p>0,00206250000000000000</text:p>
          </table:table-cell>
          <table:table-cell table:formula="of:=[.D893]-[.D8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0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06481481481482" calcext:value-type="float">
            <text:p>0,00206481481481482000</text:p>
          </table:table-cell>
          <table:table-cell table:formula="of:=[.D894]-[.D8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0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06712962962963" calcext:value-type="float">
            <text:p>0,00206712962962963000</text:p>
          </table:table-cell>
          <table:table-cell table:formula="of:=[.D895]-[.D8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0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06944444444444" calcext:value-type="float">
            <text:p>0,00206944444444444000</text:p>
          </table:table-cell>
          <table:table-cell table:formula="of:=[.D896]-[.D8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0" office:value-type="float" office:value="17900" calcext:value-type="float">
            <text:p>1790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07175925925926" calcext:value-type="float">
            <text:p>0,00207175925925926000</text:p>
          </table:table-cell>
          <table:table-cell table:formula="of:=[.D897]-[.D8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0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07407407407407" calcext:value-type="float">
            <text:p>0,00207407407407407000</text:p>
          </table:table-cell>
          <table:table-cell table:formula="of:=[.D898]-[.D8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0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07638888888889" calcext:value-type="float">
            <text:p>0,00207638888888889000</text:p>
          </table:table-cell>
          <table:table-cell table:formula="of:=[.D899]-[.D8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0" office:value-type="float" office:value="17960" calcext:value-type="float">
            <text:p>17960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0787037037037" calcext:value-type="float">
            <text:p>0,00207870370370370000</text:p>
          </table:table-cell>
          <table:table-cell table:formula="of:=[.D900]-[.D8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0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08101851851852" calcext:value-type="float">
            <text:p>0,00208101851851852000</text:p>
          </table:table-cell>
          <table:table-cell table:formula="of:=[.D901]-[.D9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08333333333333" calcext:value-type="float">
            <text:p>0,00208333333333333000</text:p>
          </table:table-cell>
          <table:table-cell table:formula="of:=[.D902]-[.D9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0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08564814814815" calcext:value-type="float">
            <text:p>0,00208564814814815000</text:p>
          </table:table-cell>
          <table:table-cell table:formula="of:=[.D903]-[.D9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0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08796296296296" calcext:value-type="float">
            <text:p>0,00208796296296296000</text:p>
          </table:table-cell>
          <table:table-cell table:formula="of:=[.D904]-[.D9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0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09027777777778" calcext:value-type="float">
            <text:p>0,00209027777777778000</text:p>
          </table:table-cell>
          <table:table-cell table:formula="of:=[.D905]-[.D9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0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09259259259259" calcext:value-type="float">
            <text:p>0,00209259259259259000</text:p>
          </table:table-cell>
          <table:table-cell table:formula="of:=[.D906]-[.D9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0" office:value-type="float" office:value="18100" calcext:value-type="float">
            <text:p>1810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09490740740741" calcext:value-type="float">
            <text:p>0,00209490740740741000</text:p>
          </table:table-cell>
          <table:table-cell table:formula="of:=[.D907]-[.D9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0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09722222222222" calcext:value-type="float">
            <text:p>0,00209722222222222000</text:p>
          </table:table-cell>
          <table:table-cell table:formula="of:=[.D908]-[.D9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0" office:value-type="float" office:value="18140" calcext:value-type="float">
            <text:p>18140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09953703703704" calcext:value-type="float">
            <text:p>0,00209953703703704000</text:p>
          </table:table-cell>
          <table:table-cell table:formula="of:=[.D909]-[.D9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0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10185185185185" calcext:value-type="float">
            <text:p>0,00210185185185185000</text:p>
          </table:table-cell>
          <table:table-cell table:formula="of:=[.D910]-[.D9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0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10416666666667" calcext:value-type="float">
            <text:p>0,00210416666666667000</text:p>
          </table:table-cell>
          <table:table-cell table:formula="of:=[.D911]-[.D9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10648148148148" calcext:value-type="float">
            <text:p>0,00210648148148148000</text:p>
          </table:table-cell>
          <table:table-cell table:formula="of:=[.D912]-[.D9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0" office:value-type="float" office:value="18220" calcext:value-type="float">
            <text:p>18220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1087962962963" calcext:value-type="float">
            <text:p>0,00210879629629630000</text:p>
          </table:table-cell>
          <table:table-cell table:formula="of:=[.D913]-[.D9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11111111111111" calcext:value-type="float">
            <text:p>0,00211111111111111000</text:p>
          </table:table-cell>
          <table:table-cell table:formula="of:=[.D914]-[.D9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0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11342592592593" calcext:value-type="float">
            <text:p>0,00211342592592593000</text:p>
          </table:table-cell>
          <table:table-cell table:formula="of:=[.D915]-[.D914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0" office:value-type="float" office:value="18280" calcext:value-type="float">
            <text:p>18280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11574074074074" calcext:value-type="float">
            <text:p>0,00211574074074074000</text:p>
          </table:table-cell>
          <table:table-cell table:formula="of:=[.D916]-[.D9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11805555555556" calcext:value-type="float">
            <text:p>0,00211805555555556000</text:p>
          </table:table-cell>
          <table:table-cell table:formula="of:=[.D917]-[.D9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0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12037037037037" calcext:value-type="float">
            <text:p>0,00212037037037037000</text:p>
          </table:table-cell>
          <table:table-cell table:formula="of:=[.D918]-[.D9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0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12268518518519" calcext:value-type="float">
            <text:p>0,00212268518518519000</text:p>
          </table:table-cell>
          <table:table-cell table:formula="of:=[.D919]-[.D9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125" calcext:value-type="float">
            <text:p>0,00212500000000000000</text:p>
          </table:table-cell>
          <table:table-cell table:formula="of:=[.D920]-[.D9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0" office:value-type="float" office:value="18380" calcext:value-type="float">
            <text:p>18380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12731481481482" calcext:value-type="float">
            <text:p>0,00212731481481482000</text:p>
          </table:table-cell>
          <table:table-cell table:formula="of:=[.D921]-[.D9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12962962962963" calcext:value-type="float">
            <text:p>0,00212962962962963000</text:p>
          </table:table-cell>
          <table:table-cell table:formula="of:=[.D922]-[.D9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0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13194444444444" calcext:value-type="float">
            <text:p>0,00213194444444444000</text:p>
          </table:table-cell>
          <table:table-cell table:formula="of:=[.D923]-[.D9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0" office:value-type="float" office:value="18440" calcext:value-type="float">
            <text:p>18440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13425925925926" calcext:value-type="float">
            <text:p>0,00213425925925926000</text:p>
          </table:table-cell>
          <table:table-cell table:formula="of:=[.D924]-[.D9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0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13657407407407" calcext:value-type="float">
            <text:p>0,00213657407407407000</text:p>
          </table:table-cell>
          <table:table-cell table:formula="of:=[.D925]-[.D9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13888888888889" calcext:value-type="float">
            <text:p>0,00213888888888889000</text:p>
          </table:table-cell>
          <table:table-cell table:formula="of:=[.D926]-[.D9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0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1412037037037" calcext:value-type="float">
            <text:p>0,00214120370370370000</text:p>
          </table:table-cell>
          <table:table-cell table:formula="of:=[.D927]-[.D9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0" office:value-type="float" office:value="18520" calcext:value-type="float">
            <text:p>18520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14351851851852" calcext:value-type="float">
            <text:p>0,00214351851851852000</text:p>
          </table:table-cell>
          <table:table-cell table:formula="of:=[.D928]-[.D9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0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14583333333333" calcext:value-type="float">
            <text:p>0,00214583333333333000</text:p>
          </table:table-cell>
          <table:table-cell table:formula="of:=[.D929]-[.D9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0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14814814814815" calcext:value-type="float">
            <text:p>0,00214814814814815000</text:p>
          </table:table-cell>
          <table:table-cell table:formula="of:=[.D930]-[.D9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0" office:value-type="float" office:value="18580" calcext:value-type="float">
            <text:p>18580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15046296296296" calcext:value-type="float">
            <text:p>0,00215046296296296000</text:p>
          </table:table-cell>
          <table:table-cell table:formula="of:=[.D931]-[.D9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15277777777778" calcext:value-type="float">
            <text:p>0,00215277777777778000</text:p>
          </table:table-cell>
          <table:table-cell table:formula="of:=[.D932]-[.D9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0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15509259259259" calcext:value-type="float">
            <text:p>0,00215509259259259000</text:p>
          </table:table-cell>
          <table:table-cell table:formula="of:=[.D933]-[.D9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0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15740740740741" calcext:value-type="float">
            <text:p>0,00215740740740741000</text:p>
          </table:table-cell>
          <table:table-cell table:formula="of:=[.D934]-[.D9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0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15972222222222" calcext:value-type="float">
            <text:p>0,00215972222222222000</text:p>
          </table:table-cell>
          <table:table-cell table:formula="of:=[.D935]-[.D9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0" office:value-type="float" office:value="18680" calcext:value-type="float">
            <text:p>18680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16203703703704" calcext:value-type="float">
            <text:p>0,00216203703703704000</text:p>
          </table:table-cell>
          <table:table-cell table:formula="of:=[.D936]-[.D9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0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16435185185185" calcext:value-type="float">
            <text:p>0,00216435185185185000</text:p>
          </table:table-cell>
          <table:table-cell table:formula="of:=[.D937]-[.D9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16666666666667" calcext:value-type="float">
            <text:p>0,00216666666666667000</text:p>
          </table:table-cell>
          <table:table-cell table:formula="of:=[.D938]-[.D9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0" office:value-type="float" office:value="18740" calcext:value-type="float">
            <text:p>18740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16898148148148" calcext:value-type="float">
            <text:p>0,00216898148148148000</text:p>
          </table:table-cell>
          <table:table-cell table:formula="of:=[.D939]-[.D9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0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1712962962963" calcext:value-type="float">
            <text:p>0,00217129629629630000</text:p>
          </table:table-cell>
          <table:table-cell table:formula="of:=[.D940]-[.D9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0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17361111111111" calcext:value-type="float">
            <text:p>0,00217361111111111000</text:p>
          </table:table-cell>
          <table:table-cell table:formula="of:=[.D941]-[.D9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17592592592593" calcext:value-type="float">
            <text:p>0,00217592592592593000</text:p>
          </table:table-cell>
          <table:table-cell table:formula="of:=[.D942]-[.D9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0" office:value-type="float" office:value="18820" calcext:value-type="float">
            <text:p>18820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17824074074074" calcext:value-type="float">
            <text:p>0,00217824074074074000</text:p>
          </table:table-cell>
          <table:table-cell table:formula="of:=[.D943]-[.D9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0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18055555555556" calcext:value-type="float">
            <text:p>0,00218055555555556000</text:p>
          </table:table-cell>
          <table:table-cell table:formula="of:=[.D944]-[.D9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0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18287037037037" calcext:value-type="float">
            <text:p>0,00218287037037037000</text:p>
          </table:table-cell>
          <table:table-cell table:formula="of:=[.D945]-[.D9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0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18518518518519" calcext:value-type="float">
            <text:p>0,00218518518518519000</text:p>
          </table:table-cell>
          <table:table-cell table:formula="of:=[.D946]-[.D945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1875" calcext:value-type="float">
            <text:p>0,00218750000000000000</text:p>
          </table:table-cell>
          <table:table-cell table:formula="of:=[.D947]-[.D9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0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18981481481482" calcext:value-type="float">
            <text:p>0,00218981481481482000</text:p>
          </table:table-cell>
          <table:table-cell table:formula="of:=[.D948]-[.D9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0" office:value-type="float" office:value="18940" calcext:value-type="float">
            <text:p>18940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19212962962963" calcext:value-type="float">
            <text:p>0,00219212962962963000</text:p>
          </table:table-cell>
          <table:table-cell table:formula="of:=[.D949]-[.D9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19444444444444" calcext:value-type="float">
            <text:p>0,00219444444444444000</text:p>
          </table:table-cell>
          <table:table-cell table:formula="of:=[.D950]-[.D9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0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19675925925926" calcext:value-type="float">
            <text:p>0,00219675925925926000</text:p>
          </table:table-cell>
          <table:table-cell table:formula="of:=[.D951]-[.D9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0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19907407407407" calcext:value-type="float">
            <text:p>0,00219907407407407000</text:p>
          </table:table-cell>
          <table:table-cell table:formula="of:=[.D952]-[.D9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0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20138888888889" calcext:value-type="float">
            <text:p>0,00220138888888889000</text:p>
          </table:table-cell>
          <table:table-cell table:formula="of:=[.D953]-[.D9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0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2037037037037" calcext:value-type="float">
            <text:p>0,00220370370370370000</text:p>
          </table:table-cell>
          <table:table-cell table:formula="of:=[.D954]-[.D9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0" office:value-type="float" office:value="19060" calcext:value-type="float">
            <text:p>19060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20601851851852" calcext:value-type="float">
            <text:p>0,00220601851851852000</text:p>
          </table:table-cell>
          <table:table-cell table:formula="of:=[.D955]-[.D9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20833333333333" calcext:value-type="float">
            <text:p>0,00220833333333333000</text:p>
          </table:table-cell>
          <table:table-cell table:formula="of:=[.D956]-[.D9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0" office:value-type="float" office:value="19100" calcext:value-type="float">
            <text:p>1910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21064814814815" calcext:value-type="float">
            <text:p>0,00221064814814815000</text:p>
          </table:table-cell>
          <table:table-cell table:formula="of:=[.D957]-[.D9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0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21296296296296" calcext:value-type="float">
            <text:p>0,00221296296296296000</text:p>
          </table:table-cell>
          <table:table-cell table:formula="of:=[.D958]-[.D9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0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21527777777778" calcext:value-type="float">
            <text:p>0,00221527777777778000</text:p>
          </table:table-cell>
          <table:table-cell table:formula="of:=[.D959]-[.D9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0" office:value-type="float" office:value="19160" calcext:value-type="float">
            <text:p>19160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21759259259259" calcext:value-type="float">
            <text:p>0,00221759259259259000</text:p>
          </table:table-cell>
          <table:table-cell table:formula="of:=[.D960]-[.D9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0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21990740740741" calcext:value-type="float">
            <text:p>0,00221990740740741000</text:p>
          </table:table-cell>
          <table:table-cell table:formula="of:=[.D961]-[.D9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22222222222222" calcext:value-type="float">
            <text:p>0,00222222222222222000</text:p>
          </table:table-cell>
          <table:table-cell table:formula="of:=[.D962]-[.D9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20" office:value-type="float" office:value="19220" calcext:value-type="float">
            <text:p>19220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22453703703704" calcext:value-type="float">
            <text:p>0,00222453703703704000</text:p>
          </table:table-cell>
          <table:table-cell table:formula="of:=[.D963]-[.D9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20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22685185185185" calcext:value-type="float">
            <text:p>0,00222685185185185000</text:p>
          </table:table-cell>
          <table:table-cell table:formula="of:=[.D964]-[.D9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20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22916666666667" calcext:value-type="float">
            <text:p>0,00222916666666667000</text:p>
          </table:table-cell>
          <table:table-cell table:formula="of:=[.D965]-[.D9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20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23148148148148" calcext:value-type="float">
            <text:p>0,00223148148148148000</text:p>
          </table:table-cell>
          <table:table-cell table:formula="of:=[.D966]-[.D9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20" office:value-type="float" office:value="19300" calcext:value-type="float">
            <text:p>1930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2337962962963" calcext:value-type="float">
            <text:p>0,00223379629629630000</text:p>
          </table:table-cell>
          <table:table-cell table:formula="of:=[.D967]-[.D9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2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23611111111111" calcext:value-type="float">
            <text:p>0,00223611111111111000</text:p>
          </table:table-cell>
          <table:table-cell table:formula="of:=[.D968]-[.D9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20" office:value-type="float" office:value="19340" calcext:value-type="float">
            <text:p>19340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23842592592593" calcext:value-type="float">
            <text:p>0,00223842592592593000</text:p>
          </table:table-cell>
          <table:table-cell table:formula="of:=[.D969]-[.D9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20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24074074074074" calcext:value-type="float">
            <text:p>0,00224074074074074000</text:p>
          </table:table-cell>
          <table:table-cell table:formula="of:=[.D970]-[.D9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20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24305555555556" calcext:value-type="float">
            <text:p>0,00224305555555556000</text:p>
          </table:table-cell>
          <table:table-cell table:formula="of:=[.D971]-[.D9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20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24537037037037" calcext:value-type="float">
            <text:p>0,00224537037037037000</text:p>
          </table:table-cell>
          <table:table-cell table:formula="of:=[.D972]-[.D9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20" office:value-type="float" office:value="19420" calcext:value-type="float">
            <text:p>19420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24768518518519" calcext:value-type="float">
            <text:p>0,00224768518518519000</text:p>
          </table:table-cell>
          <table:table-cell table:formula="of:=[.D973]-[.D9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2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25" calcext:value-type="float">
            <text:p>0,00225000000000000000</text:p>
          </table:table-cell>
          <table:table-cell table:formula="of:=[.D974]-[.D9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20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25231481481481" calcext:value-type="float">
            <text:p>0,00225231481481481000</text:p>
          </table:table-cell>
          <table:table-cell table:formula="of:=[.D975]-[.D9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20" office:value-type="float" office:value="19480" calcext:value-type="float">
            <text:p>19480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25462962962963" calcext:value-type="float">
            <text:p>0,00225462962962963000</text:p>
          </table:table-cell>
          <table:table-cell table:formula="of:=[.D976]-[.D9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2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25694444444444" calcext:value-type="float">
            <text:p>0,00225694444444444000</text:p>
          </table:table-cell>
          <table:table-cell table:formula="of:=[.D977]-[.D976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20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25925925925926" calcext:value-type="float">
            <text:p>0,00225925925925926000</text:p>
          </table:table-cell>
          <table:table-cell table:formula="of:=[.D978]-[.D9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20" office:value-type="float" office:value="19540" calcext:value-type="float">
            <text:p>19540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26157407407407" calcext:value-type="float">
            <text:p>0,00226157407407407000</text:p>
          </table:table-cell>
          <table:table-cell table:formula="of:=[.D979]-[.D9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20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26388888888889" calcext:value-type="float">
            <text:p>0,00226388888888889000</text:p>
          </table:table-cell>
          <table:table-cell table:formula="of:=[.D980]-[.D9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20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2662037037037" calcext:value-type="float">
            <text:p>0,00226620370370370000</text:p>
          </table:table-cell>
          <table:table-cell table:formula="of:=[.D981]-[.D9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2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26851851851852" calcext:value-type="float">
            <text:p>0,00226851851851852000</text:p>
          </table:table-cell>
          <table:table-cell table:formula="of:=[.D982]-[.D9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20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27083333333333" calcext:value-type="float">
            <text:p>0,00227083333333333000</text:p>
          </table:table-cell>
          <table:table-cell table:formula="of:=[.D983]-[.D9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20" office:value-type="float" office:value="19640" calcext:value-type="float">
            <text:p>19640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27314814814815" calcext:value-type="float">
            <text:p>0,00227314814814815000</text:p>
          </table:table-cell>
          <table:table-cell table:formula="of:=[.D984]-[.D9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20" office:value-type="float" office:value="19660" calcext:value-type="float">
            <text:p>19660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27546296296296" calcext:value-type="float">
            <text:p>0,00227546296296296000</text:p>
          </table:table-cell>
          <table:table-cell table:formula="of:=[.D985]-[.D9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2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27777777777778" calcext:value-type="float">
            <text:p>0,00227777777777778000</text:p>
          </table:table-cell>
          <table:table-cell table:formula="of:=[.D986]-[.D9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20" office:value-type="float" office:value="19700" calcext:value-type="float">
            <text:p>1970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28009259259259" calcext:value-type="float">
            <text:p>0,00228009259259259000</text:p>
          </table:table-cell>
          <table:table-cell table:formula="of:=[.D987]-[.D9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20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28240740740741" calcext:value-type="float">
            <text:p>0,00228240740740741000</text:p>
          </table:table-cell>
          <table:table-cell table:formula="of:=[.D988]-[.D9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20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28472222222222" calcext:value-type="float">
            <text:p>0,00228472222222222000</text:p>
          </table:table-cell>
          <table:table-cell table:formula="of:=[.D989]-[.D9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20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28703703703704" calcext:value-type="float">
            <text:p>0,00228703703703704000</text:p>
          </table:table-cell>
          <table:table-cell table:formula="of:=[.D990]-[.D9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20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28935185185185" calcext:value-type="float">
            <text:p>0,00228935185185185000</text:p>
          </table:table-cell>
          <table:table-cell table:formula="of:=[.D991]-[.D9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2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29166666666667" calcext:value-type="float">
            <text:p>0,00229166666666667000</text:p>
          </table:table-cell>
          <table:table-cell table:formula="of:=[.D992]-[.D9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20" office:value-type="float" office:value="19820" calcext:value-type="float">
            <text:p>19820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29398148148148" calcext:value-type="float">
            <text:p>0,00229398148148148000</text:p>
          </table:table-cell>
          <table:table-cell table:formula="of:=[.D993]-[.D9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20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2962962962963" calcext:value-type="float">
            <text:p>0,00229629629629630000</text:p>
          </table:table-cell>
          <table:table-cell table:formula="of:=[.D994]-[.D9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20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29861111111111" calcext:value-type="float">
            <text:p>0,00229861111111111000</text:p>
          </table:table-cell>
          <table:table-cell table:formula="of:=[.D995]-[.D9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20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30092592592593" calcext:value-type="float">
            <text:p>0,00230092592592593000</text:p>
          </table:table-cell>
          <table:table-cell table:formula="of:=[.D996]-[.D9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20" office:value-type="float" office:value="19900" calcext:value-type="float">
            <text:p>1990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30324074074074" calcext:value-type="float">
            <text:p>0,00230324074074074000</text:p>
          </table:table-cell>
          <table:table-cell table:formula="of:=[.D997]-[.D9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2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30555555555556" calcext:value-type="float">
            <text:p>0,00230555555555556000</text:p>
          </table:table-cell>
          <table:table-cell table:formula="of:=[.D998]-[.D9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20" office:value-type="float" office:value="19940" calcext:value-type="float">
            <text:p>19940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30787037037037" calcext:value-type="float">
            <text:p>0,00230787037037037000</text:p>
          </table:table-cell>
          <table:table-cell table:formula="of:=[.D999]-[.D9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20" office:value-type="float" office:value="19960" calcext:value-type="float">
            <text:p>19960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31018518518519" calcext:value-type="float">
            <text:p>0,00231018518518519000</text:p>
          </table:table-cell>
          <table:table-cell table:formula="of:=[.D1000]-[.D9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20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3125" calcext:value-type="float">
            <text:p>0,00231250000000000000</text:p>
          </table:table-cell>
          <table:table-cell table:formula="of:=[.D1001]-[.D10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2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31481481481481" calcext:value-type="float">
            <text:p>0,00231481481481481000</text:p>
          </table:table-cell>
          <table:table-cell table:formula="of:=[.D1002]-[.D10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20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31712962962963" calcext:value-type="float">
            <text:p>0,00231712962962963000</text:p>
          </table:table-cell>
          <table:table-cell table:formula="of:=[.D1003]-[.D10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20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31944444444444" calcext:value-type="float">
            <text:p>0,00231944444444444000</text:p>
          </table:table-cell>
          <table:table-cell table:formula="of:=[.D1004]-[.D10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20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32175925925926" calcext:value-type="float">
            <text:p>0,00232175925925926000</text:p>
          </table:table-cell>
          <table:table-cell table:formula="of:=[.D1005]-[.D10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20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32407407407407" calcext:value-type="float">
            <text:p>0,00232407407407407000</text:p>
          </table:table-cell>
          <table:table-cell table:formula="of:=[.D1006]-[.D10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2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32638888888889" calcext:value-type="float">
            <text:p>0,00232638888888889000</text:p>
          </table:table-cell>
          <table:table-cell table:formula="of:=[.D1007]-[.D10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20" office:value-type="float" office:value="20120" calcext:value-type="float">
            <text:p>20120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3287037037037" calcext:value-type="float">
            <text:p>0,00232870370370370000</text:p>
          </table:table-cell>
          <table:table-cell table:formula="of:=[.D1008]-[.D1007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20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33101851851852" calcext:value-type="float">
            <text:p>0,00233101851851852000</text:p>
          </table:table-cell>
          <table:table-cell table:formula="of:=[.D1009]-[.D10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2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33333333333333" calcext:value-type="float">
            <text:p>0,00233333333333333000</text:p>
          </table:table-cell>
          <table:table-cell table:formula="of:=[.D1010]-[.D10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20" office:value-type="float" office:value="20180" calcext:value-type="float">
            <text:p>20180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33564814814815" calcext:value-type="float">
            <text:p>0,00233564814814815000</text:p>
          </table:table-cell>
          <table:table-cell table:formula="of:=[.D1011]-[.D10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20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33796296296296" calcext:value-type="float">
            <text:p>0,00233796296296296000</text:p>
          </table:table-cell>
          <table:table-cell table:formula="of:=[.D1012]-[.D10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20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34027777777778" calcext:value-type="float">
            <text:p>0,00234027777777778000</text:p>
          </table:table-cell>
          <table:table-cell table:formula="of:=[.D1013]-[.D10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20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34259259259259" calcext:value-type="float">
            <text:p>0,00234259259259259000</text:p>
          </table:table-cell>
          <table:table-cell table:formula="of:=[.D1014]-[.D10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20" office:value-type="float" office:value="20260" calcext:value-type="float">
            <text:p>20260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34490740740741" calcext:value-type="float">
            <text:p>0,00234490740740741000</text:p>
          </table:table-cell>
          <table:table-cell table:formula="of:=[.D1015]-[.D10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20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34722222222222" calcext:value-type="float">
            <text:p>0,00234722222222222000</text:p>
          </table:table-cell>
          <table:table-cell table:formula="of:=[.D1016]-[.D10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20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34953703703704" calcext:value-type="float">
            <text:p>0,00234953703703704000</text:p>
          </table:table-cell>
          <table:table-cell table:formula="of:=[.D1017]-[.D10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20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35185185185185" calcext:value-type="float">
            <text:p>0,00235185185185185000</text:p>
          </table:table-cell>
          <table:table-cell table:formula="of:=[.D1018]-[.D10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20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35416666666667" calcext:value-type="float">
            <text:p>0,00235416666666667000</text:p>
          </table:table-cell>
          <table:table-cell table:formula="of:=[.D1019]-[.D10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20" office:value-type="float" office:value="20360" calcext:value-type="float">
            <text:p>20360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35648148148148" calcext:value-type="float">
            <text:p>0,00235648148148148000</text:p>
          </table:table-cell>
          <table:table-cell table:formula="of:=[.D1020]-[.D10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20" office:value-type="float" office:value="20380" calcext:value-type="float">
            <text:p>20380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3587962962963" calcext:value-type="float">
            <text:p>0,00235879629629630000</text:p>
          </table:table-cell>
          <table:table-cell table:formula="of:=[.D1021]-[.D10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2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36111111111111" calcext:value-type="float">
            <text:p>0,00236111111111111000</text:p>
          </table:table-cell>
          <table:table-cell table:formula="of:=[.D1022]-[.D10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20" office:value-type="float" office:value="20420" calcext:value-type="float">
            <text:p>20420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36342592592593" calcext:value-type="float">
            <text:p>0,00236342592592593000</text:p>
          </table:table-cell>
          <table:table-cell table:formula="of:=[.D1023]-[.D10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20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36574074074074" calcext:value-type="float">
            <text:p>0,00236574074074074000</text:p>
          </table:table-cell>
          <table:table-cell table:formula="of:=[.D1024]-[.D10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20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36805555555556" calcext:value-type="float">
            <text:p>0,00236805555555556000</text:p>
          </table:table-cell>
          <table:table-cell table:formula="of:=[.D1025]-[.D10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20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37037037037037" calcext:value-type="float">
            <text:p>0,00237037037037037000</text:p>
          </table:table-cell>
          <table:table-cell table:formula="of:=[.D1026]-[.D10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20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37268518518519" calcext:value-type="float">
            <text:p>0,00237268518518519000</text:p>
          </table:table-cell>
          <table:table-cell table:formula="of:=[.D1027]-[.D10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2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375" calcext:value-type="float">
            <text:p>0,00237500000000000000</text:p>
          </table:table-cell>
          <table:table-cell table:formula="of:=[.D1028]-[.D10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20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37731481481481" calcext:value-type="float">
            <text:p>0,00237731481481481000</text:p>
          </table:table-cell>
          <table:table-cell table:formula="of:=[.D1029]-[.D10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20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37962962962963" calcext:value-type="float">
            <text:p>0,00237962962962963000</text:p>
          </table:table-cell>
          <table:table-cell table:formula="of:=[.D1030]-[.D10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20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38194444444444" calcext:value-type="float">
            <text:p>0,00238194444444444000</text:p>
          </table:table-cell>
          <table:table-cell table:formula="of:=[.D1031]-[.D10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20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38425925925926" calcext:value-type="float">
            <text:p>0,00238425925925926000</text:p>
          </table:table-cell>
          <table:table-cell table:formula="of:=[.D1032]-[.D103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20" office:value-type="float" office:value="20620" calcext:value-type="float">
            <text:p>20620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38657407407407" calcext:value-type="float">
            <text:p>0,00238657407407407000</text:p>
          </table:table-cell>
          <table:table-cell table:formula="of:=[.D1033]-[.D10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2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38888888888889" calcext:value-type="float">
            <text:p>0,00238888888888889000</text:p>
          </table:table-cell>
          <table:table-cell table:formula="of:=[.D1034]-[.D10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20" office:value-type="float" office:value="20660" calcext:value-type="float">
            <text:p>20660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3912037037037" calcext:value-type="float">
            <text:p>0,00239120370370370000</text:p>
          </table:table-cell>
          <table:table-cell table:formula="of:=[.D1035]-[.D10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20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39351851851852" calcext:value-type="float">
            <text:p>0,00239351851851852000</text:p>
          </table:table-cell>
          <table:table-cell table:formula="of:=[.D1036]-[.D10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2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39583333333333" calcext:value-type="float">
            <text:p>0,00239583333333333000</text:p>
          </table:table-cell>
          <table:table-cell table:formula="of:=[.D1037]-[.D10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20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39814814814815" calcext:value-type="float">
            <text:p>0,00239814814814815000</text:p>
          </table:table-cell>
          <table:table-cell table:formula="of:=[.D1038]-[.D10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20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40046296296296" calcext:value-type="float">
            <text:p>0,00240046296296296000</text:p>
          </table:table-cell>
          <table:table-cell table:formula="of:=[.D1039]-[.D1038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20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40277777777778" calcext:value-type="float">
            <text:p>0,00240277777777778000</text:p>
          </table:table-cell>
          <table:table-cell table:formula="of:=[.D1040]-[.D10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20" office:value-type="float" office:value="20780" calcext:value-type="float">
            <text:p>20780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40509259259259" calcext:value-type="float">
            <text:p>0,00240509259259259000</text:p>
          </table:table-cell>
          <table:table-cell table:formula="of:=[.D1041]-[.D10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2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40740740740741" calcext:value-type="float">
            <text:p>0,00240740740740741000</text:p>
          </table:table-cell>
          <table:table-cell table:formula="of:=[.D1042]-[.D10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20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40972222222222" calcext:value-type="float">
            <text:p>0,00240972222222222000</text:p>
          </table:table-cell>
          <table:table-cell table:formula="of:=[.D1043]-[.D10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20" office:value-type="float" office:value="20840" calcext:value-type="float">
            <text:p>20840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41203703703704" calcext:value-type="float">
            <text:p>0,00241203703703704000</text:p>
          </table:table-cell>
          <table:table-cell table:formula="of:=[.D1044]-[.D10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20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41435185185185" calcext:value-type="float">
            <text:p>0,00241435185185185000</text:p>
          </table:table-cell>
          <table:table-cell table:formula="of:=[.D1045]-[.D10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2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41666666666667" calcext:value-type="float">
            <text:p>0,00241666666666667000</text:p>
          </table:table-cell>
          <table:table-cell table:formula="of:=[.D1046]-[.D10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20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41898148148148" calcext:value-type="float">
            <text:p>0,00241898148148148000</text:p>
          </table:table-cell>
          <table:table-cell table:formula="of:=[.D1047]-[.D10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20" office:value-type="float" office:value="20920" calcext:value-type="float">
            <text:p>20920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4212962962963" calcext:value-type="float">
            <text:p>0,00242129629629630000</text:p>
          </table:table-cell>
          <table:table-cell table:formula="of:=[.D1048]-[.D10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20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42361111111111" calcext:value-type="float">
            <text:p>0,00242361111111111000</text:p>
          </table:table-cell>
          <table:table-cell table:formula="of:=[.D1049]-[.D10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20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42592592592593" calcext:value-type="float">
            <text:p>0,00242592592592593000</text:p>
          </table:table-cell>
          <table:table-cell table:formula="of:=[.D1050]-[.D10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20" office:value-type="float" office:value="20980" calcext:value-type="float">
            <text:p>20980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42824074074074" calcext:value-type="float">
            <text:p>0,00242824074074074000</text:p>
          </table:table-cell>
          <table:table-cell table:formula="of:=[.D1051]-[.D10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2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43055555555556" calcext:value-type="float">
            <text:p>0,00243055555555556000</text:p>
          </table:table-cell>
          <table:table-cell table:formula="of:=[.D1052]-[.D10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20" office:value-type="float" office:value="21020" calcext:value-type="float">
            <text:p>21020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43287037037037" calcext:value-type="float">
            <text:p>0,00243287037037037000</text:p>
          </table:table-cell>
          <table:table-cell table:formula="of:=[.D1053]-[.D10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20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43518518518519" calcext:value-type="float">
            <text:p>0,00243518518518519000</text:p>
          </table:table-cell>
          <table:table-cell table:formula="of:=[.D1054]-[.D10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20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4375" calcext:value-type="float">
            <text:p>0,00243750000000000000</text:p>
          </table:table-cell>
          <table:table-cell table:formula="of:=[.D1055]-[.D10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20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43981481481482" calcext:value-type="float">
            <text:p>0,00243981481481482000</text:p>
          </table:table-cell>
          <table:table-cell table:formula="of:=[.D1056]-[.D10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20" office:value-type="float" office:value="21100" calcext:value-type="float">
            <text:p>2110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44212962962963" calcext:value-type="float">
            <text:p>0,00244212962962963000</text:p>
          </table:table-cell>
          <table:table-cell table:formula="of:=[.D1057]-[.D10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2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44444444444444" calcext:value-type="float">
            <text:p>0,00244444444444444000</text:p>
          </table:table-cell>
          <table:table-cell table:formula="of:=[.D1058]-[.D10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20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44675925925926" calcext:value-type="float">
            <text:p>0,00244675925925926000</text:p>
          </table:table-cell>
          <table:table-cell table:formula="of:=[.D1059]-[.D10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20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44907407407407" calcext:value-type="float">
            <text:p>0,00244907407407407000</text:p>
          </table:table-cell>
          <table:table-cell table:formula="of:=[.D1060]-[.D10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20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45138888888889" calcext:value-type="float">
            <text:p>0,00245138888888889000</text:p>
          </table:table-cell>
          <table:table-cell table:formula="of:=[.D1061]-[.D10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2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4537037037037" calcext:value-type="float">
            <text:p>0,00245370370370370000</text:p>
          </table:table-cell>
          <table:table-cell table:formula="of:=[.D1062]-[.D10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20" office:value-type="float" office:value="21220" calcext:value-type="float">
            <text:p>21220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45601851851852" calcext:value-type="float">
            <text:p>0,00245601851851852000</text:p>
          </table:table-cell>
          <table:table-cell table:formula="of:=[.D1063]-[.D106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2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45833333333333" calcext:value-type="float">
            <text:p>0,00245833333333333000</text:p>
          </table:table-cell>
          <table:table-cell table:formula="of:=[.D1064]-[.D10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20" office:value-type="float" office:value="21260" calcext:value-type="float">
            <text:p>21260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46064814814815" calcext:value-type="float">
            <text:p>0,00246064814814815000</text:p>
          </table:table-cell>
          <table:table-cell table:formula="of:=[.D1065]-[.D10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20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46296296296296" calcext:value-type="float">
            <text:p>0,00246296296296296000</text:p>
          </table:table-cell>
          <table:table-cell table:formula="of:=[.D1066]-[.D10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2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46527777777778" calcext:value-type="float">
            <text:p>0,00246527777777778000</text:p>
          </table:table-cell>
          <table:table-cell table:formula="of:=[.D1067]-[.D10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20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46759259259259" calcext:value-type="float">
            <text:p>0,00246759259259259000</text:p>
          </table:table-cell>
          <table:table-cell table:formula="of:=[.D1068]-[.D10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20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46990740740741" calcext:value-type="float">
            <text:p>0,00246990740740741000</text:p>
          </table:table-cell>
          <table:table-cell table:formula="of:=[.D1069]-[.D10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2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47222222222222" calcext:value-type="float">
            <text:p>0,00247222222222222000</text:p>
          </table:table-cell>
          <table:table-cell table:formula="of:=[.D1070]-[.D1069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20" office:value-type="float" office:value="21380" calcext:value-type="float">
            <text:p>21380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47453703703704" calcext:value-type="float">
            <text:p>0,00247453703703704000</text:p>
          </table:table-cell>
          <table:table-cell table:formula="of:=[.D1071]-[.D10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20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47685185185185" calcext:value-type="float">
            <text:p>0,00247685185185185000</text:p>
          </table:table-cell>
          <table:table-cell table:formula="of:=[.D1072]-[.D10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2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47916666666667" calcext:value-type="float">
            <text:p>0,00247916666666667000</text:p>
          </table:table-cell>
          <table:table-cell table:formula="of:=[.D1073]-[.D10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20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48148148148148" calcext:value-type="float">
            <text:p>0,00248148148148148000</text:p>
          </table:table-cell>
          <table:table-cell table:formula="of:=[.D1074]-[.D10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20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4837962962963" calcext:value-type="float">
            <text:p>0,00248379629629630000</text:p>
          </table:table-cell>
          <table:table-cell table:formula="of:=[.D1075]-[.D10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20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48611111111111" calcext:value-type="float">
            <text:p>0,00248611111111111000</text:p>
          </table:table-cell>
          <table:table-cell table:formula="of:=[.D1076]-[.D10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20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48842592592593" calcext:value-type="float">
            <text:p>0,00248842592592593000</text:p>
          </table:table-cell>
          <table:table-cell table:formula="of:=[.D1077]-[.D10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20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49074074074074" calcext:value-type="float">
            <text:p>0,00249074074074074000</text:p>
          </table:table-cell>
          <table:table-cell table:formula="of:=[.D1078]-[.D10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20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49305555555556" calcext:value-type="float">
            <text:p>0,00249305555555556000</text:p>
          </table:table-cell>
          <table:table-cell table:formula="of:=[.D1079]-[.D10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20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49537037037037" calcext:value-type="float">
            <text:p>0,00249537037037037000</text:p>
          </table:table-cell>
          <table:table-cell table:formula="of:=[.D1080]-[.D10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20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49768518518519" calcext:value-type="float">
            <text:p>0,00249768518518519000</text:p>
          </table:table-cell>
          <table:table-cell table:formula="of:=[.D1081]-[.D10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2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5" calcext:value-type="float">
            <text:p>0,00250000000000000000</text:p>
          </table:table-cell>
          <table:table-cell table:formula="of:=[.D1082]-[.D10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20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50231481481482" calcext:value-type="float">
            <text:p>0,00250231481481482000</text:p>
          </table:table-cell>
          <table:table-cell table:formula="of:=[.D1083]-[.D10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20" office:value-type="float" office:value="21640" calcext:value-type="float">
            <text:p>21640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50462962962963" calcext:value-type="float">
            <text:p>0,00250462962962963000</text:p>
          </table:table-cell>
          <table:table-cell table:formula="of:=[.D1084]-[.D10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20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50694444444444" calcext:value-type="float">
            <text:p>0,00250694444444444000</text:p>
          </table:table-cell>
          <table:table-cell table:formula="of:=[.D1085]-[.D10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20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50925925925926" calcext:value-type="float">
            <text:p>0,00250925925925926000</text:p>
          </table:table-cell>
          <table:table-cell table:formula="of:=[.D1086]-[.D10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20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51157407407407" calcext:value-type="float">
            <text:p>0,00251157407407407000</text:p>
          </table:table-cell>
          <table:table-cell table:formula="of:=[.D1087]-[.D10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20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51388888888889" calcext:value-type="float">
            <text:p>0,00251388888888889000</text:p>
          </table:table-cell>
          <table:table-cell table:formula="of:=[.D1088]-[.D10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20" office:value-type="float" office:value="21740" calcext:value-type="float">
            <text:p>21740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5162037037037" calcext:value-type="float">
            <text:p>0,00251620370370370000</text:p>
          </table:table-cell>
          <table:table-cell table:formula="of:=[.D1089]-[.D10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20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51851851851852" calcext:value-type="float">
            <text:p>0,00251851851851852000</text:p>
          </table:table-cell>
          <table:table-cell table:formula="of:=[.D1090]-[.D10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20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52083333333333" calcext:value-type="float">
            <text:p>0,00252083333333333000</text:p>
          </table:table-cell>
          <table:table-cell table:formula="of:=[.D1091]-[.D10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20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52314814814815" calcext:value-type="float">
            <text:p>0,00252314814814815000</text:p>
          </table:table-cell>
          <table:table-cell table:formula="of:=[.D1092]-[.D10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20" office:value-type="float" office:value="21820" calcext:value-type="float">
            <text:p>21820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52546296296296" calcext:value-type="float">
            <text:p>0,00252546296296296000</text:p>
          </table:table-cell>
          <table:table-cell table:formula="of:=[.D1093]-[.D10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2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52777777777778" calcext:value-type="float">
            <text:p>0,00252777777777778000</text:p>
          </table:table-cell>
          <table:table-cell table:formula="of:=[.D1094]-[.D109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20" office:value-type="float" office:value="21860" calcext:value-type="float">
            <text:p>21860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53009259259259" calcext:value-type="float">
            <text:p>0,00253009259259259000</text:p>
          </table:table-cell>
          <table:table-cell table:formula="of:=[.D1095]-[.D10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20" office:value-type="float" office:value="21880" calcext:value-type="float">
            <text:p>21880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53240740740741" calcext:value-type="float">
            <text:p>0,00253240740740741000</text:p>
          </table:table-cell>
          <table:table-cell table:formula="of:=[.D1096]-[.D10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2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53472222222222" calcext:value-type="float">
            <text:p>0,00253472222222222000</text:p>
          </table:table-cell>
          <table:table-cell table:formula="of:=[.D1097]-[.D10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20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53703703703704" calcext:value-type="float">
            <text:p>0,00253703703703704000</text:p>
          </table:table-cell>
          <table:table-cell table:formula="of:=[.D1098]-[.D10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20" office:value-type="float" office:value="21940" calcext:value-type="float">
            <text:p>21940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53935185185185" calcext:value-type="float">
            <text:p>0,00253935185185185000</text:p>
          </table:table-cell>
          <table:table-cell table:formula="of:=[.D1099]-[.D10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2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54166666666667" calcext:value-type="float">
            <text:p>0,00254166666666667000</text:p>
          </table:table-cell>
          <table:table-cell table:formula="of:=[.D1100]-[.D10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20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54398148148148" calcext:value-type="float">
            <text:p>0,00254398148148148000</text:p>
          </table:table-cell>
          <table:table-cell table:formula="of:=[.D1101]-[.D1100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2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5462962962963" calcext:value-type="float">
            <text:p>0,00254629629629630000</text:p>
          </table:table-cell>
          <table:table-cell table:formula="of:=[.D1102]-[.D110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20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54861111111111" calcext:value-type="float">
            <text:p>0,00254861111111111000</text:p>
          </table:table-cell>
          <table:table-cell table:formula="of:=[.D1103]-[.D110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20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55092592592593" calcext:value-type="float">
            <text:p>0,00255092592592593000</text:p>
          </table:table-cell>
          <table:table-cell table:formula="of:=[.D1104]-[.D110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20" office:value-type="float" office:value="22060" calcext:value-type="float">
            <text:p>22060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55324074074074" calcext:value-type="float">
            <text:p>0,00255324074074074000</text:p>
          </table:table-cell>
          <table:table-cell table:formula="of:=[.D1105]-[.D110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2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55555555555556" calcext:value-type="float">
            <text:p>0,00255555555555556000</text:p>
          </table:table-cell>
          <table:table-cell table:formula="of:=[.D1106]-[.D110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20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55787037037037" calcext:value-type="float">
            <text:p>0,00255787037037037000</text:p>
          </table:table-cell>
          <table:table-cell table:formula="of:=[.D1107]-[.D110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20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56018518518519" calcext:value-type="float">
            <text:p>0,00256018518518519000</text:p>
          </table:table-cell>
          <table:table-cell table:formula="of:=[.D1108]-[.D110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20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5625" calcext:value-type="float">
            <text:p>0,00256250000000000000</text:p>
          </table:table-cell>
          <table:table-cell table:formula="of:=[.D1109]-[.D110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20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56481481481482" calcext:value-type="float">
            <text:p>0,00256481481481482000</text:p>
          </table:table-cell>
          <table:table-cell table:formula="of:=[.D1110]-[.D110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20" office:value-type="float" office:value="22180" calcext:value-type="float">
            <text:p>22180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56712962962963" calcext:value-type="float">
            <text:p>0,00256712962962963000</text:p>
          </table:table-cell>
          <table:table-cell table:formula="of:=[.D1111]-[.D111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2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56944444444444" calcext:value-type="float">
            <text:p>0,00256944444444444000</text:p>
          </table:table-cell>
          <table:table-cell table:formula="of:=[.D1112]-[.D111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20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57175925925926" calcext:value-type="float">
            <text:p>0,00257175925925926000</text:p>
          </table:table-cell>
          <table:table-cell table:formula="of:=[.D1113]-[.D111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20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57407407407407" calcext:value-type="float">
            <text:p>0,00257407407407407000</text:p>
          </table:table-cell>
          <table:table-cell table:formula="of:=[.D1114]-[.D111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20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57638888888889" calcext:value-type="float">
            <text:p>0,00257638888888889000</text:p>
          </table:table-cell>
          <table:table-cell table:formula="of:=[.D1115]-[.D111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20" office:value-type="float" office:value="22280" calcext:value-type="float">
            <text:p>22280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5787037037037" calcext:value-type="float">
            <text:p>0,00257870370370370000</text:p>
          </table:table-cell>
          <table:table-cell table:formula="of:=[.D1116]-[.D111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20" office:value-type="float" office:value="22300" calcext:value-type="float">
            <text:p>2230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58101851851852" calcext:value-type="float">
            <text:p>0,00258101851851852000</text:p>
          </table:table-cell>
          <table:table-cell table:formula="of:=[.D1117]-[.D111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2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58333333333333" calcext:value-type="float">
            <text:p>0,00258333333333333000</text:p>
          </table:table-cell>
          <table:table-cell table:formula="of:=[.D1118]-[.D111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20" office:value-type="float" office:value="22340" calcext:value-type="float">
            <text:p>22340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58564814814815" calcext:value-type="float">
            <text:p>0,00258564814814815000</text:p>
          </table:table-cell>
          <table:table-cell table:formula="of:=[.D1119]-[.D111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20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58796296296296" calcext:value-type="float">
            <text:p>0,00258796296296296000</text:p>
          </table:table-cell>
          <table:table-cell table:formula="of:=[.D1120]-[.D111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20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59027777777778" calcext:value-type="float">
            <text:p>0,00259027777777778000</text:p>
          </table:table-cell>
          <table:table-cell table:formula="of:=[.D1121]-[.D112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2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59259259259259" calcext:value-type="float">
            <text:p>0,00259259259259259000</text:p>
          </table:table-cell>
          <table:table-cell table:formula="of:=[.D1122]-[.D112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20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59490740740741" calcext:value-type="float">
            <text:p>0,00259490740740741000</text:p>
          </table:table-cell>
          <table:table-cell table:formula="of:=[.D1123]-[.D112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20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59722222222222" calcext:value-type="float">
            <text:p>0,00259722222222222000</text:p>
          </table:table-cell>
          <table:table-cell table:formula="of:=[.D1124]-[.D112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20" office:value-type="float" office:value="22460" calcext:value-type="float">
            <text:p>22460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59953703703704" calcext:value-type="float">
            <text:p>0,00259953703703704000</text:p>
          </table:table-cell>
          <table:table-cell table:formula="of:=[.D1125]-[.D112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20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60185185185185" calcext:value-type="float">
            <text:p>0,00260185185185185000</text:p>
          </table:table-cell>
          <table:table-cell table:formula="of:=[.D1126]-[.D112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2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60416666666667" calcext:value-type="float">
            <text:p>0,00260416666666667000</text:p>
          </table:table-cell>
          <table:table-cell table:formula="of:=[.D1127]-[.D112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20" office:value-type="float" office:value="22520" calcext:value-type="float">
            <text:p>22520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60648148148148" calcext:value-type="float">
            <text:p>0,00260648148148148000</text:p>
          </table:table-cell>
          <table:table-cell table:formula="of:=[.D1128]-[.D112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20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6087962962963" calcext:value-type="float">
            <text:p>0,00260879629629630000</text:p>
          </table:table-cell>
          <table:table-cell table:formula="of:=[.D1129]-[.D112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2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61111111111111" calcext:value-type="float">
            <text:p>0,00261111111111111000</text:p>
          </table:table-cell>
          <table:table-cell table:formula="of:=[.D1130]-[.D112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20" office:value-type="float" office:value="22580" calcext:value-type="float">
            <text:p>22580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61342592592593" calcext:value-type="float">
            <text:p>0,00261342592592593000</text:p>
          </table:table-cell>
          <table:table-cell table:formula="of:=[.D1131]-[.D113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20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61574074074074" calcext:value-type="float">
            <text:p>0,00261574074074074000</text:p>
          </table:table-cell>
          <table:table-cell table:formula="of:=[.D1132]-[.D1131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20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61805555555556" calcext:value-type="float">
            <text:p>0,00261805555555556000</text:p>
          </table:table-cell>
          <table:table-cell table:formula="of:=[.D1133]-[.D113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20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62037037037037" calcext:value-type="float">
            <text:p>0,00262037037037037000</text:p>
          </table:table-cell>
          <table:table-cell table:formula="of:=[.D1134]-[.D113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20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62268518518519" calcext:value-type="float">
            <text:p>0,00262268518518519000</text:p>
          </table:table-cell>
          <table:table-cell table:formula="of:=[.D1135]-[.D113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2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625" calcext:value-type="float">
            <text:p>0,00262500000000000000</text:p>
          </table:table-cell>
          <table:table-cell table:formula="of:=[.D1136]-[.D113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20" office:value-type="float" office:value="22700" calcext:value-type="float">
            <text:p>2270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62731481481482" calcext:value-type="float">
            <text:p>0,00262731481481482000</text:p>
          </table:table-cell>
          <table:table-cell table:formula="of:=[.D1137]-[.D113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20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62962962962963" calcext:value-type="float">
            <text:p>0,00262962962962963000</text:p>
          </table:table-cell>
          <table:table-cell table:formula="of:=[.D1138]-[.D113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20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63194444444444" calcext:value-type="float">
            <text:p>0,00263194444444444000</text:p>
          </table:table-cell>
          <table:table-cell table:formula="of:=[.D1139]-[.D113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20" office:value-type="float" office:value="22760" calcext:value-type="float">
            <text:p>22760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63425925925926" calcext:value-type="float">
            <text:p>0,00263425925925926000</text:p>
          </table:table-cell>
          <table:table-cell table:formula="of:=[.D1140]-[.D113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20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63657407407407" calcext:value-type="float">
            <text:p>0,00263657407407407000</text:p>
          </table:table-cell>
          <table:table-cell table:formula="of:=[.D1141]-[.D114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2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63888888888889" calcext:value-type="float">
            <text:p>0,00263888888888889000</text:p>
          </table:table-cell>
          <table:table-cell table:formula="of:=[.D1142]-[.D114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20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6412037037037" calcext:value-type="float">
            <text:p>0,00264120370370370000</text:p>
          </table:table-cell>
          <table:table-cell table:formula="of:=[.D1143]-[.D114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20" office:value-type="float" office:value="22840" calcext:value-type="float">
            <text:p>22840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64351851851852" calcext:value-type="float">
            <text:p>0,00264351851851852000</text:p>
          </table:table-cell>
          <table:table-cell table:formula="of:=[.D1144]-[.D114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20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264583333333333" calcext:value-type="float">
            <text:p>0,00264583333333333000</text:p>
          </table:table-cell>
          <table:table-cell table:formula="of:=[.D1145]-[.D114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20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264814814814815" calcext:value-type="float">
            <text:p>0,00264814814814815000</text:p>
          </table:table-cell>
          <table:table-cell table:formula="of:=[.D1146]-[.D114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20" office:value-type="float" office:value="22900" calcext:value-type="float">
            <text:p>2290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265046296296296" calcext:value-type="float">
            <text:p>0,00265046296296296000</text:p>
          </table:table-cell>
          <table:table-cell table:formula="of:=[.D1147]-[.D114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20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265277777777778" calcext:value-type="float">
            <text:p>0,00265277777777778000</text:p>
          </table:table-cell>
          <table:table-cell table:formula="of:=[.D1148]-[.D114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20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265509259259259" calcext:value-type="float">
            <text:p>0,00265509259259259000</text:p>
          </table:table-cell>
          <table:table-cell table:formula="of:=[.D1149]-[.D114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20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265740740740741" calcext:value-type="float">
            <text:p>0,00265740740740741000</text:p>
          </table:table-cell>
          <table:table-cell table:formula="of:=[.D1150]-[.D114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20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265972222222222" calcext:value-type="float">
            <text:p>0,00265972222222222000</text:p>
          </table:table-cell>
          <table:table-cell table:formula="of:=[.D1151]-[.D115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20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266203703703704" calcext:value-type="float">
            <text:p>0,00266203703703704000</text:p>
          </table:table-cell>
          <table:table-cell table:formula="of:=[.D1152]-[.D115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20" office:value-type="float" office:value="23020" calcext:value-type="float">
            <text:p>23020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266435185185185" calcext:value-type="float">
            <text:p>0,00266435185185185000</text:p>
          </table:table-cell>
          <table:table-cell table:formula="of:=[.D1153]-[.D115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2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66666666666667" calcext:value-type="float">
            <text:p>0,00266666666666667000</text:p>
          </table:table-cell>
          <table:table-cell table:formula="of:=[.D1154]-[.D115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20" office:value-type="float" office:value="23060" calcext:value-type="float">
            <text:p>23060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66898148148148" calcext:value-type="float">
            <text:p>0,00266898148148148000</text:p>
          </table:table-cell>
          <table:table-cell table:formula="of:=[.D1155]-[.D115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20" office:value-type="float" office:value="23080" calcext:value-type="float">
            <text:p>23080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6712962962963" calcext:value-type="float">
            <text:p>0,00267129629629630000</text:p>
          </table:table-cell>
          <table:table-cell table:formula="of:=[.D1156]-[.D115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2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67361111111111" calcext:value-type="float">
            <text:p>0,00267361111111111000</text:p>
          </table:table-cell>
          <table:table-cell table:formula="of:=[.D1157]-[.D115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20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67592592592593" calcext:value-type="float">
            <text:p>0,00267592592592593000</text:p>
          </table:table-cell>
          <table:table-cell table:formula="of:=[.D1158]-[.D115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20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67824074074074" calcext:value-type="float">
            <text:p>0,00267824074074074000</text:p>
          </table:table-cell>
          <table:table-cell table:formula="of:=[.D1159]-[.D115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20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68055555555556" calcext:value-type="float">
            <text:p>0,00268055555555556000</text:p>
          </table:table-cell>
          <table:table-cell table:formula="of:=[.D1160]-[.D115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20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68287037037037" calcext:value-type="float">
            <text:p>0,00268287037037037000</text:p>
          </table:table-cell>
          <table:table-cell table:formula="of:=[.D1161]-[.D116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2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68518518518519" calcext:value-type="float">
            <text:p>0,00268518518518519000</text:p>
          </table:table-cell>
          <table:table-cell table:formula="of:=[.D1162]-[.D116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20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6875" calcext:value-type="float">
            <text:p>0,00268750000000000000</text:p>
          </table:table-cell>
          <table:table-cell table:formula="of:=[.D1163]-[.D1162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20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68981481481482" calcext:value-type="float">
            <text:p>0,00268981481481482000</text:p>
          </table:table-cell>
          <table:table-cell table:formula="of:=[.D1164]-[.D116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20" office:value-type="float" office:value="23260" calcext:value-type="float">
            <text:p>23260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69212962962963" calcext:value-type="float">
            <text:p>0,00269212962962963000</text:p>
          </table:table-cell>
          <table:table-cell table:formula="of:=[.D1165]-[.D116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2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69444444444444" calcext:value-type="float">
            <text:p>0,00269444444444444000</text:p>
          </table:table-cell>
          <table:table-cell table:formula="of:=[.D1166]-[.D116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20" office:value-type="float" office:value="23300" calcext:value-type="float">
            <text:p>2330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69675925925926" calcext:value-type="float">
            <text:p>0,00269675925925926000</text:p>
          </table:table-cell>
          <table:table-cell table:formula="of:=[.D1167]-[.D116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20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69907407407407" calcext:value-type="float">
            <text:p>0,00269907407407407000</text:p>
          </table:table-cell>
          <table:table-cell table:formula="of:=[.D1168]-[.D116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20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70138888888889" calcext:value-type="float">
            <text:p>0,00270138888888889000</text:p>
          </table:table-cell>
          <table:table-cell table:formula="of:=[.D1169]-[.D116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20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7037037037037" calcext:value-type="float">
            <text:p>0,00270370370370370000</text:p>
          </table:table-cell>
          <table:table-cell table:formula="of:=[.D1170]-[.D116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20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70601851851852" calcext:value-type="float">
            <text:p>0,00270601851851852000</text:p>
          </table:table-cell>
          <table:table-cell table:formula="of:=[.D1171]-[.D117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2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70833333333333" calcext:value-type="float">
            <text:p>0,00270833333333333000</text:p>
          </table:table-cell>
          <table:table-cell table:formula="of:=[.D1172]-[.D117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20" office:value-type="float" office:value="23420" calcext:value-type="float">
            <text:p>23420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71064814814815" calcext:value-type="float">
            <text:p>0,00271064814814815000</text:p>
          </table:table-cell>
          <table:table-cell table:formula="of:=[.D1173]-[.D117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20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71296296296296" calcext:value-type="float">
            <text:p>0,00271296296296296000</text:p>
          </table:table-cell>
          <table:table-cell table:formula="of:=[.D1174]-[.D117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20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71527777777778" calcext:value-type="float">
            <text:p>0,00271527777777778000</text:p>
          </table:table-cell>
          <table:table-cell table:formula="of:=[.D1175]-[.D117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20" office:value-type="float" office:value="23480" calcext:value-type="float">
            <text:p>23480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71759259259259" calcext:value-type="float">
            <text:p>0,00271759259259259000</text:p>
          </table:table-cell>
          <table:table-cell table:formula="of:=[.D1176]-[.D117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20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71990740740741" calcext:value-type="float">
            <text:p>0,00271990740740741000</text:p>
          </table:table-cell>
          <table:table-cell table:formula="of:=[.D1177]-[.D117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2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72222222222222" calcext:value-type="float">
            <text:p>0,00272222222222222000</text:p>
          </table:table-cell>
          <table:table-cell table:formula="of:=[.D1178]-[.D117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20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72453703703704" calcext:value-type="float">
            <text:p>0,00272453703703704000</text:p>
          </table:table-cell>
          <table:table-cell table:formula="of:=[.D1179]-[.D117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20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72685185185185" calcext:value-type="float">
            <text:p>0,00272685185185185000</text:p>
          </table:table-cell>
          <table:table-cell table:formula="of:=[.D1180]-[.D117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20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72916666666667" calcext:value-type="float">
            <text:p>0,00272916666666667000</text:p>
          </table:table-cell>
          <table:table-cell table:formula="of:=[.D1181]-[.D118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2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73148148148148" calcext:value-type="float">
            <text:p>0,00273148148148148000</text:p>
          </table:table-cell>
          <table:table-cell table:formula="of:=[.D1182]-[.D118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20" office:value-type="float" office:value="23620" calcext:value-type="float">
            <text:p>23620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7337962962963" calcext:value-type="float">
            <text:p>0,00273379629629630000</text:p>
          </table:table-cell>
          <table:table-cell table:formula="of:=[.D1183]-[.D118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20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73611111111111" calcext:value-type="float">
            <text:p>0,00273611111111111000</text:p>
          </table:table-cell>
          <table:table-cell table:formula="of:=[.D1184]-[.D1183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20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73842592592593" calcext:value-type="float">
            <text:p>0,00273842592592593000</text:p>
          </table:table-cell>
          <table:table-cell table:formula="of:=[.D1185]-[.D118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20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74074074074074" calcext:value-type="float">
            <text:p>0,00274074074074074000</text:p>
          </table:table-cell>
          <table:table-cell table:formula="of:=[.D1186]-[.D118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2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74305555555556" calcext:value-type="float">
            <text:p>0,00274305555555556000</text:p>
          </table:table-cell>
          <table:table-cell table:formula="of:=[.D1187]-[.D118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20" office:value-type="float" office:value="23720" calcext:value-type="float">
            <text:p>23720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74537037037037" calcext:value-type="float">
            <text:p>0,00274537037037037000</text:p>
          </table:table-cell>
          <table:table-cell table:formula="of:=[.D1188]-[.D118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20" office:value-type="float" office:value="23740" calcext:value-type="float">
            <text:p>23740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74768518518519" calcext:value-type="float">
            <text:p>0,00274768518518519000</text:p>
          </table:table-cell>
          <table:table-cell table:formula="of:=[.D1189]-[.D118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2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75" calcext:value-type="float">
            <text:p>0,00275000000000000000</text:p>
          </table:table-cell>
          <table:table-cell table:formula="of:=[.D1190]-[.D118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20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75231481481481" calcext:value-type="float">
            <text:p>0,00275231481481481000</text:p>
          </table:table-cell>
          <table:table-cell table:formula="of:=[.D1191]-[.D119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2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75462962962963" calcext:value-type="float">
            <text:p>0,00275462962962963000</text:p>
          </table:table-cell>
          <table:table-cell table:formula="of:=[.D1192]-[.D1191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20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75694444444444" calcext:value-type="float">
            <text:p>0,00275694444444444000</text:p>
          </table:table-cell>
          <table:table-cell table:formula="of:=[.D1193]-[.D1192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20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75925925925926" calcext:value-type="float">
            <text:p>0,00275925925925926000</text:p>
          </table:table-cell>
          <table:table-cell table:formula="of:=[.D1194]-[.D1193]" office:value-type="float" office:value="0.00000231481481481523" calcext:value-type="float">
            <text:p>0,0000023148148148152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20" office:value-type="float" office:value="23860" calcext:value-type="float">
            <text:p>23860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76157407407407" calcext:value-type="float">
            <text:p>0,00276157407407407000</text:p>
          </table:table-cell>
          <table:table-cell table:formula="of:=[.D1195]-[.D1194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20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76388888888889" calcext:value-type="float">
            <text:p>0,00276388888888889000</text:p>
          </table:table-cell>
          <table:table-cell table:formula="of:=[.D1196]-[.D1195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20" office:value-type="float" office:value="23900" calcext:value-type="float">
            <text:p>2390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7662037037037" calcext:value-type="float">
            <text:p>0,00276620370370370000</text:p>
          </table:table-cell>
          <table:table-cell table:formula="of:=[.D1197]-[.D1196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20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76851851851852" calcext:value-type="float">
            <text:p>0,00276851851851852000</text:p>
          </table:table-cell>
          <table:table-cell table:formula="of:=[.D1198]-[.D1197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2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77083333333333" calcext:value-type="float">
            <text:p>0,00277083333333333000</text:p>
          </table:table-cell>
          <table:table-cell table:formula="of:=[.D1199]-[.D1198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20" office:value-type="float" office:value="23960" calcext:value-type="float">
            <text:p>23960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77314814814815" calcext:value-type="float">
            <text:p>0,00277314814814815000</text:p>
          </table:table-cell>
          <table:table-cell table:formula="of:=[.D1200]-[.D1199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20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77546296296296" calcext:value-type="float">
            <text:p>0,00277546296296296000</text:p>
          </table:table-cell>
          <table:table-cell table:formula="of:=[.D1201]-[.D1200]" office:value-type="float" office:value="0.0000023148148148148" calcext:value-type="float">
            <text:p>0,000002314814814814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2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77777777777778" calcext:value-type="float">
            <text:p>0,00277777777777778000</text:p>
          </table:table-cell>
          <table:table-cell table:formula="of:=#REF!-[.D1201]" office:value-type="string" office:string-value="" calcext:value-type="error">
            <text:p>#REF!</text:p>
          </table:table-cell>
        </table:table-row>
        <table:table-row table:style-name="ro1" table:number-rows-repeated="10473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8:02.680863691</meta:creation-date>
    <dc:date>2026-05-17T15:38:09.438123667</dc:date>
    <meta:editing-duration>PT8S</meta:editing-duration>
    <meta:editing-cycles>1</meta:editing-cycles>
    <meta:document-statistic meta:table-count="1" meta:cell-count="6005" meta:object-count="0"/>
    <meta:generator>LibreOffice/24.2.7.2$Linux_X86_64 LibreOffice_project/420$Build-2</meta:generator>
  </office:meta>
</office:document-meta>
</file>