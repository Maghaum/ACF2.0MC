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9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3009259259259" calcext:value-type="float">
            <text:p>0,00001030092592592590</text:p>
          </table:table-cell>
          <table:table-cell table:formula="of:=[.D3]-[.D2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9" office:value-type="float" office:value="178" calcext:value-type="float">
            <text:p>17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06018518518519" calcext:value-type="float">
            <text:p>0,00002060185185185190</text:p>
          </table:table-cell>
          <table:table-cell table:formula="of:=[.D4]-[.D3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9" office:value-type="float" office:value="267" calcext:value-type="float">
            <text:p>26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09027777777778" calcext:value-type="float">
            <text:p>0,00003090277777777780</text:p>
          </table:table-cell>
          <table:table-cell table:formula="of:=[.D5]-[.D4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9" office:value-type="float" office:value="356" calcext:value-type="float">
            <text:p>35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12037037037037" calcext:value-type="float">
            <text:p>0,00004120370370370370</text:p>
          </table:table-cell>
          <table:table-cell table:formula="of:=[.D6]-[.D5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9" office:value-type="float" office:value="445" calcext:value-type="float">
            <text:p>44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15046296296296" calcext:value-type="float">
            <text:p>0,00005150462962962960</text:p>
          </table:table-cell>
          <table:table-cell table:formula="of:=[.D7]-[.D6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9" office:value-type="float" office:value="534" calcext:value-type="float">
            <text:p>53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18055555555556" calcext:value-type="float">
            <text:p>0,00006180555555555560</text:p>
          </table:table-cell>
          <table:table-cell table:formula="of:=[.D8]-[.D7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9" office:value-type="float" office:value="623" calcext:value-type="float">
            <text:p>62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21064814814815" calcext:value-type="float">
            <text:p>0,00007210648148148150</text:p>
          </table:table-cell>
          <table:table-cell table:formula="of:=[.D9]-[.D8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9" office:value-type="float" office:value="712" calcext:value-type="float">
            <text:p>71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24074074074074" calcext:value-type="float">
            <text:p>0,00008240740740740740</text:p>
          </table:table-cell>
          <table:table-cell table:formula="of:=[.D10]-[.D9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9" office:value-type="float" office:value="801" calcext:value-type="float">
            <text:p>80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27083333333333" calcext:value-type="float">
            <text:p>0,00009270833333333330</text:p>
          </table:table-cell>
          <table:table-cell table:formula="of:=[.D11]-[.D10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9" office:value-type="float" office:value="890" calcext:value-type="float">
            <text:p>8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3009259259259" calcext:value-type="float">
            <text:p>0,00010300925925925900</text:p>
          </table:table-cell>
          <table:table-cell table:formula="of:=[.D12]-[.D11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9" office:value-type="float" office:value="979" calcext:value-type="float">
            <text:p>97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13310185185185" calcext:value-type="float">
            <text:p>0,00011331018518518500</text:p>
          </table:table-cell>
          <table:table-cell table:formula="of:=[.D13]-[.D12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9" office:value-type="float" office:value="1068" calcext:value-type="float">
            <text:p>106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23611111111111" calcext:value-type="float">
            <text:p>0,00012361111111111100</text:p>
          </table:table-cell>
          <table:table-cell table:formula="of:=[.D14]-[.D13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9" office:value-type="float" office:value="1157" calcext:value-type="float">
            <text:p>115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33912037037037" calcext:value-type="float">
            <text:p>0,00013391203703703700</text:p>
          </table:table-cell>
          <table:table-cell table:formula="of:=[.D15]-[.D14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9" office:value-type="float" office:value="1246" calcext:value-type="float">
            <text:p>124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44212962962963" calcext:value-type="float">
            <text:p>0,00014421296296296300</text:p>
          </table:table-cell>
          <table:table-cell table:formula="of:=[.D16]-[.D15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9" office:value-type="float" office:value="1335" calcext:value-type="float">
            <text:p>133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54513888888889" calcext:value-type="float">
            <text:p>0,00015451388888888900</text:p>
          </table:table-cell>
          <table:table-cell table:formula="of:=[.D17]-[.D16]" office:value-type="float" office:value="0.0000103009259259259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9" office:value-type="float" office:value="1424" calcext:value-type="float">
            <text:p>142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64814814814815" calcext:value-type="float">
            <text:p>0,00016481481481481500</text:p>
          </table:table-cell>
          <table:table-cell table:formula="of:=[.D18]-[.D17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9" office:value-type="float" office:value="1513" calcext:value-type="float">
            <text:p>151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75115740740741" calcext:value-type="float">
            <text:p>0,00017511574074074100</text:p>
          </table:table-cell>
          <table:table-cell table:formula="of:=[.D19]-[.D18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9" office:value-type="float" office:value="1602" calcext:value-type="float">
            <text:p>160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85416666666667" calcext:value-type="float">
            <text:p>0,00018541666666666700</text:p>
          </table:table-cell>
          <table:table-cell table:formula="of:=[.D20]-[.D19]" office:value-type="float" office:value="0.0000103009259259259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9" office:value-type="float" office:value="1691" calcext:value-type="float">
            <text:p>169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95717592592593" calcext:value-type="float">
            <text:p>0,00019571759259259300</text:p>
          </table:table-cell>
          <table:table-cell table:formula="of:=[.D21]-[.D20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9" office:value-type="float" office:value="1780" calcext:value-type="float">
            <text:p>17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06018518518519" calcext:value-type="float">
            <text:p>0,00020601851851851900</text:p>
          </table:table-cell>
          <table:table-cell table:formula="of:=[.D22]-[.D21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9" office:value-type="float" office:value="1869" calcext:value-type="float">
            <text:p>186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16319444444444" calcext:value-type="float">
            <text:p>0,00021631944444444400</text:p>
          </table:table-cell>
          <table:table-cell table:formula="of:=[.D23]-[.D22]" office:value-type="float" office:value="0.0000103009259259259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9" office:value-type="float" office:value="1958" calcext:value-type="float">
            <text:p>195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2662037037037" calcext:value-type="float">
            <text:p>0,00022662037037037000</text:p>
          </table:table-cell>
          <table:table-cell table:formula="of:=[.D24]-[.D23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9" office:value-type="float" office:value="2047" calcext:value-type="float">
            <text:p>204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36921296296296" calcext:value-type="float">
            <text:p>0,00023692129629629600</text:p>
          </table:table-cell>
          <table:table-cell table:formula="of:=[.D25]-[.D24]" office:value-type="float" office:value="0.0000103009259259259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9" office:value-type="float" office:value="2136" calcext:value-type="float">
            <text:p>213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47222222222222" calcext:value-type="float">
            <text:p>0,00024722222222222200</text:p>
          </table:table-cell>
          <table:table-cell table:formula="of:=[.D26]-[.D25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9" office:value-type="float" office:value="2225" calcext:value-type="float">
            <text:p>22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57523148148148" calcext:value-type="float">
            <text:p>0,00025752314814814800</text:p>
          </table:table-cell>
          <table:table-cell table:formula="of:=[.D27]-[.D26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9" office:value-type="float" office:value="2314" calcext:value-type="float">
            <text:p>231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67824074074074" calcext:value-type="float">
            <text:p>0,00026782407407407400</text:p>
          </table:table-cell>
          <table:table-cell table:formula="of:=[.D28]-[.D27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9" office:value-type="float" office:value="2403" calcext:value-type="float">
            <text:p>240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78125" calcext:value-type="float">
            <text:p>0,00027812500000000000</text:p>
          </table:table-cell>
          <table:table-cell table:formula="of:=[.D29]-[.D28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9" office:value-type="float" office:value="2492" calcext:value-type="float">
            <text:p>249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88425925925926" calcext:value-type="float">
            <text:p>0,00028842592592592600</text:p>
          </table:table-cell>
          <table:table-cell table:formula="of:=[.D30]-[.D29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9" office:value-type="float" office:value="2581" calcext:value-type="float">
            <text:p>258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98726851851852" calcext:value-type="float">
            <text:p>0,00029872685185185200</text:p>
          </table:table-cell>
          <table:table-cell table:formula="of:=[.D31]-[.D30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9" office:value-type="float" office:value="2670" calcext:value-type="float">
            <text:p>26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09027777777778" calcext:value-type="float">
            <text:p>0,00030902777777777800</text:p>
          </table:table-cell>
          <table:table-cell table:formula="of:=[.D32]-[.D3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9" office:value-type="float" office:value="2759" calcext:value-type="float">
            <text:p>275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19328703703704" calcext:value-type="float">
            <text:p>0,00031932870370370400</text:p>
          </table:table-cell>
          <table:table-cell table:formula="of:=[.D33]-[.D32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9" office:value-type="float" office:value="2848" calcext:value-type="float">
            <text:p>284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2962962962963" calcext:value-type="float">
            <text:p>0,00032962962962963000</text:p>
          </table:table-cell>
          <table:table-cell table:formula="of:=[.D34]-[.D33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9" office:value-type="float" office:value="2937" calcext:value-type="float">
            <text:p>293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39930555555556" calcext:value-type="float">
            <text:p>0,00033993055555555600</text:p>
          </table:table-cell>
          <table:table-cell table:formula="of:=[.D35]-[.D34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9" office:value-type="float" office:value="3026" calcext:value-type="float">
            <text:p>302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50231481481482" calcext:value-type="float">
            <text:p>0,00035023148148148200</text:p>
          </table:table-cell>
          <table:table-cell table:formula="of:=[.D36]-[.D35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9" office:value-type="float" office:value="3115" calcext:value-type="float">
            <text:p>311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60532407407407" calcext:value-type="float">
            <text:p>0,00036053240740740700</text:p>
          </table:table-cell>
          <table:table-cell table:formula="of:=[.D37]-[.D36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9" office:value-type="float" office:value="3204" calcext:value-type="float">
            <text:p>320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70833333333333" calcext:value-type="float">
            <text:p>0,00037083333333333300</text:p>
          </table:table-cell>
          <table:table-cell table:formula="of:=[.D38]-[.D3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9" office:value-type="float" office:value="3293" calcext:value-type="float">
            <text:p>329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81134259259259" calcext:value-type="float">
            <text:p>0,00038113425925925900</text:p>
          </table:table-cell>
          <table:table-cell table:formula="of:=[.D39]-[.D38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9" office:value-type="float" office:value="3382" calcext:value-type="float">
            <text:p>338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91435185185185" calcext:value-type="float">
            <text:p>0,00039143518518518500</text:p>
          </table:table-cell>
          <table:table-cell table:formula="of:=[.D40]-[.D39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9" office:value-type="float" office:value="3471" calcext:value-type="float">
            <text:p>347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01736111111111" calcext:value-type="float">
            <text:p>0,00040173611111111100</text:p>
          </table:table-cell>
          <table:table-cell table:formula="of:=[.D41]-[.D40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9" office:value-type="float" office:value="3560" calcext:value-type="float">
            <text:p>35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12037037037037" calcext:value-type="float">
            <text:p>0,00041203703703703700</text:p>
          </table:table-cell>
          <table:table-cell table:formula="of:=[.D42]-[.D41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9" office:value-type="float" office:value="3649" calcext:value-type="float">
            <text:p>364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22337962962963" calcext:value-type="float">
            <text:p>0,00042233796296296300</text:p>
          </table:table-cell>
          <table:table-cell table:formula="of:=[.D43]-[.D42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9" office:value-type="float" office:value="3738" calcext:value-type="float">
            <text:p>373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32638888888889" calcext:value-type="float">
            <text:p>0,00043263888888888900</text:p>
          </table:table-cell>
          <table:table-cell table:formula="of:=[.D44]-[.D43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9" office:value-type="float" office:value="3827" calcext:value-type="float">
            <text:p>382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42939814814815" calcext:value-type="float">
            <text:p>0,00044293981481481500</text:p>
          </table:table-cell>
          <table:table-cell table:formula="of:=[.D45]-[.D4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9" office:value-type="float" office:value="3916" calcext:value-type="float">
            <text:p>391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53240740740741" calcext:value-type="float">
            <text:p>0,00045324074074074100</text:p>
          </table:table-cell>
          <table:table-cell table:formula="of:=[.D46]-[.D45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9" office:value-type="float" office:value="4005" calcext:value-type="float">
            <text:p>400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63541666666667" calcext:value-type="float">
            <text:p>0,00046354166666666700</text:p>
          </table:table-cell>
          <table:table-cell table:formula="of:=[.D47]-[.D46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9" office:value-type="float" office:value="4094" calcext:value-type="float">
            <text:p>409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73842592592593" calcext:value-type="float">
            <text:p>0,00047384259259259300</text:p>
          </table:table-cell>
          <table:table-cell table:formula="of:=[.D48]-[.D47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9" office:value-type="float" office:value="4183" calcext:value-type="float">
            <text:p>418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84143518518519" calcext:value-type="float">
            <text:p>0,00048414351851851800</text:p>
          </table:table-cell>
          <table:table-cell table:formula="of:=[.D49]-[.D4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9" office:value-type="float" office:value="4272" calcext:value-type="float">
            <text:p>427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94444444444445" calcext:value-type="float">
            <text:p>0,00049444444444444500</text:p>
          </table:table-cell>
          <table:table-cell table:formula="of:=[.D50]-[.D49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9" office:value-type="float" office:value="4361" calcext:value-type="float">
            <text:p>436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0474537037037" calcext:value-type="float">
            <text:p>0,00050474537037037000</text:p>
          </table:table-cell>
          <table:table-cell table:formula="of:=[.D51]-[.D5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9" office:value-type="float" office:value="4450" calcext:value-type="float">
            <text:p>44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15046296296296" calcext:value-type="float">
            <text:p>0,00051504629629629600</text:p>
          </table:table-cell>
          <table:table-cell table:formula="of:=[.D52]-[.D51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9" office:value-type="float" office:value="4539" calcext:value-type="float">
            <text:p>453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25347222222222" calcext:value-type="float">
            <text:p>0,00052534722222222200</text:p>
          </table:table-cell>
          <table:table-cell table:formula="of:=[.D53]-[.D5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9" office:value-type="float" office:value="4628" calcext:value-type="float">
            <text:p>462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35648148148148" calcext:value-type="float">
            <text:p>0,00053564814814814800</text:p>
          </table:table-cell>
          <table:table-cell table:formula="of:=[.D54]-[.D53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9" office:value-type="float" office:value="4717" calcext:value-type="float">
            <text:p>471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45949074074074" calcext:value-type="float">
            <text:p>0,00054594907407407400</text:p>
          </table:table-cell>
          <table:table-cell table:formula="of:=[.D55]-[.D5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9" office:value-type="float" office:value="4806" calcext:value-type="float">
            <text:p>480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5625" calcext:value-type="float">
            <text:p>0,00055625000000000000</text:p>
          </table:table-cell>
          <table:table-cell table:formula="of:=[.D56]-[.D5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9" office:value-type="float" office:value="4895" calcext:value-type="float">
            <text:p>489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66550925925926" calcext:value-type="float">
            <text:p>0,00056655092592592600</text:p>
          </table:table-cell>
          <table:table-cell table:formula="of:=[.D57]-[.D56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9" office:value-type="float" office:value="4984" calcext:value-type="float">
            <text:p>498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76851851851852" calcext:value-type="float">
            <text:p>0,00057685185185185200</text:p>
          </table:table-cell>
          <table:table-cell table:formula="of:=[.D58]-[.D5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9" office:value-type="float" office:value="5073" calcext:value-type="float">
            <text:p>507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87152777777778" calcext:value-type="float">
            <text:p>0,00058715277777777800</text:p>
          </table:table-cell>
          <table:table-cell table:formula="of:=[.D59]-[.D58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9" office:value-type="float" office:value="5162" calcext:value-type="float">
            <text:p>516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97453703703704" calcext:value-type="float">
            <text:p>0,00059745370370370400</text:p>
          </table:table-cell>
          <table:table-cell table:formula="of:=[.D60]-[.D5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9" office:value-type="float" office:value="5251" calcext:value-type="float">
            <text:p>525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0775462962963" calcext:value-type="float">
            <text:p>0,00060775462962963000</text:p>
          </table:table-cell>
          <table:table-cell table:formula="of:=[.D61]-[.D60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9" office:value-type="float" office:value="5340" calcext:value-type="float">
            <text:p>53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18055555555556" calcext:value-type="float">
            <text:p>0,00061805555555555600</text:p>
          </table:table-cell>
          <table:table-cell table:formula="of:=[.D62]-[.D6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9" office:value-type="float" office:value="5429" calcext:value-type="float">
            <text:p>542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28356481481482" calcext:value-type="float">
            <text:p>0,00062835648148148200</text:p>
          </table:table-cell>
          <table:table-cell table:formula="of:=[.D63]-[.D6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9" office:value-type="float" office:value="5518" calcext:value-type="float">
            <text:p>551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38657407407407" calcext:value-type="float">
            <text:p>0,00063865740740740700</text:p>
          </table:table-cell>
          <table:table-cell table:formula="of:=[.D64]-[.D63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9" office:value-type="float" office:value="5607" calcext:value-type="float">
            <text:p>560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48958333333333" calcext:value-type="float">
            <text:p>0,00064895833333333300</text:p>
          </table:table-cell>
          <table:table-cell table:formula="of:=[.D65]-[.D6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9" office:value-type="float" office:value="5696" calcext:value-type="float">
            <text:p>569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59259259259259" calcext:value-type="float">
            <text:p>0,00065925925925925900</text:p>
          </table:table-cell>
          <table:table-cell table:formula="of:=[.D66]-[.D65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9" office:value-type="float" office:value="5785" calcext:value-type="float">
            <text:p>578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69560185185185" calcext:value-type="float">
            <text:p>0,00066956018518518500</text:p>
          </table:table-cell>
          <table:table-cell table:formula="of:=[.D67]-[.D6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9" office:value-type="float" office:value="5874" calcext:value-type="float">
            <text:p>587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79861111111111" calcext:value-type="float">
            <text:p>0,00067986111111111100</text:p>
          </table:table-cell>
          <table:table-cell table:formula="of:=[.D68]-[.D6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9" office:value-type="float" office:value="5963" calcext:value-type="float">
            <text:p>596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90162037037037" calcext:value-type="float">
            <text:p>0,00069016203703703700</text:p>
          </table:table-cell>
          <table:table-cell table:formula="of:=[.D69]-[.D68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9" office:value-type="float" office:value="6052" calcext:value-type="float">
            <text:p>605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00462962962963" calcext:value-type="float">
            <text:p>0,00070046296296296300</text:p>
          </table:table-cell>
          <table:table-cell table:formula="of:=[.D70]-[.D6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9" office:value-type="float" office:value="6141" calcext:value-type="float">
            <text:p>614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10763888888889" calcext:value-type="float">
            <text:p>0,00071076388888888900</text:p>
          </table:table-cell>
          <table:table-cell table:formula="of:=[.D71]-[.D70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9" office:value-type="float" office:value="6230" calcext:value-type="float">
            <text:p>62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21064814814815" calcext:value-type="float">
            <text:p>0,00072106481481481500</text:p>
          </table:table-cell>
          <table:table-cell table:formula="of:=[.D72]-[.D7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9" office:value-type="float" office:value="6319" calcext:value-type="float">
            <text:p>631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31365740740741" calcext:value-type="float">
            <text:p>0,00073136574074074100</text:p>
          </table:table-cell>
          <table:table-cell table:formula="of:=[.D73]-[.D72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9" office:value-type="float" office:value="6408" calcext:value-type="float">
            <text:p>640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41666666666667" calcext:value-type="float">
            <text:p>0,00074166666666666700</text:p>
          </table:table-cell>
          <table:table-cell table:formula="of:=[.D74]-[.D7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9" office:value-type="float" office:value="6497" calcext:value-type="float">
            <text:p>649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51967592592593" calcext:value-type="float">
            <text:p>0,00075196759259259300</text:p>
          </table:table-cell>
          <table:table-cell table:formula="of:=[.D75]-[.D7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9" office:value-type="float" office:value="6586" calcext:value-type="float">
            <text:p>658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62268518518519" calcext:value-type="float">
            <text:p>0,00076226851851851900</text:p>
          </table:table-cell>
          <table:table-cell table:formula="of:=[.D76]-[.D75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9" office:value-type="float" office:value="6675" calcext:value-type="float">
            <text:p>66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72569444444444" calcext:value-type="float">
            <text:p>0,00077256944444444400</text:p>
          </table:table-cell>
          <table:table-cell table:formula="of:=[.D77]-[.D7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9" office:value-type="float" office:value="6764" calcext:value-type="float">
            <text:p>676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8287037037037" calcext:value-type="float">
            <text:p>0,00078287037037037000</text:p>
          </table:table-cell>
          <table:table-cell table:formula="of:=[.D78]-[.D77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9" office:value-type="float" office:value="6853" calcext:value-type="float">
            <text:p>685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93171296296296" calcext:value-type="float">
            <text:p>0,00079317129629629600</text:p>
          </table:table-cell>
          <table:table-cell table:formula="of:=[.D79]-[.D7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9" office:value-type="float" office:value="6942" calcext:value-type="float">
            <text:p>694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03472222222222" calcext:value-type="float">
            <text:p>0,00080347222222222200</text:p>
          </table:table-cell>
          <table:table-cell table:formula="of:=[.D80]-[.D79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9" office:value-type="float" office:value="7031" calcext:value-type="float">
            <text:p>703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13773148148148" calcext:value-type="float">
            <text:p>0,00081377314814814800</text:p>
          </table:table-cell>
          <table:table-cell table:formula="of:=[.D81]-[.D8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9" office:value-type="float" office:value="7120" calcext:value-type="float">
            <text:p>71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24074074074074" calcext:value-type="float">
            <text:p>0,00082407407407407400</text:p>
          </table:table-cell>
          <table:table-cell table:formula="of:=[.D82]-[.D8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9" office:value-type="float" office:value="7209" calcext:value-type="float">
            <text:p>720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34375" calcext:value-type="float">
            <text:p>0,00083437500000000000</text:p>
          </table:table-cell>
          <table:table-cell table:formula="of:=[.D83]-[.D82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9" office:value-type="float" office:value="7298" calcext:value-type="float">
            <text:p>729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44675925925926" calcext:value-type="float">
            <text:p>0,00084467592592592600</text:p>
          </table:table-cell>
          <table:table-cell table:formula="of:=[.D84]-[.D8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9" office:value-type="float" office:value="7387" calcext:value-type="float">
            <text:p>738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54976851851852" calcext:value-type="float">
            <text:p>0,00085497685185185200</text:p>
          </table:table-cell>
          <table:table-cell table:formula="of:=[.D85]-[.D84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9" office:value-type="float" office:value="7476" calcext:value-type="float">
            <text:p>747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65277777777778" calcext:value-type="float">
            <text:p>0,00086527777777777800</text:p>
          </table:table-cell>
          <table:table-cell table:formula="of:=[.D86]-[.D8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9" office:value-type="float" office:value="7565" calcext:value-type="float">
            <text:p>756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75578703703704" calcext:value-type="float">
            <text:p>0,00087557870370370400</text:p>
          </table:table-cell>
          <table:table-cell table:formula="of:=[.D87]-[.D86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9" office:value-type="float" office:value="7654" calcext:value-type="float">
            <text:p>765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8587962962963" calcext:value-type="float">
            <text:p>0,00088587962962963000</text:p>
          </table:table-cell>
          <table:table-cell table:formula="of:=[.D88]-[.D8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9" office:value-type="float" office:value="7743" calcext:value-type="float">
            <text:p>774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96180555555556" calcext:value-type="float">
            <text:p>0,00089618055555555600</text:p>
          </table:table-cell>
          <table:table-cell table:formula="of:=[.D89]-[.D8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9" office:value-type="float" office:value="7832" calcext:value-type="float">
            <text:p>783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06481481481482" calcext:value-type="float">
            <text:p>0,00090648148148148200</text:p>
          </table:table-cell>
          <table:table-cell table:formula="of:=[.D90]-[.D89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9" office:value-type="float" office:value="7921" calcext:value-type="float">
            <text:p>792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16782407407407" calcext:value-type="float">
            <text:p>0,00091678240740740700</text:p>
          </table:table-cell>
          <table:table-cell table:formula="of:=[.D91]-[.D9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9" office:value-type="float" office:value="8010" calcext:value-type="float">
            <text:p>80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27083333333333" calcext:value-type="float">
            <text:p>0,00092708333333333400</text:p>
          </table:table-cell>
          <table:table-cell table:formula="of:=[.D92]-[.D91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9" office:value-type="float" office:value="8099" calcext:value-type="float">
            <text:p>809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37384259259259" calcext:value-type="float">
            <text:p>0,00093738425925925900</text:p>
          </table:table-cell>
          <table:table-cell table:formula="of:=[.D93]-[.D9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9" office:value-type="float" office:value="8188" calcext:value-type="float">
            <text:p>818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47685185185185" calcext:value-type="float">
            <text:p>0,00094768518518518500</text:p>
          </table:table-cell>
          <table:table-cell table:formula="of:=[.D94]-[.D93]" office:value-type="float" office:value="0.0000103009259259259" calcext:value-type="float">
            <text:p>0,0000103009259259259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9" office:value-type="float" office:value="8277" calcext:value-type="float">
            <text:p>827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57986111111111" calcext:value-type="float">
            <text:p>0,00095798611111111100</text:p>
          </table:table-cell>
          <table:table-cell table:formula="of:=[.D95]-[.D9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9" office:value-type="float" office:value="8366" calcext:value-type="float">
            <text:p>836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68287037037037" calcext:value-type="float">
            <text:p>0,00096828703703703700</text:p>
          </table:table-cell>
          <table:table-cell table:formula="of:=[.D96]-[.D9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9" office:value-type="float" office:value="8455" calcext:value-type="float">
            <text:p>845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78587962962963" calcext:value-type="float">
            <text:p>0,00097858796296296300</text:p>
          </table:table-cell>
          <table:table-cell table:formula="of:=[.D97]-[.D9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9" office:value-type="float" office:value="8544" calcext:value-type="float">
            <text:p>854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88888888888889" calcext:value-type="float">
            <text:p>0,00098888888888888900</text:p>
          </table:table-cell>
          <table:table-cell table:formula="of:=[.D98]-[.D9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9" office:value-type="float" office:value="8633" calcext:value-type="float">
            <text:p>863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99189814814815" calcext:value-type="float">
            <text:p>0,00099918981481481500</text:p>
          </table:table-cell>
          <table:table-cell table:formula="of:=[.D99]-[.D9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9" office:value-type="float" office:value="8722" calcext:value-type="float">
            <text:p>872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00949074074074" calcext:value-type="float">
            <text:p>0,00100949074074074000</text:p>
          </table:table-cell>
          <table:table-cell table:formula="of:=[.D100]-[.D9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9" office:value-type="float" office:value="8811" calcext:value-type="float">
            <text:p>881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01979166666667" calcext:value-type="float">
            <text:p>0,00101979166666667000</text:p>
          </table:table-cell>
          <table:table-cell table:formula="of:=[.D101]-[.D10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9" office:value-type="float" office:value="8900" calcext:value-type="float">
            <text:p>8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3009259259259" calcext:value-type="float">
            <text:p>0,00103009259259259000</text:p>
          </table:table-cell>
          <table:table-cell table:formula="of:=[.D102]-[.D10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9" office:value-type="float" office:value="8989" calcext:value-type="float">
            <text:p>898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4039351851852" calcext:value-type="float">
            <text:p>0,00104039351851852000</text:p>
          </table:table-cell>
          <table:table-cell table:formula="of:=[.D103]-[.D10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9" office:value-type="float" office:value="9078" calcext:value-type="float">
            <text:p>907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5069444444444" calcext:value-type="float">
            <text:p>0,00105069444444444000</text:p>
          </table:table-cell>
          <table:table-cell table:formula="of:=[.D104]-[.D10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9" office:value-type="float" office:value="9167" calcext:value-type="float">
            <text:p>916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6099537037037" calcext:value-type="float">
            <text:p>0,00106099537037037000</text:p>
          </table:table-cell>
          <table:table-cell table:formula="of:=[.D105]-[.D10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9" office:value-type="float" office:value="9256" calcext:value-type="float">
            <text:p>925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0712962962963" calcext:value-type="float">
            <text:p>0,00107129629629630000</text:p>
          </table:table-cell>
          <table:table-cell table:formula="of:=[.D106]-[.D10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9" office:value-type="float" office:value="9345" calcext:value-type="float">
            <text:p>934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08159722222222" calcext:value-type="float">
            <text:p>0,00108159722222222000</text:p>
          </table:table-cell>
          <table:table-cell table:formula="of:=[.D107]-[.D106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9" office:value-type="float" office:value="9434" calcext:value-type="float">
            <text:p>943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09189814814815" calcext:value-type="float">
            <text:p>0,00109189814814815000</text:p>
          </table:table-cell>
          <table:table-cell table:formula="of:=[.D108]-[.D10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9" office:value-type="float" office:value="9523" calcext:value-type="float">
            <text:p>952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10219907407407" calcext:value-type="float">
            <text:p>0,00110219907407407000</text:p>
          </table:table-cell>
          <table:table-cell table:formula="of:=[.D109]-[.D10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9" office:value-type="float" office:value="9612" calcext:value-type="float">
            <text:p>961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1125" calcext:value-type="float">
            <text:p>0,00111250000000000000</text:p>
          </table:table-cell>
          <table:table-cell table:formula="of:=[.D110]-[.D10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9" office:value-type="float" office:value="9701" calcext:value-type="float">
            <text:p>970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12280092592593" calcext:value-type="float">
            <text:p>0,00112280092592593000</text:p>
          </table:table-cell>
          <table:table-cell table:formula="of:=[.D111]-[.D11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9" office:value-type="float" office:value="9790" calcext:value-type="float">
            <text:p>97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13310185185185" calcext:value-type="float">
            <text:p>0,00113310185185185000</text:p>
          </table:table-cell>
          <table:table-cell table:formula="of:=[.D112]-[.D111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9" office:value-type="float" office:value="9879" calcext:value-type="float">
            <text:p>987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14340277777778" calcext:value-type="float">
            <text:p>0,00114340277777778000</text:p>
          </table:table-cell>
          <table:table-cell table:formula="of:=[.D113]-[.D11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9" office:value-type="float" office:value="9968" calcext:value-type="float">
            <text:p>996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1537037037037" calcext:value-type="float">
            <text:p>0,00115370370370370000</text:p>
          </table:table-cell>
          <table:table-cell table:formula="of:=[.D114]-[.D11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9" office:value-type="float" office:value="10057" calcext:value-type="float">
            <text:p>1005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16400462962963" calcext:value-type="float">
            <text:p>0,00116400462962963000</text:p>
          </table:table-cell>
          <table:table-cell table:formula="of:=[.D115]-[.D11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9" office:value-type="float" office:value="10146" calcext:value-type="float">
            <text:p>1014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17430555555556" calcext:value-type="float">
            <text:p>0,00117430555555556000</text:p>
          </table:table-cell>
          <table:table-cell table:formula="of:=[.D116]-[.D11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9" office:value-type="float" office:value="10235" calcext:value-type="float">
            <text:p>1023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18460648148148" calcext:value-type="float">
            <text:p>0,00118460648148148000</text:p>
          </table:table-cell>
          <table:table-cell table:formula="of:=[.D117]-[.D116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9" office:value-type="float" office:value="10324" calcext:value-type="float">
            <text:p>1032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19490740740741" calcext:value-type="float">
            <text:p>0,00119490740740741000</text:p>
          </table:table-cell>
          <table:table-cell table:formula="of:=[.D118]-[.D11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9" office:value-type="float" office:value="10413" calcext:value-type="float">
            <text:p>1041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20520833333333" calcext:value-type="float">
            <text:p>0,00120520833333333000</text:p>
          </table:table-cell>
          <table:table-cell table:formula="of:=[.D119]-[.D11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9" office:value-type="float" office:value="10502" calcext:value-type="float">
            <text:p>1050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21550925925926" calcext:value-type="float">
            <text:p>0,00121550925925926000</text:p>
          </table:table-cell>
          <table:table-cell table:formula="of:=[.D120]-[.D11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9" office:value-type="float" office:value="10591" calcext:value-type="float">
            <text:p>1059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22581018518519" calcext:value-type="float">
            <text:p>0,00122581018518519000</text:p>
          </table:table-cell>
          <table:table-cell table:formula="of:=[.D121]-[.D120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9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23611111111111" calcext:value-type="float">
            <text:p>0,00123611111111111000</text:p>
          </table:table-cell>
          <table:table-cell table:formula="of:=[.D122]-[.D12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9" office:value-type="float" office:value="10769" calcext:value-type="float">
            <text:p>1076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24641203703704" calcext:value-type="float">
            <text:p>0,00124641203703704000</text:p>
          </table:table-cell>
          <table:table-cell table:formula="of:=[.D123]-[.D12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9" office:value-type="float" office:value="10858" calcext:value-type="float">
            <text:p>1085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25671296296296" calcext:value-type="float">
            <text:p>0,00125671296296296000</text:p>
          </table:table-cell>
          <table:table-cell table:formula="of:=[.D124]-[.D12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9" office:value-type="float" office:value="10947" calcext:value-type="float">
            <text:p>1094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26701388888889" calcext:value-type="float">
            <text:p>0,00126701388888889000</text:p>
          </table:table-cell>
          <table:table-cell table:formula="of:=[.D125]-[.D12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9" office:value-type="float" office:value="11036" calcext:value-type="float">
            <text:p>1103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27731481481482" calcext:value-type="float">
            <text:p>0,00127731481481482000</text:p>
          </table:table-cell>
          <table:table-cell table:formula="of:=[.D126]-[.D125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9" office:value-type="float" office:value="11125" calcext:value-type="float">
            <text:p>11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28761574074074" calcext:value-type="float">
            <text:p>0,00128761574074074000</text:p>
          </table:table-cell>
          <table:table-cell table:formula="of:=[.D127]-[.D12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9" office:value-type="float" office:value="11214" calcext:value-type="float">
            <text:p>1121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29791666666667" calcext:value-type="float">
            <text:p>0,00129791666666667000</text:p>
          </table:table-cell>
          <table:table-cell table:formula="of:=[.D128]-[.D12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9" office:value-type="float" office:value="11303" calcext:value-type="float">
            <text:p>1130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30821759259259" calcext:value-type="float">
            <text:p>0,00130821759259259000</text:p>
          </table:table-cell>
          <table:table-cell table:formula="of:=[.D129]-[.D12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9" office:value-type="float" office:value="11392" calcext:value-type="float">
            <text:p>1139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31851851851852" calcext:value-type="float">
            <text:p>0,00131851851851852000</text:p>
          </table:table-cell>
          <table:table-cell table:formula="of:=[.D130]-[.D12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9" office:value-type="float" office:value="11481" calcext:value-type="float">
            <text:p>1148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32881944444444" calcext:value-type="float">
            <text:p>0,00132881944444444000</text:p>
          </table:table-cell>
          <table:table-cell table:formula="of:=[.D131]-[.D130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9" office:value-type="float" office:value="11570" calcext:value-type="float">
            <text:p>115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33912037037037" calcext:value-type="float">
            <text:p>0,00133912037037037000</text:p>
          </table:table-cell>
          <table:table-cell table:formula="of:=[.D132]-[.D13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9" office:value-type="float" office:value="11659" calcext:value-type="float">
            <text:p>1165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3494212962963" calcext:value-type="float">
            <text:p>0,00134942129629630000</text:p>
          </table:table-cell>
          <table:table-cell table:formula="of:=[.D133]-[.D13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9" office:value-type="float" office:value="11748" calcext:value-type="float">
            <text:p>1174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35972222222222" calcext:value-type="float">
            <text:p>0,00135972222222222000</text:p>
          </table:table-cell>
          <table:table-cell table:formula="of:=[.D134]-[.D13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9" office:value-type="float" office:value="11837" calcext:value-type="float">
            <text:p>1183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37002314814815" calcext:value-type="float">
            <text:p>0,00137002314814815000</text:p>
          </table:table-cell>
          <table:table-cell table:formula="of:=[.D135]-[.D13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9" office:value-type="float" office:value="11926" calcext:value-type="float">
            <text:p>1192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38032407407407" calcext:value-type="float">
            <text:p>0,00138032407407407000</text:p>
          </table:table-cell>
          <table:table-cell table:formula="of:=[.D136]-[.D135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9" office:value-type="float" office:value="12015" calcext:value-type="float">
            <text:p>1201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390625" calcext:value-type="float">
            <text:p>0,00139062500000000000</text:p>
          </table:table-cell>
          <table:table-cell table:formula="of:=[.D137]-[.D13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9" office:value-type="float" office:value="12104" calcext:value-type="float">
            <text:p>1210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40092592592593" calcext:value-type="float">
            <text:p>0,00140092592592593000</text:p>
          </table:table-cell>
          <table:table-cell table:formula="of:=[.D138]-[.D13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9" office:value-type="float" office:value="12193" calcext:value-type="float">
            <text:p>1219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41122685185185" calcext:value-type="float">
            <text:p>0,00141122685185185000</text:p>
          </table:table-cell>
          <table:table-cell table:formula="of:=[.D139]-[.D13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9" office:value-type="float" office:value="12282" calcext:value-type="float">
            <text:p>1228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42152777777778" calcext:value-type="float">
            <text:p>0,00142152777777778000</text:p>
          </table:table-cell>
          <table:table-cell table:formula="of:=[.D140]-[.D13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9" office:value-type="float" office:value="12371" calcext:value-type="float">
            <text:p>1237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4318287037037" calcext:value-type="float">
            <text:p>0,00143182870370370000</text:p>
          </table:table-cell>
          <table:table-cell table:formula="of:=[.D141]-[.D14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9" office:value-type="float" office:value="12460" calcext:value-type="float">
            <text:p>124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44212962962963" calcext:value-type="float">
            <text:p>0,00144212962962963000</text:p>
          </table:table-cell>
          <table:table-cell table:formula="of:=[.D142]-[.D14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9" office:value-type="float" office:value="12549" calcext:value-type="float">
            <text:p>1254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45243055555556" calcext:value-type="float">
            <text:p>0,00145243055555556000</text:p>
          </table:table-cell>
          <table:table-cell table:formula="of:=[.D143]-[.D14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9" office:value-type="float" office:value="12638" calcext:value-type="float">
            <text:p>1263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46273148148148" calcext:value-type="float">
            <text:p>0,00146273148148148000</text:p>
          </table:table-cell>
          <table:table-cell table:formula="of:=[.D144]-[.D14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9" office:value-type="float" office:value="12727" calcext:value-type="float">
            <text:p>1272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47303240740741" calcext:value-type="float">
            <text:p>0,00147303240740741000</text:p>
          </table:table-cell>
          <table:table-cell table:formula="of:=[.D145]-[.D14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9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48333333333333" calcext:value-type="float">
            <text:p>0,00148333333333333000</text:p>
          </table:table-cell>
          <table:table-cell table:formula="of:=[.D146]-[.D14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9" office:value-type="float" office:value="12905" calcext:value-type="float">
            <text:p>1290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49363425925926" calcext:value-type="float">
            <text:p>0,00149363425925926000</text:p>
          </table:table-cell>
          <table:table-cell table:formula="of:=[.D147]-[.D14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9" office:value-type="float" office:value="12994" calcext:value-type="float">
            <text:p>1299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50393518518519" calcext:value-type="float">
            <text:p>0,00150393518518519000</text:p>
          </table:table-cell>
          <table:table-cell table:formula="of:=[.D148]-[.D14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9" office:value-type="float" office:value="13083" calcext:value-type="float">
            <text:p>1308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51423611111111" calcext:value-type="float">
            <text:p>0,00151423611111111000</text:p>
          </table:table-cell>
          <table:table-cell table:formula="of:=[.D149]-[.D14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9" office:value-type="float" office:value="13172" calcext:value-type="float">
            <text:p>1317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52453703703704" calcext:value-type="float">
            <text:p>0,00152453703703704000</text:p>
          </table:table-cell>
          <table:table-cell table:formula="of:=[.D150]-[.D14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9" office:value-type="float" office:value="13261" calcext:value-type="float">
            <text:p>1326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53483796296296" calcext:value-type="float">
            <text:p>0,00153483796296296000</text:p>
          </table:table-cell>
          <table:table-cell table:formula="of:=[.D151]-[.D15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9" office:value-type="float" office:value="13350" calcext:value-type="float">
            <text:p>133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54513888888889" calcext:value-type="float">
            <text:p>0,00154513888888889000</text:p>
          </table:table-cell>
          <table:table-cell table:formula="of:=[.D152]-[.D15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9" office:value-type="float" office:value="13439" calcext:value-type="float">
            <text:p>1343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55543981481481" calcext:value-type="float">
            <text:p>0,00155543981481481000</text:p>
          </table:table-cell>
          <table:table-cell table:formula="of:=[.D153]-[.D15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9" office:value-type="float" office:value="13528" calcext:value-type="float">
            <text:p>1352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56574074074074" calcext:value-type="float">
            <text:p>0,00156574074074074000</text:p>
          </table:table-cell>
          <table:table-cell table:formula="of:=[.D154]-[.D153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9" office:value-type="float" office:value="13617" calcext:value-type="float">
            <text:p>1361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57604166666667" calcext:value-type="float">
            <text:p>0,00157604166666667000</text:p>
          </table:table-cell>
          <table:table-cell table:formula="of:=[.D155]-[.D15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9" office:value-type="float" office:value="13706" calcext:value-type="float">
            <text:p>1370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58634259259259" calcext:value-type="float">
            <text:p>0,00158634259259259000</text:p>
          </table:table-cell>
          <table:table-cell table:formula="of:=[.D156]-[.D15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9" office:value-type="float" office:value="13795" calcext:value-type="float">
            <text:p>1379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59664351851852" calcext:value-type="float">
            <text:p>0,00159664351851852000</text:p>
          </table:table-cell>
          <table:table-cell table:formula="of:=[.D157]-[.D15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9" office:value-type="float" office:value="13884" calcext:value-type="float">
            <text:p>1388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60694444444444" calcext:value-type="float">
            <text:p>0,00160694444444444000</text:p>
          </table:table-cell>
          <table:table-cell table:formula="of:=[.D158]-[.D15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9" office:value-type="float" office:value="13973" calcext:value-type="float">
            <text:p>1397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61724537037037" calcext:value-type="float">
            <text:p>0,00161724537037037000</text:p>
          </table:table-cell>
          <table:table-cell table:formula="of:=[.D159]-[.D158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9" office:value-type="float" office:value="14062" calcext:value-type="float">
            <text:p>1406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6275462962963" calcext:value-type="float">
            <text:p>0,00162754629629630000</text:p>
          </table:table-cell>
          <table:table-cell table:formula="of:=[.D160]-[.D15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9" office:value-type="float" office:value="14151" calcext:value-type="float">
            <text:p>1415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63784722222222" calcext:value-type="float">
            <text:p>0,00163784722222222000</text:p>
          </table:table-cell>
          <table:table-cell table:formula="of:=[.D161]-[.D16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9" office:value-type="float" office:value="14240" calcext:value-type="float">
            <text:p>142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64814814814815" calcext:value-type="float">
            <text:p>0,00164814814814815000</text:p>
          </table:table-cell>
          <table:table-cell table:formula="of:=[.D162]-[.D16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9" office:value-type="float" office:value="14329" calcext:value-type="float">
            <text:p>1432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65844907407407" calcext:value-type="float">
            <text:p>0,00165844907407407000</text:p>
          </table:table-cell>
          <table:table-cell table:formula="of:=[.D163]-[.D162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9" office:value-type="float" office:value="14418" calcext:value-type="float">
            <text:p>1441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66875" calcext:value-type="float">
            <text:p>0,00166875000000000000</text:p>
          </table:table-cell>
          <table:table-cell table:formula="of:=[.D164]-[.D163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9" office:value-type="float" office:value="14507" calcext:value-type="float">
            <text:p>1450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67905092592593" calcext:value-type="float">
            <text:p>0,00167905092592593000</text:p>
          </table:table-cell>
          <table:table-cell table:formula="of:=[.D165]-[.D16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9" office:value-type="float" office:value="14596" calcext:value-type="float">
            <text:p>1459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68935185185185" calcext:value-type="float">
            <text:p>0,00168935185185185000</text:p>
          </table:table-cell>
          <table:table-cell table:formula="of:=[.D166]-[.D16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9" office:value-type="float" office:value="14685" calcext:value-type="float">
            <text:p>1468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69965277777778" calcext:value-type="float">
            <text:p>0,00169965277777778000</text:p>
          </table:table-cell>
          <table:table-cell table:formula="of:=[.D167]-[.D16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9" office:value-type="float" office:value="14774" calcext:value-type="float">
            <text:p>1477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7099537037037" calcext:value-type="float">
            <text:p>0,00170995370370370000</text:p>
          </table:table-cell>
          <table:table-cell table:formula="of:=[.D168]-[.D16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9" office:value-type="float" office:value="14863" calcext:value-type="float">
            <text:p>1486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72025462962963" calcext:value-type="float">
            <text:p>0,00172025462962963000</text:p>
          </table:table-cell>
          <table:table-cell table:formula="of:=[.D169]-[.D168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9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73055555555556" calcext:value-type="float">
            <text:p>0,00173055555555556000</text:p>
          </table:table-cell>
          <table:table-cell table:formula="of:=[.D170]-[.D16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9" office:value-type="float" office:value="15041" calcext:value-type="float">
            <text:p>1504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74085648148148" calcext:value-type="float">
            <text:p>0,00174085648148148000</text:p>
          </table:table-cell>
          <table:table-cell table:formula="of:=[.D171]-[.D17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9" office:value-type="float" office:value="15130" calcext:value-type="float">
            <text:p>151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75115740740741" calcext:value-type="float">
            <text:p>0,00175115740740741000</text:p>
          </table:table-cell>
          <table:table-cell table:formula="of:=[.D172]-[.D17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9" office:value-type="float" office:value="15219" calcext:value-type="float">
            <text:p>1521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76145833333333" calcext:value-type="float">
            <text:p>0,00176145833333333000</text:p>
          </table:table-cell>
          <table:table-cell table:formula="of:=[.D173]-[.D17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9" office:value-type="float" office:value="15308" calcext:value-type="float">
            <text:p>1530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77175925925926" calcext:value-type="float">
            <text:p>0,00177175925925926000</text:p>
          </table:table-cell>
          <table:table-cell table:formula="of:=[.D174]-[.D17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9" office:value-type="float" office:value="15397" calcext:value-type="float">
            <text:p>1539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78206018518519" calcext:value-type="float">
            <text:p>0,00178206018518519000</text:p>
          </table:table-cell>
          <table:table-cell table:formula="of:=[.D175]-[.D17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9" office:value-type="float" office:value="15486" calcext:value-type="float">
            <text:p>1548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79236111111111" calcext:value-type="float">
            <text:p>0,00179236111111111000</text:p>
          </table:table-cell>
          <table:table-cell table:formula="of:=[.D176]-[.D17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9" office:value-type="float" office:value="15575" calcext:value-type="float">
            <text:p>155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80266203703704" calcext:value-type="float">
            <text:p>0,00180266203703704000</text:p>
          </table:table-cell>
          <table:table-cell table:formula="of:=[.D177]-[.D176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9" office:value-type="float" office:value="15664" calcext:value-type="float">
            <text:p>1566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81296296296296" calcext:value-type="float">
            <text:p>0,00181296296296296000</text:p>
          </table:table-cell>
          <table:table-cell table:formula="of:=[.D178]-[.D17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9" office:value-type="float" office:value="15753" calcext:value-type="float">
            <text:p>1575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82326388888889" calcext:value-type="float">
            <text:p>0,00182326388888889000</text:p>
          </table:table-cell>
          <table:table-cell table:formula="of:=[.D179]-[.D17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9" office:value-type="float" office:value="15842" calcext:value-type="float">
            <text:p>1584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83356481481481" calcext:value-type="float">
            <text:p>0,00183356481481481000</text:p>
          </table:table-cell>
          <table:table-cell table:formula="of:=[.D180]-[.D17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9" office:value-type="float" office:value="15931" calcext:value-type="float">
            <text:p>1593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84386574074074" calcext:value-type="float">
            <text:p>0,00184386574074074000</text:p>
          </table:table-cell>
          <table:table-cell table:formula="of:=[.D181]-[.D18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9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85416666666667" calcext:value-type="float">
            <text:p>0,00185416666666667000</text:p>
          </table:table-cell>
          <table:table-cell table:formula="of:=[.D182]-[.D181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9" office:value-type="float" office:value="16109" calcext:value-type="float">
            <text:p>1610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86446759259259" calcext:value-type="float">
            <text:p>0,00186446759259259000</text:p>
          </table:table-cell>
          <table:table-cell table:formula="of:=[.D183]-[.D18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9" office:value-type="float" office:value="16198" calcext:value-type="float">
            <text:p>1619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87476851851852" calcext:value-type="float">
            <text:p>0,00187476851851852000</text:p>
          </table:table-cell>
          <table:table-cell table:formula="of:=[.D184]-[.D183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9" office:value-type="float" office:value="16287" calcext:value-type="float">
            <text:p>1628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88506944444444" calcext:value-type="float">
            <text:p>0,00188506944444444000</text:p>
          </table:table-cell>
          <table:table-cell table:formula="of:=[.D185]-[.D184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9" office:value-type="float" office:value="16376" calcext:value-type="float">
            <text:p>1637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89537037037037" calcext:value-type="float">
            <text:p>0,00189537037037037000</text:p>
          </table:table-cell>
          <table:table-cell table:formula="of:=[.D186]-[.D185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9" office:value-type="float" office:value="16465" calcext:value-type="float">
            <text:p>1646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9056712962963" calcext:value-type="float">
            <text:p>0,00190567129629630000</text:p>
          </table:table-cell>
          <table:table-cell table:formula="of:=[.D187]-[.D186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9" office:value-type="float" office:value="16554" calcext:value-type="float">
            <text:p>1655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91597222222222" calcext:value-type="float">
            <text:p>0,00191597222222222000</text:p>
          </table:table-cell>
          <table:table-cell table:formula="of:=[.D188]-[.D187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9" office:value-type="float" office:value="16643" calcext:value-type="float">
            <text:p>1664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92627314814815" calcext:value-type="float">
            <text:p>0,00192627314814815000</text:p>
          </table:table-cell>
          <table:table-cell table:formula="of:=[.D189]-[.D188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9" office:value-type="float" office:value="16732" calcext:value-type="float">
            <text:p>1673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93657407407407" calcext:value-type="float">
            <text:p>0,00193657407407407000</text:p>
          </table:table-cell>
          <table:table-cell table:formula="of:=[.D190]-[.D189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9" office:value-type="float" office:value="16821" calcext:value-type="float">
            <text:p>1682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946875" calcext:value-type="float">
            <text:p>0,00194687500000000000</text:p>
          </table:table-cell>
          <table:table-cell table:formula="of:=[.D191]-[.D190]" office:value-type="float" office:value="0.000010300925925926" calcext:value-type="float">
            <text:p>0,0000103009259259260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9" office:value-type="float" office:value="16910" calcext:value-type="float">
            <text:p>169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95717592592593" calcext:value-type="float">
            <text:p>0,00195717592592593000</text:p>
          </table:table-cell>
          <table:table-cell table:formula="of:=[.D192]-[.D191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9" office:value-type="float" office:value="16999" calcext:value-type="float">
            <text:p>1699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96747685185185" calcext:value-type="float">
            <text:p>0,00196747685185185000</text:p>
          </table:table-cell>
          <table:table-cell table:formula="of:=[.D193]-[.D192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9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97777777777778" calcext:value-type="float">
            <text:p>0,00197777777777778000</text:p>
          </table:table-cell>
          <table:table-cell table:formula="of:=[.D194]-[.D193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9" office:value-type="float" office:value="17177" calcext:value-type="float">
            <text:p>1717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9880787037037" calcext:value-type="float">
            <text:p>0,00198807870370370000</text:p>
          </table:table-cell>
          <table:table-cell table:formula="of:=[.D195]-[.D19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9" office:value-type="float" office:value="17266" calcext:value-type="float">
            <text:p>1726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99837962962963" calcext:value-type="float">
            <text:p>0,00199837962962963000</text:p>
          </table:table-cell>
          <table:table-cell table:formula="of:=[.D196]-[.D195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9" office:value-type="float" office:value="17355" calcext:value-type="float">
            <text:p>1735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00868055555556" calcext:value-type="float">
            <text:p>0,00200868055555556000</text:p>
          </table:table-cell>
          <table:table-cell table:formula="of:=[.D197]-[.D196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9" office:value-type="float" office:value="17444" calcext:value-type="float">
            <text:p>1744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01898148148148" calcext:value-type="float">
            <text:p>0,00201898148148148000</text:p>
          </table:table-cell>
          <table:table-cell table:formula="of:=[.D198]-[.D197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9" office:value-type="float" office:value="17533" calcext:value-type="float">
            <text:p>1753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02928240740741" calcext:value-type="float">
            <text:p>0,00202928240740741000</text:p>
          </table:table-cell>
          <table:table-cell table:formula="of:=[.D199]-[.D198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9" office:value-type="float" office:value="17622" calcext:value-type="float">
            <text:p>1762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03958333333333" calcext:value-type="float">
            <text:p>0,00203958333333333000</text:p>
          </table:table-cell>
          <table:table-cell table:formula="of:=[.D200]-[.D19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9" office:value-type="float" office:value="17711" calcext:value-type="float">
            <text:p>1771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04988425925926" calcext:value-type="float">
            <text:p>0,00204988425925926000</text:p>
          </table:table-cell>
          <table:table-cell table:formula="of:=[.D201]-[.D200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9" office:value-type="float" office:value="17800" calcext:value-type="float">
            <text:p>17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06018518518519" calcext:value-type="float">
            <text:p>0,00206018518518519000</text:p>
          </table:table-cell>
          <table:table-cell table:formula="of:=[.D202]-[.D201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9" office:value-type="float" office:value="17889" calcext:value-type="float">
            <text:p>1788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07048611111111" calcext:value-type="float">
            <text:p>0,00207048611111111000</text:p>
          </table:table-cell>
          <table:table-cell table:formula="of:=[.D203]-[.D202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9" office:value-type="float" office:value="17978" calcext:value-type="float">
            <text:p>1797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08078703703704" calcext:value-type="float">
            <text:p>0,00208078703703704000</text:p>
          </table:table-cell>
          <table:table-cell table:formula="of:=[.D204]-[.D203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9" office:value-type="float" office:value="18067" calcext:value-type="float">
            <text:p>1806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09108796296296" calcext:value-type="float">
            <text:p>0,00209108796296296000</text:p>
          </table:table-cell>
          <table:table-cell table:formula="of:=[.D205]-[.D20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9" office:value-type="float" office:value="18156" calcext:value-type="float">
            <text:p>1815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10138888888889" calcext:value-type="float">
            <text:p>0,00210138888888889000</text:p>
          </table:table-cell>
          <table:table-cell table:formula="of:=[.D206]-[.D205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9" office:value-type="float" office:value="18245" calcext:value-type="float">
            <text:p>1824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11168981481482" calcext:value-type="float">
            <text:p>0,00211168981481482000</text:p>
          </table:table-cell>
          <table:table-cell table:formula="of:=[.D207]-[.D206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9" office:value-type="float" office:value="18334" calcext:value-type="float">
            <text:p>1833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12199074074074" calcext:value-type="float">
            <text:p>0,00212199074074074000</text:p>
          </table:table-cell>
          <table:table-cell table:formula="of:=[.D208]-[.D20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9" office:value-type="float" office:value="18423" calcext:value-type="float">
            <text:p>1842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13229166666667" calcext:value-type="float">
            <text:p>0,00213229166666667000</text:p>
          </table:table-cell>
          <table:table-cell table:formula="of:=[.D209]-[.D208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9" office:value-type="float" office:value="18512" calcext:value-type="float">
            <text:p>1851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14259259259259" calcext:value-type="float">
            <text:p>0,00214259259259259000</text:p>
          </table:table-cell>
          <table:table-cell table:formula="of:=[.D210]-[.D20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9" office:value-type="float" office:value="18601" calcext:value-type="float">
            <text:p>1860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15289351851852" calcext:value-type="float">
            <text:p>0,00215289351851852000</text:p>
          </table:table-cell>
          <table:table-cell table:formula="of:=[.D211]-[.D210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9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16319444444444" calcext:value-type="float">
            <text:p>0,00216319444444444000</text:p>
          </table:table-cell>
          <table:table-cell table:formula="of:=[.D212]-[.D211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9" office:value-type="float" office:value="18779" calcext:value-type="float">
            <text:p>1877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17349537037037" calcext:value-type="float">
            <text:p>0,00217349537037037000</text:p>
          </table:table-cell>
          <table:table-cell table:formula="of:=[.D213]-[.D21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9" office:value-type="float" office:value="18868" calcext:value-type="float">
            <text:p>1886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1837962962963" calcext:value-type="float">
            <text:p>0,00218379629629630000</text:p>
          </table:table-cell>
          <table:table-cell table:formula="of:=[.D214]-[.D213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9" office:value-type="float" office:value="18957" calcext:value-type="float">
            <text:p>1895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19409722222222" calcext:value-type="float">
            <text:p>0,00219409722222222000</text:p>
          </table:table-cell>
          <table:table-cell table:formula="of:=[.D215]-[.D21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9" office:value-type="float" office:value="19046" calcext:value-type="float">
            <text:p>1904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20439814814815" calcext:value-type="float">
            <text:p>0,00220439814814815000</text:p>
          </table:table-cell>
          <table:table-cell table:formula="of:=[.D216]-[.D215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9" office:value-type="float" office:value="19135" calcext:value-type="float">
            <text:p>1913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21469907407407" calcext:value-type="float">
            <text:p>0,00221469907407407000</text:p>
          </table:table-cell>
          <table:table-cell table:formula="of:=[.D217]-[.D216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9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225" calcext:value-type="float">
            <text:p>0,00222500000000000000</text:p>
          </table:table-cell>
          <table:table-cell table:formula="of:=[.D218]-[.D21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9" office:value-type="float" office:value="19313" calcext:value-type="float">
            <text:p>1931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23530092592593" calcext:value-type="float">
            <text:p>0,00223530092592593000</text:p>
          </table:table-cell>
          <table:table-cell table:formula="of:=[.D219]-[.D218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9" office:value-type="float" office:value="19402" calcext:value-type="float">
            <text:p>1940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24560185185185" calcext:value-type="float">
            <text:p>0,00224560185185185000</text:p>
          </table:table-cell>
          <table:table-cell table:formula="of:=[.D220]-[.D21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9" office:value-type="float" office:value="19491" calcext:value-type="float">
            <text:p>1949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25590277777778" calcext:value-type="float">
            <text:p>0,00225590277777778000</text:p>
          </table:table-cell>
          <table:table-cell table:formula="of:=[.D221]-[.D220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9" office:value-type="float" office:value="19580" calcext:value-type="float">
            <text:p>195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2662037037037" calcext:value-type="float">
            <text:p>0,00226620370370370000</text:p>
          </table:table-cell>
          <table:table-cell table:formula="of:=[.D222]-[.D221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9" office:value-type="float" office:value="19669" calcext:value-type="float">
            <text:p>1966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27650462962963" calcext:value-type="float">
            <text:p>0,00227650462962963000</text:p>
          </table:table-cell>
          <table:table-cell table:formula="of:=[.D223]-[.D22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9" office:value-type="float" office:value="19758" calcext:value-type="float">
            <text:p>1975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28680555555556" calcext:value-type="float">
            <text:p>0,00228680555555556000</text:p>
          </table:table-cell>
          <table:table-cell table:formula="of:=[.D224]-[.D223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9" office:value-type="float" office:value="19847" calcext:value-type="float">
            <text:p>1984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29710648148148" calcext:value-type="float">
            <text:p>0,00229710648148148000</text:p>
          </table:table-cell>
          <table:table-cell table:formula="of:=[.D225]-[.D22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9" office:value-type="float" office:value="19936" calcext:value-type="float">
            <text:p>1993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30740740740741" calcext:value-type="float">
            <text:p>0,00230740740740741000</text:p>
          </table:table-cell>
          <table:table-cell table:formula="of:=[.D226]-[.D225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9" office:value-type="float" office:value="20025" calcext:value-type="float">
            <text:p>200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31770833333333" calcext:value-type="float">
            <text:p>0,00231770833333333000</text:p>
          </table:table-cell>
          <table:table-cell table:formula="of:=[.D227]-[.D226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9" office:value-type="float" office:value="20114" calcext:value-type="float">
            <text:p>2011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32800925925926" calcext:value-type="float">
            <text:p>0,00232800925925926000</text:p>
          </table:table-cell>
          <table:table-cell table:formula="of:=[.D228]-[.D22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9" office:value-type="float" office:value="20203" calcext:value-type="float">
            <text:p>2020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33831018518519" calcext:value-type="float">
            <text:p>0,00233831018518519000</text:p>
          </table:table-cell>
          <table:table-cell table:formula="of:=[.D229]-[.D228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9" office:value-type="float" office:value="20292" calcext:value-type="float">
            <text:p>2029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34861111111111" calcext:value-type="float">
            <text:p>0,00234861111111111000</text:p>
          </table:table-cell>
          <table:table-cell table:formula="of:=[.D230]-[.D22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9" office:value-type="float" office:value="20381" calcext:value-type="float">
            <text:p>2038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35891203703704" calcext:value-type="float">
            <text:p>0,00235891203703704000</text:p>
          </table:table-cell>
          <table:table-cell table:formula="of:=[.D231]-[.D230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9" office:value-type="float" office:value="20470" calcext:value-type="float">
            <text:p>204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36921296296296" calcext:value-type="float">
            <text:p>0,00236921296296296000</text:p>
          </table:table-cell>
          <table:table-cell table:formula="of:=[.D232]-[.D231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9" office:value-type="float" office:value="20559" calcext:value-type="float">
            <text:p>2055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37951388888889" calcext:value-type="float">
            <text:p>0,00237951388888889000</text:p>
          </table:table-cell>
          <table:table-cell table:formula="of:=[.D233]-[.D23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9" office:value-type="float" office:value="20648" calcext:value-type="float">
            <text:p>2064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38981481481481" calcext:value-type="float">
            <text:p>0,00238981481481481000</text:p>
          </table:table-cell>
          <table:table-cell table:formula="of:=[.D234]-[.D233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9" office:value-type="float" office:value="20737" calcext:value-type="float">
            <text:p>2073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40011574074074" calcext:value-type="float">
            <text:p>0,00240011574074074000</text:p>
          </table:table-cell>
          <table:table-cell table:formula="of:=[.D235]-[.D23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9" office:value-type="float" office:value="20826" calcext:value-type="float">
            <text:p>2082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41041666666667" calcext:value-type="float">
            <text:p>0,00241041666666667000</text:p>
          </table:table-cell>
          <table:table-cell table:formula="of:=[.D236]-[.D235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9" office:value-type="float" office:value="20915" calcext:value-type="float">
            <text:p>2091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42071759259259" calcext:value-type="float">
            <text:p>0,00242071759259259000</text:p>
          </table:table-cell>
          <table:table-cell table:formula="of:=[.D237]-[.D236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9" office:value-type="float" office:value="21004" calcext:value-type="float">
            <text:p>2100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43101851851852" calcext:value-type="float">
            <text:p>0,00243101851851852000</text:p>
          </table:table-cell>
          <table:table-cell table:formula="of:=[.D238]-[.D23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9" office:value-type="float" office:value="21093" calcext:value-type="float">
            <text:p>2109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44131944444444" calcext:value-type="float">
            <text:p>0,00244131944444444000</text:p>
          </table:table-cell>
          <table:table-cell table:formula="of:=[.D239]-[.D238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9" office:value-type="float" office:value="21182" calcext:value-type="float">
            <text:p>2118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45162037037037" calcext:value-type="float">
            <text:p>0,00245162037037037000</text:p>
          </table:table-cell>
          <table:table-cell table:formula="of:=[.D240]-[.D23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9" office:value-type="float" office:value="21271" calcext:value-type="float">
            <text:p>2127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4619212962963" calcext:value-type="float">
            <text:p>0,00246192129629630000</text:p>
          </table:table-cell>
          <table:table-cell table:formula="of:=[.D241]-[.D240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9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47222222222222" calcext:value-type="float">
            <text:p>0,00247222222222222000</text:p>
          </table:table-cell>
          <table:table-cell table:formula="of:=[.D242]-[.D241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9" office:value-type="float" office:value="21449" calcext:value-type="float">
            <text:p>2144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48252314814815" calcext:value-type="float">
            <text:p>0,00248252314814815000</text:p>
          </table:table-cell>
          <table:table-cell table:formula="of:=[.D243]-[.D24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9" office:value-type="float" office:value="21538" calcext:value-type="float">
            <text:p>2153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49282407407407" calcext:value-type="float">
            <text:p>0,00249282407407407000</text:p>
          </table:table-cell>
          <table:table-cell table:formula="of:=[.D244]-[.D243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9" office:value-type="float" office:value="21627" calcext:value-type="float">
            <text:p>2162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503125" calcext:value-type="float">
            <text:p>0,00250312500000000000</text:p>
          </table:table-cell>
          <table:table-cell table:formula="of:=[.D245]-[.D24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9" office:value-type="float" office:value="21716" calcext:value-type="float">
            <text:p>2171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51342592592593" calcext:value-type="float">
            <text:p>0,00251342592592593000</text:p>
          </table:table-cell>
          <table:table-cell table:formula="of:=[.D246]-[.D245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9" office:value-type="float" office:value="21805" calcext:value-type="float">
            <text:p>2180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52372685185185" calcext:value-type="float">
            <text:p>0,00252372685185185000</text:p>
          </table:table-cell>
          <table:table-cell table:formula="of:=[.D247]-[.D246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9" office:value-type="float" office:value="21894" calcext:value-type="float">
            <text:p>2189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53402777777778" calcext:value-type="float">
            <text:p>0,00253402777777778000</text:p>
          </table:table-cell>
          <table:table-cell table:formula="of:=[.D248]-[.D24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9" office:value-type="float" office:value="21983" calcext:value-type="float">
            <text:p>2198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5443287037037" calcext:value-type="float">
            <text:p>0,00254432870370370000</text:p>
          </table:table-cell>
          <table:table-cell table:formula="of:=[.D249]-[.D248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9" office:value-type="float" office:value="22072" calcext:value-type="float">
            <text:p>2207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55462962962963" calcext:value-type="float">
            <text:p>0,00255462962962963000</text:p>
          </table:table-cell>
          <table:table-cell table:formula="of:=[.D250]-[.D24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9" office:value-type="float" office:value="22161" calcext:value-type="float">
            <text:p>2216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56493055555556" calcext:value-type="float">
            <text:p>0,00256493055555556000</text:p>
          </table:table-cell>
          <table:table-cell table:formula="of:=[.D251]-[.D250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9" office:value-type="float" office:value="22250" calcext:value-type="float">
            <text:p>22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57523148148148" calcext:value-type="float">
            <text:p>0,00257523148148148000</text:p>
          </table:table-cell>
          <table:table-cell table:formula="of:=[.D252]-[.D251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9" office:value-type="float" office:value="22339" calcext:value-type="float">
            <text:p>2233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58553240740741" calcext:value-type="float">
            <text:p>0,00258553240740741000</text:p>
          </table:table-cell>
          <table:table-cell table:formula="of:=[.D253]-[.D25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9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59583333333333" calcext:value-type="float">
            <text:p>0,00259583333333333000</text:p>
          </table:table-cell>
          <table:table-cell table:formula="of:=[.D254]-[.D253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9" office:value-type="float" office:value="22517" calcext:value-type="float">
            <text:p>2251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60613425925926" calcext:value-type="float">
            <text:p>0,00260613425925926000</text:p>
          </table:table-cell>
          <table:table-cell table:formula="of:=[.D255]-[.D25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9" office:value-type="float" office:value="22606" calcext:value-type="float">
            <text:p>2260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61643518518519" calcext:value-type="float">
            <text:p>0,00261643518518519000</text:p>
          </table:table-cell>
          <table:table-cell table:formula="of:=[.D256]-[.D255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9" office:value-type="float" office:value="22695" calcext:value-type="float">
            <text:p>2269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62673611111111" calcext:value-type="float">
            <text:p>0,00262673611111111000</text:p>
          </table:table-cell>
          <table:table-cell table:formula="of:=[.D257]-[.D256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9" office:value-type="float" office:value="22784" calcext:value-type="float">
            <text:p>2278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63703703703704" calcext:value-type="float">
            <text:p>0,00263703703703704000</text:p>
          </table:table-cell>
          <table:table-cell table:formula="of:=[.D258]-[.D25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9" office:value-type="float" office:value="22873" calcext:value-type="float">
            <text:p>2287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64733796296296" calcext:value-type="float">
            <text:p>0,00264733796296296000</text:p>
          </table:table-cell>
          <table:table-cell table:formula="of:=[.D259]-[.D258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9" office:value-type="float" office:value="22962" calcext:value-type="float">
            <text:p>2296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65763888888889" calcext:value-type="float">
            <text:p>0,00265763888888889000</text:p>
          </table:table-cell>
          <table:table-cell table:formula="of:=[.D260]-[.D25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9" office:value-type="float" office:value="23051" calcext:value-type="float">
            <text:p>2305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66793981481482" calcext:value-type="float">
            <text:p>0,00266793981481482000</text:p>
          </table:table-cell>
          <table:table-cell table:formula="of:=[.D261]-[.D260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9" office:value-type="float" office:value="23140" calcext:value-type="float">
            <text:p>231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67824074074074" calcext:value-type="float">
            <text:p>0,00267824074074074000</text:p>
          </table:table-cell>
          <table:table-cell table:formula="of:=[.D262]-[.D261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9" office:value-type="float" office:value="23229" calcext:value-type="float">
            <text:p>2322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68854166666667" calcext:value-type="float">
            <text:p>0,00268854166666667000</text:p>
          </table:table-cell>
          <table:table-cell table:formula="of:=[.D263]-[.D262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9" office:value-type="float" office:value="23318" calcext:value-type="float">
            <text:p>2331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69884259259259" calcext:value-type="float">
            <text:p>0,00269884259259259000</text:p>
          </table:table-cell>
          <table:table-cell table:formula="of:=[.D264]-[.D263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9" office:value-type="float" office:value="23407" calcext:value-type="float">
            <text:p>2340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70914351851852" calcext:value-type="float">
            <text:p>0,00270914351851852000</text:p>
          </table:table-cell>
          <table:table-cell table:formula="of:=[.D265]-[.D264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9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71944444444444" calcext:value-type="float">
            <text:p>0,00271944444444444000</text:p>
          </table:table-cell>
          <table:table-cell table:formula="of:=[.D266]-[.D265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9" office:value-type="float" office:value="23585" calcext:value-type="float">
            <text:p>2358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72974537037037" calcext:value-type="float">
            <text:p>0,00272974537037037000</text:p>
          </table:table-cell>
          <table:table-cell table:formula="of:=[.D267]-[.D266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9" office:value-type="float" office:value="23674" calcext:value-type="float">
            <text:p>2367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7400462962963" calcext:value-type="float">
            <text:p>0,00274004629629630000</text:p>
          </table:table-cell>
          <table:table-cell table:formula="of:=[.D268]-[.D267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9" office:value-type="float" office:value="23763" calcext:value-type="float">
            <text:p>2376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75034722222222" calcext:value-type="float">
            <text:p>0,00275034722222222000</text:p>
          </table:table-cell>
          <table:table-cell table:formula="of:=[.D269]-[.D268]" office:value-type="float" office:value="0.0000103009259259262" calcext:value-type="float">
            <text:p>0,0000103009259259262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9" office:value-type="float" office:value="23852" calcext:value-type="float">
            <text:p>2385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76064814814815" calcext:value-type="float">
            <text:p>0,00276064814814815000</text:p>
          </table:table-cell>
          <table:table-cell table:formula="of:=[.D270]-[.D269]" office:value-type="float" office:value="0.0000103009259259258" calcext:value-type="float">
            <text:p>0,0000103009259259258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9" office:value-type="float" office:value="23941" calcext:value-type="float">
            <text:p>2394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77094907407407" calcext:value-type="float">
            <text:p>0,00277094907407407000</text:p>
          </table:table-cell>
          <table:table-cell table:formula="of:=#REF!-[.D270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30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21:14.647318509</meta:creation-date>
    <dc:date>2026-05-17T19:21:21.555549757</dc:date>
    <meta:editing-duration>PT8S</meta:editing-duration>
    <meta:editing-cycles>1</meta:editing-cycles>
    <meta:document-statistic meta:table-count="1" meta:cell-count="1350" meta:object-count="0"/>
    <meta:generator>LibreOffice/24.2.7.2$Linux_X86_64 LibreOffice_project/420$Build-2</meta:generator>
  </office:meta>
</office:document-meta>
</file>