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3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50462962962963" calcext:value-type="float">
            <text:p>0,00000150462962962963</text:p>
          </table:table-cell>
          <table:table-cell table:formula="of:=[.D3]-[.D2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3" office:value-type="float" office:value="26" calcext:value-type="float">
            <text:p>2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300925925925926" calcext:value-type="float">
            <text:p>0,00000300925925925926</text:p>
          </table:table-cell>
          <table:table-cell table:formula="of:=[.D4]-[.D3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3" office:value-type="float" office:value="39" calcext:value-type="float">
            <text:p>3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451388888888889" calcext:value-type="float">
            <text:p>0,00000451388888888889</text:p>
          </table:table-cell>
          <table:table-cell table:formula="of:=[.D5]-[.D4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3" office:value-type="float" office:value="52" calcext:value-type="float">
            <text:p>5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601851851851852" calcext:value-type="float">
            <text:p>0,00000601851851851852</text:p>
          </table:table-cell>
          <table:table-cell table:formula="of:=[.D6]-[.D5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3" office:value-type="float" office:value="65" calcext:value-type="float">
            <text:p>6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752314814814815" calcext:value-type="float">
            <text:p>0,00000752314814814815</text:p>
          </table:table-cell>
          <table:table-cell table:formula="of:=[.D7]-[.D6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3" office:value-type="float" office:value="78" calcext:value-type="float">
            <text:p>7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902777777777778" calcext:value-type="float">
            <text:p>0,00000902777777777778</text:p>
          </table:table-cell>
          <table:table-cell table:formula="of:=[.D8]-[.D7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3" office:value-type="float" office:value="91" calcext:value-type="float">
            <text:p>9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05324074074074" calcext:value-type="float">
            <text:p>0,00001053240740740740</text:p>
          </table:table-cell>
          <table:table-cell table:formula="of:=[.D9]-[.D8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3" office:value-type="float" office:value="104" calcext:value-type="float">
            <text:p>10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2037037037037" calcext:value-type="float">
            <text:p>0,00001203703703703700</text:p>
          </table:table-cell>
          <table:table-cell table:formula="of:=[.D10]-[.D9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3" office:value-type="float" office:value="117" calcext:value-type="float">
            <text:p>11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35416666666667" calcext:value-type="float">
            <text:p>0,00001354166666666670</text:p>
          </table:table-cell>
          <table:table-cell table:formula="of:=[.D11]-[.D10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3" office:value-type="float" office:value="130" calcext:value-type="float">
            <text:p>1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50462962962963" calcext:value-type="float">
            <text:p>0,00001504629629629630</text:p>
          </table:table-cell>
          <table:table-cell table:formula="of:=[.D12]-[.D11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3" office:value-type="float" office:value="143" calcext:value-type="float">
            <text:p>14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65509259259259" calcext:value-type="float">
            <text:p>0,00001655092592592590</text:p>
          </table:table-cell>
          <table:table-cell table:formula="of:=[.D13]-[.D12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3" office:value-type="float" office:value="156" calcext:value-type="float">
            <text:p>15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180555555555556" calcext:value-type="float">
            <text:p>0,00001805555555555560</text:p>
          </table:table-cell>
          <table:table-cell table:formula="of:=[.D14]-[.D13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3" office:value-type="float" office:value="169" calcext:value-type="float">
            <text:p>16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195601851851852" calcext:value-type="float">
            <text:p>0,00001956018518518520</text:p>
          </table:table-cell>
          <table:table-cell table:formula="of:=[.D15]-[.D14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3" office:value-type="float" office:value="182" calcext:value-type="float">
            <text:p>18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210648148148148" calcext:value-type="float">
            <text:p>0,00002106481481481480</text:p>
          </table:table-cell>
          <table:table-cell table:formula="of:=[.D16]-[.D15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3" office:value-type="float" office:value="195" calcext:value-type="float">
            <text:p>19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225694444444444" calcext:value-type="float">
            <text:p>0,00002256944444444450</text:p>
          </table:table-cell>
          <table:table-cell table:formula="of:=[.D17]-[.D16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3" office:value-type="float" office:value="208" calcext:value-type="float">
            <text:p>20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240740740740741" calcext:value-type="float">
            <text:p>0,00002407407407407410</text:p>
          </table:table-cell>
          <table:table-cell table:formula="of:=[.D18]-[.D17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3" office:value-type="float" office:value="221" calcext:value-type="float">
            <text:p>22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255787037037037" calcext:value-type="float">
            <text:p>0,00002557870370370370</text:p>
          </table:table-cell>
          <table:table-cell table:formula="of:=[.D19]-[.D18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3" office:value-type="float" office:value="234" calcext:value-type="float">
            <text:p>23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270833333333333" calcext:value-type="float">
            <text:p>0,00002708333333333330</text:p>
          </table:table-cell>
          <table:table-cell table:formula="of:=[.D20]-[.D19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3" office:value-type="float" office:value="247" calcext:value-type="float">
            <text:p>24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28587962962963" calcext:value-type="float">
            <text:p>0,00002858796296296300</text:p>
          </table:table-cell>
          <table:table-cell table:formula="of:=[.D21]-[.D20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3" office:value-type="float" office:value="260" calcext:value-type="float">
            <text:p>2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300925925925926" calcext:value-type="float">
            <text:p>0,00003009259259259260</text:p>
          </table:table-cell>
          <table:table-cell table:formula="of:=[.D22]-[.D21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3" office:value-type="float" office:value="273" calcext:value-type="float">
            <text:p>27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315972222222222" calcext:value-type="float">
            <text:p>0,00003159722222222220</text:p>
          </table:table-cell>
          <table:table-cell table:formula="of:=[.D23]-[.D22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3" office:value-type="float" office:value="286" calcext:value-type="float">
            <text:p>28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331018518518519" calcext:value-type="float">
            <text:p>0,00003310185185185190</text:p>
          </table:table-cell>
          <table:table-cell table:formula="of:=[.D24]-[.D23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3" office:value-type="float" office:value="299" calcext:value-type="float">
            <text:p>29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346064814814815" calcext:value-type="float">
            <text:p>0,00003460648148148150</text:p>
          </table:table-cell>
          <table:table-cell table:formula="of:=[.D25]-[.D24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3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361111111111111" calcext:value-type="float">
            <text:p>0,00003611111111111110</text:p>
          </table:table-cell>
          <table:table-cell table:formula="of:=[.D26]-[.D25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3" office:value-type="float" office:value="325" calcext:value-type="float">
            <text:p>3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376157407407407" calcext:value-type="float">
            <text:p>0,00003761574074074080</text:p>
          </table:table-cell>
          <table:table-cell table:formula="of:=[.D27]-[.D26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3" office:value-type="float" office:value="338" calcext:value-type="float">
            <text:p>33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391203703703704" calcext:value-type="float">
            <text:p>0,00003912037037037040</text:p>
          </table:table-cell>
          <table:table-cell table:formula="of:=[.D28]-[.D27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3" office:value-type="float" office:value="351" calcext:value-type="float">
            <text:p>35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40625" calcext:value-type="float">
            <text:p>0,00004062500000000000</text:p>
          </table:table-cell>
          <table:table-cell table:formula="of:=[.D29]-[.D28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3" office:value-type="float" office:value="364" calcext:value-type="float">
            <text:p>36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421296296296296" calcext:value-type="float">
            <text:p>0,00004212962962962960</text:p>
          </table:table-cell>
          <table:table-cell table:formula="of:=[.D30]-[.D29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3" office:value-type="float" office:value="377" calcext:value-type="float">
            <text:p>37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436342592592593" calcext:value-type="float">
            <text:p>0,00004363425925925930</text:p>
          </table:table-cell>
          <table:table-cell table:formula="of:=[.D31]-[.D30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3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451388888888889" calcext:value-type="float">
            <text:p>0,00004513888888888890</text:p>
          </table:table-cell>
          <table:table-cell table:formula="of:=[.D32]-[.D31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3" office:value-type="float" office:value="403" calcext:value-type="float">
            <text:p>40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466435185185185" calcext:value-type="float">
            <text:p>0,00004664351851851850</text:p>
          </table:table-cell>
          <table:table-cell table:formula="of:=[.D33]-[.D32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3" office:value-type="float" office:value="416" calcext:value-type="float">
            <text:p>41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481481481481482" calcext:value-type="float">
            <text:p>0,00004814814814814820</text:p>
          </table:table-cell>
          <table:table-cell table:formula="of:=[.D34]-[.D33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3" office:value-type="float" office:value="429" calcext:value-type="float">
            <text:p>42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496527777777778" calcext:value-type="float">
            <text:p>0,00004965277777777780</text:p>
          </table:table-cell>
          <table:table-cell table:formula="of:=[.D35]-[.D34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3" office:value-type="float" office:value="442" calcext:value-type="float">
            <text:p>44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511574074074074" calcext:value-type="float">
            <text:p>0,00005115740740740740</text:p>
          </table:table-cell>
          <table:table-cell table:formula="of:=[.D36]-[.D35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3" office:value-type="float" office:value="455" calcext:value-type="float">
            <text:p>45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52662037037037" calcext:value-type="float">
            <text:p>0,00005266203703703700</text:p>
          </table:table-cell>
          <table:table-cell table:formula="of:=[.D37]-[.D36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3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541666666666667" calcext:value-type="float">
            <text:p>0,00005416666666666670</text:p>
          </table:table-cell>
          <table:table-cell table:formula="of:=[.D38]-[.D37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3" office:value-type="float" office:value="481" calcext:value-type="float">
            <text:p>48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556712962962963" calcext:value-type="float">
            <text:p>0,00005567129629629630</text:p>
          </table:table-cell>
          <table:table-cell table:formula="of:=[.D39]-[.D38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3" office:value-type="float" office:value="494" calcext:value-type="float">
            <text:p>49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571759259259259" calcext:value-type="float">
            <text:p>0,00005717592592592590</text:p>
          </table:table-cell>
          <table:table-cell table:formula="of:=[.D40]-[.D39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3" office:value-type="float" office:value="507" calcext:value-type="float">
            <text:p>50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586805555555556" calcext:value-type="float">
            <text:p>0,00005868055555555560</text:p>
          </table:table-cell>
          <table:table-cell table:formula="of:=[.D41]-[.D40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3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601851851851852" calcext:value-type="float">
            <text:p>0,00006018518518518520</text:p>
          </table:table-cell>
          <table:table-cell table:formula="of:=[.D42]-[.D41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3" office:value-type="float" office:value="533" calcext:value-type="float">
            <text:p>53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616898148148148" calcext:value-type="float">
            <text:p>0,00006168981481481480</text:p>
          </table:table-cell>
          <table:table-cell table:formula="of:=[.D43]-[.D4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3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631944444444444" calcext:value-type="float">
            <text:p>0,00006319444444444440</text:p>
          </table:table-cell>
          <table:table-cell table:formula="of:=[.D44]-[.D43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3" office:value-type="float" office:value="559" calcext:value-type="float">
            <text:p>55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646990740740741" calcext:value-type="float">
            <text:p>0,00006469907407407410</text:p>
          </table:table-cell>
          <table:table-cell table:formula="of:=[.D45]-[.D44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3" office:value-type="float" office:value="572" calcext:value-type="float">
            <text:p>57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662037037037037" calcext:value-type="float">
            <text:p>0,00006620370370370370</text:p>
          </table:table-cell>
          <table:table-cell table:formula="of:=[.D46]-[.D4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3" office:value-type="float" office:value="585" calcext:value-type="float">
            <text:p>58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677083333333333" calcext:value-type="float">
            <text:p>0,00006770833333333330</text:p>
          </table:table-cell>
          <table:table-cell table:formula="of:=[.D47]-[.D46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3" office:value-type="float" office:value="598" calcext:value-type="float">
            <text:p>59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69212962962963" calcext:value-type="float">
            <text:p>0,00006921296296296300</text:p>
          </table:table-cell>
          <table:table-cell table:formula="of:=[.D48]-[.D47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3" office:value-type="float" office:value="611" calcext:value-type="float">
            <text:p>61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707175925925926" calcext:value-type="float">
            <text:p>0,00007071759259259260</text:p>
          </table:table-cell>
          <table:table-cell table:formula="of:=[.D49]-[.D4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3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722222222222222" calcext:value-type="float">
            <text:p>0,00007222222222222220</text:p>
          </table:table-cell>
          <table:table-cell table:formula="of:=[.D50]-[.D49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3" office:value-type="float" office:value="637" calcext:value-type="float">
            <text:p>63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737268518518519" calcext:value-type="float">
            <text:p>0,00007372685185185190</text:p>
          </table:table-cell>
          <table:table-cell table:formula="of:=[.D51]-[.D50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3" office:value-type="float" office:value="650" calcext:value-type="float">
            <text:p>6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752314814814815" calcext:value-type="float">
            <text:p>0,00007523148148148150</text:p>
          </table:table-cell>
          <table:table-cell table:formula="of:=[.D52]-[.D5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3" office:value-type="float" office:value="663" calcext:value-type="float">
            <text:p>66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767361111111111" calcext:value-type="float">
            <text:p>0,00007673611111111110</text:p>
          </table:table-cell>
          <table:table-cell table:formula="of:=[.D53]-[.D52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3" office:value-type="float" office:value="676" calcext:value-type="float">
            <text:p>67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782407407407407" calcext:value-type="float">
            <text:p>0,00007824074074074070</text:p>
          </table:table-cell>
          <table:table-cell table:formula="of:=[.D54]-[.D53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3" office:value-type="float" office:value="689" calcext:value-type="float">
            <text:p>68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797453703703704" calcext:value-type="float">
            <text:p>0,00007974537037037040</text:p>
          </table:table-cell>
          <table:table-cell table:formula="of:=[.D55]-[.D5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3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8125" calcext:value-type="float">
            <text:p>0,00008125000000000000</text:p>
          </table:table-cell>
          <table:table-cell table:formula="of:=[.D56]-[.D55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3" office:value-type="float" office:value="715" calcext:value-type="float">
            <text:p>71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827546296296296" calcext:value-type="float">
            <text:p>0,00008275462962962960</text:p>
          </table:table-cell>
          <table:table-cell table:formula="of:=[.D57]-[.D56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3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842592592592593" calcext:value-type="float">
            <text:p>0,00008425925925925930</text:p>
          </table:table-cell>
          <table:table-cell table:formula="of:=[.D58]-[.D5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3" office:value-type="float" office:value="741" calcext:value-type="float">
            <text:p>74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857638888888889" calcext:value-type="float">
            <text:p>0,00008576388888888890</text:p>
          </table:table-cell>
          <table:table-cell table:formula="of:=[.D59]-[.D58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3" office:value-type="float" office:value="754" calcext:value-type="float">
            <text:p>75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872685185185185" calcext:value-type="float">
            <text:p>0,00008726851851851850</text:p>
          </table:table-cell>
          <table:table-cell table:formula="of:=[.D60]-[.D59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3" office:value-type="float" office:value="767" calcext:value-type="float">
            <text:p>76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887731481481482" calcext:value-type="float">
            <text:p>0,00008877314814814820</text:p>
          </table:table-cell>
          <table:table-cell table:formula="of:=[.D61]-[.D6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3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902777777777778" calcext:value-type="float">
            <text:p>0,00009027777777777780</text:p>
          </table:table-cell>
          <table:table-cell table:formula="of:=[.D62]-[.D61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3" office:value-type="float" office:value="793" calcext:value-type="float">
            <text:p>79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917824074074074" calcext:value-type="float">
            <text:p>0,00009178240740740740</text:p>
          </table:table-cell>
          <table:table-cell table:formula="of:=[.D63]-[.D62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3" office:value-type="float" office:value="806" calcext:value-type="float">
            <text:p>80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093287037037037" calcext:value-type="float">
            <text:p>0,00009328703703703700</text:p>
          </table:table-cell>
          <table:table-cell table:formula="of:=[.D64]-[.D6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3" office:value-type="float" office:value="819" calcext:value-type="float">
            <text:p>81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0947916666666667" calcext:value-type="float">
            <text:p>0,00009479166666666670</text:p>
          </table:table-cell>
          <table:table-cell table:formula="of:=[.D65]-[.D64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3" office:value-type="float" office:value="832" calcext:value-type="float">
            <text:p>83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0962962962962963" calcext:value-type="float">
            <text:p>0,00009629629629629630</text:p>
          </table:table-cell>
          <table:table-cell table:formula="of:=[.D66]-[.D65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3" office:value-type="float" office:value="845" calcext:value-type="float">
            <text:p>84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0978009259259259" calcext:value-type="float">
            <text:p>0,00009780092592592590</text:p>
          </table:table-cell>
          <table:table-cell table:formula="of:=[.D67]-[.D6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3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0993055555555556" calcext:value-type="float">
            <text:p>0,00009930555555555560</text:p>
          </table:table-cell>
          <table:table-cell table:formula="of:=[.D68]-[.D67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3" office:value-type="float" office:value="871" calcext:value-type="float">
            <text:p>87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00810185185185" calcext:value-type="float">
            <text:p>0,00010081018518518500</text:p>
          </table:table-cell>
          <table:table-cell table:formula="of:=[.D69]-[.D68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3" office:value-type="float" office:value="884" calcext:value-type="float">
            <text:p>88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02314814814815" calcext:value-type="float">
            <text:p>0,00010231481481481500</text:p>
          </table:table-cell>
          <table:table-cell table:formula="of:=[.D70]-[.D6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3" office:value-type="float" office:value="897" calcext:value-type="float">
            <text:p>89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03819444444444" calcext:value-type="float">
            <text:p>0,00010381944444444400</text:p>
          </table:table-cell>
          <table:table-cell table:formula="of:=[.D71]-[.D70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3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05324074074074" calcext:value-type="float">
            <text:p>0,00010532407407407400</text:p>
          </table:table-cell>
          <table:table-cell table:formula="of:=[.D72]-[.D71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3" office:value-type="float" office:value="923" calcext:value-type="float">
            <text:p>92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06828703703704" calcext:value-type="float">
            <text:p>0,00010682870370370400</text:p>
          </table:table-cell>
          <table:table-cell table:formula="of:=[.D73]-[.D7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3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08333333333333" calcext:value-type="float">
            <text:p>0,00010833333333333300</text:p>
          </table:table-cell>
          <table:table-cell table:formula="of:=[.D74]-[.D73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3" office:value-type="float" office:value="949" calcext:value-type="float">
            <text:p>94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09837962962963" calcext:value-type="float">
            <text:p>0,00010983796296296300</text:p>
          </table:table-cell>
          <table:table-cell table:formula="of:=[.D75]-[.D74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3" office:value-type="float" office:value="962" calcext:value-type="float">
            <text:p>96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11342592592593" calcext:value-type="float">
            <text:p>0,00011134259259259300</text:p>
          </table:table-cell>
          <table:table-cell table:formula="of:=[.D76]-[.D7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3" office:value-type="float" office:value="975" calcext:value-type="float">
            <text:p>9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12847222222222" calcext:value-type="float">
            <text:p>0,00011284722222222200</text:p>
          </table:table-cell>
          <table:table-cell table:formula="of:=[.D77]-[.D76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3" office:value-type="float" office:value="988" calcext:value-type="float">
            <text:p>98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14351851851852" calcext:value-type="float">
            <text:p>0,00011435185185185200</text:p>
          </table:table-cell>
          <table:table-cell table:formula="of:=[.D78]-[.D77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3" office:value-type="float" office:value="1001" calcext:value-type="float">
            <text:p>100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15856481481481" calcext:value-type="float">
            <text:p>0,00011585648148148100</text:p>
          </table:table-cell>
          <table:table-cell table:formula="of:=[.D79]-[.D7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3" office:value-type="float" office:value="1014" calcext:value-type="float">
            <text:p>101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17361111111111" calcext:value-type="float">
            <text:p>0,00011736111111111100</text:p>
          </table:table-cell>
          <table:table-cell table:formula="of:=[.D80]-[.D79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3" office:value-type="float" office:value="1027" calcext:value-type="float">
            <text:p>102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18865740740741" calcext:value-type="float">
            <text:p>0,00011886574074074100</text:p>
          </table:table-cell>
          <table:table-cell table:formula="of:=[.D81]-[.D80]" office:value-type="float" office:value="0.00000150462962962963" calcext:value-type="float">
            <text:p>0,000001504629629629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3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2037037037037" calcext:value-type="float">
            <text:p>0,00012037037037037000</text:p>
          </table:table-cell>
          <table:table-cell table:formula="of:=[.D82]-[.D8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3" office:value-type="float" office:value="1053" calcext:value-type="float">
            <text:p>105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21875" calcext:value-type="float">
            <text:p>0,00012187500000000000</text:p>
          </table:table-cell>
          <table:table-cell table:formula="of:=[.D83]-[.D82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3" office:value-type="float" office:value="1066" calcext:value-type="float">
            <text:p>106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2337962962963" calcext:value-type="float">
            <text:p>0,00012337962962963000</text:p>
          </table:table-cell>
          <table:table-cell table:formula="of:=[.D84]-[.D8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3" office:value-type="float" office:value="1079" calcext:value-type="float">
            <text:p>107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24884259259259" calcext:value-type="float">
            <text:p>0,00012488425925925900</text:p>
          </table:table-cell>
          <table:table-cell table:formula="of:=[.D85]-[.D8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3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26388888888889" calcext:value-type="float">
            <text:p>0,00012638888888888900</text:p>
          </table:table-cell>
          <table:table-cell table:formula="of:=[.D86]-[.D85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3" office:value-type="float" office:value="1105" calcext:value-type="float">
            <text:p>110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27893518518519" calcext:value-type="float">
            <text:p>0,00012789351851851900</text:p>
          </table:table-cell>
          <table:table-cell table:formula="of:=[.D87]-[.D8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3" office:value-type="float" office:value="1118" calcext:value-type="float">
            <text:p>111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29398148148148" calcext:value-type="float">
            <text:p>0,00012939814814814800</text:p>
          </table:table-cell>
          <table:table-cell table:formula="of:=[.D88]-[.D8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3" office:value-type="float" office:value="1131" calcext:value-type="float">
            <text:p>113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30902777777778" calcext:value-type="float">
            <text:p>0,00013090277777777800</text:p>
          </table:table-cell>
          <table:table-cell table:formula="of:=[.D89]-[.D88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3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32407407407407" calcext:value-type="float">
            <text:p>0,00013240740740740700</text:p>
          </table:table-cell>
          <table:table-cell table:formula="of:=[.D90]-[.D8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3" office:value-type="float" office:value="1157" calcext:value-type="float">
            <text:p>115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33912037037037" calcext:value-type="float">
            <text:p>0,00013391203703703700</text:p>
          </table:table-cell>
          <table:table-cell table:formula="of:=[.D91]-[.D9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3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35416666666667" calcext:value-type="float">
            <text:p>0,00013541666666666700</text:p>
          </table:table-cell>
          <table:table-cell table:formula="of:=[.D92]-[.D91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3" office:value-type="float" office:value="1183" calcext:value-type="float">
            <text:p>118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36921296296296" calcext:value-type="float">
            <text:p>0,00013692129629629600</text:p>
          </table:table-cell>
          <table:table-cell table:formula="of:=[.D93]-[.D9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3" office:value-type="float" office:value="1196" calcext:value-type="float">
            <text:p>119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38425925925926" calcext:value-type="float">
            <text:p>0,00013842592592592600</text:p>
          </table:table-cell>
          <table:table-cell table:formula="of:=[.D94]-[.D9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3" office:value-type="float" office:value="1209" calcext:value-type="float">
            <text:p>120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39930555555556" calcext:value-type="float">
            <text:p>0,00013993055555555600</text:p>
          </table:table-cell>
          <table:table-cell table:formula="of:=[.D95]-[.D94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3" office:value-type="float" office:value="1222" calcext:value-type="float">
            <text:p>122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41435185185185" calcext:value-type="float">
            <text:p>0,00014143518518518500</text:p>
          </table:table-cell>
          <table:table-cell table:formula="of:=[.D96]-[.D9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3" office:value-type="float" office:value="1235" calcext:value-type="float">
            <text:p>123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42939814814815" calcext:value-type="float">
            <text:p>0,00014293981481481500</text:p>
          </table:table-cell>
          <table:table-cell table:formula="of:=[.D97]-[.D9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3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44444444444444" calcext:value-type="float">
            <text:p>0,00014444444444444400</text:p>
          </table:table-cell>
          <table:table-cell table:formula="of:=[.D98]-[.D97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3" office:value-type="float" office:value="1261" calcext:value-type="float">
            <text:p>126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45949074074074" calcext:value-type="float">
            <text:p>0,00014594907407407400</text:p>
          </table:table-cell>
          <table:table-cell table:formula="of:=[.D99]-[.D9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3" office:value-type="float" office:value="1274" calcext:value-type="float">
            <text:p>127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47453703703704" calcext:value-type="float">
            <text:p>0,00014745370370370400</text:p>
          </table:table-cell>
          <table:table-cell table:formula="of:=[.D100]-[.D9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3" office:value-type="float" office:value="1287" calcext:value-type="float">
            <text:p>128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48958333333333" calcext:value-type="float">
            <text:p>0,00014895833333333300</text:p>
          </table:table-cell>
          <table:table-cell table:formula="of:=[.D101]-[.D100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3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50462962962963" calcext:value-type="float">
            <text:p>0,00015046296296296300</text:p>
          </table:table-cell>
          <table:table-cell table:formula="of:=[.D102]-[.D10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3" office:value-type="float" office:value="1313" calcext:value-type="float">
            <text:p>131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51967592592593" calcext:value-type="float">
            <text:p>0,00015196759259259300</text:p>
          </table:table-cell>
          <table:table-cell table:formula="of:=[.D103]-[.D10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3" office:value-type="float" office:value="1326" calcext:value-type="float">
            <text:p>132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53472222222222" calcext:value-type="float">
            <text:p>0,00015347222222222200</text:p>
          </table:table-cell>
          <table:table-cell table:formula="of:=[.D104]-[.D103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3" office:value-type="float" office:value="1339" calcext:value-type="float">
            <text:p>133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54976851851852" calcext:value-type="float">
            <text:p>0,00015497685185185200</text:p>
          </table:table-cell>
          <table:table-cell table:formula="of:=[.D105]-[.D10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3" office:value-type="float" office:value="1352" calcext:value-type="float">
            <text:p>135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56481481481481" calcext:value-type="float">
            <text:p>0,00015648148148148100</text:p>
          </table:table-cell>
          <table:table-cell table:formula="of:=[.D106]-[.D10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3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57986111111111" calcext:value-type="float">
            <text:p>0,00015798611111111100</text:p>
          </table:table-cell>
          <table:table-cell table:formula="of:=[.D107]-[.D106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3" office:value-type="float" office:value="1378" calcext:value-type="float">
            <text:p>137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59490740740741" calcext:value-type="float">
            <text:p>0,00015949074074074100</text:p>
          </table:table-cell>
          <table:table-cell table:formula="of:=[.D108]-[.D10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3" office:value-type="float" office:value="1391" calcext:value-type="float">
            <text:p>139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6099537037037" calcext:value-type="float">
            <text:p>0,00016099537037037000</text:p>
          </table:table-cell>
          <table:table-cell table:formula="of:=[.D109]-[.D10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3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625" calcext:value-type="float">
            <text:p>0,00016250000000000000</text:p>
          </table:table-cell>
          <table:table-cell table:formula="of:=[.D110]-[.D109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3" office:value-type="float" office:value="1417" calcext:value-type="float">
            <text:p>141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6400462962963" calcext:value-type="float">
            <text:p>0,00016400462962963000</text:p>
          </table:table-cell>
          <table:table-cell table:formula="of:=[.D111]-[.D11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3" office:value-type="float" office:value="1430" calcext:value-type="float">
            <text:p>14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65509259259259" calcext:value-type="float">
            <text:p>0,00016550925925925900</text:p>
          </table:table-cell>
          <table:table-cell table:formula="of:=[.D112]-[.D11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3" office:value-type="float" office:value="1443" calcext:value-type="float">
            <text:p>144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67013888888889" calcext:value-type="float">
            <text:p>0,00016701388888888900</text:p>
          </table:table-cell>
          <table:table-cell table:formula="of:=[.D113]-[.D112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3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68518518518519" calcext:value-type="float">
            <text:p>0,00016851851851851900</text:p>
          </table:table-cell>
          <table:table-cell table:formula="of:=[.D114]-[.D11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3" office:value-type="float" office:value="1469" calcext:value-type="float">
            <text:p>146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70023148148148" calcext:value-type="float">
            <text:p>0,00017002314814814800</text:p>
          </table:table-cell>
          <table:table-cell table:formula="of:=[.D115]-[.D11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3" office:value-type="float" office:value="1482" calcext:value-type="float">
            <text:p>148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71527777777778" calcext:value-type="float">
            <text:p>0,00017152777777777800</text:p>
          </table:table-cell>
          <table:table-cell table:formula="of:=[.D116]-[.D115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3" office:value-type="float" office:value="1495" calcext:value-type="float">
            <text:p>149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73032407407407" calcext:value-type="float">
            <text:p>0,00017303240740740700</text:p>
          </table:table-cell>
          <table:table-cell table:formula="of:=[.D117]-[.D11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3" office:value-type="float" office:value="1508" calcext:value-type="float">
            <text:p>150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174537037037037" calcext:value-type="float">
            <text:p>0,00017453703703703700</text:p>
          </table:table-cell>
          <table:table-cell table:formula="of:=[.D118]-[.D11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3" office:value-type="float" office:value="1521" calcext:value-type="float">
            <text:p>152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176041666666667" calcext:value-type="float">
            <text:p>0,00017604166666666700</text:p>
          </table:table-cell>
          <table:table-cell table:formula="of:=[.D119]-[.D118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3" office:value-type="float" office:value="1534" calcext:value-type="float">
            <text:p>153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177546296296296" calcext:value-type="float">
            <text:p>0,00017754629629629600</text:p>
          </table:table-cell>
          <table:table-cell table:formula="of:=[.D120]-[.D11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3" office:value-type="float" office:value="1547" calcext:value-type="float">
            <text:p>154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179050925925926" calcext:value-type="float">
            <text:p>0,00017905092592592600</text:p>
          </table:table-cell>
          <table:table-cell table:formula="of:=[.D121]-[.D12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3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180555555555556" calcext:value-type="float">
            <text:p>0,00018055555555555600</text:p>
          </table:table-cell>
          <table:table-cell table:formula="of:=[.D122]-[.D121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3" office:value-type="float" office:value="1573" calcext:value-type="float">
            <text:p>157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182060185185185" calcext:value-type="float">
            <text:p>0,00018206018518518500</text:p>
          </table:table-cell>
          <table:table-cell table:formula="of:=[.D123]-[.D12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3" office:value-type="float" office:value="1586" calcext:value-type="float">
            <text:p>158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183564814814815" calcext:value-type="float">
            <text:p>0,00018356481481481500</text:p>
          </table:table-cell>
          <table:table-cell table:formula="of:=[.D124]-[.D12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3" office:value-type="float" office:value="1599" calcext:value-type="float">
            <text:p>159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185069444444444" calcext:value-type="float">
            <text:p>0,00018506944444444400</text:p>
          </table:table-cell>
          <table:table-cell table:formula="of:=[.D125]-[.D124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3" office:value-type="float" office:value="1612" calcext:value-type="float">
            <text:p>161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186574074074074" calcext:value-type="float">
            <text:p>0,00018657407407407400</text:p>
          </table:table-cell>
          <table:table-cell table:formula="of:=[.D126]-[.D12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3" office:value-type="float" office:value="1625" calcext:value-type="float">
            <text:p>1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188078703703704" calcext:value-type="float">
            <text:p>0,00018807870370370400</text:p>
          </table:table-cell>
          <table:table-cell table:formula="of:=[.D127]-[.D12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3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189583333333333" calcext:value-type="float">
            <text:p>0,00018958333333333300</text:p>
          </table:table-cell>
          <table:table-cell table:formula="of:=[.D128]-[.D127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3" office:value-type="float" office:value="1651" calcext:value-type="float">
            <text:p>165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191087962962963" calcext:value-type="float">
            <text:p>0,00019108796296296300</text:p>
          </table:table-cell>
          <table:table-cell table:formula="of:=[.D129]-[.D12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3" office:value-type="float" office:value="1664" calcext:value-type="float">
            <text:p>166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192592592592593" calcext:value-type="float">
            <text:p>0,00019259259259259300</text:p>
          </table:table-cell>
          <table:table-cell table:formula="of:=[.D130]-[.D12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3" office:value-type="float" office:value="1677" calcext:value-type="float">
            <text:p>167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194097222222222" calcext:value-type="float">
            <text:p>0,00019409722222222200</text:p>
          </table:table-cell>
          <table:table-cell table:formula="of:=[.D131]-[.D130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3" office:value-type="float" office:value="1690" calcext:value-type="float">
            <text:p>16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195601851851852" calcext:value-type="float">
            <text:p>0,00019560185185185200</text:p>
          </table:table-cell>
          <table:table-cell table:formula="of:=[.D132]-[.D13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3" office:value-type="float" office:value="1703" calcext:value-type="float">
            <text:p>170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197106481481481" calcext:value-type="float">
            <text:p>0,00019710648148148100</text:p>
          </table:table-cell>
          <table:table-cell table:formula="of:=[.D133]-[.D13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3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198611111111111" calcext:value-type="float">
            <text:p>0,00019861111111111100</text:p>
          </table:table-cell>
          <table:table-cell table:formula="of:=[.D134]-[.D133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3" office:value-type="float" office:value="1729" calcext:value-type="float">
            <text:p>172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200115740740741" calcext:value-type="float">
            <text:p>0,00020011574074074100</text:p>
          </table:table-cell>
          <table:table-cell table:formula="of:=[.D135]-[.D13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3" office:value-type="float" office:value="1742" calcext:value-type="float">
            <text:p>174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20162037037037" calcext:value-type="float">
            <text:p>0,00020162037037037000</text:p>
          </table:table-cell>
          <table:table-cell table:formula="of:=[.D136]-[.D13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3" office:value-type="float" office:value="1755" calcext:value-type="float">
            <text:p>175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203125" calcext:value-type="float">
            <text:p>0,00020312500000000000</text:p>
          </table:table-cell>
          <table:table-cell table:formula="of:=[.D137]-[.D136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3" office:value-type="float" office:value="1768" calcext:value-type="float">
            <text:p>176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20462962962963" calcext:value-type="float">
            <text:p>0,00020462962962963000</text:p>
          </table:table-cell>
          <table:table-cell table:formula="of:=[.D138]-[.D13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3" office:value-type="float" office:value="1781" calcext:value-type="float">
            <text:p>178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206134259259259" calcext:value-type="float">
            <text:p>0,00020613425925925900</text:p>
          </table:table-cell>
          <table:table-cell table:formula="of:=[.D139]-[.D13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3" office:value-type="float" office:value="1794" calcext:value-type="float">
            <text:p>179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207638888888889" calcext:value-type="float">
            <text:p>0,00020763888888888900</text:p>
          </table:table-cell>
          <table:table-cell table:formula="of:=[.D140]-[.D139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3" office:value-type="float" office:value="1807" calcext:value-type="float">
            <text:p>180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209143518518519" calcext:value-type="float">
            <text:p>0,00020914351851851900</text:p>
          </table:table-cell>
          <table:table-cell table:formula="of:=[.D141]-[.D14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3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210648148148148" calcext:value-type="float">
            <text:p>0,00021064814814814800</text:p>
          </table:table-cell>
          <table:table-cell table:formula="of:=[.D142]-[.D14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3" office:value-type="float" office:value="1833" calcext:value-type="float">
            <text:p>183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212152777777778" calcext:value-type="float">
            <text:p>0,00021215277777777800</text:p>
          </table:table-cell>
          <table:table-cell table:formula="of:=[.D143]-[.D142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3" office:value-type="float" office:value="1846" calcext:value-type="float">
            <text:p>184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213657407407407" calcext:value-type="float">
            <text:p>0,00021365740740740700</text:p>
          </table:table-cell>
          <table:table-cell table:formula="of:=[.D144]-[.D14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3" office:value-type="float" office:value="1859" calcext:value-type="float">
            <text:p>185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215162037037037" calcext:value-type="float">
            <text:p>0,00021516203703703700</text:p>
          </table:table-cell>
          <table:table-cell table:formula="of:=[.D145]-[.D14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3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216666666666667" calcext:value-type="float">
            <text:p>0,00021666666666666700</text:p>
          </table:table-cell>
          <table:table-cell table:formula="of:=[.D146]-[.D145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3" office:value-type="float" office:value="1885" calcext:value-type="float">
            <text:p>188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218171296296296" calcext:value-type="float">
            <text:p>0,00021817129629629600</text:p>
          </table:table-cell>
          <table:table-cell table:formula="of:=[.D147]-[.D14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3" office:value-type="float" office:value="1898" calcext:value-type="float">
            <text:p>189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219675925925926" calcext:value-type="float">
            <text:p>0,00021967592592592600</text:p>
          </table:table-cell>
          <table:table-cell table:formula="of:=[.D148]-[.D14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3" office:value-type="float" office:value="1911" calcext:value-type="float">
            <text:p>191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221180555555556" calcext:value-type="float">
            <text:p>0,00022118055555555600</text:p>
          </table:table-cell>
          <table:table-cell table:formula="of:=[.D149]-[.D148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3" office:value-type="float" office:value="1924" calcext:value-type="float">
            <text:p>192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222685185185185" calcext:value-type="float">
            <text:p>0,00022268518518518500</text:p>
          </table:table-cell>
          <table:table-cell table:formula="of:=[.D150]-[.D14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3" office:value-type="float" office:value="1937" calcext:value-type="float">
            <text:p>193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224189814814815" calcext:value-type="float">
            <text:p>0,00022418981481481500</text:p>
          </table:table-cell>
          <table:table-cell table:formula="of:=[.D151]-[.D15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3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225694444444444" calcext:value-type="float">
            <text:p>0,00022569444444444400</text:p>
          </table:table-cell>
          <table:table-cell table:formula="of:=[.D152]-[.D151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3" office:value-type="float" office:value="1963" calcext:value-type="float">
            <text:p>196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227199074074074" calcext:value-type="float">
            <text:p>0,00022719907407407400</text:p>
          </table:table-cell>
          <table:table-cell table:formula="of:=[.D153]-[.D15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3" office:value-type="float" office:value="1976" calcext:value-type="float">
            <text:p>197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228703703703704" calcext:value-type="float">
            <text:p>0,00022870370370370400</text:p>
          </table:table-cell>
          <table:table-cell table:formula="of:=[.D154]-[.D15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3" office:value-type="float" office:value="1989" calcext:value-type="float">
            <text:p>198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230208333333333" calcext:value-type="float">
            <text:p>0,00023020833333333300</text:p>
          </table:table-cell>
          <table:table-cell table:formula="of:=[.D155]-[.D154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3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231712962962963" calcext:value-type="float">
            <text:p>0,00023171296296296300</text:p>
          </table:table-cell>
          <table:table-cell table:formula="of:=[.D156]-[.D15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3" office:value-type="float" office:value="2015" calcext:value-type="float">
            <text:p>201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233217592592593" calcext:value-type="float">
            <text:p>0,00023321759259259300</text:p>
          </table:table-cell>
          <table:table-cell table:formula="of:=[.D157]-[.D15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3" office:value-type="float" office:value="2028" calcext:value-type="float">
            <text:p>202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234722222222222" calcext:value-type="float">
            <text:p>0,00023472222222222200</text:p>
          </table:table-cell>
          <table:table-cell table:formula="of:=[.D158]-[.D157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3" office:value-type="float" office:value="2041" calcext:value-type="float">
            <text:p>204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236226851851852" calcext:value-type="float">
            <text:p>0,00023622685185185200</text:p>
          </table:table-cell>
          <table:table-cell table:formula="of:=[.D159]-[.D15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3" office:value-type="float" office:value="2054" calcext:value-type="float">
            <text:p>205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237731481481481" calcext:value-type="float">
            <text:p>0,00023773148148148100</text:p>
          </table:table-cell>
          <table:table-cell table:formula="of:=[.D160]-[.D15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3" office:value-type="float" office:value="2067" calcext:value-type="float">
            <text:p>206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239236111111111" calcext:value-type="float">
            <text:p>0,00023923611111111100</text:p>
          </table:table-cell>
          <table:table-cell table:formula="of:=[.D161]-[.D160]" office:value-type="float" office:value="0.00000150462962962965" calcext:value-type="float">
            <text:p>0,000001504629629629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3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240740740740741" calcext:value-type="float">
            <text:p>0,00024074074074074100</text:p>
          </table:table-cell>
          <table:table-cell table:formula="of:=[.D162]-[.D16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3" office:value-type="float" office:value="2093" calcext:value-type="float">
            <text:p>209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24224537037037" calcext:value-type="float">
            <text:p>0,00024224537037037000</text:p>
          </table:table-cell>
          <table:table-cell table:formula="of:=[.D163]-[.D16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3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24375" calcext:value-type="float">
            <text:p>0,00024375000000000000</text:p>
          </table:table-cell>
          <table:table-cell table:formula="of:=[.D164]-[.D16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3" office:value-type="float" office:value="2119" calcext:value-type="float">
            <text:p>211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24525462962963" calcext:value-type="float">
            <text:p>0,00024525462962963000</text:p>
          </table:table-cell>
          <table:table-cell table:formula="of:=[.D165]-[.D164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3" office:value-type="float" office:value="2132" calcext:value-type="float">
            <text:p>213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246759259259259" calcext:value-type="float">
            <text:p>0,00024675925925925900</text:p>
          </table:table-cell>
          <table:table-cell table:formula="of:=[.D166]-[.D16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3" office:value-type="float" office:value="2145" calcext:value-type="float">
            <text:p>214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248263888888889" calcext:value-type="float">
            <text:p>0,00024826388888888900</text:p>
          </table:table-cell>
          <table:table-cell table:formula="of:=[.D167]-[.D16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3" office:value-type="float" office:value="2158" calcext:value-type="float">
            <text:p>215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249768518518519" calcext:value-type="float">
            <text:p>0,00024976851851851900</text:p>
          </table:table-cell>
          <table:table-cell table:formula="of:=[.D168]-[.D16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3" office:value-type="float" office:value="2171" calcext:value-type="float">
            <text:p>217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251273148148148" calcext:value-type="float">
            <text:p>0,00025127314814814800</text:p>
          </table:table-cell>
          <table:table-cell table:formula="of:=[.D169]-[.D16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3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252777777777778" calcext:value-type="float">
            <text:p>0,00025277777777777800</text:p>
          </table:table-cell>
          <table:table-cell table:formula="of:=[.D170]-[.D16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3" office:value-type="float" office:value="2197" calcext:value-type="float">
            <text:p>219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254282407407407" calcext:value-type="float">
            <text:p>0,00025428240740740700</text:p>
          </table:table-cell>
          <table:table-cell table:formula="of:=[.D171]-[.D170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3" office:value-type="float" office:value="2210" calcext:value-type="float">
            <text:p>22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255787037037037" calcext:value-type="float">
            <text:p>0,00025578703703703700</text:p>
          </table:table-cell>
          <table:table-cell table:formula="of:=[.D172]-[.D17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3" office:value-type="float" office:value="2223" calcext:value-type="float">
            <text:p>222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257291666666667" calcext:value-type="float">
            <text:p>0,00025729166666666700</text:p>
          </table:table-cell>
          <table:table-cell table:formula="of:=[.D173]-[.D17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3" office:value-type="float" office:value="2236" calcext:value-type="float">
            <text:p>223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258796296296296" calcext:value-type="float">
            <text:p>0,00025879629629629600</text:p>
          </table:table-cell>
          <table:table-cell table:formula="of:=[.D174]-[.D17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3" office:value-type="float" office:value="2249" calcext:value-type="float">
            <text:p>224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260300925925926" calcext:value-type="float">
            <text:p>0,00026030092592592600</text:p>
          </table:table-cell>
          <table:table-cell table:formula="of:=[.D175]-[.D17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3" office:value-type="float" office:value="2262" calcext:value-type="float">
            <text:p>226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261805555555556" calcext:value-type="float">
            <text:p>0,00026180555555555600</text:p>
          </table:table-cell>
          <table:table-cell table:formula="of:=[.D176]-[.D17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3" office:value-type="float" office:value="2275" calcext:value-type="float">
            <text:p>22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263310185185185" calcext:value-type="float">
            <text:p>0,00026331018518518500</text:p>
          </table:table-cell>
          <table:table-cell table:formula="of:=[.D177]-[.D176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3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264814814814815" calcext:value-type="float">
            <text:p>0,00026481481481481500</text:p>
          </table:table-cell>
          <table:table-cell table:formula="of:=[.D178]-[.D17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3" office:value-type="float" office:value="2301" calcext:value-type="float">
            <text:p>230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266319444444444" calcext:value-type="float">
            <text:p>0,00026631944444444400</text:p>
          </table:table-cell>
          <table:table-cell table:formula="of:=[.D179]-[.D17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3" office:value-type="float" office:value="2314" calcext:value-type="float">
            <text:p>231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267824074074074" calcext:value-type="float">
            <text:p>0,00026782407407407400</text:p>
          </table:table-cell>
          <table:table-cell table:formula="of:=[.D180]-[.D17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3" office:value-type="float" office:value="2327" calcext:value-type="float">
            <text:p>232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269328703703704" calcext:value-type="float">
            <text:p>0,00026932870370370400</text:p>
          </table:table-cell>
          <table:table-cell table:formula="of:=[.D181]-[.D18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3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270833333333333" calcext:value-type="float">
            <text:p>0,00027083333333333300</text:p>
          </table:table-cell>
          <table:table-cell table:formula="of:=[.D182]-[.D18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3" office:value-type="float" office:value="2353" calcext:value-type="float">
            <text:p>235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272337962962963" calcext:value-type="float">
            <text:p>0,00027233796296296300</text:p>
          </table:table-cell>
          <table:table-cell table:formula="of:=[.D183]-[.D182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3" office:value-type="float" office:value="2366" calcext:value-type="float">
            <text:p>236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273842592592593" calcext:value-type="float">
            <text:p>0,00027384259259259300</text:p>
          </table:table-cell>
          <table:table-cell table:formula="of:=[.D184]-[.D18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3" office:value-type="float" office:value="2379" calcext:value-type="float">
            <text:p>237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275347222222222" calcext:value-type="float">
            <text:p>0,00027534722222222200</text:p>
          </table:table-cell>
          <table:table-cell table:formula="of:=[.D185]-[.D18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3" office:value-type="float" office:value="2392" calcext:value-type="float">
            <text:p>239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276851851851852" calcext:value-type="float">
            <text:p>0,00027685185185185200</text:p>
          </table:table-cell>
          <table:table-cell table:formula="of:=[.D186]-[.D18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3" office:value-type="float" office:value="2405" calcext:value-type="float">
            <text:p>240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278356481481482" calcext:value-type="float">
            <text:p>0,00027835648148148200</text:p>
          </table:table-cell>
          <table:table-cell table:formula="of:=[.D187]-[.D18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3" office:value-type="float" office:value="2418" calcext:value-type="float">
            <text:p>241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279861111111111" calcext:value-type="float">
            <text:p>0,00027986111111111100</text:p>
          </table:table-cell>
          <table:table-cell table:formula="of:=[.D188]-[.D18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3" office:value-type="float" office:value="2431" calcext:value-type="float">
            <text:p>243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281365740740741" calcext:value-type="float">
            <text:p>0,00028136574074074100</text:p>
          </table:table-cell>
          <table:table-cell table:formula="of:=[.D189]-[.D188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3" office:value-type="float" office:value="2444" calcext:value-type="float">
            <text:p>244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28287037037037" calcext:value-type="float">
            <text:p>0,00028287037037037000</text:p>
          </table:table-cell>
          <table:table-cell table:formula="of:=[.D190]-[.D18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3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284375" calcext:value-type="float">
            <text:p>0,00028437500000000000</text:p>
          </table:table-cell>
          <table:table-cell table:formula="of:=[.D191]-[.D19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3" office:value-type="float" office:value="2470" calcext:value-type="float">
            <text:p>24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28587962962963" calcext:value-type="float">
            <text:p>0,00028587962962963000</text:p>
          </table:table-cell>
          <table:table-cell table:formula="of:=[.D192]-[.D19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3" office:value-type="float" office:value="2483" calcext:value-type="float">
            <text:p>248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287384259259259" calcext:value-type="float">
            <text:p>0,00028738425925925900</text:p>
          </table:table-cell>
          <table:table-cell table:formula="of:=[.D193]-[.D19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3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288888888888889" calcext:value-type="float">
            <text:p>0,00028888888888888900</text:p>
          </table:table-cell>
          <table:table-cell table:formula="of:=[.D194]-[.D19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3" office:value-type="float" office:value="2509" calcext:value-type="float">
            <text:p>250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290393518518519" calcext:value-type="float">
            <text:p>0,00029039351851851900</text:p>
          </table:table-cell>
          <table:table-cell table:formula="of:=[.D195]-[.D194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3" office:value-type="float" office:value="2522" calcext:value-type="float">
            <text:p>252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291898148148148" calcext:value-type="float">
            <text:p>0,00029189814814814800</text:p>
          </table:table-cell>
          <table:table-cell table:formula="of:=[.D196]-[.D19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3" office:value-type="float" office:value="2535" calcext:value-type="float">
            <text:p>253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293402777777778" calcext:value-type="float">
            <text:p>0,00029340277777777800</text:p>
          </table:table-cell>
          <table:table-cell table:formula="of:=[.D197]-[.D19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3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294907407407407" calcext:value-type="float">
            <text:p>0,00029490740740740700</text:p>
          </table:table-cell>
          <table:table-cell table:formula="of:=[.D198]-[.D19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3" office:value-type="float" office:value="2561" calcext:value-type="float">
            <text:p>256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296412037037037" calcext:value-type="float">
            <text:p>0,00029641203703703700</text:p>
          </table:table-cell>
          <table:table-cell table:formula="of:=[.D199]-[.D19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3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297916666666667" calcext:value-type="float">
            <text:p>0,00029791666666666700</text:p>
          </table:table-cell>
          <table:table-cell table:formula="of:=[.D200]-[.D19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3" office:value-type="float" office:value="2587" calcext:value-type="float">
            <text:p>258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299421296296296" calcext:value-type="float">
            <text:p>0,00029942129629629600</text:p>
          </table:table-cell>
          <table:table-cell table:formula="of:=[.D201]-[.D200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3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300925925925926" calcext:value-type="float">
            <text:p>0,00030092592592592600</text:p>
          </table:table-cell>
          <table:table-cell table:formula="of:=[.D202]-[.D20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3" office:value-type="float" office:value="2613" calcext:value-type="float">
            <text:p>261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302430555555556" calcext:value-type="float">
            <text:p>0,00030243055555555600</text:p>
          </table:table-cell>
          <table:table-cell table:formula="of:=[.D203]-[.D20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3" office:value-type="float" office:value="2626" calcext:value-type="float">
            <text:p>262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303935185185185" calcext:value-type="float">
            <text:p>0,00030393518518518500</text:p>
          </table:table-cell>
          <table:table-cell table:formula="of:=[.D204]-[.D20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3" office:value-type="float" office:value="2639" calcext:value-type="float">
            <text:p>263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305439814814815" calcext:value-type="float">
            <text:p>0,00030543981481481500</text:p>
          </table:table-cell>
          <table:table-cell table:formula="of:=[.D205]-[.D20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3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306944444444444" calcext:value-type="float">
            <text:p>0,00030694444444444400</text:p>
          </table:table-cell>
          <table:table-cell table:formula="of:=[.D206]-[.D20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3" office:value-type="float" office:value="2665" calcext:value-type="float">
            <text:p>266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308449074074074" calcext:value-type="float">
            <text:p>0,00030844907407407400</text:p>
          </table:table-cell>
          <table:table-cell table:formula="of:=[.D207]-[.D206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3" office:value-type="float" office:value="2678" calcext:value-type="float">
            <text:p>267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309953703703704" calcext:value-type="float">
            <text:p>0,00030995370370370400</text:p>
          </table:table-cell>
          <table:table-cell table:formula="of:=[.D208]-[.D20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3" office:value-type="float" office:value="2691" calcext:value-type="float">
            <text:p>269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311458333333333" calcext:value-type="float">
            <text:p>0,00031145833333333300</text:p>
          </table:table-cell>
          <table:table-cell table:formula="of:=[.D209]-[.D20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3" office:value-type="float" office:value="2704" calcext:value-type="float">
            <text:p>270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312962962962963" calcext:value-type="float">
            <text:p>0,00031296296296296300</text:p>
          </table:table-cell>
          <table:table-cell table:formula="of:=[.D210]-[.D20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3" office:value-type="float" office:value="2717" calcext:value-type="float">
            <text:p>271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314467592592593" calcext:value-type="float">
            <text:p>0,00031446759259259300</text:p>
          </table:table-cell>
          <table:table-cell table:formula="of:=[.D211]-[.D21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3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315972222222222" calcext:value-type="float">
            <text:p>0,00031597222222222200</text:p>
          </table:table-cell>
          <table:table-cell table:formula="of:=[.D212]-[.D21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3" office:value-type="float" office:value="2743" calcext:value-type="float">
            <text:p>274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317476851851852" calcext:value-type="float">
            <text:p>0,00031747685185185200</text:p>
          </table:table-cell>
          <table:table-cell table:formula="of:=[.D213]-[.D212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3" office:value-type="float" office:value="2756" calcext:value-type="float">
            <text:p>275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318981481481482" calcext:value-type="float">
            <text:p>0,00031898148148148200</text:p>
          </table:table-cell>
          <table:table-cell table:formula="of:=[.D214]-[.D21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3" office:value-type="float" office:value="2769" calcext:value-type="float">
            <text:p>276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320486111111111" calcext:value-type="float">
            <text:p>0,00032048611111111100</text:p>
          </table:table-cell>
          <table:table-cell table:formula="of:=[.D215]-[.D21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3" office:value-type="float" office:value="2782" calcext:value-type="float">
            <text:p>278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321990740740741" calcext:value-type="float">
            <text:p>0,00032199074074074100</text:p>
          </table:table-cell>
          <table:table-cell table:formula="of:=[.D216]-[.D21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3" office:value-type="float" office:value="2795" calcext:value-type="float">
            <text:p>279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32349537037037" calcext:value-type="float">
            <text:p>0,00032349537037037000</text:p>
          </table:table-cell>
          <table:table-cell table:formula="of:=[.D217]-[.D21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3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325" calcext:value-type="float">
            <text:p>0,00032500000000000000</text:p>
          </table:table-cell>
          <table:table-cell table:formula="of:=[.D218]-[.D21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3" office:value-type="float" office:value="2821" calcext:value-type="float">
            <text:p>282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32650462962963" calcext:value-type="float">
            <text:p>0,00032650462962963000</text:p>
          </table:table-cell>
          <table:table-cell table:formula="of:=[.D219]-[.D218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3" office:value-type="float" office:value="2834" calcext:value-type="float">
            <text:p>283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328009259259259" calcext:value-type="float">
            <text:p>0,00032800925925925900</text:p>
          </table:table-cell>
          <table:table-cell table:formula="of:=[.D220]-[.D21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3" office:value-type="float" office:value="2847" calcext:value-type="float">
            <text:p>284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329513888888889" calcext:value-type="float">
            <text:p>0,00032951388888888900</text:p>
          </table:table-cell>
          <table:table-cell table:formula="of:=[.D221]-[.D22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3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331018518518519" calcext:value-type="float">
            <text:p>0,00033101851851851900</text:p>
          </table:table-cell>
          <table:table-cell table:formula="of:=[.D222]-[.D22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3" office:value-type="float" office:value="2873" calcext:value-type="float">
            <text:p>287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332523148148148" calcext:value-type="float">
            <text:p>0,00033252314814814800</text:p>
          </table:table-cell>
          <table:table-cell table:formula="of:=[.D223]-[.D22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3" office:value-type="float" office:value="2886" calcext:value-type="float">
            <text:p>288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334027777777778" calcext:value-type="float">
            <text:p>0,00033402777777777800</text:p>
          </table:table-cell>
          <table:table-cell table:formula="of:=[.D224]-[.D22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3" office:value-type="float" office:value="2899" calcext:value-type="float">
            <text:p>289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335532407407407" calcext:value-type="float">
            <text:p>0,00033553240740740700</text:p>
          </table:table-cell>
          <table:table-cell table:formula="of:=[.D225]-[.D224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3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337037037037037" calcext:value-type="float">
            <text:p>0,00033703703703703700</text:p>
          </table:table-cell>
          <table:table-cell table:formula="of:=[.D226]-[.D22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3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338541666666667" calcext:value-type="float">
            <text:p>0,00033854166666666700</text:p>
          </table:table-cell>
          <table:table-cell table:formula="of:=[.D227]-[.D22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3" office:value-type="float" office:value="2938" calcext:value-type="float">
            <text:p>293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340046296296296" calcext:value-type="float">
            <text:p>0,00034004629629629600</text:p>
          </table:table-cell>
          <table:table-cell table:formula="of:=[.D228]-[.D22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3" office:value-type="float" office:value="2951" calcext:value-type="float">
            <text:p>295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341550925925926" calcext:value-type="float">
            <text:p>0,00034155092592592600</text:p>
          </table:table-cell>
          <table:table-cell table:formula="of:=[.D229]-[.D22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3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343055555555556" calcext:value-type="float">
            <text:p>0,00034305555555555600</text:p>
          </table:table-cell>
          <table:table-cell table:formula="of:=[.D230]-[.D22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3" office:value-type="float" office:value="2977" calcext:value-type="float">
            <text:p>297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344560185185185" calcext:value-type="float">
            <text:p>0,00034456018518518500</text:p>
          </table:table-cell>
          <table:table-cell table:formula="of:=[.D231]-[.D230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3" office:value-type="float" office:value="2990" calcext:value-type="float">
            <text:p>29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346064814814815" calcext:value-type="float">
            <text:p>0,00034606481481481500</text:p>
          </table:table-cell>
          <table:table-cell table:formula="of:=[.D232]-[.D23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3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347569444444444" calcext:value-type="float">
            <text:p>0,00034756944444444400</text:p>
          </table:table-cell>
          <table:table-cell table:formula="of:=[.D233]-[.D23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3" office:value-type="float" office:value="3016" calcext:value-type="float">
            <text:p>301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349074074074074" calcext:value-type="float">
            <text:p>0,00034907407407407400</text:p>
          </table:table-cell>
          <table:table-cell table:formula="of:=[.D234]-[.D23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3" office:value-type="float" office:value="3029" calcext:value-type="float">
            <text:p>302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350578703703704" calcext:value-type="float">
            <text:p>0,00035057870370370400</text:p>
          </table:table-cell>
          <table:table-cell table:formula="of:=[.D235]-[.D23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3" office:value-type="float" office:value="3042" calcext:value-type="float">
            <text:p>304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352083333333333" calcext:value-type="float">
            <text:p>0,00035208333333333300</text:p>
          </table:table-cell>
          <table:table-cell table:formula="of:=[.D236]-[.D23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3" office:value-type="float" office:value="3055" calcext:value-type="float">
            <text:p>305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353587962962963" calcext:value-type="float">
            <text:p>0,00035358796296296300</text:p>
          </table:table-cell>
          <table:table-cell table:formula="of:=[.D237]-[.D236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3" office:value-type="float" office:value="3068" calcext:value-type="float">
            <text:p>306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355092592592593" calcext:value-type="float">
            <text:p>0,00035509259259259300</text:p>
          </table:table-cell>
          <table:table-cell table:formula="of:=[.D238]-[.D23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3" office:value-type="float" office:value="3081" calcext:value-type="float">
            <text:p>308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356597222222222" calcext:value-type="float">
            <text:p>0,00035659722222222200</text:p>
          </table:table-cell>
          <table:table-cell table:formula="of:=[.D239]-[.D23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3" office:value-type="float" office:value="3094" calcext:value-type="float">
            <text:p>309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358101851851852" calcext:value-type="float">
            <text:p>0,00035810185185185200</text:p>
          </table:table-cell>
          <table:table-cell table:formula="of:=[.D240]-[.D23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3" office:value-type="float" office:value="3107" calcext:value-type="float">
            <text:p>310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359606481481482" calcext:value-type="float">
            <text:p>0,00035960648148148200</text:p>
          </table:table-cell>
          <table:table-cell table:formula="of:=[.D241]-[.D24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3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361111111111111" calcext:value-type="float">
            <text:p>0,00036111111111111100</text:p>
          </table:table-cell>
          <table:table-cell table:formula="of:=[.D242]-[.D24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3" office:value-type="float" office:value="3133" calcext:value-type="float">
            <text:p>313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362615740740741" calcext:value-type="float">
            <text:p>0,00036261574074074100</text:p>
          </table:table-cell>
          <table:table-cell table:formula="of:=[.D243]-[.D242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3" office:value-type="float" office:value="3146" calcext:value-type="float">
            <text:p>314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36412037037037" calcext:value-type="float">
            <text:p>0,00036412037037037000</text:p>
          </table:table-cell>
          <table:table-cell table:formula="of:=[.D244]-[.D24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3" office:value-type="float" office:value="3159" calcext:value-type="float">
            <text:p>315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365625" calcext:value-type="float">
            <text:p>0,00036562500000000000</text:p>
          </table:table-cell>
          <table:table-cell table:formula="of:=[.D245]-[.D24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3" office:value-type="float" office:value="3172" calcext:value-type="float">
            <text:p>317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36712962962963" calcext:value-type="float">
            <text:p>0,00036712962962963000</text:p>
          </table:table-cell>
          <table:table-cell table:formula="of:=[.D246]-[.D24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3" office:value-type="float" office:value="3185" calcext:value-type="float">
            <text:p>318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368634259259259" calcext:value-type="float">
            <text:p>0,00036863425925925900</text:p>
          </table:table-cell>
          <table:table-cell table:formula="of:=[.D247]-[.D24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3" office:value-type="float" office:value="3198" calcext:value-type="float">
            <text:p>319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370138888888889" calcext:value-type="float">
            <text:p>0,00037013888888888900</text:p>
          </table:table-cell>
          <table:table-cell table:formula="of:=[.D248]-[.D24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3" office:value-type="float" office:value="3211" calcext:value-type="float">
            <text:p>321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371643518518519" calcext:value-type="float">
            <text:p>0,00037164351851851900</text:p>
          </table:table-cell>
          <table:table-cell table:formula="of:=[.D249]-[.D248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3" office:value-type="float" office:value="3224" calcext:value-type="float">
            <text:p>322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373148148148148" calcext:value-type="float">
            <text:p>0,00037314814814814800</text:p>
          </table:table-cell>
          <table:table-cell table:formula="of:=[.D250]-[.D24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3" office:value-type="float" office:value="3237" calcext:value-type="float">
            <text:p>323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374652777777778" calcext:value-type="float">
            <text:p>0,00037465277777777800</text:p>
          </table:table-cell>
          <table:table-cell table:formula="of:=[.D251]-[.D25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3" office:value-type="float" office:value="3250" calcext:value-type="float">
            <text:p>3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376157407407407" calcext:value-type="float">
            <text:p>0,00037615740740740700</text:p>
          </table:table-cell>
          <table:table-cell table:formula="of:=[.D252]-[.D25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3" office:value-type="float" office:value="3263" calcext:value-type="float">
            <text:p>326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377662037037037" calcext:value-type="float">
            <text:p>0,00037766203703703700</text:p>
          </table:table-cell>
          <table:table-cell table:formula="of:=[.D253]-[.D25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3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379166666666667" calcext:value-type="float">
            <text:p>0,00037916666666666700</text:p>
          </table:table-cell>
          <table:table-cell table:formula="of:=[.D254]-[.D25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3" office:value-type="float" office:value="3289" calcext:value-type="float">
            <text:p>328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380671296296296" calcext:value-type="float">
            <text:p>0,00038067129629629600</text:p>
          </table:table-cell>
          <table:table-cell table:formula="of:=[.D255]-[.D254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3" office:value-type="float" office:value="3302" calcext:value-type="float">
            <text:p>330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382175925925926" calcext:value-type="float">
            <text:p>0,00038217592592592600</text:p>
          </table:table-cell>
          <table:table-cell table:formula="of:=[.D256]-[.D25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3" office:value-type="float" office:value="3315" calcext:value-type="float">
            <text:p>331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383680555555556" calcext:value-type="float">
            <text:p>0,00038368055555555600</text:p>
          </table:table-cell>
          <table:table-cell table:formula="of:=[.D257]-[.D25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3" office:value-type="float" office:value="3328" calcext:value-type="float">
            <text:p>332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385185185185185" calcext:value-type="float">
            <text:p>0,00038518518518518500</text:p>
          </table:table-cell>
          <table:table-cell table:formula="of:=[.D258]-[.D25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3" office:value-type="float" office:value="3341" calcext:value-type="float">
            <text:p>334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386689814814815" calcext:value-type="float">
            <text:p>0,00038668981481481500</text:p>
          </table:table-cell>
          <table:table-cell table:formula="of:=[.D259]-[.D25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3" office:value-type="float" office:value="3354" calcext:value-type="float">
            <text:p>335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388194444444444" calcext:value-type="float">
            <text:p>0,00038819444444444400</text:p>
          </table:table-cell>
          <table:table-cell table:formula="of:=[.D260]-[.D25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3" office:value-type="float" office:value="3367" calcext:value-type="float">
            <text:p>336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389699074074074" calcext:value-type="float">
            <text:p>0,00038969907407407400</text:p>
          </table:table-cell>
          <table:table-cell table:formula="of:=[.D261]-[.D260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3" office:value-type="float" office:value="3380" calcext:value-type="float">
            <text:p>33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391203703703704" calcext:value-type="float">
            <text:p>0,00039120370370370400</text:p>
          </table:table-cell>
          <table:table-cell table:formula="of:=[.D262]-[.D26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3" office:value-type="float" office:value="3393" calcext:value-type="float">
            <text:p>339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392708333333333" calcext:value-type="float">
            <text:p>0,00039270833333333300</text:p>
          </table:table-cell>
          <table:table-cell table:formula="of:=[.D263]-[.D26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3" office:value-type="float" office:value="3406" calcext:value-type="float">
            <text:p>340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394212962962963" calcext:value-type="float">
            <text:p>0,00039421296296296300</text:p>
          </table:table-cell>
          <table:table-cell table:formula="of:=[.D264]-[.D26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3" office:value-type="float" office:value="3419" calcext:value-type="float">
            <text:p>341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395717592592593" calcext:value-type="float">
            <text:p>0,00039571759259259300</text:p>
          </table:table-cell>
          <table:table-cell table:formula="of:=[.D265]-[.D26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3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397222222222222" calcext:value-type="float">
            <text:p>0,00039722222222222200</text:p>
          </table:table-cell>
          <table:table-cell table:formula="of:=[.D266]-[.D265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3" office:value-type="float" office:value="3445" calcext:value-type="float">
            <text:p>344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398726851851852" calcext:value-type="float">
            <text:p>0,00039872685185185200</text:p>
          </table:table-cell>
          <table:table-cell table:formula="of:=[.D267]-[.D26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3" office:value-type="float" office:value="3458" calcext:value-type="float">
            <text:p>345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400231481481482" calcext:value-type="float">
            <text:p>0,00040023148148148200</text:p>
          </table:table-cell>
          <table:table-cell table:formula="of:=[.D268]-[.D26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3" office:value-type="float" office:value="3471" calcext:value-type="float">
            <text:p>347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401736111111111" calcext:value-type="float">
            <text:p>0,00040173611111111100</text:p>
          </table:table-cell>
          <table:table-cell table:formula="of:=[.D269]-[.D26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3" office:value-type="float" office:value="3484" calcext:value-type="float">
            <text:p>348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403240740740741" calcext:value-type="float">
            <text:p>0,00040324074074074100</text:p>
          </table:table-cell>
          <table:table-cell table:formula="of:=[.D270]-[.D26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3" office:value-type="float" office:value="3497" calcext:value-type="float">
            <text:p>349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40474537037037" calcext:value-type="float">
            <text:p>0,00040474537037037000</text:p>
          </table:table-cell>
          <table:table-cell table:formula="of:=[.D271]-[.D27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3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40625" calcext:value-type="float">
            <text:p>0,00040625000000000000</text:p>
          </table:table-cell>
          <table:table-cell table:formula="of:=[.D272]-[.D271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3" office:value-type="float" office:value="3523" calcext:value-type="float">
            <text:p>352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40775462962963" calcext:value-type="float">
            <text:p>0,00040775462962963000</text:p>
          </table:table-cell>
          <table:table-cell table:formula="of:=[.D273]-[.D27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3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409259259259259" calcext:value-type="float">
            <text:p>0,00040925925925925900</text:p>
          </table:table-cell>
          <table:table-cell table:formula="of:=[.D274]-[.D27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3" office:value-type="float" office:value="3549" calcext:value-type="float">
            <text:p>354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410763888888889" calcext:value-type="float">
            <text:p>0,00041076388888888900</text:p>
          </table:table-cell>
          <table:table-cell table:formula="of:=[.D275]-[.D27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3" office:value-type="float" office:value="3562" calcext:value-type="float">
            <text:p>356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412268518518519" calcext:value-type="float">
            <text:p>0,00041226851851851800</text:p>
          </table:table-cell>
          <table:table-cell table:formula="of:=[.D276]-[.D27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3" office:value-type="float" office:value="3575" calcext:value-type="float">
            <text:p>35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413773148148148" calcext:value-type="float">
            <text:p>0,00041377314814814800</text:p>
          </table:table-cell>
          <table:table-cell table:formula="of:=[.D277]-[.D27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3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415277777777778" calcext:value-type="float">
            <text:p>0,00041527777777777800</text:p>
          </table:table-cell>
          <table:table-cell table:formula="of:=[.D278]-[.D277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3" office:value-type="float" office:value="3601" calcext:value-type="float">
            <text:p>360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416782407407407" calcext:value-type="float">
            <text:p>0,00041678240740740700</text:p>
          </table:table-cell>
          <table:table-cell table:formula="of:=[.D279]-[.D27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3" office:value-type="float" office:value="3614" calcext:value-type="float">
            <text:p>361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418287037037037" calcext:value-type="float">
            <text:p>0,00041828703703703700</text:p>
          </table:table-cell>
          <table:table-cell table:formula="of:=[.D280]-[.D27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3" office:value-type="float" office:value="3627" calcext:value-type="float">
            <text:p>362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419791666666667" calcext:value-type="float">
            <text:p>0,00041979166666666700</text:p>
          </table:table-cell>
          <table:table-cell table:formula="of:=[.D281]-[.D28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3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421296296296296" calcext:value-type="float">
            <text:p>0,00042129629629629600</text:p>
          </table:table-cell>
          <table:table-cell table:formula="of:=[.D282]-[.D28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3" office:value-type="float" office:value="3653" calcext:value-type="float">
            <text:p>365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422800925925926" calcext:value-type="float">
            <text:p>0,00042280092592592600</text:p>
          </table:table-cell>
          <table:table-cell table:formula="of:=[.D283]-[.D28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3" office:value-type="float" office:value="3666" calcext:value-type="float">
            <text:p>366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424305555555556" calcext:value-type="float">
            <text:p>0,00042430555555555600</text:p>
          </table:table-cell>
          <table:table-cell table:formula="of:=[.D284]-[.D283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3" office:value-type="float" office:value="3679" calcext:value-type="float">
            <text:p>367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425810185185185" calcext:value-type="float">
            <text:p>0,00042581018518518500</text:p>
          </table:table-cell>
          <table:table-cell table:formula="of:=[.D285]-[.D28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3" office:value-type="float" office:value="3692" calcext:value-type="float">
            <text:p>369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427314814814815" calcext:value-type="float">
            <text:p>0,00042731481481481500</text:p>
          </table:table-cell>
          <table:table-cell table:formula="of:=[.D286]-[.D28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3" office:value-type="float" office:value="3705" calcext:value-type="float">
            <text:p>370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428819444444444" calcext:value-type="float">
            <text:p>0,00042881944444444500</text:p>
          </table:table-cell>
          <table:table-cell table:formula="of:=[.D287]-[.D28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3" office:value-type="float" office:value="3718" calcext:value-type="float">
            <text:p>371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430324074074074" calcext:value-type="float">
            <text:p>0,00043032407407407400</text:p>
          </table:table-cell>
          <table:table-cell table:formula="of:=[.D288]-[.D28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3" office:value-type="float" office:value="3731" calcext:value-type="float">
            <text:p>373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431828703703704" calcext:value-type="float">
            <text:p>0,00043182870370370400</text:p>
          </table:table-cell>
          <table:table-cell table:formula="of:=[.D289]-[.D28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3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433333333333333" calcext:value-type="float">
            <text:p>0,00043333333333333300</text:p>
          </table:table-cell>
          <table:table-cell table:formula="of:=[.D290]-[.D289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3" office:value-type="float" office:value="3757" calcext:value-type="float">
            <text:p>375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434837962962963" calcext:value-type="float">
            <text:p>0,00043483796296296300</text:p>
          </table:table-cell>
          <table:table-cell table:formula="of:=[.D291]-[.D29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3" office:value-type="float" office:value="3770" calcext:value-type="float">
            <text:p>377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436342592592593" calcext:value-type="float">
            <text:p>0,00043634259259259300</text:p>
          </table:table-cell>
          <table:table-cell table:formula="of:=[.D292]-[.D29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3" office:value-type="float" office:value="3783" calcext:value-type="float">
            <text:p>3783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437847222222222" calcext:value-type="float">
            <text:p>0,00043784722222222200</text:p>
          </table:table-cell>
          <table:table-cell table:formula="of:=[.D293]-[.D29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3" office:value-type="float" office:value="3796" calcext:value-type="float">
            <text:p>379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439351851851852" calcext:value-type="float">
            <text:p>0,00043935185185185200</text:p>
          </table:table-cell>
          <table:table-cell table:formula="of:=[.D294]-[.D29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3" office:value-type="float" office:value="3809" calcext:value-type="float">
            <text:p>3809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440856481481481" calcext:value-type="float">
            <text:p>0,00044085648148148100</text:p>
          </table:table-cell>
          <table:table-cell table:formula="of:=[.D295]-[.D29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3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442361111111111" calcext:value-type="float">
            <text:p>0,00044236111111111100</text:p>
          </table:table-cell>
          <table:table-cell table:formula="of:=[.D296]-[.D295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3" office:value-type="float" office:value="3835" calcext:value-type="float">
            <text:p>383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443865740740741" calcext:value-type="float">
            <text:p>0,00044386574074074100</text:p>
          </table:table-cell>
          <table:table-cell table:formula="of:=[.D297]-[.D29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3" office:value-type="float" office:value="3848" calcext:value-type="float">
            <text:p>384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44537037037037" calcext:value-type="float">
            <text:p>0,00044537037037037000</text:p>
          </table:table-cell>
          <table:table-cell table:formula="of:=[.D298]-[.D29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3" office:value-type="float" office:value="3861" calcext:value-type="float">
            <text:p>3861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446875" calcext:value-type="float">
            <text:p>0,00044687500000000000</text:p>
          </table:table-cell>
          <table:table-cell table:formula="of:=[.D299]-[.D29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3" office:value-type="float" office:value="3874" calcext:value-type="float">
            <text:p>387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44837962962963" calcext:value-type="float">
            <text:p>0,00044837962962963000</text:p>
          </table:table-cell>
          <table:table-cell table:formula="of:=[.D300]-[.D29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3" office:value-type="float" office:value="3887" calcext:value-type="float">
            <text:p>3887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449884259259259" calcext:value-type="float">
            <text:p>0,00044988425925925900</text:p>
          </table:table-cell>
          <table:table-cell table:formula="of:=[.D301]-[.D30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3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451388888888889" calcext:value-type="float">
            <text:p>0,00045138888888888900</text:p>
          </table:table-cell>
          <table:table-cell table:formula="of:=[.D302]-[.D301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3" office:value-type="float" office:value="3913" calcext:value-type="float">
            <text:p>3913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452893518518519" calcext:value-type="float">
            <text:p>0,00045289351851851900</text:p>
          </table:table-cell>
          <table:table-cell table:formula="of:=[.D303]-[.D30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3" office:value-type="float" office:value="3926" calcext:value-type="float">
            <text:p>392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454398148148148" calcext:value-type="float">
            <text:p>0,00045439814814814800</text:p>
          </table:table-cell>
          <table:table-cell table:formula="of:=[.D304]-[.D30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3" office:value-type="float" office:value="3939" calcext:value-type="float">
            <text:p>3939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455902777777778" calcext:value-type="float">
            <text:p>0,00045590277777777800</text:p>
          </table:table-cell>
          <table:table-cell table:formula="of:=[.D305]-[.D30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3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457407407407407" calcext:value-type="float">
            <text:p>0,00045740740740740700</text:p>
          </table:table-cell>
          <table:table-cell table:formula="of:=[.D306]-[.D30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3" office:value-type="float" office:value="3965" calcext:value-type="float">
            <text:p>396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458912037037037" calcext:value-type="float">
            <text:p>0,00045891203703703700</text:p>
          </table:table-cell>
          <table:table-cell table:formula="of:=[.D307]-[.D30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3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460416666666667" calcext:value-type="float">
            <text:p>0,00046041666666666700</text:p>
          </table:table-cell>
          <table:table-cell table:formula="of:=[.D308]-[.D307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3" office:value-type="float" office:value="3991" calcext:value-type="float">
            <text:p>3991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461921296296296" calcext:value-type="float">
            <text:p>0,00046192129629629600</text:p>
          </table:table-cell>
          <table:table-cell table:formula="of:=[.D309]-[.D30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3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463425925925926" calcext:value-type="float">
            <text:p>0,00046342592592592600</text:p>
          </table:table-cell>
          <table:table-cell table:formula="of:=[.D310]-[.D30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3" office:value-type="float" office:value="4017" calcext:value-type="float">
            <text:p>4017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464930555555556" calcext:value-type="float">
            <text:p>0,00046493055555555600</text:p>
          </table:table-cell>
          <table:table-cell table:formula="of:=[.D311]-[.D31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3" office:value-type="float" office:value="4030" calcext:value-type="float">
            <text:p>403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466435185185185" calcext:value-type="float">
            <text:p>0,00046643518518518500</text:p>
          </table:table-cell>
          <table:table-cell table:formula="of:=[.D312]-[.D31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3" office:value-type="float" office:value="4043" calcext:value-type="float">
            <text:p>4043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467939814814815" calcext:value-type="float">
            <text:p>0,00046793981481481500</text:p>
          </table:table-cell>
          <table:table-cell table:formula="of:=[.D313]-[.D31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3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469444444444444" calcext:value-type="float">
            <text:p>0,00046944444444444400</text:p>
          </table:table-cell>
          <table:table-cell table:formula="of:=[.D314]-[.D313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3" office:value-type="float" office:value="4069" calcext:value-type="float">
            <text:p>4069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470949074074074" calcext:value-type="float">
            <text:p>0,00047094907407407400</text:p>
          </table:table-cell>
          <table:table-cell table:formula="of:=[.D315]-[.D31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3" office:value-type="float" office:value="4082" calcext:value-type="float">
            <text:p>408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472453703703704" calcext:value-type="float">
            <text:p>0,00047245370370370400</text:p>
          </table:table-cell>
          <table:table-cell table:formula="of:=[.D316]-[.D31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3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473958333333333" calcext:value-type="float">
            <text:p>0,00047395833333333300</text:p>
          </table:table-cell>
          <table:table-cell table:formula="of:=[.D317]-[.D31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3" office:value-type="float" office:value="4108" calcext:value-type="float">
            <text:p>410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475462962962963" calcext:value-type="float">
            <text:p>0,00047546296296296300</text:p>
          </table:table-cell>
          <table:table-cell table:formula="of:=[.D318]-[.D31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3" office:value-type="float" office:value="4121" calcext:value-type="float">
            <text:p>4121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476967592592593" calcext:value-type="float">
            <text:p>0,00047696759259259300</text:p>
          </table:table-cell>
          <table:table-cell table:formula="of:=[.D319]-[.D31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3" office:value-type="float" office:value="4134" calcext:value-type="float">
            <text:p>413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478472222222222" calcext:value-type="float">
            <text:p>0,00047847222222222200</text:p>
          </table:table-cell>
          <table:table-cell table:formula="of:=[.D320]-[.D319]" office:value-type="float" office:value="0.00000150462962962967" calcext:value-type="float">
            <text:p>0,000001504629629629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3" office:value-type="float" office:value="4147" calcext:value-type="float">
            <text:p>4147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479976851851852" calcext:value-type="float">
            <text:p>0,00047997685185185200</text:p>
          </table:table-cell>
          <table:table-cell table:formula="of:=[.D321]-[.D32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3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481481481481482" calcext:value-type="float">
            <text:p>0,00048148148148148200</text:p>
          </table:table-cell>
          <table:table-cell table:formula="of:=[.D322]-[.D32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3" office:value-type="float" office:value="4173" calcext:value-type="float">
            <text:p>4173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482986111111111" calcext:value-type="float">
            <text:p>0,00048298611111111100</text:p>
          </table:table-cell>
          <table:table-cell table:formula="of:=[.D323]-[.D32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3" office:value-type="float" office:value="4186" calcext:value-type="float">
            <text:p>418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484490740740741" calcext:value-type="float">
            <text:p>0,00048449074074074100</text:p>
          </table:table-cell>
          <table:table-cell table:formula="of:=[.D324]-[.D32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3" office:value-type="float" office:value="4199" calcext:value-type="float">
            <text:p>4199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48599537037037" calcext:value-type="float">
            <text:p>0,00048599537037037000</text:p>
          </table:table-cell>
          <table:table-cell table:formula="of:=[.D325]-[.D32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3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4875" calcext:value-type="float">
            <text:p>0,00048750000000000000</text:p>
          </table:table-cell>
          <table:table-cell table:formula="of:=[.D326]-[.D32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3" office:value-type="float" office:value="4225" calcext:value-type="float">
            <text:p>42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48900462962963" calcext:value-type="float">
            <text:p>0,00048900462962963000</text:p>
          </table:table-cell>
          <table:table-cell table:formula="of:=[.D327]-[.D32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3" office:value-type="float" office:value="4238" calcext:value-type="float">
            <text:p>423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490509259259259" calcext:value-type="float">
            <text:p>0,00049050925925925900</text:p>
          </table:table-cell>
          <table:table-cell table:formula="of:=[.D328]-[.D32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3" office:value-type="float" office:value="4251" calcext:value-type="float">
            <text:p>4251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492013888888889" calcext:value-type="float">
            <text:p>0,00049201388888888900</text:p>
          </table:table-cell>
          <table:table-cell table:formula="of:=[.D329]-[.D32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3" office:value-type="float" office:value="4264" calcext:value-type="float">
            <text:p>426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493518518518519" calcext:value-type="float">
            <text:p>0,00049351851851851900</text:p>
          </table:table-cell>
          <table:table-cell table:formula="of:=[.D330]-[.D32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3" office:value-type="float" office:value="4277" calcext:value-type="float">
            <text:p>4277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495023148148148" calcext:value-type="float">
            <text:p>0,00049502314814814800</text:p>
          </table:table-cell>
          <table:table-cell table:formula="of:=[.D331]-[.D33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3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496527777777778" calcext:value-type="float">
            <text:p>0,00049652777777777800</text:p>
          </table:table-cell>
          <table:table-cell table:formula="of:=[.D332]-[.D33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3" office:value-type="float" office:value="4303" calcext:value-type="float">
            <text:p>4303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498032407407407" calcext:value-type="float">
            <text:p>0,00049803240740740700</text:p>
          </table:table-cell>
          <table:table-cell table:formula="of:=[.D333]-[.D33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3" office:value-type="float" office:value="4316" calcext:value-type="float">
            <text:p>431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499537037037037" calcext:value-type="float">
            <text:p>0,00049953703703703700</text:p>
          </table:table-cell>
          <table:table-cell table:formula="of:=[.D334]-[.D33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3" office:value-type="float" office:value="4329" calcext:value-type="float">
            <text:p>4329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501041666666667" calcext:value-type="float">
            <text:p>0,00050104166666666700</text:p>
          </table:table-cell>
          <table:table-cell table:formula="of:=[.D335]-[.D33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3" office:value-type="float" office:value="4342" calcext:value-type="float">
            <text:p>434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502546296296296" calcext:value-type="float">
            <text:p>0,00050254629629629600</text:p>
          </table:table-cell>
          <table:table-cell table:formula="of:=[.D336]-[.D33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3" office:value-type="float" office:value="4355" calcext:value-type="float">
            <text:p>435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504050925925926" calcext:value-type="float">
            <text:p>0,00050405092592592600</text:p>
          </table:table-cell>
          <table:table-cell table:formula="of:=[.D337]-[.D33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3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505555555555556" calcext:value-type="float">
            <text:p>0,00050555555555555600</text:p>
          </table:table-cell>
          <table:table-cell table:formula="of:=[.D338]-[.D33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3" office:value-type="float" office:value="4381" calcext:value-type="float">
            <text:p>4381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507060185185185" calcext:value-type="float">
            <text:p>0,00050706018518518500</text:p>
          </table:table-cell>
          <table:table-cell table:formula="of:=[.D339]-[.D33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3" office:value-type="float" office:value="4394" calcext:value-type="float">
            <text:p>439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508564814814815" calcext:value-type="float">
            <text:p>0,00050856481481481500</text:p>
          </table:table-cell>
          <table:table-cell table:formula="of:=[.D340]-[.D33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3" office:value-type="float" office:value="4407" calcext:value-type="float">
            <text:p>4407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510069444444444" calcext:value-type="float">
            <text:p>0,00051006944444444400</text:p>
          </table:table-cell>
          <table:table-cell table:formula="of:=[.D341]-[.D34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3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511574074074074" calcext:value-type="float">
            <text:p>0,00051157407407407400</text:p>
          </table:table-cell>
          <table:table-cell table:formula="of:=[.D342]-[.D34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3" office:value-type="float" office:value="4433" calcext:value-type="float">
            <text:p>4433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513078703703704" calcext:value-type="float">
            <text:p>0,00051307870370370400</text:p>
          </table:table-cell>
          <table:table-cell table:formula="of:=[.D343]-[.D34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3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514583333333333" calcext:value-type="float">
            <text:p>0,00051458333333333300</text:p>
          </table:table-cell>
          <table:table-cell table:formula="of:=[.D344]-[.D34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3" office:value-type="float" office:value="4459" calcext:value-type="float">
            <text:p>4459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516087962962963" calcext:value-type="float">
            <text:p>0,00051608796296296300</text:p>
          </table:table-cell>
          <table:table-cell table:formula="of:=[.D345]-[.D34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3" office:value-type="float" office:value="4472" calcext:value-type="float">
            <text:p>447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517592592592593" calcext:value-type="float">
            <text:p>0,00051759259259259300</text:p>
          </table:table-cell>
          <table:table-cell table:formula="of:=[.D346]-[.D34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3" office:value-type="float" office:value="4485" calcext:value-type="float">
            <text:p>448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519097222222222" calcext:value-type="float">
            <text:p>0,00051909722222222200</text:p>
          </table:table-cell>
          <table:table-cell table:formula="of:=[.D347]-[.D34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3" office:value-type="float" office:value="4498" calcext:value-type="float">
            <text:p>449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520601851851852" calcext:value-type="float">
            <text:p>0,00052060185185185200</text:p>
          </table:table-cell>
          <table:table-cell table:formula="of:=[.D348]-[.D34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3" office:value-type="float" office:value="4511" calcext:value-type="float">
            <text:p>4511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522106481481482" calcext:value-type="float">
            <text:p>0,00052210648148148200</text:p>
          </table:table-cell>
          <table:table-cell table:formula="of:=[.D349]-[.D34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3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523611111111111" calcext:value-type="float">
            <text:p>0,00052361111111111100</text:p>
          </table:table-cell>
          <table:table-cell table:formula="of:=[.D350]-[.D34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3" office:value-type="float" office:value="4537" calcext:value-type="float">
            <text:p>4537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525115740740741" calcext:value-type="float">
            <text:p>0,00052511574074074100</text:p>
          </table:table-cell>
          <table:table-cell table:formula="of:=[.D351]-[.D35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3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52662037037037" calcext:value-type="float">
            <text:p>0,00052662037037037000</text:p>
          </table:table-cell>
          <table:table-cell table:formula="of:=[.D352]-[.D35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3" office:value-type="float" office:value="4563" calcext:value-type="float">
            <text:p>4563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528125" calcext:value-type="float">
            <text:p>0,00052812500000000000</text:p>
          </table:table-cell>
          <table:table-cell table:formula="of:=[.D353]-[.D35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3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52962962962963" calcext:value-type="float">
            <text:p>0,00052962962962963000</text:p>
          </table:table-cell>
          <table:table-cell table:formula="of:=[.D354]-[.D35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3" office:value-type="float" office:value="4589" calcext:value-type="float">
            <text:p>4589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531134259259259" calcext:value-type="float">
            <text:p>0,00053113425925925900</text:p>
          </table:table-cell>
          <table:table-cell table:formula="of:=[.D355]-[.D35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3" office:value-type="float" office:value="4602" calcext:value-type="float">
            <text:p>460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532638888888889" calcext:value-type="float">
            <text:p>0,00053263888888888900</text:p>
          </table:table-cell>
          <table:table-cell table:formula="of:=[.D356]-[.D35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3" office:value-type="float" office:value="4615" calcext:value-type="float">
            <text:p>461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534143518518519" calcext:value-type="float">
            <text:p>0,00053414351851851900</text:p>
          </table:table-cell>
          <table:table-cell table:formula="of:=[.D357]-[.D35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3" office:value-type="float" office:value="4628" calcext:value-type="float">
            <text:p>462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535648148148148" calcext:value-type="float">
            <text:p>0,00053564814814814800</text:p>
          </table:table-cell>
          <table:table-cell table:formula="of:=[.D358]-[.D35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3" office:value-type="float" office:value="4641" calcext:value-type="float">
            <text:p>4641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537152777777778" calcext:value-type="float">
            <text:p>0,00053715277777777800</text:p>
          </table:table-cell>
          <table:table-cell table:formula="of:=[.D359]-[.D35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3" office:value-type="float" office:value="4654" calcext:value-type="float">
            <text:p>465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538657407407407" calcext:value-type="float">
            <text:p>0,00053865740740740700</text:p>
          </table:table-cell>
          <table:table-cell table:formula="of:=[.D360]-[.D35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3" office:value-type="float" office:value="4667" calcext:value-type="float">
            <text:p>4667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540162037037037" calcext:value-type="float">
            <text:p>0,00054016203703703700</text:p>
          </table:table-cell>
          <table:table-cell table:formula="of:=[.D361]-[.D36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3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541666666666667" calcext:value-type="float">
            <text:p>0,00054166666666666700</text:p>
          </table:table-cell>
          <table:table-cell table:formula="of:=[.D362]-[.D36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3" office:value-type="float" office:value="4693" calcext:value-type="float">
            <text:p>4693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543171296296296" calcext:value-type="float">
            <text:p>0,00054317129629629600</text:p>
          </table:table-cell>
          <table:table-cell table:formula="of:=[.D363]-[.D36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3" office:value-type="float" office:value="4706" calcext:value-type="float">
            <text:p>470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544675925925926" calcext:value-type="float">
            <text:p>0,00054467592592592600</text:p>
          </table:table-cell>
          <table:table-cell table:formula="of:=[.D364]-[.D36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3" office:value-type="float" office:value="4719" calcext:value-type="float">
            <text:p>4719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546180555555556" calcext:value-type="float">
            <text:p>0,00054618055555555600</text:p>
          </table:table-cell>
          <table:table-cell table:formula="of:=[.D365]-[.D36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3" office:value-type="float" office:value="4732" calcext:value-type="float">
            <text:p>473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547685185185185" calcext:value-type="float">
            <text:p>0,00054768518518518500</text:p>
          </table:table-cell>
          <table:table-cell table:formula="of:=[.D366]-[.D36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3" office:value-type="float" office:value="4745" calcext:value-type="float">
            <text:p>474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549189814814815" calcext:value-type="float">
            <text:p>0,00054918981481481500</text:p>
          </table:table-cell>
          <table:table-cell table:formula="of:=[.D367]-[.D36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3" office:value-type="float" office:value="4758" calcext:value-type="float">
            <text:p>475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550694444444445" calcext:value-type="float">
            <text:p>0,00055069444444444500</text:p>
          </table:table-cell>
          <table:table-cell table:formula="of:=[.D368]-[.D36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3" office:value-type="float" office:value="4771" calcext:value-type="float">
            <text:p>4771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552199074074074" calcext:value-type="float">
            <text:p>0,00055219907407407400</text:p>
          </table:table-cell>
          <table:table-cell table:formula="of:=[.D369]-[.D36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3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553703703703704" calcext:value-type="float">
            <text:p>0,00055370370370370400</text:p>
          </table:table-cell>
          <table:table-cell table:formula="of:=[.D370]-[.D36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3" office:value-type="float" office:value="4797" calcext:value-type="float">
            <text:p>4797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555208333333333" calcext:value-type="float">
            <text:p>0,00055520833333333300</text:p>
          </table:table-cell>
          <table:table-cell table:formula="of:=[.D371]-[.D37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3" office:value-type="float" office:value="4810" calcext:value-type="float">
            <text:p>481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556712962962963" calcext:value-type="float">
            <text:p>0,00055671296296296300</text:p>
          </table:table-cell>
          <table:table-cell table:formula="of:=[.D372]-[.D37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3" office:value-type="float" office:value="4823" calcext:value-type="float">
            <text:p>4823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558217592592593" calcext:value-type="float">
            <text:p>0,00055821759259259300</text:p>
          </table:table-cell>
          <table:table-cell table:formula="of:=[.D373]-[.D37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3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559722222222222" calcext:value-type="float">
            <text:p>0,00055972222222222200</text:p>
          </table:table-cell>
          <table:table-cell table:formula="of:=[.D374]-[.D37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3" office:value-type="float" office:value="4849" calcext:value-type="float">
            <text:p>4849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561226851851852" calcext:value-type="float">
            <text:p>0,00056122685185185200</text:p>
          </table:table-cell>
          <table:table-cell table:formula="of:=[.D375]-[.D37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3" office:value-type="float" office:value="4862" calcext:value-type="float">
            <text:p>486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562731481481481" calcext:value-type="float">
            <text:p>0,00056273148148148100</text:p>
          </table:table-cell>
          <table:table-cell table:formula="of:=[.D376]-[.D37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3" office:value-type="float" office:value="4875" calcext:value-type="float">
            <text:p>48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564236111111111" calcext:value-type="float">
            <text:p>0,00056423611111111100</text:p>
          </table:table-cell>
          <table:table-cell table:formula="of:=[.D377]-[.D37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3" office:value-type="float" office:value="4888" calcext:value-type="float">
            <text:p>488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565740740740741" calcext:value-type="float">
            <text:p>0,00056574074074074100</text:p>
          </table:table-cell>
          <table:table-cell table:formula="of:=[.D378]-[.D37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3" office:value-type="float" office:value="4901" calcext:value-type="float">
            <text:p>4901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56724537037037" calcext:value-type="float">
            <text:p>0,00056724537037037000</text:p>
          </table:table-cell>
          <table:table-cell table:formula="of:=[.D379]-[.D37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3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56875" calcext:value-type="float">
            <text:p>0,00056875000000000000</text:p>
          </table:table-cell>
          <table:table-cell table:formula="of:=[.D380]-[.D37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3" office:value-type="float" office:value="4927" calcext:value-type="float">
            <text:p>4927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57025462962963" calcext:value-type="float">
            <text:p>0,00057025462962963000</text:p>
          </table:table-cell>
          <table:table-cell table:formula="of:=[.D381]-[.D38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3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571759259259259" calcext:value-type="float">
            <text:p>0,00057175925925925900</text:p>
          </table:table-cell>
          <table:table-cell table:formula="of:=[.D382]-[.D38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3" office:value-type="float" office:value="4953" calcext:value-type="float">
            <text:p>4953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573263888888889" calcext:value-type="float">
            <text:p>0,00057326388888888900</text:p>
          </table:table-cell>
          <table:table-cell table:formula="of:=[.D383]-[.D38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3" office:value-type="float" office:value="4966" calcext:value-type="float">
            <text:p>496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574768518518519" calcext:value-type="float">
            <text:p>0,00057476851851851900</text:p>
          </table:table-cell>
          <table:table-cell table:formula="of:=[.D384]-[.D38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3" office:value-type="float" office:value="4979" calcext:value-type="float">
            <text:p>4979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576273148148148" calcext:value-type="float">
            <text:p>0,00057627314814814800</text:p>
          </table:table-cell>
          <table:table-cell table:formula="of:=[.D385]-[.D38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3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577777777777778" calcext:value-type="float">
            <text:p>0,00057777777777777800</text:p>
          </table:table-cell>
          <table:table-cell table:formula="of:=[.D386]-[.D38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3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579282407407407" calcext:value-type="float">
            <text:p>0,00057928240740740700</text:p>
          </table:table-cell>
          <table:table-cell table:formula="of:=[.D387]-[.D38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3" office:value-type="float" office:value="5018" calcext:value-type="float">
            <text:p>501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580787037037037" calcext:value-type="float">
            <text:p>0,00058078703703703700</text:p>
          </table:table-cell>
          <table:table-cell table:formula="of:=[.D388]-[.D38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3" office:value-type="float" office:value="5031" calcext:value-type="float">
            <text:p>5031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582291666666667" calcext:value-type="float">
            <text:p>0,00058229166666666700</text:p>
          </table:table-cell>
          <table:table-cell table:formula="of:=[.D389]-[.D38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3" office:value-type="float" office:value="5044" calcext:value-type="float">
            <text:p>504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583796296296296" calcext:value-type="float">
            <text:p>0,00058379629629629600</text:p>
          </table:table-cell>
          <table:table-cell table:formula="of:=[.D390]-[.D38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3" office:value-type="float" office:value="5057" calcext:value-type="float">
            <text:p>5057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585300925925926" calcext:value-type="float">
            <text:p>0,00058530092592592600</text:p>
          </table:table-cell>
          <table:table-cell table:formula="of:=[.D391]-[.D39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3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586805555555556" calcext:value-type="float">
            <text:p>0,00058680555555555600</text:p>
          </table:table-cell>
          <table:table-cell table:formula="of:=[.D392]-[.D39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3" office:value-type="float" office:value="5083" calcext:value-type="float">
            <text:p>5083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588310185185185" calcext:value-type="float">
            <text:p>0,00058831018518518500</text:p>
          </table:table-cell>
          <table:table-cell table:formula="of:=[.D393]-[.D39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3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589814814814815" calcext:value-type="float">
            <text:p>0,00058981481481481500</text:p>
          </table:table-cell>
          <table:table-cell table:formula="of:=[.D394]-[.D39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3" office:value-type="float" office:value="5109" calcext:value-type="float">
            <text:p>5109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591319444444444" calcext:value-type="float">
            <text:p>0,00059131944444444400</text:p>
          </table:table-cell>
          <table:table-cell table:formula="of:=[.D395]-[.D39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3" office:value-type="float" office:value="5122" calcext:value-type="float">
            <text:p>512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592824074074074" calcext:value-type="float">
            <text:p>0,00059282407407407400</text:p>
          </table:table-cell>
          <table:table-cell table:formula="of:=[.D396]-[.D39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3" office:value-type="float" office:value="5135" calcext:value-type="float">
            <text:p>513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594328703703704" calcext:value-type="float">
            <text:p>0,00059432870370370400</text:p>
          </table:table-cell>
          <table:table-cell table:formula="of:=[.D397]-[.D39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3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595833333333333" calcext:value-type="float">
            <text:p>0,00059583333333333300</text:p>
          </table:table-cell>
          <table:table-cell table:formula="of:=[.D398]-[.D39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3" office:value-type="float" office:value="5161" calcext:value-type="float">
            <text:p>5161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597337962962963" calcext:value-type="float">
            <text:p>0,00059733796296296300</text:p>
          </table:table-cell>
          <table:table-cell table:formula="of:=[.D399]-[.D39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3" office:value-type="float" office:value="5174" calcext:value-type="float">
            <text:p>517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598842592592593" calcext:value-type="float">
            <text:p>0,00059884259259259300</text:p>
          </table:table-cell>
          <table:table-cell table:formula="of:=[.D400]-[.D39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3" office:value-type="float" office:value="5187" calcext:value-type="float">
            <text:p>5187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600347222222222" calcext:value-type="float">
            <text:p>0,00060034722222222200</text:p>
          </table:table-cell>
          <table:table-cell table:formula="of:=[.D401]-[.D40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3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601851851851852" calcext:value-type="float">
            <text:p>0,00060185185185185200</text:p>
          </table:table-cell>
          <table:table-cell table:formula="of:=[.D402]-[.D40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3" office:value-type="float" office:value="5213" calcext:value-type="float">
            <text:p>5213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603356481481482" calcext:value-type="float">
            <text:p>0,00060335648148148200</text:p>
          </table:table-cell>
          <table:table-cell table:formula="of:=[.D403]-[.D40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3" office:value-type="float" office:value="5226" calcext:value-type="float">
            <text:p>522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604861111111111" calcext:value-type="float">
            <text:p>0,00060486111111111100</text:p>
          </table:table-cell>
          <table:table-cell table:formula="of:=[.D404]-[.D40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3" office:value-type="float" office:value="5239" calcext:value-type="float">
            <text:p>5239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606365740740741" calcext:value-type="float">
            <text:p>0,00060636574074074100</text:p>
          </table:table-cell>
          <table:table-cell table:formula="of:=[.D405]-[.D40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3" office:value-type="float" office:value="5252" calcext:value-type="float">
            <text:p>525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60787037037037" calcext:value-type="float">
            <text:p>0,00060787037037037000</text:p>
          </table:table-cell>
          <table:table-cell table:formula="of:=[.D406]-[.D40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3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609375" calcext:value-type="float">
            <text:p>0,00060937500000000000</text:p>
          </table:table-cell>
          <table:table-cell table:formula="of:=[.D407]-[.D40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3" office:value-type="float" office:value="5278" calcext:value-type="float">
            <text:p>527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61087962962963" calcext:value-type="float">
            <text:p>0,00061087962962963000</text:p>
          </table:table-cell>
          <table:table-cell table:formula="of:=[.D408]-[.D40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3" office:value-type="float" office:value="5291" calcext:value-type="float">
            <text:p>5291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612384259259259" calcext:value-type="float">
            <text:p>0,00061238425925925900</text:p>
          </table:table-cell>
          <table:table-cell table:formula="of:=[.D409]-[.D40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3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613888888888889" calcext:value-type="float">
            <text:p>0,00061388888888888900</text:p>
          </table:table-cell>
          <table:table-cell table:formula="of:=[.D410]-[.D40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3" office:value-type="float" office:value="5317" calcext:value-type="float">
            <text:p>5317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615393518518519" calcext:value-type="float">
            <text:p>0,00061539351851851900</text:p>
          </table:table-cell>
          <table:table-cell table:formula="of:=[.D411]-[.D41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3" office:value-type="float" office:value="5330" calcext:value-type="float">
            <text:p>533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616898148148148" calcext:value-type="float">
            <text:p>0,00061689814814814800</text:p>
          </table:table-cell>
          <table:table-cell table:formula="of:=[.D412]-[.D41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3" office:value-type="float" office:value="5343" calcext:value-type="float">
            <text:p>5343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618402777777778" calcext:value-type="float">
            <text:p>0,00061840277777777800</text:p>
          </table:table-cell>
          <table:table-cell table:formula="of:=[.D413]-[.D41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3" office:value-type="float" office:value="5356" calcext:value-type="float">
            <text:p>535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619907407407408" calcext:value-type="float">
            <text:p>0,00061990740740740800</text:p>
          </table:table-cell>
          <table:table-cell table:formula="of:=[.D414]-[.D41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3" office:value-type="float" office:value="5369" calcext:value-type="float">
            <text:p>5369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621412037037037" calcext:value-type="float">
            <text:p>0,00062141203703703700</text:p>
          </table:table-cell>
          <table:table-cell table:formula="of:=[.D415]-[.D41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3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622916666666667" calcext:value-type="float">
            <text:p>0,00062291666666666700</text:p>
          </table:table-cell>
          <table:table-cell table:formula="of:=[.D416]-[.D41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3" office:value-type="float" office:value="5395" calcext:value-type="float">
            <text:p>539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624421296296296" calcext:value-type="float">
            <text:p>0,00062442129629629600</text:p>
          </table:table-cell>
          <table:table-cell table:formula="of:=[.D417]-[.D41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3" office:value-type="float" office:value="5408" calcext:value-type="float">
            <text:p>540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625925925925926" calcext:value-type="float">
            <text:p>0,00062592592592592600</text:p>
          </table:table-cell>
          <table:table-cell table:formula="of:=[.D418]-[.D41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3" office:value-type="float" office:value="5421" calcext:value-type="float">
            <text:p>5421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627430555555556" calcext:value-type="float">
            <text:p>0,00062743055555555600</text:p>
          </table:table-cell>
          <table:table-cell table:formula="of:=[.D419]-[.D41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3" office:value-type="float" office:value="5434" calcext:value-type="float">
            <text:p>543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628935185185185" calcext:value-type="float">
            <text:p>0,00062893518518518500</text:p>
          </table:table-cell>
          <table:table-cell table:formula="of:=[.D420]-[.D41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3" office:value-type="float" office:value="5447" calcext:value-type="float">
            <text:p>5447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630439814814815" calcext:value-type="float">
            <text:p>0,00063043981481481500</text:p>
          </table:table-cell>
          <table:table-cell table:formula="of:=[.D421]-[.D42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3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631944444444444" calcext:value-type="float">
            <text:p>0,00063194444444444400</text:p>
          </table:table-cell>
          <table:table-cell table:formula="of:=[.D422]-[.D42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3" office:value-type="float" office:value="5473" calcext:value-type="float">
            <text:p>5473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633449074074074" calcext:value-type="float">
            <text:p>0,00063344907407407400</text:p>
          </table:table-cell>
          <table:table-cell table:formula="of:=[.D423]-[.D42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3" office:value-type="float" office:value="5486" calcext:value-type="float">
            <text:p>548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634953703703704" calcext:value-type="float">
            <text:p>0,00063495370370370400</text:p>
          </table:table-cell>
          <table:table-cell table:formula="of:=[.D424]-[.D42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3" office:value-type="float" office:value="5499" calcext:value-type="float">
            <text:p>5499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636458333333333" calcext:value-type="float">
            <text:p>0,00063645833333333300</text:p>
          </table:table-cell>
          <table:table-cell table:formula="of:=[.D425]-[.D42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3" office:value-type="float" office:value="5512" calcext:value-type="float">
            <text:p>551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637962962962963" calcext:value-type="float">
            <text:p>0,00063796296296296300</text:p>
          </table:table-cell>
          <table:table-cell table:formula="of:=[.D426]-[.D42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3" office:value-type="float" office:value="5525" calcext:value-type="float">
            <text:p>55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639467592592593" calcext:value-type="float">
            <text:p>0,00063946759259259300</text:p>
          </table:table-cell>
          <table:table-cell table:formula="of:=[.D427]-[.D42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3" office:value-type="float" office:value="5538" calcext:value-type="float">
            <text:p>553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640972222222222" calcext:value-type="float">
            <text:p>0,00064097222222222200</text:p>
          </table:table-cell>
          <table:table-cell table:formula="of:=[.D428]-[.D42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3" office:value-type="float" office:value="5551" calcext:value-type="float">
            <text:p>5551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642476851851852" calcext:value-type="float">
            <text:p>0,00064247685185185200</text:p>
          </table:table-cell>
          <table:table-cell table:formula="of:=[.D429]-[.D42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3" office:value-type="float" office:value="5564" calcext:value-type="float">
            <text:p>556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643981481481482" calcext:value-type="float">
            <text:p>0,00064398148148148200</text:p>
          </table:table-cell>
          <table:table-cell table:formula="of:=[.D430]-[.D42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3" office:value-type="float" office:value="5577" calcext:value-type="float">
            <text:p>5577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645486111111111" calcext:value-type="float">
            <text:p>0,00064548611111111100</text:p>
          </table:table-cell>
          <table:table-cell table:formula="of:=[.D431]-[.D43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3" office:value-type="float" office:value="5590" calcext:value-type="float">
            <text:p>559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646990740740741" calcext:value-type="float">
            <text:p>0,00064699074074074100</text:p>
          </table:table-cell>
          <table:table-cell table:formula="of:=[.D432]-[.D43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3" office:value-type="float" office:value="5603" calcext:value-type="float">
            <text:p>5603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64849537037037" calcext:value-type="float">
            <text:p>0,00064849537037037000</text:p>
          </table:table-cell>
          <table:table-cell table:formula="of:=[.D433]-[.D43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3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65" calcext:value-type="float">
            <text:p>0,00065000000000000000</text:p>
          </table:table-cell>
          <table:table-cell table:formula="of:=[.D434]-[.D43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3" office:value-type="float" office:value="5629" calcext:value-type="float">
            <text:p>5629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65150462962963" calcext:value-type="float">
            <text:p>0,00065150462962963000</text:p>
          </table:table-cell>
          <table:table-cell table:formula="of:=[.D435]-[.D43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3" office:value-type="float" office:value="5642" calcext:value-type="float">
            <text:p>564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653009259259259" calcext:value-type="float">
            <text:p>0,00065300925925925900</text:p>
          </table:table-cell>
          <table:table-cell table:formula="of:=[.D436]-[.D43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3" office:value-type="float" office:value="5655" calcext:value-type="float">
            <text:p>565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654513888888889" calcext:value-type="float">
            <text:p>0,00065451388888888900</text:p>
          </table:table-cell>
          <table:table-cell table:formula="of:=[.D437]-[.D43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3" office:value-type="float" office:value="5668" calcext:value-type="float">
            <text:p>566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656018518518519" calcext:value-type="float">
            <text:p>0,00065601851851851900</text:p>
          </table:table-cell>
          <table:table-cell table:formula="of:=[.D438]-[.D43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3" office:value-type="float" office:value="5681" calcext:value-type="float">
            <text:p>5681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657523148148148" calcext:value-type="float">
            <text:p>0,00065752314814814800</text:p>
          </table:table-cell>
          <table:table-cell table:formula="of:=[.D439]-[.D43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3" office:value-type="float" office:value="5694" calcext:value-type="float">
            <text:p>569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659027777777778" calcext:value-type="float">
            <text:p>0,00065902777777777800</text:p>
          </table:table-cell>
          <table:table-cell table:formula="of:=[.D440]-[.D43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3" office:value-type="float" office:value="5707" calcext:value-type="float">
            <text:p>5707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660532407407407" calcext:value-type="float">
            <text:p>0,00066053240740740700</text:p>
          </table:table-cell>
          <table:table-cell table:formula="of:=[.D441]-[.D44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3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662037037037037" calcext:value-type="float">
            <text:p>0,00066203703703703700</text:p>
          </table:table-cell>
          <table:table-cell table:formula="of:=[.D442]-[.D44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3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663541666666667" calcext:value-type="float">
            <text:p>0,00066354166666666700</text:p>
          </table:table-cell>
          <table:table-cell table:formula="of:=[.D443]-[.D44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3" office:value-type="float" office:value="5746" calcext:value-type="float">
            <text:p>574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665046296296296" calcext:value-type="float">
            <text:p>0,00066504629629629600</text:p>
          </table:table-cell>
          <table:table-cell table:formula="of:=[.D444]-[.D44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3" office:value-type="float" office:value="5759" calcext:value-type="float">
            <text:p>5759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666550925925926" calcext:value-type="float">
            <text:p>0,00066655092592592600</text:p>
          </table:table-cell>
          <table:table-cell table:formula="of:=[.D445]-[.D44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3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668055555555556" calcext:value-type="float">
            <text:p>0,00066805555555555600</text:p>
          </table:table-cell>
          <table:table-cell table:formula="of:=[.D446]-[.D44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3" office:value-type="float" office:value="5785" calcext:value-type="float">
            <text:p>578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669560185185185" calcext:value-type="float">
            <text:p>0,00066956018518518500</text:p>
          </table:table-cell>
          <table:table-cell table:formula="of:=[.D447]-[.D44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3" office:value-type="float" office:value="5798" calcext:value-type="float">
            <text:p>579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671064814814815" calcext:value-type="float">
            <text:p>0,00067106481481481500</text:p>
          </table:table-cell>
          <table:table-cell table:formula="of:=[.D448]-[.D44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3" office:value-type="float" office:value="5811" calcext:value-type="float">
            <text:p>5811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672569444444445" calcext:value-type="float">
            <text:p>0,00067256944444444500</text:p>
          </table:table-cell>
          <table:table-cell table:formula="of:=[.D449]-[.D44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3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674074074074074" calcext:value-type="float">
            <text:p>0,00067407407407407400</text:p>
          </table:table-cell>
          <table:table-cell table:formula="of:=[.D450]-[.D44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3" office:value-type="float" office:value="5837" calcext:value-type="float">
            <text:p>5837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675578703703704" calcext:value-type="float">
            <text:p>0,00067557870370370400</text:p>
          </table:table-cell>
          <table:table-cell table:formula="of:=[.D451]-[.D45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3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677083333333333" calcext:value-type="float">
            <text:p>0,00067708333333333300</text:p>
          </table:table-cell>
          <table:table-cell table:formula="of:=[.D452]-[.D45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3" office:value-type="float" office:value="5863" calcext:value-type="float">
            <text:p>5863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678587962962963" calcext:value-type="float">
            <text:p>0,00067858796296296300</text:p>
          </table:table-cell>
          <table:table-cell table:formula="of:=[.D453]-[.D45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3" office:value-type="float" office:value="5876" calcext:value-type="float">
            <text:p>587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680092592592593" calcext:value-type="float">
            <text:p>0,00068009259259259300</text:p>
          </table:table-cell>
          <table:table-cell table:formula="of:=[.D454]-[.D45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3" office:value-type="float" office:value="5889" calcext:value-type="float">
            <text:p>5889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681597222222222" calcext:value-type="float">
            <text:p>0,00068159722222222200</text:p>
          </table:table-cell>
          <table:table-cell table:formula="of:=[.D455]-[.D45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3" office:value-type="float" office:value="5902" calcext:value-type="float">
            <text:p>590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683101851851852" calcext:value-type="float">
            <text:p>0,00068310185185185200</text:p>
          </table:table-cell>
          <table:table-cell table:formula="of:=[.D456]-[.D45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3" office:value-type="float" office:value="5915" calcext:value-type="float">
            <text:p>591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684606481481482" calcext:value-type="float">
            <text:p>0,00068460648148148200</text:p>
          </table:table-cell>
          <table:table-cell table:formula="of:=[.D457]-[.D45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3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686111111111111" calcext:value-type="float">
            <text:p>0,00068611111111111100</text:p>
          </table:table-cell>
          <table:table-cell table:formula="of:=[.D458]-[.D45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3" office:value-type="float" office:value="5941" calcext:value-type="float">
            <text:p>5941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687615740740741" calcext:value-type="float">
            <text:p>0,00068761574074074100</text:p>
          </table:table-cell>
          <table:table-cell table:formula="of:=[.D459]-[.D45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3" office:value-type="float" office:value="5954" calcext:value-type="float">
            <text:p>595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68912037037037" calcext:value-type="float">
            <text:p>0,00068912037037037000</text:p>
          </table:table-cell>
          <table:table-cell table:formula="of:=[.D460]-[.D45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3" office:value-type="float" office:value="5967" calcext:value-type="float">
            <text:p>5967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690625" calcext:value-type="float">
            <text:p>0,00069062500000000000</text:p>
          </table:table-cell>
          <table:table-cell table:formula="of:=[.D461]-[.D46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3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69212962962963" calcext:value-type="float">
            <text:p>0,00069212962962963000</text:p>
          </table:table-cell>
          <table:table-cell table:formula="of:=[.D462]-[.D46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3" office:value-type="float" office:value="5993" calcext:value-type="float">
            <text:p>5993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693634259259259" calcext:value-type="float">
            <text:p>0,00069363425925925900</text:p>
          </table:table-cell>
          <table:table-cell table:formula="of:=[.D463]-[.D46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3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695138888888889" calcext:value-type="float">
            <text:p>0,00069513888888888900</text:p>
          </table:table-cell>
          <table:table-cell table:formula="of:=[.D464]-[.D46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3" office:value-type="float" office:value="6019" calcext:value-type="float">
            <text:p>6019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696643518518519" calcext:value-type="float">
            <text:p>0,00069664351851851900</text:p>
          </table:table-cell>
          <table:table-cell table:formula="of:=[.D465]-[.D46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3" office:value-type="float" office:value="6032" calcext:value-type="float">
            <text:p>603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698148148148148" calcext:value-type="float">
            <text:p>0,00069814814814814800</text:p>
          </table:table-cell>
          <table:table-cell table:formula="of:=[.D466]-[.D46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3" office:value-type="float" office:value="6045" calcext:value-type="float">
            <text:p>604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699652777777778" calcext:value-type="float">
            <text:p>0,00069965277777777800</text:p>
          </table:table-cell>
          <table:table-cell table:formula="of:=[.D467]-[.D46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3" office:value-type="float" office:value="6058" calcext:value-type="float">
            <text:p>605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701157407407407" calcext:value-type="float">
            <text:p>0,00070115740740740700</text:p>
          </table:table-cell>
          <table:table-cell table:formula="of:=[.D468]-[.D46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3" office:value-type="float" office:value="6071" calcext:value-type="float">
            <text:p>6071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702662037037037" calcext:value-type="float">
            <text:p>0,00070266203703703700</text:p>
          </table:table-cell>
          <table:table-cell table:formula="of:=[.D469]-[.D46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3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704166666666667" calcext:value-type="float">
            <text:p>0,00070416666666666700</text:p>
          </table:table-cell>
          <table:table-cell table:formula="of:=[.D470]-[.D46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3" office:value-type="float" office:value="6097" calcext:value-type="float">
            <text:p>6097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705671296296296" calcext:value-type="float">
            <text:p>0,00070567129629629600</text:p>
          </table:table-cell>
          <table:table-cell table:formula="of:=[.D471]-[.D47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3" office:value-type="float" office:value="6110" calcext:value-type="float">
            <text:p>611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707175925925926" calcext:value-type="float">
            <text:p>0,00070717592592592600</text:p>
          </table:table-cell>
          <table:table-cell table:formula="of:=[.D472]-[.D47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3" office:value-type="float" office:value="6123" calcext:value-type="float">
            <text:p>6123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708680555555556" calcext:value-type="float">
            <text:p>0,00070868055555555600</text:p>
          </table:table-cell>
          <table:table-cell table:formula="of:=[.D473]-[.D47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3" office:value-type="float" office:value="6136" calcext:value-type="float">
            <text:p>613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710185185185185" calcext:value-type="float">
            <text:p>0,00071018518518518500</text:p>
          </table:table-cell>
          <table:table-cell table:formula="of:=[.D474]-[.D47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3" office:value-type="float" office:value="6149" calcext:value-type="float">
            <text:p>6149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711689814814815" calcext:value-type="float">
            <text:p>0,00071168981481481500</text:p>
          </table:table-cell>
          <table:table-cell table:formula="of:=[.D475]-[.D47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3" office:value-type="float" office:value="6162" calcext:value-type="float">
            <text:p>616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713194444444445" calcext:value-type="float">
            <text:p>0,00071319444444444500</text:p>
          </table:table-cell>
          <table:table-cell table:formula="of:=[.D476]-[.D47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3" office:value-type="float" office:value="6175" calcext:value-type="float">
            <text:p>61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714699074074074" calcext:value-type="float">
            <text:p>0,00071469907407407400</text:p>
          </table:table-cell>
          <table:table-cell table:formula="of:=[.D477]-[.D47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3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716203703703704" calcext:value-type="float">
            <text:p>0,00071620370370370400</text:p>
          </table:table-cell>
          <table:table-cell table:formula="of:=[.D478]-[.D47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3" office:value-type="float" office:value="6201" calcext:value-type="float">
            <text:p>6201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717708333333333" calcext:value-type="float">
            <text:p>0,00071770833333333300</text:p>
          </table:table-cell>
          <table:table-cell table:formula="of:=[.D479]-[.D47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3" office:value-type="float" office:value="6214" calcext:value-type="float">
            <text:p>621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719212962962963" calcext:value-type="float">
            <text:p>0,00071921296296296300</text:p>
          </table:table-cell>
          <table:table-cell table:formula="of:=[.D480]-[.D47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3" office:value-type="float" office:value="6227" calcext:value-type="float">
            <text:p>6227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720717592592593" calcext:value-type="float">
            <text:p>0,00072071759259259300</text:p>
          </table:table-cell>
          <table:table-cell table:formula="of:=[.D481]-[.D48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3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722222222222222" calcext:value-type="float">
            <text:p>0,00072222222222222200</text:p>
          </table:table-cell>
          <table:table-cell table:formula="of:=[.D482]-[.D48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3" office:value-type="float" office:value="6253" calcext:value-type="float">
            <text:p>6253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723726851851852" calcext:value-type="float">
            <text:p>0,00072372685185185200</text:p>
          </table:table-cell>
          <table:table-cell table:formula="of:=[.D483]-[.D48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3" office:value-type="float" office:value="6266" calcext:value-type="float">
            <text:p>626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725231481481481" calcext:value-type="float">
            <text:p>0,00072523148148148100</text:p>
          </table:table-cell>
          <table:table-cell table:formula="of:=[.D484]-[.D48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3" office:value-type="float" office:value="6279" calcext:value-type="float">
            <text:p>6279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726736111111111" calcext:value-type="float">
            <text:p>0,00072673611111111100</text:p>
          </table:table-cell>
          <table:table-cell table:formula="of:=[.D485]-[.D48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3" office:value-type="float" office:value="6292" calcext:value-type="float">
            <text:p>629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728240740740741" calcext:value-type="float">
            <text:p>0,00072824074074074100</text:p>
          </table:table-cell>
          <table:table-cell table:formula="of:=[.D486]-[.D48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3" office:value-type="float" office:value="6305" calcext:value-type="float">
            <text:p>630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72974537037037" calcext:value-type="float">
            <text:p>0,00072974537037037000</text:p>
          </table:table-cell>
          <table:table-cell table:formula="of:=[.D487]-[.D48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3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73125" calcext:value-type="float">
            <text:p>0,00073125000000000000</text:p>
          </table:table-cell>
          <table:table-cell table:formula="of:=[.D488]-[.D48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3" office:value-type="float" office:value="6331" calcext:value-type="float">
            <text:p>6331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73275462962963" calcext:value-type="float">
            <text:p>0,00073275462962963000</text:p>
          </table:table-cell>
          <table:table-cell table:formula="of:=[.D489]-[.D48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3" office:value-type="float" office:value="6344" calcext:value-type="float">
            <text:p>634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734259259259259" calcext:value-type="float">
            <text:p>0,00073425925925925900</text:p>
          </table:table-cell>
          <table:table-cell table:formula="of:=[.D490]-[.D48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3" office:value-type="float" office:value="6357" calcext:value-type="float">
            <text:p>6357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735763888888889" calcext:value-type="float">
            <text:p>0,00073576388888888900</text:p>
          </table:table-cell>
          <table:table-cell table:formula="of:=[.D491]-[.D49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3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737268518518519" calcext:value-type="float">
            <text:p>0,00073726851851851900</text:p>
          </table:table-cell>
          <table:table-cell table:formula="of:=[.D492]-[.D49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3" office:value-type="float" office:value="6383" calcext:value-type="float">
            <text:p>6383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738773148148148" calcext:value-type="float">
            <text:p>0,00073877314814814800</text:p>
          </table:table-cell>
          <table:table-cell table:formula="of:=[.D493]-[.D49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3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740277777777778" calcext:value-type="float">
            <text:p>0,00074027777777777800</text:p>
          </table:table-cell>
          <table:table-cell table:formula="of:=[.D494]-[.D49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3" office:value-type="float" office:value="6409" calcext:value-type="float">
            <text:p>6409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741782407407407" calcext:value-type="float">
            <text:p>0,00074178240740740700</text:p>
          </table:table-cell>
          <table:table-cell table:formula="of:=[.D495]-[.D49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3" office:value-type="float" office:value="6422" calcext:value-type="float">
            <text:p>642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743287037037037" calcext:value-type="float">
            <text:p>0,00074328703703703700</text:p>
          </table:table-cell>
          <table:table-cell table:formula="of:=[.D496]-[.D49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3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744791666666667" calcext:value-type="float">
            <text:p>0,00074479166666666700</text:p>
          </table:table-cell>
          <table:table-cell table:formula="of:=[.D497]-[.D49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3" office:value-type="float" office:value="6448" calcext:value-type="float">
            <text:p>644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746296296296296" calcext:value-type="float">
            <text:p>0,00074629629629629600</text:p>
          </table:table-cell>
          <table:table-cell table:formula="of:=[.D498]-[.D49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3" office:value-type="float" office:value="6461" calcext:value-type="float">
            <text:p>6461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747800925925926" calcext:value-type="float">
            <text:p>0,00074780092592592600</text:p>
          </table:table-cell>
          <table:table-cell table:formula="of:=[.D499]-[.D49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3" office:value-type="float" office:value="6474" calcext:value-type="float">
            <text:p>647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749305555555556" calcext:value-type="float">
            <text:p>0,00074930555555555600</text:p>
          </table:table-cell>
          <table:table-cell table:formula="of:=[.D500]-[.D49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3" office:value-type="float" office:value="6487" calcext:value-type="float">
            <text:p>6487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750810185185185" calcext:value-type="float">
            <text:p>0,00075081018518518500</text:p>
          </table:table-cell>
          <table:table-cell table:formula="of:=[.D501]-[.D50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3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752314814814815" calcext:value-type="float">
            <text:p>0,00075231481481481500</text:p>
          </table:table-cell>
          <table:table-cell table:formula="of:=[.D502]-[.D50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3" office:value-type="float" office:value="6513" calcext:value-type="float">
            <text:p>6513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753819444444444" calcext:value-type="float">
            <text:p>0,00075381944444444400</text:p>
          </table:table-cell>
          <table:table-cell table:formula="of:=[.D503]-[.D50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3" office:value-type="float" office:value="6526" calcext:value-type="float">
            <text:p>652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755324074074074" calcext:value-type="float">
            <text:p>0,00075532407407407400</text:p>
          </table:table-cell>
          <table:table-cell table:formula="of:=[.D504]-[.D50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3" office:value-type="float" office:value="6539" calcext:value-type="float">
            <text:p>6539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756828703703704" calcext:value-type="float">
            <text:p>0,00075682870370370400</text:p>
          </table:table-cell>
          <table:table-cell table:formula="of:=[.D505]-[.D50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3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758333333333333" calcext:value-type="float">
            <text:p>0,00075833333333333300</text:p>
          </table:table-cell>
          <table:table-cell table:formula="of:=[.D506]-[.D50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3" office:value-type="float" office:value="6565" calcext:value-type="float">
            <text:p>656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759837962962963" calcext:value-type="float">
            <text:p>0,00075983796296296300</text:p>
          </table:table-cell>
          <table:table-cell table:formula="of:=[.D507]-[.D50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3" office:value-type="float" office:value="6578" calcext:value-type="float">
            <text:p>657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761342592592593" calcext:value-type="float">
            <text:p>0,00076134259259259200</text:p>
          </table:table-cell>
          <table:table-cell table:formula="of:=[.D508]-[.D50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3" office:value-type="float" office:value="6591" calcext:value-type="float">
            <text:p>6591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762847222222222" calcext:value-type="float">
            <text:p>0,00076284722222222200</text:p>
          </table:table-cell>
          <table:table-cell table:formula="of:=[.D509]-[.D50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3" office:value-type="float" office:value="6604" calcext:value-type="float">
            <text:p>660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764351851851852" calcext:value-type="float">
            <text:p>0,00076435185185185200</text:p>
          </table:table-cell>
          <table:table-cell table:formula="of:=[.D510]-[.D50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3" office:value-type="float" office:value="6617" calcext:value-type="float">
            <text:p>6617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765856481481482" calcext:value-type="float">
            <text:p>0,00076585648148148100</text:p>
          </table:table-cell>
          <table:table-cell table:formula="of:=[.D511]-[.D51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3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767361111111111" calcext:value-type="float">
            <text:p>0,00076736111111111100</text:p>
          </table:table-cell>
          <table:table-cell table:formula="of:=[.D512]-[.D51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3" office:value-type="float" office:value="6643" calcext:value-type="float">
            <text:p>6643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768865740740741" calcext:value-type="float">
            <text:p>0,00076886574074074100</text:p>
          </table:table-cell>
          <table:table-cell table:formula="of:=[.D513]-[.D51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3" office:value-type="float" office:value="6656" calcext:value-type="float">
            <text:p>665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77037037037037" calcext:value-type="float">
            <text:p>0,00077037037037037000</text:p>
          </table:table-cell>
          <table:table-cell table:formula="of:=[.D514]-[.D51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3" office:value-type="float" office:value="6669" calcext:value-type="float">
            <text:p>6669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771875" calcext:value-type="float">
            <text:p>0,00077187500000000000</text:p>
          </table:table-cell>
          <table:table-cell table:formula="of:=[.D515]-[.D51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3" office:value-type="float" office:value="6682" calcext:value-type="float">
            <text:p>668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77337962962963" calcext:value-type="float">
            <text:p>0,00077337962962963000</text:p>
          </table:table-cell>
          <table:table-cell table:formula="of:=[.D516]-[.D51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3" office:value-type="float" office:value="6695" calcext:value-type="float">
            <text:p>669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774884259259259" calcext:value-type="float">
            <text:p>0,00077488425925925900</text:p>
          </table:table-cell>
          <table:table-cell table:formula="of:=[.D517]-[.D51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3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776388888888889" calcext:value-type="float">
            <text:p>0,00077638888888888900</text:p>
          </table:table-cell>
          <table:table-cell table:formula="of:=[.D518]-[.D51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3" office:value-type="float" office:value="6721" calcext:value-type="float">
            <text:p>6721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777893518518519" calcext:value-type="float">
            <text:p>0,00077789351851851800</text:p>
          </table:table-cell>
          <table:table-cell table:formula="of:=[.D519]-[.D51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3" office:value-type="float" office:value="6734" calcext:value-type="float">
            <text:p>673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779398148148148" calcext:value-type="float">
            <text:p>0,00077939814814814800</text:p>
          </table:table-cell>
          <table:table-cell table:formula="of:=[.D520]-[.D51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3" office:value-type="float" office:value="6747" calcext:value-type="float">
            <text:p>6747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780902777777778" calcext:value-type="float">
            <text:p>0,00078090277777777800</text:p>
          </table:table-cell>
          <table:table-cell table:formula="of:=[.D521]-[.D52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3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782407407407407" calcext:value-type="float">
            <text:p>0,00078240740740740800</text:p>
          </table:table-cell>
          <table:table-cell table:formula="of:=[.D522]-[.D52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3" office:value-type="float" office:value="6773" calcext:value-type="float">
            <text:p>6773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783912037037037" calcext:value-type="float">
            <text:p>0,00078391203703703700</text:p>
          </table:table-cell>
          <table:table-cell table:formula="of:=[.D523]-[.D52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3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785416666666667" calcext:value-type="float">
            <text:p>0,00078541666666666700</text:p>
          </table:table-cell>
          <table:table-cell table:formula="of:=[.D524]-[.D52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3" office:value-type="float" office:value="6799" calcext:value-type="float">
            <text:p>6799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786921296296296" calcext:value-type="float">
            <text:p>0,00078692129629629600</text:p>
          </table:table-cell>
          <table:table-cell table:formula="of:=[.D525]-[.D52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3" office:value-type="float" office:value="6812" calcext:value-type="float">
            <text:p>681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788425925925926" calcext:value-type="float">
            <text:p>0,00078842592592592600</text:p>
          </table:table-cell>
          <table:table-cell table:formula="of:=[.D526]-[.D52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3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789930555555556" calcext:value-type="float">
            <text:p>0,00078993055555555600</text:p>
          </table:table-cell>
          <table:table-cell table:formula="of:=[.D527]-[.D52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3" office:value-type="float" office:value="6838" calcext:value-type="float">
            <text:p>683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791435185185185" calcext:value-type="float">
            <text:p>0,00079143518518518500</text:p>
          </table:table-cell>
          <table:table-cell table:formula="of:=[.D528]-[.D52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3" office:value-type="float" office:value="6851" calcext:value-type="float">
            <text:p>6851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792939814814815" calcext:value-type="float">
            <text:p>0,00079293981481481500</text:p>
          </table:table-cell>
          <table:table-cell table:formula="of:=[.D529]-[.D52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3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794444444444444" calcext:value-type="float">
            <text:p>0,00079444444444444500</text:p>
          </table:table-cell>
          <table:table-cell table:formula="of:=[.D530]-[.D52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3" office:value-type="float" office:value="6877" calcext:value-type="float">
            <text:p>6877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795949074074074" calcext:value-type="float">
            <text:p>0,00079594907407407400</text:p>
          </table:table-cell>
          <table:table-cell table:formula="of:=[.D531]-[.D53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3" office:value-type="float" office:value="6890" calcext:value-type="float">
            <text:p>689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797453703703704" calcext:value-type="float">
            <text:p>0,00079745370370370400</text:p>
          </table:table-cell>
          <table:table-cell table:formula="of:=[.D532]-[.D53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3" office:value-type="float" office:value="6903" calcext:value-type="float">
            <text:p>6903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798958333333333" calcext:value-type="float">
            <text:p>0,00079895833333333400</text:p>
          </table:table-cell>
          <table:table-cell table:formula="of:=[.D533]-[.D53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3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800462962962963" calcext:value-type="float">
            <text:p>0,00080046296296296300</text:p>
          </table:table-cell>
          <table:table-cell table:formula="of:=[.D534]-[.D53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3" office:value-type="float" office:value="6929" calcext:value-type="float">
            <text:p>6929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801967592592593" calcext:value-type="float">
            <text:p>0,00080196759259259300</text:p>
          </table:table-cell>
          <table:table-cell table:formula="of:=[.D535]-[.D53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3" office:value-type="float" office:value="6942" calcext:value-type="float">
            <text:p>694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803472222222222" calcext:value-type="float">
            <text:p>0,00080347222222222200</text:p>
          </table:table-cell>
          <table:table-cell table:formula="of:=[.D536]-[.D53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3" office:value-type="float" office:value="6955" calcext:value-type="float">
            <text:p>695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804976851851852" calcext:value-type="float">
            <text:p>0,00080497685185185200</text:p>
          </table:table-cell>
          <table:table-cell table:formula="of:=[.D537]-[.D53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3" office:value-type="float" office:value="6968" calcext:value-type="float">
            <text:p>696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806481481481482" calcext:value-type="float">
            <text:p>0,00080648148148148200</text:p>
          </table:table-cell>
          <table:table-cell table:formula="of:=[.D538]-[.D53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3" office:value-type="float" office:value="6981" calcext:value-type="float">
            <text:p>6981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807986111111111" calcext:value-type="float">
            <text:p>0,00080798611111111100</text:p>
          </table:table-cell>
          <table:table-cell table:formula="of:=[.D539]-[.D53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3" office:value-type="float" office:value="6994" calcext:value-type="float">
            <text:p>699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809490740740741" calcext:value-type="float">
            <text:p>0,00080949074074074100</text:p>
          </table:table-cell>
          <table:table-cell table:formula="of:=[.D540]-[.D53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3" office:value-type="float" office:value="7007" calcext:value-type="float">
            <text:p>7007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81099537037037" calcext:value-type="float">
            <text:p>0,00081099537037037100</text:p>
          </table:table-cell>
          <table:table-cell table:formula="of:=[.D541]-[.D54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3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8125" calcext:value-type="float">
            <text:p>0,00081250000000000000</text:p>
          </table:table-cell>
          <table:table-cell table:formula="of:=[.D542]-[.D54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3" office:value-type="float" office:value="7033" calcext:value-type="float">
            <text:p>7033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81400462962963" calcext:value-type="float">
            <text:p>0,00081400462962963000</text:p>
          </table:table-cell>
          <table:table-cell table:formula="of:=[.D543]-[.D54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3" office:value-type="float" office:value="7046" calcext:value-type="float">
            <text:p>704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815509259259259" calcext:value-type="float">
            <text:p>0,00081550925925925900</text:p>
          </table:table-cell>
          <table:table-cell table:formula="of:=[.D544]-[.D54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3" office:value-type="float" office:value="7059" calcext:value-type="float">
            <text:p>7059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817013888888889" calcext:value-type="float">
            <text:p>0,00081701388888888900</text:p>
          </table:table-cell>
          <table:table-cell table:formula="of:=[.D545]-[.D54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3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818518518518519" calcext:value-type="float">
            <text:p>0,00081851851851851900</text:p>
          </table:table-cell>
          <table:table-cell table:formula="of:=[.D546]-[.D54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3" office:value-type="float" office:value="7085" calcext:value-type="float">
            <text:p>708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820023148148148" calcext:value-type="float">
            <text:p>0,00082002314814814800</text:p>
          </table:table-cell>
          <table:table-cell table:formula="of:=[.D547]-[.D54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3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821527777777778" calcext:value-type="float">
            <text:p>0,00082152777777777800</text:p>
          </table:table-cell>
          <table:table-cell table:formula="of:=[.D548]-[.D54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3" office:value-type="float" office:value="7111" calcext:value-type="float">
            <text:p>7111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823032407407407" calcext:value-type="float">
            <text:p>0,00082303240740740700</text:p>
          </table:table-cell>
          <table:table-cell table:formula="of:=[.D549]-[.D54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3" office:value-type="float" office:value="7124" calcext:value-type="float">
            <text:p>712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824537037037037" calcext:value-type="float">
            <text:p>0,00082453703703703700</text:p>
          </table:table-cell>
          <table:table-cell table:formula="of:=[.D550]-[.D54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3" office:value-type="float" office:value="7137" calcext:value-type="float">
            <text:p>7137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826041666666667" calcext:value-type="float">
            <text:p>0,00082604166666666700</text:p>
          </table:table-cell>
          <table:table-cell table:formula="of:=[.D551]-[.D55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3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827546296296296" calcext:value-type="float">
            <text:p>0,00082754629629629600</text:p>
          </table:table-cell>
          <table:table-cell table:formula="of:=[.D552]-[.D55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3" office:value-type="float" office:value="7163" calcext:value-type="float">
            <text:p>7163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829050925925926" calcext:value-type="float">
            <text:p>0,00082905092592592600</text:p>
          </table:table-cell>
          <table:table-cell table:formula="of:=[.D553]-[.D55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3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830555555555556" calcext:value-type="float">
            <text:p>0,00083055555555555600</text:p>
          </table:table-cell>
          <table:table-cell table:formula="of:=[.D554]-[.D55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3" office:value-type="float" office:value="7189" calcext:value-type="float">
            <text:p>7189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832060185185185" calcext:value-type="float">
            <text:p>0,00083206018518518500</text:p>
          </table:table-cell>
          <table:table-cell table:formula="of:=[.D555]-[.D55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3" office:value-type="float" office:value="7202" calcext:value-type="float">
            <text:p>720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833564814814815" calcext:value-type="float">
            <text:p>0,00083356481481481500</text:p>
          </table:table-cell>
          <table:table-cell table:formula="of:=[.D556]-[.D55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3" office:value-type="float" office:value="7215" calcext:value-type="float">
            <text:p>721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835069444444445" calcext:value-type="float">
            <text:p>0,00083506944444444500</text:p>
          </table:table-cell>
          <table:table-cell table:formula="of:=[.D557]-[.D55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3" office:value-type="float" office:value="7228" calcext:value-type="float">
            <text:p>722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836574074074074" calcext:value-type="float">
            <text:p>0,00083657407407407400</text:p>
          </table:table-cell>
          <table:table-cell table:formula="of:=[.D558]-[.D55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3" office:value-type="float" office:value="7241" calcext:value-type="float">
            <text:p>7241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838078703703704" calcext:value-type="float">
            <text:p>0,00083807870370370400</text:p>
          </table:table-cell>
          <table:table-cell table:formula="of:=[.D559]-[.D55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3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839583333333333" calcext:value-type="float">
            <text:p>0,00083958333333333300</text:p>
          </table:table-cell>
          <table:table-cell table:formula="of:=[.D560]-[.D55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3" office:value-type="float" office:value="7267" calcext:value-type="float">
            <text:p>7267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841087962962963" calcext:value-type="float">
            <text:p>0,00084108796296296300</text:p>
          </table:table-cell>
          <table:table-cell table:formula="of:=[.D561]-[.D56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3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842592592592593" calcext:value-type="float">
            <text:p>0,00084259259259259300</text:p>
          </table:table-cell>
          <table:table-cell table:formula="of:=[.D562]-[.D56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3" office:value-type="float" office:value="7293" calcext:value-type="float">
            <text:p>7293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844097222222222" calcext:value-type="float">
            <text:p>0,00084409722222222200</text:p>
          </table:table-cell>
          <table:table-cell table:formula="of:=[.D563]-[.D56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3" office:value-type="float" office:value="7306" calcext:value-type="float">
            <text:p>7306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845601851851852" calcext:value-type="float">
            <text:p>0,00084560185185185200</text:p>
          </table:table-cell>
          <table:table-cell table:formula="of:=[.D564]-[.D56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3" office:value-type="float" office:value="7319" calcext:value-type="float">
            <text:p>7319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847106481481482" calcext:value-type="float">
            <text:p>0,00084710648148148200</text:p>
          </table:table-cell>
          <table:table-cell table:formula="of:=[.D565]-[.D56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3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848611111111111" calcext:value-type="float">
            <text:p>0,00084861111111111100</text:p>
          </table:table-cell>
          <table:table-cell table:formula="of:=[.D566]-[.D56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3" office:value-type="float" office:value="7345" calcext:value-type="float">
            <text:p>734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850115740740741" calcext:value-type="float">
            <text:p>0,00085011574074074100</text:p>
          </table:table-cell>
          <table:table-cell table:formula="of:=[.D567]-[.D56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3" office:value-type="float" office:value="7358" calcext:value-type="float">
            <text:p>7358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85162037037037" calcext:value-type="float">
            <text:p>0,00085162037037037000</text:p>
          </table:table-cell>
          <table:table-cell table:formula="of:=[.D568]-[.D56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3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853125" calcext:value-type="float">
            <text:p>0,00085312500000000000</text:p>
          </table:table-cell>
          <table:table-cell table:formula="of:=[.D569]-[.D56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3" office:value-type="float" office:value="7384" calcext:value-type="float">
            <text:p>7384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85462962962963" calcext:value-type="float">
            <text:p>0,00085462962962963000</text:p>
          </table:table-cell>
          <table:table-cell table:formula="of:=[.D570]-[.D56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3" office:value-type="float" office:value="7397" calcext:value-type="float">
            <text:p>7397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856134259259259" calcext:value-type="float">
            <text:p>0,00085613425925925900</text:p>
          </table:table-cell>
          <table:table-cell table:formula="of:=[.D571]-[.D57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3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857638888888889" calcext:value-type="float">
            <text:p>0,00085763888888888900</text:p>
          </table:table-cell>
          <table:table-cell table:formula="of:=[.D572]-[.D57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3" office:value-type="float" office:value="7423" calcext:value-type="float">
            <text:p>7423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859143518518519" calcext:value-type="float">
            <text:p>0,00085914351851851900</text:p>
          </table:table-cell>
          <table:table-cell table:formula="of:=[.D573]-[.D57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3" office:value-type="float" office:value="7436" calcext:value-type="float">
            <text:p>7436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860648148148148" calcext:value-type="float">
            <text:p>0,00086064814814814800</text:p>
          </table:table-cell>
          <table:table-cell table:formula="of:=[.D574]-[.D57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3" office:value-type="float" office:value="7449" calcext:value-type="float">
            <text:p>7449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862152777777778" calcext:value-type="float">
            <text:p>0,00086215277777777800</text:p>
          </table:table-cell>
          <table:table-cell table:formula="of:=[.D575]-[.D57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3" office:value-type="float" office:value="7462" calcext:value-type="float">
            <text:p>7462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863657407407407" calcext:value-type="float">
            <text:p>0,00086365740740740700</text:p>
          </table:table-cell>
          <table:table-cell table:formula="of:=[.D576]-[.D57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3" office:value-type="float" office:value="7475" calcext:value-type="float">
            <text:p>74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865162037037037" calcext:value-type="float">
            <text:p>0,00086516203703703700</text:p>
          </table:table-cell>
          <table:table-cell table:formula="of:=[.D577]-[.D57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3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866666666666667" calcext:value-type="float">
            <text:p>0,00086666666666666700</text:p>
          </table:table-cell>
          <table:table-cell table:formula="of:=[.D578]-[.D57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3" office:value-type="float" office:value="7501" calcext:value-type="float">
            <text:p>7501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868171296296296" calcext:value-type="float">
            <text:p>0,00086817129629629600</text:p>
          </table:table-cell>
          <table:table-cell table:formula="of:=[.D579]-[.D57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3" office:value-type="float" office:value="7514" calcext:value-type="float">
            <text:p>7514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869675925925926" calcext:value-type="float">
            <text:p>0,00086967592592592600</text:p>
          </table:table-cell>
          <table:table-cell table:formula="of:=[.D580]-[.D57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3" office:value-type="float" office:value="7527" calcext:value-type="float">
            <text:p>7527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871180555555556" calcext:value-type="float">
            <text:p>0,00087118055555555600</text:p>
          </table:table-cell>
          <table:table-cell table:formula="of:=[.D581]-[.D58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3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872685185185185" calcext:value-type="float">
            <text:p>0,00087268518518518500</text:p>
          </table:table-cell>
          <table:table-cell table:formula="of:=[.D582]-[.D58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3" office:value-type="float" office:value="7553" calcext:value-type="float">
            <text:p>7553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874189814814815" calcext:value-type="float">
            <text:p>0,00087418981481481500</text:p>
          </table:table-cell>
          <table:table-cell table:formula="of:=[.D583]-[.D58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3" office:value-type="float" office:value="7566" calcext:value-type="float">
            <text:p>7566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875694444444445" calcext:value-type="float">
            <text:p>0,00087569444444444500</text:p>
          </table:table-cell>
          <table:table-cell table:formula="of:=[.D584]-[.D58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3" office:value-type="float" office:value="7579" calcext:value-type="float">
            <text:p>7579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877199074074074" calcext:value-type="float">
            <text:p>0,00087719907407407400</text:p>
          </table:table-cell>
          <table:table-cell table:formula="of:=[.D585]-[.D58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3" office:value-type="float" office:value="7592" calcext:value-type="float">
            <text:p>7592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878703703703704" calcext:value-type="float">
            <text:p>0,00087870370370370400</text:p>
          </table:table-cell>
          <table:table-cell table:formula="of:=[.D586]-[.D58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3" office:value-type="float" office:value="7605" calcext:value-type="float">
            <text:p>760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880208333333333" calcext:value-type="float">
            <text:p>0,00088020833333333300</text:p>
          </table:table-cell>
          <table:table-cell table:formula="of:=[.D587]-[.D58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3" office:value-type="float" office:value="7618" calcext:value-type="float">
            <text:p>7618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881712962962963" calcext:value-type="float">
            <text:p>0,00088171296296296300</text:p>
          </table:table-cell>
          <table:table-cell table:formula="of:=[.D588]-[.D58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3" office:value-type="float" office:value="7631" calcext:value-type="float">
            <text:p>7631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883217592592593" calcext:value-type="float">
            <text:p>0,00088321759259259300</text:p>
          </table:table-cell>
          <table:table-cell table:formula="of:=[.D589]-[.D58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3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884722222222222" calcext:value-type="float">
            <text:p>0,00088472222222222200</text:p>
          </table:table-cell>
          <table:table-cell table:formula="of:=[.D590]-[.D58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3" office:value-type="float" office:value="7657" calcext:value-type="float">
            <text:p>7657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886226851851852" calcext:value-type="float">
            <text:p>0,00088622685185185200</text:p>
          </table:table-cell>
          <table:table-cell table:formula="of:=[.D591]-[.D59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3" office:value-type="float" office:value="7670" calcext:value-type="float">
            <text:p>767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887731481481482" calcext:value-type="float">
            <text:p>0,00088773148148148200</text:p>
          </table:table-cell>
          <table:table-cell table:formula="of:=[.D592]-[.D59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3" office:value-type="float" office:value="7683" calcext:value-type="float">
            <text:p>7683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889236111111111" calcext:value-type="float">
            <text:p>0,00088923611111111100</text:p>
          </table:table-cell>
          <table:table-cell table:formula="of:=[.D593]-[.D59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3" office:value-type="float" office:value="7696" calcext:value-type="float">
            <text:p>7696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890740740740741" calcext:value-type="float">
            <text:p>0,00089074074074074100</text:p>
          </table:table-cell>
          <table:table-cell table:formula="of:=[.D594]-[.D59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3" office:value-type="float" office:value="7709" calcext:value-type="float">
            <text:p>7709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89224537037037" calcext:value-type="float">
            <text:p>0,00089224537037037000</text:p>
          </table:table-cell>
          <table:table-cell table:formula="of:=[.D595]-[.D59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3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89375" calcext:value-type="float">
            <text:p>0,00089375000000000000</text:p>
          </table:table-cell>
          <table:table-cell table:formula="of:=[.D596]-[.D59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3" office:value-type="float" office:value="7735" calcext:value-type="float">
            <text:p>773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89525462962963" calcext:value-type="float">
            <text:p>0,00089525462962963000</text:p>
          </table:table-cell>
          <table:table-cell table:formula="of:=[.D597]-[.D59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3" office:value-type="float" office:value="7748" calcext:value-type="float">
            <text:p>7748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896759259259259" calcext:value-type="float">
            <text:p>0,00089675925925925900</text:p>
          </table:table-cell>
          <table:table-cell table:formula="of:=[.D598]-[.D59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3" office:value-type="float" office:value="7761" calcext:value-type="float">
            <text:p>7761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898263888888889" calcext:value-type="float">
            <text:p>0,00089826388888888900</text:p>
          </table:table-cell>
          <table:table-cell table:formula="of:=[.D599]-[.D59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3" office:value-type="float" office:value="7774" calcext:value-type="float">
            <text:p>7774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899768518518519" calcext:value-type="float">
            <text:p>0,00089976851851851900</text:p>
          </table:table-cell>
          <table:table-cell table:formula="of:=[.D600]-[.D59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3" office:value-type="float" office:value="7787" calcext:value-type="float">
            <text:p>7787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901273148148148" calcext:value-type="float">
            <text:p>0,00090127314814814800</text:p>
          </table:table-cell>
          <table:table-cell table:formula="of:=[.D601]-[.D60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3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902777777777778" calcext:value-type="float">
            <text:p>0,00090277777777777800</text:p>
          </table:table-cell>
          <table:table-cell table:formula="of:=[.D602]-[.D60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3" office:value-type="float" office:value="7813" calcext:value-type="float">
            <text:p>7813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904282407407407" calcext:value-type="float">
            <text:p>0,00090428240740740700</text:p>
          </table:table-cell>
          <table:table-cell table:formula="of:=[.D603]-[.D60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3" office:value-type="float" office:value="7826" calcext:value-type="float">
            <text:p>7826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905787037037037" calcext:value-type="float">
            <text:p>0,00090578703703703700</text:p>
          </table:table-cell>
          <table:table-cell table:formula="of:=[.D604]-[.D60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3" office:value-type="float" office:value="7839" calcext:value-type="float">
            <text:p>7839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907291666666667" calcext:value-type="float">
            <text:p>0,00090729166666666700</text:p>
          </table:table-cell>
          <table:table-cell table:formula="of:=[.D605]-[.D60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3" office:value-type="float" office:value="7852" calcext:value-type="float">
            <text:p>7852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908796296296296" calcext:value-type="float">
            <text:p>0,00090879629629629600</text:p>
          </table:table-cell>
          <table:table-cell table:formula="of:=[.D606]-[.D60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3" office:value-type="float" office:value="7865" calcext:value-type="float">
            <text:p>786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910300925925926" calcext:value-type="float">
            <text:p>0,00091030092592592600</text:p>
          </table:table-cell>
          <table:table-cell table:formula="of:=[.D607]-[.D60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3" office:value-type="float" office:value="7878" calcext:value-type="float">
            <text:p>7878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911805555555556" calcext:value-type="float">
            <text:p>0,00091180555555555600</text:p>
          </table:table-cell>
          <table:table-cell table:formula="of:=[.D608]-[.D60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3" office:value-type="float" office:value="7891" calcext:value-type="float">
            <text:p>7891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913310185185185" calcext:value-type="float">
            <text:p>0,00091331018518518500</text:p>
          </table:table-cell>
          <table:table-cell table:formula="of:=[.D609]-[.D60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3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914814814814815" calcext:value-type="float">
            <text:p>0,00091481481481481500</text:p>
          </table:table-cell>
          <table:table-cell table:formula="of:=[.D610]-[.D60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3" office:value-type="float" office:value="7917" calcext:value-type="float">
            <text:p>7917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916319444444444" calcext:value-type="float">
            <text:p>0,00091631944444444400</text:p>
          </table:table-cell>
          <table:table-cell table:formula="of:=[.D611]-[.D61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3" office:value-type="float" office:value="7930" calcext:value-type="float">
            <text:p>793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917824074074074" calcext:value-type="float">
            <text:p>0,00091782407407407400</text:p>
          </table:table-cell>
          <table:table-cell table:formula="of:=[.D612]-[.D61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3" office:value-type="float" office:value="7943" calcext:value-type="float">
            <text:p>7943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919328703703704" calcext:value-type="float">
            <text:p>0,00091932870370370400</text:p>
          </table:table-cell>
          <table:table-cell table:formula="of:=[.D613]-[.D61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3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920833333333333" calcext:value-type="float">
            <text:p>0,00092083333333333300</text:p>
          </table:table-cell>
          <table:table-cell table:formula="of:=[.D614]-[.D61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3" office:value-type="float" office:value="7969" calcext:value-type="float">
            <text:p>7969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922337962962963" calcext:value-type="float">
            <text:p>0,00092233796296296300</text:p>
          </table:table-cell>
          <table:table-cell table:formula="of:=[.D615]-[.D61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3" office:value-type="float" office:value="7982" calcext:value-type="float">
            <text:p>7982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923842592592593" calcext:value-type="float">
            <text:p>0,00092384259259259300</text:p>
          </table:table-cell>
          <table:table-cell table:formula="of:=[.D616]-[.D61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3" office:value-type="float" office:value="7995" calcext:value-type="float">
            <text:p>799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925347222222222" calcext:value-type="float">
            <text:p>0,00092534722222222200</text:p>
          </table:table-cell>
          <table:table-cell table:formula="of:=[.D617]-[.D61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3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926851851851852" calcext:value-type="float">
            <text:p>0,00092685185185185200</text:p>
          </table:table-cell>
          <table:table-cell table:formula="of:=[.D618]-[.D61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3" office:value-type="float" office:value="8021" calcext:value-type="float">
            <text:p>8021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928356481481482" calcext:value-type="float">
            <text:p>0,00092835648148148100</text:p>
          </table:table-cell>
          <table:table-cell table:formula="of:=[.D619]-[.D61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3" office:value-type="float" office:value="8034" calcext:value-type="float">
            <text:p>8034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0929861111111111" calcext:value-type="float">
            <text:p>0,00092986111111111100</text:p>
          </table:table-cell>
          <table:table-cell table:formula="of:=[.D620]-[.D61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3" office:value-type="float" office:value="8047" calcext:value-type="float">
            <text:p>8047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0931365740740741" calcext:value-type="float">
            <text:p>0,00093136574074074100</text:p>
          </table:table-cell>
          <table:table-cell table:formula="of:=[.D621]-[.D62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3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093287037037037" calcext:value-type="float">
            <text:p>0,00093287037037037000</text:p>
          </table:table-cell>
          <table:table-cell table:formula="of:=[.D622]-[.D62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3" office:value-type="float" office:value="8073" calcext:value-type="float">
            <text:p>8073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0934375" calcext:value-type="float">
            <text:p>0,00093437500000000000</text:p>
          </table:table-cell>
          <table:table-cell table:formula="of:=[.D623]-[.D62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3" office:value-type="float" office:value="8086" calcext:value-type="float">
            <text:p>8086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093587962962963" calcext:value-type="float">
            <text:p>0,00093587962962963000</text:p>
          </table:table-cell>
          <table:table-cell table:formula="of:=[.D624]-[.D62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3" office:value-type="float" office:value="8099" calcext:value-type="float">
            <text:p>8099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0937384259259259" calcext:value-type="float">
            <text:p>0,00093738425925925900</text:p>
          </table:table-cell>
          <table:table-cell table:formula="of:=[.D625]-[.D62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3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0938888888888889" calcext:value-type="float">
            <text:p>0,00093888888888888900</text:p>
          </table:table-cell>
          <table:table-cell table:formula="of:=[.D626]-[.D62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3" office:value-type="float" office:value="8125" calcext:value-type="float">
            <text:p>81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0940393518518519" calcext:value-type="float">
            <text:p>0,00094039351851851800</text:p>
          </table:table-cell>
          <table:table-cell table:formula="of:=[.D627]-[.D62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3" office:value-type="float" office:value="8138" calcext:value-type="float">
            <text:p>8138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0941898148148148" calcext:value-type="float">
            <text:p>0,00094189814814814800</text:p>
          </table:table-cell>
          <table:table-cell table:formula="of:=[.D628]-[.D62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3" office:value-type="float" office:value="8151" calcext:value-type="float">
            <text:p>8151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0943402777777778" calcext:value-type="float">
            <text:p>0,00094340277777777800</text:p>
          </table:table-cell>
          <table:table-cell table:formula="of:=[.D629]-[.D62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3" office:value-type="float" office:value="8164" calcext:value-type="float">
            <text:p>8164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0944907407407407" calcext:value-type="float">
            <text:p>0,00094490740740740700</text:p>
          </table:table-cell>
          <table:table-cell table:formula="of:=[.D630]-[.D62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3" office:value-type="float" office:value="8177" calcext:value-type="float">
            <text:p>8177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0946412037037037" calcext:value-type="float">
            <text:p>0,00094641203703703700</text:p>
          </table:table-cell>
          <table:table-cell table:formula="of:=[.D631]-[.D63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3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0947916666666667" calcext:value-type="float">
            <text:p>0,00094791666666666700</text:p>
          </table:table-cell>
          <table:table-cell table:formula="of:=[.D632]-[.D63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3" office:value-type="float" office:value="8203" calcext:value-type="float">
            <text:p>8203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0949421296296296" calcext:value-type="float">
            <text:p>0,00094942129629629600</text:p>
          </table:table-cell>
          <table:table-cell table:formula="of:=[.D633]-[.D63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3" office:value-type="float" office:value="8216" calcext:value-type="float">
            <text:p>8216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0950925925925926" calcext:value-type="float">
            <text:p>0,00095092592592592600</text:p>
          </table:table-cell>
          <table:table-cell table:formula="of:=[.D634]-[.D63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3" office:value-type="float" office:value="8229" calcext:value-type="float">
            <text:p>8229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0952430555555556" calcext:value-type="float">
            <text:p>0,00095243055555555600</text:p>
          </table:table-cell>
          <table:table-cell table:formula="of:=[.D635]-[.D63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3" office:value-type="float" office:value="8242" calcext:value-type="float">
            <text:p>8242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0953935185185185" calcext:value-type="float">
            <text:p>0,00095393518518518500</text:p>
          </table:table-cell>
          <table:table-cell table:formula="of:=[.D636]-[.D63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3" office:value-type="float" office:value="8255" calcext:value-type="float">
            <text:p>825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0955439814814815" calcext:value-type="float">
            <text:p>0,00095543981481481500</text:p>
          </table:table-cell>
          <table:table-cell table:formula="of:=[.D637]-[.D63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3" office:value-type="float" office:value="8268" calcext:value-type="float">
            <text:p>8268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0956944444444444" calcext:value-type="float">
            <text:p>0,00095694444444444500</text:p>
          </table:table-cell>
          <table:table-cell table:formula="of:=[.D638]-[.D63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3" office:value-type="float" office:value="8281" calcext:value-type="float">
            <text:p>8281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0958449074074074" calcext:value-type="float">
            <text:p>0,00095844907407407400</text:p>
          </table:table-cell>
          <table:table-cell table:formula="of:=[.D639]-[.D63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3" office:value-type="float" office:value="8294" calcext:value-type="float">
            <text:p>8294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0959953703703704" calcext:value-type="float">
            <text:p>0,00095995370370370400</text:p>
          </table:table-cell>
          <table:table-cell table:formula="of:=[.D640]-[.D63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3" office:value-type="float" office:value="8307" calcext:value-type="float">
            <text:p>8307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0961458333333333" calcext:value-type="float">
            <text:p>0,00096145833333333400</text:p>
          </table:table-cell>
          <table:table-cell table:formula="of:=[.D641]-[.D64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3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0962962962962963" calcext:value-type="float">
            <text:p>0,00096296296296296300</text:p>
          </table:table-cell>
          <table:table-cell table:formula="of:=[.D642]-[.D641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3" office:value-type="float" office:value="8333" calcext:value-type="float">
            <text:p>8333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0964467592592593" calcext:value-type="float">
            <text:p>0,00096446759259259300</text:p>
          </table:table-cell>
          <table:table-cell table:formula="of:=[.D643]-[.D642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3" office:value-type="float" office:value="8346" calcext:value-type="float">
            <text:p>8346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0965972222222222" calcext:value-type="float">
            <text:p>0,00096597222222222200</text:p>
          </table:table-cell>
          <table:table-cell table:formula="of:=[.D644]-[.D643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3" office:value-type="float" office:value="8359" calcext:value-type="float">
            <text:p>8359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0967476851851852" calcext:value-type="float">
            <text:p>0,00096747685185185200</text:p>
          </table:table-cell>
          <table:table-cell table:formula="of:=[.D645]-[.D644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3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0968981481481482" calcext:value-type="float">
            <text:p>0,00096898148148148200</text:p>
          </table:table-cell>
          <table:table-cell table:formula="of:=[.D646]-[.D645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3" office:value-type="float" office:value="8385" calcext:value-type="float">
            <text:p>838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0970486111111111" calcext:value-type="float">
            <text:p>0,00097048611111111100</text:p>
          </table:table-cell>
          <table:table-cell table:formula="of:=[.D647]-[.D646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3" office:value-type="float" office:value="8398" calcext:value-type="float">
            <text:p>8398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0971990740740741" calcext:value-type="float">
            <text:p>0,00097199074074074100</text:p>
          </table:table-cell>
          <table:table-cell table:formula="of:=[.D648]-[.D647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3" office:value-type="float" office:value="8411" calcext:value-type="float">
            <text:p>8411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097349537037037" calcext:value-type="float">
            <text:p>0,00097349537037037000</text:p>
          </table:table-cell>
          <table:table-cell table:formula="of:=[.D649]-[.D648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3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0975" calcext:value-type="float">
            <text:p>0,00097500000000000000</text:p>
          </table:table-cell>
          <table:table-cell table:formula="of:=[.D650]-[.D649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3" office:value-type="float" office:value="8437" calcext:value-type="float">
            <text:p>8437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097650462962963" calcext:value-type="float">
            <text:p>0,00097650462962963000</text:p>
          </table:table-cell>
          <table:table-cell table:formula="of:=[.D651]-[.D650]" office:value-type="float" office:value="0.00000150462962962962" calcext:value-type="float">
            <text:p>0,0000015046296296296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3" office:value-type="float" office:value="8450" calcext:value-type="float">
            <text:p>84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0978009259259259" calcext:value-type="float">
            <text:p>0,00097800925925925900</text:p>
          </table:table-cell>
          <table:table-cell table:formula="of:=[.D652]-[.D65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3" office:value-type="float" office:value="8463" calcext:value-type="float">
            <text:p>8463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0979513888888889" calcext:value-type="float">
            <text:p>0,00097951388888888900</text:p>
          </table:table-cell>
          <table:table-cell table:formula="of:=[.D653]-[.D65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3" office:value-type="float" office:value="8476" calcext:value-type="float">
            <text:p>8476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0981018518518518" calcext:value-type="float">
            <text:p>0,00098101851851851800</text:p>
          </table:table-cell>
          <table:table-cell table:formula="of:=[.D654]-[.D65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3" office:value-type="float" office:value="8489" calcext:value-type="float">
            <text:p>8489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0982523148148148" calcext:value-type="float">
            <text:p>0,00098252314814814800</text:p>
          </table:table-cell>
          <table:table-cell table:formula="of:=[.D655]-[.D6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3" office:value-type="float" office:value="8502" calcext:value-type="float">
            <text:p>8502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0984027777777778" calcext:value-type="float">
            <text:p>0,00098402777777777800</text:p>
          </table:table-cell>
          <table:table-cell table:formula="of:=[.D656]-[.D65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3" office:value-type="float" office:value="8515" calcext:value-type="float">
            <text:p>851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0985532407407407" calcext:value-type="float">
            <text:p>0,00098553240740740700</text:p>
          </table:table-cell>
          <table:table-cell table:formula="of:=[.D657]-[.D65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3" office:value-type="float" office:value="8528" calcext:value-type="float">
            <text:p>8528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0987037037037037" calcext:value-type="float">
            <text:p>0,00098703703703703700</text:p>
          </table:table-cell>
          <table:table-cell table:formula="of:=[.D658]-[.D6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3" office:value-type="float" office:value="8541" calcext:value-type="float">
            <text:p>8541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0988541666666667" calcext:value-type="float">
            <text:p>0,00098854166666666700</text:p>
          </table:table-cell>
          <table:table-cell table:formula="of:=[.D659]-[.D65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3" office:value-type="float" office:value="8554" calcext:value-type="float">
            <text:p>8554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0990046296296296" calcext:value-type="float">
            <text:p>0,00099004629629629600</text:p>
          </table:table-cell>
          <table:table-cell table:formula="of:=[.D660]-[.D65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3" office:value-type="float" office:value="8567" calcext:value-type="float">
            <text:p>8567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0991550925925926" calcext:value-type="float">
            <text:p>0,00099155092592592600</text:p>
          </table:table-cell>
          <table:table-cell table:formula="of:=[.D661]-[.D66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3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0993055555555556" calcext:value-type="float">
            <text:p>0,00099305555555555600</text:p>
          </table:table-cell>
          <table:table-cell table:formula="of:=[.D662]-[.D6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3" office:value-type="float" office:value="8593" calcext:value-type="float">
            <text:p>8593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0994560185185185" calcext:value-type="float">
            <text:p>0,00099456018518518500</text:p>
          </table:table-cell>
          <table:table-cell table:formula="of:=[.D663]-[.D66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3" office:value-type="float" office:value="8606" calcext:value-type="float">
            <text:p>8606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0996064814814815" calcext:value-type="float">
            <text:p>0,00099606481481481500</text:p>
          </table:table-cell>
          <table:table-cell table:formula="of:=[.D664]-[.D66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3" office:value-type="float" office:value="8619" calcext:value-type="float">
            <text:p>8619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0997569444444444" calcext:value-type="float">
            <text:p>0,00099756944444444400</text:p>
          </table:table-cell>
          <table:table-cell table:formula="of:=[.D665]-[.D66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3" office:value-type="float" office:value="8632" calcext:value-type="float">
            <text:p>8632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0999074074074074" calcext:value-type="float">
            <text:p>0,00099907407407407400</text:p>
          </table:table-cell>
          <table:table-cell table:formula="of:=[.D666]-[.D6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3" office:value-type="float" office:value="8645" calcext:value-type="float">
            <text:p>864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0005787037037" calcext:value-type="float">
            <text:p>0,00100057870370370000</text:p>
          </table:table-cell>
          <table:table-cell table:formula="of:=[.D667]-[.D66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3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00208333333333" calcext:value-type="float">
            <text:p>0,00100208333333333000</text:p>
          </table:table-cell>
          <table:table-cell table:formula="of:=[.D668]-[.D66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3" office:value-type="float" office:value="8671" calcext:value-type="float">
            <text:p>8671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00358796296296" calcext:value-type="float">
            <text:p>0,00100358796296296000</text:p>
          </table:table-cell>
          <table:table-cell table:formula="of:=[.D669]-[.D6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3" office:value-type="float" office:value="8684" calcext:value-type="float">
            <text:p>8684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00509259259259" calcext:value-type="float">
            <text:p>0,00100509259259259000</text:p>
          </table:table-cell>
          <table:table-cell table:formula="of:=[.D670]-[.D66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3" office:value-type="float" office:value="8697" calcext:value-type="float">
            <text:p>8697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00659722222222" calcext:value-type="float">
            <text:p>0,00100659722222222000</text:p>
          </table:table-cell>
          <table:table-cell table:formula="of:=[.D671]-[.D67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3" office:value-type="float" office:value="8710" calcext:value-type="float">
            <text:p>871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00810185185185" calcext:value-type="float">
            <text:p>0,00100810185185185000</text:p>
          </table:table-cell>
          <table:table-cell table:formula="of:=[.D672]-[.D67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3" office:value-type="float" office:value="8723" calcext:value-type="float">
            <text:p>8723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00960648148148" calcext:value-type="float">
            <text:p>0,00100960648148148000</text:p>
          </table:table-cell>
          <table:table-cell table:formula="of:=[.D673]-[.D6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3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01111111111111" calcext:value-type="float">
            <text:p>0,00101111111111111000</text:p>
          </table:table-cell>
          <table:table-cell table:formula="of:=[.D674]-[.D67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3" office:value-type="float" office:value="8749" calcext:value-type="float">
            <text:p>8749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01261574074074" calcext:value-type="float">
            <text:p>0,00101261574074074000</text:p>
          </table:table-cell>
          <table:table-cell table:formula="of:=[.D675]-[.D67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3" office:value-type="float" office:value="8762" calcext:value-type="float">
            <text:p>8762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01412037037037" calcext:value-type="float">
            <text:p>0,00101412037037037000</text:p>
          </table:table-cell>
          <table:table-cell table:formula="of:=[.D676]-[.D67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3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015625" calcext:value-type="float">
            <text:p>0,00101562500000000000</text:p>
          </table:table-cell>
          <table:table-cell table:formula="of:=[.D677]-[.D6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3" office:value-type="float" office:value="8788" calcext:value-type="float">
            <text:p>8788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01712962962963" calcext:value-type="float">
            <text:p>0,00101712962962963000</text:p>
          </table:table-cell>
          <table:table-cell table:formula="of:=[.D678]-[.D67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3" office:value-type="float" office:value="8801" calcext:value-type="float">
            <text:p>8801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01863425925926" calcext:value-type="float">
            <text:p>0,00101863425925926000</text:p>
          </table:table-cell>
          <table:table-cell table:formula="of:=[.D679]-[.D67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3" office:value-type="float" office:value="8814" calcext:value-type="float">
            <text:p>8814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02013888888889" calcext:value-type="float">
            <text:p>0,00102013888888889000</text:p>
          </table:table-cell>
          <table:table-cell table:formula="of:=[.D680]-[.D67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3" office:value-type="float" office:value="8827" calcext:value-type="float">
            <text:p>8827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02164351851852" calcext:value-type="float">
            <text:p>0,00102164351851852000</text:p>
          </table:table-cell>
          <table:table-cell table:formula="of:=[.D681]-[.D68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3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02314814814815" calcext:value-type="float">
            <text:p>0,00102314814814815000</text:p>
          </table:table-cell>
          <table:table-cell table:formula="of:=[.D682]-[.D6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3" office:value-type="float" office:value="8853" calcext:value-type="float">
            <text:p>8853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02465277777778" calcext:value-type="float">
            <text:p>0,00102465277777778000</text:p>
          </table:table-cell>
          <table:table-cell table:formula="of:=[.D683]-[.D68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3" office:value-type="float" office:value="8866" calcext:value-type="float">
            <text:p>8866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02615740740741" calcext:value-type="float">
            <text:p>0,00102615740740741000</text:p>
          </table:table-cell>
          <table:table-cell table:formula="of:=[.D684]-[.D6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3" office:value-type="float" office:value="8879" calcext:value-type="float">
            <text:p>8879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02766203703704" calcext:value-type="float">
            <text:p>0,00102766203703704000</text:p>
          </table:table-cell>
          <table:table-cell table:formula="of:=[.D685]-[.D68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3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02916666666667" calcext:value-type="float">
            <text:p>0,00102916666666667000</text:p>
          </table:table-cell>
          <table:table-cell table:formula="of:=[.D686]-[.D68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3" office:value-type="float" office:value="8905" calcext:value-type="float">
            <text:p>890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0306712962963" calcext:value-type="float">
            <text:p>0,00103067129629630000</text:p>
          </table:table-cell>
          <table:table-cell table:formula="of:=[.D687]-[.D68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3" office:value-type="float" office:value="8918" calcext:value-type="float">
            <text:p>8918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03217592592593" calcext:value-type="float">
            <text:p>0,00103217592592593000</text:p>
          </table:table-cell>
          <table:table-cell table:formula="of:=[.D688]-[.D6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3" office:value-type="float" office:value="8931" calcext:value-type="float">
            <text:p>8931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03368055555556" calcext:value-type="float">
            <text:p>0,00103368055555556000</text:p>
          </table:table-cell>
          <table:table-cell table:formula="of:=[.D689]-[.D68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3" office:value-type="float" office:value="8944" calcext:value-type="float">
            <text:p>8944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03518518518519" calcext:value-type="float">
            <text:p>0,00103518518518519000</text:p>
          </table:table-cell>
          <table:table-cell table:formula="of:=[.D690]-[.D68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3" office:value-type="float" office:value="8957" calcext:value-type="float">
            <text:p>8957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03668981481481" calcext:value-type="float">
            <text:p>0,00103668981481481000</text:p>
          </table:table-cell>
          <table:table-cell table:formula="of:=[.D691]-[.D69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3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03819444444444" calcext:value-type="float">
            <text:p>0,00103819444444444000</text:p>
          </table:table-cell>
          <table:table-cell table:formula="of:=[.D692]-[.D69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3" office:value-type="float" office:value="8983" calcext:value-type="float">
            <text:p>8983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03969907407407" calcext:value-type="float">
            <text:p>0,00103969907407407000</text:p>
          </table:table-cell>
          <table:table-cell table:formula="of:=[.D693]-[.D6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3" office:value-type="float" office:value="8996" calcext:value-type="float">
            <text:p>8996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0412037037037" calcext:value-type="float">
            <text:p>0,00104120370370370000</text:p>
          </table:table-cell>
          <table:table-cell table:formula="of:=[.D694]-[.D69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3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04270833333333" calcext:value-type="float">
            <text:p>0,00104270833333333000</text:p>
          </table:table-cell>
          <table:table-cell table:formula="of:=[.D695]-[.D6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3" office:value-type="float" office:value="9022" calcext:value-type="float">
            <text:p>9022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04421296296296" calcext:value-type="float">
            <text:p>0,00104421296296296000</text:p>
          </table:table-cell>
          <table:table-cell table:formula="of:=[.D696]-[.D69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3" office:value-type="float" office:value="9035" calcext:value-type="float">
            <text:p>903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04571759259259" calcext:value-type="float">
            <text:p>0,00104571759259259000</text:p>
          </table:table-cell>
          <table:table-cell table:formula="of:=[.D697]-[.D69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3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04722222222222" calcext:value-type="float">
            <text:p>0,00104722222222222000</text:p>
          </table:table-cell>
          <table:table-cell table:formula="of:=[.D698]-[.D69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3" office:value-type="float" office:value="9061" calcext:value-type="float">
            <text:p>9061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04872685185185" calcext:value-type="float">
            <text:p>0,00104872685185185000</text:p>
          </table:table-cell>
          <table:table-cell table:formula="of:=[.D699]-[.D6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3" office:value-type="float" office:value="9074" calcext:value-type="float">
            <text:p>9074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05023148148148" calcext:value-type="float">
            <text:p>0,00105023148148148000</text:p>
          </table:table-cell>
          <table:table-cell table:formula="of:=[.D700]-[.D69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3" office:value-type="float" office:value="9087" calcext:value-type="float">
            <text:p>9087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05173611111111" calcext:value-type="float">
            <text:p>0,00105173611111111000</text:p>
          </table:table-cell>
          <table:table-cell table:formula="of:=[.D701]-[.D70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3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05324074074074" calcext:value-type="float">
            <text:p>0,00105324074074074000</text:p>
          </table:table-cell>
          <table:table-cell table:formula="of:=[.D702]-[.D70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3" office:value-type="float" office:value="9113" calcext:value-type="float">
            <text:p>9113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05474537037037" calcext:value-type="float">
            <text:p>0,00105474537037037000</text:p>
          </table:table-cell>
          <table:table-cell table:formula="of:=[.D703]-[.D7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3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05625" calcext:value-type="float">
            <text:p>0,00105625000000000000</text:p>
          </table:table-cell>
          <table:table-cell table:formula="of:=[.D704]-[.D70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3" office:value-type="float" office:value="9139" calcext:value-type="float">
            <text:p>9139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05775462962963" calcext:value-type="float">
            <text:p>0,00105775462962963000</text:p>
          </table:table-cell>
          <table:table-cell table:formula="of:=[.D705]-[.D70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3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05925925925926" calcext:value-type="float">
            <text:p>0,00105925925925926000</text:p>
          </table:table-cell>
          <table:table-cell table:formula="of:=[.D706]-[.D7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3" office:value-type="float" office:value="9165" calcext:value-type="float">
            <text:p>916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06076388888889" calcext:value-type="float">
            <text:p>0,00106076388888889000</text:p>
          </table:table-cell>
          <table:table-cell table:formula="of:=[.D707]-[.D70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3" office:value-type="float" office:value="9178" calcext:value-type="float">
            <text:p>9178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06226851851852" calcext:value-type="float">
            <text:p>0,00106226851851852000</text:p>
          </table:table-cell>
          <table:table-cell table:formula="of:=[.D708]-[.D70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3" office:value-type="float" office:value="9191" calcext:value-type="float">
            <text:p>9191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06377314814815" calcext:value-type="float">
            <text:p>0,00106377314814815000</text:p>
          </table:table-cell>
          <table:table-cell table:formula="of:=[.D709]-[.D70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3" office:value-type="float" office:value="9204" calcext:value-type="float">
            <text:p>9204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06527777777778" calcext:value-type="float">
            <text:p>0,00106527777777778000</text:p>
          </table:table-cell>
          <table:table-cell table:formula="of:=[.D710]-[.D7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3" office:value-type="float" office:value="9217" calcext:value-type="float">
            <text:p>9217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06678240740741" calcext:value-type="float">
            <text:p>0,00106678240740741000</text:p>
          </table:table-cell>
          <table:table-cell table:formula="of:=[.D711]-[.D71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3" office:value-type="float" office:value="9230" calcext:value-type="float">
            <text:p>923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06828703703704" calcext:value-type="float">
            <text:p>0,00106828703703704000</text:p>
          </table:table-cell>
          <table:table-cell table:formula="of:=[.D712]-[.D71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3" office:value-type="float" office:value="9243" calcext:value-type="float">
            <text:p>9243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06979166666667" calcext:value-type="float">
            <text:p>0,00106979166666667000</text:p>
          </table:table-cell>
          <table:table-cell table:formula="of:=[.D713]-[.D71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3" office:value-type="float" office:value="9256" calcext:value-type="float">
            <text:p>9256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0712962962963" calcext:value-type="float">
            <text:p>0,00107129629629630000</text:p>
          </table:table-cell>
          <table:table-cell table:formula="of:=[.D714]-[.D7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3" office:value-type="float" office:value="9269" calcext:value-type="float">
            <text:p>9269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07280092592593" calcext:value-type="float">
            <text:p>0,00107280092592593000</text:p>
          </table:table-cell>
          <table:table-cell table:formula="of:=[.D715]-[.D71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3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07430555555556" calcext:value-type="float">
            <text:p>0,00107430555555556000</text:p>
          </table:table-cell>
          <table:table-cell table:formula="of:=[.D716]-[.D71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3" office:value-type="float" office:value="9295" calcext:value-type="float">
            <text:p>929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07581018518519" calcext:value-type="float">
            <text:p>0,00107581018518519000</text:p>
          </table:table-cell>
          <table:table-cell table:formula="of:=[.D717]-[.D7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3" office:value-type="float" office:value="9308" calcext:value-type="float">
            <text:p>9308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07731481481481" calcext:value-type="float">
            <text:p>0,00107731481481481000</text:p>
          </table:table-cell>
          <table:table-cell table:formula="of:=[.D718]-[.D71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3" office:value-type="float" office:value="9321" calcext:value-type="float">
            <text:p>9321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07881944444444" calcext:value-type="float">
            <text:p>0,00107881944444444000</text:p>
          </table:table-cell>
          <table:table-cell table:formula="of:=[.D719]-[.D71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3" office:value-type="float" office:value="9334" calcext:value-type="float">
            <text:p>9334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08032407407407" calcext:value-type="float">
            <text:p>0,00108032407407407000</text:p>
          </table:table-cell>
          <table:table-cell table:formula="of:=[.D720]-[.D71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3" office:value-type="float" office:value="9347" calcext:value-type="float">
            <text:p>9347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0818287037037" calcext:value-type="float">
            <text:p>0,00108182870370370000</text:p>
          </table:table-cell>
          <table:table-cell table:formula="of:=[.D721]-[.D7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3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08333333333333" calcext:value-type="float">
            <text:p>0,00108333333333333000</text:p>
          </table:table-cell>
          <table:table-cell table:formula="of:=[.D722]-[.D72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3" office:value-type="float" office:value="9373" calcext:value-type="float">
            <text:p>9373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08483796296296" calcext:value-type="float">
            <text:p>0,00108483796296296000</text:p>
          </table:table-cell>
          <table:table-cell table:formula="of:=[.D723]-[.D72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3" office:value-type="float" office:value="9386" calcext:value-type="float">
            <text:p>9386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08634259259259" calcext:value-type="float">
            <text:p>0,00108634259259259000</text:p>
          </table:table-cell>
          <table:table-cell table:formula="of:=[.D724]-[.D72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3" office:value-type="float" office:value="9399" calcext:value-type="float">
            <text:p>9399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08784722222222" calcext:value-type="float">
            <text:p>0,00108784722222222000</text:p>
          </table:table-cell>
          <table:table-cell table:formula="of:=[.D725]-[.D7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3" office:value-type="float" office:value="9412" calcext:value-type="float">
            <text:p>9412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08935185185185" calcext:value-type="float">
            <text:p>0,00108935185185185000</text:p>
          </table:table-cell>
          <table:table-cell table:formula="of:=[.D726]-[.D72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3" office:value-type="float" office:value="9425" calcext:value-type="float">
            <text:p>942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09085648148148" calcext:value-type="float">
            <text:p>0,00109085648148148000</text:p>
          </table:table-cell>
          <table:table-cell table:formula="of:=[.D727]-[.D72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3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09236111111111" calcext:value-type="float">
            <text:p>0,00109236111111111000</text:p>
          </table:table-cell>
          <table:table-cell table:formula="of:=[.D728]-[.D72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3" office:value-type="float" office:value="9451" calcext:value-type="float">
            <text:p>9451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09386574074074" calcext:value-type="float">
            <text:p>0,00109386574074074000</text:p>
          </table:table-cell>
          <table:table-cell table:formula="of:=[.D729]-[.D72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3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09537037037037" calcext:value-type="float">
            <text:p>0,00109537037037037000</text:p>
          </table:table-cell>
          <table:table-cell table:formula="of:=[.D730]-[.D72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3" office:value-type="float" office:value="9477" calcext:value-type="float">
            <text:p>9477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096875" calcext:value-type="float">
            <text:p>0,00109687500000000000</text:p>
          </table:table-cell>
          <table:table-cell table:formula="of:=[.D731]-[.D73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3" office:value-type="float" office:value="9490" calcext:value-type="float">
            <text:p>949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09837962962963" calcext:value-type="float">
            <text:p>0,00109837962962963000</text:p>
          </table:table-cell>
          <table:table-cell table:formula="of:=[.D732]-[.D7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3" office:value-type="float" office:value="9503" calcext:value-type="float">
            <text:p>9503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09988425925926" calcext:value-type="float">
            <text:p>0,00109988425925926000</text:p>
          </table:table-cell>
          <table:table-cell table:formula="of:=[.D733]-[.D73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3" office:value-type="float" office:value="9516" calcext:value-type="float">
            <text:p>9516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10138888888889" calcext:value-type="float">
            <text:p>0,00110138888888889000</text:p>
          </table:table-cell>
          <table:table-cell table:formula="of:=[.D734]-[.D73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3" office:value-type="float" office:value="9529" calcext:value-type="float">
            <text:p>9529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10289351851852" calcext:value-type="float">
            <text:p>0,00110289351851852000</text:p>
          </table:table-cell>
          <table:table-cell table:formula="of:=[.D735]-[.D73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3" office:value-type="float" office:value="9542" calcext:value-type="float">
            <text:p>9542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10439814814815" calcext:value-type="float">
            <text:p>0,00110439814814815000</text:p>
          </table:table-cell>
          <table:table-cell table:formula="of:=[.D736]-[.D7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3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10590277777778" calcext:value-type="float">
            <text:p>0,00110590277777778000</text:p>
          </table:table-cell>
          <table:table-cell table:formula="of:=[.D737]-[.D73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3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10740740740741" calcext:value-type="float">
            <text:p>0,00110740740740741000</text:p>
          </table:table-cell>
          <table:table-cell table:formula="of:=[.D738]-[.D73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3" office:value-type="float" office:value="9581" calcext:value-type="float">
            <text:p>9581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10891203703704" calcext:value-type="float">
            <text:p>0,00110891203703704000</text:p>
          </table:table-cell>
          <table:table-cell table:formula="of:=[.D739]-[.D73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3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11041666666667" calcext:value-type="float">
            <text:p>0,00111041666666667000</text:p>
          </table:table-cell>
          <table:table-cell table:formula="of:=[.D740]-[.D73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3" office:value-type="float" office:value="9607" calcext:value-type="float">
            <text:p>9607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1119212962963" calcext:value-type="float">
            <text:p>0,00111192129629630000</text:p>
          </table:table-cell>
          <table:table-cell table:formula="of:=[.D741]-[.D7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3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11342592592593" calcext:value-type="float">
            <text:p>0,00111342592592593000</text:p>
          </table:table-cell>
          <table:table-cell table:formula="of:=[.D742]-[.D74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3" office:value-type="float" office:value="9633" calcext:value-type="float">
            <text:p>9633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11493055555556" calcext:value-type="float">
            <text:p>0,00111493055555556000</text:p>
          </table:table-cell>
          <table:table-cell table:formula="of:=[.D743]-[.D7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3" office:value-type="float" office:value="9646" calcext:value-type="float">
            <text:p>9646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11643518518519" calcext:value-type="float">
            <text:p>0,00111643518518519000</text:p>
          </table:table-cell>
          <table:table-cell table:formula="of:=[.D744]-[.D74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3" office:value-type="float" office:value="9659" calcext:value-type="float">
            <text:p>9659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11793981481481" calcext:value-type="float">
            <text:p>0,00111793981481481000</text:p>
          </table:table-cell>
          <table:table-cell table:formula="of:=[.D745]-[.D74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3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11944444444444" calcext:value-type="float">
            <text:p>0,00111944444444444000</text:p>
          </table:table-cell>
          <table:table-cell table:formula="of:=[.D746]-[.D74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3" office:value-type="float" office:value="9685" calcext:value-type="float">
            <text:p>968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12094907407407" calcext:value-type="float">
            <text:p>0,00112094907407407000</text:p>
          </table:table-cell>
          <table:table-cell table:formula="of:=[.D747]-[.D7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3" office:value-type="float" office:value="9698" calcext:value-type="float">
            <text:p>9698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1224537037037" calcext:value-type="float">
            <text:p>0,00112245370370370000</text:p>
          </table:table-cell>
          <table:table-cell table:formula="of:=[.D748]-[.D74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3" office:value-type="float" office:value="9711" calcext:value-type="float">
            <text:p>9711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12395833333333" calcext:value-type="float">
            <text:p>0,00112395833333333000</text:p>
          </table:table-cell>
          <table:table-cell table:formula="of:=[.D749]-[.D74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3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12546296296296" calcext:value-type="float">
            <text:p>0,00112546296296296000</text:p>
          </table:table-cell>
          <table:table-cell table:formula="of:=[.D750]-[.D74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3" office:value-type="float" office:value="9737" calcext:value-type="float">
            <text:p>9737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12696759259259" calcext:value-type="float">
            <text:p>0,00112696759259259000</text:p>
          </table:table-cell>
          <table:table-cell table:formula="of:=[.D751]-[.D7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3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12847222222222" calcext:value-type="float">
            <text:p>0,00112847222222222000</text:p>
          </table:table-cell>
          <table:table-cell table:formula="of:=[.D752]-[.D75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3" office:value-type="float" office:value="9763" calcext:value-type="float">
            <text:p>9763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12997685185185" calcext:value-type="float">
            <text:p>0,00112997685185185000</text:p>
          </table:table-cell>
          <table:table-cell table:formula="of:=[.D753]-[.D75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3" office:value-type="float" office:value="9776" calcext:value-type="float">
            <text:p>9776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13148148148148" calcext:value-type="float">
            <text:p>0,00113148148148148000</text:p>
          </table:table-cell>
          <table:table-cell table:formula="of:=[.D754]-[.D75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3" office:value-type="float" office:value="9789" calcext:value-type="float">
            <text:p>9789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13298611111111" calcext:value-type="float">
            <text:p>0,00113298611111111000</text:p>
          </table:table-cell>
          <table:table-cell table:formula="of:=[.D755]-[.D75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3" office:value-type="float" office:value="9802" calcext:value-type="float">
            <text:p>9802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13449074074074" calcext:value-type="float">
            <text:p>0,00113449074074074000</text:p>
          </table:table-cell>
          <table:table-cell table:formula="of:=[.D756]-[.D75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3" office:value-type="float" office:value="9815" calcext:value-type="float">
            <text:p>981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13599537037037" calcext:value-type="float">
            <text:p>0,00113599537037037000</text:p>
          </table:table-cell>
          <table:table-cell table:formula="of:=[.D757]-[.D75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3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1375" calcext:value-type="float">
            <text:p>0,00113750000000000000</text:p>
          </table:table-cell>
          <table:table-cell table:formula="of:=[.D758]-[.D7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3" office:value-type="float" office:value="9841" calcext:value-type="float">
            <text:p>9841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13900462962963" calcext:value-type="float">
            <text:p>0,00113900462962963000</text:p>
          </table:table-cell>
          <table:table-cell table:formula="of:=[.D759]-[.D75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3" office:value-type="float" office:value="9854" calcext:value-type="float">
            <text:p>9854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14050925925926" calcext:value-type="float">
            <text:p>0,00114050925925926000</text:p>
          </table:table-cell>
          <table:table-cell table:formula="of:=[.D760]-[.D75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3" office:value-type="float" office:value="9867" calcext:value-type="float">
            <text:p>9867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14201388888889" calcext:value-type="float">
            <text:p>0,00114201388888889000</text:p>
          </table:table-cell>
          <table:table-cell table:formula="of:=[.D761]-[.D76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3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14351851851852" calcext:value-type="float">
            <text:p>0,00114351851851852000</text:p>
          </table:table-cell>
          <table:table-cell table:formula="of:=[.D762]-[.D7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3" office:value-type="float" office:value="9893" calcext:value-type="float">
            <text:p>9893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14502314814815" calcext:value-type="float">
            <text:p>0,00114502314814815000</text:p>
          </table:table-cell>
          <table:table-cell table:formula="of:=[.D763]-[.D76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3" office:value-type="float" office:value="9906" calcext:value-type="float">
            <text:p>9906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14652777777778" calcext:value-type="float">
            <text:p>0,00114652777777778000</text:p>
          </table:table-cell>
          <table:table-cell table:formula="of:=[.D764]-[.D76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3" office:value-type="float" office:value="9919" calcext:value-type="float">
            <text:p>9919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14803240740741" calcext:value-type="float">
            <text:p>0,00114803240740741000</text:p>
          </table:table-cell>
          <table:table-cell table:formula="of:=[.D765]-[.D76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3" office:value-type="float" office:value="9932" calcext:value-type="float">
            <text:p>9932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14953703703704" calcext:value-type="float">
            <text:p>0,00114953703703704000</text:p>
          </table:table-cell>
          <table:table-cell table:formula="of:=[.D766]-[.D76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3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15104166666667" calcext:value-type="float">
            <text:p>0,00115104166666667000</text:p>
          </table:table-cell>
          <table:table-cell table:formula="of:=[.D767]-[.D76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3" office:value-type="float" office:value="9958" calcext:value-type="float">
            <text:p>9958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1525462962963" calcext:value-type="float">
            <text:p>0,00115254629629630000</text:p>
          </table:table-cell>
          <table:table-cell table:formula="of:=[.D768]-[.D76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3" office:value-type="float" office:value="9971" calcext:value-type="float">
            <text:p>9971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15405092592593" calcext:value-type="float">
            <text:p>0,00115405092592593000</text:p>
          </table:table-cell>
          <table:table-cell table:formula="of:=[.D769]-[.D7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3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15555555555556" calcext:value-type="float">
            <text:p>0,00115555555555556000</text:p>
          </table:table-cell>
          <table:table-cell table:formula="of:=[.D770]-[.D76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3" office:value-type="float" office:value="9997" calcext:value-type="float">
            <text:p>9997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15706018518519" calcext:value-type="float">
            <text:p>0,00115706018518519000</text:p>
          </table:table-cell>
          <table:table-cell table:formula="of:=[.D771]-[.D77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3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15856481481481" calcext:value-type="float">
            <text:p>0,00115856481481481000</text:p>
          </table:table-cell>
          <table:table-cell table:formula="of:=[.D772]-[.D77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3" office:value-type="float" office:value="10023" calcext:value-type="float">
            <text:p>10023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16006944444444" calcext:value-type="float">
            <text:p>0,00116006944444444000</text:p>
          </table:table-cell>
          <table:table-cell table:formula="of:=[.D773]-[.D7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3" office:value-type="float" office:value="10036" calcext:value-type="float">
            <text:p>10036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16157407407407" calcext:value-type="float">
            <text:p>0,00116157407407407000</text:p>
          </table:table-cell>
          <table:table-cell table:formula="of:=[.D774]-[.D77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3" office:value-type="float" office:value="10049" calcext:value-type="float">
            <text:p>10049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1630787037037" calcext:value-type="float">
            <text:p>0,00116307870370370000</text:p>
          </table:table-cell>
          <table:table-cell table:formula="of:=[.D775]-[.D77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3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16458333333333" calcext:value-type="float">
            <text:p>0,00116458333333333000</text:p>
          </table:table-cell>
          <table:table-cell table:formula="of:=[.D776]-[.D77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3" office:value-type="float" office:value="10075" calcext:value-type="float">
            <text:p>1007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16608796296296" calcext:value-type="float">
            <text:p>0,00116608796296296000</text:p>
          </table:table-cell>
          <table:table-cell table:formula="of:=[.D777]-[.D77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3" office:value-type="float" office:value="10088" calcext:value-type="float">
            <text:p>10088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16759259259259" calcext:value-type="float">
            <text:p>0,00116759259259259000</text:p>
          </table:table-cell>
          <table:table-cell table:formula="of:=[.D778]-[.D77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3" office:value-type="float" office:value="10101" calcext:value-type="float">
            <text:p>10101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16909722222222" calcext:value-type="float">
            <text:p>0,00116909722222222000</text:p>
          </table:table-cell>
          <table:table-cell table:formula="of:=[.D779]-[.D77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3" office:value-type="float" office:value="10114" calcext:value-type="float">
            <text:p>10114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17060185185185" calcext:value-type="float">
            <text:p>0,00117060185185185000</text:p>
          </table:table-cell>
          <table:table-cell table:formula="of:=[.D780]-[.D77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3" office:value-type="float" office:value="10127" calcext:value-type="float">
            <text:p>10127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17210648148148" calcext:value-type="float">
            <text:p>0,00117210648148148000</text:p>
          </table:table-cell>
          <table:table-cell table:formula="of:=[.D781]-[.D78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3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17361111111111" calcext:value-type="float">
            <text:p>0,00117361111111111000</text:p>
          </table:table-cell>
          <table:table-cell table:formula="of:=[.D782]-[.D7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3" office:value-type="float" office:value="10153" calcext:value-type="float">
            <text:p>10153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17511574074074" calcext:value-type="float">
            <text:p>0,00117511574074074000</text:p>
          </table:table-cell>
          <table:table-cell table:formula="of:=[.D783]-[.D78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3" office:value-type="float" office:value="10166" calcext:value-type="float">
            <text:p>10166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17662037037037" calcext:value-type="float">
            <text:p>0,00117662037037037000</text:p>
          </table:table-cell>
          <table:table-cell table:formula="of:=[.D784]-[.D7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3" office:value-type="float" office:value="10179" calcext:value-type="float">
            <text:p>10179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178125" calcext:value-type="float">
            <text:p>0,00117812500000000000</text:p>
          </table:table-cell>
          <table:table-cell table:formula="of:=[.D785]-[.D78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3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17962962962963" calcext:value-type="float">
            <text:p>0,00117962962962963000</text:p>
          </table:table-cell>
          <table:table-cell table:formula="of:=[.D786]-[.D78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3" office:value-type="float" office:value="10205" calcext:value-type="float">
            <text:p>1020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18113425925926" calcext:value-type="float">
            <text:p>0,00118113425925926000</text:p>
          </table:table-cell>
          <table:table-cell table:formula="of:=[.D787]-[.D78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3" office:value-type="float" office:value="10218" calcext:value-type="float">
            <text:p>10218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18263888888889" calcext:value-type="float">
            <text:p>0,00118263888888889000</text:p>
          </table:table-cell>
          <table:table-cell table:formula="of:=[.D788]-[.D78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3" office:value-type="float" office:value="10231" calcext:value-type="float">
            <text:p>10231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18414351851852" calcext:value-type="float">
            <text:p>0,00118414351851852000</text:p>
          </table:table-cell>
          <table:table-cell table:formula="of:=[.D789]-[.D7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3" office:value-type="float" office:value="10244" calcext:value-type="float">
            <text:p>10244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18564814814815" calcext:value-type="float">
            <text:p>0,00118564814814815000</text:p>
          </table:table-cell>
          <table:table-cell table:formula="of:=[.D790]-[.D78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3" office:value-type="float" office:value="10257" calcext:value-type="float">
            <text:p>10257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18715277777778" calcext:value-type="float">
            <text:p>0,00118715277777778000</text:p>
          </table:table-cell>
          <table:table-cell table:formula="of:=[.D791]-[.D79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3" office:value-type="float" office:value="10270" calcext:value-type="float">
            <text:p>1027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18865740740741" calcext:value-type="float">
            <text:p>0,00118865740740741000</text:p>
          </table:table-cell>
          <table:table-cell table:formula="of:=[.D792]-[.D79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3" office:value-type="float" office:value="10283" calcext:value-type="float">
            <text:p>10283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19016203703704" calcext:value-type="float">
            <text:p>0,00119016203703704000</text:p>
          </table:table-cell>
          <table:table-cell table:formula="of:=[.D793]-[.D7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3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19166666666667" calcext:value-type="float">
            <text:p>0,00119166666666667000</text:p>
          </table:table-cell>
          <table:table-cell table:formula="of:=[.D794]-[.D79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3" office:value-type="float" office:value="10309" calcext:value-type="float">
            <text:p>10309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1931712962963" calcext:value-type="float">
            <text:p>0,00119317129629630000</text:p>
          </table:table-cell>
          <table:table-cell table:formula="of:=[.D795]-[.D7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3" office:value-type="float" office:value="10322" calcext:value-type="float">
            <text:p>10322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19467592592593" calcext:value-type="float">
            <text:p>0,00119467592592593000</text:p>
          </table:table-cell>
          <table:table-cell table:formula="of:=[.D796]-[.D79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3" office:value-type="float" office:value="10335" calcext:value-type="float">
            <text:p>1033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19618055555556" calcext:value-type="float">
            <text:p>0,00119618055555556000</text:p>
          </table:table-cell>
          <table:table-cell table:formula="of:=[.D797]-[.D79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3" office:value-type="float" office:value="10348" calcext:value-type="float">
            <text:p>10348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19768518518519" calcext:value-type="float">
            <text:p>0,00119768518518519000</text:p>
          </table:table-cell>
          <table:table-cell table:formula="of:=[.D798]-[.D79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3" office:value-type="float" office:value="10361" calcext:value-type="float">
            <text:p>10361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19918981481481" calcext:value-type="float">
            <text:p>0,00119918981481481000</text:p>
          </table:table-cell>
          <table:table-cell table:formula="of:=[.D799]-[.D79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3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20069444444444" calcext:value-type="float">
            <text:p>0,00120069444444444000</text:p>
          </table:table-cell>
          <table:table-cell table:formula="of:=[.D800]-[.D79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3" office:value-type="float" office:value="10387" calcext:value-type="float">
            <text:p>10387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20219907407407" calcext:value-type="float">
            <text:p>0,00120219907407407000</text:p>
          </table:table-cell>
          <table:table-cell table:formula="of:=[.D801]-[.D80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3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2037037037037" calcext:value-type="float">
            <text:p>0,00120370370370370000</text:p>
          </table:table-cell>
          <table:table-cell table:formula="of:=[.D802]-[.D80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3" office:value-type="float" office:value="10413" calcext:value-type="float">
            <text:p>10413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20520833333333" calcext:value-type="float">
            <text:p>0,00120520833333333000</text:p>
          </table:table-cell>
          <table:table-cell table:formula="of:=[.D803]-[.D80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3" office:value-type="float" office:value="10426" calcext:value-type="float">
            <text:p>10426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20671296296296" calcext:value-type="float">
            <text:p>0,00120671296296296000</text:p>
          </table:table-cell>
          <table:table-cell table:formula="of:=[.D804]-[.D80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3" office:value-type="float" office:value="10439" calcext:value-type="float">
            <text:p>10439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20821759259259" calcext:value-type="float">
            <text:p>0,00120821759259259000</text:p>
          </table:table-cell>
          <table:table-cell table:formula="of:=[.D805]-[.D80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3" office:value-type="float" office:value="10452" calcext:value-type="float">
            <text:p>10452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20972222222222" calcext:value-type="float">
            <text:p>0,00120972222222222000</text:p>
          </table:table-cell>
          <table:table-cell table:formula="of:=[.D806]-[.D8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3" office:value-type="float" office:value="10465" calcext:value-type="float">
            <text:p>1046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21122685185185" calcext:value-type="float">
            <text:p>0,00121122685185185000</text:p>
          </table:table-cell>
          <table:table-cell table:formula="of:=[.D807]-[.D80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3" office:value-type="float" office:value="10478" calcext:value-type="float">
            <text:p>10478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21273148148148" calcext:value-type="float">
            <text:p>0,00121273148148148000</text:p>
          </table:table-cell>
          <table:table-cell table:formula="of:=[.D808]-[.D80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3" office:value-type="float" office:value="10491" calcext:value-type="float">
            <text:p>10491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21423611111111" calcext:value-type="float">
            <text:p>0,00121423611111111000</text:p>
          </table:table-cell>
          <table:table-cell table:formula="of:=[.D809]-[.D80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3" office:value-type="float" office:value="10504" calcext:value-type="float">
            <text:p>10504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21574074074074" calcext:value-type="float">
            <text:p>0,00121574074074074000</text:p>
          </table:table-cell>
          <table:table-cell table:formula="of:=[.D810]-[.D8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3" office:value-type="float" office:value="10517" calcext:value-type="float">
            <text:p>10517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21724537037037" calcext:value-type="float">
            <text:p>0,00121724537037037000</text:p>
          </table:table-cell>
          <table:table-cell table:formula="of:=[.D811]-[.D81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3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21875" calcext:value-type="float">
            <text:p>0,00121875000000000000</text:p>
          </table:table-cell>
          <table:table-cell table:formula="of:=[.D812]-[.D81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3" office:value-type="float" office:value="10543" calcext:value-type="float">
            <text:p>10543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22025462962963" calcext:value-type="float">
            <text:p>0,00122025462962963000</text:p>
          </table:table-cell>
          <table:table-cell table:formula="of:=[.D813]-[.D81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3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22175925925926" calcext:value-type="float">
            <text:p>0,00122175925925926000</text:p>
          </table:table-cell>
          <table:table-cell table:formula="of:=[.D814]-[.D81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3" office:value-type="float" office:value="10569" calcext:value-type="float">
            <text:p>10569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22326388888889" calcext:value-type="float">
            <text:p>0,00122326388888889000</text:p>
          </table:table-cell>
          <table:table-cell table:formula="of:=[.D815]-[.D81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3" office:value-type="float" office:value="10582" calcext:value-type="float">
            <text:p>10582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22476851851852" calcext:value-type="float">
            <text:p>0,00122476851851852000</text:p>
          </table:table-cell>
          <table:table-cell table:formula="of:=[.D816]-[.D81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3" office:value-type="float" office:value="10595" calcext:value-type="float">
            <text:p>1059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22627314814815" calcext:value-type="float">
            <text:p>0,00122627314814815000</text:p>
          </table:table-cell>
          <table:table-cell table:formula="of:=[.D817]-[.D8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3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22777777777778" calcext:value-type="float">
            <text:p>0,00122777777777778000</text:p>
          </table:table-cell>
          <table:table-cell table:formula="of:=[.D818]-[.D81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3" office:value-type="float" office:value="10621" calcext:value-type="float">
            <text:p>10621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22928240740741" calcext:value-type="float">
            <text:p>0,00122928240740741000</text:p>
          </table:table-cell>
          <table:table-cell table:formula="of:=[.D819]-[.D81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3" office:value-type="float" office:value="10634" calcext:value-type="float">
            <text:p>10634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23078703703704" calcext:value-type="float">
            <text:p>0,00123078703703704000</text:p>
          </table:table-cell>
          <table:table-cell table:formula="of:=[.D820]-[.D81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3" office:value-type="float" office:value="10647" calcext:value-type="float">
            <text:p>10647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23229166666667" calcext:value-type="float">
            <text:p>0,00123229166666667000</text:p>
          </table:table-cell>
          <table:table-cell table:formula="of:=[.D821]-[.D8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3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2337962962963" calcext:value-type="float">
            <text:p>0,00123379629629630000</text:p>
          </table:table-cell>
          <table:table-cell table:formula="of:=[.D822]-[.D82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3" office:value-type="float" office:value="10673" calcext:value-type="float">
            <text:p>10673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23530092592593" calcext:value-type="float">
            <text:p>0,00123530092592593000</text:p>
          </table:table-cell>
          <table:table-cell table:formula="of:=[.D823]-[.D82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3" office:value-type="float" office:value="10686" calcext:value-type="float">
            <text:p>10686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23680555555556" calcext:value-type="float">
            <text:p>0,00123680555555556000</text:p>
          </table:table-cell>
          <table:table-cell table:formula="of:=[.D824]-[.D82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3" office:value-type="float" office:value="10699" calcext:value-type="float">
            <text:p>10699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23831018518519" calcext:value-type="float">
            <text:p>0,00123831018518519000</text:p>
          </table:table-cell>
          <table:table-cell table:formula="of:=[.D825]-[.D82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3" office:value-type="float" office:value="10712" calcext:value-type="float">
            <text:p>10712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23981481481482" calcext:value-type="float">
            <text:p>0,00123981481481482000</text:p>
          </table:table-cell>
          <table:table-cell table:formula="of:=[.D826]-[.D82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3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24131944444444" calcext:value-type="float">
            <text:p>0,00124131944444444000</text:p>
          </table:table-cell>
          <table:table-cell table:formula="of:=[.D827]-[.D82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3" office:value-type="float" office:value="10738" calcext:value-type="float">
            <text:p>10738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24282407407407" calcext:value-type="float">
            <text:p>0,00124282407407407000</text:p>
          </table:table-cell>
          <table:table-cell table:formula="of:=[.D828]-[.D82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3" office:value-type="float" office:value="10751" calcext:value-type="float">
            <text:p>10751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2443287037037" calcext:value-type="float">
            <text:p>0,00124432870370370000</text:p>
          </table:table-cell>
          <table:table-cell table:formula="of:=[.D829]-[.D82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3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24583333333333" calcext:value-type="float">
            <text:p>0,00124583333333333000</text:p>
          </table:table-cell>
          <table:table-cell table:formula="of:=[.D830]-[.D82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3" office:value-type="float" office:value="10777" calcext:value-type="float">
            <text:p>10777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24733796296296" calcext:value-type="float">
            <text:p>0,00124733796296296000</text:p>
          </table:table-cell>
          <table:table-cell table:formula="of:=[.D831]-[.D83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3" office:value-type="float" office:value="10790" calcext:value-type="float">
            <text:p>1079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24884259259259" calcext:value-type="float">
            <text:p>0,00124884259259259000</text:p>
          </table:table-cell>
          <table:table-cell table:formula="of:=[.D832]-[.D8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3" office:value-type="float" office:value="10803" calcext:value-type="float">
            <text:p>10803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25034722222222" calcext:value-type="float">
            <text:p>0,00125034722222222000</text:p>
          </table:table-cell>
          <table:table-cell table:formula="of:=[.D833]-[.D83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3" office:value-type="float" office:value="10816" calcext:value-type="float">
            <text:p>10816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25185185185185" calcext:value-type="float">
            <text:p>0,00125185185185185000</text:p>
          </table:table-cell>
          <table:table-cell table:formula="of:=[.D834]-[.D83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3" office:value-type="float" office:value="10829" calcext:value-type="float">
            <text:p>10829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25335648148148" calcext:value-type="float">
            <text:p>0,00125335648148148000</text:p>
          </table:table-cell>
          <table:table-cell table:formula="of:=[.D835]-[.D83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3" office:value-type="float" office:value="10842" calcext:value-type="float">
            <text:p>10842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25486111111111" calcext:value-type="float">
            <text:p>0,00125486111111111000</text:p>
          </table:table-cell>
          <table:table-cell table:formula="of:=[.D836]-[.D83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3" office:value-type="float" office:value="10855" calcext:value-type="float">
            <text:p>1085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25636574074074" calcext:value-type="float">
            <text:p>0,00125636574074074000</text:p>
          </table:table-cell>
          <table:table-cell table:formula="of:=[.D837]-[.D8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3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25787037037037" calcext:value-type="float">
            <text:p>0,00125787037037037000</text:p>
          </table:table-cell>
          <table:table-cell table:formula="of:=[.D838]-[.D83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3" office:value-type="float" office:value="10881" calcext:value-type="float">
            <text:p>10881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259375" calcext:value-type="float">
            <text:p>0,00125937500000000000</text:p>
          </table:table-cell>
          <table:table-cell table:formula="of:=[.D839]-[.D83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3" office:value-type="float" office:value="10894" calcext:value-type="float">
            <text:p>10894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26087962962963" calcext:value-type="float">
            <text:p>0,00126087962962963000</text:p>
          </table:table-cell>
          <table:table-cell table:formula="of:=[.D840]-[.D83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3" office:value-type="float" office:value="10907" calcext:value-type="float">
            <text:p>10907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26238425925926" calcext:value-type="float">
            <text:p>0,00126238425925926000</text:p>
          </table:table-cell>
          <table:table-cell table:formula="of:=[.D841]-[.D8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3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26388888888889" calcext:value-type="float">
            <text:p>0,00126388888888889000</text:p>
          </table:table-cell>
          <table:table-cell table:formula="of:=[.D842]-[.D84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3" office:value-type="float" office:value="10933" calcext:value-type="float">
            <text:p>10933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26539351851852" calcext:value-type="float">
            <text:p>0,00126539351851852000</text:p>
          </table:table-cell>
          <table:table-cell table:formula="of:=[.D843]-[.D8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3" office:value-type="float" office:value="10946" calcext:value-type="float">
            <text:p>10946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26689814814815" calcext:value-type="float">
            <text:p>0,00126689814814815000</text:p>
          </table:table-cell>
          <table:table-cell table:formula="of:=[.D844]-[.D84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3" office:value-type="float" office:value="10959" calcext:value-type="float">
            <text:p>10959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26840277777778" calcext:value-type="float">
            <text:p>0,00126840277777778000</text:p>
          </table:table-cell>
          <table:table-cell table:formula="of:=[.D845]-[.D84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3" office:value-type="float" office:value="10972" calcext:value-type="float">
            <text:p>10972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26990740740741" calcext:value-type="float">
            <text:p>0,00126990740740741000</text:p>
          </table:table-cell>
          <table:table-cell table:formula="of:=[.D846]-[.D84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3" office:value-type="float" office:value="10985" calcext:value-type="float">
            <text:p>1098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27141203703704" calcext:value-type="float">
            <text:p>0,00127141203703704000</text:p>
          </table:table-cell>
          <table:table-cell table:formula="of:=[.D847]-[.D84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3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27291666666667" calcext:value-type="float">
            <text:p>0,00127291666666667000</text:p>
          </table:table-cell>
          <table:table-cell table:formula="of:=[.D848]-[.D8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3" office:value-type="float" office:value="11011" calcext:value-type="float">
            <text:p>11011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2744212962963" calcext:value-type="float">
            <text:p>0,00127442129629630000</text:p>
          </table:table-cell>
          <table:table-cell table:formula="of:=[.D849]-[.D84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3" office:value-type="float" office:value="11024" calcext:value-type="float">
            <text:p>11024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27592592592593" calcext:value-type="float">
            <text:p>0,00127592592592593000</text:p>
          </table:table-cell>
          <table:table-cell table:formula="of:=[.D850]-[.D84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3" office:value-type="float" office:value="11037" calcext:value-type="float">
            <text:p>11037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27743055555556" calcext:value-type="float">
            <text:p>0,00127743055555556000</text:p>
          </table:table-cell>
          <table:table-cell table:formula="of:=[.D851]-[.D85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3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27893518518519" calcext:value-type="float">
            <text:p>0,00127893518518519000</text:p>
          </table:table-cell>
          <table:table-cell table:formula="of:=[.D852]-[.D85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3" office:value-type="float" office:value="11063" calcext:value-type="float">
            <text:p>11063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28043981481481" calcext:value-type="float">
            <text:p>0,00128043981481481000</text:p>
          </table:table-cell>
          <table:table-cell table:formula="of:=[.D853]-[.D85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3" office:value-type="float" office:value="11076" calcext:value-type="float">
            <text:p>11076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28194444444444" calcext:value-type="float">
            <text:p>0,00128194444444444000</text:p>
          </table:table-cell>
          <table:table-cell table:formula="of:=[.D854]-[.D85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3" office:value-type="float" office:value="11089" calcext:value-type="float">
            <text:p>11089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28344907407407" calcext:value-type="float">
            <text:p>0,00128344907407407000</text:p>
          </table:table-cell>
          <table:table-cell table:formula="of:=[.D855]-[.D85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3" office:value-type="float" office:value="11102" calcext:value-type="float">
            <text:p>11102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2849537037037" calcext:value-type="float">
            <text:p>0,00128495370370370000</text:p>
          </table:table-cell>
          <table:table-cell table:formula="of:=[.D856]-[.D85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3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28645833333333" calcext:value-type="float">
            <text:p>0,00128645833333333000</text:p>
          </table:table-cell>
          <table:table-cell table:formula="of:=[.D857]-[.D85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3" office:value-type="float" office:value="11128" calcext:value-type="float">
            <text:p>11128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28796296296296" calcext:value-type="float">
            <text:p>0,00128796296296296000</text:p>
          </table:table-cell>
          <table:table-cell table:formula="of:=[.D858]-[.D8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3" office:value-type="float" office:value="11141" calcext:value-type="float">
            <text:p>11141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28946759259259" calcext:value-type="float">
            <text:p>0,00128946759259259000</text:p>
          </table:table-cell>
          <table:table-cell table:formula="of:=[.D859]-[.D85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3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29097222222222" calcext:value-type="float">
            <text:p>0,00129097222222222000</text:p>
          </table:table-cell>
          <table:table-cell table:formula="of:=[.D860]-[.D85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3" office:value-type="float" office:value="11167" calcext:value-type="float">
            <text:p>11167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29247685185185" calcext:value-type="float">
            <text:p>0,00129247685185185000</text:p>
          </table:table-cell>
          <table:table-cell table:formula="of:=[.D861]-[.D86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3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29398148148148" calcext:value-type="float">
            <text:p>0,00129398148148148000</text:p>
          </table:table-cell>
          <table:table-cell table:formula="of:=[.D862]-[.D86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3" office:value-type="float" office:value="11193" calcext:value-type="float">
            <text:p>11193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29548611111111" calcext:value-type="float">
            <text:p>0,00129548611111111000</text:p>
          </table:table-cell>
          <table:table-cell table:formula="of:=[.D863]-[.D86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3" office:value-type="float" office:value="11206" calcext:value-type="float">
            <text:p>11206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29699074074074" calcext:value-type="float">
            <text:p>0,00129699074074074000</text:p>
          </table:table-cell>
          <table:table-cell table:formula="of:=[.D864]-[.D86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3" office:value-type="float" office:value="11219" calcext:value-type="float">
            <text:p>11219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29849537037037" calcext:value-type="float">
            <text:p>0,00129849537037037000</text:p>
          </table:table-cell>
          <table:table-cell table:formula="of:=[.D865]-[.D86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3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3" calcext:value-type="float">
            <text:p>0,00130000000000000000</text:p>
          </table:table-cell>
          <table:table-cell table:formula="of:=[.D866]-[.D86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3" office:value-type="float" office:value="11245" calcext:value-type="float">
            <text:p>1124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30150462962963" calcext:value-type="float">
            <text:p>0,00130150462962963000</text:p>
          </table:table-cell>
          <table:table-cell table:formula="of:=[.D867]-[.D86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3" office:value-type="float" office:value="11258" calcext:value-type="float">
            <text:p>11258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30300925925926" calcext:value-type="float">
            <text:p>0,00130300925925926000</text:p>
          </table:table-cell>
          <table:table-cell table:formula="of:=[.D868]-[.D86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3" office:value-type="float" office:value="11271" calcext:value-type="float">
            <text:p>11271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30451388888889" calcext:value-type="float">
            <text:p>0,00130451388888889000</text:p>
          </table:table-cell>
          <table:table-cell table:formula="of:=[.D869]-[.D8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3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30601851851852" calcext:value-type="float">
            <text:p>0,00130601851851852000</text:p>
          </table:table-cell>
          <table:table-cell table:formula="of:=[.D870]-[.D86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3" office:value-type="float" office:value="11297" calcext:value-type="float">
            <text:p>11297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30752314814815" calcext:value-type="float">
            <text:p>0,00130752314814815000</text:p>
          </table:table-cell>
          <table:table-cell table:formula="of:=[.D871]-[.D87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3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30902777777778" calcext:value-type="float">
            <text:p>0,00130902777777778000</text:p>
          </table:table-cell>
          <table:table-cell table:formula="of:=[.D872]-[.D87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3" office:value-type="float" office:value="11323" calcext:value-type="float">
            <text:p>11323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31053240740741" calcext:value-type="float">
            <text:p>0,00131053240740741000</text:p>
          </table:table-cell>
          <table:table-cell table:formula="of:=[.D873]-[.D87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3" office:value-type="float" office:value="11336" calcext:value-type="float">
            <text:p>11336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31203703703704" calcext:value-type="float">
            <text:p>0,00131203703703704000</text:p>
          </table:table-cell>
          <table:table-cell table:formula="of:=[.D874]-[.D87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3" office:value-type="float" office:value="11349" calcext:value-type="float">
            <text:p>11349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31354166666667" calcext:value-type="float">
            <text:p>0,00131354166666667000</text:p>
          </table:table-cell>
          <table:table-cell table:formula="of:=[.D875]-[.D87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3" office:value-type="float" office:value="11362" calcext:value-type="float">
            <text:p>11362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3150462962963" calcext:value-type="float">
            <text:p>0,00131504629629630000</text:p>
          </table:table-cell>
          <table:table-cell table:formula="of:=[.D876]-[.D87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3" office:value-type="float" office:value="11375" calcext:value-type="float">
            <text:p>1137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31655092592593" calcext:value-type="float">
            <text:p>0,00131655092592593000</text:p>
          </table:table-cell>
          <table:table-cell table:formula="of:=[.D877]-[.D87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3" office:value-type="float" office:value="11388" calcext:value-type="float">
            <text:p>11388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31805555555556" calcext:value-type="float">
            <text:p>0,00131805555555556000</text:p>
          </table:table-cell>
          <table:table-cell table:formula="of:=[.D878]-[.D87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3" office:value-type="float" office:value="11401" calcext:value-type="float">
            <text:p>11401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31956018518519" calcext:value-type="float">
            <text:p>0,00131956018518519000</text:p>
          </table:table-cell>
          <table:table-cell table:formula="of:=[.D879]-[.D87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3" office:value-type="float" office:value="11414" calcext:value-type="float">
            <text:p>11414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32106481481481" calcext:value-type="float">
            <text:p>0,00132106481481481000</text:p>
          </table:table-cell>
          <table:table-cell table:formula="of:=[.D880]-[.D87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3" office:value-type="float" office:value="11427" calcext:value-type="float">
            <text:p>11427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32256944444444" calcext:value-type="float">
            <text:p>0,00132256944444444000</text:p>
          </table:table-cell>
          <table:table-cell table:formula="of:=[.D881]-[.D88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3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32407407407407" calcext:value-type="float">
            <text:p>0,00132407407407407000</text:p>
          </table:table-cell>
          <table:table-cell table:formula="of:=[.D882]-[.D8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3" office:value-type="float" office:value="11453" calcext:value-type="float">
            <text:p>11453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3255787037037" calcext:value-type="float">
            <text:p>0,00132557870370370000</text:p>
          </table:table-cell>
          <table:table-cell table:formula="of:=[.D883]-[.D88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3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32708333333333" calcext:value-type="float">
            <text:p>0,00132708333333333000</text:p>
          </table:table-cell>
          <table:table-cell table:formula="of:=[.D884]-[.D88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3" office:value-type="float" office:value="11479" calcext:value-type="float">
            <text:p>11479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32858796296296" calcext:value-type="float">
            <text:p>0,00132858796296296000</text:p>
          </table:table-cell>
          <table:table-cell table:formula="of:=[.D885]-[.D88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3" office:value-type="float" office:value="11492" calcext:value-type="float">
            <text:p>11492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33009259259259" calcext:value-type="float">
            <text:p>0,00133009259259259000</text:p>
          </table:table-cell>
          <table:table-cell table:formula="of:=[.D886]-[.D88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3" office:value-type="float" office:value="11505" calcext:value-type="float">
            <text:p>1150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33159722222222" calcext:value-type="float">
            <text:p>0,00133159722222222000</text:p>
          </table:table-cell>
          <table:table-cell table:formula="of:=[.D887]-[.D88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3" office:value-type="float" office:value="11518" calcext:value-type="float">
            <text:p>11518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33310185185185" calcext:value-type="float">
            <text:p>0,00133310185185185000</text:p>
          </table:table-cell>
          <table:table-cell table:formula="of:=[.D888]-[.D88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3" office:value-type="float" office:value="11531" calcext:value-type="float">
            <text:p>11531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33460648148148" calcext:value-type="float">
            <text:p>0,00133460648148148000</text:p>
          </table:table-cell>
          <table:table-cell table:formula="of:=[.D889]-[.D8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3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33611111111111" calcext:value-type="float">
            <text:p>0,00133611111111111000</text:p>
          </table:table-cell>
          <table:table-cell table:formula="of:=[.D890]-[.D88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3" office:value-type="float" office:value="11557" calcext:value-type="float">
            <text:p>11557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33761574074074" calcext:value-type="float">
            <text:p>0,00133761574074074000</text:p>
          </table:table-cell>
          <table:table-cell table:formula="of:=[.D891]-[.D89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3" office:value-type="float" office:value="11570" calcext:value-type="float">
            <text:p>1157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33912037037037" calcext:value-type="float">
            <text:p>0,00133912037037037000</text:p>
          </table:table-cell>
          <table:table-cell table:formula="of:=[.D892]-[.D89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3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340625" calcext:value-type="float">
            <text:p>0,00134062500000000000</text:p>
          </table:table-cell>
          <table:table-cell table:formula="of:=[.D893]-[.D8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3" office:value-type="float" office:value="11596" calcext:value-type="float">
            <text:p>11596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34212962962963" calcext:value-type="float">
            <text:p>0,00134212962962963000</text:p>
          </table:table-cell>
          <table:table-cell table:formula="of:=[.D894]-[.D89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3" office:value-type="float" office:value="11609" calcext:value-type="float">
            <text:p>11609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34363425925926" calcext:value-type="float">
            <text:p>0,00134363425925926000</text:p>
          </table:table-cell>
          <table:table-cell table:formula="of:=[.D895]-[.D89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3" office:value-type="float" office:value="11622" calcext:value-type="float">
            <text:p>11622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34513888888889" calcext:value-type="float">
            <text:p>0,00134513888888889000</text:p>
          </table:table-cell>
          <table:table-cell table:formula="of:=[.D896]-[.D8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3" office:value-type="float" office:value="11635" calcext:value-type="float">
            <text:p>1163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34664351851852" calcext:value-type="float">
            <text:p>0,00134664351851852000</text:p>
          </table:table-cell>
          <table:table-cell table:formula="of:=[.D897]-[.D89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3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34814814814815" calcext:value-type="float">
            <text:p>0,00134814814814815000</text:p>
          </table:table-cell>
          <table:table-cell table:formula="of:=[.D898]-[.D89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3" office:value-type="float" office:value="11661" calcext:value-type="float">
            <text:p>11661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34965277777778" calcext:value-type="float">
            <text:p>0,00134965277777778000</text:p>
          </table:table-cell>
          <table:table-cell table:formula="of:=[.D899]-[.D89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3" office:value-type="float" office:value="11674" calcext:value-type="float">
            <text:p>11674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35115740740741" calcext:value-type="float">
            <text:p>0,00135115740740741000</text:p>
          </table:table-cell>
          <table:table-cell table:formula="of:=[.D900]-[.D89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3" office:value-type="float" office:value="11687" calcext:value-type="float">
            <text:p>11687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35266203703704" calcext:value-type="float">
            <text:p>0,00135266203703704000</text:p>
          </table:table-cell>
          <table:table-cell table:formula="of:=[.D901]-[.D90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3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35416666666667" calcext:value-type="float">
            <text:p>0,00135416666666667000</text:p>
          </table:table-cell>
          <table:table-cell table:formula="of:=[.D902]-[.D90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3" office:value-type="float" office:value="11713" calcext:value-type="float">
            <text:p>11713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3556712962963" calcext:value-type="float">
            <text:p>0,00135567129629630000</text:p>
          </table:table-cell>
          <table:table-cell table:formula="of:=[.D903]-[.D90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3" office:value-type="float" office:value="11726" calcext:value-type="float">
            <text:p>11726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35717592592593" calcext:value-type="float">
            <text:p>0,00135717592592593000</text:p>
          </table:table-cell>
          <table:table-cell table:formula="of:=[.D904]-[.D90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3" office:value-type="float" office:value="11739" calcext:value-type="float">
            <text:p>11739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35868055555556" calcext:value-type="float">
            <text:p>0,00135868055555556000</text:p>
          </table:table-cell>
          <table:table-cell table:formula="of:=[.D905]-[.D90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3" office:value-type="float" office:value="11752" calcext:value-type="float">
            <text:p>11752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36018518518519" calcext:value-type="float">
            <text:p>0,00136018518518519000</text:p>
          </table:table-cell>
          <table:table-cell table:formula="of:=[.D906]-[.D9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3" office:value-type="float" office:value="11765" calcext:value-type="float">
            <text:p>1176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36168981481481" calcext:value-type="float">
            <text:p>0,00136168981481481000</text:p>
          </table:table-cell>
          <table:table-cell table:formula="of:=[.D907]-[.D90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3" office:value-type="float" office:value="11778" calcext:value-type="float">
            <text:p>11778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36319444444444" calcext:value-type="float">
            <text:p>0,00136319444444444000</text:p>
          </table:table-cell>
          <table:table-cell table:formula="of:=[.D908]-[.D90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3" office:value-type="float" office:value="11791" calcext:value-type="float">
            <text:p>11791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36469907407407" calcext:value-type="float">
            <text:p>0,00136469907407407000</text:p>
          </table:table-cell>
          <table:table-cell table:formula="of:=[.D909]-[.D90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3" office:value-type="float" office:value="11804" calcext:value-type="float">
            <text:p>11804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3662037037037" calcext:value-type="float">
            <text:p>0,00136620370370370000</text:p>
          </table:table-cell>
          <table:table-cell table:formula="of:=[.D910]-[.D90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3" office:value-type="float" office:value="11817" calcext:value-type="float">
            <text:p>11817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36770833333333" calcext:value-type="float">
            <text:p>0,00136770833333333000</text:p>
          </table:table-cell>
          <table:table-cell table:formula="of:=[.D911]-[.D9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3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36921296296296" calcext:value-type="float">
            <text:p>0,00136921296296296000</text:p>
          </table:table-cell>
          <table:table-cell table:formula="of:=[.D912]-[.D91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3" office:value-type="float" office:value="11843" calcext:value-type="float">
            <text:p>11843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37071759259259" calcext:value-type="float">
            <text:p>0,00137071759259259000</text:p>
          </table:table-cell>
          <table:table-cell table:formula="of:=[.D913]-[.D91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3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37222222222222" calcext:value-type="float">
            <text:p>0,00137222222222222000</text:p>
          </table:table-cell>
          <table:table-cell table:formula="of:=[.D914]-[.D91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3" office:value-type="float" office:value="11869" calcext:value-type="float">
            <text:p>11869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37372685185185" calcext:value-type="float">
            <text:p>0,00137372685185185000</text:p>
          </table:table-cell>
          <table:table-cell table:formula="of:=[.D915]-[.D91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3" office:value-type="float" office:value="11882" calcext:value-type="float">
            <text:p>11882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37523148148148" calcext:value-type="float">
            <text:p>0,00137523148148148000</text:p>
          </table:table-cell>
          <table:table-cell table:formula="of:=[.D916]-[.D91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3" office:value-type="float" office:value="11895" calcext:value-type="float">
            <text:p>1189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37673611111111" calcext:value-type="float">
            <text:p>0,00137673611111111000</text:p>
          </table:table-cell>
          <table:table-cell table:formula="of:=[.D917]-[.D9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3" office:value-type="float" office:value="11908" calcext:value-type="float">
            <text:p>11908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37824074074074" calcext:value-type="float">
            <text:p>0,00137824074074074000</text:p>
          </table:table-cell>
          <table:table-cell table:formula="of:=[.D918]-[.D91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3" office:value-type="float" office:value="11921" calcext:value-type="float">
            <text:p>11921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37974537037037" calcext:value-type="float">
            <text:p>0,00137974537037037000</text:p>
          </table:table-cell>
          <table:table-cell table:formula="of:=[.D919]-[.D91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3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38125" calcext:value-type="float">
            <text:p>0,00138125000000000000</text:p>
          </table:table-cell>
          <table:table-cell table:formula="of:=[.D920]-[.D91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3" office:value-type="float" office:value="11947" calcext:value-type="float">
            <text:p>11947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38275462962963" calcext:value-type="float">
            <text:p>0,00138275462962963000</text:p>
          </table:table-cell>
          <table:table-cell table:formula="of:=[.D921]-[.D92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3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38425925925926" calcext:value-type="float">
            <text:p>0,00138425925925926000</text:p>
          </table:table-cell>
          <table:table-cell table:formula="of:=[.D922]-[.D9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3" office:value-type="float" office:value="11973" calcext:value-type="float">
            <text:p>11973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38576388888889" calcext:value-type="float">
            <text:p>0,00138576388888889000</text:p>
          </table:table-cell>
          <table:table-cell table:formula="of:=[.D923]-[.D92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3" office:value-type="float" office:value="11986" calcext:value-type="float">
            <text:p>11986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38726851851852" calcext:value-type="float">
            <text:p>0,00138726851851852000</text:p>
          </table:table-cell>
          <table:table-cell table:formula="of:=[.D924]-[.D92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3" office:value-type="float" office:value="11999" calcext:value-type="float">
            <text:p>11999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38877314814815" calcext:value-type="float">
            <text:p>0,00138877314814815000</text:p>
          </table:table-cell>
          <table:table-cell table:formula="of:=[.D925]-[.D92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3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39027777777778" calcext:value-type="float">
            <text:p>0,00139027777777778000</text:p>
          </table:table-cell>
          <table:table-cell table:formula="of:=[.D926]-[.D92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3" office:value-type="float" office:value="12025" calcext:value-type="float">
            <text:p>1202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39178240740741" calcext:value-type="float">
            <text:p>0,00139178240740741000</text:p>
          </table:table-cell>
          <table:table-cell table:formula="of:=[.D927]-[.D92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3" office:value-type="float" office:value="12038" calcext:value-type="float">
            <text:p>12038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39328703703704" calcext:value-type="float">
            <text:p>0,00139328703703704000</text:p>
          </table:table-cell>
          <table:table-cell table:formula="of:=[.D928]-[.D92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3" office:value-type="float" office:value="12051" calcext:value-type="float">
            <text:p>12051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39479166666667" calcext:value-type="float">
            <text:p>0,00139479166666667000</text:p>
          </table:table-cell>
          <table:table-cell table:formula="of:=[.D929]-[.D92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3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3962962962963" calcext:value-type="float">
            <text:p>0,00139629629629630000</text:p>
          </table:table-cell>
          <table:table-cell table:formula="of:=[.D930]-[.D92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3" office:value-type="float" office:value="12077" calcext:value-type="float">
            <text:p>12077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39780092592593" calcext:value-type="float">
            <text:p>0,00139780092592593000</text:p>
          </table:table-cell>
          <table:table-cell table:formula="of:=[.D931]-[.D93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3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39930555555556" calcext:value-type="float">
            <text:p>0,00139930555555556000</text:p>
          </table:table-cell>
          <table:table-cell table:formula="of:=[.D932]-[.D93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3" office:value-type="float" office:value="12103" calcext:value-type="float">
            <text:p>12103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40081018518519" calcext:value-type="float">
            <text:p>0,00140081018518519000</text:p>
          </table:table-cell>
          <table:table-cell table:formula="of:=[.D933]-[.D9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3" office:value-type="float" office:value="12116" calcext:value-type="float">
            <text:p>12116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40231481481481" calcext:value-type="float">
            <text:p>0,00140231481481481000</text:p>
          </table:table-cell>
          <table:table-cell table:formula="of:=[.D934]-[.D93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3" office:value-type="float" office:value="12129" calcext:value-type="float">
            <text:p>12129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40381944444444" calcext:value-type="float">
            <text:p>0,00140381944444444000</text:p>
          </table:table-cell>
          <table:table-cell table:formula="of:=[.D935]-[.D93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3" office:value-type="float" office:value="12142" calcext:value-type="float">
            <text:p>12142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40532407407407" calcext:value-type="float">
            <text:p>0,00140532407407407000</text:p>
          </table:table-cell>
          <table:table-cell table:formula="of:=[.D936]-[.D93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3" office:value-type="float" office:value="12155" calcext:value-type="float">
            <text:p>1215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4068287037037" calcext:value-type="float">
            <text:p>0,00140682870370370000</text:p>
          </table:table-cell>
          <table:table-cell table:formula="of:=[.D937]-[.D9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3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40833333333333" calcext:value-type="float">
            <text:p>0,00140833333333333000</text:p>
          </table:table-cell>
          <table:table-cell table:formula="of:=[.D938]-[.D93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3" office:value-type="float" office:value="12181" calcext:value-type="float">
            <text:p>12181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40983796296296" calcext:value-type="float">
            <text:p>0,00140983796296296000</text:p>
          </table:table-cell>
          <table:table-cell table:formula="of:=[.D939]-[.D93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3" office:value-type="float" office:value="12194" calcext:value-type="float">
            <text:p>12194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41134259259259" calcext:value-type="float">
            <text:p>0,00141134259259259000</text:p>
          </table:table-cell>
          <table:table-cell table:formula="of:=[.D940]-[.D93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3" office:value-type="float" office:value="12207" calcext:value-type="float">
            <text:p>12207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41284722222222" calcext:value-type="float">
            <text:p>0,00141284722222222000</text:p>
          </table:table-cell>
          <table:table-cell table:formula="of:=[.D941]-[.D9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3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41435185185185" calcext:value-type="float">
            <text:p>0,00141435185185185000</text:p>
          </table:table-cell>
          <table:table-cell table:formula="of:=[.D942]-[.D94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3" office:value-type="float" office:value="12233" calcext:value-type="float">
            <text:p>12233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41585648148148" calcext:value-type="float">
            <text:p>0,00141585648148148000</text:p>
          </table:table-cell>
          <table:table-cell table:formula="of:=[.D943]-[.D94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3" office:value-type="float" office:value="12246" calcext:value-type="float">
            <text:p>12246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41736111111111" calcext:value-type="float">
            <text:p>0,00141736111111111000</text:p>
          </table:table-cell>
          <table:table-cell table:formula="of:=[.D944]-[.D9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3" office:value-type="float" office:value="12259" calcext:value-type="float">
            <text:p>12259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41886574074074" calcext:value-type="float">
            <text:p>0,00141886574074074000</text:p>
          </table:table-cell>
          <table:table-cell table:formula="of:=[.D945]-[.D94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3" office:value-type="float" office:value="12272" calcext:value-type="float">
            <text:p>12272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42037037037037" calcext:value-type="float">
            <text:p>0,00142037037037037000</text:p>
          </table:table-cell>
          <table:table-cell table:formula="of:=[.D946]-[.D94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3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421875" calcext:value-type="float">
            <text:p>0,00142187500000000000</text:p>
          </table:table-cell>
          <table:table-cell table:formula="of:=[.D947]-[.D94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3" office:value-type="float" office:value="12298" calcext:value-type="float">
            <text:p>12298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42337962962963" calcext:value-type="float">
            <text:p>0,00142337962962963000</text:p>
          </table:table-cell>
          <table:table-cell table:formula="of:=[.D948]-[.D9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3" office:value-type="float" office:value="12311" calcext:value-type="float">
            <text:p>12311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42488425925926" calcext:value-type="float">
            <text:p>0,00142488425925926000</text:p>
          </table:table-cell>
          <table:table-cell table:formula="of:=[.D949]-[.D94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3" office:value-type="float" office:value="12324" calcext:value-type="float">
            <text:p>12324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42638888888889" calcext:value-type="float">
            <text:p>0,00142638888888889000</text:p>
          </table:table-cell>
          <table:table-cell table:formula="of:=[.D950]-[.D94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3" office:value-type="float" office:value="12337" calcext:value-type="float">
            <text:p>12337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42789351851852" calcext:value-type="float">
            <text:p>0,00142789351851852000</text:p>
          </table:table-cell>
          <table:table-cell table:formula="of:=[.D951]-[.D95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3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42939814814815" calcext:value-type="float">
            <text:p>0,00142939814814815000</text:p>
          </table:table-cell>
          <table:table-cell table:formula="of:=[.D952]-[.D95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3" office:value-type="float" office:value="12363" calcext:value-type="float">
            <text:p>12363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43090277777778" calcext:value-type="float">
            <text:p>0,00143090277777778000</text:p>
          </table:table-cell>
          <table:table-cell table:formula="of:=[.D953]-[.D95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3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43240740740741" calcext:value-type="float">
            <text:p>0,00143240740740741000</text:p>
          </table:table-cell>
          <table:table-cell table:formula="of:=[.D954]-[.D95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3" office:value-type="float" office:value="12389" calcext:value-type="float">
            <text:p>12389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43391203703704" calcext:value-type="float">
            <text:p>0,00143391203703704000</text:p>
          </table:table-cell>
          <table:table-cell table:formula="of:=[.D955]-[.D9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3" office:value-type="float" office:value="12402" calcext:value-type="float">
            <text:p>12402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43541666666667" calcext:value-type="float">
            <text:p>0,00143541666666667000</text:p>
          </table:table-cell>
          <table:table-cell table:formula="of:=[.D956]-[.D95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3" office:value-type="float" office:value="12415" calcext:value-type="float">
            <text:p>1241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4369212962963" calcext:value-type="float">
            <text:p>0,00143692129629630000</text:p>
          </table:table-cell>
          <table:table-cell table:formula="of:=[.D957]-[.D95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3" office:value-type="float" office:value="12428" calcext:value-type="float">
            <text:p>12428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43842592592593" calcext:value-type="float">
            <text:p>0,00143842592592593000</text:p>
          </table:table-cell>
          <table:table-cell table:formula="of:=[.D958]-[.D95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3" office:value-type="float" office:value="12441" calcext:value-type="float">
            <text:p>12441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43993055555556" calcext:value-type="float">
            <text:p>0,00143993055555556000</text:p>
          </table:table-cell>
          <table:table-cell table:formula="of:=[.D959]-[.D95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3" office:value-type="float" office:value="12454" calcext:value-type="float">
            <text:p>12454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44143518518519" calcext:value-type="float">
            <text:p>0,00144143518518519000</text:p>
          </table:table-cell>
          <table:table-cell table:formula="of:=[.D960]-[.D95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3" office:value-type="float" office:value="12467" calcext:value-type="float">
            <text:p>12467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44293981481481" calcext:value-type="float">
            <text:p>0,00144293981481481000</text:p>
          </table:table-cell>
          <table:table-cell table:formula="of:=[.D961]-[.D96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3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44444444444444" calcext:value-type="float">
            <text:p>0,00144444444444444000</text:p>
          </table:table-cell>
          <table:table-cell table:formula="of:=[.D962]-[.D96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3" office:value-type="float" office:value="12493" calcext:value-type="float">
            <text:p>12493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44594907407407" calcext:value-type="float">
            <text:p>0,00144594907407407000</text:p>
          </table:table-cell>
          <table:table-cell table:formula="of:=[.D963]-[.D96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3" office:value-type="float" office:value="12506" calcext:value-type="float">
            <text:p>12506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4474537037037" calcext:value-type="float">
            <text:p>0,00144745370370370000</text:p>
          </table:table-cell>
          <table:table-cell table:formula="of:=[.D964]-[.D96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3" office:value-type="float" office:value="12519" calcext:value-type="float">
            <text:p>12519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44895833333333" calcext:value-type="float">
            <text:p>0,00144895833333333000</text:p>
          </table:table-cell>
          <table:table-cell table:formula="of:=[.D965]-[.D96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3" office:value-type="float" office:value="12532" calcext:value-type="float">
            <text:p>12532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45046296296296" calcext:value-type="float">
            <text:p>0,00145046296296296000</text:p>
          </table:table-cell>
          <table:table-cell table:formula="of:=[.D966]-[.D96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3" office:value-type="float" office:value="12545" calcext:value-type="float">
            <text:p>1254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45196759259259" calcext:value-type="float">
            <text:p>0,00145196759259259000</text:p>
          </table:table-cell>
          <table:table-cell table:formula="of:=[.D967]-[.D96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3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45347222222222" calcext:value-type="float">
            <text:p>0,00145347222222222000</text:p>
          </table:table-cell>
          <table:table-cell table:formula="of:=[.D968]-[.D96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3" office:value-type="float" office:value="12571" calcext:value-type="float">
            <text:p>12571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45497685185185" calcext:value-type="float">
            <text:p>0,00145497685185185000</text:p>
          </table:table-cell>
          <table:table-cell table:formula="of:=[.D969]-[.D96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3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45648148148148" calcext:value-type="float">
            <text:p>0,00145648148148148000</text:p>
          </table:table-cell>
          <table:table-cell table:formula="of:=[.D970]-[.D96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3" office:value-type="float" office:value="12597" calcext:value-type="float">
            <text:p>12597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45798611111111" calcext:value-type="float">
            <text:p>0,00145798611111111000</text:p>
          </table:table-cell>
          <table:table-cell table:formula="of:=[.D971]-[.D97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3" office:value-type="float" office:value="12610" calcext:value-type="float">
            <text:p>1261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45949074074074" calcext:value-type="float">
            <text:p>0,00145949074074074000</text:p>
          </table:table-cell>
          <table:table-cell table:formula="of:=[.D972]-[.D97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3" office:value-type="float" office:value="12623" calcext:value-type="float">
            <text:p>12623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46099537037037" calcext:value-type="float">
            <text:p>0,00146099537037037000</text:p>
          </table:table-cell>
          <table:table-cell table:formula="of:=[.D973]-[.D97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3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4625" calcext:value-type="float">
            <text:p>0,00146250000000000000</text:p>
          </table:table-cell>
          <table:table-cell table:formula="of:=[.D974]-[.D97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3" office:value-type="float" office:value="12649" calcext:value-type="float">
            <text:p>12649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46400462962963" calcext:value-type="float">
            <text:p>0,00146400462962963000</text:p>
          </table:table-cell>
          <table:table-cell table:formula="of:=[.D975]-[.D97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3" office:value-type="float" office:value="12662" calcext:value-type="float">
            <text:p>12662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46550925925926" calcext:value-type="float">
            <text:p>0,00146550925925926000</text:p>
          </table:table-cell>
          <table:table-cell table:formula="of:=[.D976]-[.D97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3" office:value-type="float" office:value="12675" calcext:value-type="float">
            <text:p>1267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46701388888889" calcext:value-type="float">
            <text:p>0,00146701388888889000</text:p>
          </table:table-cell>
          <table:table-cell table:formula="of:=[.D977]-[.D97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3" office:value-type="float" office:value="12688" calcext:value-type="float">
            <text:p>12688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46851851851852" calcext:value-type="float">
            <text:p>0,00146851851851852000</text:p>
          </table:table-cell>
          <table:table-cell table:formula="of:=[.D978]-[.D97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3" office:value-type="float" office:value="12701" calcext:value-type="float">
            <text:p>12701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47002314814815" calcext:value-type="float">
            <text:p>0,00147002314814815000</text:p>
          </table:table-cell>
          <table:table-cell table:formula="of:=[.D979]-[.D97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3" office:value-type="float" office:value="12714" calcext:value-type="float">
            <text:p>12714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47152777777778" calcext:value-type="float">
            <text:p>0,00147152777777778000</text:p>
          </table:table-cell>
          <table:table-cell table:formula="of:=[.D980]-[.D97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3" office:value-type="float" office:value="12727" calcext:value-type="float">
            <text:p>12727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47303240740741" calcext:value-type="float">
            <text:p>0,00147303240740741000</text:p>
          </table:table-cell>
          <table:table-cell table:formula="of:=[.D981]-[.D98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3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47453703703704" calcext:value-type="float">
            <text:p>0,00147453703703704000</text:p>
          </table:table-cell>
          <table:table-cell table:formula="of:=[.D982]-[.D98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3" office:value-type="float" office:value="12753" calcext:value-type="float">
            <text:p>12753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47604166666667" calcext:value-type="float">
            <text:p>0,00147604166666667000</text:p>
          </table:table-cell>
          <table:table-cell table:formula="of:=[.D983]-[.D98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3" office:value-type="float" office:value="12766" calcext:value-type="float">
            <text:p>12766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4775462962963" calcext:value-type="float">
            <text:p>0,00147754629629630000</text:p>
          </table:table-cell>
          <table:table-cell table:formula="of:=[.D984]-[.D98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3" office:value-type="float" office:value="12779" calcext:value-type="float">
            <text:p>12779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47905092592593" calcext:value-type="float">
            <text:p>0,00147905092592593000</text:p>
          </table:table-cell>
          <table:table-cell table:formula="of:=[.D985]-[.D98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3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48055555555556" calcext:value-type="float">
            <text:p>0,00148055555555556000</text:p>
          </table:table-cell>
          <table:table-cell table:formula="of:=[.D986]-[.D98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3" office:value-type="float" office:value="12805" calcext:value-type="float">
            <text:p>1280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48206018518519" calcext:value-type="float">
            <text:p>0,00148206018518519000</text:p>
          </table:table-cell>
          <table:table-cell table:formula="of:=[.D987]-[.D98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3" office:value-type="float" office:value="12818" calcext:value-type="float">
            <text:p>12818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48356481481481" calcext:value-type="float">
            <text:p>0,00148356481481481000</text:p>
          </table:table-cell>
          <table:table-cell table:formula="of:=[.D988]-[.D98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3" office:value-type="float" office:value="12831" calcext:value-type="float">
            <text:p>12831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48506944444444" calcext:value-type="float">
            <text:p>0,00148506944444444000</text:p>
          </table:table-cell>
          <table:table-cell table:formula="of:=[.D989]-[.D9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3" office:value-type="float" office:value="12844" calcext:value-type="float">
            <text:p>12844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48657407407407" calcext:value-type="float">
            <text:p>0,00148657407407407000</text:p>
          </table:table-cell>
          <table:table-cell table:formula="of:=[.D990]-[.D98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3" office:value-type="float" office:value="12857" calcext:value-type="float">
            <text:p>12857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4880787037037" calcext:value-type="float">
            <text:p>0,00148807870370370000</text:p>
          </table:table-cell>
          <table:table-cell table:formula="of:=[.D991]-[.D99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3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48958333333333" calcext:value-type="float">
            <text:p>0,00148958333333333000</text:p>
          </table:table-cell>
          <table:table-cell table:formula="of:=[.D992]-[.D99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3" office:value-type="float" office:value="12883" calcext:value-type="float">
            <text:p>12883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49108796296296" calcext:value-type="float">
            <text:p>0,00149108796296296000</text:p>
          </table:table-cell>
          <table:table-cell table:formula="of:=[.D993]-[.D99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3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49259259259259" calcext:value-type="float">
            <text:p>0,00149259259259259000</text:p>
          </table:table-cell>
          <table:table-cell table:formula="of:=[.D994]-[.D99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3" office:value-type="float" office:value="12909" calcext:value-type="float">
            <text:p>12909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49409722222222" calcext:value-type="float">
            <text:p>0,00149409722222222000</text:p>
          </table:table-cell>
          <table:table-cell table:formula="of:=[.D995]-[.D99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3" office:value-type="float" office:value="12922" calcext:value-type="float">
            <text:p>12922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49560185185185" calcext:value-type="float">
            <text:p>0,00149560185185185000</text:p>
          </table:table-cell>
          <table:table-cell table:formula="of:=[.D996]-[.D9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3" office:value-type="float" office:value="12935" calcext:value-type="float">
            <text:p>1293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49710648148148" calcext:value-type="float">
            <text:p>0,00149710648148148000</text:p>
          </table:table-cell>
          <table:table-cell table:formula="of:=[.D997]-[.D99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3" office:value-type="float" office:value="12948" calcext:value-type="float">
            <text:p>12948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49861111111111" calcext:value-type="float">
            <text:p>0,00149861111111111000</text:p>
          </table:table-cell>
          <table:table-cell table:formula="of:=[.D998]-[.D99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3" office:value-type="float" office:value="12961" calcext:value-type="float">
            <text:p>12961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50011574074074" calcext:value-type="float">
            <text:p>0,00150011574074074000</text:p>
          </table:table-cell>
          <table:table-cell table:formula="of:=[.D999]-[.D99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3" office:value-type="float" office:value="12974" calcext:value-type="float">
            <text:p>12974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50162037037037" calcext:value-type="float">
            <text:p>0,00150162037037037000</text:p>
          </table:table-cell>
          <table:table-cell table:formula="of:=[.D1000]-[.D99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3" office:value-type="float" office:value="12987" calcext:value-type="float">
            <text:p>12987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503125" calcext:value-type="float">
            <text:p>0,00150312500000000000</text:p>
          </table:table-cell>
          <table:table-cell table:formula="of:=[.D1001]-[.D100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3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50462962962963" calcext:value-type="float">
            <text:p>0,00150462962962963000</text:p>
          </table:table-cell>
          <table:table-cell table:formula="of:=[.D1002]-[.D100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3" office:value-type="float" office:value="13013" calcext:value-type="float">
            <text:p>13013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50613425925926" calcext:value-type="float">
            <text:p>0,00150613425925926000</text:p>
          </table:table-cell>
          <table:table-cell table:formula="of:=[.D1003]-[.D10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3" office:value-type="float" office:value="13026" calcext:value-type="float">
            <text:p>13026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50763888888889" calcext:value-type="float">
            <text:p>0,00150763888888889000</text:p>
          </table:table-cell>
          <table:table-cell table:formula="of:=[.D1004]-[.D100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3" office:value-type="float" office:value="13039" calcext:value-type="float">
            <text:p>13039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50914351851852" calcext:value-type="float">
            <text:p>0,00150914351851852000</text:p>
          </table:table-cell>
          <table:table-cell table:formula="of:=[.D1005]-[.D100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3" office:value-type="float" office:value="13052" calcext:value-type="float">
            <text:p>13052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51064814814815" calcext:value-type="float">
            <text:p>0,00151064814814815000</text:p>
          </table:table-cell>
          <table:table-cell table:formula="of:=[.D1006]-[.D100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3" office:value-type="float" office:value="13065" calcext:value-type="float">
            <text:p>1306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51215277777778" calcext:value-type="float">
            <text:p>0,00151215277777778000</text:p>
          </table:table-cell>
          <table:table-cell table:formula="of:=[.D1007]-[.D10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3" office:value-type="float" office:value="13078" calcext:value-type="float">
            <text:p>13078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51365740740741" calcext:value-type="float">
            <text:p>0,00151365740740741000</text:p>
          </table:table-cell>
          <table:table-cell table:formula="of:=[.D1008]-[.D100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3" office:value-type="float" office:value="13091" calcext:value-type="float">
            <text:p>13091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51516203703704" calcext:value-type="float">
            <text:p>0,00151516203703704000</text:p>
          </table:table-cell>
          <table:table-cell table:formula="of:=[.D1009]-[.D100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3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51666666666667" calcext:value-type="float">
            <text:p>0,00151666666666667000</text:p>
          </table:table-cell>
          <table:table-cell table:formula="of:=[.D1010]-[.D100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3" office:value-type="float" office:value="13117" calcext:value-type="float">
            <text:p>13117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5181712962963" calcext:value-type="float">
            <text:p>0,00151817129629630000</text:p>
          </table:table-cell>
          <table:table-cell table:formula="of:=[.D1011]-[.D10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3" office:value-type="float" office:value="13130" calcext:value-type="float">
            <text:p>1313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51967592592593" calcext:value-type="float">
            <text:p>0,00151967592592593000</text:p>
          </table:table-cell>
          <table:table-cell table:formula="of:=[.D1012]-[.D101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3" office:value-type="float" office:value="13143" calcext:value-type="float">
            <text:p>13143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52118055555556" calcext:value-type="float">
            <text:p>0,00152118055555556000</text:p>
          </table:table-cell>
          <table:table-cell table:formula="of:=[.D1013]-[.D101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3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52268518518519" calcext:value-type="float">
            <text:p>0,00152268518518518000</text:p>
          </table:table-cell>
          <table:table-cell table:formula="of:=[.D1014]-[.D101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3" office:value-type="float" office:value="13169" calcext:value-type="float">
            <text:p>13169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52418981481481" calcext:value-type="float">
            <text:p>0,00152418981481481000</text:p>
          </table:table-cell>
          <table:table-cell table:formula="of:=[.D1015]-[.D101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3" office:value-type="float" office:value="13182" calcext:value-type="float">
            <text:p>13182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52569444444444" calcext:value-type="float">
            <text:p>0,00152569444444444000</text:p>
          </table:table-cell>
          <table:table-cell table:formula="of:=[.D1016]-[.D101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3" office:value-type="float" office:value="13195" calcext:value-type="float">
            <text:p>1319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52719907407407" calcext:value-type="float">
            <text:p>0,00152719907407407000</text:p>
          </table:table-cell>
          <table:table-cell table:formula="of:=[.D1017]-[.D101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3" office:value-type="float" office:value="13208" calcext:value-type="float">
            <text:p>13208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5287037037037" calcext:value-type="float">
            <text:p>0,00152870370370370000</text:p>
          </table:table-cell>
          <table:table-cell table:formula="of:=[.D1018]-[.D10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3" office:value-type="float" office:value="13221" calcext:value-type="float">
            <text:p>13221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53020833333333" calcext:value-type="float">
            <text:p>0,00153020833333333000</text:p>
          </table:table-cell>
          <table:table-cell table:formula="of:=[.D1019]-[.D101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3" office:value-type="float" office:value="13234" calcext:value-type="float">
            <text:p>13234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53171296296296" calcext:value-type="float">
            <text:p>0,00153171296296296000</text:p>
          </table:table-cell>
          <table:table-cell table:formula="of:=[.D1020]-[.D101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3" office:value-type="float" office:value="13247" calcext:value-type="float">
            <text:p>13247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53321759259259" calcext:value-type="float">
            <text:p>0,00153321759259259000</text:p>
          </table:table-cell>
          <table:table-cell table:formula="of:=[.D1021]-[.D102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3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53472222222222" calcext:value-type="float">
            <text:p>0,00153472222222222000</text:p>
          </table:table-cell>
          <table:table-cell table:formula="of:=[.D1022]-[.D10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3" office:value-type="float" office:value="13273" calcext:value-type="float">
            <text:p>13273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53622685185185" calcext:value-type="float">
            <text:p>0,00153622685185185000</text:p>
          </table:table-cell>
          <table:table-cell table:formula="of:=[.D1023]-[.D102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3" office:value-type="float" office:value="13286" calcext:value-type="float">
            <text:p>13286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53773148148148" calcext:value-type="float">
            <text:p>0,00153773148148148000</text:p>
          </table:table-cell>
          <table:table-cell table:formula="of:=[.D1024]-[.D102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3" office:value-type="float" office:value="13299" calcext:value-type="float">
            <text:p>13299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53923611111111" calcext:value-type="float">
            <text:p>0,00153923611111111000</text:p>
          </table:table-cell>
          <table:table-cell table:formula="of:=[.D1025]-[.D102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3" office:value-type="float" office:value="13312" calcext:value-type="float">
            <text:p>13312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54074074074074" calcext:value-type="float">
            <text:p>0,00154074074074074000</text:p>
          </table:table-cell>
          <table:table-cell table:formula="of:=[.D1026]-[.D102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3" office:value-type="float" office:value="13325" calcext:value-type="float">
            <text:p>1332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54224537037037" calcext:value-type="float">
            <text:p>0,00154224537037037000</text:p>
          </table:table-cell>
          <table:table-cell table:formula="of:=[.D1027]-[.D102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3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54375" calcext:value-type="float">
            <text:p>0,00154375000000000000</text:p>
          </table:table-cell>
          <table:table-cell table:formula="of:=[.D1028]-[.D102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3" office:value-type="float" office:value="13351" calcext:value-type="float">
            <text:p>13351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54525462962963" calcext:value-type="float">
            <text:p>0,00154525462962963000</text:p>
          </table:table-cell>
          <table:table-cell table:formula="of:=[.D1029]-[.D10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3" office:value-type="float" office:value="13364" calcext:value-type="float">
            <text:p>13364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54675925925926" calcext:value-type="float">
            <text:p>0,00154675925925926000</text:p>
          </table:table-cell>
          <table:table-cell table:formula="of:=[.D1030]-[.D102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3" office:value-type="float" office:value="13377" calcext:value-type="float">
            <text:p>13377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54826388888889" calcext:value-type="float">
            <text:p>0,00154826388888889000</text:p>
          </table:table-cell>
          <table:table-cell table:formula="of:=[.D1031]-[.D103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3" office:value-type="float" office:value="13390" calcext:value-type="float">
            <text:p>1339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54976851851852" calcext:value-type="float">
            <text:p>0,00154976851851852000</text:p>
          </table:table-cell>
          <table:table-cell table:formula="of:=[.D1032]-[.D103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3" office:value-type="float" office:value="13403" calcext:value-type="float">
            <text:p>13403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55127314814815" calcext:value-type="float">
            <text:p>0,00155127314814815000</text:p>
          </table:table-cell>
          <table:table-cell table:formula="of:=[.D1033]-[.D10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3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55277777777778" calcext:value-type="float">
            <text:p>0,00155277777777778000</text:p>
          </table:table-cell>
          <table:table-cell table:formula="of:=[.D1034]-[.D103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3" office:value-type="float" office:value="13429" calcext:value-type="float">
            <text:p>13429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55428240740741" calcext:value-type="float">
            <text:p>0,00155428240740741000</text:p>
          </table:table-cell>
          <table:table-cell table:formula="of:=[.D1035]-[.D103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3" office:value-type="float" office:value="13442" calcext:value-type="float">
            <text:p>13442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55578703703704" calcext:value-type="float">
            <text:p>0,00155578703703704000</text:p>
          </table:table-cell>
          <table:table-cell table:formula="of:=[.D1036]-[.D103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3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55729166666667" calcext:value-type="float">
            <text:p>0,00155729166666667000</text:p>
          </table:table-cell>
          <table:table-cell table:formula="of:=[.D1037]-[.D10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3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5587962962963" calcext:value-type="float">
            <text:p>0,00155879629629630000</text:p>
          </table:table-cell>
          <table:table-cell table:formula="of:=[.D1038]-[.D103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3" office:value-type="float" office:value="13481" calcext:value-type="float">
            <text:p>13481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56030092592593" calcext:value-type="float">
            <text:p>0,00156030092592593000</text:p>
          </table:table-cell>
          <table:table-cell table:formula="of:=[.D1039]-[.D103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3" office:value-type="float" office:value="13494" calcext:value-type="float">
            <text:p>13494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56180555555556" calcext:value-type="float">
            <text:p>0,00156180555555556000</text:p>
          </table:table-cell>
          <table:table-cell table:formula="of:=[.D1040]-[.D10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3" office:value-type="float" office:value="13507" calcext:value-type="float">
            <text:p>13507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56331018518519" calcext:value-type="float">
            <text:p>0,00156331018518519000</text:p>
          </table:table-cell>
          <table:table-cell table:formula="of:=[.D1041]-[.D104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3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56481481481481" calcext:value-type="float">
            <text:p>0,00156481481481482000</text:p>
          </table:table-cell>
          <table:table-cell table:formula="of:=[.D1042]-[.D104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3" office:value-type="float" office:value="13533" calcext:value-type="float">
            <text:p>13533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56631944444444" calcext:value-type="float">
            <text:p>0,00156631944444444000</text:p>
          </table:table-cell>
          <table:table-cell table:formula="of:=[.D1043]-[.D104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3" office:value-type="float" office:value="13546" calcext:value-type="float">
            <text:p>13546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56782407407407" calcext:value-type="float">
            <text:p>0,00156782407407407000</text:p>
          </table:table-cell>
          <table:table-cell table:formula="of:=[.D1044]-[.D10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3" office:value-type="float" office:value="13559" calcext:value-type="float">
            <text:p>13559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5693287037037" calcext:value-type="float">
            <text:p>0,00156932870370370000</text:p>
          </table:table-cell>
          <table:table-cell table:formula="of:=[.D1045]-[.D104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3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57083333333333" calcext:value-type="float">
            <text:p>0,00157083333333333000</text:p>
          </table:table-cell>
          <table:table-cell table:formula="of:=[.D1046]-[.D104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3" office:value-type="float" office:value="13585" calcext:value-type="float">
            <text:p>1358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57233796296296" calcext:value-type="float">
            <text:p>0,00157233796296296000</text:p>
          </table:table-cell>
          <table:table-cell table:formula="of:=[.D1047]-[.D104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3" office:value-type="float" office:value="13598" calcext:value-type="float">
            <text:p>13598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57384259259259" calcext:value-type="float">
            <text:p>0,00157384259259259000</text:p>
          </table:table-cell>
          <table:table-cell table:formula="of:=[.D1048]-[.D10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3" office:value-type="float" office:value="13611" calcext:value-type="float">
            <text:p>13611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57534722222222" calcext:value-type="float">
            <text:p>0,00157534722222222000</text:p>
          </table:table-cell>
          <table:table-cell table:formula="of:=[.D1049]-[.D104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3" office:value-type="float" office:value="13624" calcext:value-type="float">
            <text:p>13624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57685185185185" calcext:value-type="float">
            <text:p>0,00157685185185185000</text:p>
          </table:table-cell>
          <table:table-cell table:formula="of:=[.D1050]-[.D104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3" office:value-type="float" office:value="13637" calcext:value-type="float">
            <text:p>13637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57835648148148" calcext:value-type="float">
            <text:p>0,00157835648148148000</text:p>
          </table:table-cell>
          <table:table-cell table:formula="of:=[.D1051]-[.D10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3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57986111111111" calcext:value-type="float">
            <text:p>0,00157986111111111000</text:p>
          </table:table-cell>
          <table:table-cell table:formula="of:=[.D1052]-[.D105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3" office:value-type="float" office:value="13663" calcext:value-type="float">
            <text:p>13663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58136574074074" calcext:value-type="float">
            <text:p>0,00158136574074074000</text:p>
          </table:table-cell>
          <table:table-cell table:formula="of:=[.D1053]-[.D105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3" office:value-type="float" office:value="13676" calcext:value-type="float">
            <text:p>13676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58287037037037" calcext:value-type="float">
            <text:p>0,00158287037037037000</text:p>
          </table:table-cell>
          <table:table-cell table:formula="of:=[.D1054]-[.D105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3" office:value-type="float" office:value="13689" calcext:value-type="float">
            <text:p>13689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584375" calcext:value-type="float">
            <text:p>0,00158437500000000000</text:p>
          </table:table-cell>
          <table:table-cell table:formula="of:=[.D1055]-[.D10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3" office:value-type="float" office:value="13702" calcext:value-type="float">
            <text:p>13702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58587962962963" calcext:value-type="float">
            <text:p>0,00158587962962963000</text:p>
          </table:table-cell>
          <table:table-cell table:formula="of:=[.D1056]-[.D105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3" office:value-type="float" office:value="13715" calcext:value-type="float">
            <text:p>1371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58738425925926" calcext:value-type="float">
            <text:p>0,00158738425925926000</text:p>
          </table:table-cell>
          <table:table-cell table:formula="of:=[.D1057]-[.D105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3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58888888888889" calcext:value-type="float">
            <text:p>0,00158888888888889000</text:p>
          </table:table-cell>
          <table:table-cell table:formula="of:=[.D1058]-[.D105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3" office:value-type="float" office:value="13741" calcext:value-type="float">
            <text:p>13741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59039351851852" calcext:value-type="float">
            <text:p>0,00159039351851852000</text:p>
          </table:table-cell>
          <table:table-cell table:formula="of:=[.D1059]-[.D105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3" office:value-type="float" office:value="13754" calcext:value-type="float">
            <text:p>13754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59189814814815" calcext:value-type="float">
            <text:p>0,00159189814814815000</text:p>
          </table:table-cell>
          <table:table-cell table:formula="of:=[.D1060]-[.D105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3" office:value-type="float" office:value="13767" calcext:value-type="float">
            <text:p>13767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59340277777778" calcext:value-type="float">
            <text:p>0,00159340277777778000</text:p>
          </table:table-cell>
          <table:table-cell table:formula="of:=[.D1061]-[.D106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3" office:value-type="float" office:value="13780" calcext:value-type="float">
            <text:p>1378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59490740740741" calcext:value-type="float">
            <text:p>0,00159490740740741000</text:p>
          </table:table-cell>
          <table:table-cell table:formula="of:=[.D1062]-[.D10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3" office:value-type="float" office:value="13793" calcext:value-type="float">
            <text:p>13793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59641203703704" calcext:value-type="float">
            <text:p>0,00159641203703704000</text:p>
          </table:table-cell>
          <table:table-cell table:formula="of:=[.D1063]-[.D106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3" office:value-type="float" office:value="13806" calcext:value-type="float">
            <text:p>13806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59791666666667" calcext:value-type="float">
            <text:p>0,00159791666666667000</text:p>
          </table:table-cell>
          <table:table-cell table:formula="of:=[.D1064]-[.D106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3" office:value-type="float" office:value="13819" calcext:value-type="float">
            <text:p>13819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5994212962963" calcext:value-type="float">
            <text:p>0,00159942129629630000</text:p>
          </table:table-cell>
          <table:table-cell table:formula="of:=[.D1065]-[.D106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3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60092592592593" calcext:value-type="float">
            <text:p>0,00160092592592593000</text:p>
          </table:table-cell>
          <table:table-cell table:formula="of:=[.D1066]-[.D10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3" office:value-type="float" office:value="13845" calcext:value-type="float">
            <text:p>1384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60243055555556" calcext:value-type="float">
            <text:p>0,00160243055555556000</text:p>
          </table:table-cell>
          <table:table-cell table:formula="of:=[.D1067]-[.D106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3" office:value-type="float" office:value="13858" calcext:value-type="float">
            <text:p>13858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60393518518519" calcext:value-type="float">
            <text:p>0,00160393518518519000</text:p>
          </table:table-cell>
          <table:table-cell table:formula="of:=[.D1068]-[.D106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3" office:value-type="float" office:value="13871" calcext:value-type="float">
            <text:p>13871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60543981481481" calcext:value-type="float">
            <text:p>0,00160543981481481000</text:p>
          </table:table-cell>
          <table:table-cell table:formula="of:=[.D1069]-[.D106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3" office:value-type="float" office:value="13884" calcext:value-type="float">
            <text:p>13884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60694444444444" calcext:value-type="float">
            <text:p>0,00160694444444444000</text:p>
          </table:table-cell>
          <table:table-cell table:formula="of:=[.D1070]-[.D106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3" office:value-type="float" office:value="13897" calcext:value-type="float">
            <text:p>13897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60844907407407" calcext:value-type="float">
            <text:p>0,00160844907407407000</text:p>
          </table:table-cell>
          <table:table-cell table:formula="of:=[.D1071]-[.D107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3" office:value-type="float" office:value="13910" calcext:value-type="float">
            <text:p>1391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6099537037037" calcext:value-type="float">
            <text:p>0,00160995370370370000</text:p>
          </table:table-cell>
          <table:table-cell table:formula="of:=[.D1072]-[.D107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3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61145833333333" calcext:value-type="float">
            <text:p>0,00161145833333333000</text:p>
          </table:table-cell>
          <table:table-cell table:formula="of:=[.D1073]-[.D107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3" office:value-type="float" office:value="13936" calcext:value-type="float">
            <text:p>13936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61296296296296" calcext:value-type="float">
            <text:p>0,00161296296296296000</text:p>
          </table:table-cell>
          <table:table-cell table:formula="of:=[.D1074]-[.D107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3" office:value-type="float" office:value="13949" calcext:value-type="float">
            <text:p>13949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61446759259259" calcext:value-type="float">
            <text:p>0,00161446759259259000</text:p>
          </table:table-cell>
          <table:table-cell table:formula="of:=[.D1075]-[.D107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3" office:value-type="float" office:value="13962" calcext:value-type="float">
            <text:p>13962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61597222222222" calcext:value-type="float">
            <text:p>0,00161597222222222000</text:p>
          </table:table-cell>
          <table:table-cell table:formula="of:=[.D1076]-[.D107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3" office:value-type="float" office:value="13975" calcext:value-type="float">
            <text:p>1397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61747685185185" calcext:value-type="float">
            <text:p>0,00161747685185185000</text:p>
          </table:table-cell>
          <table:table-cell table:formula="of:=[.D1077]-[.D10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3" office:value-type="float" office:value="13988" calcext:value-type="float">
            <text:p>13988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61898148148148" calcext:value-type="float">
            <text:p>0,00161898148148148000</text:p>
          </table:table-cell>
          <table:table-cell table:formula="of:=[.D1078]-[.D107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3" office:value-type="float" office:value="14001" calcext:value-type="float">
            <text:p>14001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62048611111111" calcext:value-type="float">
            <text:p>0,00162048611111111000</text:p>
          </table:table-cell>
          <table:table-cell table:formula="of:=[.D1079]-[.D107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3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62199074074074" calcext:value-type="float">
            <text:p>0,00162199074074074000</text:p>
          </table:table-cell>
          <table:table-cell table:formula="of:=[.D1080]-[.D107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3" office:value-type="float" office:value="14027" calcext:value-type="float">
            <text:p>14027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62349537037037" calcext:value-type="float">
            <text:p>0,00162349537037037000</text:p>
          </table:table-cell>
          <table:table-cell table:formula="of:=[.D1081]-[.D108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3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625" calcext:value-type="float">
            <text:p>0,00162500000000000000</text:p>
          </table:table-cell>
          <table:table-cell table:formula="of:=[.D1082]-[.D108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3" office:value-type="float" office:value="14053" calcext:value-type="float">
            <text:p>14053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62650462962963" calcext:value-type="float">
            <text:p>0,00162650462962963000</text:p>
          </table:table-cell>
          <table:table-cell table:formula="of:=[.D1083]-[.D108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3" office:value-type="float" office:value="14066" calcext:value-type="float">
            <text:p>14066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62800925925926" calcext:value-type="float">
            <text:p>0,00162800925925926000</text:p>
          </table:table-cell>
          <table:table-cell table:formula="of:=[.D1084]-[.D108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3" office:value-type="float" office:value="14079" calcext:value-type="float">
            <text:p>14079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62951388888889" calcext:value-type="float">
            <text:p>0,00162951388888889000</text:p>
          </table:table-cell>
          <table:table-cell table:formula="of:=[.D1085]-[.D108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3" office:value-type="float" office:value="14092" calcext:value-type="float">
            <text:p>14092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63101851851852" calcext:value-type="float">
            <text:p>0,00163101851851852000</text:p>
          </table:table-cell>
          <table:table-cell table:formula="of:=[.D1086]-[.D108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3" office:value-type="float" office:value="14105" calcext:value-type="float">
            <text:p>1410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63252314814815" calcext:value-type="float">
            <text:p>0,00163252314814815000</text:p>
          </table:table-cell>
          <table:table-cell table:formula="of:=[.D1087]-[.D108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3" office:value-type="float" office:value="14118" calcext:value-type="float">
            <text:p>14118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63402777777778" calcext:value-type="float">
            <text:p>0,00163402777777778000</text:p>
          </table:table-cell>
          <table:table-cell table:formula="of:=[.D1088]-[.D10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3" office:value-type="float" office:value="14131" calcext:value-type="float">
            <text:p>14131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63553240740741" calcext:value-type="float">
            <text:p>0,00163553240740741000</text:p>
          </table:table-cell>
          <table:table-cell table:formula="of:=[.D1089]-[.D108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3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63703703703704" calcext:value-type="float">
            <text:p>0,00163703703703704000</text:p>
          </table:table-cell>
          <table:table-cell table:formula="of:=[.D1090]-[.D108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3" office:value-type="float" office:value="14157" calcext:value-type="float">
            <text:p>14157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63854166666667" calcext:value-type="float">
            <text:p>0,00163854166666667000</text:p>
          </table:table-cell>
          <table:table-cell table:formula="of:=[.D1091]-[.D109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3" office:value-type="float" office:value="14170" calcext:value-type="float">
            <text:p>1417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6400462962963" calcext:value-type="float">
            <text:p>0,00164004629629630000</text:p>
          </table:table-cell>
          <table:table-cell table:formula="of:=[.D1092]-[.D109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3" office:value-type="float" office:value="14183" calcext:value-type="float">
            <text:p>14183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64155092592593" calcext:value-type="float">
            <text:p>0,00164155092592593000</text:p>
          </table:table-cell>
          <table:table-cell table:formula="of:=[.D1093]-[.D109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3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64305555555556" calcext:value-type="float">
            <text:p>0,00164305555555556000</text:p>
          </table:table-cell>
          <table:table-cell table:formula="of:=[.D1094]-[.D109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3" office:value-type="float" office:value="14209" calcext:value-type="float">
            <text:p>14209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64456018518519" calcext:value-type="float">
            <text:p>0,00164456018518518000</text:p>
          </table:table-cell>
          <table:table-cell table:formula="of:=[.D1095]-[.D109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3" office:value-type="float" office:value="14222" calcext:value-type="float">
            <text:p>14222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64606481481481" calcext:value-type="float">
            <text:p>0,00164606481481481000</text:p>
          </table:table-cell>
          <table:table-cell table:formula="of:=[.D1096]-[.D10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3" office:value-type="float" office:value="14235" calcext:value-type="float">
            <text:p>1423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64756944444444" calcext:value-type="float">
            <text:p>0,00164756944444444000</text:p>
          </table:table-cell>
          <table:table-cell table:formula="of:=[.D1097]-[.D109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3" office:value-type="float" office:value="14248" calcext:value-type="float">
            <text:p>14248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64907407407407" calcext:value-type="float">
            <text:p>0,00164907407407407000</text:p>
          </table:table-cell>
          <table:table-cell table:formula="of:=[.D1098]-[.D109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3" office:value-type="float" office:value="14261" calcext:value-type="float">
            <text:p>14261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6505787037037" calcext:value-type="float">
            <text:p>0,00165057870370370000</text:p>
          </table:table-cell>
          <table:table-cell table:formula="of:=[.D1099]-[.D10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3" office:value-type="float" office:value="14274" calcext:value-type="float">
            <text:p>14274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65208333333333" calcext:value-type="float">
            <text:p>0,00165208333333333000</text:p>
          </table:table-cell>
          <table:table-cell table:formula="of:=[.D1100]-[.D109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3" office:value-type="float" office:value="14287" calcext:value-type="float">
            <text:p>14287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65358796296296" calcext:value-type="float">
            <text:p>0,00165358796296296000</text:p>
          </table:table-cell>
          <table:table-cell table:formula="of:=[.D1101]-[.D110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3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65509259259259" calcext:value-type="float">
            <text:p>0,00165509259259259000</text:p>
          </table:table-cell>
          <table:table-cell table:formula="of:=[.D1102]-[.D110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3" office:value-type="float" office:value="14313" calcext:value-type="float">
            <text:p>14313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65659722222222" calcext:value-type="float">
            <text:p>0,00165659722222222000</text:p>
          </table:table-cell>
          <table:table-cell table:formula="of:=[.D1103]-[.D11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3" office:value-type="float" office:value="14326" calcext:value-type="float">
            <text:p>14326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65810185185185" calcext:value-type="float">
            <text:p>0,00165810185185185000</text:p>
          </table:table-cell>
          <table:table-cell table:formula="of:=[.D1104]-[.D110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3" office:value-type="float" office:value="14339" calcext:value-type="float">
            <text:p>14339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65960648148148" calcext:value-type="float">
            <text:p>0,00165960648148148000</text:p>
          </table:table-cell>
          <table:table-cell table:formula="of:=[.D1105]-[.D110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3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66111111111111" calcext:value-type="float">
            <text:p>0,00166111111111111000</text:p>
          </table:table-cell>
          <table:table-cell table:formula="of:=[.D1106]-[.D110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3" office:value-type="float" office:value="14365" calcext:value-type="float">
            <text:p>1436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66261574074074" calcext:value-type="float">
            <text:p>0,00166261574074074000</text:p>
          </table:table-cell>
          <table:table-cell table:formula="of:=[.D1107]-[.D11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3" office:value-type="float" office:value="14378" calcext:value-type="float">
            <text:p>14378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66412037037037" calcext:value-type="float">
            <text:p>0,00166412037037037000</text:p>
          </table:table-cell>
          <table:table-cell table:formula="of:=[.D1108]-[.D110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3" office:value-type="float" office:value="14391" calcext:value-type="float">
            <text:p>14391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665625" calcext:value-type="float">
            <text:p>0,00166562500000000000</text:p>
          </table:table-cell>
          <table:table-cell table:formula="of:=[.D1109]-[.D110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3" office:value-type="float" office:value="14404" calcext:value-type="float">
            <text:p>14404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66712962962963" calcext:value-type="float">
            <text:p>0,00166712962962963000</text:p>
          </table:table-cell>
          <table:table-cell table:formula="of:=[.D1110]-[.D11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3" office:value-type="float" office:value="14417" calcext:value-type="float">
            <text:p>14417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66863425925926" calcext:value-type="float">
            <text:p>0,00166863425925926000</text:p>
          </table:table-cell>
          <table:table-cell table:formula="of:=[.D1111]-[.D111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3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67013888888889" calcext:value-type="float">
            <text:p>0,00167013888888889000</text:p>
          </table:table-cell>
          <table:table-cell table:formula="of:=[.D1112]-[.D111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3" office:value-type="float" office:value="14443" calcext:value-type="float">
            <text:p>14443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67164351851852" calcext:value-type="float">
            <text:p>0,00167164351851852000</text:p>
          </table:table-cell>
          <table:table-cell table:formula="of:=[.D1113]-[.D111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3" office:value-type="float" office:value="14456" calcext:value-type="float">
            <text:p>14456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67314814814815" calcext:value-type="float">
            <text:p>0,00167314814814815000</text:p>
          </table:table-cell>
          <table:table-cell table:formula="of:=[.D1114]-[.D11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3" office:value-type="float" office:value="14469" calcext:value-type="float">
            <text:p>14469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67465277777778" calcext:value-type="float">
            <text:p>0,00167465277777778000</text:p>
          </table:table-cell>
          <table:table-cell table:formula="of:=[.D1115]-[.D111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3" office:value-type="float" office:value="14482" calcext:value-type="float">
            <text:p>14482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67615740740741" calcext:value-type="float">
            <text:p>0,00167615740740741000</text:p>
          </table:table-cell>
          <table:table-cell table:formula="of:=[.D1116]-[.D111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3" office:value-type="float" office:value="14495" calcext:value-type="float">
            <text:p>1449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67766203703704" calcext:value-type="float">
            <text:p>0,00167766203703704000</text:p>
          </table:table-cell>
          <table:table-cell table:formula="of:=[.D1117]-[.D111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3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67916666666667" calcext:value-type="float">
            <text:p>0,00167916666666667000</text:p>
          </table:table-cell>
          <table:table-cell table:formula="of:=[.D1118]-[.D11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3" office:value-type="float" office:value="14521" calcext:value-type="float">
            <text:p>14521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6806712962963" calcext:value-type="float">
            <text:p>0,00168067129629630000</text:p>
          </table:table-cell>
          <table:table-cell table:formula="of:=[.D1119]-[.D111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3" office:value-type="float" office:value="14534" calcext:value-type="float">
            <text:p>14534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68217592592593" calcext:value-type="float">
            <text:p>0,00168217592592593000</text:p>
          </table:table-cell>
          <table:table-cell table:formula="of:=[.D1120]-[.D111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3" office:value-type="float" office:value="14547" calcext:value-type="float">
            <text:p>14547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68368055555556" calcext:value-type="float">
            <text:p>0,00168368055555556000</text:p>
          </table:table-cell>
          <table:table-cell table:formula="of:=[.D1121]-[.D112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3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68518518518519" calcext:value-type="float">
            <text:p>0,00168518518518519000</text:p>
          </table:table-cell>
          <table:table-cell table:formula="of:=[.D1122]-[.D112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3" office:value-type="float" office:value="14573" calcext:value-type="float">
            <text:p>14573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68668981481482" calcext:value-type="float">
            <text:p>0,00168668981481482000</text:p>
          </table:table-cell>
          <table:table-cell table:formula="of:=[.D1123]-[.D112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3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68819444444444" calcext:value-type="float">
            <text:p>0,00168819444444444000</text:p>
          </table:table-cell>
          <table:table-cell table:formula="of:=[.D1124]-[.D112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3" office:value-type="float" office:value="14599" calcext:value-type="float">
            <text:p>14599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68969907407407" calcext:value-type="float">
            <text:p>0,00168969907407407000</text:p>
          </table:table-cell>
          <table:table-cell table:formula="of:=[.D1125]-[.D11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3" office:value-type="float" office:value="14612" calcext:value-type="float">
            <text:p>14612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6912037037037" calcext:value-type="float">
            <text:p>0,00169120370370370000</text:p>
          </table:table-cell>
          <table:table-cell table:formula="of:=[.D1126]-[.D112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3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69270833333333" calcext:value-type="float">
            <text:p>0,00169270833333333000</text:p>
          </table:table-cell>
          <table:table-cell table:formula="of:=[.D1127]-[.D112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3" office:value-type="float" office:value="14638" calcext:value-type="float">
            <text:p>14638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69421296296296" calcext:value-type="float">
            <text:p>0,00169421296296296000</text:p>
          </table:table-cell>
          <table:table-cell table:formula="of:=[.D1128]-[.D112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3" office:value-type="float" office:value="14651" calcext:value-type="float">
            <text:p>14651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69571759259259" calcext:value-type="float">
            <text:p>0,00169571759259259000</text:p>
          </table:table-cell>
          <table:table-cell table:formula="of:=[.D1129]-[.D11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3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69722222222222" calcext:value-type="float">
            <text:p>0,00169722222222222000</text:p>
          </table:table-cell>
          <table:table-cell table:formula="of:=[.D1130]-[.D112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3" office:value-type="float" office:value="14677" calcext:value-type="float">
            <text:p>14677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69872685185185" calcext:value-type="float">
            <text:p>0,00169872685185185000</text:p>
          </table:table-cell>
          <table:table-cell table:formula="of:=[.D1131]-[.D113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3" office:value-type="float" office:value="14690" calcext:value-type="float">
            <text:p>1469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70023148148148" calcext:value-type="float">
            <text:p>0,00170023148148148000</text:p>
          </table:table-cell>
          <table:table-cell table:formula="of:=[.D1132]-[.D113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3" office:value-type="float" office:value="14703" calcext:value-type="float">
            <text:p>14703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70173611111111" calcext:value-type="float">
            <text:p>0,00170173611111111000</text:p>
          </table:table-cell>
          <table:table-cell table:formula="of:=[.D1133]-[.D113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3" office:value-type="float" office:value="14716" calcext:value-type="float">
            <text:p>14716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70324074074074" calcext:value-type="float">
            <text:p>0,00170324074074074000</text:p>
          </table:table-cell>
          <table:table-cell table:formula="of:=[.D1134]-[.D113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3" office:value-type="float" office:value="14729" calcext:value-type="float">
            <text:p>14729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70474537037037" calcext:value-type="float">
            <text:p>0,00170474537037037000</text:p>
          </table:table-cell>
          <table:table-cell table:formula="of:=[.D1135]-[.D113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3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70625" calcext:value-type="float">
            <text:p>0,00170625000000000000</text:p>
          </table:table-cell>
          <table:table-cell table:formula="of:=[.D1136]-[.D11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3" office:value-type="float" office:value="14755" calcext:value-type="float">
            <text:p>1475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70775462962963" calcext:value-type="float">
            <text:p>0,00170775462962963000</text:p>
          </table:table-cell>
          <table:table-cell table:formula="of:=[.D1137]-[.D113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3" office:value-type="float" office:value="14768" calcext:value-type="float">
            <text:p>14768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70925925925926" calcext:value-type="float">
            <text:p>0,00170925925925926000</text:p>
          </table:table-cell>
          <table:table-cell table:formula="of:=[.D1138]-[.D113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3" office:value-type="float" office:value="14781" calcext:value-type="float">
            <text:p>14781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71076388888889" calcext:value-type="float">
            <text:p>0,00171076388888889000</text:p>
          </table:table-cell>
          <table:table-cell table:formula="of:=[.D1139]-[.D113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3" office:value-type="float" office:value="14794" calcext:value-type="float">
            <text:p>14794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71226851851852" calcext:value-type="float">
            <text:p>0,00171226851851852000</text:p>
          </table:table-cell>
          <table:table-cell table:formula="of:=[.D1140]-[.D11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3" office:value-type="float" office:value="14807" calcext:value-type="float">
            <text:p>14807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71377314814815" calcext:value-type="float">
            <text:p>0,00171377314814815000</text:p>
          </table:table-cell>
          <table:table-cell table:formula="of:=[.D1141]-[.D114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3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71527777777778" calcext:value-type="float">
            <text:p>0,00171527777777778000</text:p>
          </table:table-cell>
          <table:table-cell table:formula="of:=[.D1142]-[.D114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3" office:value-type="float" office:value="14833" calcext:value-type="float">
            <text:p>14833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71678240740741" calcext:value-type="float">
            <text:p>0,00171678240740741000</text:p>
          </table:table-cell>
          <table:table-cell table:formula="of:=[.D1143]-[.D114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3" office:value-type="float" office:value="14846" calcext:value-type="float">
            <text:p>14846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71828703703704" calcext:value-type="float">
            <text:p>0,00171828703703704000</text:p>
          </table:table-cell>
          <table:table-cell table:formula="of:=[.D1144]-[.D11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3" office:value-type="float" office:value="14859" calcext:value-type="float">
            <text:p>14859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71979166666667" calcext:value-type="float">
            <text:p>0,00171979166666667000</text:p>
          </table:table-cell>
          <table:table-cell table:formula="of:=[.D1145]-[.D114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3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7212962962963" calcext:value-type="float">
            <text:p>0,00172129629629630000</text:p>
          </table:table-cell>
          <table:table-cell table:formula="of:=[.D1146]-[.D114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3" office:value-type="float" office:value="14885" calcext:value-type="float">
            <text:p>14885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72280092592593" calcext:value-type="float">
            <text:p>0,00172280092592593000</text:p>
          </table:table-cell>
          <table:table-cell table:formula="of:=[.D1147]-[.D11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3" office:value-type="float" office:value="14898" calcext:value-type="float">
            <text:p>14898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72430555555556" calcext:value-type="float">
            <text:p>0,00172430555555556000</text:p>
          </table:table-cell>
          <table:table-cell table:formula="of:=[.D1148]-[.D114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3" office:value-type="float" office:value="14911" calcext:value-type="float">
            <text:p>14911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72581018518519" calcext:value-type="float">
            <text:p>0,00172581018518519000</text:p>
          </table:table-cell>
          <table:table-cell table:formula="of:=[.D1149]-[.D114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3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72731481481481" calcext:value-type="float">
            <text:p>0,00172731481481481000</text:p>
          </table:table-cell>
          <table:table-cell table:formula="of:=[.D1150]-[.D114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3" office:value-type="float" office:value="14937" calcext:value-type="float">
            <text:p>14937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72881944444444" calcext:value-type="float">
            <text:p>0,00172881944444444000</text:p>
          </table:table-cell>
          <table:table-cell table:formula="of:=[.D1151]-[.D11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3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73032407407407" calcext:value-type="float">
            <text:p>0,00173032407407407000</text:p>
          </table:table-cell>
          <table:table-cell table:formula="of:=[.D1152]-[.D115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3" office:value-type="float" office:value="14963" calcext:value-type="float">
            <text:p>14963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7318287037037" calcext:value-type="float">
            <text:p>0,00173182870370370000</text:p>
          </table:table-cell>
          <table:table-cell table:formula="of:=[.D1153]-[.D115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3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173333333333333" calcext:value-type="float">
            <text:p>0,00173333333333333000</text:p>
          </table:table-cell>
          <table:table-cell table:formula="of:=[.D1154]-[.D115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3" office:value-type="float" office:value="14989" calcext:value-type="float">
            <text:p>14989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173483796296296" calcext:value-type="float">
            <text:p>0,00173483796296296000</text:p>
          </table:table-cell>
          <table:table-cell table:formula="of:=[.D1155]-[.D11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3" office:value-type="float" office:value="15002" calcext:value-type="float">
            <text:p>15002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173634259259259" calcext:value-type="float">
            <text:p>0,00173634259259259000</text:p>
          </table:table-cell>
          <table:table-cell table:formula="of:=[.D1156]-[.D115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3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173784722222222" calcext:value-type="float">
            <text:p>0,00173784722222222000</text:p>
          </table:table-cell>
          <table:table-cell table:formula="of:=[.D1157]-[.D115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3" office:value-type="float" office:value="15028" calcext:value-type="float">
            <text:p>15028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173935185185185" calcext:value-type="float">
            <text:p>0,00173935185185185000</text:p>
          </table:table-cell>
          <table:table-cell table:formula="of:=[.D1158]-[.D11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3" office:value-type="float" office:value="15041" calcext:value-type="float">
            <text:p>15041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174085648148148" calcext:value-type="float">
            <text:p>0,00174085648148148000</text:p>
          </table:table-cell>
          <table:table-cell table:formula="of:=[.D1159]-[.D115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3" office:value-type="float" office:value="15054" calcext:value-type="float">
            <text:p>15054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174236111111111" calcext:value-type="float">
            <text:p>0,00174236111111111000</text:p>
          </table:table-cell>
          <table:table-cell table:formula="of:=[.D1160]-[.D115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3" office:value-type="float" office:value="15067" calcext:value-type="float">
            <text:p>15067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174386574074074" calcext:value-type="float">
            <text:p>0,00174386574074074000</text:p>
          </table:table-cell>
          <table:table-cell table:formula="of:=[.D1161]-[.D116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3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174537037037037" calcext:value-type="float">
            <text:p>0,00174537037037037000</text:p>
          </table:table-cell>
          <table:table-cell table:formula="of:=[.D1162]-[.D11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3" office:value-type="float" office:value="15093" calcext:value-type="float">
            <text:p>15093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1746875" calcext:value-type="float">
            <text:p>0,00174687500000000000</text:p>
          </table:table-cell>
          <table:table-cell table:formula="of:=[.D1163]-[.D116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3" office:value-type="float" office:value="15106" calcext:value-type="float">
            <text:p>15106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174837962962963" calcext:value-type="float">
            <text:p>0,00174837962962963000</text:p>
          </table:table-cell>
          <table:table-cell table:formula="of:=[.D1164]-[.D116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3" office:value-type="float" office:value="15119" calcext:value-type="float">
            <text:p>15119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174988425925926" calcext:value-type="float">
            <text:p>0,00174988425925926000</text:p>
          </table:table-cell>
          <table:table-cell table:formula="of:=[.D1165]-[.D116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3" office:value-type="float" office:value="15132" calcext:value-type="float">
            <text:p>15132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175138888888889" calcext:value-type="float">
            <text:p>0,00175138888888889000</text:p>
          </table:table-cell>
          <table:table-cell table:formula="of:=[.D1166]-[.D11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3" office:value-type="float" office:value="15145" calcext:value-type="float">
            <text:p>15145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175289351851852" calcext:value-type="float">
            <text:p>0,00175289351851852000</text:p>
          </table:table-cell>
          <table:table-cell table:formula="of:=[.D1167]-[.D116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3" office:value-type="float" office:value="15158" calcext:value-type="float">
            <text:p>15158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175439814814815" calcext:value-type="float">
            <text:p>0,00175439814814815000</text:p>
          </table:table-cell>
          <table:table-cell table:formula="of:=[.D1168]-[.D116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3" office:value-type="float" office:value="15171" calcext:value-type="float">
            <text:p>15171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175590277777778" calcext:value-type="float">
            <text:p>0,00175590277777778000</text:p>
          </table:table-cell>
          <table:table-cell table:formula="of:=[.D1169]-[.D116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3" office:value-type="float" office:value="15184" calcext:value-type="float">
            <text:p>15184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175740740740741" calcext:value-type="float">
            <text:p>0,00175740740740741000</text:p>
          </table:table-cell>
          <table:table-cell table:formula="of:=[.D1170]-[.D116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3" office:value-type="float" office:value="15197" calcext:value-type="float">
            <text:p>15197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175891203703704" calcext:value-type="float">
            <text:p>0,00175891203703704000</text:p>
          </table:table-cell>
          <table:table-cell table:formula="of:=[.D1171]-[.D117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3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176041666666667" calcext:value-type="float">
            <text:p>0,00176041666666667000</text:p>
          </table:table-cell>
          <table:table-cell table:formula="of:=[.D1172]-[.D117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3" office:value-type="float" office:value="15223" calcext:value-type="float">
            <text:p>15223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17619212962963" calcext:value-type="float">
            <text:p>0,00176192129629630000</text:p>
          </table:table-cell>
          <table:table-cell table:formula="of:=[.D1173]-[.D11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3" office:value-type="float" office:value="15236" calcext:value-type="float">
            <text:p>15236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176342592592593" calcext:value-type="float">
            <text:p>0,00176342592592593000</text:p>
          </table:table-cell>
          <table:table-cell table:formula="of:=[.D1174]-[.D117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3" office:value-type="float" office:value="15249" calcext:value-type="float">
            <text:p>15249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176493055555556" calcext:value-type="float">
            <text:p>0,00176493055555556000</text:p>
          </table:table-cell>
          <table:table-cell table:formula="of:=[.D1175]-[.D117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3" office:value-type="float" office:value="15262" calcext:value-type="float">
            <text:p>15262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176643518518519" calcext:value-type="float">
            <text:p>0,00176643518518519000</text:p>
          </table:table-cell>
          <table:table-cell table:formula="of:=[.D1176]-[.D117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3" office:value-type="float" office:value="15275" calcext:value-type="float">
            <text:p>15275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176793981481481" calcext:value-type="float">
            <text:p>0,00176793981481481000</text:p>
          </table:table-cell>
          <table:table-cell table:formula="of:=[.D1177]-[.D11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3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176944444444444" calcext:value-type="float">
            <text:p>0,00176944444444444000</text:p>
          </table:table-cell>
          <table:table-cell table:formula="of:=[.D1178]-[.D117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3" office:value-type="float" office:value="15301" calcext:value-type="float">
            <text:p>15301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177094907407407" calcext:value-type="float">
            <text:p>0,00177094907407407000</text:p>
          </table:table-cell>
          <table:table-cell table:formula="of:=[.D1179]-[.D117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3" office:value-type="float" office:value="15314" calcext:value-type="float">
            <text:p>15314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17724537037037" calcext:value-type="float">
            <text:p>0,00177245370370370000</text:p>
          </table:table-cell>
          <table:table-cell table:formula="of:=[.D1180]-[.D117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3" office:value-type="float" office:value="15327" calcext:value-type="float">
            <text:p>15327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177395833333333" calcext:value-type="float">
            <text:p>0,00177395833333333000</text:p>
          </table:table-cell>
          <table:table-cell table:formula="of:=[.D1181]-[.D118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3" office:value-type="float" office:value="15340" calcext:value-type="float">
            <text:p>1534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177546296296296" calcext:value-type="float">
            <text:p>0,00177546296296296000</text:p>
          </table:table-cell>
          <table:table-cell table:formula="of:=[.D1182]-[.D11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3" office:value-type="float" office:value="15353" calcext:value-type="float">
            <text:p>15353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177696759259259" calcext:value-type="float">
            <text:p>0,00177696759259259000</text:p>
          </table:table-cell>
          <table:table-cell table:formula="of:=[.D1183]-[.D118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3" office:value-type="float" office:value="15366" calcext:value-type="float">
            <text:p>15366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177847222222222" calcext:value-type="float">
            <text:p>0,00177847222222222000</text:p>
          </table:table-cell>
          <table:table-cell table:formula="of:=[.D1184]-[.D11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3" office:value-type="float" office:value="15379" calcext:value-type="float">
            <text:p>15379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177997685185185" calcext:value-type="float">
            <text:p>0,00177997685185185000</text:p>
          </table:table-cell>
          <table:table-cell table:formula="of:=[.D1185]-[.D118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3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178148148148148" calcext:value-type="float">
            <text:p>0,00178148148148148000</text:p>
          </table:table-cell>
          <table:table-cell table:formula="of:=[.D1186]-[.D118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3" office:value-type="float" office:value="15405" calcext:value-type="float">
            <text:p>15405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178298611111111" calcext:value-type="float">
            <text:p>0,00178298611111111000</text:p>
          </table:table-cell>
          <table:table-cell table:formula="of:=[.D1187]-[.D118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3" office:value-type="float" office:value="15418" calcext:value-type="float">
            <text:p>15418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178449074074074" calcext:value-type="float">
            <text:p>0,00178449074074074000</text:p>
          </table:table-cell>
          <table:table-cell table:formula="of:=[.D1188]-[.D11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3" office:value-type="float" office:value="15431" calcext:value-type="float">
            <text:p>15431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178599537037037" calcext:value-type="float">
            <text:p>0,00178599537037037000</text:p>
          </table:table-cell>
          <table:table-cell table:formula="of:=[.D1189]-[.D118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3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17875" calcext:value-type="float">
            <text:p>0,00178750000000000000</text:p>
          </table:table-cell>
          <table:table-cell table:formula="of:=[.D1190]-[.D118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3" office:value-type="float" office:value="15457" calcext:value-type="float">
            <text:p>15457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178900462962963" calcext:value-type="float">
            <text:p>0,00178900462962963000</text:p>
          </table:table-cell>
          <table:table-cell table:formula="of:=[.D1191]-[.D119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3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179050925925926" calcext:value-type="float">
            <text:p>0,00179050925925926000</text:p>
          </table:table-cell>
          <table:table-cell table:formula="of:=[.D1192]-[.D119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3" office:value-type="float" office:value="15483" calcext:value-type="float">
            <text:p>15483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179201388888889" calcext:value-type="float">
            <text:p>0,00179201388888889000</text:p>
          </table:table-cell>
          <table:table-cell table:formula="of:=[.D1193]-[.D11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3" office:value-type="float" office:value="15496" calcext:value-type="float">
            <text:p>15496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179351851851852" calcext:value-type="float">
            <text:p>0,00179351851851852000</text:p>
          </table:table-cell>
          <table:table-cell table:formula="of:=[.D1194]-[.D119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3" office:value-type="float" office:value="15509" calcext:value-type="float">
            <text:p>15509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179502314814815" calcext:value-type="float">
            <text:p>0,00179502314814815000</text:p>
          </table:table-cell>
          <table:table-cell table:formula="of:=[.D1195]-[.D11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3" office:value-type="float" office:value="15522" calcext:value-type="float">
            <text:p>15522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179652777777778" calcext:value-type="float">
            <text:p>0,00179652777777778000</text:p>
          </table:table-cell>
          <table:table-cell table:formula="of:=[.D1196]-[.D119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3" office:value-type="float" office:value="15535" calcext:value-type="float">
            <text:p>15535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179803240740741" calcext:value-type="float">
            <text:p>0,00179803240740741000</text:p>
          </table:table-cell>
          <table:table-cell table:formula="of:=[.D1197]-[.D119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3" office:value-type="float" office:value="15548" calcext:value-type="float">
            <text:p>15548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179953703703704" calcext:value-type="float">
            <text:p>0,00179953703703704000</text:p>
          </table:table-cell>
          <table:table-cell table:formula="of:=[.D1198]-[.D119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3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180104166666667" calcext:value-type="float">
            <text:p>0,00180104166666667000</text:p>
          </table:table-cell>
          <table:table-cell table:formula="of:=[.D1199]-[.D11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3" office:value-type="float" office:value="15574" calcext:value-type="float">
            <text:p>15574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18025462962963" calcext:value-type="float">
            <text:p>0,00180254629629630000</text:p>
          </table:table-cell>
          <table:table-cell table:formula="of:=[.D1200]-[.D119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3" office:value-type="float" office:value="15587" calcext:value-type="float">
            <text:p>15587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180405092592593" calcext:value-type="float">
            <text:p>0,00180405092592593000</text:p>
          </table:table-cell>
          <table:table-cell table:formula="of:=[.D1201]-[.D120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3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180555555555556" calcext:value-type="float">
            <text:p>0,00180555555555556000</text:p>
          </table:table-cell>
          <table:table-cell table:formula="of:=[.D1202]-[.D120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3" office:value-type="float" office:value="15613" calcext:value-type="float">
            <text:p>15613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180706018518519" calcext:value-type="float">
            <text:p>0,00180706018518519000</text:p>
          </table:table-cell>
          <table:table-cell table:formula="of:=[.D1203]-[.D12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3" office:value-type="float" office:value="15626" calcext:value-type="float">
            <text:p>15626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180856481481481" calcext:value-type="float">
            <text:p>0,00180856481481481000</text:p>
          </table:table-cell>
          <table:table-cell table:formula="of:=[.D1204]-[.D120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3" office:value-type="float" office:value="15639" calcext:value-type="float">
            <text:p>15639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181006944444444" calcext:value-type="float">
            <text:p>0,00181006944444444000</text:p>
          </table:table-cell>
          <table:table-cell table:formula="of:=[.D1205]-[.D120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3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181157407407407" calcext:value-type="float">
            <text:p>0,00181157407407407000</text:p>
          </table:table-cell>
          <table:table-cell table:formula="of:=[.D1206]-[.D12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3" office:value-type="float" office:value="15665" calcext:value-type="float">
            <text:p>15665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18130787037037" calcext:value-type="float">
            <text:p>0,00181307870370370000</text:p>
          </table:table-cell>
          <table:table-cell table:formula="of:=[.D1207]-[.D120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3" office:value-type="float" office:value="15678" calcext:value-type="float">
            <text:p>15678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181458333333333" calcext:value-type="float">
            <text:p>0,00181458333333333000</text:p>
          </table:table-cell>
          <table:table-cell table:formula="of:=[.D1208]-[.D120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3" office:value-type="float" office:value="15691" calcext:value-type="float">
            <text:p>15691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181608796296296" calcext:value-type="float">
            <text:p>0,00181608796296296000</text:p>
          </table:table-cell>
          <table:table-cell table:formula="of:=[.D1209]-[.D120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3" office:value-type="float" office:value="15704" calcext:value-type="float">
            <text:p>15704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181759259259259" calcext:value-type="float">
            <text:p>0,00181759259259259000</text:p>
          </table:table-cell>
          <table:table-cell table:formula="of:=[.D1210]-[.D12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3" office:value-type="float" office:value="15717" calcext:value-type="float">
            <text:p>15717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181909722222222" calcext:value-type="float">
            <text:p>0,00181909722222222000</text:p>
          </table:table-cell>
          <table:table-cell table:formula="of:=[.D1211]-[.D121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3" office:value-type="float" office:value="15730" calcext:value-type="float">
            <text:p>1573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182060185185185" calcext:value-type="float">
            <text:p>0,00182060185185185000</text:p>
          </table:table-cell>
          <table:table-cell table:formula="of:=[.D1212]-[.D121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3" office:value-type="float" office:value="15743" calcext:value-type="float">
            <text:p>15743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182210648148148" calcext:value-type="float">
            <text:p>0,00182210648148148000</text:p>
          </table:table-cell>
          <table:table-cell table:formula="of:=[.D1213]-[.D121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3" office:value-type="float" office:value="15756" calcext:value-type="float">
            <text:p>15756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182361111111111" calcext:value-type="float">
            <text:p>0,00182361111111111000</text:p>
          </table:table-cell>
          <table:table-cell table:formula="of:=[.D1214]-[.D12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3" office:value-type="float" office:value="15769" calcext:value-type="float">
            <text:p>15769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182511574074074" calcext:value-type="float">
            <text:p>0,00182511574074074000</text:p>
          </table:table-cell>
          <table:table-cell table:formula="of:=[.D1215]-[.D121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3" office:value-type="float" office:value="15782" calcext:value-type="float">
            <text:p>15782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182662037037037" calcext:value-type="float">
            <text:p>0,00182662037037037000</text:p>
          </table:table-cell>
          <table:table-cell table:formula="of:=[.D1216]-[.D121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3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1828125" calcext:value-type="float">
            <text:p>0,00182812500000000000</text:p>
          </table:table-cell>
          <table:table-cell table:formula="of:=[.D1217]-[.D12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3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182962962962963" calcext:value-type="float">
            <text:p>0,00182962962962963000</text:p>
          </table:table-cell>
          <table:table-cell table:formula="of:=[.D1218]-[.D121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3" office:value-type="float" office:value="15821" calcext:value-type="float">
            <text:p>15821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183113425925926" calcext:value-type="float">
            <text:p>0,00183113425925926000</text:p>
          </table:table-cell>
          <table:table-cell table:formula="of:=[.D1219]-[.D121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3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183263888888889" calcext:value-type="float">
            <text:p>0,00183263888888889000</text:p>
          </table:table-cell>
          <table:table-cell table:formula="of:=[.D1220]-[.D121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3" office:value-type="float" office:value="15847" calcext:value-type="float">
            <text:p>15847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183414351851852" calcext:value-type="float">
            <text:p>0,00183414351851852000</text:p>
          </table:table-cell>
          <table:table-cell table:formula="of:=[.D1221]-[.D12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3" office:value-type="float" office:value="15860" calcext:value-type="float">
            <text:p>1586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183564814814815" calcext:value-type="float">
            <text:p>0,00183564814814815000</text:p>
          </table:table-cell>
          <table:table-cell table:formula="of:=[.D1222]-[.D122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3" office:value-type="float" office:value="15873" calcext:value-type="float">
            <text:p>15873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183715277777778" calcext:value-type="float">
            <text:p>0,00183715277777778000</text:p>
          </table:table-cell>
          <table:table-cell table:formula="of:=[.D1223]-[.D122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3" office:value-type="float" office:value="15886" calcext:value-type="float">
            <text:p>15886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183865740740741" calcext:value-type="float">
            <text:p>0,00183865740740741000</text:p>
          </table:table-cell>
          <table:table-cell table:formula="of:=[.D1224]-[.D122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3" office:value-type="float" office:value="15899" calcext:value-type="float">
            <text:p>15899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184016203703704" calcext:value-type="float">
            <text:p>0,00184016203703704000</text:p>
          </table:table-cell>
          <table:table-cell table:formula="of:=[.D1225]-[.D12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3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184166666666667" calcext:value-type="float">
            <text:p>0,00184166666666667000</text:p>
          </table:table-cell>
          <table:table-cell table:formula="of:=[.D1226]-[.D122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3" office:value-type="float" office:value="15925" calcext:value-type="float">
            <text:p>15925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18431712962963" calcext:value-type="float">
            <text:p>0,00184317129629630000</text:p>
          </table:table-cell>
          <table:table-cell table:formula="of:=[.D1227]-[.D122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3" office:value-type="float" office:value="15938" calcext:value-type="float">
            <text:p>15938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184467592592593" calcext:value-type="float">
            <text:p>0,00184467592592593000</text:p>
          </table:table-cell>
          <table:table-cell table:formula="of:=[.D1228]-[.D122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3" office:value-type="float" office:value="15951" calcext:value-type="float">
            <text:p>15951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184618055555556" calcext:value-type="float">
            <text:p>0,00184618055555556000</text:p>
          </table:table-cell>
          <table:table-cell table:formula="of:=[.D1229]-[.D122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3" office:value-type="float" office:value="15964" calcext:value-type="float">
            <text:p>15964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184768518518519" calcext:value-type="float">
            <text:p>0,00184768518518519000</text:p>
          </table:table-cell>
          <table:table-cell table:formula="of:=[.D1230]-[.D122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3" office:value-type="float" office:value="15977" calcext:value-type="float">
            <text:p>15977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184918981481481" calcext:value-type="float">
            <text:p>0,00184918981481481000</text:p>
          </table:table-cell>
          <table:table-cell table:formula="of:=[.D1231]-[.D123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3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185069444444444" calcext:value-type="float">
            <text:p>0,00185069444444444000</text:p>
          </table:table-cell>
          <table:table-cell table:formula="of:=[.D1232]-[.D12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3" office:value-type="float" office:value="16003" calcext:value-type="float">
            <text:p>16003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185219907407407" calcext:value-type="float">
            <text:p>0,00185219907407407000</text:p>
          </table:table-cell>
          <table:table-cell table:formula="of:=[.D1233]-[.D123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3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18537037037037" calcext:value-type="float">
            <text:p>0,00185370370370370000</text:p>
          </table:table-cell>
          <table:table-cell table:formula="of:=[.D1234]-[.D123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3" office:value-type="float" office:value="16029" calcext:value-type="float">
            <text:p>16029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185520833333333" calcext:value-type="float">
            <text:p>0,00185520833333333000</text:p>
          </table:table-cell>
          <table:table-cell table:formula="of:=[.D1235]-[.D123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3" office:value-type="float" office:value="16042" calcext:value-type="float">
            <text:p>16042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185671296296296" calcext:value-type="float">
            <text:p>0,00185671296296296000</text:p>
          </table:table-cell>
          <table:table-cell table:formula="of:=[.D1236]-[.D12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3" office:value-type="float" office:value="16055" calcext:value-type="float">
            <text:p>16055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185821759259259" calcext:value-type="float">
            <text:p>0,00185821759259259000</text:p>
          </table:table-cell>
          <table:table-cell table:formula="of:=[.D1237]-[.D123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3" office:value-type="float" office:value="16068" calcext:value-type="float">
            <text:p>16068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185972222222222" calcext:value-type="float">
            <text:p>0,00185972222222222000</text:p>
          </table:table-cell>
          <table:table-cell table:formula="of:=[.D1238]-[.D123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3" office:value-type="float" office:value="16081" calcext:value-type="float">
            <text:p>16081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186122685185185" calcext:value-type="float">
            <text:p>0,00186122685185185000</text:p>
          </table:table-cell>
          <table:table-cell table:formula="of:=[.D1239]-[.D123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3" office:value-type="float" office:value="16094" calcext:value-type="float">
            <text:p>16094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186273148148148" calcext:value-type="float">
            <text:p>0,00186273148148148000</text:p>
          </table:table-cell>
          <table:table-cell table:formula="of:=[.D1240]-[.D123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3" office:value-type="float" office:value="16107" calcext:value-type="float">
            <text:p>16107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186423611111111" calcext:value-type="float">
            <text:p>0,00186423611111111000</text:p>
          </table:table-cell>
          <table:table-cell table:formula="of:=[.D1241]-[.D12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3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186574074074074" calcext:value-type="float">
            <text:p>0,00186574074074074000</text:p>
          </table:table-cell>
          <table:table-cell table:formula="of:=[.D1242]-[.D124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3" office:value-type="float" office:value="16133" calcext:value-type="float">
            <text:p>16133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186724537037037" calcext:value-type="float">
            <text:p>0,00186724537037037000</text:p>
          </table:table-cell>
          <table:table-cell table:formula="of:=[.D1243]-[.D12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3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186875" calcext:value-type="float">
            <text:p>0,00186875000000000000</text:p>
          </table:table-cell>
          <table:table-cell table:formula="of:=[.D1244]-[.D124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3" office:value-type="float" office:value="16159" calcext:value-type="float">
            <text:p>16159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187025462962963" calcext:value-type="float">
            <text:p>0,00187025462962963000</text:p>
          </table:table-cell>
          <table:table-cell table:formula="of:=[.D1245]-[.D124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3" office:value-type="float" office:value="16172" calcext:value-type="float">
            <text:p>16172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187175925925926" calcext:value-type="float">
            <text:p>0,00187175925925926000</text:p>
          </table:table-cell>
          <table:table-cell table:formula="of:=[.D1246]-[.D124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3" office:value-type="float" office:value="16185" calcext:value-type="float">
            <text:p>16185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187326388888889" calcext:value-type="float">
            <text:p>0,00187326388888889000</text:p>
          </table:table-cell>
          <table:table-cell table:formula="of:=[.D1247]-[.D12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3" office:value-type="float" office:value="16198" calcext:value-type="float">
            <text:p>16198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187476851851852" calcext:value-type="float">
            <text:p>0,00187476851851852000</text:p>
          </table:table-cell>
          <table:table-cell table:formula="of:=[.D1248]-[.D124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3" office:value-type="float" office:value="16211" calcext:value-type="float">
            <text:p>16211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187627314814815" calcext:value-type="float">
            <text:p>0,00187627314814815000</text:p>
          </table:table-cell>
          <table:table-cell table:formula="of:=[.D1249]-[.D124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3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187777777777778" calcext:value-type="float">
            <text:p>0,00187777777777778000</text:p>
          </table:table-cell>
          <table:table-cell table:formula="of:=[.D1250]-[.D124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3" office:value-type="float" office:value="16237" calcext:value-type="float">
            <text:p>16237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187928240740741" calcext:value-type="float">
            <text:p>0,00187928240740741000</text:p>
          </table:table-cell>
          <table:table-cell table:formula="of:=[.D1251]-[.D12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3" office:value-type="float" office:value="16250" calcext:value-type="float">
            <text:p>1625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188078703703704" calcext:value-type="float">
            <text:p>0,00188078703703704000</text:p>
          </table:table-cell>
          <table:table-cell table:formula="of:=[.D1252]-[.D125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3" office:value-type="float" office:value="16263" calcext:value-type="float">
            <text:p>16263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188229166666667" calcext:value-type="float">
            <text:p>0,00188229166666667000</text:p>
          </table:table-cell>
          <table:table-cell table:formula="of:=[.D1253]-[.D125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3" office:value-type="float" office:value="16276" calcext:value-type="float">
            <text:p>16276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18837962962963" calcext:value-type="float">
            <text:p>0,00188379629629630000</text:p>
          </table:table-cell>
          <table:table-cell table:formula="of:=[.D1254]-[.D125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3" office:value-type="float" office:value="16289" calcext:value-type="float">
            <text:p>16289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188530092592593" calcext:value-type="float">
            <text:p>0,00188530092592593000</text:p>
          </table:table-cell>
          <table:table-cell table:formula="of:=[.D1255]-[.D125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3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188680555555556" calcext:value-type="float">
            <text:p>0,00188680555555556000</text:p>
          </table:table-cell>
          <table:table-cell table:formula="of:=[.D1256]-[.D125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3" office:value-type="float" office:value="16315" calcext:value-type="float">
            <text:p>16315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188831018518519" calcext:value-type="float">
            <text:p>0,00188831018518519000</text:p>
          </table:table-cell>
          <table:table-cell table:formula="of:=[.D1257]-[.D125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3" office:value-type="float" office:value="16328" calcext:value-type="float">
            <text:p>16328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188981481481481" calcext:value-type="float">
            <text:p>0,00188981481481481000</text:p>
          </table:table-cell>
          <table:table-cell table:formula="of:=[.D1258]-[.D12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3" office:value-type="float" office:value="16341" calcext:value-type="float">
            <text:p>16341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189131944444444" calcext:value-type="float">
            <text:p>0,00189131944444444000</text:p>
          </table:table-cell>
          <table:table-cell table:formula="of:=[.D1259]-[.D125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3" office:value-type="float" office:value="16354" calcext:value-type="float">
            <text:p>16354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189282407407407" calcext:value-type="float">
            <text:p>0,00189282407407407000</text:p>
          </table:table-cell>
          <table:table-cell table:formula="of:=[.D1260]-[.D125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3" office:value-type="float" office:value="16367" calcext:value-type="float">
            <text:p>16367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18943287037037" calcext:value-type="float">
            <text:p>0,00189432870370370000</text:p>
          </table:table-cell>
          <table:table-cell table:formula="of:=[.D1261]-[.D126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3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189583333333333" calcext:value-type="float">
            <text:p>0,00189583333333333000</text:p>
          </table:table-cell>
          <table:table-cell table:formula="of:=[.D1262]-[.D12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3" office:value-type="float" office:value="16393" calcext:value-type="float">
            <text:p>16393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189733796296296" calcext:value-type="float">
            <text:p>0,00189733796296296000</text:p>
          </table:table-cell>
          <table:table-cell table:formula="of:=[.D1263]-[.D126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3" office:value-type="float" office:value="16406" calcext:value-type="float">
            <text:p>16406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189884259259259" calcext:value-type="float">
            <text:p>0,00189884259259259000</text:p>
          </table:table-cell>
          <table:table-cell table:formula="of:=[.D1264]-[.D126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3" office:value-type="float" office:value="16419" calcext:value-type="float">
            <text:p>16419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190034722222222" calcext:value-type="float">
            <text:p>0,00190034722222222000</text:p>
          </table:table-cell>
          <table:table-cell table:formula="of:=[.D1265]-[.D126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3" office:value-type="float" office:value="16432" calcext:value-type="float">
            <text:p>16432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190185185185185" calcext:value-type="float">
            <text:p>0,00190185185185185000</text:p>
          </table:table-cell>
          <table:table-cell table:formula="of:=[.D1266]-[.D126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3" office:value-type="float" office:value="16445" calcext:value-type="float">
            <text:p>16445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190335648148148" calcext:value-type="float">
            <text:p>0,00190335648148148000</text:p>
          </table:table-cell>
          <table:table-cell table:formula="of:=[.D1267]-[.D126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3" office:value-type="float" office:value="16458" calcext:value-type="float">
            <text:p>16458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190486111111111" calcext:value-type="float">
            <text:p>0,00190486111111111000</text:p>
          </table:table-cell>
          <table:table-cell table:formula="of:=[.D1268]-[.D126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3" office:value-type="float" office:value="16471" calcext:value-type="float">
            <text:p>16471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190636574074074" calcext:value-type="float">
            <text:p>0,00190636574074074000</text:p>
          </table:table-cell>
          <table:table-cell table:formula="of:=[.D1269]-[.D12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3" office:value-type="float" office:value="16484" calcext:value-type="float">
            <text:p>16484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190787037037037" calcext:value-type="float">
            <text:p>0,00190787037037037000</text:p>
          </table:table-cell>
          <table:table-cell table:formula="of:=[.D1270]-[.D126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3" office:value-type="float" office:value="16497" calcext:value-type="float">
            <text:p>16497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1909375" calcext:value-type="float">
            <text:p>0,00190937500000000000</text:p>
          </table:table-cell>
          <table:table-cell table:formula="of:=[.D1271]-[.D127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3" office:value-type="float" office:value="16510" calcext:value-type="float">
            <text:p>1651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191087962962963" calcext:value-type="float">
            <text:p>0,00191087962962963000</text:p>
          </table:table-cell>
          <table:table-cell table:formula="of:=[.D1272]-[.D127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3" office:value-type="float" office:value="16523" calcext:value-type="float">
            <text:p>16523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191238425925926" calcext:value-type="float">
            <text:p>0,00191238425925926000</text:p>
          </table:table-cell>
          <table:table-cell table:formula="of:=[.D1273]-[.D12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3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191388888888889" calcext:value-type="float">
            <text:p>0,00191388888888889000</text:p>
          </table:table-cell>
          <table:table-cell table:formula="of:=[.D1274]-[.D127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3" office:value-type="float" office:value="16549" calcext:value-type="float">
            <text:p>16549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191539351851852" calcext:value-type="float">
            <text:p>0,00191539351851852000</text:p>
          </table:table-cell>
          <table:table-cell table:formula="of:=[.D1275]-[.D127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3" office:value-type="float" office:value="16562" calcext:value-type="float">
            <text:p>16562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191689814814815" calcext:value-type="float">
            <text:p>0,00191689814814815000</text:p>
          </table:table-cell>
          <table:table-cell table:formula="of:=[.D1276]-[.D127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3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191840277777778" calcext:value-type="float">
            <text:p>0,00191840277777778000</text:p>
          </table:table-cell>
          <table:table-cell table:formula="of:=[.D1277]-[.D127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3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191990740740741" calcext:value-type="float">
            <text:p>0,00191990740740741000</text:p>
          </table:table-cell>
          <table:table-cell table:formula="of:=[.D1278]-[.D127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3" office:value-type="float" office:value="16601" calcext:value-type="float">
            <text:p>16601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192141203703704" calcext:value-type="float">
            <text:p>0,00192141203703704000</text:p>
          </table:table-cell>
          <table:table-cell table:formula="of:=[.D1279]-[.D1278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3" office:value-type="float" office:value="16614" calcext:value-type="float">
            <text:p>16614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192291666666667" calcext:value-type="float">
            <text:p>0,00192291666666667000</text:p>
          </table:table-cell>
          <table:table-cell table:formula="of:=[.D1280]-[.D127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3" office:value-type="float" office:value="16627" calcext:value-type="float">
            <text:p>16627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19244212962963" calcext:value-type="float">
            <text:p>0,00192442129629630000</text:p>
          </table:table-cell>
          <table:table-cell table:formula="of:=[.D1281]-[.D1280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3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192592592592593" calcext:value-type="float">
            <text:p>0,00192592592592593000</text:p>
          </table:table-cell>
          <table:table-cell table:formula="of:=[.D1282]-[.D12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3" office:value-type="float" office:value="16653" calcext:value-type="float">
            <text:p>16653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192743055555556" calcext:value-type="float">
            <text:p>0,00192743055555556000</text:p>
          </table:table-cell>
          <table:table-cell table:formula="of:=[.D1283]-[.D1282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3" office:value-type="float" office:value="16666" calcext:value-type="float">
            <text:p>16666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192893518518519" calcext:value-type="float">
            <text:p>0,00192893518518519000</text:p>
          </table:table-cell>
          <table:table-cell table:formula="of:=[.D1284]-[.D12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3" office:value-type="float" office:value="16679" calcext:value-type="float">
            <text:p>16679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193043981481481" calcext:value-type="float">
            <text:p>0,00193043981481481000</text:p>
          </table:table-cell>
          <table:table-cell table:formula="of:=[.D1285]-[.D1284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3" office:value-type="float" office:value="16692" calcext:value-type="float">
            <text:p>16692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193194444444444" calcext:value-type="float">
            <text:p>0,00193194444444444000</text:p>
          </table:table-cell>
          <table:table-cell table:formula="of:=[.D1286]-[.D128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3" office:value-type="float" office:value="16705" calcext:value-type="float">
            <text:p>16705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193344907407407" calcext:value-type="float">
            <text:p>0,00193344907407407000</text:p>
          </table:table-cell>
          <table:table-cell table:formula="of:=[.D1287]-[.D1286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3" office:value-type="float" office:value="16718" calcext:value-type="float">
            <text:p>16718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19349537037037" calcext:value-type="float">
            <text:p>0,00193495370370370000</text:p>
          </table:table-cell>
          <table:table-cell table:formula="of:=[.D1288]-[.D128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3" office:value-type="float" office:value="16731" calcext:value-type="float">
            <text:p>16731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193645833333333" calcext:value-type="float">
            <text:p>0,00193645833333333000</text:p>
          </table:table-cell>
          <table:table-cell table:formula="of:=[.D1289]-[.D12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3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193796296296296" calcext:value-type="float">
            <text:p>0,00193796296296296000</text:p>
          </table:table-cell>
          <table:table-cell table:formula="of:=[.D1290]-[.D128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3" office:value-type="float" office:value="16757" calcext:value-type="float">
            <text:p>16757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193946759259259" calcext:value-type="float">
            <text:p>0,00193946759259259000</text:p>
          </table:table-cell>
          <table:table-cell table:formula="of:=[.D1291]-[.D129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3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194097222222222" calcext:value-type="float">
            <text:p>0,00194097222222222000</text:p>
          </table:table-cell>
          <table:table-cell table:formula="of:=[.D1292]-[.D1291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3" office:value-type="float" office:value="16783" calcext:value-type="float">
            <text:p>16783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194247685185185" calcext:value-type="float">
            <text:p>0,00194247685185185000</text:p>
          </table:table-cell>
          <table:table-cell table:formula="of:=[.D1293]-[.D12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3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194398148148148" calcext:value-type="float">
            <text:p>0,00194398148148148000</text:p>
          </table:table-cell>
          <table:table-cell table:formula="of:=[.D1294]-[.D1293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3" office:value-type="float" office:value="16809" calcext:value-type="float">
            <text:p>16809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194548611111111" calcext:value-type="float">
            <text:p>0,00194548611111111000</text:p>
          </table:table-cell>
          <table:table-cell table:formula="of:=[.D1295]-[.D12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3" office:value-type="float" office:value="16822" calcext:value-type="float">
            <text:p>16822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194699074074074" calcext:value-type="float">
            <text:p>0,00194699074074074000</text:p>
          </table:table-cell>
          <table:table-cell table:formula="of:=[.D1296]-[.D1295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3" office:value-type="float" office:value="16835" calcext:value-type="float">
            <text:p>16835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194849537037037" calcext:value-type="float">
            <text:p>0,00194849537037037000</text:p>
          </table:table-cell>
          <table:table-cell table:formula="of:=[.D1297]-[.D129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3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195" calcext:value-type="float">
            <text:p>0,00195000000000000000</text:p>
          </table:table-cell>
          <table:table-cell table:formula="of:=[.D1298]-[.D1297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3" office:value-type="float" office:value="16861" calcext:value-type="float">
            <text:p>16861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195150462962963" calcext:value-type="float">
            <text:p>0,00195150462962963000</text:p>
          </table:table-cell>
          <table:table-cell table:formula="of:=[.D1299]-[.D12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3" office:value-type="float" office:value="16874" calcext:value-type="float">
            <text:p>16874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195300925925926" calcext:value-type="float">
            <text:p>0,00195300925925926000</text:p>
          </table:table-cell>
          <table:table-cell table:formula="of:=[.D1300]-[.D1299]" office:value-type="float" office:value="0.00000150462962962973" calcext:value-type="float">
            <text:p>0,0000015046296296297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3" office:value-type="float" office:value="16887" calcext:value-type="float">
            <text:p>16887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195451388888889" calcext:value-type="float">
            <text:p>0,00195451388888889000</text:p>
          </table:table-cell>
          <table:table-cell table:formula="of:=[.D1301]-[.D130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3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195601851851852" calcext:value-type="float">
            <text:p>0,00195601851851852000</text:p>
          </table:table-cell>
          <table:table-cell table:formula="of:=[.D1302]-[.D130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3" office:value-type="float" office:value="16913" calcext:value-type="float">
            <text:p>16913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195752314814815" calcext:value-type="float">
            <text:p>0,00195752314814815000</text:p>
          </table:table-cell>
          <table:table-cell table:formula="of:=[.D1303]-[.D13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3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195902777777778" calcext:value-type="float">
            <text:p>0,00195902777777778000</text:p>
          </table:table-cell>
          <table:table-cell table:formula="of:=[.D1304]-[.D130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3" office:value-type="float" office:value="16939" calcext:value-type="float">
            <text:p>16939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196053240740741" calcext:value-type="float">
            <text:p>0,00196053240740741000</text:p>
          </table:table-cell>
          <table:table-cell table:formula="of:=[.D1305]-[.D130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3" office:value-type="float" office:value="16952" calcext:value-type="float">
            <text:p>16952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196203703703704" calcext:value-type="float">
            <text:p>0,00196203703703704000</text:p>
          </table:table-cell>
          <table:table-cell table:formula="of:=[.D1306]-[.D130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3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196354166666667" calcext:value-type="float">
            <text:p>0,00196354166666667000</text:p>
          </table:table-cell>
          <table:table-cell table:formula="of:=[.D1307]-[.D13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3" office:value-type="float" office:value="16978" calcext:value-type="float">
            <text:p>16978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19650462962963" calcext:value-type="float">
            <text:p>0,00196504629629630000</text:p>
          </table:table-cell>
          <table:table-cell table:formula="of:=[.D1308]-[.D130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3" office:value-type="float" office:value="16991" calcext:value-type="float">
            <text:p>16991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196655092592593" calcext:value-type="float">
            <text:p>0,00196655092592593000</text:p>
          </table:table-cell>
          <table:table-cell table:formula="of:=[.D1309]-[.D130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3" office:value-type="float" office:value="17004" calcext:value-type="float">
            <text:p>17004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196805555555556" calcext:value-type="float">
            <text:p>0,00196805555555556000</text:p>
          </table:table-cell>
          <table:table-cell table:formula="of:=[.D1310]-[.D130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3" office:value-type="float" office:value="17017" calcext:value-type="float">
            <text:p>17017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196956018518519" calcext:value-type="float">
            <text:p>0,00196956018518519000</text:p>
          </table:table-cell>
          <table:table-cell table:formula="of:=[.D1311]-[.D13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3" office:value-type="float" office:value="17030" calcext:value-type="float">
            <text:p>1703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197106481481482" calcext:value-type="float">
            <text:p>0,00197106481481482000</text:p>
          </table:table-cell>
          <table:table-cell table:formula="of:=[.D1312]-[.D131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3" office:value-type="float" office:value="17043" calcext:value-type="float">
            <text:p>17043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197256944444444" calcext:value-type="float">
            <text:p>0,00197256944444444000</text:p>
          </table:table-cell>
          <table:table-cell table:formula="of:=[.D1313]-[.D131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3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197407407407407" calcext:value-type="float">
            <text:p>0,00197407407407407000</text:p>
          </table:table-cell>
          <table:table-cell table:formula="of:=[.D1314]-[.D13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3" office:value-type="float" office:value="17069" calcext:value-type="float">
            <text:p>17069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19755787037037" calcext:value-type="float">
            <text:p>0,00197557870370370000</text:p>
          </table:table-cell>
          <table:table-cell table:formula="of:=[.D1315]-[.D131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3" office:value-type="float" office:value="17082" calcext:value-type="float">
            <text:p>17082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197708333333333" calcext:value-type="float">
            <text:p>0,00197708333333333000</text:p>
          </table:table-cell>
          <table:table-cell table:formula="of:=[.D1316]-[.D131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3" office:value-type="float" office:value="17095" calcext:value-type="float">
            <text:p>17095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197858796296296" calcext:value-type="float">
            <text:p>0,00197858796296296000</text:p>
          </table:table-cell>
          <table:table-cell table:formula="of:=[.D1317]-[.D131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3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198009259259259" calcext:value-type="float">
            <text:p>0,00198009259259259000</text:p>
          </table:table-cell>
          <table:table-cell table:formula="of:=[.D1318]-[.D13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3" office:value-type="float" office:value="17121" calcext:value-type="float">
            <text:p>17121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198159722222222" calcext:value-type="float">
            <text:p>0,00198159722222222000</text:p>
          </table:table-cell>
          <table:table-cell table:formula="of:=[.D1319]-[.D131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3" office:value-type="float" office:value="17134" calcext:value-type="float">
            <text:p>17134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198310185185185" calcext:value-type="float">
            <text:p>0,00198310185185185000</text:p>
          </table:table-cell>
          <table:table-cell table:formula="of:=[.D1320]-[.D131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3" office:value-type="float" office:value="17147" calcext:value-type="float">
            <text:p>17147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198460648148148" calcext:value-type="float">
            <text:p>0,00198460648148148000</text:p>
          </table:table-cell>
          <table:table-cell table:formula="of:=[.D1321]-[.D132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3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198611111111111" calcext:value-type="float">
            <text:p>0,00198611111111111000</text:p>
          </table:table-cell>
          <table:table-cell table:formula="of:=[.D1322]-[.D13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3" office:value-type="float" office:value="17173" calcext:value-type="float">
            <text:p>17173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198761574074074" calcext:value-type="float">
            <text:p>0,00198761574074074000</text:p>
          </table:table-cell>
          <table:table-cell table:formula="of:=[.D1323]-[.D132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3" office:value-type="float" office:value="17186" calcext:value-type="float">
            <text:p>17186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198912037037037" calcext:value-type="float">
            <text:p>0,00198912037037037000</text:p>
          </table:table-cell>
          <table:table-cell table:formula="of:=[.D1324]-[.D132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3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1990625" calcext:value-type="float">
            <text:p>0,00199062500000000000</text:p>
          </table:table-cell>
          <table:table-cell table:formula="of:=[.D1325]-[.D13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3" office:value-type="float" office:value="17212" calcext:value-type="float">
            <text:p>17212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199212962962963" calcext:value-type="float">
            <text:p>0,00199212962962963000</text:p>
          </table:table-cell>
          <table:table-cell table:formula="of:=[.D1326]-[.D132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3" office:value-type="float" office:value="17225" calcext:value-type="float">
            <text:p>17225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199363425925926" calcext:value-type="float">
            <text:p>0,00199363425925926000</text:p>
          </table:table-cell>
          <table:table-cell table:formula="of:=[.D1327]-[.D132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3" office:value-type="float" office:value="17238" calcext:value-type="float">
            <text:p>17238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199513888888889" calcext:value-type="float">
            <text:p>0,00199513888888889000</text:p>
          </table:table-cell>
          <table:table-cell table:formula="of:=[.D1328]-[.D132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3" office:value-type="float" office:value="17251" calcext:value-type="float">
            <text:p>17251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199664351851852" calcext:value-type="float">
            <text:p>0,00199664351851852000</text:p>
          </table:table-cell>
          <table:table-cell table:formula="of:=[.D1329]-[.D13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3" office:value-type="float" office:value="17264" calcext:value-type="float">
            <text:p>17264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199814814814815" calcext:value-type="float">
            <text:p>0,00199814814814815000</text:p>
          </table:table-cell>
          <table:table-cell table:formula="of:=[.D1330]-[.D132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3" office:value-type="float" office:value="17277" calcext:value-type="float">
            <text:p>17277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199965277777778" calcext:value-type="float">
            <text:p>0,00199965277777778000</text:p>
          </table:table-cell>
          <table:table-cell table:formula="of:=[.D1331]-[.D133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3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200115740740741" calcext:value-type="float">
            <text:p>0,00200115740740741000</text:p>
          </table:table-cell>
          <table:table-cell table:formula="of:=[.D1332]-[.D133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3" office:value-type="float" office:value="17303" calcext:value-type="float">
            <text:p>17303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200266203703704" calcext:value-type="float">
            <text:p>0,00200266203703704000</text:p>
          </table:table-cell>
          <table:table-cell table:formula="of:=[.D1333]-[.D13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3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200416666666667" calcext:value-type="float">
            <text:p>0,00200416666666667000</text:p>
          </table:table-cell>
          <table:table-cell table:formula="of:=[.D1334]-[.D133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3" office:value-type="float" office:value="17329" calcext:value-type="float">
            <text:p>17329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20056712962963" calcext:value-type="float">
            <text:p>0,00200567129629630000</text:p>
          </table:table-cell>
          <table:table-cell table:formula="of:=[.D1335]-[.D133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3" office:value-type="float" office:value="17342" calcext:value-type="float">
            <text:p>17342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200717592592593" calcext:value-type="float">
            <text:p>0,00200717592592593000</text:p>
          </table:table-cell>
          <table:table-cell table:formula="of:=[.D1336]-[.D13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3" office:value-type="float" office:value="17355" calcext:value-type="float">
            <text:p>17355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200868055555556" calcext:value-type="float">
            <text:p>0,00200868055555556000</text:p>
          </table:table-cell>
          <table:table-cell table:formula="of:=[.D1337]-[.D13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3" office:value-type="float" office:value="17368" calcext:value-type="float">
            <text:p>17368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201018518518519" calcext:value-type="float">
            <text:p>0,00201018518518519000</text:p>
          </table:table-cell>
          <table:table-cell table:formula="of:=[.D1338]-[.D133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3" office:value-type="float" office:value="17381" calcext:value-type="float">
            <text:p>17381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201168981481481" calcext:value-type="float">
            <text:p>0,00201168981481481000</text:p>
          </table:table-cell>
          <table:table-cell table:formula="of:=[.D1339]-[.D133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3" office:value-type="float" office:value="17394" calcext:value-type="float">
            <text:p>17394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201319444444444" calcext:value-type="float">
            <text:p>0,00201319444444444000</text:p>
          </table:table-cell>
          <table:table-cell table:formula="of:=[.D1340]-[.D13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3" office:value-type="float" office:value="17407" calcext:value-type="float">
            <text:p>17407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201469907407407" calcext:value-type="float">
            <text:p>0,00201469907407407000</text:p>
          </table:table-cell>
          <table:table-cell table:formula="of:=[.D1341]-[.D13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3" office:value-type="float" office:value="17420" calcext:value-type="float">
            <text:p>1742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20162037037037" calcext:value-type="float">
            <text:p>0,00201620370370370000</text:p>
          </table:table-cell>
          <table:table-cell table:formula="of:=[.D1342]-[.D134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3" office:value-type="float" office:value="17433" calcext:value-type="float">
            <text:p>17433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201770833333333" calcext:value-type="float">
            <text:p>0,00201770833333333000</text:p>
          </table:table-cell>
          <table:table-cell table:formula="of:=[.D1343]-[.D134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3" office:value-type="float" office:value="17446" calcext:value-type="float">
            <text:p>17446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201921296296296" calcext:value-type="float">
            <text:p>0,00201921296296296000</text:p>
          </table:table-cell>
          <table:table-cell table:formula="of:=[.D1344]-[.D13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3" office:value-type="float" office:value="17459" calcext:value-type="float">
            <text:p>17459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202071759259259" calcext:value-type="float">
            <text:p>0,00202071759259259000</text:p>
          </table:table-cell>
          <table:table-cell table:formula="of:=[.D1345]-[.D134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3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202222222222222" calcext:value-type="float">
            <text:p>0,00202222222222222000</text:p>
          </table:table-cell>
          <table:table-cell table:formula="of:=[.D1346]-[.D134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3" office:value-type="float" office:value="17485" calcext:value-type="float">
            <text:p>17485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202372685185185" calcext:value-type="float">
            <text:p>0,00202372685185185000</text:p>
          </table:table-cell>
          <table:table-cell table:formula="of:=[.D1347]-[.D134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3" office:value-type="float" office:value="17498" calcext:value-type="float">
            <text:p>17498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202523148148148" calcext:value-type="float">
            <text:p>0,00202523148148148000</text:p>
          </table:table-cell>
          <table:table-cell table:formula="of:=[.D1348]-[.D13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3" office:value-type="float" office:value="17511" calcext:value-type="float">
            <text:p>17511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202673611111111" calcext:value-type="float">
            <text:p>0,00202673611111111000</text:p>
          </table:table-cell>
          <table:table-cell table:formula="of:=[.D1349]-[.D134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3" office:value-type="float" office:value="17524" calcext:value-type="float">
            <text:p>17524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202824074074074" calcext:value-type="float">
            <text:p>0,00202824074074074000</text:p>
          </table:table-cell>
          <table:table-cell table:formula="of:=[.D1350]-[.D134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3" office:value-type="float" office:value="17537" calcext:value-type="float">
            <text:p>17537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202974537037037" calcext:value-type="float">
            <text:p>0,00202974537037037000</text:p>
          </table:table-cell>
          <table:table-cell table:formula="of:=[.D1351]-[.D13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3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203125" calcext:value-type="float">
            <text:p>0,00203125000000000000</text:p>
          </table:table-cell>
          <table:table-cell table:formula="of:=[.D1352]-[.D135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3" office:value-type="float" office:value="17563" calcext:value-type="float">
            <text:p>17563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203275462962963" calcext:value-type="float">
            <text:p>0,00203275462962963000</text:p>
          </table:table-cell>
          <table:table-cell table:formula="of:=[.D1353]-[.D135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3" office:value-type="float" office:value="17576" calcext:value-type="float">
            <text:p>17576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203425925925926" calcext:value-type="float">
            <text:p>0,00203425925925926000</text:p>
          </table:table-cell>
          <table:table-cell table:formula="of:=[.D1354]-[.D135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3" office:value-type="float" office:value="17589" calcext:value-type="float">
            <text:p>17589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203576388888889" calcext:value-type="float">
            <text:p>0,00203576388888889000</text:p>
          </table:table-cell>
          <table:table-cell table:formula="of:=[.D1355]-[.D13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3" office:value-type="float" office:value="17602" calcext:value-type="float">
            <text:p>17602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203726851851852" calcext:value-type="float">
            <text:p>0,00203726851851852000</text:p>
          </table:table-cell>
          <table:table-cell table:formula="of:=[.D1356]-[.D135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3" office:value-type="float" office:value="17615" calcext:value-type="float">
            <text:p>17615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203877314814815" calcext:value-type="float">
            <text:p>0,00203877314814815000</text:p>
          </table:table-cell>
          <table:table-cell table:formula="of:=[.D1357]-[.D135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3" office:value-type="float" office:value="17628" calcext:value-type="float">
            <text:p>17628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204027777777778" calcext:value-type="float">
            <text:p>0,00204027777777778000</text:p>
          </table:table-cell>
          <table:table-cell table:formula="of:=[.D1358]-[.D135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3" office:value-type="float" office:value="17641" calcext:value-type="float">
            <text:p>17641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204178240740741" calcext:value-type="float">
            <text:p>0,00204178240740741000</text:p>
          </table:table-cell>
          <table:table-cell table:formula="of:=[.D1359]-[.D135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3" office:value-type="float" office:value="17654" calcext:value-type="float">
            <text:p>17654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204328703703704" calcext:value-type="float">
            <text:p>0,00204328703703704000</text:p>
          </table:table-cell>
          <table:table-cell table:formula="of:=[.D1360]-[.D135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3" office:value-type="float" office:value="17667" calcext:value-type="float">
            <text:p>17667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204479166666667" calcext:value-type="float">
            <text:p>0,00204479166666667000</text:p>
          </table:table-cell>
          <table:table-cell table:formula="of:=[.D1361]-[.D136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3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20462962962963" calcext:value-type="float">
            <text:p>0,00204629629629630000</text:p>
          </table:table-cell>
          <table:table-cell table:formula="of:=[.D1362]-[.D13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3" office:value-type="float" office:value="17693" calcext:value-type="float">
            <text:p>17693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204780092592593" calcext:value-type="float">
            <text:p>0,00204780092592593000</text:p>
          </table:table-cell>
          <table:table-cell table:formula="of:=[.D1363]-[.D136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3" office:value-type="float" office:value="17706" calcext:value-type="float">
            <text:p>17706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204930555555556" calcext:value-type="float">
            <text:p>0,00204930555555556000</text:p>
          </table:table-cell>
          <table:table-cell table:formula="of:=[.D1364]-[.D136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3" office:value-type="float" office:value="17719" calcext:value-type="float">
            <text:p>17719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205081018518519" calcext:value-type="float">
            <text:p>0,00205081018518519000</text:p>
          </table:table-cell>
          <table:table-cell table:formula="of:=[.D1365]-[.D136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3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205231481481482" calcext:value-type="float">
            <text:p>0,00205231481481482000</text:p>
          </table:table-cell>
          <table:table-cell table:formula="of:=[.D1366]-[.D13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3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205381944444444" calcext:value-type="float">
            <text:p>0,00205381944444444000</text:p>
          </table:table-cell>
          <table:table-cell table:formula="of:=[.D1367]-[.D136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3" office:value-type="float" office:value="17758" calcext:value-type="float">
            <text:p>17758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205532407407407" calcext:value-type="float">
            <text:p>0,00205532407407407000</text:p>
          </table:table-cell>
          <table:table-cell table:formula="of:=[.D1368]-[.D136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3" office:value-type="float" office:value="17771" calcext:value-type="float">
            <text:p>17771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20568287037037" calcext:value-type="float">
            <text:p>0,00205682870370370000</text:p>
          </table:table-cell>
          <table:table-cell table:formula="of:=[.D1369]-[.D136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3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205833333333333" calcext:value-type="float">
            <text:p>0,00205833333333333000</text:p>
          </table:table-cell>
          <table:table-cell table:formula="of:=[.D1370]-[.D136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3" office:value-type="float" office:value="17797" calcext:value-type="float">
            <text:p>17797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205983796296296" calcext:value-type="float">
            <text:p>0,00205983796296296000</text:p>
          </table:table-cell>
          <table:table-cell table:formula="of:=[.D1371]-[.D137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3" office:value-type="float" office:value="17810" calcext:value-type="float">
            <text:p>1781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206134259259259" calcext:value-type="float">
            <text:p>0,00206134259259259000</text:p>
          </table:table-cell>
          <table:table-cell table:formula="of:=[.D1372]-[.D137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3" office:value-type="float" office:value="17823" calcext:value-type="float">
            <text:p>17823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206284722222222" calcext:value-type="float">
            <text:p>0,00206284722222222000</text:p>
          </table:table-cell>
          <table:table-cell table:formula="of:=[.D1373]-[.D13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3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206435185185185" calcext:value-type="float">
            <text:p>0,00206435185185185000</text:p>
          </table:table-cell>
          <table:table-cell table:formula="of:=[.D1374]-[.D137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3" office:value-type="float" office:value="17849" calcext:value-type="float">
            <text:p>17849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206585648148148" calcext:value-type="float">
            <text:p>0,00206585648148148000</text:p>
          </table:table-cell>
          <table:table-cell table:formula="of:=[.D1375]-[.D137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3" office:value-type="float" office:value="17862" calcext:value-type="float">
            <text:p>17862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206736111111111" calcext:value-type="float">
            <text:p>0,00206736111111111000</text:p>
          </table:table-cell>
          <table:table-cell table:formula="of:=[.D1376]-[.D137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3" office:value-type="float" office:value="17875" calcext:value-type="float">
            <text:p>17875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206886574074074" calcext:value-type="float">
            <text:p>0,00206886574074074000</text:p>
          </table:table-cell>
          <table:table-cell table:formula="of:=[.D1377]-[.D13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3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207037037037037" calcext:value-type="float">
            <text:p>0,00207037037037037000</text:p>
          </table:table-cell>
          <table:table-cell table:formula="of:=[.D1378]-[.D137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3" office:value-type="float" office:value="17901" calcext:value-type="float">
            <text:p>17901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2071875" calcext:value-type="float">
            <text:p>0,00207187500000000000</text:p>
          </table:table-cell>
          <table:table-cell table:formula="of:=[.D1379]-[.D137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3" office:value-type="float" office:value="17914" calcext:value-type="float">
            <text:p>17914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207337962962963" calcext:value-type="float">
            <text:p>0,00207337962962963000</text:p>
          </table:table-cell>
          <table:table-cell table:formula="of:=[.D1380]-[.D137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3" office:value-type="float" office:value="17927" calcext:value-type="float">
            <text:p>17927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207488425925926" calcext:value-type="float">
            <text:p>0,00207488425925926000</text:p>
          </table:table-cell>
          <table:table-cell table:formula="of:=[.D1381]-[.D138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3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207638888888889" calcext:value-type="float">
            <text:p>0,00207638888888889000</text:p>
          </table:table-cell>
          <table:table-cell table:formula="of:=[.D1382]-[.D13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3" office:value-type="float" office:value="17953" calcext:value-type="float">
            <text:p>17953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207789351851852" calcext:value-type="float">
            <text:p>0,00207789351851852000</text:p>
          </table:table-cell>
          <table:table-cell table:formula="of:=[.D1383]-[.D138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3" office:value-type="float" office:value="17966" calcext:value-type="float">
            <text:p>17966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207939814814815" calcext:value-type="float">
            <text:p>0,00207939814814815000</text:p>
          </table:table-cell>
          <table:table-cell table:formula="of:=[.D1384]-[.D13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3" office:value-type="float" office:value="17979" calcext:value-type="float">
            <text:p>17979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208090277777778" calcext:value-type="float">
            <text:p>0,00208090277777778000</text:p>
          </table:table-cell>
          <table:table-cell table:formula="of:=[.D1385]-[.D138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3" office:value-type="float" office:value="17992" calcext:value-type="float">
            <text:p>17992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208240740740741" calcext:value-type="float">
            <text:p>0,00208240740740741000</text:p>
          </table:table-cell>
          <table:table-cell table:formula="of:=[.D1386]-[.D138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3" office:value-type="float" office:value="18005" calcext:value-type="float">
            <text:p>18005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208391203703704" calcext:value-type="float">
            <text:p>0,00208391203703704000</text:p>
          </table:table-cell>
          <table:table-cell table:formula="of:=[.D1387]-[.D138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3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208541666666667" calcext:value-type="float">
            <text:p>0,00208541666666667000</text:p>
          </table:table-cell>
          <table:table-cell table:formula="of:=[.D1388]-[.D13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3" office:value-type="float" office:value="18031" calcext:value-type="float">
            <text:p>18031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20869212962963" calcext:value-type="float">
            <text:p>0,00208692129629630000</text:p>
          </table:table-cell>
          <table:table-cell table:formula="of:=[.D1389]-[.D13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3" office:value-type="float" office:value="18044" calcext:value-type="float">
            <text:p>18044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208842592592593" calcext:value-type="float">
            <text:p>0,00208842592592593000</text:p>
          </table:table-cell>
          <table:table-cell table:formula="of:=[.D1390]-[.D138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3" office:value-type="float" office:value="18057" calcext:value-type="float">
            <text:p>18057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208993055555556" calcext:value-type="float">
            <text:p>0,00208993055555556000</text:p>
          </table:table-cell>
          <table:table-cell table:formula="of:=[.D1391]-[.D139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3" office:value-type="float" office:value="18070" calcext:value-type="float">
            <text:p>1807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209143518518519" calcext:value-type="float">
            <text:p>0,00209143518518519000</text:p>
          </table:table-cell>
          <table:table-cell table:formula="of:=[.D1392]-[.D139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3" office:value-type="float" office:value="18083" calcext:value-type="float">
            <text:p>18083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209293981481482" calcext:value-type="float">
            <text:p>0,00209293981481482000</text:p>
          </table:table-cell>
          <table:table-cell table:formula="of:=[.D1393]-[.D13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3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209444444444444" calcext:value-type="float">
            <text:p>0,00209444444444444000</text:p>
          </table:table-cell>
          <table:table-cell table:formula="of:=[.D1394]-[.D139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3" office:value-type="float" office:value="18109" calcext:value-type="float">
            <text:p>18109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209594907407407" calcext:value-type="float">
            <text:p>0,00209594907407407000</text:p>
          </table:table-cell>
          <table:table-cell table:formula="of:=[.D1395]-[.D139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3" office:value-type="float" office:value="18122" calcext:value-type="float">
            <text:p>18122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20974537037037" calcext:value-type="float">
            <text:p>0,00209745370370370000</text:p>
          </table:table-cell>
          <table:table-cell table:formula="of:=[.D1396]-[.D13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3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209895833333333" calcext:value-type="float">
            <text:p>0,00209895833333333000</text:p>
          </table:table-cell>
          <table:table-cell table:formula="of:=[.D1397]-[.D139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3" office:value-type="float" office:value="18148" calcext:value-type="float">
            <text:p>18148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210046296296296" calcext:value-type="float">
            <text:p>0,00210046296296296000</text:p>
          </table:table-cell>
          <table:table-cell table:formula="of:=[.D1398]-[.D139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3" office:value-type="float" office:value="18161" calcext:value-type="float">
            <text:p>18161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210196759259259" calcext:value-type="float">
            <text:p>0,00210196759259259000</text:p>
          </table:table-cell>
          <table:table-cell table:formula="of:=[.D1399]-[.D13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3" office:value-type="float" office:value="18174" calcext:value-type="float">
            <text:p>18174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210347222222222" calcext:value-type="float">
            <text:p>0,00210347222222222000</text:p>
          </table:table-cell>
          <table:table-cell table:formula="of:=[.D1400]-[.D139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3" office:value-type="float" office:value="18187" calcext:value-type="float">
            <text:p>18187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210497685185185" calcext:value-type="float">
            <text:p>0,00210497685185185000</text:p>
          </table:table-cell>
          <table:table-cell table:formula="of:=[.D1401]-[.D140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3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210648148148148" calcext:value-type="float">
            <text:p>0,00210648148148148000</text:p>
          </table:table-cell>
          <table:table-cell table:formula="of:=[.D1402]-[.D140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3" office:value-type="float" office:value="18213" calcext:value-type="float">
            <text:p>18213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210798611111111" calcext:value-type="float">
            <text:p>0,00210798611111111000</text:p>
          </table:table-cell>
          <table:table-cell table:formula="of:=[.D1403]-[.D14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3" office:value-type="float" office:value="18226" calcext:value-type="float">
            <text:p>18226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210949074074074" calcext:value-type="float">
            <text:p>0,00210949074074074000</text:p>
          </table:table-cell>
          <table:table-cell table:formula="of:=[.D1404]-[.D140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3" office:value-type="float" office:value="18239" calcext:value-type="float">
            <text:p>18239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211099537037037" calcext:value-type="float">
            <text:p>0,00211099537037037000</text:p>
          </table:table-cell>
          <table:table-cell table:formula="of:=[.D1405]-[.D140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3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21125" calcext:value-type="float">
            <text:p>0,00211250000000000000</text:p>
          </table:table-cell>
          <table:table-cell table:formula="of:=[.D1406]-[.D140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3" office:value-type="float" office:value="18265" calcext:value-type="float">
            <text:p>18265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211400462962963" calcext:value-type="float">
            <text:p>0,00211400462962963000</text:p>
          </table:table-cell>
          <table:table-cell table:formula="of:=[.D1407]-[.D14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3" office:value-type="float" office:value="18278" calcext:value-type="float">
            <text:p>18278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211550925925926" calcext:value-type="float">
            <text:p>0,00211550925925926000</text:p>
          </table:table-cell>
          <table:table-cell table:formula="of:=[.D1408]-[.D140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3" office:value-type="float" office:value="18291" calcext:value-type="float">
            <text:p>18291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211701388888889" calcext:value-type="float">
            <text:p>0,00211701388888889000</text:p>
          </table:table-cell>
          <table:table-cell table:formula="of:=[.D1409]-[.D140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3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211851851851852" calcext:value-type="float">
            <text:p>0,00211851851851852000</text:p>
          </table:table-cell>
          <table:table-cell table:formula="of:=[.D1410]-[.D14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3" office:value-type="float" office:value="18317" calcext:value-type="float">
            <text:p>18317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212002314814815" calcext:value-type="float">
            <text:p>0,00212002314814815000</text:p>
          </table:table-cell>
          <table:table-cell table:formula="of:=[.D1411]-[.D14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3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212152777777778" calcext:value-type="float">
            <text:p>0,00212152777777778000</text:p>
          </table:table-cell>
          <table:table-cell table:formula="of:=[.D1412]-[.D141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3" office:value-type="float" office:value="18343" calcext:value-type="float">
            <text:p>18343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212303240740741" calcext:value-type="float">
            <text:p>0,00212303240740741000</text:p>
          </table:table-cell>
          <table:table-cell table:formula="of:=[.D1413]-[.D141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13" office:value-type="float" office:value="18356" calcext:value-type="float">
            <text:p>18356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212453703703704" calcext:value-type="float">
            <text:p>0,00212453703703704000</text:p>
          </table:table-cell>
          <table:table-cell table:formula="of:=[.D1414]-[.D14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13" office:value-type="float" office:value="18369" calcext:value-type="float">
            <text:p>18369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212604166666667" calcext:value-type="float">
            <text:p>0,00212604166666667000</text:p>
          </table:table-cell>
          <table:table-cell table:formula="of:=[.D1415]-[.D141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13" office:value-type="float" office:value="18382" calcext:value-type="float">
            <text:p>18382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21275462962963" calcext:value-type="float">
            <text:p>0,00212754629629630000</text:p>
          </table:table-cell>
          <table:table-cell table:formula="of:=[.D1416]-[.D141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13" office:value-type="float" office:value="18395" calcext:value-type="float">
            <text:p>18395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212905092592593" calcext:value-type="float">
            <text:p>0,00212905092592593000</text:p>
          </table:table-cell>
          <table:table-cell table:formula="of:=[.D1417]-[.D141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13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213055555555556" calcext:value-type="float">
            <text:p>0,00213055555555556000</text:p>
          </table:table-cell>
          <table:table-cell table:formula="of:=[.D1418]-[.D14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13" office:value-type="float" office:value="18421" calcext:value-type="float">
            <text:p>18421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213206018518519" calcext:value-type="float">
            <text:p>0,00213206018518519000</text:p>
          </table:table-cell>
          <table:table-cell table:formula="of:=[.D1419]-[.D141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13" office:value-type="float" office:value="18434" calcext:value-type="float">
            <text:p>18434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213356481481481" calcext:value-type="float">
            <text:p>0,00213356481481481000</text:p>
          </table:table-cell>
          <table:table-cell table:formula="of:=[.D1420]-[.D141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13" office:value-type="float" office:value="18447" calcext:value-type="float">
            <text:p>18447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213506944444444" calcext:value-type="float">
            <text:p>0,00213506944444444000</text:p>
          </table:table-cell>
          <table:table-cell table:formula="of:=[.D1421]-[.D14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13" office:value-type="float" office:value="18460" calcext:value-type="float">
            <text:p>1846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213657407407407" calcext:value-type="float">
            <text:p>0,00213657407407407000</text:p>
          </table:table-cell>
          <table:table-cell table:formula="of:=[.D1422]-[.D14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13" office:value-type="float" office:value="18473" calcext:value-type="float">
            <text:p>18473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21380787037037" calcext:value-type="float">
            <text:p>0,00213807870370370000</text:p>
          </table:table-cell>
          <table:table-cell table:formula="of:=[.D1423]-[.D142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13" office:value-type="float" office:value="18486" calcext:value-type="float">
            <text:p>18486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213958333333333" calcext:value-type="float">
            <text:p>0,00213958333333333000</text:p>
          </table:table-cell>
          <table:table-cell table:formula="of:=[.D1424]-[.D142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13" office:value-type="float" office:value="18499" calcext:value-type="float">
            <text:p>18499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214108796296296" calcext:value-type="float">
            <text:p>0,00214108796296296000</text:p>
          </table:table-cell>
          <table:table-cell table:formula="of:=[.D1425]-[.D14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13" office:value-type="float" office:value="18512" calcext:value-type="float">
            <text:p>18512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214259259259259" calcext:value-type="float">
            <text:p>0,00214259259259259000</text:p>
          </table:table-cell>
          <table:table-cell table:formula="of:=[.D1426]-[.D142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13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214409722222222" calcext:value-type="float">
            <text:p>0,00214409722222222000</text:p>
          </table:table-cell>
          <table:table-cell table:formula="of:=[.D1427]-[.D142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13" office:value-type="float" office:value="18538" calcext:value-type="float">
            <text:p>18538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214560185185185" calcext:value-type="float">
            <text:p>0,00214560185185185000</text:p>
          </table:table-cell>
          <table:table-cell table:formula="of:=[.D1428]-[.D142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13" office:value-type="float" office:value="18551" calcext:value-type="float">
            <text:p>18551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214710648148148" calcext:value-type="float">
            <text:p>0,00214710648148148000</text:p>
          </table:table-cell>
          <table:table-cell table:formula="of:=[.D1429]-[.D14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13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214861111111111" calcext:value-type="float">
            <text:p>0,00214861111111111000</text:p>
          </table:table-cell>
          <table:table-cell table:formula="of:=[.D1430]-[.D142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13" office:value-type="float" office:value="18577" calcext:value-type="float">
            <text:p>18577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215011574074074" calcext:value-type="float">
            <text:p>0,00215011574074074000</text:p>
          </table:table-cell>
          <table:table-cell table:formula="of:=[.D1431]-[.D143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13" office:value-type="float" office:value="18590" calcext:value-type="float">
            <text:p>1859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215162037037037" calcext:value-type="float">
            <text:p>0,00215162037037037000</text:p>
          </table:table-cell>
          <table:table-cell table:formula="of:=[.D1432]-[.D14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13" office:value-type="float" office:value="18603" calcext:value-type="float">
            <text:p>18603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2153125" calcext:value-type="float">
            <text:p>0,00215312500000000000</text:p>
          </table:table-cell>
          <table:table-cell table:formula="of:=[.D1433]-[.D14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13" office:value-type="float" office:value="18616" calcext:value-type="float">
            <text:p>18616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215462962962963" calcext:value-type="float">
            <text:p>0,00215462962962963000</text:p>
          </table:table-cell>
          <table:table-cell table:formula="of:=[.D1434]-[.D143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13" office:value-type="float" office:value="18629" calcext:value-type="float">
            <text:p>18629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215613425925926" calcext:value-type="float">
            <text:p>0,00215613425925926000</text:p>
          </table:table-cell>
          <table:table-cell table:formula="of:=[.D1435]-[.D143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13" office:value-type="float" office:value="18642" calcext:value-type="float">
            <text:p>18642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215763888888889" calcext:value-type="float">
            <text:p>0,00215763888888889000</text:p>
          </table:table-cell>
          <table:table-cell table:formula="of:=[.D1436]-[.D14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13" office:value-type="float" office:value="18655" calcext:value-type="float">
            <text:p>18655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215914351851852" calcext:value-type="float">
            <text:p>0,00215914351851852000</text:p>
          </table:table-cell>
          <table:table-cell table:formula="of:=[.D1437]-[.D14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13" office:value-type="float" office:value="18668" calcext:value-type="float">
            <text:p>18668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216064814814815" calcext:value-type="float">
            <text:p>0,00216064814814815000</text:p>
          </table:table-cell>
          <table:table-cell table:formula="of:=[.D1438]-[.D143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13" office:value-type="float" office:value="18681" calcext:value-type="float">
            <text:p>18681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216215277777778" calcext:value-type="float">
            <text:p>0,00216215277777778000</text:p>
          </table:table-cell>
          <table:table-cell table:formula="of:=[.D1439]-[.D143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13" office:value-type="float" office:value="18694" calcext:value-type="float">
            <text:p>18694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216365740740741" calcext:value-type="float">
            <text:p>0,00216365740740741000</text:p>
          </table:table-cell>
          <table:table-cell table:formula="of:=[.D1440]-[.D14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13" office:value-type="float" office:value="18707" calcext:value-type="float">
            <text:p>18707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216516203703704" calcext:value-type="float">
            <text:p>0,00216516203703704000</text:p>
          </table:table-cell>
          <table:table-cell table:formula="of:=[.D1441]-[.D14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13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216666666666667" calcext:value-type="float">
            <text:p>0,00216666666666667000</text:p>
          </table:table-cell>
          <table:table-cell table:formula="of:=[.D1442]-[.D144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13" office:value-type="float" office:value="18733" calcext:value-type="float">
            <text:p>18733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21681712962963" calcext:value-type="float">
            <text:p>0,00216817129629630000</text:p>
          </table:table-cell>
          <table:table-cell table:formula="of:=[.D1443]-[.D14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13" office:value-type="float" office:value="18746" calcext:value-type="float">
            <text:p>18746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216967592592593" calcext:value-type="float">
            <text:p>0,00216967592592593000</text:p>
          </table:table-cell>
          <table:table-cell table:formula="of:=[.D1444]-[.D14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13" office:value-type="float" office:value="18759" calcext:value-type="float">
            <text:p>18759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217118055555556" calcext:value-type="float">
            <text:p>0,00217118055555556000</text:p>
          </table:table-cell>
          <table:table-cell table:formula="of:=[.D1445]-[.D144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13" office:value-type="float" office:value="18772" calcext:value-type="float">
            <text:p>18772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217268518518519" calcext:value-type="float">
            <text:p>0,00217268518518519000</text:p>
          </table:table-cell>
          <table:table-cell table:formula="of:=[.D1446]-[.D144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13" office:value-type="float" office:value="18785" calcext:value-type="float">
            <text:p>18785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217418981481482" calcext:value-type="float">
            <text:p>0,00217418981481482000</text:p>
          </table:table-cell>
          <table:table-cell table:formula="of:=[.D1447]-[.D14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13" office:value-type="float" office:value="18798" calcext:value-type="float">
            <text:p>18798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217569444444444" calcext:value-type="float">
            <text:p>0,00217569444444444000</text:p>
          </table:table-cell>
          <table:table-cell table:formula="of:=[.D1448]-[.D14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13" office:value-type="float" office:value="18811" calcext:value-type="float">
            <text:p>18811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217719907407407" calcext:value-type="float">
            <text:p>0,00217719907407407000</text:p>
          </table:table-cell>
          <table:table-cell table:formula="of:=[.D1449]-[.D144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13" office:value-type="float" office:value="18824" calcext:value-type="float">
            <text:p>18824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21787037037037" calcext:value-type="float">
            <text:p>0,00217870370370370000</text:p>
          </table:table-cell>
          <table:table-cell table:formula="of:=[.D1450]-[.D144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13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218020833333333" calcext:value-type="float">
            <text:p>0,00218020833333333000</text:p>
          </table:table-cell>
          <table:table-cell table:formula="of:=[.D1451]-[.D14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13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218171296296296" calcext:value-type="float">
            <text:p>0,00218171296296296000</text:p>
          </table:table-cell>
          <table:table-cell table:formula="of:=[.D1452]-[.D145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13" office:value-type="float" office:value="18863" calcext:value-type="float">
            <text:p>18863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218321759259259" calcext:value-type="float">
            <text:p>0,00218321759259259000</text:p>
          </table:table-cell>
          <table:table-cell table:formula="of:=[.D1453]-[.D145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13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218472222222222" calcext:value-type="float">
            <text:p>0,00218472222222222000</text:p>
          </table:table-cell>
          <table:table-cell table:formula="of:=[.D1454]-[.D145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13" office:value-type="float" office:value="18889" calcext:value-type="float">
            <text:p>18889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218622685185185" calcext:value-type="float">
            <text:p>0,00218622685185185000</text:p>
          </table:table-cell>
          <table:table-cell table:formula="of:=[.D1455]-[.D14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13" office:value-type="float" office:value="18902" calcext:value-type="float">
            <text:p>18902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218773148148148" calcext:value-type="float">
            <text:p>0,00218773148148148000</text:p>
          </table:table-cell>
          <table:table-cell table:formula="of:=[.D1456]-[.D145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13" office:value-type="float" office:value="18915" calcext:value-type="float">
            <text:p>18915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218923611111111" calcext:value-type="float">
            <text:p>0,00218923611111111000</text:p>
          </table:table-cell>
          <table:table-cell table:formula="of:=[.D1457]-[.D145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13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219074074074074" calcext:value-type="float">
            <text:p>0,00219074074074074000</text:p>
          </table:table-cell>
          <table:table-cell table:formula="of:=[.D1458]-[.D14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13" office:value-type="float" office:value="18941" calcext:value-type="float">
            <text:p>18941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219224537037037" calcext:value-type="float">
            <text:p>0,00219224537037037000</text:p>
          </table:table-cell>
          <table:table-cell table:formula="of:=[.D1459]-[.D145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13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219375" calcext:value-type="float">
            <text:p>0,00219375000000000000</text:p>
          </table:table-cell>
          <table:table-cell table:formula="of:=[.D1460]-[.D145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13" office:value-type="float" office:value="18967" calcext:value-type="float">
            <text:p>18967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219525462962963" calcext:value-type="float">
            <text:p>0,00219525462962963000</text:p>
          </table:table-cell>
          <table:table-cell table:formula="of:=[.D1461]-[.D146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13" office:value-type="float" office:value="18980" calcext:value-type="float">
            <text:p>1898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219675925925926" calcext:value-type="float">
            <text:p>0,00219675925925926000</text:p>
          </table:table-cell>
          <table:table-cell table:formula="of:=[.D1462]-[.D14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13" office:value-type="float" office:value="18993" calcext:value-type="float">
            <text:p>18993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219826388888889" calcext:value-type="float">
            <text:p>0,00219826388888889000</text:p>
          </table:table-cell>
          <table:table-cell table:formula="of:=[.D1463]-[.D146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13" office:value-type="float" office:value="19006" calcext:value-type="float">
            <text:p>19006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219976851851852" calcext:value-type="float">
            <text:p>0,00219976851851852000</text:p>
          </table:table-cell>
          <table:table-cell table:formula="of:=[.D1464]-[.D146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13" office:value-type="float" office:value="19019" calcext:value-type="float">
            <text:p>19019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220127314814815" calcext:value-type="float">
            <text:p>0,00220127314814815000</text:p>
          </table:table-cell>
          <table:table-cell table:formula="of:=[.D1465]-[.D146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13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220277777777778" calcext:value-type="float">
            <text:p>0,00220277777777778000</text:p>
          </table:table-cell>
          <table:table-cell table:formula="of:=[.D1466]-[.D14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13" office:value-type="float" office:value="19045" calcext:value-type="float">
            <text:p>19045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220428240740741" calcext:value-type="float">
            <text:p>0,00220428240740741000</text:p>
          </table:table-cell>
          <table:table-cell table:formula="of:=[.D1467]-[.D146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13" office:value-type="float" office:value="19058" calcext:value-type="float">
            <text:p>19058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220578703703704" calcext:value-type="float">
            <text:p>0,00220578703703704000</text:p>
          </table:table-cell>
          <table:table-cell table:formula="of:=[.D1468]-[.D146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13" office:value-type="float" office:value="19071" calcext:value-type="float">
            <text:p>19071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220729166666667" calcext:value-type="float">
            <text:p>0,00220729166666667000</text:p>
          </table:table-cell>
          <table:table-cell table:formula="of:=[.D1469]-[.D14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13" office:value-type="float" office:value="19084" calcext:value-type="float">
            <text:p>19084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22087962962963" calcext:value-type="float">
            <text:p>0,00220879629629630000</text:p>
          </table:table-cell>
          <table:table-cell table:formula="of:=[.D1470]-[.D146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13" office:value-type="float" office:value="19097" calcext:value-type="float">
            <text:p>19097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221030092592593" calcext:value-type="float">
            <text:p>0,00221030092592593000</text:p>
          </table:table-cell>
          <table:table-cell table:formula="of:=[.D1471]-[.D147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13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221180555555556" calcext:value-type="float">
            <text:p>0,00221180555555556000</text:p>
          </table:table-cell>
          <table:table-cell table:formula="of:=[.D1472]-[.D147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13" office:value-type="float" office:value="19123" calcext:value-type="float">
            <text:p>19123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221331018518519" calcext:value-type="float">
            <text:p>0,00221331018518519000</text:p>
          </table:table-cell>
          <table:table-cell table:formula="of:=[.D1473]-[.D14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13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221481481481482" calcext:value-type="float">
            <text:p>0,00221481481481482000</text:p>
          </table:table-cell>
          <table:table-cell table:formula="of:=[.D1474]-[.D147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13" office:value-type="float" office:value="19149" calcext:value-type="float">
            <text:p>19149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221631944444444" calcext:value-type="float">
            <text:p>0,00221631944444444000</text:p>
          </table:table-cell>
          <table:table-cell table:formula="of:=[.D1475]-[.D147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13" office:value-type="float" office:value="19162" calcext:value-type="float">
            <text:p>19162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221782407407407" calcext:value-type="float">
            <text:p>0,00221782407407407000</text:p>
          </table:table-cell>
          <table:table-cell table:formula="of:=[.D1476]-[.D147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13" office:value-type="float" office:value="19175" calcext:value-type="float">
            <text:p>19175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22193287037037" calcext:value-type="float">
            <text:p>0,00221932870370370000</text:p>
          </table:table-cell>
          <table:table-cell table:formula="of:=[.D1477]-[.D14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13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222083333333333" calcext:value-type="float">
            <text:p>0,00222083333333333000</text:p>
          </table:table-cell>
          <table:table-cell table:formula="of:=[.D1478]-[.D147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13" office:value-type="float" office:value="19201" calcext:value-type="float">
            <text:p>19201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222233796296296" calcext:value-type="float">
            <text:p>0,00222233796296296000</text:p>
          </table:table-cell>
          <table:table-cell table:formula="of:=[.D1479]-[.D147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13" office:value-type="float" office:value="19214" calcext:value-type="float">
            <text:p>19214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222384259259259" calcext:value-type="float">
            <text:p>0,00222384259259259000</text:p>
          </table:table-cell>
          <table:table-cell table:formula="of:=[.D1480]-[.D147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13" office:value-type="float" office:value="19227" calcext:value-type="float">
            <text:p>19227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222534722222222" calcext:value-type="float">
            <text:p>0,00222534722222222000</text:p>
          </table:table-cell>
          <table:table-cell table:formula="of:=[.D1481]-[.D148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13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222685185185185" calcext:value-type="float">
            <text:p>0,00222685185185185000</text:p>
          </table:table-cell>
          <table:table-cell table:formula="of:=[.D1482]-[.D14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13" office:value-type="float" office:value="19253" calcext:value-type="float">
            <text:p>19253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222835648148148" calcext:value-type="float">
            <text:p>0,00222835648148148000</text:p>
          </table:table-cell>
          <table:table-cell table:formula="of:=[.D1483]-[.D148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13" office:value-type="float" office:value="19266" calcext:value-type="float">
            <text:p>19266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222986111111111" calcext:value-type="float">
            <text:p>0,00222986111111111000</text:p>
          </table:table-cell>
          <table:table-cell table:formula="of:=[.D1484]-[.D14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13" office:value-type="float" office:value="19279" calcext:value-type="float">
            <text:p>19279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223136574074074" calcext:value-type="float">
            <text:p>0,00223136574074074000</text:p>
          </table:table-cell>
          <table:table-cell table:formula="of:=[.D1485]-[.D148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13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223287037037037" calcext:value-type="float">
            <text:p>0,00223287037037037000</text:p>
          </table:table-cell>
          <table:table-cell table:formula="of:=[.D1486]-[.D148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13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2234375" calcext:value-type="float">
            <text:p>0,00223437500000000000</text:p>
          </table:table-cell>
          <table:table-cell table:formula="of:=[.D1487]-[.D148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13" office:value-type="float" office:value="19318" calcext:value-type="float">
            <text:p>19318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223587962962963" calcext:value-type="float">
            <text:p>0,00223587962962963000</text:p>
          </table:table-cell>
          <table:table-cell table:formula="of:=[.D1488]-[.D14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13" office:value-type="float" office:value="19331" calcext:value-type="float">
            <text:p>19331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223738425925926" calcext:value-type="float">
            <text:p>0,00223738425925926000</text:p>
          </table:table-cell>
          <table:table-cell table:formula="of:=[.D1489]-[.D14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13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223888888888889" calcext:value-type="float">
            <text:p>0,00223888888888889000</text:p>
          </table:table-cell>
          <table:table-cell table:formula="of:=[.D1490]-[.D148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13" office:value-type="float" office:value="19357" calcext:value-type="float">
            <text:p>19357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224039351851852" calcext:value-type="float">
            <text:p>0,00224039351851852000</text:p>
          </table:table-cell>
          <table:table-cell table:formula="of:=[.D1491]-[.D149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13" office:value-type="float" office:value="19370" calcext:value-type="float">
            <text:p>1937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224189814814815" calcext:value-type="float">
            <text:p>0,00224189814814815000</text:p>
          </table:table-cell>
          <table:table-cell table:formula="of:=[.D1492]-[.D149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13" office:value-type="float" office:value="19383" calcext:value-type="float">
            <text:p>19383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224340277777778" calcext:value-type="float">
            <text:p>0,00224340277777778000</text:p>
          </table:table-cell>
          <table:table-cell table:formula="of:=[.D1493]-[.D14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13" office:value-type="float" office:value="19396" calcext:value-type="float">
            <text:p>19396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224490740740741" calcext:value-type="float">
            <text:p>0,00224490740740741000</text:p>
          </table:table-cell>
          <table:table-cell table:formula="of:=[.D1494]-[.D149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13" office:value-type="float" office:value="19409" calcext:value-type="float">
            <text:p>19409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224641203703704" calcext:value-type="float">
            <text:p>0,00224641203703704000</text:p>
          </table:table-cell>
          <table:table-cell table:formula="of:=[.D1495]-[.D14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13" office:value-type="float" office:value="19422" calcext:value-type="float">
            <text:p>19422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224791666666667" calcext:value-type="float">
            <text:p>0,00224791666666667000</text:p>
          </table:table-cell>
          <table:table-cell table:formula="of:=[.D1496]-[.D14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13" office:value-type="float" office:value="19435" calcext:value-type="float">
            <text:p>19435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22494212962963" calcext:value-type="float">
            <text:p>0,00224942129629630000</text:p>
          </table:table-cell>
          <table:table-cell table:formula="of:=[.D1497]-[.D149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13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225092592592593" calcext:value-type="float">
            <text:p>0,00225092592592593000</text:p>
          </table:table-cell>
          <table:table-cell table:formula="of:=[.D1498]-[.D149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13" office:value-type="float" office:value="19461" calcext:value-type="float">
            <text:p>19461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225243055555556" calcext:value-type="float">
            <text:p>0,00225243055555556000</text:p>
          </table:table-cell>
          <table:table-cell table:formula="of:=[.D1499]-[.D14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13" office:value-type="float" office:value="19474" calcext:value-type="float">
            <text:p>19474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225393518518519" calcext:value-type="float">
            <text:p>0,00225393518518519000</text:p>
          </table:table-cell>
          <table:table-cell table:formula="of:=[.D1500]-[.D149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13" office:value-type="float" office:value="19487" calcext:value-type="float">
            <text:p>19487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225543981481481" calcext:value-type="float">
            <text:p>0,00225543981481481000</text:p>
          </table:table-cell>
          <table:table-cell table:formula="of:=[.D1501]-[.D150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13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225694444444444" calcext:value-type="float">
            <text:p>0,00225694444444444000</text:p>
          </table:table-cell>
          <table:table-cell table:formula="of:=[.D1502]-[.D150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13" office:value-type="float" office:value="19513" calcext:value-type="float">
            <text:p>19513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225844907407407" calcext:value-type="float">
            <text:p>0,00225844907407407000</text:p>
          </table:table-cell>
          <table:table-cell table:formula="of:=[.D1503]-[.D15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13" office:value-type="float" office:value="19526" calcext:value-type="float">
            <text:p>19526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22599537037037" calcext:value-type="float">
            <text:p>0,00225995370370370000</text:p>
          </table:table-cell>
          <table:table-cell table:formula="of:=[.D1504]-[.D150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13" office:value-type="float" office:value="19539" calcext:value-type="float">
            <text:p>19539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226145833333333" calcext:value-type="float">
            <text:p>0,00226145833333333000</text:p>
          </table:table-cell>
          <table:table-cell table:formula="of:=[.D1505]-[.D150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13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226296296296296" calcext:value-type="float">
            <text:p>0,00226296296296296000</text:p>
          </table:table-cell>
          <table:table-cell table:formula="of:=[.D1506]-[.D15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13" office:value-type="float" office:value="19565" calcext:value-type="float">
            <text:p>19565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226446759259259" calcext:value-type="float">
            <text:p>0,00226446759259259000</text:p>
          </table:table-cell>
          <table:table-cell table:formula="of:=[.D1507]-[.D15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13" office:value-type="float" office:value="19578" calcext:value-type="float">
            <text:p>19578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226597222222222" calcext:value-type="float">
            <text:p>0,00226597222222222000</text:p>
          </table:table-cell>
          <table:table-cell table:formula="of:=[.D1508]-[.D150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13" office:value-type="float" office:value="19591" calcext:value-type="float">
            <text:p>19591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226747685185185" calcext:value-type="float">
            <text:p>0,00226747685185185000</text:p>
          </table:table-cell>
          <table:table-cell table:formula="of:=[.D1509]-[.D150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13" office:value-type="float" office:value="19604" calcext:value-type="float">
            <text:p>19604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226898148148148" calcext:value-type="float">
            <text:p>0,00226898148148148000</text:p>
          </table:table-cell>
          <table:table-cell table:formula="of:=[.D1510]-[.D15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13" office:value-type="float" office:value="19617" calcext:value-type="float">
            <text:p>19617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227048611111111" calcext:value-type="float">
            <text:p>0,00227048611111111000</text:p>
          </table:table-cell>
          <table:table-cell table:formula="of:=[.D1511]-[.D15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13" office:value-type="float" office:value="19630" calcext:value-type="float">
            <text:p>1963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227199074074074" calcext:value-type="float">
            <text:p>0,00227199074074074000</text:p>
          </table:table-cell>
          <table:table-cell table:formula="of:=[.D1512]-[.D151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13" office:value-type="float" office:value="19643" calcext:value-type="float">
            <text:p>19643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227349537037037" calcext:value-type="float">
            <text:p>0,00227349537037037000</text:p>
          </table:table-cell>
          <table:table-cell table:formula="of:=[.D1513]-[.D151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13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2275" calcext:value-type="float">
            <text:p>0,00227500000000000000</text:p>
          </table:table-cell>
          <table:table-cell table:formula="of:=[.D1514]-[.D15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13" office:value-type="float" office:value="19669" calcext:value-type="float">
            <text:p>19669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227650462962963" calcext:value-type="float">
            <text:p>0,00227650462962963000</text:p>
          </table:table-cell>
          <table:table-cell table:formula="of:=[.D1515]-[.D151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13" office:value-type="float" office:value="19682" calcext:value-type="float">
            <text:p>19682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227800925925926" calcext:value-type="float">
            <text:p>0,00227800925925926000</text:p>
          </table:table-cell>
          <table:table-cell table:formula="of:=[.D1516]-[.D151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13" office:value-type="float" office:value="19695" calcext:value-type="float">
            <text:p>19695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227951388888889" calcext:value-type="float">
            <text:p>0,00227951388888889000</text:p>
          </table:table-cell>
          <table:table-cell table:formula="of:=[.D1517]-[.D15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13" office:value-type="float" office:value="19708" calcext:value-type="float">
            <text:p>19708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228101851851852" calcext:value-type="float">
            <text:p>0,00228101851851852000</text:p>
          </table:table-cell>
          <table:table-cell table:formula="of:=[.D1518]-[.D15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13" office:value-type="float" office:value="19721" calcext:value-type="float">
            <text:p>19721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228252314814815" calcext:value-type="float">
            <text:p>0,00228252314814815000</text:p>
          </table:table-cell>
          <table:table-cell table:formula="of:=[.D1519]-[.D151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13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228402777777778" calcext:value-type="float">
            <text:p>0,00228402777777778000</text:p>
          </table:table-cell>
          <table:table-cell table:formula="of:=[.D1520]-[.D151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13" office:value-type="float" office:value="19747" calcext:value-type="float">
            <text:p>19747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228553240740741" calcext:value-type="float">
            <text:p>0,00228553240740741000</text:p>
          </table:table-cell>
          <table:table-cell table:formula="of:=[.D1521]-[.D15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13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228703703703704" calcext:value-type="float">
            <text:p>0,00228703703703704000</text:p>
          </table:table-cell>
          <table:table-cell table:formula="of:=[.D1522]-[.D15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13" office:value-type="float" office:value="19773" calcext:value-type="float">
            <text:p>19773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228854166666667" calcext:value-type="float">
            <text:p>0,00228854166666667000</text:p>
          </table:table-cell>
          <table:table-cell table:formula="of:=[.D1523]-[.D152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13" office:value-type="float" office:value="19786" calcext:value-type="float">
            <text:p>19786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22900462962963" calcext:value-type="float">
            <text:p>0,00229004629629630000</text:p>
          </table:table-cell>
          <table:table-cell table:formula="of:=[.D1524]-[.D152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13" office:value-type="float" office:value="19799" calcext:value-type="float">
            <text:p>19799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229155092592593" calcext:value-type="float">
            <text:p>0,00229155092592593000</text:p>
          </table:table-cell>
          <table:table-cell table:formula="of:=[.D1525]-[.D15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13" office:value-type="float" office:value="19812" calcext:value-type="float">
            <text:p>19812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229305555555556" calcext:value-type="float">
            <text:p>0,00229305555555556000</text:p>
          </table:table-cell>
          <table:table-cell table:formula="of:=[.D1526]-[.D152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13" office:value-type="float" office:value="19825" calcext:value-type="float">
            <text:p>19825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229456018518519" calcext:value-type="float">
            <text:p>0,00229456018518519000</text:p>
          </table:table-cell>
          <table:table-cell table:formula="of:=[.D1527]-[.D152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13" office:value-type="float" office:value="19838" calcext:value-type="float">
            <text:p>19838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229606481481482" calcext:value-type="float">
            <text:p>0,00229606481481482000</text:p>
          </table:table-cell>
          <table:table-cell table:formula="of:=[.D1528]-[.D152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13" office:value-type="float" office:value="19851" calcext:value-type="float">
            <text:p>19851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229756944444444" calcext:value-type="float">
            <text:p>0,00229756944444444000</text:p>
          </table:table-cell>
          <table:table-cell table:formula="of:=[.D1529]-[.D15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13" office:value-type="float" office:value="19864" calcext:value-type="float">
            <text:p>19864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229907407407407" calcext:value-type="float">
            <text:p>0,00229907407407407000</text:p>
          </table:table-cell>
          <table:table-cell table:formula="of:=[.D1530]-[.D152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13" office:value-type="float" office:value="19877" calcext:value-type="float">
            <text:p>19877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23005787037037" calcext:value-type="float">
            <text:p>0,00230057870370370000</text:p>
          </table:table-cell>
          <table:table-cell table:formula="of:=[.D1531]-[.D153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13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230208333333333" calcext:value-type="float">
            <text:p>0,00230208333333333000</text:p>
          </table:table-cell>
          <table:table-cell table:formula="of:=[.D1532]-[.D15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13" office:value-type="float" office:value="19903" calcext:value-type="float">
            <text:p>19903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230358796296296" calcext:value-type="float">
            <text:p>0,00230358796296296000</text:p>
          </table:table-cell>
          <table:table-cell table:formula="of:=[.D1533]-[.D15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13" office:value-type="float" office:value="19916" calcext:value-type="float">
            <text:p>19916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230509259259259" calcext:value-type="float">
            <text:p>0,00230509259259259000</text:p>
          </table:table-cell>
          <table:table-cell table:formula="of:=[.D1534]-[.D153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13" office:value-type="float" office:value="19929" calcext:value-type="float">
            <text:p>19929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230659722222222" calcext:value-type="float">
            <text:p>0,00230659722222222000</text:p>
          </table:table-cell>
          <table:table-cell table:formula="of:=[.D1535]-[.D153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13" office:value-type="float" office:value="19942" calcext:value-type="float">
            <text:p>19942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230810185185185" calcext:value-type="float">
            <text:p>0,00230810185185185000</text:p>
          </table:table-cell>
          <table:table-cell table:formula="of:=[.D1536]-[.D15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13" office:value-type="float" office:value="19955" calcext:value-type="float">
            <text:p>19955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230960648148148" calcext:value-type="float">
            <text:p>0,00230960648148148000</text:p>
          </table:table-cell>
          <table:table-cell table:formula="of:=[.D1537]-[.D15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13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231111111111111" calcext:value-type="float">
            <text:p>0,00231111111111111000</text:p>
          </table:table-cell>
          <table:table-cell table:formula="of:=[.D1538]-[.D153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13" office:value-type="float" office:value="19981" calcext:value-type="float">
            <text:p>19981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231261574074074" calcext:value-type="float">
            <text:p>0,00231261574074074000</text:p>
          </table:table-cell>
          <table:table-cell table:formula="of:=[.D1539]-[.D153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13" office:value-type="float" office:value="19994" calcext:value-type="float">
            <text:p>19994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231412037037037" calcext:value-type="float">
            <text:p>0,00231412037037037000</text:p>
          </table:table-cell>
          <table:table-cell table:formula="of:=[.D1540]-[.D15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13" office:value-type="float" office:value="20007" calcext:value-type="float">
            <text:p>20007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2315625" calcext:value-type="float">
            <text:p>0,00231562500000000000</text:p>
          </table:table-cell>
          <table:table-cell table:formula="of:=[.D1541]-[.D15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13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231712962962963" calcext:value-type="float">
            <text:p>0,00231712962962963000</text:p>
          </table:table-cell>
          <table:table-cell table:formula="of:=[.D1542]-[.D154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13" office:value-type="float" office:value="20033" calcext:value-type="float">
            <text:p>20033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231863425925926" calcext:value-type="float">
            <text:p>0,00231863425925926000</text:p>
          </table:table-cell>
          <table:table-cell table:formula="of:=[.D1543]-[.D15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13" office:value-type="float" office:value="20046" calcext:value-type="float">
            <text:p>20046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232013888888889" calcext:value-type="float">
            <text:p>0,00232013888888889000</text:p>
          </table:table-cell>
          <table:table-cell table:formula="of:=[.D1544]-[.D15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13" office:value-type="float" office:value="20059" calcext:value-type="float">
            <text:p>20059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232164351851852" calcext:value-type="float">
            <text:p>0,00232164351851852000</text:p>
          </table:table-cell>
          <table:table-cell table:formula="of:=[.D1545]-[.D154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13" office:value-type="float" office:value="20072" calcext:value-type="float">
            <text:p>20072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232314814814815" calcext:value-type="float">
            <text:p>0,00232314814814815000</text:p>
          </table:table-cell>
          <table:table-cell table:formula="of:=[.D1546]-[.D154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13" office:value-type="float" office:value="20085" calcext:value-type="float">
            <text:p>20085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232465277777778" calcext:value-type="float">
            <text:p>0,00232465277777778000</text:p>
          </table:table-cell>
          <table:table-cell table:formula="of:=[.D1547]-[.D15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13" office:value-type="float" office:value="20098" calcext:value-type="float">
            <text:p>20098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232615740740741" calcext:value-type="float">
            <text:p>0,00232615740740741000</text:p>
          </table:table-cell>
          <table:table-cell table:formula="of:=[.D1548]-[.D15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13" office:value-type="float" office:value="20111" calcext:value-type="float">
            <text:p>20111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232766203703704" calcext:value-type="float">
            <text:p>0,00232766203703704000</text:p>
          </table:table-cell>
          <table:table-cell table:formula="of:=[.D1549]-[.D154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13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232916666666667" calcext:value-type="float">
            <text:p>0,00232916666666667000</text:p>
          </table:table-cell>
          <table:table-cell table:formula="of:=[.D1550]-[.D154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13" office:value-type="float" office:value="20137" calcext:value-type="float">
            <text:p>20137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23306712962963" calcext:value-type="float">
            <text:p>0,00233067129629630000</text:p>
          </table:table-cell>
          <table:table-cell table:formula="of:=[.D1551]-[.D15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13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233217592592593" calcext:value-type="float">
            <text:p>0,00233217592592593000</text:p>
          </table:table-cell>
          <table:table-cell table:formula="of:=[.D1552]-[.D155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13" office:value-type="float" office:value="20163" calcext:value-type="float">
            <text:p>20163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233368055555556" calcext:value-type="float">
            <text:p>0,00233368055555556000</text:p>
          </table:table-cell>
          <table:table-cell table:formula="of:=[.D1553]-[.D155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13" office:value-type="float" office:value="20176" calcext:value-type="float">
            <text:p>20176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233518518518519" calcext:value-type="float">
            <text:p>0,00233518518518519000</text:p>
          </table:table-cell>
          <table:table-cell table:formula="of:=[.D1554]-[.D155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13" office:value-type="float" office:value="20189" calcext:value-type="float">
            <text:p>20189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233668981481482" calcext:value-type="float">
            <text:p>0,00233668981481482000</text:p>
          </table:table-cell>
          <table:table-cell table:formula="of:=[.D1555]-[.D15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13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233819444444444" calcext:value-type="float">
            <text:p>0,00233819444444444000</text:p>
          </table:table-cell>
          <table:table-cell table:formula="of:=[.D1556]-[.D155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13" office:value-type="float" office:value="20215" calcext:value-type="float">
            <text:p>20215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233969907407407" calcext:value-type="float">
            <text:p>0,00233969907407407000</text:p>
          </table:table-cell>
          <table:table-cell table:formula="of:=[.D1557]-[.D155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13" office:value-type="float" office:value="20228" calcext:value-type="float">
            <text:p>20228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23412037037037" calcext:value-type="float">
            <text:p>0,00234120370370370000</text:p>
          </table:table-cell>
          <table:table-cell table:formula="of:=[.D1558]-[.D15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13" office:value-type="float" office:value="20241" calcext:value-type="float">
            <text:p>20241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234270833333333" calcext:value-type="float">
            <text:p>0,00234270833333333000</text:p>
          </table:table-cell>
          <table:table-cell table:formula="of:=[.D1559]-[.D155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13" office:value-type="float" office:value="20254" calcext:value-type="float">
            <text:p>20254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234421296296296" calcext:value-type="float">
            <text:p>0,00234421296296296000</text:p>
          </table:table-cell>
          <table:table-cell table:formula="of:=[.D1560]-[.D155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13" office:value-type="float" office:value="20267" calcext:value-type="float">
            <text:p>20267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234571759259259" calcext:value-type="float">
            <text:p>0,00234571759259259000</text:p>
          </table:table-cell>
          <table:table-cell table:formula="of:=[.D1561]-[.D156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13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234722222222222" calcext:value-type="float">
            <text:p>0,00234722222222222000</text:p>
          </table:table-cell>
          <table:table-cell table:formula="of:=[.D1562]-[.D15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13" office:value-type="float" office:value="20293" calcext:value-type="float">
            <text:p>20293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234872685185185" calcext:value-type="float">
            <text:p>0,00234872685185185000</text:p>
          </table:table-cell>
          <table:table-cell table:formula="of:=[.D1563]-[.D156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13" office:value-type="float" office:value="20306" calcext:value-type="float">
            <text:p>20306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235023148148148" calcext:value-type="float">
            <text:p>0,00235023148148148000</text:p>
          </table:table-cell>
          <table:table-cell table:formula="of:=[.D1564]-[.D156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13" office:value-type="float" office:value="20319" calcext:value-type="float">
            <text:p>20319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235173611111111" calcext:value-type="float">
            <text:p>0,00235173611111111000</text:p>
          </table:table-cell>
          <table:table-cell table:formula="of:=[.D1565]-[.D156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13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235324074074074" calcext:value-type="float">
            <text:p>0,00235324074074074000</text:p>
          </table:table-cell>
          <table:table-cell table:formula="of:=[.D1566]-[.D15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13" office:value-type="float" office:value="20345" calcext:value-type="float">
            <text:p>20345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235474537037037" calcext:value-type="float">
            <text:p>0,00235474537037037000</text:p>
          </table:table-cell>
          <table:table-cell table:formula="of:=[.D1567]-[.D156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13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235625" calcext:value-type="float">
            <text:p>0,00235625000000000000</text:p>
          </table:table-cell>
          <table:table-cell table:formula="of:=[.D1568]-[.D156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13" office:value-type="float" office:value="20371" calcext:value-type="float">
            <text:p>20371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235775462962963" calcext:value-type="float">
            <text:p>0,00235775462962963000</text:p>
          </table:table-cell>
          <table:table-cell table:formula="of:=[.D1569]-[.D15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13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235925925925926" calcext:value-type="float">
            <text:p>0,00235925925925926000</text:p>
          </table:table-cell>
          <table:table-cell table:formula="of:=[.D1570]-[.D156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13" office:value-type="float" office:value="20397" calcext:value-type="float">
            <text:p>20397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236076388888889" calcext:value-type="float">
            <text:p>0,00236076388888889000</text:p>
          </table:table-cell>
          <table:table-cell table:formula="of:=[.D1571]-[.D157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13" office:value-type="float" office:value="20410" calcext:value-type="float">
            <text:p>2041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236226851851852" calcext:value-type="float">
            <text:p>0,00236226851851852000</text:p>
          </table:table-cell>
          <table:table-cell table:formula="of:=[.D1572]-[.D157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13" office:value-type="float" office:value="20423" calcext:value-type="float">
            <text:p>20423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236377314814815" calcext:value-type="float">
            <text:p>0,00236377314814815000</text:p>
          </table:table-cell>
          <table:table-cell table:formula="of:=[.D1573]-[.D15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13" office:value-type="float" office:value="20436" calcext:value-type="float">
            <text:p>20436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236527777777778" calcext:value-type="float">
            <text:p>0,00236527777777778000</text:p>
          </table:table-cell>
          <table:table-cell table:formula="of:=[.D1574]-[.D157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13" office:value-type="float" office:value="20449" calcext:value-type="float">
            <text:p>20449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236678240740741" calcext:value-type="float">
            <text:p>0,00236678240740741000</text:p>
          </table:table-cell>
          <table:table-cell table:formula="of:=[.D1575]-[.D157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13" office:value-type="float" office:value="20462" calcext:value-type="float">
            <text:p>20462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236828703703704" calcext:value-type="float">
            <text:p>0,00236828703703704000</text:p>
          </table:table-cell>
          <table:table-cell table:formula="of:=[.D1576]-[.D157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13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236979166666667" calcext:value-type="float">
            <text:p>0,00236979166666667000</text:p>
          </table:table-cell>
          <table:table-cell table:formula="of:=[.D1577]-[.D15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13" office:value-type="float" office:value="20488" calcext:value-type="float">
            <text:p>20488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23712962962963" calcext:value-type="float">
            <text:p>0,00237129629629630000</text:p>
          </table:table-cell>
          <table:table-cell table:formula="of:=[.D1578]-[.D157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13" office:value-type="float" office:value="20501" calcext:value-type="float">
            <text:p>20501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237280092592593" calcext:value-type="float">
            <text:p>0,00237280092592593000</text:p>
          </table:table-cell>
          <table:table-cell table:formula="of:=[.D1579]-[.D157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13" office:value-type="float" office:value="20514" calcext:value-type="float">
            <text:p>20514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237430555555556" calcext:value-type="float">
            <text:p>0,00237430555555556000</text:p>
          </table:table-cell>
          <table:table-cell table:formula="of:=[.D1580]-[.D157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13" office:value-type="float" office:value="20527" calcext:value-type="float">
            <text:p>20527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237581018518519" calcext:value-type="float">
            <text:p>0,00237581018518519000</text:p>
          </table:table-cell>
          <table:table-cell table:formula="of:=[.D1581]-[.D158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13" office:value-type="float" office:value="20540" calcext:value-type="float">
            <text:p>2054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237731481481481" calcext:value-type="float">
            <text:p>0,00237731481481481000</text:p>
          </table:table-cell>
          <table:table-cell table:formula="of:=[.D1582]-[.D158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13" office:value-type="float" office:value="20553" calcext:value-type="float">
            <text:p>20553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237881944444444" calcext:value-type="float">
            <text:p>0,00237881944444444000</text:p>
          </table:table-cell>
          <table:table-cell table:formula="of:=[.D1583]-[.D158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13" office:value-type="float" office:value="20566" calcext:value-type="float">
            <text:p>20566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238032407407407" calcext:value-type="float">
            <text:p>0,00238032407407407000</text:p>
          </table:table-cell>
          <table:table-cell table:formula="of:=[.D1584]-[.D15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13" office:value-type="float" office:value="20579" calcext:value-type="float">
            <text:p>20579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23818287037037" calcext:value-type="float">
            <text:p>0,00238182870370370000</text:p>
          </table:table-cell>
          <table:table-cell table:formula="of:=[.D1585]-[.D158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13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238333333333333" calcext:value-type="float">
            <text:p>0,00238333333333333000</text:p>
          </table:table-cell>
          <table:table-cell table:formula="of:=[.D1586]-[.D158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13" office:value-type="float" office:value="20605" calcext:value-type="float">
            <text:p>20605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238483796296296" calcext:value-type="float">
            <text:p>0,00238483796296296000</text:p>
          </table:table-cell>
          <table:table-cell table:formula="of:=[.D1587]-[.D158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13" office:value-type="float" office:value="20618" calcext:value-type="float">
            <text:p>20618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238634259259259" calcext:value-type="float">
            <text:p>0,00238634259259259000</text:p>
          </table:table-cell>
          <table:table-cell table:formula="of:=[.D1588]-[.D15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13" office:value-type="float" office:value="20631" calcext:value-type="float">
            <text:p>20631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238784722222222" calcext:value-type="float">
            <text:p>0,00238784722222222000</text:p>
          </table:table-cell>
          <table:table-cell table:formula="of:=[.D1589]-[.D15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13" office:value-type="float" office:value="20644" calcext:value-type="float">
            <text:p>20644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238935185185185" calcext:value-type="float">
            <text:p>0,00238935185185185000</text:p>
          </table:table-cell>
          <table:table-cell table:formula="of:=[.D1590]-[.D158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13" office:value-type="float" office:value="20657" calcext:value-type="float">
            <text:p>20657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239085648148148" calcext:value-type="float">
            <text:p>0,00239085648148148000</text:p>
          </table:table-cell>
          <table:table-cell table:formula="of:=[.D1591]-[.D159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13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239236111111111" calcext:value-type="float">
            <text:p>0,00239236111111111000</text:p>
          </table:table-cell>
          <table:table-cell table:formula="of:=[.D1592]-[.D159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13" office:value-type="float" office:value="20683" calcext:value-type="float">
            <text:p>20683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239386574074074" calcext:value-type="float">
            <text:p>0,00239386574074074000</text:p>
          </table:table-cell>
          <table:table-cell table:formula="of:=[.D1593]-[.D159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13" office:value-type="float" office:value="20696" calcext:value-type="float">
            <text:p>20696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239537037037037" calcext:value-type="float">
            <text:p>0,00239537037037037000</text:p>
          </table:table-cell>
          <table:table-cell table:formula="of:=[.D1594]-[.D159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13" office:value-type="float" office:value="20709" calcext:value-type="float">
            <text:p>20709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2396875" calcext:value-type="float">
            <text:p>0,00239687500000000000</text:p>
          </table:table-cell>
          <table:table-cell table:formula="of:=[.D1595]-[.D15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13" office:value-type="float" office:value="20722" calcext:value-type="float">
            <text:p>20722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239837962962963" calcext:value-type="float">
            <text:p>0,00239837962962963000</text:p>
          </table:table-cell>
          <table:table-cell table:formula="of:=[.D1596]-[.D15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13" office:value-type="float" office:value="20735" calcext:value-type="float">
            <text:p>20735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239988425925926" calcext:value-type="float">
            <text:p>0,00239988425925926000</text:p>
          </table:table-cell>
          <table:table-cell table:formula="of:=[.D1597]-[.D159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13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240138888888889" calcext:value-type="float">
            <text:p>0,00240138888888889000</text:p>
          </table:table-cell>
          <table:table-cell table:formula="of:=[.D1598]-[.D159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13" office:value-type="float" office:value="20761" calcext:value-type="float">
            <text:p>20761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240289351851852" calcext:value-type="float">
            <text:p>0,00240289351851852000</text:p>
          </table:table-cell>
          <table:table-cell table:formula="of:=[.D1599]-[.D15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13" office:value-type="float" office:value="20774" calcext:value-type="float">
            <text:p>20774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240439814814815" calcext:value-type="float">
            <text:p>0,00240439814814815000</text:p>
          </table:table-cell>
          <table:table-cell table:formula="of:=[.D1600]-[.D159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13" office:value-type="float" office:value="20787" calcext:value-type="float">
            <text:p>20787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240590277777778" calcext:value-type="float">
            <text:p>0,00240590277777778000</text:p>
          </table:table-cell>
          <table:table-cell table:formula="of:=[.D1601]-[.D160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13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240740740740741" calcext:value-type="float">
            <text:p>0,00240740740740741000</text:p>
          </table:table-cell>
          <table:table-cell table:formula="of:=[.D1602]-[.D160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13" office:value-type="float" office:value="20813" calcext:value-type="float">
            <text:p>20813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240891203703704" calcext:value-type="float">
            <text:p>0,00240891203703704000</text:p>
          </table:table-cell>
          <table:table-cell table:formula="of:=[.D1603]-[.D16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13" office:value-type="float" office:value="20826" calcext:value-type="float">
            <text:p>20826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241041666666667" calcext:value-type="float">
            <text:p>0,00241041666666667000</text:p>
          </table:table-cell>
          <table:table-cell table:formula="of:=[.D1604]-[.D160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13" office:value-type="float" office:value="20839" calcext:value-type="float">
            <text:p>20839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24119212962963" calcext:value-type="float">
            <text:p>0,00241192129629630000</text:p>
          </table:table-cell>
          <table:table-cell table:formula="of:=[.D1605]-[.D160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13" office:value-type="float" office:value="20852" calcext:value-type="float">
            <text:p>20852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241342592592593" calcext:value-type="float">
            <text:p>0,00241342592592593000</text:p>
          </table:table-cell>
          <table:table-cell table:formula="of:=[.D1606]-[.D16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13" office:value-type="float" office:value="20865" calcext:value-type="float">
            <text:p>20865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241493055555556" calcext:value-type="float">
            <text:p>0,00241493055555556000</text:p>
          </table:table-cell>
          <table:table-cell table:formula="of:=[.D1607]-[.D16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13" office:value-type="float" office:value="20878" calcext:value-type="float">
            <text:p>20878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241643518518519" calcext:value-type="float">
            <text:p>0,00241643518518519000</text:p>
          </table:table-cell>
          <table:table-cell table:formula="of:=[.D1608]-[.D160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13" office:value-type="float" office:value="20891" calcext:value-type="float">
            <text:p>20891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241793981481481" calcext:value-type="float">
            <text:p>0,00241793981481481000</text:p>
          </table:table-cell>
          <table:table-cell table:formula="of:=[.D1609]-[.D160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13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241944444444444" calcext:value-type="float">
            <text:p>0,00241944444444444000</text:p>
          </table:table-cell>
          <table:table-cell table:formula="of:=[.D1610]-[.D16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13" office:value-type="float" office:value="20917" calcext:value-type="float">
            <text:p>20917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242094907407407" calcext:value-type="float">
            <text:p>0,00242094907407407000</text:p>
          </table:table-cell>
          <table:table-cell table:formula="of:=[.D1611]-[.D16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13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24224537037037" calcext:value-type="float">
            <text:p>0,00242245370370370000</text:p>
          </table:table-cell>
          <table:table-cell table:formula="of:=[.D1612]-[.D161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13" office:value-type="float" office:value="20943" calcext:value-type="float">
            <text:p>20943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242395833333333" calcext:value-type="float">
            <text:p>0,00242395833333333000</text:p>
          </table:table-cell>
          <table:table-cell table:formula="of:=[.D1613]-[.D161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13" office:value-type="float" office:value="20956" calcext:value-type="float">
            <text:p>20956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242546296296296" calcext:value-type="float">
            <text:p>0,00242546296296296000</text:p>
          </table:table-cell>
          <table:table-cell table:formula="of:=[.D1614]-[.D16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13" office:value-type="float" office:value="20969" calcext:value-type="float">
            <text:p>20969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242696759259259" calcext:value-type="float">
            <text:p>0,00242696759259259000</text:p>
          </table:table-cell>
          <table:table-cell table:formula="of:=[.D1615]-[.D161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13" office:value-type="float" office:value="20982" calcext:value-type="float">
            <text:p>20982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242847222222222" calcext:value-type="float">
            <text:p>0,00242847222222222000</text:p>
          </table:table-cell>
          <table:table-cell table:formula="of:=[.D1616]-[.D161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13" office:value-type="float" office:value="20995" calcext:value-type="float">
            <text:p>20995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242997685185185" calcext:value-type="float">
            <text:p>0,00242997685185185000</text:p>
          </table:table-cell>
          <table:table-cell table:formula="of:=[.D1617]-[.D16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13" office:value-type="float" office:value="21008" calcext:value-type="float">
            <text:p>21008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243148148148148" calcext:value-type="float">
            <text:p>0,00243148148148148000</text:p>
          </table:table-cell>
          <table:table-cell table:formula="of:=[.D1618]-[.D16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13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243298611111111" calcext:value-type="float">
            <text:p>0,00243298611111111000</text:p>
          </table:table-cell>
          <table:table-cell table:formula="of:=[.D1619]-[.D161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13" office:value-type="float" office:value="21034" calcext:value-type="float">
            <text:p>21034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243449074074074" calcext:value-type="float">
            <text:p>0,00243449074074074000</text:p>
          </table:table-cell>
          <table:table-cell table:formula="of:=[.D1620]-[.D161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13" office:value-type="float" office:value="21047" calcext:value-type="float">
            <text:p>21047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243599537037037" calcext:value-type="float">
            <text:p>0,00243599537037037000</text:p>
          </table:table-cell>
          <table:table-cell table:formula="of:=[.D1621]-[.D16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13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24375" calcext:value-type="float">
            <text:p>0,00243750000000000000</text:p>
          </table:table-cell>
          <table:table-cell table:formula="of:=[.D1622]-[.D16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13" office:value-type="float" office:value="21073" calcext:value-type="float">
            <text:p>21073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243900462962963" calcext:value-type="float">
            <text:p>0,00243900462962963000</text:p>
          </table:table-cell>
          <table:table-cell table:formula="of:=[.D1623]-[.D162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13" office:value-type="float" office:value="21086" calcext:value-type="float">
            <text:p>21086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244050925925926" calcext:value-type="float">
            <text:p>0,00244050925925926000</text:p>
          </table:table-cell>
          <table:table-cell table:formula="of:=[.D1624]-[.D162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13" office:value-type="float" office:value="21099" calcext:value-type="float">
            <text:p>21099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244201388888889" calcext:value-type="float">
            <text:p>0,00244201388888889000</text:p>
          </table:table-cell>
          <table:table-cell table:formula="of:=[.D1625]-[.D16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13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244351851851852" calcext:value-type="float">
            <text:p>0,00244351851851852000</text:p>
          </table:table-cell>
          <table:table-cell table:formula="of:=[.D1626]-[.D162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13" office:value-type="float" office:value="21125" calcext:value-type="float">
            <text:p>21125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244502314814815" calcext:value-type="float">
            <text:p>0,00244502314814815000</text:p>
          </table:table-cell>
          <table:table-cell table:formula="of:=[.D1627]-[.D162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13" office:value-type="float" office:value="21138" calcext:value-type="float">
            <text:p>21138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244652777777778" calcext:value-type="float">
            <text:p>0,00244652777777778000</text:p>
          </table:table-cell>
          <table:table-cell table:formula="of:=[.D1628]-[.D162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13" office:value-type="float" office:value="21151" calcext:value-type="float">
            <text:p>21151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244803240740741" calcext:value-type="float">
            <text:p>0,00244803240740741000</text:p>
          </table:table-cell>
          <table:table-cell table:formula="of:=[.D1629]-[.D16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13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244953703703704" calcext:value-type="float">
            <text:p>0,00244953703703704000</text:p>
          </table:table-cell>
          <table:table-cell table:formula="of:=[.D1630]-[.D162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13" office:value-type="float" office:value="21177" calcext:value-type="float">
            <text:p>21177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245104166666667" calcext:value-type="float">
            <text:p>0,00245104166666667000</text:p>
          </table:table-cell>
          <table:table-cell table:formula="of:=[.D1631]-[.D163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13" office:value-type="float" office:value="21190" calcext:value-type="float">
            <text:p>2119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24525462962963" calcext:value-type="float">
            <text:p>0,00245254629629630000</text:p>
          </table:table-cell>
          <table:table-cell table:formula="of:=[.D1632]-[.D16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13" office:value-type="float" office:value="21203" calcext:value-type="float">
            <text:p>21203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245405092592593" calcext:value-type="float">
            <text:p>0,00245405092592593000</text:p>
          </table:table-cell>
          <table:table-cell table:formula="of:=[.D1633]-[.D16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13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245555555555556" calcext:value-type="float">
            <text:p>0,00245555555555556000</text:p>
          </table:table-cell>
          <table:table-cell table:formula="of:=[.D1634]-[.D163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13" office:value-type="float" office:value="21229" calcext:value-type="float">
            <text:p>21229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245706018518519" calcext:value-type="float">
            <text:p>0,00245706018518519000</text:p>
          </table:table-cell>
          <table:table-cell table:formula="of:=[.D1635]-[.D163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13" office:value-type="float" office:value="21242" calcext:value-type="float">
            <text:p>21242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245856481481482" calcext:value-type="float">
            <text:p>0,00245856481481482000</text:p>
          </table:table-cell>
          <table:table-cell table:formula="of:=[.D1636]-[.D16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13" office:value-type="float" office:value="21255" calcext:value-type="float">
            <text:p>21255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246006944444444" calcext:value-type="float">
            <text:p>0,00246006944444444000</text:p>
          </table:table-cell>
          <table:table-cell table:formula="of:=[.D1637]-[.D16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13" office:value-type="float" office:value="21268" calcext:value-type="float">
            <text:p>21268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246157407407407" calcext:value-type="float">
            <text:p>0,00246157407407407000</text:p>
          </table:table-cell>
          <table:table-cell table:formula="of:=[.D1638]-[.D163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13" office:value-type="float" office:value="21281" calcext:value-type="float">
            <text:p>21281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24630787037037" calcext:value-type="float">
            <text:p>0,00246307870370370000</text:p>
          </table:table-cell>
          <table:table-cell table:formula="of:=[.D1639]-[.D163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13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246458333333333" calcext:value-type="float">
            <text:p>0,00246458333333333000</text:p>
          </table:table-cell>
          <table:table-cell table:formula="of:=[.D1640]-[.D16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13" office:value-type="float" office:value="21307" calcext:value-type="float">
            <text:p>21307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246608796296296" calcext:value-type="float">
            <text:p>0,00246608796296296000</text:p>
          </table:table-cell>
          <table:table-cell table:formula="of:=[.D1641]-[.D164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13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246759259259259" calcext:value-type="float">
            <text:p>0,00246759259259259000</text:p>
          </table:table-cell>
          <table:table-cell table:formula="of:=[.D1642]-[.D164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13" office:value-type="float" office:value="21333" calcext:value-type="float">
            <text:p>21333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246909722222222" calcext:value-type="float">
            <text:p>0,00246909722222222000</text:p>
          </table:table-cell>
          <table:table-cell table:formula="of:=[.D1643]-[.D16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13" office:value-type="float" office:value="21346" calcext:value-type="float">
            <text:p>21346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247060185185185" calcext:value-type="float">
            <text:p>0,00247060185185185000</text:p>
          </table:table-cell>
          <table:table-cell table:formula="of:=[.D1644]-[.D16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13" office:value-type="float" office:value="21359" calcext:value-type="float">
            <text:p>21359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247210648148148" calcext:value-type="float">
            <text:p>0,00247210648148148000</text:p>
          </table:table-cell>
          <table:table-cell table:formula="of:=[.D1645]-[.D164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13" office:value-type="float" office:value="21372" calcext:value-type="float">
            <text:p>21372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247361111111111" calcext:value-type="float">
            <text:p>0,00247361111111111000</text:p>
          </table:table-cell>
          <table:table-cell table:formula="of:=[.D1646]-[.D164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13" office:value-type="float" office:value="21385" calcext:value-type="float">
            <text:p>21385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247511574074074" calcext:value-type="float">
            <text:p>0,00247511574074074000</text:p>
          </table:table-cell>
          <table:table-cell table:formula="of:=[.D1647]-[.D16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13" office:value-type="float" office:value="21398" calcext:value-type="float">
            <text:p>21398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247662037037037" calcext:value-type="float">
            <text:p>0,00247662037037037000</text:p>
          </table:table-cell>
          <table:table-cell table:formula="of:=[.D1648]-[.D16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13" office:value-type="float" office:value="21411" calcext:value-type="float">
            <text:p>21411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2478125" calcext:value-type="float">
            <text:p>0,00247812500000000000</text:p>
          </table:table-cell>
          <table:table-cell table:formula="of:=[.D1649]-[.D164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13" office:value-type="float" office:value="21424" calcext:value-type="float">
            <text:p>21424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247962962962963" calcext:value-type="float">
            <text:p>0,00247962962962963000</text:p>
          </table:table-cell>
          <table:table-cell table:formula="of:=[.D1650]-[.D164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13" office:value-type="float" office:value="21437" calcext:value-type="float">
            <text:p>21437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248113425925926" calcext:value-type="float">
            <text:p>0,00248113425925926000</text:p>
          </table:table-cell>
          <table:table-cell table:formula="of:=[.D1651]-[.D16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13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248263888888889" calcext:value-type="float">
            <text:p>0,00248263888888889000</text:p>
          </table:table-cell>
          <table:table-cell table:formula="of:=[.D1652]-[.D165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13" office:value-type="float" office:value="21463" calcext:value-type="float">
            <text:p>21463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248414351851852" calcext:value-type="float">
            <text:p>0,00248414351851852000</text:p>
          </table:table-cell>
          <table:table-cell table:formula="of:=[.D1653]-[.D165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13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248564814814815" calcext:value-type="float">
            <text:p>0,00248564814814815000</text:p>
          </table:table-cell>
          <table:table-cell table:formula="of:=[.D1654]-[.D165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13" office:value-type="float" office:value="21489" calcext:value-type="float">
            <text:p>21489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248715277777778" calcext:value-type="float">
            <text:p>0,00248715277777778000</text:p>
          </table:table-cell>
          <table:table-cell table:formula="of:=[.D1655]-[.D16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13" office:value-type="float" office:value="21502" calcext:value-type="float">
            <text:p>21502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248865740740741" calcext:value-type="float">
            <text:p>0,00248865740740741000</text:p>
          </table:table-cell>
          <table:table-cell table:formula="of:=[.D1656]-[.D165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13" office:value-type="float" office:value="21515" calcext:value-type="float">
            <text:p>21515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249016203703704" calcext:value-type="float">
            <text:p>0,00249016203703704000</text:p>
          </table:table-cell>
          <table:table-cell table:formula="of:=[.D1657]-[.D165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13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249166666666667" calcext:value-type="float">
            <text:p>0,00249166666666667000</text:p>
          </table:table-cell>
          <table:table-cell table:formula="of:=[.D1658]-[.D16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13" office:value-type="float" office:value="21541" calcext:value-type="float">
            <text:p>21541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24931712962963" calcext:value-type="float">
            <text:p>0,00249317129629630000</text:p>
          </table:table-cell>
          <table:table-cell table:formula="of:=[.D1659]-[.D165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13" office:value-type="float" office:value="21554" calcext:value-type="float">
            <text:p>21554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249467592592593" calcext:value-type="float">
            <text:p>0,00249467592592593000</text:p>
          </table:table-cell>
          <table:table-cell table:formula="of:=[.D1660]-[.D165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13" office:value-type="float" office:value="21567" calcext:value-type="float">
            <text:p>21567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249618055555556" calcext:value-type="float">
            <text:p>0,00249618055555556000</text:p>
          </table:table-cell>
          <table:table-cell table:formula="of:=[.D1661]-[.D166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13" office:value-type="float" office:value="21580" calcext:value-type="float">
            <text:p>2158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249768518518519" calcext:value-type="float">
            <text:p>0,00249768518518519000</text:p>
          </table:table-cell>
          <table:table-cell table:formula="of:=[.D1662]-[.D16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13" office:value-type="float" office:value="21593" calcext:value-type="float">
            <text:p>21593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249918981481481" calcext:value-type="float">
            <text:p>0,00249918981481481000</text:p>
          </table:table-cell>
          <table:table-cell table:formula="of:=[.D1663]-[.D166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13" office:value-type="float" office:value="21606" calcext:value-type="float">
            <text:p>21606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250069444444444" calcext:value-type="float">
            <text:p>0,00250069444444444000</text:p>
          </table:table-cell>
          <table:table-cell table:formula="of:=[.D1664]-[.D166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13" office:value-type="float" office:value="21619" calcext:value-type="float">
            <text:p>21619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250219907407407" calcext:value-type="float">
            <text:p>0,00250219907407407000</text:p>
          </table:table-cell>
          <table:table-cell table:formula="of:=[.D1665]-[.D166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13" office:value-type="float" office:value="21632" calcext:value-type="float">
            <text:p>21632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25037037037037" calcext:value-type="float">
            <text:p>0,00250370370370370000</text:p>
          </table:table-cell>
          <table:table-cell table:formula="of:=[.D1666]-[.D16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13" office:value-type="float" office:value="21645" calcext:value-type="float">
            <text:p>21645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250520833333333" calcext:value-type="float">
            <text:p>0,00250520833333333000</text:p>
          </table:table-cell>
          <table:table-cell table:formula="of:=[.D1667]-[.D166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13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250671296296296" calcext:value-type="float">
            <text:p>0,00250671296296296000</text:p>
          </table:table-cell>
          <table:table-cell table:formula="of:=[.D1668]-[.D166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13" office:value-type="float" office:value="21671" calcext:value-type="float">
            <text:p>21671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250821759259259" calcext:value-type="float">
            <text:p>0,00250821759259259000</text:p>
          </table:table-cell>
          <table:table-cell table:formula="of:=[.D1669]-[.D16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13" office:value-type="float" office:value="21684" calcext:value-type="float">
            <text:p>21684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250972222222222" calcext:value-type="float">
            <text:p>0,00250972222222222000</text:p>
          </table:table-cell>
          <table:table-cell table:formula="of:=[.D1670]-[.D166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13" office:value-type="float" office:value="21697" calcext:value-type="float">
            <text:p>21697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251122685185185" calcext:value-type="float">
            <text:p>0,00251122685185185000</text:p>
          </table:table-cell>
          <table:table-cell table:formula="of:=[.D1671]-[.D167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13" office:value-type="float" office:value="21710" calcext:value-type="float">
            <text:p>2171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251273148148148" calcext:value-type="float">
            <text:p>0,00251273148148148000</text:p>
          </table:table-cell>
          <table:table-cell table:formula="of:=[.D1672]-[.D167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13" office:value-type="float" office:value="21723" calcext:value-type="float">
            <text:p>21723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251423611111111" calcext:value-type="float">
            <text:p>0,00251423611111111000</text:p>
          </table:table-cell>
          <table:table-cell table:formula="of:=[.D1673]-[.D16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13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251574074074074" calcext:value-type="float">
            <text:p>0,00251574074074074000</text:p>
          </table:table-cell>
          <table:table-cell table:formula="of:=[.D1674]-[.D167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13" office:value-type="float" office:value="21749" calcext:value-type="float">
            <text:p>21749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251724537037037" calcext:value-type="float">
            <text:p>0,00251724537037037000</text:p>
          </table:table-cell>
          <table:table-cell table:formula="of:=[.D1675]-[.D167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13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251875" calcext:value-type="float">
            <text:p>0,00251875000000000000</text:p>
          </table:table-cell>
          <table:table-cell table:formula="of:=[.D1676]-[.D167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13" office:value-type="float" office:value="21775" calcext:value-type="float">
            <text:p>21775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252025462962963" calcext:value-type="float">
            <text:p>0,00252025462962963000</text:p>
          </table:table-cell>
          <table:table-cell table:formula="of:=[.D1677]-[.D16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13" office:value-type="float" office:value="21788" calcext:value-type="float">
            <text:p>21788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252175925925926" calcext:value-type="float">
            <text:p>0,00252175925925926000</text:p>
          </table:table-cell>
          <table:table-cell table:formula="of:=[.D1678]-[.D167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13" office:value-type="float" office:value="21801" calcext:value-type="float">
            <text:p>21801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252326388888889" calcext:value-type="float">
            <text:p>0,00252326388888889000</text:p>
          </table:table-cell>
          <table:table-cell table:formula="of:=[.D1679]-[.D167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13" office:value-type="float" office:value="21814" calcext:value-type="float">
            <text:p>21814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252476851851852" calcext:value-type="float">
            <text:p>0,00252476851851852000</text:p>
          </table:table-cell>
          <table:table-cell table:formula="of:=[.D1680]-[.D167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13" office:value-type="float" office:value="21827" calcext:value-type="float">
            <text:p>21827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252627314814815" calcext:value-type="float">
            <text:p>0,00252627314814815000</text:p>
          </table:table-cell>
          <table:table-cell table:formula="of:=[.D1681]-[.D168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13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252777777777778" calcext:value-type="float">
            <text:p>0,00252777777777778000</text:p>
          </table:table-cell>
          <table:table-cell table:formula="of:=[.D1682]-[.D168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13" office:value-type="float" office:value="21853" calcext:value-type="float">
            <text:p>21853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252928240740741" calcext:value-type="float">
            <text:p>0,00252928240740741000</text:p>
          </table:table-cell>
          <table:table-cell table:formula="of:=[.D1683]-[.D168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13" office:value-type="float" office:value="21866" calcext:value-type="float">
            <text:p>21866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253078703703704" calcext:value-type="float">
            <text:p>0,00253078703703704000</text:p>
          </table:table-cell>
          <table:table-cell table:formula="of:=[.D1684]-[.D16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13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253229166666667" calcext:value-type="float">
            <text:p>0,00253229166666667000</text:p>
          </table:table-cell>
          <table:table-cell table:formula="of:=[.D1685]-[.D168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13" office:value-type="float" office:value="21892" calcext:value-type="float">
            <text:p>21892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25337962962963" calcext:value-type="float">
            <text:p>0,00253379629629630000</text:p>
          </table:table-cell>
          <table:table-cell table:formula="of:=[.D1686]-[.D168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13" office:value-type="float" office:value="21905" calcext:value-type="float">
            <text:p>21905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253530092592593" calcext:value-type="float">
            <text:p>0,00253530092592593000</text:p>
          </table:table-cell>
          <table:table-cell table:formula="of:=[.D1687]-[.D168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13" office:value-type="float" office:value="21918" calcext:value-type="float">
            <text:p>21918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253680555555556" calcext:value-type="float">
            <text:p>0,00253680555555556000</text:p>
          </table:table-cell>
          <table:table-cell table:formula="of:=[.D1688]-[.D16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13" office:value-type="float" office:value="21931" calcext:value-type="float">
            <text:p>21931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253831018518519" calcext:value-type="float">
            <text:p>0,00253831018518519000</text:p>
          </table:table-cell>
          <table:table-cell table:formula="of:=[.D1689]-[.D168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13" office:value-type="float" office:value="21944" calcext:value-type="float">
            <text:p>21944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253981481481481" calcext:value-type="float">
            <text:p>0,00253981481481481000</text:p>
          </table:table-cell>
          <table:table-cell table:formula="of:=[.D1690]-[.D168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13" office:value-type="float" office:value="21957" calcext:value-type="float">
            <text:p>21957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254131944444444" calcext:value-type="float">
            <text:p>0,00254131944444444000</text:p>
          </table:table-cell>
          <table:table-cell table:formula="of:=[.D1691]-[.D169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13" office:value-type="float" office:value="21970" calcext:value-type="float">
            <text:p>2197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254282407407407" calcext:value-type="float">
            <text:p>0,00254282407407407000</text:p>
          </table:table-cell>
          <table:table-cell table:formula="of:=[.D1692]-[.D169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13" office:value-type="float" office:value="21983" calcext:value-type="float">
            <text:p>21983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25443287037037" calcext:value-type="float">
            <text:p>0,00254432870370370000</text:p>
          </table:table-cell>
          <table:table-cell table:formula="of:=[.D1693]-[.D169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13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254583333333333" calcext:value-type="float">
            <text:p>0,00254583333333333000</text:p>
          </table:table-cell>
          <table:table-cell table:formula="of:=[.D1694]-[.D169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13" office:value-type="float" office:value="22009" calcext:value-type="float">
            <text:p>22009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254733796296296" calcext:value-type="float">
            <text:p>0,00254733796296296000</text:p>
          </table:table-cell>
          <table:table-cell table:formula="of:=[.D1695]-[.D16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13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254884259259259" calcext:value-type="float">
            <text:p>0,00254884259259259000</text:p>
          </table:table-cell>
          <table:table-cell table:formula="of:=[.D1696]-[.D16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13" office:value-type="float" office:value="22035" calcext:value-type="float">
            <text:p>22035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255034722222222" calcext:value-type="float">
            <text:p>0,00255034722222222000</text:p>
          </table:table-cell>
          <table:table-cell table:formula="of:=[.D1697]-[.D169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13" office:value-type="float" office:value="22048" calcext:value-type="float">
            <text:p>22048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255185185185185" calcext:value-type="float">
            <text:p>0,00255185185185185000</text:p>
          </table:table-cell>
          <table:table-cell table:formula="of:=[.D1698]-[.D169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13" office:value-type="float" office:value="22061" calcext:value-type="float">
            <text:p>22061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255335648148148" calcext:value-type="float">
            <text:p>0,00255335648148148000</text:p>
          </table:table-cell>
          <table:table-cell table:formula="of:=[.D1699]-[.D16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13" office:value-type="float" office:value="22074" calcext:value-type="float">
            <text:p>22074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255486111111111" calcext:value-type="float">
            <text:p>0,00255486111111111000</text:p>
          </table:table-cell>
          <table:table-cell table:formula="of:=[.D1700]-[.D169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13" office:value-type="float" office:value="22087" calcext:value-type="float">
            <text:p>22087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255636574074074" calcext:value-type="float">
            <text:p>0,00255636574074074000</text:p>
          </table:table-cell>
          <table:table-cell table:formula="of:=[.D1701]-[.D170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13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255787037037037" calcext:value-type="float">
            <text:p>0,00255787037037037000</text:p>
          </table:table-cell>
          <table:table-cell table:formula="of:=[.D1702]-[.D170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13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2559375" calcext:value-type="float">
            <text:p>0,00255937500000000000</text:p>
          </table:table-cell>
          <table:table-cell table:formula="of:=[.D1703]-[.D17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13" office:value-type="float" office:value="22126" calcext:value-type="float">
            <text:p>22126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256087962962963" calcext:value-type="float">
            <text:p>0,00256087962962963000</text:p>
          </table:table-cell>
          <table:table-cell table:formula="of:=[.D1704]-[.D170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13" office:value-type="float" office:value="22139" calcext:value-type="float">
            <text:p>22139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256238425925926" calcext:value-type="float">
            <text:p>0,00256238425925926000</text:p>
          </table:table-cell>
          <table:table-cell table:formula="of:=[.D1705]-[.D170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13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256388888888889" calcext:value-type="float">
            <text:p>0,00256388888888889000</text:p>
          </table:table-cell>
          <table:table-cell table:formula="of:=[.D1706]-[.D17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13" office:value-type="float" office:value="22165" calcext:value-type="float">
            <text:p>22165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256539351851852" calcext:value-type="float">
            <text:p>0,00256539351851852000</text:p>
          </table:table-cell>
          <table:table-cell table:formula="of:=[.D1707]-[.D17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13" office:value-type="float" office:value="22178" calcext:value-type="float">
            <text:p>22178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256689814814815" calcext:value-type="float">
            <text:p>0,00256689814814815000</text:p>
          </table:table-cell>
          <table:table-cell table:formula="of:=[.D1708]-[.D170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13" office:value-type="float" office:value="22191" calcext:value-type="float">
            <text:p>22191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256840277777778" calcext:value-type="float">
            <text:p>0,00256840277777778000</text:p>
          </table:table-cell>
          <table:table-cell table:formula="of:=[.D1709]-[.D170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13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256990740740741" calcext:value-type="float">
            <text:p>0,00256990740740741000</text:p>
          </table:table-cell>
          <table:table-cell table:formula="of:=[.D1710]-[.D17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13" office:value-type="float" office:value="22217" calcext:value-type="float">
            <text:p>22217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257141203703704" calcext:value-type="float">
            <text:p>0,00257141203703704000</text:p>
          </table:table-cell>
          <table:table-cell table:formula="of:=[.D1711]-[.D17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13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257291666666667" calcext:value-type="float">
            <text:p>0,00257291666666667000</text:p>
          </table:table-cell>
          <table:table-cell table:formula="of:=[.D1712]-[.D171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13" office:value-type="float" office:value="22243" calcext:value-type="float">
            <text:p>22243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25744212962963" calcext:value-type="float">
            <text:p>0,00257442129629630000</text:p>
          </table:table-cell>
          <table:table-cell table:formula="of:=[.D1713]-[.D171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13" office:value-type="float" office:value="22256" calcext:value-type="float">
            <text:p>22256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257592592592593" calcext:value-type="float">
            <text:p>0,00257592592592593000</text:p>
          </table:table-cell>
          <table:table-cell table:formula="of:=[.D1714]-[.D17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13" office:value-type="float" office:value="22269" calcext:value-type="float">
            <text:p>22269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257743055555556" calcext:value-type="float">
            <text:p>0,00257743055555556000</text:p>
          </table:table-cell>
          <table:table-cell table:formula="of:=[.D1715]-[.D171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13" office:value-type="float" office:value="22282" calcext:value-type="float">
            <text:p>22282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257893518518519" calcext:value-type="float">
            <text:p>0,00257893518518519000</text:p>
          </table:table-cell>
          <table:table-cell table:formula="of:=[.D1716]-[.D171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13" office:value-type="float" office:value="22295" calcext:value-type="float">
            <text:p>22295</text:p>
          </table:table-cell>
          <table:table-cell office:value-type="float" office:value="8640000" calcext:value-type="float">
            <text:p>8640000</text:p>
          </table:table-cell>
          <table:table-cell table:formula="of:=[.B1716]/[.C1716]" office:value-type="float" office:value="0.00258043981481482" calcext:value-type="float">
            <text:p>0,00258043981481482000</text:p>
          </table:table-cell>
          <table:table-cell table:formula="of:=[.D1717]-[.D17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13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1717]/[.C1717]" office:value-type="float" office:value="0.00258194444444444" calcext:value-type="float">
            <text:p>0,00258194444444444000</text:p>
          </table:table-cell>
          <table:table-cell table:formula="of:=[.D1718]-[.D17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13" office:value-type="float" office:value="22321" calcext:value-type="float">
            <text:p>22321</text:p>
          </table:table-cell>
          <table:table-cell office:value-type="float" office:value="8640000" calcext:value-type="float">
            <text:p>8640000</text:p>
          </table:table-cell>
          <table:table-cell table:formula="of:=[.B1718]/[.C1718]" office:value-type="float" office:value="0.00258344907407407" calcext:value-type="float">
            <text:p>0,00258344907407407000</text:p>
          </table:table-cell>
          <table:table-cell table:formula="of:=[.D1719]-[.D171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13" office:value-type="float" office:value="22334" calcext:value-type="float">
            <text:p>22334</text:p>
          </table:table-cell>
          <table:table-cell office:value-type="float" office:value="8640000" calcext:value-type="float">
            <text:p>8640000</text:p>
          </table:table-cell>
          <table:table-cell table:formula="of:=[.B1719]/[.C1719]" office:value-type="float" office:value="0.0025849537037037" calcext:value-type="float">
            <text:p>0,00258495370370370000</text:p>
          </table:table-cell>
          <table:table-cell table:formula="of:=[.D1720]-[.D171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13" office:value-type="float" office:value="22347" calcext:value-type="float">
            <text:p>22347</text:p>
          </table:table-cell>
          <table:table-cell office:value-type="float" office:value="8640000" calcext:value-type="float">
            <text:p>8640000</text:p>
          </table:table-cell>
          <table:table-cell table:formula="of:=[.B1720]/[.C1720]" office:value-type="float" office:value="0.00258645833333333" calcext:value-type="float">
            <text:p>0,00258645833333333000</text:p>
          </table:table-cell>
          <table:table-cell table:formula="of:=[.D1721]-[.D17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13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1721]/[.C1721]" office:value-type="float" office:value="0.00258796296296296" calcext:value-type="float">
            <text:p>0,00258796296296296000</text:p>
          </table:table-cell>
          <table:table-cell table:formula="of:=[.D1722]-[.D17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13" office:value-type="float" office:value="22373" calcext:value-type="float">
            <text:p>22373</text:p>
          </table:table-cell>
          <table:table-cell office:value-type="float" office:value="8640000" calcext:value-type="float">
            <text:p>8640000</text:p>
          </table:table-cell>
          <table:table-cell table:formula="of:=[.B1722]/[.C1722]" office:value-type="float" office:value="0.00258946759259259" calcext:value-type="float">
            <text:p>0,00258946759259259000</text:p>
          </table:table-cell>
          <table:table-cell table:formula="of:=[.D1723]-[.D172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13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1723]/[.C1723]" office:value-type="float" office:value="0.00259097222222222" calcext:value-type="float">
            <text:p>0,00259097222222222000</text:p>
          </table:table-cell>
          <table:table-cell table:formula="of:=[.D1724]-[.D172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13" office:value-type="float" office:value="22399" calcext:value-type="float">
            <text:p>22399</text:p>
          </table:table-cell>
          <table:table-cell office:value-type="float" office:value="8640000" calcext:value-type="float">
            <text:p>8640000</text:p>
          </table:table-cell>
          <table:table-cell table:formula="of:=[.B1724]/[.C1724]" office:value-type="float" office:value="0.00259247685185185" calcext:value-type="float">
            <text:p>0,00259247685185185000</text:p>
          </table:table-cell>
          <table:table-cell table:formula="of:=[.D1725]-[.D17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13" office:value-type="float" office:value="22412" calcext:value-type="float">
            <text:p>22412</text:p>
          </table:table-cell>
          <table:table-cell office:value-type="float" office:value="8640000" calcext:value-type="float">
            <text:p>8640000</text:p>
          </table:table-cell>
          <table:table-cell table:formula="of:=[.B1725]/[.C1725]" office:value-type="float" office:value="0.00259398148148148" calcext:value-type="float">
            <text:p>0,00259398148148148000</text:p>
          </table:table-cell>
          <table:table-cell table:formula="of:=[.D1726]-[.D172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13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1726]/[.C1726]" office:value-type="float" office:value="0.00259548611111111" calcext:value-type="float">
            <text:p>0,00259548611111111000</text:p>
          </table:table-cell>
          <table:table-cell table:formula="of:=[.D1727]-[.D172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13" office:value-type="float" office:value="22438" calcext:value-type="float">
            <text:p>22438</text:p>
          </table:table-cell>
          <table:table-cell office:value-type="float" office:value="8640000" calcext:value-type="float">
            <text:p>8640000</text:p>
          </table:table-cell>
          <table:table-cell table:formula="of:=[.B1727]/[.C1727]" office:value-type="float" office:value="0.00259699074074074" calcext:value-type="float">
            <text:p>0,00259699074074074000</text:p>
          </table:table-cell>
          <table:table-cell table:formula="of:=[.D1728]-[.D172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13" office:value-type="float" office:value="22451" calcext:value-type="float">
            <text:p>22451</text:p>
          </table:table-cell>
          <table:table-cell office:value-type="float" office:value="8640000" calcext:value-type="float">
            <text:p>8640000</text:p>
          </table:table-cell>
          <table:table-cell table:formula="of:=[.B1728]/[.C1728]" office:value-type="float" office:value="0.00259849537037037" calcext:value-type="float">
            <text:p>0,00259849537037037000</text:p>
          </table:table-cell>
          <table:table-cell table:formula="of:=[.D1729]-[.D17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13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1729]/[.C1729]" office:value-type="float" office:value="0.0026" calcext:value-type="float">
            <text:p>0,00260000000000000000</text:p>
          </table:table-cell>
          <table:table-cell table:formula="of:=[.D1730]-[.D172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13" office:value-type="float" office:value="22477" calcext:value-type="float">
            <text:p>22477</text:p>
          </table:table-cell>
          <table:table-cell office:value-type="float" office:value="8640000" calcext:value-type="float">
            <text:p>8640000</text:p>
          </table:table-cell>
          <table:table-cell table:formula="of:=[.B1730]/[.C1730]" office:value-type="float" office:value="0.00260150462962963" calcext:value-type="float">
            <text:p>0,00260150462962963000</text:p>
          </table:table-cell>
          <table:table-cell table:formula="of:=[.D1731]-[.D173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13" office:value-type="float" office:value="22490" calcext:value-type="float">
            <text:p>22490</text:p>
          </table:table-cell>
          <table:table-cell office:value-type="float" office:value="8640000" calcext:value-type="float">
            <text:p>8640000</text:p>
          </table:table-cell>
          <table:table-cell table:formula="of:=[.B1731]/[.C1731]" office:value-type="float" office:value="0.00260300925925926" calcext:value-type="float">
            <text:p>0,00260300925925926000</text:p>
          </table:table-cell>
          <table:table-cell table:formula="of:=[.D1732]-[.D17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13" office:value-type="float" office:value="22503" calcext:value-type="float">
            <text:p>22503</text:p>
          </table:table-cell>
          <table:table-cell office:value-type="float" office:value="8640000" calcext:value-type="float">
            <text:p>8640000</text:p>
          </table:table-cell>
          <table:table-cell table:formula="of:=[.B1732]/[.C1732]" office:value-type="float" office:value="0.00260451388888889" calcext:value-type="float">
            <text:p>0,00260451388888889000</text:p>
          </table:table-cell>
          <table:table-cell table:formula="of:=[.D1733]-[.D17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13" office:value-type="float" office:value="22516" calcext:value-type="float">
            <text:p>22516</text:p>
          </table:table-cell>
          <table:table-cell office:value-type="float" office:value="8640000" calcext:value-type="float">
            <text:p>8640000</text:p>
          </table:table-cell>
          <table:table-cell table:formula="of:=[.B1733]/[.C1733]" office:value-type="float" office:value="0.00260601851851852" calcext:value-type="float">
            <text:p>0,00260601851851852000</text:p>
          </table:table-cell>
          <table:table-cell table:formula="of:=[.D1734]-[.D173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13" office:value-type="float" office:value="22529" calcext:value-type="float">
            <text:p>22529</text:p>
          </table:table-cell>
          <table:table-cell office:value-type="float" office:value="8640000" calcext:value-type="float">
            <text:p>8640000</text:p>
          </table:table-cell>
          <table:table-cell table:formula="of:=[.B1734]/[.C1734]" office:value-type="float" office:value="0.00260752314814815" calcext:value-type="float">
            <text:p>0,00260752314814815000</text:p>
          </table:table-cell>
          <table:table-cell table:formula="of:=[.D1735]-[.D173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13" office:value-type="float" office:value="22542" calcext:value-type="float">
            <text:p>22542</text:p>
          </table:table-cell>
          <table:table-cell office:value-type="float" office:value="8640000" calcext:value-type="float">
            <text:p>8640000</text:p>
          </table:table-cell>
          <table:table-cell table:formula="of:=[.B1735]/[.C1735]" office:value-type="float" office:value="0.00260902777777778" calcext:value-type="float">
            <text:p>0,00260902777777778000</text:p>
          </table:table-cell>
          <table:table-cell table:formula="of:=[.D1736]-[.D17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13" office:value-type="float" office:value="22555" calcext:value-type="float">
            <text:p>22555</text:p>
          </table:table-cell>
          <table:table-cell office:value-type="float" office:value="8640000" calcext:value-type="float">
            <text:p>8640000</text:p>
          </table:table-cell>
          <table:table-cell table:formula="of:=[.B1736]/[.C1736]" office:value-type="float" office:value="0.00261053240740741" calcext:value-type="float">
            <text:p>0,00261053240740741000</text:p>
          </table:table-cell>
          <table:table-cell table:formula="of:=[.D1737]-[.D173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13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1737]/[.C1737]" office:value-type="float" office:value="0.00261203703703704" calcext:value-type="float">
            <text:p>0,00261203703703704000</text:p>
          </table:table-cell>
          <table:table-cell table:formula="of:=[.D1738]-[.D173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13" office:value-type="float" office:value="22581" calcext:value-type="float">
            <text:p>22581</text:p>
          </table:table-cell>
          <table:table-cell office:value-type="float" office:value="8640000" calcext:value-type="float">
            <text:p>8640000</text:p>
          </table:table-cell>
          <table:table-cell table:formula="of:=[.B1738]/[.C1738]" office:value-type="float" office:value="0.00261354166666667" calcext:value-type="float">
            <text:p>0,00261354166666667000</text:p>
          </table:table-cell>
          <table:table-cell table:formula="of:=[.D1739]-[.D173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13" office:value-type="float" office:value="22594" calcext:value-type="float">
            <text:p>22594</text:p>
          </table:table-cell>
          <table:table-cell office:value-type="float" office:value="8640000" calcext:value-type="float">
            <text:p>8640000</text:p>
          </table:table-cell>
          <table:table-cell table:formula="of:=[.B1739]/[.C1739]" office:value-type="float" office:value="0.0026150462962963" calcext:value-type="float">
            <text:p>0,00261504629629630000</text:p>
          </table:table-cell>
          <table:table-cell table:formula="of:=[.D1740]-[.D17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13" office:value-type="float" office:value="22607" calcext:value-type="float">
            <text:p>22607</text:p>
          </table:table-cell>
          <table:table-cell office:value-type="float" office:value="8640000" calcext:value-type="float">
            <text:p>8640000</text:p>
          </table:table-cell>
          <table:table-cell table:formula="of:=[.B1740]/[.C1740]" office:value-type="float" office:value="0.00261655092592593" calcext:value-type="float">
            <text:p>0,00261655092592593000</text:p>
          </table:table-cell>
          <table:table-cell table:formula="of:=[.D1741]-[.D174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13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1741]/[.C1741]" office:value-type="float" office:value="0.00261805555555556" calcext:value-type="float">
            <text:p>0,00261805555555556000</text:p>
          </table:table-cell>
          <table:table-cell table:formula="of:=[.D1742]-[.D174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13" office:value-type="float" office:value="22633" calcext:value-type="float">
            <text:p>22633</text:p>
          </table:table-cell>
          <table:table-cell office:value-type="float" office:value="8640000" calcext:value-type="float">
            <text:p>8640000</text:p>
          </table:table-cell>
          <table:table-cell table:formula="of:=[.B1742]/[.C1742]" office:value-type="float" office:value="0.00261956018518519" calcext:value-type="float">
            <text:p>0,00261956018518519000</text:p>
          </table:table-cell>
          <table:table-cell table:formula="of:=[.D1743]-[.D17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13" office:value-type="float" office:value="22646" calcext:value-type="float">
            <text:p>22646</text:p>
          </table:table-cell>
          <table:table-cell office:value-type="float" office:value="8640000" calcext:value-type="float">
            <text:p>8640000</text:p>
          </table:table-cell>
          <table:table-cell table:formula="of:=[.B1743]/[.C1743]" office:value-type="float" office:value="0.00262106481481482" calcext:value-type="float">
            <text:p>0,00262106481481482000</text:p>
          </table:table-cell>
          <table:table-cell table:formula="of:=[.D1744]-[.D17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13" office:value-type="float" office:value="22659" calcext:value-type="float">
            <text:p>22659</text:p>
          </table:table-cell>
          <table:table-cell office:value-type="float" office:value="8640000" calcext:value-type="float">
            <text:p>8640000</text:p>
          </table:table-cell>
          <table:table-cell table:formula="of:=[.B1744]/[.C1744]" office:value-type="float" office:value="0.00262256944444444" calcext:value-type="float">
            <text:p>0,00262256944444444000</text:p>
          </table:table-cell>
          <table:table-cell table:formula="of:=[.D1745]-[.D174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13" office:value-type="float" office:value="22672" calcext:value-type="float">
            <text:p>22672</text:p>
          </table:table-cell>
          <table:table-cell office:value-type="float" office:value="8640000" calcext:value-type="float">
            <text:p>8640000</text:p>
          </table:table-cell>
          <table:table-cell table:formula="of:=[.B1745]/[.C1745]" office:value-type="float" office:value="0.00262407407407407" calcext:value-type="float">
            <text:p>0,00262407407407407000</text:p>
          </table:table-cell>
          <table:table-cell table:formula="of:=[.D1746]-[.D174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13" office:value-type="float" office:value="22685" calcext:value-type="float">
            <text:p>22685</text:p>
          </table:table-cell>
          <table:table-cell office:value-type="float" office:value="8640000" calcext:value-type="float">
            <text:p>8640000</text:p>
          </table:table-cell>
          <table:table-cell table:formula="of:=[.B1746]/[.C1746]" office:value-type="float" office:value="0.0026255787037037" calcext:value-type="float">
            <text:p>0,00262557870370370000</text:p>
          </table:table-cell>
          <table:table-cell table:formula="of:=[.D1747]-[.D17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13" office:value-type="float" office:value="22698" calcext:value-type="float">
            <text:p>22698</text:p>
          </table:table-cell>
          <table:table-cell office:value-type="float" office:value="8640000" calcext:value-type="float">
            <text:p>8640000</text:p>
          </table:table-cell>
          <table:table-cell table:formula="of:=[.B1747]/[.C1747]" office:value-type="float" office:value="0.00262708333333333" calcext:value-type="float">
            <text:p>0,00262708333333333000</text:p>
          </table:table-cell>
          <table:table-cell table:formula="of:=[.D1748]-[.D174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13" office:value-type="float" office:value="22711" calcext:value-type="float">
            <text:p>22711</text:p>
          </table:table-cell>
          <table:table-cell office:value-type="float" office:value="8640000" calcext:value-type="float">
            <text:p>8640000</text:p>
          </table:table-cell>
          <table:table-cell table:formula="of:=[.B1748]/[.C1748]" office:value-type="float" office:value="0.00262858796296296" calcext:value-type="float">
            <text:p>0,00262858796296296000</text:p>
          </table:table-cell>
          <table:table-cell table:formula="of:=[.D1749]-[.D174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13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1749]/[.C1749]" office:value-type="float" office:value="0.00263009259259259" calcext:value-type="float">
            <text:p>0,00263009259259259000</text:p>
          </table:table-cell>
          <table:table-cell table:formula="of:=[.D1750]-[.D174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13" office:value-type="float" office:value="22737" calcext:value-type="float">
            <text:p>22737</text:p>
          </table:table-cell>
          <table:table-cell office:value-type="float" office:value="8640000" calcext:value-type="float">
            <text:p>8640000</text:p>
          </table:table-cell>
          <table:table-cell table:formula="of:=[.B1750]/[.C1750]" office:value-type="float" office:value="0.00263159722222222" calcext:value-type="float">
            <text:p>0,00263159722222222000</text:p>
          </table:table-cell>
          <table:table-cell table:formula="of:=[.D1751]-[.D175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13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1751]/[.C1751]" office:value-type="float" office:value="0.00263310185185185" calcext:value-type="float">
            <text:p>0,00263310185185185000</text:p>
          </table:table-cell>
          <table:table-cell table:formula="of:=[.D1752]-[.D175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13" office:value-type="float" office:value="22763" calcext:value-type="float">
            <text:p>22763</text:p>
          </table:table-cell>
          <table:table-cell office:value-type="float" office:value="8640000" calcext:value-type="float">
            <text:p>8640000</text:p>
          </table:table-cell>
          <table:table-cell table:formula="of:=[.B1752]/[.C1752]" office:value-type="float" office:value="0.00263460648148148" calcext:value-type="float">
            <text:p>0,00263460648148148000</text:p>
          </table:table-cell>
          <table:table-cell table:formula="of:=[.D1753]-[.D175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13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1753]/[.C1753]" office:value-type="float" office:value="0.00263611111111111" calcext:value-type="float">
            <text:p>0,00263611111111111000</text:p>
          </table:table-cell>
          <table:table-cell table:formula="of:=[.D1754]-[.D175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13" office:value-type="float" office:value="22789" calcext:value-type="float">
            <text:p>22789</text:p>
          </table:table-cell>
          <table:table-cell office:value-type="float" office:value="8640000" calcext:value-type="float">
            <text:p>8640000</text:p>
          </table:table-cell>
          <table:table-cell table:formula="of:=[.B1754]/[.C1754]" office:value-type="float" office:value="0.00263761574074074" calcext:value-type="float">
            <text:p>0,00263761574074074000</text:p>
          </table:table-cell>
          <table:table-cell table:formula="of:=[.D1755]-[.D175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13" office:value-type="float" office:value="22802" calcext:value-type="float">
            <text:p>22802</text:p>
          </table:table-cell>
          <table:table-cell office:value-type="float" office:value="8640000" calcext:value-type="float">
            <text:p>8640000</text:p>
          </table:table-cell>
          <table:table-cell table:formula="of:=[.B1755]/[.C1755]" office:value-type="float" office:value="0.00263912037037037" calcext:value-type="float">
            <text:p>0,00263912037037037000</text:p>
          </table:table-cell>
          <table:table-cell table:formula="of:=[.D1756]-[.D175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13" office:value-type="float" office:value="22815" calcext:value-type="float">
            <text:p>22815</text:p>
          </table:table-cell>
          <table:table-cell office:value-type="float" office:value="8640000" calcext:value-type="float">
            <text:p>8640000</text:p>
          </table:table-cell>
          <table:table-cell table:formula="of:=[.B1756]/[.C1756]" office:value-type="float" office:value="0.002640625" calcext:value-type="float">
            <text:p>0,00264062500000000000</text:p>
          </table:table-cell>
          <table:table-cell table:formula="of:=[.D1757]-[.D175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13" office:value-type="float" office:value="22828" calcext:value-type="float">
            <text:p>22828</text:p>
          </table:table-cell>
          <table:table-cell office:value-type="float" office:value="8640000" calcext:value-type="float">
            <text:p>8640000</text:p>
          </table:table-cell>
          <table:table-cell table:formula="of:=[.B1757]/[.C1757]" office:value-type="float" office:value="0.00264212962962963" calcext:value-type="float">
            <text:p>0,00264212962962963000</text:p>
          </table:table-cell>
          <table:table-cell table:formula="of:=[.D1758]-[.D175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13" office:value-type="float" office:value="22841" calcext:value-type="float">
            <text:p>22841</text:p>
          </table:table-cell>
          <table:table-cell office:value-type="float" office:value="8640000" calcext:value-type="float">
            <text:p>8640000</text:p>
          </table:table-cell>
          <table:table-cell table:formula="of:=[.B1758]/[.C1758]" office:value-type="float" office:value="0.00264363425925926" calcext:value-type="float">
            <text:p>0,00264363425925926000</text:p>
          </table:table-cell>
          <table:table-cell table:formula="of:=[.D1759]-[.D175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13" office:value-type="float" office:value="22854" calcext:value-type="float">
            <text:p>22854</text:p>
          </table:table-cell>
          <table:table-cell office:value-type="float" office:value="8640000" calcext:value-type="float">
            <text:p>8640000</text:p>
          </table:table-cell>
          <table:table-cell table:formula="of:=[.B1759]/[.C1759]" office:value-type="float" office:value="0.00264513888888889" calcext:value-type="float">
            <text:p>0,00264513888888889000</text:p>
          </table:table-cell>
          <table:table-cell table:formula="of:=[.D1760]-[.D175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13" office:value-type="float" office:value="22867" calcext:value-type="float">
            <text:p>22867</text:p>
          </table:table-cell>
          <table:table-cell office:value-type="float" office:value="8640000" calcext:value-type="float">
            <text:p>8640000</text:p>
          </table:table-cell>
          <table:table-cell table:formula="of:=[.B1760]/[.C1760]" office:value-type="float" office:value="0.00264664351851852" calcext:value-type="float">
            <text:p>0,00264664351851852000</text:p>
          </table:table-cell>
          <table:table-cell table:formula="of:=[.D1761]-[.D176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13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1761]/[.C1761]" office:value-type="float" office:value="0.00264814814814815" calcext:value-type="float">
            <text:p>0,00264814814814815000</text:p>
          </table:table-cell>
          <table:table-cell table:formula="of:=[.D1762]-[.D176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13" office:value-type="float" office:value="22893" calcext:value-type="float">
            <text:p>22893</text:p>
          </table:table-cell>
          <table:table-cell office:value-type="float" office:value="8640000" calcext:value-type="float">
            <text:p>8640000</text:p>
          </table:table-cell>
          <table:table-cell table:formula="of:=[.B1762]/[.C1762]" office:value-type="float" office:value="0.00264965277777778" calcext:value-type="float">
            <text:p>0,00264965277777778000</text:p>
          </table:table-cell>
          <table:table-cell table:formula="of:=[.D1763]-[.D176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13" office:value-type="float" office:value="22906" calcext:value-type="float">
            <text:p>22906</text:p>
          </table:table-cell>
          <table:table-cell office:value-type="float" office:value="8640000" calcext:value-type="float">
            <text:p>8640000</text:p>
          </table:table-cell>
          <table:table-cell table:formula="of:=[.B1763]/[.C1763]" office:value-type="float" office:value="0.00265115740740741" calcext:value-type="float">
            <text:p>0,00265115740740741000</text:p>
          </table:table-cell>
          <table:table-cell table:formula="of:=[.D1764]-[.D176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13" office:value-type="float" office:value="22919" calcext:value-type="float">
            <text:p>22919</text:p>
          </table:table-cell>
          <table:table-cell office:value-type="float" office:value="8640000" calcext:value-type="float">
            <text:p>8640000</text:p>
          </table:table-cell>
          <table:table-cell table:formula="of:=[.B1764]/[.C1764]" office:value-type="float" office:value="0.00265266203703704" calcext:value-type="float">
            <text:p>0,00265266203703704000</text:p>
          </table:table-cell>
          <table:table-cell table:formula="of:=[.D1765]-[.D176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13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1765]/[.C1765]" office:value-type="float" office:value="0.00265416666666667" calcext:value-type="float">
            <text:p>0,00265416666666667000</text:p>
          </table:table-cell>
          <table:table-cell table:formula="of:=[.D1766]-[.D176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13" office:value-type="float" office:value="22945" calcext:value-type="float">
            <text:p>22945</text:p>
          </table:table-cell>
          <table:table-cell office:value-type="float" office:value="8640000" calcext:value-type="float">
            <text:p>8640000</text:p>
          </table:table-cell>
          <table:table-cell table:formula="of:=[.B1766]/[.C1766]" office:value-type="float" office:value="0.0026556712962963" calcext:value-type="float">
            <text:p>0,00265567129629630000</text:p>
          </table:table-cell>
          <table:table-cell table:formula="of:=[.D1767]-[.D176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13" office:value-type="float" office:value="22958" calcext:value-type="float">
            <text:p>22958</text:p>
          </table:table-cell>
          <table:table-cell office:value-type="float" office:value="8640000" calcext:value-type="float">
            <text:p>8640000</text:p>
          </table:table-cell>
          <table:table-cell table:formula="of:=[.B1767]/[.C1767]" office:value-type="float" office:value="0.00265717592592593" calcext:value-type="float">
            <text:p>0,00265717592592593000</text:p>
          </table:table-cell>
          <table:table-cell table:formula="of:=[.D1768]-[.D176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13" office:value-type="float" office:value="22971" calcext:value-type="float">
            <text:p>22971</text:p>
          </table:table-cell>
          <table:table-cell office:value-type="float" office:value="8640000" calcext:value-type="float">
            <text:p>8640000</text:p>
          </table:table-cell>
          <table:table-cell table:formula="of:=[.B1768]/[.C1768]" office:value-type="float" office:value="0.00265868055555556" calcext:value-type="float">
            <text:p>0,00265868055555556000</text:p>
          </table:table-cell>
          <table:table-cell table:formula="of:=[.D1769]-[.D176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13" office:value-type="float" office:value="22984" calcext:value-type="float">
            <text:p>22984</text:p>
          </table:table-cell>
          <table:table-cell office:value-type="float" office:value="8640000" calcext:value-type="float">
            <text:p>8640000</text:p>
          </table:table-cell>
          <table:table-cell table:formula="of:=[.B1769]/[.C1769]" office:value-type="float" office:value="0.00266018518518519" calcext:value-type="float">
            <text:p>0,00266018518518519000</text:p>
          </table:table-cell>
          <table:table-cell table:formula="of:=[.D1770]-[.D176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13" office:value-type="float" office:value="22997" calcext:value-type="float">
            <text:p>22997</text:p>
          </table:table-cell>
          <table:table-cell office:value-type="float" office:value="8640000" calcext:value-type="float">
            <text:p>8640000</text:p>
          </table:table-cell>
          <table:table-cell table:formula="of:=[.B1770]/[.C1770]" office:value-type="float" office:value="0.00266168981481481" calcext:value-type="float">
            <text:p>0,00266168981481481000</text:p>
          </table:table-cell>
          <table:table-cell table:formula="of:=[.D1771]-[.D177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13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1771]/[.C1771]" office:value-type="float" office:value="0.00266319444444444" calcext:value-type="float">
            <text:p>0,00266319444444444000</text:p>
          </table:table-cell>
          <table:table-cell table:formula="of:=[.D1772]-[.D177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13" office:value-type="float" office:value="23023" calcext:value-type="float">
            <text:p>23023</text:p>
          </table:table-cell>
          <table:table-cell office:value-type="float" office:value="8640000" calcext:value-type="float">
            <text:p>8640000</text:p>
          </table:table-cell>
          <table:table-cell table:formula="of:=[.B1772]/[.C1772]" office:value-type="float" office:value="0.00266469907407407" calcext:value-type="float">
            <text:p>0,00266469907407407000</text:p>
          </table:table-cell>
          <table:table-cell table:formula="of:=[.D1773]-[.D177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13" office:value-type="float" office:value="23036" calcext:value-type="float">
            <text:p>23036</text:p>
          </table:table-cell>
          <table:table-cell office:value-type="float" office:value="8640000" calcext:value-type="float">
            <text:p>8640000</text:p>
          </table:table-cell>
          <table:table-cell table:formula="of:=[.B1773]/[.C1773]" office:value-type="float" office:value="0.0026662037037037" calcext:value-type="float">
            <text:p>0,00266620370370370000</text:p>
          </table:table-cell>
          <table:table-cell table:formula="of:=[.D1774]-[.D177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13" office:value-type="float" office:value="23049" calcext:value-type="float">
            <text:p>23049</text:p>
          </table:table-cell>
          <table:table-cell office:value-type="float" office:value="8640000" calcext:value-type="float">
            <text:p>8640000</text:p>
          </table:table-cell>
          <table:table-cell table:formula="of:=[.B1774]/[.C1774]" office:value-type="float" office:value="0.00266770833333333" calcext:value-type="float">
            <text:p>0,00266770833333333000</text:p>
          </table:table-cell>
          <table:table-cell table:formula="of:=[.D1775]-[.D177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13" office:value-type="float" office:value="23062" calcext:value-type="float">
            <text:p>23062</text:p>
          </table:table-cell>
          <table:table-cell office:value-type="float" office:value="8640000" calcext:value-type="float">
            <text:p>8640000</text:p>
          </table:table-cell>
          <table:table-cell table:formula="of:=[.B1775]/[.C1775]" office:value-type="float" office:value="0.00266921296296296" calcext:value-type="float">
            <text:p>0,00266921296296296000</text:p>
          </table:table-cell>
          <table:table-cell table:formula="of:=[.D1776]-[.D177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13" office:value-type="float" office:value="23075" calcext:value-type="float">
            <text:p>23075</text:p>
          </table:table-cell>
          <table:table-cell office:value-type="float" office:value="8640000" calcext:value-type="float">
            <text:p>8640000</text:p>
          </table:table-cell>
          <table:table-cell table:formula="of:=[.B1776]/[.C1776]" office:value-type="float" office:value="0.00267071759259259" calcext:value-type="float">
            <text:p>0,00267071759259259000</text:p>
          </table:table-cell>
          <table:table-cell table:formula="of:=[.D1777]-[.D177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13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1777]/[.C1777]" office:value-type="float" office:value="0.00267222222222222" calcext:value-type="float">
            <text:p>0,00267222222222222000</text:p>
          </table:table-cell>
          <table:table-cell table:formula="of:=[.D1778]-[.D177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13" office:value-type="float" office:value="23101" calcext:value-type="float">
            <text:p>23101</text:p>
          </table:table-cell>
          <table:table-cell office:value-type="float" office:value="8640000" calcext:value-type="float">
            <text:p>8640000</text:p>
          </table:table-cell>
          <table:table-cell table:formula="of:=[.B1778]/[.C1778]" office:value-type="float" office:value="0.00267372685185185" calcext:value-type="float">
            <text:p>0,00267372685185185000</text:p>
          </table:table-cell>
          <table:table-cell table:formula="of:=[.D1779]-[.D177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13" office:value-type="float" office:value="23114" calcext:value-type="float">
            <text:p>23114</text:p>
          </table:table-cell>
          <table:table-cell office:value-type="float" office:value="8640000" calcext:value-type="float">
            <text:p>8640000</text:p>
          </table:table-cell>
          <table:table-cell table:formula="of:=[.B1779]/[.C1779]" office:value-type="float" office:value="0.00267523148148148" calcext:value-type="float">
            <text:p>0,00267523148148148000</text:p>
          </table:table-cell>
          <table:table-cell table:formula="of:=[.D1780]-[.D177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13" office:value-type="float" office:value="23127" calcext:value-type="float">
            <text:p>23127</text:p>
          </table:table-cell>
          <table:table-cell office:value-type="float" office:value="8640000" calcext:value-type="float">
            <text:p>8640000</text:p>
          </table:table-cell>
          <table:table-cell table:formula="of:=[.B1780]/[.C1780]" office:value-type="float" office:value="0.00267673611111111" calcext:value-type="float">
            <text:p>0,00267673611111111000</text:p>
          </table:table-cell>
          <table:table-cell table:formula="of:=[.D1781]-[.D178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13" office:value-type="float" office:value="23140" calcext:value-type="float">
            <text:p>23140</text:p>
          </table:table-cell>
          <table:table-cell office:value-type="float" office:value="8640000" calcext:value-type="float">
            <text:p>8640000</text:p>
          </table:table-cell>
          <table:table-cell table:formula="of:=[.B1781]/[.C1781]" office:value-type="float" office:value="0.00267824074074074" calcext:value-type="float">
            <text:p>0,00267824074074074000</text:p>
          </table:table-cell>
          <table:table-cell table:formula="of:=[.D1782]-[.D178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13" office:value-type="float" office:value="23153" calcext:value-type="float">
            <text:p>23153</text:p>
          </table:table-cell>
          <table:table-cell office:value-type="float" office:value="8640000" calcext:value-type="float">
            <text:p>8640000</text:p>
          </table:table-cell>
          <table:table-cell table:formula="of:=[.B1782]/[.C1782]" office:value-type="float" office:value="0.00267974537037037" calcext:value-type="float">
            <text:p>0,00267974537037037000</text:p>
          </table:table-cell>
          <table:table-cell table:formula="of:=[.D1783]-[.D178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13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1783]/[.C1783]" office:value-type="float" office:value="0.00268125" calcext:value-type="float">
            <text:p>0,00268125000000000000</text:p>
          </table:table-cell>
          <table:table-cell table:formula="of:=[.D1784]-[.D178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13" office:value-type="float" office:value="23179" calcext:value-type="float">
            <text:p>23179</text:p>
          </table:table-cell>
          <table:table-cell office:value-type="float" office:value="8640000" calcext:value-type="float">
            <text:p>8640000</text:p>
          </table:table-cell>
          <table:table-cell table:formula="of:=[.B1784]/[.C1784]" office:value-type="float" office:value="0.00268275462962963" calcext:value-type="float">
            <text:p>0,00268275462962963000</text:p>
          </table:table-cell>
          <table:table-cell table:formula="of:=[.D1785]-[.D178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13" office:value-type="float" office:value="23192" calcext:value-type="float">
            <text:p>23192</text:p>
          </table:table-cell>
          <table:table-cell office:value-type="float" office:value="8640000" calcext:value-type="float">
            <text:p>8640000</text:p>
          </table:table-cell>
          <table:table-cell table:formula="of:=[.B1785]/[.C1785]" office:value-type="float" office:value="0.00268425925925926" calcext:value-type="float">
            <text:p>0,00268425925925926000</text:p>
          </table:table-cell>
          <table:table-cell table:formula="of:=[.D1786]-[.D178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13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1786]/[.C1786]" office:value-type="float" office:value="0.00268576388888889" calcext:value-type="float">
            <text:p>0,00268576388888889000</text:p>
          </table:table-cell>
          <table:table-cell table:formula="of:=[.D1787]-[.D178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13" office:value-type="float" office:value="23218" calcext:value-type="float">
            <text:p>23218</text:p>
          </table:table-cell>
          <table:table-cell office:value-type="float" office:value="8640000" calcext:value-type="float">
            <text:p>8640000</text:p>
          </table:table-cell>
          <table:table-cell table:formula="of:=[.B1787]/[.C1787]" office:value-type="float" office:value="0.00268726851851852" calcext:value-type="float">
            <text:p>0,00268726851851852000</text:p>
          </table:table-cell>
          <table:table-cell table:formula="of:=[.D1788]-[.D178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13" office:value-type="float" office:value="23231" calcext:value-type="float">
            <text:p>23231</text:p>
          </table:table-cell>
          <table:table-cell office:value-type="float" office:value="8640000" calcext:value-type="float">
            <text:p>8640000</text:p>
          </table:table-cell>
          <table:table-cell table:formula="of:=[.B1788]/[.C1788]" office:value-type="float" office:value="0.00268877314814815" calcext:value-type="float">
            <text:p>0,00268877314814815000</text:p>
          </table:table-cell>
          <table:table-cell table:formula="of:=[.D1789]-[.D178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13" office:value-type="float" office:value="23244" calcext:value-type="float">
            <text:p>23244</text:p>
          </table:table-cell>
          <table:table-cell office:value-type="float" office:value="8640000" calcext:value-type="float">
            <text:p>8640000</text:p>
          </table:table-cell>
          <table:table-cell table:formula="of:=[.B1789]/[.C1789]" office:value-type="float" office:value="0.00269027777777778" calcext:value-type="float">
            <text:p>0,00269027777777778000</text:p>
          </table:table-cell>
          <table:table-cell table:formula="of:=[.D1790]-[.D178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13" office:value-type="float" office:value="23257" calcext:value-type="float">
            <text:p>23257</text:p>
          </table:table-cell>
          <table:table-cell office:value-type="float" office:value="8640000" calcext:value-type="float">
            <text:p>8640000</text:p>
          </table:table-cell>
          <table:table-cell table:formula="of:=[.B1790]/[.C1790]" office:value-type="float" office:value="0.00269178240740741" calcext:value-type="float">
            <text:p>0,00269178240740741000</text:p>
          </table:table-cell>
          <table:table-cell table:formula="of:=[.D1791]-[.D179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13" office:value-type="float" office:value="23270" calcext:value-type="float">
            <text:p>23270</text:p>
          </table:table-cell>
          <table:table-cell office:value-type="float" office:value="8640000" calcext:value-type="float">
            <text:p>8640000</text:p>
          </table:table-cell>
          <table:table-cell table:formula="of:=[.B1791]/[.C1791]" office:value-type="float" office:value="0.00269328703703704" calcext:value-type="float">
            <text:p>0,00269328703703704000</text:p>
          </table:table-cell>
          <table:table-cell table:formula="of:=[.D1792]-[.D179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13" office:value-type="float" office:value="23283" calcext:value-type="float">
            <text:p>23283</text:p>
          </table:table-cell>
          <table:table-cell office:value-type="float" office:value="8640000" calcext:value-type="float">
            <text:p>8640000</text:p>
          </table:table-cell>
          <table:table-cell table:formula="of:=[.B1792]/[.C1792]" office:value-type="float" office:value="0.00269479166666667" calcext:value-type="float">
            <text:p>0,00269479166666667000</text:p>
          </table:table-cell>
          <table:table-cell table:formula="of:=[.D1793]-[.D179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13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1793]/[.C1793]" office:value-type="float" office:value="0.0026962962962963" calcext:value-type="float">
            <text:p>0,00269629629629630000</text:p>
          </table:table-cell>
          <table:table-cell table:formula="of:=[.D1794]-[.D179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13" office:value-type="float" office:value="23309" calcext:value-type="float">
            <text:p>23309</text:p>
          </table:table-cell>
          <table:table-cell office:value-type="float" office:value="8640000" calcext:value-type="float">
            <text:p>8640000</text:p>
          </table:table-cell>
          <table:table-cell table:formula="of:=[.B1794]/[.C1794]" office:value-type="float" office:value="0.00269780092592593" calcext:value-type="float">
            <text:p>0,00269780092592593000</text:p>
          </table:table-cell>
          <table:table-cell table:formula="of:=[.D1795]-[.D179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13" office:value-type="float" office:value="23322" calcext:value-type="float">
            <text:p>23322</text:p>
          </table:table-cell>
          <table:table-cell office:value-type="float" office:value="8640000" calcext:value-type="float">
            <text:p>8640000</text:p>
          </table:table-cell>
          <table:table-cell table:formula="of:=[.B1795]/[.C1795]" office:value-type="float" office:value="0.00269930555555556" calcext:value-type="float">
            <text:p>0,00269930555555556000</text:p>
          </table:table-cell>
          <table:table-cell table:formula="of:=[.D1796]-[.D179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13" office:value-type="float" office:value="23335" calcext:value-type="float">
            <text:p>23335</text:p>
          </table:table-cell>
          <table:table-cell office:value-type="float" office:value="8640000" calcext:value-type="float">
            <text:p>8640000</text:p>
          </table:table-cell>
          <table:table-cell table:formula="of:=[.B1796]/[.C1796]" office:value-type="float" office:value="0.00270081018518519" calcext:value-type="float">
            <text:p>0,00270081018518519000</text:p>
          </table:table-cell>
          <table:table-cell table:formula="of:=[.D1797]-[.D179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13" office:value-type="float" office:value="23348" calcext:value-type="float">
            <text:p>23348</text:p>
          </table:table-cell>
          <table:table-cell office:value-type="float" office:value="8640000" calcext:value-type="float">
            <text:p>8640000</text:p>
          </table:table-cell>
          <table:table-cell table:formula="of:=[.B1797]/[.C1797]" office:value-type="float" office:value="0.00270231481481482" calcext:value-type="float">
            <text:p>0,00270231481481482000</text:p>
          </table:table-cell>
          <table:table-cell table:formula="of:=[.D1798]-[.D179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13" office:value-type="float" office:value="23361" calcext:value-type="float">
            <text:p>23361</text:p>
          </table:table-cell>
          <table:table-cell office:value-type="float" office:value="8640000" calcext:value-type="float">
            <text:p>8640000</text:p>
          </table:table-cell>
          <table:table-cell table:formula="of:=[.B1798]/[.C1798]" office:value-type="float" office:value="0.00270381944444444" calcext:value-type="float">
            <text:p>0,00270381944444444000</text:p>
          </table:table-cell>
          <table:table-cell table:formula="of:=[.D1799]-[.D179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13" office:value-type="float" office:value="23374" calcext:value-type="float">
            <text:p>23374</text:p>
          </table:table-cell>
          <table:table-cell office:value-type="float" office:value="8640000" calcext:value-type="float">
            <text:p>8640000</text:p>
          </table:table-cell>
          <table:table-cell table:formula="of:=[.B1799]/[.C1799]" office:value-type="float" office:value="0.00270532407407407" calcext:value-type="float">
            <text:p>0,00270532407407407000</text:p>
          </table:table-cell>
          <table:table-cell table:formula="of:=[.D1800]-[.D179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13" office:value-type="float" office:value="23387" calcext:value-type="float">
            <text:p>23387</text:p>
          </table:table-cell>
          <table:table-cell office:value-type="float" office:value="8640000" calcext:value-type="float">
            <text:p>8640000</text:p>
          </table:table-cell>
          <table:table-cell table:formula="of:=[.B1800]/[.C1800]" office:value-type="float" office:value="0.0027068287037037" calcext:value-type="float">
            <text:p>0,00270682870370370000</text:p>
          </table:table-cell>
          <table:table-cell table:formula="of:=[.D1801]-[.D180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13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1801]/[.C1801]" office:value-type="float" office:value="0.00270833333333333" calcext:value-type="float">
            <text:p>0,00270833333333333000</text:p>
          </table:table-cell>
          <table:table-cell table:formula="of:=[.D1802]-[.D180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13" office:value-type="float" office:value="23413" calcext:value-type="float">
            <text:p>23413</text:p>
          </table:table-cell>
          <table:table-cell office:value-type="float" office:value="8640000" calcext:value-type="float">
            <text:p>8640000</text:p>
          </table:table-cell>
          <table:table-cell table:formula="of:=[.B1802]/[.C1802]" office:value-type="float" office:value="0.00270983796296296" calcext:value-type="float">
            <text:p>0,00270983796296296000</text:p>
          </table:table-cell>
          <table:table-cell table:formula="of:=[.D1803]-[.D180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13" office:value-type="float" office:value="23426" calcext:value-type="float">
            <text:p>23426</text:p>
          </table:table-cell>
          <table:table-cell office:value-type="float" office:value="8640000" calcext:value-type="float">
            <text:p>8640000</text:p>
          </table:table-cell>
          <table:table-cell table:formula="of:=[.B1803]/[.C1803]" office:value-type="float" office:value="0.00271134259259259" calcext:value-type="float">
            <text:p>0,00271134259259259000</text:p>
          </table:table-cell>
          <table:table-cell table:formula="of:=[.D1804]-[.D180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13" office:value-type="float" office:value="23439" calcext:value-type="float">
            <text:p>23439</text:p>
          </table:table-cell>
          <table:table-cell office:value-type="float" office:value="8640000" calcext:value-type="float">
            <text:p>8640000</text:p>
          </table:table-cell>
          <table:table-cell table:formula="of:=[.B1804]/[.C1804]" office:value-type="float" office:value="0.00271284722222222" calcext:value-type="float">
            <text:p>0,00271284722222222000</text:p>
          </table:table-cell>
          <table:table-cell table:formula="of:=[.D1805]-[.D180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13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1805]/[.C1805]" office:value-type="float" office:value="0.00271435185185185" calcext:value-type="float">
            <text:p>0,00271435185185185000</text:p>
          </table:table-cell>
          <table:table-cell table:formula="of:=[.D1806]-[.D180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13" office:value-type="float" office:value="23465" calcext:value-type="float">
            <text:p>23465</text:p>
          </table:table-cell>
          <table:table-cell office:value-type="float" office:value="8640000" calcext:value-type="float">
            <text:p>8640000</text:p>
          </table:table-cell>
          <table:table-cell table:formula="of:=[.B1806]/[.C1806]" office:value-type="float" office:value="0.00271585648148148" calcext:value-type="float">
            <text:p>0,00271585648148148000</text:p>
          </table:table-cell>
          <table:table-cell table:formula="of:=[.D1807]-[.D180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13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1807]/[.C1807]" office:value-type="float" office:value="0.00271736111111111" calcext:value-type="float">
            <text:p>0,00271736111111111000</text:p>
          </table:table-cell>
          <table:table-cell table:formula="of:=[.D1808]-[.D1807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13" office:value-type="float" office:value="23491" calcext:value-type="float">
            <text:p>23491</text:p>
          </table:table-cell>
          <table:table-cell office:value-type="float" office:value="8640000" calcext:value-type="float">
            <text:p>8640000</text:p>
          </table:table-cell>
          <table:table-cell table:formula="of:=[.B1808]/[.C1808]" office:value-type="float" office:value="0.00271886574074074" calcext:value-type="float">
            <text:p>0,00271886574074074000</text:p>
          </table:table-cell>
          <table:table-cell table:formula="of:=[.D1809]-[.D180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13" office:value-type="float" office:value="23504" calcext:value-type="float">
            <text:p>23504</text:p>
          </table:table-cell>
          <table:table-cell office:value-type="float" office:value="8640000" calcext:value-type="float">
            <text:p>8640000</text:p>
          </table:table-cell>
          <table:table-cell table:formula="of:=[.B1809]/[.C1809]" office:value-type="float" office:value="0.00272037037037037" calcext:value-type="float">
            <text:p>0,00272037037037037000</text:p>
          </table:table-cell>
          <table:table-cell table:formula="of:=[.D1810]-[.D180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13" office:value-type="float" office:value="23517" calcext:value-type="float">
            <text:p>23517</text:p>
          </table:table-cell>
          <table:table-cell office:value-type="float" office:value="8640000" calcext:value-type="float">
            <text:p>8640000</text:p>
          </table:table-cell>
          <table:table-cell table:formula="of:=[.B1810]/[.C1810]" office:value-type="float" office:value="0.002721875" calcext:value-type="float">
            <text:p>0,00272187500000000000</text:p>
          </table:table-cell>
          <table:table-cell table:formula="of:=[.D1811]-[.D181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13" office:value-type="float" office:value="23530" calcext:value-type="float">
            <text:p>23530</text:p>
          </table:table-cell>
          <table:table-cell office:value-type="float" office:value="8640000" calcext:value-type="float">
            <text:p>8640000</text:p>
          </table:table-cell>
          <table:table-cell table:formula="of:=[.B1811]/[.C1811]" office:value-type="float" office:value="0.00272337962962963" calcext:value-type="float">
            <text:p>0,00272337962962963000</text:p>
          </table:table-cell>
          <table:table-cell table:formula="of:=[.D1812]-[.D1811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13" office:value-type="float" office:value="23543" calcext:value-type="float">
            <text:p>23543</text:p>
          </table:table-cell>
          <table:table-cell office:value-type="float" office:value="8640000" calcext:value-type="float">
            <text:p>8640000</text:p>
          </table:table-cell>
          <table:table-cell table:formula="of:=[.B1812]/[.C1812]" office:value-type="float" office:value="0.00272488425925926" calcext:value-type="float">
            <text:p>0,00272488425925926000</text:p>
          </table:table-cell>
          <table:table-cell table:formula="of:=[.D1813]-[.D181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13" office:value-type="float" office:value="23556" calcext:value-type="float">
            <text:p>23556</text:p>
          </table:table-cell>
          <table:table-cell office:value-type="float" office:value="8640000" calcext:value-type="float">
            <text:p>8640000</text:p>
          </table:table-cell>
          <table:table-cell table:formula="of:=[.B1813]/[.C1813]" office:value-type="float" office:value="0.00272638888888889" calcext:value-type="float">
            <text:p>0,00272638888888889000</text:p>
          </table:table-cell>
          <table:table-cell table:formula="of:=[.D1814]-[.D181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13" office:value-type="float" office:value="23569" calcext:value-type="float">
            <text:p>23569</text:p>
          </table:table-cell>
          <table:table-cell office:value-type="float" office:value="8640000" calcext:value-type="float">
            <text:p>8640000</text:p>
          </table:table-cell>
          <table:table-cell table:formula="of:=[.B1814]/[.C1814]" office:value-type="float" office:value="0.00272789351851852" calcext:value-type="float">
            <text:p>0,00272789351851852000</text:p>
          </table:table-cell>
          <table:table-cell table:formula="of:=[.D1815]-[.D181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13" office:value-type="float" office:value="23582" calcext:value-type="float">
            <text:p>23582</text:p>
          </table:table-cell>
          <table:table-cell office:value-type="float" office:value="8640000" calcext:value-type="float">
            <text:p>8640000</text:p>
          </table:table-cell>
          <table:table-cell table:formula="of:=[.B1815]/[.C1815]" office:value-type="float" office:value="0.00272939814814815" calcext:value-type="float">
            <text:p>0,00272939814814815000</text:p>
          </table:table-cell>
          <table:table-cell table:formula="of:=[.D1816]-[.D181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13" office:value-type="float" office:value="23595" calcext:value-type="float">
            <text:p>23595</text:p>
          </table:table-cell>
          <table:table-cell office:value-type="float" office:value="8640000" calcext:value-type="float">
            <text:p>8640000</text:p>
          </table:table-cell>
          <table:table-cell table:formula="of:=[.B1816]/[.C1816]" office:value-type="float" office:value="0.00273090277777778" calcext:value-type="float">
            <text:p>0,00273090277777778000</text:p>
          </table:table-cell>
          <table:table-cell table:formula="of:=[.D1817]-[.D181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13" office:value-type="float" office:value="23608" calcext:value-type="float">
            <text:p>23608</text:p>
          </table:table-cell>
          <table:table-cell office:value-type="float" office:value="8640000" calcext:value-type="float">
            <text:p>8640000</text:p>
          </table:table-cell>
          <table:table-cell table:formula="of:=[.B1817]/[.C1817]" office:value-type="float" office:value="0.00273240740740741" calcext:value-type="float">
            <text:p>0,00273240740740741000</text:p>
          </table:table-cell>
          <table:table-cell table:formula="of:=[.D1818]-[.D181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13" office:value-type="float" office:value="23621" calcext:value-type="float">
            <text:p>23621</text:p>
          </table:table-cell>
          <table:table-cell office:value-type="float" office:value="8640000" calcext:value-type="float">
            <text:p>8640000</text:p>
          </table:table-cell>
          <table:table-cell table:formula="of:=[.B1818]/[.C1818]" office:value-type="float" office:value="0.00273391203703704" calcext:value-type="float">
            <text:p>0,00273391203703704000</text:p>
          </table:table-cell>
          <table:table-cell table:formula="of:=[.D1819]-[.D1818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13" office:value-type="float" office:value="23634" calcext:value-type="float">
            <text:p>23634</text:p>
          </table:table-cell>
          <table:table-cell office:value-type="float" office:value="8640000" calcext:value-type="float">
            <text:p>8640000</text:p>
          </table:table-cell>
          <table:table-cell table:formula="of:=[.B1819]/[.C1819]" office:value-type="float" office:value="0.00273541666666667" calcext:value-type="float">
            <text:p>0,00273541666666667000</text:p>
          </table:table-cell>
          <table:table-cell table:formula="of:=[.D1820]-[.D181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13" office:value-type="float" office:value="23647" calcext:value-type="float">
            <text:p>23647</text:p>
          </table:table-cell>
          <table:table-cell office:value-type="float" office:value="8640000" calcext:value-type="float">
            <text:p>8640000</text:p>
          </table:table-cell>
          <table:table-cell table:formula="of:=[.B1820]/[.C1820]" office:value-type="float" office:value="0.0027369212962963" calcext:value-type="float">
            <text:p>0,00273692129629630000</text:p>
          </table:table-cell>
          <table:table-cell table:formula="of:=[.D1821]-[.D182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13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1821]/[.C1821]" office:value-type="float" office:value="0.00273842592592593" calcext:value-type="float">
            <text:p>0,00273842592592593000</text:p>
          </table:table-cell>
          <table:table-cell table:formula="of:=[.D1822]-[.D182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13" office:value-type="float" office:value="23673" calcext:value-type="float">
            <text:p>23673</text:p>
          </table:table-cell>
          <table:table-cell office:value-type="float" office:value="8640000" calcext:value-type="float">
            <text:p>8640000</text:p>
          </table:table-cell>
          <table:table-cell table:formula="of:=[.B1822]/[.C1822]" office:value-type="float" office:value="0.00273993055555556" calcext:value-type="float">
            <text:p>0,00273993055555556000</text:p>
          </table:table-cell>
          <table:table-cell table:formula="of:=[.D1823]-[.D1822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13" office:value-type="float" office:value="23686" calcext:value-type="float">
            <text:p>23686</text:p>
          </table:table-cell>
          <table:table-cell office:value-type="float" office:value="8640000" calcext:value-type="float">
            <text:p>8640000</text:p>
          </table:table-cell>
          <table:table-cell table:formula="of:=[.B1823]/[.C1823]" office:value-type="float" office:value="0.00274143518518519" calcext:value-type="float">
            <text:p>0,00274143518518519000</text:p>
          </table:table-cell>
          <table:table-cell table:formula="of:=[.D1824]-[.D182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13" office:value-type="float" office:value="23699" calcext:value-type="float">
            <text:p>23699</text:p>
          </table:table-cell>
          <table:table-cell office:value-type="float" office:value="8640000" calcext:value-type="float">
            <text:p>8640000</text:p>
          </table:table-cell>
          <table:table-cell table:formula="of:=[.B1824]/[.C1824]" office:value-type="float" office:value="0.00274293981481482" calcext:value-type="float">
            <text:p>0,00274293981481482000</text:p>
          </table:table-cell>
          <table:table-cell table:formula="of:=[.D1825]-[.D182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13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1825]/[.C1825]" office:value-type="float" office:value="0.00274444444444444" calcext:value-type="float">
            <text:p>0,00274444444444444000</text:p>
          </table:table-cell>
          <table:table-cell table:formula="of:=[.D1826]-[.D1825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13" office:value-type="float" office:value="23725" calcext:value-type="float">
            <text:p>23725</text:p>
          </table:table-cell>
          <table:table-cell office:value-type="float" office:value="8640000" calcext:value-type="float">
            <text:p>8640000</text:p>
          </table:table-cell>
          <table:table-cell table:formula="of:=[.B1826]/[.C1826]" office:value-type="float" office:value="0.00274594907407407" calcext:value-type="float">
            <text:p>0,00274594907407407000</text:p>
          </table:table-cell>
          <table:table-cell table:formula="of:=[.D1827]-[.D182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13" office:value-type="float" office:value="23738" calcext:value-type="float">
            <text:p>23738</text:p>
          </table:table-cell>
          <table:table-cell office:value-type="float" office:value="8640000" calcext:value-type="float">
            <text:p>8640000</text:p>
          </table:table-cell>
          <table:table-cell table:formula="of:=[.B1827]/[.C1827]" office:value-type="float" office:value="0.0027474537037037" calcext:value-type="float">
            <text:p>0,00274745370370370000</text:p>
          </table:table-cell>
          <table:table-cell table:formula="of:=[.D1828]-[.D182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13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1828]/[.C1828]" office:value-type="float" office:value="0.00274895833333333" calcext:value-type="float">
            <text:p>0,00274895833333333000</text:p>
          </table:table-cell>
          <table:table-cell table:formula="of:=[.D1829]-[.D182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13" office:value-type="float" office:value="23764" calcext:value-type="float">
            <text:p>23764</text:p>
          </table:table-cell>
          <table:table-cell office:value-type="float" office:value="8640000" calcext:value-type="float">
            <text:p>8640000</text:p>
          </table:table-cell>
          <table:table-cell table:formula="of:=[.B1829]/[.C1829]" office:value-type="float" office:value="0.00275046296296296" calcext:value-type="float">
            <text:p>0,00275046296296296000</text:p>
          </table:table-cell>
          <table:table-cell table:formula="of:=[.D1830]-[.D1829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13" office:value-type="float" office:value="23777" calcext:value-type="float">
            <text:p>23777</text:p>
          </table:table-cell>
          <table:table-cell office:value-type="float" office:value="8640000" calcext:value-type="float">
            <text:p>8640000</text:p>
          </table:table-cell>
          <table:table-cell table:formula="of:=[.B1830]/[.C1830]" office:value-type="float" office:value="0.00275196759259259" calcext:value-type="float">
            <text:p>0,00275196759259259000</text:p>
          </table:table-cell>
          <table:table-cell table:formula="of:=[.D1831]-[.D1830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13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1831]/[.C1831]" office:value-type="float" office:value="0.00275347222222222" calcext:value-type="float">
            <text:p>0,00275347222222222000</text:p>
          </table:table-cell>
          <table:table-cell table:formula="of:=[.D1832]-[.D183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13" office:value-type="float" office:value="23803" calcext:value-type="float">
            <text:p>23803</text:p>
          </table:table-cell>
          <table:table-cell office:value-type="float" office:value="8640000" calcext:value-type="float">
            <text:p>8640000</text:p>
          </table:table-cell>
          <table:table-cell table:formula="of:=[.B1832]/[.C1832]" office:value-type="float" office:value="0.00275497685185185" calcext:value-type="float">
            <text:p>0,00275497685185185000</text:p>
          </table:table-cell>
          <table:table-cell table:formula="of:=[.D1833]-[.D183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13" office:value-type="float" office:value="23816" calcext:value-type="float">
            <text:p>23816</text:p>
          </table:table-cell>
          <table:table-cell office:value-type="float" office:value="8640000" calcext:value-type="float">
            <text:p>8640000</text:p>
          </table:table-cell>
          <table:table-cell table:formula="of:=[.B1833]/[.C1833]" office:value-type="float" office:value="0.00275648148148148" calcext:value-type="float">
            <text:p>0,00275648148148148000</text:p>
          </table:table-cell>
          <table:table-cell table:formula="of:=[.D1834]-[.D1833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13" office:value-type="float" office:value="23829" calcext:value-type="float">
            <text:p>23829</text:p>
          </table:table-cell>
          <table:table-cell office:value-type="float" office:value="8640000" calcext:value-type="float">
            <text:p>8640000</text:p>
          </table:table-cell>
          <table:table-cell table:formula="of:=[.B1834]/[.C1834]" office:value-type="float" office:value="0.00275798611111111" calcext:value-type="float">
            <text:p>0,00275798611111111000</text:p>
          </table:table-cell>
          <table:table-cell table:formula="of:=[.D1835]-[.D1834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13" office:value-type="float" office:value="23842" calcext:value-type="float">
            <text:p>23842</text:p>
          </table:table-cell>
          <table:table-cell office:value-type="float" office:value="8640000" calcext:value-type="float">
            <text:p>8640000</text:p>
          </table:table-cell>
          <table:table-cell table:formula="of:=[.B1835]/[.C1835]" office:value-type="float" office:value="0.00275949074074074" calcext:value-type="float">
            <text:p>0,00275949074074074000</text:p>
          </table:table-cell>
          <table:table-cell table:formula="of:=[.D1836]-[.D183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13" office:value-type="float" office:value="23855" calcext:value-type="float">
            <text:p>23855</text:p>
          </table:table-cell>
          <table:table-cell office:value-type="float" office:value="8640000" calcext:value-type="float">
            <text:p>8640000</text:p>
          </table:table-cell>
          <table:table-cell table:formula="of:=[.B1836]/[.C1836]" office:value-type="float" office:value="0.00276099537037037" calcext:value-type="float">
            <text:p>0,00276099537037037000</text:p>
          </table:table-cell>
          <table:table-cell table:formula="of:=[.D1837]-[.D1836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13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1837]/[.C1837]" office:value-type="float" office:value="0.0027625" calcext:value-type="float">
            <text:p>0,00276250000000000000</text:p>
          </table:table-cell>
          <table:table-cell table:formula="of:=[.D1838]-[.D1837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13" office:value-type="float" office:value="23881" calcext:value-type="float">
            <text:p>23881</text:p>
          </table:table-cell>
          <table:table-cell office:value-type="float" office:value="8640000" calcext:value-type="float">
            <text:p>8640000</text:p>
          </table:table-cell>
          <table:table-cell table:formula="of:=[.B1838]/[.C1838]" office:value-type="float" office:value="0.00276400462962963" calcext:value-type="float">
            <text:p>0,00276400462962963000</text:p>
          </table:table-cell>
          <table:table-cell table:formula="of:=[.D1839]-[.D1838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13" office:value-type="float" office:value="23894" calcext:value-type="float">
            <text:p>23894</text:p>
          </table:table-cell>
          <table:table-cell office:value-type="float" office:value="8640000" calcext:value-type="float">
            <text:p>8640000</text:p>
          </table:table-cell>
          <table:table-cell table:formula="of:=[.B1839]/[.C1839]" office:value-type="float" office:value="0.00276550925925926" calcext:value-type="float">
            <text:p>0,00276550925925926000</text:p>
          </table:table-cell>
          <table:table-cell table:formula="of:=[.D1840]-[.D1839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13" office:value-type="float" office:value="23907" calcext:value-type="float">
            <text:p>23907</text:p>
          </table:table-cell>
          <table:table-cell office:value-type="float" office:value="8640000" calcext:value-type="float">
            <text:p>8640000</text:p>
          </table:table-cell>
          <table:table-cell table:formula="of:=[.B1840]/[.C1840]" office:value-type="float" office:value="0.00276701388888889" calcext:value-type="float">
            <text:p>0,00276701388888889000</text:p>
          </table:table-cell>
          <table:table-cell table:formula="of:=[.D1841]-[.D1840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13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1841]/[.C1841]" office:value-type="float" office:value="0.00276851851851852" calcext:value-type="float">
            <text:p>0,00276851851851852000</text:p>
          </table:table-cell>
          <table:table-cell table:formula="of:=[.D1842]-[.D1841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13" office:value-type="float" office:value="23933" calcext:value-type="float">
            <text:p>23933</text:p>
          </table:table-cell>
          <table:table-cell office:value-type="float" office:value="8640000" calcext:value-type="float">
            <text:p>8640000</text:p>
          </table:table-cell>
          <table:table-cell table:formula="of:=[.B1842]/[.C1842]" office:value-type="float" office:value="0.00277002314814815" calcext:value-type="float">
            <text:p>0,00277002314814815000</text:p>
          </table:table-cell>
          <table:table-cell table:formula="of:=[.D1843]-[.D1842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13" office:value-type="float" office:value="23946" calcext:value-type="float">
            <text:p>23946</text:p>
          </table:table-cell>
          <table:table-cell office:value-type="float" office:value="8640000" calcext:value-type="float">
            <text:p>8640000</text:p>
          </table:table-cell>
          <table:table-cell table:formula="of:=[.B1843]/[.C1843]" office:value-type="float" office:value="0.00277152777777778" calcext:value-type="float">
            <text:p>0,00277152777777778000</text:p>
          </table:table-cell>
          <table:table-cell table:formula="of:=[.D1844]-[.D1843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13" office:value-type="float" office:value="23959" calcext:value-type="float">
            <text:p>23959</text:p>
          </table:table-cell>
          <table:table-cell office:value-type="float" office:value="8640000" calcext:value-type="float">
            <text:p>8640000</text:p>
          </table:table-cell>
          <table:table-cell table:formula="of:=[.B1844]/[.C1844]" office:value-type="float" office:value="0.00277303240740741" calcext:value-type="float">
            <text:p>0,00277303240740741000</text:p>
          </table:table-cell>
          <table:table-cell table:formula="of:=[.D1845]-[.D1844]" office:value-type="float" office:value="0.00000150462962962995" calcext:value-type="float">
            <text:p>0,0000015046296296299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13" office:value-type="float" office:value="23972" calcext:value-type="float">
            <text:p>23972</text:p>
          </table:table-cell>
          <table:table-cell office:value-type="float" office:value="8640000" calcext:value-type="float">
            <text:p>8640000</text:p>
          </table:table-cell>
          <table:table-cell table:formula="of:=[.B1845]/[.C1845]" office:value-type="float" office:value="0.00277453703703704" calcext:value-type="float">
            <text:p>0,00277453703703704000</text:p>
          </table:table-cell>
          <table:table-cell table:formula="of:=[.D1846]-[.D1845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13" office:value-type="float" office:value="23985" calcext:value-type="float">
            <text:p>23985</text:p>
          </table:table-cell>
          <table:table-cell office:value-type="float" office:value="8640000" calcext:value-type="float">
            <text:p>8640000</text:p>
          </table:table-cell>
          <table:table-cell table:formula="of:=[.B1846]/[.C1846]" office:value-type="float" office:value="0.00277604166666667" calcext:value-type="float">
            <text:p>0,00277604166666667000</text:p>
          </table:table-cell>
          <table:table-cell table:formula="of:=[.D1847]-[.D1846]" office:value-type="float" office:value="0.00000150462962962951" calcext:value-type="float">
            <text:p>0,0000015046296296295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13" office:value-type="float" office:value="23998" calcext:value-type="float">
            <text:p>23998</text:p>
          </table:table-cell>
          <table:table-cell office:value-type="float" office:value="8640000" calcext:value-type="float">
            <text:p>8640000</text:p>
          </table:table-cell>
          <table:table-cell table:formula="of:=[.B1847]/[.C1847]" office:value-type="float" office:value="0.0027775462962963" calcext:value-type="float">
            <text:p>0,00277754629629630000</text:p>
          </table:table-cell>
          <table:table-cell table:formula="of:=#REF!-[.D1847]" office:value-type="string" office:string-value="" calcext:value-type="error">
            <text:p>#REF!</text:p>
          </table:table-cell>
        </table:table-row>
        <table:table-row table:style-name="ro1" table:number-rows-repeated="10467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4:47.020273498</meta:creation-date>
    <dc:date>2026-05-17T15:34:53.271052635</dc:date>
    <meta:editing-duration>PT7S</meta:editing-duration>
    <meta:editing-cycles>1</meta:editing-cycles>
    <meta:document-statistic meta:table-count="1" meta:cell-count="9235" meta:object-count="0"/>
    <meta:generator>LibreOffice/24.2.7.2$Linux_X86_64 LibreOffice_project/420$Build-2</meta:generator>
  </office:meta>
</office:document-meta>
</file>