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1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18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208333333333333" calcext:value-type="float">
            <text:p>0,00000208333333333333</text:p>
          </table:table-cell>
          <table:table-cell table:formula="of:=[.D3]-[.D2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8" office:value-type="float" office:value="36" calcext:value-type="float">
            <text:p>3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416666666666667" calcext:value-type="float">
            <text:p>0,00000416666666666667</text:p>
          </table:table-cell>
          <table:table-cell table:formula="of:=[.D4]-[.D3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8" office:value-type="float" office:value="54" calcext:value-type="float">
            <text:p>54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625" calcext:value-type="float">
            <text:p>0,00000625000000000000</text:p>
          </table:table-cell>
          <table:table-cell table:formula="of:=[.D5]-[.D4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18" office:value-type="float" office:value="72" calcext:value-type="float">
            <text:p>7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833333333333333" calcext:value-type="float">
            <text:p>0,00000833333333333333</text:p>
          </table:table-cell>
          <table:table-cell table:formula="of:=[.D6]-[.D5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18" office:value-type="float" office:value="90" calcext:value-type="float">
            <text:p>9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04166666666667" calcext:value-type="float">
            <text:p>0,00001041666666666670</text:p>
          </table:table-cell>
          <table:table-cell table:formula="of:=[.D7]-[.D6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18" office:value-type="float" office:value="108" calcext:value-type="float">
            <text:p>10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125" calcext:value-type="float">
            <text:p>0,00001250000000000000</text:p>
          </table:table-cell>
          <table:table-cell table:formula="of:=[.D8]-[.D7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18" office:value-type="float" office:value="126" calcext:value-type="float">
            <text:p>126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145833333333333" calcext:value-type="float">
            <text:p>0,00001458333333333330</text:p>
          </table:table-cell>
          <table:table-cell table:formula="of:=[.D9]-[.D8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18" office:value-type="float" office:value="144" calcext:value-type="float">
            <text:p>14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166666666666667" calcext:value-type="float">
            <text:p>0,00001666666666666670</text:p>
          </table:table-cell>
          <table:table-cell table:formula="of:=[.D10]-[.D9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18" office:value-type="float" office:value="162" calcext:value-type="float">
            <text:p>162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1875" calcext:value-type="float">
            <text:p>0,00001875000000000000</text:p>
          </table:table-cell>
          <table:table-cell table:formula="of:=[.D11]-[.D10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18" office:value-type="float" office:value="180" calcext:value-type="float">
            <text:p>18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208333333333333" calcext:value-type="float">
            <text:p>0,00002083333333333330</text:p>
          </table:table-cell>
          <table:table-cell table:formula="of:=[.D12]-[.D11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18" office:value-type="float" office:value="198" calcext:value-type="float">
            <text:p>198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229166666666667" calcext:value-type="float">
            <text:p>0,00002291666666666670</text:p>
          </table:table-cell>
          <table:table-cell table:formula="of:=[.D13]-[.D12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18" office:value-type="float" office:value="216" calcext:value-type="float">
            <text:p>21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25" calcext:value-type="float">
            <text:p>0,00002500000000000000</text:p>
          </table:table-cell>
          <table:table-cell table:formula="of:=[.D14]-[.D13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18" office:value-type="float" office:value="234" calcext:value-type="float">
            <text:p>234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270833333333333" calcext:value-type="float">
            <text:p>0,00002708333333333330</text:p>
          </table:table-cell>
          <table:table-cell table:formula="of:=[.D15]-[.D14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18" office:value-type="float" office:value="252" calcext:value-type="float">
            <text:p>25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291666666666667" calcext:value-type="float">
            <text:p>0,00002916666666666670</text:p>
          </table:table-cell>
          <table:table-cell table:formula="of:=[.D16]-[.D15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18" office:value-type="float" office:value="270" calcext:value-type="float">
            <text:p>27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3125" calcext:value-type="float">
            <text:p>0,00003125000000000000</text:p>
          </table:table-cell>
          <table:table-cell table:formula="of:=[.D17]-[.D16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18" office:value-type="float" office:value="288" calcext:value-type="float">
            <text:p>28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333333333333333" calcext:value-type="float">
            <text:p>0,00003333333333333330</text:p>
          </table:table-cell>
          <table:table-cell table:formula="of:=[.D18]-[.D17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18" office:value-type="float" office:value="306" calcext:value-type="float">
            <text:p>306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354166666666667" calcext:value-type="float">
            <text:p>0,00003541666666666670</text:p>
          </table:table-cell>
          <table:table-cell table:formula="of:=[.D19]-[.D18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18" office:value-type="float" office:value="324" calcext:value-type="float">
            <text:p>32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375" calcext:value-type="float">
            <text:p>0,00003750000000000000</text:p>
          </table:table-cell>
          <table:table-cell table:formula="of:=[.D20]-[.D19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18" office:value-type="float" office:value="342" calcext:value-type="float">
            <text:p>342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395833333333333" calcext:value-type="float">
            <text:p>0,00003958333333333330</text:p>
          </table:table-cell>
          <table:table-cell table:formula="of:=[.D21]-[.D20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18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416666666666667" calcext:value-type="float">
            <text:p>0,00004166666666666670</text:p>
          </table:table-cell>
          <table:table-cell table:formula="of:=[.D22]-[.D21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18" office:value-type="float" office:value="378" calcext:value-type="float">
            <text:p>378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4375" calcext:value-type="float">
            <text:p>0,00004375000000000000</text:p>
          </table:table-cell>
          <table:table-cell table:formula="of:=[.D23]-[.D22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18" office:value-type="float" office:value="396" calcext:value-type="float">
            <text:p>39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458333333333333" calcext:value-type="float">
            <text:p>0,00004583333333333330</text:p>
          </table:table-cell>
          <table:table-cell table:formula="of:=[.D24]-[.D23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18" office:value-type="float" office:value="414" calcext:value-type="float">
            <text:p>414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479166666666667" calcext:value-type="float">
            <text:p>0,00004791666666666670</text:p>
          </table:table-cell>
          <table:table-cell table:formula="of:=[.D25]-[.D24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18" office:value-type="float" office:value="432" calcext:value-type="float">
            <text:p>43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5" calcext:value-type="float">
            <text:p>0,00005000000000000000</text:p>
          </table:table-cell>
          <table:table-cell table:formula="of:=[.D26]-[.D25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18" office:value-type="float" office:value="450" calcext:value-type="float">
            <text:p>4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520833333333333" calcext:value-type="float">
            <text:p>0,00005208333333333330</text:p>
          </table:table-cell>
          <table:table-cell table:formula="of:=[.D27]-[.D26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18" office:value-type="float" office:value="468" calcext:value-type="float">
            <text:p>46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541666666666667" calcext:value-type="float">
            <text:p>0,00005416666666666670</text:p>
          </table:table-cell>
          <table:table-cell table:formula="of:=[.D28]-[.D27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18" office:value-type="float" office:value="486" calcext:value-type="float">
            <text:p>486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5625" calcext:value-type="float">
            <text:p>0,00005625000000000000</text:p>
          </table:table-cell>
          <table:table-cell table:formula="of:=[.D29]-[.D28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18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583333333333333" calcext:value-type="float">
            <text:p>0,00005833333333333330</text:p>
          </table:table-cell>
          <table:table-cell table:formula="of:=[.D30]-[.D29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18" office:value-type="float" office:value="522" calcext:value-type="float">
            <text:p>522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604166666666667" calcext:value-type="float">
            <text:p>0,00006041666666666670</text:p>
          </table:table-cell>
          <table:table-cell table:formula="of:=[.D31]-[.D30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18" office:value-type="float" office:value="540" calcext:value-type="float">
            <text:p>54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625" calcext:value-type="float">
            <text:p>0,00006250000000000000</text:p>
          </table:table-cell>
          <table:table-cell table:formula="of:=[.D32]-[.D31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18" office:value-type="float" office:value="558" calcext:value-type="float">
            <text:p>558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645833333333333" calcext:value-type="float">
            <text:p>0,00006458333333333330</text:p>
          </table:table-cell>
          <table:table-cell table:formula="of:=[.D33]-[.D32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18" office:value-type="float" office:value="576" calcext:value-type="float">
            <text:p>57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666666666666667" calcext:value-type="float">
            <text:p>0,00006666666666666670</text:p>
          </table:table-cell>
          <table:table-cell table:formula="of:=[.D34]-[.D33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18" office:value-type="float" office:value="594" calcext:value-type="float">
            <text:p>594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6875" calcext:value-type="float">
            <text:p>0,00006875000000000000</text:p>
          </table:table-cell>
          <table:table-cell table:formula="of:=[.D35]-[.D34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18" office:value-type="float" office:value="612" calcext:value-type="float">
            <text:p>61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708333333333333" calcext:value-type="float">
            <text:p>0,00007083333333333330</text:p>
          </table:table-cell>
          <table:table-cell table:formula="of:=[.D36]-[.D35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18" office:value-type="float" office:value="630" calcext:value-type="float">
            <text:p>63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729166666666667" calcext:value-type="float">
            <text:p>0,00007291666666666670</text:p>
          </table:table-cell>
          <table:table-cell table:formula="of:=[.D37]-[.D3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18" office:value-type="float" office:value="648" calcext:value-type="float">
            <text:p>64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75" calcext:value-type="float">
            <text:p>0,00007500000000000000</text:p>
          </table:table-cell>
          <table:table-cell table:formula="of:=[.D38]-[.D37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18" office:value-type="float" office:value="666" calcext:value-type="float">
            <text:p>666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770833333333333" calcext:value-type="float">
            <text:p>0,00007708333333333330</text:p>
          </table:table-cell>
          <table:table-cell table:formula="of:=[.D39]-[.D38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18" office:value-type="float" office:value="684" calcext:value-type="float">
            <text:p>68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791666666666667" calcext:value-type="float">
            <text:p>0,00007916666666666670</text:p>
          </table:table-cell>
          <table:table-cell table:formula="of:=[.D40]-[.D39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18" office:value-type="float" office:value="702" calcext:value-type="float">
            <text:p>702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8125" calcext:value-type="float">
            <text:p>0,00008125000000000000</text:p>
          </table:table-cell>
          <table:table-cell table:formula="of:=[.D41]-[.D40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18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833333333333333" calcext:value-type="float">
            <text:p>0,00008333333333333330</text:p>
          </table:table-cell>
          <table:table-cell table:formula="of:=[.D42]-[.D41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18" office:value-type="float" office:value="738" calcext:value-type="float">
            <text:p>738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854166666666667" calcext:value-type="float">
            <text:p>0,00008541666666666670</text:p>
          </table:table-cell>
          <table:table-cell table:formula="of:=[.D43]-[.D42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18" office:value-type="float" office:value="756" calcext:value-type="float">
            <text:p>75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0875" calcext:value-type="float">
            <text:p>0,00008750000000000000</text:p>
          </table:table-cell>
          <table:table-cell table:formula="of:=[.D44]-[.D43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18" office:value-type="float" office:value="774" calcext:value-type="float">
            <text:p>774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0895833333333333" calcext:value-type="float">
            <text:p>0,00008958333333333330</text:p>
          </table:table-cell>
          <table:table-cell table:formula="of:=[.D45]-[.D44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18" office:value-type="float" office:value="792" calcext:value-type="float">
            <text:p>79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0916666666666667" calcext:value-type="float">
            <text:p>0,00009166666666666670</text:p>
          </table:table-cell>
          <table:table-cell table:formula="of:=[.D46]-[.D45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18" office:value-type="float" office:value="810" calcext:value-type="float">
            <text:p>81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09375" calcext:value-type="float">
            <text:p>0,00009375000000000000</text:p>
          </table:table-cell>
          <table:table-cell table:formula="of:=[.D47]-[.D46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18" office:value-type="float" office:value="828" calcext:value-type="float">
            <text:p>82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0958333333333333" calcext:value-type="float">
            <text:p>0,00009583333333333330</text:p>
          </table:table-cell>
          <table:table-cell table:formula="of:=[.D48]-[.D47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18" office:value-type="float" office:value="846" calcext:value-type="float">
            <text:p>846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0979166666666667" calcext:value-type="float">
            <text:p>0,00009791666666666670</text:p>
          </table:table-cell>
          <table:table-cell table:formula="of:=[.D49]-[.D48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18" office:value-type="float" office:value="864" calcext:value-type="float">
            <text:p>86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" calcext:value-type="float">
            <text:p>0,00010000000000000000</text:p>
          </table:table-cell>
          <table:table-cell table:formula="of:=[.D50]-[.D49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18" office:value-type="float" office:value="882" calcext:value-type="float">
            <text:p>882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02083333333333" calcext:value-type="float">
            <text:p>0,00010208333333333300</text:p>
          </table:table-cell>
          <table:table-cell table:formula="of:=[.D51]-[.D50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18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04166666666667" calcext:value-type="float">
            <text:p>0,00010416666666666700</text:p>
          </table:table-cell>
          <table:table-cell table:formula="of:=[.D52]-[.D5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18" office:value-type="float" office:value="918" calcext:value-type="float">
            <text:p>918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0625" calcext:value-type="float">
            <text:p>0,00010625000000000000</text:p>
          </table:table-cell>
          <table:table-cell table:formula="of:=[.D53]-[.D52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18" office:value-type="float" office:value="936" calcext:value-type="float">
            <text:p>93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08333333333333" calcext:value-type="float">
            <text:p>0,00010833333333333300</text:p>
          </table:table-cell>
          <table:table-cell table:formula="of:=[.D54]-[.D53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18" office:value-type="float" office:value="954" calcext:value-type="float">
            <text:p>954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10416666666667" calcext:value-type="float">
            <text:p>0,00011041666666666700</text:p>
          </table:table-cell>
          <table:table-cell table:formula="of:=[.D55]-[.D54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18" office:value-type="float" office:value="972" calcext:value-type="float">
            <text:p>97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125" calcext:value-type="float">
            <text:p>0,00011250000000000000</text:p>
          </table:table-cell>
          <table:table-cell table:formula="of:=[.D56]-[.D55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18" office:value-type="float" office:value="990" calcext:value-type="float">
            <text:p>99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14583333333333" calcext:value-type="float">
            <text:p>0,00011458333333333300</text:p>
          </table:table-cell>
          <table:table-cell table:formula="of:=[.D57]-[.D56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18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16666666666667" calcext:value-type="float">
            <text:p>0,00011666666666666700</text:p>
          </table:table-cell>
          <table:table-cell table:formula="of:=[.D58]-[.D57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18" office:value-type="float" office:value="1026" calcext:value-type="float">
            <text:p>1026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1875" calcext:value-type="float">
            <text:p>0,00011875000000000000</text:p>
          </table:table-cell>
          <table:table-cell table:formula="of:=[.D59]-[.D58]" office:value-type="float" office:value="0.00000208333333333333" calcext:value-type="float">
            <text:p>0,00000208333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18" office:value-type="float" office:value="1044" calcext:value-type="float">
            <text:p>104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20833333333333" calcext:value-type="float">
            <text:p>0,00012083333333333300</text:p>
          </table:table-cell>
          <table:table-cell table:formula="of:=[.D60]-[.D5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18" office:value-type="float" office:value="1062" calcext:value-type="float">
            <text:p>1062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22916666666667" calcext:value-type="float">
            <text:p>0,00012291666666666700</text:p>
          </table:table-cell>
          <table:table-cell table:formula="of:=[.D61]-[.D60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18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125" calcext:value-type="float">
            <text:p>0,00012500000000000000</text:p>
          </table:table-cell>
          <table:table-cell table:formula="of:=[.D62]-[.D6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18" office:value-type="float" office:value="1098" calcext:value-type="float">
            <text:p>1098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127083333333333" calcext:value-type="float">
            <text:p>0,00012708333333333300</text:p>
          </table:table-cell>
          <table:table-cell table:formula="of:=[.D63]-[.D62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18" office:value-type="float" office:value="1116" calcext:value-type="float">
            <text:p>111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129166666666667" calcext:value-type="float">
            <text:p>0,00012916666666666700</text:p>
          </table:table-cell>
          <table:table-cell table:formula="of:=[.D64]-[.D6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18" office:value-type="float" office:value="1134" calcext:value-type="float">
            <text:p>1134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13125" calcext:value-type="float">
            <text:p>0,00013125000000000000</text:p>
          </table:table-cell>
          <table:table-cell table:formula="of:=[.D65]-[.D64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18" office:value-type="float" office:value="1152" calcext:value-type="float">
            <text:p>115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133333333333333" calcext:value-type="float">
            <text:p>0,00013333333333333300</text:p>
          </table:table-cell>
          <table:table-cell table:formula="of:=[.D66]-[.D6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18" office:value-type="float" office:value="1170" calcext:value-type="float">
            <text:p>117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135416666666667" calcext:value-type="float">
            <text:p>0,00013541666666666700</text:p>
          </table:table-cell>
          <table:table-cell table:formula="of:=[.D67]-[.D66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18" office:value-type="float" office:value="1188" calcext:value-type="float">
            <text:p>118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1375" calcext:value-type="float">
            <text:p>0,00013750000000000000</text:p>
          </table:table-cell>
          <table:table-cell table:formula="of:=[.D68]-[.D6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18" office:value-type="float" office:value="1206" calcext:value-type="float">
            <text:p>1206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139583333333333" calcext:value-type="float">
            <text:p>0,00013958333333333300</text:p>
          </table:table-cell>
          <table:table-cell table:formula="of:=[.D69]-[.D68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18" office:value-type="float" office:value="1224" calcext:value-type="float">
            <text:p>122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141666666666667" calcext:value-type="float">
            <text:p>0,00014166666666666700</text:p>
          </table:table-cell>
          <table:table-cell table:formula="of:=[.D70]-[.D6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18" office:value-type="float" office:value="1242" calcext:value-type="float">
            <text:p>1242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14375" calcext:value-type="float">
            <text:p>0,00014375000000000000</text:p>
          </table:table-cell>
          <table:table-cell table:formula="of:=[.D71]-[.D70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18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145833333333333" calcext:value-type="float">
            <text:p>0,00014583333333333300</text:p>
          </table:table-cell>
          <table:table-cell table:formula="of:=[.D72]-[.D7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18" office:value-type="float" office:value="1278" calcext:value-type="float">
            <text:p>1278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147916666666667" calcext:value-type="float">
            <text:p>0,00014791666666666700</text:p>
          </table:table-cell>
          <table:table-cell table:formula="of:=[.D73]-[.D7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18" office:value-type="float" office:value="1296" calcext:value-type="float">
            <text:p>129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15" calcext:value-type="float">
            <text:p>0,00015000000000000000</text:p>
          </table:table-cell>
          <table:table-cell table:formula="of:=[.D74]-[.D73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18" office:value-type="float" office:value="1314" calcext:value-type="float">
            <text:p>1314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152083333333333" calcext:value-type="float">
            <text:p>0,00015208333333333300</text:p>
          </table:table-cell>
          <table:table-cell table:formula="of:=[.D75]-[.D7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18" office:value-type="float" office:value="1332" calcext:value-type="float">
            <text:p>133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154166666666667" calcext:value-type="float">
            <text:p>0,00015416666666666700</text:p>
          </table:table-cell>
          <table:table-cell table:formula="of:=[.D76]-[.D75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18" office:value-type="float" office:value="1350" calcext:value-type="float">
            <text:p>13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15625" calcext:value-type="float">
            <text:p>0,00015625000000000000</text:p>
          </table:table-cell>
          <table:table-cell table:formula="of:=[.D77]-[.D7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18" office:value-type="float" office:value="1368" calcext:value-type="float">
            <text:p>136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158333333333333" calcext:value-type="float">
            <text:p>0,00015833333333333300</text:p>
          </table:table-cell>
          <table:table-cell table:formula="of:=[.D78]-[.D77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18" office:value-type="float" office:value="1386" calcext:value-type="float">
            <text:p>1386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160416666666667" calcext:value-type="float">
            <text:p>0,00016041666666666700</text:p>
          </table:table-cell>
          <table:table-cell table:formula="of:=[.D79]-[.D7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18" office:value-type="float" office:value="1404" calcext:value-type="float">
            <text:p>140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1625" calcext:value-type="float">
            <text:p>0,00016250000000000000</text:p>
          </table:table-cell>
          <table:table-cell table:formula="of:=[.D80]-[.D79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18" office:value-type="float" office:value="1422" calcext:value-type="float">
            <text:p>1422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164583333333333" calcext:value-type="float">
            <text:p>0,00016458333333333300</text:p>
          </table:table-cell>
          <table:table-cell table:formula="of:=[.D81]-[.D8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18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166666666666667" calcext:value-type="float">
            <text:p>0,00016666666666666700</text:p>
          </table:table-cell>
          <table:table-cell table:formula="of:=[.D82]-[.D81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18" office:value-type="float" office:value="1458" calcext:value-type="float">
            <text:p>1458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16875" calcext:value-type="float">
            <text:p>0,00016875000000000000</text:p>
          </table:table-cell>
          <table:table-cell table:formula="of:=[.D83]-[.D8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18" office:value-type="float" office:value="1476" calcext:value-type="float">
            <text:p>147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170833333333333" calcext:value-type="float">
            <text:p>0,00017083333333333300</text:p>
          </table:table-cell>
          <table:table-cell table:formula="of:=[.D84]-[.D83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18" office:value-type="float" office:value="1494" calcext:value-type="float">
            <text:p>1494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172916666666667" calcext:value-type="float">
            <text:p>0,00017291666666666700</text:p>
          </table:table-cell>
          <table:table-cell table:formula="of:=[.D85]-[.D8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18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175" calcext:value-type="float">
            <text:p>0,00017500000000000000</text:p>
          </table:table-cell>
          <table:table-cell table:formula="of:=[.D86]-[.D85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18" office:value-type="float" office:value="1530" calcext:value-type="float">
            <text:p>153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177083333333333" calcext:value-type="float">
            <text:p>0,00017708333333333300</text:p>
          </table:table-cell>
          <table:table-cell table:formula="of:=[.D87]-[.D8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18" office:value-type="float" office:value="1548" calcext:value-type="float">
            <text:p>154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179166666666667" calcext:value-type="float">
            <text:p>0,00017916666666666700</text:p>
          </table:table-cell>
          <table:table-cell table:formula="of:=[.D88]-[.D8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18" office:value-type="float" office:value="1566" calcext:value-type="float">
            <text:p>1566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18125" calcext:value-type="float">
            <text:p>0,00018125000000000000</text:p>
          </table:table-cell>
          <table:table-cell table:formula="of:=[.D89]-[.D88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18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183333333333333" calcext:value-type="float">
            <text:p>0,00018333333333333300</text:p>
          </table:table-cell>
          <table:table-cell table:formula="of:=[.D90]-[.D8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18" office:value-type="float" office:value="1602" calcext:value-type="float">
            <text:p>1602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185416666666667" calcext:value-type="float">
            <text:p>0,00018541666666666700</text:p>
          </table:table-cell>
          <table:table-cell table:formula="of:=[.D91]-[.D90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18" office:value-type="float" office:value="1620" calcext:value-type="float">
            <text:p>162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1875" calcext:value-type="float">
            <text:p>0,00018750000000000000</text:p>
          </table:table-cell>
          <table:table-cell table:formula="of:=[.D92]-[.D9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18" office:value-type="float" office:value="1638" calcext:value-type="float">
            <text:p>1638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189583333333333" calcext:value-type="float">
            <text:p>0,00018958333333333300</text:p>
          </table:table-cell>
          <table:table-cell table:formula="of:=[.D93]-[.D92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18" office:value-type="float" office:value="1656" calcext:value-type="float">
            <text:p>165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191666666666667" calcext:value-type="float">
            <text:p>0,00019166666666666700</text:p>
          </table:table-cell>
          <table:table-cell table:formula="of:=[.D94]-[.D9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18" office:value-type="float" office:value="1674" calcext:value-type="float">
            <text:p>1674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19375" calcext:value-type="float">
            <text:p>0,00019375000000000000</text:p>
          </table:table-cell>
          <table:table-cell table:formula="of:=[.D95]-[.D94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18" office:value-type="float" office:value="1692" calcext:value-type="float">
            <text:p>169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195833333333333" calcext:value-type="float">
            <text:p>0,00019583333333333300</text:p>
          </table:table-cell>
          <table:table-cell table:formula="of:=[.D96]-[.D9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18" office:value-type="float" office:value="1710" calcext:value-type="float">
            <text:p>171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197916666666667" calcext:value-type="float">
            <text:p>0,00019791666666666700</text:p>
          </table:table-cell>
          <table:table-cell table:formula="of:=[.D97]-[.D96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18" office:value-type="float" office:value="1728" calcext:value-type="float">
            <text:p>172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2" calcext:value-type="float">
            <text:p>0,00020000000000000000</text:p>
          </table:table-cell>
          <table:table-cell table:formula="of:=[.D98]-[.D9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18" office:value-type="float" office:value="1746" calcext:value-type="float">
            <text:p>1746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202083333333333" calcext:value-type="float">
            <text:p>0,00020208333333333300</text:p>
          </table:table-cell>
          <table:table-cell table:formula="of:=[.D99]-[.D98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18" office:value-type="float" office:value="1764" calcext:value-type="float">
            <text:p>176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204166666666667" calcext:value-type="float">
            <text:p>0,00020416666666666700</text:p>
          </table:table-cell>
          <table:table-cell table:formula="of:=[.D100]-[.D9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18" office:value-type="float" office:value="1782" calcext:value-type="float">
            <text:p>1782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20625" calcext:value-type="float">
            <text:p>0,00020625000000000000</text:p>
          </table:table-cell>
          <table:table-cell table:formula="of:=[.D101]-[.D100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18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208333333333333" calcext:value-type="float">
            <text:p>0,00020833333333333300</text:p>
          </table:table-cell>
          <table:table-cell table:formula="of:=[.D102]-[.D10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18" office:value-type="float" office:value="1818" calcext:value-type="float">
            <text:p>1818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210416666666667" calcext:value-type="float">
            <text:p>0,00021041666666666700</text:p>
          </table:table-cell>
          <table:table-cell table:formula="of:=[.D103]-[.D10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18" office:value-type="float" office:value="1836" calcext:value-type="float">
            <text:p>183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2125" calcext:value-type="float">
            <text:p>0,00021250000000000000</text:p>
          </table:table-cell>
          <table:table-cell table:formula="of:=[.D104]-[.D103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18" office:value-type="float" office:value="1854" calcext:value-type="float">
            <text:p>1854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214583333333333" calcext:value-type="float">
            <text:p>0,00021458333333333300</text:p>
          </table:table-cell>
          <table:table-cell table:formula="of:=[.D105]-[.D10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18" office:value-type="float" office:value="1872" calcext:value-type="float">
            <text:p>187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216666666666667" calcext:value-type="float">
            <text:p>0,00021666666666666700</text:p>
          </table:table-cell>
          <table:table-cell table:formula="of:=[.D106]-[.D105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18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21875" calcext:value-type="float">
            <text:p>0,00021875000000000000</text:p>
          </table:table-cell>
          <table:table-cell table:formula="of:=[.D107]-[.D10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18" office:value-type="float" office:value="1908" calcext:value-type="float">
            <text:p>190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220833333333333" calcext:value-type="float">
            <text:p>0,00022083333333333300</text:p>
          </table:table-cell>
          <table:table-cell table:formula="of:=[.D108]-[.D107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18" office:value-type="float" office:value="1926" calcext:value-type="float">
            <text:p>1926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222916666666667" calcext:value-type="float">
            <text:p>0,00022291666666666700</text:p>
          </table:table-cell>
          <table:table-cell table:formula="of:=[.D109]-[.D10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18" office:value-type="float" office:value="1944" calcext:value-type="float">
            <text:p>194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225" calcext:value-type="float">
            <text:p>0,00022500000000000000</text:p>
          </table:table-cell>
          <table:table-cell table:formula="of:=[.D110]-[.D109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18" office:value-type="float" office:value="1962" calcext:value-type="float">
            <text:p>1962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227083333333333" calcext:value-type="float">
            <text:p>0,00022708333333333300</text:p>
          </table:table-cell>
          <table:table-cell table:formula="of:=[.D111]-[.D11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18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229166666666667" calcext:value-type="float">
            <text:p>0,00022916666666666700</text:p>
          </table:table-cell>
          <table:table-cell table:formula="of:=[.D112]-[.D111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18" office:value-type="float" office:value="1998" calcext:value-type="float">
            <text:p>1998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23125" calcext:value-type="float">
            <text:p>0,00023125000000000000</text:p>
          </table:table-cell>
          <table:table-cell table:formula="of:=[.D113]-[.D11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18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233333333333333" calcext:value-type="float">
            <text:p>0,00023333333333333300</text:p>
          </table:table-cell>
          <table:table-cell table:formula="of:=[.D114]-[.D113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18" office:value-type="float" office:value="2034" calcext:value-type="float">
            <text:p>2034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235416666666667" calcext:value-type="float">
            <text:p>0,00023541666666666700</text:p>
          </table:table-cell>
          <table:table-cell table:formula="of:=[.D115]-[.D11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18" office:value-type="float" office:value="2052" calcext:value-type="float">
            <text:p>205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2375" calcext:value-type="float">
            <text:p>0,00023750000000000000</text:p>
          </table:table-cell>
          <table:table-cell table:formula="of:=[.D116]-[.D11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18" office:value-type="float" office:value="2070" calcext:value-type="float">
            <text:p>207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239583333333333" calcext:value-type="float">
            <text:p>0,00023958333333333300</text:p>
          </table:table-cell>
          <table:table-cell table:formula="of:=[.D117]-[.D116]" office:value-type="float" office:value="0.00000208333333333335" calcext:value-type="float">
            <text:p>0,0000020833333333333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18" office:value-type="float" office:value="2088" calcext:value-type="float">
            <text:p>208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241666666666667" calcext:value-type="float">
            <text:p>0,00024166666666666700</text:p>
          </table:table-cell>
          <table:table-cell table:formula="of:=[.D118]-[.D11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18" office:value-type="float" office:value="2106" calcext:value-type="float">
            <text:p>2106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24375" calcext:value-type="float">
            <text:p>0,00024375000000000000</text:p>
          </table:table-cell>
          <table:table-cell table:formula="of:=[.D119]-[.D11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18" office:value-type="float" office:value="2124" calcext:value-type="float">
            <text:p>212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245833333333333" calcext:value-type="float">
            <text:p>0,00024583333333333300</text:p>
          </table:table-cell>
          <table:table-cell table:formula="of:=[.D120]-[.D119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18" office:value-type="float" office:value="2142" calcext:value-type="float">
            <text:p>2142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247916666666667" calcext:value-type="float">
            <text:p>0,00024791666666666700</text:p>
          </table:table-cell>
          <table:table-cell table:formula="of:=[.D121]-[.D12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18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25" calcext:value-type="float">
            <text:p>0,00025000000000000000</text:p>
          </table:table-cell>
          <table:table-cell table:formula="of:=[.D122]-[.D12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18" office:value-type="float" office:value="2178" calcext:value-type="float">
            <text:p>2178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252083333333333" calcext:value-type="float">
            <text:p>0,00025208333333333300</text:p>
          </table:table-cell>
          <table:table-cell table:formula="of:=[.D123]-[.D12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18" office:value-type="float" office:value="2196" calcext:value-type="float">
            <text:p>219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254166666666667" calcext:value-type="float">
            <text:p>0,00025416666666666700</text:p>
          </table:table-cell>
          <table:table-cell table:formula="of:=[.D124]-[.D123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18" office:value-type="float" office:value="2214" calcext:value-type="float">
            <text:p>2214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25625" calcext:value-type="float">
            <text:p>0,00025625000000000000</text:p>
          </table:table-cell>
          <table:table-cell table:formula="of:=[.D125]-[.D12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18" office:value-type="float" office:value="2232" calcext:value-type="float">
            <text:p>223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258333333333333" calcext:value-type="float">
            <text:p>0,00025833333333333300</text:p>
          </table:table-cell>
          <table:table-cell table:formula="of:=[.D126]-[.D12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18" office:value-type="float" office:value="2250" calcext:value-type="float">
            <text:p>22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260416666666667" calcext:value-type="float">
            <text:p>0,00026041666666666700</text:p>
          </table:table-cell>
          <table:table-cell table:formula="of:=[.D127]-[.D12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18" office:value-type="float" office:value="2268" calcext:value-type="float">
            <text:p>226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2625" calcext:value-type="float">
            <text:p>0,00026250000000000000</text:p>
          </table:table-cell>
          <table:table-cell table:formula="of:=[.D128]-[.D127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18" office:value-type="float" office:value="2286" calcext:value-type="float">
            <text:p>2286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264583333333333" calcext:value-type="float">
            <text:p>0,00026458333333333300</text:p>
          </table:table-cell>
          <table:table-cell table:formula="of:=[.D129]-[.D12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18" office:value-type="float" office:value="2304" calcext:value-type="float">
            <text:p>230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266666666666667" calcext:value-type="float">
            <text:p>0,00026666666666666700</text:p>
          </table:table-cell>
          <table:table-cell table:formula="of:=[.D130]-[.D12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18" office:value-type="float" office:value="2322" calcext:value-type="float">
            <text:p>2322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26875" calcext:value-type="float">
            <text:p>0,00026875000000000000</text:p>
          </table:table-cell>
          <table:table-cell table:formula="of:=[.D131]-[.D13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18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270833333333333" calcext:value-type="float">
            <text:p>0,00027083333333333300</text:p>
          </table:table-cell>
          <table:table-cell table:formula="of:=[.D132]-[.D13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18" office:value-type="float" office:value="2358" calcext:value-type="float">
            <text:p>2358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272916666666667" calcext:value-type="float">
            <text:p>0,00027291666666666700</text:p>
          </table:table-cell>
          <table:table-cell table:formula="of:=[.D133]-[.D132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18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275" calcext:value-type="float">
            <text:p>0,00027500000000000000</text:p>
          </table:table-cell>
          <table:table-cell table:formula="of:=[.D134]-[.D13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18" office:value-type="float" office:value="2394" calcext:value-type="float">
            <text:p>2394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277083333333333" calcext:value-type="float">
            <text:p>0,00027708333333333300</text:p>
          </table:table-cell>
          <table:table-cell table:formula="of:=[.D135]-[.D13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18" office:value-type="float" office:value="2412" calcext:value-type="float">
            <text:p>241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279166666666667" calcext:value-type="float">
            <text:p>0,00027916666666666700</text:p>
          </table:table-cell>
          <table:table-cell table:formula="of:=[.D136]-[.D13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18" office:value-type="float" office:value="2430" calcext:value-type="float">
            <text:p>243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28125" calcext:value-type="float">
            <text:p>0,00028125000000000000</text:p>
          </table:table-cell>
          <table:table-cell table:formula="of:=[.D137]-[.D136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18" office:value-type="float" office:value="2448" calcext:value-type="float">
            <text:p>244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283333333333333" calcext:value-type="float">
            <text:p>0,00028333333333333300</text:p>
          </table:table-cell>
          <table:table-cell table:formula="of:=[.D138]-[.D13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18" office:value-type="float" office:value="2466" calcext:value-type="float">
            <text:p>2466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285416666666667" calcext:value-type="float">
            <text:p>0,00028541666666666700</text:p>
          </table:table-cell>
          <table:table-cell table:formula="of:=[.D139]-[.D13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18" office:value-type="float" office:value="2484" calcext:value-type="float">
            <text:p>248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2875" calcext:value-type="float">
            <text:p>0,00028750000000000000</text:p>
          </table:table-cell>
          <table:table-cell table:formula="of:=[.D140]-[.D13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18" office:value-type="float" office:value="2502" calcext:value-type="float">
            <text:p>2502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289583333333333" calcext:value-type="float">
            <text:p>0,00028958333333333300</text:p>
          </table:table-cell>
          <table:table-cell table:formula="of:=[.D141]-[.D140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18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291666666666667" calcext:value-type="float">
            <text:p>0,00029166666666666700</text:p>
          </table:table-cell>
          <table:table-cell table:formula="of:=[.D142]-[.D14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18" office:value-type="float" office:value="2538" calcext:value-type="float">
            <text:p>2538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29375" calcext:value-type="float">
            <text:p>0,00029375000000000000</text:p>
          </table:table-cell>
          <table:table-cell table:formula="of:=[.D143]-[.D14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18" office:value-type="float" office:value="2556" calcext:value-type="float">
            <text:p>255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295833333333333" calcext:value-type="float">
            <text:p>0,00029583333333333300</text:p>
          </table:table-cell>
          <table:table-cell table:formula="of:=[.D144]-[.D14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18" office:value-type="float" office:value="2574" calcext:value-type="float">
            <text:p>2574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297916666666667" calcext:value-type="float">
            <text:p>0,00029791666666666700</text:p>
          </table:table-cell>
          <table:table-cell table:formula="of:=[.D145]-[.D14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18" office:value-type="float" office:value="2592" calcext:value-type="float">
            <text:p>259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3" calcext:value-type="float">
            <text:p>0,00030000000000000000</text:p>
          </table:table-cell>
          <table:table-cell table:formula="of:=[.D146]-[.D145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18" office:value-type="float" office:value="2610" calcext:value-type="float">
            <text:p>261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302083333333333" calcext:value-type="float">
            <text:p>0,00030208333333333300</text:p>
          </table:table-cell>
          <table:table-cell table:formula="of:=[.D147]-[.D14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18" office:value-type="float" office:value="2628" calcext:value-type="float">
            <text:p>262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304166666666667" calcext:value-type="float">
            <text:p>0,00030416666666666700</text:p>
          </table:table-cell>
          <table:table-cell table:formula="of:=[.D148]-[.D14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18" office:value-type="float" office:value="2646" calcext:value-type="float">
            <text:p>2646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30625" calcext:value-type="float">
            <text:p>0,00030625000000000000</text:p>
          </table:table-cell>
          <table:table-cell table:formula="of:=[.D149]-[.D14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18" office:value-type="float" office:value="2664" calcext:value-type="float">
            <text:p>266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308333333333333" calcext:value-type="float">
            <text:p>0,00030833333333333300</text:p>
          </table:table-cell>
          <table:table-cell table:formula="of:=[.D150]-[.D149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18" office:value-type="float" office:value="2682" calcext:value-type="float">
            <text:p>2682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310416666666667" calcext:value-type="float">
            <text:p>0,00031041666666666700</text:p>
          </table:table-cell>
          <table:table-cell table:formula="of:=[.D151]-[.D15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18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3125" calcext:value-type="float">
            <text:p>0,00031250000000000000</text:p>
          </table:table-cell>
          <table:table-cell table:formula="of:=[.D152]-[.D15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18" office:value-type="float" office:value="2718" calcext:value-type="float">
            <text:p>2718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314583333333333" calcext:value-type="float">
            <text:p>0,00031458333333333300</text:p>
          </table:table-cell>
          <table:table-cell table:formula="of:=[.D153]-[.D15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18" office:value-type="float" office:value="2736" calcext:value-type="float">
            <text:p>273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316666666666667" calcext:value-type="float">
            <text:p>0,00031666666666666700</text:p>
          </table:table-cell>
          <table:table-cell table:formula="of:=[.D154]-[.D153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18" office:value-type="float" office:value="2754" calcext:value-type="float">
            <text:p>2754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31875" calcext:value-type="float">
            <text:p>0,00031875000000000000</text:p>
          </table:table-cell>
          <table:table-cell table:formula="of:=[.D155]-[.D15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18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320833333333333" calcext:value-type="float">
            <text:p>0,00032083333333333300</text:p>
          </table:table-cell>
          <table:table-cell table:formula="of:=[.D156]-[.D15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18" office:value-type="float" office:value="2790" calcext:value-type="float">
            <text:p>279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322916666666667" calcext:value-type="float">
            <text:p>0,00032291666666666700</text:p>
          </table:table-cell>
          <table:table-cell table:formula="of:=[.D157]-[.D15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18" office:value-type="float" office:value="2808" calcext:value-type="float">
            <text:p>280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325" calcext:value-type="float">
            <text:p>0,00032500000000000000</text:p>
          </table:table-cell>
          <table:table-cell table:formula="of:=[.D158]-[.D157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18" office:value-type="float" office:value="2826" calcext:value-type="float">
            <text:p>2826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327083333333333" calcext:value-type="float">
            <text:p>0,00032708333333333300</text:p>
          </table:table-cell>
          <table:table-cell table:formula="of:=[.D159]-[.D15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18" office:value-type="float" office:value="2844" calcext:value-type="float">
            <text:p>284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329166666666667" calcext:value-type="float">
            <text:p>0,00032916666666666700</text:p>
          </table:table-cell>
          <table:table-cell table:formula="of:=[.D160]-[.D15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18" office:value-type="float" office:value="2862" calcext:value-type="float">
            <text:p>2862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33125" calcext:value-type="float">
            <text:p>0,00033125000000000000</text:p>
          </table:table-cell>
          <table:table-cell table:formula="of:=[.D161]-[.D16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18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333333333333333" calcext:value-type="float">
            <text:p>0,00033333333333333300</text:p>
          </table:table-cell>
          <table:table-cell table:formula="of:=[.D162]-[.D16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18" office:value-type="float" office:value="2898" calcext:value-type="float">
            <text:p>2898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335416666666667" calcext:value-type="float">
            <text:p>0,00033541666666666700</text:p>
          </table:table-cell>
          <table:table-cell table:formula="of:=[.D163]-[.D162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18" office:value-type="float" office:value="2916" calcext:value-type="float">
            <text:p>291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3375" calcext:value-type="float">
            <text:p>0,00033750000000000000</text:p>
          </table:table-cell>
          <table:table-cell table:formula="of:=[.D164]-[.D16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18" office:value-type="float" office:value="2934" calcext:value-type="float">
            <text:p>2934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339583333333333" calcext:value-type="float">
            <text:p>0,00033958333333333300</text:p>
          </table:table-cell>
          <table:table-cell table:formula="of:=[.D165]-[.D16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18" office:value-type="float" office:value="2952" calcext:value-type="float">
            <text:p>295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341666666666667" calcext:value-type="float">
            <text:p>0,00034166666666666700</text:p>
          </table:table-cell>
          <table:table-cell table:formula="of:=[.D166]-[.D16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18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34375" calcext:value-type="float">
            <text:p>0,00034375000000000000</text:p>
          </table:table-cell>
          <table:table-cell table:formula="of:=[.D167]-[.D166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18" office:value-type="float" office:value="2988" calcext:value-type="float">
            <text:p>298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345833333333333" calcext:value-type="float">
            <text:p>0,00034583333333333300</text:p>
          </table:table-cell>
          <table:table-cell table:formula="of:=[.D168]-[.D16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18" office:value-type="float" office:value="3006" calcext:value-type="float">
            <text:p>3006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347916666666667" calcext:value-type="float">
            <text:p>0,00034791666666666700</text:p>
          </table:table-cell>
          <table:table-cell table:formula="of:=[.D169]-[.D16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18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35" calcext:value-type="float">
            <text:p>0,00035000000000000000</text:p>
          </table:table-cell>
          <table:table-cell table:formula="of:=[.D170]-[.D16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18" office:value-type="float" office:value="3042" calcext:value-type="float">
            <text:p>3042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352083333333333" calcext:value-type="float">
            <text:p>0,00035208333333333300</text:p>
          </table:table-cell>
          <table:table-cell table:formula="of:=[.D171]-[.D170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18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354166666666667" calcext:value-type="float">
            <text:p>0,00035416666666666700</text:p>
          </table:table-cell>
          <table:table-cell table:formula="of:=[.D172]-[.D17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18" office:value-type="float" office:value="3078" calcext:value-type="float">
            <text:p>3078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35625" calcext:value-type="float">
            <text:p>0,00035625000000000000</text:p>
          </table:table-cell>
          <table:table-cell table:formula="of:=[.D173]-[.D17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18" office:value-type="float" office:value="3096" calcext:value-type="float">
            <text:p>309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358333333333333" calcext:value-type="float">
            <text:p>0,00035833333333333300</text:p>
          </table:table-cell>
          <table:table-cell table:formula="of:=[.D174]-[.D17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18" office:value-type="float" office:value="3114" calcext:value-type="float">
            <text:p>3114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360416666666667" calcext:value-type="float">
            <text:p>0,00036041666666666700</text:p>
          </table:table-cell>
          <table:table-cell table:formula="of:=[.D175]-[.D17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18" office:value-type="float" office:value="3132" calcext:value-type="float">
            <text:p>313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3625" calcext:value-type="float">
            <text:p>0,00036250000000000000</text:p>
          </table:table-cell>
          <table:table-cell table:formula="of:=[.D176]-[.D175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18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364583333333333" calcext:value-type="float">
            <text:p>0,00036458333333333300</text:p>
          </table:table-cell>
          <table:table-cell table:formula="of:=[.D177]-[.D17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18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366666666666667" calcext:value-type="float">
            <text:p>0,00036666666666666700</text:p>
          </table:table-cell>
          <table:table-cell table:formula="of:=[.D178]-[.D17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18" office:value-type="float" office:value="3186" calcext:value-type="float">
            <text:p>3186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36875" calcext:value-type="float">
            <text:p>0,00036875000000000000</text:p>
          </table:table-cell>
          <table:table-cell table:formula="of:=[.D179]-[.D17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18" office:value-type="float" office:value="3204" calcext:value-type="float">
            <text:p>320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370833333333333" calcext:value-type="float">
            <text:p>0,00037083333333333300</text:p>
          </table:table-cell>
          <table:table-cell table:formula="of:=[.D180]-[.D179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18" office:value-type="float" office:value="3222" calcext:value-type="float">
            <text:p>3222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372916666666667" calcext:value-type="float">
            <text:p>0,00037291666666666700</text:p>
          </table:table-cell>
          <table:table-cell table:formula="of:=[.D181]-[.D18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18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375" calcext:value-type="float">
            <text:p>0,00037500000000000000</text:p>
          </table:table-cell>
          <table:table-cell table:formula="of:=[.D182]-[.D18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18" office:value-type="float" office:value="3258" calcext:value-type="float">
            <text:p>3258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377083333333333" calcext:value-type="float">
            <text:p>0,00037708333333333300</text:p>
          </table:table-cell>
          <table:table-cell table:formula="of:=[.D183]-[.D18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18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379166666666667" calcext:value-type="float">
            <text:p>0,00037916666666666700</text:p>
          </table:table-cell>
          <table:table-cell table:formula="of:=[.D184]-[.D183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18" office:value-type="float" office:value="3294" calcext:value-type="float">
            <text:p>3294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38125" calcext:value-type="float">
            <text:p>0,00038125000000000000</text:p>
          </table:table-cell>
          <table:table-cell table:formula="of:=[.D185]-[.D18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18" office:value-type="float" office:value="3312" calcext:value-type="float">
            <text:p>331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383333333333333" calcext:value-type="float">
            <text:p>0,00038333333333333300</text:p>
          </table:table-cell>
          <table:table-cell table:formula="of:=[.D186]-[.D18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18" office:value-type="float" office:value="3330" calcext:value-type="float">
            <text:p>333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385416666666667" calcext:value-type="float">
            <text:p>0,00038541666666666700</text:p>
          </table:table-cell>
          <table:table-cell table:formula="of:=[.D187]-[.D18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18" office:value-type="float" office:value="3348" calcext:value-type="float">
            <text:p>334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3875" calcext:value-type="float">
            <text:p>0,00038750000000000000</text:p>
          </table:table-cell>
          <table:table-cell table:formula="of:=[.D188]-[.D18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18" office:value-type="float" office:value="3366" calcext:value-type="float">
            <text:p>3366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389583333333333" calcext:value-type="float">
            <text:p>0,00038958333333333300</text:p>
          </table:table-cell>
          <table:table-cell table:formula="of:=[.D189]-[.D188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18" office:value-type="float" office:value="3384" calcext:value-type="float">
            <text:p>338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391666666666667" calcext:value-type="float">
            <text:p>0,00039166666666666700</text:p>
          </table:table-cell>
          <table:table-cell table:formula="of:=[.D190]-[.D18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18" office:value-type="float" office:value="3402" calcext:value-type="float">
            <text:p>3402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39375" calcext:value-type="float">
            <text:p>0,00039375000000000000</text:p>
          </table:table-cell>
          <table:table-cell table:formula="of:=[.D191]-[.D19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18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395833333333333" calcext:value-type="float">
            <text:p>0,00039583333333333300</text:p>
          </table:table-cell>
          <table:table-cell table:formula="of:=[.D192]-[.D19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18" office:value-type="float" office:value="3438" calcext:value-type="float">
            <text:p>3438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397916666666667" calcext:value-type="float">
            <text:p>0,00039791666666666700</text:p>
          </table:table-cell>
          <table:table-cell table:formula="of:=[.D193]-[.D192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18" office:value-type="float" office:value="3456" calcext:value-type="float">
            <text:p>345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4" calcext:value-type="float">
            <text:p>0,00040000000000000000</text:p>
          </table:table-cell>
          <table:table-cell table:formula="of:=[.D194]-[.D19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18" office:value-type="float" office:value="3474" calcext:value-type="float">
            <text:p>3474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402083333333333" calcext:value-type="float">
            <text:p>0,00040208333333333300</text:p>
          </table:table-cell>
          <table:table-cell table:formula="of:=[.D195]-[.D19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18" office:value-type="float" office:value="3492" calcext:value-type="float">
            <text:p>349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404166666666667" calcext:value-type="float">
            <text:p>0,00040416666666666700</text:p>
          </table:table-cell>
          <table:table-cell table:formula="of:=[.D196]-[.D19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18" office:value-type="float" office:value="3510" calcext:value-type="float">
            <text:p>351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40625" calcext:value-type="float">
            <text:p>0,00040625000000000000</text:p>
          </table:table-cell>
          <table:table-cell table:formula="of:=[.D197]-[.D196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18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408333333333333" calcext:value-type="float">
            <text:p>0,00040833333333333300</text:p>
          </table:table-cell>
          <table:table-cell table:formula="of:=[.D198]-[.D19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18" office:value-type="float" office:value="3546" calcext:value-type="float">
            <text:p>3546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410416666666667" calcext:value-type="float">
            <text:p>0,00041041666666666700</text:p>
          </table:table-cell>
          <table:table-cell table:formula="of:=[.D199]-[.D19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18" office:value-type="float" office:value="3564" calcext:value-type="float">
            <text:p>356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4125" calcext:value-type="float">
            <text:p>0,00041250000000000000</text:p>
          </table:table-cell>
          <table:table-cell table:formula="of:=[.D200]-[.D19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18" office:value-type="float" office:value="3582" calcext:value-type="float">
            <text:p>3582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414583333333333" calcext:value-type="float">
            <text:p>0,00041458333333333300</text:p>
          </table:table-cell>
          <table:table-cell table:formula="of:=[.D201]-[.D200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18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416666666666667" calcext:value-type="float">
            <text:p>0,00041666666666666700</text:p>
          </table:table-cell>
          <table:table-cell table:formula="of:=[.D202]-[.D20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18" office:value-type="float" office:value="3618" calcext:value-type="float">
            <text:p>3618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41875" calcext:value-type="float">
            <text:p>0,00041875000000000000</text:p>
          </table:table-cell>
          <table:table-cell table:formula="of:=[.D203]-[.D20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18" office:value-type="float" office:value="3636" calcext:value-type="float">
            <text:p>363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420833333333333" calcext:value-type="float">
            <text:p>0,00042083333333333300</text:p>
          </table:table-cell>
          <table:table-cell table:formula="of:=[.D204]-[.D20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18" office:value-type="float" office:value="3654" calcext:value-type="float">
            <text:p>3654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422916666666667" calcext:value-type="float">
            <text:p>0,00042291666666666700</text:p>
          </table:table-cell>
          <table:table-cell table:formula="of:=[.D205]-[.D20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18" office:value-type="float" office:value="3672" calcext:value-type="float">
            <text:p>367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425" calcext:value-type="float">
            <text:p>0,00042500000000000000</text:p>
          </table:table-cell>
          <table:table-cell table:formula="of:=[.D206]-[.D205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18" office:value-type="float" office:value="3690" calcext:value-type="float">
            <text:p>369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427083333333333" calcext:value-type="float">
            <text:p>0,00042708333333333300</text:p>
          </table:table-cell>
          <table:table-cell table:formula="of:=[.D207]-[.D20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18" office:value-type="float" office:value="3708" calcext:value-type="float">
            <text:p>370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429166666666667" calcext:value-type="float">
            <text:p>0,00042916666666666700</text:p>
          </table:table-cell>
          <table:table-cell table:formula="of:=[.D208]-[.D20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18" office:value-type="float" office:value="3726" calcext:value-type="float">
            <text:p>3726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43125" calcext:value-type="float">
            <text:p>0,00043125000000000000</text:p>
          </table:table-cell>
          <table:table-cell table:formula="of:=[.D209]-[.D20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18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433333333333333" calcext:value-type="float">
            <text:p>0,00043333333333333300</text:p>
          </table:table-cell>
          <table:table-cell table:formula="of:=[.D210]-[.D209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18" office:value-type="float" office:value="3762" calcext:value-type="float">
            <text:p>3762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435416666666667" calcext:value-type="float">
            <text:p>0,00043541666666666700</text:p>
          </table:table-cell>
          <table:table-cell table:formula="of:=[.D211]-[.D21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18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4375" calcext:value-type="float">
            <text:p>0,00043750000000000000</text:p>
          </table:table-cell>
          <table:table-cell table:formula="of:=[.D212]-[.D21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18" office:value-type="float" office:value="3798" calcext:value-type="float">
            <text:p>3798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439583333333333" calcext:value-type="float">
            <text:p>0,00043958333333333300</text:p>
          </table:table-cell>
          <table:table-cell table:formula="of:=[.D213]-[.D21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18" office:value-type="float" office:value="3816" calcext:value-type="float">
            <text:p>381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441666666666667" calcext:value-type="float">
            <text:p>0,00044166666666666700</text:p>
          </table:table-cell>
          <table:table-cell table:formula="of:=[.D214]-[.D213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18" office:value-type="float" office:value="3834" calcext:value-type="float">
            <text:p>3834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44375" calcext:value-type="float">
            <text:p>0,00044375000000000000</text:p>
          </table:table-cell>
          <table:table-cell table:formula="of:=[.D215]-[.D21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18" office:value-type="float" office:value="3852" calcext:value-type="float">
            <text:p>385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445833333333333" calcext:value-type="float">
            <text:p>0,00044583333333333300</text:p>
          </table:table-cell>
          <table:table-cell table:formula="of:=[.D216]-[.D21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18" office:value-type="float" office:value="3870" calcext:value-type="float">
            <text:p>387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447916666666667" calcext:value-type="float">
            <text:p>0,00044791666666666700</text:p>
          </table:table-cell>
          <table:table-cell table:formula="of:=[.D217]-[.D21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18" office:value-type="float" office:value="3888" calcext:value-type="float">
            <text:p>388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45" calcext:value-type="float">
            <text:p>0,00045000000000000000</text:p>
          </table:table-cell>
          <table:table-cell table:formula="of:=[.D218]-[.D21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18" office:value-type="float" office:value="3906" calcext:value-type="float">
            <text:p>3906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452083333333333" calcext:value-type="float">
            <text:p>0,00045208333333333300</text:p>
          </table:table-cell>
          <table:table-cell table:formula="of:=[.D219]-[.D218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18" office:value-type="float" office:value="3924" calcext:value-type="float">
            <text:p>392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454166666666667" calcext:value-type="float">
            <text:p>0,00045416666666666700</text:p>
          </table:table-cell>
          <table:table-cell table:formula="of:=[.D220]-[.D21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18" office:value-type="float" office:value="3942" calcext:value-type="float">
            <text:p>3942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45625" calcext:value-type="float">
            <text:p>0,00045625000000000000</text:p>
          </table:table-cell>
          <table:table-cell table:formula="of:=[.D221]-[.D22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18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458333333333333" calcext:value-type="float">
            <text:p>0,00045833333333333300</text:p>
          </table:table-cell>
          <table:table-cell table:formula="of:=[.D222]-[.D22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18" office:value-type="float" office:value="3978" calcext:value-type="float">
            <text:p>3978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460416666666667" calcext:value-type="float">
            <text:p>0,00046041666666666700</text:p>
          </table:table-cell>
          <table:table-cell table:formula="of:=[.D223]-[.D222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18" office:value-type="float" office:value="3996" calcext:value-type="float">
            <text:p>399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4625" calcext:value-type="float">
            <text:p>0,00046250000000000000</text:p>
          </table:table-cell>
          <table:table-cell table:formula="of:=[.D224]-[.D22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18" office:value-type="float" office:value="4014" calcext:value-type="float">
            <text:p>4014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464583333333333" calcext:value-type="float">
            <text:p>0,00046458333333333300</text:p>
          </table:table-cell>
          <table:table-cell table:formula="of:=[.D225]-[.D22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18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466666666666667" calcext:value-type="float">
            <text:p>0,00046666666666666700</text:p>
          </table:table-cell>
          <table:table-cell table:formula="of:=[.D226]-[.D22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18" office:value-type="float" office:value="4050" calcext:value-type="float">
            <text:p>40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46875" calcext:value-type="float">
            <text:p>0,00046875000000000000</text:p>
          </table:table-cell>
          <table:table-cell table:formula="of:=[.D227]-[.D226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18" office:value-type="float" office:value="4068" calcext:value-type="float">
            <text:p>406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470833333333333" calcext:value-type="float">
            <text:p>0,00047083333333333300</text:p>
          </table:table-cell>
          <table:table-cell table:formula="of:=[.D228]-[.D22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18" office:value-type="float" office:value="4086" calcext:value-type="float">
            <text:p>4086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472916666666667" calcext:value-type="float">
            <text:p>0,00047291666666666700</text:p>
          </table:table-cell>
          <table:table-cell table:formula="of:=[.D229]-[.D22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18" office:value-type="float" office:value="4104" calcext:value-type="float">
            <text:p>410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475" calcext:value-type="float">
            <text:p>0,00047500000000000000</text:p>
          </table:table-cell>
          <table:table-cell table:formula="of:=[.D230]-[.D22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18" office:value-type="float" office:value="4122" calcext:value-type="float">
            <text:p>4122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477083333333333" calcext:value-type="float">
            <text:p>0,00047708333333333300</text:p>
          </table:table-cell>
          <table:table-cell table:formula="of:=[.D231]-[.D23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18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479166666666667" calcext:value-type="float">
            <text:p>0,00047916666666666700</text:p>
          </table:table-cell>
          <table:table-cell table:formula="of:=[.D232]-[.D231]" office:value-type="float" office:value="0.00000208333333333338" calcext:value-type="float">
            <text:p>0,0000020833333333333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18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48125" calcext:value-type="float">
            <text:p>0,00048125000000000000</text:p>
          </table:table-cell>
          <table:table-cell table:formula="of:=[.D233]-[.D23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18" office:value-type="float" office:value="4176" calcext:value-type="float">
            <text:p>417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483333333333333" calcext:value-type="float">
            <text:p>0,00048333333333333300</text:p>
          </table:table-cell>
          <table:table-cell table:formula="of:=[.D234]-[.D23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18" office:value-type="float" office:value="4194" calcext:value-type="float">
            <text:p>4194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485416666666667" calcext:value-type="float">
            <text:p>0,00048541666666666700</text:p>
          </table:table-cell>
          <table:table-cell table:formula="of:=[.D235]-[.D23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18" office:value-type="float" office:value="4212" calcext:value-type="float">
            <text:p>421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4875" calcext:value-type="float">
            <text:p>0,00048750000000000000</text:p>
          </table:table-cell>
          <table:table-cell table:formula="of:=[.D236]-[.D23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18" office:value-type="float" office:value="4230" calcext:value-type="float">
            <text:p>423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489583333333333" calcext:value-type="float">
            <text:p>0,00048958333333333300</text:p>
          </table:table-cell>
          <table:table-cell table:formula="of:=[.D237]-[.D23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18" office:value-type="float" office:value="4248" calcext:value-type="float">
            <text:p>424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491666666666667" calcext:value-type="float">
            <text:p>0,00049166666666666700</text:p>
          </table:table-cell>
          <table:table-cell table:formula="of:=[.D238]-[.D237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18" office:value-type="float" office:value="4266" calcext:value-type="float">
            <text:p>4266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49375" calcext:value-type="float">
            <text:p>0,00049375000000000000</text:p>
          </table:table-cell>
          <table:table-cell table:formula="of:=[.D239]-[.D23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18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495833333333333" calcext:value-type="float">
            <text:p>0,00049583333333333300</text:p>
          </table:table-cell>
          <table:table-cell table:formula="of:=[.D240]-[.D23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18" office:value-type="float" office:value="4302" calcext:value-type="float">
            <text:p>4302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497916666666667" calcext:value-type="float">
            <text:p>0,00049791666666666700</text:p>
          </table:table-cell>
          <table:table-cell table:formula="of:=[.D241]-[.D24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18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5" calcext:value-type="float">
            <text:p>0,00050000000000000000</text:p>
          </table:table-cell>
          <table:table-cell table:formula="of:=[.D242]-[.D24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18" office:value-type="float" office:value="4338" calcext:value-type="float">
            <text:p>4338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502083333333333" calcext:value-type="float">
            <text:p>0,00050208333333333300</text:p>
          </table:table-cell>
          <table:table-cell table:formula="of:=[.D243]-[.D24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18" office:value-type="float" office:value="4356" calcext:value-type="float">
            <text:p>435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504166666666667" calcext:value-type="float">
            <text:p>0,00050416666666666700</text:p>
          </table:table-cell>
          <table:table-cell table:formula="of:=[.D244]-[.D24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18" office:value-type="float" office:value="4374" calcext:value-type="float">
            <text:p>4374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50625" calcext:value-type="float">
            <text:p>0,00050625000000000000</text:p>
          </table:table-cell>
          <table:table-cell table:formula="of:=[.D245]-[.D24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18" office:value-type="float" office:value="4392" calcext:value-type="float">
            <text:p>439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508333333333333" calcext:value-type="float">
            <text:p>0,00050833333333333300</text:p>
          </table:table-cell>
          <table:table-cell table:formula="of:=[.D246]-[.D24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18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510416666666667" calcext:value-type="float">
            <text:p>0,00051041666666666700</text:p>
          </table:table-cell>
          <table:table-cell table:formula="of:=[.D247]-[.D246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18" office:value-type="float" office:value="4428" calcext:value-type="float">
            <text:p>442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5125" calcext:value-type="float">
            <text:p>0,00051250000000000000</text:p>
          </table:table-cell>
          <table:table-cell table:formula="of:=[.D248]-[.D24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18" office:value-type="float" office:value="4446" calcext:value-type="float">
            <text:p>4446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514583333333333" calcext:value-type="float">
            <text:p>0,00051458333333333300</text:p>
          </table:table-cell>
          <table:table-cell table:formula="of:=[.D249]-[.D24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18" office:value-type="float" office:value="4464" calcext:value-type="float">
            <text:p>446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516666666666667" calcext:value-type="float">
            <text:p>0,00051666666666666700</text:p>
          </table:table-cell>
          <table:table-cell table:formula="of:=[.D250]-[.D24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18" office:value-type="float" office:value="4482" calcext:value-type="float">
            <text:p>4482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51875" calcext:value-type="float">
            <text:p>0,00051875000000000000</text:p>
          </table:table-cell>
          <table:table-cell table:formula="of:=[.D251]-[.D25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18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520833333333333" calcext:value-type="float">
            <text:p>0,00052083333333333300</text:p>
          </table:table-cell>
          <table:table-cell table:formula="of:=[.D252]-[.D25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18" office:value-type="float" office:value="4518" calcext:value-type="float">
            <text:p>4518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522916666666667" calcext:value-type="float">
            <text:p>0,00052291666666666700</text:p>
          </table:table-cell>
          <table:table-cell table:formula="of:=[.D253]-[.D25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18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525" calcext:value-type="float">
            <text:p>0,00052500000000000000</text:p>
          </table:table-cell>
          <table:table-cell table:formula="of:=[.D254]-[.D25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18" office:value-type="float" office:value="4554" calcext:value-type="float">
            <text:p>4554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527083333333333" calcext:value-type="float">
            <text:p>0,00052708333333333300</text:p>
          </table:table-cell>
          <table:table-cell table:formula="of:=[.D255]-[.D254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18" office:value-type="float" office:value="4572" calcext:value-type="float">
            <text:p>457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529166666666667" calcext:value-type="float">
            <text:p>0,00052916666666666700</text:p>
          </table:table-cell>
          <table:table-cell table:formula="of:=[.D256]-[.D25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18" office:value-type="float" office:value="4590" calcext:value-type="float">
            <text:p>459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53125" calcext:value-type="float">
            <text:p>0,00053125000000000000</text:p>
          </table:table-cell>
          <table:table-cell table:formula="of:=[.D257]-[.D25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18" office:value-type="float" office:value="4608" calcext:value-type="float">
            <text:p>460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533333333333333" calcext:value-type="float">
            <text:p>0,00053333333333333300</text:p>
          </table:table-cell>
          <table:table-cell table:formula="of:=[.D258]-[.D25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18" office:value-type="float" office:value="4626" calcext:value-type="float">
            <text:p>4626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535416666666667" calcext:value-type="float">
            <text:p>0,00053541666666666700</text:p>
          </table:table-cell>
          <table:table-cell table:formula="of:=[.D259]-[.D25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18" office:value-type="float" office:value="4644" calcext:value-type="float">
            <text:p>464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5375" calcext:value-type="float">
            <text:p>0,00053750000000000000</text:p>
          </table:table-cell>
          <table:table-cell table:formula="of:=[.D260]-[.D25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18" office:value-type="float" office:value="4662" calcext:value-type="float">
            <text:p>4662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539583333333333" calcext:value-type="float">
            <text:p>0,00053958333333333300</text:p>
          </table:table-cell>
          <table:table-cell table:formula="of:=[.D261]-[.D26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18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541666666666667" calcext:value-type="float">
            <text:p>0,00054166666666666700</text:p>
          </table:table-cell>
          <table:table-cell table:formula="of:=[.D262]-[.D26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18" office:value-type="float" office:value="4698" calcext:value-type="float">
            <text:p>4698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54375" calcext:value-type="float">
            <text:p>0,00054375000000000000</text:p>
          </table:table-cell>
          <table:table-cell table:formula="of:=[.D263]-[.D26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18" office:value-type="float" office:value="4716" calcext:value-type="float">
            <text:p>471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545833333333333" calcext:value-type="float">
            <text:p>0,00054583333333333300</text:p>
          </table:table-cell>
          <table:table-cell table:formula="of:=[.D264]-[.D263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18" office:value-type="float" office:value="4734" calcext:value-type="float">
            <text:p>4734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547916666666667" calcext:value-type="float">
            <text:p>0,00054791666666666700</text:p>
          </table:table-cell>
          <table:table-cell table:formula="of:=[.D265]-[.D26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18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55" calcext:value-type="float">
            <text:p>0,00055000000000000000</text:p>
          </table:table-cell>
          <table:table-cell table:formula="of:=[.D266]-[.D26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18" office:value-type="float" office:value="4770" calcext:value-type="float">
            <text:p>477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552083333333333" calcext:value-type="float">
            <text:p>0,00055208333333333300</text:p>
          </table:table-cell>
          <table:table-cell table:formula="of:=[.D267]-[.D26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18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554166666666667" calcext:value-type="float">
            <text:p>0,00055416666666666700</text:p>
          </table:table-cell>
          <table:table-cell table:formula="of:=[.D268]-[.D26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18" office:value-type="float" office:value="4806" calcext:value-type="float">
            <text:p>4806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55625" calcext:value-type="float">
            <text:p>0,00055625000000000000</text:p>
          </table:table-cell>
          <table:table-cell table:formula="of:=[.D269]-[.D26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18" office:value-type="float" office:value="4824" calcext:value-type="float">
            <text:p>482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558333333333333" calcext:value-type="float">
            <text:p>0,00055833333333333300</text:p>
          </table:table-cell>
          <table:table-cell table:formula="of:=[.D270]-[.D26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18" office:value-type="float" office:value="4842" calcext:value-type="float">
            <text:p>4842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560416666666667" calcext:value-type="float">
            <text:p>0,00056041666666666700</text:p>
          </table:table-cell>
          <table:table-cell table:formula="of:=[.D271]-[.D27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18" office:value-type="float" office:value="4860" calcext:value-type="float">
            <text:p>486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5625" calcext:value-type="float">
            <text:p>0,00056250000000000000</text:p>
          </table:table-cell>
          <table:table-cell table:formula="of:=[.D272]-[.D271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18" office:value-type="float" office:value="4878" calcext:value-type="float">
            <text:p>4878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564583333333333" calcext:value-type="float">
            <text:p>0,00056458333333333300</text:p>
          </table:table-cell>
          <table:table-cell table:formula="of:=[.D273]-[.D27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18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566666666666667" calcext:value-type="float">
            <text:p>0,00056666666666666700</text:p>
          </table:table-cell>
          <table:table-cell table:formula="of:=[.D274]-[.D27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18" office:value-type="float" office:value="4914" calcext:value-type="float">
            <text:p>4914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56875" calcext:value-type="float">
            <text:p>0,00056875000000000000</text:p>
          </table:table-cell>
          <table:table-cell table:formula="of:=[.D275]-[.D27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18" office:value-type="float" office:value="4932" calcext:value-type="float">
            <text:p>493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570833333333333" calcext:value-type="float">
            <text:p>0,00057083333333333300</text:p>
          </table:table-cell>
          <table:table-cell table:formula="of:=[.D276]-[.D27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18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572916666666667" calcext:value-type="float">
            <text:p>0,00057291666666666700</text:p>
          </table:table-cell>
          <table:table-cell table:formula="of:=[.D277]-[.D27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18" office:value-type="float" office:value="4968" calcext:value-type="float">
            <text:p>496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575" calcext:value-type="float">
            <text:p>0,00057500000000000000</text:p>
          </table:table-cell>
          <table:table-cell table:formula="of:=[.D278]-[.D27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18" office:value-type="float" office:value="4986" calcext:value-type="float">
            <text:p>4986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577083333333333" calcext:value-type="float">
            <text:p>0,00057708333333333300</text:p>
          </table:table-cell>
          <table:table-cell table:formula="of:=[.D279]-[.D27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18" office:value-type="float" office:value="5004" calcext:value-type="float">
            <text:p>500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579166666666667" calcext:value-type="float">
            <text:p>0,00057916666666666700</text:p>
          </table:table-cell>
          <table:table-cell table:formula="of:=[.D280]-[.D27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18" office:value-type="float" office:value="5022" calcext:value-type="float">
            <text:p>5022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58125" calcext:value-type="float">
            <text:p>0,00058125000000000000</text:p>
          </table:table-cell>
          <table:table-cell table:formula="of:=[.D281]-[.D280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18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583333333333333" calcext:value-type="float">
            <text:p>0,00058333333333333300</text:p>
          </table:table-cell>
          <table:table-cell table:formula="of:=[.D282]-[.D28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18" office:value-type="float" office:value="5058" calcext:value-type="float">
            <text:p>5058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585416666666667" calcext:value-type="float">
            <text:p>0,00058541666666666700</text:p>
          </table:table-cell>
          <table:table-cell table:formula="of:=[.D283]-[.D28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18" office:value-type="float" office:value="5076" calcext:value-type="float">
            <text:p>507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5875" calcext:value-type="float">
            <text:p>0,00058750000000000000</text:p>
          </table:table-cell>
          <table:table-cell table:formula="of:=[.D284]-[.D28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18" office:value-type="float" office:value="5094" calcext:value-type="float">
            <text:p>5094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589583333333333" calcext:value-type="float">
            <text:p>0,00058958333333333300</text:p>
          </table:table-cell>
          <table:table-cell table:formula="of:=[.D285]-[.D28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18" office:value-type="float" office:value="5112" calcext:value-type="float">
            <text:p>511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591666666666667" calcext:value-type="float">
            <text:p>0,00059166666666666700</text:p>
          </table:table-cell>
          <table:table-cell table:formula="of:=[.D286]-[.D28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18" office:value-type="float" office:value="5130" calcext:value-type="float">
            <text:p>513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59375" calcext:value-type="float">
            <text:p>0,00059375000000000000</text:p>
          </table:table-cell>
          <table:table-cell table:formula="of:=[.D287]-[.D28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18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595833333333333" calcext:value-type="float">
            <text:p>0,00059583333333333300</text:p>
          </table:table-cell>
          <table:table-cell table:formula="of:=[.D288]-[.D28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18" office:value-type="float" office:value="5166" calcext:value-type="float">
            <text:p>5166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597916666666667" calcext:value-type="float">
            <text:p>0,00059791666666666700</text:p>
          </table:table-cell>
          <table:table-cell table:formula="of:=[.D289]-[.D28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18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6" calcext:value-type="float">
            <text:p>0,00060000000000000000</text:p>
          </table:table-cell>
          <table:table-cell table:formula="of:=[.D290]-[.D289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18" office:value-type="float" office:value="5202" calcext:value-type="float">
            <text:p>5202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602083333333333" calcext:value-type="float">
            <text:p>0,00060208333333333300</text:p>
          </table:table-cell>
          <table:table-cell table:formula="of:=[.D291]-[.D29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18" office:value-type="float" office:value="5220" calcext:value-type="float">
            <text:p>522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604166666666667" calcext:value-type="float">
            <text:p>0,00060416666666666700</text:p>
          </table:table-cell>
          <table:table-cell table:formula="of:=[.D292]-[.D29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18" office:value-type="float" office:value="5238" calcext:value-type="float">
            <text:p>5238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60625" calcext:value-type="float">
            <text:p>0,00060625000000000000</text:p>
          </table:table-cell>
          <table:table-cell table:formula="of:=[.D293]-[.D29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18" office:value-type="float" office:value="5256" calcext:value-type="float">
            <text:p>525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608333333333333" calcext:value-type="float">
            <text:p>0,00060833333333333300</text:p>
          </table:table-cell>
          <table:table-cell table:formula="of:=[.D294]-[.D29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18" office:value-type="float" office:value="5274" calcext:value-type="float">
            <text:p>5274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610416666666667" calcext:value-type="float">
            <text:p>0,00061041666666666700</text:p>
          </table:table-cell>
          <table:table-cell table:formula="of:=[.D295]-[.D29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18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6125" calcext:value-type="float">
            <text:p>0,00061250000000000000</text:p>
          </table:table-cell>
          <table:table-cell table:formula="of:=[.D296]-[.D29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18" office:value-type="float" office:value="5310" calcext:value-type="float">
            <text:p>531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614583333333333" calcext:value-type="float">
            <text:p>0,00061458333333333300</text:p>
          </table:table-cell>
          <table:table-cell table:formula="of:=[.D297]-[.D29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18" office:value-type="float" office:value="5328" calcext:value-type="float">
            <text:p>532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616666666666667" calcext:value-type="float">
            <text:p>0,00061666666666666700</text:p>
          </table:table-cell>
          <table:table-cell table:formula="of:=[.D298]-[.D297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18" office:value-type="float" office:value="5346" calcext:value-type="float">
            <text:p>5346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61875" calcext:value-type="float">
            <text:p>0,00061875000000000000</text:p>
          </table:table-cell>
          <table:table-cell table:formula="of:=[.D299]-[.D29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18" office:value-type="float" office:value="5364" calcext:value-type="float">
            <text:p>536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620833333333333" calcext:value-type="float">
            <text:p>0,00062083333333333300</text:p>
          </table:table-cell>
          <table:table-cell table:formula="of:=[.D300]-[.D29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18" office:value-type="float" office:value="5382" calcext:value-type="float">
            <text:p>5382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622916666666667" calcext:value-type="float">
            <text:p>0,00062291666666666700</text:p>
          </table:table-cell>
          <table:table-cell table:formula="of:=[.D301]-[.D30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18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625" calcext:value-type="float">
            <text:p>0,00062500000000000000</text:p>
          </table:table-cell>
          <table:table-cell table:formula="of:=[.D302]-[.D30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18" office:value-type="float" office:value="5418" calcext:value-type="float">
            <text:p>5418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627083333333333" calcext:value-type="float">
            <text:p>0,00062708333333333300</text:p>
          </table:table-cell>
          <table:table-cell table:formula="of:=[.D303]-[.D30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18" office:value-type="float" office:value="5436" calcext:value-type="float">
            <text:p>543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629166666666667" calcext:value-type="float">
            <text:p>0,00062916666666666700</text:p>
          </table:table-cell>
          <table:table-cell table:formula="of:=[.D304]-[.D30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18" office:value-type="float" office:value="5454" calcext:value-type="float">
            <text:p>5454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63125" calcext:value-type="float">
            <text:p>0,00063125000000000000</text:p>
          </table:table-cell>
          <table:table-cell table:formula="of:=[.D305]-[.D30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18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633333333333333" calcext:value-type="float">
            <text:p>0,00063333333333333300</text:p>
          </table:table-cell>
          <table:table-cell table:formula="of:=[.D306]-[.D30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18" office:value-type="float" office:value="5490" calcext:value-type="float">
            <text:p>549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635416666666667" calcext:value-type="float">
            <text:p>0,00063541666666666700</text:p>
          </table:table-cell>
          <table:table-cell table:formula="of:=[.D307]-[.D306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18" office:value-type="float" office:value="5508" calcext:value-type="float">
            <text:p>550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6375" calcext:value-type="float">
            <text:p>0,00063750000000000000</text:p>
          </table:table-cell>
          <table:table-cell table:formula="of:=[.D308]-[.D30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18" office:value-type="float" office:value="5526" calcext:value-type="float">
            <text:p>5526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639583333333333" calcext:value-type="float">
            <text:p>0,00063958333333333300</text:p>
          </table:table-cell>
          <table:table-cell table:formula="of:=[.D309]-[.D30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18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641666666666667" calcext:value-type="float">
            <text:p>0,00064166666666666700</text:p>
          </table:table-cell>
          <table:table-cell table:formula="of:=[.D310]-[.D30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18" office:value-type="float" office:value="5562" calcext:value-type="float">
            <text:p>5562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64375" calcext:value-type="float">
            <text:p>0,00064375000000000000</text:p>
          </table:table-cell>
          <table:table-cell table:formula="of:=[.D311]-[.D31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18" office:value-type="float" office:value="5580" calcext:value-type="float">
            <text:p>558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645833333333333" calcext:value-type="float">
            <text:p>0,00064583333333333300</text:p>
          </table:table-cell>
          <table:table-cell table:formula="of:=[.D312]-[.D31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18" office:value-type="float" office:value="5598" calcext:value-type="float">
            <text:p>5598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647916666666667" calcext:value-type="float">
            <text:p>0,00064791666666666700</text:p>
          </table:table-cell>
          <table:table-cell table:formula="of:=[.D313]-[.D31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18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65" calcext:value-type="float">
            <text:p>0,00065000000000000000</text:p>
          </table:table-cell>
          <table:table-cell table:formula="of:=[.D314]-[.D31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18" office:value-type="float" office:value="5634" calcext:value-type="float">
            <text:p>5634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652083333333333" calcext:value-type="float">
            <text:p>0,00065208333333333300</text:p>
          </table:table-cell>
          <table:table-cell table:formula="of:=[.D315]-[.D314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18" office:value-type="float" office:value="5652" calcext:value-type="float">
            <text:p>5652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654166666666667" calcext:value-type="float">
            <text:p>0,00065416666666666700</text:p>
          </table:table-cell>
          <table:table-cell table:formula="of:=[.D316]-[.D31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18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65625" calcext:value-type="float">
            <text:p>0,00065625000000000000</text:p>
          </table:table-cell>
          <table:table-cell table:formula="of:=[.D317]-[.D31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18" office:value-type="float" office:value="5688" calcext:value-type="float">
            <text:p>5688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658333333333333" calcext:value-type="float">
            <text:p>0,00065833333333333300</text:p>
          </table:table-cell>
          <table:table-cell table:formula="of:=[.D318]-[.D31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18" office:value-type="float" office:value="5706" calcext:value-type="float">
            <text:p>5706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660416666666667" calcext:value-type="float">
            <text:p>0,00066041666666666700</text:p>
          </table:table-cell>
          <table:table-cell table:formula="of:=[.D319]-[.D31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18" office:value-type="float" office:value="5724" calcext:value-type="float">
            <text:p>5724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6625" calcext:value-type="float">
            <text:p>0,00066250000000000000</text:p>
          </table:table-cell>
          <table:table-cell table:formula="of:=[.D320]-[.D31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18" office:value-type="float" office:value="5742" calcext:value-type="float">
            <text:p>5742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664583333333333" calcext:value-type="float">
            <text:p>0,00066458333333333300</text:p>
          </table:table-cell>
          <table:table-cell table:formula="of:=[.D321]-[.D32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18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666666666666667" calcext:value-type="float">
            <text:p>0,00066666666666666700</text:p>
          </table:table-cell>
          <table:table-cell table:formula="of:=[.D322]-[.D32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18" office:value-type="float" office:value="5778" calcext:value-type="float">
            <text:p>5778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66875" calcext:value-type="float">
            <text:p>0,00066875000000000000</text:p>
          </table:table-cell>
          <table:table-cell table:formula="of:=[.D323]-[.D32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18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670833333333333" calcext:value-type="float">
            <text:p>0,00067083333333333300</text:p>
          </table:table-cell>
          <table:table-cell table:formula="of:=[.D324]-[.D323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18" office:value-type="float" office:value="5814" calcext:value-type="float">
            <text:p>5814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672916666666667" calcext:value-type="float">
            <text:p>0,00067291666666666700</text:p>
          </table:table-cell>
          <table:table-cell table:formula="of:=[.D325]-[.D32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18" office:value-type="float" office:value="5832" calcext:value-type="float">
            <text:p>5832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675" calcext:value-type="float">
            <text:p>0,00067500000000000000</text:p>
          </table:table-cell>
          <table:table-cell table:formula="of:=[.D326]-[.D32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18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677083333333333" calcext:value-type="float">
            <text:p>0,00067708333333333300</text:p>
          </table:table-cell>
          <table:table-cell table:formula="of:=[.D327]-[.D32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18" office:value-type="float" office:value="5868" calcext:value-type="float">
            <text:p>5868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679166666666667" calcext:value-type="float">
            <text:p>0,00067916666666666700</text:p>
          </table:table-cell>
          <table:table-cell table:formula="of:=[.D328]-[.D32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18" office:value-type="float" office:value="5886" calcext:value-type="float">
            <text:p>5886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68125" calcext:value-type="float">
            <text:p>0,00068125000000000000</text:p>
          </table:table-cell>
          <table:table-cell table:formula="of:=[.D329]-[.D32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18" office:value-type="float" office:value="5904" calcext:value-type="float">
            <text:p>5904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683333333333333" calcext:value-type="float">
            <text:p>0,00068333333333333300</text:p>
          </table:table-cell>
          <table:table-cell table:formula="of:=[.D330]-[.D32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18" office:value-type="float" office:value="5922" calcext:value-type="float">
            <text:p>5922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685416666666667" calcext:value-type="float">
            <text:p>0,00068541666666666700</text:p>
          </table:table-cell>
          <table:table-cell table:formula="of:=[.D331]-[.D33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18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6875" calcext:value-type="float">
            <text:p>0,00068750000000000000</text:p>
          </table:table-cell>
          <table:table-cell table:formula="of:=[.D332]-[.D33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18" office:value-type="float" office:value="5958" calcext:value-type="float">
            <text:p>5958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689583333333333" calcext:value-type="float">
            <text:p>0,00068958333333333300</text:p>
          </table:table-cell>
          <table:table-cell table:formula="of:=[.D333]-[.D332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18" office:value-type="float" office:value="5976" calcext:value-type="float">
            <text:p>5976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691666666666667" calcext:value-type="float">
            <text:p>0,00069166666666666700</text:p>
          </table:table-cell>
          <table:table-cell table:formula="of:=[.D334]-[.D33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18" office:value-type="float" office:value="5994" calcext:value-type="float">
            <text:p>5994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69375" calcext:value-type="float">
            <text:p>0,00069375000000000000</text:p>
          </table:table-cell>
          <table:table-cell table:formula="of:=[.D335]-[.D33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18" office:value-type="float" office:value="6012" calcext:value-type="float">
            <text:p>6012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695833333333333" calcext:value-type="float">
            <text:p>0,00069583333333333300</text:p>
          </table:table-cell>
          <table:table-cell table:formula="of:=[.D336]-[.D33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18" office:value-type="float" office:value="6030" calcext:value-type="float">
            <text:p>603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697916666666667" calcext:value-type="float">
            <text:p>0,00069791666666666700</text:p>
          </table:table-cell>
          <table:table-cell table:formula="of:=[.D337]-[.D33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18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7" calcext:value-type="float">
            <text:p>0,00070000000000000000</text:p>
          </table:table-cell>
          <table:table-cell table:formula="of:=[.D338]-[.D33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18" office:value-type="float" office:value="6066" calcext:value-type="float">
            <text:p>6066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702083333333333" calcext:value-type="float">
            <text:p>0,00070208333333333300</text:p>
          </table:table-cell>
          <table:table-cell table:formula="of:=[.D339]-[.D33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18" office:value-type="float" office:value="6084" calcext:value-type="float">
            <text:p>6084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704166666666667" calcext:value-type="float">
            <text:p>0,00070416666666666700</text:p>
          </table:table-cell>
          <table:table-cell table:formula="of:=[.D340]-[.D33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18" office:value-type="float" office:value="6102" calcext:value-type="float">
            <text:p>6102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70625" calcext:value-type="float">
            <text:p>0,00070625000000000000</text:p>
          </table:table-cell>
          <table:table-cell table:formula="of:=[.D341]-[.D340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18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708333333333333" calcext:value-type="float">
            <text:p>0,00070833333333333300</text:p>
          </table:table-cell>
          <table:table-cell table:formula="of:=[.D342]-[.D34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18" office:value-type="float" office:value="6138" calcext:value-type="float">
            <text:p>6138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710416666666667" calcext:value-type="float">
            <text:p>0,00071041666666666700</text:p>
          </table:table-cell>
          <table:table-cell table:formula="of:=[.D343]-[.D34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18" office:value-type="float" office:value="6156" calcext:value-type="float">
            <text:p>6156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7125" calcext:value-type="float">
            <text:p>0,00071250000000000000</text:p>
          </table:table-cell>
          <table:table-cell table:formula="of:=[.D344]-[.D34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18" office:value-type="float" office:value="6174" calcext:value-type="float">
            <text:p>6174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714583333333333" calcext:value-type="float">
            <text:p>0,00071458333333333300</text:p>
          </table:table-cell>
          <table:table-cell table:formula="of:=[.D345]-[.D34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18" office:value-type="float" office:value="6192" calcext:value-type="float">
            <text:p>6192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716666666666667" calcext:value-type="float">
            <text:p>0,00071666666666666700</text:p>
          </table:table-cell>
          <table:table-cell table:formula="of:=[.D346]-[.D34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18" office:value-type="float" office:value="6210" calcext:value-type="float">
            <text:p>621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71875" calcext:value-type="float">
            <text:p>0,00071875000000000000</text:p>
          </table:table-cell>
          <table:table-cell table:formula="of:=[.D347]-[.D34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18" office:value-type="float" office:value="6228" calcext:value-type="float">
            <text:p>6228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720833333333333" calcext:value-type="float">
            <text:p>0,00072083333333333300</text:p>
          </table:table-cell>
          <table:table-cell table:formula="of:=[.D348]-[.D34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18" office:value-type="float" office:value="6246" calcext:value-type="float">
            <text:p>6246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722916666666667" calcext:value-type="float">
            <text:p>0,00072291666666666700</text:p>
          </table:table-cell>
          <table:table-cell table:formula="of:=[.D349]-[.D34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18" office:value-type="float" office:value="6264" calcext:value-type="float">
            <text:p>6264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725" calcext:value-type="float">
            <text:p>0,00072500000000000000</text:p>
          </table:table-cell>
          <table:table-cell table:formula="of:=[.D350]-[.D349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18" office:value-type="float" office:value="6282" calcext:value-type="float">
            <text:p>6282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727083333333333" calcext:value-type="float">
            <text:p>0,00072708333333333400</text:p>
          </table:table-cell>
          <table:table-cell table:formula="of:=[.D351]-[.D35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18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729166666666667" calcext:value-type="float">
            <text:p>0,00072916666666666700</text:p>
          </table:table-cell>
          <table:table-cell table:formula="of:=[.D352]-[.D35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18" office:value-type="float" office:value="6318" calcext:value-type="float">
            <text:p>6318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73125" calcext:value-type="float">
            <text:p>0,00073125000000000000</text:p>
          </table:table-cell>
          <table:table-cell table:formula="of:=[.D353]-[.D35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18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733333333333333" calcext:value-type="float">
            <text:p>0,00073333333333333300</text:p>
          </table:table-cell>
          <table:table-cell table:formula="of:=[.D354]-[.D35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18" office:value-type="float" office:value="6354" calcext:value-type="float">
            <text:p>6354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735416666666667" calcext:value-type="float">
            <text:p>0,00073541666666666700</text:p>
          </table:table-cell>
          <table:table-cell table:formula="of:=[.D355]-[.D35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18" office:value-type="float" office:value="6372" calcext:value-type="float">
            <text:p>6372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7375" calcext:value-type="float">
            <text:p>0,00073750000000000000</text:p>
          </table:table-cell>
          <table:table-cell table:formula="of:=[.D356]-[.D35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18" office:value-type="float" office:value="6390" calcext:value-type="float">
            <text:p>639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739583333333333" calcext:value-type="float">
            <text:p>0,00073958333333333300</text:p>
          </table:table-cell>
          <table:table-cell table:formula="of:=[.D357]-[.D35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18" office:value-type="float" office:value="6408" calcext:value-type="float">
            <text:p>6408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741666666666667" calcext:value-type="float">
            <text:p>0,00074166666666666700</text:p>
          </table:table-cell>
          <table:table-cell table:formula="of:=[.D358]-[.D357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18" office:value-type="float" office:value="6426" calcext:value-type="float">
            <text:p>6426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74375" calcext:value-type="float">
            <text:p>0,00074375000000000000</text:p>
          </table:table-cell>
          <table:table-cell table:formula="of:=[.D359]-[.D35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18" office:value-type="float" office:value="6444" calcext:value-type="float">
            <text:p>6444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745833333333333" calcext:value-type="float">
            <text:p>0,00074583333333333400</text:p>
          </table:table-cell>
          <table:table-cell table:formula="of:=[.D360]-[.D35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18" office:value-type="float" office:value="6462" calcext:value-type="float">
            <text:p>6462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747916666666667" calcext:value-type="float">
            <text:p>0,00074791666666666700</text:p>
          </table:table-cell>
          <table:table-cell table:formula="of:=[.D361]-[.D36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18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75" calcext:value-type="float">
            <text:p>0,00075000000000000000</text:p>
          </table:table-cell>
          <table:table-cell table:formula="of:=[.D362]-[.D36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18" office:value-type="float" office:value="6498" calcext:value-type="float">
            <text:p>6498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752083333333333" calcext:value-type="float">
            <text:p>0,00075208333333333300</text:p>
          </table:table-cell>
          <table:table-cell table:formula="of:=[.D363]-[.D36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18" office:value-type="float" office:value="6516" calcext:value-type="float">
            <text:p>6516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754166666666667" calcext:value-type="float">
            <text:p>0,00075416666666666700</text:p>
          </table:table-cell>
          <table:table-cell table:formula="of:=[.D364]-[.D36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18" office:value-type="float" office:value="6534" calcext:value-type="float">
            <text:p>6534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75625" calcext:value-type="float">
            <text:p>0,00075625000000000000</text:p>
          </table:table-cell>
          <table:table-cell table:formula="of:=[.D365]-[.D36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18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758333333333333" calcext:value-type="float">
            <text:p>0,00075833333333333300</text:p>
          </table:table-cell>
          <table:table-cell table:formula="of:=[.D366]-[.D36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18" office:value-type="float" office:value="6570" calcext:value-type="float">
            <text:p>657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760416666666667" calcext:value-type="float">
            <text:p>0,00076041666666666700</text:p>
          </table:table-cell>
          <table:table-cell table:formula="of:=[.D367]-[.D366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18" office:value-type="float" office:value="6588" calcext:value-type="float">
            <text:p>6588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7625" calcext:value-type="float">
            <text:p>0,00076250000000000000</text:p>
          </table:table-cell>
          <table:table-cell table:formula="of:=[.D368]-[.D36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18" office:value-type="float" office:value="6606" calcext:value-type="float">
            <text:p>6606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764583333333333" calcext:value-type="float">
            <text:p>0,00076458333333333400</text:p>
          </table:table-cell>
          <table:table-cell table:formula="of:=[.D369]-[.D36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18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766666666666667" calcext:value-type="float">
            <text:p>0,00076666666666666700</text:p>
          </table:table-cell>
          <table:table-cell table:formula="of:=[.D370]-[.D36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18" office:value-type="float" office:value="6642" calcext:value-type="float">
            <text:p>6642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76875" calcext:value-type="float">
            <text:p>0,00076875000000000000</text:p>
          </table:table-cell>
          <table:table-cell table:formula="of:=[.D371]-[.D37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18" office:value-type="float" office:value="6660" calcext:value-type="float">
            <text:p>666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770833333333333" calcext:value-type="float">
            <text:p>0,00077083333333333300</text:p>
          </table:table-cell>
          <table:table-cell table:formula="of:=[.D372]-[.D37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18" office:value-type="float" office:value="6678" calcext:value-type="float">
            <text:p>6678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772916666666667" calcext:value-type="float">
            <text:p>0,00077291666666666700</text:p>
          </table:table-cell>
          <table:table-cell table:formula="of:=[.D373]-[.D37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18" office:value-type="float" office:value="6696" calcext:value-type="float">
            <text:p>6696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775" calcext:value-type="float">
            <text:p>0,00077500000000000000</text:p>
          </table:table-cell>
          <table:table-cell table:formula="of:=[.D374]-[.D37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18" office:value-type="float" office:value="6714" calcext:value-type="float">
            <text:p>6714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777083333333333" calcext:value-type="float">
            <text:p>0,00077708333333333300</text:p>
          </table:table-cell>
          <table:table-cell table:formula="of:=[.D375]-[.D37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18" office:value-type="float" office:value="6732" calcext:value-type="float">
            <text:p>6732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779166666666667" calcext:value-type="float">
            <text:p>0,00077916666666666700</text:p>
          </table:table-cell>
          <table:table-cell table:formula="of:=[.D376]-[.D375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18" office:value-type="float" office:value="6750" calcext:value-type="float">
            <text:p>675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78125" calcext:value-type="float">
            <text:p>0,00078125000000000000</text:p>
          </table:table-cell>
          <table:table-cell table:formula="of:=[.D377]-[.D37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18" office:value-type="float" office:value="6768" calcext:value-type="float">
            <text:p>6768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783333333333333" calcext:value-type="float">
            <text:p>0,00078333333333333400</text:p>
          </table:table-cell>
          <table:table-cell table:formula="of:=[.D378]-[.D37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18" office:value-type="float" office:value="6786" calcext:value-type="float">
            <text:p>6786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785416666666667" calcext:value-type="float">
            <text:p>0,00078541666666666700</text:p>
          </table:table-cell>
          <table:table-cell table:formula="of:=[.D379]-[.D37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18" office:value-type="float" office:value="6804" calcext:value-type="float">
            <text:p>6804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7875" calcext:value-type="float">
            <text:p>0,00078750000000000000</text:p>
          </table:table-cell>
          <table:table-cell table:formula="of:=[.D380]-[.D37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18" office:value-type="float" office:value="6822" calcext:value-type="float">
            <text:p>6822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789583333333333" calcext:value-type="float">
            <text:p>0,00078958333333333300</text:p>
          </table:table-cell>
          <table:table-cell table:formula="of:=[.D381]-[.D38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18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791666666666667" calcext:value-type="float">
            <text:p>0,00079166666666666700</text:p>
          </table:table-cell>
          <table:table-cell table:formula="of:=[.D382]-[.D38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18" office:value-type="float" office:value="6858" calcext:value-type="float">
            <text:p>6858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79375" calcext:value-type="float">
            <text:p>0,00079375000000000000</text:p>
          </table:table-cell>
          <table:table-cell table:formula="of:=[.D383]-[.D38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18" office:value-type="float" office:value="6876" calcext:value-type="float">
            <text:p>6876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795833333333333" calcext:value-type="float">
            <text:p>0,00079583333333333300</text:p>
          </table:table-cell>
          <table:table-cell table:formula="of:=[.D384]-[.D383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18" office:value-type="float" office:value="6894" calcext:value-type="float">
            <text:p>6894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797916666666667" calcext:value-type="float">
            <text:p>0,00079791666666666700</text:p>
          </table:table-cell>
          <table:table-cell table:formula="of:=[.D385]-[.D38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18" office:value-type="float" office:value="6912" calcext:value-type="float">
            <text:p>6912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8" calcext:value-type="float">
            <text:p>0,00080000000000000000</text:p>
          </table:table-cell>
          <table:table-cell table:formula="of:=[.D386]-[.D38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18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802083333333333" calcext:value-type="float">
            <text:p>0,00080208333333333300</text:p>
          </table:table-cell>
          <table:table-cell table:formula="of:=[.D387]-[.D38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18" office:value-type="float" office:value="6948" calcext:value-type="float">
            <text:p>6948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804166666666667" calcext:value-type="float">
            <text:p>0,00080416666666666700</text:p>
          </table:table-cell>
          <table:table-cell table:formula="of:=[.D388]-[.D38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18" office:value-type="float" office:value="6966" calcext:value-type="float">
            <text:p>6966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80625" calcext:value-type="float">
            <text:p>0,00080625000000000000</text:p>
          </table:table-cell>
          <table:table-cell table:formula="of:=[.D389]-[.D38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18" office:value-type="float" office:value="6984" calcext:value-type="float">
            <text:p>6984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808333333333333" calcext:value-type="float">
            <text:p>0,00080833333333333300</text:p>
          </table:table-cell>
          <table:table-cell table:formula="of:=[.D390]-[.D38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18" office:value-type="float" office:value="7002" calcext:value-type="float">
            <text:p>7002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810416666666667" calcext:value-type="float">
            <text:p>0,00081041666666666700</text:p>
          </table:table-cell>
          <table:table-cell table:formula="of:=[.D391]-[.D39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18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8125" calcext:value-type="float">
            <text:p>0,00081250000000000000</text:p>
          </table:table-cell>
          <table:table-cell table:formula="of:=[.D392]-[.D39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18" office:value-type="float" office:value="7038" calcext:value-type="float">
            <text:p>7038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814583333333333" calcext:value-type="float">
            <text:p>0,00081458333333333300</text:p>
          </table:table-cell>
          <table:table-cell table:formula="of:=[.D393]-[.D392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18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816666666666667" calcext:value-type="float">
            <text:p>0,00081666666666666700</text:p>
          </table:table-cell>
          <table:table-cell table:formula="of:=[.D394]-[.D39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18" office:value-type="float" office:value="7074" calcext:value-type="float">
            <text:p>7074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81875" calcext:value-type="float">
            <text:p>0,00081875000000000000</text:p>
          </table:table-cell>
          <table:table-cell table:formula="of:=[.D395]-[.D39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18" office:value-type="float" office:value="7092" calcext:value-type="float">
            <text:p>7092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820833333333333" calcext:value-type="float">
            <text:p>0,00082083333333333300</text:p>
          </table:table-cell>
          <table:table-cell table:formula="of:=[.D396]-[.D39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18" office:value-type="float" office:value="7110" calcext:value-type="float">
            <text:p>711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822916666666667" calcext:value-type="float">
            <text:p>0,00082291666666666700</text:p>
          </table:table-cell>
          <table:table-cell table:formula="of:=[.D397]-[.D39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18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825" calcext:value-type="float">
            <text:p>0,00082500000000000000</text:p>
          </table:table-cell>
          <table:table-cell table:formula="of:=[.D398]-[.D39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18" office:value-type="float" office:value="7146" calcext:value-type="float">
            <text:p>7146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827083333333333" calcext:value-type="float">
            <text:p>0,00082708333333333300</text:p>
          </table:table-cell>
          <table:table-cell table:formula="of:=[.D399]-[.D39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18" office:value-type="float" office:value="7164" calcext:value-type="float">
            <text:p>7164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829166666666667" calcext:value-type="float">
            <text:p>0,00082916666666666700</text:p>
          </table:table-cell>
          <table:table-cell table:formula="of:=[.D400]-[.D39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18" office:value-type="float" office:value="7182" calcext:value-type="float">
            <text:p>7182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83125" calcext:value-type="float">
            <text:p>0,00083125000000000000</text:p>
          </table:table-cell>
          <table:table-cell table:formula="of:=[.D401]-[.D400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18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833333333333333" calcext:value-type="float">
            <text:p>0,00083333333333333300</text:p>
          </table:table-cell>
          <table:table-cell table:formula="of:=[.D402]-[.D40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18" office:value-type="float" office:value="7218" calcext:value-type="float">
            <text:p>7218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835416666666667" calcext:value-type="float">
            <text:p>0,00083541666666666700</text:p>
          </table:table-cell>
          <table:table-cell table:formula="of:=[.D403]-[.D40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18" office:value-type="float" office:value="7236" calcext:value-type="float">
            <text:p>7236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8375" calcext:value-type="float">
            <text:p>0,00083750000000000000</text:p>
          </table:table-cell>
          <table:table-cell table:formula="of:=[.D404]-[.D40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18" office:value-type="float" office:value="7254" calcext:value-type="float">
            <text:p>7254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839583333333333" calcext:value-type="float">
            <text:p>0,00083958333333333300</text:p>
          </table:table-cell>
          <table:table-cell table:formula="of:=[.D405]-[.D40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18" office:value-type="float" office:value="7272" calcext:value-type="float">
            <text:p>7272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841666666666667" calcext:value-type="float">
            <text:p>0,00084166666666666700</text:p>
          </table:table-cell>
          <table:table-cell table:formula="of:=[.D406]-[.D40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18" office:value-type="float" office:value="7290" calcext:value-type="float">
            <text:p>729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84375" calcext:value-type="float">
            <text:p>0,00084375000000000000</text:p>
          </table:table-cell>
          <table:table-cell table:formula="of:=[.D407]-[.D40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18" office:value-type="float" office:value="7308" calcext:value-type="float">
            <text:p>7308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845833333333333" calcext:value-type="float">
            <text:p>0,00084583333333333300</text:p>
          </table:table-cell>
          <table:table-cell table:formula="of:=[.D408]-[.D40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18" office:value-type="float" office:value="7326" calcext:value-type="float">
            <text:p>7326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847916666666667" calcext:value-type="float">
            <text:p>0,00084791666666666700</text:p>
          </table:table-cell>
          <table:table-cell table:formula="of:=[.D409]-[.D40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18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85" calcext:value-type="float">
            <text:p>0,00085000000000000000</text:p>
          </table:table-cell>
          <table:table-cell table:formula="of:=[.D410]-[.D409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18" office:value-type="float" office:value="7362" calcext:value-type="float">
            <text:p>7362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852083333333333" calcext:value-type="float">
            <text:p>0,00085208333333333400</text:p>
          </table:table-cell>
          <table:table-cell table:formula="of:=[.D411]-[.D41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18" office:value-type="float" office:value="7380" calcext:value-type="float">
            <text:p>738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854166666666667" calcext:value-type="float">
            <text:p>0,00085416666666666700</text:p>
          </table:table-cell>
          <table:table-cell table:formula="of:=[.D412]-[.D41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18" office:value-type="float" office:value="7398" calcext:value-type="float">
            <text:p>7398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85625" calcext:value-type="float">
            <text:p>0,00085625000000000000</text:p>
          </table:table-cell>
          <table:table-cell table:formula="of:=[.D413]-[.D41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18" office:value-type="float" office:value="7416" calcext:value-type="float">
            <text:p>7416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0858333333333333" calcext:value-type="float">
            <text:p>0,00085833333333333300</text:p>
          </table:table-cell>
          <table:table-cell table:formula="of:=[.D414]-[.D41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18" office:value-type="float" office:value="7434" calcext:value-type="float">
            <text:p>7434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0860416666666667" calcext:value-type="float">
            <text:p>0,00086041666666666700</text:p>
          </table:table-cell>
          <table:table-cell table:formula="of:=[.D415]-[.D41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18" office:value-type="float" office:value="7452" calcext:value-type="float">
            <text:p>7452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08625" calcext:value-type="float">
            <text:p>0,00086250000000000000</text:p>
          </table:table-cell>
          <table:table-cell table:formula="of:=[.D416]-[.D41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18" office:value-type="float" office:value="7470" calcext:value-type="float">
            <text:p>747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0864583333333333" calcext:value-type="float">
            <text:p>0,00086458333333333300</text:p>
          </table:table-cell>
          <table:table-cell table:formula="of:=[.D417]-[.D41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18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0866666666666667" calcext:value-type="float">
            <text:p>0,00086666666666666700</text:p>
          </table:table-cell>
          <table:table-cell table:formula="of:=[.D418]-[.D41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18" office:value-type="float" office:value="7506" calcext:value-type="float">
            <text:p>7506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086875" calcext:value-type="float">
            <text:p>0,00086875000000000000</text:p>
          </table:table-cell>
          <table:table-cell table:formula="of:=[.D419]-[.D418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18" office:value-type="float" office:value="7524" calcext:value-type="float">
            <text:p>7524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0870833333333333" calcext:value-type="float">
            <text:p>0,00087083333333333400</text:p>
          </table:table-cell>
          <table:table-cell table:formula="of:=[.D420]-[.D41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18" office:value-type="float" office:value="7542" calcext:value-type="float">
            <text:p>7542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0872916666666667" calcext:value-type="float">
            <text:p>0,00087291666666666700</text:p>
          </table:table-cell>
          <table:table-cell table:formula="of:=[.D421]-[.D42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18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0875" calcext:value-type="float">
            <text:p>0,00087500000000000000</text:p>
          </table:table-cell>
          <table:table-cell table:formula="of:=[.D422]-[.D42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18" office:value-type="float" office:value="7578" calcext:value-type="float">
            <text:p>7578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0877083333333333" calcext:value-type="float">
            <text:p>0,00087708333333333300</text:p>
          </table:table-cell>
          <table:table-cell table:formula="of:=[.D423]-[.D42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18" office:value-type="float" office:value="7596" calcext:value-type="float">
            <text:p>7596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0879166666666667" calcext:value-type="float">
            <text:p>0,00087916666666666700</text:p>
          </table:table-cell>
          <table:table-cell table:formula="of:=[.D424]-[.D42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18" office:value-type="float" office:value="7614" calcext:value-type="float">
            <text:p>7614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088125" calcext:value-type="float">
            <text:p>0,00088125000000000000</text:p>
          </table:table-cell>
          <table:table-cell table:formula="of:=[.D425]-[.D42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18" office:value-type="float" office:value="7632" calcext:value-type="float">
            <text:p>7632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0883333333333333" calcext:value-type="float">
            <text:p>0,00088333333333333300</text:p>
          </table:table-cell>
          <table:table-cell table:formula="of:=[.D426]-[.D42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18" office:value-type="float" office:value="7650" calcext:value-type="float">
            <text:p>765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0885416666666667" calcext:value-type="float">
            <text:p>0,00088541666666666700</text:p>
          </table:table-cell>
          <table:table-cell table:formula="of:=[.D427]-[.D426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18" office:value-type="float" office:value="7668" calcext:value-type="float">
            <text:p>7668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08875" calcext:value-type="float">
            <text:p>0,00088750000000000000</text:p>
          </table:table-cell>
          <table:table-cell table:formula="of:=[.D428]-[.D42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18" office:value-type="float" office:value="7686" calcext:value-type="float">
            <text:p>7686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0889583333333333" calcext:value-type="float">
            <text:p>0,00088958333333333400</text:p>
          </table:table-cell>
          <table:table-cell table:formula="of:=[.D429]-[.D42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18" office:value-type="float" office:value="7704" calcext:value-type="float">
            <text:p>7704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0891666666666667" calcext:value-type="float">
            <text:p>0,00089166666666666700</text:p>
          </table:table-cell>
          <table:table-cell table:formula="of:=[.D430]-[.D42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18" office:value-type="float" office:value="7722" calcext:value-type="float">
            <text:p>7722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089375" calcext:value-type="float">
            <text:p>0,00089375000000000000</text:p>
          </table:table-cell>
          <table:table-cell table:formula="of:=[.D431]-[.D43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18" office:value-type="float" office:value="7740" calcext:value-type="float">
            <text:p>774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0895833333333333" calcext:value-type="float">
            <text:p>0,00089583333333333300</text:p>
          </table:table-cell>
          <table:table-cell table:formula="of:=[.D432]-[.D43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18" office:value-type="float" office:value="7758" calcext:value-type="float">
            <text:p>7758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0897916666666667" calcext:value-type="float">
            <text:p>0,00089791666666666700</text:p>
          </table:table-cell>
          <table:table-cell table:formula="of:=[.D433]-[.D43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18" office:value-type="float" office:value="7776" calcext:value-type="float">
            <text:p>7776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09" calcext:value-type="float">
            <text:p>0,00090000000000000000</text:p>
          </table:table-cell>
          <table:table-cell table:formula="of:=[.D434]-[.D43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18" office:value-type="float" office:value="7794" calcext:value-type="float">
            <text:p>7794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0902083333333333" calcext:value-type="float">
            <text:p>0,00090208333333333300</text:p>
          </table:table-cell>
          <table:table-cell table:formula="of:=[.D435]-[.D43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18" office:value-type="float" office:value="7812" calcext:value-type="float">
            <text:p>7812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0904166666666667" calcext:value-type="float">
            <text:p>0,00090416666666666700</text:p>
          </table:table-cell>
          <table:table-cell table:formula="of:=[.D436]-[.D435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18" office:value-type="float" office:value="7830" calcext:value-type="float">
            <text:p>783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090625" calcext:value-type="float">
            <text:p>0,00090625000000000000</text:p>
          </table:table-cell>
          <table:table-cell table:formula="of:=[.D437]-[.D43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18" office:value-type="float" office:value="7848" calcext:value-type="float">
            <text:p>7848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0908333333333333" calcext:value-type="float">
            <text:p>0,00090833333333333400</text:p>
          </table:table-cell>
          <table:table-cell table:formula="of:=[.D438]-[.D43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18" office:value-type="float" office:value="7866" calcext:value-type="float">
            <text:p>7866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0910416666666667" calcext:value-type="float">
            <text:p>0,00091041666666666700</text:p>
          </table:table-cell>
          <table:table-cell table:formula="of:=[.D439]-[.D43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18" office:value-type="float" office:value="7884" calcext:value-type="float">
            <text:p>7884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09125" calcext:value-type="float">
            <text:p>0,00091250000000000000</text:p>
          </table:table-cell>
          <table:table-cell table:formula="of:=[.D440]-[.D43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18" office:value-type="float" office:value="7902" calcext:value-type="float">
            <text:p>7902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0914583333333333" calcext:value-type="float">
            <text:p>0,00091458333333333300</text:p>
          </table:table-cell>
          <table:table-cell table:formula="of:=[.D441]-[.D44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18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0916666666666667" calcext:value-type="float">
            <text:p>0,00091666666666666700</text:p>
          </table:table-cell>
          <table:table-cell table:formula="of:=[.D442]-[.D44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18" office:value-type="float" office:value="7938" calcext:value-type="float">
            <text:p>7938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091875" calcext:value-type="float">
            <text:p>0,00091875000000000000</text:p>
          </table:table-cell>
          <table:table-cell table:formula="of:=[.D443]-[.D44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18" office:value-type="float" office:value="7956" calcext:value-type="float">
            <text:p>7956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0920833333333333" calcext:value-type="float">
            <text:p>0,00092083333333333300</text:p>
          </table:table-cell>
          <table:table-cell table:formula="of:=[.D444]-[.D443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18" office:value-type="float" office:value="7974" calcext:value-type="float">
            <text:p>7974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0922916666666667" calcext:value-type="float">
            <text:p>0,00092291666666666700</text:p>
          </table:table-cell>
          <table:table-cell table:formula="of:=[.D445]-[.D44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18" office:value-type="float" office:value="7992" calcext:value-type="float">
            <text:p>7992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0925" calcext:value-type="float">
            <text:p>0,00092500000000000000</text:p>
          </table:table-cell>
          <table:table-cell table:formula="of:=[.D446]-[.D44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18" office:value-type="float" office:value="8010" calcext:value-type="float">
            <text:p>801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0927083333333333" calcext:value-type="float">
            <text:p>0,00092708333333333400</text:p>
          </table:table-cell>
          <table:table-cell table:formula="of:=[.D447]-[.D44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18" office:value-type="float" office:value="8028" calcext:value-type="float">
            <text:p>8028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0929166666666667" calcext:value-type="float">
            <text:p>0,00092916666666666700</text:p>
          </table:table-cell>
          <table:table-cell table:formula="of:=[.D448]-[.D44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18" office:value-type="float" office:value="8046" calcext:value-type="float">
            <text:p>8046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093125" calcext:value-type="float">
            <text:p>0,00093125000000000000</text:p>
          </table:table-cell>
          <table:table-cell table:formula="of:=[.D449]-[.D44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18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0933333333333333" calcext:value-type="float">
            <text:p>0,00093333333333333300</text:p>
          </table:table-cell>
          <table:table-cell table:formula="of:=[.D450]-[.D44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18" office:value-type="float" office:value="8082" calcext:value-type="float">
            <text:p>8082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0935416666666667" calcext:value-type="float">
            <text:p>0,00093541666666666700</text:p>
          </table:table-cell>
          <table:table-cell table:formula="of:=[.D451]-[.D45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18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09375" calcext:value-type="float">
            <text:p>0,00093750000000000000</text:p>
          </table:table-cell>
          <table:table-cell table:formula="of:=[.D452]-[.D45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18" office:value-type="float" office:value="8118" calcext:value-type="float">
            <text:p>8118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0939583333333333" calcext:value-type="float">
            <text:p>0,00093958333333333300</text:p>
          </table:table-cell>
          <table:table-cell table:formula="of:=[.D453]-[.D452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18" office:value-type="float" office:value="8136" calcext:value-type="float">
            <text:p>8136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0941666666666667" calcext:value-type="float">
            <text:p>0,00094166666666666700</text:p>
          </table:table-cell>
          <table:table-cell table:formula="of:=[.D454]-[.D45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18" office:value-type="float" office:value="8154" calcext:value-type="float">
            <text:p>8154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094375" calcext:value-type="float">
            <text:p>0,00094375000000000000</text:p>
          </table:table-cell>
          <table:table-cell table:formula="of:=[.D455]-[.D45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18" office:value-type="float" office:value="8172" calcext:value-type="float">
            <text:p>8172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0945833333333333" calcext:value-type="float">
            <text:p>0,00094583333333333300</text:p>
          </table:table-cell>
          <table:table-cell table:formula="of:=[.D456]-[.D45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18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0947916666666667" calcext:value-type="float">
            <text:p>0,00094791666666666700</text:p>
          </table:table-cell>
          <table:table-cell table:formula="of:=[.D457]-[.D45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18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095" calcext:value-type="float">
            <text:p>0,00095000000000000000</text:p>
          </table:table-cell>
          <table:table-cell table:formula="of:=[.D458]-[.D45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18" office:value-type="float" office:value="8226" calcext:value-type="float">
            <text:p>8226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0952083333333333" calcext:value-type="float">
            <text:p>0,00095208333333333300</text:p>
          </table:table-cell>
          <table:table-cell table:formula="of:=[.D459]-[.D45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18" office:value-type="float" office:value="8244" calcext:value-type="float">
            <text:p>8244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0954166666666667" calcext:value-type="float">
            <text:p>0,00095416666666666700</text:p>
          </table:table-cell>
          <table:table-cell table:formula="of:=[.D460]-[.D45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18" office:value-type="float" office:value="8262" calcext:value-type="float">
            <text:p>8262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095625" calcext:value-type="float">
            <text:p>0,00095625000000000000</text:p>
          </table:table-cell>
          <table:table-cell table:formula="of:=[.D461]-[.D46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18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0958333333333333" calcext:value-type="float">
            <text:p>0,00095833333333333300</text:p>
          </table:table-cell>
          <table:table-cell table:formula="of:=[.D462]-[.D461]" office:value-type="float" office:value="0.00000208333333333343" calcext:value-type="float">
            <text:p>0,0000020833333333334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18" office:value-type="float" office:value="8298" calcext:value-type="float">
            <text:p>8298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0960416666666667" calcext:value-type="float">
            <text:p>0,00096041666666666700</text:p>
          </table:table-cell>
          <table:table-cell table:formula="of:=[.D463]-[.D46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18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09625" calcext:value-type="float">
            <text:p>0,00096250000000000000</text:p>
          </table:table-cell>
          <table:table-cell table:formula="of:=[.D464]-[.D46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18" office:value-type="float" office:value="8334" calcext:value-type="float">
            <text:p>8334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0964583333333333" calcext:value-type="float">
            <text:p>0,00096458333333333300</text:p>
          </table:table-cell>
          <table:table-cell table:formula="of:=[.D465]-[.D46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18" office:value-type="float" office:value="8352" calcext:value-type="float">
            <text:p>8352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0966666666666667" calcext:value-type="float">
            <text:p>0,00096666666666666700</text:p>
          </table:table-cell>
          <table:table-cell table:formula="of:=[.D466]-[.D46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18" office:value-type="float" office:value="8370" calcext:value-type="float">
            <text:p>837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096875" calcext:value-type="float">
            <text:p>0,00096875000000000000</text:p>
          </table:table-cell>
          <table:table-cell table:formula="of:=[.D467]-[.D46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18" office:value-type="float" office:value="8388" calcext:value-type="float">
            <text:p>8388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0970833333333333" calcext:value-type="float">
            <text:p>0,00097083333333333300</text:p>
          </table:table-cell>
          <table:table-cell table:formula="of:=[.D468]-[.D46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18" office:value-type="float" office:value="8406" calcext:value-type="float">
            <text:p>8406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0972916666666667" calcext:value-type="float">
            <text:p>0,00097291666666666700</text:p>
          </table:table-cell>
          <table:table-cell table:formula="of:=[.D469]-[.D46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18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0975" calcext:value-type="float">
            <text:p>0,00097500000000000000</text:p>
          </table:table-cell>
          <table:table-cell table:formula="of:=[.D470]-[.D46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18" office:value-type="float" office:value="8442" calcext:value-type="float">
            <text:p>8442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0977083333333333" calcext:value-type="float">
            <text:p>0,00097708333333333300</text:p>
          </table:table-cell>
          <table:table-cell table:formula="of:=[.D471]-[.D47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18" office:value-type="float" office:value="8460" calcext:value-type="float">
            <text:p>846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0979166666666667" calcext:value-type="float">
            <text:p>0,00097916666666666700</text:p>
          </table:table-cell>
          <table:table-cell table:formula="of:=[.D472]-[.D47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18" office:value-type="float" office:value="8478" calcext:value-type="float">
            <text:p>8478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098125" calcext:value-type="float">
            <text:p>0,00098125000000000000</text:p>
          </table:table-cell>
          <table:table-cell table:formula="of:=[.D473]-[.D47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18" office:value-type="float" office:value="8496" calcext:value-type="float">
            <text:p>8496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0983333333333333" calcext:value-type="float">
            <text:p>0,00098333333333333300</text:p>
          </table:table-cell>
          <table:table-cell table:formula="of:=[.D474]-[.D47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18" office:value-type="float" office:value="8514" calcext:value-type="float">
            <text:p>8514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0985416666666667" calcext:value-type="float">
            <text:p>0,00098541666666666700</text:p>
          </table:table-cell>
          <table:table-cell table:formula="of:=[.D475]-[.D47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18" office:value-type="float" office:value="8532" calcext:value-type="float">
            <text:p>8532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09875" calcext:value-type="float">
            <text:p>0,00098750000000000000</text:p>
          </table:table-cell>
          <table:table-cell table:formula="of:=[.D476]-[.D47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18" office:value-type="float" office:value="8550" calcext:value-type="float">
            <text:p>855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0989583333333333" calcext:value-type="float">
            <text:p>0,00098958333333333300</text:p>
          </table:table-cell>
          <table:table-cell table:formula="of:=[.D477]-[.D47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18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0991666666666667" calcext:value-type="float">
            <text:p>0,00099166666666666700</text:p>
          </table:table-cell>
          <table:table-cell table:formula="of:=[.D478]-[.D47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18" office:value-type="float" office:value="8586" calcext:value-type="float">
            <text:p>8586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099375" calcext:value-type="float">
            <text:p>0,00099375000000000000</text:p>
          </table:table-cell>
          <table:table-cell table:formula="of:=[.D479]-[.D47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18" office:value-type="float" office:value="8604" calcext:value-type="float">
            <text:p>8604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0995833333333333" calcext:value-type="float">
            <text:p>0,00099583333333333300</text:p>
          </table:table-cell>
          <table:table-cell table:formula="of:=[.D480]-[.D47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18" office:value-type="float" office:value="8622" calcext:value-type="float">
            <text:p>8622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0997916666666667" calcext:value-type="float">
            <text:p>0,00099791666666666700</text:p>
          </table:table-cell>
          <table:table-cell table:formula="of:=[.D481]-[.D48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18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" calcext:value-type="float">
            <text:p>0,00100000000000000000</text:p>
          </table:table-cell>
          <table:table-cell table:formula="of:=[.D482]-[.D48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18" office:value-type="float" office:value="8658" calcext:value-type="float">
            <text:p>8658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00208333333333" calcext:value-type="float">
            <text:p>0,00100208333333333000</text:p>
          </table:table-cell>
          <table:table-cell table:formula="of:=[.D483]-[.D48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18" office:value-type="float" office:value="8676" calcext:value-type="float">
            <text:p>8676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00416666666667" calcext:value-type="float">
            <text:p>0,00100416666666667000</text:p>
          </table:table-cell>
          <table:table-cell table:formula="of:=[.D484]-[.D48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18" office:value-type="float" office:value="8694" calcext:value-type="float">
            <text:p>8694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00625" calcext:value-type="float">
            <text:p>0,00100625000000000000</text:p>
          </table:table-cell>
          <table:table-cell table:formula="of:=[.D485]-[.D48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18" office:value-type="float" office:value="8712" calcext:value-type="float">
            <text:p>8712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00833333333333" calcext:value-type="float">
            <text:p>0,00100833333333333000</text:p>
          </table:table-cell>
          <table:table-cell table:formula="of:=[.D486]-[.D48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18" office:value-type="float" office:value="8730" calcext:value-type="float">
            <text:p>873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01041666666667" calcext:value-type="float">
            <text:p>0,00101041666666667000</text:p>
          </table:table-cell>
          <table:table-cell table:formula="of:=[.D487]-[.D48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18" office:value-type="float" office:value="8748" calcext:value-type="float">
            <text:p>8748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0125" calcext:value-type="float">
            <text:p>0,00101250000000000000</text:p>
          </table:table-cell>
          <table:table-cell table:formula="of:=[.D488]-[.D48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18" office:value-type="float" office:value="8766" calcext:value-type="float">
            <text:p>8766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01458333333333" calcext:value-type="float">
            <text:p>0,00101458333333333000</text:p>
          </table:table-cell>
          <table:table-cell table:formula="of:=[.D489]-[.D48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18" office:value-type="float" office:value="8784" calcext:value-type="float">
            <text:p>8784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01666666666667" calcext:value-type="float">
            <text:p>0,00101666666666667000</text:p>
          </table:table-cell>
          <table:table-cell table:formula="of:=[.D490]-[.D48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18" office:value-type="float" office:value="8802" calcext:value-type="float">
            <text:p>8802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01875" calcext:value-type="float">
            <text:p>0,00101875000000000000</text:p>
          </table:table-cell>
          <table:table-cell table:formula="of:=[.D491]-[.D49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18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02083333333333" calcext:value-type="float">
            <text:p>0,00102083333333333000</text:p>
          </table:table-cell>
          <table:table-cell table:formula="of:=[.D492]-[.D49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18" office:value-type="float" office:value="8838" calcext:value-type="float">
            <text:p>8838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02291666666667" calcext:value-type="float">
            <text:p>0,00102291666666667000</text:p>
          </table:table-cell>
          <table:table-cell table:formula="of:=[.D493]-[.D49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18" office:value-type="float" office:value="8856" calcext:value-type="float">
            <text:p>8856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025" calcext:value-type="float">
            <text:p>0,00102500000000000000</text:p>
          </table:table-cell>
          <table:table-cell table:formula="of:=[.D494]-[.D49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18" office:value-type="float" office:value="8874" calcext:value-type="float">
            <text:p>8874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02708333333333" calcext:value-type="float">
            <text:p>0,00102708333333333000</text:p>
          </table:table-cell>
          <table:table-cell table:formula="of:=[.D495]-[.D49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18" office:value-type="float" office:value="8892" calcext:value-type="float">
            <text:p>8892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02916666666667" calcext:value-type="float">
            <text:p>0,00102916666666667000</text:p>
          </table:table-cell>
          <table:table-cell table:formula="of:=[.D496]-[.D49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18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03125" calcext:value-type="float">
            <text:p>0,00103125000000000000</text:p>
          </table:table-cell>
          <table:table-cell table:formula="of:=[.D497]-[.D49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18" office:value-type="float" office:value="8928" calcext:value-type="float">
            <text:p>8928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03333333333333" calcext:value-type="float">
            <text:p>0,00103333333333333000</text:p>
          </table:table-cell>
          <table:table-cell table:formula="of:=[.D498]-[.D49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18" office:value-type="float" office:value="8946" calcext:value-type="float">
            <text:p>8946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03541666666667" calcext:value-type="float">
            <text:p>0,00103541666666667000</text:p>
          </table:table-cell>
          <table:table-cell table:formula="of:=[.D499]-[.D49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18" office:value-type="float" office:value="8964" calcext:value-type="float">
            <text:p>8964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0375" calcext:value-type="float">
            <text:p>0,00103750000000000000</text:p>
          </table:table-cell>
          <table:table-cell table:formula="of:=[.D500]-[.D49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18" office:value-type="float" office:value="8982" calcext:value-type="float">
            <text:p>8982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03958333333333" calcext:value-type="float">
            <text:p>0,00103958333333333000</text:p>
          </table:table-cell>
          <table:table-cell table:formula="of:=[.D501]-[.D50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18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04166666666667" calcext:value-type="float">
            <text:p>0,00104166666666667000</text:p>
          </table:table-cell>
          <table:table-cell table:formula="of:=[.D502]-[.D50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18" office:value-type="float" office:value="9018" calcext:value-type="float">
            <text:p>9018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04375" calcext:value-type="float">
            <text:p>0,00104375000000000000</text:p>
          </table:table-cell>
          <table:table-cell table:formula="of:=[.D503]-[.D50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18" office:value-type="float" office:value="9036" calcext:value-type="float">
            <text:p>9036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04583333333333" calcext:value-type="float">
            <text:p>0,00104583333333333000</text:p>
          </table:table-cell>
          <table:table-cell table:formula="of:=[.D504]-[.D50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18" office:value-type="float" office:value="9054" calcext:value-type="float">
            <text:p>9054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04791666666667" calcext:value-type="float">
            <text:p>0,00104791666666667000</text:p>
          </table:table-cell>
          <table:table-cell table:formula="of:=[.D505]-[.D50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18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05" calcext:value-type="float">
            <text:p>0,00105000000000000000</text:p>
          </table:table-cell>
          <table:table-cell table:formula="of:=[.D506]-[.D50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18" office:value-type="float" office:value="9090" calcext:value-type="float">
            <text:p>909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05208333333333" calcext:value-type="float">
            <text:p>0,00105208333333333000</text:p>
          </table:table-cell>
          <table:table-cell table:formula="of:=[.D507]-[.D50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18" office:value-type="float" office:value="9108" calcext:value-type="float">
            <text:p>9108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05416666666667" calcext:value-type="float">
            <text:p>0,00105416666666667000</text:p>
          </table:table-cell>
          <table:table-cell table:formula="of:=[.D508]-[.D50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18" office:value-type="float" office:value="9126" calcext:value-type="float">
            <text:p>9126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05625" calcext:value-type="float">
            <text:p>0,00105625000000000000</text:p>
          </table:table-cell>
          <table:table-cell table:formula="of:=[.D509]-[.D50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18" office:value-type="float" office:value="9144" calcext:value-type="float">
            <text:p>9144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05833333333333" calcext:value-type="float">
            <text:p>0,00105833333333333000</text:p>
          </table:table-cell>
          <table:table-cell table:formula="of:=[.D510]-[.D50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18" office:value-type="float" office:value="9162" calcext:value-type="float">
            <text:p>9162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06041666666667" calcext:value-type="float">
            <text:p>0,00106041666666667000</text:p>
          </table:table-cell>
          <table:table-cell table:formula="of:=[.D511]-[.D51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18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0625" calcext:value-type="float">
            <text:p>0,00106250000000000000</text:p>
          </table:table-cell>
          <table:table-cell table:formula="of:=[.D512]-[.D51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18" office:value-type="float" office:value="9198" calcext:value-type="float">
            <text:p>9198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06458333333333" calcext:value-type="float">
            <text:p>0,00106458333333333000</text:p>
          </table:table-cell>
          <table:table-cell table:formula="of:=[.D513]-[.D51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18" office:value-type="float" office:value="9216" calcext:value-type="float">
            <text:p>9216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06666666666667" calcext:value-type="float">
            <text:p>0,00106666666666667000</text:p>
          </table:table-cell>
          <table:table-cell table:formula="of:=[.D514]-[.D51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18" office:value-type="float" office:value="9234" calcext:value-type="float">
            <text:p>9234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06875" calcext:value-type="float">
            <text:p>0,00106875000000000000</text:p>
          </table:table-cell>
          <table:table-cell table:formula="of:=[.D515]-[.D51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18" office:value-type="float" office:value="9252" calcext:value-type="float">
            <text:p>9252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07083333333333" calcext:value-type="float">
            <text:p>0,00107083333333333000</text:p>
          </table:table-cell>
          <table:table-cell table:formula="of:=[.D516]-[.D51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18" office:value-type="float" office:value="9270" calcext:value-type="float">
            <text:p>927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07291666666667" calcext:value-type="float">
            <text:p>0,00107291666666667000</text:p>
          </table:table-cell>
          <table:table-cell table:formula="of:=[.D517]-[.D51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18" office:value-type="float" office:value="9288" calcext:value-type="float">
            <text:p>9288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075" calcext:value-type="float">
            <text:p>0,00107500000000000000</text:p>
          </table:table-cell>
          <table:table-cell table:formula="of:=[.D518]-[.D51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18" office:value-type="float" office:value="9306" calcext:value-type="float">
            <text:p>9306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07708333333333" calcext:value-type="float">
            <text:p>0,00107708333333333000</text:p>
          </table:table-cell>
          <table:table-cell table:formula="of:=[.D519]-[.D51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18" office:value-type="float" office:value="9324" calcext:value-type="float">
            <text:p>9324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07916666666667" calcext:value-type="float">
            <text:p>0,00107916666666667000</text:p>
          </table:table-cell>
          <table:table-cell table:formula="of:=[.D520]-[.D51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18" office:value-type="float" office:value="9342" calcext:value-type="float">
            <text:p>9342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08125" calcext:value-type="float">
            <text:p>0,00108125000000000000</text:p>
          </table:table-cell>
          <table:table-cell table:formula="of:=[.D521]-[.D52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18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08333333333333" calcext:value-type="float">
            <text:p>0,00108333333333333000</text:p>
          </table:table-cell>
          <table:table-cell table:formula="of:=[.D522]-[.D52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18" office:value-type="float" office:value="9378" calcext:value-type="float">
            <text:p>9378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08541666666667" calcext:value-type="float">
            <text:p>0,00108541666666667000</text:p>
          </table:table-cell>
          <table:table-cell table:formula="of:=[.D523]-[.D52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18" office:value-type="float" office:value="9396" calcext:value-type="float">
            <text:p>9396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0875" calcext:value-type="float">
            <text:p>0,00108750000000000000</text:p>
          </table:table-cell>
          <table:table-cell table:formula="of:=[.D524]-[.D52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18" office:value-type="float" office:value="9414" calcext:value-type="float">
            <text:p>9414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08958333333333" calcext:value-type="float">
            <text:p>0,00108958333333333000</text:p>
          </table:table-cell>
          <table:table-cell table:formula="of:=[.D525]-[.D52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18" office:value-type="float" office:value="9432" calcext:value-type="float">
            <text:p>9432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09166666666667" calcext:value-type="float">
            <text:p>0,00109166666666667000</text:p>
          </table:table-cell>
          <table:table-cell table:formula="of:=[.D526]-[.D52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18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09375" calcext:value-type="float">
            <text:p>0,00109375000000000000</text:p>
          </table:table-cell>
          <table:table-cell table:formula="of:=[.D527]-[.D52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18" office:value-type="float" office:value="9468" calcext:value-type="float">
            <text:p>9468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09583333333333" calcext:value-type="float">
            <text:p>0,00109583333333333000</text:p>
          </table:table-cell>
          <table:table-cell table:formula="of:=[.D528]-[.D52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18" office:value-type="float" office:value="9486" calcext:value-type="float">
            <text:p>9486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09791666666667" calcext:value-type="float">
            <text:p>0,00109791666666667000</text:p>
          </table:table-cell>
          <table:table-cell table:formula="of:=[.D529]-[.D52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18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1" calcext:value-type="float">
            <text:p>0,00110000000000000000</text:p>
          </table:table-cell>
          <table:table-cell table:formula="of:=[.D530]-[.D52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18" office:value-type="float" office:value="9522" calcext:value-type="float">
            <text:p>9522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10208333333333" calcext:value-type="float">
            <text:p>0,00110208333333333000</text:p>
          </table:table-cell>
          <table:table-cell table:formula="of:=[.D531]-[.D53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18" office:value-type="float" office:value="9540" calcext:value-type="float">
            <text:p>954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10416666666667" calcext:value-type="float">
            <text:p>0,00110416666666667000</text:p>
          </table:table-cell>
          <table:table-cell table:formula="of:=[.D532]-[.D53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18" office:value-type="float" office:value="9558" calcext:value-type="float">
            <text:p>9558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10625" calcext:value-type="float">
            <text:p>0,00110625000000000000</text:p>
          </table:table-cell>
          <table:table-cell table:formula="of:=[.D533]-[.D53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18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10833333333333" calcext:value-type="float">
            <text:p>0,00110833333333333000</text:p>
          </table:table-cell>
          <table:table-cell table:formula="of:=[.D534]-[.D53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18" office:value-type="float" office:value="9594" calcext:value-type="float">
            <text:p>9594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11041666666667" calcext:value-type="float">
            <text:p>0,00111041666666667000</text:p>
          </table:table-cell>
          <table:table-cell table:formula="of:=[.D535]-[.D53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18" office:value-type="float" office:value="9612" calcext:value-type="float">
            <text:p>9612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1125" calcext:value-type="float">
            <text:p>0,00111250000000000000</text:p>
          </table:table-cell>
          <table:table-cell table:formula="of:=[.D536]-[.D53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18" office:value-type="float" office:value="9630" calcext:value-type="float">
            <text:p>963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11458333333333" calcext:value-type="float">
            <text:p>0,00111458333333333000</text:p>
          </table:table-cell>
          <table:table-cell table:formula="of:=[.D537]-[.D53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18" office:value-type="float" office:value="9648" calcext:value-type="float">
            <text:p>9648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11666666666667" calcext:value-type="float">
            <text:p>0,00111666666666667000</text:p>
          </table:table-cell>
          <table:table-cell table:formula="of:=[.D538]-[.D53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18" office:value-type="float" office:value="9666" calcext:value-type="float">
            <text:p>9666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11875" calcext:value-type="float">
            <text:p>0,00111875000000000000</text:p>
          </table:table-cell>
          <table:table-cell table:formula="of:=[.D539]-[.D53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18" office:value-type="float" office:value="9684" calcext:value-type="float">
            <text:p>9684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12083333333333" calcext:value-type="float">
            <text:p>0,00112083333333333000</text:p>
          </table:table-cell>
          <table:table-cell table:formula="of:=[.D540]-[.D53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18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12291666666667" calcext:value-type="float">
            <text:p>0,00112291666666667000</text:p>
          </table:table-cell>
          <table:table-cell table:formula="of:=[.D541]-[.D54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18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125" calcext:value-type="float">
            <text:p>0,00112500000000000000</text:p>
          </table:table-cell>
          <table:table-cell table:formula="of:=[.D542]-[.D54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18" office:value-type="float" office:value="9738" calcext:value-type="float">
            <text:p>9738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12708333333333" calcext:value-type="float">
            <text:p>0,00112708333333333000</text:p>
          </table:table-cell>
          <table:table-cell table:formula="of:=[.D543]-[.D54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18" office:value-type="float" office:value="9756" calcext:value-type="float">
            <text:p>9756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12916666666667" calcext:value-type="float">
            <text:p>0,00112916666666667000</text:p>
          </table:table-cell>
          <table:table-cell table:formula="of:=[.D544]-[.D54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18" office:value-type="float" office:value="9774" calcext:value-type="float">
            <text:p>9774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13125" calcext:value-type="float">
            <text:p>0,00113125000000000000</text:p>
          </table:table-cell>
          <table:table-cell table:formula="of:=[.D545]-[.D54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18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13333333333333" calcext:value-type="float">
            <text:p>0,00113333333333333000</text:p>
          </table:table-cell>
          <table:table-cell table:formula="of:=[.D546]-[.D54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18" office:value-type="float" office:value="9810" calcext:value-type="float">
            <text:p>981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13541666666667" calcext:value-type="float">
            <text:p>0,00113541666666667000</text:p>
          </table:table-cell>
          <table:table-cell table:formula="of:=[.D547]-[.D54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18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1375" calcext:value-type="float">
            <text:p>0,00113750000000000000</text:p>
          </table:table-cell>
          <table:table-cell table:formula="of:=[.D548]-[.D54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18" office:value-type="float" office:value="9846" calcext:value-type="float">
            <text:p>9846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13958333333333" calcext:value-type="float">
            <text:p>0,00113958333333333000</text:p>
          </table:table-cell>
          <table:table-cell table:formula="of:=[.D549]-[.D54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18" office:value-type="float" office:value="9864" calcext:value-type="float">
            <text:p>9864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14166666666667" calcext:value-type="float">
            <text:p>0,00114166666666667000</text:p>
          </table:table-cell>
          <table:table-cell table:formula="of:=[.D550]-[.D54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18" office:value-type="float" office:value="9882" calcext:value-type="float">
            <text:p>9882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14375" calcext:value-type="float">
            <text:p>0,00114375000000000000</text:p>
          </table:table-cell>
          <table:table-cell table:formula="of:=[.D551]-[.D55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18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14583333333333" calcext:value-type="float">
            <text:p>0,00114583333333333000</text:p>
          </table:table-cell>
          <table:table-cell table:formula="of:=[.D552]-[.D55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18" office:value-type="float" office:value="9918" calcext:value-type="float">
            <text:p>9918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14791666666667" calcext:value-type="float">
            <text:p>0,00114791666666667000</text:p>
          </table:table-cell>
          <table:table-cell table:formula="of:=[.D553]-[.D55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18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15" calcext:value-type="float">
            <text:p>0,00115000000000000000</text:p>
          </table:table-cell>
          <table:table-cell table:formula="of:=[.D554]-[.D55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18" office:value-type="float" office:value="9954" calcext:value-type="float">
            <text:p>9954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15208333333333" calcext:value-type="float">
            <text:p>0,00115208333333333000</text:p>
          </table:table-cell>
          <table:table-cell table:formula="of:=[.D555]-[.D55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18" office:value-type="float" office:value="9972" calcext:value-type="float">
            <text:p>9972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15416666666667" calcext:value-type="float">
            <text:p>0,00115416666666667000</text:p>
          </table:table-cell>
          <table:table-cell table:formula="of:=[.D556]-[.D55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18" office:value-type="float" office:value="9990" calcext:value-type="float">
            <text:p>999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15625" calcext:value-type="float">
            <text:p>0,00115625000000000000</text:p>
          </table:table-cell>
          <table:table-cell table:formula="of:=[.D557]-[.D55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18" office:value-type="float" office:value="10008" calcext:value-type="float">
            <text:p>10008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15833333333333" calcext:value-type="float">
            <text:p>0,00115833333333333000</text:p>
          </table:table-cell>
          <table:table-cell table:formula="of:=[.D558]-[.D55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18" office:value-type="float" office:value="10026" calcext:value-type="float">
            <text:p>10026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16041666666667" calcext:value-type="float">
            <text:p>0,00116041666666667000</text:p>
          </table:table-cell>
          <table:table-cell table:formula="of:=[.D559]-[.D55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18" office:value-type="float" office:value="10044" calcext:value-type="float">
            <text:p>10044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1625" calcext:value-type="float">
            <text:p>0,00116250000000000000</text:p>
          </table:table-cell>
          <table:table-cell table:formula="of:=[.D560]-[.D55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18" office:value-type="float" office:value="10062" calcext:value-type="float">
            <text:p>10062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16458333333333" calcext:value-type="float">
            <text:p>0,00116458333333333000</text:p>
          </table:table-cell>
          <table:table-cell table:formula="of:=[.D561]-[.D56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18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16666666666667" calcext:value-type="float">
            <text:p>0,00116666666666667000</text:p>
          </table:table-cell>
          <table:table-cell table:formula="of:=[.D562]-[.D56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18" office:value-type="float" office:value="10098" calcext:value-type="float">
            <text:p>10098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16875" calcext:value-type="float">
            <text:p>0,00116875000000000000</text:p>
          </table:table-cell>
          <table:table-cell table:formula="of:=[.D563]-[.D56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18" office:value-type="float" office:value="10116" calcext:value-type="float">
            <text:p>10116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17083333333333" calcext:value-type="float">
            <text:p>0,00117083333333333000</text:p>
          </table:table-cell>
          <table:table-cell table:formula="of:=[.D564]-[.D56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18" office:value-type="float" office:value="10134" calcext:value-type="float">
            <text:p>10134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17291666666667" calcext:value-type="float">
            <text:p>0,00117291666666667000</text:p>
          </table:table-cell>
          <table:table-cell table:formula="of:=[.D565]-[.D56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18" office:value-type="float" office:value="10152" calcext:value-type="float">
            <text:p>10152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175" calcext:value-type="float">
            <text:p>0,00117500000000000000</text:p>
          </table:table-cell>
          <table:table-cell table:formula="of:=[.D566]-[.D56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18" office:value-type="float" office:value="10170" calcext:value-type="float">
            <text:p>1017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17708333333333" calcext:value-type="float">
            <text:p>0,00117708333333333000</text:p>
          </table:table-cell>
          <table:table-cell table:formula="of:=[.D567]-[.D56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18" office:value-type="float" office:value="10188" calcext:value-type="float">
            <text:p>10188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17916666666667" calcext:value-type="float">
            <text:p>0,00117916666666667000</text:p>
          </table:table-cell>
          <table:table-cell table:formula="of:=[.D568]-[.D56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18" office:value-type="float" office:value="10206" calcext:value-type="float">
            <text:p>10206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18125" calcext:value-type="float">
            <text:p>0,00118125000000000000</text:p>
          </table:table-cell>
          <table:table-cell table:formula="of:=[.D569]-[.D56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18" office:value-type="float" office:value="10224" calcext:value-type="float">
            <text:p>10224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18333333333333" calcext:value-type="float">
            <text:p>0,00118333333333333000</text:p>
          </table:table-cell>
          <table:table-cell table:formula="of:=[.D570]-[.D56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18" office:value-type="float" office:value="10242" calcext:value-type="float">
            <text:p>10242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18541666666667" calcext:value-type="float">
            <text:p>0,00118541666666667000</text:p>
          </table:table-cell>
          <table:table-cell table:formula="of:=[.D571]-[.D57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18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1875" calcext:value-type="float">
            <text:p>0,00118750000000000000</text:p>
          </table:table-cell>
          <table:table-cell table:formula="of:=[.D572]-[.D57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18" office:value-type="float" office:value="10278" calcext:value-type="float">
            <text:p>10278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18958333333333" calcext:value-type="float">
            <text:p>0,00118958333333333000</text:p>
          </table:table-cell>
          <table:table-cell table:formula="of:=[.D573]-[.D57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18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19166666666667" calcext:value-type="float">
            <text:p>0,00119166666666667000</text:p>
          </table:table-cell>
          <table:table-cell table:formula="of:=[.D574]-[.D57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18" office:value-type="float" office:value="10314" calcext:value-type="float">
            <text:p>10314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19375" calcext:value-type="float">
            <text:p>0,00119375000000000000</text:p>
          </table:table-cell>
          <table:table-cell table:formula="of:=[.D575]-[.D57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18" office:value-type="float" office:value="10332" calcext:value-type="float">
            <text:p>10332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19583333333333" calcext:value-type="float">
            <text:p>0,00119583333333333000</text:p>
          </table:table-cell>
          <table:table-cell table:formula="of:=[.D576]-[.D57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18" office:value-type="float" office:value="10350" calcext:value-type="float">
            <text:p>1035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19791666666667" calcext:value-type="float">
            <text:p>0,00119791666666667000</text:p>
          </table:table-cell>
          <table:table-cell table:formula="of:=[.D577]-[.D57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18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2" calcext:value-type="float">
            <text:p>0,00120000000000000000</text:p>
          </table:table-cell>
          <table:table-cell table:formula="of:=[.D578]-[.D57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18" office:value-type="float" office:value="10386" calcext:value-type="float">
            <text:p>10386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20208333333333" calcext:value-type="float">
            <text:p>0,00120208333333333000</text:p>
          </table:table-cell>
          <table:table-cell table:formula="of:=[.D579]-[.D57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18" office:value-type="float" office:value="10404" calcext:value-type="float">
            <text:p>10404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20416666666667" calcext:value-type="float">
            <text:p>0,00120416666666667000</text:p>
          </table:table-cell>
          <table:table-cell table:formula="of:=[.D580]-[.D57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18" office:value-type="float" office:value="10422" calcext:value-type="float">
            <text:p>10422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20625" calcext:value-type="float">
            <text:p>0,00120625000000000000</text:p>
          </table:table-cell>
          <table:table-cell table:formula="of:=[.D581]-[.D58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18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20833333333333" calcext:value-type="float">
            <text:p>0,00120833333333333000</text:p>
          </table:table-cell>
          <table:table-cell table:formula="of:=[.D582]-[.D58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18" office:value-type="float" office:value="10458" calcext:value-type="float">
            <text:p>10458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21041666666667" calcext:value-type="float">
            <text:p>0,00121041666666667000</text:p>
          </table:table-cell>
          <table:table-cell table:formula="of:=[.D583]-[.D58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18" office:value-type="float" office:value="10476" calcext:value-type="float">
            <text:p>10476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2125" calcext:value-type="float">
            <text:p>0,00121250000000000000</text:p>
          </table:table-cell>
          <table:table-cell table:formula="of:=[.D584]-[.D58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18" office:value-type="float" office:value="10494" calcext:value-type="float">
            <text:p>10494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21458333333333" calcext:value-type="float">
            <text:p>0,00121458333333333000</text:p>
          </table:table-cell>
          <table:table-cell table:formula="of:=[.D585]-[.D58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18" office:value-type="float" office:value="10512" calcext:value-type="float">
            <text:p>10512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21666666666667" calcext:value-type="float">
            <text:p>0,00121666666666667000</text:p>
          </table:table-cell>
          <table:table-cell table:formula="of:=[.D586]-[.D58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18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21875" calcext:value-type="float">
            <text:p>0,00121875000000000000</text:p>
          </table:table-cell>
          <table:table-cell table:formula="of:=[.D587]-[.D58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18" office:value-type="float" office:value="10548" calcext:value-type="float">
            <text:p>10548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22083333333333" calcext:value-type="float">
            <text:p>0,00122083333333333000</text:p>
          </table:table-cell>
          <table:table-cell table:formula="of:=[.D588]-[.D58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18" office:value-type="float" office:value="10566" calcext:value-type="float">
            <text:p>10566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22291666666667" calcext:value-type="float">
            <text:p>0,00122291666666667000</text:p>
          </table:table-cell>
          <table:table-cell table:formula="of:=[.D589]-[.D58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18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225" calcext:value-type="float">
            <text:p>0,00122500000000000000</text:p>
          </table:table-cell>
          <table:table-cell table:formula="of:=[.D590]-[.D58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18" office:value-type="float" office:value="10602" calcext:value-type="float">
            <text:p>10602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22708333333333" calcext:value-type="float">
            <text:p>0,00122708333333333000</text:p>
          </table:table-cell>
          <table:table-cell table:formula="of:=[.D591]-[.D59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18" office:value-type="float" office:value="10620" calcext:value-type="float">
            <text:p>1062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22916666666667" calcext:value-type="float">
            <text:p>0,00122916666666667000</text:p>
          </table:table-cell>
          <table:table-cell table:formula="of:=[.D592]-[.D59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18" office:value-type="float" office:value="10638" calcext:value-type="float">
            <text:p>10638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23125" calcext:value-type="float">
            <text:p>0,00123125000000000000</text:p>
          </table:table-cell>
          <table:table-cell table:formula="of:=[.D593]-[.D59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18" office:value-type="float" office:value="10656" calcext:value-type="float">
            <text:p>10656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23333333333333" calcext:value-type="float">
            <text:p>0,00123333333333333000</text:p>
          </table:table-cell>
          <table:table-cell table:formula="of:=[.D594]-[.D59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18" office:value-type="float" office:value="10674" calcext:value-type="float">
            <text:p>10674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23541666666667" calcext:value-type="float">
            <text:p>0,00123541666666667000</text:p>
          </table:table-cell>
          <table:table-cell table:formula="of:=[.D595]-[.D59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18" office:value-type="float" office:value="10692" calcext:value-type="float">
            <text:p>10692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2375" calcext:value-type="float">
            <text:p>0,00123750000000000000</text:p>
          </table:table-cell>
          <table:table-cell table:formula="of:=[.D596]-[.D59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18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23958333333333" calcext:value-type="float">
            <text:p>0,00123958333333333000</text:p>
          </table:table-cell>
          <table:table-cell table:formula="of:=[.D597]-[.D59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18" office:value-type="float" office:value="10728" calcext:value-type="float">
            <text:p>10728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124166666666667" calcext:value-type="float">
            <text:p>0,00124166666666667000</text:p>
          </table:table-cell>
          <table:table-cell table:formula="of:=[.D598]-[.D59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18" office:value-type="float" office:value="10746" calcext:value-type="float">
            <text:p>10746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124375" calcext:value-type="float">
            <text:p>0,00124375000000000000</text:p>
          </table:table-cell>
          <table:table-cell table:formula="of:=[.D599]-[.D59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18" office:value-type="float" office:value="10764" calcext:value-type="float">
            <text:p>10764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124583333333333" calcext:value-type="float">
            <text:p>0,00124583333333333000</text:p>
          </table:table-cell>
          <table:table-cell table:formula="of:=[.D600]-[.D59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18" office:value-type="float" office:value="10782" calcext:value-type="float">
            <text:p>10782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124791666666667" calcext:value-type="float">
            <text:p>0,00124791666666667000</text:p>
          </table:table-cell>
          <table:table-cell table:formula="of:=[.D601]-[.D60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18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125" calcext:value-type="float">
            <text:p>0,00125000000000000000</text:p>
          </table:table-cell>
          <table:table-cell table:formula="of:=[.D602]-[.D60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18" office:value-type="float" office:value="10818" calcext:value-type="float">
            <text:p>10818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125208333333333" calcext:value-type="float">
            <text:p>0,00125208333333333000</text:p>
          </table:table-cell>
          <table:table-cell table:formula="of:=[.D603]-[.D60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18" office:value-type="float" office:value="10836" calcext:value-type="float">
            <text:p>10836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125416666666667" calcext:value-type="float">
            <text:p>0,00125416666666667000</text:p>
          </table:table-cell>
          <table:table-cell table:formula="of:=[.D604]-[.D60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18" office:value-type="float" office:value="10854" calcext:value-type="float">
            <text:p>10854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125625" calcext:value-type="float">
            <text:p>0,00125625000000000000</text:p>
          </table:table-cell>
          <table:table-cell table:formula="of:=[.D605]-[.D60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18" office:value-type="float" office:value="10872" calcext:value-type="float">
            <text:p>10872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125833333333333" calcext:value-type="float">
            <text:p>0,00125833333333333000</text:p>
          </table:table-cell>
          <table:table-cell table:formula="of:=[.D606]-[.D60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18" office:value-type="float" office:value="10890" calcext:value-type="float">
            <text:p>1089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126041666666667" calcext:value-type="float">
            <text:p>0,00126041666666667000</text:p>
          </table:table-cell>
          <table:table-cell table:formula="of:=[.D607]-[.D60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18" office:value-type="float" office:value="10908" calcext:value-type="float">
            <text:p>10908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12625" calcext:value-type="float">
            <text:p>0,00126250000000000000</text:p>
          </table:table-cell>
          <table:table-cell table:formula="of:=[.D608]-[.D60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18" office:value-type="float" office:value="10926" calcext:value-type="float">
            <text:p>10926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126458333333333" calcext:value-type="float">
            <text:p>0,00126458333333333000</text:p>
          </table:table-cell>
          <table:table-cell table:formula="of:=[.D609]-[.D60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18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126666666666667" calcext:value-type="float">
            <text:p>0,00126666666666667000</text:p>
          </table:table-cell>
          <table:table-cell table:formula="of:=[.D610]-[.D60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18" office:value-type="float" office:value="10962" calcext:value-type="float">
            <text:p>10962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126875" calcext:value-type="float">
            <text:p>0,00126875000000000000</text:p>
          </table:table-cell>
          <table:table-cell table:formula="of:=[.D611]-[.D61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18" office:value-type="float" office:value="10980" calcext:value-type="float">
            <text:p>1098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127083333333333" calcext:value-type="float">
            <text:p>0,00127083333333333000</text:p>
          </table:table-cell>
          <table:table-cell table:formula="of:=[.D612]-[.D61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18" office:value-type="float" office:value="10998" calcext:value-type="float">
            <text:p>10998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127291666666667" calcext:value-type="float">
            <text:p>0,00127291666666667000</text:p>
          </table:table-cell>
          <table:table-cell table:formula="of:=[.D613]-[.D61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18" office:value-type="float" office:value="11016" calcext:value-type="float">
            <text:p>11016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1275" calcext:value-type="float">
            <text:p>0,00127500000000000000</text:p>
          </table:table-cell>
          <table:table-cell table:formula="of:=[.D614]-[.D61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18" office:value-type="float" office:value="11034" calcext:value-type="float">
            <text:p>11034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127708333333333" calcext:value-type="float">
            <text:p>0,00127708333333333000</text:p>
          </table:table-cell>
          <table:table-cell table:formula="of:=[.D615]-[.D61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18" office:value-type="float" office:value="11052" calcext:value-type="float">
            <text:p>11052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127916666666667" calcext:value-type="float">
            <text:p>0,00127916666666667000</text:p>
          </table:table-cell>
          <table:table-cell table:formula="of:=[.D616]-[.D61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18" office:value-type="float" office:value="11070" calcext:value-type="float">
            <text:p>1107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128125" calcext:value-type="float">
            <text:p>0,00128125000000000000</text:p>
          </table:table-cell>
          <table:table-cell table:formula="of:=[.D617]-[.D61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18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128333333333333" calcext:value-type="float">
            <text:p>0,00128333333333333000</text:p>
          </table:table-cell>
          <table:table-cell table:formula="of:=[.D618]-[.D61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18" office:value-type="float" office:value="11106" calcext:value-type="float">
            <text:p>11106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128541666666667" calcext:value-type="float">
            <text:p>0,00128541666666667000</text:p>
          </table:table-cell>
          <table:table-cell table:formula="of:=[.D619]-[.D61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18" office:value-type="float" office:value="11124" calcext:value-type="float">
            <text:p>11124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12875" calcext:value-type="float">
            <text:p>0,00128750000000000000</text:p>
          </table:table-cell>
          <table:table-cell table:formula="of:=[.D620]-[.D61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18" office:value-type="float" office:value="11142" calcext:value-type="float">
            <text:p>11142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128958333333333" calcext:value-type="float">
            <text:p>0,00128958333333333000</text:p>
          </table:table-cell>
          <table:table-cell table:formula="of:=[.D621]-[.D62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18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129166666666667" calcext:value-type="float">
            <text:p>0,00129166666666667000</text:p>
          </table:table-cell>
          <table:table-cell table:formula="of:=[.D622]-[.D62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18" office:value-type="float" office:value="11178" calcext:value-type="float">
            <text:p>11178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129375" calcext:value-type="float">
            <text:p>0,00129375000000000000</text:p>
          </table:table-cell>
          <table:table-cell table:formula="of:=[.D623]-[.D62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18" office:value-type="float" office:value="11196" calcext:value-type="float">
            <text:p>11196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129583333333333" calcext:value-type="float">
            <text:p>0,00129583333333333000</text:p>
          </table:table-cell>
          <table:table-cell table:formula="of:=[.D624]-[.D62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18" office:value-type="float" office:value="11214" calcext:value-type="float">
            <text:p>11214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129791666666667" calcext:value-type="float">
            <text:p>0,00129791666666667000</text:p>
          </table:table-cell>
          <table:table-cell table:formula="of:=[.D625]-[.D62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18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13" calcext:value-type="float">
            <text:p>0,00130000000000000000</text:p>
          </table:table-cell>
          <table:table-cell table:formula="of:=[.D626]-[.D62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18" office:value-type="float" office:value="11250" calcext:value-type="float">
            <text:p>1125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130208333333333" calcext:value-type="float">
            <text:p>0,00130208333333333000</text:p>
          </table:table-cell>
          <table:table-cell table:formula="of:=[.D627]-[.D62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18" office:value-type="float" office:value="11268" calcext:value-type="float">
            <text:p>11268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130416666666667" calcext:value-type="float">
            <text:p>0,00130416666666667000</text:p>
          </table:table-cell>
          <table:table-cell table:formula="of:=[.D628]-[.D62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18" office:value-type="float" office:value="11286" calcext:value-type="float">
            <text:p>11286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130625" calcext:value-type="float">
            <text:p>0,00130625000000000000</text:p>
          </table:table-cell>
          <table:table-cell table:formula="of:=[.D629]-[.D62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18" office:value-type="float" office:value="11304" calcext:value-type="float">
            <text:p>11304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130833333333333" calcext:value-type="float">
            <text:p>0,00130833333333333000</text:p>
          </table:table-cell>
          <table:table-cell table:formula="of:=[.D630]-[.D62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18" office:value-type="float" office:value="11322" calcext:value-type="float">
            <text:p>11322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131041666666667" calcext:value-type="float">
            <text:p>0,00131041666666667000</text:p>
          </table:table-cell>
          <table:table-cell table:formula="of:=[.D631]-[.D63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18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13125" calcext:value-type="float">
            <text:p>0,00131250000000000000</text:p>
          </table:table-cell>
          <table:table-cell table:formula="of:=[.D632]-[.D63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18" office:value-type="float" office:value="11358" calcext:value-type="float">
            <text:p>11358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131458333333333" calcext:value-type="float">
            <text:p>0,00131458333333333000</text:p>
          </table:table-cell>
          <table:table-cell table:formula="of:=[.D633]-[.D63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18" office:value-type="float" office:value="11376" calcext:value-type="float">
            <text:p>11376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131666666666667" calcext:value-type="float">
            <text:p>0,00131666666666667000</text:p>
          </table:table-cell>
          <table:table-cell table:formula="of:=[.D634]-[.D63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18" office:value-type="float" office:value="11394" calcext:value-type="float">
            <text:p>11394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131875" calcext:value-type="float">
            <text:p>0,00131875000000000000</text:p>
          </table:table-cell>
          <table:table-cell table:formula="of:=[.D635]-[.D63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18" office:value-type="float" office:value="11412" calcext:value-type="float">
            <text:p>11412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132083333333333" calcext:value-type="float">
            <text:p>0,00132083333333333000</text:p>
          </table:table-cell>
          <table:table-cell table:formula="of:=[.D636]-[.D63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18" office:value-type="float" office:value="11430" calcext:value-type="float">
            <text:p>1143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132291666666667" calcext:value-type="float">
            <text:p>0,00132291666666667000</text:p>
          </table:table-cell>
          <table:table-cell table:formula="of:=[.D637]-[.D63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18" office:value-type="float" office:value="11448" calcext:value-type="float">
            <text:p>11448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1325" calcext:value-type="float">
            <text:p>0,00132500000000000000</text:p>
          </table:table-cell>
          <table:table-cell table:formula="of:=[.D638]-[.D63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18" office:value-type="float" office:value="11466" calcext:value-type="float">
            <text:p>11466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132708333333333" calcext:value-type="float">
            <text:p>0,00132708333333333000</text:p>
          </table:table-cell>
          <table:table-cell table:formula="of:=[.D639]-[.D63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18" office:value-type="float" office:value="11484" calcext:value-type="float">
            <text:p>11484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132916666666667" calcext:value-type="float">
            <text:p>0,00132916666666667000</text:p>
          </table:table-cell>
          <table:table-cell table:formula="of:=[.D640]-[.D63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18" office:value-type="float" office:value="11502" calcext:value-type="float">
            <text:p>11502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133125" calcext:value-type="float">
            <text:p>0,00133125000000000000</text:p>
          </table:table-cell>
          <table:table-cell table:formula="of:=[.D641]-[.D64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18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133333333333333" calcext:value-type="float">
            <text:p>0,00133333333333333000</text:p>
          </table:table-cell>
          <table:table-cell table:formula="of:=[.D642]-[.D64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18" office:value-type="float" office:value="11538" calcext:value-type="float">
            <text:p>11538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133541666666667" calcext:value-type="float">
            <text:p>0,00133541666666667000</text:p>
          </table:table-cell>
          <table:table-cell table:formula="of:=[.D643]-[.D64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18" office:value-type="float" office:value="11556" calcext:value-type="float">
            <text:p>11556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13375" calcext:value-type="float">
            <text:p>0,00133750000000000000</text:p>
          </table:table-cell>
          <table:table-cell table:formula="of:=[.D644]-[.D64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18" office:value-type="float" office:value="11574" calcext:value-type="float">
            <text:p>11574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133958333333333" calcext:value-type="float">
            <text:p>0,00133958333333333000</text:p>
          </table:table-cell>
          <table:table-cell table:formula="of:=[.D645]-[.D64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18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134166666666667" calcext:value-type="float">
            <text:p>0,00134166666666667000</text:p>
          </table:table-cell>
          <table:table-cell table:formula="of:=[.D646]-[.D64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18" office:value-type="float" office:value="11610" calcext:value-type="float">
            <text:p>1161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134375" calcext:value-type="float">
            <text:p>0,00134375000000000000</text:p>
          </table:table-cell>
          <table:table-cell table:formula="of:=[.D647]-[.D64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18" office:value-type="float" office:value="11628" calcext:value-type="float">
            <text:p>11628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134583333333333" calcext:value-type="float">
            <text:p>0,00134583333333333000</text:p>
          </table:table-cell>
          <table:table-cell table:formula="of:=[.D648]-[.D64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18" office:value-type="float" office:value="11646" calcext:value-type="float">
            <text:p>11646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134791666666667" calcext:value-type="float">
            <text:p>0,00134791666666667000</text:p>
          </table:table-cell>
          <table:table-cell table:formula="of:=[.D649]-[.D64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18" office:value-type="float" office:value="11664" calcext:value-type="float">
            <text:p>11664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135" calcext:value-type="float">
            <text:p>0,00135000000000000000</text:p>
          </table:table-cell>
          <table:table-cell table:formula="of:=[.D650]-[.D64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18" office:value-type="float" office:value="11682" calcext:value-type="float">
            <text:p>11682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135208333333333" calcext:value-type="float">
            <text:p>0,00135208333333333000</text:p>
          </table:table-cell>
          <table:table-cell table:formula="of:=[.D651]-[.D65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18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135416666666667" calcext:value-type="float">
            <text:p>0,00135416666666667000</text:p>
          </table:table-cell>
          <table:table-cell table:formula="of:=[.D652]-[.D65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18" office:value-type="float" office:value="11718" calcext:value-type="float">
            <text:p>11718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135625" calcext:value-type="float">
            <text:p>0,00135625000000000000</text:p>
          </table:table-cell>
          <table:table-cell table:formula="of:=[.D653]-[.D65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18" office:value-type="float" office:value="11736" calcext:value-type="float">
            <text:p>11736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135833333333333" calcext:value-type="float">
            <text:p>0,00135833333333333000</text:p>
          </table:table-cell>
          <table:table-cell table:formula="of:=[.D654]-[.D65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18" office:value-type="float" office:value="11754" calcext:value-type="float">
            <text:p>11754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136041666666667" calcext:value-type="float">
            <text:p>0,00136041666666667000</text:p>
          </table:table-cell>
          <table:table-cell table:formula="of:=[.D655]-[.D65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18" office:value-type="float" office:value="11772" calcext:value-type="float">
            <text:p>11772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13625" calcext:value-type="float">
            <text:p>0,00136250000000000000</text:p>
          </table:table-cell>
          <table:table-cell table:formula="of:=[.D656]-[.D65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18" office:value-type="float" office:value="11790" calcext:value-type="float">
            <text:p>1179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136458333333333" calcext:value-type="float">
            <text:p>0,00136458333333333000</text:p>
          </table:table-cell>
          <table:table-cell table:formula="of:=[.D657]-[.D65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18" office:value-type="float" office:value="11808" calcext:value-type="float">
            <text:p>11808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136666666666667" calcext:value-type="float">
            <text:p>0,00136666666666667000</text:p>
          </table:table-cell>
          <table:table-cell table:formula="of:=[.D658]-[.D65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18" office:value-type="float" office:value="11826" calcext:value-type="float">
            <text:p>11826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136875" calcext:value-type="float">
            <text:p>0,00136875000000000000</text:p>
          </table:table-cell>
          <table:table-cell table:formula="of:=[.D659]-[.D65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18" office:value-type="float" office:value="11844" calcext:value-type="float">
            <text:p>11844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137083333333333" calcext:value-type="float">
            <text:p>0,00137083333333333000</text:p>
          </table:table-cell>
          <table:table-cell table:formula="of:=[.D660]-[.D65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18" office:value-type="float" office:value="11862" calcext:value-type="float">
            <text:p>11862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137291666666667" calcext:value-type="float">
            <text:p>0,00137291666666667000</text:p>
          </table:table-cell>
          <table:table-cell table:formula="of:=[.D661]-[.D66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18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1375" calcext:value-type="float">
            <text:p>0,00137500000000000000</text:p>
          </table:table-cell>
          <table:table-cell table:formula="of:=[.D662]-[.D66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18" office:value-type="float" office:value="11898" calcext:value-type="float">
            <text:p>11898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137708333333333" calcext:value-type="float">
            <text:p>0,00137708333333333000</text:p>
          </table:table-cell>
          <table:table-cell table:formula="of:=[.D663]-[.D66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18" office:value-type="float" office:value="11916" calcext:value-type="float">
            <text:p>11916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137916666666667" calcext:value-type="float">
            <text:p>0,00137916666666667000</text:p>
          </table:table-cell>
          <table:table-cell table:formula="of:=[.D664]-[.D66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18" office:value-type="float" office:value="11934" calcext:value-type="float">
            <text:p>11934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138125" calcext:value-type="float">
            <text:p>0,00138125000000000000</text:p>
          </table:table-cell>
          <table:table-cell table:formula="of:=[.D665]-[.D66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18" office:value-type="float" office:value="11952" calcext:value-type="float">
            <text:p>11952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138333333333333" calcext:value-type="float">
            <text:p>0,00138333333333333000</text:p>
          </table:table-cell>
          <table:table-cell table:formula="of:=[.D666]-[.D66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18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138541666666667" calcext:value-type="float">
            <text:p>0,00138541666666667000</text:p>
          </table:table-cell>
          <table:table-cell table:formula="of:=[.D667]-[.D66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18" office:value-type="float" office:value="11988" calcext:value-type="float">
            <text:p>11988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13875" calcext:value-type="float">
            <text:p>0,00138750000000000000</text:p>
          </table:table-cell>
          <table:table-cell table:formula="of:=[.D668]-[.D66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18" office:value-type="float" office:value="12006" calcext:value-type="float">
            <text:p>12006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138958333333333" calcext:value-type="float">
            <text:p>0,00138958333333333000</text:p>
          </table:table-cell>
          <table:table-cell table:formula="of:=[.D669]-[.D66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18" office:value-type="float" office:value="12024" calcext:value-type="float">
            <text:p>12024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139166666666667" calcext:value-type="float">
            <text:p>0,00139166666666667000</text:p>
          </table:table-cell>
          <table:table-cell table:formula="of:=[.D670]-[.D66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18" office:value-type="float" office:value="12042" calcext:value-type="float">
            <text:p>12042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139375" calcext:value-type="float">
            <text:p>0,00139375000000000000</text:p>
          </table:table-cell>
          <table:table-cell table:formula="of:=[.D671]-[.D67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18" office:value-type="float" office:value="12060" calcext:value-type="float">
            <text:p>1206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139583333333333" calcext:value-type="float">
            <text:p>0,00139583333333333000</text:p>
          </table:table-cell>
          <table:table-cell table:formula="of:=[.D672]-[.D67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18" office:value-type="float" office:value="12078" calcext:value-type="float">
            <text:p>12078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139791666666667" calcext:value-type="float">
            <text:p>0,00139791666666667000</text:p>
          </table:table-cell>
          <table:table-cell table:formula="of:=[.D673]-[.D67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18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14" calcext:value-type="float">
            <text:p>0,00140000000000000000</text:p>
          </table:table-cell>
          <table:table-cell table:formula="of:=[.D674]-[.D67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18" office:value-type="float" office:value="12114" calcext:value-type="float">
            <text:p>12114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140208333333333" calcext:value-type="float">
            <text:p>0,00140208333333333000</text:p>
          </table:table-cell>
          <table:table-cell table:formula="of:=[.D675]-[.D67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18" office:value-type="float" office:value="12132" calcext:value-type="float">
            <text:p>12132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140416666666667" calcext:value-type="float">
            <text:p>0,00140416666666667000</text:p>
          </table:table-cell>
          <table:table-cell table:formula="of:=[.D676]-[.D67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18" office:value-type="float" office:value="12150" calcext:value-type="float">
            <text:p>12150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140625" calcext:value-type="float">
            <text:p>0,00140625000000000000</text:p>
          </table:table-cell>
          <table:table-cell table:formula="of:=[.D677]-[.D67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18" office:value-type="float" office:value="12168" calcext:value-type="float">
            <text:p>12168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140833333333333" calcext:value-type="float">
            <text:p>0,00140833333333333000</text:p>
          </table:table-cell>
          <table:table-cell table:formula="of:=[.D678]-[.D67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18" office:value-type="float" office:value="12186" calcext:value-type="float">
            <text:p>12186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141041666666667" calcext:value-type="float">
            <text:p>0,00141041666666667000</text:p>
          </table:table-cell>
          <table:table-cell table:formula="of:=[.D679]-[.D67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18" office:value-type="float" office:value="12204" calcext:value-type="float">
            <text:p>12204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14125" calcext:value-type="float">
            <text:p>0,00141250000000000000</text:p>
          </table:table-cell>
          <table:table-cell table:formula="of:=[.D680]-[.D67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18" office:value-type="float" office:value="12222" calcext:value-type="float">
            <text:p>12222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141458333333333" calcext:value-type="float">
            <text:p>0,00141458333333333000</text:p>
          </table:table-cell>
          <table:table-cell table:formula="of:=[.D681]-[.D68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18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141666666666667" calcext:value-type="float">
            <text:p>0,00141666666666667000</text:p>
          </table:table-cell>
          <table:table-cell table:formula="of:=[.D682]-[.D68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18" office:value-type="float" office:value="12258" calcext:value-type="float">
            <text:p>12258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141875" calcext:value-type="float">
            <text:p>0,00141875000000000000</text:p>
          </table:table-cell>
          <table:table-cell table:formula="of:=[.D683]-[.D68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18" office:value-type="float" office:value="12276" calcext:value-type="float">
            <text:p>12276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142083333333333" calcext:value-type="float">
            <text:p>0,00142083333333333000</text:p>
          </table:table-cell>
          <table:table-cell table:formula="of:=[.D684]-[.D68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18" office:value-type="float" office:value="12294" calcext:value-type="float">
            <text:p>12294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142291666666667" calcext:value-type="float">
            <text:p>0,00142291666666667000</text:p>
          </table:table-cell>
          <table:table-cell table:formula="of:=[.D685]-[.D68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18" office:value-type="float" office:value="12312" calcext:value-type="float">
            <text:p>12312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1425" calcext:value-type="float">
            <text:p>0,00142500000000000000</text:p>
          </table:table-cell>
          <table:table-cell table:formula="of:=[.D686]-[.D68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18" office:value-type="float" office:value="12330" calcext:value-type="float">
            <text:p>12330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142708333333333" calcext:value-type="float">
            <text:p>0,00142708333333333000</text:p>
          </table:table-cell>
          <table:table-cell table:formula="of:=[.D687]-[.D68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18" office:value-type="float" office:value="12348" calcext:value-type="float">
            <text:p>12348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142916666666667" calcext:value-type="float">
            <text:p>0,00142916666666667000</text:p>
          </table:table-cell>
          <table:table-cell table:formula="of:=[.D688]-[.D68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18" office:value-type="float" office:value="12366" calcext:value-type="float">
            <text:p>12366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143125" calcext:value-type="float">
            <text:p>0,00143125000000000000</text:p>
          </table:table-cell>
          <table:table-cell table:formula="of:=[.D689]-[.D68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18" office:value-type="float" office:value="12384" calcext:value-type="float">
            <text:p>12384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143333333333333" calcext:value-type="float">
            <text:p>0,00143333333333333000</text:p>
          </table:table-cell>
          <table:table-cell table:formula="of:=[.D690]-[.D68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18" office:value-type="float" office:value="12402" calcext:value-type="float">
            <text:p>12402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143541666666667" calcext:value-type="float">
            <text:p>0,00143541666666667000</text:p>
          </table:table-cell>
          <table:table-cell table:formula="of:=[.D691]-[.D69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18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14375" calcext:value-type="float">
            <text:p>0,00143750000000000000</text:p>
          </table:table-cell>
          <table:table-cell table:formula="of:=[.D692]-[.D69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18" office:value-type="float" office:value="12438" calcext:value-type="float">
            <text:p>12438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143958333333333" calcext:value-type="float">
            <text:p>0,00143958333333333000</text:p>
          </table:table-cell>
          <table:table-cell table:formula="of:=[.D693]-[.D69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18" office:value-type="float" office:value="12456" calcext:value-type="float">
            <text:p>12456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144166666666667" calcext:value-type="float">
            <text:p>0,00144166666666667000</text:p>
          </table:table-cell>
          <table:table-cell table:formula="of:=[.D694]-[.D69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18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144375" calcext:value-type="float">
            <text:p>0,00144375000000000000</text:p>
          </table:table-cell>
          <table:table-cell table:formula="of:=[.D695]-[.D69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18" office:value-type="float" office:value="12492" calcext:value-type="float">
            <text:p>12492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144583333333333" calcext:value-type="float">
            <text:p>0,00144583333333333000</text:p>
          </table:table-cell>
          <table:table-cell table:formula="of:=[.D696]-[.D69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18" office:value-type="float" office:value="12510" calcext:value-type="float">
            <text:p>12510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144791666666667" calcext:value-type="float">
            <text:p>0,00144791666666667000</text:p>
          </table:table-cell>
          <table:table-cell table:formula="of:=[.D697]-[.D69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18" office:value-type="float" office:value="12528" calcext:value-type="float">
            <text:p>12528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145" calcext:value-type="float">
            <text:p>0,00145000000000000000</text:p>
          </table:table-cell>
          <table:table-cell table:formula="of:=[.D698]-[.D69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18" office:value-type="float" office:value="12546" calcext:value-type="float">
            <text:p>12546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145208333333333" calcext:value-type="float">
            <text:p>0,00145208333333333000</text:p>
          </table:table-cell>
          <table:table-cell table:formula="of:=[.D699]-[.D69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18" office:value-type="float" office:value="12564" calcext:value-type="float">
            <text:p>12564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145416666666667" calcext:value-type="float">
            <text:p>0,00145416666666667000</text:p>
          </table:table-cell>
          <table:table-cell table:formula="of:=[.D700]-[.D69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18" office:value-type="float" office:value="12582" calcext:value-type="float">
            <text:p>12582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145625" calcext:value-type="float">
            <text:p>0,00145625000000000000</text:p>
          </table:table-cell>
          <table:table-cell table:formula="of:=[.D701]-[.D70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18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145833333333333" calcext:value-type="float">
            <text:p>0,00145833333333333000</text:p>
          </table:table-cell>
          <table:table-cell table:formula="of:=[.D702]-[.D70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18" office:value-type="float" office:value="12618" calcext:value-type="float">
            <text:p>12618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146041666666667" calcext:value-type="float">
            <text:p>0,00146041666666667000</text:p>
          </table:table-cell>
          <table:table-cell table:formula="of:=[.D703]-[.D70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18" office:value-type="float" office:value="12636" calcext:value-type="float">
            <text:p>12636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14625" calcext:value-type="float">
            <text:p>0,00146250000000000000</text:p>
          </table:table-cell>
          <table:table-cell table:formula="of:=[.D704]-[.D70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18" office:value-type="float" office:value="12654" calcext:value-type="float">
            <text:p>12654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146458333333333" calcext:value-type="float">
            <text:p>0,00146458333333333000</text:p>
          </table:table-cell>
          <table:table-cell table:formula="of:=[.D705]-[.D70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18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146666666666667" calcext:value-type="float">
            <text:p>0,00146666666666667000</text:p>
          </table:table-cell>
          <table:table-cell table:formula="of:=[.D706]-[.D70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18" office:value-type="float" office:value="12690" calcext:value-type="float">
            <text:p>12690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146875" calcext:value-type="float">
            <text:p>0,00146875000000000000</text:p>
          </table:table-cell>
          <table:table-cell table:formula="of:=[.D707]-[.D70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18" office:value-type="float" office:value="12708" calcext:value-type="float">
            <text:p>12708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147083333333333" calcext:value-type="float">
            <text:p>0,00147083333333333000</text:p>
          </table:table-cell>
          <table:table-cell table:formula="of:=[.D708]-[.D70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18" office:value-type="float" office:value="12726" calcext:value-type="float">
            <text:p>12726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147291666666667" calcext:value-type="float">
            <text:p>0,00147291666666667000</text:p>
          </table:table-cell>
          <table:table-cell table:formula="of:=[.D709]-[.D70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18" office:value-type="float" office:value="12744" calcext:value-type="float">
            <text:p>12744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1475" calcext:value-type="float">
            <text:p>0,00147500000000000000</text:p>
          </table:table-cell>
          <table:table-cell table:formula="of:=[.D710]-[.D70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18" office:value-type="float" office:value="12762" calcext:value-type="float">
            <text:p>12762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147708333333333" calcext:value-type="float">
            <text:p>0,00147708333333333000</text:p>
          </table:table-cell>
          <table:table-cell table:formula="of:=[.D711]-[.D71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18" office:value-type="float" office:value="12780" calcext:value-type="float">
            <text:p>1278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147916666666667" calcext:value-type="float">
            <text:p>0,00147916666666667000</text:p>
          </table:table-cell>
          <table:table-cell table:formula="of:=[.D712]-[.D71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18" office:value-type="float" office:value="12798" calcext:value-type="float">
            <text:p>12798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148125" calcext:value-type="float">
            <text:p>0,00148125000000000000</text:p>
          </table:table-cell>
          <table:table-cell table:formula="of:=[.D713]-[.D71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18" office:value-type="float" office:value="12816" calcext:value-type="float">
            <text:p>12816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148333333333333" calcext:value-type="float">
            <text:p>0,00148333333333333000</text:p>
          </table:table-cell>
          <table:table-cell table:formula="of:=[.D714]-[.D71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18" office:value-type="float" office:value="12834" calcext:value-type="float">
            <text:p>12834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148541666666667" calcext:value-type="float">
            <text:p>0,00148541666666667000</text:p>
          </table:table-cell>
          <table:table-cell table:formula="of:=[.D715]-[.D71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18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14875" calcext:value-type="float">
            <text:p>0,00148750000000000000</text:p>
          </table:table-cell>
          <table:table-cell table:formula="of:=[.D716]-[.D71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18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148958333333333" calcext:value-type="float">
            <text:p>0,00148958333333333000</text:p>
          </table:table-cell>
          <table:table-cell table:formula="of:=[.D717]-[.D71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18" office:value-type="float" office:value="12888" calcext:value-type="float">
            <text:p>12888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149166666666667" calcext:value-type="float">
            <text:p>0,00149166666666667000</text:p>
          </table:table-cell>
          <table:table-cell table:formula="of:=[.D718]-[.D71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18" office:value-type="float" office:value="12906" calcext:value-type="float">
            <text:p>12906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149375" calcext:value-type="float">
            <text:p>0,00149375000000000000</text:p>
          </table:table-cell>
          <table:table-cell table:formula="of:=[.D719]-[.D71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18" office:value-type="float" office:value="12924" calcext:value-type="float">
            <text:p>12924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149583333333333" calcext:value-type="float">
            <text:p>0,00149583333333333000</text:p>
          </table:table-cell>
          <table:table-cell table:formula="of:=[.D720]-[.D71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18" office:value-type="float" office:value="12942" calcext:value-type="float">
            <text:p>12942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149791666666667" calcext:value-type="float">
            <text:p>0,00149791666666667000</text:p>
          </table:table-cell>
          <table:table-cell table:formula="of:=[.D721]-[.D72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18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15" calcext:value-type="float">
            <text:p>0,00150000000000000000</text:p>
          </table:table-cell>
          <table:table-cell table:formula="of:=[.D722]-[.D72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18" office:value-type="float" office:value="12978" calcext:value-type="float">
            <text:p>12978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150208333333333" calcext:value-type="float">
            <text:p>0,00150208333333333000</text:p>
          </table:table-cell>
          <table:table-cell table:formula="of:=[.D723]-[.D72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18" office:value-type="float" office:value="12996" calcext:value-type="float">
            <text:p>12996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150416666666667" calcext:value-type="float">
            <text:p>0,00150416666666667000</text:p>
          </table:table-cell>
          <table:table-cell table:formula="of:=[.D724]-[.D72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18" office:value-type="float" office:value="13014" calcext:value-type="float">
            <text:p>13014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150625" calcext:value-type="float">
            <text:p>0,00150625000000000000</text:p>
          </table:table-cell>
          <table:table-cell table:formula="of:=[.D725]-[.D72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18" office:value-type="float" office:value="13032" calcext:value-type="float">
            <text:p>13032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150833333333333" calcext:value-type="float">
            <text:p>0,00150833333333333000</text:p>
          </table:table-cell>
          <table:table-cell table:formula="of:=[.D726]-[.D72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18" office:value-type="float" office:value="13050" calcext:value-type="float">
            <text:p>13050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151041666666667" calcext:value-type="float">
            <text:p>0,00151041666666667000</text:p>
          </table:table-cell>
          <table:table-cell table:formula="of:=[.D727]-[.D72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18" office:value-type="float" office:value="13068" calcext:value-type="float">
            <text:p>13068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15125" calcext:value-type="float">
            <text:p>0,00151250000000000000</text:p>
          </table:table-cell>
          <table:table-cell table:formula="of:=[.D728]-[.D72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18" office:value-type="float" office:value="13086" calcext:value-type="float">
            <text:p>13086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151458333333333" calcext:value-type="float">
            <text:p>0,00151458333333333000</text:p>
          </table:table-cell>
          <table:table-cell table:formula="of:=[.D729]-[.D72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18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151666666666667" calcext:value-type="float">
            <text:p>0,00151666666666667000</text:p>
          </table:table-cell>
          <table:table-cell table:formula="of:=[.D730]-[.D72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18" office:value-type="float" office:value="13122" calcext:value-type="float">
            <text:p>13122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151875" calcext:value-type="float">
            <text:p>0,00151875000000000000</text:p>
          </table:table-cell>
          <table:table-cell table:formula="of:=[.D731]-[.D73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18" office:value-type="float" office:value="13140" calcext:value-type="float">
            <text:p>1314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152083333333333" calcext:value-type="float">
            <text:p>0,00152083333333333000</text:p>
          </table:table-cell>
          <table:table-cell table:formula="of:=[.D732]-[.D73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18" office:value-type="float" office:value="13158" calcext:value-type="float">
            <text:p>13158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152291666666667" calcext:value-type="float">
            <text:p>0,00152291666666667000</text:p>
          </table:table-cell>
          <table:table-cell table:formula="of:=[.D733]-[.D73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18" office:value-type="float" office:value="13176" calcext:value-type="float">
            <text:p>13176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1525" calcext:value-type="float">
            <text:p>0,00152500000000000000</text:p>
          </table:table-cell>
          <table:table-cell table:formula="of:=[.D734]-[.D73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18" office:value-type="float" office:value="13194" calcext:value-type="float">
            <text:p>13194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152708333333333" calcext:value-type="float">
            <text:p>0,00152708333333333000</text:p>
          </table:table-cell>
          <table:table-cell table:formula="of:=[.D735]-[.D73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18" office:value-type="float" office:value="13212" calcext:value-type="float">
            <text:p>13212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152916666666667" calcext:value-type="float">
            <text:p>0,00152916666666667000</text:p>
          </table:table-cell>
          <table:table-cell table:formula="of:=[.D736]-[.D73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18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153125" calcext:value-type="float">
            <text:p>0,00153125000000000000</text:p>
          </table:table-cell>
          <table:table-cell table:formula="of:=[.D737]-[.D73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18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153333333333333" calcext:value-type="float">
            <text:p>0,00153333333333333000</text:p>
          </table:table-cell>
          <table:table-cell table:formula="of:=[.D738]-[.D73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18" office:value-type="float" office:value="13266" calcext:value-type="float">
            <text:p>13266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153541666666667" calcext:value-type="float">
            <text:p>0,00153541666666667000</text:p>
          </table:table-cell>
          <table:table-cell table:formula="of:=[.D739]-[.D73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18" office:value-type="float" office:value="13284" calcext:value-type="float">
            <text:p>13284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15375" calcext:value-type="float">
            <text:p>0,00153750000000000000</text:p>
          </table:table-cell>
          <table:table-cell table:formula="of:=[.D740]-[.D73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18" office:value-type="float" office:value="13302" calcext:value-type="float">
            <text:p>13302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153958333333333" calcext:value-type="float">
            <text:p>0,00153958333333333000</text:p>
          </table:table-cell>
          <table:table-cell table:formula="of:=[.D741]-[.D74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18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154166666666667" calcext:value-type="float">
            <text:p>0,00154166666666667000</text:p>
          </table:table-cell>
          <table:table-cell table:formula="of:=[.D742]-[.D74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18" office:value-type="float" office:value="13338" calcext:value-type="float">
            <text:p>13338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154375" calcext:value-type="float">
            <text:p>0,00154375000000000000</text:p>
          </table:table-cell>
          <table:table-cell table:formula="of:=[.D743]-[.D74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18" office:value-type="float" office:value="13356" calcext:value-type="float">
            <text:p>13356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154583333333333" calcext:value-type="float">
            <text:p>0,00154583333333333000</text:p>
          </table:table-cell>
          <table:table-cell table:formula="of:=[.D744]-[.D74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18" office:value-type="float" office:value="13374" calcext:value-type="float">
            <text:p>13374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154791666666667" calcext:value-type="float">
            <text:p>0,00154791666666667000</text:p>
          </table:table-cell>
          <table:table-cell table:formula="of:=[.D745]-[.D74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18" office:value-type="float" office:value="13392" calcext:value-type="float">
            <text:p>13392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155" calcext:value-type="float">
            <text:p>0,00155000000000000000</text:p>
          </table:table-cell>
          <table:table-cell table:formula="of:=[.D746]-[.D74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18" office:value-type="float" office:value="13410" calcext:value-type="float">
            <text:p>13410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155208333333333" calcext:value-type="float">
            <text:p>0,00155208333333333000</text:p>
          </table:table-cell>
          <table:table-cell table:formula="of:=[.D747]-[.D74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18" office:value-type="float" office:value="13428" calcext:value-type="float">
            <text:p>13428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155416666666667" calcext:value-type="float">
            <text:p>0,00155416666666667000</text:p>
          </table:table-cell>
          <table:table-cell table:formula="of:=[.D748]-[.D74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18" office:value-type="float" office:value="13446" calcext:value-type="float">
            <text:p>13446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155625" calcext:value-type="float">
            <text:p>0,00155625000000000000</text:p>
          </table:table-cell>
          <table:table-cell table:formula="of:=[.D749]-[.D74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18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155833333333333" calcext:value-type="float">
            <text:p>0,00155833333333333000</text:p>
          </table:table-cell>
          <table:table-cell table:formula="of:=[.D750]-[.D74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18" office:value-type="float" office:value="13482" calcext:value-type="float">
            <text:p>13482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156041666666667" calcext:value-type="float">
            <text:p>0,00156041666666667000</text:p>
          </table:table-cell>
          <table:table-cell table:formula="of:=[.D751]-[.D75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18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15625" calcext:value-type="float">
            <text:p>0,00156250000000000000</text:p>
          </table:table-cell>
          <table:table-cell table:formula="of:=[.D752]-[.D75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18" office:value-type="float" office:value="13518" calcext:value-type="float">
            <text:p>13518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156458333333333" calcext:value-type="float">
            <text:p>0,00156458333333333000</text:p>
          </table:table-cell>
          <table:table-cell table:formula="of:=[.D753]-[.D75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18" office:value-type="float" office:value="13536" calcext:value-type="float">
            <text:p>13536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156666666666667" calcext:value-type="float">
            <text:p>0,00156666666666667000</text:p>
          </table:table-cell>
          <table:table-cell table:formula="of:=[.D754]-[.D75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18" office:value-type="float" office:value="13554" calcext:value-type="float">
            <text:p>13554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156875" calcext:value-type="float">
            <text:p>0,00156875000000000000</text:p>
          </table:table-cell>
          <table:table-cell table:formula="of:=[.D755]-[.D75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18" office:value-type="float" office:value="13572" calcext:value-type="float">
            <text:p>13572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157083333333333" calcext:value-type="float">
            <text:p>0,00157083333333333000</text:p>
          </table:table-cell>
          <table:table-cell table:formula="of:=[.D756]-[.D75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18" office:value-type="float" office:value="13590" calcext:value-type="float">
            <text:p>13590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157291666666667" calcext:value-type="float">
            <text:p>0,00157291666666667000</text:p>
          </table:table-cell>
          <table:table-cell table:formula="of:=[.D757]-[.D75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18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1575" calcext:value-type="float">
            <text:p>0,00157500000000000000</text:p>
          </table:table-cell>
          <table:table-cell table:formula="of:=[.D758]-[.D75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18" office:value-type="float" office:value="13626" calcext:value-type="float">
            <text:p>13626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157708333333333" calcext:value-type="float">
            <text:p>0,00157708333333333000</text:p>
          </table:table-cell>
          <table:table-cell table:formula="of:=[.D759]-[.D75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18" office:value-type="float" office:value="13644" calcext:value-type="float">
            <text:p>13644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157916666666667" calcext:value-type="float">
            <text:p>0,00157916666666667000</text:p>
          </table:table-cell>
          <table:table-cell table:formula="of:=[.D760]-[.D75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18" office:value-type="float" office:value="13662" calcext:value-type="float">
            <text:p>13662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158125" calcext:value-type="float">
            <text:p>0,00158125000000000000</text:p>
          </table:table-cell>
          <table:table-cell table:formula="of:=[.D761]-[.D76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18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158333333333333" calcext:value-type="float">
            <text:p>0,00158333333333333000</text:p>
          </table:table-cell>
          <table:table-cell table:formula="of:=[.D762]-[.D76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18" office:value-type="float" office:value="13698" calcext:value-type="float">
            <text:p>13698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158541666666667" calcext:value-type="float">
            <text:p>0,00158541666666667000</text:p>
          </table:table-cell>
          <table:table-cell table:formula="of:=[.D763]-[.D76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18" office:value-type="float" office:value="13716" calcext:value-type="float">
            <text:p>13716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15875" calcext:value-type="float">
            <text:p>0,00158750000000000000</text:p>
          </table:table-cell>
          <table:table-cell table:formula="of:=[.D764]-[.D76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18" office:value-type="float" office:value="13734" calcext:value-type="float">
            <text:p>13734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158958333333333" calcext:value-type="float">
            <text:p>0,00158958333333333000</text:p>
          </table:table-cell>
          <table:table-cell table:formula="of:=[.D765]-[.D76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18" office:value-type="float" office:value="13752" calcext:value-type="float">
            <text:p>13752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159166666666667" calcext:value-type="float">
            <text:p>0,00159166666666667000</text:p>
          </table:table-cell>
          <table:table-cell table:formula="of:=[.D766]-[.D76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18" office:value-type="float" office:value="13770" calcext:value-type="float">
            <text:p>13770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159375" calcext:value-type="float">
            <text:p>0,00159375000000000000</text:p>
          </table:table-cell>
          <table:table-cell table:formula="of:=[.D767]-[.D76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18" office:value-type="float" office:value="13788" calcext:value-type="float">
            <text:p>13788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159583333333333" calcext:value-type="float">
            <text:p>0,00159583333333333000</text:p>
          </table:table-cell>
          <table:table-cell table:formula="of:=[.D768]-[.D76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18" office:value-type="float" office:value="13806" calcext:value-type="float">
            <text:p>13806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159791666666667" calcext:value-type="float">
            <text:p>0,00159791666666667000</text:p>
          </table:table-cell>
          <table:table-cell table:formula="of:=[.D769]-[.D76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18" office:value-type="float" office:value="13824" calcext:value-type="float">
            <text:p>13824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16" calcext:value-type="float">
            <text:p>0,00160000000000000000</text:p>
          </table:table-cell>
          <table:table-cell table:formula="of:=[.D770]-[.D76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18" office:value-type="float" office:value="13842" calcext:value-type="float">
            <text:p>13842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160208333333333" calcext:value-type="float">
            <text:p>0,00160208333333333000</text:p>
          </table:table-cell>
          <table:table-cell table:formula="of:=[.D771]-[.D77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18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160416666666667" calcext:value-type="float">
            <text:p>0,00160416666666667000</text:p>
          </table:table-cell>
          <table:table-cell table:formula="of:=[.D772]-[.D77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18" office:value-type="float" office:value="13878" calcext:value-type="float">
            <text:p>13878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160625" calcext:value-type="float">
            <text:p>0,00160625000000000000</text:p>
          </table:table-cell>
          <table:table-cell table:formula="of:=[.D773]-[.D77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18" office:value-type="float" office:value="13896" calcext:value-type="float">
            <text:p>13896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160833333333333" calcext:value-type="float">
            <text:p>0,00160833333333333000</text:p>
          </table:table-cell>
          <table:table-cell table:formula="of:=[.D774]-[.D77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18" office:value-type="float" office:value="13914" calcext:value-type="float">
            <text:p>13914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161041666666667" calcext:value-type="float">
            <text:p>0,00161041666666667000</text:p>
          </table:table-cell>
          <table:table-cell table:formula="of:=[.D775]-[.D77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18" office:value-type="float" office:value="13932" calcext:value-type="float">
            <text:p>13932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16125" calcext:value-type="float">
            <text:p>0,00161250000000000000</text:p>
          </table:table-cell>
          <table:table-cell table:formula="of:=[.D776]-[.D77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18" office:value-type="float" office:value="13950" calcext:value-type="float">
            <text:p>13950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161458333333333" calcext:value-type="float">
            <text:p>0,00161458333333333000</text:p>
          </table:table-cell>
          <table:table-cell table:formula="of:=[.D777]-[.D77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18" office:value-type="float" office:value="13968" calcext:value-type="float">
            <text:p>13968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161666666666667" calcext:value-type="float">
            <text:p>0,00161666666666667000</text:p>
          </table:table-cell>
          <table:table-cell table:formula="of:=[.D778]-[.D77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18" office:value-type="float" office:value="13986" calcext:value-type="float">
            <text:p>13986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161875" calcext:value-type="float">
            <text:p>0,00161875000000000000</text:p>
          </table:table-cell>
          <table:table-cell table:formula="of:=[.D779]-[.D77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18" office:value-type="float" office:value="14004" calcext:value-type="float">
            <text:p>14004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162083333333333" calcext:value-type="float">
            <text:p>0,00162083333333333000</text:p>
          </table:table-cell>
          <table:table-cell table:formula="of:=[.D780]-[.D77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18" office:value-type="float" office:value="14022" calcext:value-type="float">
            <text:p>14022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162291666666667" calcext:value-type="float">
            <text:p>0,00162291666666667000</text:p>
          </table:table-cell>
          <table:table-cell table:formula="of:=[.D781]-[.D78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18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1625" calcext:value-type="float">
            <text:p>0,00162500000000000000</text:p>
          </table:table-cell>
          <table:table-cell table:formula="of:=[.D782]-[.D78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18" office:value-type="float" office:value="14058" calcext:value-type="float">
            <text:p>14058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162708333333333" calcext:value-type="float">
            <text:p>0,00162708333333333000</text:p>
          </table:table-cell>
          <table:table-cell table:formula="of:=[.D783]-[.D78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18" office:value-type="float" office:value="14076" calcext:value-type="float">
            <text:p>14076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162916666666667" calcext:value-type="float">
            <text:p>0,00162916666666667000</text:p>
          </table:table-cell>
          <table:table-cell table:formula="of:=[.D784]-[.D78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18" office:value-type="float" office:value="14094" calcext:value-type="float">
            <text:p>14094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163125" calcext:value-type="float">
            <text:p>0,00163125000000000000</text:p>
          </table:table-cell>
          <table:table-cell table:formula="of:=[.D785]-[.D78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18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163333333333333" calcext:value-type="float">
            <text:p>0,00163333333333333000</text:p>
          </table:table-cell>
          <table:table-cell table:formula="of:=[.D786]-[.D78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18" office:value-type="float" office:value="14130" calcext:value-type="float">
            <text:p>14130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163541666666667" calcext:value-type="float">
            <text:p>0,00163541666666667000</text:p>
          </table:table-cell>
          <table:table-cell table:formula="of:=[.D787]-[.D78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18" office:value-type="float" office:value="14148" calcext:value-type="float">
            <text:p>14148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16375" calcext:value-type="float">
            <text:p>0,00163750000000000000</text:p>
          </table:table-cell>
          <table:table-cell table:formula="of:=[.D788]-[.D78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18" office:value-type="float" office:value="14166" calcext:value-type="float">
            <text:p>14166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163958333333333" calcext:value-type="float">
            <text:p>0,00163958333333333000</text:p>
          </table:table-cell>
          <table:table-cell table:formula="of:=[.D789]-[.D78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18" office:value-type="float" office:value="14184" calcext:value-type="float">
            <text:p>14184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164166666666667" calcext:value-type="float">
            <text:p>0,00164166666666667000</text:p>
          </table:table-cell>
          <table:table-cell table:formula="of:=[.D790]-[.D78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18" office:value-type="float" office:value="14202" calcext:value-type="float">
            <text:p>14202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164375" calcext:value-type="float">
            <text:p>0,00164375000000000000</text:p>
          </table:table-cell>
          <table:table-cell table:formula="of:=[.D791]-[.D79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18" office:value-type="float" office:value="14220" calcext:value-type="float">
            <text:p>1422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164583333333333" calcext:value-type="float">
            <text:p>0,00164583333333333000</text:p>
          </table:table-cell>
          <table:table-cell table:formula="of:=[.D792]-[.D79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18" office:value-type="float" office:value="14238" calcext:value-type="float">
            <text:p>14238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164791666666667" calcext:value-type="float">
            <text:p>0,00164791666666667000</text:p>
          </table:table-cell>
          <table:table-cell table:formula="of:=[.D793]-[.D79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18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165" calcext:value-type="float">
            <text:p>0,00165000000000000000</text:p>
          </table:table-cell>
          <table:table-cell table:formula="of:=[.D794]-[.D79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18" office:value-type="float" office:value="14274" calcext:value-type="float">
            <text:p>14274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165208333333333" calcext:value-type="float">
            <text:p>0,00165208333333333000</text:p>
          </table:table-cell>
          <table:table-cell table:formula="of:=[.D795]-[.D79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18" office:value-type="float" office:value="14292" calcext:value-type="float">
            <text:p>14292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165416666666667" calcext:value-type="float">
            <text:p>0,00165416666666667000</text:p>
          </table:table-cell>
          <table:table-cell table:formula="of:=[.D796]-[.D79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18" office:value-type="float" office:value="14310" calcext:value-type="float">
            <text:p>14310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165625" calcext:value-type="float">
            <text:p>0,00165625000000000000</text:p>
          </table:table-cell>
          <table:table-cell table:formula="of:=[.D797]-[.D79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18" office:value-type="float" office:value="14328" calcext:value-type="float">
            <text:p>14328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165833333333333" calcext:value-type="float">
            <text:p>0,00165833333333333000</text:p>
          </table:table-cell>
          <table:table-cell table:formula="of:=[.D798]-[.D79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18" office:value-type="float" office:value="14346" calcext:value-type="float">
            <text:p>14346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166041666666667" calcext:value-type="float">
            <text:p>0,00166041666666667000</text:p>
          </table:table-cell>
          <table:table-cell table:formula="of:=[.D799]-[.D79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18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16625" calcext:value-type="float">
            <text:p>0,00166250000000000000</text:p>
          </table:table-cell>
          <table:table-cell table:formula="of:=[.D800]-[.D79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18" office:value-type="float" office:value="14382" calcext:value-type="float">
            <text:p>14382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166458333333333" calcext:value-type="float">
            <text:p>0,00166458333333333000</text:p>
          </table:table-cell>
          <table:table-cell table:formula="of:=[.D801]-[.D80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18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166666666666667" calcext:value-type="float">
            <text:p>0,00166666666666667000</text:p>
          </table:table-cell>
          <table:table-cell table:formula="of:=[.D802]-[.D80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18" office:value-type="float" office:value="14418" calcext:value-type="float">
            <text:p>14418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166875" calcext:value-type="float">
            <text:p>0,00166875000000000000</text:p>
          </table:table-cell>
          <table:table-cell table:formula="of:=[.D803]-[.D80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18" office:value-type="float" office:value="14436" calcext:value-type="float">
            <text:p>14436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167083333333333" calcext:value-type="float">
            <text:p>0,00167083333333333000</text:p>
          </table:table-cell>
          <table:table-cell table:formula="of:=[.D804]-[.D80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18" office:value-type="float" office:value="14454" calcext:value-type="float">
            <text:p>14454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167291666666667" calcext:value-type="float">
            <text:p>0,00167291666666667000</text:p>
          </table:table-cell>
          <table:table-cell table:formula="of:=[.D805]-[.D80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18" office:value-type="float" office:value="14472" calcext:value-type="float">
            <text:p>14472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1675" calcext:value-type="float">
            <text:p>0,00167500000000000000</text:p>
          </table:table-cell>
          <table:table-cell table:formula="of:=[.D806]-[.D80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18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167708333333333" calcext:value-type="float">
            <text:p>0,00167708333333333000</text:p>
          </table:table-cell>
          <table:table-cell table:formula="of:=[.D807]-[.D80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18" office:value-type="float" office:value="14508" calcext:value-type="float">
            <text:p>14508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167916666666667" calcext:value-type="float">
            <text:p>0,00167916666666667000</text:p>
          </table:table-cell>
          <table:table-cell table:formula="of:=[.D808]-[.D80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18" office:value-type="float" office:value="14526" calcext:value-type="float">
            <text:p>14526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168125" calcext:value-type="float">
            <text:p>0,00168125000000000000</text:p>
          </table:table-cell>
          <table:table-cell table:formula="of:=[.D809]-[.D80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18" office:value-type="float" office:value="14544" calcext:value-type="float">
            <text:p>14544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168333333333333" calcext:value-type="float">
            <text:p>0,00168333333333333000</text:p>
          </table:table-cell>
          <table:table-cell table:formula="of:=[.D810]-[.D80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18" office:value-type="float" office:value="14562" calcext:value-type="float">
            <text:p>14562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168541666666667" calcext:value-type="float">
            <text:p>0,00168541666666667000</text:p>
          </table:table-cell>
          <table:table-cell table:formula="of:=[.D811]-[.D81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18" office:value-type="float" office:value="14580" calcext:value-type="float">
            <text:p>1458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16875" calcext:value-type="float">
            <text:p>0,00168750000000000000</text:p>
          </table:table-cell>
          <table:table-cell table:formula="of:=[.D812]-[.D81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18" office:value-type="float" office:value="14598" calcext:value-type="float">
            <text:p>14598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168958333333333" calcext:value-type="float">
            <text:p>0,00168958333333333000</text:p>
          </table:table-cell>
          <table:table-cell table:formula="of:=[.D813]-[.D81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18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169166666666667" calcext:value-type="float">
            <text:p>0,00169166666666667000</text:p>
          </table:table-cell>
          <table:table-cell table:formula="of:=[.D814]-[.D81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18" office:value-type="float" office:value="14634" calcext:value-type="float">
            <text:p>14634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169375" calcext:value-type="float">
            <text:p>0,00169375000000000000</text:p>
          </table:table-cell>
          <table:table-cell table:formula="of:=[.D815]-[.D81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18" office:value-type="float" office:value="14652" calcext:value-type="float">
            <text:p>14652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169583333333333" calcext:value-type="float">
            <text:p>0,00169583333333333000</text:p>
          </table:table-cell>
          <table:table-cell table:formula="of:=[.D816]-[.D81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18" office:value-type="float" office:value="14670" calcext:value-type="float">
            <text:p>14670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169791666666667" calcext:value-type="float">
            <text:p>0,00169791666666667000</text:p>
          </table:table-cell>
          <table:table-cell table:formula="of:=[.D817]-[.D81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18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17" calcext:value-type="float">
            <text:p>0,00170000000000000000</text:p>
          </table:table-cell>
          <table:table-cell table:formula="of:=[.D818]-[.D81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18" office:value-type="float" office:value="14706" calcext:value-type="float">
            <text:p>14706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170208333333333" calcext:value-type="float">
            <text:p>0,00170208333333333000</text:p>
          </table:table-cell>
          <table:table-cell table:formula="of:=[.D819]-[.D81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18" office:value-type="float" office:value="14724" calcext:value-type="float">
            <text:p>14724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170416666666667" calcext:value-type="float">
            <text:p>0,00170416666666667000</text:p>
          </table:table-cell>
          <table:table-cell table:formula="of:=[.D820]-[.D81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18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170625" calcext:value-type="float">
            <text:p>0,00170625000000000000</text:p>
          </table:table-cell>
          <table:table-cell table:formula="of:=[.D821]-[.D82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18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170833333333333" calcext:value-type="float">
            <text:p>0,00170833333333333000</text:p>
          </table:table-cell>
          <table:table-cell table:formula="of:=[.D822]-[.D82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18" office:value-type="float" office:value="14778" calcext:value-type="float">
            <text:p>14778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171041666666667" calcext:value-type="float">
            <text:p>0,00171041666666667000</text:p>
          </table:table-cell>
          <table:table-cell table:formula="of:=[.D823]-[.D82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18" office:value-type="float" office:value="14796" calcext:value-type="float">
            <text:p>14796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17125" calcext:value-type="float">
            <text:p>0,00171250000000000000</text:p>
          </table:table-cell>
          <table:table-cell table:formula="of:=[.D824]-[.D82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18" office:value-type="float" office:value="14814" calcext:value-type="float">
            <text:p>14814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171458333333333" calcext:value-type="float">
            <text:p>0,00171458333333333000</text:p>
          </table:table-cell>
          <table:table-cell table:formula="of:=[.D825]-[.D82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18" office:value-type="float" office:value="14832" calcext:value-type="float">
            <text:p>14832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171666666666667" calcext:value-type="float">
            <text:p>0,00171666666666667000</text:p>
          </table:table-cell>
          <table:table-cell table:formula="of:=[.D826]-[.D82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18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171875" calcext:value-type="float">
            <text:p>0,00171875000000000000</text:p>
          </table:table-cell>
          <table:table-cell table:formula="of:=[.D827]-[.D82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18" office:value-type="float" office:value="14868" calcext:value-type="float">
            <text:p>14868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172083333333333" calcext:value-type="float">
            <text:p>0,00172083333333333000</text:p>
          </table:table-cell>
          <table:table-cell table:formula="of:=[.D828]-[.D82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18" office:value-type="float" office:value="14886" calcext:value-type="float">
            <text:p>14886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172291666666667" calcext:value-type="float">
            <text:p>0,00172291666666667000</text:p>
          </table:table-cell>
          <table:table-cell table:formula="of:=[.D829]-[.D82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18" office:value-type="float" office:value="14904" calcext:value-type="float">
            <text:p>14904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1725" calcext:value-type="float">
            <text:p>0,00172500000000000000</text:p>
          </table:table-cell>
          <table:table-cell table:formula="of:=[.D830]-[.D82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18" office:value-type="float" office:value="14922" calcext:value-type="float">
            <text:p>14922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172708333333333" calcext:value-type="float">
            <text:p>0,00172708333333333000</text:p>
          </table:table-cell>
          <table:table-cell table:formula="of:=[.D831]-[.D83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18" office:value-type="float" office:value="14940" calcext:value-type="float">
            <text:p>1494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172916666666667" calcext:value-type="float">
            <text:p>0,00172916666666667000</text:p>
          </table:table-cell>
          <table:table-cell table:formula="of:=[.D832]-[.D83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18" office:value-type="float" office:value="14958" calcext:value-type="float">
            <text:p>14958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173125" calcext:value-type="float">
            <text:p>0,00173125000000000000</text:p>
          </table:table-cell>
          <table:table-cell table:formula="of:=[.D833]-[.D83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18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173333333333333" calcext:value-type="float">
            <text:p>0,00173333333333333000</text:p>
          </table:table-cell>
          <table:table-cell table:formula="of:=[.D834]-[.D83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18" office:value-type="float" office:value="14994" calcext:value-type="float">
            <text:p>14994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173541666666667" calcext:value-type="float">
            <text:p>0,00173541666666667000</text:p>
          </table:table-cell>
          <table:table-cell table:formula="of:=[.D835]-[.D83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18" office:value-type="float" office:value="15012" calcext:value-type="float">
            <text:p>15012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17375" calcext:value-type="float">
            <text:p>0,00173750000000000000</text:p>
          </table:table-cell>
          <table:table-cell table:formula="of:=[.D836]-[.D83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18" office:value-type="float" office:value="15030" calcext:value-type="float">
            <text:p>15030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173958333333333" calcext:value-type="float">
            <text:p>0,00173958333333333000</text:p>
          </table:table-cell>
          <table:table-cell table:formula="of:=[.D837]-[.D83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18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174166666666667" calcext:value-type="float">
            <text:p>0,00174166666666667000</text:p>
          </table:table-cell>
          <table:table-cell table:formula="of:=[.D838]-[.D83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18" office:value-type="float" office:value="15066" calcext:value-type="float">
            <text:p>15066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174375" calcext:value-type="float">
            <text:p>0,00174375000000000000</text:p>
          </table:table-cell>
          <table:table-cell table:formula="of:=[.D839]-[.D83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18" office:value-type="float" office:value="15084" calcext:value-type="float">
            <text:p>15084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174583333333333" calcext:value-type="float">
            <text:p>0,00174583333333333000</text:p>
          </table:table-cell>
          <table:table-cell table:formula="of:=[.D840]-[.D83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18" office:value-type="float" office:value="15102" calcext:value-type="float">
            <text:p>15102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174791666666667" calcext:value-type="float">
            <text:p>0,00174791666666667000</text:p>
          </table:table-cell>
          <table:table-cell table:formula="of:=[.D841]-[.D84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18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175" calcext:value-type="float">
            <text:p>0,00175000000000000000</text:p>
          </table:table-cell>
          <table:table-cell table:formula="of:=[.D842]-[.D84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18" office:value-type="float" office:value="15138" calcext:value-type="float">
            <text:p>15138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175208333333333" calcext:value-type="float">
            <text:p>0,00175208333333333000</text:p>
          </table:table-cell>
          <table:table-cell table:formula="of:=[.D843]-[.D84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18" office:value-type="float" office:value="15156" calcext:value-type="float">
            <text:p>15156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175416666666667" calcext:value-type="float">
            <text:p>0,00175416666666667000</text:p>
          </table:table-cell>
          <table:table-cell table:formula="of:=[.D844]-[.D84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18" office:value-type="float" office:value="15174" calcext:value-type="float">
            <text:p>15174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175625" calcext:value-type="float">
            <text:p>0,00175625000000000000</text:p>
          </table:table-cell>
          <table:table-cell table:formula="of:=[.D845]-[.D84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18" office:value-type="float" office:value="15192" calcext:value-type="float">
            <text:p>15192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175833333333333" calcext:value-type="float">
            <text:p>0,00175833333333333000</text:p>
          </table:table-cell>
          <table:table-cell table:formula="of:=[.D846]-[.D84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18" office:value-type="float" office:value="15210" calcext:value-type="float">
            <text:p>15210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176041666666667" calcext:value-type="float">
            <text:p>0,00176041666666667000</text:p>
          </table:table-cell>
          <table:table-cell table:formula="of:=[.D847]-[.D84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18" office:value-type="float" office:value="15228" calcext:value-type="float">
            <text:p>15228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17625" calcext:value-type="float">
            <text:p>0,00176250000000000000</text:p>
          </table:table-cell>
          <table:table-cell table:formula="of:=[.D848]-[.D84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18" office:value-type="float" office:value="15246" calcext:value-type="float">
            <text:p>15246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176458333333333" calcext:value-type="float">
            <text:p>0,00176458333333333000</text:p>
          </table:table-cell>
          <table:table-cell table:formula="of:=[.D849]-[.D84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18" office:value-type="float" office:value="15264" calcext:value-type="float">
            <text:p>15264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176666666666667" calcext:value-type="float">
            <text:p>0,00176666666666667000</text:p>
          </table:table-cell>
          <table:table-cell table:formula="of:=[.D850]-[.D84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18" office:value-type="float" office:value="15282" calcext:value-type="float">
            <text:p>15282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176875" calcext:value-type="float">
            <text:p>0,00176875000000000000</text:p>
          </table:table-cell>
          <table:table-cell table:formula="of:=[.D851]-[.D85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18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177083333333333" calcext:value-type="float">
            <text:p>0,00177083333333333000</text:p>
          </table:table-cell>
          <table:table-cell table:formula="of:=[.D852]-[.D85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18" office:value-type="float" office:value="15318" calcext:value-type="float">
            <text:p>15318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177291666666667" calcext:value-type="float">
            <text:p>0,00177291666666667000</text:p>
          </table:table-cell>
          <table:table-cell table:formula="of:=[.D853]-[.D85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18" office:value-type="float" office:value="15336" calcext:value-type="float">
            <text:p>15336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1775" calcext:value-type="float">
            <text:p>0,00177500000000000000</text:p>
          </table:table-cell>
          <table:table-cell table:formula="of:=[.D854]-[.D85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18" office:value-type="float" office:value="15354" calcext:value-type="float">
            <text:p>15354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177708333333333" calcext:value-type="float">
            <text:p>0,00177708333333333000</text:p>
          </table:table-cell>
          <table:table-cell table:formula="of:=[.D855]-[.D85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18" office:value-type="float" office:value="15372" calcext:value-type="float">
            <text:p>15372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177916666666667" calcext:value-type="float">
            <text:p>0,00177916666666667000</text:p>
          </table:table-cell>
          <table:table-cell table:formula="of:=[.D856]-[.D85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18" office:value-type="float" office:value="15390" calcext:value-type="float">
            <text:p>15390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178125" calcext:value-type="float">
            <text:p>0,00178125000000000000</text:p>
          </table:table-cell>
          <table:table-cell table:formula="of:=[.D857]-[.D85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18" office:value-type="float" office:value="15408" calcext:value-type="float">
            <text:p>15408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178333333333333" calcext:value-type="float">
            <text:p>0,00178333333333333000</text:p>
          </table:table-cell>
          <table:table-cell table:formula="of:=[.D858]-[.D85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18" office:value-type="float" office:value="15426" calcext:value-type="float">
            <text:p>15426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178541666666667" calcext:value-type="float">
            <text:p>0,00178541666666667000</text:p>
          </table:table-cell>
          <table:table-cell table:formula="of:=[.D859]-[.D85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18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17875" calcext:value-type="float">
            <text:p>0,00178750000000000000</text:p>
          </table:table-cell>
          <table:table-cell table:formula="of:=[.D860]-[.D85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18" office:value-type="float" office:value="15462" calcext:value-type="float">
            <text:p>15462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178958333333333" calcext:value-type="float">
            <text:p>0,00178958333333333000</text:p>
          </table:table-cell>
          <table:table-cell table:formula="of:=[.D861]-[.D86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18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179166666666667" calcext:value-type="float">
            <text:p>0,00179166666666667000</text:p>
          </table:table-cell>
          <table:table-cell table:formula="of:=[.D862]-[.D86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18" office:value-type="float" office:value="15498" calcext:value-type="float">
            <text:p>15498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179375" calcext:value-type="float">
            <text:p>0,00179375000000000000</text:p>
          </table:table-cell>
          <table:table-cell table:formula="of:=[.D863]-[.D86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18" office:value-type="float" office:value="15516" calcext:value-type="float">
            <text:p>15516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179583333333333" calcext:value-type="float">
            <text:p>0,00179583333333333000</text:p>
          </table:table-cell>
          <table:table-cell table:formula="of:=[.D864]-[.D86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18" office:value-type="float" office:value="15534" calcext:value-type="float">
            <text:p>15534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179791666666667" calcext:value-type="float">
            <text:p>0,00179791666666667000</text:p>
          </table:table-cell>
          <table:table-cell table:formula="of:=[.D865]-[.D86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18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18" calcext:value-type="float">
            <text:p>0,00180000000000000000</text:p>
          </table:table-cell>
          <table:table-cell table:formula="of:=[.D866]-[.D86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18" office:value-type="float" office:value="15570" calcext:value-type="float">
            <text:p>15570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180208333333333" calcext:value-type="float">
            <text:p>0,00180208333333333000</text:p>
          </table:table-cell>
          <table:table-cell table:formula="of:=[.D867]-[.D86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18" office:value-type="float" office:value="15588" calcext:value-type="float">
            <text:p>15588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180416666666667" calcext:value-type="float">
            <text:p>0,00180416666666667000</text:p>
          </table:table-cell>
          <table:table-cell table:formula="of:=[.D868]-[.D86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18" office:value-type="float" office:value="15606" calcext:value-type="float">
            <text:p>15606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180625" calcext:value-type="float">
            <text:p>0,00180625000000000000</text:p>
          </table:table-cell>
          <table:table-cell table:formula="of:=[.D869]-[.D86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18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180833333333333" calcext:value-type="float">
            <text:p>0,00180833333333333000</text:p>
          </table:table-cell>
          <table:table-cell table:formula="of:=[.D870]-[.D86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18" office:value-type="float" office:value="15642" calcext:value-type="float">
            <text:p>15642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181041666666667" calcext:value-type="float">
            <text:p>0,00181041666666667000</text:p>
          </table:table-cell>
          <table:table-cell table:formula="of:=[.D871]-[.D87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18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18125" calcext:value-type="float">
            <text:p>0,00181250000000000000</text:p>
          </table:table-cell>
          <table:table-cell table:formula="of:=[.D872]-[.D87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18" office:value-type="float" office:value="15678" calcext:value-type="float">
            <text:p>15678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181458333333333" calcext:value-type="float">
            <text:p>0,00181458333333333000</text:p>
          </table:table-cell>
          <table:table-cell table:formula="of:=[.D873]-[.D87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18" office:value-type="float" office:value="15696" calcext:value-type="float">
            <text:p>15696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181666666666667" calcext:value-type="float">
            <text:p>0,00181666666666667000</text:p>
          </table:table-cell>
          <table:table-cell table:formula="of:=[.D874]-[.D87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18" office:value-type="float" office:value="15714" calcext:value-type="float">
            <text:p>15714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181875" calcext:value-type="float">
            <text:p>0,00181875000000000000</text:p>
          </table:table-cell>
          <table:table-cell table:formula="of:=[.D875]-[.D87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18" office:value-type="float" office:value="15732" calcext:value-type="float">
            <text:p>15732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182083333333333" calcext:value-type="float">
            <text:p>0,00182083333333333000</text:p>
          </table:table-cell>
          <table:table-cell table:formula="of:=[.D876]-[.D87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18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182291666666667" calcext:value-type="float">
            <text:p>0,00182291666666667000</text:p>
          </table:table-cell>
          <table:table-cell table:formula="of:=[.D877]-[.D87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18" office:value-type="float" office:value="15768" calcext:value-type="float">
            <text:p>15768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1825" calcext:value-type="float">
            <text:p>0,00182500000000000000</text:p>
          </table:table-cell>
          <table:table-cell table:formula="of:=[.D878]-[.D87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18" office:value-type="float" office:value="15786" calcext:value-type="float">
            <text:p>15786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182708333333333" calcext:value-type="float">
            <text:p>0,00182708333333333000</text:p>
          </table:table-cell>
          <table:table-cell table:formula="of:=[.D879]-[.D87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18" office:value-type="float" office:value="15804" calcext:value-type="float">
            <text:p>15804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182916666666667" calcext:value-type="float">
            <text:p>0,00182916666666667000</text:p>
          </table:table-cell>
          <table:table-cell table:formula="of:=[.D880]-[.D87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18" office:value-type="float" office:value="15822" calcext:value-type="float">
            <text:p>15822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183125" calcext:value-type="float">
            <text:p>0,00183125000000000000</text:p>
          </table:table-cell>
          <table:table-cell table:formula="of:=[.D881]-[.D88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18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183333333333333" calcext:value-type="float">
            <text:p>0,00183333333333333000</text:p>
          </table:table-cell>
          <table:table-cell table:formula="of:=[.D882]-[.D88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18" office:value-type="float" office:value="15858" calcext:value-type="float">
            <text:p>15858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183541666666667" calcext:value-type="float">
            <text:p>0,00183541666666667000</text:p>
          </table:table-cell>
          <table:table-cell table:formula="of:=[.D883]-[.D88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18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18375" calcext:value-type="float">
            <text:p>0,00183750000000000000</text:p>
          </table:table-cell>
          <table:table-cell table:formula="of:=[.D884]-[.D88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18" office:value-type="float" office:value="15894" calcext:value-type="float">
            <text:p>15894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183958333333333" calcext:value-type="float">
            <text:p>0,00183958333333333000</text:p>
          </table:table-cell>
          <table:table-cell table:formula="of:=[.D885]-[.D88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18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184166666666667" calcext:value-type="float">
            <text:p>0,00184166666666667000</text:p>
          </table:table-cell>
          <table:table-cell table:formula="of:=[.D886]-[.D88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18" office:value-type="float" office:value="15930" calcext:value-type="float">
            <text:p>15930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184375" calcext:value-type="float">
            <text:p>0,00184375000000000000</text:p>
          </table:table-cell>
          <table:table-cell table:formula="of:=[.D887]-[.D88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18" office:value-type="float" office:value="15948" calcext:value-type="float">
            <text:p>15948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184583333333333" calcext:value-type="float">
            <text:p>0,00184583333333333000</text:p>
          </table:table-cell>
          <table:table-cell table:formula="of:=[.D888]-[.D88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18" office:value-type="float" office:value="15966" calcext:value-type="float">
            <text:p>15966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184791666666667" calcext:value-type="float">
            <text:p>0,00184791666666667000</text:p>
          </table:table-cell>
          <table:table-cell table:formula="of:=[.D889]-[.D88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18" office:value-type="float" office:value="15984" calcext:value-type="float">
            <text:p>15984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185" calcext:value-type="float">
            <text:p>0,00185000000000000000</text:p>
          </table:table-cell>
          <table:table-cell table:formula="of:=[.D890]-[.D88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18" office:value-type="float" office:value="16002" calcext:value-type="float">
            <text:p>16002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185208333333333" calcext:value-type="float">
            <text:p>0,00185208333333333000</text:p>
          </table:table-cell>
          <table:table-cell table:formula="of:=[.D891]-[.D89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18" office:value-type="float" office:value="16020" calcext:value-type="float">
            <text:p>1602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185416666666667" calcext:value-type="float">
            <text:p>0,00185416666666667000</text:p>
          </table:table-cell>
          <table:table-cell table:formula="of:=[.D892]-[.D89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18" office:value-type="float" office:value="16038" calcext:value-type="float">
            <text:p>16038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185625" calcext:value-type="float">
            <text:p>0,00185625000000000000</text:p>
          </table:table-cell>
          <table:table-cell table:formula="of:=[.D893]-[.D89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18" office:value-type="float" office:value="16056" calcext:value-type="float">
            <text:p>16056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185833333333333" calcext:value-type="float">
            <text:p>0,00185833333333333000</text:p>
          </table:table-cell>
          <table:table-cell table:formula="of:=[.D894]-[.D89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18" office:value-type="float" office:value="16074" calcext:value-type="float">
            <text:p>16074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186041666666667" calcext:value-type="float">
            <text:p>0,00186041666666667000</text:p>
          </table:table-cell>
          <table:table-cell table:formula="of:=[.D895]-[.D89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18" office:value-type="float" office:value="16092" calcext:value-type="float">
            <text:p>16092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18625" calcext:value-type="float">
            <text:p>0,00186250000000000000</text:p>
          </table:table-cell>
          <table:table-cell table:formula="of:=[.D896]-[.D89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18" office:value-type="float" office:value="16110" calcext:value-type="float">
            <text:p>16110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186458333333333" calcext:value-type="float">
            <text:p>0,00186458333333333000</text:p>
          </table:table-cell>
          <table:table-cell table:formula="of:=[.D897]-[.D89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18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186666666666667" calcext:value-type="float">
            <text:p>0,00186666666666667000</text:p>
          </table:table-cell>
          <table:table-cell table:formula="of:=[.D898]-[.D89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18" office:value-type="float" office:value="16146" calcext:value-type="float">
            <text:p>16146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186875" calcext:value-type="float">
            <text:p>0,00186875000000000000</text:p>
          </table:table-cell>
          <table:table-cell table:formula="of:=[.D899]-[.D89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18" office:value-type="float" office:value="16164" calcext:value-type="float">
            <text:p>16164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187083333333333" calcext:value-type="float">
            <text:p>0,00187083333333333000</text:p>
          </table:table-cell>
          <table:table-cell table:formula="of:=[.D900]-[.D89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18" office:value-type="float" office:value="16182" calcext:value-type="float">
            <text:p>16182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187291666666667" calcext:value-type="float">
            <text:p>0,00187291666666667000</text:p>
          </table:table-cell>
          <table:table-cell table:formula="of:=[.D901]-[.D90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18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1875" calcext:value-type="float">
            <text:p>0,00187500000000000000</text:p>
          </table:table-cell>
          <table:table-cell table:formula="of:=[.D902]-[.D90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18" office:value-type="float" office:value="16218" calcext:value-type="float">
            <text:p>16218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187708333333333" calcext:value-type="float">
            <text:p>0,00187708333333333000</text:p>
          </table:table-cell>
          <table:table-cell table:formula="of:=[.D903]-[.D90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18" office:value-type="float" office:value="16236" calcext:value-type="float">
            <text:p>16236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187916666666667" calcext:value-type="float">
            <text:p>0,00187916666666667000</text:p>
          </table:table-cell>
          <table:table-cell table:formula="of:=[.D904]-[.D90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18" office:value-type="float" office:value="16254" calcext:value-type="float">
            <text:p>16254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188125" calcext:value-type="float">
            <text:p>0,00188125000000000000</text:p>
          </table:table-cell>
          <table:table-cell table:formula="of:=[.D905]-[.D90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18" office:value-type="float" office:value="16272" calcext:value-type="float">
            <text:p>16272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188333333333333" calcext:value-type="float">
            <text:p>0,00188333333333333000</text:p>
          </table:table-cell>
          <table:table-cell table:formula="of:=[.D906]-[.D90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18" office:value-type="float" office:value="16290" calcext:value-type="float">
            <text:p>16290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188541666666667" calcext:value-type="float">
            <text:p>0,00188541666666667000</text:p>
          </table:table-cell>
          <table:table-cell table:formula="of:=[.D907]-[.D90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18" office:value-type="float" office:value="16308" calcext:value-type="float">
            <text:p>16308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18875" calcext:value-type="float">
            <text:p>0,00188750000000000000</text:p>
          </table:table-cell>
          <table:table-cell table:formula="of:=[.D908]-[.D90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18" office:value-type="float" office:value="16326" calcext:value-type="float">
            <text:p>16326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188958333333333" calcext:value-type="float">
            <text:p>0,00188958333333333000</text:p>
          </table:table-cell>
          <table:table-cell table:formula="of:=[.D909]-[.D90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18" office:value-type="float" office:value="16344" calcext:value-type="float">
            <text:p>16344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189166666666667" calcext:value-type="float">
            <text:p>0,00189166666666667000</text:p>
          </table:table-cell>
          <table:table-cell table:formula="of:=[.D910]-[.D90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18" office:value-type="float" office:value="16362" calcext:value-type="float">
            <text:p>16362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189375" calcext:value-type="float">
            <text:p>0,00189375000000000000</text:p>
          </table:table-cell>
          <table:table-cell table:formula="of:=[.D911]-[.D91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18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189583333333333" calcext:value-type="float">
            <text:p>0,00189583333333333000</text:p>
          </table:table-cell>
          <table:table-cell table:formula="of:=[.D912]-[.D91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18" office:value-type="float" office:value="16398" calcext:value-type="float">
            <text:p>16398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189791666666667" calcext:value-type="float">
            <text:p>0,00189791666666667000</text:p>
          </table:table-cell>
          <table:table-cell table:formula="of:=[.D913]-[.D91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18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19" calcext:value-type="float">
            <text:p>0,00190000000000000000</text:p>
          </table:table-cell>
          <table:table-cell table:formula="of:=[.D914]-[.D91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18" office:value-type="float" office:value="16434" calcext:value-type="float">
            <text:p>16434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190208333333333" calcext:value-type="float">
            <text:p>0,00190208333333333000</text:p>
          </table:table-cell>
          <table:table-cell table:formula="of:=[.D915]-[.D91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18" office:value-type="float" office:value="16452" calcext:value-type="float">
            <text:p>16452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190416666666667" calcext:value-type="float">
            <text:p>0,00190416666666667000</text:p>
          </table:table-cell>
          <table:table-cell table:formula="of:=[.D916]-[.D91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18" office:value-type="float" office:value="16470" calcext:value-type="float">
            <text:p>16470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190625" calcext:value-type="float">
            <text:p>0,00190625000000000000</text:p>
          </table:table-cell>
          <table:table-cell table:formula="of:=[.D917]-[.D91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18" office:value-type="float" office:value="16488" calcext:value-type="float">
            <text:p>16488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190833333333333" calcext:value-type="float">
            <text:p>0,00190833333333333000</text:p>
          </table:table-cell>
          <table:table-cell table:formula="of:=[.D918]-[.D91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18" office:value-type="float" office:value="16506" calcext:value-type="float">
            <text:p>16506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191041666666667" calcext:value-type="float">
            <text:p>0,00191041666666667000</text:p>
          </table:table-cell>
          <table:table-cell table:formula="of:=[.D919]-[.D91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18" office:value-type="float" office:value="16524" calcext:value-type="float">
            <text:p>16524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19125" calcext:value-type="float">
            <text:p>0,00191250000000000000</text:p>
          </table:table-cell>
          <table:table-cell table:formula="of:=[.D920]-[.D91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18" office:value-type="float" office:value="16542" calcext:value-type="float">
            <text:p>16542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191458333333333" calcext:value-type="float">
            <text:p>0,00191458333333333000</text:p>
          </table:table-cell>
          <table:table-cell table:formula="of:=[.D921]-[.D92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18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191666666666667" calcext:value-type="float">
            <text:p>0,00191666666666667000</text:p>
          </table:table-cell>
          <table:table-cell table:formula="of:=[.D922]-[.D92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18" office:value-type="float" office:value="16578" calcext:value-type="float">
            <text:p>16578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191875" calcext:value-type="float">
            <text:p>0,00191875000000000000</text:p>
          </table:table-cell>
          <table:table-cell table:formula="of:=[.D923]-[.D92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18" office:value-type="float" office:value="16596" calcext:value-type="float">
            <text:p>16596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192083333333333" calcext:value-type="float">
            <text:p>0,00192083333333333000</text:p>
          </table:table-cell>
          <table:table-cell table:formula="of:=[.D924]-[.D92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18" office:value-type="float" office:value="16614" calcext:value-type="float">
            <text:p>16614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192291666666667" calcext:value-type="float">
            <text:p>0,00192291666666667000</text:p>
          </table:table-cell>
          <table:table-cell table:formula="of:=[.D925]-[.D92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18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1925" calcext:value-type="float">
            <text:p>0,00192500000000000000</text:p>
          </table:table-cell>
          <table:table-cell table:formula="of:=[.D926]-[.D92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18" office:value-type="float" office:value="16650" calcext:value-type="float">
            <text:p>16650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192708333333333" calcext:value-type="float">
            <text:p>0,00192708333333333000</text:p>
          </table:table-cell>
          <table:table-cell table:formula="of:=[.D927]-[.D92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18" office:value-type="float" office:value="16668" calcext:value-type="float">
            <text:p>16668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192916666666667" calcext:value-type="float">
            <text:p>0,00192916666666667000</text:p>
          </table:table-cell>
          <table:table-cell table:formula="of:=[.D928]-[.D92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18" office:value-type="float" office:value="16686" calcext:value-type="float">
            <text:p>16686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193125" calcext:value-type="float">
            <text:p>0,00193125000000000000</text:p>
          </table:table-cell>
          <table:table-cell table:formula="of:=[.D929]-[.D92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18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193333333333333" calcext:value-type="float">
            <text:p>0,00193333333333333000</text:p>
          </table:table-cell>
          <table:table-cell table:formula="of:=[.D930]-[.D929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18" office:value-type="float" office:value="16722" calcext:value-type="float">
            <text:p>16722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193541666666667" calcext:value-type="float">
            <text:p>0,00193541666666667000</text:p>
          </table:table-cell>
          <table:table-cell table:formula="of:=[.D931]-[.D930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18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19375" calcext:value-type="float">
            <text:p>0,00193750000000000000</text:p>
          </table:table-cell>
          <table:table-cell table:formula="of:=[.D932]-[.D931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18" office:value-type="float" office:value="16758" calcext:value-type="float">
            <text:p>16758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193958333333333" calcext:value-type="float">
            <text:p>0,00193958333333333000</text:p>
          </table:table-cell>
          <table:table-cell table:formula="of:=[.D933]-[.D932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18" office:value-type="float" office:value="16776" calcext:value-type="float">
            <text:p>16776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194166666666667" calcext:value-type="float">
            <text:p>0,00194166666666667000</text:p>
          </table:table-cell>
          <table:table-cell table:formula="of:=[.D934]-[.D933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18" office:value-type="float" office:value="16794" calcext:value-type="float">
            <text:p>16794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194375" calcext:value-type="float">
            <text:p>0,00194375000000000000</text:p>
          </table:table-cell>
          <table:table-cell table:formula="of:=[.D935]-[.D934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18" office:value-type="float" office:value="16812" calcext:value-type="float">
            <text:p>16812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194583333333333" calcext:value-type="float">
            <text:p>0,00194583333333333000</text:p>
          </table:table-cell>
          <table:table-cell table:formula="of:=[.D936]-[.D935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18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194791666666667" calcext:value-type="float">
            <text:p>0,00194791666666667000</text:p>
          </table:table-cell>
          <table:table-cell table:formula="of:=[.D937]-[.D936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18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195" calcext:value-type="float">
            <text:p>0,00195000000000000000</text:p>
          </table:table-cell>
          <table:table-cell table:formula="of:=[.D938]-[.D937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18" office:value-type="float" office:value="16866" calcext:value-type="float">
            <text:p>16866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195208333333333" calcext:value-type="float">
            <text:p>0,00195208333333333000</text:p>
          </table:table-cell>
          <table:table-cell table:formula="of:=[.D939]-[.D938]" office:value-type="float" office:value="0.00000208333333333332" calcext:value-type="float">
            <text:p>0,0000020833333333333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18" office:value-type="float" office:value="16884" calcext:value-type="float">
            <text:p>16884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195416666666667" calcext:value-type="float">
            <text:p>0,00195416666666667000</text:p>
          </table:table-cell>
          <table:table-cell table:formula="of:=[.D940]-[.D93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18" office:value-type="float" office:value="16902" calcext:value-type="float">
            <text:p>16902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195625" calcext:value-type="float">
            <text:p>0,00195625000000000000</text:p>
          </table:table-cell>
          <table:table-cell table:formula="of:=[.D941]-[.D94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18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195833333333333" calcext:value-type="float">
            <text:p>0,00195833333333333000</text:p>
          </table:table-cell>
          <table:table-cell table:formula="of:=[.D942]-[.D94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18" office:value-type="float" office:value="16938" calcext:value-type="float">
            <text:p>16938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196041666666667" calcext:value-type="float">
            <text:p>0,00196041666666667000</text:p>
          </table:table-cell>
          <table:table-cell table:formula="of:=[.D943]-[.D94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18" office:value-type="float" office:value="16956" calcext:value-type="float">
            <text:p>16956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19625" calcext:value-type="float">
            <text:p>0,00196250000000000000</text:p>
          </table:table-cell>
          <table:table-cell table:formula="of:=[.D944]-[.D94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18" office:value-type="float" office:value="16974" calcext:value-type="float">
            <text:p>16974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196458333333333" calcext:value-type="float">
            <text:p>0,00196458333333333000</text:p>
          </table:table-cell>
          <table:table-cell table:formula="of:=[.D945]-[.D94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18" office:value-type="float" office:value="16992" calcext:value-type="float">
            <text:p>16992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196666666666667" calcext:value-type="float">
            <text:p>0,00196666666666667000</text:p>
          </table:table-cell>
          <table:table-cell table:formula="of:=[.D946]-[.D94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18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196875" calcext:value-type="float">
            <text:p>0,00196875000000000000</text:p>
          </table:table-cell>
          <table:table-cell table:formula="of:=[.D947]-[.D94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18" office:value-type="float" office:value="17028" calcext:value-type="float">
            <text:p>17028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197083333333333" calcext:value-type="float">
            <text:p>0,00197083333333333000</text:p>
          </table:table-cell>
          <table:table-cell table:formula="of:=[.D948]-[.D94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18" office:value-type="float" office:value="17046" calcext:value-type="float">
            <text:p>17046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197291666666667" calcext:value-type="float">
            <text:p>0,00197291666666667000</text:p>
          </table:table-cell>
          <table:table-cell table:formula="of:=[.D949]-[.D94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18" office:value-type="float" office:value="17064" calcext:value-type="float">
            <text:p>17064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1975" calcext:value-type="float">
            <text:p>0,00197500000000000000</text:p>
          </table:table-cell>
          <table:table-cell table:formula="of:=[.D950]-[.D94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18" office:value-type="float" office:value="17082" calcext:value-type="float">
            <text:p>17082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197708333333333" calcext:value-type="float">
            <text:p>0,00197708333333333000</text:p>
          </table:table-cell>
          <table:table-cell table:formula="of:=[.D951]-[.D95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18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197916666666667" calcext:value-type="float">
            <text:p>0,00197916666666667000</text:p>
          </table:table-cell>
          <table:table-cell table:formula="of:=[.D952]-[.D95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18" office:value-type="float" office:value="17118" calcext:value-type="float">
            <text:p>17118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198125" calcext:value-type="float">
            <text:p>0,00198125000000000000</text:p>
          </table:table-cell>
          <table:table-cell table:formula="of:=[.D953]-[.D95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18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198333333333333" calcext:value-type="float">
            <text:p>0,00198333333333333000</text:p>
          </table:table-cell>
          <table:table-cell table:formula="of:=[.D954]-[.D95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18" office:value-type="float" office:value="17154" calcext:value-type="float">
            <text:p>17154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198541666666667" calcext:value-type="float">
            <text:p>0,00198541666666667000</text:p>
          </table:table-cell>
          <table:table-cell table:formula="of:=[.D955]-[.D95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18" office:value-type="float" office:value="17172" calcext:value-type="float">
            <text:p>17172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19875" calcext:value-type="float">
            <text:p>0,00198750000000000000</text:p>
          </table:table-cell>
          <table:table-cell table:formula="of:=[.D956]-[.D95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18" office:value-type="float" office:value="17190" calcext:value-type="float">
            <text:p>17190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198958333333333" calcext:value-type="float">
            <text:p>0,00198958333333333000</text:p>
          </table:table-cell>
          <table:table-cell table:formula="of:=[.D957]-[.D95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18" office:value-type="float" office:value="17208" calcext:value-type="float">
            <text:p>17208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199166666666667" calcext:value-type="float">
            <text:p>0,00199166666666667000</text:p>
          </table:table-cell>
          <table:table-cell table:formula="of:=[.D958]-[.D95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18" office:value-type="float" office:value="17226" calcext:value-type="float">
            <text:p>17226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199375" calcext:value-type="float">
            <text:p>0,00199375000000000000</text:p>
          </table:table-cell>
          <table:table-cell table:formula="of:=[.D959]-[.D95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18" office:value-type="float" office:value="17244" calcext:value-type="float">
            <text:p>17244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199583333333333" calcext:value-type="float">
            <text:p>0,00199583333333333000</text:p>
          </table:table-cell>
          <table:table-cell table:formula="of:=[.D960]-[.D95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18" office:value-type="float" office:value="17262" calcext:value-type="float">
            <text:p>17262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199791666666667" calcext:value-type="float">
            <text:p>0,00199791666666667000</text:p>
          </table:table-cell>
          <table:table-cell table:formula="of:=[.D961]-[.D96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18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2" calcext:value-type="float">
            <text:p>0,00200000000000000000</text:p>
          </table:table-cell>
          <table:table-cell table:formula="of:=[.D962]-[.D96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18" office:value-type="float" office:value="17298" calcext:value-type="float">
            <text:p>17298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200208333333333" calcext:value-type="float">
            <text:p>0,00200208333333333000</text:p>
          </table:table-cell>
          <table:table-cell table:formula="of:=[.D963]-[.D96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18" office:value-type="float" office:value="17316" calcext:value-type="float">
            <text:p>17316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200416666666667" calcext:value-type="float">
            <text:p>0,00200416666666667000</text:p>
          </table:table-cell>
          <table:table-cell table:formula="of:=[.D964]-[.D96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18" office:value-type="float" office:value="17334" calcext:value-type="float">
            <text:p>17334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200625" calcext:value-type="float">
            <text:p>0,00200625000000000000</text:p>
          </table:table-cell>
          <table:table-cell table:formula="of:=[.D965]-[.D96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18" office:value-type="float" office:value="17352" calcext:value-type="float">
            <text:p>17352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200833333333333" calcext:value-type="float">
            <text:p>0,00200833333333333000</text:p>
          </table:table-cell>
          <table:table-cell table:formula="of:=[.D966]-[.D96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18" office:value-type="float" office:value="17370" calcext:value-type="float">
            <text:p>17370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201041666666667" calcext:value-type="float">
            <text:p>0,00201041666666667000</text:p>
          </table:table-cell>
          <table:table-cell table:formula="of:=[.D967]-[.D96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18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20125" calcext:value-type="float">
            <text:p>0,00201250000000000000</text:p>
          </table:table-cell>
          <table:table-cell table:formula="of:=[.D968]-[.D96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18" office:value-type="float" office:value="17406" calcext:value-type="float">
            <text:p>17406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201458333333333" calcext:value-type="float">
            <text:p>0,00201458333333333000</text:p>
          </table:table-cell>
          <table:table-cell table:formula="of:=[.D969]-[.D96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18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201666666666667" calcext:value-type="float">
            <text:p>0,00201666666666667000</text:p>
          </table:table-cell>
          <table:table-cell table:formula="of:=[.D970]-[.D96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18" office:value-type="float" office:value="17442" calcext:value-type="float">
            <text:p>17442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201875" calcext:value-type="float">
            <text:p>0,00201875000000000000</text:p>
          </table:table-cell>
          <table:table-cell table:formula="of:=[.D971]-[.D97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18" office:value-type="float" office:value="17460" calcext:value-type="float">
            <text:p>1746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202083333333333" calcext:value-type="float">
            <text:p>0,00202083333333333000</text:p>
          </table:table-cell>
          <table:table-cell table:formula="of:=[.D972]-[.D97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18" office:value-type="float" office:value="17478" calcext:value-type="float">
            <text:p>17478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202291666666667" calcext:value-type="float">
            <text:p>0,00202291666666667000</text:p>
          </table:table-cell>
          <table:table-cell table:formula="of:=[.D973]-[.D97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18" office:value-type="float" office:value="17496" calcext:value-type="float">
            <text:p>17496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2025" calcext:value-type="float">
            <text:p>0,00202500000000000000</text:p>
          </table:table-cell>
          <table:table-cell table:formula="of:=[.D974]-[.D97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18" office:value-type="float" office:value="17514" calcext:value-type="float">
            <text:p>17514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202708333333333" calcext:value-type="float">
            <text:p>0,00202708333333333000</text:p>
          </table:table-cell>
          <table:table-cell table:formula="of:=[.D975]-[.D97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18" office:value-type="float" office:value="17532" calcext:value-type="float">
            <text:p>17532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202916666666667" calcext:value-type="float">
            <text:p>0,00202916666666667000</text:p>
          </table:table-cell>
          <table:table-cell table:formula="of:=[.D976]-[.D97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18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203125" calcext:value-type="float">
            <text:p>0,00203125000000000000</text:p>
          </table:table-cell>
          <table:table-cell table:formula="of:=[.D977]-[.D97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18" office:value-type="float" office:value="17568" calcext:value-type="float">
            <text:p>17568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203333333333333" calcext:value-type="float">
            <text:p>0,00203333333333333000</text:p>
          </table:table-cell>
          <table:table-cell table:formula="of:=[.D978]-[.D97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18" office:value-type="float" office:value="17586" calcext:value-type="float">
            <text:p>17586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203541666666667" calcext:value-type="float">
            <text:p>0,00203541666666667000</text:p>
          </table:table-cell>
          <table:table-cell table:formula="of:=[.D979]-[.D97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18" office:value-type="float" office:value="17604" calcext:value-type="float">
            <text:p>17604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20375" calcext:value-type="float">
            <text:p>0,00203750000000000000</text:p>
          </table:table-cell>
          <table:table-cell table:formula="of:=[.D980]-[.D97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18" office:value-type="float" office:value="17622" calcext:value-type="float">
            <text:p>17622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203958333333333" calcext:value-type="float">
            <text:p>0,00203958333333333000</text:p>
          </table:table-cell>
          <table:table-cell table:formula="of:=[.D981]-[.D98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18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204166666666667" calcext:value-type="float">
            <text:p>0,00204166666666667000</text:p>
          </table:table-cell>
          <table:table-cell table:formula="of:=[.D982]-[.D98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18" office:value-type="float" office:value="17658" calcext:value-type="float">
            <text:p>17658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204375" calcext:value-type="float">
            <text:p>0,00204375000000000000</text:p>
          </table:table-cell>
          <table:table-cell table:formula="of:=[.D983]-[.D98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18" office:value-type="float" office:value="17676" calcext:value-type="float">
            <text:p>17676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204583333333333" calcext:value-type="float">
            <text:p>0,00204583333333333000</text:p>
          </table:table-cell>
          <table:table-cell table:formula="of:=[.D984]-[.D98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18" office:value-type="float" office:value="17694" calcext:value-type="float">
            <text:p>17694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204791666666667" calcext:value-type="float">
            <text:p>0,00204791666666667000</text:p>
          </table:table-cell>
          <table:table-cell table:formula="of:=[.D985]-[.D98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18" office:value-type="float" office:value="17712" calcext:value-type="float">
            <text:p>17712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205" calcext:value-type="float">
            <text:p>0,00205000000000000000</text:p>
          </table:table-cell>
          <table:table-cell table:formula="of:=[.D986]-[.D98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18" office:value-type="float" office:value="17730" calcext:value-type="float">
            <text:p>17730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205208333333333" calcext:value-type="float">
            <text:p>0,00205208333333333000</text:p>
          </table:table-cell>
          <table:table-cell table:formula="of:=[.D987]-[.D98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18" office:value-type="float" office:value="17748" calcext:value-type="float">
            <text:p>17748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205416666666667" calcext:value-type="float">
            <text:p>0,00205416666666667000</text:p>
          </table:table-cell>
          <table:table-cell table:formula="of:=[.D988]-[.D98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18" office:value-type="float" office:value="17766" calcext:value-type="float">
            <text:p>17766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205625" calcext:value-type="float">
            <text:p>0,00205625000000000000</text:p>
          </table:table-cell>
          <table:table-cell table:formula="of:=[.D989]-[.D98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18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205833333333333" calcext:value-type="float">
            <text:p>0,00205833333333333000</text:p>
          </table:table-cell>
          <table:table-cell table:formula="of:=[.D990]-[.D98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18" office:value-type="float" office:value="17802" calcext:value-type="float">
            <text:p>17802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206041666666667" calcext:value-type="float">
            <text:p>0,00206041666666667000</text:p>
          </table:table-cell>
          <table:table-cell table:formula="of:=[.D991]-[.D99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18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20625" calcext:value-type="float">
            <text:p>0,00206250000000000000</text:p>
          </table:table-cell>
          <table:table-cell table:formula="of:=[.D992]-[.D99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18" office:value-type="float" office:value="17838" calcext:value-type="float">
            <text:p>17838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206458333333333" calcext:value-type="float">
            <text:p>0,00206458333333333000</text:p>
          </table:table-cell>
          <table:table-cell table:formula="of:=[.D993]-[.D99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18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206666666666667" calcext:value-type="float">
            <text:p>0,00206666666666667000</text:p>
          </table:table-cell>
          <table:table-cell table:formula="of:=[.D994]-[.D99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18" office:value-type="float" office:value="17874" calcext:value-type="float">
            <text:p>17874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206875" calcext:value-type="float">
            <text:p>0,00206875000000000000</text:p>
          </table:table-cell>
          <table:table-cell table:formula="of:=[.D995]-[.D99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18" office:value-type="float" office:value="17892" calcext:value-type="float">
            <text:p>17892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207083333333333" calcext:value-type="float">
            <text:p>0,00207083333333333000</text:p>
          </table:table-cell>
          <table:table-cell table:formula="of:=[.D996]-[.D99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18" office:value-type="float" office:value="17910" calcext:value-type="float">
            <text:p>17910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207291666666667" calcext:value-type="float">
            <text:p>0,00207291666666667000</text:p>
          </table:table-cell>
          <table:table-cell table:formula="of:=[.D997]-[.D99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18" office:value-type="float" office:value="17928" calcext:value-type="float">
            <text:p>17928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2075" calcext:value-type="float">
            <text:p>0,00207500000000000000</text:p>
          </table:table-cell>
          <table:table-cell table:formula="of:=[.D998]-[.D99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18" office:value-type="float" office:value="17946" calcext:value-type="float">
            <text:p>17946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207708333333333" calcext:value-type="float">
            <text:p>0,00207708333333333000</text:p>
          </table:table-cell>
          <table:table-cell table:formula="of:=[.D999]-[.D99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18" office:value-type="float" office:value="17964" calcext:value-type="float">
            <text:p>17964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207916666666667" calcext:value-type="float">
            <text:p>0,00207916666666667000</text:p>
          </table:table-cell>
          <table:table-cell table:formula="of:=[.D1000]-[.D99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18" office:value-type="float" office:value="17982" calcext:value-type="float">
            <text:p>17982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208125" calcext:value-type="float">
            <text:p>0,00208125000000000000</text:p>
          </table:table-cell>
          <table:table-cell table:formula="of:=[.D1001]-[.D100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18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208333333333333" calcext:value-type="float">
            <text:p>0,00208333333333333000</text:p>
          </table:table-cell>
          <table:table-cell table:formula="of:=[.D1002]-[.D100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18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208541666666667" calcext:value-type="float">
            <text:p>0,00208541666666667000</text:p>
          </table:table-cell>
          <table:table-cell table:formula="of:=[.D1003]-[.D100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18" office:value-type="float" office:value="18036" calcext:value-type="float">
            <text:p>18036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20875" calcext:value-type="float">
            <text:p>0,00208750000000000000</text:p>
          </table:table-cell>
          <table:table-cell table:formula="of:=[.D1004]-[.D100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18" office:value-type="float" office:value="18054" calcext:value-type="float">
            <text:p>18054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208958333333333" calcext:value-type="float">
            <text:p>0,00208958333333333000</text:p>
          </table:table-cell>
          <table:table-cell table:formula="of:=[.D1005]-[.D100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18" office:value-type="float" office:value="18072" calcext:value-type="float">
            <text:p>18072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209166666666667" calcext:value-type="float">
            <text:p>0,00209166666666667000</text:p>
          </table:table-cell>
          <table:table-cell table:formula="of:=[.D1006]-[.D100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18" office:value-type="float" office:value="18090" calcext:value-type="float">
            <text:p>18090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209375" calcext:value-type="float">
            <text:p>0,00209375000000000000</text:p>
          </table:table-cell>
          <table:table-cell table:formula="of:=[.D1007]-[.D100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18" office:value-type="float" office:value="18108" calcext:value-type="float">
            <text:p>18108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209583333333333" calcext:value-type="float">
            <text:p>0,00209583333333333000</text:p>
          </table:table-cell>
          <table:table-cell table:formula="of:=[.D1008]-[.D100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18" office:value-type="float" office:value="18126" calcext:value-type="float">
            <text:p>18126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209791666666667" calcext:value-type="float">
            <text:p>0,00209791666666667000</text:p>
          </table:table-cell>
          <table:table-cell table:formula="of:=[.D1009]-[.D100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18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21" calcext:value-type="float">
            <text:p>0,00210000000000000000</text:p>
          </table:table-cell>
          <table:table-cell table:formula="of:=[.D1010]-[.D100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18" office:value-type="float" office:value="18162" calcext:value-type="float">
            <text:p>18162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210208333333333" calcext:value-type="float">
            <text:p>0,00210208333333333000</text:p>
          </table:table-cell>
          <table:table-cell table:formula="of:=[.D1011]-[.D101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18" office:value-type="float" office:value="18180" calcext:value-type="float">
            <text:p>1818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210416666666667" calcext:value-type="float">
            <text:p>0,00210416666666667000</text:p>
          </table:table-cell>
          <table:table-cell table:formula="of:=[.D1012]-[.D101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18" office:value-type="float" office:value="18198" calcext:value-type="float">
            <text:p>18198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210625" calcext:value-type="float">
            <text:p>0,00210625000000000000</text:p>
          </table:table-cell>
          <table:table-cell table:formula="of:=[.D1013]-[.D101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18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210833333333333" calcext:value-type="float">
            <text:p>0,00210833333333333000</text:p>
          </table:table-cell>
          <table:table-cell table:formula="of:=[.D1014]-[.D101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18" office:value-type="float" office:value="18234" calcext:value-type="float">
            <text:p>18234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211041666666667" calcext:value-type="float">
            <text:p>0,00211041666666667000</text:p>
          </table:table-cell>
          <table:table-cell table:formula="of:=[.D1015]-[.D101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18" office:value-type="float" office:value="18252" calcext:value-type="float">
            <text:p>18252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21125" calcext:value-type="float">
            <text:p>0,00211250000000000000</text:p>
          </table:table-cell>
          <table:table-cell table:formula="of:=[.D1016]-[.D101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18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211458333333333" calcext:value-type="float">
            <text:p>0,00211458333333333000</text:p>
          </table:table-cell>
          <table:table-cell table:formula="of:=[.D1017]-[.D101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18" office:value-type="float" office:value="18288" calcext:value-type="float">
            <text:p>18288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211666666666667" calcext:value-type="float">
            <text:p>0,00211666666666667000</text:p>
          </table:table-cell>
          <table:table-cell table:formula="of:=[.D1018]-[.D101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18" office:value-type="float" office:value="18306" calcext:value-type="float">
            <text:p>18306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211875" calcext:value-type="float">
            <text:p>0,00211875000000000000</text:p>
          </table:table-cell>
          <table:table-cell table:formula="of:=[.D1019]-[.D101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18" office:value-type="float" office:value="18324" calcext:value-type="float">
            <text:p>18324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212083333333333" calcext:value-type="float">
            <text:p>0,00212083333333333000</text:p>
          </table:table-cell>
          <table:table-cell table:formula="of:=[.D1020]-[.D101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18" office:value-type="float" office:value="18342" calcext:value-type="float">
            <text:p>18342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212291666666667" calcext:value-type="float">
            <text:p>0,00212291666666667000</text:p>
          </table:table-cell>
          <table:table-cell table:formula="of:=[.D1021]-[.D102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18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2125" calcext:value-type="float">
            <text:p>0,00212500000000000000</text:p>
          </table:table-cell>
          <table:table-cell table:formula="of:=[.D1022]-[.D102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18" office:value-type="float" office:value="18378" calcext:value-type="float">
            <text:p>18378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212708333333333" calcext:value-type="float">
            <text:p>0,00212708333333333000</text:p>
          </table:table-cell>
          <table:table-cell table:formula="of:=[.D1023]-[.D102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18" office:value-type="float" office:value="18396" calcext:value-type="float">
            <text:p>18396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212916666666667" calcext:value-type="float">
            <text:p>0,00212916666666667000</text:p>
          </table:table-cell>
          <table:table-cell table:formula="of:=[.D1024]-[.D102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18" office:value-type="float" office:value="18414" calcext:value-type="float">
            <text:p>18414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213125" calcext:value-type="float">
            <text:p>0,00213125000000000000</text:p>
          </table:table-cell>
          <table:table-cell table:formula="of:=[.D1025]-[.D102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18" office:value-type="float" office:value="18432" calcext:value-type="float">
            <text:p>18432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213333333333333" calcext:value-type="float">
            <text:p>0,00213333333333333000</text:p>
          </table:table-cell>
          <table:table-cell table:formula="of:=[.D1026]-[.D102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18" office:value-type="float" office:value="18450" calcext:value-type="float">
            <text:p>18450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213541666666667" calcext:value-type="float">
            <text:p>0,00213541666666667000</text:p>
          </table:table-cell>
          <table:table-cell table:formula="of:=[.D1027]-[.D102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18" office:value-type="float" office:value="18468" calcext:value-type="float">
            <text:p>18468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21375" calcext:value-type="float">
            <text:p>0,00213750000000000000</text:p>
          </table:table-cell>
          <table:table-cell table:formula="of:=[.D1028]-[.D102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18" office:value-type="float" office:value="18486" calcext:value-type="float">
            <text:p>18486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213958333333333" calcext:value-type="float">
            <text:p>0,00213958333333333000</text:p>
          </table:table-cell>
          <table:table-cell table:formula="of:=[.D1029]-[.D102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18" office:value-type="float" office:value="18504" calcext:value-type="float">
            <text:p>18504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214166666666667" calcext:value-type="float">
            <text:p>0,00214166666666667000</text:p>
          </table:table-cell>
          <table:table-cell table:formula="of:=[.D1030]-[.D102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18" office:value-type="float" office:value="18522" calcext:value-type="float">
            <text:p>18522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214375" calcext:value-type="float">
            <text:p>0,00214375000000000000</text:p>
          </table:table-cell>
          <table:table-cell table:formula="of:=[.D1031]-[.D103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18" office:value-type="float" office:value="18540" calcext:value-type="float">
            <text:p>1854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214583333333333" calcext:value-type="float">
            <text:p>0,00214583333333333000</text:p>
          </table:table-cell>
          <table:table-cell table:formula="of:=[.D1032]-[.D103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18" office:value-type="float" office:value="18558" calcext:value-type="float">
            <text:p>18558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214791666666667" calcext:value-type="float">
            <text:p>0,00214791666666667000</text:p>
          </table:table-cell>
          <table:table-cell table:formula="of:=[.D1033]-[.D103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18" office:value-type="float" office:value="18576" calcext:value-type="float">
            <text:p>18576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215" calcext:value-type="float">
            <text:p>0,00215000000000000000</text:p>
          </table:table-cell>
          <table:table-cell table:formula="of:=[.D1034]-[.D103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18" office:value-type="float" office:value="18594" calcext:value-type="float">
            <text:p>18594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215208333333333" calcext:value-type="float">
            <text:p>0,00215208333333333000</text:p>
          </table:table-cell>
          <table:table-cell table:formula="of:=[.D1035]-[.D103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18" office:value-type="float" office:value="18612" calcext:value-type="float">
            <text:p>18612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215416666666667" calcext:value-type="float">
            <text:p>0,00215416666666667000</text:p>
          </table:table-cell>
          <table:table-cell table:formula="of:=[.D1036]-[.D103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18" office:value-type="float" office:value="18630" calcext:value-type="float">
            <text:p>18630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215625" calcext:value-type="float">
            <text:p>0,00215625000000000000</text:p>
          </table:table-cell>
          <table:table-cell table:formula="of:=[.D1037]-[.D103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18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215833333333333" calcext:value-type="float">
            <text:p>0,00215833333333333000</text:p>
          </table:table-cell>
          <table:table-cell table:formula="of:=[.D1038]-[.D103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18" office:value-type="float" office:value="18666" calcext:value-type="float">
            <text:p>18666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216041666666667" calcext:value-type="float">
            <text:p>0,00216041666666667000</text:p>
          </table:table-cell>
          <table:table-cell table:formula="of:=[.D1039]-[.D103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18" office:value-type="float" office:value="18684" calcext:value-type="float">
            <text:p>18684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21625" calcext:value-type="float">
            <text:p>0,00216250000000000000</text:p>
          </table:table-cell>
          <table:table-cell table:formula="of:=[.D1040]-[.D103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18" office:value-type="float" office:value="18702" calcext:value-type="float">
            <text:p>18702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216458333333333" calcext:value-type="float">
            <text:p>0,00216458333333333000</text:p>
          </table:table-cell>
          <table:table-cell table:formula="of:=[.D1041]-[.D104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18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216666666666667" calcext:value-type="float">
            <text:p>0,00216666666666667000</text:p>
          </table:table-cell>
          <table:table-cell table:formula="of:=[.D1042]-[.D104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18" office:value-type="float" office:value="18738" calcext:value-type="float">
            <text:p>18738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216875" calcext:value-type="float">
            <text:p>0,00216875000000000000</text:p>
          </table:table-cell>
          <table:table-cell table:formula="of:=[.D1043]-[.D104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18" office:value-type="float" office:value="18756" calcext:value-type="float">
            <text:p>18756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217083333333333" calcext:value-type="float">
            <text:p>0,00217083333333333000</text:p>
          </table:table-cell>
          <table:table-cell table:formula="of:=[.D1044]-[.D104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18" office:value-type="float" office:value="18774" calcext:value-type="float">
            <text:p>18774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217291666666667" calcext:value-type="float">
            <text:p>0,00217291666666667000</text:p>
          </table:table-cell>
          <table:table-cell table:formula="of:=[.D1045]-[.D104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18" office:value-type="float" office:value="18792" calcext:value-type="float">
            <text:p>18792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2175" calcext:value-type="float">
            <text:p>0,00217500000000000000</text:p>
          </table:table-cell>
          <table:table-cell table:formula="of:=[.D1046]-[.D104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18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217708333333333" calcext:value-type="float">
            <text:p>0,00217708333333333000</text:p>
          </table:table-cell>
          <table:table-cell table:formula="of:=[.D1047]-[.D104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18" office:value-type="float" office:value="18828" calcext:value-type="float">
            <text:p>18828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217916666666667" calcext:value-type="float">
            <text:p>0,00217916666666667000</text:p>
          </table:table-cell>
          <table:table-cell table:formula="of:=[.D1048]-[.D104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18" office:value-type="float" office:value="18846" calcext:value-type="float">
            <text:p>18846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218125" calcext:value-type="float">
            <text:p>0,00218125000000000000</text:p>
          </table:table-cell>
          <table:table-cell table:formula="of:=[.D1049]-[.D104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18" office:value-type="float" office:value="18864" calcext:value-type="float">
            <text:p>18864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218333333333333" calcext:value-type="float">
            <text:p>0,00218333333333333000</text:p>
          </table:table-cell>
          <table:table-cell table:formula="of:=[.D1050]-[.D104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18" office:value-type="float" office:value="18882" calcext:value-type="float">
            <text:p>18882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218541666666667" calcext:value-type="float">
            <text:p>0,00218541666666667000</text:p>
          </table:table-cell>
          <table:table-cell table:formula="of:=[.D1051]-[.D105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18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21875" calcext:value-type="float">
            <text:p>0,00218750000000000000</text:p>
          </table:table-cell>
          <table:table-cell table:formula="of:=[.D1052]-[.D105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18" office:value-type="float" office:value="18918" calcext:value-type="float">
            <text:p>18918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218958333333333" calcext:value-type="float">
            <text:p>0,00218958333333333000</text:p>
          </table:table-cell>
          <table:table-cell table:formula="of:=[.D1053]-[.D105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18" office:value-type="float" office:value="18936" calcext:value-type="float">
            <text:p>18936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219166666666667" calcext:value-type="float">
            <text:p>0,00219166666666667000</text:p>
          </table:table-cell>
          <table:table-cell table:formula="of:=[.D1054]-[.D105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18" office:value-type="float" office:value="18954" calcext:value-type="float">
            <text:p>18954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219375" calcext:value-type="float">
            <text:p>0,00219375000000000000</text:p>
          </table:table-cell>
          <table:table-cell table:formula="of:=[.D1055]-[.D105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18" office:value-type="float" office:value="18972" calcext:value-type="float">
            <text:p>18972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219583333333333" calcext:value-type="float">
            <text:p>0,00219583333333333000</text:p>
          </table:table-cell>
          <table:table-cell table:formula="of:=[.D1056]-[.D105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18" office:value-type="float" office:value="18990" calcext:value-type="float">
            <text:p>18990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219791666666667" calcext:value-type="float">
            <text:p>0,00219791666666667000</text:p>
          </table:table-cell>
          <table:table-cell table:formula="of:=[.D1057]-[.D105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18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22" calcext:value-type="float">
            <text:p>0,00220000000000000000</text:p>
          </table:table-cell>
          <table:table-cell table:formula="of:=[.D1058]-[.D105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18" office:value-type="float" office:value="19026" calcext:value-type="float">
            <text:p>19026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220208333333333" calcext:value-type="float">
            <text:p>0,00220208333333333000</text:p>
          </table:table-cell>
          <table:table-cell table:formula="of:=[.D1059]-[.D105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18" office:value-type="float" office:value="19044" calcext:value-type="float">
            <text:p>19044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220416666666667" calcext:value-type="float">
            <text:p>0,00220416666666667000</text:p>
          </table:table-cell>
          <table:table-cell table:formula="of:=[.D1060]-[.D105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18" office:value-type="float" office:value="19062" calcext:value-type="float">
            <text:p>19062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220625" calcext:value-type="float">
            <text:p>0,00220625000000000000</text:p>
          </table:table-cell>
          <table:table-cell table:formula="of:=[.D1061]-[.D106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18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220833333333333" calcext:value-type="float">
            <text:p>0,00220833333333333000</text:p>
          </table:table-cell>
          <table:table-cell table:formula="of:=[.D1062]-[.D106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18" office:value-type="float" office:value="19098" calcext:value-type="float">
            <text:p>19098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221041666666667" calcext:value-type="float">
            <text:p>0,00221041666666667000</text:p>
          </table:table-cell>
          <table:table-cell table:formula="of:=[.D1063]-[.D106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18" office:value-type="float" office:value="19116" calcext:value-type="float">
            <text:p>19116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22125" calcext:value-type="float">
            <text:p>0,00221250000000000000</text:p>
          </table:table-cell>
          <table:table-cell table:formula="of:=[.D1064]-[.D106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18" office:value-type="float" office:value="19134" calcext:value-type="float">
            <text:p>19134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221458333333333" calcext:value-type="float">
            <text:p>0,00221458333333333000</text:p>
          </table:table-cell>
          <table:table-cell table:formula="of:=[.D1065]-[.D106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18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221666666666667" calcext:value-type="float">
            <text:p>0,00221666666666667000</text:p>
          </table:table-cell>
          <table:table-cell table:formula="of:=[.D1066]-[.D106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18" office:value-type="float" office:value="19170" calcext:value-type="float">
            <text:p>19170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221875" calcext:value-type="float">
            <text:p>0,00221875000000000000</text:p>
          </table:table-cell>
          <table:table-cell table:formula="of:=[.D1067]-[.D106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18" office:value-type="float" office:value="19188" calcext:value-type="float">
            <text:p>19188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222083333333333" calcext:value-type="float">
            <text:p>0,00222083333333333000</text:p>
          </table:table-cell>
          <table:table-cell table:formula="of:=[.D1068]-[.D106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18" office:value-type="float" office:value="19206" calcext:value-type="float">
            <text:p>19206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222291666666667" calcext:value-type="float">
            <text:p>0,00222291666666667000</text:p>
          </table:table-cell>
          <table:table-cell table:formula="of:=[.D1069]-[.D106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18" office:value-type="float" office:value="19224" calcext:value-type="float">
            <text:p>19224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2225" calcext:value-type="float">
            <text:p>0,00222500000000000000</text:p>
          </table:table-cell>
          <table:table-cell table:formula="of:=[.D1070]-[.D106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18" office:value-type="float" office:value="19242" calcext:value-type="float">
            <text:p>19242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222708333333333" calcext:value-type="float">
            <text:p>0,00222708333333333000</text:p>
          </table:table-cell>
          <table:table-cell table:formula="of:=[.D1071]-[.D107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18" office:value-type="float" office:value="19260" calcext:value-type="float">
            <text:p>1926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222916666666667" calcext:value-type="float">
            <text:p>0,00222916666666667000</text:p>
          </table:table-cell>
          <table:table-cell table:formula="of:=[.D1072]-[.D107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18" office:value-type="float" office:value="19278" calcext:value-type="float">
            <text:p>19278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223125" calcext:value-type="float">
            <text:p>0,00223125000000000000</text:p>
          </table:table-cell>
          <table:table-cell table:formula="of:=[.D1073]-[.D107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18" office:value-type="float" office:value="19296" calcext:value-type="float">
            <text:p>19296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223333333333333" calcext:value-type="float">
            <text:p>0,00223333333333333000</text:p>
          </table:table-cell>
          <table:table-cell table:formula="of:=[.D1074]-[.D107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18" office:value-type="float" office:value="19314" calcext:value-type="float">
            <text:p>19314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223541666666667" calcext:value-type="float">
            <text:p>0,00223541666666667000</text:p>
          </table:table-cell>
          <table:table-cell table:formula="of:=[.D1075]-[.D107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18" office:value-type="float" office:value="19332" calcext:value-type="float">
            <text:p>19332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22375" calcext:value-type="float">
            <text:p>0,00223750000000000000</text:p>
          </table:table-cell>
          <table:table-cell table:formula="of:=[.D1076]-[.D107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18" office:value-type="float" office:value="19350" calcext:value-type="float">
            <text:p>19350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223958333333333" calcext:value-type="float">
            <text:p>0,00223958333333333000</text:p>
          </table:table-cell>
          <table:table-cell table:formula="of:=[.D1077]-[.D107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18" office:value-type="float" office:value="19368" calcext:value-type="float">
            <text:p>19368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224166666666667" calcext:value-type="float">
            <text:p>0,00224166666666667000</text:p>
          </table:table-cell>
          <table:table-cell table:formula="of:=[.D1078]-[.D107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18" office:value-type="float" office:value="19386" calcext:value-type="float">
            <text:p>19386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224375" calcext:value-type="float">
            <text:p>0,00224375000000000000</text:p>
          </table:table-cell>
          <table:table-cell table:formula="of:=[.D1079]-[.D107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18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224583333333333" calcext:value-type="float">
            <text:p>0,00224583333333333000</text:p>
          </table:table-cell>
          <table:table-cell table:formula="of:=[.D1080]-[.D107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18" office:value-type="float" office:value="19422" calcext:value-type="float">
            <text:p>19422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224791666666667" calcext:value-type="float">
            <text:p>0,00224791666666667000</text:p>
          </table:table-cell>
          <table:table-cell table:formula="of:=[.D1081]-[.D108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18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225" calcext:value-type="float">
            <text:p>0,00225000000000000000</text:p>
          </table:table-cell>
          <table:table-cell table:formula="of:=[.D1082]-[.D108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18" office:value-type="float" office:value="19458" calcext:value-type="float">
            <text:p>19458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225208333333333" calcext:value-type="float">
            <text:p>0,00225208333333333000</text:p>
          </table:table-cell>
          <table:table-cell table:formula="of:=[.D1083]-[.D108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18" office:value-type="float" office:value="19476" calcext:value-type="float">
            <text:p>19476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225416666666667" calcext:value-type="float">
            <text:p>0,00225416666666667000</text:p>
          </table:table-cell>
          <table:table-cell table:formula="of:=[.D1084]-[.D108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18" office:value-type="float" office:value="19494" calcext:value-type="float">
            <text:p>19494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225625" calcext:value-type="float">
            <text:p>0,00225625000000000000</text:p>
          </table:table-cell>
          <table:table-cell table:formula="of:=[.D1085]-[.D108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18" office:value-type="float" office:value="19512" calcext:value-type="float">
            <text:p>19512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225833333333333" calcext:value-type="float">
            <text:p>0,00225833333333333000</text:p>
          </table:table-cell>
          <table:table-cell table:formula="of:=[.D1086]-[.D108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18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226041666666667" calcext:value-type="float">
            <text:p>0,00226041666666667000</text:p>
          </table:table-cell>
          <table:table-cell table:formula="of:=[.D1087]-[.D108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18" office:value-type="float" office:value="19548" calcext:value-type="float">
            <text:p>19548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22625" calcext:value-type="float">
            <text:p>0,00226250000000000000</text:p>
          </table:table-cell>
          <table:table-cell table:formula="of:=[.D1088]-[.D108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18" office:value-type="float" office:value="19566" calcext:value-type="float">
            <text:p>19566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226458333333333" calcext:value-type="float">
            <text:p>0,00226458333333333000</text:p>
          </table:table-cell>
          <table:table-cell table:formula="of:=[.D1089]-[.D108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18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226666666666667" calcext:value-type="float">
            <text:p>0,00226666666666667000</text:p>
          </table:table-cell>
          <table:table-cell table:formula="of:=[.D1090]-[.D108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18" office:value-type="float" office:value="19602" calcext:value-type="float">
            <text:p>19602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226875" calcext:value-type="float">
            <text:p>0,00226875000000000000</text:p>
          </table:table-cell>
          <table:table-cell table:formula="of:=[.D1091]-[.D109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18" office:value-type="float" office:value="19620" calcext:value-type="float">
            <text:p>1962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227083333333333" calcext:value-type="float">
            <text:p>0,00227083333333333000</text:p>
          </table:table-cell>
          <table:table-cell table:formula="of:=[.D1092]-[.D109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18" office:value-type="float" office:value="19638" calcext:value-type="float">
            <text:p>19638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227291666666667" calcext:value-type="float">
            <text:p>0,00227291666666667000</text:p>
          </table:table-cell>
          <table:table-cell table:formula="of:=[.D1093]-[.D109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18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2275" calcext:value-type="float">
            <text:p>0,00227500000000000000</text:p>
          </table:table-cell>
          <table:table-cell table:formula="of:=[.D1094]-[.D109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18" office:value-type="float" office:value="19674" calcext:value-type="float">
            <text:p>19674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227708333333333" calcext:value-type="float">
            <text:p>0,00227708333333333000</text:p>
          </table:table-cell>
          <table:table-cell table:formula="of:=[.D1095]-[.D109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18" office:value-type="float" office:value="19692" calcext:value-type="float">
            <text:p>19692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227916666666667" calcext:value-type="float">
            <text:p>0,00227916666666667000</text:p>
          </table:table-cell>
          <table:table-cell table:formula="of:=[.D1096]-[.D109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18" office:value-type="float" office:value="19710" calcext:value-type="float">
            <text:p>19710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228125" calcext:value-type="float">
            <text:p>0,00228125000000000000</text:p>
          </table:table-cell>
          <table:table-cell table:formula="of:=[.D1097]-[.D109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18" office:value-type="float" office:value="19728" calcext:value-type="float">
            <text:p>19728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228333333333333" calcext:value-type="float">
            <text:p>0,00228333333333333000</text:p>
          </table:table-cell>
          <table:table-cell table:formula="of:=[.D1098]-[.D109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18" office:value-type="float" office:value="19746" calcext:value-type="float">
            <text:p>19746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228541666666667" calcext:value-type="float">
            <text:p>0,00228541666666667000</text:p>
          </table:table-cell>
          <table:table-cell table:formula="of:=[.D1099]-[.D109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18" office:value-type="float" office:value="19764" calcext:value-type="float">
            <text:p>19764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22875" calcext:value-type="float">
            <text:p>0,00228750000000000000</text:p>
          </table:table-cell>
          <table:table-cell table:formula="of:=[.D1100]-[.D109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18" office:value-type="float" office:value="19782" calcext:value-type="float">
            <text:p>19782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228958333333333" calcext:value-type="float">
            <text:p>0,00228958333333333000</text:p>
          </table:table-cell>
          <table:table-cell table:formula="of:=[.D1101]-[.D110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18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229166666666667" calcext:value-type="float">
            <text:p>0,00229166666666667000</text:p>
          </table:table-cell>
          <table:table-cell table:formula="of:=[.D1102]-[.D110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18" office:value-type="float" office:value="19818" calcext:value-type="float">
            <text:p>19818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229375" calcext:value-type="float">
            <text:p>0,00229375000000000000</text:p>
          </table:table-cell>
          <table:table-cell table:formula="of:=[.D1103]-[.D110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18" office:value-type="float" office:value="19836" calcext:value-type="float">
            <text:p>19836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229583333333333" calcext:value-type="float">
            <text:p>0,00229583333333333000</text:p>
          </table:table-cell>
          <table:table-cell table:formula="of:=[.D1104]-[.D110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18" office:value-type="float" office:value="19854" calcext:value-type="float">
            <text:p>19854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229791666666667" calcext:value-type="float">
            <text:p>0,00229791666666667000</text:p>
          </table:table-cell>
          <table:table-cell table:formula="of:=[.D1105]-[.D110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18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23" calcext:value-type="float">
            <text:p>0,00230000000000000000</text:p>
          </table:table-cell>
          <table:table-cell table:formula="of:=[.D1106]-[.D110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18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230208333333333" calcext:value-type="float">
            <text:p>0,00230208333333333000</text:p>
          </table:table-cell>
          <table:table-cell table:formula="of:=[.D1107]-[.D110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18" office:value-type="float" office:value="19908" calcext:value-type="float">
            <text:p>19908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230416666666667" calcext:value-type="float">
            <text:p>0,00230416666666667000</text:p>
          </table:table-cell>
          <table:table-cell table:formula="of:=[.D1108]-[.D110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18" office:value-type="float" office:value="19926" calcext:value-type="float">
            <text:p>19926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230625" calcext:value-type="float">
            <text:p>0,00230625000000000000</text:p>
          </table:table-cell>
          <table:table-cell table:formula="of:=[.D1109]-[.D110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18" office:value-type="float" office:value="19944" calcext:value-type="float">
            <text:p>19944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230833333333333" calcext:value-type="float">
            <text:p>0,00230833333333333000</text:p>
          </table:table-cell>
          <table:table-cell table:formula="of:=[.D1110]-[.D110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18" office:value-type="float" office:value="19962" calcext:value-type="float">
            <text:p>19962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231041666666667" calcext:value-type="float">
            <text:p>0,00231041666666667000</text:p>
          </table:table-cell>
          <table:table-cell table:formula="of:=[.D1111]-[.D111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18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23125" calcext:value-type="float">
            <text:p>0,00231250000000000000</text:p>
          </table:table-cell>
          <table:table-cell table:formula="of:=[.D1112]-[.D111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18" office:value-type="float" office:value="19998" calcext:value-type="float">
            <text:p>19998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231458333333333" calcext:value-type="float">
            <text:p>0,00231458333333333000</text:p>
          </table:table-cell>
          <table:table-cell table:formula="of:=[.D1113]-[.D111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18" office:value-type="float" office:value="20016" calcext:value-type="float">
            <text:p>20016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231666666666667" calcext:value-type="float">
            <text:p>0,00231666666666667000</text:p>
          </table:table-cell>
          <table:table-cell table:formula="of:=[.D1114]-[.D111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18" office:value-type="float" office:value="20034" calcext:value-type="float">
            <text:p>20034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231875" calcext:value-type="float">
            <text:p>0,00231875000000000000</text:p>
          </table:table-cell>
          <table:table-cell table:formula="of:=[.D1115]-[.D111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18" office:value-type="float" office:value="20052" calcext:value-type="float">
            <text:p>20052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232083333333333" calcext:value-type="float">
            <text:p>0,00232083333333333000</text:p>
          </table:table-cell>
          <table:table-cell table:formula="of:=[.D1116]-[.D111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18" office:value-type="float" office:value="20070" calcext:value-type="float">
            <text:p>20070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232291666666667" calcext:value-type="float">
            <text:p>0,00232291666666667000</text:p>
          </table:table-cell>
          <table:table-cell table:formula="of:=[.D1117]-[.D111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18" office:value-type="float" office:value="20088" calcext:value-type="float">
            <text:p>20088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2325" calcext:value-type="float">
            <text:p>0,00232500000000000000</text:p>
          </table:table-cell>
          <table:table-cell table:formula="of:=[.D1118]-[.D111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18" office:value-type="float" office:value="20106" calcext:value-type="float">
            <text:p>20106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232708333333333" calcext:value-type="float">
            <text:p>0,00232708333333333000</text:p>
          </table:table-cell>
          <table:table-cell table:formula="of:=[.D1119]-[.D111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18" office:value-type="float" office:value="20124" calcext:value-type="float">
            <text:p>20124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232916666666667" calcext:value-type="float">
            <text:p>0,00232916666666667000</text:p>
          </table:table-cell>
          <table:table-cell table:formula="of:=[.D1120]-[.D111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18" office:value-type="float" office:value="20142" calcext:value-type="float">
            <text:p>20142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233125" calcext:value-type="float">
            <text:p>0,00233125000000000000</text:p>
          </table:table-cell>
          <table:table-cell table:formula="of:=[.D1121]-[.D112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18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233333333333333" calcext:value-type="float">
            <text:p>0,00233333333333333000</text:p>
          </table:table-cell>
          <table:table-cell table:formula="of:=[.D1122]-[.D112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18" office:value-type="float" office:value="20178" calcext:value-type="float">
            <text:p>20178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233541666666667" calcext:value-type="float">
            <text:p>0,00233541666666667000</text:p>
          </table:table-cell>
          <table:table-cell table:formula="of:=[.D1123]-[.D112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18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23375" calcext:value-type="float">
            <text:p>0,00233750000000000000</text:p>
          </table:table-cell>
          <table:table-cell table:formula="of:=[.D1124]-[.D112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18" office:value-type="float" office:value="20214" calcext:value-type="float">
            <text:p>20214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233958333333333" calcext:value-type="float">
            <text:p>0,00233958333333333000</text:p>
          </table:table-cell>
          <table:table-cell table:formula="of:=[.D1125]-[.D112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18" office:value-type="float" office:value="20232" calcext:value-type="float">
            <text:p>20232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234166666666667" calcext:value-type="float">
            <text:p>0,00234166666666667000</text:p>
          </table:table-cell>
          <table:table-cell table:formula="of:=[.D1126]-[.D112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18" office:value-type="float" office:value="20250" calcext:value-type="float">
            <text:p>20250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234375" calcext:value-type="float">
            <text:p>0,00234375000000000000</text:p>
          </table:table-cell>
          <table:table-cell table:formula="of:=[.D1127]-[.D112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18" office:value-type="float" office:value="20268" calcext:value-type="float">
            <text:p>20268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234583333333333" calcext:value-type="float">
            <text:p>0,00234583333333333000</text:p>
          </table:table-cell>
          <table:table-cell table:formula="of:=[.D1128]-[.D112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18" office:value-type="float" office:value="20286" calcext:value-type="float">
            <text:p>20286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234791666666667" calcext:value-type="float">
            <text:p>0,00234791666666667000</text:p>
          </table:table-cell>
          <table:table-cell table:formula="of:=[.D1129]-[.D112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18" office:value-type="float" office:value="20304" calcext:value-type="float">
            <text:p>20304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235" calcext:value-type="float">
            <text:p>0,00235000000000000000</text:p>
          </table:table-cell>
          <table:table-cell table:formula="of:=[.D1130]-[.D112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18" office:value-type="float" office:value="20322" calcext:value-type="float">
            <text:p>20322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235208333333333" calcext:value-type="float">
            <text:p>0,00235208333333333000</text:p>
          </table:table-cell>
          <table:table-cell table:formula="of:=[.D1131]-[.D113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18" office:value-type="float" office:value="20340" calcext:value-type="float">
            <text:p>2034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235416666666667" calcext:value-type="float">
            <text:p>0,00235416666666667000</text:p>
          </table:table-cell>
          <table:table-cell table:formula="of:=[.D1132]-[.D113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18" office:value-type="float" office:value="20358" calcext:value-type="float">
            <text:p>20358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235625" calcext:value-type="float">
            <text:p>0,00235625000000000000</text:p>
          </table:table-cell>
          <table:table-cell table:formula="of:=[.D1133]-[.D113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18" office:value-type="float" office:value="20376" calcext:value-type="float">
            <text:p>20376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235833333333333" calcext:value-type="float">
            <text:p>0,00235833333333333000</text:p>
          </table:table-cell>
          <table:table-cell table:formula="of:=[.D1134]-[.D113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18" office:value-type="float" office:value="20394" calcext:value-type="float">
            <text:p>20394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236041666666667" calcext:value-type="float">
            <text:p>0,00236041666666667000</text:p>
          </table:table-cell>
          <table:table-cell table:formula="of:=[.D1135]-[.D113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18" office:value-type="float" office:value="20412" calcext:value-type="float">
            <text:p>20412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23625" calcext:value-type="float">
            <text:p>0,00236250000000000000</text:p>
          </table:table-cell>
          <table:table-cell table:formula="of:=[.D1136]-[.D113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18" office:value-type="float" office:value="20430" calcext:value-type="float">
            <text:p>20430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236458333333333" calcext:value-type="float">
            <text:p>0,00236458333333333000</text:p>
          </table:table-cell>
          <table:table-cell table:formula="of:=[.D1137]-[.D113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18" office:value-type="float" office:value="20448" calcext:value-type="float">
            <text:p>20448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236666666666667" calcext:value-type="float">
            <text:p>0,00236666666666667000</text:p>
          </table:table-cell>
          <table:table-cell table:formula="of:=[.D1138]-[.D113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18" office:value-type="float" office:value="20466" calcext:value-type="float">
            <text:p>20466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236875" calcext:value-type="float">
            <text:p>0,00236875000000000000</text:p>
          </table:table-cell>
          <table:table-cell table:formula="of:=[.D1139]-[.D113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18" office:value-type="float" office:value="20484" calcext:value-type="float">
            <text:p>20484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237083333333333" calcext:value-type="float">
            <text:p>0,00237083333333333000</text:p>
          </table:table-cell>
          <table:table-cell table:formula="of:=[.D1140]-[.D113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18" office:value-type="float" office:value="20502" calcext:value-type="float">
            <text:p>20502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237291666666667" calcext:value-type="float">
            <text:p>0,00237291666666667000</text:p>
          </table:table-cell>
          <table:table-cell table:formula="of:=[.D1141]-[.D114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18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2375" calcext:value-type="float">
            <text:p>0,00237500000000000000</text:p>
          </table:table-cell>
          <table:table-cell table:formula="of:=[.D1142]-[.D114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18" office:value-type="float" office:value="20538" calcext:value-type="float">
            <text:p>20538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237708333333333" calcext:value-type="float">
            <text:p>0,00237708333333333000</text:p>
          </table:table-cell>
          <table:table-cell table:formula="of:=[.D1143]-[.D114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18" office:value-type="float" office:value="20556" calcext:value-type="float">
            <text:p>20556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237916666666667" calcext:value-type="float">
            <text:p>0,00237916666666667000</text:p>
          </table:table-cell>
          <table:table-cell table:formula="of:=[.D1144]-[.D114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18" office:value-type="float" office:value="20574" calcext:value-type="float">
            <text:p>20574</text:p>
          </table:table-cell>
          <table:table-cell office:value-type="float" office:value="8640000" calcext:value-type="float">
            <text:p>8640000</text:p>
          </table:table-cell>
          <table:table-cell table:formula="of:=[.B1144]/[.C1144]" office:value-type="float" office:value="0.00238125" calcext:value-type="float">
            <text:p>0,00238125000000000000</text:p>
          </table:table-cell>
          <table:table-cell table:formula="of:=[.D1145]-[.D114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18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1145]/[.C1145]" office:value-type="float" office:value="0.00238333333333333" calcext:value-type="float">
            <text:p>0,00238333333333333000</text:p>
          </table:table-cell>
          <table:table-cell table:formula="of:=[.D1146]-[.D114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18" office:value-type="float" office:value="20610" calcext:value-type="float">
            <text:p>20610</text:p>
          </table:table-cell>
          <table:table-cell office:value-type="float" office:value="8640000" calcext:value-type="float">
            <text:p>8640000</text:p>
          </table:table-cell>
          <table:table-cell table:formula="of:=[.B1146]/[.C1146]" office:value-type="float" office:value="0.00238541666666667" calcext:value-type="float">
            <text:p>0,00238541666666667000</text:p>
          </table:table-cell>
          <table:table-cell table:formula="of:=[.D1147]-[.D114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18" office:value-type="float" office:value="20628" calcext:value-type="float">
            <text:p>20628</text:p>
          </table:table-cell>
          <table:table-cell office:value-type="float" office:value="8640000" calcext:value-type="float">
            <text:p>8640000</text:p>
          </table:table-cell>
          <table:table-cell table:formula="of:=[.B1147]/[.C1147]" office:value-type="float" office:value="0.0023875" calcext:value-type="float">
            <text:p>0,00238750000000000000</text:p>
          </table:table-cell>
          <table:table-cell table:formula="of:=[.D1148]-[.D114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18" office:value-type="float" office:value="20646" calcext:value-type="float">
            <text:p>20646</text:p>
          </table:table-cell>
          <table:table-cell office:value-type="float" office:value="8640000" calcext:value-type="float">
            <text:p>8640000</text:p>
          </table:table-cell>
          <table:table-cell table:formula="of:=[.B1148]/[.C1148]" office:value-type="float" office:value="0.00238958333333333" calcext:value-type="float">
            <text:p>0,00238958333333333000</text:p>
          </table:table-cell>
          <table:table-cell table:formula="of:=[.D1149]-[.D114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18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1149]/[.C1149]" office:value-type="float" office:value="0.00239166666666667" calcext:value-type="float">
            <text:p>0,00239166666666667000</text:p>
          </table:table-cell>
          <table:table-cell table:formula="of:=[.D1150]-[.D114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18" office:value-type="float" office:value="20682" calcext:value-type="float">
            <text:p>20682</text:p>
          </table:table-cell>
          <table:table-cell office:value-type="float" office:value="8640000" calcext:value-type="float">
            <text:p>8640000</text:p>
          </table:table-cell>
          <table:table-cell table:formula="of:=[.B1150]/[.C1150]" office:value-type="float" office:value="0.00239375" calcext:value-type="float">
            <text:p>0,00239375000000000000</text:p>
          </table:table-cell>
          <table:table-cell table:formula="of:=[.D1151]-[.D115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18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1151]/[.C1151]" office:value-type="float" office:value="0.00239583333333333" calcext:value-type="float">
            <text:p>0,00239583333333333000</text:p>
          </table:table-cell>
          <table:table-cell table:formula="of:=[.D1152]-[.D115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18" office:value-type="float" office:value="20718" calcext:value-type="float">
            <text:p>20718</text:p>
          </table:table-cell>
          <table:table-cell office:value-type="float" office:value="8640000" calcext:value-type="float">
            <text:p>8640000</text:p>
          </table:table-cell>
          <table:table-cell table:formula="of:=[.B1152]/[.C1152]" office:value-type="float" office:value="0.00239791666666667" calcext:value-type="float">
            <text:p>0,00239791666666667000</text:p>
          </table:table-cell>
          <table:table-cell table:formula="of:=[.D1153]-[.D115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18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1153]/[.C1153]" office:value-type="float" office:value="0.0024" calcext:value-type="float">
            <text:p>0,00240000000000000000</text:p>
          </table:table-cell>
          <table:table-cell table:formula="of:=[.D1154]-[.D115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18" office:value-type="float" office:value="20754" calcext:value-type="float">
            <text:p>20754</text:p>
          </table:table-cell>
          <table:table-cell office:value-type="float" office:value="8640000" calcext:value-type="float">
            <text:p>8640000</text:p>
          </table:table-cell>
          <table:table-cell table:formula="of:=[.B1154]/[.C1154]" office:value-type="float" office:value="0.00240208333333333" calcext:value-type="float">
            <text:p>0,00240208333333333000</text:p>
          </table:table-cell>
          <table:table-cell table:formula="of:=[.D1155]-[.D115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18" office:value-type="float" office:value="20772" calcext:value-type="float">
            <text:p>20772</text:p>
          </table:table-cell>
          <table:table-cell office:value-type="float" office:value="8640000" calcext:value-type="float">
            <text:p>8640000</text:p>
          </table:table-cell>
          <table:table-cell table:formula="of:=[.B1155]/[.C1155]" office:value-type="float" office:value="0.00240416666666667" calcext:value-type="float">
            <text:p>0,00240416666666667000</text:p>
          </table:table-cell>
          <table:table-cell table:formula="of:=[.D1156]-[.D115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18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1156]/[.C1156]" office:value-type="float" office:value="0.00240625" calcext:value-type="float">
            <text:p>0,00240625000000000000</text:p>
          </table:table-cell>
          <table:table-cell table:formula="of:=[.D1157]-[.D115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18" office:value-type="float" office:value="20808" calcext:value-type="float">
            <text:p>20808</text:p>
          </table:table-cell>
          <table:table-cell office:value-type="float" office:value="8640000" calcext:value-type="float">
            <text:p>8640000</text:p>
          </table:table-cell>
          <table:table-cell table:formula="of:=[.B1157]/[.C1157]" office:value-type="float" office:value="0.00240833333333333" calcext:value-type="float">
            <text:p>0,00240833333333333000</text:p>
          </table:table-cell>
          <table:table-cell table:formula="of:=[.D1158]-[.D115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18" office:value-type="float" office:value="20826" calcext:value-type="float">
            <text:p>20826</text:p>
          </table:table-cell>
          <table:table-cell office:value-type="float" office:value="8640000" calcext:value-type="float">
            <text:p>8640000</text:p>
          </table:table-cell>
          <table:table-cell table:formula="of:=[.B1158]/[.C1158]" office:value-type="float" office:value="0.00241041666666667" calcext:value-type="float">
            <text:p>0,00241041666666667000</text:p>
          </table:table-cell>
          <table:table-cell table:formula="of:=[.D1159]-[.D115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18" office:value-type="float" office:value="20844" calcext:value-type="float">
            <text:p>20844</text:p>
          </table:table-cell>
          <table:table-cell office:value-type="float" office:value="8640000" calcext:value-type="float">
            <text:p>8640000</text:p>
          </table:table-cell>
          <table:table-cell table:formula="of:=[.B1159]/[.C1159]" office:value-type="float" office:value="0.0024125" calcext:value-type="float">
            <text:p>0,00241250000000000000</text:p>
          </table:table-cell>
          <table:table-cell table:formula="of:=[.D1160]-[.D115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18" office:value-type="float" office:value="20862" calcext:value-type="float">
            <text:p>20862</text:p>
          </table:table-cell>
          <table:table-cell office:value-type="float" office:value="8640000" calcext:value-type="float">
            <text:p>8640000</text:p>
          </table:table-cell>
          <table:table-cell table:formula="of:=[.B1160]/[.C1160]" office:value-type="float" office:value="0.00241458333333333" calcext:value-type="float">
            <text:p>0,00241458333333333000</text:p>
          </table:table-cell>
          <table:table-cell table:formula="of:=[.D1161]-[.D116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18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1161]/[.C1161]" office:value-type="float" office:value="0.00241666666666667" calcext:value-type="float">
            <text:p>0,00241666666666667000</text:p>
          </table:table-cell>
          <table:table-cell table:formula="of:=[.D1162]-[.D116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18" office:value-type="float" office:value="20898" calcext:value-type="float">
            <text:p>20898</text:p>
          </table:table-cell>
          <table:table-cell office:value-type="float" office:value="8640000" calcext:value-type="float">
            <text:p>8640000</text:p>
          </table:table-cell>
          <table:table-cell table:formula="of:=[.B1162]/[.C1162]" office:value-type="float" office:value="0.00241875" calcext:value-type="float">
            <text:p>0,00241875000000000000</text:p>
          </table:table-cell>
          <table:table-cell table:formula="of:=[.D1163]-[.D116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18" office:value-type="float" office:value="20916" calcext:value-type="float">
            <text:p>20916</text:p>
          </table:table-cell>
          <table:table-cell office:value-type="float" office:value="8640000" calcext:value-type="float">
            <text:p>8640000</text:p>
          </table:table-cell>
          <table:table-cell table:formula="of:=[.B1163]/[.C1163]" office:value-type="float" office:value="0.00242083333333333" calcext:value-type="float">
            <text:p>0,00242083333333333000</text:p>
          </table:table-cell>
          <table:table-cell table:formula="of:=[.D1164]-[.D116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18" office:value-type="float" office:value="20934" calcext:value-type="float">
            <text:p>20934</text:p>
          </table:table-cell>
          <table:table-cell office:value-type="float" office:value="8640000" calcext:value-type="float">
            <text:p>8640000</text:p>
          </table:table-cell>
          <table:table-cell table:formula="of:=[.B1164]/[.C1164]" office:value-type="float" office:value="0.00242291666666667" calcext:value-type="float">
            <text:p>0,00242291666666667000</text:p>
          </table:table-cell>
          <table:table-cell table:formula="of:=[.D1165]-[.D116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18" office:value-type="float" office:value="20952" calcext:value-type="float">
            <text:p>20952</text:p>
          </table:table-cell>
          <table:table-cell office:value-type="float" office:value="8640000" calcext:value-type="float">
            <text:p>8640000</text:p>
          </table:table-cell>
          <table:table-cell table:formula="of:=[.B1165]/[.C1165]" office:value-type="float" office:value="0.002425" calcext:value-type="float">
            <text:p>0,00242500000000000000</text:p>
          </table:table-cell>
          <table:table-cell table:formula="of:=[.D1166]-[.D116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18" office:value-type="float" office:value="20970" calcext:value-type="float">
            <text:p>20970</text:p>
          </table:table-cell>
          <table:table-cell office:value-type="float" office:value="8640000" calcext:value-type="float">
            <text:p>8640000</text:p>
          </table:table-cell>
          <table:table-cell table:formula="of:=[.B1166]/[.C1166]" office:value-type="float" office:value="0.00242708333333333" calcext:value-type="float">
            <text:p>0,00242708333333333000</text:p>
          </table:table-cell>
          <table:table-cell table:formula="of:=[.D1167]-[.D116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18" office:value-type="float" office:value="20988" calcext:value-type="float">
            <text:p>20988</text:p>
          </table:table-cell>
          <table:table-cell office:value-type="float" office:value="8640000" calcext:value-type="float">
            <text:p>8640000</text:p>
          </table:table-cell>
          <table:table-cell table:formula="of:=[.B1167]/[.C1167]" office:value-type="float" office:value="0.00242916666666667" calcext:value-type="float">
            <text:p>0,00242916666666667000</text:p>
          </table:table-cell>
          <table:table-cell table:formula="of:=[.D1168]-[.D116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18" office:value-type="float" office:value="21006" calcext:value-type="float">
            <text:p>21006</text:p>
          </table:table-cell>
          <table:table-cell office:value-type="float" office:value="8640000" calcext:value-type="float">
            <text:p>8640000</text:p>
          </table:table-cell>
          <table:table-cell table:formula="of:=[.B1168]/[.C1168]" office:value-type="float" office:value="0.00243125" calcext:value-type="float">
            <text:p>0,00243125000000000000</text:p>
          </table:table-cell>
          <table:table-cell table:formula="of:=[.D1169]-[.D116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18" office:value-type="float" office:value="21024" calcext:value-type="float">
            <text:p>21024</text:p>
          </table:table-cell>
          <table:table-cell office:value-type="float" office:value="8640000" calcext:value-type="float">
            <text:p>8640000</text:p>
          </table:table-cell>
          <table:table-cell table:formula="of:=[.B1169]/[.C1169]" office:value-type="float" office:value="0.00243333333333333" calcext:value-type="float">
            <text:p>0,00243333333333333000</text:p>
          </table:table-cell>
          <table:table-cell table:formula="of:=[.D1170]-[.D116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18" office:value-type="float" office:value="21042" calcext:value-type="float">
            <text:p>21042</text:p>
          </table:table-cell>
          <table:table-cell office:value-type="float" office:value="8640000" calcext:value-type="float">
            <text:p>8640000</text:p>
          </table:table-cell>
          <table:table-cell table:formula="of:=[.B1170]/[.C1170]" office:value-type="float" office:value="0.00243541666666667" calcext:value-type="float">
            <text:p>0,00243541666666667000</text:p>
          </table:table-cell>
          <table:table-cell table:formula="of:=[.D1171]-[.D117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18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1171]/[.C1171]" office:value-type="float" office:value="0.0024375" calcext:value-type="float">
            <text:p>0,00243750000000000000</text:p>
          </table:table-cell>
          <table:table-cell table:formula="of:=[.D1172]-[.D117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18" office:value-type="float" office:value="21078" calcext:value-type="float">
            <text:p>21078</text:p>
          </table:table-cell>
          <table:table-cell office:value-type="float" office:value="8640000" calcext:value-type="float">
            <text:p>8640000</text:p>
          </table:table-cell>
          <table:table-cell table:formula="of:=[.B1172]/[.C1172]" office:value-type="float" office:value="0.00243958333333333" calcext:value-type="float">
            <text:p>0,00243958333333333000</text:p>
          </table:table-cell>
          <table:table-cell table:formula="of:=[.D1173]-[.D117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18" office:value-type="float" office:value="21096" calcext:value-type="float">
            <text:p>21096</text:p>
          </table:table-cell>
          <table:table-cell office:value-type="float" office:value="8640000" calcext:value-type="float">
            <text:p>8640000</text:p>
          </table:table-cell>
          <table:table-cell table:formula="of:=[.B1173]/[.C1173]" office:value-type="float" office:value="0.00244166666666667" calcext:value-type="float">
            <text:p>0,00244166666666667000</text:p>
          </table:table-cell>
          <table:table-cell table:formula="of:=[.D1174]-[.D117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18" office:value-type="float" office:value="21114" calcext:value-type="float">
            <text:p>21114</text:p>
          </table:table-cell>
          <table:table-cell office:value-type="float" office:value="8640000" calcext:value-type="float">
            <text:p>8640000</text:p>
          </table:table-cell>
          <table:table-cell table:formula="of:=[.B1174]/[.C1174]" office:value-type="float" office:value="0.00244375" calcext:value-type="float">
            <text:p>0,00244375000000000000</text:p>
          </table:table-cell>
          <table:table-cell table:formula="of:=[.D1175]-[.D117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18" office:value-type="float" office:value="21132" calcext:value-type="float">
            <text:p>21132</text:p>
          </table:table-cell>
          <table:table-cell office:value-type="float" office:value="8640000" calcext:value-type="float">
            <text:p>8640000</text:p>
          </table:table-cell>
          <table:table-cell table:formula="of:=[.B1175]/[.C1175]" office:value-type="float" office:value="0.00244583333333333" calcext:value-type="float">
            <text:p>0,00244583333333333000</text:p>
          </table:table-cell>
          <table:table-cell table:formula="of:=[.D1176]-[.D117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18" office:value-type="float" office:value="21150" calcext:value-type="float">
            <text:p>21150</text:p>
          </table:table-cell>
          <table:table-cell office:value-type="float" office:value="8640000" calcext:value-type="float">
            <text:p>8640000</text:p>
          </table:table-cell>
          <table:table-cell table:formula="of:=[.B1176]/[.C1176]" office:value-type="float" office:value="0.00244791666666667" calcext:value-type="float">
            <text:p>0,00244791666666667000</text:p>
          </table:table-cell>
          <table:table-cell table:formula="of:=[.D1177]-[.D117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18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1177]/[.C1177]" office:value-type="float" office:value="0.00245" calcext:value-type="float">
            <text:p>0,00245000000000000000</text:p>
          </table:table-cell>
          <table:table-cell table:formula="of:=[.D1178]-[.D117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18" office:value-type="float" office:value="21186" calcext:value-type="float">
            <text:p>21186</text:p>
          </table:table-cell>
          <table:table-cell office:value-type="float" office:value="8640000" calcext:value-type="float">
            <text:p>8640000</text:p>
          </table:table-cell>
          <table:table-cell table:formula="of:=[.B1178]/[.C1178]" office:value-type="float" office:value="0.00245208333333333" calcext:value-type="float">
            <text:p>0,00245208333333333000</text:p>
          </table:table-cell>
          <table:table-cell table:formula="of:=[.D1179]-[.D117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18" office:value-type="float" office:value="21204" calcext:value-type="float">
            <text:p>21204</text:p>
          </table:table-cell>
          <table:table-cell office:value-type="float" office:value="8640000" calcext:value-type="float">
            <text:p>8640000</text:p>
          </table:table-cell>
          <table:table-cell table:formula="of:=[.B1179]/[.C1179]" office:value-type="float" office:value="0.00245416666666667" calcext:value-type="float">
            <text:p>0,00245416666666667000</text:p>
          </table:table-cell>
          <table:table-cell table:formula="of:=[.D1180]-[.D117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18" office:value-type="float" office:value="21222" calcext:value-type="float">
            <text:p>21222</text:p>
          </table:table-cell>
          <table:table-cell office:value-type="float" office:value="8640000" calcext:value-type="float">
            <text:p>8640000</text:p>
          </table:table-cell>
          <table:table-cell table:formula="of:=[.B1180]/[.C1180]" office:value-type="float" office:value="0.00245625" calcext:value-type="float">
            <text:p>0,00245625000000000000</text:p>
          </table:table-cell>
          <table:table-cell table:formula="of:=[.D1181]-[.D118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18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1181]/[.C1181]" office:value-type="float" office:value="0.00245833333333333" calcext:value-type="float">
            <text:p>0,00245833333333333000</text:p>
          </table:table-cell>
          <table:table-cell table:formula="of:=[.D1182]-[.D118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18" office:value-type="float" office:value="21258" calcext:value-type="float">
            <text:p>21258</text:p>
          </table:table-cell>
          <table:table-cell office:value-type="float" office:value="8640000" calcext:value-type="float">
            <text:p>8640000</text:p>
          </table:table-cell>
          <table:table-cell table:formula="of:=[.B1182]/[.C1182]" office:value-type="float" office:value="0.00246041666666667" calcext:value-type="float">
            <text:p>0,00246041666666667000</text:p>
          </table:table-cell>
          <table:table-cell table:formula="of:=[.D1183]-[.D118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18" office:value-type="float" office:value="21276" calcext:value-type="float">
            <text:p>21276</text:p>
          </table:table-cell>
          <table:table-cell office:value-type="float" office:value="8640000" calcext:value-type="float">
            <text:p>8640000</text:p>
          </table:table-cell>
          <table:table-cell table:formula="of:=[.B1183]/[.C1183]" office:value-type="float" office:value="0.0024625" calcext:value-type="float">
            <text:p>0,00246250000000000000</text:p>
          </table:table-cell>
          <table:table-cell table:formula="of:=[.D1184]-[.D118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18" office:value-type="float" office:value="21294" calcext:value-type="float">
            <text:p>21294</text:p>
          </table:table-cell>
          <table:table-cell office:value-type="float" office:value="8640000" calcext:value-type="float">
            <text:p>8640000</text:p>
          </table:table-cell>
          <table:table-cell table:formula="of:=[.B1184]/[.C1184]" office:value-type="float" office:value="0.00246458333333333" calcext:value-type="float">
            <text:p>0,00246458333333333000</text:p>
          </table:table-cell>
          <table:table-cell table:formula="of:=[.D1185]-[.D118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18" office:value-type="float" office:value="21312" calcext:value-type="float">
            <text:p>21312</text:p>
          </table:table-cell>
          <table:table-cell office:value-type="float" office:value="8640000" calcext:value-type="float">
            <text:p>8640000</text:p>
          </table:table-cell>
          <table:table-cell table:formula="of:=[.B1185]/[.C1185]" office:value-type="float" office:value="0.00246666666666667" calcext:value-type="float">
            <text:p>0,00246666666666667000</text:p>
          </table:table-cell>
          <table:table-cell table:formula="of:=[.D1186]-[.D118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18" office:value-type="float" office:value="21330" calcext:value-type="float">
            <text:p>21330</text:p>
          </table:table-cell>
          <table:table-cell office:value-type="float" office:value="8640000" calcext:value-type="float">
            <text:p>8640000</text:p>
          </table:table-cell>
          <table:table-cell table:formula="of:=[.B1186]/[.C1186]" office:value-type="float" office:value="0.00246875" calcext:value-type="float">
            <text:p>0,00246875000000000000</text:p>
          </table:table-cell>
          <table:table-cell table:formula="of:=[.D1187]-[.D118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18" office:value-type="float" office:value="21348" calcext:value-type="float">
            <text:p>21348</text:p>
          </table:table-cell>
          <table:table-cell office:value-type="float" office:value="8640000" calcext:value-type="float">
            <text:p>8640000</text:p>
          </table:table-cell>
          <table:table-cell table:formula="of:=[.B1187]/[.C1187]" office:value-type="float" office:value="0.00247083333333333" calcext:value-type="float">
            <text:p>0,00247083333333333000</text:p>
          </table:table-cell>
          <table:table-cell table:formula="of:=[.D1188]-[.D118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18" office:value-type="float" office:value="21366" calcext:value-type="float">
            <text:p>21366</text:p>
          </table:table-cell>
          <table:table-cell office:value-type="float" office:value="8640000" calcext:value-type="float">
            <text:p>8640000</text:p>
          </table:table-cell>
          <table:table-cell table:formula="of:=[.B1188]/[.C1188]" office:value-type="float" office:value="0.00247291666666667" calcext:value-type="float">
            <text:p>0,00247291666666667000</text:p>
          </table:table-cell>
          <table:table-cell table:formula="of:=[.D1189]-[.D118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18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1189]/[.C1189]" office:value-type="float" office:value="0.002475" calcext:value-type="float">
            <text:p>0,00247500000000000000</text:p>
          </table:table-cell>
          <table:table-cell table:formula="of:=[.D1190]-[.D118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18" office:value-type="float" office:value="21402" calcext:value-type="float">
            <text:p>21402</text:p>
          </table:table-cell>
          <table:table-cell office:value-type="float" office:value="8640000" calcext:value-type="float">
            <text:p>8640000</text:p>
          </table:table-cell>
          <table:table-cell table:formula="of:=[.B1190]/[.C1190]" office:value-type="float" office:value="0.00247708333333333" calcext:value-type="float">
            <text:p>0,00247708333333333000</text:p>
          </table:table-cell>
          <table:table-cell table:formula="of:=[.D1191]-[.D119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18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1191]/[.C1191]" office:value-type="float" office:value="0.00247916666666667" calcext:value-type="float">
            <text:p>0,00247916666666667000</text:p>
          </table:table-cell>
          <table:table-cell table:formula="of:=[.D1192]-[.D119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18" office:value-type="float" office:value="21438" calcext:value-type="float">
            <text:p>21438</text:p>
          </table:table-cell>
          <table:table-cell office:value-type="float" office:value="8640000" calcext:value-type="float">
            <text:p>8640000</text:p>
          </table:table-cell>
          <table:table-cell table:formula="of:=[.B1192]/[.C1192]" office:value-type="float" office:value="0.00248125" calcext:value-type="float">
            <text:p>0,00248125000000000000</text:p>
          </table:table-cell>
          <table:table-cell table:formula="of:=[.D1193]-[.D119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18" office:value-type="float" office:value="21456" calcext:value-type="float">
            <text:p>21456</text:p>
          </table:table-cell>
          <table:table-cell office:value-type="float" office:value="8640000" calcext:value-type="float">
            <text:p>8640000</text:p>
          </table:table-cell>
          <table:table-cell table:formula="of:=[.B1193]/[.C1193]" office:value-type="float" office:value="0.00248333333333333" calcext:value-type="float">
            <text:p>0,00248333333333333000</text:p>
          </table:table-cell>
          <table:table-cell table:formula="of:=[.D1194]-[.D119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18" office:value-type="float" office:value="21474" calcext:value-type="float">
            <text:p>21474</text:p>
          </table:table-cell>
          <table:table-cell office:value-type="float" office:value="8640000" calcext:value-type="float">
            <text:p>8640000</text:p>
          </table:table-cell>
          <table:table-cell table:formula="of:=[.B1194]/[.C1194]" office:value-type="float" office:value="0.00248541666666667" calcext:value-type="float">
            <text:p>0,00248541666666667000</text:p>
          </table:table-cell>
          <table:table-cell table:formula="of:=[.D1195]-[.D119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18" office:value-type="float" office:value="21492" calcext:value-type="float">
            <text:p>21492</text:p>
          </table:table-cell>
          <table:table-cell office:value-type="float" office:value="8640000" calcext:value-type="float">
            <text:p>8640000</text:p>
          </table:table-cell>
          <table:table-cell table:formula="of:=[.B1195]/[.C1195]" office:value-type="float" office:value="0.0024875" calcext:value-type="float">
            <text:p>0,00248750000000000000</text:p>
          </table:table-cell>
          <table:table-cell table:formula="of:=[.D1196]-[.D119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18" office:value-type="float" office:value="21510" calcext:value-type="float">
            <text:p>21510</text:p>
          </table:table-cell>
          <table:table-cell office:value-type="float" office:value="8640000" calcext:value-type="float">
            <text:p>8640000</text:p>
          </table:table-cell>
          <table:table-cell table:formula="of:=[.B1196]/[.C1196]" office:value-type="float" office:value="0.00248958333333333" calcext:value-type="float">
            <text:p>0,00248958333333333000</text:p>
          </table:table-cell>
          <table:table-cell table:formula="of:=[.D1197]-[.D119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18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1197]/[.C1197]" office:value-type="float" office:value="0.00249166666666667" calcext:value-type="float">
            <text:p>0,00249166666666667000</text:p>
          </table:table-cell>
          <table:table-cell table:formula="of:=[.D1198]-[.D119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18" office:value-type="float" office:value="21546" calcext:value-type="float">
            <text:p>21546</text:p>
          </table:table-cell>
          <table:table-cell office:value-type="float" office:value="8640000" calcext:value-type="float">
            <text:p>8640000</text:p>
          </table:table-cell>
          <table:table-cell table:formula="of:=[.B1198]/[.C1198]" office:value-type="float" office:value="0.00249375" calcext:value-type="float">
            <text:p>0,00249375000000000000</text:p>
          </table:table-cell>
          <table:table-cell table:formula="of:=[.D1199]-[.D119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18" office:value-type="float" office:value="21564" calcext:value-type="float">
            <text:p>21564</text:p>
          </table:table-cell>
          <table:table-cell office:value-type="float" office:value="8640000" calcext:value-type="float">
            <text:p>8640000</text:p>
          </table:table-cell>
          <table:table-cell table:formula="of:=[.B1199]/[.C1199]" office:value-type="float" office:value="0.00249583333333333" calcext:value-type="float">
            <text:p>0,00249583333333333000</text:p>
          </table:table-cell>
          <table:table-cell table:formula="of:=[.D1200]-[.D119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18" office:value-type="float" office:value="21582" calcext:value-type="float">
            <text:p>21582</text:p>
          </table:table-cell>
          <table:table-cell office:value-type="float" office:value="8640000" calcext:value-type="float">
            <text:p>8640000</text:p>
          </table:table-cell>
          <table:table-cell table:formula="of:=[.B1200]/[.C1200]" office:value-type="float" office:value="0.00249791666666667" calcext:value-type="float">
            <text:p>0,00249791666666667000</text:p>
          </table:table-cell>
          <table:table-cell table:formula="of:=[.D1201]-[.D120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18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1201]/[.C1201]" office:value-type="float" office:value="0.0025" calcext:value-type="float">
            <text:p>0,00250000000000000000</text:p>
          </table:table-cell>
          <table:table-cell table:formula="of:=[.D1202]-[.D120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1201]+18" office:value-type="float" office:value="21618" calcext:value-type="float">
            <text:p>21618</text:p>
          </table:table-cell>
          <table:table-cell office:value-type="float" office:value="8640000" calcext:value-type="float">
            <text:p>8640000</text:p>
          </table:table-cell>
          <table:table-cell table:formula="of:=[.B1202]/[.C1202]" office:value-type="float" office:value="0.00250208333333333" calcext:value-type="float">
            <text:p>0,00250208333333333000</text:p>
          </table:table-cell>
          <table:table-cell table:formula="of:=[.D1203]-[.D120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1202]+18" office:value-type="float" office:value="21636" calcext:value-type="float">
            <text:p>21636</text:p>
          </table:table-cell>
          <table:table-cell office:value-type="float" office:value="8640000" calcext:value-type="float">
            <text:p>8640000</text:p>
          </table:table-cell>
          <table:table-cell table:formula="of:=[.B1203]/[.C1203]" office:value-type="float" office:value="0.00250416666666667" calcext:value-type="float">
            <text:p>0,00250416666666667000</text:p>
          </table:table-cell>
          <table:table-cell table:formula="of:=[.D1204]-[.D120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1203]+18" office:value-type="float" office:value="21654" calcext:value-type="float">
            <text:p>21654</text:p>
          </table:table-cell>
          <table:table-cell office:value-type="float" office:value="8640000" calcext:value-type="float">
            <text:p>8640000</text:p>
          </table:table-cell>
          <table:table-cell table:formula="of:=[.B1204]/[.C1204]" office:value-type="float" office:value="0.00250625" calcext:value-type="float">
            <text:p>0,00250625000000000000</text:p>
          </table:table-cell>
          <table:table-cell table:formula="of:=[.D1205]-[.D120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1204]+18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1205]/[.C1205]" office:value-type="float" office:value="0.00250833333333333" calcext:value-type="float">
            <text:p>0,00250833333333333000</text:p>
          </table:table-cell>
          <table:table-cell table:formula="of:=[.D1206]-[.D120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1205]+18" office:value-type="float" office:value="21690" calcext:value-type="float">
            <text:p>21690</text:p>
          </table:table-cell>
          <table:table-cell office:value-type="float" office:value="8640000" calcext:value-type="float">
            <text:p>8640000</text:p>
          </table:table-cell>
          <table:table-cell table:formula="of:=[.B1206]/[.C1206]" office:value-type="float" office:value="0.00251041666666667" calcext:value-type="float">
            <text:p>0,00251041666666667000</text:p>
          </table:table-cell>
          <table:table-cell table:formula="of:=[.D1207]-[.D120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1206]+18" office:value-type="float" office:value="21708" calcext:value-type="float">
            <text:p>21708</text:p>
          </table:table-cell>
          <table:table-cell office:value-type="float" office:value="8640000" calcext:value-type="float">
            <text:p>8640000</text:p>
          </table:table-cell>
          <table:table-cell table:formula="of:=[.B1207]/[.C1207]" office:value-type="float" office:value="0.0025125" calcext:value-type="float">
            <text:p>0,00251250000000000000</text:p>
          </table:table-cell>
          <table:table-cell table:formula="of:=[.D1208]-[.D120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1207]+18" office:value-type="float" office:value="21726" calcext:value-type="float">
            <text:p>21726</text:p>
          </table:table-cell>
          <table:table-cell office:value-type="float" office:value="8640000" calcext:value-type="float">
            <text:p>8640000</text:p>
          </table:table-cell>
          <table:table-cell table:formula="of:=[.B1208]/[.C1208]" office:value-type="float" office:value="0.00251458333333333" calcext:value-type="float">
            <text:p>0,00251458333333333000</text:p>
          </table:table-cell>
          <table:table-cell table:formula="of:=[.D1209]-[.D120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1208]+18" office:value-type="float" office:value="21744" calcext:value-type="float">
            <text:p>21744</text:p>
          </table:table-cell>
          <table:table-cell office:value-type="float" office:value="8640000" calcext:value-type="float">
            <text:p>8640000</text:p>
          </table:table-cell>
          <table:table-cell table:formula="of:=[.B1209]/[.C1209]" office:value-type="float" office:value="0.00251666666666667" calcext:value-type="float">
            <text:p>0,00251666666666667000</text:p>
          </table:table-cell>
          <table:table-cell table:formula="of:=[.D1210]-[.D120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1209]+18" office:value-type="float" office:value="21762" calcext:value-type="float">
            <text:p>21762</text:p>
          </table:table-cell>
          <table:table-cell office:value-type="float" office:value="8640000" calcext:value-type="float">
            <text:p>8640000</text:p>
          </table:table-cell>
          <table:table-cell table:formula="of:=[.B1210]/[.C1210]" office:value-type="float" office:value="0.00251875" calcext:value-type="float">
            <text:p>0,00251875000000000000</text:p>
          </table:table-cell>
          <table:table-cell table:formula="of:=[.D1211]-[.D121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1210]+18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1211]/[.C1211]" office:value-type="float" office:value="0.00252083333333333" calcext:value-type="float">
            <text:p>0,00252083333333333000</text:p>
          </table:table-cell>
          <table:table-cell table:formula="of:=[.D1212]-[.D121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1211]+18" office:value-type="float" office:value="21798" calcext:value-type="float">
            <text:p>21798</text:p>
          </table:table-cell>
          <table:table-cell office:value-type="float" office:value="8640000" calcext:value-type="float">
            <text:p>8640000</text:p>
          </table:table-cell>
          <table:table-cell table:formula="of:=[.B1212]/[.C1212]" office:value-type="float" office:value="0.00252291666666667" calcext:value-type="float">
            <text:p>0,00252291666666667000</text:p>
          </table:table-cell>
          <table:table-cell table:formula="of:=[.D1213]-[.D121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1212]+18" office:value-type="float" office:value="21816" calcext:value-type="float">
            <text:p>21816</text:p>
          </table:table-cell>
          <table:table-cell office:value-type="float" office:value="8640000" calcext:value-type="float">
            <text:p>8640000</text:p>
          </table:table-cell>
          <table:table-cell table:formula="of:=[.B1213]/[.C1213]" office:value-type="float" office:value="0.002525" calcext:value-type="float">
            <text:p>0,00252500000000000000</text:p>
          </table:table-cell>
          <table:table-cell table:formula="of:=[.D1214]-[.D121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1213]+18" office:value-type="float" office:value="21834" calcext:value-type="float">
            <text:p>21834</text:p>
          </table:table-cell>
          <table:table-cell office:value-type="float" office:value="8640000" calcext:value-type="float">
            <text:p>8640000</text:p>
          </table:table-cell>
          <table:table-cell table:formula="of:=[.B1214]/[.C1214]" office:value-type="float" office:value="0.00252708333333333" calcext:value-type="float">
            <text:p>0,00252708333333333000</text:p>
          </table:table-cell>
          <table:table-cell table:formula="of:=[.D1215]-[.D121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1214]+18" office:value-type="float" office:value="21852" calcext:value-type="float">
            <text:p>21852</text:p>
          </table:table-cell>
          <table:table-cell office:value-type="float" office:value="8640000" calcext:value-type="float">
            <text:p>8640000</text:p>
          </table:table-cell>
          <table:table-cell table:formula="of:=[.B1215]/[.C1215]" office:value-type="float" office:value="0.00252916666666667" calcext:value-type="float">
            <text:p>0,00252916666666667000</text:p>
          </table:table-cell>
          <table:table-cell table:formula="of:=[.D1216]-[.D121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1215]+18" office:value-type="float" office:value="21870" calcext:value-type="float">
            <text:p>21870</text:p>
          </table:table-cell>
          <table:table-cell office:value-type="float" office:value="8640000" calcext:value-type="float">
            <text:p>8640000</text:p>
          </table:table-cell>
          <table:table-cell table:formula="of:=[.B1216]/[.C1216]" office:value-type="float" office:value="0.00253125" calcext:value-type="float">
            <text:p>0,00253125000000000000</text:p>
          </table:table-cell>
          <table:table-cell table:formula="of:=[.D1217]-[.D121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1216]+18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1217]/[.C1217]" office:value-type="float" office:value="0.00253333333333333" calcext:value-type="float">
            <text:p>0,00253333333333333000</text:p>
          </table:table-cell>
          <table:table-cell table:formula="of:=[.D1218]-[.D121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1217]+18" office:value-type="float" office:value="21906" calcext:value-type="float">
            <text:p>21906</text:p>
          </table:table-cell>
          <table:table-cell office:value-type="float" office:value="8640000" calcext:value-type="float">
            <text:p>8640000</text:p>
          </table:table-cell>
          <table:table-cell table:formula="of:=[.B1218]/[.C1218]" office:value-type="float" office:value="0.00253541666666667" calcext:value-type="float">
            <text:p>0,00253541666666667000</text:p>
          </table:table-cell>
          <table:table-cell table:formula="of:=[.D1219]-[.D121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1218]+18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1219]/[.C1219]" office:value-type="float" office:value="0.0025375" calcext:value-type="float">
            <text:p>0,00253750000000000000</text:p>
          </table:table-cell>
          <table:table-cell table:formula="of:=[.D1220]-[.D121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1219]+18" office:value-type="float" office:value="21942" calcext:value-type="float">
            <text:p>21942</text:p>
          </table:table-cell>
          <table:table-cell office:value-type="float" office:value="8640000" calcext:value-type="float">
            <text:p>8640000</text:p>
          </table:table-cell>
          <table:table-cell table:formula="of:=[.B1220]/[.C1220]" office:value-type="float" office:value="0.00253958333333333" calcext:value-type="float">
            <text:p>0,00253958333333333000</text:p>
          </table:table-cell>
          <table:table-cell table:formula="of:=[.D1221]-[.D122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1220]+18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1221]/[.C1221]" office:value-type="float" office:value="0.00254166666666667" calcext:value-type="float">
            <text:p>0,00254166666666667000</text:p>
          </table:table-cell>
          <table:table-cell table:formula="of:=[.D1222]-[.D122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1221]+18" office:value-type="float" office:value="21978" calcext:value-type="float">
            <text:p>21978</text:p>
          </table:table-cell>
          <table:table-cell office:value-type="float" office:value="8640000" calcext:value-type="float">
            <text:p>8640000</text:p>
          </table:table-cell>
          <table:table-cell table:formula="of:=[.B1222]/[.C1222]" office:value-type="float" office:value="0.00254375" calcext:value-type="float">
            <text:p>0,00254375000000000000</text:p>
          </table:table-cell>
          <table:table-cell table:formula="of:=[.D1223]-[.D122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1222]+18" office:value-type="float" office:value="21996" calcext:value-type="float">
            <text:p>21996</text:p>
          </table:table-cell>
          <table:table-cell office:value-type="float" office:value="8640000" calcext:value-type="float">
            <text:p>8640000</text:p>
          </table:table-cell>
          <table:table-cell table:formula="of:=[.B1223]/[.C1223]" office:value-type="float" office:value="0.00254583333333333" calcext:value-type="float">
            <text:p>0,00254583333333333000</text:p>
          </table:table-cell>
          <table:table-cell table:formula="of:=[.D1224]-[.D122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1223]+18" office:value-type="float" office:value="22014" calcext:value-type="float">
            <text:p>22014</text:p>
          </table:table-cell>
          <table:table-cell office:value-type="float" office:value="8640000" calcext:value-type="float">
            <text:p>8640000</text:p>
          </table:table-cell>
          <table:table-cell table:formula="of:=[.B1224]/[.C1224]" office:value-type="float" office:value="0.00254791666666667" calcext:value-type="float">
            <text:p>0,00254791666666667000</text:p>
          </table:table-cell>
          <table:table-cell table:formula="of:=[.D1225]-[.D122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1224]+18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1225]/[.C1225]" office:value-type="float" office:value="0.00255" calcext:value-type="float">
            <text:p>0,00255000000000000000</text:p>
          </table:table-cell>
          <table:table-cell table:formula="of:=[.D1226]-[.D122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1225]+18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1226]/[.C1226]" office:value-type="float" office:value="0.00255208333333333" calcext:value-type="float">
            <text:p>0,00255208333333333000</text:p>
          </table:table-cell>
          <table:table-cell table:formula="of:=[.D1227]-[.D122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1226]+18" office:value-type="float" office:value="22068" calcext:value-type="float">
            <text:p>22068</text:p>
          </table:table-cell>
          <table:table-cell office:value-type="float" office:value="8640000" calcext:value-type="float">
            <text:p>8640000</text:p>
          </table:table-cell>
          <table:table-cell table:formula="of:=[.B1227]/[.C1227]" office:value-type="float" office:value="0.00255416666666667" calcext:value-type="float">
            <text:p>0,00255416666666667000</text:p>
          </table:table-cell>
          <table:table-cell table:formula="of:=[.D1228]-[.D122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1227]+18" office:value-type="float" office:value="22086" calcext:value-type="float">
            <text:p>22086</text:p>
          </table:table-cell>
          <table:table-cell office:value-type="float" office:value="8640000" calcext:value-type="float">
            <text:p>8640000</text:p>
          </table:table-cell>
          <table:table-cell table:formula="of:=[.B1228]/[.C1228]" office:value-type="float" office:value="0.00255625" calcext:value-type="float">
            <text:p>0,00255625000000000000</text:p>
          </table:table-cell>
          <table:table-cell table:formula="of:=[.D1229]-[.D122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1228]+18" office:value-type="float" office:value="22104" calcext:value-type="float">
            <text:p>22104</text:p>
          </table:table-cell>
          <table:table-cell office:value-type="float" office:value="8640000" calcext:value-type="float">
            <text:p>8640000</text:p>
          </table:table-cell>
          <table:table-cell table:formula="of:=[.B1229]/[.C1229]" office:value-type="float" office:value="0.00255833333333333" calcext:value-type="float">
            <text:p>0,00255833333333333000</text:p>
          </table:table-cell>
          <table:table-cell table:formula="of:=[.D1230]-[.D122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1229]+18" office:value-type="float" office:value="22122" calcext:value-type="float">
            <text:p>22122</text:p>
          </table:table-cell>
          <table:table-cell office:value-type="float" office:value="8640000" calcext:value-type="float">
            <text:p>8640000</text:p>
          </table:table-cell>
          <table:table-cell table:formula="of:=[.B1230]/[.C1230]" office:value-type="float" office:value="0.00256041666666667" calcext:value-type="float">
            <text:p>0,00256041666666667000</text:p>
          </table:table-cell>
          <table:table-cell table:formula="of:=[.D1231]-[.D123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1230]+18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1231]/[.C1231]" office:value-type="float" office:value="0.0025625" calcext:value-type="float">
            <text:p>0,00256250000000000000</text:p>
          </table:table-cell>
          <table:table-cell table:formula="of:=[.D1232]-[.D123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1231]+18" office:value-type="float" office:value="22158" calcext:value-type="float">
            <text:p>22158</text:p>
          </table:table-cell>
          <table:table-cell office:value-type="float" office:value="8640000" calcext:value-type="float">
            <text:p>8640000</text:p>
          </table:table-cell>
          <table:table-cell table:formula="of:=[.B1232]/[.C1232]" office:value-type="float" office:value="0.00256458333333333" calcext:value-type="float">
            <text:p>0,00256458333333333000</text:p>
          </table:table-cell>
          <table:table-cell table:formula="of:=[.D1233]-[.D123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1232]+18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1233]/[.C1233]" office:value-type="float" office:value="0.00256666666666667" calcext:value-type="float">
            <text:p>0,00256666666666667000</text:p>
          </table:table-cell>
          <table:table-cell table:formula="of:=[.D1234]-[.D123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1233]+18" office:value-type="float" office:value="22194" calcext:value-type="float">
            <text:p>22194</text:p>
          </table:table-cell>
          <table:table-cell office:value-type="float" office:value="8640000" calcext:value-type="float">
            <text:p>8640000</text:p>
          </table:table-cell>
          <table:table-cell table:formula="of:=[.B1234]/[.C1234]" office:value-type="float" office:value="0.00256875" calcext:value-type="float">
            <text:p>0,00256875000000000000</text:p>
          </table:table-cell>
          <table:table-cell table:formula="of:=[.D1235]-[.D123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1234]+18" office:value-type="float" office:value="22212" calcext:value-type="float">
            <text:p>22212</text:p>
          </table:table-cell>
          <table:table-cell office:value-type="float" office:value="8640000" calcext:value-type="float">
            <text:p>8640000</text:p>
          </table:table-cell>
          <table:table-cell table:formula="of:=[.B1235]/[.C1235]" office:value-type="float" office:value="0.00257083333333333" calcext:value-type="float">
            <text:p>0,00257083333333333000</text:p>
          </table:table-cell>
          <table:table-cell table:formula="of:=[.D1236]-[.D123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1235]+18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1236]/[.C1236]" office:value-type="float" office:value="0.00257291666666667" calcext:value-type="float">
            <text:p>0,00257291666666667000</text:p>
          </table:table-cell>
          <table:table-cell table:formula="of:=[.D1237]-[.D123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1236]+18" office:value-type="float" office:value="22248" calcext:value-type="float">
            <text:p>22248</text:p>
          </table:table-cell>
          <table:table-cell office:value-type="float" office:value="8640000" calcext:value-type="float">
            <text:p>8640000</text:p>
          </table:table-cell>
          <table:table-cell table:formula="of:=[.B1237]/[.C1237]" office:value-type="float" office:value="0.002575" calcext:value-type="float">
            <text:p>0,00257500000000000000</text:p>
          </table:table-cell>
          <table:table-cell table:formula="of:=[.D1238]-[.D123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1237]+18" office:value-type="float" office:value="22266" calcext:value-type="float">
            <text:p>22266</text:p>
          </table:table-cell>
          <table:table-cell office:value-type="float" office:value="8640000" calcext:value-type="float">
            <text:p>8640000</text:p>
          </table:table-cell>
          <table:table-cell table:formula="of:=[.B1238]/[.C1238]" office:value-type="float" office:value="0.00257708333333333" calcext:value-type="float">
            <text:p>0,00257708333333333000</text:p>
          </table:table-cell>
          <table:table-cell table:formula="of:=[.D1239]-[.D123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1238]+18" office:value-type="float" office:value="22284" calcext:value-type="float">
            <text:p>22284</text:p>
          </table:table-cell>
          <table:table-cell office:value-type="float" office:value="8640000" calcext:value-type="float">
            <text:p>8640000</text:p>
          </table:table-cell>
          <table:table-cell table:formula="of:=[.B1239]/[.C1239]" office:value-type="float" office:value="0.00257916666666667" calcext:value-type="float">
            <text:p>0,00257916666666667000</text:p>
          </table:table-cell>
          <table:table-cell table:formula="of:=[.D1240]-[.D123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1239]+18" office:value-type="float" office:value="22302" calcext:value-type="float">
            <text:p>22302</text:p>
          </table:table-cell>
          <table:table-cell office:value-type="float" office:value="8640000" calcext:value-type="float">
            <text:p>8640000</text:p>
          </table:table-cell>
          <table:table-cell table:formula="of:=[.B1240]/[.C1240]" office:value-type="float" office:value="0.00258125" calcext:value-type="float">
            <text:p>0,00258125000000000000</text:p>
          </table:table-cell>
          <table:table-cell table:formula="of:=[.D1241]-[.D124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1240]+18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1241]/[.C1241]" office:value-type="float" office:value="0.00258333333333333" calcext:value-type="float">
            <text:p>0,00258333333333333000</text:p>
          </table:table-cell>
          <table:table-cell table:formula="of:=[.D1242]-[.D124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1241]+18" office:value-type="float" office:value="22338" calcext:value-type="float">
            <text:p>22338</text:p>
          </table:table-cell>
          <table:table-cell office:value-type="float" office:value="8640000" calcext:value-type="float">
            <text:p>8640000</text:p>
          </table:table-cell>
          <table:table-cell table:formula="of:=[.B1242]/[.C1242]" office:value-type="float" office:value="0.00258541666666667" calcext:value-type="float">
            <text:p>0,00258541666666667000</text:p>
          </table:table-cell>
          <table:table-cell table:formula="of:=[.D1243]-[.D124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1242]+18" office:value-type="float" office:value="22356" calcext:value-type="float">
            <text:p>22356</text:p>
          </table:table-cell>
          <table:table-cell office:value-type="float" office:value="8640000" calcext:value-type="float">
            <text:p>8640000</text:p>
          </table:table-cell>
          <table:table-cell table:formula="of:=[.B1243]/[.C1243]" office:value-type="float" office:value="0.0025875" calcext:value-type="float">
            <text:p>0,00258750000000000000</text:p>
          </table:table-cell>
          <table:table-cell table:formula="of:=[.D1244]-[.D124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1243]+18" office:value-type="float" office:value="22374" calcext:value-type="float">
            <text:p>22374</text:p>
          </table:table-cell>
          <table:table-cell office:value-type="float" office:value="8640000" calcext:value-type="float">
            <text:p>8640000</text:p>
          </table:table-cell>
          <table:table-cell table:formula="of:=[.B1244]/[.C1244]" office:value-type="float" office:value="0.00258958333333333" calcext:value-type="float">
            <text:p>0,00258958333333333000</text:p>
          </table:table-cell>
          <table:table-cell table:formula="of:=[.D1245]-[.D124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1244]+18" office:value-type="float" office:value="22392" calcext:value-type="float">
            <text:p>22392</text:p>
          </table:table-cell>
          <table:table-cell office:value-type="float" office:value="8640000" calcext:value-type="float">
            <text:p>8640000</text:p>
          </table:table-cell>
          <table:table-cell table:formula="of:=[.B1245]/[.C1245]" office:value-type="float" office:value="0.00259166666666667" calcext:value-type="float">
            <text:p>0,00259166666666667000</text:p>
          </table:table-cell>
          <table:table-cell table:formula="of:=[.D1246]-[.D124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1245]+18" office:value-type="float" office:value="22410" calcext:value-type="float">
            <text:p>22410</text:p>
          </table:table-cell>
          <table:table-cell office:value-type="float" office:value="8640000" calcext:value-type="float">
            <text:p>8640000</text:p>
          </table:table-cell>
          <table:table-cell table:formula="of:=[.B1246]/[.C1246]" office:value-type="float" office:value="0.00259375" calcext:value-type="float">
            <text:p>0,00259375000000000000</text:p>
          </table:table-cell>
          <table:table-cell table:formula="of:=[.D1247]-[.D124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1246]+18" office:value-type="float" office:value="22428" calcext:value-type="float">
            <text:p>22428</text:p>
          </table:table-cell>
          <table:table-cell office:value-type="float" office:value="8640000" calcext:value-type="float">
            <text:p>8640000</text:p>
          </table:table-cell>
          <table:table-cell table:formula="of:=[.B1247]/[.C1247]" office:value-type="float" office:value="0.00259583333333333" calcext:value-type="float">
            <text:p>0,00259583333333333000</text:p>
          </table:table-cell>
          <table:table-cell table:formula="of:=[.D1248]-[.D124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1247]+18" office:value-type="float" office:value="22446" calcext:value-type="float">
            <text:p>22446</text:p>
          </table:table-cell>
          <table:table-cell office:value-type="float" office:value="8640000" calcext:value-type="float">
            <text:p>8640000</text:p>
          </table:table-cell>
          <table:table-cell table:formula="of:=[.B1248]/[.C1248]" office:value-type="float" office:value="0.00259791666666667" calcext:value-type="float">
            <text:p>0,00259791666666667000</text:p>
          </table:table-cell>
          <table:table-cell table:formula="of:=[.D1249]-[.D124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1248]+18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1249]/[.C1249]" office:value-type="float" office:value="0.0026" calcext:value-type="float">
            <text:p>0,00260000000000000000</text:p>
          </table:table-cell>
          <table:table-cell table:formula="of:=[.D1250]-[.D124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1249]+18" office:value-type="float" office:value="22482" calcext:value-type="float">
            <text:p>22482</text:p>
          </table:table-cell>
          <table:table-cell office:value-type="float" office:value="8640000" calcext:value-type="float">
            <text:p>8640000</text:p>
          </table:table-cell>
          <table:table-cell table:formula="of:=[.B1250]/[.C1250]" office:value-type="float" office:value="0.00260208333333333" calcext:value-type="float">
            <text:p>0,00260208333333333000</text:p>
          </table:table-cell>
          <table:table-cell table:formula="of:=[.D1251]-[.D125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1250]+18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1251]/[.C1251]" office:value-type="float" office:value="0.00260416666666667" calcext:value-type="float">
            <text:p>0,00260416666666667000</text:p>
          </table:table-cell>
          <table:table-cell table:formula="of:=[.D1252]-[.D125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1251]+18" office:value-type="float" office:value="22518" calcext:value-type="float">
            <text:p>22518</text:p>
          </table:table-cell>
          <table:table-cell office:value-type="float" office:value="8640000" calcext:value-type="float">
            <text:p>8640000</text:p>
          </table:table-cell>
          <table:table-cell table:formula="of:=[.B1252]/[.C1252]" office:value-type="float" office:value="0.00260625" calcext:value-type="float">
            <text:p>0,00260625000000000000</text:p>
          </table:table-cell>
          <table:table-cell table:formula="of:=[.D1253]-[.D125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1252]+18" office:value-type="float" office:value="22536" calcext:value-type="float">
            <text:p>22536</text:p>
          </table:table-cell>
          <table:table-cell office:value-type="float" office:value="8640000" calcext:value-type="float">
            <text:p>8640000</text:p>
          </table:table-cell>
          <table:table-cell table:formula="of:=[.B1253]/[.C1253]" office:value-type="float" office:value="0.00260833333333333" calcext:value-type="float">
            <text:p>0,00260833333333333000</text:p>
          </table:table-cell>
          <table:table-cell table:formula="of:=[.D1254]-[.D125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1253]+18" office:value-type="float" office:value="22554" calcext:value-type="float">
            <text:p>22554</text:p>
          </table:table-cell>
          <table:table-cell office:value-type="float" office:value="8640000" calcext:value-type="float">
            <text:p>8640000</text:p>
          </table:table-cell>
          <table:table-cell table:formula="of:=[.B1254]/[.C1254]" office:value-type="float" office:value="0.00261041666666667" calcext:value-type="float">
            <text:p>0,00261041666666667000</text:p>
          </table:table-cell>
          <table:table-cell table:formula="of:=[.D1255]-[.D125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1254]+18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1255]/[.C1255]" office:value-type="float" office:value="0.0026125" calcext:value-type="float">
            <text:p>0,00261250000000000000</text:p>
          </table:table-cell>
          <table:table-cell table:formula="of:=[.D1256]-[.D125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1255]+18" office:value-type="float" office:value="22590" calcext:value-type="float">
            <text:p>22590</text:p>
          </table:table-cell>
          <table:table-cell office:value-type="float" office:value="8640000" calcext:value-type="float">
            <text:p>8640000</text:p>
          </table:table-cell>
          <table:table-cell table:formula="of:=[.B1256]/[.C1256]" office:value-type="float" office:value="0.00261458333333333" calcext:value-type="float">
            <text:p>0,00261458333333333000</text:p>
          </table:table-cell>
          <table:table-cell table:formula="of:=[.D1257]-[.D125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1256]+18" office:value-type="float" office:value="22608" calcext:value-type="float">
            <text:p>22608</text:p>
          </table:table-cell>
          <table:table-cell office:value-type="float" office:value="8640000" calcext:value-type="float">
            <text:p>8640000</text:p>
          </table:table-cell>
          <table:table-cell table:formula="of:=[.B1257]/[.C1257]" office:value-type="float" office:value="0.00261666666666667" calcext:value-type="float">
            <text:p>0,00261666666666667000</text:p>
          </table:table-cell>
          <table:table-cell table:formula="of:=[.D1258]-[.D125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1257]+18" office:value-type="float" office:value="22626" calcext:value-type="float">
            <text:p>22626</text:p>
          </table:table-cell>
          <table:table-cell office:value-type="float" office:value="8640000" calcext:value-type="float">
            <text:p>8640000</text:p>
          </table:table-cell>
          <table:table-cell table:formula="of:=[.B1258]/[.C1258]" office:value-type="float" office:value="0.00261875" calcext:value-type="float">
            <text:p>0,00261875000000000000</text:p>
          </table:table-cell>
          <table:table-cell table:formula="of:=[.D1259]-[.D125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1258]+18" office:value-type="float" office:value="22644" calcext:value-type="float">
            <text:p>22644</text:p>
          </table:table-cell>
          <table:table-cell office:value-type="float" office:value="8640000" calcext:value-type="float">
            <text:p>8640000</text:p>
          </table:table-cell>
          <table:table-cell table:formula="of:=[.B1259]/[.C1259]" office:value-type="float" office:value="0.00262083333333333" calcext:value-type="float">
            <text:p>0,00262083333333333000</text:p>
          </table:table-cell>
          <table:table-cell table:formula="of:=[.D1260]-[.D125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1259]+18" office:value-type="float" office:value="22662" calcext:value-type="float">
            <text:p>22662</text:p>
          </table:table-cell>
          <table:table-cell office:value-type="float" office:value="8640000" calcext:value-type="float">
            <text:p>8640000</text:p>
          </table:table-cell>
          <table:table-cell table:formula="of:=[.B1260]/[.C1260]" office:value-type="float" office:value="0.00262291666666667" calcext:value-type="float">
            <text:p>0,00262291666666667000</text:p>
          </table:table-cell>
          <table:table-cell table:formula="of:=[.D1261]-[.D126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1260]+18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1261]/[.C1261]" office:value-type="float" office:value="0.002625" calcext:value-type="float">
            <text:p>0,00262500000000000000</text:p>
          </table:table-cell>
          <table:table-cell table:formula="of:=[.D1262]-[.D126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1261]+18" office:value-type="float" office:value="22698" calcext:value-type="float">
            <text:p>22698</text:p>
          </table:table-cell>
          <table:table-cell office:value-type="float" office:value="8640000" calcext:value-type="float">
            <text:p>8640000</text:p>
          </table:table-cell>
          <table:table-cell table:formula="of:=[.B1262]/[.C1262]" office:value-type="float" office:value="0.00262708333333333" calcext:value-type="float">
            <text:p>0,00262708333333333000</text:p>
          </table:table-cell>
          <table:table-cell table:formula="of:=[.D1263]-[.D126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1262]+18" office:value-type="float" office:value="22716" calcext:value-type="float">
            <text:p>22716</text:p>
          </table:table-cell>
          <table:table-cell office:value-type="float" office:value="8640000" calcext:value-type="float">
            <text:p>8640000</text:p>
          </table:table-cell>
          <table:table-cell table:formula="of:=[.B1263]/[.C1263]" office:value-type="float" office:value="0.00262916666666667" calcext:value-type="float">
            <text:p>0,00262916666666667000</text:p>
          </table:table-cell>
          <table:table-cell table:formula="of:=[.D1264]-[.D126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1263]+18" office:value-type="float" office:value="22734" calcext:value-type="float">
            <text:p>22734</text:p>
          </table:table-cell>
          <table:table-cell office:value-type="float" office:value="8640000" calcext:value-type="float">
            <text:p>8640000</text:p>
          </table:table-cell>
          <table:table-cell table:formula="of:=[.B1264]/[.C1264]" office:value-type="float" office:value="0.00263125" calcext:value-type="float">
            <text:p>0,00263125000000000000</text:p>
          </table:table-cell>
          <table:table-cell table:formula="of:=[.D1265]-[.D126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B1264]+18" office:value-type="float" office:value="22752" calcext:value-type="float">
            <text:p>22752</text:p>
          </table:table-cell>
          <table:table-cell office:value-type="float" office:value="8640000" calcext:value-type="float">
            <text:p>8640000</text:p>
          </table:table-cell>
          <table:table-cell table:formula="of:=[.B1265]/[.C1265]" office:value-type="float" office:value="0.00263333333333333" calcext:value-type="float">
            <text:p>0,00263333333333333000</text:p>
          </table:table-cell>
          <table:table-cell table:formula="of:=[.D1266]-[.D126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B1265]+18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1266]/[.C1266]" office:value-type="float" office:value="0.00263541666666667" calcext:value-type="float">
            <text:p>0,00263541666666667000</text:p>
          </table:table-cell>
          <table:table-cell table:formula="of:=[.D1267]-[.D126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B1266]+18" office:value-type="float" office:value="22788" calcext:value-type="float">
            <text:p>22788</text:p>
          </table:table-cell>
          <table:table-cell office:value-type="float" office:value="8640000" calcext:value-type="float">
            <text:p>8640000</text:p>
          </table:table-cell>
          <table:table-cell table:formula="of:=[.B1267]/[.C1267]" office:value-type="float" office:value="0.0026375" calcext:value-type="float">
            <text:p>0,00263750000000000000</text:p>
          </table:table-cell>
          <table:table-cell table:formula="of:=[.D1268]-[.D126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B1267]+18" office:value-type="float" office:value="22806" calcext:value-type="float">
            <text:p>22806</text:p>
          </table:table-cell>
          <table:table-cell office:value-type="float" office:value="8640000" calcext:value-type="float">
            <text:p>8640000</text:p>
          </table:table-cell>
          <table:table-cell table:formula="of:=[.B1268]/[.C1268]" office:value-type="float" office:value="0.00263958333333333" calcext:value-type="float">
            <text:p>0,00263958333333333000</text:p>
          </table:table-cell>
          <table:table-cell table:formula="of:=[.D1269]-[.D126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B1268]+18" office:value-type="float" office:value="22824" calcext:value-type="float">
            <text:p>22824</text:p>
          </table:table-cell>
          <table:table-cell office:value-type="float" office:value="8640000" calcext:value-type="float">
            <text:p>8640000</text:p>
          </table:table-cell>
          <table:table-cell table:formula="of:=[.B1269]/[.C1269]" office:value-type="float" office:value="0.00264166666666667" calcext:value-type="float">
            <text:p>0,00264166666666667000</text:p>
          </table:table-cell>
          <table:table-cell table:formula="of:=[.D1270]-[.D126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B1269]+18" office:value-type="float" office:value="22842" calcext:value-type="float">
            <text:p>22842</text:p>
          </table:table-cell>
          <table:table-cell office:value-type="float" office:value="8640000" calcext:value-type="float">
            <text:p>8640000</text:p>
          </table:table-cell>
          <table:table-cell table:formula="of:=[.B1270]/[.C1270]" office:value-type="float" office:value="0.00264375" calcext:value-type="float">
            <text:p>0,00264375000000000000</text:p>
          </table:table-cell>
          <table:table-cell table:formula="of:=[.D1271]-[.D127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B1270]+18" office:value-type="float" office:value="22860" calcext:value-type="float">
            <text:p>22860</text:p>
          </table:table-cell>
          <table:table-cell office:value-type="float" office:value="8640000" calcext:value-type="float">
            <text:p>8640000</text:p>
          </table:table-cell>
          <table:table-cell table:formula="of:=[.B1271]/[.C1271]" office:value-type="float" office:value="0.00264583333333333" calcext:value-type="float">
            <text:p>0,00264583333333333000</text:p>
          </table:table-cell>
          <table:table-cell table:formula="of:=[.D1272]-[.D127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B1271]+18" office:value-type="float" office:value="22878" calcext:value-type="float">
            <text:p>22878</text:p>
          </table:table-cell>
          <table:table-cell office:value-type="float" office:value="8640000" calcext:value-type="float">
            <text:p>8640000</text:p>
          </table:table-cell>
          <table:table-cell table:formula="of:=[.B1272]/[.C1272]" office:value-type="float" office:value="0.00264791666666667" calcext:value-type="float">
            <text:p>0,00264791666666667000</text:p>
          </table:table-cell>
          <table:table-cell table:formula="of:=[.D1273]-[.D127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B1272]+18" office:value-type="float" office:value="22896" calcext:value-type="float">
            <text:p>22896</text:p>
          </table:table-cell>
          <table:table-cell office:value-type="float" office:value="8640000" calcext:value-type="float">
            <text:p>8640000</text:p>
          </table:table-cell>
          <table:table-cell table:formula="of:=[.B1273]/[.C1273]" office:value-type="float" office:value="0.00265" calcext:value-type="float">
            <text:p>0,00265000000000000000</text:p>
          </table:table-cell>
          <table:table-cell table:formula="of:=[.D1274]-[.D127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B1273]+18" office:value-type="float" office:value="22914" calcext:value-type="float">
            <text:p>22914</text:p>
          </table:table-cell>
          <table:table-cell office:value-type="float" office:value="8640000" calcext:value-type="float">
            <text:p>8640000</text:p>
          </table:table-cell>
          <table:table-cell table:formula="of:=[.B1274]/[.C1274]" office:value-type="float" office:value="0.00265208333333333" calcext:value-type="float">
            <text:p>0,00265208333333333000</text:p>
          </table:table-cell>
          <table:table-cell table:formula="of:=[.D1275]-[.D127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B1274]+18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1275]/[.C1275]" office:value-type="float" office:value="0.00265416666666667" calcext:value-type="float">
            <text:p>0,00265416666666667000</text:p>
          </table:table-cell>
          <table:table-cell table:formula="of:=[.D1276]-[.D127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B1275]+18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1276]/[.C1276]" office:value-type="float" office:value="0.00265625" calcext:value-type="float">
            <text:p>0,00265625000000000000</text:p>
          </table:table-cell>
          <table:table-cell table:formula="of:=[.D1277]-[.D127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B1276]+18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1277]/[.C1277]" office:value-type="float" office:value="0.00265833333333333" calcext:value-type="float">
            <text:p>0,00265833333333333000</text:p>
          </table:table-cell>
          <table:table-cell table:formula="of:=[.D1278]-[.D127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B1277]+18" office:value-type="float" office:value="22986" calcext:value-type="float">
            <text:p>22986</text:p>
          </table:table-cell>
          <table:table-cell office:value-type="float" office:value="8640000" calcext:value-type="float">
            <text:p>8640000</text:p>
          </table:table-cell>
          <table:table-cell table:formula="of:=[.B1278]/[.C1278]" office:value-type="float" office:value="0.00266041666666667" calcext:value-type="float">
            <text:p>0,00266041666666667000</text:p>
          </table:table-cell>
          <table:table-cell table:formula="of:=[.D1279]-[.D127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B1278]+18" office:value-type="float" office:value="23004" calcext:value-type="float">
            <text:p>23004</text:p>
          </table:table-cell>
          <table:table-cell office:value-type="float" office:value="8640000" calcext:value-type="float">
            <text:p>8640000</text:p>
          </table:table-cell>
          <table:table-cell table:formula="of:=[.B1279]/[.C1279]" office:value-type="float" office:value="0.0026625" calcext:value-type="float">
            <text:p>0,00266250000000000000</text:p>
          </table:table-cell>
          <table:table-cell table:formula="of:=[.D1280]-[.D127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B1279]+18" office:value-type="float" office:value="23022" calcext:value-type="float">
            <text:p>23022</text:p>
          </table:table-cell>
          <table:table-cell office:value-type="float" office:value="8640000" calcext:value-type="float">
            <text:p>8640000</text:p>
          </table:table-cell>
          <table:table-cell table:formula="of:=[.B1280]/[.C1280]" office:value-type="float" office:value="0.00266458333333333" calcext:value-type="float">
            <text:p>0,00266458333333333000</text:p>
          </table:table-cell>
          <table:table-cell table:formula="of:=[.D1281]-[.D128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B1280]+18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1281]/[.C1281]" office:value-type="float" office:value="0.00266666666666667" calcext:value-type="float">
            <text:p>0,00266666666666667000</text:p>
          </table:table-cell>
          <table:table-cell table:formula="of:=[.D1282]-[.D128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B1281]+18" office:value-type="float" office:value="23058" calcext:value-type="float">
            <text:p>23058</text:p>
          </table:table-cell>
          <table:table-cell office:value-type="float" office:value="8640000" calcext:value-type="float">
            <text:p>8640000</text:p>
          </table:table-cell>
          <table:table-cell table:formula="of:=[.B1282]/[.C1282]" office:value-type="float" office:value="0.00266875" calcext:value-type="float">
            <text:p>0,00266875000000000000</text:p>
          </table:table-cell>
          <table:table-cell table:formula="of:=[.D1283]-[.D128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1282]+18" office:value-type="float" office:value="23076" calcext:value-type="float">
            <text:p>23076</text:p>
          </table:table-cell>
          <table:table-cell office:value-type="float" office:value="8640000" calcext:value-type="float">
            <text:p>8640000</text:p>
          </table:table-cell>
          <table:table-cell table:formula="of:=[.B1283]/[.C1283]" office:value-type="float" office:value="0.00267083333333333" calcext:value-type="float">
            <text:p>0,00267083333333333000</text:p>
          </table:table-cell>
          <table:table-cell table:formula="of:=[.D1284]-[.D128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B1283]+18" office:value-type="float" office:value="23094" calcext:value-type="float">
            <text:p>23094</text:p>
          </table:table-cell>
          <table:table-cell office:value-type="float" office:value="8640000" calcext:value-type="float">
            <text:p>8640000</text:p>
          </table:table-cell>
          <table:table-cell table:formula="of:=[.B1284]/[.C1284]" office:value-type="float" office:value="0.00267291666666667" calcext:value-type="float">
            <text:p>0,00267291666666667000</text:p>
          </table:table-cell>
          <table:table-cell table:formula="of:=[.D1285]-[.D128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B1284]+18" office:value-type="float" office:value="23112" calcext:value-type="float">
            <text:p>23112</text:p>
          </table:table-cell>
          <table:table-cell office:value-type="float" office:value="8640000" calcext:value-type="float">
            <text:p>8640000</text:p>
          </table:table-cell>
          <table:table-cell table:formula="of:=[.B1285]/[.C1285]" office:value-type="float" office:value="0.002675" calcext:value-type="float">
            <text:p>0,00267500000000000000</text:p>
          </table:table-cell>
          <table:table-cell table:formula="of:=[.D1286]-[.D128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B1285]+18" office:value-type="float" office:value="23130" calcext:value-type="float">
            <text:p>23130</text:p>
          </table:table-cell>
          <table:table-cell office:value-type="float" office:value="8640000" calcext:value-type="float">
            <text:p>8640000</text:p>
          </table:table-cell>
          <table:table-cell table:formula="of:=[.B1286]/[.C1286]" office:value-type="float" office:value="0.00267708333333333" calcext:value-type="float">
            <text:p>0,00267708333333333000</text:p>
          </table:table-cell>
          <table:table-cell table:formula="of:=[.D1287]-[.D128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B1286]+18" office:value-type="float" office:value="23148" calcext:value-type="float">
            <text:p>23148</text:p>
          </table:table-cell>
          <table:table-cell office:value-type="float" office:value="8640000" calcext:value-type="float">
            <text:p>8640000</text:p>
          </table:table-cell>
          <table:table-cell table:formula="of:=[.B1287]/[.C1287]" office:value-type="float" office:value="0.00267916666666667" calcext:value-type="float">
            <text:p>0,00267916666666667000</text:p>
          </table:table-cell>
          <table:table-cell table:formula="of:=[.D1288]-[.D128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B1287]+18" office:value-type="float" office:value="23166" calcext:value-type="float">
            <text:p>23166</text:p>
          </table:table-cell>
          <table:table-cell office:value-type="float" office:value="8640000" calcext:value-type="float">
            <text:p>8640000</text:p>
          </table:table-cell>
          <table:table-cell table:formula="of:=[.B1288]/[.C1288]" office:value-type="float" office:value="0.00268125" calcext:value-type="float">
            <text:p>0,00268125000000000000</text:p>
          </table:table-cell>
          <table:table-cell table:formula="of:=[.D1289]-[.D128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B1288]+18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1289]/[.C1289]" office:value-type="float" office:value="0.00268333333333333" calcext:value-type="float">
            <text:p>0,00268333333333333000</text:p>
          </table:table-cell>
          <table:table-cell table:formula="of:=[.D1290]-[.D128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B1289]+18" office:value-type="float" office:value="23202" calcext:value-type="float">
            <text:p>23202</text:p>
          </table:table-cell>
          <table:table-cell office:value-type="float" office:value="8640000" calcext:value-type="float">
            <text:p>8640000</text:p>
          </table:table-cell>
          <table:table-cell table:formula="of:=[.B1290]/[.C1290]" office:value-type="float" office:value="0.00268541666666667" calcext:value-type="float">
            <text:p>0,00268541666666667000</text:p>
          </table:table-cell>
          <table:table-cell table:formula="of:=[.D1291]-[.D129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B1290]+18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1291]/[.C1291]" office:value-type="float" office:value="0.0026875" calcext:value-type="float">
            <text:p>0,00268750000000000000</text:p>
          </table:table-cell>
          <table:table-cell table:formula="of:=[.D1292]-[.D129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B1291]+18" office:value-type="float" office:value="23238" calcext:value-type="float">
            <text:p>23238</text:p>
          </table:table-cell>
          <table:table-cell office:value-type="float" office:value="8640000" calcext:value-type="float">
            <text:p>8640000</text:p>
          </table:table-cell>
          <table:table-cell table:formula="of:=[.B1292]/[.C1292]" office:value-type="float" office:value="0.00268958333333333" calcext:value-type="float">
            <text:p>0,00268958333333333000</text:p>
          </table:table-cell>
          <table:table-cell table:formula="of:=[.D1293]-[.D129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B1292]+18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1293]/[.C1293]" office:value-type="float" office:value="0.00269166666666667" calcext:value-type="float">
            <text:p>0,00269166666666667000</text:p>
          </table:table-cell>
          <table:table-cell table:formula="of:=[.D1294]-[.D129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B1293]+18" office:value-type="float" office:value="23274" calcext:value-type="float">
            <text:p>23274</text:p>
          </table:table-cell>
          <table:table-cell office:value-type="float" office:value="8640000" calcext:value-type="float">
            <text:p>8640000</text:p>
          </table:table-cell>
          <table:table-cell table:formula="of:=[.B1294]/[.C1294]" office:value-type="float" office:value="0.00269375" calcext:value-type="float">
            <text:p>0,00269375000000000000</text:p>
          </table:table-cell>
          <table:table-cell table:formula="of:=[.D1295]-[.D129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B1294]+18" office:value-type="float" office:value="23292" calcext:value-type="float">
            <text:p>23292</text:p>
          </table:table-cell>
          <table:table-cell office:value-type="float" office:value="8640000" calcext:value-type="float">
            <text:p>8640000</text:p>
          </table:table-cell>
          <table:table-cell table:formula="of:=[.B1295]/[.C1295]" office:value-type="float" office:value="0.00269583333333333" calcext:value-type="float">
            <text:p>0,00269583333333333000</text:p>
          </table:table-cell>
          <table:table-cell table:formula="of:=[.D1296]-[.D129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B1295]+18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1296]/[.C1296]" office:value-type="float" office:value="0.00269791666666667" calcext:value-type="float">
            <text:p>0,00269791666666667000</text:p>
          </table:table-cell>
          <table:table-cell table:formula="of:=[.D1297]-[.D129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B1296]+18" office:value-type="float" office:value="23328" calcext:value-type="float">
            <text:p>23328</text:p>
          </table:table-cell>
          <table:table-cell office:value-type="float" office:value="8640000" calcext:value-type="float">
            <text:p>8640000</text:p>
          </table:table-cell>
          <table:table-cell table:formula="of:=[.B1297]/[.C1297]" office:value-type="float" office:value="0.0027" calcext:value-type="float">
            <text:p>0,00270000000000000000</text:p>
          </table:table-cell>
          <table:table-cell table:formula="of:=[.D1298]-[.D129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B1297]+18" office:value-type="float" office:value="23346" calcext:value-type="float">
            <text:p>23346</text:p>
          </table:table-cell>
          <table:table-cell office:value-type="float" office:value="8640000" calcext:value-type="float">
            <text:p>8640000</text:p>
          </table:table-cell>
          <table:table-cell table:formula="of:=[.B1298]/[.C1298]" office:value-type="float" office:value="0.00270208333333333" calcext:value-type="float">
            <text:p>0,00270208333333333000</text:p>
          </table:table-cell>
          <table:table-cell table:formula="of:=[.D1299]-[.D129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B1298]+18" office:value-type="float" office:value="23364" calcext:value-type="float">
            <text:p>23364</text:p>
          </table:table-cell>
          <table:table-cell office:value-type="float" office:value="8640000" calcext:value-type="float">
            <text:p>8640000</text:p>
          </table:table-cell>
          <table:table-cell table:formula="of:=[.B1299]/[.C1299]" office:value-type="float" office:value="0.00270416666666667" calcext:value-type="float">
            <text:p>0,00270416666666667000</text:p>
          </table:table-cell>
          <table:table-cell table:formula="of:=[.D1300]-[.D129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B1299]+18" office:value-type="float" office:value="23382" calcext:value-type="float">
            <text:p>23382</text:p>
          </table:table-cell>
          <table:table-cell office:value-type="float" office:value="8640000" calcext:value-type="float">
            <text:p>8640000</text:p>
          </table:table-cell>
          <table:table-cell table:formula="of:=[.B1300]/[.C1300]" office:value-type="float" office:value="0.00270625" calcext:value-type="float">
            <text:p>0,00270625000000000000</text:p>
          </table:table-cell>
          <table:table-cell table:formula="of:=[.D1301]-[.D130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1300]+18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1301]/[.C1301]" office:value-type="float" office:value="0.00270833333333333" calcext:value-type="float">
            <text:p>0,00270833333333333000</text:p>
          </table:table-cell>
          <table:table-cell table:formula="of:=[.D1302]-[.D130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B1301]+18" office:value-type="float" office:value="23418" calcext:value-type="float">
            <text:p>23418</text:p>
          </table:table-cell>
          <table:table-cell office:value-type="float" office:value="8640000" calcext:value-type="float">
            <text:p>8640000</text:p>
          </table:table-cell>
          <table:table-cell table:formula="of:=[.B1302]/[.C1302]" office:value-type="float" office:value="0.00271041666666667" calcext:value-type="float">
            <text:p>0,00271041666666667000</text:p>
          </table:table-cell>
          <table:table-cell table:formula="of:=[.D1303]-[.D130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B1302]+18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1303]/[.C1303]" office:value-type="float" office:value="0.0027125" calcext:value-type="float">
            <text:p>0,00271250000000000000</text:p>
          </table:table-cell>
          <table:table-cell table:formula="of:=[.D1304]-[.D130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B1303]+18" office:value-type="float" office:value="23454" calcext:value-type="float">
            <text:p>23454</text:p>
          </table:table-cell>
          <table:table-cell office:value-type="float" office:value="8640000" calcext:value-type="float">
            <text:p>8640000</text:p>
          </table:table-cell>
          <table:table-cell table:formula="of:=[.B1304]/[.C1304]" office:value-type="float" office:value="0.00271458333333333" calcext:value-type="float">
            <text:p>0,00271458333333333000</text:p>
          </table:table-cell>
          <table:table-cell table:formula="of:=[.D1305]-[.D1304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B1304]+18" office:value-type="float" office:value="23472" calcext:value-type="float">
            <text:p>23472</text:p>
          </table:table-cell>
          <table:table-cell office:value-type="float" office:value="8640000" calcext:value-type="float">
            <text:p>8640000</text:p>
          </table:table-cell>
          <table:table-cell table:formula="of:=[.B1305]/[.C1305]" office:value-type="float" office:value="0.00271666666666667" calcext:value-type="float">
            <text:p>0,00271666666666667000</text:p>
          </table:table-cell>
          <table:table-cell table:formula="of:=[.D1306]-[.D1305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B1305]+18" office:value-type="float" office:value="23490" calcext:value-type="float">
            <text:p>23490</text:p>
          </table:table-cell>
          <table:table-cell office:value-type="float" office:value="8640000" calcext:value-type="float">
            <text:p>8640000</text:p>
          </table:table-cell>
          <table:table-cell table:formula="of:=[.B1306]/[.C1306]" office:value-type="float" office:value="0.00271875" calcext:value-type="float">
            <text:p>0,00271875000000000000</text:p>
          </table:table-cell>
          <table:table-cell table:formula="of:=[.D1307]-[.D130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B1306]+18" office:value-type="float" office:value="23508" calcext:value-type="float">
            <text:p>23508</text:p>
          </table:table-cell>
          <table:table-cell office:value-type="float" office:value="8640000" calcext:value-type="float">
            <text:p>8640000</text:p>
          </table:table-cell>
          <table:table-cell table:formula="of:=[.B1307]/[.C1307]" office:value-type="float" office:value="0.00272083333333333" calcext:value-type="float">
            <text:p>0,00272083333333333000</text:p>
          </table:table-cell>
          <table:table-cell table:formula="of:=[.D1308]-[.D130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B1307]+18" office:value-type="float" office:value="23526" calcext:value-type="float">
            <text:p>23526</text:p>
          </table:table-cell>
          <table:table-cell office:value-type="float" office:value="8640000" calcext:value-type="float">
            <text:p>8640000</text:p>
          </table:table-cell>
          <table:table-cell table:formula="of:=[.B1308]/[.C1308]" office:value-type="float" office:value="0.00272291666666667" calcext:value-type="float">
            <text:p>0,00272291666666667000</text:p>
          </table:table-cell>
          <table:table-cell table:formula="of:=[.D1309]-[.D130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B1308]+18" office:value-type="float" office:value="23544" calcext:value-type="float">
            <text:p>23544</text:p>
          </table:table-cell>
          <table:table-cell office:value-type="float" office:value="8640000" calcext:value-type="float">
            <text:p>8640000</text:p>
          </table:table-cell>
          <table:table-cell table:formula="of:=[.B1309]/[.C1309]" office:value-type="float" office:value="0.002725" calcext:value-type="float">
            <text:p>0,00272500000000000000</text:p>
          </table:table-cell>
          <table:table-cell table:formula="of:=[.D1310]-[.D130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B1309]+18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1310]/[.C1310]" office:value-type="float" office:value="0.00272708333333333" calcext:value-type="float">
            <text:p>0,00272708333333333000</text:p>
          </table:table-cell>
          <table:table-cell table:formula="of:=[.D1311]-[.D131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B1310]+18" office:value-type="float" office:value="23580" calcext:value-type="float">
            <text:p>23580</text:p>
          </table:table-cell>
          <table:table-cell office:value-type="float" office:value="8640000" calcext:value-type="float">
            <text:p>8640000</text:p>
          </table:table-cell>
          <table:table-cell table:formula="of:=[.B1311]/[.C1311]" office:value-type="float" office:value="0.00272916666666667" calcext:value-type="float">
            <text:p>0,00272916666666667000</text:p>
          </table:table-cell>
          <table:table-cell table:formula="of:=[.D1312]-[.D131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B1311]+18" office:value-type="float" office:value="23598" calcext:value-type="float">
            <text:p>23598</text:p>
          </table:table-cell>
          <table:table-cell office:value-type="float" office:value="8640000" calcext:value-type="float">
            <text:p>8640000</text:p>
          </table:table-cell>
          <table:table-cell table:formula="of:=[.B1312]/[.C1312]" office:value-type="float" office:value="0.00273125" calcext:value-type="float">
            <text:p>0,00273125000000000000</text:p>
          </table:table-cell>
          <table:table-cell table:formula="of:=[.D1313]-[.D131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B1312]+18" office:value-type="float" office:value="23616" calcext:value-type="float">
            <text:p>23616</text:p>
          </table:table-cell>
          <table:table-cell office:value-type="float" office:value="8640000" calcext:value-type="float">
            <text:p>8640000</text:p>
          </table:table-cell>
          <table:table-cell table:formula="of:=[.B1313]/[.C1313]" office:value-type="float" office:value="0.00273333333333333" calcext:value-type="float">
            <text:p>0,00273333333333333000</text:p>
          </table:table-cell>
          <table:table-cell table:formula="of:=[.D1314]-[.D131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B1313]+18" office:value-type="float" office:value="23634" calcext:value-type="float">
            <text:p>23634</text:p>
          </table:table-cell>
          <table:table-cell office:value-type="float" office:value="8640000" calcext:value-type="float">
            <text:p>8640000</text:p>
          </table:table-cell>
          <table:table-cell table:formula="of:=[.B1314]/[.C1314]" office:value-type="float" office:value="0.00273541666666667" calcext:value-type="float">
            <text:p>0,00273541666666667000</text:p>
          </table:table-cell>
          <table:table-cell table:formula="of:=[.D1315]-[.D131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B1314]+18" office:value-type="float" office:value="23652" calcext:value-type="float">
            <text:p>23652</text:p>
          </table:table-cell>
          <table:table-cell office:value-type="float" office:value="8640000" calcext:value-type="float">
            <text:p>8640000</text:p>
          </table:table-cell>
          <table:table-cell table:formula="of:=[.B1315]/[.C1315]" office:value-type="float" office:value="0.0027375" calcext:value-type="float">
            <text:p>0,00273750000000000000</text:p>
          </table:table-cell>
          <table:table-cell table:formula="of:=[.D1316]-[.D131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B1315]+18" office:value-type="float" office:value="23670" calcext:value-type="float">
            <text:p>23670</text:p>
          </table:table-cell>
          <table:table-cell office:value-type="float" office:value="8640000" calcext:value-type="float">
            <text:p>8640000</text:p>
          </table:table-cell>
          <table:table-cell table:formula="of:=[.B1316]/[.C1316]" office:value-type="float" office:value="0.00273958333333333" calcext:value-type="float">
            <text:p>0,00273958333333333000</text:p>
          </table:table-cell>
          <table:table-cell table:formula="of:=[.D1317]-[.D1316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B1316]+18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1317]/[.C1317]" office:value-type="float" office:value="0.00274166666666667" calcext:value-type="float">
            <text:p>0,00274166666666667000</text:p>
          </table:table-cell>
          <table:table-cell table:formula="of:=[.D1318]-[.D1317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B1317]+18" office:value-type="float" office:value="23706" calcext:value-type="float">
            <text:p>23706</text:p>
          </table:table-cell>
          <table:table-cell office:value-type="float" office:value="8640000" calcext:value-type="float">
            <text:p>8640000</text:p>
          </table:table-cell>
          <table:table-cell table:formula="of:=[.B1318]/[.C1318]" office:value-type="float" office:value="0.00274375" calcext:value-type="float">
            <text:p>0,00274375000000000000</text:p>
          </table:table-cell>
          <table:table-cell table:formula="of:=[.D1319]-[.D1318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1318]+18" office:value-type="float" office:value="23724" calcext:value-type="float">
            <text:p>23724</text:p>
          </table:table-cell>
          <table:table-cell office:value-type="float" office:value="8640000" calcext:value-type="float">
            <text:p>8640000</text:p>
          </table:table-cell>
          <table:table-cell table:formula="of:=[.B1319]/[.C1319]" office:value-type="float" office:value="0.00274583333333333" calcext:value-type="float">
            <text:p>0,00274583333333333000</text:p>
          </table:table-cell>
          <table:table-cell table:formula="of:=[.D1320]-[.D1319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B1319]+18" office:value-type="float" office:value="23742" calcext:value-type="float">
            <text:p>23742</text:p>
          </table:table-cell>
          <table:table-cell office:value-type="float" office:value="8640000" calcext:value-type="float">
            <text:p>8640000</text:p>
          </table:table-cell>
          <table:table-cell table:formula="of:=[.B1320]/[.C1320]" office:value-type="float" office:value="0.00274791666666667" calcext:value-type="float">
            <text:p>0,00274791666666667000</text:p>
          </table:table-cell>
          <table:table-cell table:formula="of:=[.D1321]-[.D1320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B1320]+18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1321]/[.C1321]" office:value-type="float" office:value="0.00275" calcext:value-type="float">
            <text:p>0,00275000000000000000</text:p>
          </table:table-cell>
          <table:table-cell table:formula="of:=[.D1322]-[.D1321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B1321]+18" office:value-type="float" office:value="23778" calcext:value-type="float">
            <text:p>23778</text:p>
          </table:table-cell>
          <table:table-cell office:value-type="float" office:value="8640000" calcext:value-type="float">
            <text:p>8640000</text:p>
          </table:table-cell>
          <table:table-cell table:formula="of:=[.B1322]/[.C1322]" office:value-type="float" office:value="0.00275208333333333" calcext:value-type="float">
            <text:p>0,00275208333333333000</text:p>
          </table:table-cell>
          <table:table-cell table:formula="of:=[.D1323]-[.D1322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B1322]+18" office:value-type="float" office:value="23796" calcext:value-type="float">
            <text:p>23796</text:p>
          </table:table-cell>
          <table:table-cell office:value-type="float" office:value="8640000" calcext:value-type="float">
            <text:p>8640000</text:p>
          </table:table-cell>
          <table:table-cell table:formula="of:=[.B1323]/[.C1323]" office:value-type="float" office:value="0.00275416666666667" calcext:value-type="float">
            <text:p>0,00275416666666667000</text:p>
          </table:table-cell>
          <table:table-cell table:formula="of:=[.D1324]-[.D1323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B1323]+18" office:value-type="float" office:value="23814" calcext:value-type="float">
            <text:p>23814</text:p>
          </table:table-cell>
          <table:table-cell office:value-type="float" office:value="8640000" calcext:value-type="float">
            <text:p>8640000</text:p>
          </table:table-cell>
          <table:table-cell table:formula="of:=[.B1324]/[.C1324]" office:value-type="float" office:value="0.00275625" calcext:value-type="float">
            <text:p>0,00275625000000000000</text:p>
          </table:table-cell>
          <table:table-cell table:formula="of:=[.D1325]-[.D1324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B1324]+18" office:value-type="float" office:value="23832" calcext:value-type="float">
            <text:p>23832</text:p>
          </table:table-cell>
          <table:table-cell office:value-type="float" office:value="8640000" calcext:value-type="float">
            <text:p>8640000</text:p>
          </table:table-cell>
          <table:table-cell table:formula="of:=[.B1325]/[.C1325]" office:value-type="float" office:value="0.00275833333333333" calcext:value-type="float">
            <text:p>0,00275833333333333000</text:p>
          </table:table-cell>
          <table:table-cell table:formula="of:=[.D1326]-[.D1325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B1325]+18" office:value-type="float" office:value="23850" calcext:value-type="float">
            <text:p>23850</text:p>
          </table:table-cell>
          <table:table-cell office:value-type="float" office:value="8640000" calcext:value-type="float">
            <text:p>8640000</text:p>
          </table:table-cell>
          <table:table-cell table:formula="of:=[.B1326]/[.C1326]" office:value-type="float" office:value="0.00276041666666667" calcext:value-type="float">
            <text:p>0,00276041666666667000</text:p>
          </table:table-cell>
          <table:table-cell table:formula="of:=[.D1327]-[.D1326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B1326]+18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1327]/[.C1327]" office:value-type="float" office:value="0.0027625" calcext:value-type="float">
            <text:p>0,00276250000000000000</text:p>
          </table:table-cell>
          <table:table-cell table:formula="of:=[.D1328]-[.D1327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B1327]+18" office:value-type="float" office:value="23886" calcext:value-type="float">
            <text:p>23886</text:p>
          </table:table-cell>
          <table:table-cell office:value-type="float" office:value="8640000" calcext:value-type="float">
            <text:p>8640000</text:p>
          </table:table-cell>
          <table:table-cell table:formula="of:=[.B1328]/[.C1328]" office:value-type="float" office:value="0.00276458333333333" calcext:value-type="float">
            <text:p>0,00276458333333333000</text:p>
          </table:table-cell>
          <table:table-cell table:formula="of:=[.D1329]-[.D1328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B1328]+18" office:value-type="float" office:value="23904" calcext:value-type="float">
            <text:p>23904</text:p>
          </table:table-cell>
          <table:table-cell office:value-type="float" office:value="8640000" calcext:value-type="float">
            <text:p>8640000</text:p>
          </table:table-cell>
          <table:table-cell table:formula="of:=[.B1329]/[.C1329]" office:value-type="float" office:value="0.00276666666666667" calcext:value-type="float">
            <text:p>0,00276666666666667000</text:p>
          </table:table-cell>
          <table:table-cell table:formula="of:=[.D1330]-[.D1329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B1329]+18" office:value-type="float" office:value="23922" calcext:value-type="float">
            <text:p>23922</text:p>
          </table:table-cell>
          <table:table-cell office:value-type="float" office:value="8640000" calcext:value-type="float">
            <text:p>8640000</text:p>
          </table:table-cell>
          <table:table-cell table:formula="of:=[.B1330]/[.C1330]" office:value-type="float" office:value="0.00276875" calcext:value-type="float">
            <text:p>0,00276875000000000000</text:p>
          </table:table-cell>
          <table:table-cell table:formula="of:=[.D1331]-[.D1330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B1330]+18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1331]/[.C1331]" office:value-type="float" office:value="0.00277083333333333" calcext:value-type="float">
            <text:p>0,00277083333333333000</text:p>
          </table:table-cell>
          <table:table-cell table:formula="of:=[.D1332]-[.D1331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B1331]+18" office:value-type="float" office:value="23958" calcext:value-type="float">
            <text:p>23958</text:p>
          </table:table-cell>
          <table:table-cell office:value-type="float" office:value="8640000" calcext:value-type="float">
            <text:p>8640000</text:p>
          </table:table-cell>
          <table:table-cell table:formula="of:=[.B1332]/[.C1332]" office:value-type="float" office:value="0.00277291666666667" calcext:value-type="float">
            <text:p>0,00277291666666667000</text:p>
          </table:table-cell>
          <table:table-cell table:formula="of:=[.D1333]-[.D1332]" office:value-type="float" office:value="0.00000208333333333354" calcext:value-type="float">
            <text:p>0,0000020833333333335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B1332]+18" office:value-type="float" office:value="23976" calcext:value-type="float">
            <text:p>23976</text:p>
          </table:table-cell>
          <table:table-cell office:value-type="float" office:value="8640000" calcext:value-type="float">
            <text:p>8640000</text:p>
          </table:table-cell>
          <table:table-cell table:formula="of:=[.B1333]/[.C1333]" office:value-type="float" office:value="0.002775" calcext:value-type="float">
            <text:p>0,00277500000000000000</text:p>
          </table:table-cell>
          <table:table-cell table:formula="of:=[.D1334]-[.D1333]" office:value-type="float" office:value="0.0000020833333333331" calcext:value-type="float">
            <text:p>0,0000020833333333331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B1333]+18" office:value-type="float" office:value="23994" calcext:value-type="float">
            <text:p>23994</text:p>
          </table:table-cell>
          <table:table-cell office:value-type="float" office:value="8640000" calcext:value-type="float">
            <text:p>8640000</text:p>
          </table:table-cell>
          <table:table-cell table:formula="of:=[.B1334]/[.C1334]" office:value-type="float" office:value="0.00277708333333333" calcext:value-type="float">
            <text:p>0,00277708333333333000</text:p>
          </table:table-cell>
          <table:table-cell table:formula="of:=#REF!-[.D1334]" office:value-type="string" office:string-value="" calcext:value-type="error">
            <text:p>#REF!</text:p>
          </table:table-cell>
        </table:table-row>
        <table:table-row table:style-name="ro1" table:number-rows-repeated="104724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37:24.183912746</meta:creation-date>
    <dc:date>2026-05-17T15:37:31.758460417</dc:date>
    <meta:editing-duration>PT9S</meta:editing-duration>
    <meta:editing-cycles>1</meta:editing-cycles>
    <meta:document-statistic meta:table-count="1" meta:cell-count="6670" meta:object-count="0"/>
    <meta:generator>LibreOffice/24.2.7.2$Linux_X86_64 LibreOffice_project/420$Build-2</meta:generator>
  </office:meta>
</office:document-meta>
</file>