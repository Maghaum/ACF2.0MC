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25" calcext:value-type="float">
            <text:p>0,00000625000000000000</text:p>
          </table:table-cell>
          <table:table-cell table:formula="of:=[.D3]-[.D2]" office:value-type="float" office:value="0.00000625" calcext:value-type="float">
            <text:p>0,0000062500000000000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4" office:value-type="float" office:value="108" calcext:value-type="float">
            <text:p>10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25" calcext:value-type="float">
            <text:p>0,00001250000000000000</text:p>
          </table:table-cell>
          <table:table-cell table:formula="of:=[.D4]-[.D3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4" office:value-type="float" office:value="162" calcext:value-type="float">
            <text:p>16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875" calcext:value-type="float">
            <text:p>0,00001875000000000000</text:p>
          </table:table-cell>
          <table:table-cell table:formula="of:=[.D5]-[.D4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4" office:value-type="float" office:value="216" calcext:value-type="float">
            <text:p>21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5" calcext:value-type="float">
            <text:p>0,00002500000000000000</text:p>
          </table:table-cell>
          <table:table-cell table:formula="of:=[.D6]-[.D5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4" office:value-type="float" office:value="270" calcext:value-type="float">
            <text:p>27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125" calcext:value-type="float">
            <text:p>0,00003125000000000000</text:p>
          </table:table-cell>
          <table:table-cell table:formula="of:=[.D7]-[.D6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4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75" calcext:value-type="float">
            <text:p>0,00003750000000000000</text:p>
          </table:table-cell>
          <table:table-cell table:formula="of:=[.D8]-[.D7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4" office:value-type="float" office:value="378" calcext:value-type="float">
            <text:p>37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375" calcext:value-type="float">
            <text:p>0,00004375000000000000</text:p>
          </table:table-cell>
          <table:table-cell table:formula="of:=[.D9]-[.D8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4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" calcext:value-type="float">
            <text:p>0,00005000000000000000</text:p>
          </table:table-cell>
          <table:table-cell table:formula="of:=[.D10]-[.D9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4" office:value-type="float" office:value="486" calcext:value-type="float">
            <text:p>48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625" calcext:value-type="float">
            <text:p>0,00005625000000000000</text:p>
          </table:table-cell>
          <table:table-cell table:formula="of:=[.D11]-[.D10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4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25" calcext:value-type="float">
            <text:p>0,00006250000000000000</text:p>
          </table:table-cell>
          <table:table-cell table:formula="of:=[.D12]-[.D11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4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875" calcext:value-type="float">
            <text:p>0,00006875000000000000</text:p>
          </table:table-cell>
          <table:table-cell table:formula="of:=[.D13]-[.D12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4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5" calcext:value-type="float">
            <text:p>0,00007500000000000000</text:p>
          </table:table-cell>
          <table:table-cell table:formula="of:=[.D14]-[.D13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4" office:value-type="float" office:value="702" calcext:value-type="float">
            <text:p>70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125" calcext:value-type="float">
            <text:p>0,00008125000000000000</text:p>
          </table:table-cell>
          <table:table-cell table:formula="of:=[.D15]-[.D14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4" office:value-type="float" office:value="756" calcext:value-type="float">
            <text:p>75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75" calcext:value-type="float">
            <text:p>0,00008750000000000000</text:p>
          </table:table-cell>
          <table:table-cell table:formula="of:=[.D16]-[.D15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4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375" calcext:value-type="float">
            <text:p>0,00009375000000000000</text:p>
          </table:table-cell>
          <table:table-cell table:formula="of:=[.D17]-[.D16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4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" calcext:value-type="float">
            <text:p>0,00010000000000000000</text:p>
          </table:table-cell>
          <table:table-cell table:formula="of:=[.D18]-[.D17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4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0625" calcext:value-type="float">
            <text:p>0,00010625000000000000</text:p>
          </table:table-cell>
          <table:table-cell table:formula="of:=[.D19]-[.D18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4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125" calcext:value-type="float">
            <text:p>0,00011250000000000000</text:p>
          </table:table-cell>
          <table:table-cell table:formula="of:=[.D20]-[.D19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4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1875" calcext:value-type="float">
            <text:p>0,00011875000000000000</text:p>
          </table:table-cell>
          <table:table-cell table:formula="of:=[.D21]-[.D20]" office:value-type="float" office:value="0.00000625" calcext:value-type="float">
            <text:p>0,0000062500000000000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4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25" calcext:value-type="float">
            <text:p>0,00012500000000000000</text:p>
          </table:table-cell>
          <table:table-cell table:formula="of:=[.D22]-[.D21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4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3125" calcext:value-type="float">
            <text:p>0,00013125000000000000</text:p>
          </table:table-cell>
          <table:table-cell table:formula="of:=[.D23]-[.D22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4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375" calcext:value-type="float">
            <text:p>0,00013750000000000000</text:p>
          </table:table-cell>
          <table:table-cell table:formula="of:=[.D24]-[.D23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4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4375" calcext:value-type="float">
            <text:p>0,00014375000000000000</text:p>
          </table:table-cell>
          <table:table-cell table:formula="of:=[.D25]-[.D24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4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5" calcext:value-type="float">
            <text:p>0,00015000000000000000</text:p>
          </table:table-cell>
          <table:table-cell table:formula="of:=[.D26]-[.D25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4" office:value-type="float" office:value="1350" calcext:value-type="float">
            <text:p>13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5625" calcext:value-type="float">
            <text:p>0,00015625000000000000</text:p>
          </table:table-cell>
          <table:table-cell table:formula="of:=[.D27]-[.D26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4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625" calcext:value-type="float">
            <text:p>0,00016250000000000000</text:p>
          </table:table-cell>
          <table:table-cell table:formula="of:=[.D28]-[.D2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4" office:value-type="float" office:value="1458" calcext:value-type="float">
            <text:p>145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6875" calcext:value-type="float">
            <text:p>0,00016875000000000000</text:p>
          </table:table-cell>
          <table:table-cell table:formula="of:=[.D29]-[.D28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4" office:value-type="float" office:value="1512" calcext:value-type="float">
            <text:p>151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75" calcext:value-type="float">
            <text:p>0,00017500000000000000</text:p>
          </table:table-cell>
          <table:table-cell table:formula="of:=[.D30]-[.D29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4" office:value-type="float" office:value="1566" calcext:value-type="float">
            <text:p>156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8125" calcext:value-type="float">
            <text:p>0,00018125000000000000</text:p>
          </table:table-cell>
          <table:table-cell table:formula="of:=[.D31]-[.D30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4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875" calcext:value-type="float">
            <text:p>0,00018750000000000000</text:p>
          </table:table-cell>
          <table:table-cell table:formula="of:=[.D32]-[.D31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4" office:value-type="float" office:value="1674" calcext:value-type="float">
            <text:p>167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9375" calcext:value-type="float">
            <text:p>0,00019375000000000000</text:p>
          </table:table-cell>
          <table:table-cell table:formula="of:=[.D33]-[.D32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4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" calcext:value-type="float">
            <text:p>0,00020000000000000000</text:p>
          </table:table-cell>
          <table:table-cell table:formula="of:=[.D34]-[.D33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4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0625" calcext:value-type="float">
            <text:p>0,00020625000000000000</text:p>
          </table:table-cell>
          <table:table-cell table:formula="of:=[.D35]-[.D34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4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125" calcext:value-type="float">
            <text:p>0,00021250000000000000</text:p>
          </table:table-cell>
          <table:table-cell table:formula="of:=[.D36]-[.D35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4" office:value-type="float" office:value="1890" calcext:value-type="float">
            <text:p>189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1875" calcext:value-type="float">
            <text:p>0,00021875000000000000</text:p>
          </table:table-cell>
          <table:table-cell table:formula="of:=[.D37]-[.D36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4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25" calcext:value-type="float">
            <text:p>0,00022500000000000000</text:p>
          </table:table-cell>
          <table:table-cell table:formula="of:=[.D38]-[.D3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4" office:value-type="float" office:value="1998" calcext:value-type="float">
            <text:p>199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3125" calcext:value-type="float">
            <text:p>0,00023125000000000000</text:p>
          </table:table-cell>
          <table:table-cell table:formula="of:=[.D39]-[.D38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4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375" calcext:value-type="float">
            <text:p>0,00023750000000000000</text:p>
          </table:table-cell>
          <table:table-cell table:formula="of:=[.D40]-[.D39]" office:value-type="float" office:value="0.00000624999999999999" calcext:value-type="float">
            <text:p>0,00000624999999999999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4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4375" calcext:value-type="float">
            <text:p>0,00024375000000000000</text:p>
          </table:table-cell>
          <table:table-cell table:formula="of:=[.D41]-[.D40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4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5" calcext:value-type="float">
            <text:p>0,00025000000000000000</text:p>
          </table:table-cell>
          <table:table-cell table:formula="of:=[.D42]-[.D41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4" office:value-type="float" office:value="2214" calcext:value-type="float">
            <text:p>221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5625" calcext:value-type="float">
            <text:p>0,00025625000000000000</text:p>
          </table:table-cell>
          <table:table-cell table:formula="of:=[.D43]-[.D4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4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625" calcext:value-type="float">
            <text:p>0,00026250000000000000</text:p>
          </table:table-cell>
          <table:table-cell table:formula="of:=[.D44]-[.D43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4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6875" calcext:value-type="float">
            <text:p>0,00026875000000000000</text:p>
          </table:table-cell>
          <table:table-cell table:formula="of:=[.D45]-[.D44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4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75" calcext:value-type="float">
            <text:p>0,00027500000000000000</text:p>
          </table:table-cell>
          <table:table-cell table:formula="of:=[.D46]-[.D4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4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8125" calcext:value-type="float">
            <text:p>0,00028125000000000000</text:p>
          </table:table-cell>
          <table:table-cell table:formula="of:=[.D47]-[.D46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4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875" calcext:value-type="float">
            <text:p>0,00028750000000000000</text:p>
          </table:table-cell>
          <table:table-cell table:formula="of:=[.D48]-[.D4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4" office:value-type="float" office:value="2538" calcext:value-type="float">
            <text:p>253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9375" calcext:value-type="float">
            <text:p>0,00029375000000000000</text:p>
          </table:table-cell>
          <table:table-cell table:formula="of:=[.D49]-[.D4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4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" calcext:value-type="float">
            <text:p>0,00030000000000000000</text:p>
          </table:table-cell>
          <table:table-cell table:formula="of:=[.D50]-[.D49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4" office:value-type="float" office:value="2646" calcext:value-type="float">
            <text:p>264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0625" calcext:value-type="float">
            <text:p>0,00030625000000000000</text:p>
          </table:table-cell>
          <table:table-cell table:formula="of:=[.D51]-[.D50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4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125" calcext:value-type="float">
            <text:p>0,00031250000000000000</text:p>
          </table:table-cell>
          <table:table-cell table:formula="of:=[.D52]-[.D51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4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1875" calcext:value-type="float">
            <text:p>0,00031875000000000000</text:p>
          </table:table-cell>
          <table:table-cell table:formula="of:=[.D53]-[.D5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4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25" calcext:value-type="float">
            <text:p>0,00032500000000000000</text:p>
          </table:table-cell>
          <table:table-cell table:formula="of:=[.D54]-[.D53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4" office:value-type="float" office:value="2862" calcext:value-type="float">
            <text:p>286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3125" calcext:value-type="float">
            <text:p>0,00033125000000000000</text:p>
          </table:table-cell>
          <table:table-cell table:formula="of:=[.D55]-[.D54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4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375" calcext:value-type="float">
            <text:p>0,00033750000000000000</text:p>
          </table:table-cell>
          <table:table-cell table:formula="of:=[.D56]-[.D5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4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4375" calcext:value-type="float">
            <text:p>0,00034375000000000000</text:p>
          </table:table-cell>
          <table:table-cell table:formula="of:=[.D57]-[.D56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4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5" calcext:value-type="float">
            <text:p>0,00035000000000000000</text:p>
          </table:table-cell>
          <table:table-cell table:formula="of:=[.D58]-[.D5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4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5625" calcext:value-type="float">
            <text:p>0,00035625000000000000</text:p>
          </table:table-cell>
          <table:table-cell table:formula="of:=[.D59]-[.D5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4" office:value-type="float" office:value="3132" calcext:value-type="float">
            <text:p>313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625" calcext:value-type="float">
            <text:p>0,00036250000000000000</text:p>
          </table:table-cell>
          <table:table-cell table:formula="of:=[.D60]-[.D59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4" office:value-type="float" office:value="3186" calcext:value-type="float">
            <text:p>318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6875" calcext:value-type="float">
            <text:p>0,00036875000000000000</text:p>
          </table:table-cell>
          <table:table-cell table:formula="of:=[.D61]-[.D60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4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75" calcext:value-type="float">
            <text:p>0,00037500000000000000</text:p>
          </table:table-cell>
          <table:table-cell table:formula="of:=[.D62]-[.D61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4" office:value-type="float" office:value="3294" calcext:value-type="float">
            <text:p>329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8125" calcext:value-type="float">
            <text:p>0,00038125000000000000</text:p>
          </table:table-cell>
          <table:table-cell table:formula="of:=[.D63]-[.D6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4" office:value-type="float" office:value="3348" calcext:value-type="float">
            <text:p>334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875" calcext:value-type="float">
            <text:p>0,00038750000000000000</text:p>
          </table:table-cell>
          <table:table-cell table:formula="of:=[.D64]-[.D63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4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9375" calcext:value-type="float">
            <text:p>0,00039375000000000000</text:p>
          </table:table-cell>
          <table:table-cell table:formula="of:=[.D65]-[.D64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4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" calcext:value-type="float">
            <text:p>0,00040000000000000000</text:p>
          </table:table-cell>
          <table:table-cell table:formula="of:=[.D66]-[.D6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4" office:value-type="float" office:value="3510" calcext:value-type="float">
            <text:p>351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0625" calcext:value-type="float">
            <text:p>0,00040625000000000000</text:p>
          </table:table-cell>
          <table:table-cell table:formula="of:=[.D67]-[.D66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4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125" calcext:value-type="float">
            <text:p>0,00041250000000000000</text:p>
          </table:table-cell>
          <table:table-cell table:formula="of:=[.D68]-[.D6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4" office:value-type="float" office:value="3618" calcext:value-type="float">
            <text:p>361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1875" calcext:value-type="float">
            <text:p>0,00041875000000000000</text:p>
          </table:table-cell>
          <table:table-cell table:formula="of:=[.D69]-[.D6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4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25" calcext:value-type="float">
            <text:p>0,00042500000000000000</text:p>
          </table:table-cell>
          <table:table-cell table:formula="of:=[.D70]-[.D69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4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3125" calcext:value-type="float">
            <text:p>0,00043125000000000000</text:p>
          </table:table-cell>
          <table:table-cell table:formula="of:=[.D71]-[.D70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4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375" calcext:value-type="float">
            <text:p>0,00043750000000000000</text:p>
          </table:table-cell>
          <table:table-cell table:formula="of:=[.D72]-[.D71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4" office:value-type="float" office:value="3834" calcext:value-type="float">
            <text:p>383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4375" calcext:value-type="float">
            <text:p>0,00044375000000000000</text:p>
          </table:table-cell>
          <table:table-cell table:formula="of:=[.D73]-[.D7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4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5" calcext:value-type="float">
            <text:p>0,00045000000000000000</text:p>
          </table:table-cell>
          <table:table-cell table:formula="of:=[.D74]-[.D73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4" office:value-type="float" office:value="3942" calcext:value-type="float">
            <text:p>394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5625" calcext:value-type="float">
            <text:p>0,00045625000000000000</text:p>
          </table:table-cell>
          <table:table-cell table:formula="of:=[.D75]-[.D74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4" office:value-type="float" office:value="3996" calcext:value-type="float">
            <text:p>399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625" calcext:value-type="float">
            <text:p>0,00046250000000000000</text:p>
          </table:table-cell>
          <table:table-cell table:formula="of:=[.D76]-[.D7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4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6875" calcext:value-type="float">
            <text:p>0,00046875000000000000</text:p>
          </table:table-cell>
          <table:table-cell table:formula="of:=[.D77]-[.D76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4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75" calcext:value-type="float">
            <text:p>0,00047500000000000000</text:p>
          </table:table-cell>
          <table:table-cell table:formula="of:=[.D78]-[.D77]" office:value-type="float" office:value="0.00000625000000000002" calcext:value-type="float">
            <text:p>0,00000625000000000002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4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8125" calcext:value-type="float">
            <text:p>0,00048125000000000000</text:p>
          </table:table-cell>
          <table:table-cell table:formula="of:=[.D79]-[.D7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4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875" calcext:value-type="float">
            <text:p>0,00048750000000000000</text:p>
          </table:table-cell>
          <table:table-cell table:formula="of:=[.D80]-[.D79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4" office:value-type="float" office:value="4266" calcext:value-type="float">
            <text:p>426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9375" calcext:value-type="float">
            <text:p>0,00049375000000000000</text:p>
          </table:table-cell>
          <table:table-cell table:formula="of:=[.D81]-[.D8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4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" calcext:value-type="float">
            <text:p>0,00050000000000000000</text:p>
          </table:table-cell>
          <table:table-cell table:formula="of:=[.D82]-[.D8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4" office:value-type="float" office:value="4374" calcext:value-type="float">
            <text:p>437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0625" calcext:value-type="float">
            <text:p>0,00050625000000000000</text:p>
          </table:table-cell>
          <table:table-cell table:formula="of:=[.D83]-[.D82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4" office:value-type="float" office:value="4428" calcext:value-type="float">
            <text:p>442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125" calcext:value-type="float">
            <text:p>0,00051250000000000000</text:p>
          </table:table-cell>
          <table:table-cell table:formula="of:=[.D84]-[.D8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4" office:value-type="float" office:value="4482" calcext:value-type="float">
            <text:p>448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1875" calcext:value-type="float">
            <text:p>0,00051875000000000000</text:p>
          </table:table-cell>
          <table:table-cell table:formula="of:=[.D85]-[.D8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4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25" calcext:value-type="float">
            <text:p>0,00052500000000000000</text:p>
          </table:table-cell>
          <table:table-cell table:formula="of:=[.D86]-[.D85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4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3125" calcext:value-type="float">
            <text:p>0,00053125000000000000</text:p>
          </table:table-cell>
          <table:table-cell table:formula="of:=[.D87]-[.D8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4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375" calcext:value-type="float">
            <text:p>0,00053750000000000000</text:p>
          </table:table-cell>
          <table:table-cell table:formula="of:=[.D88]-[.D8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4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4375" calcext:value-type="float">
            <text:p>0,00054375000000000000</text:p>
          </table:table-cell>
          <table:table-cell table:formula="of:=[.D89]-[.D88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4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5" calcext:value-type="float">
            <text:p>0,00055000000000000000</text:p>
          </table:table-cell>
          <table:table-cell table:formula="of:=[.D90]-[.D8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4" office:value-type="float" office:value="4806" calcext:value-type="float">
            <text:p>480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5625" calcext:value-type="float">
            <text:p>0,00055625000000000000</text:p>
          </table:table-cell>
          <table:table-cell table:formula="of:=[.D91]-[.D9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4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625" calcext:value-type="float">
            <text:p>0,00056250000000000000</text:p>
          </table:table-cell>
          <table:table-cell table:formula="of:=[.D92]-[.D91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4" office:value-type="float" office:value="4914" calcext:value-type="float">
            <text:p>491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6875" calcext:value-type="float">
            <text:p>0,00056875000000000000</text:p>
          </table:table-cell>
          <table:table-cell table:formula="of:=[.D93]-[.D9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4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75" calcext:value-type="float">
            <text:p>0,00057500000000000000</text:p>
          </table:table-cell>
          <table:table-cell table:formula="of:=[.D94]-[.D9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4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8125" calcext:value-type="float">
            <text:p>0,00058125000000000000</text:p>
          </table:table-cell>
          <table:table-cell table:formula="of:=[.D95]-[.D94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4" office:value-type="float" office:value="5076" calcext:value-type="float">
            <text:p>507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875" calcext:value-type="float">
            <text:p>0,00058750000000000000</text:p>
          </table:table-cell>
          <table:table-cell table:formula="of:=[.D96]-[.D9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4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9375" calcext:value-type="float">
            <text:p>0,00059375000000000000</text:p>
          </table:table-cell>
          <table:table-cell table:formula="of:=[.D97]-[.D9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4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" calcext:value-type="float">
            <text:p>0,00060000000000000000</text:p>
          </table:table-cell>
          <table:table-cell table:formula="of:=[.D98]-[.D97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4" office:value-type="float" office:value="5238" calcext:value-type="float">
            <text:p>523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0625" calcext:value-type="float">
            <text:p>0,00060625000000000000</text:p>
          </table:table-cell>
          <table:table-cell table:formula="of:=[.D99]-[.D9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4" office:value-type="float" office:value="5292" calcext:value-type="float">
            <text:p>529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125" calcext:value-type="float">
            <text:p>0,00061250000000000000</text:p>
          </table:table-cell>
          <table:table-cell table:formula="of:=[.D100]-[.D99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4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1875" calcext:value-type="float">
            <text:p>0,00061875000000000000</text:p>
          </table:table-cell>
          <table:table-cell table:formula="of:=[.D101]-[.D10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4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25" calcext:value-type="float">
            <text:p>0,00062500000000000000</text:p>
          </table:table-cell>
          <table:table-cell table:formula="of:=[.D102]-[.D10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4" office:value-type="float" office:value="5454" calcext:value-type="float">
            <text:p>545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3125" calcext:value-type="float">
            <text:p>0,00063125000000000000</text:p>
          </table:table-cell>
          <table:table-cell table:formula="of:=[.D103]-[.D102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4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375" calcext:value-type="float">
            <text:p>0,00063750000000000000</text:p>
          </table:table-cell>
          <table:table-cell table:formula="of:=[.D104]-[.D10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4" office:value-type="float" office:value="5562" calcext:value-type="float">
            <text:p>556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4375" calcext:value-type="float">
            <text:p>0,00064375000000000000</text:p>
          </table:table-cell>
          <table:table-cell table:formula="of:=[.D105]-[.D10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4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5" calcext:value-type="float">
            <text:p>0,00065000000000000000</text:p>
          </table:table-cell>
          <table:table-cell table:formula="of:=[.D106]-[.D105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4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5625" calcext:value-type="float">
            <text:p>0,00065625000000000000</text:p>
          </table:table-cell>
          <table:table-cell table:formula="of:=[.D107]-[.D10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4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625" calcext:value-type="float">
            <text:p>0,00066250000000000000</text:p>
          </table:table-cell>
          <table:table-cell table:formula="of:=[.D108]-[.D10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4" office:value-type="float" office:value="5778" calcext:value-type="float">
            <text:p>577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6875" calcext:value-type="float">
            <text:p>0,00066875000000000000</text:p>
          </table:table-cell>
          <table:table-cell table:formula="of:=[.D109]-[.D108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4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75" calcext:value-type="float">
            <text:p>0,00067500000000000000</text:p>
          </table:table-cell>
          <table:table-cell table:formula="of:=[.D110]-[.D10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4" office:value-type="float" office:value="5886" calcext:value-type="float">
            <text:p>588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8125" calcext:value-type="float">
            <text:p>0,00068125000000000000</text:p>
          </table:table-cell>
          <table:table-cell table:formula="of:=[.D111]-[.D11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4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875" calcext:value-type="float">
            <text:p>0,00068750000000000000</text:p>
          </table:table-cell>
          <table:table-cell table:formula="of:=[.D112]-[.D111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4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9375" calcext:value-type="float">
            <text:p>0,00069375000000000000</text:p>
          </table:table-cell>
          <table:table-cell table:formula="of:=[.D113]-[.D11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4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" calcext:value-type="float">
            <text:p>0,00070000000000000000</text:p>
          </table:table-cell>
          <table:table-cell table:formula="of:=[.D114]-[.D11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4" office:value-type="float" office:value="6102" calcext:value-type="float">
            <text:p>610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0625" calcext:value-type="float">
            <text:p>0,00070625000000000000</text:p>
          </table:table-cell>
          <table:table-cell table:formula="of:=[.D115]-[.D114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4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125" calcext:value-type="float">
            <text:p>0,00071250000000000000</text:p>
          </table:table-cell>
          <table:table-cell table:formula="of:=[.D116]-[.D11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4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1875" calcext:value-type="float">
            <text:p>0,00071875000000000000</text:p>
          </table:table-cell>
          <table:table-cell table:formula="of:=[.D117]-[.D11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4" office:value-type="float" office:value="6264" calcext:value-type="float">
            <text:p>626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25" calcext:value-type="float">
            <text:p>0,00072500000000000000</text:p>
          </table:table-cell>
          <table:table-cell table:formula="of:=[.D118]-[.D117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4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3125" calcext:value-type="float">
            <text:p>0,00073125000000000000</text:p>
          </table:table-cell>
          <table:table-cell table:formula="of:=[.D119]-[.D11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4" office:value-type="float" office:value="6372" calcext:value-type="float">
            <text:p>637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375" calcext:value-type="float">
            <text:p>0,00073750000000000000</text:p>
          </table:table-cell>
          <table:table-cell table:formula="of:=[.D120]-[.D119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4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4375" calcext:value-type="float">
            <text:p>0,00074375000000000000</text:p>
          </table:table-cell>
          <table:table-cell table:formula="of:=[.D121]-[.D12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4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5" calcext:value-type="float">
            <text:p>0,00075000000000000000</text:p>
          </table:table-cell>
          <table:table-cell table:formula="of:=[.D122]-[.D12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4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5625" calcext:value-type="float">
            <text:p>0,00075625000000000000</text:p>
          </table:table-cell>
          <table:table-cell table:formula="of:=[.D123]-[.D122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4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625" calcext:value-type="float">
            <text:p>0,00076250000000000000</text:p>
          </table:table-cell>
          <table:table-cell table:formula="of:=[.D124]-[.D12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4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6875" calcext:value-type="float">
            <text:p>0,00076875000000000000</text:p>
          </table:table-cell>
          <table:table-cell table:formula="of:=[.D125]-[.D12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4" office:value-type="float" office:value="6696" calcext:value-type="float">
            <text:p>669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75" calcext:value-type="float">
            <text:p>0,00077500000000000000</text:p>
          </table:table-cell>
          <table:table-cell table:formula="of:=[.D126]-[.D125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4" office:value-type="float" office:value="6750" calcext:value-type="float">
            <text:p>6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8125" calcext:value-type="float">
            <text:p>0,00078125000000000000</text:p>
          </table:table-cell>
          <table:table-cell table:formula="of:=[.D127]-[.D12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4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875" calcext:value-type="float">
            <text:p>0,00078750000000000000</text:p>
          </table:table-cell>
          <table:table-cell table:formula="of:=[.D128]-[.D12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4" office:value-type="float" office:value="6858" calcext:value-type="float">
            <text:p>685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9375" calcext:value-type="float">
            <text:p>0,00079375000000000000</text:p>
          </table:table-cell>
          <table:table-cell table:formula="of:=[.D129]-[.D128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4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" calcext:value-type="float">
            <text:p>0,00080000000000000000</text:p>
          </table:table-cell>
          <table:table-cell table:formula="of:=[.D130]-[.D12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4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0625" calcext:value-type="float">
            <text:p>0,00080625000000000000</text:p>
          </table:table-cell>
          <table:table-cell table:formula="of:=[.D131]-[.D13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4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125" calcext:value-type="float">
            <text:p>0,00081250000000000000</text:p>
          </table:table-cell>
          <table:table-cell table:formula="of:=[.D132]-[.D131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4" office:value-type="float" office:value="7074" calcext:value-type="float">
            <text:p>707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1875" calcext:value-type="float">
            <text:p>0,00081875000000000000</text:p>
          </table:table-cell>
          <table:table-cell table:formula="of:=[.D133]-[.D13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4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25" calcext:value-type="float">
            <text:p>0,00082500000000000000</text:p>
          </table:table-cell>
          <table:table-cell table:formula="of:=[.D134]-[.D13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4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3125" calcext:value-type="float">
            <text:p>0,00083125000000000000</text:p>
          </table:table-cell>
          <table:table-cell table:formula="of:=[.D135]-[.D134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4" office:value-type="float" office:value="7236" calcext:value-type="float">
            <text:p>723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375" calcext:value-type="float">
            <text:p>0,00083750000000000000</text:p>
          </table:table-cell>
          <table:table-cell table:formula="of:=[.D136]-[.D13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4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4375" calcext:value-type="float">
            <text:p>0,00084375000000000000</text:p>
          </table:table-cell>
          <table:table-cell table:formula="of:=[.D137]-[.D13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4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5" calcext:value-type="float">
            <text:p>0,00085000000000000000</text:p>
          </table:table-cell>
          <table:table-cell table:formula="of:=[.D138]-[.D137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4" office:value-type="float" office:value="7398" calcext:value-type="float">
            <text:p>739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5625" calcext:value-type="float">
            <text:p>0,00085625000000000000</text:p>
          </table:table-cell>
          <table:table-cell table:formula="of:=[.D139]-[.D13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4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625" calcext:value-type="float">
            <text:p>0,00086250000000000000</text:p>
          </table:table-cell>
          <table:table-cell table:formula="of:=[.D140]-[.D13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4" office:value-type="float" office:value="7506" calcext:value-type="float">
            <text:p>750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6875" calcext:value-type="float">
            <text:p>0,00086875000000000000</text:p>
          </table:table-cell>
          <table:table-cell table:formula="of:=[.D141]-[.D140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4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75" calcext:value-type="float">
            <text:p>0,00087500000000000000</text:p>
          </table:table-cell>
          <table:table-cell table:formula="of:=[.D142]-[.D14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4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8125" calcext:value-type="float">
            <text:p>0,00088125000000000000</text:p>
          </table:table-cell>
          <table:table-cell table:formula="of:=[.D143]-[.D142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4" office:value-type="float" office:value="7668" calcext:value-type="float">
            <text:p>766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875" calcext:value-type="float">
            <text:p>0,00088750000000000000</text:p>
          </table:table-cell>
          <table:table-cell table:formula="of:=[.D144]-[.D14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4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9375" calcext:value-type="float">
            <text:p>0,00089375000000000000</text:p>
          </table:table-cell>
          <table:table-cell table:formula="of:=[.D145]-[.D14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4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" calcext:value-type="float">
            <text:p>0,00090000000000000000</text:p>
          </table:table-cell>
          <table:table-cell table:formula="of:=[.D146]-[.D145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4" office:value-type="float" office:value="7830" calcext:value-type="float">
            <text:p>783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0625" calcext:value-type="float">
            <text:p>0,00090625000000000000</text:p>
          </table:table-cell>
          <table:table-cell table:formula="of:=[.D147]-[.D14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4" office:value-type="float" office:value="7884" calcext:value-type="float">
            <text:p>788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125" calcext:value-type="float">
            <text:p>0,00091250000000000000</text:p>
          </table:table-cell>
          <table:table-cell table:formula="of:=[.D148]-[.D14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4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1875" calcext:value-type="float">
            <text:p>0,00091875000000000000</text:p>
          </table:table-cell>
          <table:table-cell table:formula="of:=[.D149]-[.D148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4" office:value-type="float" office:value="7992" calcext:value-type="float">
            <text:p>799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25" calcext:value-type="float">
            <text:p>0,00092500000000000000</text:p>
          </table:table-cell>
          <table:table-cell table:formula="of:=[.D150]-[.D14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4" office:value-type="float" office:value="8046" calcext:value-type="float">
            <text:p>804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93125" calcext:value-type="float">
            <text:p>0,00093125000000000000</text:p>
          </table:table-cell>
          <table:table-cell table:formula="of:=[.D151]-[.D15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4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375" calcext:value-type="float">
            <text:p>0,00093750000000000000</text:p>
          </table:table-cell>
          <table:table-cell table:formula="of:=[.D152]-[.D151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4" office:value-type="float" office:value="8154" calcext:value-type="float">
            <text:p>815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4375" calcext:value-type="float">
            <text:p>0,00094375000000000000</text:p>
          </table:table-cell>
          <table:table-cell table:formula="of:=[.D153]-[.D15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4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95" calcext:value-type="float">
            <text:p>0,00095000000000000000</text:p>
          </table:table-cell>
          <table:table-cell table:formula="of:=[.D154]-[.D15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4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5625" calcext:value-type="float">
            <text:p>0,00095625000000000000</text:p>
          </table:table-cell>
          <table:table-cell table:formula="of:=[.D155]-[.D154]" office:value-type="float" office:value="0.00000625000000000007" calcext:value-type="float">
            <text:p>0,00000625000000000007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4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625" calcext:value-type="float">
            <text:p>0,00096250000000000000</text:p>
          </table:table-cell>
          <table:table-cell table:formula="of:=[.D156]-[.D15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4" office:value-type="float" office:value="8370" calcext:value-type="float">
            <text:p>837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96875" calcext:value-type="float">
            <text:p>0,00096875000000000000</text:p>
          </table:table-cell>
          <table:table-cell table:formula="of:=[.D157]-[.D15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4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75" calcext:value-type="float">
            <text:p>0,00097500000000000000</text:p>
          </table:table-cell>
          <table:table-cell table:formula="of:=[.D158]-[.D15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4" office:value-type="float" office:value="8478" calcext:value-type="float">
            <text:p>847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8125" calcext:value-type="float">
            <text:p>0,00098125000000000000</text:p>
          </table:table-cell>
          <table:table-cell table:formula="of:=[.D159]-[.D15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4" office:value-type="float" office:value="8532" calcext:value-type="float">
            <text:p>853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9875" calcext:value-type="float">
            <text:p>0,00098750000000000000</text:p>
          </table:table-cell>
          <table:table-cell table:formula="of:=[.D160]-[.D15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4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9375" calcext:value-type="float">
            <text:p>0,00099375000000000000</text:p>
          </table:table-cell>
          <table:table-cell table:formula="of:=[.D161]-[.D16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4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" calcext:value-type="float">
            <text:p>0,00100000000000000000</text:p>
          </table:table-cell>
          <table:table-cell table:formula="of:=[.D162]-[.D16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4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0625" calcext:value-type="float">
            <text:p>0,00100625000000000000</text:p>
          </table:table-cell>
          <table:table-cell table:formula="of:=[.D163]-[.D16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4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0125" calcext:value-type="float">
            <text:p>0,00101250000000000000</text:p>
          </table:table-cell>
          <table:table-cell table:formula="of:=[.D164]-[.D16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4" office:value-type="float" office:value="8802" calcext:value-type="float">
            <text:p>880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01875" calcext:value-type="float">
            <text:p>0,00101875000000000000</text:p>
          </table:table-cell>
          <table:table-cell table:formula="of:=[.D165]-[.D16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4" office:value-type="float" office:value="8856" calcext:value-type="float">
            <text:p>885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025" calcext:value-type="float">
            <text:p>0,00102500000000000000</text:p>
          </table:table-cell>
          <table:table-cell table:formula="of:=[.D166]-[.D16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4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03125" calcext:value-type="float">
            <text:p>0,00103125000000000000</text:p>
          </table:table-cell>
          <table:table-cell table:formula="of:=[.D167]-[.D16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4" office:value-type="float" office:value="8964" calcext:value-type="float">
            <text:p>896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0375" calcext:value-type="float">
            <text:p>0,00103750000000000000</text:p>
          </table:table-cell>
          <table:table-cell table:formula="of:=[.D168]-[.D16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4" office:value-type="float" office:value="9018" calcext:value-type="float">
            <text:p>901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04375" calcext:value-type="float">
            <text:p>0,00104375000000000000</text:p>
          </table:table-cell>
          <table:table-cell table:formula="of:=[.D169]-[.D16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4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05" calcext:value-type="float">
            <text:p>0,00105000000000000000</text:p>
          </table:table-cell>
          <table:table-cell table:formula="of:=[.D170]-[.D16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4" office:value-type="float" office:value="9126" calcext:value-type="float">
            <text:p>912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05625" calcext:value-type="float">
            <text:p>0,00105625000000000000</text:p>
          </table:table-cell>
          <table:table-cell table:formula="of:=[.D171]-[.D17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4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0625" calcext:value-type="float">
            <text:p>0,00106250000000000000</text:p>
          </table:table-cell>
          <table:table-cell table:formula="of:=[.D172]-[.D17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4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06875" calcext:value-type="float">
            <text:p>0,00106875000000000000</text:p>
          </table:table-cell>
          <table:table-cell table:formula="of:=[.D173]-[.D17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4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075" calcext:value-type="float">
            <text:p>0,00107500000000000000</text:p>
          </table:table-cell>
          <table:table-cell table:formula="of:=[.D174]-[.D17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4" office:value-type="float" office:value="9342" calcext:value-type="float">
            <text:p>934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08125" calcext:value-type="float">
            <text:p>0,00108125000000000000</text:p>
          </table:table-cell>
          <table:table-cell table:formula="of:=[.D175]-[.D17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4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0875" calcext:value-type="float">
            <text:p>0,00108750000000000000</text:p>
          </table:table-cell>
          <table:table-cell table:formula="of:=[.D176]-[.D17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4" office:value-type="float" office:value="9450" calcext:value-type="float">
            <text:p>94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09375" calcext:value-type="float">
            <text:p>0,00109375000000000000</text:p>
          </table:table-cell>
          <table:table-cell table:formula="of:=[.D177]-[.D17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4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1" calcext:value-type="float">
            <text:p>0,00110000000000000000</text:p>
          </table:table-cell>
          <table:table-cell table:formula="of:=[.D178]-[.D17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4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10625" calcext:value-type="float">
            <text:p>0,00110625000000000000</text:p>
          </table:table-cell>
          <table:table-cell table:formula="of:=[.D179]-[.D17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4" office:value-type="float" office:value="9612" calcext:value-type="float">
            <text:p>961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1125" calcext:value-type="float">
            <text:p>0,00111250000000000000</text:p>
          </table:table-cell>
          <table:table-cell table:formula="of:=[.D180]-[.D17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4" office:value-type="float" office:value="9666" calcext:value-type="float">
            <text:p>966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11875" calcext:value-type="float">
            <text:p>0,00111875000000000000</text:p>
          </table:table-cell>
          <table:table-cell table:formula="of:=[.D181]-[.D18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4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125" calcext:value-type="float">
            <text:p>0,00112500000000000000</text:p>
          </table:table-cell>
          <table:table-cell table:formula="of:=[.D182]-[.D18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4" office:value-type="float" office:value="9774" calcext:value-type="float">
            <text:p>977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13125" calcext:value-type="float">
            <text:p>0,00113125000000000000</text:p>
          </table:table-cell>
          <table:table-cell table:formula="of:=[.D183]-[.D18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4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1375" calcext:value-type="float">
            <text:p>0,00113750000000000000</text:p>
          </table:table-cell>
          <table:table-cell table:formula="of:=[.D184]-[.D18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4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14375" calcext:value-type="float">
            <text:p>0,00114375000000000000</text:p>
          </table:table-cell>
          <table:table-cell table:formula="of:=[.D185]-[.D18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4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15" calcext:value-type="float">
            <text:p>0,00115000000000000000</text:p>
          </table:table-cell>
          <table:table-cell table:formula="of:=[.D186]-[.D18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4" office:value-type="float" office:value="9990" calcext:value-type="float">
            <text:p>999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15625" calcext:value-type="float">
            <text:p>0,00115625000000000000</text:p>
          </table:table-cell>
          <table:table-cell table:formula="of:=[.D187]-[.D18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4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1625" calcext:value-type="float">
            <text:p>0,00116250000000000000</text:p>
          </table:table-cell>
          <table:table-cell table:formula="of:=[.D188]-[.D18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4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16875" calcext:value-type="float">
            <text:p>0,00116875000000000000</text:p>
          </table:table-cell>
          <table:table-cell table:formula="of:=[.D189]-[.D18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4" office:value-type="float" office:value="10152" calcext:value-type="float">
            <text:p>1015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175" calcext:value-type="float">
            <text:p>0,00117500000000000000</text:p>
          </table:table-cell>
          <table:table-cell table:formula="of:=[.D190]-[.D18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4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18125" calcext:value-type="float">
            <text:p>0,00118125000000000000</text:p>
          </table:table-cell>
          <table:table-cell table:formula="of:=[.D191]-[.D19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4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1875" calcext:value-type="float">
            <text:p>0,00118750000000000000</text:p>
          </table:table-cell>
          <table:table-cell table:formula="of:=[.D192]-[.D19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4" office:value-type="float" office:value="10314" calcext:value-type="float">
            <text:p>1031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19375" calcext:value-type="float">
            <text:p>0,00119375000000000000</text:p>
          </table:table-cell>
          <table:table-cell table:formula="of:=[.D193]-[.D19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4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2" calcext:value-type="float">
            <text:p>0,00120000000000000000</text:p>
          </table:table-cell>
          <table:table-cell table:formula="of:=[.D194]-[.D19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4" office:value-type="float" office:value="10422" calcext:value-type="float">
            <text:p>1042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20625" calcext:value-type="float">
            <text:p>0,00120625000000000000</text:p>
          </table:table-cell>
          <table:table-cell table:formula="of:=[.D195]-[.D19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4" office:value-type="float" office:value="10476" calcext:value-type="float">
            <text:p>1047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2125" calcext:value-type="float">
            <text:p>0,00121250000000000000</text:p>
          </table:table-cell>
          <table:table-cell table:formula="of:=[.D196]-[.D19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4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21875" calcext:value-type="float">
            <text:p>0,00121875000000000000</text:p>
          </table:table-cell>
          <table:table-cell table:formula="of:=[.D197]-[.D19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4" office:value-type="float" office:value="10584" calcext:value-type="float">
            <text:p>1058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225" calcext:value-type="float">
            <text:p>0,00122500000000000000</text:p>
          </table:table-cell>
          <table:table-cell table:formula="of:=[.D198]-[.D19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4" office:value-type="float" office:value="10638" calcext:value-type="float">
            <text:p>1063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23125" calcext:value-type="float">
            <text:p>0,00123125000000000000</text:p>
          </table:table-cell>
          <table:table-cell table:formula="of:=[.D199]-[.D19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4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2375" calcext:value-type="float">
            <text:p>0,00123750000000000000</text:p>
          </table:table-cell>
          <table:table-cell table:formula="of:=[.D200]-[.D19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4" office:value-type="float" office:value="10746" calcext:value-type="float">
            <text:p>1074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24375" calcext:value-type="float">
            <text:p>0,00124375000000000000</text:p>
          </table:table-cell>
          <table:table-cell table:formula="of:=[.D201]-[.D20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4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25" calcext:value-type="float">
            <text:p>0,00125000000000000000</text:p>
          </table:table-cell>
          <table:table-cell table:formula="of:=[.D202]-[.D20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4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25625" calcext:value-type="float">
            <text:p>0,00125625000000000000</text:p>
          </table:table-cell>
          <table:table-cell table:formula="of:=[.D203]-[.D20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4" office:value-type="float" office:value="10908" calcext:value-type="float">
            <text:p>1090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2625" calcext:value-type="float">
            <text:p>0,00126250000000000000</text:p>
          </table:table-cell>
          <table:table-cell table:formula="of:=[.D204]-[.D20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4" office:value-type="float" office:value="10962" calcext:value-type="float">
            <text:p>1096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26875" calcext:value-type="float">
            <text:p>0,00126875000000000000</text:p>
          </table:table-cell>
          <table:table-cell table:formula="of:=[.D205]-[.D20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4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275" calcext:value-type="float">
            <text:p>0,00127500000000000000</text:p>
          </table:table-cell>
          <table:table-cell table:formula="of:=[.D206]-[.D20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4" office:value-type="float" office:value="11070" calcext:value-type="float">
            <text:p>1107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28125" calcext:value-type="float">
            <text:p>0,00128125000000000000</text:p>
          </table:table-cell>
          <table:table-cell table:formula="of:=[.D207]-[.D20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4" office:value-type="float" office:value="11124" calcext:value-type="float">
            <text:p>1112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2875" calcext:value-type="float">
            <text:p>0,00128750000000000000</text:p>
          </table:table-cell>
          <table:table-cell table:formula="of:=[.D208]-[.D20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4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29375" calcext:value-type="float">
            <text:p>0,00129375000000000000</text:p>
          </table:table-cell>
          <table:table-cell table:formula="of:=[.D209]-[.D20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4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3" calcext:value-type="float">
            <text:p>0,00130000000000000000</text:p>
          </table:table-cell>
          <table:table-cell table:formula="of:=[.D210]-[.D20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4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30625" calcext:value-type="float">
            <text:p>0,00130625000000000000</text:p>
          </table:table-cell>
          <table:table-cell table:formula="of:=[.D211]-[.D21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4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3125" calcext:value-type="float">
            <text:p>0,00131250000000000000</text:p>
          </table:table-cell>
          <table:table-cell table:formula="of:=[.D212]-[.D21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4" office:value-type="float" office:value="11394" calcext:value-type="float">
            <text:p>1139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31875" calcext:value-type="float">
            <text:p>0,00131875000000000000</text:p>
          </table:table-cell>
          <table:table-cell table:formula="of:=[.D213]-[.D21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4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325" calcext:value-type="float">
            <text:p>0,00132500000000000000</text:p>
          </table:table-cell>
          <table:table-cell table:formula="of:=[.D214]-[.D21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4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33125" calcext:value-type="float">
            <text:p>0,00133125000000000000</text:p>
          </table:table-cell>
          <table:table-cell table:formula="of:=[.D215]-[.D21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4" office:value-type="float" office:value="11556" calcext:value-type="float">
            <text:p>1155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3375" calcext:value-type="float">
            <text:p>0,00133750000000000000</text:p>
          </table:table-cell>
          <table:table-cell table:formula="of:=[.D216]-[.D21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4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34375" calcext:value-type="float">
            <text:p>0,00134375000000000000</text:p>
          </table:table-cell>
          <table:table-cell table:formula="of:=[.D217]-[.D21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4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35" calcext:value-type="float">
            <text:p>0,00135000000000000000</text:p>
          </table:table-cell>
          <table:table-cell table:formula="of:=[.D218]-[.D21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4" office:value-type="float" office:value="11718" calcext:value-type="float">
            <text:p>1171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35625" calcext:value-type="float">
            <text:p>0,00135625000000000000</text:p>
          </table:table-cell>
          <table:table-cell table:formula="of:=[.D219]-[.D21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4" office:value-type="float" office:value="11772" calcext:value-type="float">
            <text:p>1177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3625" calcext:value-type="float">
            <text:p>0,00136250000000000000</text:p>
          </table:table-cell>
          <table:table-cell table:formula="of:=[.D220]-[.D21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4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36875" calcext:value-type="float">
            <text:p>0,00136875000000000000</text:p>
          </table:table-cell>
          <table:table-cell table:formula="of:=[.D221]-[.D22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4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375" calcext:value-type="float">
            <text:p>0,00137500000000000000</text:p>
          </table:table-cell>
          <table:table-cell table:formula="of:=[.D222]-[.D22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4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38125" calcext:value-type="float">
            <text:p>0,00138125000000000000</text:p>
          </table:table-cell>
          <table:table-cell table:formula="of:=[.D223]-[.D22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4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3875" calcext:value-type="float">
            <text:p>0,00138750000000000000</text:p>
          </table:table-cell>
          <table:table-cell table:formula="of:=[.D224]-[.D22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4" office:value-type="float" office:value="12042" calcext:value-type="float">
            <text:p>1204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39375" calcext:value-type="float">
            <text:p>0,00139375000000000000</text:p>
          </table:table-cell>
          <table:table-cell table:formula="of:=[.D225]-[.D22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4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4" calcext:value-type="float">
            <text:p>0,00140000000000000000</text:p>
          </table:table-cell>
          <table:table-cell table:formula="of:=[.D226]-[.D22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4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40625" calcext:value-type="float">
            <text:p>0,00140625000000000000</text:p>
          </table:table-cell>
          <table:table-cell table:formula="of:=[.D227]-[.D22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4" office:value-type="float" office:value="12204" calcext:value-type="float">
            <text:p>1220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4125" calcext:value-type="float">
            <text:p>0,00141250000000000000</text:p>
          </table:table-cell>
          <table:table-cell table:formula="of:=[.D228]-[.D22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4" office:value-type="float" office:value="12258" calcext:value-type="float">
            <text:p>1225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41875" calcext:value-type="float">
            <text:p>0,00141875000000000000</text:p>
          </table:table-cell>
          <table:table-cell table:formula="of:=[.D229]-[.D22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4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425" calcext:value-type="float">
            <text:p>0,00142500000000000000</text:p>
          </table:table-cell>
          <table:table-cell table:formula="of:=[.D230]-[.D22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4" office:value-type="float" office:value="12366" calcext:value-type="float">
            <text:p>1236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43125" calcext:value-type="float">
            <text:p>0,00143125000000000000</text:p>
          </table:table-cell>
          <table:table-cell table:formula="of:=[.D231]-[.D23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4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4375" calcext:value-type="float">
            <text:p>0,00143750000000000000</text:p>
          </table:table-cell>
          <table:table-cell table:formula="of:=[.D232]-[.D23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4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44375" calcext:value-type="float">
            <text:p>0,00144375000000000000</text:p>
          </table:table-cell>
          <table:table-cell table:formula="of:=[.D233]-[.D23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4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45" calcext:value-type="float">
            <text:p>0,00145000000000000000</text:p>
          </table:table-cell>
          <table:table-cell table:formula="of:=[.D234]-[.D23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4" office:value-type="float" office:value="12582" calcext:value-type="float">
            <text:p>1258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45625" calcext:value-type="float">
            <text:p>0,00145625000000000000</text:p>
          </table:table-cell>
          <table:table-cell table:formula="of:=[.D235]-[.D23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4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4625" calcext:value-type="float">
            <text:p>0,00146250000000000000</text:p>
          </table:table-cell>
          <table:table-cell table:formula="of:=[.D236]-[.D23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4" office:value-type="float" office:value="12690" calcext:value-type="float">
            <text:p>1269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46875" calcext:value-type="float">
            <text:p>0,00146875000000000000</text:p>
          </table:table-cell>
          <table:table-cell table:formula="of:=[.D237]-[.D23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4" office:value-type="float" office:value="12744" calcext:value-type="float">
            <text:p>1274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475" calcext:value-type="float">
            <text:p>0,00147500000000000000</text:p>
          </table:table-cell>
          <table:table-cell table:formula="of:=[.D238]-[.D23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4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48125" calcext:value-type="float">
            <text:p>0,00148125000000000000</text:p>
          </table:table-cell>
          <table:table-cell table:formula="of:=[.D239]-[.D23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4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4875" calcext:value-type="float">
            <text:p>0,00148750000000000000</text:p>
          </table:table-cell>
          <table:table-cell table:formula="of:=[.D240]-[.D23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4" office:value-type="float" office:value="12906" calcext:value-type="float">
            <text:p>1290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49375" calcext:value-type="float">
            <text:p>0,00149375000000000000</text:p>
          </table:table-cell>
          <table:table-cell table:formula="of:=[.D241]-[.D24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4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5" calcext:value-type="float">
            <text:p>0,00150000000000000000</text:p>
          </table:table-cell>
          <table:table-cell table:formula="of:=[.D242]-[.D24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4" office:value-type="float" office:value="13014" calcext:value-type="float">
            <text:p>1301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50625" calcext:value-type="float">
            <text:p>0,00150625000000000000</text:p>
          </table:table-cell>
          <table:table-cell table:formula="of:=[.D243]-[.D24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4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5125" calcext:value-type="float">
            <text:p>0,00151250000000000000</text:p>
          </table:table-cell>
          <table:table-cell table:formula="of:=[.D244]-[.D24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4" office:value-type="float" office:value="13122" calcext:value-type="float">
            <text:p>1312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51875" calcext:value-type="float">
            <text:p>0,00151875000000000000</text:p>
          </table:table-cell>
          <table:table-cell table:formula="of:=[.D245]-[.D24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4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525" calcext:value-type="float">
            <text:p>0,00152500000000000000</text:p>
          </table:table-cell>
          <table:table-cell table:formula="of:=[.D246]-[.D24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4" office:value-type="float" office:value="13230" calcext:value-type="float">
            <text:p>1323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53125" calcext:value-type="float">
            <text:p>0,00153125000000000000</text:p>
          </table:table-cell>
          <table:table-cell table:formula="of:=[.D247]-[.D24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4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5375" calcext:value-type="float">
            <text:p>0,00153750000000000000</text:p>
          </table:table-cell>
          <table:table-cell table:formula="of:=[.D248]-[.D24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4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54375" calcext:value-type="float">
            <text:p>0,00154375000000000000</text:p>
          </table:table-cell>
          <table:table-cell table:formula="of:=[.D249]-[.D24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4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55" calcext:value-type="float">
            <text:p>0,00155000000000000000</text:p>
          </table:table-cell>
          <table:table-cell table:formula="of:=[.D250]-[.D24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4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55625" calcext:value-type="float">
            <text:p>0,00155625000000000000</text:p>
          </table:table-cell>
          <table:table-cell table:formula="of:=[.D251]-[.D25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4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5625" calcext:value-type="float">
            <text:p>0,00156250000000000000</text:p>
          </table:table-cell>
          <table:table-cell table:formula="of:=[.D252]-[.D25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4" office:value-type="float" office:value="13554" calcext:value-type="float">
            <text:p>1355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56875" calcext:value-type="float">
            <text:p>0,00156875000000000000</text:p>
          </table:table-cell>
          <table:table-cell table:formula="of:=[.D253]-[.D25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4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575" calcext:value-type="float">
            <text:p>0,00157500000000000000</text:p>
          </table:table-cell>
          <table:table-cell table:formula="of:=[.D254]-[.D25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4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58125" calcext:value-type="float">
            <text:p>0,00158125000000000000</text:p>
          </table:table-cell>
          <table:table-cell table:formula="of:=[.D255]-[.D25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4" office:value-type="float" office:value="13716" calcext:value-type="float">
            <text:p>1371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5875" calcext:value-type="float">
            <text:p>0,00158750000000000000</text:p>
          </table:table-cell>
          <table:table-cell table:formula="of:=[.D256]-[.D25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4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59375" calcext:value-type="float">
            <text:p>0,00159375000000000000</text:p>
          </table:table-cell>
          <table:table-cell table:formula="of:=[.D257]-[.D25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4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6" calcext:value-type="float">
            <text:p>0,00160000000000000000</text:p>
          </table:table-cell>
          <table:table-cell table:formula="of:=[.D258]-[.D25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4" office:value-type="float" office:value="13878" calcext:value-type="float">
            <text:p>1387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60625" calcext:value-type="float">
            <text:p>0,00160625000000000000</text:p>
          </table:table-cell>
          <table:table-cell table:formula="of:=[.D259]-[.D25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4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6125" calcext:value-type="float">
            <text:p>0,00161250000000000000</text:p>
          </table:table-cell>
          <table:table-cell table:formula="of:=[.D260]-[.D25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4" office:value-type="float" office:value="13986" calcext:value-type="float">
            <text:p>1398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61875" calcext:value-type="float">
            <text:p>0,00161875000000000000</text:p>
          </table:table-cell>
          <table:table-cell table:formula="of:=[.D261]-[.D26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4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625" calcext:value-type="float">
            <text:p>0,00162500000000000000</text:p>
          </table:table-cell>
          <table:table-cell table:formula="of:=[.D262]-[.D26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4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63125" calcext:value-type="float">
            <text:p>0,00163125000000000000</text:p>
          </table:table-cell>
          <table:table-cell table:formula="of:=[.D263]-[.D26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4" office:value-type="float" office:value="14148" calcext:value-type="float">
            <text:p>1414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6375" calcext:value-type="float">
            <text:p>0,00163750000000000000</text:p>
          </table:table-cell>
          <table:table-cell table:formula="of:=[.D264]-[.D26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4" office:value-type="float" office:value="14202" calcext:value-type="float">
            <text:p>1420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64375" calcext:value-type="float">
            <text:p>0,00164375000000000000</text:p>
          </table:table-cell>
          <table:table-cell table:formula="of:=[.D265]-[.D26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4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65" calcext:value-type="float">
            <text:p>0,00165000000000000000</text:p>
          </table:table-cell>
          <table:table-cell table:formula="of:=[.D266]-[.D26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4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65625" calcext:value-type="float">
            <text:p>0,00165625000000000000</text:p>
          </table:table-cell>
          <table:table-cell table:formula="of:=[.D267]-[.D26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4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6625" calcext:value-type="float">
            <text:p>0,00166250000000000000</text:p>
          </table:table-cell>
          <table:table-cell table:formula="of:=[.D268]-[.D26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4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66875" calcext:value-type="float">
            <text:p>0,00166875000000000000</text:p>
          </table:table-cell>
          <table:table-cell table:formula="of:=[.D269]-[.D26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4" office:value-type="float" office:value="14472" calcext:value-type="float">
            <text:p>1447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675" calcext:value-type="float">
            <text:p>0,00167500000000000000</text:p>
          </table:table-cell>
          <table:table-cell table:formula="of:=[.D270]-[.D26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4" office:value-type="float" office:value="14526" calcext:value-type="float">
            <text:p>1452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68125" calcext:value-type="float">
            <text:p>0,00168125000000000000</text:p>
          </table:table-cell>
          <table:table-cell table:formula="of:=[.D271]-[.D27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4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6875" calcext:value-type="float">
            <text:p>0,00168750000000000000</text:p>
          </table:table-cell>
          <table:table-cell table:formula="of:=[.D272]-[.D27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4" office:value-type="float" office:value="14634" calcext:value-type="float">
            <text:p>1463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69375" calcext:value-type="float">
            <text:p>0,00169375000000000000</text:p>
          </table:table-cell>
          <table:table-cell table:formula="of:=[.D273]-[.D27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4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7" calcext:value-type="float">
            <text:p>0,00170000000000000000</text:p>
          </table:table-cell>
          <table:table-cell table:formula="of:=[.D274]-[.D27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4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70625" calcext:value-type="float">
            <text:p>0,00170625000000000000</text:p>
          </table:table-cell>
          <table:table-cell table:formula="of:=[.D275]-[.D27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4" office:value-type="float" office:value="14796" calcext:value-type="float">
            <text:p>1479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7125" calcext:value-type="float">
            <text:p>0,00171250000000000000</text:p>
          </table:table-cell>
          <table:table-cell table:formula="of:=[.D276]-[.D27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4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71875" calcext:value-type="float">
            <text:p>0,00171875000000000000</text:p>
          </table:table-cell>
          <table:table-cell table:formula="of:=[.D277]-[.D27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4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725" calcext:value-type="float">
            <text:p>0,00172500000000000000</text:p>
          </table:table-cell>
          <table:table-cell table:formula="of:=[.D278]-[.D27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4" office:value-type="float" office:value="14958" calcext:value-type="float">
            <text:p>1495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73125" calcext:value-type="float">
            <text:p>0,00173125000000000000</text:p>
          </table:table-cell>
          <table:table-cell table:formula="of:=[.D279]-[.D27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4" office:value-type="float" office:value="15012" calcext:value-type="float">
            <text:p>1501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7375" calcext:value-type="float">
            <text:p>0,00173750000000000000</text:p>
          </table:table-cell>
          <table:table-cell table:formula="of:=[.D280]-[.D27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4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74375" calcext:value-type="float">
            <text:p>0,00174375000000000000</text:p>
          </table:table-cell>
          <table:table-cell table:formula="of:=[.D281]-[.D28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4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75" calcext:value-type="float">
            <text:p>0,00175000000000000000</text:p>
          </table:table-cell>
          <table:table-cell table:formula="of:=[.D282]-[.D28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4" office:value-type="float" office:value="15174" calcext:value-type="float">
            <text:p>1517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75625" calcext:value-type="float">
            <text:p>0,00175625000000000000</text:p>
          </table:table-cell>
          <table:table-cell table:formula="of:=[.D283]-[.D28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4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7625" calcext:value-type="float">
            <text:p>0,00176250000000000000</text:p>
          </table:table-cell>
          <table:table-cell table:formula="of:=[.D284]-[.D28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4" office:value-type="float" office:value="15282" calcext:value-type="float">
            <text:p>1528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76875" calcext:value-type="float">
            <text:p>0,00176875000000000000</text:p>
          </table:table-cell>
          <table:table-cell table:formula="of:=[.D285]-[.D28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4" office:value-type="float" office:value="15336" calcext:value-type="float">
            <text:p>1533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775" calcext:value-type="float">
            <text:p>0,00177500000000000000</text:p>
          </table:table-cell>
          <table:table-cell table:formula="of:=[.D286]-[.D28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4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78125" calcext:value-type="float">
            <text:p>0,00178125000000000000</text:p>
          </table:table-cell>
          <table:table-cell table:formula="of:=[.D287]-[.D28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4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7875" calcext:value-type="float">
            <text:p>0,00178750000000000000</text:p>
          </table:table-cell>
          <table:table-cell table:formula="of:=[.D288]-[.D28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4" office:value-type="float" office:value="15498" calcext:value-type="float">
            <text:p>1549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79375" calcext:value-type="float">
            <text:p>0,00179375000000000000</text:p>
          </table:table-cell>
          <table:table-cell table:formula="of:=[.D289]-[.D28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4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8" calcext:value-type="float">
            <text:p>0,00180000000000000000</text:p>
          </table:table-cell>
          <table:table-cell table:formula="of:=[.D290]-[.D28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4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80625" calcext:value-type="float">
            <text:p>0,00180625000000000000</text:p>
          </table:table-cell>
          <table:table-cell table:formula="of:=[.D291]-[.D29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4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8125" calcext:value-type="float">
            <text:p>0,00181250000000000000</text:p>
          </table:table-cell>
          <table:table-cell table:formula="of:=[.D292]-[.D29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4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81875" calcext:value-type="float">
            <text:p>0,00181875000000000000</text:p>
          </table:table-cell>
          <table:table-cell table:formula="of:=[.D293]-[.D29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4" office:value-type="float" office:value="15768" calcext:value-type="float">
            <text:p>1576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825" calcext:value-type="float">
            <text:p>0,00182500000000000000</text:p>
          </table:table-cell>
          <table:table-cell table:formula="of:=[.D294]-[.D29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4" office:value-type="float" office:value="15822" calcext:value-type="float">
            <text:p>1582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83125" calcext:value-type="float">
            <text:p>0,00183125000000000000</text:p>
          </table:table-cell>
          <table:table-cell table:formula="of:=[.D295]-[.D29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4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8375" calcext:value-type="float">
            <text:p>0,00183750000000000000</text:p>
          </table:table-cell>
          <table:table-cell table:formula="of:=[.D296]-[.D29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4" office:value-type="float" office:value="15930" calcext:value-type="float">
            <text:p>1593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84375" calcext:value-type="float">
            <text:p>0,00184375000000000000</text:p>
          </table:table-cell>
          <table:table-cell table:formula="of:=[.D297]-[.D29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4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85" calcext:value-type="float">
            <text:p>0,00185000000000000000</text:p>
          </table:table-cell>
          <table:table-cell table:formula="of:=[.D298]-[.D297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4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85625" calcext:value-type="float">
            <text:p>0,00185625000000000000</text:p>
          </table:table-cell>
          <table:table-cell table:formula="of:=[.D299]-[.D29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4" office:value-type="float" office:value="16092" calcext:value-type="float">
            <text:p>1609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8625" calcext:value-type="float">
            <text:p>0,00186250000000000000</text:p>
          </table:table-cell>
          <table:table-cell table:formula="of:=[.D300]-[.D29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4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86875" calcext:value-type="float">
            <text:p>0,00186875000000000000</text:p>
          </table:table-cell>
          <table:table-cell table:formula="of:=[.D301]-[.D30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4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875" calcext:value-type="float">
            <text:p>0,00187500000000000000</text:p>
          </table:table-cell>
          <table:table-cell table:formula="of:=[.D302]-[.D30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4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88125" calcext:value-type="float">
            <text:p>0,00188125000000000000</text:p>
          </table:table-cell>
          <table:table-cell table:formula="of:=[.D303]-[.D30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4" office:value-type="float" office:value="16308" calcext:value-type="float">
            <text:p>1630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8875" calcext:value-type="float">
            <text:p>0,00188750000000000000</text:p>
          </table:table-cell>
          <table:table-cell table:formula="of:=[.D304]-[.D303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4" office:value-type="float" office:value="16362" calcext:value-type="float">
            <text:p>1636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89375" calcext:value-type="float">
            <text:p>0,00189375000000000000</text:p>
          </table:table-cell>
          <table:table-cell table:formula="of:=[.D305]-[.D304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4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9" calcext:value-type="float">
            <text:p>0,00190000000000000000</text:p>
          </table:table-cell>
          <table:table-cell table:formula="of:=[.D306]-[.D305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4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90625" calcext:value-type="float">
            <text:p>0,00190625000000000000</text:p>
          </table:table-cell>
          <table:table-cell table:formula="of:=[.D307]-[.D306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4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9125" calcext:value-type="float">
            <text:p>0,00191250000000000000</text:p>
          </table:table-cell>
          <table:table-cell table:formula="of:=[.D308]-[.D30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4" office:value-type="float" office:value="16578" calcext:value-type="float">
            <text:p>1657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91875" calcext:value-type="float">
            <text:p>0,00191875000000000000</text:p>
          </table:table-cell>
          <table:table-cell table:formula="of:=[.D309]-[.D308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4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925" calcext:value-type="float">
            <text:p>0,00192500000000000000</text:p>
          </table:table-cell>
          <table:table-cell table:formula="of:=[.D310]-[.D309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4" office:value-type="float" office:value="16686" calcext:value-type="float">
            <text:p>1668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93125" calcext:value-type="float">
            <text:p>0,00193125000000000000</text:p>
          </table:table-cell>
          <table:table-cell table:formula="of:=[.D311]-[.D310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4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9375" calcext:value-type="float">
            <text:p>0,00193750000000000000</text:p>
          </table:table-cell>
          <table:table-cell table:formula="of:=[.D312]-[.D311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4" office:value-type="float" office:value="16794" calcext:value-type="float">
            <text:p>1679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94375" calcext:value-type="float">
            <text:p>0,00194375000000000000</text:p>
          </table:table-cell>
          <table:table-cell table:formula="of:=[.D313]-[.D312]" office:value-type="float" office:value="0.00000624999999999996" calcext:value-type="float">
            <text:p>0,00000624999999999996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4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95" calcext:value-type="float">
            <text:p>0,00195000000000000000</text:p>
          </table:table-cell>
          <table:table-cell table:formula="of:=[.D314]-[.D31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4" office:value-type="float" office:value="16902" calcext:value-type="float">
            <text:p>1690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95625" calcext:value-type="float">
            <text:p>0,00195625000000000000</text:p>
          </table:table-cell>
          <table:table-cell table:formula="of:=[.D315]-[.D31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4" office:value-type="float" office:value="16956" calcext:value-type="float">
            <text:p>1695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9625" calcext:value-type="float">
            <text:p>0,00196250000000000000</text:p>
          </table:table-cell>
          <table:table-cell table:formula="of:=[.D316]-[.D31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4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96875" calcext:value-type="float">
            <text:p>0,00196875000000000000</text:p>
          </table:table-cell>
          <table:table-cell table:formula="of:=[.D317]-[.D31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4" office:value-type="float" office:value="17064" calcext:value-type="float">
            <text:p>1706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975" calcext:value-type="float">
            <text:p>0,00197500000000000000</text:p>
          </table:table-cell>
          <table:table-cell table:formula="of:=[.D318]-[.D317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4" office:value-type="float" office:value="17118" calcext:value-type="float">
            <text:p>1711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98125" calcext:value-type="float">
            <text:p>0,00198125000000000000</text:p>
          </table:table-cell>
          <table:table-cell table:formula="of:=[.D319]-[.D31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4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9875" calcext:value-type="float">
            <text:p>0,00198750000000000000</text:p>
          </table:table-cell>
          <table:table-cell table:formula="of:=[.D320]-[.D319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4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99375" calcext:value-type="float">
            <text:p>0,00199375000000000000</text:p>
          </table:table-cell>
          <table:table-cell table:formula="of:=[.D321]-[.D32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4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" calcext:value-type="float">
            <text:p>0,00200000000000000000</text:p>
          </table:table-cell>
          <table:table-cell table:formula="of:=[.D322]-[.D32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4" office:value-type="float" office:value="17334" calcext:value-type="float">
            <text:p>1733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00625" calcext:value-type="float">
            <text:p>0,00200625000000000000</text:p>
          </table:table-cell>
          <table:table-cell table:formula="of:=[.D323]-[.D32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4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0125" calcext:value-type="float">
            <text:p>0,00201250000000000000</text:p>
          </table:table-cell>
          <table:table-cell table:formula="of:=[.D324]-[.D32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4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01875" calcext:value-type="float">
            <text:p>0,00201875000000000000</text:p>
          </table:table-cell>
          <table:table-cell table:formula="of:=[.D325]-[.D32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4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025" calcext:value-type="float">
            <text:p>0,00202500000000000000</text:p>
          </table:table-cell>
          <table:table-cell table:formula="of:=[.D326]-[.D32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4" office:value-type="float" office:value="17550" calcext:value-type="float">
            <text:p>175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03125" calcext:value-type="float">
            <text:p>0,00203125000000000000</text:p>
          </table:table-cell>
          <table:table-cell table:formula="of:=[.D327]-[.D32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4" office:value-type="float" office:value="17604" calcext:value-type="float">
            <text:p>1760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0375" calcext:value-type="float">
            <text:p>0,00203750000000000000</text:p>
          </table:table-cell>
          <table:table-cell table:formula="of:=[.D328]-[.D32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4" office:value-type="float" office:value="17658" calcext:value-type="float">
            <text:p>1765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04375" calcext:value-type="float">
            <text:p>0,00204375000000000000</text:p>
          </table:table-cell>
          <table:table-cell table:formula="of:=[.D329]-[.D32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4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05" calcext:value-type="float">
            <text:p>0,00205000000000000000</text:p>
          </table:table-cell>
          <table:table-cell table:formula="of:=[.D330]-[.D329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4" office:value-type="float" office:value="17766" calcext:value-type="float">
            <text:p>1776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05625" calcext:value-type="float">
            <text:p>0,00205625000000000000</text:p>
          </table:table-cell>
          <table:table-cell table:formula="of:=[.D331]-[.D33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4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0625" calcext:value-type="float">
            <text:p>0,00206250000000000000</text:p>
          </table:table-cell>
          <table:table-cell table:formula="of:=[.D332]-[.D33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4" office:value-type="float" office:value="17874" calcext:value-type="float">
            <text:p>1787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06875" calcext:value-type="float">
            <text:p>0,00206875000000000000</text:p>
          </table:table-cell>
          <table:table-cell table:formula="of:=[.D333]-[.D33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4" office:value-type="float" office:value="17928" calcext:value-type="float">
            <text:p>1792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075" calcext:value-type="float">
            <text:p>0,00207500000000000000</text:p>
          </table:table-cell>
          <table:table-cell table:formula="of:=[.D334]-[.D33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4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08125" calcext:value-type="float">
            <text:p>0,00208125000000000000</text:p>
          </table:table-cell>
          <table:table-cell table:formula="of:=[.D335]-[.D33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4" office:value-type="float" office:value="18036" calcext:value-type="float">
            <text:p>1803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0875" calcext:value-type="float">
            <text:p>0,00208750000000000000</text:p>
          </table:table-cell>
          <table:table-cell table:formula="of:=[.D336]-[.D33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4" office:value-type="float" office:value="18090" calcext:value-type="float">
            <text:p>1809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09375" calcext:value-type="float">
            <text:p>0,00209375000000000000</text:p>
          </table:table-cell>
          <table:table-cell table:formula="of:=[.D337]-[.D33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4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1" calcext:value-type="float">
            <text:p>0,00210000000000000000</text:p>
          </table:table-cell>
          <table:table-cell table:formula="of:=[.D338]-[.D33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4" office:value-type="float" office:value="18198" calcext:value-type="float">
            <text:p>1819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10625" calcext:value-type="float">
            <text:p>0,00210625000000000000</text:p>
          </table:table-cell>
          <table:table-cell table:formula="of:=[.D339]-[.D33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4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1125" calcext:value-type="float">
            <text:p>0,00211250000000000000</text:p>
          </table:table-cell>
          <table:table-cell table:formula="of:=[.D340]-[.D33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4" office:value-type="float" office:value="18306" calcext:value-type="float">
            <text:p>1830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11875" calcext:value-type="float">
            <text:p>0,00211875000000000000</text:p>
          </table:table-cell>
          <table:table-cell table:formula="of:=[.D341]-[.D34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4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125" calcext:value-type="float">
            <text:p>0,00212500000000000000</text:p>
          </table:table-cell>
          <table:table-cell table:formula="of:=[.D342]-[.D34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4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13125" calcext:value-type="float">
            <text:p>0,00213125000000000000</text:p>
          </table:table-cell>
          <table:table-cell table:formula="of:=[.D343]-[.D34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4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1375" calcext:value-type="float">
            <text:p>0,00213750000000000000</text:p>
          </table:table-cell>
          <table:table-cell table:formula="of:=[.D344]-[.D34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4" office:value-type="float" office:value="18522" calcext:value-type="float">
            <text:p>1852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14375" calcext:value-type="float">
            <text:p>0,00214375000000000000</text:p>
          </table:table-cell>
          <table:table-cell table:formula="of:=[.D345]-[.D34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4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15" calcext:value-type="float">
            <text:p>0,00215000000000000000</text:p>
          </table:table-cell>
          <table:table-cell table:formula="of:=[.D346]-[.D34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4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15625" calcext:value-type="float">
            <text:p>0,00215625000000000000</text:p>
          </table:table-cell>
          <table:table-cell table:formula="of:=[.D347]-[.D34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4" office:value-type="float" office:value="18684" calcext:value-type="float">
            <text:p>1868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1625" calcext:value-type="float">
            <text:p>0,00216250000000000000</text:p>
          </table:table-cell>
          <table:table-cell table:formula="of:=[.D348]-[.D34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4" office:value-type="float" office:value="18738" calcext:value-type="float">
            <text:p>1873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16875" calcext:value-type="float">
            <text:p>0,00216875000000000000</text:p>
          </table:table-cell>
          <table:table-cell table:formula="of:=[.D349]-[.D34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4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175" calcext:value-type="float">
            <text:p>0,00217500000000000000</text:p>
          </table:table-cell>
          <table:table-cell table:formula="of:=[.D350]-[.D34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4" office:value-type="float" office:value="18846" calcext:value-type="float">
            <text:p>1884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18125" calcext:value-type="float">
            <text:p>0,00218125000000000000</text:p>
          </table:table-cell>
          <table:table-cell table:formula="of:=[.D351]-[.D35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4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1875" calcext:value-type="float">
            <text:p>0,00218750000000000000</text:p>
          </table:table-cell>
          <table:table-cell table:formula="of:=[.D352]-[.D35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4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19375" calcext:value-type="float">
            <text:p>0,00219375000000000000</text:p>
          </table:table-cell>
          <table:table-cell table:formula="of:=[.D353]-[.D35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4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2" calcext:value-type="float">
            <text:p>0,00220000000000000000</text:p>
          </table:table-cell>
          <table:table-cell table:formula="of:=[.D354]-[.D35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4" office:value-type="float" office:value="19062" calcext:value-type="float">
            <text:p>1906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20625" calcext:value-type="float">
            <text:p>0,00220625000000000000</text:p>
          </table:table-cell>
          <table:table-cell table:formula="of:=[.D355]-[.D35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4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2125" calcext:value-type="float">
            <text:p>0,00221250000000000000</text:p>
          </table:table-cell>
          <table:table-cell table:formula="of:=[.D356]-[.D355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4" office:value-type="float" office:value="19170" calcext:value-type="float">
            <text:p>1917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21875" calcext:value-type="float">
            <text:p>0,00221875000000000000</text:p>
          </table:table-cell>
          <table:table-cell table:formula="of:=[.D357]-[.D35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4" office:value-type="float" office:value="19224" calcext:value-type="float">
            <text:p>1922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225" calcext:value-type="float">
            <text:p>0,00222500000000000000</text:p>
          </table:table-cell>
          <table:table-cell table:formula="of:=[.D358]-[.D35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4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23125" calcext:value-type="float">
            <text:p>0,00223125000000000000</text:p>
          </table:table-cell>
          <table:table-cell table:formula="of:=[.D359]-[.D35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4" office:value-type="float" office:value="19332" calcext:value-type="float">
            <text:p>1933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2375" calcext:value-type="float">
            <text:p>0,00223750000000000000</text:p>
          </table:table-cell>
          <table:table-cell table:formula="of:=[.D360]-[.D35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4" office:value-type="float" office:value="19386" calcext:value-type="float">
            <text:p>1938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24375" calcext:value-type="float">
            <text:p>0,00224375000000000000</text:p>
          </table:table-cell>
          <table:table-cell table:formula="of:=[.D361]-[.D360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4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25" calcext:value-type="float">
            <text:p>0,00225000000000000000</text:p>
          </table:table-cell>
          <table:table-cell table:formula="of:=[.D362]-[.D36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4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25625" calcext:value-type="float">
            <text:p>0,00225625000000000000</text:p>
          </table:table-cell>
          <table:table-cell table:formula="of:=[.D363]-[.D36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4" office:value-type="float" office:value="19548" calcext:value-type="float">
            <text:p>1954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2625" calcext:value-type="float">
            <text:p>0,00226250000000000000</text:p>
          </table:table-cell>
          <table:table-cell table:formula="of:=[.D364]-[.D36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4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26875" calcext:value-type="float">
            <text:p>0,00226875000000000000</text:p>
          </table:table-cell>
          <table:table-cell table:formula="of:=[.D365]-[.D36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4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275" calcext:value-type="float">
            <text:p>0,00227500000000000000</text:p>
          </table:table-cell>
          <table:table-cell table:formula="of:=[.D366]-[.D365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4" office:value-type="float" office:value="19710" calcext:value-type="float">
            <text:p>1971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28125" calcext:value-type="float">
            <text:p>0,00228125000000000000</text:p>
          </table:table-cell>
          <table:table-cell table:formula="of:=[.D367]-[.D36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4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2875" calcext:value-type="float">
            <text:p>0,00228750000000000000</text:p>
          </table:table-cell>
          <table:table-cell table:formula="of:=[.D368]-[.D36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4" office:value-type="float" office:value="19818" calcext:value-type="float">
            <text:p>1981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29375" calcext:value-type="float">
            <text:p>0,00229375000000000000</text:p>
          </table:table-cell>
          <table:table-cell table:formula="of:=[.D369]-[.D36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4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3" calcext:value-type="float">
            <text:p>0,00230000000000000000</text:p>
          </table:table-cell>
          <table:table-cell table:formula="of:=[.D370]-[.D36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4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30625" calcext:value-type="float">
            <text:p>0,00230625000000000000</text:p>
          </table:table-cell>
          <table:table-cell table:formula="of:=[.D371]-[.D370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4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3125" calcext:value-type="float">
            <text:p>0,00231250000000000000</text:p>
          </table:table-cell>
          <table:table-cell table:formula="of:=[.D372]-[.D37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4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31875" calcext:value-type="float">
            <text:p>0,00231875000000000000</text:p>
          </table:table-cell>
          <table:table-cell table:formula="of:=[.D373]-[.D372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4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325" calcext:value-type="float">
            <text:p>0,00232500000000000000</text:p>
          </table:table-cell>
          <table:table-cell table:formula="of:=[.D374]-[.D37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4" office:value-type="float" office:value="20142" calcext:value-type="float">
            <text:p>2014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33125" calcext:value-type="float">
            <text:p>0,00233125000000000000</text:p>
          </table:table-cell>
          <table:table-cell table:formula="of:=[.D375]-[.D37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4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3375" calcext:value-type="float">
            <text:p>0,00233750000000000000</text:p>
          </table:table-cell>
          <table:table-cell table:formula="of:=[.D376]-[.D375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4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34375" calcext:value-type="float">
            <text:p>0,00234375000000000000</text:p>
          </table:table-cell>
          <table:table-cell table:formula="of:=[.D377]-[.D37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4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35" calcext:value-type="float">
            <text:p>0,00235000000000000000</text:p>
          </table:table-cell>
          <table:table-cell table:formula="of:=[.D378]-[.D377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4" office:value-type="float" office:value="20358" calcext:value-type="float">
            <text:p>20358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35625" calcext:value-type="float">
            <text:p>0,00235625000000000000</text:p>
          </table:table-cell>
          <table:table-cell table:formula="of:=[.D379]-[.D37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4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3625" calcext:value-type="float">
            <text:p>0,00236250000000000000</text:p>
          </table:table-cell>
          <table:table-cell table:formula="of:=[.D380]-[.D37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4" office:value-type="float" office:value="20466" calcext:value-type="float">
            <text:p>20466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36875" calcext:value-type="float">
            <text:p>0,00236875000000000000</text:p>
          </table:table-cell>
          <table:table-cell table:formula="of:=[.D381]-[.D380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4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375" calcext:value-type="float">
            <text:p>0,00237500000000000000</text:p>
          </table:table-cell>
          <table:table-cell table:formula="of:=[.D382]-[.D38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4" office:value-type="float" office:value="20574" calcext:value-type="float">
            <text:p>20574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38125" calcext:value-type="float">
            <text:p>0,00238125000000000000</text:p>
          </table:table-cell>
          <table:table-cell table:formula="of:=[.D383]-[.D382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4" office:value-type="float" office:value="20628" calcext:value-type="float">
            <text:p>2062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3875" calcext:value-type="float">
            <text:p>0,00238750000000000000</text:p>
          </table:table-cell>
          <table:table-cell table:formula="of:=[.D384]-[.D38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4" office:value-type="float" office:value="20682" calcext:value-type="float">
            <text:p>20682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39375" calcext:value-type="float">
            <text:p>0,00239375000000000000</text:p>
          </table:table-cell>
          <table:table-cell table:formula="of:=[.D385]-[.D38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4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4" calcext:value-type="float">
            <text:p>0,00240000000000000000</text:p>
          </table:table-cell>
          <table:table-cell table:formula="of:=[.D386]-[.D38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4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40625" calcext:value-type="float">
            <text:p>0,00240625000000000000</text:p>
          </table:table-cell>
          <table:table-cell table:formula="of:=[.D387]-[.D38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4" office:value-type="float" office:value="20844" calcext:value-type="float">
            <text:p>2084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4125" calcext:value-type="float">
            <text:p>0,00241250000000000000</text:p>
          </table:table-cell>
          <table:table-cell table:formula="of:=[.D388]-[.D387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4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41875" calcext:value-type="float">
            <text:p>0,00241875000000000000</text:p>
          </table:table-cell>
          <table:table-cell table:formula="of:=[.D389]-[.D38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4" office:value-type="float" office:value="20952" calcext:value-type="float">
            <text:p>2095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425" calcext:value-type="float">
            <text:p>0,00242500000000000000</text:p>
          </table:table-cell>
          <table:table-cell table:formula="of:=[.D390]-[.D389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4" office:value-type="float" office:value="21006" calcext:value-type="float">
            <text:p>21006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43125" calcext:value-type="float">
            <text:p>0,00243125000000000000</text:p>
          </table:table-cell>
          <table:table-cell table:formula="of:=[.D391]-[.D39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4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4375" calcext:value-type="float">
            <text:p>0,00243750000000000000</text:p>
          </table:table-cell>
          <table:table-cell table:formula="of:=[.D392]-[.D39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4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44375" calcext:value-type="float">
            <text:p>0,00244375000000000000</text:p>
          </table:table-cell>
          <table:table-cell table:formula="of:=[.D393]-[.D392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4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45" calcext:value-type="float">
            <text:p>0,00245000000000000000</text:p>
          </table:table-cell>
          <table:table-cell table:formula="of:=[.D394]-[.D39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4" office:value-type="float" office:value="21222" calcext:value-type="float">
            <text:p>21222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45625" calcext:value-type="float">
            <text:p>0,00245625000000000000</text:p>
          </table:table-cell>
          <table:table-cell table:formula="of:=[.D395]-[.D39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4" office:value-type="float" office:value="21276" calcext:value-type="float">
            <text:p>2127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4625" calcext:value-type="float">
            <text:p>0,00246250000000000000</text:p>
          </table:table-cell>
          <table:table-cell table:formula="of:=[.D396]-[.D39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4" office:value-type="float" office:value="21330" calcext:value-type="float">
            <text:p>2133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46875" calcext:value-type="float">
            <text:p>0,00246875000000000000</text:p>
          </table:table-cell>
          <table:table-cell table:formula="of:=[.D397]-[.D39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4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475" calcext:value-type="float">
            <text:p>0,00247500000000000000</text:p>
          </table:table-cell>
          <table:table-cell table:formula="of:=[.D398]-[.D397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4" office:value-type="float" office:value="21438" calcext:value-type="float">
            <text:p>21438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48125" calcext:value-type="float">
            <text:p>0,00248125000000000000</text:p>
          </table:table-cell>
          <table:table-cell table:formula="of:=[.D399]-[.D39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4" office:value-type="float" office:value="21492" calcext:value-type="float">
            <text:p>2149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4875" calcext:value-type="float">
            <text:p>0,00248750000000000000</text:p>
          </table:table-cell>
          <table:table-cell table:formula="of:=[.D400]-[.D399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4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49375" calcext:value-type="float">
            <text:p>0,00249375000000000000</text:p>
          </table:table-cell>
          <table:table-cell table:formula="of:=[.D401]-[.D40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4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5" calcext:value-type="float">
            <text:p>0,00250000000000000000</text:p>
          </table:table-cell>
          <table:table-cell table:formula="of:=[.D402]-[.D40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4" office:value-type="float" office:value="21654" calcext:value-type="float">
            <text:p>21654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50625" calcext:value-type="float">
            <text:p>0,00250625000000000000</text:p>
          </table:table-cell>
          <table:table-cell table:formula="of:=[.D403]-[.D40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4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5125" calcext:value-type="float">
            <text:p>0,00251250000000000000</text:p>
          </table:table-cell>
          <table:table-cell table:formula="of:=[.D404]-[.D40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4" office:value-type="float" office:value="21762" calcext:value-type="float">
            <text:p>21762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51875" calcext:value-type="float">
            <text:p>0,00251875000000000000</text:p>
          </table:table-cell>
          <table:table-cell table:formula="of:=[.D405]-[.D40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4" office:value-type="float" office:value="21816" calcext:value-type="float">
            <text:p>2181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525" calcext:value-type="float">
            <text:p>0,00252500000000000000</text:p>
          </table:table-cell>
          <table:table-cell table:formula="of:=[.D406]-[.D40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4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53125" calcext:value-type="float">
            <text:p>0,00253125000000000000</text:p>
          </table:table-cell>
          <table:table-cell table:formula="of:=[.D407]-[.D40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4" office:value-type="float" office:value="21924" calcext:value-type="float">
            <text:p>2192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5375" calcext:value-type="float">
            <text:p>0,00253750000000000000</text:p>
          </table:table-cell>
          <table:table-cell table:formula="of:=[.D408]-[.D40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4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54375" calcext:value-type="float">
            <text:p>0,00254375000000000000</text:p>
          </table:table-cell>
          <table:table-cell table:formula="of:=[.D409]-[.D408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4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55" calcext:value-type="float">
            <text:p>0,00255000000000000000</text:p>
          </table:table-cell>
          <table:table-cell table:formula="of:=[.D410]-[.D409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4" office:value-type="float" office:value="22086" calcext:value-type="float">
            <text:p>22086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55625" calcext:value-type="float">
            <text:p>0,00255625000000000000</text:p>
          </table:table-cell>
          <table:table-cell table:formula="of:=[.D411]-[.D41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4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5625" calcext:value-type="float">
            <text:p>0,00256250000000000000</text:p>
          </table:table-cell>
          <table:table-cell table:formula="of:=[.D412]-[.D41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4" office:value-type="float" office:value="22194" calcext:value-type="float">
            <text:p>22194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56875" calcext:value-type="float">
            <text:p>0,00256875000000000000</text:p>
          </table:table-cell>
          <table:table-cell table:formula="of:=[.D413]-[.D41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4" office:value-type="float" office:value="22248" calcext:value-type="float">
            <text:p>2224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575" calcext:value-type="float">
            <text:p>0,00257500000000000000</text:p>
          </table:table-cell>
          <table:table-cell table:formula="of:=[.D414]-[.D413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4" office:value-type="float" office:value="22302" calcext:value-type="float">
            <text:p>22302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58125" calcext:value-type="float">
            <text:p>0,00258125000000000000</text:p>
          </table:table-cell>
          <table:table-cell table:formula="of:=[.D415]-[.D414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4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5875" calcext:value-type="float">
            <text:p>0,00258750000000000000</text:p>
          </table:table-cell>
          <table:table-cell table:formula="of:=[.D416]-[.D41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4" office:value-type="float" office:value="22410" calcext:value-type="float">
            <text:p>2241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59375" calcext:value-type="float">
            <text:p>0,00259375000000000000</text:p>
          </table:table-cell>
          <table:table-cell table:formula="of:=[.D417]-[.D41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4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6" calcext:value-type="float">
            <text:p>0,00260000000000000000</text:p>
          </table:table-cell>
          <table:table-cell table:formula="of:=[.D418]-[.D41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4" office:value-type="float" office:value="22518" calcext:value-type="float">
            <text:p>22518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60625" calcext:value-type="float">
            <text:p>0,00260625000000000000</text:p>
          </table:table-cell>
          <table:table-cell table:formula="of:=[.D419]-[.D41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4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6125" calcext:value-type="float">
            <text:p>0,00261250000000000000</text:p>
          </table:table-cell>
          <table:table-cell table:formula="of:=[.D420]-[.D41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4" office:value-type="float" office:value="22626" calcext:value-type="float">
            <text:p>22626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61875" calcext:value-type="float">
            <text:p>0,00261875000000000000</text:p>
          </table:table-cell>
          <table:table-cell table:formula="of:=[.D421]-[.D420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4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625" calcext:value-type="float">
            <text:p>0,00262500000000000000</text:p>
          </table:table-cell>
          <table:table-cell table:formula="of:=[.D422]-[.D421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4" office:value-type="float" office:value="22734" calcext:value-type="float">
            <text:p>22734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63125" calcext:value-type="float">
            <text:p>0,00263125000000000000</text:p>
          </table:table-cell>
          <table:table-cell table:formula="of:=[.D423]-[.D42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4" office:value-type="float" office:value="22788" calcext:value-type="float">
            <text:p>2278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6375" calcext:value-type="float">
            <text:p>0,00263750000000000000</text:p>
          </table:table-cell>
          <table:table-cell table:formula="of:=[.D424]-[.D42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4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64375" calcext:value-type="float">
            <text:p>0,00264375000000000000</text:p>
          </table:table-cell>
          <table:table-cell table:formula="of:=[.D425]-[.D42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4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65" calcext:value-type="float">
            <text:p>0,00265000000000000000</text:p>
          </table:table-cell>
          <table:table-cell table:formula="of:=[.D426]-[.D425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4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65625" calcext:value-type="float">
            <text:p>0,00265625000000000000</text:p>
          </table:table-cell>
          <table:table-cell table:formula="of:=[.D427]-[.D426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4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6625" calcext:value-type="float">
            <text:p>0,00266250000000000000</text:p>
          </table:table-cell>
          <table:table-cell table:formula="of:=[.D428]-[.D42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4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66875" calcext:value-type="float">
            <text:p>0,00266875000000000000</text:p>
          </table:table-cell>
          <table:table-cell table:formula="of:=[.D429]-[.D42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4" office:value-type="float" office:value="23112" calcext:value-type="float">
            <text:p>2311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675" calcext:value-type="float">
            <text:p>0,00267500000000000000</text:p>
          </table:table-cell>
          <table:table-cell table:formula="of:=[.D430]-[.D42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4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68125" calcext:value-type="float">
            <text:p>0,00268125000000000000</text:p>
          </table:table-cell>
          <table:table-cell table:formula="of:=[.D431]-[.D430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4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6875" calcext:value-type="float">
            <text:p>0,00268750000000000000</text:p>
          </table:table-cell>
          <table:table-cell table:formula="of:=[.D432]-[.D43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4" office:value-type="float" office:value="23274" calcext:value-type="float">
            <text:p>23274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69375" calcext:value-type="float">
            <text:p>0,00269375000000000000</text:p>
          </table:table-cell>
          <table:table-cell table:formula="of:=[.D433]-[.D43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4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7" calcext:value-type="float">
            <text:p>0,00270000000000000000</text:p>
          </table:table-cell>
          <table:table-cell table:formula="of:=[.D434]-[.D43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4" office:value-type="float" office:value="23382" calcext:value-type="float">
            <text:p>23382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70625" calcext:value-type="float">
            <text:p>0,00270625000000000000</text:p>
          </table:table-cell>
          <table:table-cell table:formula="of:=[.D435]-[.D43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4" office:value-type="float" office:value="23436" calcext:value-type="float">
            <text:p>2343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7125" calcext:value-type="float">
            <text:p>0,00271250000000000000</text:p>
          </table:table-cell>
          <table:table-cell table:formula="of:=[.D436]-[.D435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4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71875" calcext:value-type="float">
            <text:p>0,00271875000000000000</text:p>
          </table:table-cell>
          <table:table-cell table:formula="of:=[.D437]-[.D436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4" office:value-type="float" office:value="23544" calcext:value-type="float">
            <text:p>2354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725" calcext:value-type="float">
            <text:p>0,00272500000000000000</text:p>
          </table:table-cell>
          <table:table-cell table:formula="of:=[.D438]-[.D437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54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73125" calcext:value-type="float">
            <text:p>0,00273125000000000000</text:p>
          </table:table-cell>
          <table:table-cell table:formula="of:=[.D439]-[.D438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54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7375" calcext:value-type="float">
            <text:p>0,00273750000000000000</text:p>
          </table:table-cell>
          <table:table-cell table:formula="of:=[.D440]-[.D439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54" office:value-type="float" office:value="23706" calcext:value-type="float">
            <text:p>23706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74375" calcext:value-type="float">
            <text:p>0,00274375000000000000</text:p>
          </table:table-cell>
          <table:table-cell table:formula="of:=[.D441]-[.D440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54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75" calcext:value-type="float">
            <text:p>0,00275000000000000000</text:p>
          </table:table-cell>
          <table:table-cell table:formula="of:=[.D442]-[.D441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54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75625" calcext:value-type="float">
            <text:p>0,00275625000000000000</text:p>
          </table:table-cell>
          <table:table-cell table:formula="of:=[.D443]-[.D442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54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7625" calcext:value-type="float">
            <text:p>0,00276250000000000000</text:p>
          </table:table-cell>
          <table:table-cell table:formula="of:=[.D444]-[.D443]" office:value-type="float" office:value="0.00000624999999999975" calcext:value-type="float">
            <text:p>0,00000624999999999975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54" office:value-type="float" office:value="23922" calcext:value-type="float">
            <text:p>23922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76875" calcext:value-type="float">
            <text:p>0,00276875000000000000</text:p>
          </table:table-cell>
          <table:table-cell table:formula="of:=[.D445]-[.D444]" office:value-type="float" office:value="0.00000625000000000018" calcext:value-type="float">
            <text:p>0,00000625000000000018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54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775" calcext:value-type="float">
            <text:p>0,00277500000000000000</text:p>
          </table:table-cell>
          <table:table-cell table:formula="of:=[.D446]-[.D445]" office:value-type="float" office:value="-0.002775" calcext:value-type="float">
            <text:p>-0,00277500000000000000</text:p>
          </table:table-cell>
          <table:table-cell table:number-columns-repeated="16379"/>
        </table:table-row>
        <table:table-row table:style-name="ro1" table:number-rows-repeated="10481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08:55.670427807</meta:creation-date>
    <dc:date>2026-05-17T18:09:03.188204896</dc:date>
    <meta:editing-duration>PT9S</meta:editing-duration>
    <meta:editing-cycles>1</meta:editing-cycles>
    <meta:document-statistic meta:table-count="1" meta:cell-count="2225" meta:object-count="0"/>
    <meta:generator>LibreOffice/24.2.7.2$Linux_X86_64 LibreOffice_project/420$Build-2</meta:generator>
  </office:meta>
</office:document-meta>
</file>