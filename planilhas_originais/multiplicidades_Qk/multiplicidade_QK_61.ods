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6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61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706018518518519" calcext:value-type="float">
            <text:p>0,00000706018518518519</text:p>
          </table:table-cell>
          <table:table-cell table:formula="of:=[.D3]-[.D2]" office:value-type="float" office:value="0.00000706018518518519" calcext:value-type="float">
            <text:p>0,00000706018518518519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61" office:value-type="float" office:value="122" calcext:value-type="float">
            <text:p>122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41203703703704" calcext:value-type="float">
            <text:p>0,00001412037037037040</text:p>
          </table:table-cell>
          <table:table-cell table:formula="of:=[.D4]-[.D3]" office:value-type="float" office:value="0.00000706018518518519" calcext:value-type="float">
            <text:p>0,00000706018518518519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61" office:value-type="float" office:value="183" calcext:value-type="float">
            <text:p>183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11805555555556" calcext:value-type="float">
            <text:p>0,00002118055555555560</text:p>
          </table:table-cell>
          <table:table-cell table:formula="of:=[.D5]-[.D4]" office:value-type="float" office:value="0.00000706018518518518" calcext:value-type="float">
            <text:p>0,00000706018518518518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61" office:value-type="float" office:value="244" calcext:value-type="float">
            <text:p>244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82407407407407" calcext:value-type="float">
            <text:p>0,00002824074074074070</text:p>
          </table:table-cell>
          <table:table-cell table:formula="of:=[.D6]-[.D5]" office:value-type="float" office:value="0.00000706018518518519" calcext:value-type="float">
            <text:p>0,00000706018518518519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61" office:value-type="float" office:value="305" calcext:value-type="float">
            <text:p>30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353009259259259" calcext:value-type="float">
            <text:p>0,00003530092592592590</text:p>
          </table:table-cell>
          <table:table-cell table:formula="of:=[.D7]-[.D6]" office:value-type="float" office:value="0.00000706018518518518" calcext:value-type="float">
            <text:p>0,00000706018518518518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61" office:value-type="float" office:value="366" calcext:value-type="float">
            <text:p>366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423611111111111" calcext:value-type="float">
            <text:p>0,00004236111111111110</text:p>
          </table:table-cell>
          <table:table-cell table:formula="of:=[.D8]-[.D7]" office:value-type="float" office:value="0.00000706018518518518" calcext:value-type="float">
            <text:p>0,00000706018518518518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61" office:value-type="float" office:value="427" calcext:value-type="float">
            <text:p>427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494212962962963" calcext:value-type="float">
            <text:p>0,00004942129629629630</text:p>
          </table:table-cell>
          <table:table-cell table:formula="of:=[.D9]-[.D8]" office:value-type="float" office:value="0.00000706018518518518" calcext:value-type="float">
            <text:p>0,00000706018518518518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61" office:value-type="float" office:value="488" calcext:value-type="float">
            <text:p>488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564814814814815" calcext:value-type="float">
            <text:p>0,00005648148148148150</text:p>
          </table:table-cell>
          <table:table-cell table:formula="of:=[.D10]-[.D9]" office:value-type="float" office:value="0.00000706018518518518" calcext:value-type="float">
            <text:p>0,00000706018518518518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61" office:value-type="float" office:value="549" calcext:value-type="float">
            <text:p>549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635416666666667" calcext:value-type="float">
            <text:p>0,00006354166666666670</text:p>
          </table:table-cell>
          <table:table-cell table:formula="of:=[.D11]-[.D10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61" office:value-type="float" office:value="610" calcext:value-type="float">
            <text:p>61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706018518518519" calcext:value-type="float">
            <text:p>0,00007060185185185190</text:p>
          </table:table-cell>
          <table:table-cell table:formula="of:=[.D12]-[.D11]" office:value-type="float" office:value="0.00000706018518518518" calcext:value-type="float">
            <text:p>0,00000706018518518518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61" office:value-type="float" office:value="671" calcext:value-type="float">
            <text:p>671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77662037037037" calcext:value-type="float">
            <text:p>0,00007766203703703700</text:p>
          </table:table-cell>
          <table:table-cell table:formula="of:=[.D13]-[.D12]" office:value-type="float" office:value="0.00000706018518518518" calcext:value-type="float">
            <text:p>0,00000706018518518518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61" office:value-type="float" office:value="732" calcext:value-type="float">
            <text:p>732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847222222222222" calcext:value-type="float">
            <text:p>0,00008472222222222220</text:p>
          </table:table-cell>
          <table:table-cell table:formula="of:=[.D14]-[.D13]" office:value-type="float" office:value="0.00000706018518518518" calcext:value-type="float">
            <text:p>0,00000706018518518518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61" office:value-type="float" office:value="793" calcext:value-type="float">
            <text:p>793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917824074074074" calcext:value-type="float">
            <text:p>0,00009178240740740740</text:p>
          </table:table-cell>
          <table:table-cell table:formula="of:=[.D15]-[.D14]" office:value-type="float" office:value="0.00000706018518518518" calcext:value-type="float">
            <text:p>0,00000706018518518518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61" office:value-type="float" office:value="854" calcext:value-type="float">
            <text:p>854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988425925925926" calcext:value-type="float">
            <text:p>0,00009884259259259260</text:p>
          </table:table-cell>
          <table:table-cell table:formula="of:=[.D16]-[.D15]" office:value-type="float" office:value="0.00000706018518518518" calcext:value-type="float">
            <text:p>0,00000706018518518518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61" office:value-type="float" office:value="915" calcext:value-type="float">
            <text:p>91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05902777777778" calcext:value-type="float">
            <text:p>0,00010590277777777800</text:p>
          </table:table-cell>
          <table:table-cell table:formula="of:=[.D17]-[.D16]" office:value-type="float" office:value="0.00000706018518518518" calcext:value-type="float">
            <text:p>0,00000706018518518518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61" office:value-type="float" office:value="976" calcext:value-type="float">
            <text:p>976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12962962962963" calcext:value-type="float">
            <text:p>0,00011296296296296300</text:p>
          </table:table-cell>
          <table:table-cell table:formula="of:=[.D18]-[.D17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61" office:value-type="float" office:value="1037" calcext:value-type="float">
            <text:p>1037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20023148148148" calcext:value-type="float">
            <text:p>0,00012002314814814800</text:p>
          </table:table-cell>
          <table:table-cell table:formula="of:=[.D19]-[.D18]" office:value-type="float" office:value="0.00000706018518518517" calcext:value-type="float">
            <text:p>0,00000706018518518517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61" office:value-type="float" office:value="1098" calcext:value-type="float">
            <text:p>1098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27083333333333" calcext:value-type="float">
            <text:p>0,00012708333333333300</text:p>
          </table:table-cell>
          <table:table-cell table:formula="of:=[.D20]-[.D19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61" office:value-type="float" office:value="1159" calcext:value-type="float">
            <text:p>1159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34143518518519" calcext:value-type="float">
            <text:p>0,00013414351851851900</text:p>
          </table:table-cell>
          <table:table-cell table:formula="of:=[.D21]-[.D20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61" office:value-type="float" office:value="1220" calcext:value-type="float">
            <text:p>122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41203703703704" calcext:value-type="float">
            <text:p>0,00014120370370370400</text:p>
          </table:table-cell>
          <table:table-cell table:formula="of:=[.D22]-[.D21]" office:value-type="float" office:value="0.00000706018518518517" calcext:value-type="float">
            <text:p>0,00000706018518518517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61" office:value-type="float" office:value="1281" calcext:value-type="float">
            <text:p>1281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48263888888889" calcext:value-type="float">
            <text:p>0,00014826388888888900</text:p>
          </table:table-cell>
          <table:table-cell table:formula="of:=[.D23]-[.D22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61" office:value-type="float" office:value="1342" calcext:value-type="float">
            <text:p>1342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55324074074074" calcext:value-type="float">
            <text:p>0,00015532407407407400</text:p>
          </table:table-cell>
          <table:table-cell table:formula="of:=[.D24]-[.D23]" office:value-type="float" office:value="0.00000706018518518517" calcext:value-type="float">
            <text:p>0,00000706018518518517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61" office:value-type="float" office:value="1403" calcext:value-type="float">
            <text:p>1403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62384259259259" calcext:value-type="float">
            <text:p>0,00016238425925925900</text:p>
          </table:table-cell>
          <table:table-cell table:formula="of:=[.D25]-[.D24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61" office:value-type="float" office:value="1464" calcext:value-type="float">
            <text:p>1464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69444444444444" calcext:value-type="float">
            <text:p>0,00016944444444444400</text:p>
          </table:table-cell>
          <table:table-cell table:formula="of:=[.D26]-[.D25]" office:value-type="float" office:value="0.00000706018518518517" calcext:value-type="float">
            <text:p>0,00000706018518518517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61" office:value-type="float" office:value="1525" calcext:value-type="float">
            <text:p>15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7650462962963" calcext:value-type="float">
            <text:p>0,00017650462962963000</text:p>
          </table:table-cell>
          <table:table-cell table:formula="of:=[.D27]-[.D26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61" office:value-type="float" office:value="1586" calcext:value-type="float">
            <text:p>1586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83564814814815" calcext:value-type="float">
            <text:p>0,00018356481481481500</text:p>
          </table:table-cell>
          <table:table-cell table:formula="of:=[.D28]-[.D27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61" office:value-type="float" office:value="1647" calcext:value-type="float">
            <text:p>1647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90625" calcext:value-type="float">
            <text:p>0,00019062500000000000</text:p>
          </table:table-cell>
          <table:table-cell table:formula="of:=[.D29]-[.D28]" office:value-type="float" office:value="0.00000706018518518517" calcext:value-type="float">
            <text:p>0,00000706018518518517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61" office:value-type="float" office:value="1708" calcext:value-type="float">
            <text:p>1708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97685185185185" calcext:value-type="float">
            <text:p>0,00019768518518518500</text:p>
          </table:table-cell>
          <table:table-cell table:formula="of:=[.D30]-[.D29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61" office:value-type="float" office:value="1769" calcext:value-type="float">
            <text:p>1769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0474537037037" calcext:value-type="float">
            <text:p>0,00020474537037037000</text:p>
          </table:table-cell>
          <table:table-cell table:formula="of:=[.D31]-[.D30]" office:value-type="float" office:value="0.00000706018518518517" calcext:value-type="float">
            <text:p>0,00000706018518518517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61" office:value-type="float" office:value="1830" calcext:value-type="float">
            <text:p>183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11805555555556" calcext:value-type="float">
            <text:p>0,00021180555555555600</text:p>
          </table:table-cell>
          <table:table-cell table:formula="of:=[.D32]-[.D31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61" office:value-type="float" office:value="1891" calcext:value-type="float">
            <text:p>1891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18865740740741" calcext:value-type="float">
            <text:p>0,00021886574074074100</text:p>
          </table:table-cell>
          <table:table-cell table:formula="of:=[.D33]-[.D32]" office:value-type="float" office:value="0.00000706018518518517" calcext:value-type="float">
            <text:p>0,00000706018518518517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61" office:value-type="float" office:value="1952" calcext:value-type="float">
            <text:p>1952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25925925925926" calcext:value-type="float">
            <text:p>0,00022592592592592600</text:p>
          </table:table-cell>
          <table:table-cell table:formula="of:=[.D34]-[.D33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61" office:value-type="float" office:value="2013" calcext:value-type="float">
            <text:p>2013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32986111111111" calcext:value-type="float">
            <text:p>0,00023298611111111100</text:p>
          </table:table-cell>
          <table:table-cell table:formula="of:=[.D35]-[.D34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61" office:value-type="float" office:value="2074" calcext:value-type="float">
            <text:p>2074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40046296296296" calcext:value-type="float">
            <text:p>0,00024004629629629600</text:p>
          </table:table-cell>
          <table:table-cell table:formula="of:=[.D36]-[.D35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61" office:value-type="float" office:value="2135" calcext:value-type="float">
            <text:p>213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47106481481482" calcext:value-type="float">
            <text:p>0,00024710648148148200</text:p>
          </table:table-cell>
          <table:table-cell table:formula="of:=[.D37]-[.D36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61" office:value-type="float" office:value="2196" calcext:value-type="float">
            <text:p>2196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54166666666667" calcext:value-type="float">
            <text:p>0,00025416666666666700</text:p>
          </table:table-cell>
          <table:table-cell table:formula="of:=[.D38]-[.D37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61" office:value-type="float" office:value="2257" calcext:value-type="float">
            <text:p>2257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61226851851852" calcext:value-type="float">
            <text:p>0,00026122685185185200</text:p>
          </table:table-cell>
          <table:table-cell table:formula="of:=[.D39]-[.D38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61" office:value-type="float" office:value="2318" calcext:value-type="float">
            <text:p>2318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68287037037037" calcext:value-type="float">
            <text:p>0,00026828703703703700</text:p>
          </table:table-cell>
          <table:table-cell table:formula="of:=[.D40]-[.D39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61" office:value-type="float" office:value="2379" calcext:value-type="float">
            <text:p>2379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75347222222222" calcext:value-type="float">
            <text:p>0,00027534722222222200</text:p>
          </table:table-cell>
          <table:table-cell table:formula="of:=[.D41]-[.D40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61" office:value-type="float" office:value="2440" calcext:value-type="float">
            <text:p>244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82407407407407" calcext:value-type="float">
            <text:p>0,00028240740740740700</text:p>
          </table:table-cell>
          <table:table-cell table:formula="of:=[.D42]-[.D41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61" office:value-type="float" office:value="2501" calcext:value-type="float">
            <text:p>2501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89467592592593" calcext:value-type="float">
            <text:p>0,00028946759259259300</text:p>
          </table:table-cell>
          <table:table-cell table:formula="of:=[.D43]-[.D42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61" office:value-type="float" office:value="2562" calcext:value-type="float">
            <text:p>2562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96527777777778" calcext:value-type="float">
            <text:p>0,00029652777777777800</text:p>
          </table:table-cell>
          <table:table-cell table:formula="of:=[.D44]-[.D43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61" office:value-type="float" office:value="2623" calcext:value-type="float">
            <text:p>2623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303587962962963" calcext:value-type="float">
            <text:p>0,00030358796296296300</text:p>
          </table:table-cell>
          <table:table-cell table:formula="of:=[.D45]-[.D44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61" office:value-type="float" office:value="2684" calcext:value-type="float">
            <text:p>2684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10648148148148" calcext:value-type="float">
            <text:p>0,00031064814814814800</text:p>
          </table:table-cell>
          <table:table-cell table:formula="of:=[.D46]-[.D45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61" office:value-type="float" office:value="2745" calcext:value-type="float">
            <text:p>274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17708333333333" calcext:value-type="float">
            <text:p>0,00031770833333333300</text:p>
          </table:table-cell>
          <table:table-cell table:formula="of:=[.D47]-[.D46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61" office:value-type="float" office:value="2806" calcext:value-type="float">
            <text:p>2806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24768518518519" calcext:value-type="float">
            <text:p>0,00032476851851851900</text:p>
          </table:table-cell>
          <table:table-cell table:formula="of:=[.D48]-[.D47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61" office:value-type="float" office:value="2867" calcext:value-type="float">
            <text:p>2867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331828703703704" calcext:value-type="float">
            <text:p>0,00033182870370370400</text:p>
          </table:table-cell>
          <table:table-cell table:formula="of:=[.D49]-[.D48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61" office:value-type="float" office:value="2928" calcext:value-type="float">
            <text:p>2928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338888888888889" calcext:value-type="float">
            <text:p>0,00033888888888888900</text:p>
          </table:table-cell>
          <table:table-cell table:formula="of:=[.D50]-[.D49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61" office:value-type="float" office:value="2989" calcext:value-type="float">
            <text:p>2989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345949074074074" calcext:value-type="float">
            <text:p>0,00034594907407407400</text:p>
          </table:table-cell>
          <table:table-cell table:formula="of:=[.D51]-[.D50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61" office:value-type="float" office:value="3050" calcext:value-type="float">
            <text:p>30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353009259259259" calcext:value-type="float">
            <text:p>0,00035300925925925900</text:p>
          </table:table-cell>
          <table:table-cell table:formula="of:=[.D52]-[.D51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61" office:value-type="float" office:value="3111" calcext:value-type="float">
            <text:p>3111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360069444444444" calcext:value-type="float">
            <text:p>0,00036006944444444400</text:p>
          </table:table-cell>
          <table:table-cell table:formula="of:=[.D53]-[.D52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61" office:value-type="float" office:value="3172" calcext:value-type="float">
            <text:p>3172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36712962962963" calcext:value-type="float">
            <text:p>0,00036712962962963000</text:p>
          </table:table-cell>
          <table:table-cell table:formula="of:=[.D54]-[.D53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61" office:value-type="float" office:value="3233" calcext:value-type="float">
            <text:p>3233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374189814814815" calcext:value-type="float">
            <text:p>0,00037418981481481500</text:p>
          </table:table-cell>
          <table:table-cell table:formula="of:=[.D55]-[.D54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61" office:value-type="float" office:value="3294" calcext:value-type="float">
            <text:p>3294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38125" calcext:value-type="float">
            <text:p>0,00038125000000000000</text:p>
          </table:table-cell>
          <table:table-cell table:formula="of:=[.D56]-[.D55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61" office:value-type="float" office:value="3355" calcext:value-type="float">
            <text:p>335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388310185185185" calcext:value-type="float">
            <text:p>0,00038831018518518500</text:p>
          </table:table-cell>
          <table:table-cell table:formula="of:=[.D57]-[.D56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61" office:value-type="float" office:value="3416" calcext:value-type="float">
            <text:p>3416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39537037037037" calcext:value-type="float">
            <text:p>0,00039537037037037000</text:p>
          </table:table-cell>
          <table:table-cell table:formula="of:=[.D58]-[.D57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61" office:value-type="float" office:value="3477" calcext:value-type="float">
            <text:p>3477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402430555555556" calcext:value-type="float">
            <text:p>0,00040243055555555600</text:p>
          </table:table-cell>
          <table:table-cell table:formula="of:=[.D59]-[.D58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61" office:value-type="float" office:value="3538" calcext:value-type="float">
            <text:p>3538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409490740740741" calcext:value-type="float">
            <text:p>0,00040949074074074100</text:p>
          </table:table-cell>
          <table:table-cell table:formula="of:=[.D60]-[.D59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61" office:value-type="float" office:value="3599" calcext:value-type="float">
            <text:p>3599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416550925925926" calcext:value-type="float">
            <text:p>0,00041655092592592600</text:p>
          </table:table-cell>
          <table:table-cell table:formula="of:=[.D61]-[.D60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61" office:value-type="float" office:value="3660" calcext:value-type="float">
            <text:p>366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423611111111111" calcext:value-type="float">
            <text:p>0,00042361111111111100</text:p>
          </table:table-cell>
          <table:table-cell table:formula="of:=[.D62]-[.D61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61" office:value-type="float" office:value="3721" calcext:value-type="float">
            <text:p>3721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430671296296296" calcext:value-type="float">
            <text:p>0,00043067129629629600</text:p>
          </table:table-cell>
          <table:table-cell table:formula="of:=[.D63]-[.D62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61" office:value-type="float" office:value="3782" calcext:value-type="float">
            <text:p>3782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437731481481482" calcext:value-type="float">
            <text:p>0,00043773148148148200</text:p>
          </table:table-cell>
          <table:table-cell table:formula="of:=[.D64]-[.D63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61" office:value-type="float" office:value="3843" calcext:value-type="float">
            <text:p>3843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444791666666667" calcext:value-type="float">
            <text:p>0,00044479166666666700</text:p>
          </table:table-cell>
          <table:table-cell table:formula="of:=[.D65]-[.D64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61" office:value-type="float" office:value="3904" calcext:value-type="float">
            <text:p>3904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451851851851852" calcext:value-type="float">
            <text:p>0,00045185185185185200</text:p>
          </table:table-cell>
          <table:table-cell table:formula="of:=[.D66]-[.D65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61" office:value-type="float" office:value="3965" calcext:value-type="float">
            <text:p>396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458912037037037" calcext:value-type="float">
            <text:p>0,00045891203703703700</text:p>
          </table:table-cell>
          <table:table-cell table:formula="of:=[.D67]-[.D66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61" office:value-type="float" office:value="4026" calcext:value-type="float">
            <text:p>4026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465972222222222" calcext:value-type="float">
            <text:p>0,00046597222222222200</text:p>
          </table:table-cell>
          <table:table-cell table:formula="of:=[.D68]-[.D67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61" office:value-type="float" office:value="4087" calcext:value-type="float">
            <text:p>4087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473032407407407" calcext:value-type="float">
            <text:p>0,00047303240740740700</text:p>
          </table:table-cell>
          <table:table-cell table:formula="of:=[.D69]-[.D68]" office:value-type="float" office:value="0.0000070601851851852" calcext:value-type="float">
            <text:p>0,00000706018518518520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61" office:value-type="float" office:value="4148" calcext:value-type="float">
            <text:p>4148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480092592592593" calcext:value-type="float">
            <text:p>0,00048009259259259300</text:p>
          </table:table-cell>
          <table:table-cell table:formula="of:=[.D70]-[.D69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61" office:value-type="float" office:value="4209" calcext:value-type="float">
            <text:p>4209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487152777777778" calcext:value-type="float">
            <text:p>0,00048715277777777800</text:p>
          </table:table-cell>
          <table:table-cell table:formula="of:=[.D71]-[.D70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61" office:value-type="float" office:value="4270" calcext:value-type="float">
            <text:p>427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494212962962963" calcext:value-type="float">
            <text:p>0,00049421296296296300</text:p>
          </table:table-cell>
          <table:table-cell table:formula="of:=[.D72]-[.D71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61" office:value-type="float" office:value="4331" calcext:value-type="float">
            <text:p>4331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501273148148148" calcext:value-type="float">
            <text:p>0,00050127314814814800</text:p>
          </table:table-cell>
          <table:table-cell table:formula="of:=[.D73]-[.D72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61" office:value-type="float" office:value="4392" calcext:value-type="float">
            <text:p>4392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508333333333333" calcext:value-type="float">
            <text:p>0,00050833333333333300</text:p>
          </table:table-cell>
          <table:table-cell table:formula="of:=[.D74]-[.D73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61" office:value-type="float" office:value="4453" calcext:value-type="float">
            <text:p>4453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515393518518519" calcext:value-type="float">
            <text:p>0,00051539351851851900</text:p>
          </table:table-cell>
          <table:table-cell table:formula="of:=[.D75]-[.D74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61" office:value-type="float" office:value="4514" calcext:value-type="float">
            <text:p>4514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522453703703704" calcext:value-type="float">
            <text:p>0,00052245370370370400</text:p>
          </table:table-cell>
          <table:table-cell table:formula="of:=[.D76]-[.D75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61" office:value-type="float" office:value="4575" calcext:value-type="float">
            <text:p>45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529513888888889" calcext:value-type="float">
            <text:p>0,00052951388888888900</text:p>
          </table:table-cell>
          <table:table-cell table:formula="of:=[.D77]-[.D76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61" office:value-type="float" office:value="4636" calcext:value-type="float">
            <text:p>4636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536574074074074" calcext:value-type="float">
            <text:p>0,00053657407407407400</text:p>
          </table:table-cell>
          <table:table-cell table:formula="of:=[.D78]-[.D77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61" office:value-type="float" office:value="4697" calcext:value-type="float">
            <text:p>4697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543634259259259" calcext:value-type="float">
            <text:p>0,00054363425925925900</text:p>
          </table:table-cell>
          <table:table-cell table:formula="of:=[.D79]-[.D78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61" office:value-type="float" office:value="4758" calcext:value-type="float">
            <text:p>4758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550694444444445" calcext:value-type="float">
            <text:p>0,00055069444444444500</text:p>
          </table:table-cell>
          <table:table-cell table:formula="of:=[.D80]-[.D79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61" office:value-type="float" office:value="4819" calcext:value-type="float">
            <text:p>4819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55775462962963" calcext:value-type="float">
            <text:p>0,00055775462962963000</text:p>
          </table:table-cell>
          <table:table-cell table:formula="of:=[.D81]-[.D80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61" office:value-type="float" office:value="4880" calcext:value-type="float">
            <text:p>488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564814814814815" calcext:value-type="float">
            <text:p>0,00056481481481481500</text:p>
          </table:table-cell>
          <table:table-cell table:formula="of:=[.D82]-[.D81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61" office:value-type="float" office:value="4941" calcext:value-type="float">
            <text:p>4941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571875" calcext:value-type="float">
            <text:p>0,00057187500000000000</text:p>
          </table:table-cell>
          <table:table-cell table:formula="of:=[.D83]-[.D82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61" office:value-type="float" office:value="5002" calcext:value-type="float">
            <text:p>5002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578935185185185" calcext:value-type="float">
            <text:p>0,00057893518518518500</text:p>
          </table:table-cell>
          <table:table-cell table:formula="of:=[.D84]-[.D83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61" office:value-type="float" office:value="5063" calcext:value-type="float">
            <text:p>5063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58599537037037" calcext:value-type="float">
            <text:p>0,00058599537037037000</text:p>
          </table:table-cell>
          <table:table-cell table:formula="of:=[.D85]-[.D84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61" office:value-type="float" office:value="5124" calcext:value-type="float">
            <text:p>5124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593055555555556" calcext:value-type="float">
            <text:p>0,00059305555555555600</text:p>
          </table:table-cell>
          <table:table-cell table:formula="of:=[.D86]-[.D85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61" office:value-type="float" office:value="5185" calcext:value-type="float">
            <text:p>518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600115740740741" calcext:value-type="float">
            <text:p>0,00060011574074074100</text:p>
          </table:table-cell>
          <table:table-cell table:formula="of:=[.D87]-[.D86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61" office:value-type="float" office:value="5246" calcext:value-type="float">
            <text:p>5246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607175925925926" calcext:value-type="float">
            <text:p>0,00060717592592592600</text:p>
          </table:table-cell>
          <table:table-cell table:formula="of:=[.D88]-[.D87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61" office:value-type="float" office:value="5307" calcext:value-type="float">
            <text:p>5307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614236111111111" calcext:value-type="float">
            <text:p>0,00061423611111111100</text:p>
          </table:table-cell>
          <table:table-cell table:formula="of:=[.D89]-[.D88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61" office:value-type="float" office:value="5368" calcext:value-type="float">
            <text:p>5368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621296296296296" calcext:value-type="float">
            <text:p>0,00062129629629629600</text:p>
          </table:table-cell>
          <table:table-cell table:formula="of:=[.D90]-[.D89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61" office:value-type="float" office:value="5429" calcext:value-type="float">
            <text:p>5429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628356481481482" calcext:value-type="float">
            <text:p>0,00062835648148148200</text:p>
          </table:table-cell>
          <table:table-cell table:formula="of:=[.D91]-[.D90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61" office:value-type="float" office:value="5490" calcext:value-type="float">
            <text:p>549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635416666666667" calcext:value-type="float">
            <text:p>0,00063541666666666700</text:p>
          </table:table-cell>
          <table:table-cell table:formula="of:=[.D92]-[.D91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61" office:value-type="float" office:value="5551" calcext:value-type="float">
            <text:p>5551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642476851851852" calcext:value-type="float">
            <text:p>0,00064247685185185200</text:p>
          </table:table-cell>
          <table:table-cell table:formula="of:=[.D93]-[.D92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61" office:value-type="float" office:value="5612" calcext:value-type="float">
            <text:p>5612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649537037037037" calcext:value-type="float">
            <text:p>0,00064953703703703700</text:p>
          </table:table-cell>
          <table:table-cell table:formula="of:=[.D94]-[.D93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61" office:value-type="float" office:value="5673" calcext:value-type="float">
            <text:p>5673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656597222222222" calcext:value-type="float">
            <text:p>0,00065659722222222200</text:p>
          </table:table-cell>
          <table:table-cell table:formula="of:=[.D95]-[.D94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61" office:value-type="float" office:value="5734" calcext:value-type="float">
            <text:p>5734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663657407407407" calcext:value-type="float">
            <text:p>0,00066365740740740700</text:p>
          </table:table-cell>
          <table:table-cell table:formula="of:=[.D96]-[.D95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61" office:value-type="float" office:value="5795" calcext:value-type="float">
            <text:p>579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670717592592593" calcext:value-type="float">
            <text:p>0,00067071759259259300</text:p>
          </table:table-cell>
          <table:table-cell table:formula="of:=[.D97]-[.D96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61" office:value-type="float" office:value="5856" calcext:value-type="float">
            <text:p>5856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677777777777778" calcext:value-type="float">
            <text:p>0,00067777777777777800</text:p>
          </table:table-cell>
          <table:table-cell table:formula="of:=[.D98]-[.D97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61" office:value-type="float" office:value="5917" calcext:value-type="float">
            <text:p>5917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684837962962963" calcext:value-type="float">
            <text:p>0,00068483796296296300</text:p>
          </table:table-cell>
          <table:table-cell table:formula="of:=[.D99]-[.D98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61" office:value-type="float" office:value="5978" calcext:value-type="float">
            <text:p>5978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691898148148148" calcext:value-type="float">
            <text:p>0,00069189814814814800</text:p>
          </table:table-cell>
          <table:table-cell table:formula="of:=[.D100]-[.D99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61" office:value-type="float" office:value="6039" calcext:value-type="float">
            <text:p>6039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698958333333333" calcext:value-type="float">
            <text:p>0,00069895833333333300</text:p>
          </table:table-cell>
          <table:table-cell table:formula="of:=[.D101]-[.D100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61" office:value-type="float" office:value="6100" calcext:value-type="float">
            <text:p>61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706018518518519" calcext:value-type="float">
            <text:p>0,00070601851851851900</text:p>
          </table:table-cell>
          <table:table-cell table:formula="of:=[.D102]-[.D101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61" office:value-type="float" office:value="6161" calcext:value-type="float">
            <text:p>6161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713078703703704" calcext:value-type="float">
            <text:p>0,00071307870370370400</text:p>
          </table:table-cell>
          <table:table-cell table:formula="of:=[.D103]-[.D102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61" office:value-type="float" office:value="6222" calcext:value-type="float">
            <text:p>6222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720138888888889" calcext:value-type="float">
            <text:p>0,00072013888888888900</text:p>
          </table:table-cell>
          <table:table-cell table:formula="of:=[.D104]-[.D103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61" office:value-type="float" office:value="6283" calcext:value-type="float">
            <text:p>6283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727199074074074" calcext:value-type="float">
            <text:p>0,00072719907407407400</text:p>
          </table:table-cell>
          <table:table-cell table:formula="of:=[.D105]-[.D104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61" office:value-type="float" office:value="6344" calcext:value-type="float">
            <text:p>6344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734259259259259" calcext:value-type="float">
            <text:p>0,00073425925925925900</text:p>
          </table:table-cell>
          <table:table-cell table:formula="of:=[.D106]-[.D105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61" office:value-type="float" office:value="6405" calcext:value-type="float">
            <text:p>640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741319444444444" calcext:value-type="float">
            <text:p>0,00074131944444444500</text:p>
          </table:table-cell>
          <table:table-cell table:formula="of:=[.D107]-[.D106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61" office:value-type="float" office:value="6466" calcext:value-type="float">
            <text:p>6466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74837962962963" calcext:value-type="float">
            <text:p>0,00074837962962963000</text:p>
          </table:table-cell>
          <table:table-cell table:formula="of:=[.D108]-[.D107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61" office:value-type="float" office:value="6527" calcext:value-type="float">
            <text:p>6527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755439814814815" calcext:value-type="float">
            <text:p>0,00075543981481481500</text:p>
          </table:table-cell>
          <table:table-cell table:formula="of:=[.D109]-[.D108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61" office:value-type="float" office:value="6588" calcext:value-type="float">
            <text:p>6588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7625" calcext:value-type="float">
            <text:p>0,00076250000000000000</text:p>
          </table:table-cell>
          <table:table-cell table:formula="of:=[.D110]-[.D109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61" office:value-type="float" office:value="6649" calcext:value-type="float">
            <text:p>6649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769560185185185" calcext:value-type="float">
            <text:p>0,00076956018518518500</text:p>
          </table:table-cell>
          <table:table-cell table:formula="of:=[.D111]-[.D110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61" office:value-type="float" office:value="6710" calcext:value-type="float">
            <text:p>671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77662037037037" calcext:value-type="float">
            <text:p>0,00077662037037037000</text:p>
          </table:table-cell>
          <table:table-cell table:formula="of:=[.D112]-[.D111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61" office:value-type="float" office:value="6771" calcext:value-type="float">
            <text:p>6771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783680555555556" calcext:value-type="float">
            <text:p>0,00078368055555555600</text:p>
          </table:table-cell>
          <table:table-cell table:formula="of:=[.D113]-[.D112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61" office:value-type="float" office:value="6832" calcext:value-type="float">
            <text:p>6832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790740740740741" calcext:value-type="float">
            <text:p>0,00079074074074074100</text:p>
          </table:table-cell>
          <table:table-cell table:formula="of:=[.D114]-[.D113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61" office:value-type="float" office:value="6893" calcext:value-type="float">
            <text:p>6893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797800925925926" calcext:value-type="float">
            <text:p>0,00079780092592592600</text:p>
          </table:table-cell>
          <table:table-cell table:formula="of:=[.D115]-[.D114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61" office:value-type="float" office:value="6954" calcext:value-type="float">
            <text:p>6954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804861111111111" calcext:value-type="float">
            <text:p>0,00080486111111111100</text:p>
          </table:table-cell>
          <table:table-cell table:formula="of:=[.D116]-[.D115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61" office:value-type="float" office:value="7015" calcext:value-type="float">
            <text:p>701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811921296296296" calcext:value-type="float">
            <text:p>0,00081192129629629600</text:p>
          </table:table-cell>
          <table:table-cell table:formula="of:=[.D117]-[.D116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61" office:value-type="float" office:value="7076" calcext:value-type="float">
            <text:p>7076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818981481481482" calcext:value-type="float">
            <text:p>0,00081898148148148100</text:p>
          </table:table-cell>
          <table:table-cell table:formula="of:=[.D118]-[.D117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61" office:value-type="float" office:value="7137" calcext:value-type="float">
            <text:p>7137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826041666666667" calcext:value-type="float">
            <text:p>0,00082604166666666700</text:p>
          </table:table-cell>
          <table:table-cell table:formula="of:=[.D119]-[.D118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61" office:value-type="float" office:value="7198" calcext:value-type="float">
            <text:p>7198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833101851851852" calcext:value-type="float">
            <text:p>0,00083310185185185200</text:p>
          </table:table-cell>
          <table:table-cell table:formula="of:=[.D120]-[.D119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61" office:value-type="float" office:value="7259" calcext:value-type="float">
            <text:p>7259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840162037037037" calcext:value-type="float">
            <text:p>0,00084016203703703700</text:p>
          </table:table-cell>
          <table:table-cell table:formula="of:=[.D121]-[.D120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61" office:value-type="float" office:value="7320" calcext:value-type="float">
            <text:p>732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847222222222222" calcext:value-type="float">
            <text:p>0,00084722222222222200</text:p>
          </table:table-cell>
          <table:table-cell table:formula="of:=[.D122]-[.D121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61" office:value-type="float" office:value="7381" calcext:value-type="float">
            <text:p>7381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854282407407407" calcext:value-type="float">
            <text:p>0,00085428240740740800</text:p>
          </table:table-cell>
          <table:table-cell table:formula="of:=[.D123]-[.D122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61" office:value-type="float" office:value="7442" calcext:value-type="float">
            <text:p>7442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861342592592593" calcext:value-type="float">
            <text:p>0,00086134259259259300</text:p>
          </table:table-cell>
          <table:table-cell table:formula="of:=[.D124]-[.D123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61" office:value-type="float" office:value="7503" calcext:value-type="float">
            <text:p>7503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868402777777778" calcext:value-type="float">
            <text:p>0,00086840277777777800</text:p>
          </table:table-cell>
          <table:table-cell table:formula="of:=[.D125]-[.D124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61" office:value-type="float" office:value="7564" calcext:value-type="float">
            <text:p>7564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875462962962963" calcext:value-type="float">
            <text:p>0,00087546296296296300</text:p>
          </table:table-cell>
          <table:table-cell table:formula="of:=[.D126]-[.D125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61" office:value-type="float" office:value="7625" calcext:value-type="float">
            <text:p>76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882523148148148" calcext:value-type="float">
            <text:p>0,00088252314814814800</text:p>
          </table:table-cell>
          <table:table-cell table:formula="of:=[.D127]-[.D126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61" office:value-type="float" office:value="7686" calcext:value-type="float">
            <text:p>7686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889583333333333" calcext:value-type="float">
            <text:p>0,00088958333333333400</text:p>
          </table:table-cell>
          <table:table-cell table:formula="of:=[.D128]-[.D127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61" office:value-type="float" office:value="7747" calcext:value-type="float">
            <text:p>7747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896643518518519" calcext:value-type="float">
            <text:p>0,00089664351851851900</text:p>
          </table:table-cell>
          <table:table-cell table:formula="of:=[.D129]-[.D128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61" office:value-type="float" office:value="7808" calcext:value-type="float">
            <text:p>7808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903703703703704" calcext:value-type="float">
            <text:p>0,00090370370370370400</text:p>
          </table:table-cell>
          <table:table-cell table:formula="of:=[.D130]-[.D129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61" office:value-type="float" office:value="7869" calcext:value-type="float">
            <text:p>7869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910763888888889" calcext:value-type="float">
            <text:p>0,00091076388888888900</text:p>
          </table:table-cell>
          <table:table-cell table:formula="of:=[.D131]-[.D130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61" office:value-type="float" office:value="7930" calcext:value-type="float">
            <text:p>793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917824074074074" calcext:value-type="float">
            <text:p>0,00091782407407407400</text:p>
          </table:table-cell>
          <table:table-cell table:formula="of:=[.D132]-[.D131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61" office:value-type="float" office:value="7991" calcext:value-type="float">
            <text:p>7991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924884259259259" calcext:value-type="float">
            <text:p>0,00092488425925925900</text:p>
          </table:table-cell>
          <table:table-cell table:formula="of:=[.D133]-[.D132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61" office:value-type="float" office:value="8052" calcext:value-type="float">
            <text:p>8052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931944444444444" calcext:value-type="float">
            <text:p>0,00093194444444444400</text:p>
          </table:table-cell>
          <table:table-cell table:formula="of:=[.D134]-[.D133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61" office:value-type="float" office:value="8113" calcext:value-type="float">
            <text:p>8113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93900462962963" calcext:value-type="float">
            <text:p>0,00093900462962963000</text:p>
          </table:table-cell>
          <table:table-cell table:formula="of:=[.D135]-[.D134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61" office:value-type="float" office:value="8174" calcext:value-type="float">
            <text:p>8174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946064814814815" calcext:value-type="float">
            <text:p>0,00094606481481481500</text:p>
          </table:table-cell>
          <table:table-cell table:formula="of:=[.D136]-[.D135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61" office:value-type="float" office:value="8235" calcext:value-type="float">
            <text:p>823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953125" calcext:value-type="float">
            <text:p>0,00095312500000000000</text:p>
          </table:table-cell>
          <table:table-cell table:formula="of:=[.D137]-[.D136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61" office:value-type="float" office:value="8296" calcext:value-type="float">
            <text:p>8296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960185185185185" calcext:value-type="float">
            <text:p>0,00096018518518518500</text:p>
          </table:table-cell>
          <table:table-cell table:formula="of:=[.D138]-[.D137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61" office:value-type="float" office:value="8357" calcext:value-type="float">
            <text:p>8357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96724537037037" calcext:value-type="float">
            <text:p>0,00096724537037037000</text:p>
          </table:table-cell>
          <table:table-cell table:formula="of:=[.D139]-[.D138]" office:value-type="float" office:value="0.00000706018518518514" calcext:value-type="float">
            <text:p>0,00000706018518518514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61" office:value-type="float" office:value="8418" calcext:value-type="float">
            <text:p>8418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974305555555556" calcext:value-type="float">
            <text:p>0,00097430555555555600</text:p>
          </table:table-cell>
          <table:table-cell table:formula="of:=[.D140]-[.D139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61" office:value-type="float" office:value="8479" calcext:value-type="float">
            <text:p>8479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981365740740741" calcext:value-type="float">
            <text:p>0,00098136574074074100</text:p>
          </table:table-cell>
          <table:table-cell table:formula="of:=[.D141]-[.D140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61" office:value-type="float" office:value="8540" calcext:value-type="float">
            <text:p>854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988425925925926" calcext:value-type="float">
            <text:p>0,00098842592592592600</text:p>
          </table:table-cell>
          <table:table-cell table:formula="of:=[.D142]-[.D141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61" office:value-type="float" office:value="8601" calcext:value-type="float">
            <text:p>8601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995486111111111" calcext:value-type="float">
            <text:p>0,00099548611111111100</text:p>
          </table:table-cell>
          <table:table-cell table:formula="of:=[.D143]-[.D142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61" office:value-type="float" office:value="8662" calcext:value-type="float">
            <text:p>8662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0025462962963" calcext:value-type="float">
            <text:p>0,00100254629629630000</text:p>
          </table:table-cell>
          <table:table-cell table:formula="of:=[.D144]-[.D143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61" office:value-type="float" office:value="8723" calcext:value-type="float">
            <text:p>8723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00960648148148" calcext:value-type="float">
            <text:p>0,00100960648148148000</text:p>
          </table:table-cell>
          <table:table-cell table:formula="of:=[.D145]-[.D144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61" office:value-type="float" office:value="8784" calcext:value-type="float">
            <text:p>8784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01666666666667" calcext:value-type="float">
            <text:p>0,00101666666666667000</text:p>
          </table:table-cell>
          <table:table-cell table:formula="of:=[.D146]-[.D145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61" office:value-type="float" office:value="8845" calcext:value-type="float">
            <text:p>884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02372685185185" calcext:value-type="float">
            <text:p>0,00102372685185185000</text:p>
          </table:table-cell>
          <table:table-cell table:formula="of:=[.D147]-[.D146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61" office:value-type="float" office:value="8906" calcext:value-type="float">
            <text:p>8906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03078703703704" calcext:value-type="float">
            <text:p>0,00103078703703704000</text:p>
          </table:table-cell>
          <table:table-cell table:formula="of:=[.D148]-[.D14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61" office:value-type="float" office:value="8967" calcext:value-type="float">
            <text:p>8967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03784722222222" calcext:value-type="float">
            <text:p>0,00103784722222222000</text:p>
          </table:table-cell>
          <table:table-cell table:formula="of:=[.D149]-[.D148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61" office:value-type="float" office:value="9028" calcext:value-type="float">
            <text:p>9028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04490740740741" calcext:value-type="float">
            <text:p>0,00104490740740741000</text:p>
          </table:table-cell>
          <table:table-cell table:formula="of:=[.D150]-[.D149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61" office:value-type="float" office:value="9089" calcext:value-type="float">
            <text:p>9089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05196759259259" calcext:value-type="float">
            <text:p>0,00105196759259259000</text:p>
          </table:table-cell>
          <table:table-cell table:formula="of:=[.D151]-[.D150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61" office:value-type="float" office:value="9150" calcext:value-type="float">
            <text:p>91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05902777777778" calcext:value-type="float">
            <text:p>0,00105902777777778000</text:p>
          </table:table-cell>
          <table:table-cell table:formula="of:=[.D152]-[.D151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61" office:value-type="float" office:value="9211" calcext:value-type="float">
            <text:p>9211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06608796296296" calcext:value-type="float">
            <text:p>0,00106608796296296000</text:p>
          </table:table-cell>
          <table:table-cell table:formula="of:=[.D153]-[.D152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61" office:value-type="float" office:value="9272" calcext:value-type="float">
            <text:p>9272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07314814814815" calcext:value-type="float">
            <text:p>0,00107314814814815000</text:p>
          </table:table-cell>
          <table:table-cell table:formula="of:=[.D154]-[.D153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61" office:value-type="float" office:value="9333" calcext:value-type="float">
            <text:p>9333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08020833333333" calcext:value-type="float">
            <text:p>0,00108020833333333000</text:p>
          </table:table-cell>
          <table:table-cell table:formula="of:=[.D155]-[.D154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61" office:value-type="float" office:value="9394" calcext:value-type="float">
            <text:p>9394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08726851851852" calcext:value-type="float">
            <text:p>0,00108726851851852000</text:p>
          </table:table-cell>
          <table:table-cell table:formula="of:=[.D156]-[.D155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61" office:value-type="float" office:value="9455" calcext:value-type="float">
            <text:p>945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0943287037037" calcext:value-type="float">
            <text:p>0,00109432870370370000</text:p>
          </table:table-cell>
          <table:table-cell table:formula="of:=[.D157]-[.D156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61" office:value-type="float" office:value="9516" calcext:value-type="float">
            <text:p>9516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10138888888889" calcext:value-type="float">
            <text:p>0,00110138888888889000</text:p>
          </table:table-cell>
          <table:table-cell table:formula="of:=[.D158]-[.D15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61" office:value-type="float" office:value="9577" calcext:value-type="float">
            <text:p>9577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10844907407407" calcext:value-type="float">
            <text:p>0,00110844907407407000</text:p>
          </table:table-cell>
          <table:table-cell table:formula="of:=[.D159]-[.D158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61" office:value-type="float" office:value="9638" calcext:value-type="float">
            <text:p>9638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11550925925926" calcext:value-type="float">
            <text:p>0,00111550925925926000</text:p>
          </table:table-cell>
          <table:table-cell table:formula="of:=[.D160]-[.D159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61" office:value-type="float" office:value="9699" calcext:value-type="float">
            <text:p>9699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12256944444444" calcext:value-type="float">
            <text:p>0,00112256944444444000</text:p>
          </table:table-cell>
          <table:table-cell table:formula="of:=[.D161]-[.D160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61" office:value-type="float" office:value="9760" calcext:value-type="float">
            <text:p>976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12962962962963" calcext:value-type="float">
            <text:p>0,00112962962962963000</text:p>
          </table:table-cell>
          <table:table-cell table:formula="of:=[.D162]-[.D161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61" office:value-type="float" office:value="9821" calcext:value-type="float">
            <text:p>9821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13668981481481" calcext:value-type="float">
            <text:p>0,00113668981481481000</text:p>
          </table:table-cell>
          <table:table-cell table:formula="of:=[.D163]-[.D162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61" office:value-type="float" office:value="9882" calcext:value-type="float">
            <text:p>9882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14375" calcext:value-type="float">
            <text:p>0,00114375000000000000</text:p>
          </table:table-cell>
          <table:table-cell table:formula="of:=[.D164]-[.D163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61" office:value-type="float" office:value="9943" calcext:value-type="float">
            <text:p>9943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15081018518519" calcext:value-type="float">
            <text:p>0,00115081018518519000</text:p>
          </table:table-cell>
          <table:table-cell table:formula="of:=[.D165]-[.D164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61" office:value-type="float" office:value="10004" calcext:value-type="float">
            <text:p>10004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15787037037037" calcext:value-type="float">
            <text:p>0,00115787037037037000</text:p>
          </table:table-cell>
          <table:table-cell table:formula="of:=[.D166]-[.D165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61" office:value-type="float" office:value="10065" calcext:value-type="float">
            <text:p>1006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16493055555556" calcext:value-type="float">
            <text:p>0,00116493055555556000</text:p>
          </table:table-cell>
          <table:table-cell table:formula="of:=[.D167]-[.D166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61" office:value-type="float" office:value="10126" calcext:value-type="float">
            <text:p>10126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17199074074074" calcext:value-type="float">
            <text:p>0,00117199074074074000</text:p>
          </table:table-cell>
          <table:table-cell table:formula="of:=[.D168]-[.D16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61" office:value-type="float" office:value="10187" calcext:value-type="float">
            <text:p>10187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17905092592593" calcext:value-type="float">
            <text:p>0,00117905092592593000</text:p>
          </table:table-cell>
          <table:table-cell table:formula="of:=[.D169]-[.D168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61" office:value-type="float" office:value="10248" calcext:value-type="float">
            <text:p>10248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18611111111111" calcext:value-type="float">
            <text:p>0,00118611111111111000</text:p>
          </table:table-cell>
          <table:table-cell table:formula="of:=[.D170]-[.D169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61" office:value-type="float" office:value="10309" calcext:value-type="float">
            <text:p>10309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1931712962963" calcext:value-type="float">
            <text:p>0,00119317129629630000</text:p>
          </table:table-cell>
          <table:table-cell table:formula="of:=[.D171]-[.D17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61" office:value-type="float" office:value="10370" calcext:value-type="float">
            <text:p>1037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20023148148148" calcext:value-type="float">
            <text:p>0,00120023148148148000</text:p>
          </table:table-cell>
          <table:table-cell table:formula="of:=[.D172]-[.D171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61" office:value-type="float" office:value="10431" calcext:value-type="float">
            <text:p>10431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20729166666667" calcext:value-type="float">
            <text:p>0,00120729166666667000</text:p>
          </table:table-cell>
          <table:table-cell table:formula="of:=[.D173]-[.D172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61" office:value-type="float" office:value="10492" calcext:value-type="float">
            <text:p>10492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21435185185185" calcext:value-type="float">
            <text:p>0,00121435185185185000</text:p>
          </table:table-cell>
          <table:table-cell table:formula="of:=[.D174]-[.D173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61" office:value-type="float" office:value="10553" calcext:value-type="float">
            <text:p>10553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22141203703704" calcext:value-type="float">
            <text:p>0,00122141203703704000</text:p>
          </table:table-cell>
          <table:table-cell table:formula="of:=[.D175]-[.D174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61" office:value-type="float" office:value="10614" calcext:value-type="float">
            <text:p>10614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22847222222222" calcext:value-type="float">
            <text:p>0,00122847222222222000</text:p>
          </table:table-cell>
          <table:table-cell table:formula="of:=[.D176]-[.D175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61" office:value-type="float" office:value="10675" calcext:value-type="float">
            <text:p>106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23553240740741" calcext:value-type="float">
            <text:p>0,00123553240740741000</text:p>
          </table:table-cell>
          <table:table-cell table:formula="of:=[.D177]-[.D176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61" office:value-type="float" office:value="10736" calcext:value-type="float">
            <text:p>10736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24259259259259" calcext:value-type="float">
            <text:p>0,00124259259259259000</text:p>
          </table:table-cell>
          <table:table-cell table:formula="of:=[.D178]-[.D17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61" office:value-type="float" office:value="10797" calcext:value-type="float">
            <text:p>10797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24965277777778" calcext:value-type="float">
            <text:p>0,00124965277777778000</text:p>
          </table:table-cell>
          <table:table-cell table:formula="of:=[.D179]-[.D178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61" office:value-type="float" office:value="10858" calcext:value-type="float">
            <text:p>10858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25671296296296" calcext:value-type="float">
            <text:p>0,00125671296296296000</text:p>
          </table:table-cell>
          <table:table-cell table:formula="of:=[.D180]-[.D179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61" office:value-type="float" office:value="10919" calcext:value-type="float">
            <text:p>10919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26377314814815" calcext:value-type="float">
            <text:p>0,00126377314814815000</text:p>
          </table:table-cell>
          <table:table-cell table:formula="of:=[.D181]-[.D18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61" office:value-type="float" office:value="10980" calcext:value-type="float">
            <text:p>1098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27083333333333" calcext:value-type="float">
            <text:p>0,00127083333333333000</text:p>
          </table:table-cell>
          <table:table-cell table:formula="of:=[.D182]-[.D181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61" office:value-type="float" office:value="11041" calcext:value-type="float">
            <text:p>11041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27789351851852" calcext:value-type="float">
            <text:p>0,00127789351851852000</text:p>
          </table:table-cell>
          <table:table-cell table:formula="of:=[.D183]-[.D182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61" office:value-type="float" office:value="11102" calcext:value-type="float">
            <text:p>11102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2849537037037" calcext:value-type="float">
            <text:p>0,00128495370370370000</text:p>
          </table:table-cell>
          <table:table-cell table:formula="of:=[.D184]-[.D183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61" office:value-type="float" office:value="11163" calcext:value-type="float">
            <text:p>11163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29201388888889" calcext:value-type="float">
            <text:p>0,00129201388888889000</text:p>
          </table:table-cell>
          <table:table-cell table:formula="of:=[.D185]-[.D184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61" office:value-type="float" office:value="11224" calcext:value-type="float">
            <text:p>11224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29907407407407" calcext:value-type="float">
            <text:p>0,00129907407407407000</text:p>
          </table:table-cell>
          <table:table-cell table:formula="of:=[.D186]-[.D185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61" office:value-type="float" office:value="11285" calcext:value-type="float">
            <text:p>1128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30613425925926" calcext:value-type="float">
            <text:p>0,00130613425925926000</text:p>
          </table:table-cell>
          <table:table-cell table:formula="of:=[.D187]-[.D186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61" office:value-type="float" office:value="11346" calcext:value-type="float">
            <text:p>11346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31319444444444" calcext:value-type="float">
            <text:p>0,00131319444444444000</text:p>
          </table:table-cell>
          <table:table-cell table:formula="of:=[.D188]-[.D18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61" office:value-type="float" office:value="11407" calcext:value-type="float">
            <text:p>11407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32025462962963" calcext:value-type="float">
            <text:p>0,00132025462962963000</text:p>
          </table:table-cell>
          <table:table-cell table:formula="of:=[.D189]-[.D188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61" office:value-type="float" office:value="11468" calcext:value-type="float">
            <text:p>11468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32731481481481" calcext:value-type="float">
            <text:p>0,00132731481481481000</text:p>
          </table:table-cell>
          <table:table-cell table:formula="of:=[.D190]-[.D189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61" office:value-type="float" office:value="11529" calcext:value-type="float">
            <text:p>11529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334375" calcext:value-type="float">
            <text:p>0,00133437500000000000</text:p>
          </table:table-cell>
          <table:table-cell table:formula="of:=[.D191]-[.D19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61" office:value-type="float" office:value="11590" calcext:value-type="float">
            <text:p>1159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34143518518519" calcext:value-type="float">
            <text:p>0,00134143518518519000</text:p>
          </table:table-cell>
          <table:table-cell table:formula="of:=[.D192]-[.D191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61" office:value-type="float" office:value="11651" calcext:value-type="float">
            <text:p>11651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34849537037037" calcext:value-type="float">
            <text:p>0,00134849537037037000</text:p>
          </table:table-cell>
          <table:table-cell table:formula="of:=[.D193]-[.D192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61" office:value-type="float" office:value="11712" calcext:value-type="float">
            <text:p>11712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35555555555556" calcext:value-type="float">
            <text:p>0,00135555555555556000</text:p>
          </table:table-cell>
          <table:table-cell table:formula="of:=[.D194]-[.D193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61" office:value-type="float" office:value="11773" calcext:value-type="float">
            <text:p>11773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36261574074074" calcext:value-type="float">
            <text:p>0,00136261574074074000</text:p>
          </table:table-cell>
          <table:table-cell table:formula="of:=[.D195]-[.D194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61" office:value-type="float" office:value="11834" calcext:value-type="float">
            <text:p>11834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36967592592593" calcext:value-type="float">
            <text:p>0,00136967592592593000</text:p>
          </table:table-cell>
          <table:table-cell table:formula="of:=[.D196]-[.D195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61" office:value-type="float" office:value="11895" calcext:value-type="float">
            <text:p>1189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37673611111111" calcext:value-type="float">
            <text:p>0,00137673611111111000</text:p>
          </table:table-cell>
          <table:table-cell table:formula="of:=[.D197]-[.D196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61" office:value-type="float" office:value="11956" calcext:value-type="float">
            <text:p>11956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3837962962963" calcext:value-type="float">
            <text:p>0,00138379629629630000</text:p>
          </table:table-cell>
          <table:table-cell table:formula="of:=[.D198]-[.D19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61" office:value-type="float" office:value="12017" calcext:value-type="float">
            <text:p>12017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39085648148148" calcext:value-type="float">
            <text:p>0,00139085648148148000</text:p>
          </table:table-cell>
          <table:table-cell table:formula="of:=[.D199]-[.D198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61" office:value-type="float" office:value="12078" calcext:value-type="float">
            <text:p>12078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39791666666667" calcext:value-type="float">
            <text:p>0,00139791666666667000</text:p>
          </table:table-cell>
          <table:table-cell table:formula="of:=[.D200]-[.D199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61" office:value-type="float" office:value="12139" calcext:value-type="float">
            <text:p>12139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40497685185185" calcext:value-type="float">
            <text:p>0,00140497685185185000</text:p>
          </table:table-cell>
          <table:table-cell table:formula="of:=[.D201]-[.D20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61" office:value-type="float" office:value="12200" calcext:value-type="float">
            <text:p>122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41203703703704" calcext:value-type="float">
            <text:p>0,00141203703703704000</text:p>
          </table:table-cell>
          <table:table-cell table:formula="of:=[.D202]-[.D201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61" office:value-type="float" office:value="12261" calcext:value-type="float">
            <text:p>12261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41909722222222" calcext:value-type="float">
            <text:p>0,00141909722222222000</text:p>
          </table:table-cell>
          <table:table-cell table:formula="of:=[.D203]-[.D202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61" office:value-type="float" office:value="12322" calcext:value-type="float">
            <text:p>12322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42615740740741" calcext:value-type="float">
            <text:p>0,00142615740740741000</text:p>
          </table:table-cell>
          <table:table-cell table:formula="of:=[.D204]-[.D203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61" office:value-type="float" office:value="12383" calcext:value-type="float">
            <text:p>12383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43321759259259" calcext:value-type="float">
            <text:p>0,00143321759259259000</text:p>
          </table:table-cell>
          <table:table-cell table:formula="of:=[.D205]-[.D204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61" office:value-type="float" office:value="12444" calcext:value-type="float">
            <text:p>12444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44027777777778" calcext:value-type="float">
            <text:p>0,00144027777777778000</text:p>
          </table:table-cell>
          <table:table-cell table:formula="of:=[.D206]-[.D205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61" office:value-type="float" office:value="12505" calcext:value-type="float">
            <text:p>1250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44733796296296" calcext:value-type="float">
            <text:p>0,00144733796296296000</text:p>
          </table:table-cell>
          <table:table-cell table:formula="of:=[.D207]-[.D206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61" office:value-type="float" office:value="12566" calcext:value-type="float">
            <text:p>12566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45439814814815" calcext:value-type="float">
            <text:p>0,00145439814814815000</text:p>
          </table:table-cell>
          <table:table-cell table:formula="of:=[.D208]-[.D20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61" office:value-type="float" office:value="12627" calcext:value-type="float">
            <text:p>12627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46145833333333" calcext:value-type="float">
            <text:p>0,00146145833333333000</text:p>
          </table:table-cell>
          <table:table-cell table:formula="of:=[.D209]-[.D208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61" office:value-type="float" office:value="12688" calcext:value-type="float">
            <text:p>12688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46851851851852" calcext:value-type="float">
            <text:p>0,00146851851851852000</text:p>
          </table:table-cell>
          <table:table-cell table:formula="of:=[.D210]-[.D209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61" office:value-type="float" office:value="12749" calcext:value-type="float">
            <text:p>12749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4755787037037" calcext:value-type="float">
            <text:p>0,00147557870370370000</text:p>
          </table:table-cell>
          <table:table-cell table:formula="of:=[.D211]-[.D21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61" office:value-type="float" office:value="12810" calcext:value-type="float">
            <text:p>1281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48263888888889" calcext:value-type="float">
            <text:p>0,00148263888888889000</text:p>
          </table:table-cell>
          <table:table-cell table:formula="of:=[.D212]-[.D211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61" office:value-type="float" office:value="12871" calcext:value-type="float">
            <text:p>12871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48969907407407" calcext:value-type="float">
            <text:p>0,00148969907407407000</text:p>
          </table:table-cell>
          <table:table-cell table:formula="of:=[.D213]-[.D212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61" office:value-type="float" office:value="12932" calcext:value-type="float">
            <text:p>12932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49675925925926" calcext:value-type="float">
            <text:p>0,00149675925925926000</text:p>
          </table:table-cell>
          <table:table-cell table:formula="of:=[.D214]-[.D213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61" office:value-type="float" office:value="12993" calcext:value-type="float">
            <text:p>12993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50381944444444" calcext:value-type="float">
            <text:p>0,00150381944444444000</text:p>
          </table:table-cell>
          <table:table-cell table:formula="of:=[.D215]-[.D214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61" office:value-type="float" office:value="13054" calcext:value-type="float">
            <text:p>13054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51087962962963" calcext:value-type="float">
            <text:p>0,00151087962962963000</text:p>
          </table:table-cell>
          <table:table-cell table:formula="of:=[.D216]-[.D215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61" office:value-type="float" office:value="13115" calcext:value-type="float">
            <text:p>1311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51793981481481" calcext:value-type="float">
            <text:p>0,00151793981481481000</text:p>
          </table:table-cell>
          <table:table-cell table:formula="of:=[.D217]-[.D216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61" office:value-type="float" office:value="13176" calcext:value-type="float">
            <text:p>13176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525" calcext:value-type="float">
            <text:p>0,00152500000000000000</text:p>
          </table:table-cell>
          <table:table-cell table:formula="of:=[.D218]-[.D21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61" office:value-type="float" office:value="13237" calcext:value-type="float">
            <text:p>13237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53206018518519" calcext:value-type="float">
            <text:p>0,00153206018518519000</text:p>
          </table:table-cell>
          <table:table-cell table:formula="of:=[.D219]-[.D218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61" office:value-type="float" office:value="13298" calcext:value-type="float">
            <text:p>13298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53912037037037" calcext:value-type="float">
            <text:p>0,00153912037037037000</text:p>
          </table:table-cell>
          <table:table-cell table:formula="of:=[.D220]-[.D219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61" office:value-type="float" office:value="13359" calcext:value-type="float">
            <text:p>13359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54618055555556" calcext:value-type="float">
            <text:p>0,00154618055555556000</text:p>
          </table:table-cell>
          <table:table-cell table:formula="of:=[.D221]-[.D22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61" office:value-type="float" office:value="13420" calcext:value-type="float">
            <text:p>1342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55324074074074" calcext:value-type="float">
            <text:p>0,00155324074074074000</text:p>
          </table:table-cell>
          <table:table-cell table:formula="of:=[.D222]-[.D221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61" office:value-type="float" office:value="13481" calcext:value-type="float">
            <text:p>13481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56030092592593" calcext:value-type="float">
            <text:p>0,00156030092592593000</text:p>
          </table:table-cell>
          <table:table-cell table:formula="of:=[.D223]-[.D222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61" office:value-type="float" office:value="13542" calcext:value-type="float">
            <text:p>13542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56736111111111" calcext:value-type="float">
            <text:p>0,00156736111111111000</text:p>
          </table:table-cell>
          <table:table-cell table:formula="of:=[.D224]-[.D223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61" office:value-type="float" office:value="13603" calcext:value-type="float">
            <text:p>13603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5744212962963" calcext:value-type="float">
            <text:p>0,00157442129629630000</text:p>
          </table:table-cell>
          <table:table-cell table:formula="of:=[.D225]-[.D224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61" office:value-type="float" office:value="13664" calcext:value-type="float">
            <text:p>13664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58148148148148" calcext:value-type="float">
            <text:p>0,00158148148148148000</text:p>
          </table:table-cell>
          <table:table-cell table:formula="of:=[.D226]-[.D225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61" office:value-type="float" office:value="13725" calcext:value-type="float">
            <text:p>137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58854166666667" calcext:value-type="float">
            <text:p>0,00158854166666667000</text:p>
          </table:table-cell>
          <table:table-cell table:formula="of:=[.D227]-[.D226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61" office:value-type="float" office:value="13786" calcext:value-type="float">
            <text:p>13786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59560185185185" calcext:value-type="float">
            <text:p>0,00159560185185185000</text:p>
          </table:table-cell>
          <table:table-cell table:formula="of:=[.D228]-[.D22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61" office:value-type="float" office:value="13847" calcext:value-type="float">
            <text:p>13847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60266203703704" calcext:value-type="float">
            <text:p>0,00160266203703704000</text:p>
          </table:table-cell>
          <table:table-cell table:formula="of:=[.D229]-[.D228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61" office:value-type="float" office:value="13908" calcext:value-type="float">
            <text:p>13908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60972222222222" calcext:value-type="float">
            <text:p>0,00160972222222222000</text:p>
          </table:table-cell>
          <table:table-cell table:formula="of:=[.D230]-[.D229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61" office:value-type="float" office:value="13969" calcext:value-type="float">
            <text:p>13969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61678240740741" calcext:value-type="float">
            <text:p>0,00161678240740741000</text:p>
          </table:table-cell>
          <table:table-cell table:formula="of:=[.D231]-[.D23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61" office:value-type="float" office:value="14030" calcext:value-type="float">
            <text:p>1403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62384259259259" calcext:value-type="float">
            <text:p>0,00162384259259259000</text:p>
          </table:table-cell>
          <table:table-cell table:formula="of:=[.D232]-[.D231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61" office:value-type="float" office:value="14091" calcext:value-type="float">
            <text:p>14091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63090277777778" calcext:value-type="float">
            <text:p>0,00163090277777778000</text:p>
          </table:table-cell>
          <table:table-cell table:formula="of:=[.D233]-[.D232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61" office:value-type="float" office:value="14152" calcext:value-type="float">
            <text:p>14152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63796296296296" calcext:value-type="float">
            <text:p>0,00163796296296296000</text:p>
          </table:table-cell>
          <table:table-cell table:formula="of:=[.D234]-[.D233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61" office:value-type="float" office:value="14213" calcext:value-type="float">
            <text:p>14213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64502314814815" calcext:value-type="float">
            <text:p>0,00164502314814815000</text:p>
          </table:table-cell>
          <table:table-cell table:formula="of:=[.D235]-[.D234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61" office:value-type="float" office:value="14274" calcext:value-type="float">
            <text:p>14274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65208333333333" calcext:value-type="float">
            <text:p>0,00165208333333333000</text:p>
          </table:table-cell>
          <table:table-cell table:formula="of:=[.D236]-[.D235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61" office:value-type="float" office:value="14335" calcext:value-type="float">
            <text:p>1433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65914351851852" calcext:value-type="float">
            <text:p>0,00165914351851852000</text:p>
          </table:table-cell>
          <table:table-cell table:formula="of:=[.D237]-[.D236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61" office:value-type="float" office:value="14396" calcext:value-type="float">
            <text:p>14396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6662037037037" calcext:value-type="float">
            <text:p>0,00166620370370370000</text:p>
          </table:table-cell>
          <table:table-cell table:formula="of:=[.D238]-[.D237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61" office:value-type="float" office:value="14457" calcext:value-type="float">
            <text:p>14457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67326388888889" calcext:value-type="float">
            <text:p>0,00167326388888889000</text:p>
          </table:table-cell>
          <table:table-cell table:formula="of:=[.D239]-[.D238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61" office:value-type="float" office:value="14518" calcext:value-type="float">
            <text:p>14518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68032407407407" calcext:value-type="float">
            <text:p>0,00168032407407407000</text:p>
          </table:table-cell>
          <table:table-cell table:formula="of:=[.D240]-[.D239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61" office:value-type="float" office:value="14579" calcext:value-type="float">
            <text:p>14579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68738425925926" calcext:value-type="float">
            <text:p>0,00168738425925926000</text:p>
          </table:table-cell>
          <table:table-cell table:formula="of:=[.D241]-[.D24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61" office:value-type="float" office:value="14640" calcext:value-type="float">
            <text:p>1464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69444444444444" calcext:value-type="float">
            <text:p>0,00169444444444444000</text:p>
          </table:table-cell>
          <table:table-cell table:formula="of:=[.D242]-[.D241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61" office:value-type="float" office:value="14701" calcext:value-type="float">
            <text:p>14701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70150462962963" calcext:value-type="float">
            <text:p>0,00170150462962963000</text:p>
          </table:table-cell>
          <table:table-cell table:formula="of:=[.D243]-[.D242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61" office:value-type="float" office:value="14762" calcext:value-type="float">
            <text:p>14762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70856481481481" calcext:value-type="float">
            <text:p>0,00170856481481482000</text:p>
          </table:table-cell>
          <table:table-cell table:formula="of:=[.D244]-[.D243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61" office:value-type="float" office:value="14823" calcext:value-type="float">
            <text:p>14823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715625" calcext:value-type="float">
            <text:p>0,00171562500000000000</text:p>
          </table:table-cell>
          <table:table-cell table:formula="of:=[.D245]-[.D244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61" office:value-type="float" office:value="14884" calcext:value-type="float">
            <text:p>14884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72268518518519" calcext:value-type="float">
            <text:p>0,00172268518518519000</text:p>
          </table:table-cell>
          <table:table-cell table:formula="of:=[.D246]-[.D245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61" office:value-type="float" office:value="14945" calcext:value-type="float">
            <text:p>1494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72974537037037" calcext:value-type="float">
            <text:p>0,00172974537037037000</text:p>
          </table:table-cell>
          <table:table-cell table:formula="of:=[.D247]-[.D246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61" office:value-type="float" office:value="15006" calcext:value-type="float">
            <text:p>15006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73680555555556" calcext:value-type="float">
            <text:p>0,00173680555555556000</text:p>
          </table:table-cell>
          <table:table-cell table:formula="of:=[.D248]-[.D247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61" office:value-type="float" office:value="15067" calcext:value-type="float">
            <text:p>15067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74386574074074" calcext:value-type="float">
            <text:p>0,00174386574074074000</text:p>
          </table:table-cell>
          <table:table-cell table:formula="of:=[.D249]-[.D248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61" office:value-type="float" office:value="15128" calcext:value-type="float">
            <text:p>15128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75092592592593" calcext:value-type="float">
            <text:p>0,00175092592592593000</text:p>
          </table:table-cell>
          <table:table-cell table:formula="of:=[.D250]-[.D249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61" office:value-type="float" office:value="15189" calcext:value-type="float">
            <text:p>15189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75798611111111" calcext:value-type="float">
            <text:p>0,00175798611111111000</text:p>
          </table:table-cell>
          <table:table-cell table:formula="of:=[.D251]-[.D25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61" office:value-type="float" office:value="15250" calcext:value-type="float">
            <text:p>15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7650462962963" calcext:value-type="float">
            <text:p>0,00176504629629630000</text:p>
          </table:table-cell>
          <table:table-cell table:formula="of:=[.D252]-[.D251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61" office:value-type="float" office:value="15311" calcext:value-type="float">
            <text:p>15311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77210648148148" calcext:value-type="float">
            <text:p>0,00177210648148148000</text:p>
          </table:table-cell>
          <table:table-cell table:formula="of:=[.D253]-[.D252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61" office:value-type="float" office:value="15372" calcext:value-type="float">
            <text:p>15372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77916666666667" calcext:value-type="float">
            <text:p>0,00177916666666667000</text:p>
          </table:table-cell>
          <table:table-cell table:formula="of:=[.D254]-[.D253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61" office:value-type="float" office:value="15433" calcext:value-type="float">
            <text:p>15433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78622685185185" calcext:value-type="float">
            <text:p>0,00178622685185185000</text:p>
          </table:table-cell>
          <table:table-cell table:formula="of:=[.D255]-[.D254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61" office:value-type="float" office:value="15494" calcext:value-type="float">
            <text:p>15494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79328703703704" calcext:value-type="float">
            <text:p>0,00179328703703704000</text:p>
          </table:table-cell>
          <table:table-cell table:formula="of:=[.D256]-[.D255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61" office:value-type="float" office:value="15555" calcext:value-type="float">
            <text:p>1555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80034722222222" calcext:value-type="float">
            <text:p>0,00180034722222222000</text:p>
          </table:table-cell>
          <table:table-cell table:formula="of:=[.D257]-[.D256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61" office:value-type="float" office:value="15616" calcext:value-type="float">
            <text:p>15616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80740740740741" calcext:value-type="float">
            <text:p>0,00180740740740741000</text:p>
          </table:table-cell>
          <table:table-cell table:formula="of:=[.D258]-[.D257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61" office:value-type="float" office:value="15677" calcext:value-type="float">
            <text:p>15677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81446759259259" calcext:value-type="float">
            <text:p>0,00181446759259259000</text:p>
          </table:table-cell>
          <table:table-cell table:formula="of:=[.D259]-[.D258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61" office:value-type="float" office:value="15738" calcext:value-type="float">
            <text:p>15738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82152777777778" calcext:value-type="float">
            <text:p>0,00182152777777778000</text:p>
          </table:table-cell>
          <table:table-cell table:formula="of:=[.D260]-[.D259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61" office:value-type="float" office:value="15799" calcext:value-type="float">
            <text:p>15799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82858796296296" calcext:value-type="float">
            <text:p>0,00182858796296296000</text:p>
          </table:table-cell>
          <table:table-cell table:formula="of:=[.D261]-[.D26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61" office:value-type="float" office:value="15860" calcext:value-type="float">
            <text:p>1586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83564814814815" calcext:value-type="float">
            <text:p>0,00183564814814815000</text:p>
          </table:table-cell>
          <table:table-cell table:formula="of:=[.D262]-[.D261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61" office:value-type="float" office:value="15921" calcext:value-type="float">
            <text:p>15921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84270833333333" calcext:value-type="float">
            <text:p>0,00184270833333333000</text:p>
          </table:table-cell>
          <table:table-cell table:formula="of:=[.D263]-[.D262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61" office:value-type="float" office:value="15982" calcext:value-type="float">
            <text:p>15982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84976851851852" calcext:value-type="float">
            <text:p>0,00184976851851852000</text:p>
          </table:table-cell>
          <table:table-cell table:formula="of:=[.D264]-[.D263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61" office:value-type="float" office:value="16043" calcext:value-type="float">
            <text:p>16043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8568287037037" calcext:value-type="float">
            <text:p>0,00185682870370370000</text:p>
          </table:table-cell>
          <table:table-cell table:formula="of:=[.D265]-[.D264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61" office:value-type="float" office:value="16104" calcext:value-type="float">
            <text:p>16104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86388888888889" calcext:value-type="float">
            <text:p>0,00186388888888889000</text:p>
          </table:table-cell>
          <table:table-cell table:formula="of:=[.D266]-[.D265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61" office:value-type="float" office:value="16165" calcext:value-type="float">
            <text:p>1616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87094907407407" calcext:value-type="float">
            <text:p>0,00187094907407407000</text:p>
          </table:table-cell>
          <table:table-cell table:formula="of:=[.D267]-[.D266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61" office:value-type="float" office:value="16226" calcext:value-type="float">
            <text:p>16226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87800925925926" calcext:value-type="float">
            <text:p>0,00187800925925926000</text:p>
          </table:table-cell>
          <table:table-cell table:formula="of:=[.D268]-[.D267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61" office:value-type="float" office:value="16287" calcext:value-type="float">
            <text:p>16287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88506944444444" calcext:value-type="float">
            <text:p>0,00188506944444444000</text:p>
          </table:table-cell>
          <table:table-cell table:formula="of:=[.D269]-[.D268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61" office:value-type="float" office:value="16348" calcext:value-type="float">
            <text:p>16348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89212962962963" calcext:value-type="float">
            <text:p>0,00189212962962963000</text:p>
          </table:table-cell>
          <table:table-cell table:formula="of:=[.D270]-[.D269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61" office:value-type="float" office:value="16409" calcext:value-type="float">
            <text:p>16409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89918981481481" calcext:value-type="float">
            <text:p>0,00189918981481481000</text:p>
          </table:table-cell>
          <table:table-cell table:formula="of:=[.D271]-[.D270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61" office:value-type="float" office:value="16470" calcext:value-type="float">
            <text:p>1647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90625" calcext:value-type="float">
            <text:p>0,00190625000000000000</text:p>
          </table:table-cell>
          <table:table-cell table:formula="of:=[.D272]-[.D271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61" office:value-type="float" office:value="16531" calcext:value-type="float">
            <text:p>16531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91331018518519" calcext:value-type="float">
            <text:p>0,00191331018518519000</text:p>
          </table:table-cell>
          <table:table-cell table:formula="of:=[.D273]-[.D272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61" office:value-type="float" office:value="16592" calcext:value-type="float">
            <text:p>16592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92037037037037" calcext:value-type="float">
            <text:p>0,00192037037037037000</text:p>
          </table:table-cell>
          <table:table-cell table:formula="of:=[.D274]-[.D273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61" office:value-type="float" office:value="16653" calcext:value-type="float">
            <text:p>16653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92743055555556" calcext:value-type="float">
            <text:p>0,00192743055555556000</text:p>
          </table:table-cell>
          <table:table-cell table:formula="of:=[.D275]-[.D274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61" office:value-type="float" office:value="16714" calcext:value-type="float">
            <text:p>16714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93449074074074" calcext:value-type="float">
            <text:p>0,00193449074074074000</text:p>
          </table:table-cell>
          <table:table-cell table:formula="of:=[.D276]-[.D275]" office:value-type="float" office:value="0.00000706018518518525" calcext:value-type="float">
            <text:p>0,00000706018518518525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61" office:value-type="float" office:value="16775" calcext:value-type="float">
            <text:p>167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94155092592593" calcext:value-type="float">
            <text:p>0,00194155092592593000</text:p>
          </table:table-cell>
          <table:table-cell table:formula="of:=[.D277]-[.D276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61" office:value-type="float" office:value="16836" calcext:value-type="float">
            <text:p>16836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94861111111111" calcext:value-type="float">
            <text:p>0,00194861111111111000</text:p>
          </table:table-cell>
          <table:table-cell table:formula="of:=[.D278]-[.D277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61" office:value-type="float" office:value="16897" calcext:value-type="float">
            <text:p>16897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9556712962963" calcext:value-type="float">
            <text:p>0,00195567129629630000</text:p>
          </table:table-cell>
          <table:table-cell table:formula="of:=[.D279]-[.D278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61" office:value-type="float" office:value="16958" calcext:value-type="float">
            <text:p>16958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96273148148148" calcext:value-type="float">
            <text:p>0,00196273148148148000</text:p>
          </table:table-cell>
          <table:table-cell table:formula="of:=[.D280]-[.D279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61" office:value-type="float" office:value="17019" calcext:value-type="float">
            <text:p>17019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96979166666667" calcext:value-type="float">
            <text:p>0,00196979166666667000</text:p>
          </table:table-cell>
          <table:table-cell table:formula="of:=[.D281]-[.D280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61" office:value-type="float" office:value="17080" calcext:value-type="float">
            <text:p>1708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97685185185185" calcext:value-type="float">
            <text:p>0,00197685185185185000</text:p>
          </table:table-cell>
          <table:table-cell table:formula="of:=[.D282]-[.D281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61" office:value-type="float" office:value="17141" calcext:value-type="float">
            <text:p>17141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98391203703704" calcext:value-type="float">
            <text:p>0,00198391203703704000</text:p>
          </table:table-cell>
          <table:table-cell table:formula="of:=[.D283]-[.D282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61" office:value-type="float" office:value="17202" calcext:value-type="float">
            <text:p>17202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99097222222222" calcext:value-type="float">
            <text:p>0,00199097222222222000</text:p>
          </table:table-cell>
          <table:table-cell table:formula="of:=[.D284]-[.D283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61" office:value-type="float" office:value="17263" calcext:value-type="float">
            <text:p>17263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99803240740741" calcext:value-type="float">
            <text:p>0,00199803240740741000</text:p>
          </table:table-cell>
          <table:table-cell table:formula="of:=[.D285]-[.D284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61" office:value-type="float" office:value="17324" calcext:value-type="float">
            <text:p>17324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00509259259259" calcext:value-type="float">
            <text:p>0,00200509259259259000</text:p>
          </table:table-cell>
          <table:table-cell table:formula="of:=[.D286]-[.D285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61" office:value-type="float" office:value="17385" calcext:value-type="float">
            <text:p>1738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01215277777778" calcext:value-type="float">
            <text:p>0,00201215277777778000</text:p>
          </table:table-cell>
          <table:table-cell table:formula="of:=[.D287]-[.D286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61" office:value-type="float" office:value="17446" calcext:value-type="float">
            <text:p>17446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01921296296296" calcext:value-type="float">
            <text:p>0,00201921296296296000</text:p>
          </table:table-cell>
          <table:table-cell table:formula="of:=[.D288]-[.D28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61" office:value-type="float" office:value="17507" calcext:value-type="float">
            <text:p>17507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02627314814815" calcext:value-type="float">
            <text:p>0,00202627314814815000</text:p>
          </table:table-cell>
          <table:table-cell table:formula="of:=[.D289]-[.D288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61" office:value-type="float" office:value="17568" calcext:value-type="float">
            <text:p>17568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03333333333333" calcext:value-type="float">
            <text:p>0,00203333333333333000</text:p>
          </table:table-cell>
          <table:table-cell table:formula="of:=[.D290]-[.D289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61" office:value-type="float" office:value="17629" calcext:value-type="float">
            <text:p>17629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04039351851852" calcext:value-type="float">
            <text:p>0,00204039351851852000</text:p>
          </table:table-cell>
          <table:table-cell table:formula="of:=[.D291]-[.D29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61" office:value-type="float" office:value="17690" calcext:value-type="float">
            <text:p>1769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0474537037037" calcext:value-type="float">
            <text:p>0,00204745370370370000</text:p>
          </table:table-cell>
          <table:table-cell table:formula="of:=[.D292]-[.D291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61" office:value-type="float" office:value="17751" calcext:value-type="float">
            <text:p>17751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05451388888889" calcext:value-type="float">
            <text:p>0,00205451388888889000</text:p>
          </table:table-cell>
          <table:table-cell table:formula="of:=[.D293]-[.D292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61" office:value-type="float" office:value="17812" calcext:value-type="float">
            <text:p>17812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06157407407407" calcext:value-type="float">
            <text:p>0,00206157407407407000</text:p>
          </table:table-cell>
          <table:table-cell table:formula="of:=[.D294]-[.D293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61" office:value-type="float" office:value="17873" calcext:value-type="float">
            <text:p>17873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06863425925926" calcext:value-type="float">
            <text:p>0,00206863425925926000</text:p>
          </table:table-cell>
          <table:table-cell table:formula="of:=[.D295]-[.D294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61" office:value-type="float" office:value="17934" calcext:value-type="float">
            <text:p>17934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07569444444444" calcext:value-type="float">
            <text:p>0,00207569444444444000</text:p>
          </table:table-cell>
          <table:table-cell table:formula="of:=[.D296]-[.D295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61" office:value-type="float" office:value="17995" calcext:value-type="float">
            <text:p>1799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08275462962963" calcext:value-type="float">
            <text:p>0,00208275462962963000</text:p>
          </table:table-cell>
          <table:table-cell table:formula="of:=[.D297]-[.D296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61" office:value-type="float" office:value="18056" calcext:value-type="float">
            <text:p>18056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08981481481481" calcext:value-type="float">
            <text:p>0,00208981481481481000</text:p>
          </table:table-cell>
          <table:table-cell table:formula="of:=[.D298]-[.D297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61" office:value-type="float" office:value="18117" calcext:value-type="float">
            <text:p>18117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096875" calcext:value-type="float">
            <text:p>0,00209687500000000000</text:p>
          </table:table-cell>
          <table:table-cell table:formula="of:=[.D299]-[.D298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61" office:value-type="float" office:value="18178" calcext:value-type="float">
            <text:p>18178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10393518518519" calcext:value-type="float">
            <text:p>0,00210393518518519000</text:p>
          </table:table-cell>
          <table:table-cell table:formula="of:=[.D300]-[.D299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61" office:value-type="float" office:value="18239" calcext:value-type="float">
            <text:p>18239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11099537037037" calcext:value-type="float">
            <text:p>0,00211099537037037000</text:p>
          </table:table-cell>
          <table:table-cell table:formula="of:=[.D301]-[.D300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61" office:value-type="float" office:value="18300" calcext:value-type="float">
            <text:p>183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11805555555556" calcext:value-type="float">
            <text:p>0,00211805555555556000</text:p>
          </table:table-cell>
          <table:table-cell table:formula="of:=[.D302]-[.D301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61" office:value-type="float" office:value="18361" calcext:value-type="float">
            <text:p>18361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12511574074074" calcext:value-type="float">
            <text:p>0,00212511574074074000</text:p>
          </table:table-cell>
          <table:table-cell table:formula="of:=[.D303]-[.D302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61" office:value-type="float" office:value="18422" calcext:value-type="float">
            <text:p>18422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13217592592593" calcext:value-type="float">
            <text:p>0,00213217592592593000</text:p>
          </table:table-cell>
          <table:table-cell table:formula="of:=[.D304]-[.D303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61" office:value-type="float" office:value="18483" calcext:value-type="float">
            <text:p>18483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13923611111111" calcext:value-type="float">
            <text:p>0,00213923611111111000</text:p>
          </table:table-cell>
          <table:table-cell table:formula="of:=[.D305]-[.D304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61" office:value-type="float" office:value="18544" calcext:value-type="float">
            <text:p>18544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1462962962963" calcext:value-type="float">
            <text:p>0,00214629629629630000</text:p>
          </table:table-cell>
          <table:table-cell table:formula="of:=[.D306]-[.D305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61" office:value-type="float" office:value="18605" calcext:value-type="float">
            <text:p>1860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15335648148148" calcext:value-type="float">
            <text:p>0,00215335648148148000</text:p>
          </table:table-cell>
          <table:table-cell table:formula="of:=[.D307]-[.D306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61" office:value-type="float" office:value="18666" calcext:value-type="float">
            <text:p>18666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16041666666667" calcext:value-type="float">
            <text:p>0,00216041666666667000</text:p>
          </table:table-cell>
          <table:table-cell table:formula="of:=[.D308]-[.D30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61" office:value-type="float" office:value="18727" calcext:value-type="float">
            <text:p>18727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16747685185185" calcext:value-type="float">
            <text:p>0,00216747685185185000</text:p>
          </table:table-cell>
          <table:table-cell table:formula="of:=[.D309]-[.D308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61" office:value-type="float" office:value="18788" calcext:value-type="float">
            <text:p>18788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17453703703704" calcext:value-type="float">
            <text:p>0,00217453703703704000</text:p>
          </table:table-cell>
          <table:table-cell table:formula="of:=[.D310]-[.D309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61" office:value-type="float" office:value="18849" calcext:value-type="float">
            <text:p>18849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18159722222222" calcext:value-type="float">
            <text:p>0,00218159722222222000</text:p>
          </table:table-cell>
          <table:table-cell table:formula="of:=[.D311]-[.D31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61" office:value-type="float" office:value="18910" calcext:value-type="float">
            <text:p>1891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18865740740741" calcext:value-type="float">
            <text:p>0,00218865740740741000</text:p>
          </table:table-cell>
          <table:table-cell table:formula="of:=[.D312]-[.D311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61" office:value-type="float" office:value="18971" calcext:value-type="float">
            <text:p>18971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19571759259259" calcext:value-type="float">
            <text:p>0,00219571759259259000</text:p>
          </table:table-cell>
          <table:table-cell table:formula="of:=[.D313]-[.D312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61" office:value-type="float" office:value="19032" calcext:value-type="float">
            <text:p>19032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20277777777778" calcext:value-type="float">
            <text:p>0,00220277777777778000</text:p>
          </table:table-cell>
          <table:table-cell table:formula="of:=[.D314]-[.D313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61" office:value-type="float" office:value="19093" calcext:value-type="float">
            <text:p>19093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20983796296296" calcext:value-type="float">
            <text:p>0,00220983796296296000</text:p>
          </table:table-cell>
          <table:table-cell table:formula="of:=[.D315]-[.D314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61" office:value-type="float" office:value="19154" calcext:value-type="float">
            <text:p>19154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21689814814815" calcext:value-type="float">
            <text:p>0,00221689814814815000</text:p>
          </table:table-cell>
          <table:table-cell table:formula="of:=[.D316]-[.D315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61" office:value-type="float" office:value="19215" calcext:value-type="float">
            <text:p>1921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22395833333333" calcext:value-type="float">
            <text:p>0,00222395833333333000</text:p>
          </table:table-cell>
          <table:table-cell table:formula="of:=[.D317]-[.D316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61" office:value-type="float" office:value="19276" calcext:value-type="float">
            <text:p>19276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23101851851852" calcext:value-type="float">
            <text:p>0,00223101851851852000</text:p>
          </table:table-cell>
          <table:table-cell table:formula="of:=[.D318]-[.D31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61" office:value-type="float" office:value="19337" calcext:value-type="float">
            <text:p>19337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2380787037037" calcext:value-type="float">
            <text:p>0,00223807870370370000</text:p>
          </table:table-cell>
          <table:table-cell table:formula="of:=[.D319]-[.D318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61" office:value-type="float" office:value="19398" calcext:value-type="float">
            <text:p>19398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24513888888889" calcext:value-type="float">
            <text:p>0,00224513888888889000</text:p>
          </table:table-cell>
          <table:table-cell table:formula="of:=[.D320]-[.D319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61" office:value-type="float" office:value="19459" calcext:value-type="float">
            <text:p>19459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25219907407407" calcext:value-type="float">
            <text:p>0,00225219907407407000</text:p>
          </table:table-cell>
          <table:table-cell table:formula="of:=[.D321]-[.D320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61" office:value-type="float" office:value="19520" calcext:value-type="float">
            <text:p>1952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25925925925926" calcext:value-type="float">
            <text:p>0,00225925925925926000</text:p>
          </table:table-cell>
          <table:table-cell table:formula="of:=[.D322]-[.D321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61" office:value-type="float" office:value="19581" calcext:value-type="float">
            <text:p>19581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26631944444444" calcext:value-type="float">
            <text:p>0,00226631944444444000</text:p>
          </table:table-cell>
          <table:table-cell table:formula="of:=[.D323]-[.D322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61" office:value-type="float" office:value="19642" calcext:value-type="float">
            <text:p>19642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27337962962963" calcext:value-type="float">
            <text:p>0,00227337962962963000</text:p>
          </table:table-cell>
          <table:table-cell table:formula="of:=[.D324]-[.D323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61" office:value-type="float" office:value="19703" calcext:value-type="float">
            <text:p>19703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28043981481482" calcext:value-type="float">
            <text:p>0,00228043981481482000</text:p>
          </table:table-cell>
          <table:table-cell table:formula="of:=[.D325]-[.D324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61" office:value-type="float" office:value="19764" calcext:value-type="float">
            <text:p>19764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2875" calcext:value-type="float">
            <text:p>0,00228750000000000000</text:p>
          </table:table-cell>
          <table:table-cell table:formula="of:=[.D326]-[.D325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61" office:value-type="float" office:value="19825" calcext:value-type="float">
            <text:p>1982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29456018518519" calcext:value-type="float">
            <text:p>0,00229456018518519000</text:p>
          </table:table-cell>
          <table:table-cell table:formula="of:=[.D327]-[.D326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61" office:value-type="float" office:value="19886" calcext:value-type="float">
            <text:p>19886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30162037037037" calcext:value-type="float">
            <text:p>0,00230162037037037000</text:p>
          </table:table-cell>
          <table:table-cell table:formula="of:=[.D328]-[.D32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61" office:value-type="float" office:value="19947" calcext:value-type="float">
            <text:p>19947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30868055555556" calcext:value-type="float">
            <text:p>0,00230868055555556000</text:p>
          </table:table-cell>
          <table:table-cell table:formula="of:=[.D329]-[.D328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61" office:value-type="float" office:value="20008" calcext:value-type="float">
            <text:p>20008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31574074074074" calcext:value-type="float">
            <text:p>0,00231574074074074000</text:p>
          </table:table-cell>
          <table:table-cell table:formula="of:=[.D330]-[.D329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61" office:value-type="float" office:value="20069" calcext:value-type="float">
            <text:p>20069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32280092592593" calcext:value-type="float">
            <text:p>0,00232280092592593000</text:p>
          </table:table-cell>
          <table:table-cell table:formula="of:=[.D331]-[.D33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61" office:value-type="float" office:value="20130" calcext:value-type="float">
            <text:p>2013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32986111111111" calcext:value-type="float">
            <text:p>0,00232986111111111000</text:p>
          </table:table-cell>
          <table:table-cell table:formula="of:=[.D332]-[.D331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61" office:value-type="float" office:value="20191" calcext:value-type="float">
            <text:p>20191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3369212962963" calcext:value-type="float">
            <text:p>0,00233692129629630000</text:p>
          </table:table-cell>
          <table:table-cell table:formula="of:=[.D333]-[.D332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61" office:value-type="float" office:value="20252" calcext:value-type="float">
            <text:p>20252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34398148148148" calcext:value-type="float">
            <text:p>0,00234398148148148000</text:p>
          </table:table-cell>
          <table:table-cell table:formula="of:=[.D334]-[.D333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61" office:value-type="float" office:value="20313" calcext:value-type="float">
            <text:p>20313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35104166666667" calcext:value-type="float">
            <text:p>0,00235104166666667000</text:p>
          </table:table-cell>
          <table:table-cell table:formula="of:=[.D335]-[.D334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61" office:value-type="float" office:value="20374" calcext:value-type="float">
            <text:p>20374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35810185185185" calcext:value-type="float">
            <text:p>0,00235810185185185000</text:p>
          </table:table-cell>
          <table:table-cell table:formula="of:=[.D336]-[.D335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61" office:value-type="float" office:value="20435" calcext:value-type="float">
            <text:p>2043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36516203703704" calcext:value-type="float">
            <text:p>0,00236516203703704000</text:p>
          </table:table-cell>
          <table:table-cell table:formula="of:=[.D337]-[.D336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61" office:value-type="float" office:value="20496" calcext:value-type="float">
            <text:p>20496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37222222222222" calcext:value-type="float">
            <text:p>0,00237222222222222000</text:p>
          </table:table-cell>
          <table:table-cell table:formula="of:=[.D338]-[.D33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61" office:value-type="float" office:value="20557" calcext:value-type="float">
            <text:p>20557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37928240740741" calcext:value-type="float">
            <text:p>0,00237928240740741000</text:p>
          </table:table-cell>
          <table:table-cell table:formula="of:=[.D339]-[.D338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61" office:value-type="float" office:value="20618" calcext:value-type="float">
            <text:p>20618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38634259259259" calcext:value-type="float">
            <text:p>0,00238634259259259000</text:p>
          </table:table-cell>
          <table:table-cell table:formula="of:=[.D340]-[.D339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61" office:value-type="float" office:value="20679" calcext:value-type="float">
            <text:p>20679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39340277777778" calcext:value-type="float">
            <text:p>0,00239340277777778000</text:p>
          </table:table-cell>
          <table:table-cell table:formula="of:=[.D341]-[.D34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61" office:value-type="float" office:value="20740" calcext:value-type="float">
            <text:p>2074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40046296296296" calcext:value-type="float">
            <text:p>0,00240046296296296000</text:p>
          </table:table-cell>
          <table:table-cell table:formula="of:=[.D342]-[.D341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61" office:value-type="float" office:value="20801" calcext:value-type="float">
            <text:p>20801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40752314814815" calcext:value-type="float">
            <text:p>0,00240752314814815000</text:p>
          </table:table-cell>
          <table:table-cell table:formula="of:=[.D343]-[.D342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61" office:value-type="float" office:value="20862" calcext:value-type="float">
            <text:p>20862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41458333333333" calcext:value-type="float">
            <text:p>0,00241458333333333000</text:p>
          </table:table-cell>
          <table:table-cell table:formula="of:=[.D344]-[.D343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61" office:value-type="float" office:value="20923" calcext:value-type="float">
            <text:p>20923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42164351851852" calcext:value-type="float">
            <text:p>0,00242164351851852000</text:p>
          </table:table-cell>
          <table:table-cell table:formula="of:=[.D345]-[.D344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61" office:value-type="float" office:value="20984" calcext:value-type="float">
            <text:p>20984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4287037037037" calcext:value-type="float">
            <text:p>0,00242870370370370000</text:p>
          </table:table-cell>
          <table:table-cell table:formula="of:=[.D346]-[.D345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61" office:value-type="float" office:value="21045" calcext:value-type="float">
            <text:p>2104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43576388888889" calcext:value-type="float">
            <text:p>0,00243576388888889000</text:p>
          </table:table-cell>
          <table:table-cell table:formula="of:=[.D347]-[.D346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61" office:value-type="float" office:value="21106" calcext:value-type="float">
            <text:p>21106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44282407407407" calcext:value-type="float">
            <text:p>0,00244282407407407000</text:p>
          </table:table-cell>
          <table:table-cell table:formula="of:=[.D348]-[.D34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61" office:value-type="float" office:value="21167" calcext:value-type="float">
            <text:p>21167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44988425925926" calcext:value-type="float">
            <text:p>0,00244988425925926000</text:p>
          </table:table-cell>
          <table:table-cell table:formula="of:=[.D349]-[.D348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61" office:value-type="float" office:value="21228" calcext:value-type="float">
            <text:p>21228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45694444444444" calcext:value-type="float">
            <text:p>0,00245694444444444000</text:p>
          </table:table-cell>
          <table:table-cell table:formula="of:=[.D350]-[.D349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61" office:value-type="float" office:value="21289" calcext:value-type="float">
            <text:p>21289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46400462962963" calcext:value-type="float">
            <text:p>0,00246400462962963000</text:p>
          </table:table-cell>
          <table:table-cell table:formula="of:=[.D351]-[.D35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61" office:value-type="float" office:value="21350" calcext:value-type="float">
            <text:p>213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47106481481482" calcext:value-type="float">
            <text:p>0,00247106481481482000</text:p>
          </table:table-cell>
          <table:table-cell table:formula="of:=[.D352]-[.D351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61" office:value-type="float" office:value="21411" calcext:value-type="float">
            <text:p>21411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478125" calcext:value-type="float">
            <text:p>0,00247812500000000000</text:p>
          </table:table-cell>
          <table:table-cell table:formula="of:=[.D353]-[.D352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61" office:value-type="float" office:value="21472" calcext:value-type="float">
            <text:p>21472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48518518518519" calcext:value-type="float">
            <text:p>0,00248518518518519000</text:p>
          </table:table-cell>
          <table:table-cell table:formula="of:=[.D354]-[.D353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61" office:value-type="float" office:value="21533" calcext:value-type="float">
            <text:p>21533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49224537037037" calcext:value-type="float">
            <text:p>0,00249224537037037000</text:p>
          </table:table-cell>
          <table:table-cell table:formula="of:=[.D355]-[.D354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61" office:value-type="float" office:value="21594" calcext:value-type="float">
            <text:p>21594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49930555555556" calcext:value-type="float">
            <text:p>0,00249930555555556000</text:p>
          </table:table-cell>
          <table:table-cell table:formula="of:=[.D356]-[.D355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61" office:value-type="float" office:value="21655" calcext:value-type="float">
            <text:p>2165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50636574074074" calcext:value-type="float">
            <text:p>0,00250636574074074000</text:p>
          </table:table-cell>
          <table:table-cell table:formula="of:=[.D357]-[.D356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61" office:value-type="float" office:value="21716" calcext:value-type="float">
            <text:p>21716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51342592592593" calcext:value-type="float">
            <text:p>0,00251342592592593000</text:p>
          </table:table-cell>
          <table:table-cell table:formula="of:=[.D358]-[.D35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61" office:value-type="float" office:value="21777" calcext:value-type="float">
            <text:p>21777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52048611111111" calcext:value-type="float">
            <text:p>0,00252048611111111000</text:p>
          </table:table-cell>
          <table:table-cell table:formula="of:=[.D359]-[.D358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61" office:value-type="float" office:value="21838" calcext:value-type="float">
            <text:p>21838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5275462962963" calcext:value-type="float">
            <text:p>0,00252754629629630000</text:p>
          </table:table-cell>
          <table:table-cell table:formula="of:=[.D360]-[.D359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61" office:value-type="float" office:value="21899" calcext:value-type="float">
            <text:p>21899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253460648148148" calcext:value-type="float">
            <text:p>0,00253460648148148000</text:p>
          </table:table-cell>
          <table:table-cell table:formula="of:=[.D361]-[.D36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61" office:value-type="float" office:value="21960" calcext:value-type="float">
            <text:p>2196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54166666666667" calcext:value-type="float">
            <text:p>0,00254166666666667000</text:p>
          </table:table-cell>
          <table:table-cell table:formula="of:=[.D362]-[.D361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61" office:value-type="float" office:value="22021" calcext:value-type="float">
            <text:p>22021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54872685185185" calcext:value-type="float">
            <text:p>0,00254872685185185000</text:p>
          </table:table-cell>
          <table:table-cell table:formula="of:=[.D363]-[.D362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61" office:value-type="float" office:value="22082" calcext:value-type="float">
            <text:p>22082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55578703703704" calcext:value-type="float">
            <text:p>0,00255578703703704000</text:p>
          </table:table-cell>
          <table:table-cell table:formula="of:=[.D364]-[.D363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61" office:value-type="float" office:value="22143" calcext:value-type="float">
            <text:p>22143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56284722222222" calcext:value-type="float">
            <text:p>0,00256284722222222000</text:p>
          </table:table-cell>
          <table:table-cell table:formula="of:=[.D365]-[.D364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61" office:value-type="float" office:value="22204" calcext:value-type="float">
            <text:p>22204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256990740740741" calcext:value-type="float">
            <text:p>0,00256990740740741000</text:p>
          </table:table-cell>
          <table:table-cell table:formula="of:=[.D366]-[.D365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61" office:value-type="float" office:value="22265" calcext:value-type="float">
            <text:p>2226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257696759259259" calcext:value-type="float">
            <text:p>0,00257696759259259000</text:p>
          </table:table-cell>
          <table:table-cell table:formula="of:=[.D367]-[.D366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61" office:value-type="float" office:value="22326" calcext:value-type="float">
            <text:p>22326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258402777777778" calcext:value-type="float">
            <text:p>0,00258402777777778000</text:p>
          </table:table-cell>
          <table:table-cell table:formula="of:=[.D368]-[.D36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61" office:value-type="float" office:value="22387" calcext:value-type="float">
            <text:p>22387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259108796296296" calcext:value-type="float">
            <text:p>0,00259108796296296000</text:p>
          </table:table-cell>
          <table:table-cell table:formula="of:=[.D369]-[.D368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61" office:value-type="float" office:value="22448" calcext:value-type="float">
            <text:p>22448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59814814814815" calcext:value-type="float">
            <text:p>0,00259814814814815000</text:p>
          </table:table-cell>
          <table:table-cell table:formula="of:=[.D370]-[.D369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61" office:value-type="float" office:value="22509" calcext:value-type="float">
            <text:p>22509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60520833333333" calcext:value-type="float">
            <text:p>0,00260520833333333000</text:p>
          </table:table-cell>
          <table:table-cell table:formula="of:=[.D371]-[.D37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61" office:value-type="float" office:value="22570" calcext:value-type="float">
            <text:p>2257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261226851851852" calcext:value-type="float">
            <text:p>0,00261226851851852000</text:p>
          </table:table-cell>
          <table:table-cell table:formula="of:=[.D372]-[.D371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61" office:value-type="float" office:value="22631" calcext:value-type="float">
            <text:p>22631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26193287037037" calcext:value-type="float">
            <text:p>0,00261932870370370000</text:p>
          </table:table-cell>
          <table:table-cell table:formula="of:=[.D373]-[.D372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61" office:value-type="float" office:value="22692" calcext:value-type="float">
            <text:p>22692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262638888888889" calcext:value-type="float">
            <text:p>0,00262638888888889000</text:p>
          </table:table-cell>
          <table:table-cell table:formula="of:=[.D374]-[.D373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61" office:value-type="float" office:value="22753" calcext:value-type="float">
            <text:p>22753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263344907407407" calcext:value-type="float">
            <text:p>0,00263344907407407000</text:p>
          </table:table-cell>
          <table:table-cell table:formula="of:=[.D375]-[.D374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61" office:value-type="float" office:value="22814" calcext:value-type="float">
            <text:p>22814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264050925925926" calcext:value-type="float">
            <text:p>0,00264050925925926000</text:p>
          </table:table-cell>
          <table:table-cell table:formula="of:=[.D376]-[.D375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61" office:value-type="float" office:value="22875" calcext:value-type="float">
            <text:p>2287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264756944444444" calcext:value-type="float">
            <text:p>0,00264756944444444000</text:p>
          </table:table-cell>
          <table:table-cell table:formula="of:=[.D377]-[.D376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61" office:value-type="float" office:value="22936" calcext:value-type="float">
            <text:p>22936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265462962962963" calcext:value-type="float">
            <text:p>0,00265462962962963000</text:p>
          </table:table-cell>
          <table:table-cell table:formula="of:=[.D378]-[.D37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61" office:value-type="float" office:value="22997" calcext:value-type="float">
            <text:p>22997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266168981481481" calcext:value-type="float">
            <text:p>0,00266168981481481000</text:p>
          </table:table-cell>
          <table:table-cell table:formula="of:=[.D379]-[.D378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61" office:value-type="float" office:value="23058" calcext:value-type="float">
            <text:p>23058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266875" calcext:value-type="float">
            <text:p>0,00266875000000000000</text:p>
          </table:table-cell>
          <table:table-cell table:formula="of:=[.D380]-[.D379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61" office:value-type="float" office:value="23119" calcext:value-type="float">
            <text:p>23119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267581018518519" calcext:value-type="float">
            <text:p>0,00267581018518519000</text:p>
          </table:table-cell>
          <table:table-cell table:formula="of:=[.D381]-[.D38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61" office:value-type="float" office:value="23180" calcext:value-type="float">
            <text:p>2318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268287037037037" calcext:value-type="float">
            <text:p>0,00268287037037037000</text:p>
          </table:table-cell>
          <table:table-cell table:formula="of:=[.D382]-[.D381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61" office:value-type="float" office:value="23241" calcext:value-type="float">
            <text:p>23241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268993055555556" calcext:value-type="float">
            <text:p>0,00268993055555556000</text:p>
          </table:table-cell>
          <table:table-cell table:formula="of:=[.D383]-[.D382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61" office:value-type="float" office:value="23302" calcext:value-type="float">
            <text:p>23302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269699074074074" calcext:value-type="float">
            <text:p>0,00269699074074074000</text:p>
          </table:table-cell>
          <table:table-cell table:formula="of:=[.D384]-[.D383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61" office:value-type="float" office:value="23363" calcext:value-type="float">
            <text:p>23363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270405092592593" calcext:value-type="float">
            <text:p>0,00270405092592593000</text:p>
          </table:table-cell>
          <table:table-cell table:formula="of:=[.D385]-[.D384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61" office:value-type="float" office:value="23424" calcext:value-type="float">
            <text:p>23424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271111111111111" calcext:value-type="float">
            <text:p>0,00271111111111111000</text:p>
          </table:table-cell>
          <table:table-cell table:formula="of:=[.D386]-[.D385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61" office:value-type="float" office:value="23485" calcext:value-type="float">
            <text:p>2348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27181712962963" calcext:value-type="float">
            <text:p>0,00271817129629630000</text:p>
          </table:table-cell>
          <table:table-cell table:formula="of:=[.D387]-[.D386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61" office:value-type="float" office:value="23546" calcext:value-type="float">
            <text:p>23546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272523148148148" calcext:value-type="float">
            <text:p>0,00272523148148148000</text:p>
          </table:table-cell>
          <table:table-cell table:formula="of:=[.D388]-[.D387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61" office:value-type="float" office:value="23607" calcext:value-type="float">
            <text:p>23607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273229166666667" calcext:value-type="float">
            <text:p>0,00273229166666667000</text:p>
          </table:table-cell>
          <table:table-cell table:formula="of:=[.D389]-[.D388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61" office:value-type="float" office:value="23668" calcext:value-type="float">
            <text:p>23668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273935185185185" calcext:value-type="float">
            <text:p>0,00273935185185185000</text:p>
          </table:table-cell>
          <table:table-cell table:formula="of:=[.D390]-[.D389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61" office:value-type="float" office:value="23729" calcext:value-type="float">
            <text:p>23729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274641203703704" calcext:value-type="float">
            <text:p>0,00274641203703704000</text:p>
          </table:table-cell>
          <table:table-cell table:formula="of:=[.D391]-[.D390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61" office:value-type="float" office:value="23790" calcext:value-type="float">
            <text:p>2379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275347222222222" calcext:value-type="float">
            <text:p>0,00275347222222222000</text:p>
          </table:table-cell>
          <table:table-cell table:formula="of:=[.D392]-[.D391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61" office:value-type="float" office:value="23851" calcext:value-type="float">
            <text:p>23851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276053240740741" calcext:value-type="float">
            <text:p>0,00276053240740741000</text:p>
          </table:table-cell>
          <table:table-cell table:formula="of:=[.D393]-[.D392]" office:value-type="float" office:value="0.00000706018518518547" calcext:value-type="float">
            <text:p>0,00000706018518518547</text:p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61" office:value-type="float" office:value="23912" calcext:value-type="float">
            <text:p>23912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276759259259259" calcext:value-type="float">
            <text:p>0,00276759259259259000</text:p>
          </table:table-cell>
          <table:table-cell table:formula="of:=[.D394]-[.D393]" office:value-type="float" office:value="0.00000706018518518503" calcext:value-type="float">
            <text:p>0,00000706018518518503</text:p>
          </table:table-cell>
          <table:table-cell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61" office:value-type="float" office:value="23973" calcext:value-type="float">
            <text:p>23973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277465277777778" calcext:value-type="float">
            <text:p>0,00277465277777778000</text:p>
          </table:table-cell>
          <table:table-cell table:formula="of:=#REF!-[.D394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1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22:41.466860523</meta:creation-date>
    <dc:date>2026-05-17T18:22:48.926464435</dc:date>
    <meta:editing-duration>PT8S</meta:editing-duration>
    <meta:editing-cycles>1</meta:editing-cycles>
    <meta:document-statistic meta:table-count="1" meta:cell-count="1970" meta:object-count="0"/>
    <meta:generator>LibreOffice/24.2.7.2$Linux_X86_64 LibreOffice_project/420$Build-2</meta:generator>
  </office:meta>
</office:document-meta>
</file>