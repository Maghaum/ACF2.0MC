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34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393518518518519" calcext:value-type="float">
            <text:p>0,00000393518518518519</text:p>
          </table:table-cell>
          <table:table-cell table:formula="of:=[.D3]-[.D2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4" office:value-type="float" office:value="68" calcext:value-type="float">
            <text:p>68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787037037037037" calcext:value-type="float">
            <text:p>0,00000787037037037037</text:p>
          </table:table-cell>
          <table:table-cell table:formula="of:=[.D4]-[.D3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34" office:value-type="float" office:value="102" calcext:value-type="float">
            <text:p>102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18055555555556" calcext:value-type="float">
            <text:p>0,00001180555555555560</text:p>
          </table:table-cell>
          <table:table-cell table:formula="of:=[.D5]-[.D4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34" office:value-type="float" office:value="136" calcext:value-type="float">
            <text:p>136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57407407407407" calcext:value-type="float">
            <text:p>0,00001574074074074070</text:p>
          </table:table-cell>
          <table:table-cell table:formula="of:=[.D6]-[.D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34" office:value-type="float" office:value="170" calcext:value-type="float">
            <text:p>17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96759259259259" calcext:value-type="float">
            <text:p>0,00001967592592592590</text:p>
          </table:table-cell>
          <table:table-cell table:formula="of:=[.D7]-[.D6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34" office:value-type="float" office:value="204" calcext:value-type="float">
            <text:p>204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236111111111111" calcext:value-type="float">
            <text:p>0,00002361111111111110</text:p>
          </table:table-cell>
          <table:table-cell table:formula="of:=[.D8]-[.D7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34" office:value-type="float" office:value="238" calcext:value-type="float">
            <text:p>238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275462962962963" calcext:value-type="float">
            <text:p>0,00002754629629629630</text:p>
          </table:table-cell>
          <table:table-cell table:formula="of:=[.D9]-[.D8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34" office:value-type="float" office:value="272" calcext:value-type="float">
            <text:p>272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314814814814815" calcext:value-type="float">
            <text:p>0,00003148148148148150</text:p>
          </table:table-cell>
          <table:table-cell table:formula="of:=[.D10]-[.D9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4" office:value-type="float" office:value="306" calcext:value-type="float">
            <text:p>306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354166666666667" calcext:value-type="float">
            <text:p>0,00003541666666666670</text:p>
          </table:table-cell>
          <table:table-cell table:formula="of:=[.D11]-[.D10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4" office:value-type="float" office:value="340" calcext:value-type="float">
            <text:p>34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393518518518519" calcext:value-type="float">
            <text:p>0,00003935185185185190</text:p>
          </table:table-cell>
          <table:table-cell table:formula="of:=[.D12]-[.D11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4" office:value-type="float" office:value="374" calcext:value-type="float">
            <text:p>374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43287037037037" calcext:value-type="float">
            <text:p>0,00004328703703703700</text:p>
          </table:table-cell>
          <table:table-cell table:formula="of:=[.D13]-[.D12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4" office:value-type="float" office:value="408" calcext:value-type="float">
            <text:p>408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472222222222222" calcext:value-type="float">
            <text:p>0,00004722222222222220</text:p>
          </table:table-cell>
          <table:table-cell table:formula="of:=[.D14]-[.D13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34" office:value-type="float" office:value="442" calcext:value-type="float">
            <text:p>442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511574074074074" calcext:value-type="float">
            <text:p>0,00005115740740740740</text:p>
          </table:table-cell>
          <table:table-cell table:formula="of:=[.D15]-[.D14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34" office:value-type="float" office:value="476" calcext:value-type="float">
            <text:p>476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550925925925926" calcext:value-type="float">
            <text:p>0,00005509259259259260</text:p>
          </table:table-cell>
          <table:table-cell table:formula="of:=[.D16]-[.D1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34" office:value-type="float" office:value="510" calcext:value-type="float">
            <text:p>51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590277777777778" calcext:value-type="float">
            <text:p>0,00005902777777777780</text:p>
          </table:table-cell>
          <table:table-cell table:formula="of:=[.D17]-[.D16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34" office:value-type="float" office:value="544" calcext:value-type="float">
            <text:p>544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62962962962963" calcext:value-type="float">
            <text:p>0,00006296296296296300</text:p>
          </table:table-cell>
          <table:table-cell table:formula="of:=[.D18]-[.D17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34" office:value-type="float" office:value="578" calcext:value-type="float">
            <text:p>578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668981481481482" calcext:value-type="float">
            <text:p>0,00006689814814814820</text:p>
          </table:table-cell>
          <table:table-cell table:formula="of:=[.D19]-[.D18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34" office:value-type="float" office:value="612" calcext:value-type="float">
            <text:p>612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708333333333333" calcext:value-type="float">
            <text:p>0,00007083333333333330</text:p>
          </table:table-cell>
          <table:table-cell table:formula="of:=[.D20]-[.D19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34" office:value-type="float" office:value="646" calcext:value-type="float">
            <text:p>646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747685185185185" calcext:value-type="float">
            <text:p>0,00007476851851851850</text:p>
          </table:table-cell>
          <table:table-cell table:formula="of:=[.D21]-[.D20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34" office:value-type="float" office:value="680" calcext:value-type="float">
            <text:p>68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787037037037037" calcext:value-type="float">
            <text:p>0,00007870370370370370</text:p>
          </table:table-cell>
          <table:table-cell table:formula="of:=[.D22]-[.D21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34" office:value-type="float" office:value="714" calcext:value-type="float">
            <text:p>714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826388888888889" calcext:value-type="float">
            <text:p>0,00008263888888888890</text:p>
          </table:table-cell>
          <table:table-cell table:formula="of:=[.D23]-[.D22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34" office:value-type="float" office:value="748" calcext:value-type="float">
            <text:p>748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865740740740741" calcext:value-type="float">
            <text:p>0,00008657407407407410</text:p>
          </table:table-cell>
          <table:table-cell table:formula="of:=[.D24]-[.D23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34" office:value-type="float" office:value="782" calcext:value-type="float">
            <text:p>782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905092592592593" calcext:value-type="float">
            <text:p>0,00009050925925925930</text:p>
          </table:table-cell>
          <table:table-cell table:formula="of:=[.D25]-[.D24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34" office:value-type="float" office:value="816" calcext:value-type="float">
            <text:p>816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944444444444444" calcext:value-type="float">
            <text:p>0,00009444444444444440</text:p>
          </table:table-cell>
          <table:table-cell table:formula="of:=[.D26]-[.D2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34" office:value-type="float" office:value="850" calcext:value-type="float">
            <text:p>8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983796296296296" calcext:value-type="float">
            <text:p>0,00009837962962962960</text:p>
          </table:table-cell>
          <table:table-cell table:formula="of:=[.D27]-[.D26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34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02314814814815" calcext:value-type="float">
            <text:p>0,00010231481481481500</text:p>
          </table:table-cell>
          <table:table-cell table:formula="of:=[.D28]-[.D27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34" office:value-type="float" office:value="918" calcext:value-type="float">
            <text:p>918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0625" calcext:value-type="float">
            <text:p>0,00010625000000000000</text:p>
          </table:table-cell>
          <table:table-cell table:formula="of:=[.D29]-[.D28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34" office:value-type="float" office:value="952" calcext:value-type="float">
            <text:p>952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10185185185185" calcext:value-type="float">
            <text:p>0,00011018518518518500</text:p>
          </table:table-cell>
          <table:table-cell table:formula="of:=[.D30]-[.D29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34" office:value-type="float" office:value="986" calcext:value-type="float">
            <text:p>986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1412037037037" calcext:value-type="float">
            <text:p>0,00011412037037037000</text:p>
          </table:table-cell>
          <table:table-cell table:formula="of:=[.D31]-[.D30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34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18055555555556" calcext:value-type="float">
            <text:p>0,00011805555555555600</text:p>
          </table:table-cell>
          <table:table-cell table:formula="of:=[.D32]-[.D31]" office:value-type="float" office:value="0.00000393518518518518" calcext:value-type="float">
            <text:p>0,000003935185185185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34" office:value-type="float" office:value="1054" calcext:value-type="float">
            <text:p>1054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21990740740741" calcext:value-type="float">
            <text:p>0,00012199074074074100</text:p>
          </table:table-cell>
          <table:table-cell table:formula="of:=[.D33]-[.D32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34" office:value-type="float" office:value="1088" calcext:value-type="float">
            <text:p>1088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25925925925926" calcext:value-type="float">
            <text:p>0,00012592592592592600</text:p>
          </table:table-cell>
          <table:table-cell table:formula="of:=[.D34]-[.D33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34" office:value-type="float" office:value="1122" calcext:value-type="float">
            <text:p>1122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29861111111111" calcext:value-type="float">
            <text:p>0,00012986111111111100</text:p>
          </table:table-cell>
          <table:table-cell table:formula="of:=[.D35]-[.D34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34" office:value-type="float" office:value="1156" calcext:value-type="float">
            <text:p>1156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133796296296296" calcext:value-type="float">
            <text:p>0,00013379629629629600</text:p>
          </table:table-cell>
          <table:table-cell table:formula="of:=[.D36]-[.D3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34" office:value-type="float" office:value="1190" calcext:value-type="float">
            <text:p>119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137731481481482" calcext:value-type="float">
            <text:p>0,00013773148148148200</text:p>
          </table:table-cell>
          <table:table-cell table:formula="of:=[.D37]-[.D36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34" office:value-type="float" office:value="1224" calcext:value-type="float">
            <text:p>1224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141666666666667" calcext:value-type="float">
            <text:p>0,00014166666666666700</text:p>
          </table:table-cell>
          <table:table-cell table:formula="of:=[.D38]-[.D37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34" office:value-type="float" office:value="1258" calcext:value-type="float">
            <text:p>1258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145601851851852" calcext:value-type="float">
            <text:p>0,00014560185185185200</text:p>
          </table:table-cell>
          <table:table-cell table:formula="of:=[.D39]-[.D3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34" office:value-type="float" office:value="1292" calcext:value-type="float">
            <text:p>1292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49537037037037" calcext:value-type="float">
            <text:p>0,00014953703703703700</text:p>
          </table:table-cell>
          <table:table-cell table:formula="of:=[.D40]-[.D39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34" office:value-type="float" office:value="1326" calcext:value-type="float">
            <text:p>1326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53472222222222" calcext:value-type="float">
            <text:p>0,00015347222222222200</text:p>
          </table:table-cell>
          <table:table-cell table:formula="of:=[.D41]-[.D40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34" office:value-type="float" office:value="1360" calcext:value-type="float">
            <text:p>136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57407407407407" calcext:value-type="float">
            <text:p>0,00015740740740740700</text:p>
          </table:table-cell>
          <table:table-cell table:formula="of:=[.D42]-[.D41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34" office:value-type="float" office:value="1394" calcext:value-type="float">
            <text:p>1394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61342592592593" calcext:value-type="float">
            <text:p>0,00016134259259259300</text:p>
          </table:table-cell>
          <table:table-cell table:formula="of:=[.D43]-[.D42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34" office:value-type="float" office:value="1428" calcext:value-type="float">
            <text:p>1428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65277777777778" calcext:value-type="float">
            <text:p>0,00016527777777777800</text:p>
          </table:table-cell>
          <table:table-cell table:formula="of:=[.D44]-[.D43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34" office:value-type="float" office:value="1462" calcext:value-type="float">
            <text:p>1462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69212962962963" calcext:value-type="float">
            <text:p>0,00016921296296296300</text:p>
          </table:table-cell>
          <table:table-cell table:formula="of:=[.D45]-[.D44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34" office:value-type="float" office:value="1496" calcext:value-type="float">
            <text:p>1496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73148148148148" calcext:value-type="float">
            <text:p>0,00017314814814814800</text:p>
          </table:table-cell>
          <table:table-cell table:formula="of:=[.D46]-[.D4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34" office:value-type="float" office:value="1530" calcext:value-type="float">
            <text:p>153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77083333333333" calcext:value-type="float">
            <text:p>0,00017708333333333300</text:p>
          </table:table-cell>
          <table:table-cell table:formula="of:=[.D47]-[.D4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34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81018518518519" calcext:value-type="float">
            <text:p>0,00018101851851851900</text:p>
          </table:table-cell>
          <table:table-cell table:formula="of:=[.D48]-[.D47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34" office:value-type="float" office:value="1598" calcext:value-type="float">
            <text:p>1598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84953703703704" calcext:value-type="float">
            <text:p>0,00018495370370370400</text:p>
          </table:table-cell>
          <table:table-cell table:formula="of:=[.D49]-[.D48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34" office:value-type="float" office:value="1632" calcext:value-type="float">
            <text:p>1632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88888888888889" calcext:value-type="float">
            <text:p>0,00018888888888888900</text:p>
          </table:table-cell>
          <table:table-cell table:formula="of:=[.D50]-[.D49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34" office:value-type="float" office:value="1666" calcext:value-type="float">
            <text:p>1666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92824074074074" calcext:value-type="float">
            <text:p>0,00019282407407407400</text:p>
          </table:table-cell>
          <table:table-cell table:formula="of:=[.D51]-[.D50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34" office:value-type="float" office:value="1700" calcext:value-type="float">
            <text:p>17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96759259259259" calcext:value-type="float">
            <text:p>0,00019675925925925900</text:p>
          </table:table-cell>
          <table:table-cell table:formula="of:=[.D52]-[.D51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34" office:value-type="float" office:value="1734" calcext:value-type="float">
            <text:p>1734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200694444444444" calcext:value-type="float">
            <text:p>0,00020069444444444400</text:p>
          </table:table-cell>
          <table:table-cell table:formula="of:=[.D53]-[.D52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34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20462962962963" calcext:value-type="float">
            <text:p>0,00020462962962963000</text:p>
          </table:table-cell>
          <table:table-cell table:formula="of:=[.D54]-[.D53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34" office:value-type="float" office:value="1802" calcext:value-type="float">
            <text:p>1802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208564814814815" calcext:value-type="float">
            <text:p>0,00020856481481481500</text:p>
          </table:table-cell>
          <table:table-cell table:formula="of:=[.D55]-[.D5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34" office:value-type="float" office:value="1836" calcext:value-type="float">
            <text:p>1836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2125" calcext:value-type="float">
            <text:p>0,00021250000000000000</text:p>
          </table:table-cell>
          <table:table-cell table:formula="of:=[.D56]-[.D55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34" office:value-type="float" office:value="1870" calcext:value-type="float">
            <text:p>187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216435185185185" calcext:value-type="float">
            <text:p>0,00021643518518518500</text:p>
          </table:table-cell>
          <table:table-cell table:formula="of:=[.D57]-[.D56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34" office:value-type="float" office:value="1904" calcext:value-type="float">
            <text:p>1904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22037037037037" calcext:value-type="float">
            <text:p>0,00022037037037037000</text:p>
          </table:table-cell>
          <table:table-cell table:formula="of:=[.D58]-[.D57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34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224305555555556" calcext:value-type="float">
            <text:p>0,00022430555555555600</text:p>
          </table:table-cell>
          <table:table-cell table:formula="of:=[.D59]-[.D58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34" office:value-type="float" office:value="1972" calcext:value-type="float">
            <text:p>1972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228240740740741" calcext:value-type="float">
            <text:p>0,00022824074074074100</text:p>
          </table:table-cell>
          <table:table-cell table:formula="of:=[.D60]-[.D59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34" office:value-type="float" office:value="2006" calcext:value-type="float">
            <text:p>2006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232175925925926" calcext:value-type="float">
            <text:p>0,00023217592592592600</text:p>
          </table:table-cell>
          <table:table-cell table:formula="of:=[.D61]-[.D60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34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236111111111111" calcext:value-type="float">
            <text:p>0,00023611111111111100</text:p>
          </table:table-cell>
          <table:table-cell table:formula="of:=[.D62]-[.D61]" office:value-type="float" office:value="0.00000393518518518519" calcext:value-type="float">
            <text:p>0,000003935185185185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34" office:value-type="float" office:value="2074" calcext:value-type="float">
            <text:p>2074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240046296296296" calcext:value-type="float">
            <text:p>0,00024004629629629600</text:p>
          </table:table-cell>
          <table:table-cell table:formula="of:=[.D63]-[.D6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34" office:value-type="float" office:value="2108" calcext:value-type="float">
            <text:p>2108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243981481481481" calcext:value-type="float">
            <text:p>0,00024398148148148100</text:p>
          </table:table-cell>
          <table:table-cell table:formula="of:=[.D64]-[.D63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34" office:value-type="float" office:value="2142" calcext:value-type="float">
            <text:p>2142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247916666666667" calcext:value-type="float">
            <text:p>0,00024791666666666700</text:p>
          </table:table-cell>
          <table:table-cell table:formula="of:=[.D65]-[.D6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34" office:value-type="float" office:value="2176" calcext:value-type="float">
            <text:p>2176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251851851851852" calcext:value-type="float">
            <text:p>0,00025185185185185200</text:p>
          </table:table-cell>
          <table:table-cell table:formula="of:=[.D66]-[.D65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34" office:value-type="float" office:value="2210" calcext:value-type="float">
            <text:p>221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255787037037037" calcext:value-type="float">
            <text:p>0,00025578703703703700</text:p>
          </table:table-cell>
          <table:table-cell table:formula="of:=[.D67]-[.D6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34" office:value-type="float" office:value="2244" calcext:value-type="float">
            <text:p>2244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259722222222222" calcext:value-type="float">
            <text:p>0,00025972222222222200</text:p>
          </table:table-cell>
          <table:table-cell table:formula="of:=[.D68]-[.D6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34" office:value-type="float" office:value="2278" calcext:value-type="float">
            <text:p>2278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263657407407407" calcext:value-type="float">
            <text:p>0,00026365740740740700</text:p>
          </table:table-cell>
          <table:table-cell table:formula="of:=[.D69]-[.D68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34" office:value-type="float" office:value="2312" calcext:value-type="float">
            <text:p>2312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267592592592593" calcext:value-type="float">
            <text:p>0,00026759259259259300</text:p>
          </table:table-cell>
          <table:table-cell table:formula="of:=[.D70]-[.D6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34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271527777777778" calcext:value-type="float">
            <text:p>0,00027152777777777800</text:p>
          </table:table-cell>
          <table:table-cell table:formula="of:=[.D71]-[.D70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34" office:value-type="float" office:value="2380" calcext:value-type="float">
            <text:p>238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275462962962963" calcext:value-type="float">
            <text:p>0,00027546296296296300</text:p>
          </table:table-cell>
          <table:table-cell table:formula="of:=[.D72]-[.D7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34" office:value-type="float" office:value="2414" calcext:value-type="float">
            <text:p>2414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279398148148148" calcext:value-type="float">
            <text:p>0,00027939814814814800</text:p>
          </table:table-cell>
          <table:table-cell table:formula="of:=[.D73]-[.D72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34" office:value-type="float" office:value="2448" calcext:value-type="float">
            <text:p>2448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283333333333333" calcext:value-type="float">
            <text:p>0,00028333333333333300</text:p>
          </table:table-cell>
          <table:table-cell table:formula="of:=[.D74]-[.D7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34" office:value-type="float" office:value="2482" calcext:value-type="float">
            <text:p>2482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287268518518519" calcext:value-type="float">
            <text:p>0,00028726851851851900</text:p>
          </table:table-cell>
          <table:table-cell table:formula="of:=[.D75]-[.D74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34" office:value-type="float" office:value="2516" calcext:value-type="float">
            <text:p>2516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291203703703704" calcext:value-type="float">
            <text:p>0,00029120370370370400</text:p>
          </table:table-cell>
          <table:table-cell table:formula="of:=[.D76]-[.D7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34" office:value-type="float" office:value="2550" calcext:value-type="float">
            <text:p>25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295138888888889" calcext:value-type="float">
            <text:p>0,00029513888888888900</text:p>
          </table:table-cell>
          <table:table-cell table:formula="of:=[.D77]-[.D7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34" office:value-type="float" office:value="2584" calcext:value-type="float">
            <text:p>2584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99074074074074" calcext:value-type="float">
            <text:p>0,00029907407407407400</text:p>
          </table:table-cell>
          <table:table-cell table:formula="of:=[.D78]-[.D77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34" office:value-type="float" office:value="2618" calcext:value-type="float">
            <text:p>2618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303009259259259" calcext:value-type="float">
            <text:p>0,00030300925925925900</text:p>
          </table:table-cell>
          <table:table-cell table:formula="of:=[.D79]-[.D7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34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306944444444444" calcext:value-type="float">
            <text:p>0,00030694444444444400</text:p>
          </table:table-cell>
          <table:table-cell table:formula="of:=[.D80]-[.D79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34" office:value-type="float" office:value="2686" calcext:value-type="float">
            <text:p>2686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31087962962963" calcext:value-type="float">
            <text:p>0,00031087962962963000</text:p>
          </table:table-cell>
          <table:table-cell table:formula="of:=[.D81]-[.D8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34" office:value-type="float" office:value="2720" calcext:value-type="float">
            <text:p>272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314814814814815" calcext:value-type="float">
            <text:p>0,00031481481481481500</text:p>
          </table:table-cell>
          <table:table-cell table:formula="of:=[.D82]-[.D81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34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31875" calcext:value-type="float">
            <text:p>0,00031875000000000000</text:p>
          </table:table-cell>
          <table:table-cell table:formula="of:=[.D83]-[.D8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34" office:value-type="float" office:value="2788" calcext:value-type="float">
            <text:p>2788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322685185185185" calcext:value-type="float">
            <text:p>0,00032268518518518500</text:p>
          </table:table-cell>
          <table:table-cell table:formula="of:=[.D84]-[.D8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34" office:value-type="float" office:value="2822" calcext:value-type="float">
            <text:p>2822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32662037037037" calcext:value-type="float">
            <text:p>0,00032662037037037000</text:p>
          </table:table-cell>
          <table:table-cell table:formula="of:=[.D85]-[.D84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34" office:value-type="float" office:value="2856" calcext:value-type="float">
            <text:p>2856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330555555555556" calcext:value-type="float">
            <text:p>0,00033055555555555600</text:p>
          </table:table-cell>
          <table:table-cell table:formula="of:=[.D86]-[.D8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34" office:value-type="float" office:value="2890" calcext:value-type="float">
            <text:p>289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334490740740741" calcext:value-type="float">
            <text:p>0,00033449074074074100</text:p>
          </table:table-cell>
          <table:table-cell table:formula="of:=[.D87]-[.D86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34" office:value-type="float" office:value="2924" calcext:value-type="float">
            <text:p>2924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338425925925926" calcext:value-type="float">
            <text:p>0,00033842592592592600</text:p>
          </table:table-cell>
          <table:table-cell table:formula="of:=[.D88]-[.D8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34" office:value-type="float" office:value="2958" calcext:value-type="float">
            <text:p>2958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342361111111111" calcext:value-type="float">
            <text:p>0,00034236111111111100</text:p>
          </table:table-cell>
          <table:table-cell table:formula="of:=[.D89]-[.D88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34" office:value-type="float" office:value="2992" calcext:value-type="float">
            <text:p>2992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346296296296296" calcext:value-type="float">
            <text:p>0,00034629629629629600</text:p>
          </table:table-cell>
          <table:table-cell table:formula="of:=[.D90]-[.D8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34" office:value-type="float" office:value="3026" calcext:value-type="float">
            <text:p>3026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350231481481482" calcext:value-type="float">
            <text:p>0,00035023148148148200</text:p>
          </table:table-cell>
          <table:table-cell table:formula="of:=[.D91]-[.D90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34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354166666666667" calcext:value-type="float">
            <text:p>0,00035416666666666700</text:p>
          </table:table-cell>
          <table:table-cell table:formula="of:=[.D92]-[.D9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34" office:value-type="float" office:value="3094" calcext:value-type="float">
            <text:p>3094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358101851851852" calcext:value-type="float">
            <text:p>0,00035810185185185200</text:p>
          </table:table-cell>
          <table:table-cell table:formula="of:=[.D93]-[.D9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34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362037037037037" calcext:value-type="float">
            <text:p>0,00036203703703703700</text:p>
          </table:table-cell>
          <table:table-cell table:formula="of:=[.D94]-[.D93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34" office:value-type="float" office:value="3162" calcext:value-type="float">
            <text:p>3162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365972222222222" calcext:value-type="float">
            <text:p>0,00036597222222222200</text:p>
          </table:table-cell>
          <table:table-cell table:formula="of:=[.D95]-[.D9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34" office:value-type="float" office:value="3196" calcext:value-type="float">
            <text:p>3196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369907407407407" calcext:value-type="float">
            <text:p>0,00036990740740740700</text:p>
          </table:table-cell>
          <table:table-cell table:formula="of:=[.D96]-[.D95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34" office:value-type="float" office:value="3230" calcext:value-type="float">
            <text:p>323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373842592592593" calcext:value-type="float">
            <text:p>0,00037384259259259300</text:p>
          </table:table-cell>
          <table:table-cell table:formula="of:=[.D97]-[.D9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34" office:value-type="float" office:value="3264" calcext:value-type="float">
            <text:p>3264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377777777777778" calcext:value-type="float">
            <text:p>0,00037777777777777800</text:p>
          </table:table-cell>
          <table:table-cell table:formula="of:=[.D98]-[.D97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34" office:value-type="float" office:value="3298" calcext:value-type="float">
            <text:p>3298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381712962962963" calcext:value-type="float">
            <text:p>0,00038171296296296300</text:p>
          </table:table-cell>
          <table:table-cell table:formula="of:=[.D99]-[.D9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34" office:value-type="float" office:value="3332" calcext:value-type="float">
            <text:p>3332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385648148148148" calcext:value-type="float">
            <text:p>0,00038564814814814800</text:p>
          </table:table-cell>
          <table:table-cell table:formula="of:=[.D100]-[.D9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34" office:value-type="float" office:value="3366" calcext:value-type="float">
            <text:p>3366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389583333333333" calcext:value-type="float">
            <text:p>0,00038958333333333300</text:p>
          </table:table-cell>
          <table:table-cell table:formula="of:=[.D101]-[.D100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34" office:value-type="float" office:value="3400" calcext:value-type="float">
            <text:p>34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393518518518519" calcext:value-type="float">
            <text:p>0,00039351851851851900</text:p>
          </table:table-cell>
          <table:table-cell table:formula="of:=[.D102]-[.D10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34" office:value-type="float" office:value="3434" calcext:value-type="float">
            <text:p>3434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397453703703704" calcext:value-type="float">
            <text:p>0,00039745370370370400</text:p>
          </table:table-cell>
          <table:table-cell table:formula="of:=[.D103]-[.D102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34" office:value-type="float" office:value="3468" calcext:value-type="float">
            <text:p>3468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401388888888889" calcext:value-type="float">
            <text:p>0,00040138888888888900</text:p>
          </table:table-cell>
          <table:table-cell table:formula="of:=[.D104]-[.D10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34" office:value-type="float" office:value="3502" calcext:value-type="float">
            <text:p>3502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405324074074074" calcext:value-type="float">
            <text:p>0,00040532407407407400</text:p>
          </table:table-cell>
          <table:table-cell table:formula="of:=[.D105]-[.D104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34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409259259259259" calcext:value-type="float">
            <text:p>0,00040925925925925900</text:p>
          </table:table-cell>
          <table:table-cell table:formula="of:=[.D106]-[.D10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34" office:value-type="float" office:value="3570" calcext:value-type="float">
            <text:p>357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413194444444444" calcext:value-type="float">
            <text:p>0,00041319444444444400</text:p>
          </table:table-cell>
          <table:table-cell table:formula="of:=[.D107]-[.D106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34" office:value-type="float" office:value="3604" calcext:value-type="float">
            <text:p>3604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41712962962963" calcext:value-type="float">
            <text:p>0,00041712962962963000</text:p>
          </table:table-cell>
          <table:table-cell table:formula="of:=[.D108]-[.D10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34" office:value-type="float" office:value="3638" calcext:value-type="float">
            <text:p>3638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421064814814815" calcext:value-type="float">
            <text:p>0,00042106481481481500</text:p>
          </table:table-cell>
          <table:table-cell table:formula="of:=[.D109]-[.D10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34" office:value-type="float" office:value="3672" calcext:value-type="float">
            <text:p>3672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425" calcext:value-type="float">
            <text:p>0,00042500000000000000</text:p>
          </table:table-cell>
          <table:table-cell table:formula="of:=[.D110]-[.D109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34" office:value-type="float" office:value="3706" calcext:value-type="float">
            <text:p>3706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428935185185185" calcext:value-type="float">
            <text:p>0,00042893518518518500</text:p>
          </table:table-cell>
          <table:table-cell table:formula="of:=[.D111]-[.D11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34" office:value-type="float" office:value="3740" calcext:value-type="float">
            <text:p>374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43287037037037" calcext:value-type="float">
            <text:p>0,00043287037037037000</text:p>
          </table:table-cell>
          <table:table-cell table:formula="of:=[.D112]-[.D111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34" office:value-type="float" office:value="3774" calcext:value-type="float">
            <text:p>3774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436805555555556" calcext:value-type="float">
            <text:p>0,00043680555555555600</text:p>
          </table:table-cell>
          <table:table-cell table:formula="of:=[.D113]-[.D11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34" office:value-type="float" office:value="3808" calcext:value-type="float">
            <text:p>3808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440740740740741" calcext:value-type="float">
            <text:p>0,00044074074074074100</text:p>
          </table:table-cell>
          <table:table-cell table:formula="of:=[.D114]-[.D113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34" office:value-type="float" office:value="3842" calcext:value-type="float">
            <text:p>3842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444675925925926" calcext:value-type="float">
            <text:p>0,00044467592592592600</text:p>
          </table:table-cell>
          <table:table-cell table:formula="of:=[.D115]-[.D11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34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448611111111111" calcext:value-type="float">
            <text:p>0,00044861111111111100</text:p>
          </table:table-cell>
          <table:table-cell table:formula="of:=[.D116]-[.D115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34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452546296296296" calcext:value-type="float">
            <text:p>0,00045254629629629600</text:p>
          </table:table-cell>
          <table:table-cell table:formula="of:=[.D117]-[.D11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34" office:value-type="float" office:value="3944" calcext:value-type="float">
            <text:p>3944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456481481481482" calcext:value-type="float">
            <text:p>0,00045648148148148200</text:p>
          </table:table-cell>
          <table:table-cell table:formula="of:=[.D118]-[.D11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34" office:value-type="float" office:value="3978" calcext:value-type="float">
            <text:p>3978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460416666666667" calcext:value-type="float">
            <text:p>0,00046041666666666700</text:p>
          </table:table-cell>
          <table:table-cell table:formula="of:=[.D119]-[.D118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34" office:value-type="float" office:value="4012" calcext:value-type="float">
            <text:p>4012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464351851851852" calcext:value-type="float">
            <text:p>0,00046435185185185200</text:p>
          </table:table-cell>
          <table:table-cell table:formula="of:=[.D120]-[.D11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34" office:value-type="float" office:value="4046" calcext:value-type="float">
            <text:p>4046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468287037037037" calcext:value-type="float">
            <text:p>0,00046828703703703700</text:p>
          </table:table-cell>
          <table:table-cell table:formula="of:=[.D121]-[.D120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34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472222222222222" calcext:value-type="float">
            <text:p>0,00047222222222222200</text:p>
          </table:table-cell>
          <table:table-cell table:formula="of:=[.D122]-[.D12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34" office:value-type="float" office:value="4114" calcext:value-type="float">
            <text:p>4114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476157407407407" calcext:value-type="float">
            <text:p>0,00047615740740740700</text:p>
          </table:table-cell>
          <table:table-cell table:formula="of:=[.D123]-[.D122]" office:value-type="float" office:value="0.00000393518518518522" calcext:value-type="float">
            <text:p>0,000003935185185185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34" office:value-type="float" office:value="4148" calcext:value-type="float">
            <text:p>4148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480092592592593" calcext:value-type="float">
            <text:p>0,00048009259259259300</text:p>
          </table:table-cell>
          <table:table-cell table:formula="of:=[.D124]-[.D12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34" office:value-type="float" office:value="4182" calcext:value-type="float">
            <text:p>4182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484027777777778" calcext:value-type="float">
            <text:p>0,00048402777777777800</text:p>
          </table:table-cell>
          <table:table-cell table:formula="of:=[.D125]-[.D12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34" office:value-type="float" office:value="4216" calcext:value-type="float">
            <text:p>4216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487962962962963" calcext:value-type="float">
            <text:p>0,00048796296296296300</text:p>
          </table:table-cell>
          <table:table-cell table:formula="of:=[.D126]-[.D12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34" office:value-type="float" office:value="4250" calcext:value-type="float">
            <text:p>42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491898148148148" calcext:value-type="float">
            <text:p>0,00049189814814814800</text:p>
          </table:table-cell>
          <table:table-cell table:formula="of:=[.D127]-[.D126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34" office:value-type="float" office:value="4284" calcext:value-type="float">
            <text:p>4284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495833333333333" calcext:value-type="float">
            <text:p>0,00049583333333333300</text:p>
          </table:table-cell>
          <table:table-cell table:formula="of:=[.D128]-[.D12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34" office:value-type="float" office:value="4318" calcext:value-type="float">
            <text:p>4318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499768518518519" calcext:value-type="float">
            <text:p>0,00049976851851851900</text:p>
          </table:table-cell>
          <table:table-cell table:formula="of:=[.D129]-[.D12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34" office:value-type="float" office:value="4352" calcext:value-type="float">
            <text:p>4352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503703703703704" calcext:value-type="float">
            <text:p>0,00050370370370370400</text:p>
          </table:table-cell>
          <table:table-cell table:formula="of:=[.D130]-[.D12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34" office:value-type="float" office:value="4386" calcext:value-type="float">
            <text:p>4386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507638888888889" calcext:value-type="float">
            <text:p>0,00050763888888888900</text:p>
          </table:table-cell>
          <table:table-cell table:formula="of:=[.D131]-[.D130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34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511574074074074" calcext:value-type="float">
            <text:p>0,00051157407407407400</text:p>
          </table:table-cell>
          <table:table-cell table:formula="of:=[.D132]-[.D13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34" office:value-type="float" office:value="4454" calcext:value-type="float">
            <text:p>4454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515509259259259" calcext:value-type="float">
            <text:p>0,00051550925925925900</text:p>
          </table:table-cell>
          <table:table-cell table:formula="of:=[.D133]-[.D13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34" office:value-type="float" office:value="4488" calcext:value-type="float">
            <text:p>4488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519444444444444" calcext:value-type="float">
            <text:p>0,00051944444444444400</text:p>
          </table:table-cell>
          <table:table-cell table:formula="of:=[.D134]-[.D13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34" office:value-type="float" office:value="4522" calcext:value-type="float">
            <text:p>4522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52337962962963" calcext:value-type="float">
            <text:p>0,00052337962962963000</text:p>
          </table:table-cell>
          <table:table-cell table:formula="of:=[.D135]-[.D13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34" office:value-type="float" office:value="4556" calcext:value-type="float">
            <text:p>4556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527314814814815" calcext:value-type="float">
            <text:p>0,00052731481481481500</text:p>
          </table:table-cell>
          <table:table-cell table:formula="of:=[.D136]-[.D135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34" office:value-type="float" office:value="4590" calcext:value-type="float">
            <text:p>459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53125" calcext:value-type="float">
            <text:p>0,00053125000000000000</text:p>
          </table:table-cell>
          <table:table-cell table:formula="of:=[.D137]-[.D13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34" office:value-type="float" office:value="4624" calcext:value-type="float">
            <text:p>4624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535185185185185" calcext:value-type="float">
            <text:p>0,00053518518518518500</text:p>
          </table:table-cell>
          <table:table-cell table:formula="of:=[.D138]-[.D13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34" office:value-type="float" office:value="4658" calcext:value-type="float">
            <text:p>4658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53912037037037" calcext:value-type="float">
            <text:p>0,00053912037037037000</text:p>
          </table:table-cell>
          <table:table-cell table:formula="of:=[.D139]-[.D13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34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543055555555556" calcext:value-type="float">
            <text:p>0,00054305555555555600</text:p>
          </table:table-cell>
          <table:table-cell table:formula="of:=[.D140]-[.D139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34" office:value-type="float" office:value="4726" calcext:value-type="float">
            <text:p>4726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546990740740741" calcext:value-type="float">
            <text:p>0,00054699074074074100</text:p>
          </table:table-cell>
          <table:table-cell table:formula="of:=[.D141]-[.D14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34" office:value-type="float" office:value="4760" calcext:value-type="float">
            <text:p>476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550925925925926" calcext:value-type="float">
            <text:p>0,00055092592592592600</text:p>
          </table:table-cell>
          <table:table-cell table:formula="of:=[.D142]-[.D14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34" office:value-type="float" office:value="4794" calcext:value-type="float">
            <text:p>4794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554861111111111" calcext:value-type="float">
            <text:p>0,00055486111111111100</text:p>
          </table:table-cell>
          <table:table-cell table:formula="of:=[.D143]-[.D14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34" office:value-type="float" office:value="4828" calcext:value-type="float">
            <text:p>4828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558796296296296" calcext:value-type="float">
            <text:p>0,00055879629629629600</text:p>
          </table:table-cell>
          <table:table-cell table:formula="of:=[.D144]-[.D14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34" office:value-type="float" office:value="4862" calcext:value-type="float">
            <text:p>4862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562731481481481" calcext:value-type="float">
            <text:p>0,00056273148148148100</text:p>
          </table:table-cell>
          <table:table-cell table:formula="of:=[.D145]-[.D144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34" office:value-type="float" office:value="4896" calcext:value-type="float">
            <text:p>4896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566666666666667" calcext:value-type="float">
            <text:p>0,00056666666666666700</text:p>
          </table:table-cell>
          <table:table-cell table:formula="of:=[.D146]-[.D14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34" office:value-type="float" office:value="4930" calcext:value-type="float">
            <text:p>493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570601851851852" calcext:value-type="float">
            <text:p>0,00057060185185185200</text:p>
          </table:table-cell>
          <table:table-cell table:formula="of:=[.D147]-[.D14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34" office:value-type="float" office:value="4964" calcext:value-type="float">
            <text:p>4964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574537037037037" calcext:value-type="float">
            <text:p>0,00057453703703703700</text:p>
          </table:table-cell>
          <table:table-cell table:formula="of:=[.D148]-[.D14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34" office:value-type="float" office:value="4998" calcext:value-type="float">
            <text:p>4998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578472222222222" calcext:value-type="float">
            <text:p>0,00057847222222222200</text:p>
          </table:table-cell>
          <table:table-cell table:formula="of:=[.D149]-[.D148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34" office:value-type="float" office:value="5032" calcext:value-type="float">
            <text:p>5032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582407407407408" calcext:value-type="float">
            <text:p>0,00058240740740740800</text:p>
          </table:table-cell>
          <table:table-cell table:formula="of:=[.D150]-[.D14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34" office:value-type="float" office:value="5066" calcext:value-type="float">
            <text:p>5066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586342592592593" calcext:value-type="float">
            <text:p>0,00058634259259259300</text:p>
          </table:table-cell>
          <table:table-cell table:formula="of:=[.D151]-[.D15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34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590277777777778" calcext:value-type="float">
            <text:p>0,00059027777777777800</text:p>
          </table:table-cell>
          <table:table-cell table:formula="of:=[.D152]-[.D15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34" office:value-type="float" office:value="5134" calcext:value-type="float">
            <text:p>5134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594212962962963" calcext:value-type="float">
            <text:p>0,00059421296296296300</text:p>
          </table:table-cell>
          <table:table-cell table:formula="of:=[.D153]-[.D15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34" office:value-type="float" office:value="5168" calcext:value-type="float">
            <text:p>5168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598148148148148" calcext:value-type="float">
            <text:p>0,00059814814814814800</text:p>
          </table:table-cell>
          <table:table-cell table:formula="of:=[.D154]-[.D153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34" office:value-type="float" office:value="5202" calcext:value-type="float">
            <text:p>5202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602083333333333" calcext:value-type="float">
            <text:p>0,00060208333333333300</text:p>
          </table:table-cell>
          <table:table-cell table:formula="of:=[.D155]-[.D15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34" office:value-type="float" office:value="5236" calcext:value-type="float">
            <text:p>5236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606018518518519" calcext:value-type="float">
            <text:p>0,00060601851851851900</text:p>
          </table:table-cell>
          <table:table-cell table:formula="of:=[.D156]-[.D15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34" office:value-type="float" office:value="5270" calcext:value-type="float">
            <text:p>527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609953703703704" calcext:value-type="float">
            <text:p>0,00060995370370370400</text:p>
          </table:table-cell>
          <table:table-cell table:formula="of:=[.D157]-[.D15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34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613888888888889" calcext:value-type="float">
            <text:p>0,00061388888888888900</text:p>
          </table:table-cell>
          <table:table-cell table:formula="of:=[.D158]-[.D15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34" office:value-type="float" office:value="5338" calcext:value-type="float">
            <text:p>5338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617824074074074" calcext:value-type="float">
            <text:p>0,00061782407407407400</text:p>
          </table:table-cell>
          <table:table-cell table:formula="of:=[.D159]-[.D158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34" office:value-type="float" office:value="5372" calcext:value-type="float">
            <text:p>5372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621759259259259" calcext:value-type="float">
            <text:p>0,00062175925925925900</text:p>
          </table:table-cell>
          <table:table-cell table:formula="of:=[.D160]-[.D15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34" office:value-type="float" office:value="5406" calcext:value-type="float">
            <text:p>5406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625694444444445" calcext:value-type="float">
            <text:p>0,00062569444444444500</text:p>
          </table:table-cell>
          <table:table-cell table:formula="of:=[.D161]-[.D16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34" office:value-type="float" office:value="5440" calcext:value-type="float">
            <text:p>544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62962962962963" calcext:value-type="float">
            <text:p>0,00062962962962963000</text:p>
          </table:table-cell>
          <table:table-cell table:formula="of:=[.D162]-[.D16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34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633564814814815" calcext:value-type="float">
            <text:p>0,00063356481481481500</text:p>
          </table:table-cell>
          <table:table-cell table:formula="of:=[.D163]-[.D162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34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6375" calcext:value-type="float">
            <text:p>0,00063750000000000000</text:p>
          </table:table-cell>
          <table:table-cell table:formula="of:=[.D164]-[.D16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34" office:value-type="float" office:value="5542" calcext:value-type="float">
            <text:p>5542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641435185185185" calcext:value-type="float">
            <text:p>0,00064143518518518500</text:p>
          </table:table-cell>
          <table:table-cell table:formula="of:=[.D165]-[.D16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34" office:value-type="float" office:value="5576" calcext:value-type="float">
            <text:p>5576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64537037037037" calcext:value-type="float">
            <text:p>0,00064537037037037000</text:p>
          </table:table-cell>
          <table:table-cell table:formula="of:=[.D166]-[.D16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34" office:value-type="float" office:value="5610" calcext:value-type="float">
            <text:p>561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649305555555556" calcext:value-type="float">
            <text:p>0,00064930555555555600</text:p>
          </table:table-cell>
          <table:table-cell table:formula="of:=[.D167]-[.D16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34" office:value-type="float" office:value="5644" calcext:value-type="float">
            <text:p>5644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653240740740741" calcext:value-type="float">
            <text:p>0,00065324074074074100</text:p>
          </table:table-cell>
          <table:table-cell table:formula="of:=[.D168]-[.D167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34" office:value-type="float" office:value="5678" calcext:value-type="float">
            <text:p>5678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657175925925926" calcext:value-type="float">
            <text:p>0,00065717592592592600</text:p>
          </table:table-cell>
          <table:table-cell table:formula="of:=[.D169]-[.D16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34" office:value-type="float" office:value="5712" calcext:value-type="float">
            <text:p>5712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661111111111111" calcext:value-type="float">
            <text:p>0,00066111111111111100</text:p>
          </table:table-cell>
          <table:table-cell table:formula="of:=[.D170]-[.D16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34" office:value-type="float" office:value="5746" calcext:value-type="float">
            <text:p>5746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665046296296296" calcext:value-type="float">
            <text:p>0,00066504629629629600</text:p>
          </table:table-cell>
          <table:table-cell table:formula="of:=[.D171]-[.D17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34" office:value-type="float" office:value="5780" calcext:value-type="float">
            <text:p>578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668981481481481" calcext:value-type="float">
            <text:p>0,00066898148148148100</text:p>
          </table:table-cell>
          <table:table-cell table:formula="of:=[.D172]-[.D171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34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672916666666667" calcext:value-type="float">
            <text:p>0,00067291666666666700</text:p>
          </table:table-cell>
          <table:table-cell table:formula="of:=[.D173]-[.D17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34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676851851851852" calcext:value-type="float">
            <text:p>0,00067685185185185200</text:p>
          </table:table-cell>
          <table:table-cell table:formula="of:=[.D174]-[.D17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34" office:value-type="float" office:value="5882" calcext:value-type="float">
            <text:p>5882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680787037037037" calcext:value-type="float">
            <text:p>0,00068078703703703700</text:p>
          </table:table-cell>
          <table:table-cell table:formula="of:=[.D175]-[.D17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34" office:value-type="float" office:value="5916" calcext:value-type="float">
            <text:p>5916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684722222222222" calcext:value-type="float">
            <text:p>0,00068472222222222200</text:p>
          </table:table-cell>
          <table:table-cell table:formula="of:=[.D176]-[.D17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34" office:value-type="float" office:value="5950" calcext:value-type="float">
            <text:p>59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688657407407407" calcext:value-type="float">
            <text:p>0,00068865740740740700</text:p>
          </table:table-cell>
          <table:table-cell table:formula="of:=[.D177]-[.D176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34" office:value-type="float" office:value="5984" calcext:value-type="float">
            <text:p>5984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692592592592593" calcext:value-type="float">
            <text:p>0,00069259259259259300</text:p>
          </table:table-cell>
          <table:table-cell table:formula="of:=[.D178]-[.D17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34" office:value-type="float" office:value="6018" calcext:value-type="float">
            <text:p>6018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696527777777778" calcext:value-type="float">
            <text:p>0,00069652777777777800</text:p>
          </table:table-cell>
          <table:table-cell table:formula="of:=[.D179]-[.D17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34" office:value-type="float" office:value="6052" calcext:value-type="float">
            <text:p>6052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700462962962963" calcext:value-type="float">
            <text:p>0,00070046296296296300</text:p>
          </table:table-cell>
          <table:table-cell table:formula="of:=[.D180]-[.D17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34" office:value-type="float" office:value="6086" calcext:value-type="float">
            <text:p>6086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704398148148148" calcext:value-type="float">
            <text:p>0,00070439814814814800</text:p>
          </table:table-cell>
          <table:table-cell table:formula="of:=[.D181]-[.D180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34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708333333333333" calcext:value-type="float">
            <text:p>0,00070833333333333300</text:p>
          </table:table-cell>
          <table:table-cell table:formula="of:=[.D182]-[.D18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34" office:value-type="float" office:value="6154" calcext:value-type="float">
            <text:p>6154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712268518518519" calcext:value-type="float">
            <text:p>0,00071226851851851900</text:p>
          </table:table-cell>
          <table:table-cell table:formula="of:=[.D183]-[.D18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34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716203703703704" calcext:value-type="float">
            <text:p>0,00071620370370370400</text:p>
          </table:table-cell>
          <table:table-cell table:formula="of:=[.D184]-[.D18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34" office:value-type="float" office:value="6222" calcext:value-type="float">
            <text:p>6222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720138888888889" calcext:value-type="float">
            <text:p>0,00072013888888888900</text:p>
          </table:table-cell>
          <table:table-cell table:formula="of:=[.D185]-[.D18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34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724074074074074" calcext:value-type="float">
            <text:p>0,00072407407407407400</text:p>
          </table:table-cell>
          <table:table-cell table:formula="of:=[.D186]-[.D185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34" office:value-type="float" office:value="6290" calcext:value-type="float">
            <text:p>629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728009259259259" calcext:value-type="float">
            <text:p>0,00072800925925925900</text:p>
          </table:table-cell>
          <table:table-cell table:formula="of:=[.D187]-[.D18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34" office:value-type="float" office:value="6324" calcext:value-type="float">
            <text:p>6324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731944444444445" calcext:value-type="float">
            <text:p>0,00073194444444444500</text:p>
          </table:table-cell>
          <table:table-cell table:formula="of:=[.D188]-[.D18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34" office:value-type="float" office:value="6358" calcext:value-type="float">
            <text:p>6358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73587962962963" calcext:value-type="float">
            <text:p>0,00073587962962963000</text:p>
          </table:table-cell>
          <table:table-cell table:formula="of:=[.D189]-[.D18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34" office:value-type="float" office:value="6392" calcext:value-type="float">
            <text:p>6392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739814814814815" calcext:value-type="float">
            <text:p>0,00073981481481481500</text:p>
          </table:table-cell>
          <table:table-cell table:formula="of:=[.D190]-[.D189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34" office:value-type="float" office:value="6426" calcext:value-type="float">
            <text:p>6426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74375" calcext:value-type="float">
            <text:p>0,00074375000000000000</text:p>
          </table:table-cell>
          <table:table-cell table:formula="of:=[.D191]-[.D19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34" office:value-type="float" office:value="6460" calcext:value-type="float">
            <text:p>646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747685185185185" calcext:value-type="float">
            <text:p>0,00074768518518518500</text:p>
          </table:table-cell>
          <table:table-cell table:formula="of:=[.D192]-[.D19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34" office:value-type="float" office:value="6494" calcext:value-type="float">
            <text:p>6494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75162037037037" calcext:value-type="float">
            <text:p>0,00075162037037037000</text:p>
          </table:table-cell>
          <table:table-cell table:formula="of:=[.D193]-[.D19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34" office:value-type="float" office:value="6528" calcext:value-type="float">
            <text:p>6528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755555555555556" calcext:value-type="float">
            <text:p>0,00075555555555555600</text:p>
          </table:table-cell>
          <table:table-cell table:formula="of:=[.D194]-[.D19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34" office:value-type="float" office:value="6562" calcext:value-type="float">
            <text:p>6562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759490740740741" calcext:value-type="float">
            <text:p>0,00075949074074074100</text:p>
          </table:table-cell>
          <table:table-cell table:formula="of:=[.D195]-[.D194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34" office:value-type="float" office:value="6596" calcext:value-type="float">
            <text:p>6596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763425925925926" calcext:value-type="float">
            <text:p>0,00076342592592592600</text:p>
          </table:table-cell>
          <table:table-cell table:formula="of:=[.D196]-[.D19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34" office:value-type="float" office:value="6630" calcext:value-type="float">
            <text:p>663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767361111111111" calcext:value-type="float">
            <text:p>0,00076736111111111100</text:p>
          </table:table-cell>
          <table:table-cell table:formula="of:=[.D197]-[.D19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34" office:value-type="float" office:value="6664" calcext:value-type="float">
            <text:p>6664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771296296296296" calcext:value-type="float">
            <text:p>0,00077129629629629600</text:p>
          </table:table-cell>
          <table:table-cell table:formula="of:=[.D198]-[.D19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34" office:value-type="float" office:value="6698" calcext:value-type="float">
            <text:p>6698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775231481481482" calcext:value-type="float">
            <text:p>0,00077523148148148200</text:p>
          </table:table-cell>
          <table:table-cell table:formula="of:=[.D199]-[.D19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34" office:value-type="float" office:value="6732" calcext:value-type="float">
            <text:p>6732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779166666666667" calcext:value-type="float">
            <text:p>0,00077916666666666700</text:p>
          </table:table-cell>
          <table:table-cell table:formula="of:=[.D200]-[.D199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34" office:value-type="float" office:value="6766" calcext:value-type="float">
            <text:p>6766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783101851851852" calcext:value-type="float">
            <text:p>0,00078310185185185200</text:p>
          </table:table-cell>
          <table:table-cell table:formula="of:=[.D201]-[.D20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34" office:value-type="float" office:value="6800" calcext:value-type="float">
            <text:p>68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787037037037037" calcext:value-type="float">
            <text:p>0,00078703703703703700</text:p>
          </table:table-cell>
          <table:table-cell table:formula="of:=[.D202]-[.D20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34" office:value-type="float" office:value="6834" calcext:value-type="float">
            <text:p>6834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790972222222222" calcext:value-type="float">
            <text:p>0,00079097222222222200</text:p>
          </table:table-cell>
          <table:table-cell table:formula="of:=[.D203]-[.D20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34" office:value-type="float" office:value="6868" calcext:value-type="float">
            <text:p>6868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794907407407407" calcext:value-type="float">
            <text:p>0,00079490740740740700</text:p>
          </table:table-cell>
          <table:table-cell table:formula="of:=[.D204]-[.D203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34" office:value-type="float" office:value="6902" calcext:value-type="float">
            <text:p>6902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798842592592593" calcext:value-type="float">
            <text:p>0,00079884259259259300</text:p>
          </table:table-cell>
          <table:table-cell table:formula="of:=[.D205]-[.D20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34" office:value-type="float" office:value="6936" calcext:value-type="float">
            <text:p>6936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802777777777778" calcext:value-type="float">
            <text:p>0,00080277777777777800</text:p>
          </table:table-cell>
          <table:table-cell table:formula="of:=[.D206]-[.D20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34" office:value-type="float" office:value="6970" calcext:value-type="float">
            <text:p>697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806712962962963" calcext:value-type="float">
            <text:p>0,00080671296296296300</text:p>
          </table:table-cell>
          <table:table-cell table:formula="of:=[.D207]-[.D20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34" office:value-type="float" office:value="7004" calcext:value-type="float">
            <text:p>7004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810648148148148" calcext:value-type="float">
            <text:p>0,00081064814814814800</text:p>
          </table:table-cell>
          <table:table-cell table:formula="of:=[.D208]-[.D20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34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814583333333333" calcext:value-type="float">
            <text:p>0,00081458333333333300</text:p>
          </table:table-cell>
          <table:table-cell table:formula="of:=[.D209]-[.D208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34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818518518518519" calcext:value-type="float">
            <text:p>0,00081851851851851900</text:p>
          </table:table-cell>
          <table:table-cell table:formula="of:=[.D210]-[.D20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34" office:value-type="float" office:value="7106" calcext:value-type="float">
            <text:p>7106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822453703703704" calcext:value-type="float">
            <text:p>0,00082245370370370400</text:p>
          </table:table-cell>
          <table:table-cell table:formula="of:=[.D211]-[.D21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34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826388888888889" calcext:value-type="float">
            <text:p>0,00082638888888888900</text:p>
          </table:table-cell>
          <table:table-cell table:formula="of:=[.D212]-[.D21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34" office:value-type="float" office:value="7174" calcext:value-type="float">
            <text:p>7174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830324074074074" calcext:value-type="float">
            <text:p>0,00083032407407407400</text:p>
          </table:table-cell>
          <table:table-cell table:formula="of:=[.D213]-[.D212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34" office:value-type="float" office:value="7208" calcext:value-type="float">
            <text:p>7208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834259259259259" calcext:value-type="float">
            <text:p>0,00083425925925925900</text:p>
          </table:table-cell>
          <table:table-cell table:formula="of:=[.D214]-[.D21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34" office:value-type="float" office:value="7242" calcext:value-type="float">
            <text:p>7242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838194444444445" calcext:value-type="float">
            <text:p>0,00083819444444444500</text:p>
          </table:table-cell>
          <table:table-cell table:formula="of:=[.D215]-[.D21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34" office:value-type="float" office:value="7276" calcext:value-type="float">
            <text:p>7276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84212962962963" calcext:value-type="float">
            <text:p>0,00084212962962963000</text:p>
          </table:table-cell>
          <table:table-cell table:formula="of:=[.D216]-[.D21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34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846064814814815" calcext:value-type="float">
            <text:p>0,00084606481481481500</text:p>
          </table:table-cell>
          <table:table-cell table:formula="of:=[.D217]-[.D21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34" office:value-type="float" office:value="7344" calcext:value-type="float">
            <text:p>7344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85" calcext:value-type="float">
            <text:p>0,00085000000000000000</text:p>
          </table:table-cell>
          <table:table-cell table:formula="of:=[.D218]-[.D217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34" office:value-type="float" office:value="7378" calcext:value-type="float">
            <text:p>7378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853935185185185" calcext:value-type="float">
            <text:p>0,00085393518518518500</text:p>
          </table:table-cell>
          <table:table-cell table:formula="of:=[.D219]-[.D21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34" office:value-type="float" office:value="7412" calcext:value-type="float">
            <text:p>7412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85787037037037" calcext:value-type="float">
            <text:p>0,00085787037037037000</text:p>
          </table:table-cell>
          <table:table-cell table:formula="of:=[.D220]-[.D21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34" office:value-type="float" office:value="7446" calcext:value-type="float">
            <text:p>7446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861805555555556" calcext:value-type="float">
            <text:p>0,00086180555555555600</text:p>
          </table:table-cell>
          <table:table-cell table:formula="of:=[.D221]-[.D22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34" office:value-type="float" office:value="7480" calcext:value-type="float">
            <text:p>748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865740740740741" calcext:value-type="float">
            <text:p>0,00086574074074074100</text:p>
          </table:table-cell>
          <table:table-cell table:formula="of:=[.D222]-[.D221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34" office:value-type="float" office:value="7514" calcext:value-type="float">
            <text:p>7514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869675925925926" calcext:value-type="float">
            <text:p>0,00086967592592592600</text:p>
          </table:table-cell>
          <table:table-cell table:formula="of:=[.D223]-[.D22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34" office:value-type="float" office:value="7548" calcext:value-type="float">
            <text:p>7548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873611111111111" calcext:value-type="float">
            <text:p>0,00087361111111111100</text:p>
          </table:table-cell>
          <table:table-cell table:formula="of:=[.D224]-[.D22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34" office:value-type="float" office:value="7582" calcext:value-type="float">
            <text:p>7582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877546296296296" calcext:value-type="float">
            <text:p>0,00087754629629629600</text:p>
          </table:table-cell>
          <table:table-cell table:formula="of:=[.D225]-[.D22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34" office:value-type="float" office:value="7616" calcext:value-type="float">
            <text:p>7616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881481481481482" calcext:value-type="float">
            <text:p>0,00088148148148148200</text:p>
          </table:table-cell>
          <table:table-cell table:formula="of:=[.D226]-[.D22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34" office:value-type="float" office:value="7650" calcext:value-type="float">
            <text:p>76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885416666666667" calcext:value-type="float">
            <text:p>0,00088541666666666700</text:p>
          </table:table-cell>
          <table:table-cell table:formula="of:=[.D227]-[.D226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34" office:value-type="float" office:value="7684" calcext:value-type="float">
            <text:p>7684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889351851851852" calcext:value-type="float">
            <text:p>0,00088935185185185200</text:p>
          </table:table-cell>
          <table:table-cell table:formula="of:=[.D228]-[.D22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34" office:value-type="float" office:value="7718" calcext:value-type="float">
            <text:p>7718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893287037037037" calcext:value-type="float">
            <text:p>0,00089328703703703700</text:p>
          </table:table-cell>
          <table:table-cell table:formula="of:=[.D229]-[.D22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34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897222222222222" calcext:value-type="float">
            <text:p>0,00089722222222222200</text:p>
          </table:table-cell>
          <table:table-cell table:formula="of:=[.D230]-[.D22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34" office:value-type="float" office:value="7786" calcext:value-type="float">
            <text:p>7786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901157407407407" calcext:value-type="float">
            <text:p>0,00090115740740740700</text:p>
          </table:table-cell>
          <table:table-cell table:formula="of:=[.D231]-[.D230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34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905092592592593" calcext:value-type="float">
            <text:p>0,00090509259259259300</text:p>
          </table:table-cell>
          <table:table-cell table:formula="of:=[.D232]-[.D23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34" office:value-type="float" office:value="7854" calcext:value-type="float">
            <text:p>7854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909027777777778" calcext:value-type="float">
            <text:p>0,00090902777777777800</text:p>
          </table:table-cell>
          <table:table-cell table:formula="of:=[.D233]-[.D23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34" office:value-type="float" office:value="7888" calcext:value-type="float">
            <text:p>7888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912962962962963" calcext:value-type="float">
            <text:p>0,00091296296296296300</text:p>
          </table:table-cell>
          <table:table-cell table:formula="of:=[.D234]-[.D23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34" office:value-type="float" office:value="7922" calcext:value-type="float">
            <text:p>7922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916898148148148" calcext:value-type="float">
            <text:p>0,00091689814814814800</text:p>
          </table:table-cell>
          <table:table-cell table:formula="of:=[.D235]-[.D23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34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920833333333333" calcext:value-type="float">
            <text:p>0,00092083333333333300</text:p>
          </table:table-cell>
          <table:table-cell table:formula="of:=[.D236]-[.D235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34" office:value-type="float" office:value="7990" calcext:value-type="float">
            <text:p>799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924768518518519" calcext:value-type="float">
            <text:p>0,00092476851851851900</text:p>
          </table:table-cell>
          <table:table-cell table:formula="of:=[.D237]-[.D23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34" office:value-type="float" office:value="8024" calcext:value-type="float">
            <text:p>8024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928703703703704" calcext:value-type="float">
            <text:p>0,00092870370370370400</text:p>
          </table:table-cell>
          <table:table-cell table:formula="of:=[.D238]-[.D23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34" office:value-type="float" office:value="8058" calcext:value-type="float">
            <text:p>8058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932638888888889" calcext:value-type="float">
            <text:p>0,00093263888888888900</text:p>
          </table:table-cell>
          <table:table-cell table:formula="of:=[.D239]-[.D23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34" office:value-type="float" office:value="8092" calcext:value-type="float">
            <text:p>8092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936574074074074" calcext:value-type="float">
            <text:p>0,00093657407407407400</text:p>
          </table:table-cell>
          <table:table-cell table:formula="of:=[.D240]-[.D23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34" office:value-type="float" office:value="8126" calcext:value-type="float">
            <text:p>8126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940509259259259" calcext:value-type="float">
            <text:p>0,00094050925925925900</text:p>
          </table:table-cell>
          <table:table-cell table:formula="of:=[.D241]-[.D240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34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944444444444445" calcext:value-type="float">
            <text:p>0,00094444444444444500</text:p>
          </table:table-cell>
          <table:table-cell table:formula="of:=[.D242]-[.D24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34" office:value-type="float" office:value="8194" calcext:value-type="float">
            <text:p>8194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94837962962963" calcext:value-type="float">
            <text:p>0,00094837962962963000</text:p>
          </table:table-cell>
          <table:table-cell table:formula="of:=[.D243]-[.D24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34" office:value-type="float" office:value="8228" calcext:value-type="float">
            <text:p>8228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952314814814815" calcext:value-type="float">
            <text:p>0,00095231481481481500</text:p>
          </table:table-cell>
          <table:table-cell table:formula="of:=[.D244]-[.D24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34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95625" calcext:value-type="float">
            <text:p>0,00095625000000000000</text:p>
          </table:table-cell>
          <table:table-cell table:formula="of:=[.D245]-[.D244]" office:value-type="float" office:value="0.00000393518518518527" calcext:value-type="float">
            <text:p>0,000003935185185185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34" office:value-type="float" office:value="8296" calcext:value-type="float">
            <text:p>8296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960185185185185" calcext:value-type="float">
            <text:p>0,00096018518518518500</text:p>
          </table:table-cell>
          <table:table-cell table:formula="of:=[.D246]-[.D24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34" office:value-type="float" office:value="8330" calcext:value-type="float">
            <text:p>833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96412037037037" calcext:value-type="float">
            <text:p>0,00096412037037037000</text:p>
          </table:table-cell>
          <table:table-cell table:formula="of:=[.D247]-[.D24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34" office:value-type="float" office:value="8364" calcext:value-type="float">
            <text:p>8364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968055555555556" calcext:value-type="float">
            <text:p>0,00096805555555555600</text:p>
          </table:table-cell>
          <table:table-cell table:formula="of:=[.D248]-[.D24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34" office:value-type="float" office:value="8398" calcext:value-type="float">
            <text:p>8398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971990740740741" calcext:value-type="float">
            <text:p>0,00097199074074074100</text:p>
          </table:table-cell>
          <table:table-cell table:formula="of:=[.D249]-[.D24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34" office:value-type="float" office:value="8432" calcext:value-type="float">
            <text:p>8432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975925925925926" calcext:value-type="float">
            <text:p>0,00097592592592592600</text:p>
          </table:table-cell>
          <table:table-cell table:formula="of:=[.D250]-[.D24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34" office:value-type="float" office:value="8466" calcext:value-type="float">
            <text:p>8466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979861111111111" calcext:value-type="float">
            <text:p>0,00097986111111111100</text:p>
          </table:table-cell>
          <table:table-cell table:formula="of:=[.D251]-[.D25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34" office:value-type="float" office:value="8500" calcext:value-type="float">
            <text:p>8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983796296296296" calcext:value-type="float">
            <text:p>0,00098379629629629600</text:p>
          </table:table-cell>
          <table:table-cell table:formula="of:=[.D252]-[.D25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34" office:value-type="float" office:value="8534" calcext:value-type="float">
            <text:p>8534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987731481481482" calcext:value-type="float">
            <text:p>0,00098773148148148200</text:p>
          </table:table-cell>
          <table:table-cell table:formula="of:=[.D253]-[.D25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34" office:value-type="float" office:value="8568" calcext:value-type="float">
            <text:p>8568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991666666666667" calcext:value-type="float">
            <text:p>0,00099166666666666700</text:p>
          </table:table-cell>
          <table:table-cell table:formula="of:=[.D254]-[.D25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34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995601851851852" calcext:value-type="float">
            <text:p>0,00099560185185185200</text:p>
          </table:table-cell>
          <table:table-cell table:formula="of:=[.D255]-[.D25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34" office:value-type="float" office:value="8636" calcext:value-type="float">
            <text:p>8636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999537037037037" calcext:value-type="float">
            <text:p>0,00099953703703703700</text:p>
          </table:table-cell>
          <table:table-cell table:formula="of:=[.D256]-[.D25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34" office:value-type="float" office:value="8670" calcext:value-type="float">
            <text:p>867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00347222222222" calcext:value-type="float">
            <text:p>0,00100347222222222000</text:p>
          </table:table-cell>
          <table:table-cell table:formula="of:=[.D257]-[.D25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34" office:value-type="float" office:value="8704" calcext:value-type="float">
            <text:p>8704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00740740740741" calcext:value-type="float">
            <text:p>0,00100740740740741000</text:p>
          </table:table-cell>
          <table:table-cell table:formula="of:=[.D258]-[.D25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34" office:value-type="float" office:value="8738" calcext:value-type="float">
            <text:p>8738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01134259259259" calcext:value-type="float">
            <text:p>0,00101134259259259000</text:p>
          </table:table-cell>
          <table:table-cell table:formula="of:=[.D259]-[.D25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34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01527777777778" calcext:value-type="float">
            <text:p>0,00101527777777778000</text:p>
          </table:table-cell>
          <table:table-cell table:formula="of:=[.D260]-[.D25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34" office:value-type="float" office:value="8806" calcext:value-type="float">
            <text:p>8806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01921296296296" calcext:value-type="float">
            <text:p>0,00101921296296296000</text:p>
          </table:table-cell>
          <table:table-cell table:formula="of:=[.D261]-[.D26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34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02314814814815" calcext:value-type="float">
            <text:p>0,00102314814814815000</text:p>
          </table:table-cell>
          <table:table-cell table:formula="of:=[.D262]-[.D26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34" office:value-type="float" office:value="8874" calcext:value-type="float">
            <text:p>8874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02708333333333" calcext:value-type="float">
            <text:p>0,00102708333333333000</text:p>
          </table:table-cell>
          <table:table-cell table:formula="of:=[.D263]-[.D26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34" office:value-type="float" office:value="8908" calcext:value-type="float">
            <text:p>8908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03101851851852" calcext:value-type="float">
            <text:p>0,00103101851851852000</text:p>
          </table:table-cell>
          <table:table-cell table:formula="of:=[.D264]-[.D26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34" office:value-type="float" office:value="8942" calcext:value-type="float">
            <text:p>8942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0349537037037" calcext:value-type="float">
            <text:p>0,00103495370370370000</text:p>
          </table:table-cell>
          <table:table-cell table:formula="of:=[.D265]-[.D26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34" office:value-type="float" office:value="8976" calcext:value-type="float">
            <text:p>8976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03888888888889" calcext:value-type="float">
            <text:p>0,00103888888888889000</text:p>
          </table:table-cell>
          <table:table-cell table:formula="of:=[.D266]-[.D26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34" office:value-type="float" office:value="9010" calcext:value-type="float">
            <text:p>901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04282407407407" calcext:value-type="float">
            <text:p>0,00104282407407407000</text:p>
          </table:table-cell>
          <table:table-cell table:formula="of:=[.D267]-[.D26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34" office:value-type="float" office:value="9044" calcext:value-type="float">
            <text:p>9044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04675925925926" calcext:value-type="float">
            <text:p>0,00104675925925926000</text:p>
          </table:table-cell>
          <table:table-cell table:formula="of:=[.D268]-[.D26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34" office:value-type="float" office:value="9078" calcext:value-type="float">
            <text:p>9078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05069444444444" calcext:value-type="float">
            <text:p>0,00105069444444444000</text:p>
          </table:table-cell>
          <table:table-cell table:formula="of:=[.D269]-[.D26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34" office:value-type="float" office:value="9112" calcext:value-type="float">
            <text:p>9112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05462962962963" calcext:value-type="float">
            <text:p>0,00105462962962963000</text:p>
          </table:table-cell>
          <table:table-cell table:formula="of:=[.D270]-[.D26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34" office:value-type="float" office:value="9146" calcext:value-type="float">
            <text:p>9146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05856481481482" calcext:value-type="float">
            <text:p>0,00105856481481482000</text:p>
          </table:table-cell>
          <table:table-cell table:formula="of:=[.D271]-[.D27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34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0625" calcext:value-type="float">
            <text:p>0,00106250000000000000</text:p>
          </table:table-cell>
          <table:table-cell table:formula="of:=[.D272]-[.D27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34" office:value-type="float" office:value="9214" calcext:value-type="float">
            <text:p>9214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06643518518519" calcext:value-type="float">
            <text:p>0,00106643518518519000</text:p>
          </table:table-cell>
          <table:table-cell table:formula="of:=[.D273]-[.D27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34" office:value-type="float" office:value="9248" calcext:value-type="float">
            <text:p>9248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07037037037037" calcext:value-type="float">
            <text:p>0,00107037037037037000</text:p>
          </table:table-cell>
          <table:table-cell table:formula="of:=[.D274]-[.D27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34" office:value-type="float" office:value="9282" calcext:value-type="float">
            <text:p>9282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07430555555556" calcext:value-type="float">
            <text:p>0,00107430555555556000</text:p>
          </table:table-cell>
          <table:table-cell table:formula="of:=[.D275]-[.D27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34" office:value-type="float" office:value="9316" calcext:value-type="float">
            <text:p>9316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07824074074074" calcext:value-type="float">
            <text:p>0,00107824074074074000</text:p>
          </table:table-cell>
          <table:table-cell table:formula="of:=[.D276]-[.D27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34" office:value-type="float" office:value="9350" calcext:value-type="float">
            <text:p>93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08217592592593" calcext:value-type="float">
            <text:p>0,00108217592592593000</text:p>
          </table:table-cell>
          <table:table-cell table:formula="of:=[.D277]-[.D27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34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08611111111111" calcext:value-type="float">
            <text:p>0,00108611111111111000</text:p>
          </table:table-cell>
          <table:table-cell table:formula="of:=[.D278]-[.D27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34" office:value-type="float" office:value="9418" calcext:value-type="float">
            <text:p>9418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0900462962963" calcext:value-type="float">
            <text:p>0,00109004629629630000</text:p>
          </table:table-cell>
          <table:table-cell table:formula="of:=[.D279]-[.D27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34" office:value-type="float" office:value="9452" calcext:value-type="float">
            <text:p>9452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09398148148148" calcext:value-type="float">
            <text:p>0,00109398148148148000</text:p>
          </table:table-cell>
          <table:table-cell table:formula="of:=[.D280]-[.D27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34" office:value-type="float" office:value="9486" calcext:value-type="float">
            <text:p>9486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09791666666667" calcext:value-type="float">
            <text:p>0,00109791666666667000</text:p>
          </table:table-cell>
          <table:table-cell table:formula="of:=[.D281]-[.D28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34" office:value-type="float" office:value="9520" calcext:value-type="float">
            <text:p>952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10185185185185" calcext:value-type="float">
            <text:p>0,00110185185185185000</text:p>
          </table:table-cell>
          <table:table-cell table:formula="of:=[.D282]-[.D28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34" office:value-type="float" office:value="9554" calcext:value-type="float">
            <text:p>9554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10578703703704" calcext:value-type="float">
            <text:p>0,00110578703703704000</text:p>
          </table:table-cell>
          <table:table-cell table:formula="of:=[.D283]-[.D28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34" office:value-type="float" office:value="9588" calcext:value-type="float">
            <text:p>9588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10972222222222" calcext:value-type="float">
            <text:p>0,00110972222222222000</text:p>
          </table:table-cell>
          <table:table-cell table:formula="of:=[.D284]-[.D28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34" office:value-type="float" office:value="9622" calcext:value-type="float">
            <text:p>9622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11365740740741" calcext:value-type="float">
            <text:p>0,00111365740740741000</text:p>
          </table:table-cell>
          <table:table-cell table:formula="of:=[.D285]-[.D28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34" office:value-type="float" office:value="9656" calcext:value-type="float">
            <text:p>9656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11759259259259" calcext:value-type="float">
            <text:p>0,00111759259259259000</text:p>
          </table:table-cell>
          <table:table-cell table:formula="of:=[.D286]-[.D28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34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12152777777778" calcext:value-type="float">
            <text:p>0,00112152777777778000</text:p>
          </table:table-cell>
          <table:table-cell table:formula="of:=[.D287]-[.D28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34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12546296296296" calcext:value-type="float">
            <text:p>0,00112546296296296000</text:p>
          </table:table-cell>
          <table:table-cell table:formula="of:=[.D288]-[.D28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34" office:value-type="float" office:value="9758" calcext:value-type="float">
            <text:p>9758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12939814814815" calcext:value-type="float">
            <text:p>0,00112939814814815000</text:p>
          </table:table-cell>
          <table:table-cell table:formula="of:=[.D289]-[.D28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34" office:value-type="float" office:value="9792" calcext:value-type="float">
            <text:p>9792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13333333333333" calcext:value-type="float">
            <text:p>0,00113333333333333000</text:p>
          </table:table-cell>
          <table:table-cell table:formula="of:=[.D290]-[.D28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34" office:value-type="float" office:value="9826" calcext:value-type="float">
            <text:p>9826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13726851851852" calcext:value-type="float">
            <text:p>0,00113726851851852000</text:p>
          </table:table-cell>
          <table:table-cell table:formula="of:=[.D291]-[.D29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34" office:value-type="float" office:value="9860" calcext:value-type="float">
            <text:p>986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1412037037037" calcext:value-type="float">
            <text:p>0,00114120370370370000</text:p>
          </table:table-cell>
          <table:table-cell table:formula="of:=[.D292]-[.D29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34" office:value-type="float" office:value="9894" calcext:value-type="float">
            <text:p>9894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14513888888889" calcext:value-type="float">
            <text:p>0,00114513888888889000</text:p>
          </table:table-cell>
          <table:table-cell table:formula="of:=[.D293]-[.D29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34" office:value-type="float" office:value="9928" calcext:value-type="float">
            <text:p>9928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14907407407407" calcext:value-type="float">
            <text:p>0,00114907407407407000</text:p>
          </table:table-cell>
          <table:table-cell table:formula="of:=[.D294]-[.D29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34" office:value-type="float" office:value="9962" calcext:value-type="float">
            <text:p>9962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15300925925926" calcext:value-type="float">
            <text:p>0,00115300925925926000</text:p>
          </table:table-cell>
          <table:table-cell table:formula="of:=[.D295]-[.D29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34" office:value-type="float" office:value="9996" calcext:value-type="float">
            <text:p>9996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15694444444444" calcext:value-type="float">
            <text:p>0,00115694444444444000</text:p>
          </table:table-cell>
          <table:table-cell table:formula="of:=[.D296]-[.D29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34" office:value-type="float" office:value="10030" calcext:value-type="float">
            <text:p>1003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16087962962963" calcext:value-type="float">
            <text:p>0,00116087962962963000</text:p>
          </table:table-cell>
          <table:table-cell table:formula="of:=[.D297]-[.D29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34" office:value-type="float" office:value="10064" calcext:value-type="float">
            <text:p>10064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16481481481482" calcext:value-type="float">
            <text:p>0,00116481481481482000</text:p>
          </table:table-cell>
          <table:table-cell table:formula="of:=[.D298]-[.D29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34" office:value-type="float" office:value="10098" calcext:value-type="float">
            <text:p>10098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16875" calcext:value-type="float">
            <text:p>0,00116875000000000000</text:p>
          </table:table-cell>
          <table:table-cell table:formula="of:=[.D299]-[.D29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34" office:value-type="float" office:value="10132" calcext:value-type="float">
            <text:p>10132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17268518518519" calcext:value-type="float">
            <text:p>0,00117268518518519000</text:p>
          </table:table-cell>
          <table:table-cell table:formula="of:=[.D300]-[.D29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34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17662037037037" calcext:value-type="float">
            <text:p>0,00117662037037037000</text:p>
          </table:table-cell>
          <table:table-cell table:formula="of:=[.D301]-[.D30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34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18055555555556" calcext:value-type="float">
            <text:p>0,00118055555555556000</text:p>
          </table:table-cell>
          <table:table-cell table:formula="of:=[.D302]-[.D30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34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18449074074074" calcext:value-type="float">
            <text:p>0,00118449074074074000</text:p>
          </table:table-cell>
          <table:table-cell table:formula="of:=[.D303]-[.D30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34" office:value-type="float" office:value="10268" calcext:value-type="float">
            <text:p>10268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18842592592593" calcext:value-type="float">
            <text:p>0,00118842592592593000</text:p>
          </table:table-cell>
          <table:table-cell table:formula="of:=[.D304]-[.D30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34" office:value-type="float" office:value="10302" calcext:value-type="float">
            <text:p>10302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19236111111111" calcext:value-type="float">
            <text:p>0,00119236111111111000</text:p>
          </table:table-cell>
          <table:table-cell table:formula="of:=[.D305]-[.D30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34" office:value-type="float" office:value="10336" calcext:value-type="float">
            <text:p>10336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1962962962963" calcext:value-type="float">
            <text:p>0,00119629629629630000</text:p>
          </table:table-cell>
          <table:table-cell table:formula="of:=[.D306]-[.D30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34" office:value-type="float" office:value="10370" calcext:value-type="float">
            <text:p>1037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20023148148148" calcext:value-type="float">
            <text:p>0,00120023148148148000</text:p>
          </table:table-cell>
          <table:table-cell table:formula="of:=[.D307]-[.D30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34" office:value-type="float" office:value="10404" calcext:value-type="float">
            <text:p>10404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20416666666667" calcext:value-type="float">
            <text:p>0,00120416666666667000</text:p>
          </table:table-cell>
          <table:table-cell table:formula="of:=[.D308]-[.D30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34" office:value-type="float" office:value="10438" calcext:value-type="float">
            <text:p>10438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20810185185185" calcext:value-type="float">
            <text:p>0,00120810185185185000</text:p>
          </table:table-cell>
          <table:table-cell table:formula="of:=[.D309]-[.D30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34" office:value-type="float" office:value="10472" calcext:value-type="float">
            <text:p>10472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21203703703704" calcext:value-type="float">
            <text:p>0,00121203703703704000</text:p>
          </table:table-cell>
          <table:table-cell table:formula="of:=[.D310]-[.D30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34" office:value-type="float" office:value="10506" calcext:value-type="float">
            <text:p>10506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21597222222222" calcext:value-type="float">
            <text:p>0,00121597222222222000</text:p>
          </table:table-cell>
          <table:table-cell table:formula="of:=[.D311]-[.D31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34" office:value-type="float" office:value="10540" calcext:value-type="float">
            <text:p>1054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21990740740741" calcext:value-type="float">
            <text:p>0,00121990740740741000</text:p>
          </table:table-cell>
          <table:table-cell table:formula="of:=[.D312]-[.D31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34" office:value-type="float" office:value="10574" calcext:value-type="float">
            <text:p>10574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22384259259259" calcext:value-type="float">
            <text:p>0,00122384259259259000</text:p>
          </table:table-cell>
          <table:table-cell table:formula="of:=[.D313]-[.D31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34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22777777777778" calcext:value-type="float">
            <text:p>0,00122777777777778000</text:p>
          </table:table-cell>
          <table:table-cell table:formula="of:=[.D314]-[.D31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34" office:value-type="float" office:value="10642" calcext:value-type="float">
            <text:p>10642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23171296296296" calcext:value-type="float">
            <text:p>0,00123171296296296000</text:p>
          </table:table-cell>
          <table:table-cell table:formula="of:=[.D315]-[.D31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34" office:value-type="float" office:value="10676" calcext:value-type="float">
            <text:p>10676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23564814814815" calcext:value-type="float">
            <text:p>0,00123564814814815000</text:p>
          </table:table-cell>
          <table:table-cell table:formula="of:=[.D316]-[.D31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34" office:value-type="float" office:value="10710" calcext:value-type="float">
            <text:p>1071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23958333333333" calcext:value-type="float">
            <text:p>0,00123958333333333000</text:p>
          </table:table-cell>
          <table:table-cell table:formula="of:=[.D317]-[.D31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34" office:value-type="float" office:value="10744" calcext:value-type="float">
            <text:p>10744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24351851851852" calcext:value-type="float">
            <text:p>0,00124351851851852000</text:p>
          </table:table-cell>
          <table:table-cell table:formula="of:=[.D318]-[.D31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34" office:value-type="float" office:value="10778" calcext:value-type="float">
            <text:p>10778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2474537037037" calcext:value-type="float">
            <text:p>0,00124745370370370000</text:p>
          </table:table-cell>
          <table:table-cell table:formula="of:=[.D319]-[.D31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34" office:value-type="float" office:value="10812" calcext:value-type="float">
            <text:p>10812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25138888888889" calcext:value-type="float">
            <text:p>0,00125138888888889000</text:p>
          </table:table-cell>
          <table:table-cell table:formula="of:=[.D320]-[.D31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34" office:value-type="float" office:value="10846" calcext:value-type="float">
            <text:p>10846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25532407407407" calcext:value-type="float">
            <text:p>0,00125532407407407000</text:p>
          </table:table-cell>
          <table:table-cell table:formula="of:=[.D321]-[.D32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34" office:value-type="float" office:value="10880" calcext:value-type="float">
            <text:p>1088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25925925925926" calcext:value-type="float">
            <text:p>0,00125925925925926000</text:p>
          </table:table-cell>
          <table:table-cell table:formula="of:=[.D322]-[.D32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34" office:value-type="float" office:value="10914" calcext:value-type="float">
            <text:p>10914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26319444444444" calcext:value-type="float">
            <text:p>0,00126319444444444000</text:p>
          </table:table-cell>
          <table:table-cell table:formula="of:=[.D323]-[.D32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34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26712962962963" calcext:value-type="float">
            <text:p>0,00126712962962963000</text:p>
          </table:table-cell>
          <table:table-cell table:formula="of:=[.D324]-[.D32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34" office:value-type="float" office:value="10982" calcext:value-type="float">
            <text:p>10982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27106481481481" calcext:value-type="float">
            <text:p>0,00127106481481481000</text:p>
          </table:table-cell>
          <table:table-cell table:formula="of:=[.D325]-[.D32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34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275" calcext:value-type="float">
            <text:p>0,00127500000000000000</text:p>
          </table:table-cell>
          <table:table-cell table:formula="of:=[.D326]-[.D32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34" office:value-type="float" office:value="11050" calcext:value-type="float">
            <text:p>1105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27893518518519" calcext:value-type="float">
            <text:p>0,00127893518518519000</text:p>
          </table:table-cell>
          <table:table-cell table:formula="of:=[.D327]-[.D32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34" office:value-type="float" office:value="11084" calcext:value-type="float">
            <text:p>11084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28287037037037" calcext:value-type="float">
            <text:p>0,00128287037037037000</text:p>
          </table:table-cell>
          <table:table-cell table:formula="of:=[.D328]-[.D32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34" office:value-type="float" office:value="11118" calcext:value-type="float">
            <text:p>11118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28680555555556" calcext:value-type="float">
            <text:p>0,00128680555555556000</text:p>
          </table:table-cell>
          <table:table-cell table:formula="of:=[.D329]-[.D32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34" office:value-type="float" office:value="11152" calcext:value-type="float">
            <text:p>11152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29074074074074" calcext:value-type="float">
            <text:p>0,00129074074074074000</text:p>
          </table:table-cell>
          <table:table-cell table:formula="of:=[.D330]-[.D32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34" office:value-type="float" office:value="11186" calcext:value-type="float">
            <text:p>11186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29467592592593" calcext:value-type="float">
            <text:p>0,00129467592592593000</text:p>
          </table:table-cell>
          <table:table-cell table:formula="of:=[.D331]-[.D33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34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29861111111111" calcext:value-type="float">
            <text:p>0,00129861111111111000</text:p>
          </table:table-cell>
          <table:table-cell table:formula="of:=[.D332]-[.D33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34" office:value-type="float" office:value="11254" calcext:value-type="float">
            <text:p>11254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3025462962963" calcext:value-type="float">
            <text:p>0,00130254629629630000</text:p>
          </table:table-cell>
          <table:table-cell table:formula="of:=[.D333]-[.D33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34" office:value-type="float" office:value="11288" calcext:value-type="float">
            <text:p>11288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30648148148148" calcext:value-type="float">
            <text:p>0,00130648148148148000</text:p>
          </table:table-cell>
          <table:table-cell table:formula="of:=[.D334]-[.D33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34" office:value-type="float" office:value="11322" calcext:value-type="float">
            <text:p>11322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131041666666667" calcext:value-type="float">
            <text:p>0,00131041666666667000</text:p>
          </table:table-cell>
          <table:table-cell table:formula="of:=[.D335]-[.D33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34" office:value-type="float" office:value="11356" calcext:value-type="float">
            <text:p>11356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131435185185185" calcext:value-type="float">
            <text:p>0,00131435185185185000</text:p>
          </table:table-cell>
          <table:table-cell table:formula="of:=[.D336]-[.D33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34" office:value-type="float" office:value="11390" calcext:value-type="float">
            <text:p>1139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131828703703704" calcext:value-type="float">
            <text:p>0,00131828703703704000</text:p>
          </table:table-cell>
          <table:table-cell table:formula="of:=[.D337]-[.D33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34" office:value-type="float" office:value="11424" calcext:value-type="float">
            <text:p>11424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132222222222222" calcext:value-type="float">
            <text:p>0,00132222222222222000</text:p>
          </table:table-cell>
          <table:table-cell table:formula="of:=[.D338]-[.D33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34" office:value-type="float" office:value="11458" calcext:value-type="float">
            <text:p>11458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132615740740741" calcext:value-type="float">
            <text:p>0,00132615740740741000</text:p>
          </table:table-cell>
          <table:table-cell table:formula="of:=[.D339]-[.D33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34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133009259259259" calcext:value-type="float">
            <text:p>0,00133009259259259000</text:p>
          </table:table-cell>
          <table:table-cell table:formula="of:=[.D340]-[.D33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34" office:value-type="float" office:value="11526" calcext:value-type="float">
            <text:p>11526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133402777777778" calcext:value-type="float">
            <text:p>0,00133402777777778000</text:p>
          </table:table-cell>
          <table:table-cell table:formula="of:=[.D341]-[.D34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34" office:value-type="float" office:value="11560" calcext:value-type="float">
            <text:p>1156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133796296296296" calcext:value-type="float">
            <text:p>0,00133796296296296000</text:p>
          </table:table-cell>
          <table:table-cell table:formula="of:=[.D342]-[.D34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34" office:value-type="float" office:value="11594" calcext:value-type="float">
            <text:p>11594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134189814814815" calcext:value-type="float">
            <text:p>0,00134189814814815000</text:p>
          </table:table-cell>
          <table:table-cell table:formula="of:=[.D343]-[.D34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34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134583333333333" calcext:value-type="float">
            <text:p>0,00134583333333333000</text:p>
          </table:table-cell>
          <table:table-cell table:formula="of:=[.D344]-[.D34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34" office:value-type="float" office:value="11662" calcext:value-type="float">
            <text:p>11662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134976851851852" calcext:value-type="float">
            <text:p>0,00134976851851852000</text:p>
          </table:table-cell>
          <table:table-cell table:formula="of:=[.D345]-[.D34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34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13537037037037" calcext:value-type="float">
            <text:p>0,00135370370370370000</text:p>
          </table:table-cell>
          <table:table-cell table:formula="of:=[.D346]-[.D34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34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135763888888889" calcext:value-type="float">
            <text:p>0,00135763888888889000</text:p>
          </table:table-cell>
          <table:table-cell table:formula="of:=[.D347]-[.D34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34" office:value-type="float" office:value="11764" calcext:value-type="float">
            <text:p>11764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136157407407407" calcext:value-type="float">
            <text:p>0,00136157407407407000</text:p>
          </table:table-cell>
          <table:table-cell table:formula="of:=[.D348]-[.D34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34" office:value-type="float" office:value="11798" calcext:value-type="float">
            <text:p>11798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136550925925926" calcext:value-type="float">
            <text:p>0,00136550925925926000</text:p>
          </table:table-cell>
          <table:table-cell table:formula="of:=[.D349]-[.D34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34" office:value-type="float" office:value="11832" calcext:value-type="float">
            <text:p>11832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136944444444444" calcext:value-type="float">
            <text:p>0,00136944444444444000</text:p>
          </table:table-cell>
          <table:table-cell table:formula="of:=[.D350]-[.D34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34" office:value-type="float" office:value="11866" calcext:value-type="float">
            <text:p>11866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137337962962963" calcext:value-type="float">
            <text:p>0,00137337962962963000</text:p>
          </table:table-cell>
          <table:table-cell table:formula="of:=[.D351]-[.D35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34" office:value-type="float" office:value="11900" calcext:value-type="float">
            <text:p>119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137731481481481" calcext:value-type="float">
            <text:p>0,00137731481481481000</text:p>
          </table:table-cell>
          <table:table-cell table:formula="of:=[.D352]-[.D35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34" office:value-type="float" office:value="11934" calcext:value-type="float">
            <text:p>11934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138125" calcext:value-type="float">
            <text:p>0,00138125000000000000</text:p>
          </table:table-cell>
          <table:table-cell table:formula="of:=[.D353]-[.D35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34" office:value-type="float" office:value="11968" calcext:value-type="float">
            <text:p>11968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138518518518519" calcext:value-type="float">
            <text:p>0,00138518518518519000</text:p>
          </table:table-cell>
          <table:table-cell table:formula="of:=[.D354]-[.D35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34" office:value-type="float" office:value="12002" calcext:value-type="float">
            <text:p>12002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138912037037037" calcext:value-type="float">
            <text:p>0,00138912037037037000</text:p>
          </table:table-cell>
          <table:table-cell table:formula="of:=[.D355]-[.D35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34" office:value-type="float" office:value="12036" calcext:value-type="float">
            <text:p>12036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139305555555556" calcext:value-type="float">
            <text:p>0,00139305555555556000</text:p>
          </table:table-cell>
          <table:table-cell table:formula="of:=[.D356]-[.D35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34" office:value-type="float" office:value="12070" calcext:value-type="float">
            <text:p>1207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139699074074074" calcext:value-type="float">
            <text:p>0,00139699074074074000</text:p>
          </table:table-cell>
          <table:table-cell table:formula="of:=[.D357]-[.D35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34" office:value-type="float" office:value="12104" calcext:value-type="float">
            <text:p>12104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140092592592593" calcext:value-type="float">
            <text:p>0,00140092592592593000</text:p>
          </table:table-cell>
          <table:table-cell table:formula="of:=[.D358]-[.D35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34" office:value-type="float" office:value="12138" calcext:value-type="float">
            <text:p>12138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140486111111111" calcext:value-type="float">
            <text:p>0,00140486111111111000</text:p>
          </table:table-cell>
          <table:table-cell table:formula="of:=[.D359]-[.D35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34" office:value-type="float" office:value="12172" calcext:value-type="float">
            <text:p>12172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14087962962963" calcext:value-type="float">
            <text:p>0,00140879629629630000</text:p>
          </table:table-cell>
          <table:table-cell table:formula="of:=[.D360]-[.D35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34" office:value-type="float" office:value="12206" calcext:value-type="float">
            <text:p>12206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141273148148148" calcext:value-type="float">
            <text:p>0,00141273148148148000</text:p>
          </table:table-cell>
          <table:table-cell table:formula="of:=[.D361]-[.D36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34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141666666666667" calcext:value-type="float">
            <text:p>0,00141666666666667000</text:p>
          </table:table-cell>
          <table:table-cell table:formula="of:=[.D362]-[.D36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34" office:value-type="float" office:value="12274" calcext:value-type="float">
            <text:p>12274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142060185185185" calcext:value-type="float">
            <text:p>0,00142060185185185000</text:p>
          </table:table-cell>
          <table:table-cell table:formula="of:=[.D363]-[.D36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34" office:value-type="float" office:value="12308" calcext:value-type="float">
            <text:p>12308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142453703703704" calcext:value-type="float">
            <text:p>0,00142453703703704000</text:p>
          </table:table-cell>
          <table:table-cell table:formula="of:=[.D364]-[.D36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34" office:value-type="float" office:value="12342" calcext:value-type="float">
            <text:p>12342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142847222222222" calcext:value-type="float">
            <text:p>0,00142847222222222000</text:p>
          </table:table-cell>
          <table:table-cell table:formula="of:=[.D365]-[.D36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34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143240740740741" calcext:value-type="float">
            <text:p>0,00143240740740741000</text:p>
          </table:table-cell>
          <table:table-cell table:formula="of:=[.D366]-[.D36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34" office:value-type="float" office:value="12410" calcext:value-type="float">
            <text:p>1241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143634259259259" calcext:value-type="float">
            <text:p>0,00143634259259259000</text:p>
          </table:table-cell>
          <table:table-cell table:formula="of:=[.D367]-[.D36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34" office:value-type="float" office:value="12444" calcext:value-type="float">
            <text:p>12444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144027777777778" calcext:value-type="float">
            <text:p>0,00144027777777778000</text:p>
          </table:table-cell>
          <table:table-cell table:formula="of:=[.D368]-[.D36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34" office:value-type="float" office:value="12478" calcext:value-type="float">
            <text:p>12478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144421296296296" calcext:value-type="float">
            <text:p>0,00144421296296296000</text:p>
          </table:table-cell>
          <table:table-cell table:formula="of:=[.D369]-[.D36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34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144814814814815" calcext:value-type="float">
            <text:p>0,00144814814814815000</text:p>
          </table:table-cell>
          <table:table-cell table:formula="of:=[.D370]-[.D36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34" office:value-type="float" office:value="12546" calcext:value-type="float">
            <text:p>12546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145208333333333" calcext:value-type="float">
            <text:p>0,00145208333333333000</text:p>
          </table:table-cell>
          <table:table-cell table:formula="of:=[.D371]-[.D37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34" office:value-type="float" office:value="12580" calcext:value-type="float">
            <text:p>1258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145601851851852" calcext:value-type="float">
            <text:p>0,00145601851851852000</text:p>
          </table:table-cell>
          <table:table-cell table:formula="of:=[.D372]-[.D37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34" office:value-type="float" office:value="12614" calcext:value-type="float">
            <text:p>12614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14599537037037" calcext:value-type="float">
            <text:p>0,00145995370370370000</text:p>
          </table:table-cell>
          <table:table-cell table:formula="of:=[.D373]-[.D37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34" office:value-type="float" office:value="12648" calcext:value-type="float">
            <text:p>12648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146388888888889" calcext:value-type="float">
            <text:p>0,00146388888888889000</text:p>
          </table:table-cell>
          <table:table-cell table:formula="of:=[.D374]-[.D37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34" office:value-type="float" office:value="12682" calcext:value-type="float">
            <text:p>12682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146782407407407" calcext:value-type="float">
            <text:p>0,00146782407407407000</text:p>
          </table:table-cell>
          <table:table-cell table:formula="of:=[.D375]-[.D37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34" office:value-type="float" office:value="12716" calcext:value-type="float">
            <text:p>12716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147175925925926" calcext:value-type="float">
            <text:p>0,00147175925925926000</text:p>
          </table:table-cell>
          <table:table-cell table:formula="of:=[.D376]-[.D37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34" office:value-type="float" office:value="12750" calcext:value-type="float">
            <text:p>1275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147569444444444" calcext:value-type="float">
            <text:p>0,00147569444444444000</text:p>
          </table:table-cell>
          <table:table-cell table:formula="of:=[.D377]-[.D37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34" office:value-type="float" office:value="12784" calcext:value-type="float">
            <text:p>12784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47962962962963" calcext:value-type="float">
            <text:p>0,00147962962962963000</text:p>
          </table:table-cell>
          <table:table-cell table:formula="of:=[.D378]-[.D37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34" office:value-type="float" office:value="12818" calcext:value-type="float">
            <text:p>12818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48356481481481" calcext:value-type="float">
            <text:p>0,00148356481481481000</text:p>
          </table:table-cell>
          <table:table-cell table:formula="of:=[.D379]-[.D37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34" office:value-type="float" office:value="12852" calcext:value-type="float">
            <text:p>12852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4875" calcext:value-type="float">
            <text:p>0,00148750000000000000</text:p>
          </table:table-cell>
          <table:table-cell table:formula="of:=[.D380]-[.D37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34" office:value-type="float" office:value="12886" calcext:value-type="float">
            <text:p>12886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49143518518519" calcext:value-type="float">
            <text:p>0,00149143518518519000</text:p>
          </table:table-cell>
          <table:table-cell table:formula="of:=[.D381]-[.D38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34" office:value-type="float" office:value="12920" calcext:value-type="float">
            <text:p>1292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49537037037037" calcext:value-type="float">
            <text:p>0,00149537037037037000</text:p>
          </table:table-cell>
          <table:table-cell table:formula="of:=[.D382]-[.D38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34" office:value-type="float" office:value="12954" calcext:value-type="float">
            <text:p>12954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49930555555556" calcext:value-type="float">
            <text:p>0,00149930555555556000</text:p>
          </table:table-cell>
          <table:table-cell table:formula="of:=[.D383]-[.D38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34" office:value-type="float" office:value="12988" calcext:value-type="float">
            <text:p>12988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50324074074074" calcext:value-type="float">
            <text:p>0,00150324074074074000</text:p>
          </table:table-cell>
          <table:table-cell table:formula="of:=[.D384]-[.D38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34" office:value-type="float" office:value="13022" calcext:value-type="float">
            <text:p>13022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50717592592593" calcext:value-type="float">
            <text:p>0,00150717592592593000</text:p>
          </table:table-cell>
          <table:table-cell table:formula="of:=[.D385]-[.D38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34" office:value-type="float" office:value="13056" calcext:value-type="float">
            <text:p>13056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51111111111111" calcext:value-type="float">
            <text:p>0,00151111111111111000</text:p>
          </table:table-cell>
          <table:table-cell table:formula="of:=[.D386]-[.D38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34" office:value-type="float" office:value="13090" calcext:value-type="float">
            <text:p>1309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5150462962963" calcext:value-type="float">
            <text:p>0,00151504629629630000</text:p>
          </table:table-cell>
          <table:table-cell table:formula="of:=[.D387]-[.D38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34" office:value-type="float" office:value="13124" calcext:value-type="float">
            <text:p>13124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51898148148148" calcext:value-type="float">
            <text:p>0,00151898148148148000</text:p>
          </table:table-cell>
          <table:table-cell table:formula="of:=[.D388]-[.D38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34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52291666666667" calcext:value-type="float">
            <text:p>0,00152291666666667000</text:p>
          </table:table-cell>
          <table:table-cell table:formula="of:=[.D389]-[.D38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34" office:value-type="float" office:value="13192" calcext:value-type="float">
            <text:p>13192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52685185185185" calcext:value-type="float">
            <text:p>0,00152685185185185000</text:p>
          </table:table-cell>
          <table:table-cell table:formula="of:=[.D390]-[.D38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34" office:value-type="float" office:value="13226" calcext:value-type="float">
            <text:p>13226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53078703703704" calcext:value-type="float">
            <text:p>0,00153078703703704000</text:p>
          </table:table-cell>
          <table:table-cell table:formula="of:=[.D391]-[.D39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34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53472222222222" calcext:value-type="float">
            <text:p>0,00153472222222222000</text:p>
          </table:table-cell>
          <table:table-cell table:formula="of:=[.D392]-[.D39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34" office:value-type="float" office:value="13294" calcext:value-type="float">
            <text:p>13294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53865740740741" calcext:value-type="float">
            <text:p>0,00153865740740741000</text:p>
          </table:table-cell>
          <table:table-cell table:formula="of:=[.D393]-[.D39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34" office:value-type="float" office:value="13328" calcext:value-type="float">
            <text:p>13328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54259259259259" calcext:value-type="float">
            <text:p>0,00154259259259259000</text:p>
          </table:table-cell>
          <table:table-cell table:formula="of:=[.D394]-[.D39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34" office:value-type="float" office:value="13362" calcext:value-type="float">
            <text:p>13362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54652777777778" calcext:value-type="float">
            <text:p>0,00154652777777778000</text:p>
          </table:table-cell>
          <table:table-cell table:formula="of:=[.D395]-[.D39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34" office:value-type="float" office:value="13396" calcext:value-type="float">
            <text:p>13396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55046296296296" calcext:value-type="float">
            <text:p>0,00155046296296296000</text:p>
          </table:table-cell>
          <table:table-cell table:formula="of:=[.D396]-[.D39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34" office:value-type="float" office:value="13430" calcext:value-type="float">
            <text:p>1343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55439814814815" calcext:value-type="float">
            <text:p>0,00155439814814815000</text:p>
          </table:table-cell>
          <table:table-cell table:formula="of:=[.D397]-[.D39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34" office:value-type="float" office:value="13464" calcext:value-type="float">
            <text:p>13464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55833333333333" calcext:value-type="float">
            <text:p>0,00155833333333333000</text:p>
          </table:table-cell>
          <table:table-cell table:formula="of:=[.D398]-[.D39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34" office:value-type="float" office:value="13498" calcext:value-type="float">
            <text:p>13498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56226851851852" calcext:value-type="float">
            <text:p>0,00156226851851852000</text:p>
          </table:table-cell>
          <table:table-cell table:formula="of:=[.D399]-[.D39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34" office:value-type="float" office:value="13532" calcext:value-type="float">
            <text:p>13532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5662037037037" calcext:value-type="float">
            <text:p>0,00156620370370370000</text:p>
          </table:table-cell>
          <table:table-cell table:formula="of:=[.D400]-[.D39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34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57013888888889" calcext:value-type="float">
            <text:p>0,00157013888888889000</text:p>
          </table:table-cell>
          <table:table-cell table:formula="of:=[.D401]-[.D40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34" office:value-type="float" office:value="13600" calcext:value-type="float">
            <text:p>136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57407407407407" calcext:value-type="float">
            <text:p>0,00157407407407407000</text:p>
          </table:table-cell>
          <table:table-cell table:formula="of:=[.D402]-[.D40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34" office:value-type="float" office:value="13634" calcext:value-type="float">
            <text:p>13634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57800925925926" calcext:value-type="float">
            <text:p>0,00157800925925926000</text:p>
          </table:table-cell>
          <table:table-cell table:formula="of:=[.D403]-[.D40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34" office:value-type="float" office:value="13668" calcext:value-type="float">
            <text:p>13668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58194444444444" calcext:value-type="float">
            <text:p>0,00158194444444444000</text:p>
          </table:table-cell>
          <table:table-cell table:formula="of:=[.D404]-[.D40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34" office:value-type="float" office:value="13702" calcext:value-type="float">
            <text:p>13702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58587962962963" calcext:value-type="float">
            <text:p>0,00158587962962963000</text:p>
          </table:table-cell>
          <table:table-cell table:formula="of:=[.D405]-[.D40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34" office:value-type="float" office:value="13736" calcext:value-type="float">
            <text:p>13736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58981481481481" calcext:value-type="float">
            <text:p>0,00158981481481481000</text:p>
          </table:table-cell>
          <table:table-cell table:formula="of:=[.D406]-[.D40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34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59375" calcext:value-type="float">
            <text:p>0,00159375000000000000</text:p>
          </table:table-cell>
          <table:table-cell table:formula="of:=[.D407]-[.D40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34" office:value-type="float" office:value="13804" calcext:value-type="float">
            <text:p>13804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59768518518519" calcext:value-type="float">
            <text:p>0,00159768518518519000</text:p>
          </table:table-cell>
          <table:table-cell table:formula="of:=[.D408]-[.D40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34" office:value-type="float" office:value="13838" calcext:value-type="float">
            <text:p>13838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60162037037037" calcext:value-type="float">
            <text:p>0,00160162037037037000</text:p>
          </table:table-cell>
          <table:table-cell table:formula="of:=[.D409]-[.D40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34" office:value-type="float" office:value="13872" calcext:value-type="float">
            <text:p>13872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60555555555556" calcext:value-type="float">
            <text:p>0,00160555555555556000</text:p>
          </table:table-cell>
          <table:table-cell table:formula="of:=[.D410]-[.D40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34" office:value-type="float" office:value="13906" calcext:value-type="float">
            <text:p>13906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60949074074074" calcext:value-type="float">
            <text:p>0,00160949074074074000</text:p>
          </table:table-cell>
          <table:table-cell table:formula="of:=[.D411]-[.D41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34" office:value-type="float" office:value="13940" calcext:value-type="float">
            <text:p>1394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61342592592593" calcext:value-type="float">
            <text:p>0,00161342592592593000</text:p>
          </table:table-cell>
          <table:table-cell table:formula="of:=[.D412]-[.D41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34" office:value-type="float" office:value="13974" calcext:value-type="float">
            <text:p>13974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61736111111111" calcext:value-type="float">
            <text:p>0,00161736111111111000</text:p>
          </table:table-cell>
          <table:table-cell table:formula="of:=[.D413]-[.D41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34" office:value-type="float" office:value="14008" calcext:value-type="float">
            <text:p>14008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6212962962963" calcext:value-type="float">
            <text:p>0,00162129629629630000</text:p>
          </table:table-cell>
          <table:table-cell table:formula="of:=[.D414]-[.D41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34" office:value-type="float" office:value="14042" calcext:value-type="float">
            <text:p>14042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62523148148148" calcext:value-type="float">
            <text:p>0,00162523148148148000</text:p>
          </table:table-cell>
          <table:table-cell table:formula="of:=[.D415]-[.D41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34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62916666666667" calcext:value-type="float">
            <text:p>0,00162916666666667000</text:p>
          </table:table-cell>
          <table:table-cell table:formula="of:=[.D416]-[.D41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34" office:value-type="float" office:value="14110" calcext:value-type="float">
            <text:p>1411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63310185185185" calcext:value-type="float">
            <text:p>0,00163310185185185000</text:p>
          </table:table-cell>
          <table:table-cell table:formula="of:=[.D417]-[.D41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34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63703703703704" calcext:value-type="float">
            <text:p>0,00163703703703704000</text:p>
          </table:table-cell>
          <table:table-cell table:formula="of:=[.D418]-[.D41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34" office:value-type="float" office:value="14178" calcext:value-type="float">
            <text:p>14178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64097222222222" calcext:value-type="float">
            <text:p>0,00164097222222222000</text:p>
          </table:table-cell>
          <table:table-cell table:formula="of:=[.D419]-[.D41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34" office:value-type="float" office:value="14212" calcext:value-type="float">
            <text:p>14212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64490740740741" calcext:value-type="float">
            <text:p>0,00164490740740741000</text:p>
          </table:table-cell>
          <table:table-cell table:formula="of:=[.D420]-[.D41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34" office:value-type="float" office:value="14246" calcext:value-type="float">
            <text:p>14246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64884259259259" calcext:value-type="float">
            <text:p>0,00164884259259259000</text:p>
          </table:table-cell>
          <table:table-cell table:formula="of:=[.D421]-[.D42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34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65277777777778" calcext:value-type="float">
            <text:p>0,00165277777777778000</text:p>
          </table:table-cell>
          <table:table-cell table:formula="of:=[.D422]-[.D42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34" office:value-type="float" office:value="14314" calcext:value-type="float">
            <text:p>14314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65671296296296" calcext:value-type="float">
            <text:p>0,00165671296296296000</text:p>
          </table:table-cell>
          <table:table-cell table:formula="of:=[.D423]-[.D42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34" office:value-type="float" office:value="14348" calcext:value-type="float">
            <text:p>14348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66064814814815" calcext:value-type="float">
            <text:p>0,00166064814814815000</text:p>
          </table:table-cell>
          <table:table-cell table:formula="of:=[.D424]-[.D42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34" office:value-type="float" office:value="14382" calcext:value-type="float">
            <text:p>14382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66458333333333" calcext:value-type="float">
            <text:p>0,00166458333333333000</text:p>
          </table:table-cell>
          <table:table-cell table:formula="of:=[.D425]-[.D42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34" office:value-type="float" office:value="14416" calcext:value-type="float">
            <text:p>14416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66851851851852" calcext:value-type="float">
            <text:p>0,00166851851851852000</text:p>
          </table:table-cell>
          <table:table-cell table:formula="of:=[.D426]-[.D42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34" office:value-type="float" office:value="14450" calcext:value-type="float">
            <text:p>1445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6724537037037" calcext:value-type="float">
            <text:p>0,00167245370370370000</text:p>
          </table:table-cell>
          <table:table-cell table:formula="of:=[.D427]-[.D42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34" office:value-type="float" office:value="14484" calcext:value-type="float">
            <text:p>14484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67638888888889" calcext:value-type="float">
            <text:p>0,00167638888888889000</text:p>
          </table:table-cell>
          <table:table-cell table:formula="of:=[.D428]-[.D42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34" office:value-type="float" office:value="14518" calcext:value-type="float">
            <text:p>14518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68032407407407" calcext:value-type="float">
            <text:p>0,00168032407407407000</text:p>
          </table:table-cell>
          <table:table-cell table:formula="of:=[.D429]-[.D42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34" office:value-type="float" office:value="14552" calcext:value-type="float">
            <text:p>14552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68425925925926" calcext:value-type="float">
            <text:p>0,00168425925925926000</text:p>
          </table:table-cell>
          <table:table-cell table:formula="of:=[.D430]-[.D42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34" office:value-type="float" office:value="14586" calcext:value-type="float">
            <text:p>14586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68819444444444" calcext:value-type="float">
            <text:p>0,00168819444444444000</text:p>
          </table:table-cell>
          <table:table-cell table:formula="of:=[.D431]-[.D43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34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69212962962963" calcext:value-type="float">
            <text:p>0,00169212962962963000</text:p>
          </table:table-cell>
          <table:table-cell table:formula="of:=[.D432]-[.D43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34" office:value-type="float" office:value="14654" calcext:value-type="float">
            <text:p>14654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69606481481481" calcext:value-type="float">
            <text:p>0,00169606481481481000</text:p>
          </table:table-cell>
          <table:table-cell table:formula="of:=[.D433]-[.D43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34" office:value-type="float" office:value="14688" calcext:value-type="float">
            <text:p>14688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7" calcext:value-type="float">
            <text:p>0,00170000000000000000</text:p>
          </table:table-cell>
          <table:table-cell table:formula="of:=[.D434]-[.D43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34" office:value-type="float" office:value="14722" calcext:value-type="float">
            <text:p>14722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70393518518519" calcext:value-type="float">
            <text:p>0,00170393518518519000</text:p>
          </table:table-cell>
          <table:table-cell table:formula="of:=[.D435]-[.D43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34" office:value-type="float" office:value="14756" calcext:value-type="float">
            <text:p>14756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70787037037037" calcext:value-type="float">
            <text:p>0,00170787037037037000</text:p>
          </table:table-cell>
          <table:table-cell table:formula="of:=[.D436]-[.D43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34" office:value-type="float" office:value="14790" calcext:value-type="float">
            <text:p>1479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71180555555556" calcext:value-type="float">
            <text:p>0,00171180555555556000</text:p>
          </table:table-cell>
          <table:table-cell table:formula="of:=[.D437]-[.D43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34" office:value-type="float" office:value="14824" calcext:value-type="float">
            <text:p>14824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71574074074074" calcext:value-type="float">
            <text:p>0,00171574074074074000</text:p>
          </table:table-cell>
          <table:table-cell table:formula="of:=[.D438]-[.D43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34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71967592592593" calcext:value-type="float">
            <text:p>0,00171967592592593000</text:p>
          </table:table-cell>
          <table:table-cell table:formula="of:=[.D439]-[.D43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34" office:value-type="float" office:value="14892" calcext:value-type="float">
            <text:p>14892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72361111111111" calcext:value-type="float">
            <text:p>0,00172361111111111000</text:p>
          </table:table-cell>
          <table:table-cell table:formula="of:=[.D440]-[.D43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34" office:value-type="float" office:value="14926" calcext:value-type="float">
            <text:p>14926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7275462962963" calcext:value-type="float">
            <text:p>0,00172754629629630000</text:p>
          </table:table-cell>
          <table:table-cell table:formula="of:=[.D441]-[.D44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34" office:value-type="float" office:value="14960" calcext:value-type="float">
            <text:p>1496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73148148148148" calcext:value-type="float">
            <text:p>0,00173148148148148000</text:p>
          </table:table-cell>
          <table:table-cell table:formula="of:=[.D442]-[.D44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34" office:value-type="float" office:value="14994" calcext:value-type="float">
            <text:p>14994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73541666666667" calcext:value-type="float">
            <text:p>0,00173541666666667000</text:p>
          </table:table-cell>
          <table:table-cell table:formula="of:=[.D443]-[.D44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34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73935185185185" calcext:value-type="float">
            <text:p>0,00173935185185185000</text:p>
          </table:table-cell>
          <table:table-cell table:formula="of:=[.D444]-[.D44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34" office:value-type="float" office:value="15062" calcext:value-type="float">
            <text:p>15062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74328703703704" calcext:value-type="float">
            <text:p>0,00174328703703704000</text:p>
          </table:table-cell>
          <table:table-cell table:formula="of:=[.D445]-[.D44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34" office:value-type="float" office:value="15096" calcext:value-type="float">
            <text:p>15096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74722222222222" calcext:value-type="float">
            <text:p>0,00174722222222222000</text:p>
          </table:table-cell>
          <table:table-cell table:formula="of:=[.D446]-[.D44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34" office:value-type="float" office:value="15130" calcext:value-type="float">
            <text:p>1513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75115740740741" calcext:value-type="float">
            <text:p>0,00175115740740741000</text:p>
          </table:table-cell>
          <table:table-cell table:formula="of:=[.D447]-[.D44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34" office:value-type="float" office:value="15164" calcext:value-type="float">
            <text:p>15164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75509259259259" calcext:value-type="float">
            <text:p>0,00175509259259259000</text:p>
          </table:table-cell>
          <table:table-cell table:formula="of:=[.D448]-[.D44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34" office:value-type="float" office:value="15198" calcext:value-type="float">
            <text:p>15198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75902777777778" calcext:value-type="float">
            <text:p>0,00175902777777778000</text:p>
          </table:table-cell>
          <table:table-cell table:formula="of:=[.D449]-[.D44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34" office:value-type="float" office:value="15232" calcext:value-type="float">
            <text:p>15232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76296296296296" calcext:value-type="float">
            <text:p>0,00176296296296296000</text:p>
          </table:table-cell>
          <table:table-cell table:formula="of:=[.D450]-[.D44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34" office:value-type="float" office:value="15266" calcext:value-type="float">
            <text:p>15266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76689814814815" calcext:value-type="float">
            <text:p>0,00176689814814815000</text:p>
          </table:table-cell>
          <table:table-cell table:formula="of:=[.D451]-[.D45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34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77083333333333" calcext:value-type="float">
            <text:p>0,00177083333333333000</text:p>
          </table:table-cell>
          <table:table-cell table:formula="of:=[.D452]-[.D45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34" office:value-type="float" office:value="15334" calcext:value-type="float">
            <text:p>15334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77476851851852" calcext:value-type="float">
            <text:p>0,00177476851851852000</text:p>
          </table:table-cell>
          <table:table-cell table:formula="of:=[.D453]-[.D45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34" office:value-type="float" office:value="15368" calcext:value-type="float">
            <text:p>15368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7787037037037" calcext:value-type="float">
            <text:p>0,00177870370370370000</text:p>
          </table:table-cell>
          <table:table-cell table:formula="of:=[.D454]-[.D45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34" office:value-type="float" office:value="15402" calcext:value-type="float">
            <text:p>15402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78263888888889" calcext:value-type="float">
            <text:p>0,00178263888888889000</text:p>
          </table:table-cell>
          <table:table-cell table:formula="of:=[.D455]-[.D45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34" office:value-type="float" office:value="15436" calcext:value-type="float">
            <text:p>15436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78657407407407" calcext:value-type="float">
            <text:p>0,00178657407407407000</text:p>
          </table:table-cell>
          <table:table-cell table:formula="of:=[.D456]-[.D45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34" office:value-type="float" office:value="15470" calcext:value-type="float">
            <text:p>1547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79050925925926" calcext:value-type="float">
            <text:p>0,00179050925925926000</text:p>
          </table:table-cell>
          <table:table-cell table:formula="of:=[.D457]-[.D45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34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79444444444444" calcext:value-type="float">
            <text:p>0,00179444444444444000</text:p>
          </table:table-cell>
          <table:table-cell table:formula="of:=[.D458]-[.D45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34" office:value-type="float" office:value="15538" calcext:value-type="float">
            <text:p>15538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79837962962963" calcext:value-type="float">
            <text:p>0,00179837962962963000</text:p>
          </table:table-cell>
          <table:table-cell table:formula="of:=[.D459]-[.D45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34" office:value-type="float" office:value="15572" calcext:value-type="float">
            <text:p>15572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80231481481481" calcext:value-type="float">
            <text:p>0,00180231481481481000</text:p>
          </table:table-cell>
          <table:table-cell table:formula="of:=[.D460]-[.D45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34" office:value-type="float" office:value="15606" calcext:value-type="float">
            <text:p>15606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80625" calcext:value-type="float">
            <text:p>0,00180625000000000000</text:p>
          </table:table-cell>
          <table:table-cell table:formula="of:=[.D461]-[.D46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34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81018518518519" calcext:value-type="float">
            <text:p>0,00181018518518519000</text:p>
          </table:table-cell>
          <table:table-cell table:formula="of:=[.D462]-[.D46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34" office:value-type="float" office:value="15674" calcext:value-type="float">
            <text:p>15674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81412037037037" calcext:value-type="float">
            <text:p>0,00181412037037037000</text:p>
          </table:table-cell>
          <table:table-cell table:formula="of:=[.D463]-[.D46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34" office:value-type="float" office:value="15708" calcext:value-type="float">
            <text:p>15708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81805555555556" calcext:value-type="float">
            <text:p>0,00181805555555556000</text:p>
          </table:table-cell>
          <table:table-cell table:formula="of:=[.D464]-[.D46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34" office:value-type="float" office:value="15742" calcext:value-type="float">
            <text:p>15742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82199074074074" calcext:value-type="float">
            <text:p>0,00182199074074074000</text:p>
          </table:table-cell>
          <table:table-cell table:formula="of:=[.D465]-[.D46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34" office:value-type="float" office:value="15776" calcext:value-type="float">
            <text:p>15776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82592592592593" calcext:value-type="float">
            <text:p>0,00182592592592593000</text:p>
          </table:table-cell>
          <table:table-cell table:formula="of:=[.D466]-[.D46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34" office:value-type="float" office:value="15810" calcext:value-type="float">
            <text:p>15810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82986111111111" calcext:value-type="float">
            <text:p>0,00182986111111111000</text:p>
          </table:table-cell>
          <table:table-cell table:formula="of:=[.D467]-[.D46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34" office:value-type="float" office:value="15844" calcext:value-type="float">
            <text:p>15844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8337962962963" calcext:value-type="float">
            <text:p>0,00183379629629630000</text:p>
          </table:table-cell>
          <table:table-cell table:formula="of:=[.D468]-[.D46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34" office:value-type="float" office:value="15878" calcext:value-type="float">
            <text:p>15878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83773148148148" calcext:value-type="float">
            <text:p>0,00183773148148148000</text:p>
          </table:table-cell>
          <table:table-cell table:formula="of:=[.D469]-[.D46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34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84166666666667" calcext:value-type="float">
            <text:p>0,00184166666666667000</text:p>
          </table:table-cell>
          <table:table-cell table:formula="of:=[.D470]-[.D46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34" office:value-type="float" office:value="15946" calcext:value-type="float">
            <text:p>15946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84560185185185" calcext:value-type="float">
            <text:p>0,00184560185185185000</text:p>
          </table:table-cell>
          <table:table-cell table:formula="of:=[.D471]-[.D47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34" office:value-type="float" office:value="15980" calcext:value-type="float">
            <text:p>1598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84953703703704" calcext:value-type="float">
            <text:p>0,00184953703703704000</text:p>
          </table:table-cell>
          <table:table-cell table:formula="of:=[.D472]-[.D47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34" office:value-type="float" office:value="16014" calcext:value-type="float">
            <text:p>16014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85347222222222" calcext:value-type="float">
            <text:p>0,00185347222222222000</text:p>
          </table:table-cell>
          <table:table-cell table:formula="of:=[.D473]-[.D47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34" office:value-type="float" office:value="16048" calcext:value-type="float">
            <text:p>16048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85740740740741" calcext:value-type="float">
            <text:p>0,00185740740740741000</text:p>
          </table:table-cell>
          <table:table-cell table:formula="of:=[.D474]-[.D47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34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86134259259259" calcext:value-type="float">
            <text:p>0,00186134259259259000</text:p>
          </table:table-cell>
          <table:table-cell table:formula="of:=[.D475]-[.D47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34" office:value-type="float" office:value="16116" calcext:value-type="float">
            <text:p>16116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86527777777778" calcext:value-type="float">
            <text:p>0,00186527777777778000</text:p>
          </table:table-cell>
          <table:table-cell table:formula="of:=[.D476]-[.D47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34" office:value-type="float" office:value="16150" calcext:value-type="float">
            <text:p>16150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86921296296296" calcext:value-type="float">
            <text:p>0,00186921296296296000</text:p>
          </table:table-cell>
          <table:table-cell table:formula="of:=[.D477]-[.D47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34" office:value-type="float" office:value="16184" calcext:value-type="float">
            <text:p>16184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87314814814815" calcext:value-type="float">
            <text:p>0,00187314814814815000</text:p>
          </table:table-cell>
          <table:table-cell table:formula="of:=[.D478]-[.D47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34" office:value-type="float" office:value="16218" calcext:value-type="float">
            <text:p>16218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87708333333333" calcext:value-type="float">
            <text:p>0,00187708333333333000</text:p>
          </table:table-cell>
          <table:table-cell table:formula="of:=[.D479]-[.D478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34" office:value-type="float" office:value="16252" calcext:value-type="float">
            <text:p>16252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88101851851852" calcext:value-type="float">
            <text:p>0,00188101851851852000</text:p>
          </table:table-cell>
          <table:table-cell table:formula="of:=[.D480]-[.D47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34" office:value-type="float" office:value="16286" calcext:value-type="float">
            <text:p>16286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8849537037037" calcext:value-type="float">
            <text:p>0,00188495370370370000</text:p>
          </table:table-cell>
          <table:table-cell table:formula="of:=[.D481]-[.D48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34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88888888888889" calcext:value-type="float">
            <text:p>0,00188888888888889000</text:p>
          </table:table-cell>
          <table:table-cell table:formula="of:=[.D482]-[.D48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34" office:value-type="float" office:value="16354" calcext:value-type="float">
            <text:p>16354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89282407407407" calcext:value-type="float">
            <text:p>0,00189282407407407000</text:p>
          </table:table-cell>
          <table:table-cell table:formula="of:=[.D483]-[.D48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34" office:value-type="float" office:value="16388" calcext:value-type="float">
            <text:p>16388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89675925925926" calcext:value-type="float">
            <text:p>0,00189675925925926000</text:p>
          </table:table-cell>
          <table:table-cell table:formula="of:=[.D484]-[.D48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34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90069444444444" calcext:value-type="float">
            <text:p>0,00190069444444444000</text:p>
          </table:table-cell>
          <table:table-cell table:formula="of:=[.D485]-[.D48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34" office:value-type="float" office:value="16456" calcext:value-type="float">
            <text:p>16456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90462962962963" calcext:value-type="float">
            <text:p>0,00190462962962963000</text:p>
          </table:table-cell>
          <table:table-cell table:formula="of:=[.D486]-[.D48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34" office:value-type="float" office:value="16490" calcext:value-type="float">
            <text:p>16490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90856481481481" calcext:value-type="float">
            <text:p>0,00190856481481481000</text:p>
          </table:table-cell>
          <table:table-cell table:formula="of:=[.D487]-[.D48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34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9125" calcext:value-type="float">
            <text:p>0,00191250000000000000</text:p>
          </table:table-cell>
          <table:table-cell table:formula="of:=[.D488]-[.D487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34" office:value-type="float" office:value="16558" calcext:value-type="float">
            <text:p>16558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91643518518519" calcext:value-type="float">
            <text:p>0,00191643518518518000</text:p>
          </table:table-cell>
          <table:table-cell table:formula="of:=[.D489]-[.D48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34" office:value-type="float" office:value="16592" calcext:value-type="float">
            <text:p>16592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92037037037037" calcext:value-type="float">
            <text:p>0,00192037037037037000</text:p>
          </table:table-cell>
          <table:table-cell table:formula="of:=[.D490]-[.D489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34" office:value-type="float" office:value="16626" calcext:value-type="float">
            <text:p>16626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92430555555556" calcext:value-type="float">
            <text:p>0,00192430555555556000</text:p>
          </table:table-cell>
          <table:table-cell table:formula="of:=[.D491]-[.D490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34" office:value-type="float" office:value="16660" calcext:value-type="float">
            <text:p>1666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92824074074074" calcext:value-type="float">
            <text:p>0,00192824074074074000</text:p>
          </table:table-cell>
          <table:table-cell table:formula="of:=[.D492]-[.D491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34" office:value-type="float" office:value="16694" calcext:value-type="float">
            <text:p>16694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93217592592593" calcext:value-type="float">
            <text:p>0,00193217592592593000</text:p>
          </table:table-cell>
          <table:table-cell table:formula="of:=[.D493]-[.D492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34" office:value-type="float" office:value="16728" calcext:value-type="float">
            <text:p>16728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93611111111111" calcext:value-type="float">
            <text:p>0,00193611111111111000</text:p>
          </table:table-cell>
          <table:table-cell table:formula="of:=[.D494]-[.D493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34" office:value-type="float" office:value="16762" calcext:value-type="float">
            <text:p>16762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9400462962963" calcext:value-type="float">
            <text:p>0,00194004629629630000</text:p>
          </table:table-cell>
          <table:table-cell table:formula="of:=[.D495]-[.D494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34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94398148148148" calcext:value-type="float">
            <text:p>0,00194398148148148000</text:p>
          </table:table-cell>
          <table:table-cell table:formula="of:=[.D496]-[.D495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34" office:value-type="float" office:value="16830" calcext:value-type="float">
            <text:p>16830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94791666666667" calcext:value-type="float">
            <text:p>0,00194791666666667000</text:p>
          </table:table-cell>
          <table:table-cell table:formula="of:=[.D497]-[.D496]" office:value-type="float" office:value="0.00000393518518518516" calcext:value-type="float">
            <text:p>0,000003935185185185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34" office:value-type="float" office:value="16864" calcext:value-type="float">
            <text:p>16864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95185185185185" calcext:value-type="float">
            <text:p>0,00195185185185185000</text:p>
          </table:table-cell>
          <table:table-cell table:formula="of:=[.D498]-[.D49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34" office:value-type="float" office:value="16898" calcext:value-type="float">
            <text:p>16898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95578703703704" calcext:value-type="float">
            <text:p>0,00195578703703704000</text:p>
          </table:table-cell>
          <table:table-cell table:formula="of:=[.D499]-[.D49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34" office:value-type="float" office:value="16932" calcext:value-type="float">
            <text:p>16932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95972222222222" calcext:value-type="float">
            <text:p>0,00195972222222222000</text:p>
          </table:table-cell>
          <table:table-cell table:formula="of:=[.D500]-[.D49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34" office:value-type="float" office:value="16966" calcext:value-type="float">
            <text:p>16966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96365740740741" calcext:value-type="float">
            <text:p>0,00196365740740741000</text:p>
          </table:table-cell>
          <table:table-cell table:formula="of:=[.D501]-[.D50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34" office:value-type="float" office:value="17000" calcext:value-type="float">
            <text:p>170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96759259259259" calcext:value-type="float">
            <text:p>0,00196759259259259000</text:p>
          </table:table-cell>
          <table:table-cell table:formula="of:=[.D502]-[.D50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34" office:value-type="float" office:value="17034" calcext:value-type="float">
            <text:p>17034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97152777777778" calcext:value-type="float">
            <text:p>0,00197152777777778000</text:p>
          </table:table-cell>
          <table:table-cell table:formula="of:=[.D503]-[.D50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34" office:value-type="float" office:value="17068" calcext:value-type="float">
            <text:p>17068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97546296296296" calcext:value-type="float">
            <text:p>0,00197546296296296000</text:p>
          </table:table-cell>
          <table:table-cell table:formula="of:=[.D504]-[.D50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34" office:value-type="float" office:value="17102" calcext:value-type="float">
            <text:p>17102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97939814814815" calcext:value-type="float">
            <text:p>0,00197939814814815000</text:p>
          </table:table-cell>
          <table:table-cell table:formula="of:=[.D505]-[.D50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34" office:value-type="float" office:value="17136" calcext:value-type="float">
            <text:p>17136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98333333333333" calcext:value-type="float">
            <text:p>0,00198333333333333000</text:p>
          </table:table-cell>
          <table:table-cell table:formula="of:=[.D506]-[.D50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34" office:value-type="float" office:value="17170" calcext:value-type="float">
            <text:p>17170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98726851851852" calcext:value-type="float">
            <text:p>0,00198726851851852000</text:p>
          </table:table-cell>
          <table:table-cell table:formula="of:=[.D507]-[.D50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34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9912037037037" calcext:value-type="float">
            <text:p>0,00199120370370370000</text:p>
          </table:table-cell>
          <table:table-cell table:formula="of:=[.D508]-[.D50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34" office:value-type="float" office:value="17238" calcext:value-type="float">
            <text:p>17238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99513888888889" calcext:value-type="float">
            <text:p>0,00199513888888889000</text:p>
          </table:table-cell>
          <table:table-cell table:formula="of:=[.D509]-[.D50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34" office:value-type="float" office:value="17272" calcext:value-type="float">
            <text:p>17272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99907407407407" calcext:value-type="float">
            <text:p>0,00199907407407407000</text:p>
          </table:table-cell>
          <table:table-cell table:formula="of:=[.D510]-[.D50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34" office:value-type="float" office:value="17306" calcext:value-type="float">
            <text:p>17306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200300925925926" calcext:value-type="float">
            <text:p>0,00200300925925926000</text:p>
          </table:table-cell>
          <table:table-cell table:formula="of:=[.D511]-[.D51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34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200694444444444" calcext:value-type="float">
            <text:p>0,00200694444444444000</text:p>
          </table:table-cell>
          <table:table-cell table:formula="of:=[.D512]-[.D51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34" office:value-type="float" office:value="17374" calcext:value-type="float">
            <text:p>17374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201087962962963" calcext:value-type="float">
            <text:p>0,00201087962962963000</text:p>
          </table:table-cell>
          <table:table-cell table:formula="of:=[.D513]-[.D51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34" office:value-type="float" office:value="17408" calcext:value-type="float">
            <text:p>17408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201481481481481" calcext:value-type="float">
            <text:p>0,00201481481481481000</text:p>
          </table:table-cell>
          <table:table-cell table:formula="of:=[.D514]-[.D51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34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201875" calcext:value-type="float">
            <text:p>0,00201875000000000000</text:p>
          </table:table-cell>
          <table:table-cell table:formula="of:=[.D515]-[.D51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34" office:value-type="float" office:value="17476" calcext:value-type="float">
            <text:p>17476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202268518518519" calcext:value-type="float">
            <text:p>0,00202268518518519000</text:p>
          </table:table-cell>
          <table:table-cell table:formula="of:=[.D516]-[.D51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34" office:value-type="float" office:value="17510" calcext:value-type="float">
            <text:p>17510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202662037037037" calcext:value-type="float">
            <text:p>0,00202662037037037000</text:p>
          </table:table-cell>
          <table:table-cell table:formula="of:=[.D517]-[.D51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34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203055555555556" calcext:value-type="float">
            <text:p>0,00203055555555556000</text:p>
          </table:table-cell>
          <table:table-cell table:formula="of:=[.D518]-[.D51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34" office:value-type="float" office:value="17578" calcext:value-type="float">
            <text:p>17578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203449074074074" calcext:value-type="float">
            <text:p>0,00203449074074074000</text:p>
          </table:table-cell>
          <table:table-cell table:formula="of:=[.D519]-[.D51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34" office:value-type="float" office:value="17612" calcext:value-type="float">
            <text:p>17612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203842592592593" calcext:value-type="float">
            <text:p>0,00203842592592593000</text:p>
          </table:table-cell>
          <table:table-cell table:formula="of:=[.D520]-[.D51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34" office:value-type="float" office:value="17646" calcext:value-type="float">
            <text:p>17646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204236111111111" calcext:value-type="float">
            <text:p>0,00204236111111111000</text:p>
          </table:table-cell>
          <table:table-cell table:formula="of:=[.D521]-[.D52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34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20462962962963" calcext:value-type="float">
            <text:p>0,00204629629629630000</text:p>
          </table:table-cell>
          <table:table-cell table:formula="of:=[.D522]-[.D52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34" office:value-type="float" office:value="17714" calcext:value-type="float">
            <text:p>17714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205023148148148" calcext:value-type="float">
            <text:p>0,00205023148148148000</text:p>
          </table:table-cell>
          <table:table-cell table:formula="of:=[.D523]-[.D52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34" office:value-type="float" office:value="17748" calcext:value-type="float">
            <text:p>17748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205416666666667" calcext:value-type="float">
            <text:p>0,00205416666666667000</text:p>
          </table:table-cell>
          <table:table-cell table:formula="of:=[.D524]-[.D52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34" office:value-type="float" office:value="17782" calcext:value-type="float">
            <text:p>17782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205810185185185" calcext:value-type="float">
            <text:p>0,00205810185185185000</text:p>
          </table:table-cell>
          <table:table-cell table:formula="of:=[.D525]-[.D52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34" office:value-type="float" office:value="17816" calcext:value-type="float">
            <text:p>17816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206203703703704" calcext:value-type="float">
            <text:p>0,00206203703703704000</text:p>
          </table:table-cell>
          <table:table-cell table:formula="of:=[.D526]-[.D52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34" office:value-type="float" office:value="17850" calcext:value-type="float">
            <text:p>17850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206597222222222" calcext:value-type="float">
            <text:p>0,00206597222222222000</text:p>
          </table:table-cell>
          <table:table-cell table:formula="of:=[.D527]-[.D52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34" office:value-type="float" office:value="17884" calcext:value-type="float">
            <text:p>17884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206990740740741" calcext:value-type="float">
            <text:p>0,00206990740740741000</text:p>
          </table:table-cell>
          <table:table-cell table:formula="of:=[.D528]-[.D52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34" office:value-type="float" office:value="17918" calcext:value-type="float">
            <text:p>17918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207384259259259" calcext:value-type="float">
            <text:p>0,00207384259259259000</text:p>
          </table:table-cell>
          <table:table-cell table:formula="of:=[.D529]-[.D52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34" office:value-type="float" office:value="17952" calcext:value-type="float">
            <text:p>17952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207777777777778" calcext:value-type="float">
            <text:p>0,00207777777777778000</text:p>
          </table:table-cell>
          <table:table-cell table:formula="of:=[.D530]-[.D52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34" office:value-type="float" office:value="17986" calcext:value-type="float">
            <text:p>17986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208171296296296" calcext:value-type="float">
            <text:p>0,00208171296296296000</text:p>
          </table:table-cell>
          <table:table-cell table:formula="of:=[.D531]-[.D53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34" office:value-type="float" office:value="18020" calcext:value-type="float">
            <text:p>1802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208564814814815" calcext:value-type="float">
            <text:p>0,00208564814814815000</text:p>
          </table:table-cell>
          <table:table-cell table:formula="of:=[.D532]-[.D53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34" office:value-type="float" office:value="18054" calcext:value-type="float">
            <text:p>18054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208958333333333" calcext:value-type="float">
            <text:p>0,00208958333333333000</text:p>
          </table:table-cell>
          <table:table-cell table:formula="of:=[.D533]-[.D53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34" office:value-type="float" office:value="18088" calcext:value-type="float">
            <text:p>18088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209351851851852" calcext:value-type="float">
            <text:p>0,00209351851851852000</text:p>
          </table:table-cell>
          <table:table-cell table:formula="of:=[.D534]-[.D53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34" office:value-type="float" office:value="18122" calcext:value-type="float">
            <text:p>18122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20974537037037" calcext:value-type="float">
            <text:p>0,00209745370370370000</text:p>
          </table:table-cell>
          <table:table-cell table:formula="of:=[.D535]-[.D53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34" office:value-type="float" office:value="18156" calcext:value-type="float">
            <text:p>18156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210138888888889" calcext:value-type="float">
            <text:p>0,00210138888888889000</text:p>
          </table:table-cell>
          <table:table-cell table:formula="of:=[.D536]-[.D53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34" office:value-type="float" office:value="18190" calcext:value-type="float">
            <text:p>18190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210532407407407" calcext:value-type="float">
            <text:p>0,00210532407407407000</text:p>
          </table:table-cell>
          <table:table-cell table:formula="of:=[.D537]-[.D53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34" office:value-type="float" office:value="18224" calcext:value-type="float">
            <text:p>18224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210925925925926" calcext:value-type="float">
            <text:p>0,00210925925925926000</text:p>
          </table:table-cell>
          <table:table-cell table:formula="of:=[.D538]-[.D53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34" office:value-type="float" office:value="18258" calcext:value-type="float">
            <text:p>18258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211319444444444" calcext:value-type="float">
            <text:p>0,00211319444444444000</text:p>
          </table:table-cell>
          <table:table-cell table:formula="of:=[.D539]-[.D53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34" office:value-type="float" office:value="18292" calcext:value-type="float">
            <text:p>18292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211712962962963" calcext:value-type="float">
            <text:p>0,00211712962962963000</text:p>
          </table:table-cell>
          <table:table-cell table:formula="of:=[.D540]-[.D53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34" office:value-type="float" office:value="18326" calcext:value-type="float">
            <text:p>18326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212106481481481" calcext:value-type="float">
            <text:p>0,00212106481481481000</text:p>
          </table:table-cell>
          <table:table-cell table:formula="of:=[.D541]-[.D54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34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2125" calcext:value-type="float">
            <text:p>0,00212500000000000000</text:p>
          </table:table-cell>
          <table:table-cell table:formula="of:=[.D542]-[.D54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34" office:value-type="float" office:value="18394" calcext:value-type="float">
            <text:p>18394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212893518518519" calcext:value-type="float">
            <text:p>0,00212893518518519000</text:p>
          </table:table-cell>
          <table:table-cell table:formula="of:=[.D543]-[.D54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34" office:value-type="float" office:value="18428" calcext:value-type="float">
            <text:p>18428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213287037037037" calcext:value-type="float">
            <text:p>0,00213287037037037000</text:p>
          </table:table-cell>
          <table:table-cell table:formula="of:=[.D544]-[.D54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34" office:value-type="float" office:value="18462" calcext:value-type="float">
            <text:p>18462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213680555555556" calcext:value-type="float">
            <text:p>0,00213680555555556000</text:p>
          </table:table-cell>
          <table:table-cell table:formula="of:=[.D545]-[.D54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34" office:value-type="float" office:value="18496" calcext:value-type="float">
            <text:p>18496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214074074074074" calcext:value-type="float">
            <text:p>0,00214074074074074000</text:p>
          </table:table-cell>
          <table:table-cell table:formula="of:=[.D546]-[.D54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34" office:value-type="float" office:value="18530" calcext:value-type="float">
            <text:p>18530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214467592592593" calcext:value-type="float">
            <text:p>0,00214467592592593000</text:p>
          </table:table-cell>
          <table:table-cell table:formula="of:=[.D547]-[.D54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34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214861111111111" calcext:value-type="float">
            <text:p>0,00214861111111111000</text:p>
          </table:table-cell>
          <table:table-cell table:formula="of:=[.D548]-[.D54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34" office:value-type="float" office:value="18598" calcext:value-type="float">
            <text:p>18598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21525462962963" calcext:value-type="float">
            <text:p>0,00215254629629630000</text:p>
          </table:table-cell>
          <table:table-cell table:formula="of:=[.D549]-[.D54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34" office:value-type="float" office:value="18632" calcext:value-type="float">
            <text:p>18632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215648148148148" calcext:value-type="float">
            <text:p>0,00215648148148148000</text:p>
          </table:table-cell>
          <table:table-cell table:formula="of:=[.D550]-[.D54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34" office:value-type="float" office:value="18666" calcext:value-type="float">
            <text:p>18666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216041666666667" calcext:value-type="float">
            <text:p>0,00216041666666667000</text:p>
          </table:table-cell>
          <table:table-cell table:formula="of:=[.D551]-[.D55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34" office:value-type="float" office:value="18700" calcext:value-type="float">
            <text:p>1870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216435185185185" calcext:value-type="float">
            <text:p>0,00216435185185185000</text:p>
          </table:table-cell>
          <table:table-cell table:formula="of:=[.D552]-[.D55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34" office:value-type="float" office:value="18734" calcext:value-type="float">
            <text:p>18734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216828703703704" calcext:value-type="float">
            <text:p>0,00216828703703704000</text:p>
          </table:table-cell>
          <table:table-cell table:formula="of:=[.D553]-[.D55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34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217222222222222" calcext:value-type="float">
            <text:p>0,00217222222222222000</text:p>
          </table:table-cell>
          <table:table-cell table:formula="of:=[.D554]-[.D55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34" office:value-type="float" office:value="18802" calcext:value-type="float">
            <text:p>18802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217615740740741" calcext:value-type="float">
            <text:p>0,00217615740740741000</text:p>
          </table:table-cell>
          <table:table-cell table:formula="of:=[.D555]-[.D55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34" office:value-type="float" office:value="18836" calcext:value-type="float">
            <text:p>18836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218009259259259" calcext:value-type="float">
            <text:p>0,00218009259259259000</text:p>
          </table:table-cell>
          <table:table-cell table:formula="of:=[.D556]-[.D55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34" office:value-type="float" office:value="18870" calcext:value-type="float">
            <text:p>18870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218402777777778" calcext:value-type="float">
            <text:p>0,00218402777777778000</text:p>
          </table:table-cell>
          <table:table-cell table:formula="of:=[.D557]-[.D55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34" office:value-type="float" office:value="18904" calcext:value-type="float">
            <text:p>18904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218796296296296" calcext:value-type="float">
            <text:p>0,00218796296296296000</text:p>
          </table:table-cell>
          <table:table-cell table:formula="of:=[.D558]-[.D55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34" office:value-type="float" office:value="18938" calcext:value-type="float">
            <text:p>18938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219189814814815" calcext:value-type="float">
            <text:p>0,00219189814814815000</text:p>
          </table:table-cell>
          <table:table-cell table:formula="of:=[.D559]-[.D55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34" office:value-type="float" office:value="18972" calcext:value-type="float">
            <text:p>18972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219583333333333" calcext:value-type="float">
            <text:p>0,00219583333333333000</text:p>
          </table:table-cell>
          <table:table-cell table:formula="of:=[.D560]-[.D55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34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219976851851852" calcext:value-type="float">
            <text:p>0,00219976851851852000</text:p>
          </table:table-cell>
          <table:table-cell table:formula="of:=[.D561]-[.D56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34" office:value-type="float" office:value="19040" calcext:value-type="float">
            <text:p>1904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22037037037037" calcext:value-type="float">
            <text:p>0,00220370370370370000</text:p>
          </table:table-cell>
          <table:table-cell table:formula="of:=[.D562]-[.D56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34" office:value-type="float" office:value="19074" calcext:value-type="float">
            <text:p>19074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220763888888889" calcext:value-type="float">
            <text:p>0,00220763888888889000</text:p>
          </table:table-cell>
          <table:table-cell table:formula="of:=[.D563]-[.D56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34" office:value-type="float" office:value="19108" calcext:value-type="float">
            <text:p>19108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221157407407407" calcext:value-type="float">
            <text:p>0,00221157407407407000</text:p>
          </table:table-cell>
          <table:table-cell table:formula="of:=[.D564]-[.D56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34" office:value-type="float" office:value="19142" calcext:value-type="float">
            <text:p>19142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221550925925926" calcext:value-type="float">
            <text:p>0,00221550925925926000</text:p>
          </table:table-cell>
          <table:table-cell table:formula="of:=[.D565]-[.D56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34" office:value-type="float" office:value="19176" calcext:value-type="float">
            <text:p>19176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221944444444444" calcext:value-type="float">
            <text:p>0,00221944444444444000</text:p>
          </table:table-cell>
          <table:table-cell table:formula="of:=[.D566]-[.D56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34" office:value-type="float" office:value="19210" calcext:value-type="float">
            <text:p>19210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222337962962963" calcext:value-type="float">
            <text:p>0,00222337962962963000</text:p>
          </table:table-cell>
          <table:table-cell table:formula="of:=[.D567]-[.D56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34" office:value-type="float" office:value="19244" calcext:value-type="float">
            <text:p>19244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222731481481481" calcext:value-type="float">
            <text:p>0,00222731481481481000</text:p>
          </table:table-cell>
          <table:table-cell table:formula="of:=[.D568]-[.D56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34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223125" calcext:value-type="float">
            <text:p>0,00223125000000000000</text:p>
          </table:table-cell>
          <table:table-cell table:formula="of:=[.D569]-[.D56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34" office:value-type="float" office:value="19312" calcext:value-type="float">
            <text:p>19312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223518518518519" calcext:value-type="float">
            <text:p>0,00223518518518519000</text:p>
          </table:table-cell>
          <table:table-cell table:formula="of:=[.D570]-[.D56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34" office:value-type="float" office:value="19346" calcext:value-type="float">
            <text:p>19346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223912037037037" calcext:value-type="float">
            <text:p>0,00223912037037037000</text:p>
          </table:table-cell>
          <table:table-cell table:formula="of:=[.D571]-[.D57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34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224305555555556" calcext:value-type="float">
            <text:p>0,00224305555555556000</text:p>
          </table:table-cell>
          <table:table-cell table:formula="of:=[.D572]-[.D57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34" office:value-type="float" office:value="19414" calcext:value-type="float">
            <text:p>19414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224699074074074" calcext:value-type="float">
            <text:p>0,00224699074074074000</text:p>
          </table:table-cell>
          <table:table-cell table:formula="of:=[.D573]-[.D57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34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225092592592593" calcext:value-type="float">
            <text:p>0,00225092592592593000</text:p>
          </table:table-cell>
          <table:table-cell table:formula="of:=[.D574]-[.D57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34" office:value-type="float" office:value="19482" calcext:value-type="float">
            <text:p>19482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225486111111111" calcext:value-type="float">
            <text:p>0,00225486111111111000</text:p>
          </table:table-cell>
          <table:table-cell table:formula="of:=[.D575]-[.D57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34" office:value-type="float" office:value="19516" calcext:value-type="float">
            <text:p>19516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22587962962963" calcext:value-type="float">
            <text:p>0,00225879629629630000</text:p>
          </table:table-cell>
          <table:table-cell table:formula="of:=[.D576]-[.D57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34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226273148148148" calcext:value-type="float">
            <text:p>0,00226273148148148000</text:p>
          </table:table-cell>
          <table:table-cell table:formula="of:=[.D577]-[.D57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34" office:value-type="float" office:value="19584" calcext:value-type="float">
            <text:p>19584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226666666666667" calcext:value-type="float">
            <text:p>0,00226666666666667000</text:p>
          </table:table-cell>
          <table:table-cell table:formula="of:=[.D578]-[.D57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34" office:value-type="float" office:value="19618" calcext:value-type="float">
            <text:p>19618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227060185185185" calcext:value-type="float">
            <text:p>0,00227060185185185000</text:p>
          </table:table-cell>
          <table:table-cell table:formula="of:=[.D579]-[.D57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34" office:value-type="float" office:value="19652" calcext:value-type="float">
            <text:p>19652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227453703703704" calcext:value-type="float">
            <text:p>0,00227453703703704000</text:p>
          </table:table-cell>
          <table:table-cell table:formula="of:=[.D580]-[.D57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34" office:value-type="float" office:value="19686" calcext:value-type="float">
            <text:p>19686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227847222222222" calcext:value-type="float">
            <text:p>0,00227847222222222000</text:p>
          </table:table-cell>
          <table:table-cell table:formula="of:=[.D581]-[.D58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34" office:value-type="float" office:value="19720" calcext:value-type="float">
            <text:p>1972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228240740740741" calcext:value-type="float">
            <text:p>0,00228240740740741000</text:p>
          </table:table-cell>
          <table:table-cell table:formula="of:=[.D582]-[.D58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34" office:value-type="float" office:value="19754" calcext:value-type="float">
            <text:p>19754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228634259259259" calcext:value-type="float">
            <text:p>0,00228634259259259000</text:p>
          </table:table-cell>
          <table:table-cell table:formula="of:=[.D583]-[.D58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34" office:value-type="float" office:value="19788" calcext:value-type="float">
            <text:p>19788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229027777777778" calcext:value-type="float">
            <text:p>0,00229027777777778000</text:p>
          </table:table-cell>
          <table:table-cell table:formula="of:=[.D584]-[.D58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34" office:value-type="float" office:value="19822" calcext:value-type="float">
            <text:p>19822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229421296296296" calcext:value-type="float">
            <text:p>0,00229421296296296000</text:p>
          </table:table-cell>
          <table:table-cell table:formula="of:=[.D585]-[.D58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34" office:value-type="float" office:value="19856" calcext:value-type="float">
            <text:p>19856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229814814814815" calcext:value-type="float">
            <text:p>0,00229814814814815000</text:p>
          </table:table-cell>
          <table:table-cell table:formula="of:=[.D586]-[.D58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34" office:value-type="float" office:value="19890" calcext:value-type="float">
            <text:p>19890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230208333333333" calcext:value-type="float">
            <text:p>0,00230208333333333000</text:p>
          </table:table-cell>
          <table:table-cell table:formula="of:=[.D587]-[.D58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34" office:value-type="float" office:value="19924" calcext:value-type="float">
            <text:p>19924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230601851851852" calcext:value-type="float">
            <text:p>0,00230601851851852000</text:p>
          </table:table-cell>
          <table:table-cell table:formula="of:=[.D588]-[.D58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34" office:value-type="float" office:value="19958" calcext:value-type="float">
            <text:p>19958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23099537037037" calcext:value-type="float">
            <text:p>0,00230995370370370000</text:p>
          </table:table-cell>
          <table:table-cell table:formula="of:=[.D589]-[.D58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34" office:value-type="float" office:value="19992" calcext:value-type="float">
            <text:p>19992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231388888888889" calcext:value-type="float">
            <text:p>0,00231388888888889000</text:p>
          </table:table-cell>
          <table:table-cell table:formula="of:=[.D590]-[.D58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34" office:value-type="float" office:value="20026" calcext:value-type="float">
            <text:p>20026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231782407407407" calcext:value-type="float">
            <text:p>0,00231782407407407000</text:p>
          </table:table-cell>
          <table:table-cell table:formula="of:=[.D591]-[.D59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34" office:value-type="float" office:value="20060" calcext:value-type="float">
            <text:p>2006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232175925925926" calcext:value-type="float">
            <text:p>0,00232175925925926000</text:p>
          </table:table-cell>
          <table:table-cell table:formula="of:=[.D592]-[.D59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34" office:value-type="float" office:value="20094" calcext:value-type="float">
            <text:p>20094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232569444444444" calcext:value-type="float">
            <text:p>0,00232569444444444000</text:p>
          </table:table-cell>
          <table:table-cell table:formula="of:=[.D593]-[.D59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34" office:value-type="float" office:value="20128" calcext:value-type="float">
            <text:p>20128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232962962962963" calcext:value-type="float">
            <text:p>0,00232962962962963000</text:p>
          </table:table-cell>
          <table:table-cell table:formula="of:=[.D594]-[.D59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34" office:value-type="float" office:value="20162" calcext:value-type="float">
            <text:p>20162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233356481481482" calcext:value-type="float">
            <text:p>0,00233356481481482000</text:p>
          </table:table-cell>
          <table:table-cell table:formula="of:=[.D595]-[.D59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34" office:value-type="float" office:value="20196" calcext:value-type="float">
            <text:p>20196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23375" calcext:value-type="float">
            <text:p>0,00233750000000000000</text:p>
          </table:table-cell>
          <table:table-cell table:formula="of:=[.D596]-[.D59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34" office:value-type="float" office:value="20230" calcext:value-type="float">
            <text:p>20230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234143518518519" calcext:value-type="float">
            <text:p>0,00234143518518519000</text:p>
          </table:table-cell>
          <table:table-cell table:formula="of:=[.D597]-[.D59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34" office:value-type="float" office:value="20264" calcext:value-type="float">
            <text:p>20264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234537037037037" calcext:value-type="float">
            <text:p>0,00234537037037037000</text:p>
          </table:table-cell>
          <table:table-cell table:formula="of:=[.D598]-[.D59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34" office:value-type="float" office:value="20298" calcext:value-type="float">
            <text:p>20298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234930555555556" calcext:value-type="float">
            <text:p>0,00234930555555556000</text:p>
          </table:table-cell>
          <table:table-cell table:formula="of:=[.D599]-[.D59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34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235324074074074" calcext:value-type="float">
            <text:p>0,00235324074074074000</text:p>
          </table:table-cell>
          <table:table-cell table:formula="of:=[.D600]-[.D59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34" office:value-type="float" office:value="20366" calcext:value-type="float">
            <text:p>20366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235717592592593" calcext:value-type="float">
            <text:p>0,00235717592592593000</text:p>
          </table:table-cell>
          <table:table-cell table:formula="of:=[.D601]-[.D60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34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236111111111111" calcext:value-type="float">
            <text:p>0,00236111111111111000</text:p>
          </table:table-cell>
          <table:table-cell table:formula="of:=[.D602]-[.D60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34" office:value-type="float" office:value="20434" calcext:value-type="float">
            <text:p>20434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23650462962963" calcext:value-type="float">
            <text:p>0,00236504629629630000</text:p>
          </table:table-cell>
          <table:table-cell table:formula="of:=[.D603]-[.D60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34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236898148148148" calcext:value-type="float">
            <text:p>0,00236898148148148000</text:p>
          </table:table-cell>
          <table:table-cell table:formula="of:=[.D604]-[.D60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34" office:value-type="float" office:value="20502" calcext:value-type="float">
            <text:p>20502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237291666666667" calcext:value-type="float">
            <text:p>0,00237291666666667000</text:p>
          </table:table-cell>
          <table:table-cell table:formula="of:=[.D605]-[.D60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34" office:value-type="float" office:value="20536" calcext:value-type="float">
            <text:p>20536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237685185185185" calcext:value-type="float">
            <text:p>0,00237685185185185000</text:p>
          </table:table-cell>
          <table:table-cell table:formula="of:=[.D606]-[.D60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34" office:value-type="float" office:value="20570" calcext:value-type="float">
            <text:p>20570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238078703703704" calcext:value-type="float">
            <text:p>0,00238078703703704000</text:p>
          </table:table-cell>
          <table:table-cell table:formula="of:=[.D607]-[.D60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34" office:value-type="float" office:value="20604" calcext:value-type="float">
            <text:p>20604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238472222222222" calcext:value-type="float">
            <text:p>0,00238472222222222000</text:p>
          </table:table-cell>
          <table:table-cell table:formula="of:=[.D608]-[.D60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34" office:value-type="float" office:value="20638" calcext:value-type="float">
            <text:p>20638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238865740740741" calcext:value-type="float">
            <text:p>0,00238865740740741000</text:p>
          </table:table-cell>
          <table:table-cell table:formula="of:=[.D609]-[.D60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34" office:value-type="float" office:value="20672" calcext:value-type="float">
            <text:p>20672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239259259259259" calcext:value-type="float">
            <text:p>0,00239259259259259000</text:p>
          </table:table-cell>
          <table:table-cell table:formula="of:=[.D610]-[.D60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34" office:value-type="float" office:value="20706" calcext:value-type="float">
            <text:p>20706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239652777777778" calcext:value-type="float">
            <text:p>0,00239652777777778000</text:p>
          </table:table-cell>
          <table:table-cell table:formula="of:=[.D611]-[.D61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34" office:value-type="float" office:value="20740" calcext:value-type="float">
            <text:p>2074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240046296296296" calcext:value-type="float">
            <text:p>0,00240046296296296000</text:p>
          </table:table-cell>
          <table:table-cell table:formula="of:=[.D612]-[.D61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34" office:value-type="float" office:value="20774" calcext:value-type="float">
            <text:p>20774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240439814814815" calcext:value-type="float">
            <text:p>0,00240439814814815000</text:p>
          </table:table-cell>
          <table:table-cell table:formula="of:=[.D613]-[.D61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34" office:value-type="float" office:value="20808" calcext:value-type="float">
            <text:p>20808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240833333333333" calcext:value-type="float">
            <text:p>0,00240833333333333000</text:p>
          </table:table-cell>
          <table:table-cell table:formula="of:=[.D614]-[.D61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34" office:value-type="float" office:value="20842" calcext:value-type="float">
            <text:p>20842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241226851851852" calcext:value-type="float">
            <text:p>0,00241226851851852000</text:p>
          </table:table-cell>
          <table:table-cell table:formula="of:=[.D615]-[.D61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34" office:value-type="float" office:value="20876" calcext:value-type="float">
            <text:p>20876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24162037037037" calcext:value-type="float">
            <text:p>0,00241620370370370000</text:p>
          </table:table-cell>
          <table:table-cell table:formula="of:=[.D616]-[.D61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34" office:value-type="float" office:value="20910" calcext:value-type="float">
            <text:p>20910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242013888888889" calcext:value-type="float">
            <text:p>0,00242013888888889000</text:p>
          </table:table-cell>
          <table:table-cell table:formula="of:=[.D617]-[.D61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34" office:value-type="float" office:value="20944" calcext:value-type="float">
            <text:p>20944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242407407407407" calcext:value-type="float">
            <text:p>0,00242407407407407000</text:p>
          </table:table-cell>
          <table:table-cell table:formula="of:=[.D618]-[.D61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34" office:value-type="float" office:value="20978" calcext:value-type="float">
            <text:p>20978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242800925925926" calcext:value-type="float">
            <text:p>0,00242800925925926000</text:p>
          </table:table-cell>
          <table:table-cell table:formula="of:=[.D619]-[.D61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34" office:value-type="float" office:value="21012" calcext:value-type="float">
            <text:p>21012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243194444444444" calcext:value-type="float">
            <text:p>0,00243194444444444000</text:p>
          </table:table-cell>
          <table:table-cell table:formula="of:=[.D620]-[.D61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34" office:value-type="float" office:value="21046" calcext:value-type="float">
            <text:p>21046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243587962962963" calcext:value-type="float">
            <text:p>0,00243587962962963000</text:p>
          </table:table-cell>
          <table:table-cell table:formula="of:=[.D621]-[.D62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34" office:value-type="float" office:value="21080" calcext:value-type="float">
            <text:p>2108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243981481481482" calcext:value-type="float">
            <text:p>0,00243981481481482000</text:p>
          </table:table-cell>
          <table:table-cell table:formula="of:=[.D622]-[.D62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34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244375" calcext:value-type="float">
            <text:p>0,00244375000000000000</text:p>
          </table:table-cell>
          <table:table-cell table:formula="of:=[.D623]-[.D62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34" office:value-type="float" office:value="21148" calcext:value-type="float">
            <text:p>21148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244768518518519" calcext:value-type="float">
            <text:p>0,00244768518518519000</text:p>
          </table:table-cell>
          <table:table-cell table:formula="of:=[.D624]-[.D62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34" office:value-type="float" office:value="21182" calcext:value-type="float">
            <text:p>21182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245162037037037" calcext:value-type="float">
            <text:p>0,00245162037037037000</text:p>
          </table:table-cell>
          <table:table-cell table:formula="of:=[.D625]-[.D62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34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245555555555556" calcext:value-type="float">
            <text:p>0,00245555555555556000</text:p>
          </table:table-cell>
          <table:table-cell table:formula="of:=[.D626]-[.D62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34" office:value-type="float" office:value="21250" calcext:value-type="float">
            <text:p>21250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245949074074074" calcext:value-type="float">
            <text:p>0,00245949074074074000</text:p>
          </table:table-cell>
          <table:table-cell table:formula="of:=[.D627]-[.D62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34" office:value-type="float" office:value="21284" calcext:value-type="float">
            <text:p>21284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246342592592593" calcext:value-type="float">
            <text:p>0,00246342592592593000</text:p>
          </table:table-cell>
          <table:table-cell table:formula="of:=[.D628]-[.D62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34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246736111111111" calcext:value-type="float">
            <text:p>0,00246736111111111000</text:p>
          </table:table-cell>
          <table:table-cell table:formula="of:=[.D629]-[.D62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34" office:value-type="float" office:value="21352" calcext:value-type="float">
            <text:p>21352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24712962962963" calcext:value-type="float">
            <text:p>0,00247129629629630000</text:p>
          </table:table-cell>
          <table:table-cell table:formula="of:=[.D630]-[.D62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34" office:value-type="float" office:value="21386" calcext:value-type="float">
            <text:p>21386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247523148148148" calcext:value-type="float">
            <text:p>0,00247523148148148000</text:p>
          </table:table-cell>
          <table:table-cell table:formula="of:=[.D631]-[.D63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34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247916666666667" calcext:value-type="float">
            <text:p>0,00247916666666667000</text:p>
          </table:table-cell>
          <table:table-cell table:formula="of:=[.D632]-[.D63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34" office:value-type="float" office:value="21454" calcext:value-type="float">
            <text:p>21454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248310185185185" calcext:value-type="float">
            <text:p>0,00248310185185185000</text:p>
          </table:table-cell>
          <table:table-cell table:formula="of:=[.D633]-[.D63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34" office:value-type="float" office:value="21488" calcext:value-type="float">
            <text:p>21488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248703703703704" calcext:value-type="float">
            <text:p>0,00248703703703704000</text:p>
          </table:table-cell>
          <table:table-cell table:formula="of:=[.D634]-[.D63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34" office:value-type="float" office:value="21522" calcext:value-type="float">
            <text:p>21522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249097222222222" calcext:value-type="float">
            <text:p>0,00249097222222222000</text:p>
          </table:table-cell>
          <table:table-cell table:formula="of:=[.D635]-[.D63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34" office:value-type="float" office:value="21556" calcext:value-type="float">
            <text:p>21556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249490740740741" calcext:value-type="float">
            <text:p>0,00249490740740741000</text:p>
          </table:table-cell>
          <table:table-cell table:formula="of:=[.D636]-[.D63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34" office:value-type="float" office:value="21590" calcext:value-type="float">
            <text:p>21590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249884259259259" calcext:value-type="float">
            <text:p>0,00249884259259259000</text:p>
          </table:table-cell>
          <table:table-cell table:formula="of:=[.D637]-[.D63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34" office:value-type="float" office:value="21624" calcext:value-type="float">
            <text:p>21624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250277777777778" calcext:value-type="float">
            <text:p>0,00250277777777778000</text:p>
          </table:table-cell>
          <table:table-cell table:formula="of:=[.D638]-[.D63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34" office:value-type="float" office:value="21658" calcext:value-type="float">
            <text:p>21658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250671296296296" calcext:value-type="float">
            <text:p>0,00250671296296296000</text:p>
          </table:table-cell>
          <table:table-cell table:formula="of:=[.D639]-[.D63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34" office:value-type="float" office:value="21692" calcext:value-type="float">
            <text:p>21692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251064814814815" calcext:value-type="float">
            <text:p>0,00251064814814815000</text:p>
          </table:table-cell>
          <table:table-cell table:formula="of:=[.D640]-[.D63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34" office:value-type="float" office:value="21726" calcext:value-type="float">
            <text:p>21726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251458333333333" calcext:value-type="float">
            <text:p>0,00251458333333333000</text:p>
          </table:table-cell>
          <table:table-cell table:formula="of:=[.D641]-[.D64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34" office:value-type="float" office:value="21760" calcext:value-type="float">
            <text:p>2176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251851851851852" calcext:value-type="float">
            <text:p>0,00251851851851852000</text:p>
          </table:table-cell>
          <table:table-cell table:formula="of:=[.D642]-[.D64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34" office:value-type="float" office:value="21794" calcext:value-type="float">
            <text:p>21794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25224537037037" calcext:value-type="float">
            <text:p>0,00252245370370370000</text:p>
          </table:table-cell>
          <table:table-cell table:formula="of:=[.D643]-[.D64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34" office:value-type="float" office:value="21828" calcext:value-type="float">
            <text:p>21828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252638888888889" calcext:value-type="float">
            <text:p>0,00252638888888889000</text:p>
          </table:table-cell>
          <table:table-cell table:formula="of:=[.D644]-[.D64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34" office:value-type="float" office:value="21862" calcext:value-type="float">
            <text:p>21862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253032407407407" calcext:value-type="float">
            <text:p>0,00253032407407407000</text:p>
          </table:table-cell>
          <table:table-cell table:formula="of:=[.D645]-[.D64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34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253425925925926" calcext:value-type="float">
            <text:p>0,00253425925925926000</text:p>
          </table:table-cell>
          <table:table-cell table:formula="of:=[.D646]-[.D64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34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253819444444444" calcext:value-type="float">
            <text:p>0,00253819444444444000</text:p>
          </table:table-cell>
          <table:table-cell table:formula="of:=[.D647]-[.D64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34" office:value-type="float" office:value="21964" calcext:value-type="float">
            <text:p>21964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254212962962963" calcext:value-type="float">
            <text:p>0,00254212962962963000</text:p>
          </table:table-cell>
          <table:table-cell table:formula="of:=[.D648]-[.D64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34" office:value-type="float" office:value="21998" calcext:value-type="float">
            <text:p>21998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254606481481482" calcext:value-type="float">
            <text:p>0,00254606481481482000</text:p>
          </table:table-cell>
          <table:table-cell table:formula="of:=[.D649]-[.D64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34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255" calcext:value-type="float">
            <text:p>0,00255000000000000000</text:p>
          </table:table-cell>
          <table:table-cell table:formula="of:=[.D650]-[.D64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34" office:value-type="float" office:value="22066" calcext:value-type="float">
            <text:p>22066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255393518518519" calcext:value-type="float">
            <text:p>0,00255393518518519000</text:p>
          </table:table-cell>
          <table:table-cell table:formula="of:=[.D651]-[.D65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34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255787037037037" calcext:value-type="float">
            <text:p>0,00255787037037037000</text:p>
          </table:table-cell>
          <table:table-cell table:formula="of:=[.D652]-[.D65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34" office:value-type="float" office:value="22134" calcext:value-type="float">
            <text:p>22134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256180555555556" calcext:value-type="float">
            <text:p>0,00256180555555556000</text:p>
          </table:table-cell>
          <table:table-cell table:formula="of:=[.D653]-[.D65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34" office:value-type="float" office:value="22168" calcext:value-type="float">
            <text:p>22168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256574074074074" calcext:value-type="float">
            <text:p>0,00256574074074074000</text:p>
          </table:table-cell>
          <table:table-cell table:formula="of:=[.D654]-[.D65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34" office:value-type="float" office:value="22202" calcext:value-type="float">
            <text:p>22202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256967592592593" calcext:value-type="float">
            <text:p>0,00256967592592593000</text:p>
          </table:table-cell>
          <table:table-cell table:formula="of:=[.D655]-[.D65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34" office:value-type="float" office:value="22236" calcext:value-type="float">
            <text:p>22236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257361111111111" calcext:value-type="float">
            <text:p>0,00257361111111111000</text:p>
          </table:table-cell>
          <table:table-cell table:formula="of:=[.D656]-[.D65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34" office:value-type="float" office:value="22270" calcext:value-type="float">
            <text:p>22270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25775462962963" calcext:value-type="float">
            <text:p>0,00257754629629630000</text:p>
          </table:table-cell>
          <table:table-cell table:formula="of:=[.D657]-[.D65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34" office:value-type="float" office:value="22304" calcext:value-type="float">
            <text:p>22304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258148148148148" calcext:value-type="float">
            <text:p>0,00258148148148148000</text:p>
          </table:table-cell>
          <table:table-cell table:formula="of:=[.D658]-[.D65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34" office:value-type="float" office:value="22338" calcext:value-type="float">
            <text:p>22338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258541666666667" calcext:value-type="float">
            <text:p>0,00258541666666667000</text:p>
          </table:table-cell>
          <table:table-cell table:formula="of:=[.D659]-[.D65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34" office:value-type="float" office:value="22372" calcext:value-type="float">
            <text:p>22372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258935185185185" calcext:value-type="float">
            <text:p>0,00258935185185185000</text:p>
          </table:table-cell>
          <table:table-cell table:formula="of:=[.D660]-[.D65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34" office:value-type="float" office:value="22406" calcext:value-type="float">
            <text:p>22406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259328703703704" calcext:value-type="float">
            <text:p>0,00259328703703704000</text:p>
          </table:table-cell>
          <table:table-cell table:formula="of:=[.D661]-[.D66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34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259722222222222" calcext:value-type="float">
            <text:p>0,00259722222222222000</text:p>
          </table:table-cell>
          <table:table-cell table:formula="of:=[.D662]-[.D66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34" office:value-type="float" office:value="22474" calcext:value-type="float">
            <text:p>22474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260115740740741" calcext:value-type="float">
            <text:p>0,00260115740740741000</text:p>
          </table:table-cell>
          <table:table-cell table:formula="of:=[.D663]-[.D66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34" office:value-type="float" office:value="22508" calcext:value-type="float">
            <text:p>22508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260509259259259" calcext:value-type="float">
            <text:p>0,00260509259259259000</text:p>
          </table:table-cell>
          <table:table-cell table:formula="of:=[.D664]-[.D66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34" office:value-type="float" office:value="22542" calcext:value-type="float">
            <text:p>22542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260902777777778" calcext:value-type="float">
            <text:p>0,00260902777777778000</text:p>
          </table:table-cell>
          <table:table-cell table:formula="of:=[.D665]-[.D66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34" office:value-type="float" office:value="22576" calcext:value-type="float">
            <text:p>22576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261296296296296" calcext:value-type="float">
            <text:p>0,00261296296296296000</text:p>
          </table:table-cell>
          <table:table-cell table:formula="of:=[.D666]-[.D66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34" office:value-type="float" office:value="22610" calcext:value-type="float">
            <text:p>22610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261689814814815" calcext:value-type="float">
            <text:p>0,00261689814814815000</text:p>
          </table:table-cell>
          <table:table-cell table:formula="of:=[.D667]-[.D66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34" office:value-type="float" office:value="22644" calcext:value-type="float">
            <text:p>22644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262083333333333" calcext:value-type="float">
            <text:p>0,00262083333333333000</text:p>
          </table:table-cell>
          <table:table-cell table:formula="of:=[.D668]-[.D66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34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262476851851852" calcext:value-type="float">
            <text:p>0,00262476851851852000</text:p>
          </table:table-cell>
          <table:table-cell table:formula="of:=[.D669]-[.D66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34" office:value-type="float" office:value="22712" calcext:value-type="float">
            <text:p>22712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26287037037037" calcext:value-type="float">
            <text:p>0,00262870370370370000</text:p>
          </table:table-cell>
          <table:table-cell table:formula="of:=[.D670]-[.D66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34" office:value-type="float" office:value="22746" calcext:value-type="float">
            <text:p>22746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263263888888889" calcext:value-type="float">
            <text:p>0,00263263888888889000</text:p>
          </table:table-cell>
          <table:table-cell table:formula="of:=[.D671]-[.D67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34" office:value-type="float" office:value="22780" calcext:value-type="float">
            <text:p>2278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263657407407407" calcext:value-type="float">
            <text:p>0,00263657407407407000</text:p>
          </table:table-cell>
          <table:table-cell table:formula="of:=[.D672]-[.D67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34" office:value-type="float" office:value="22814" calcext:value-type="float">
            <text:p>22814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264050925925926" calcext:value-type="float">
            <text:p>0,00264050925925926000</text:p>
          </table:table-cell>
          <table:table-cell table:formula="of:=[.D673]-[.D67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34" office:value-type="float" office:value="22848" calcext:value-type="float">
            <text:p>22848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264444444444444" calcext:value-type="float">
            <text:p>0,00264444444444444000</text:p>
          </table:table-cell>
          <table:table-cell table:formula="of:=[.D674]-[.D67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34" office:value-type="float" office:value="22882" calcext:value-type="float">
            <text:p>22882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264837962962963" calcext:value-type="float">
            <text:p>0,00264837962962963000</text:p>
          </table:table-cell>
          <table:table-cell table:formula="of:=[.D675]-[.D67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34" office:value-type="float" office:value="22916" calcext:value-type="float">
            <text:p>22916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265231481481482" calcext:value-type="float">
            <text:p>0,00265231481481482000</text:p>
          </table:table-cell>
          <table:table-cell table:formula="of:=[.D676]-[.D67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34" office:value-type="float" office:value="22950" calcext:value-type="float">
            <text:p>22950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265625" calcext:value-type="float">
            <text:p>0,00265625000000000000</text:p>
          </table:table-cell>
          <table:table-cell table:formula="of:=[.D677]-[.D67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34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266018518518519" calcext:value-type="float">
            <text:p>0,00266018518518519000</text:p>
          </table:table-cell>
          <table:table-cell table:formula="of:=[.D678]-[.D67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34" office:value-type="float" office:value="23018" calcext:value-type="float">
            <text:p>23018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266412037037037" calcext:value-type="float">
            <text:p>0,00266412037037037000</text:p>
          </table:table-cell>
          <table:table-cell table:formula="of:=[.D679]-[.D67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34" office:value-type="float" office:value="23052" calcext:value-type="float">
            <text:p>23052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266805555555556" calcext:value-type="float">
            <text:p>0,00266805555555556000</text:p>
          </table:table-cell>
          <table:table-cell table:formula="of:=[.D680]-[.D67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34" office:value-type="float" office:value="23086" calcext:value-type="float">
            <text:p>23086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267199074074074" calcext:value-type="float">
            <text:p>0,00267199074074074000</text:p>
          </table:table-cell>
          <table:table-cell table:formula="of:=[.D681]-[.D68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34" office:value-type="float" office:value="23120" calcext:value-type="float">
            <text:p>2312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267592592592593" calcext:value-type="float">
            <text:p>0,00267592592592593000</text:p>
          </table:table-cell>
          <table:table-cell table:formula="of:=[.D682]-[.D68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34" office:value-type="float" office:value="23154" calcext:value-type="float">
            <text:p>23154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267986111111111" calcext:value-type="float">
            <text:p>0,00267986111111111000</text:p>
          </table:table-cell>
          <table:table-cell table:formula="of:=[.D683]-[.D682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34" office:value-type="float" office:value="23188" calcext:value-type="float">
            <text:p>23188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26837962962963" calcext:value-type="float">
            <text:p>0,00268379629629630000</text:p>
          </table:table-cell>
          <table:table-cell table:formula="of:=[.D684]-[.D68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34" office:value-type="float" office:value="23222" calcext:value-type="float">
            <text:p>23222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268773148148148" calcext:value-type="float">
            <text:p>0,00268773148148148000</text:p>
          </table:table-cell>
          <table:table-cell table:formula="of:=[.D685]-[.D68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34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269166666666667" calcext:value-type="float">
            <text:p>0,00269166666666667000</text:p>
          </table:table-cell>
          <table:table-cell table:formula="of:=[.D686]-[.D68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34" office:value-type="float" office:value="23290" calcext:value-type="float">
            <text:p>23290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269560185185185" calcext:value-type="float">
            <text:p>0,00269560185185185000</text:p>
          </table:table-cell>
          <table:table-cell table:formula="of:=[.D687]-[.D686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34" office:value-type="float" office:value="23324" calcext:value-type="float">
            <text:p>23324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269953703703704" calcext:value-type="float">
            <text:p>0,00269953703703704000</text:p>
          </table:table-cell>
          <table:table-cell table:formula="of:=[.D688]-[.D687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34" office:value-type="float" office:value="23358" calcext:value-type="float">
            <text:p>23358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270347222222222" calcext:value-type="float">
            <text:p>0,00270347222222222000</text:p>
          </table:table-cell>
          <table:table-cell table:formula="of:=[.D689]-[.D688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34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270740740740741" calcext:value-type="float">
            <text:p>0,00270740740740741000</text:p>
          </table:table-cell>
          <table:table-cell table:formula="of:=[.D690]-[.D689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34" office:value-type="float" office:value="23426" calcext:value-type="float">
            <text:p>23426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271134259259259" calcext:value-type="float">
            <text:p>0,00271134259259259000</text:p>
          </table:table-cell>
          <table:table-cell table:formula="of:=[.D691]-[.D690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34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271527777777778" calcext:value-type="float">
            <text:p>0,00271527777777778000</text:p>
          </table:table-cell>
          <table:table-cell table:formula="of:=[.D692]-[.D691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34" office:value-type="float" office:value="23494" calcext:value-type="float">
            <text:p>23494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271921296296296" calcext:value-type="float">
            <text:p>0,00271921296296296000</text:p>
          </table:table-cell>
          <table:table-cell table:formula="of:=[.D693]-[.D69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34" office:value-type="float" office:value="23528" calcext:value-type="float">
            <text:p>23528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272314814814815" calcext:value-type="float">
            <text:p>0,00272314814814815000</text:p>
          </table:table-cell>
          <table:table-cell table:formula="of:=[.D694]-[.D693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34" office:value-type="float" office:value="23562" calcext:value-type="float">
            <text:p>23562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272708333333333" calcext:value-type="float">
            <text:p>0,00272708333333333000</text:p>
          </table:table-cell>
          <table:table-cell table:formula="of:=[.D695]-[.D694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34" office:value-type="float" office:value="23596" calcext:value-type="float">
            <text:p>23596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273101851851852" calcext:value-type="float">
            <text:p>0,00273101851851852000</text:p>
          </table:table-cell>
          <table:table-cell table:formula="of:=[.D696]-[.D695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34" office:value-type="float" office:value="23630" calcext:value-type="float">
            <text:p>23630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27349537037037" calcext:value-type="float">
            <text:p>0,00273495370370370000</text:p>
          </table:table-cell>
          <table:table-cell table:formula="of:=[.D697]-[.D696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34" office:value-type="float" office:value="23664" calcext:value-type="float">
            <text:p>23664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273888888888889" calcext:value-type="float">
            <text:p>0,00273888888888889000</text:p>
          </table:table-cell>
          <table:table-cell table:formula="of:=[.D698]-[.D697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34" office:value-type="float" office:value="23698" calcext:value-type="float">
            <text:p>23698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274282407407407" calcext:value-type="float">
            <text:p>0,00274282407407407000</text:p>
          </table:table-cell>
          <table:table-cell table:formula="of:=[.D699]-[.D698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34" office:value-type="float" office:value="23732" calcext:value-type="float">
            <text:p>23732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274675925925926" calcext:value-type="float">
            <text:p>0,00274675925925926000</text:p>
          </table:table-cell>
          <table:table-cell table:formula="of:=[.D700]-[.D699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34" office:value-type="float" office:value="23766" calcext:value-type="float">
            <text:p>23766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275069444444444" calcext:value-type="float">
            <text:p>0,00275069444444444000</text:p>
          </table:table-cell>
          <table:table-cell table:formula="of:=[.D701]-[.D700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34" office:value-type="float" office:value="23800" calcext:value-type="float">
            <text:p>238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275462962962963" calcext:value-type="float">
            <text:p>0,00275462962962963000</text:p>
          </table:table-cell>
          <table:table-cell table:formula="of:=[.D702]-[.D701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34" office:value-type="float" office:value="23834" calcext:value-type="float">
            <text:p>23834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275856481481482" calcext:value-type="float">
            <text:p>0,00275856481481482000</text:p>
          </table:table-cell>
          <table:table-cell table:formula="of:=[.D703]-[.D702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34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27625" calcext:value-type="float">
            <text:p>0,00276250000000000000</text:p>
          </table:table-cell>
          <table:table-cell table:formula="of:=[.D704]-[.D703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34" office:value-type="float" office:value="23902" calcext:value-type="float">
            <text:p>23902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276643518518519" calcext:value-type="float">
            <text:p>0,00276643518518519000</text:p>
          </table:table-cell>
          <table:table-cell table:formula="of:=[.D705]-[.D704]" office:value-type="float" office:value="0.00000393518518518538" calcext:value-type="float">
            <text:p>0,000003935185185185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34" office:value-type="float" office:value="23936" calcext:value-type="float">
            <text:p>23936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277037037037037" calcext:value-type="float">
            <text:p>0,00277037037037037000</text:p>
          </table:table-cell>
          <table:table-cell table:formula="of:=[.D706]-[.D705]" office:value-type="float" office:value="0.00000393518518518494" calcext:value-type="float">
            <text:p>0,0000039351851851849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34" office:value-type="float" office:value="23970" calcext:value-type="float">
            <text:p>23970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277430555555556" calcext:value-type="float">
            <text:p>0,00277430555555556000</text:p>
          </table:table-cell>
          <table:table-cell table:formula="of:=#REF!-[.D706]" office:value-type="string" office:string-value="" calcext:value-type="error">
            <text:p>#REF!</text:p>
          </table:table-cell>
        </table:table-row>
        <table:table-row table:style-name="ro1" table:number-rows-repeated="10478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8:22.529798409</meta:creation-date>
    <dc:date>2026-05-17T15:58:28.597944683</dc:date>
    <meta:editing-duration>PT7S</meta:editing-duration>
    <meta:editing-cycles>1</meta:editing-cycles>
    <meta:document-statistic meta:table-count="1" meta:cell-count="3530" meta:object-count="0"/>
    <meta:generator>LibreOffice/24.2.7.2$Linux_X86_64 LibreOffice_project/420$Build-2</meta:generator>
  </office:meta>
</office:document-meta>
</file>