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7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78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02777777777778" calcext:value-type="float">
            <text:p>0,00000902777777777778</text:p>
          </table:table-cell>
          <table:table-cell table:formula="of:=[.D3]-[.D2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78" office:value-type="float" office:value="156" calcext:value-type="float">
            <text:p>15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80555555555556" calcext:value-type="float">
            <text:p>0,00001805555555555560</text:p>
          </table:table-cell>
          <table:table-cell table:formula="of:=[.D4]-[.D3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78" office:value-type="float" office:value="234" calcext:value-type="float">
            <text:p>234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70833333333333" calcext:value-type="float">
            <text:p>0,00002708333333333330</text:p>
          </table:table-cell>
          <table:table-cell table:formula="of:=[.D5]-[.D4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8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61111111111111" calcext:value-type="float">
            <text:p>0,00003611111111111110</text:p>
          </table:table-cell>
          <table:table-cell table:formula="of:=[.D6]-[.D5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8" office:value-type="float" office:value="390" calcext:value-type="float">
            <text:p>39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51388888888889" calcext:value-type="float">
            <text:p>0,00004513888888888890</text:p>
          </table:table-cell>
          <table:table-cell table:formula="of:=[.D7]-[.D6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78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41666666666667" calcext:value-type="float">
            <text:p>0,00005416666666666670</text:p>
          </table:table-cell>
          <table:table-cell table:formula="of:=[.D8]-[.D7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78" office:value-type="float" office:value="546" calcext:value-type="float">
            <text:p>546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31944444444444" calcext:value-type="float">
            <text:p>0,00006319444444444440</text:p>
          </table:table-cell>
          <table:table-cell table:formula="of:=[.D9]-[.D8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78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22222222222222" calcext:value-type="float">
            <text:p>0,00007222222222222220</text:p>
          </table:table-cell>
          <table:table-cell table:formula="of:=[.D10]-[.D9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78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125" calcext:value-type="float">
            <text:p>0,00008125000000000000</text:p>
          </table:table-cell>
          <table:table-cell table:formula="of:=[.D11]-[.D10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78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02777777777778" calcext:value-type="float">
            <text:p>0,00009027777777777780</text:p>
          </table:table-cell>
          <table:table-cell table:formula="of:=[.D12]-[.D11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78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993055555555556" calcext:value-type="float">
            <text:p>0,00009930555555555560</text:p>
          </table:table-cell>
          <table:table-cell table:formula="of:=[.D13]-[.D12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78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08333333333333" calcext:value-type="float">
            <text:p>0,00010833333333333300</text:p>
          </table:table-cell>
          <table:table-cell table:formula="of:=[.D14]-[.D13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78" office:value-type="float" office:value="1014" calcext:value-type="float">
            <text:p>1014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17361111111111" calcext:value-type="float">
            <text:p>0,00011736111111111100</text:p>
          </table:table-cell>
          <table:table-cell table:formula="of:=[.D15]-[.D14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78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26388888888889" calcext:value-type="float">
            <text:p>0,00012638888888888900</text:p>
          </table:table-cell>
          <table:table-cell table:formula="of:=[.D16]-[.D15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78" office:value-type="float" office:value="1170" calcext:value-type="float">
            <text:p>117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35416666666667" calcext:value-type="float">
            <text:p>0,00013541666666666700</text:p>
          </table:table-cell>
          <table:table-cell table:formula="of:=[.D17]-[.D16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78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44444444444444" calcext:value-type="float">
            <text:p>0,00014444444444444400</text:p>
          </table:table-cell>
          <table:table-cell table:formula="of:=[.D18]-[.D17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78" office:value-type="float" office:value="1326" calcext:value-type="float">
            <text:p>1326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53472222222222" calcext:value-type="float">
            <text:p>0,00015347222222222200</text:p>
          </table:table-cell>
          <table:table-cell table:formula="of:=[.D19]-[.D18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78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625" calcext:value-type="float">
            <text:p>0,00016250000000000000</text:p>
          </table:table-cell>
          <table:table-cell table:formula="of:=[.D20]-[.D19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78" office:value-type="float" office:value="1482" calcext:value-type="float">
            <text:p>1482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71527777777778" calcext:value-type="float">
            <text:p>0,00017152777777777800</text:p>
          </table:table-cell>
          <table:table-cell table:formula="of:=[.D21]-[.D20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78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80555555555556" calcext:value-type="float">
            <text:p>0,00018055555555555600</text:p>
          </table:table-cell>
          <table:table-cell table:formula="of:=[.D22]-[.D21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78" office:value-type="float" office:value="1638" calcext:value-type="float">
            <text:p>1638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89583333333333" calcext:value-type="float">
            <text:p>0,00018958333333333300</text:p>
          </table:table-cell>
          <table:table-cell table:formula="of:=[.D23]-[.D22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78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98611111111111" calcext:value-type="float">
            <text:p>0,00019861111111111100</text:p>
          </table:table-cell>
          <table:table-cell table:formula="of:=[.D24]-[.D23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78" office:value-type="float" office:value="1794" calcext:value-type="float">
            <text:p>1794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07638888888889" calcext:value-type="float">
            <text:p>0,00020763888888888900</text:p>
          </table:table-cell>
          <table:table-cell table:formula="of:=[.D25]-[.D24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78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16666666666667" calcext:value-type="float">
            <text:p>0,00021666666666666700</text:p>
          </table:table-cell>
          <table:table-cell table:formula="of:=[.D26]-[.D25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78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25694444444444" calcext:value-type="float">
            <text:p>0,00022569444444444400</text:p>
          </table:table-cell>
          <table:table-cell table:formula="of:=[.D27]-[.D26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78" office:value-type="float" office:value="2028" calcext:value-type="float">
            <text:p>202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34722222222222" calcext:value-type="float">
            <text:p>0,00023472222222222200</text:p>
          </table:table-cell>
          <table:table-cell table:formula="of:=[.D28]-[.D27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78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4375" calcext:value-type="float">
            <text:p>0,00024375000000000000</text:p>
          </table:table-cell>
          <table:table-cell table:formula="of:=[.D29]-[.D28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78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52777777777778" calcext:value-type="float">
            <text:p>0,00025277777777777800</text:p>
          </table:table-cell>
          <table:table-cell table:formula="of:=[.D30]-[.D29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78" office:value-type="float" office:value="2262" calcext:value-type="float">
            <text:p>2262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61805555555556" calcext:value-type="float">
            <text:p>0,00026180555555555600</text:p>
          </table:table-cell>
          <table:table-cell table:formula="of:=[.D31]-[.D30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78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70833333333333" calcext:value-type="float">
            <text:p>0,00027083333333333300</text:p>
          </table:table-cell>
          <table:table-cell table:formula="of:=[.D32]-[.D31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78" office:value-type="float" office:value="2418" calcext:value-type="float">
            <text:p>2418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79861111111111" calcext:value-type="float">
            <text:p>0,00027986111111111100</text:p>
          </table:table-cell>
          <table:table-cell table:formula="of:=[.D33]-[.D32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78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88888888888889" calcext:value-type="float">
            <text:p>0,00028888888888888900</text:p>
          </table:table-cell>
          <table:table-cell table:formula="of:=[.D34]-[.D33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78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97916666666667" calcext:value-type="float">
            <text:p>0,00029791666666666700</text:p>
          </table:table-cell>
          <table:table-cell table:formula="of:=[.D35]-[.D34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78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06944444444444" calcext:value-type="float">
            <text:p>0,00030694444444444400</text:p>
          </table:table-cell>
          <table:table-cell table:formula="of:=[.D36]-[.D35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78" office:value-type="float" office:value="2730" calcext:value-type="float">
            <text:p>273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15972222222222" calcext:value-type="float">
            <text:p>0,00031597222222222200</text:p>
          </table:table-cell>
          <table:table-cell table:formula="of:=[.D37]-[.D36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78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25" calcext:value-type="float">
            <text:p>0,00032500000000000000</text:p>
          </table:table-cell>
          <table:table-cell table:formula="of:=[.D38]-[.D37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78" office:value-type="float" office:value="2886" calcext:value-type="float">
            <text:p>2886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34027777777778" calcext:value-type="float">
            <text:p>0,00033402777777777800</text:p>
          </table:table-cell>
          <table:table-cell table:formula="of:=[.D39]-[.D38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78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43055555555556" calcext:value-type="float">
            <text:p>0,00034305555555555600</text:p>
          </table:table-cell>
          <table:table-cell table:formula="of:=[.D40]-[.D39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78" office:value-type="float" office:value="3042" calcext:value-type="float">
            <text:p>3042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52083333333333" calcext:value-type="float">
            <text:p>0,00035208333333333300</text:p>
          </table:table-cell>
          <table:table-cell table:formula="of:=[.D41]-[.D40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78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61111111111111" calcext:value-type="float">
            <text:p>0,00036111111111111100</text:p>
          </table:table-cell>
          <table:table-cell table:formula="of:=[.D42]-[.D41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78" office:value-type="float" office:value="3198" calcext:value-type="float">
            <text:p>3198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70138888888889" calcext:value-type="float">
            <text:p>0,00037013888888888900</text:p>
          </table:table-cell>
          <table:table-cell table:formula="of:=[.D43]-[.D42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78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79166666666667" calcext:value-type="float">
            <text:p>0,00037916666666666700</text:p>
          </table:table-cell>
          <table:table-cell table:formula="of:=[.D44]-[.D43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78" office:value-type="float" office:value="3354" calcext:value-type="float">
            <text:p>3354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88194444444444" calcext:value-type="float">
            <text:p>0,00038819444444444400</text:p>
          </table:table-cell>
          <table:table-cell table:formula="of:=[.D45]-[.D44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78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97222222222222" calcext:value-type="float">
            <text:p>0,00039722222222222200</text:p>
          </table:table-cell>
          <table:table-cell table:formula="of:=[.D46]-[.D45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78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0625" calcext:value-type="float">
            <text:p>0,00040625000000000000</text:p>
          </table:table-cell>
          <table:table-cell table:formula="of:=[.D47]-[.D46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78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15277777777778" calcext:value-type="float">
            <text:p>0,00041527777777777800</text:p>
          </table:table-cell>
          <table:table-cell table:formula="of:=[.D48]-[.D47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78" office:value-type="float" office:value="3666" calcext:value-type="float">
            <text:p>3666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24305555555556" calcext:value-type="float">
            <text:p>0,00042430555555555600</text:p>
          </table:table-cell>
          <table:table-cell table:formula="of:=[.D49]-[.D48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78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33333333333333" calcext:value-type="float">
            <text:p>0,00043333333333333300</text:p>
          </table:table-cell>
          <table:table-cell table:formula="of:=[.D50]-[.D49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78" office:value-type="float" office:value="3822" calcext:value-type="float">
            <text:p>3822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42361111111111" calcext:value-type="float">
            <text:p>0,00044236111111111100</text:p>
          </table:table-cell>
          <table:table-cell table:formula="of:=[.D51]-[.D50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78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51388888888889" calcext:value-type="float">
            <text:p>0,00045138888888888900</text:p>
          </table:table-cell>
          <table:table-cell table:formula="of:=[.D52]-[.D51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78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60416666666667" calcext:value-type="float">
            <text:p>0,00046041666666666700</text:p>
          </table:table-cell>
          <table:table-cell table:formula="of:=[.D53]-[.D52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78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69444444444444" calcext:value-type="float">
            <text:p>0,00046944444444444400</text:p>
          </table:table-cell>
          <table:table-cell table:formula="of:=[.D54]-[.D53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78" office:value-type="float" office:value="4134" calcext:value-type="float">
            <text:p>4134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78472222222222" calcext:value-type="float">
            <text:p>0,00047847222222222200</text:p>
          </table:table-cell>
          <table:table-cell table:formula="of:=[.D55]-[.D54]" office:value-type="float" office:value="0.00000902777777777778" calcext:value-type="float">
            <text:p>0,0000090277777777777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78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4875" calcext:value-type="float">
            <text:p>0,00048750000000000000</text:p>
          </table:table-cell>
          <table:table-cell table:formula="of:=[.D56]-[.D55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78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496527777777778" calcext:value-type="float">
            <text:p>0,00049652777777777800</text:p>
          </table:table-cell>
          <table:table-cell table:formula="of:=[.D57]-[.D5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78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05555555555556" calcext:value-type="float">
            <text:p>0,00050555555555555600</text:p>
          </table:table-cell>
          <table:table-cell table:formula="of:=[.D58]-[.D57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78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14583333333333" calcext:value-type="float">
            <text:p>0,00051458333333333300</text:p>
          </table:table-cell>
          <table:table-cell table:formula="of:=[.D59]-[.D5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78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23611111111111" calcext:value-type="float">
            <text:p>0,00052361111111111100</text:p>
          </table:table-cell>
          <table:table-cell table:formula="of:=[.D60]-[.D59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78" office:value-type="float" office:value="4602" calcext:value-type="float">
            <text:p>4602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32638888888889" calcext:value-type="float">
            <text:p>0,00053263888888888900</text:p>
          </table:table-cell>
          <table:table-cell table:formula="of:=[.D61]-[.D6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78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41666666666667" calcext:value-type="float">
            <text:p>0,00054166666666666700</text:p>
          </table:table-cell>
          <table:table-cell table:formula="of:=[.D62]-[.D61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78" office:value-type="float" office:value="4758" calcext:value-type="float">
            <text:p>4758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50694444444445" calcext:value-type="float">
            <text:p>0,00055069444444444500</text:p>
          </table:table-cell>
          <table:table-cell table:formula="of:=[.D63]-[.D6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78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59722222222222" calcext:value-type="float">
            <text:p>0,00055972222222222200</text:p>
          </table:table-cell>
          <table:table-cell table:formula="of:=[.D64]-[.D63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78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6875" calcext:value-type="float">
            <text:p>0,00056875000000000000</text:p>
          </table:table-cell>
          <table:table-cell table:formula="of:=[.D65]-[.D6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78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577777777777778" calcext:value-type="float">
            <text:p>0,00057777777777777800</text:p>
          </table:table-cell>
          <table:table-cell table:formula="of:=[.D66]-[.D65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78" office:value-type="float" office:value="5070" calcext:value-type="float">
            <text:p>507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586805555555556" calcext:value-type="float">
            <text:p>0,00058680555555555600</text:p>
          </table:table-cell>
          <table:table-cell table:formula="of:=[.D67]-[.D6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78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595833333333333" calcext:value-type="float">
            <text:p>0,00059583333333333300</text:p>
          </table:table-cell>
          <table:table-cell table:formula="of:=[.D68]-[.D67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78" office:value-type="float" office:value="5226" calcext:value-type="float">
            <text:p>5226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04861111111111" calcext:value-type="float">
            <text:p>0,00060486111111111100</text:p>
          </table:table-cell>
          <table:table-cell table:formula="of:=[.D69]-[.D6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78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13888888888889" calcext:value-type="float">
            <text:p>0,00061388888888888900</text:p>
          </table:table-cell>
          <table:table-cell table:formula="of:=[.D70]-[.D69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78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22916666666667" calcext:value-type="float">
            <text:p>0,00062291666666666700</text:p>
          </table:table-cell>
          <table:table-cell table:formula="of:=[.D71]-[.D7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78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31944444444444" calcext:value-type="float">
            <text:p>0,00063194444444444400</text:p>
          </table:table-cell>
          <table:table-cell table:formula="of:=[.D72]-[.D71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78" office:value-type="float" office:value="5538" calcext:value-type="float">
            <text:p>5538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40972222222222" calcext:value-type="float">
            <text:p>0,00064097222222222200</text:p>
          </table:table-cell>
          <table:table-cell table:formula="of:=[.D73]-[.D7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78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5" calcext:value-type="float">
            <text:p>0,00065000000000000000</text:p>
          </table:table-cell>
          <table:table-cell table:formula="of:=[.D74]-[.D73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78" office:value-type="float" office:value="5694" calcext:value-type="float">
            <text:p>5694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59027777777778" calcext:value-type="float">
            <text:p>0,00065902777777777800</text:p>
          </table:table-cell>
          <table:table-cell table:formula="of:=[.D75]-[.D7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78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68055555555556" calcext:value-type="float">
            <text:p>0,00066805555555555600</text:p>
          </table:table-cell>
          <table:table-cell table:formula="of:=[.D76]-[.D75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78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677083333333333" calcext:value-type="float">
            <text:p>0,00067708333333333300</text:p>
          </table:table-cell>
          <table:table-cell table:formula="of:=[.D77]-[.D7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78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686111111111111" calcext:value-type="float">
            <text:p>0,00068611111111111100</text:p>
          </table:table-cell>
          <table:table-cell table:formula="of:=[.D78]-[.D77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78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695138888888889" calcext:value-type="float">
            <text:p>0,00069513888888888900</text:p>
          </table:table-cell>
          <table:table-cell table:formula="of:=[.D79]-[.D7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78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04166666666667" calcext:value-type="float">
            <text:p>0,00070416666666666700</text:p>
          </table:table-cell>
          <table:table-cell table:formula="of:=[.D80]-[.D79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78" office:value-type="float" office:value="6162" calcext:value-type="float">
            <text:p>6162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13194444444445" calcext:value-type="float">
            <text:p>0,00071319444444444500</text:p>
          </table:table-cell>
          <table:table-cell table:formula="of:=[.D81]-[.D8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78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22222222222222" calcext:value-type="float">
            <text:p>0,00072222222222222200</text:p>
          </table:table-cell>
          <table:table-cell table:formula="of:=[.D82]-[.D81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78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3125" calcext:value-type="float">
            <text:p>0,00073125000000000000</text:p>
          </table:table-cell>
          <table:table-cell table:formula="of:=[.D83]-[.D8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78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40277777777778" calcext:value-type="float">
            <text:p>0,00074027777777777800</text:p>
          </table:table-cell>
          <table:table-cell table:formula="of:=[.D84]-[.D83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78" office:value-type="float" office:value="6474" calcext:value-type="float">
            <text:p>6474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49305555555556" calcext:value-type="float">
            <text:p>0,00074930555555555600</text:p>
          </table:table-cell>
          <table:table-cell table:formula="of:=[.D85]-[.D8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78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58333333333333" calcext:value-type="float">
            <text:p>0,00075833333333333300</text:p>
          </table:table-cell>
          <table:table-cell table:formula="of:=[.D86]-[.D85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78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67361111111111" calcext:value-type="float">
            <text:p>0,00076736111111111100</text:p>
          </table:table-cell>
          <table:table-cell table:formula="of:=[.D87]-[.D8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78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776388888888889" calcext:value-type="float">
            <text:p>0,00077638888888888900</text:p>
          </table:table-cell>
          <table:table-cell table:formula="of:=[.D88]-[.D87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78" office:value-type="float" office:value="6786" calcext:value-type="float">
            <text:p>6786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785416666666667" calcext:value-type="float">
            <text:p>0,00078541666666666700</text:p>
          </table:table-cell>
          <table:table-cell table:formula="of:=[.D89]-[.D8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78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794444444444444" calcext:value-type="float">
            <text:p>0,00079444444444444500</text:p>
          </table:table-cell>
          <table:table-cell table:formula="of:=[.D90]-[.D89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78" office:value-type="float" office:value="6942" calcext:value-type="float">
            <text:p>6942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03472222222222" calcext:value-type="float">
            <text:p>0,00080347222222222200</text:p>
          </table:table-cell>
          <table:table-cell table:formula="of:=[.D91]-[.D9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78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125" calcext:value-type="float">
            <text:p>0,00081250000000000000</text:p>
          </table:table-cell>
          <table:table-cell table:formula="of:=[.D92]-[.D91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78" office:value-type="float" office:value="7098" calcext:value-type="float">
            <text:p>7098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21527777777778" calcext:value-type="float">
            <text:p>0,00082152777777777800</text:p>
          </table:table-cell>
          <table:table-cell table:formula="of:=[.D93]-[.D9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78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30555555555556" calcext:value-type="float">
            <text:p>0,00083055555555555600</text:p>
          </table:table-cell>
          <table:table-cell table:formula="of:=[.D94]-[.D93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78" office:value-type="float" office:value="7254" calcext:value-type="float">
            <text:p>7254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39583333333333" calcext:value-type="float">
            <text:p>0,00083958333333333300</text:p>
          </table:table-cell>
          <table:table-cell table:formula="of:=[.D95]-[.D9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78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48611111111111" calcext:value-type="float">
            <text:p>0,00084861111111111100</text:p>
          </table:table-cell>
          <table:table-cell table:formula="of:=[.D96]-[.D95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78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57638888888889" calcext:value-type="float">
            <text:p>0,00085763888888888900</text:p>
          </table:table-cell>
          <table:table-cell table:formula="of:=[.D97]-[.D9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78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866666666666667" calcext:value-type="float">
            <text:p>0,00086666666666666700</text:p>
          </table:table-cell>
          <table:table-cell table:formula="of:=[.D98]-[.D97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78" office:value-type="float" office:value="7566" calcext:value-type="float">
            <text:p>7566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875694444444445" calcext:value-type="float">
            <text:p>0,00087569444444444500</text:p>
          </table:table-cell>
          <table:table-cell table:formula="of:=[.D99]-[.D9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78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884722222222222" calcext:value-type="float">
            <text:p>0,00088472222222222200</text:p>
          </table:table-cell>
          <table:table-cell table:formula="of:=[.D100]-[.D99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78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89375" calcext:value-type="float">
            <text:p>0,00089375000000000000</text:p>
          </table:table-cell>
          <table:table-cell table:formula="of:=[.D101]-[.D10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78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02777777777778" calcext:value-type="float">
            <text:p>0,00090277777777777800</text:p>
          </table:table-cell>
          <table:table-cell table:formula="of:=[.D102]-[.D101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78" office:value-type="float" office:value="7878" calcext:value-type="float">
            <text:p>7878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11805555555556" calcext:value-type="float">
            <text:p>0,00091180555555555600</text:p>
          </table:table-cell>
          <table:table-cell table:formula="of:=[.D103]-[.D10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78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20833333333333" calcext:value-type="float">
            <text:p>0,00092083333333333300</text:p>
          </table:table-cell>
          <table:table-cell table:formula="of:=[.D104]-[.D103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78" office:value-type="float" office:value="8034" calcext:value-type="float">
            <text:p>8034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29861111111111" calcext:value-type="float">
            <text:p>0,00092986111111111100</text:p>
          </table:table-cell>
          <table:table-cell table:formula="of:=[.D105]-[.D10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78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38888888888889" calcext:value-type="float">
            <text:p>0,00093888888888888900</text:p>
          </table:table-cell>
          <table:table-cell table:formula="of:=[.D106]-[.D105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78" office:value-type="float" office:value="8190" calcext:value-type="float">
            <text:p>819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47916666666667" calcext:value-type="float">
            <text:p>0,00094791666666666700</text:p>
          </table:table-cell>
          <table:table-cell table:formula="of:=[.D107]-[.D10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78" office:value-type="float" office:value="8268" calcext:value-type="float">
            <text:p>826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56944444444444" calcext:value-type="float">
            <text:p>0,00095694444444444500</text:p>
          </table:table-cell>
          <table:table-cell table:formula="of:=[.D108]-[.D107]" office:value-type="float" office:value="0.00000902777777777783" calcext:value-type="float">
            <text:p>0,0000090277777777778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78" office:value-type="float" office:value="8346" calcext:value-type="float">
            <text:p>8346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965972222222222" calcext:value-type="float">
            <text:p>0,00096597222222222200</text:p>
          </table:table-cell>
          <table:table-cell table:formula="of:=[.D109]-[.D10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78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975" calcext:value-type="float">
            <text:p>0,00097500000000000000</text:p>
          </table:table-cell>
          <table:table-cell table:formula="of:=[.D110]-[.D109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78" office:value-type="float" office:value="8502" calcext:value-type="float">
            <text:p>8502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984027777777778" calcext:value-type="float">
            <text:p>0,00098402777777777800</text:p>
          </table:table-cell>
          <table:table-cell table:formula="of:=[.D111]-[.D11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78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993055555555556" calcext:value-type="float">
            <text:p>0,00099305555555555600</text:p>
          </table:table-cell>
          <table:table-cell table:formula="of:=[.D112]-[.D111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78" office:value-type="float" office:value="8658" calcext:value-type="float">
            <text:p>8658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0208333333333" calcext:value-type="float">
            <text:p>0,00100208333333333000</text:p>
          </table:table-cell>
          <table:table-cell table:formula="of:=[.D113]-[.D11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78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01111111111111" calcext:value-type="float">
            <text:p>0,00101111111111111000</text:p>
          </table:table-cell>
          <table:table-cell table:formula="of:=[.D114]-[.D113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78" office:value-type="float" office:value="8814" calcext:value-type="float">
            <text:p>8814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2013888888889" calcext:value-type="float">
            <text:p>0,00102013888888889000</text:p>
          </table:table-cell>
          <table:table-cell table:formula="of:=[.D115]-[.D114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78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2916666666667" calcext:value-type="float">
            <text:p>0,00102916666666667000</text:p>
          </table:table-cell>
          <table:table-cell table:formula="of:=[.D116]-[.D115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78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03819444444444" calcext:value-type="float">
            <text:p>0,00103819444444444000</text:p>
          </table:table-cell>
          <table:table-cell table:formula="of:=[.D117]-[.D11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78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04722222222222" calcext:value-type="float">
            <text:p>0,00104722222222222000</text:p>
          </table:table-cell>
          <table:table-cell table:formula="of:=[.D118]-[.D117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78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5625" calcext:value-type="float">
            <text:p>0,00105625000000000000</text:p>
          </table:table-cell>
          <table:table-cell table:formula="of:=[.D119]-[.D118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78" office:value-type="float" office:value="9204" calcext:value-type="float">
            <text:p>920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06527777777778" calcext:value-type="float">
            <text:p>0,00106527777777778000</text:p>
          </table:table-cell>
          <table:table-cell table:formula="of:=[.D120]-[.D119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78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07430555555556" calcext:value-type="float">
            <text:p>0,00107430555555556000</text:p>
          </table:table-cell>
          <table:table-cell table:formula="of:=[.D121]-[.D12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78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08333333333333" calcext:value-type="float">
            <text:p>0,00108333333333333000</text:p>
          </table:table-cell>
          <table:table-cell table:formula="of:=[.D122]-[.D121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78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09236111111111" calcext:value-type="float">
            <text:p>0,00109236111111111000</text:p>
          </table:table-cell>
          <table:table-cell table:formula="of:=[.D123]-[.D122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78" office:value-type="float" office:value="9516" calcext:value-type="float">
            <text:p>951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10138888888889" calcext:value-type="float">
            <text:p>0,00110138888888889000</text:p>
          </table:table-cell>
          <table:table-cell table:formula="of:=[.D124]-[.D123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78" office:value-type="float" office:value="9594" calcext:value-type="float">
            <text:p>9594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11041666666667" calcext:value-type="float">
            <text:p>0,00111041666666667000</text:p>
          </table:table-cell>
          <table:table-cell table:formula="of:=[.D125]-[.D12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78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11944444444444" calcext:value-type="float">
            <text:p>0,00111944444444444000</text:p>
          </table:table-cell>
          <table:table-cell table:formula="of:=[.D126]-[.D125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78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12847222222222" calcext:value-type="float">
            <text:p>0,00112847222222222000</text:p>
          </table:table-cell>
          <table:table-cell table:formula="of:=[.D127]-[.D126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78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1375" calcext:value-type="float">
            <text:p>0,00113750000000000000</text:p>
          </table:table-cell>
          <table:table-cell table:formula="of:=[.D128]-[.D127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78" office:value-type="float" office:value="9906" calcext:value-type="float">
            <text:p>9906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14652777777778" calcext:value-type="float">
            <text:p>0,00114652777777778000</text:p>
          </table:table-cell>
          <table:table-cell table:formula="of:=[.D129]-[.D12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78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15555555555556" calcext:value-type="float">
            <text:p>0,00115555555555556000</text:p>
          </table:table-cell>
          <table:table-cell table:formula="of:=[.D130]-[.D129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78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16458333333333" calcext:value-type="float">
            <text:p>0,00116458333333333000</text:p>
          </table:table-cell>
          <table:table-cell table:formula="of:=[.D131]-[.D13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78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17361111111111" calcext:value-type="float">
            <text:p>0,00117361111111111000</text:p>
          </table:table-cell>
          <table:table-cell table:formula="of:=[.D132]-[.D131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78" office:value-type="float" office:value="10218" calcext:value-type="float">
            <text:p>10218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18263888888889" calcext:value-type="float">
            <text:p>0,00118263888888889000</text:p>
          </table:table-cell>
          <table:table-cell table:formula="of:=[.D133]-[.D13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78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19166666666667" calcext:value-type="float">
            <text:p>0,00119166666666667000</text:p>
          </table:table-cell>
          <table:table-cell table:formula="of:=[.D134]-[.D13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78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20069444444444" calcext:value-type="float">
            <text:p>0,00120069444444444000</text:p>
          </table:table-cell>
          <table:table-cell table:formula="of:=[.D135]-[.D13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78" office:value-type="float" office:value="10452" calcext:value-type="float">
            <text:p>1045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20972222222222" calcext:value-type="float">
            <text:p>0,00120972222222222000</text:p>
          </table:table-cell>
          <table:table-cell table:formula="of:=[.D136]-[.D135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78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21875" calcext:value-type="float">
            <text:p>0,00121875000000000000</text:p>
          </table:table-cell>
          <table:table-cell table:formula="of:=[.D137]-[.D13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78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22777777777778" calcext:value-type="float">
            <text:p>0,00122777777777778000</text:p>
          </table:table-cell>
          <table:table-cell table:formula="of:=[.D138]-[.D13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78" office:value-type="float" office:value="10686" calcext:value-type="float">
            <text:p>10686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23680555555556" calcext:value-type="float">
            <text:p>0,00123680555555556000</text:p>
          </table:table-cell>
          <table:table-cell table:formula="of:=[.D139]-[.D13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78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24583333333333" calcext:value-type="float">
            <text:p>0,00124583333333333000</text:p>
          </table:table-cell>
          <table:table-cell table:formula="of:=[.D140]-[.D139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78" office:value-type="float" office:value="10842" calcext:value-type="float">
            <text:p>10842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25486111111111" calcext:value-type="float">
            <text:p>0,00125486111111111000</text:p>
          </table:table-cell>
          <table:table-cell table:formula="of:=[.D141]-[.D14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78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26388888888889" calcext:value-type="float">
            <text:p>0,00126388888888889000</text:p>
          </table:table-cell>
          <table:table-cell table:formula="of:=[.D142]-[.D14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78" office:value-type="float" office:value="10998" calcext:value-type="float">
            <text:p>10998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27291666666667" calcext:value-type="float">
            <text:p>0,00127291666666667000</text:p>
          </table:table-cell>
          <table:table-cell table:formula="of:=[.D143]-[.D14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78" office:value-type="float" office:value="11076" calcext:value-type="float">
            <text:p>1107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28194444444444" calcext:value-type="float">
            <text:p>0,00128194444444444000</text:p>
          </table:table-cell>
          <table:table-cell table:formula="of:=[.D144]-[.D143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78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29097222222222" calcext:value-type="float">
            <text:p>0,00129097222222222000</text:p>
          </table:table-cell>
          <table:table-cell table:formula="of:=[.D145]-[.D14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78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3" calcext:value-type="float">
            <text:p>0,00130000000000000000</text:p>
          </table:table-cell>
          <table:table-cell table:formula="of:=[.D146]-[.D14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78" office:value-type="float" office:value="11310" calcext:value-type="float">
            <text:p>1131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30902777777778" calcext:value-type="float">
            <text:p>0,00130902777777778000</text:p>
          </table:table-cell>
          <table:table-cell table:formula="of:=[.D147]-[.D14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78" office:value-type="float" office:value="11388" calcext:value-type="float">
            <text:p>1138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31805555555556" calcext:value-type="float">
            <text:p>0,00131805555555556000</text:p>
          </table:table-cell>
          <table:table-cell table:formula="of:=[.D148]-[.D147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78" office:value-type="float" office:value="11466" calcext:value-type="float">
            <text:p>11466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32708333333333" calcext:value-type="float">
            <text:p>0,00132708333333333000</text:p>
          </table:table-cell>
          <table:table-cell table:formula="of:=[.D149]-[.D14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78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33611111111111" calcext:value-type="float">
            <text:p>0,00133611111111111000</text:p>
          </table:table-cell>
          <table:table-cell table:formula="of:=[.D150]-[.D14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78" office:value-type="float" office:value="11622" calcext:value-type="float">
            <text:p>11622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34513888888889" calcext:value-type="float">
            <text:p>0,00134513888888889000</text:p>
          </table:table-cell>
          <table:table-cell table:formula="of:=[.D151]-[.D15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78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35416666666667" calcext:value-type="float">
            <text:p>0,00135416666666667000</text:p>
          </table:table-cell>
          <table:table-cell table:formula="of:=[.D152]-[.D151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78" office:value-type="float" office:value="11778" calcext:value-type="float">
            <text:p>11778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36319444444444" calcext:value-type="float">
            <text:p>0,00136319444444444000</text:p>
          </table:table-cell>
          <table:table-cell table:formula="of:=[.D153]-[.D15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78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37222222222222" calcext:value-type="float">
            <text:p>0,00137222222222222000</text:p>
          </table:table-cell>
          <table:table-cell table:formula="of:=[.D154]-[.D15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78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38125" calcext:value-type="float">
            <text:p>0,00138125000000000000</text:p>
          </table:table-cell>
          <table:table-cell table:formula="of:=[.D155]-[.D15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78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39027777777778" calcext:value-type="float">
            <text:p>0,00139027777777778000</text:p>
          </table:table-cell>
          <table:table-cell table:formula="of:=[.D156]-[.D155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78" office:value-type="float" office:value="12090" calcext:value-type="float">
            <text:p>1209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39930555555556" calcext:value-type="float">
            <text:p>0,00139930555555556000</text:p>
          </table:table-cell>
          <table:table-cell table:formula="of:=[.D157]-[.D15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78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40833333333333" calcext:value-type="float">
            <text:p>0,00140833333333333000</text:p>
          </table:table-cell>
          <table:table-cell table:formula="of:=[.D158]-[.D15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78" office:value-type="float" office:value="12246" calcext:value-type="float">
            <text:p>12246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41736111111111" calcext:value-type="float">
            <text:p>0,00141736111111111000</text:p>
          </table:table-cell>
          <table:table-cell table:formula="of:=[.D159]-[.D15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78" office:value-type="float" office:value="12324" calcext:value-type="float">
            <text:p>1232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42638888888889" calcext:value-type="float">
            <text:p>0,00142638888888889000</text:p>
          </table:table-cell>
          <table:table-cell table:formula="of:=[.D160]-[.D159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78" office:value-type="float" office:value="12402" calcext:value-type="float">
            <text:p>12402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43541666666667" calcext:value-type="float">
            <text:p>0,00143541666666667000</text:p>
          </table:table-cell>
          <table:table-cell table:formula="of:=[.D161]-[.D16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78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44444444444444" calcext:value-type="float">
            <text:p>0,00144444444444444000</text:p>
          </table:table-cell>
          <table:table-cell table:formula="of:=[.D162]-[.D16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78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45347222222222" calcext:value-type="float">
            <text:p>0,00145347222222222000</text:p>
          </table:table-cell>
          <table:table-cell table:formula="of:=[.D163]-[.D16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78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4625" calcext:value-type="float">
            <text:p>0,00146250000000000000</text:p>
          </table:table-cell>
          <table:table-cell table:formula="of:=[.D164]-[.D163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78" office:value-type="float" office:value="12714" calcext:value-type="float">
            <text:p>12714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47152777777778" calcext:value-type="float">
            <text:p>0,00147152777777778000</text:p>
          </table:table-cell>
          <table:table-cell table:formula="of:=[.D165]-[.D16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78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48055555555556" calcext:value-type="float">
            <text:p>0,00148055555555556000</text:p>
          </table:table-cell>
          <table:table-cell table:formula="of:=[.D166]-[.D16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78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48958333333333" calcext:value-type="float">
            <text:p>0,00148958333333333000</text:p>
          </table:table-cell>
          <table:table-cell table:formula="of:=[.D167]-[.D16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78" office:value-type="float" office:value="12948" calcext:value-type="float">
            <text:p>1294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49861111111111" calcext:value-type="float">
            <text:p>0,00149861111111111000</text:p>
          </table:table-cell>
          <table:table-cell table:formula="of:=[.D168]-[.D167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78" office:value-type="float" office:value="13026" calcext:value-type="float">
            <text:p>13026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50763888888889" calcext:value-type="float">
            <text:p>0,00150763888888889000</text:p>
          </table:table-cell>
          <table:table-cell table:formula="of:=[.D169]-[.D16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78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51666666666667" calcext:value-type="float">
            <text:p>0,00151666666666667000</text:p>
          </table:table-cell>
          <table:table-cell table:formula="of:=[.D170]-[.D16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78" office:value-type="float" office:value="13182" calcext:value-type="float">
            <text:p>13182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52569444444444" calcext:value-type="float">
            <text:p>0,00152569444444444000</text:p>
          </table:table-cell>
          <table:table-cell table:formula="of:=[.D171]-[.D17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78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53472222222222" calcext:value-type="float">
            <text:p>0,00153472222222222000</text:p>
          </table:table-cell>
          <table:table-cell table:formula="of:=[.D172]-[.D171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78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54375" calcext:value-type="float">
            <text:p>0,00154375000000000000</text:p>
          </table:table-cell>
          <table:table-cell table:formula="of:=[.D173]-[.D17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78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55277777777778" calcext:value-type="float">
            <text:p>0,00155277777777778000</text:p>
          </table:table-cell>
          <table:table-cell table:formula="of:=[.D174]-[.D17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78" office:value-type="float" office:value="13494" calcext:value-type="float">
            <text:p>13494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56180555555556" calcext:value-type="float">
            <text:p>0,00156180555555556000</text:p>
          </table:table-cell>
          <table:table-cell table:formula="of:=[.D175]-[.D17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78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57083333333333" calcext:value-type="float">
            <text:p>0,00157083333333333000</text:p>
          </table:table-cell>
          <table:table-cell table:formula="of:=[.D176]-[.D175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78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57986111111111" calcext:value-type="float">
            <text:p>0,00157986111111111000</text:p>
          </table:table-cell>
          <table:table-cell table:formula="of:=[.D177]-[.D17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78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58888888888889" calcext:value-type="float">
            <text:p>0,00158888888888889000</text:p>
          </table:table-cell>
          <table:table-cell table:formula="of:=[.D178]-[.D17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78" office:value-type="float" office:value="13806" calcext:value-type="float">
            <text:p>13806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59791666666667" calcext:value-type="float">
            <text:p>0,00159791666666667000</text:p>
          </table:table-cell>
          <table:table-cell table:formula="of:=[.D179]-[.D17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78" office:value-type="float" office:value="13884" calcext:value-type="float">
            <text:p>1388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60694444444444" calcext:value-type="float">
            <text:p>0,00160694444444444000</text:p>
          </table:table-cell>
          <table:table-cell table:formula="of:=[.D180]-[.D179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78" office:value-type="float" office:value="13962" calcext:value-type="float">
            <text:p>13962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61597222222222" calcext:value-type="float">
            <text:p>0,00161597222222222000</text:p>
          </table:table-cell>
          <table:table-cell table:formula="of:=[.D181]-[.D18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78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625" calcext:value-type="float">
            <text:p>0,00162500000000000000</text:p>
          </table:table-cell>
          <table:table-cell table:formula="of:=[.D182]-[.D18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78" office:value-type="float" office:value="14118" calcext:value-type="float">
            <text:p>14118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63402777777778" calcext:value-type="float">
            <text:p>0,00163402777777778000</text:p>
          </table:table-cell>
          <table:table-cell table:formula="of:=[.D183]-[.D18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78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64305555555556" calcext:value-type="float">
            <text:p>0,00164305555555556000</text:p>
          </table:table-cell>
          <table:table-cell table:formula="of:=[.D184]-[.D183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78" office:value-type="float" office:value="14274" calcext:value-type="float">
            <text:p>14274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65208333333333" calcext:value-type="float">
            <text:p>0,00165208333333333000</text:p>
          </table:table-cell>
          <table:table-cell table:formula="of:=[.D185]-[.D18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78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66111111111111" calcext:value-type="float">
            <text:p>0,00166111111111111000</text:p>
          </table:table-cell>
          <table:table-cell table:formula="of:=[.D186]-[.D18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78" office:value-type="float" office:value="14430" calcext:value-type="float">
            <text:p>1443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67013888888889" calcext:value-type="float">
            <text:p>0,00167013888888889000</text:p>
          </table:table-cell>
          <table:table-cell table:formula="of:=[.D187]-[.D18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78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67916666666667" calcext:value-type="float">
            <text:p>0,00167916666666667000</text:p>
          </table:table-cell>
          <table:table-cell table:formula="of:=[.D188]-[.D187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78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68819444444444" calcext:value-type="float">
            <text:p>0,00168819444444444000</text:p>
          </table:table-cell>
          <table:table-cell table:formula="of:=[.D189]-[.D18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78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69722222222222" calcext:value-type="float">
            <text:p>0,00169722222222222000</text:p>
          </table:table-cell>
          <table:table-cell table:formula="of:=[.D190]-[.D18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78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70625" calcext:value-type="float">
            <text:p>0,00170625000000000000</text:p>
          </table:table-cell>
          <table:table-cell table:formula="of:=[.D191]-[.D19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78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71527777777778" calcext:value-type="float">
            <text:p>0,00171527777777778000</text:p>
          </table:table-cell>
          <table:table-cell table:formula="of:=[.D192]-[.D191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78" office:value-type="float" office:value="14898" calcext:value-type="float">
            <text:p>14898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72430555555556" calcext:value-type="float">
            <text:p>0,00172430555555556000</text:p>
          </table:table-cell>
          <table:table-cell table:formula="of:=[.D193]-[.D19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78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73333333333333" calcext:value-type="float">
            <text:p>0,00173333333333333000</text:p>
          </table:table-cell>
          <table:table-cell table:formula="of:=[.D194]-[.D19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78" office:value-type="float" office:value="15054" calcext:value-type="float">
            <text:p>15054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74236111111111" calcext:value-type="float">
            <text:p>0,00174236111111111000</text:p>
          </table:table-cell>
          <table:table-cell table:formula="of:=[.D195]-[.D19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78" office:value-type="float" office:value="15132" calcext:value-type="float">
            <text:p>1513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75138888888889" calcext:value-type="float">
            <text:p>0,00175138888888889000</text:p>
          </table:table-cell>
          <table:table-cell table:formula="of:=[.D196]-[.D195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78" office:value-type="float" office:value="15210" calcext:value-type="float">
            <text:p>1521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76041666666667" calcext:value-type="float">
            <text:p>0,00176041666666667000</text:p>
          </table:table-cell>
          <table:table-cell table:formula="of:=[.D197]-[.D19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78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76944444444444" calcext:value-type="float">
            <text:p>0,00176944444444444000</text:p>
          </table:table-cell>
          <table:table-cell table:formula="of:=[.D198]-[.D19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78" office:value-type="float" office:value="15366" calcext:value-type="float">
            <text:p>15366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77847222222222" calcext:value-type="float">
            <text:p>0,00177847222222222000</text:p>
          </table:table-cell>
          <table:table-cell table:formula="of:=[.D199]-[.D19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78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7875" calcext:value-type="float">
            <text:p>0,00178750000000000000</text:p>
          </table:table-cell>
          <table:table-cell table:formula="of:=[.D200]-[.D199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78" office:value-type="float" office:value="15522" calcext:value-type="float">
            <text:p>15522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79652777777778" calcext:value-type="float">
            <text:p>0,00179652777777778000</text:p>
          </table:table-cell>
          <table:table-cell table:formula="of:=[.D201]-[.D20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78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80555555555556" calcext:value-type="float">
            <text:p>0,00180555555555556000</text:p>
          </table:table-cell>
          <table:table-cell table:formula="of:=[.D202]-[.D20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78" office:value-type="float" office:value="15678" calcext:value-type="float">
            <text:p>15678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81458333333333" calcext:value-type="float">
            <text:p>0,00181458333333333000</text:p>
          </table:table-cell>
          <table:table-cell table:formula="of:=[.D203]-[.D20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78" office:value-type="float" office:value="15756" calcext:value-type="float">
            <text:p>1575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82361111111111" calcext:value-type="float">
            <text:p>0,00182361111111111000</text:p>
          </table:table-cell>
          <table:table-cell table:formula="of:=[.D204]-[.D203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78" office:value-type="float" office:value="15834" calcext:value-type="float">
            <text:p>15834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83263888888889" calcext:value-type="float">
            <text:p>0,00183263888888889000</text:p>
          </table:table-cell>
          <table:table-cell table:formula="of:=[.D205]-[.D20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78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84166666666667" calcext:value-type="float">
            <text:p>0,00184166666666667000</text:p>
          </table:table-cell>
          <table:table-cell table:formula="of:=[.D206]-[.D20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78" office:value-type="float" office:value="15990" calcext:value-type="float">
            <text:p>1599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85069444444444" calcext:value-type="float">
            <text:p>0,00185069444444444000</text:p>
          </table:table-cell>
          <table:table-cell table:formula="of:=[.D207]-[.D20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78" office:value-type="float" office:value="16068" calcext:value-type="float">
            <text:p>1606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85972222222222" calcext:value-type="float">
            <text:p>0,00185972222222222000</text:p>
          </table:table-cell>
          <table:table-cell table:formula="of:=[.D208]-[.D207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78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86875" calcext:value-type="float">
            <text:p>0,00186875000000000000</text:p>
          </table:table-cell>
          <table:table-cell table:formula="of:=[.D209]-[.D208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78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87777777777778" calcext:value-type="float">
            <text:p>0,00187777777777778000</text:p>
          </table:table-cell>
          <table:table-cell table:formula="of:=[.D210]-[.D20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78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88680555555556" calcext:value-type="float">
            <text:p>0,00188680555555556000</text:p>
          </table:table-cell>
          <table:table-cell table:formula="of:=[.D211]-[.D210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78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89583333333333" calcext:value-type="float">
            <text:p>0,00189583333333333000</text:p>
          </table:table-cell>
          <table:table-cell table:formula="of:=[.D212]-[.D211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78" office:value-type="float" office:value="16458" calcext:value-type="float">
            <text:p>16458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90486111111111" calcext:value-type="float">
            <text:p>0,00190486111111111000</text:p>
          </table:table-cell>
          <table:table-cell table:formula="of:=[.D213]-[.D212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78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91388888888889" calcext:value-type="float">
            <text:p>0,00191388888888889000</text:p>
          </table:table-cell>
          <table:table-cell table:formula="of:=[.D214]-[.D21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78" office:value-type="float" office:value="16614" calcext:value-type="float">
            <text:p>16614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92291666666667" calcext:value-type="float">
            <text:p>0,00192291666666667000</text:p>
          </table:table-cell>
          <table:table-cell table:formula="of:=[.D215]-[.D214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78" office:value-type="float" office:value="16692" calcext:value-type="float">
            <text:p>1669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93194444444444" calcext:value-type="float">
            <text:p>0,00193194444444444000</text:p>
          </table:table-cell>
          <table:table-cell table:formula="of:=[.D216]-[.D215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78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94097222222222" calcext:value-type="float">
            <text:p>0,00194097222222222000</text:p>
          </table:table-cell>
          <table:table-cell table:formula="of:=[.D217]-[.D216]" office:value-type="float" office:value="0.00000902777777777772" calcext:value-type="float">
            <text:p>0,00000902777777777772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78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95" calcext:value-type="float">
            <text:p>0,00195000000000000000</text:p>
          </table:table-cell>
          <table:table-cell table:formula="of:=[.D218]-[.D21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78" office:value-type="float" office:value="16926" calcext:value-type="float">
            <text:p>16926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95902777777778" calcext:value-type="float">
            <text:p>0,00195902777777778000</text:p>
          </table:table-cell>
          <table:table-cell table:formula="of:=[.D219]-[.D218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78" office:value-type="float" office:value="17004" calcext:value-type="float">
            <text:p>1700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96805555555556" calcext:value-type="float">
            <text:p>0,00196805555555556000</text:p>
          </table:table-cell>
          <table:table-cell table:formula="of:=[.D220]-[.D21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78" office:value-type="float" office:value="17082" calcext:value-type="float">
            <text:p>17082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97708333333333" calcext:value-type="float">
            <text:p>0,00197708333333333000</text:p>
          </table:table-cell>
          <table:table-cell table:formula="of:=[.D221]-[.D22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78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98611111111111" calcext:value-type="float">
            <text:p>0,00198611111111111000</text:p>
          </table:table-cell>
          <table:table-cell table:formula="of:=[.D222]-[.D221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78" office:value-type="float" office:value="17238" calcext:value-type="float">
            <text:p>17238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99513888888889" calcext:value-type="float">
            <text:p>0,00199513888888889000</text:p>
          </table:table-cell>
          <table:table-cell table:formula="of:=[.D223]-[.D222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78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00416666666667" calcext:value-type="float">
            <text:p>0,00200416666666667000</text:p>
          </table:table-cell>
          <table:table-cell table:formula="of:=[.D224]-[.D22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78" office:value-type="float" office:value="17394" calcext:value-type="float">
            <text:p>17394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01319444444444" calcext:value-type="float">
            <text:p>0,00201319444444444000</text:p>
          </table:table-cell>
          <table:table-cell table:formula="of:=[.D225]-[.D224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78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02222222222222" calcext:value-type="float">
            <text:p>0,00202222222222222000</text:p>
          </table:table-cell>
          <table:table-cell table:formula="of:=[.D226]-[.D22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78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03125" calcext:value-type="float">
            <text:p>0,00203125000000000000</text:p>
          </table:table-cell>
          <table:table-cell table:formula="of:=[.D227]-[.D226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78" office:value-type="float" office:value="17628" calcext:value-type="float">
            <text:p>1762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04027777777778" calcext:value-type="float">
            <text:p>0,00204027777777778000</text:p>
          </table:table-cell>
          <table:table-cell table:formula="of:=[.D228]-[.D22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78" office:value-type="float" office:value="17706" calcext:value-type="float">
            <text:p>17706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04930555555556" calcext:value-type="float">
            <text:p>0,00204930555555556000</text:p>
          </table:table-cell>
          <table:table-cell table:formula="of:=[.D229]-[.D228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78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05833333333333" calcext:value-type="float">
            <text:p>0,00205833333333333000</text:p>
          </table:table-cell>
          <table:table-cell table:formula="of:=[.D230]-[.D229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78" office:value-type="float" office:value="17862" calcext:value-type="float">
            <text:p>17862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06736111111111" calcext:value-type="float">
            <text:p>0,00206736111111111000</text:p>
          </table:table-cell>
          <table:table-cell table:formula="of:=[.D231]-[.D23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78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07638888888889" calcext:value-type="float">
            <text:p>0,00207638888888889000</text:p>
          </table:table-cell>
          <table:table-cell table:formula="of:=[.D232]-[.D23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78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08541666666667" calcext:value-type="float">
            <text:p>0,00208541666666667000</text:p>
          </table:table-cell>
          <table:table-cell table:formula="of:=[.D233]-[.D232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78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09444444444444" calcext:value-type="float">
            <text:p>0,00209444444444444000</text:p>
          </table:table-cell>
          <table:table-cell table:formula="of:=[.D234]-[.D23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78" office:value-type="float" office:value="18174" calcext:value-type="float">
            <text:p>18174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10347222222222" calcext:value-type="float">
            <text:p>0,00210347222222222000</text:p>
          </table:table-cell>
          <table:table-cell table:formula="of:=[.D235]-[.D234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78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1125" calcext:value-type="float">
            <text:p>0,00211250000000000000</text:p>
          </table:table-cell>
          <table:table-cell table:formula="of:=[.D236]-[.D23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78" office:value-type="float" office:value="18330" calcext:value-type="float">
            <text:p>1833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12152777777778" calcext:value-type="float">
            <text:p>0,00212152777777778000</text:p>
          </table:table-cell>
          <table:table-cell table:formula="of:=[.D237]-[.D236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78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13055555555556" calcext:value-type="float">
            <text:p>0,00213055555555556000</text:p>
          </table:table-cell>
          <table:table-cell table:formula="of:=[.D238]-[.D237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78" office:value-type="float" office:value="18486" calcext:value-type="float">
            <text:p>18486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13958333333333" calcext:value-type="float">
            <text:p>0,00213958333333333000</text:p>
          </table:table-cell>
          <table:table-cell table:formula="of:=[.D239]-[.D238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78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14861111111111" calcext:value-type="float">
            <text:p>0,00214861111111111000</text:p>
          </table:table-cell>
          <table:table-cell table:formula="of:=[.D240]-[.D23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78" office:value-type="float" office:value="18642" calcext:value-type="float">
            <text:p>18642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15763888888889" calcext:value-type="float">
            <text:p>0,00215763888888889000</text:p>
          </table:table-cell>
          <table:table-cell table:formula="of:=[.D241]-[.D240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78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16666666666667" calcext:value-type="float">
            <text:p>0,00216666666666667000</text:p>
          </table:table-cell>
          <table:table-cell table:formula="of:=[.D242]-[.D24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78" office:value-type="float" office:value="18798" calcext:value-type="float">
            <text:p>18798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17569444444444" calcext:value-type="float">
            <text:p>0,00217569444444444000</text:p>
          </table:table-cell>
          <table:table-cell table:formula="of:=[.D243]-[.D242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78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18472222222222" calcext:value-type="float">
            <text:p>0,00218472222222222000</text:p>
          </table:table-cell>
          <table:table-cell table:formula="of:=[.D244]-[.D24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78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19375" calcext:value-type="float">
            <text:p>0,00219375000000000000</text:p>
          </table:table-cell>
          <table:table-cell table:formula="of:=[.D245]-[.D244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78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20277777777778" calcext:value-type="float">
            <text:p>0,00220277777777778000</text:p>
          </table:table-cell>
          <table:table-cell table:formula="of:=[.D246]-[.D245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78" office:value-type="float" office:value="19110" calcext:value-type="float">
            <text:p>1911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21180555555556" calcext:value-type="float">
            <text:p>0,00221180555555556000</text:p>
          </table:table-cell>
          <table:table-cell table:formula="of:=[.D247]-[.D246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78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22083333333333" calcext:value-type="float">
            <text:p>0,00222083333333333000</text:p>
          </table:table-cell>
          <table:table-cell table:formula="of:=[.D248]-[.D24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78" office:value-type="float" office:value="19266" calcext:value-type="float">
            <text:p>19266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22986111111111" calcext:value-type="float">
            <text:p>0,00222986111111111000</text:p>
          </table:table-cell>
          <table:table-cell table:formula="of:=[.D249]-[.D248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78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23888888888889" calcext:value-type="float">
            <text:p>0,00223888888888889000</text:p>
          </table:table-cell>
          <table:table-cell table:formula="of:=[.D250]-[.D24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78" office:value-type="float" office:value="19422" calcext:value-type="float">
            <text:p>19422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24791666666667" calcext:value-type="float">
            <text:p>0,00224791666666667000</text:p>
          </table:table-cell>
          <table:table-cell table:formula="of:=[.D251]-[.D250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78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25694444444444" calcext:value-type="float">
            <text:p>0,00225694444444444000</text:p>
          </table:table-cell>
          <table:table-cell table:formula="of:=[.D252]-[.D25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78" office:value-type="float" office:value="19578" calcext:value-type="float">
            <text:p>19578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26597222222222" calcext:value-type="float">
            <text:p>0,00226597222222222000</text:p>
          </table:table-cell>
          <table:table-cell table:formula="of:=[.D253]-[.D252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78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275" calcext:value-type="float">
            <text:p>0,00227500000000000000</text:p>
          </table:table-cell>
          <table:table-cell table:formula="of:=[.D254]-[.D253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78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28402777777778" calcext:value-type="float">
            <text:p>0,00228402777777778000</text:p>
          </table:table-cell>
          <table:table-cell table:formula="of:=[.D255]-[.D254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78" office:value-type="float" office:value="19812" calcext:value-type="float">
            <text:p>1981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29305555555556" calcext:value-type="float">
            <text:p>0,00229305555555556000</text:p>
          </table:table-cell>
          <table:table-cell table:formula="of:=[.D256]-[.D25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78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30208333333333" calcext:value-type="float">
            <text:p>0,00230208333333333000</text:p>
          </table:table-cell>
          <table:table-cell table:formula="of:=[.D257]-[.D256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78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31111111111111" calcext:value-type="float">
            <text:p>0,00231111111111111000</text:p>
          </table:table-cell>
          <table:table-cell table:formula="of:=[.D258]-[.D25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78" office:value-type="float" office:value="20046" calcext:value-type="float">
            <text:p>20046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32013888888889" calcext:value-type="float">
            <text:p>0,00232013888888889000</text:p>
          </table:table-cell>
          <table:table-cell table:formula="of:=[.D259]-[.D258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78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32916666666667" calcext:value-type="float">
            <text:p>0,00232916666666667000</text:p>
          </table:table-cell>
          <table:table-cell table:formula="of:=[.D260]-[.D25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78" office:value-type="float" office:value="20202" calcext:value-type="float">
            <text:p>20202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33819444444444" calcext:value-type="float">
            <text:p>0,00233819444444444000</text:p>
          </table:table-cell>
          <table:table-cell table:formula="of:=[.D261]-[.D26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78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34722222222222" calcext:value-type="float">
            <text:p>0,00234722222222222000</text:p>
          </table:table-cell>
          <table:table-cell table:formula="of:=[.D262]-[.D261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78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35625" calcext:value-type="float">
            <text:p>0,00235625000000000000</text:p>
          </table:table-cell>
          <table:table-cell table:formula="of:=[.D263]-[.D262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78" office:value-type="float" office:value="20436" calcext:value-type="float">
            <text:p>2043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36527777777778" calcext:value-type="float">
            <text:p>0,00236527777777778000</text:p>
          </table:table-cell>
          <table:table-cell table:formula="of:=[.D264]-[.D26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78" office:value-type="float" office:value="20514" calcext:value-type="float">
            <text:p>20514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37430555555556" calcext:value-type="float">
            <text:p>0,00237430555555556000</text:p>
          </table:table-cell>
          <table:table-cell table:formula="of:=[.D265]-[.D264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78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38333333333333" calcext:value-type="float">
            <text:p>0,00238333333333333000</text:p>
          </table:table-cell>
          <table:table-cell table:formula="of:=[.D266]-[.D26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78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39236111111111" calcext:value-type="float">
            <text:p>0,00239236111111111000</text:p>
          </table:table-cell>
          <table:table-cell table:formula="of:=[.D267]-[.D266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78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40138888888889" calcext:value-type="float">
            <text:p>0,00240138888888889000</text:p>
          </table:table-cell>
          <table:table-cell table:formula="of:=[.D268]-[.D267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78" office:value-type="float" office:value="20826" calcext:value-type="float">
            <text:p>20826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41041666666667" calcext:value-type="float">
            <text:p>0,00241041666666667000</text:p>
          </table:table-cell>
          <table:table-cell table:formula="of:=[.D269]-[.D268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78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41944444444444" calcext:value-type="float">
            <text:p>0,00241944444444444000</text:p>
          </table:table-cell>
          <table:table-cell table:formula="of:=[.D270]-[.D269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78" office:value-type="float" office:value="20982" calcext:value-type="float">
            <text:p>20982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42847222222222" calcext:value-type="float">
            <text:p>0,00242847222222222000</text:p>
          </table:table-cell>
          <table:table-cell table:formula="of:=[.D271]-[.D27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78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4375" calcext:value-type="float">
            <text:p>0,00243750000000000000</text:p>
          </table:table-cell>
          <table:table-cell table:formula="of:=[.D272]-[.D27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78" office:value-type="float" office:value="21138" calcext:value-type="float">
            <text:p>21138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44652777777778" calcext:value-type="float">
            <text:p>0,00244652777777778000</text:p>
          </table:table-cell>
          <table:table-cell table:formula="of:=[.D273]-[.D272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78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45555555555556" calcext:value-type="float">
            <text:p>0,00245555555555556000</text:p>
          </table:table-cell>
          <table:table-cell table:formula="of:=[.D274]-[.D27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78" office:value-type="float" office:value="21294" calcext:value-type="float">
            <text:p>21294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46458333333333" calcext:value-type="float">
            <text:p>0,00246458333333333000</text:p>
          </table:table-cell>
          <table:table-cell table:formula="of:=[.D275]-[.D274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78" office:value-type="float" office:value="21372" calcext:value-type="float">
            <text:p>2137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47361111111111" calcext:value-type="float">
            <text:p>0,00247361111111111000</text:p>
          </table:table-cell>
          <table:table-cell table:formula="of:=[.D276]-[.D275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78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48263888888889" calcext:value-type="float">
            <text:p>0,00248263888888889000</text:p>
          </table:table-cell>
          <table:table-cell table:formula="of:=[.D277]-[.D276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78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49166666666667" calcext:value-type="float">
            <text:p>0,00249166666666667000</text:p>
          </table:table-cell>
          <table:table-cell table:formula="of:=[.D278]-[.D277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78" office:value-type="float" office:value="21606" calcext:value-type="float">
            <text:p>21606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50069444444444" calcext:value-type="float">
            <text:p>0,00250069444444444000</text:p>
          </table:table-cell>
          <table:table-cell table:formula="of:=[.D279]-[.D278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78" office:value-type="float" office:value="21684" calcext:value-type="float">
            <text:p>2168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50972222222222" calcext:value-type="float">
            <text:p>0,00250972222222222000</text:p>
          </table:table-cell>
          <table:table-cell table:formula="of:=[.D280]-[.D27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78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51875" calcext:value-type="float">
            <text:p>0,00251875000000000000</text:p>
          </table:table-cell>
          <table:table-cell table:formula="of:=[.D281]-[.D280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78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52777777777778" calcext:value-type="float">
            <text:p>0,00252777777777778000</text:p>
          </table:table-cell>
          <table:table-cell table:formula="of:=[.D282]-[.D281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78" office:value-type="float" office:value="21918" calcext:value-type="float">
            <text:p>21918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53680555555556" calcext:value-type="float">
            <text:p>0,00253680555555556000</text:p>
          </table:table-cell>
          <table:table-cell table:formula="of:=[.D283]-[.D282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78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54583333333333" calcext:value-type="float">
            <text:p>0,00254583333333333000</text:p>
          </table:table-cell>
          <table:table-cell table:formula="of:=[.D284]-[.D283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78" office:value-type="float" office:value="22074" calcext:value-type="float">
            <text:p>22074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55486111111111" calcext:value-type="float">
            <text:p>0,00255486111111111000</text:p>
          </table:table-cell>
          <table:table-cell table:formula="of:=[.D285]-[.D284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78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56388888888889" calcext:value-type="float">
            <text:p>0,00256388888888889000</text:p>
          </table:table-cell>
          <table:table-cell table:formula="of:=[.D286]-[.D285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78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57291666666667" calcext:value-type="float">
            <text:p>0,00257291666666667000</text:p>
          </table:table-cell>
          <table:table-cell table:formula="of:=[.D287]-[.D286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78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58194444444444" calcext:value-type="float">
            <text:p>0,00258194444444444000</text:p>
          </table:table-cell>
          <table:table-cell table:formula="of:=[.D288]-[.D28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78" office:value-type="float" office:value="22386" calcext:value-type="float">
            <text:p>22386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59097222222222" calcext:value-type="float">
            <text:p>0,00259097222222222000</text:p>
          </table:table-cell>
          <table:table-cell table:formula="of:=[.D289]-[.D288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78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6" calcext:value-type="float">
            <text:p>0,00260000000000000000</text:p>
          </table:table-cell>
          <table:table-cell table:formula="of:=[.D290]-[.D289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78" office:value-type="float" office:value="22542" calcext:value-type="float">
            <text:p>22542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60902777777778" calcext:value-type="float">
            <text:p>0,00260902777777778000</text:p>
          </table:table-cell>
          <table:table-cell table:formula="of:=[.D291]-[.D29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78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61805555555556" calcext:value-type="float">
            <text:p>0,00261805555555556000</text:p>
          </table:table-cell>
          <table:table-cell table:formula="of:=[.D292]-[.D291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78" office:value-type="float" office:value="22698" calcext:value-type="float">
            <text:p>22698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62708333333333" calcext:value-type="float">
            <text:p>0,00262708333333333000</text:p>
          </table:table-cell>
          <table:table-cell table:formula="of:=[.D293]-[.D292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78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63611111111111" calcext:value-type="float">
            <text:p>0,00263611111111111000</text:p>
          </table:table-cell>
          <table:table-cell table:formula="of:=[.D294]-[.D293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78" office:value-type="float" office:value="22854" calcext:value-type="float">
            <text:p>22854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64513888888889" calcext:value-type="float">
            <text:p>0,00264513888888889000</text:p>
          </table:table-cell>
          <table:table-cell table:formula="of:=[.D295]-[.D294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78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65416666666667" calcext:value-type="float">
            <text:p>0,00265416666666667000</text:p>
          </table:table-cell>
          <table:table-cell table:formula="of:=[.D296]-[.D29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78" office:value-type="float" office:value="23010" calcext:value-type="float">
            <text:p>2301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66319444444444" calcext:value-type="float">
            <text:p>0,00266319444444444000</text:p>
          </table:table-cell>
          <table:table-cell table:formula="of:=[.D297]-[.D296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78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67222222222222" calcext:value-type="float">
            <text:p>0,00267222222222222000</text:p>
          </table:table-cell>
          <table:table-cell table:formula="of:=[.D298]-[.D297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78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68125" calcext:value-type="float">
            <text:p>0,00268125000000000000</text:p>
          </table:table-cell>
          <table:table-cell table:formula="of:=[.D299]-[.D298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78" office:value-type="float" office:value="23244" calcext:value-type="float">
            <text:p>2324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69027777777778" calcext:value-type="float">
            <text:p>0,00269027777777778000</text:p>
          </table:table-cell>
          <table:table-cell table:formula="of:=[.D300]-[.D299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78" office:value-type="float" office:value="23322" calcext:value-type="float">
            <text:p>23322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69930555555556" calcext:value-type="float">
            <text:p>0,00269930555555556000</text:p>
          </table:table-cell>
          <table:table-cell table:formula="of:=[.D301]-[.D300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78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70833333333333" calcext:value-type="float">
            <text:p>0,00270833333333333000</text:p>
          </table:table-cell>
          <table:table-cell table:formula="of:=[.D302]-[.D301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78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71736111111111" calcext:value-type="float">
            <text:p>0,00271736111111111000</text:p>
          </table:table-cell>
          <table:table-cell table:formula="of:=[.D303]-[.D302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78" office:value-type="float" office:value="23556" calcext:value-type="float">
            <text:p>2355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72638888888889" calcext:value-type="float">
            <text:p>0,00272638888888889000</text:p>
          </table:table-cell>
          <table:table-cell table:formula="of:=[.D304]-[.D303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78" office:value-type="float" office:value="23634" calcext:value-type="float">
            <text:p>23634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73541666666667" calcext:value-type="float">
            <text:p>0,00273541666666667000</text:p>
          </table:table-cell>
          <table:table-cell table:formula="of:=[.D305]-[.D304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78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74444444444444" calcext:value-type="float">
            <text:p>0,00274444444444444000</text:p>
          </table:table-cell>
          <table:table-cell table:formula="of:=[.D306]-[.D305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78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75347222222222" calcext:value-type="float">
            <text:p>0,00275347222222222000</text:p>
          </table:table-cell>
          <table:table-cell table:formula="of:=[.D307]-[.D306]" office:value-type="float" office:value="0.00000902777777777794" calcext:value-type="float">
            <text:p>0,00000902777777777794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78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7625" calcext:value-type="float">
            <text:p>0,00276250000000000000</text:p>
          </table:table-cell>
          <table:table-cell table:formula="of:=[.D308]-[.D307]" office:value-type="float" office:value="0.00000902777777777751" calcext:value-type="float">
            <text:p>0,0000090277777777775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78" office:value-type="float" office:value="23946" calcext:value-type="float">
            <text:p>23946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77152777777778" calcext:value-type="float">
            <text:p>0,00277152777777778000</text:p>
          </table:table-cell>
          <table:table-cell table:formula="of:=#REF!-[.D308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57:26.923523774</meta:creation-date>
    <dc:date>2026-05-17T18:57:37.118946091</dc:date>
    <meta:editing-duration>PT11S</meta:editing-duration>
    <meta:editing-cycles>1</meta:editing-cycles>
    <meta:document-statistic meta:table-count="1" meta:cell-count="1540" meta:object-count="0"/>
    <meta:generator>LibreOffice/24.2.7.2$Linux_X86_64 LibreOffice_project/420$Build-2</meta:generator>
  </office:meta>
</office:document-meta>
</file>