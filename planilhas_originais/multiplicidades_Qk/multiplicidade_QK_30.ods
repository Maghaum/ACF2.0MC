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47222222222222" calcext:value-type="float">
            <text:p>0,00000347222222222222</text:p>
          </table:table-cell>
          <table:table-cell table:formula="of:=[.D3]-[.D2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0" office:value-type="float" office:value="60" calcext:value-type="float">
            <text:p>6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694444444444445" calcext:value-type="float">
            <text:p>0,00000694444444444445</text:p>
          </table:table-cell>
          <table:table-cell table:formula="of:=[.D4]-[.D3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0"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04166666666667" calcext:value-type="float">
            <text:p>0,00001041666666666670</text:p>
          </table:table-cell>
          <table:table-cell table:formula="of:=[.D5]-[.D4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0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38888888888889" calcext:value-type="float">
            <text:p>0,00001388888888888890</text:p>
          </table:table-cell>
          <table:table-cell table:formula="of:=[.D6]-[.D5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0" office:value-type="float" office:value="150" calcext:value-type="float">
            <text:p>15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73611111111111" calcext:value-type="float">
            <text:p>0,00001736111111111110</text:p>
          </table:table-cell>
          <table:table-cell table:formula="of:=[.D7]-[.D6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0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08333333333333" calcext:value-type="float">
            <text:p>0,00002083333333333330</text:p>
          </table:table-cell>
          <table:table-cell table:formula="of:=[.D8]-[.D7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0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43055555555556" calcext:value-type="float">
            <text:p>0,00002430555555555560</text:p>
          </table:table-cell>
          <table:table-cell table:formula="of:=[.D9]-[.D8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0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77777777777778" calcext:value-type="float">
            <text:p>0,00002777777777777780</text:p>
          </table:table-cell>
          <table:table-cell table:formula="of:=[.D10]-[.D9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0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125" calcext:value-type="float">
            <text:p>0,00003125000000000000</text:p>
          </table:table-cell>
          <table:table-cell table:formula="of:=[.D11]-[.D10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0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47222222222222" calcext:value-type="float">
            <text:p>0,00003472222222222220</text:p>
          </table:table-cell>
          <table:table-cell table:formula="of:=[.D12]-[.D11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0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81944444444444" calcext:value-type="float">
            <text:p>0,00003819444444444450</text:p>
          </table:table-cell>
          <table:table-cell table:formula="of:=[.D13]-[.D12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0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16666666666667" calcext:value-type="float">
            <text:p>0,00004166666666666670</text:p>
          </table:table-cell>
          <table:table-cell table:formula="of:=[.D14]-[.D13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0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51388888888889" calcext:value-type="float">
            <text:p>0,00004513888888888890</text:p>
          </table:table-cell>
          <table:table-cell table:formula="of:=[.D15]-[.D14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0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486111111111111" calcext:value-type="float">
            <text:p>0,00004861111111111110</text:p>
          </table:table-cell>
          <table:table-cell table:formula="of:=[.D16]-[.D15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0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520833333333333" calcext:value-type="float">
            <text:p>0,00005208333333333330</text:p>
          </table:table-cell>
          <table:table-cell table:formula="of:=[.D17]-[.D16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0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555555555555556" calcext:value-type="float">
            <text:p>0,00005555555555555560</text:p>
          </table:table-cell>
          <table:table-cell table:formula="of:=[.D18]-[.D17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0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590277777777778" calcext:value-type="float">
            <text:p>0,00005902777777777780</text:p>
          </table:table-cell>
          <table:table-cell table:formula="of:=[.D19]-[.D18]" office:value-type="float" office:value="0.00000347222222222222" calcext:value-type="float">
            <text:p>0,00000347222222222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0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625" calcext:value-type="float">
            <text:p>0,00006250000000000000</text:p>
          </table:table-cell>
          <table:table-cell table:formula="of:=[.D20]-[.D19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0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659722222222222" calcext:value-type="float">
            <text:p>0,00006597222222222220</text:p>
          </table:table-cell>
          <table:table-cell table:formula="of:=[.D21]-[.D20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694444444444444" calcext:value-type="float">
            <text:p>0,00006944444444444440</text:p>
          </table:table-cell>
          <table:table-cell table:formula="of:=[.D22]-[.D21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0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729166666666667" calcext:value-type="float">
            <text:p>0,00007291666666666670</text:p>
          </table:table-cell>
          <table:table-cell table:formula="of:=[.D23]-[.D22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0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763888888888889" calcext:value-type="float">
            <text:p>0,00007638888888888890</text:p>
          </table:table-cell>
          <table:table-cell table:formula="of:=[.D24]-[.D23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0" office:value-type="float" office:value="690" calcext:value-type="float">
            <text:p>69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798611111111111" calcext:value-type="float">
            <text:p>0,00007986111111111110</text:p>
          </table:table-cell>
          <table:table-cell table:formula="of:=[.D25]-[.D24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833333333333333" calcext:value-type="float">
            <text:p>0,00008333333333333330</text:p>
          </table:table-cell>
          <table:table-cell table:formula="of:=[.D26]-[.D25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0" office:value-type="float" office:value="750" calcext:value-type="float">
            <text:p>7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868055555555556" calcext:value-type="float">
            <text:p>0,00008680555555555560</text:p>
          </table:table-cell>
          <table:table-cell table:formula="of:=[.D27]-[.D26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0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902777777777778" calcext:value-type="float">
            <text:p>0,00009027777777777780</text:p>
          </table:table-cell>
          <table:table-cell table:formula="of:=[.D28]-[.D27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0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9375" calcext:value-type="float">
            <text:p>0,00009375000000000000</text:p>
          </table:table-cell>
          <table:table-cell table:formula="of:=[.D29]-[.D28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0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972222222222222" calcext:value-type="float">
            <text:p>0,00009722222222222220</text:p>
          </table:table-cell>
          <table:table-cell table:formula="of:=[.D30]-[.D29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0" office:value-type="float" office:value="870" calcext:value-type="float">
            <text:p>87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00694444444444" calcext:value-type="float">
            <text:p>0,00010069444444444400</text:p>
          </table:table-cell>
          <table:table-cell table:formula="of:=[.D31]-[.D30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04166666666667" calcext:value-type="float">
            <text:p>0,00010416666666666700</text:p>
          </table:table-cell>
          <table:table-cell table:formula="of:=[.D32]-[.D31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0" office:value-type="float" office:value="930" calcext:value-type="float">
            <text:p>93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07638888888889" calcext:value-type="float">
            <text:p>0,00010763888888888900</text:p>
          </table:table-cell>
          <table:table-cell table:formula="of:=[.D33]-[.D32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0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11111111111111" calcext:value-type="float">
            <text:p>0,00011111111111111100</text:p>
          </table:table-cell>
          <table:table-cell table:formula="of:=[.D34]-[.D33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0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14583333333333" calcext:value-type="float">
            <text:p>0,00011458333333333300</text:p>
          </table:table-cell>
          <table:table-cell table:formula="of:=[.D35]-[.D34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0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18055555555556" calcext:value-type="float">
            <text:p>0,00011805555555555600</text:p>
          </table:table-cell>
          <table:table-cell table:formula="of:=[.D36]-[.D35]" office:value-type="float" office:value="0.00000347222222222221" calcext:value-type="float">
            <text:p>0,000003472222222222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0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21527777777778" calcext:value-type="float">
            <text:p>0,00012152777777777800</text:p>
          </table:table-cell>
          <table:table-cell table:formula="of:=[.D37]-[.D36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0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25" calcext:value-type="float">
            <text:p>0,00012500000000000000</text:p>
          </table:table-cell>
          <table:table-cell table:formula="of:=[.D38]-[.D37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0" office:value-type="float" office:value="1110" calcext:value-type="float">
            <text:p>111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28472222222222" calcext:value-type="float">
            <text:p>0,00012847222222222200</text:p>
          </table:table-cell>
          <table:table-cell table:formula="of:=[.D39]-[.D3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0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31944444444444" calcext:value-type="float">
            <text:p>0,00013194444444444400</text:p>
          </table:table-cell>
          <table:table-cell table:formula="of:=[.D40]-[.D39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0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35416666666667" calcext:value-type="float">
            <text:p>0,00013541666666666700</text:p>
          </table:table-cell>
          <table:table-cell table:formula="of:=[.D41]-[.D40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38888888888889" calcext:value-type="float">
            <text:p>0,00013888888888888900</text:p>
          </table:table-cell>
          <table:table-cell table:formula="of:=[.D42]-[.D41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0" office:value-type="float" office:value="1230" calcext:value-type="float">
            <text:p>123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42361111111111" calcext:value-type="float">
            <text:p>0,00014236111111111100</text:p>
          </table:table-cell>
          <table:table-cell table:formula="of:=[.D43]-[.D42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0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45833333333333" calcext:value-type="float">
            <text:p>0,00014583333333333300</text:p>
          </table:table-cell>
          <table:table-cell table:formula="of:=[.D44]-[.D4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0" office:value-type="float" office:value="1290" calcext:value-type="float">
            <text:p>129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49305555555556" calcext:value-type="float">
            <text:p>0,00014930555555555600</text:p>
          </table:table-cell>
          <table:table-cell table:formula="of:=[.D45]-[.D44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0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52777777777778" calcext:value-type="float">
            <text:p>0,00015277777777777800</text:p>
          </table:table-cell>
          <table:table-cell table:formula="of:=[.D46]-[.D45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0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5625" calcext:value-type="float">
            <text:p>0,00015625000000000000</text:p>
          </table:table-cell>
          <table:table-cell table:formula="of:=[.D47]-[.D46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0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59722222222222" calcext:value-type="float">
            <text:p>0,00015972222222222200</text:p>
          </table:table-cell>
          <table:table-cell table:formula="of:=[.D48]-[.D4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0" office:value-type="float" office:value="1410" calcext:value-type="float">
            <text:p>141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63194444444444" calcext:value-type="float">
            <text:p>0,00016319444444444400</text:p>
          </table:table-cell>
          <table:table-cell table:formula="of:=[.D49]-[.D48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66666666666667" calcext:value-type="float">
            <text:p>0,00016666666666666700</text:p>
          </table:table-cell>
          <table:table-cell table:formula="of:=[.D50]-[.D49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0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70138888888889" calcext:value-type="float">
            <text:p>0,00017013888888888900</text:p>
          </table:table-cell>
          <table:table-cell table:formula="of:=[.D51]-[.D50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0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73611111111111" calcext:value-type="float">
            <text:p>0,00017361111111111100</text:p>
          </table:table-cell>
          <table:table-cell table:formula="of:=[.D52]-[.D51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0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77083333333333" calcext:value-type="float">
            <text:p>0,00017708333333333300</text:p>
          </table:table-cell>
          <table:table-cell table:formula="of:=[.D53]-[.D5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0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80555555555556" calcext:value-type="float">
            <text:p>0,00018055555555555600</text:p>
          </table:table-cell>
          <table:table-cell table:formula="of:=[.D54]-[.D53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0" office:value-type="float" office:value="1590" calcext:value-type="float">
            <text:p>159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84027777777778" calcext:value-type="float">
            <text:p>0,00018402777777777800</text:p>
          </table:table-cell>
          <table:table-cell table:formula="of:=[.D55]-[.D54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0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875" calcext:value-type="float">
            <text:p>0,00018750000000000000</text:p>
          </table:table-cell>
          <table:table-cell table:formula="of:=[.D56]-[.D55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0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90972222222222" calcext:value-type="float">
            <text:p>0,00019097222222222200</text:p>
          </table:table-cell>
          <table:table-cell table:formula="of:=[.D57]-[.D5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94444444444444" calcext:value-type="float">
            <text:p>0,00019444444444444400</text:p>
          </table:table-cell>
          <table:table-cell table:formula="of:=[.D58]-[.D57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0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97916666666667" calcext:value-type="float">
            <text:p>0,00019791666666666700</text:p>
          </table:table-cell>
          <table:table-cell table:formula="of:=[.D59]-[.D58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0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01388888888889" calcext:value-type="float">
            <text:p>0,00020138888888888900</text:p>
          </table:table-cell>
          <table:table-cell table:formula="of:=[.D60]-[.D59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0" office:value-type="float" office:value="1770" calcext:value-type="float">
            <text:p>177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04861111111111" calcext:value-type="float">
            <text:p>0,00020486111111111100</text:p>
          </table:table-cell>
          <table:table-cell table:formula="of:=[.D61]-[.D60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08333333333333" calcext:value-type="float">
            <text:p>0,00020833333333333300</text:p>
          </table:table-cell>
          <table:table-cell table:formula="of:=[.D62]-[.D6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0" office:value-type="float" office:value="1830" calcext:value-type="float">
            <text:p>183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11805555555556" calcext:value-type="float">
            <text:p>0,00021180555555555600</text:p>
          </table:table-cell>
          <table:table-cell table:formula="of:=[.D63]-[.D62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0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15277777777778" calcext:value-type="float">
            <text:p>0,00021527777777777800</text:p>
          </table:table-cell>
          <table:table-cell table:formula="of:=[.D64]-[.D63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0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1875" calcext:value-type="float">
            <text:p>0,00021875000000000000</text:p>
          </table:table-cell>
          <table:table-cell table:formula="of:=[.D65]-[.D64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0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22222222222222" calcext:value-type="float">
            <text:p>0,00022222222222222200</text:p>
          </table:table-cell>
          <table:table-cell table:formula="of:=[.D66]-[.D6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0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25694444444444" calcext:value-type="float">
            <text:p>0,00022569444444444400</text:p>
          </table:table-cell>
          <table:table-cell table:formula="of:=[.D67]-[.D66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0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29166666666667" calcext:value-type="float">
            <text:p>0,00022916666666666700</text:p>
          </table:table-cell>
          <table:table-cell table:formula="of:=[.D68]-[.D67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0" office:value-type="float" office:value="2010" calcext:value-type="float">
            <text:p>201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32638888888889" calcext:value-type="float">
            <text:p>0,00023263888888888900</text:p>
          </table:table-cell>
          <table:table-cell table:formula="of:=[.D69]-[.D68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0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36111111111111" calcext:value-type="float">
            <text:p>0,00023611111111111100</text:p>
          </table:table-cell>
          <table:table-cell table:formula="of:=[.D70]-[.D6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0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39583333333333" calcext:value-type="float">
            <text:p>0,00023958333333333300</text:p>
          </table:table-cell>
          <table:table-cell table:formula="of:=[.D71]-[.D70]" office:value-type="float" office:value="0.00000347222222222223" calcext:value-type="float">
            <text:p>0,000003472222222222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43055555555556" calcext:value-type="float">
            <text:p>0,00024305555555555600</text:p>
          </table:table-cell>
          <table:table-cell table:formula="of:=[.D72]-[.D71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0" office:value-type="float" office:value="2130" calcext:value-type="float">
            <text:p>213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46527777777778" calcext:value-type="float">
            <text:p>0,00024652777777777800</text:p>
          </table:table-cell>
          <table:table-cell table:formula="of:=[.D73]-[.D7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5" calcext:value-type="float">
            <text:p>0,00025000000000000000</text:p>
          </table:table-cell>
          <table:table-cell table:formula="of:=[.D74]-[.D7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0" office:value-type="float" office:value="2190" calcext:value-type="float">
            <text:p>219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53472222222222" calcext:value-type="float">
            <text:p>0,00025347222222222200</text:p>
          </table:table-cell>
          <table:table-cell table:formula="of:=[.D75]-[.D74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0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56944444444444" calcext:value-type="float">
            <text:p>0,00025694444444444400</text:p>
          </table:table-cell>
          <table:table-cell table:formula="of:=[.D76]-[.D7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0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60416666666667" calcext:value-type="float">
            <text:p>0,00026041666666666700</text:p>
          </table:table-cell>
          <table:table-cell table:formula="of:=[.D77]-[.D7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0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63888888888889" calcext:value-type="float">
            <text:p>0,00026388888888888900</text:p>
          </table:table-cell>
          <table:table-cell table:formula="of:=[.D78]-[.D77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0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67361111111111" calcext:value-type="float">
            <text:p>0,00026736111111111100</text:p>
          </table:table-cell>
          <table:table-cell table:formula="of:=[.D79]-[.D7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0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70833333333333" calcext:value-type="float">
            <text:p>0,00027083333333333300</text:p>
          </table:table-cell>
          <table:table-cell table:formula="of:=[.D80]-[.D79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0" office:value-type="float" office:value="2370" calcext:value-type="float">
            <text:p>237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74305555555556" calcext:value-type="float">
            <text:p>0,00027430555555555600</text:p>
          </table:table-cell>
          <table:table-cell table:formula="of:=[.D81]-[.D8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77777777777778" calcext:value-type="float">
            <text:p>0,00027777777777777800</text:p>
          </table:table-cell>
          <table:table-cell table:formula="of:=[.D82]-[.D8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0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8125" calcext:value-type="float">
            <text:p>0,00028125000000000000</text:p>
          </table:table-cell>
          <table:table-cell table:formula="of:=[.D83]-[.D82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0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84722222222222" calcext:value-type="float">
            <text:p>0,00028472222222222200</text:p>
          </table:table-cell>
          <table:table-cell table:formula="of:=[.D84]-[.D8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0" office:value-type="float" office:value="2490" calcext:value-type="float">
            <text:p>249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88194444444444" calcext:value-type="float">
            <text:p>0,00028819444444444400</text:p>
          </table:table-cell>
          <table:table-cell table:formula="of:=[.D85]-[.D84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91666666666667" calcext:value-type="float">
            <text:p>0,00029166666666666700</text:p>
          </table:table-cell>
          <table:table-cell table:formula="of:=[.D86]-[.D8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0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95138888888889" calcext:value-type="float">
            <text:p>0,00029513888888888900</text:p>
          </table:table-cell>
          <table:table-cell table:formula="of:=[.D87]-[.D8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0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98611111111111" calcext:value-type="float">
            <text:p>0,00029861111111111100</text:p>
          </table:table-cell>
          <table:table-cell table:formula="of:=[.D88]-[.D87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0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02083333333333" calcext:value-type="float">
            <text:p>0,00030208333333333300</text:p>
          </table:table-cell>
          <table:table-cell table:formula="of:=[.D89]-[.D8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0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05555555555556" calcext:value-type="float">
            <text:p>0,00030555555555555600</text:p>
          </table:table-cell>
          <table:table-cell table:formula="of:=[.D90]-[.D8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0" office:value-type="float" office:value="2670" calcext:value-type="float">
            <text:p>267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09027777777778" calcext:value-type="float">
            <text:p>0,00030902777777777800</text:p>
          </table:table-cell>
          <table:table-cell table:formula="of:=[.D91]-[.D90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125" calcext:value-type="float">
            <text:p>0,00031250000000000000</text:p>
          </table:table-cell>
          <table:table-cell table:formula="of:=[.D92]-[.D9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0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15972222222222" calcext:value-type="float">
            <text:p>0,00031597222222222200</text:p>
          </table:table-cell>
          <table:table-cell table:formula="of:=[.D93]-[.D92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0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19444444444444" calcext:value-type="float">
            <text:p>0,00031944444444444400</text:p>
          </table:table-cell>
          <table:table-cell table:formula="of:=[.D94]-[.D9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0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22916666666667" calcext:value-type="float">
            <text:p>0,00032291666666666700</text:p>
          </table:table-cell>
          <table:table-cell table:formula="of:=[.D95]-[.D9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0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26388888888889" calcext:value-type="float">
            <text:p>0,00032638888888888900</text:p>
          </table:table-cell>
          <table:table-cell table:formula="of:=[.D96]-[.D95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0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29861111111111" calcext:value-type="float">
            <text:p>0,00032986111111111100</text:p>
          </table:table-cell>
          <table:table-cell table:formula="of:=[.D97]-[.D9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33333333333333" calcext:value-type="float">
            <text:p>0,00033333333333333300</text:p>
          </table:table-cell>
          <table:table-cell table:formula="of:=[.D98]-[.D97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0" office:value-type="float" office:value="2910" calcext:value-type="float">
            <text:p>291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36805555555556" calcext:value-type="float">
            <text:p>0,00033680555555555600</text:p>
          </table:table-cell>
          <table:table-cell table:formula="of:=[.D99]-[.D9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0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40277777777778" calcext:value-type="float">
            <text:p>0,00034027777777777800</text:p>
          </table:table-cell>
          <table:table-cell table:formula="of:=[.D100]-[.D9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0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4375" calcext:value-type="float">
            <text:p>0,00034375000000000000</text:p>
          </table:table-cell>
          <table:table-cell table:formula="of:=[.D101]-[.D100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47222222222222" calcext:value-type="float">
            <text:p>0,00034722222222222200</text:p>
          </table:table-cell>
          <table:table-cell table:formula="of:=[.D102]-[.D10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0" office:value-type="float" office:value="3030" calcext:value-type="float">
            <text:p>303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50694444444444" calcext:value-type="float">
            <text:p>0,00035069444444444400</text:p>
          </table:table-cell>
          <table:table-cell table:formula="of:=[.D103]-[.D102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0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54166666666667" calcext:value-type="float">
            <text:p>0,00035416666666666700</text:p>
          </table:table-cell>
          <table:table-cell table:formula="of:=[.D104]-[.D10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0" office:value-type="float" office:value="3090" calcext:value-type="float">
            <text:p>309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57638888888889" calcext:value-type="float">
            <text:p>0,00035763888888888900</text:p>
          </table:table-cell>
          <table:table-cell table:formula="of:=[.D105]-[.D10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0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61111111111111" calcext:value-type="float">
            <text:p>0,00036111111111111100</text:p>
          </table:table-cell>
          <table:table-cell table:formula="of:=[.D106]-[.D105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0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64583333333333" calcext:value-type="float">
            <text:p>0,00036458333333333300</text:p>
          </table:table-cell>
          <table:table-cell table:formula="of:=[.D107]-[.D10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0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68055555555556" calcext:value-type="float">
            <text:p>0,00036805555555555600</text:p>
          </table:table-cell>
          <table:table-cell table:formula="of:=[.D108]-[.D10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0" office:value-type="float" office:value="3210" calcext:value-type="float">
            <text:p>321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71527777777778" calcext:value-type="float">
            <text:p>0,00037152777777777800</text:p>
          </table:table-cell>
          <table:table-cell table:formula="of:=[.D109]-[.D108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0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75" calcext:value-type="float">
            <text:p>0,00037500000000000000</text:p>
          </table:table-cell>
          <table:table-cell table:formula="of:=[.D110]-[.D10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0" office:value-type="float" office:value="3270" calcext:value-type="float">
            <text:p>327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78472222222222" calcext:value-type="float">
            <text:p>0,00037847222222222200</text:p>
          </table:table-cell>
          <table:table-cell table:formula="of:=[.D111]-[.D110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0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81944444444444" calcext:value-type="float">
            <text:p>0,00038194444444444400</text:p>
          </table:table-cell>
          <table:table-cell table:formula="of:=[.D112]-[.D11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0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85416666666667" calcext:value-type="float">
            <text:p>0,00038541666666666700</text:p>
          </table:table-cell>
          <table:table-cell table:formula="of:=[.D113]-[.D11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88888888888889" calcext:value-type="float">
            <text:p>0,00038888888888888900</text:p>
          </table:table-cell>
          <table:table-cell table:formula="of:=[.D114]-[.D113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0" office:value-type="float" office:value="3390" calcext:value-type="float">
            <text:p>339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92361111111111" calcext:value-type="float">
            <text:p>0,00039236111111111100</text:p>
          </table:table-cell>
          <table:table-cell table:formula="of:=[.D115]-[.D11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0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95833333333333" calcext:value-type="float">
            <text:p>0,00039583333333333300</text:p>
          </table:table-cell>
          <table:table-cell table:formula="of:=[.D116]-[.D115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0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99305555555556" calcext:value-type="float">
            <text:p>0,00039930555555555600</text:p>
          </table:table-cell>
          <table:table-cell table:formula="of:=[.D117]-[.D11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0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02777777777778" calcext:value-type="float">
            <text:p>0,00040277777777777800</text:p>
          </table:table-cell>
          <table:table-cell table:formula="of:=[.D118]-[.D11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0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0625" calcext:value-type="float">
            <text:p>0,00040625000000000000</text:p>
          </table:table-cell>
          <table:table-cell table:formula="of:=[.D119]-[.D118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0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09722222222222" calcext:value-type="float">
            <text:p>0,00040972222222222200</text:p>
          </table:table-cell>
          <table:table-cell table:formula="of:=[.D120]-[.D11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0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13194444444444" calcext:value-type="float">
            <text:p>0,00041319444444444400</text:p>
          </table:table-cell>
          <table:table-cell table:formula="of:=[.D121]-[.D120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16666666666667" calcext:value-type="float">
            <text:p>0,00041666666666666700</text:p>
          </table:table-cell>
          <table:table-cell table:formula="of:=[.D122]-[.D12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0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20138888888889" calcext:value-type="float">
            <text:p>0,00042013888888888900</text:p>
          </table:table-cell>
          <table:table-cell table:formula="of:=[.D123]-[.D12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0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23611111111111" calcext:value-type="float">
            <text:p>0,00042361111111111100</text:p>
          </table:table-cell>
          <table:table-cell table:formula="of:=[.D124]-[.D123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0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27083333333333" calcext:value-type="float">
            <text:p>0,00042708333333333300</text:p>
          </table:table-cell>
          <table:table-cell table:formula="of:=[.D125]-[.D12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0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30555555555556" calcext:value-type="float">
            <text:p>0,00043055555555555600</text:p>
          </table:table-cell>
          <table:table-cell table:formula="of:=[.D126]-[.D12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0" office:value-type="float" office:value="3750" calcext:value-type="float">
            <text:p>3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34027777777778" calcext:value-type="float">
            <text:p>0,00043402777777777800</text:p>
          </table:table-cell>
          <table:table-cell table:formula="of:=[.D127]-[.D126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0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375" calcext:value-type="float">
            <text:p>0,00043750000000000000</text:p>
          </table:table-cell>
          <table:table-cell table:formula="of:=[.D128]-[.D12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0" office:value-type="float" office:value="3810" calcext:value-type="float">
            <text:p>381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40972222222222" calcext:value-type="float">
            <text:p>0,00044097222222222200</text:p>
          </table:table-cell>
          <table:table-cell table:formula="of:=[.D129]-[.D128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0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44444444444444" calcext:value-type="float">
            <text:p>0,00044444444444444400</text:p>
          </table:table-cell>
          <table:table-cell table:formula="of:=[.D130]-[.D12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0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47916666666667" calcext:value-type="float">
            <text:p>0,00044791666666666700</text:p>
          </table:table-cell>
          <table:table-cell table:formula="of:=[.D131]-[.D13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0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51388888888889" calcext:value-type="float">
            <text:p>0,00045138888888888900</text:p>
          </table:table-cell>
          <table:table-cell table:formula="of:=[.D132]-[.D131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0" office:value-type="float" office:value="3930" calcext:value-type="float">
            <text:p>393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454861111111111" calcext:value-type="float">
            <text:p>0,00045486111111111100</text:p>
          </table:table-cell>
          <table:table-cell table:formula="of:=[.D133]-[.D13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0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458333333333333" calcext:value-type="float">
            <text:p>0,00045833333333333300</text:p>
          </table:table-cell>
          <table:table-cell table:formula="of:=[.D134]-[.D133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0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61805555555556" calcext:value-type="float">
            <text:p>0,00046180555555555600</text:p>
          </table:table-cell>
          <table:table-cell table:formula="of:=[.D135]-[.D13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0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65277777777778" calcext:value-type="float">
            <text:p>0,00046527777777777800</text:p>
          </table:table-cell>
          <table:table-cell table:formula="of:=[.D136]-[.D13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0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46875" calcext:value-type="float">
            <text:p>0,00046875000000000000</text:p>
          </table:table-cell>
          <table:table-cell table:formula="of:=[.D137]-[.D136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0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472222222222222" calcext:value-type="float">
            <text:p>0,00047222222222222200</text:p>
          </table:table-cell>
          <table:table-cell table:formula="of:=[.D138]-[.D13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0" office:value-type="float" office:value="4110" calcext:value-type="float">
            <text:p>411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475694444444444" calcext:value-type="float">
            <text:p>0,00047569444444444400</text:p>
          </table:table-cell>
          <table:table-cell table:formula="of:=[.D139]-[.D13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0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479166666666667" calcext:value-type="float">
            <text:p>0,00047916666666666700</text:p>
          </table:table-cell>
          <table:table-cell table:formula="of:=[.D140]-[.D139]" office:value-type="float" office:value="0.00000347222222222226" calcext:value-type="float">
            <text:p>0,000003472222222222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0" office:value-type="float" office:value="4170" calcext:value-type="float">
            <text:p>417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82638888888889" calcext:value-type="float">
            <text:p>0,00048263888888888900</text:p>
          </table:table-cell>
          <table:table-cell table:formula="of:=[.D141]-[.D14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486111111111111" calcext:value-type="float">
            <text:p>0,00048611111111111100</text:p>
          </table:table-cell>
          <table:table-cell table:formula="of:=[.D142]-[.D14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0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489583333333333" calcext:value-type="float">
            <text:p>0,00048958333333333300</text:p>
          </table:table-cell>
          <table:table-cell table:formula="of:=[.D143]-[.D142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0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493055555555556" calcext:value-type="float">
            <text:p>0,00049305555555555600</text:p>
          </table:table-cell>
          <table:table-cell table:formula="of:=[.D144]-[.D14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0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496527777777778" calcext:value-type="float">
            <text:p>0,00049652777777777800</text:p>
          </table:table-cell>
          <table:table-cell table:formula="of:=[.D145]-[.D14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5" calcext:value-type="float">
            <text:p>0,00050000000000000000</text:p>
          </table:table-cell>
          <table:table-cell table:formula="of:=[.D146]-[.D14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0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503472222222222" calcext:value-type="float">
            <text:p>0,00050347222222222200</text:p>
          </table:table-cell>
          <table:table-cell table:formula="of:=[.D147]-[.D14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0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506944444444444" calcext:value-type="float">
            <text:p>0,00050694444444444400</text:p>
          </table:table-cell>
          <table:table-cell table:formula="of:=[.D148]-[.D14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0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510416666666667" calcext:value-type="float">
            <text:p>0,00051041666666666700</text:p>
          </table:table-cell>
          <table:table-cell table:formula="of:=[.D149]-[.D148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0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513888888888889" calcext:value-type="float">
            <text:p>0,00051388888888888900</text:p>
          </table:table-cell>
          <table:table-cell table:formula="of:=[.D150]-[.D14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0" office:value-type="float" office:value="4470" calcext:value-type="float">
            <text:p>447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517361111111111" calcext:value-type="float">
            <text:p>0,00051736111111111100</text:p>
          </table:table-cell>
          <table:table-cell table:formula="of:=[.D151]-[.D15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520833333333333" calcext:value-type="float">
            <text:p>0,00052083333333333300</text:p>
          </table:table-cell>
          <table:table-cell table:formula="of:=[.D152]-[.D15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0" office:value-type="float" office:value="4530" calcext:value-type="float">
            <text:p>453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524305555555556" calcext:value-type="float">
            <text:p>0,00052430555555555600</text:p>
          </table:table-cell>
          <table:table-cell table:formula="of:=[.D153]-[.D15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0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527777777777778" calcext:value-type="float">
            <text:p>0,00052777777777777800</text:p>
          </table:table-cell>
          <table:table-cell table:formula="of:=[.D154]-[.D153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0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53125" calcext:value-type="float">
            <text:p>0,00053125000000000000</text:p>
          </table:table-cell>
          <table:table-cell table:formula="of:=[.D155]-[.D15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0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534722222222222" calcext:value-type="float">
            <text:p>0,00053472222222222200</text:p>
          </table:table-cell>
          <table:table-cell table:formula="of:=[.D156]-[.D15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0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538194444444444" calcext:value-type="float">
            <text:p>0,00053819444444444400</text:p>
          </table:table-cell>
          <table:table-cell table:formula="of:=[.D157]-[.D15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0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541666666666667" calcext:value-type="float">
            <text:p>0,00054166666666666700</text:p>
          </table:table-cell>
          <table:table-cell table:formula="of:=[.D158]-[.D15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0" office:value-type="float" office:value="4710" calcext:value-type="float">
            <text:p>471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545138888888889" calcext:value-type="float">
            <text:p>0,00054513888888888900</text:p>
          </table:table-cell>
          <table:table-cell table:formula="of:=[.D159]-[.D158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0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548611111111111" calcext:value-type="float">
            <text:p>0,00054861111111111100</text:p>
          </table:table-cell>
          <table:table-cell table:formula="of:=[.D160]-[.D15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0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552083333333333" calcext:value-type="float">
            <text:p>0,00055208333333333300</text:p>
          </table:table-cell>
          <table:table-cell table:formula="of:=[.D161]-[.D16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555555555555556" calcext:value-type="float">
            <text:p>0,00055555555555555600</text:p>
          </table:table-cell>
          <table:table-cell table:formula="of:=[.D162]-[.D16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0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559027777777778" calcext:value-type="float">
            <text:p>0,00055902777777777800</text:p>
          </table:table-cell>
          <table:table-cell table:formula="of:=[.D163]-[.D16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0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5625" calcext:value-type="float">
            <text:p>0,00056250000000000000</text:p>
          </table:table-cell>
          <table:table-cell table:formula="of:=[.D164]-[.D163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0" office:value-type="float" office:value="4890" calcext:value-type="float">
            <text:p>489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565972222222222" calcext:value-type="float">
            <text:p>0,00056597222222222200</text:p>
          </table:table-cell>
          <table:table-cell table:formula="of:=[.D165]-[.D16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0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569444444444445" calcext:value-type="float">
            <text:p>0,00056944444444444500</text:p>
          </table:table-cell>
          <table:table-cell table:formula="of:=[.D166]-[.D16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0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572916666666667" calcext:value-type="float">
            <text:p>0,00057291666666666700</text:p>
          </table:table-cell>
          <table:table-cell table:formula="of:=[.D167]-[.D16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0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576388888888889" calcext:value-type="float">
            <text:p>0,00057638888888888900</text:p>
          </table:table-cell>
          <table:table-cell table:formula="of:=[.D168]-[.D16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0" office:value-type="float" office:value="5010" calcext:value-type="float">
            <text:p>501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579861111111111" calcext:value-type="float">
            <text:p>0,00057986111111111100</text:p>
          </table:table-cell>
          <table:table-cell table:formula="of:=[.D169]-[.D168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583333333333333" calcext:value-type="float">
            <text:p>0,00058333333333333300</text:p>
          </table:table-cell>
          <table:table-cell table:formula="of:=[.D170]-[.D16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0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586805555555556" calcext:value-type="float">
            <text:p>0,00058680555555555600</text:p>
          </table:table-cell>
          <table:table-cell table:formula="of:=[.D171]-[.D17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0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590277777777778" calcext:value-type="float">
            <text:p>0,00059027777777777800</text:p>
          </table:table-cell>
          <table:table-cell table:formula="of:=[.D172]-[.D17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0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59375" calcext:value-type="float">
            <text:p>0,00059375000000000000</text:p>
          </table:table-cell>
          <table:table-cell table:formula="of:=[.D173]-[.D17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0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597222222222222" calcext:value-type="float">
            <text:p>0,00059722222222222200</text:p>
          </table:table-cell>
          <table:table-cell table:formula="of:=[.D174]-[.D173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0" office:value-type="float" office:value="5190" calcext:value-type="float">
            <text:p>519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600694444444445" calcext:value-type="float">
            <text:p>0,00060069444444444500</text:p>
          </table:table-cell>
          <table:table-cell table:formula="of:=[.D175]-[.D17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0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604166666666667" calcext:value-type="float">
            <text:p>0,00060416666666666700</text:p>
          </table:table-cell>
          <table:table-cell table:formula="of:=[.D176]-[.D17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0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607638888888889" calcext:value-type="float">
            <text:p>0,00060763888888888900</text:p>
          </table:table-cell>
          <table:table-cell table:formula="of:=[.D177]-[.D17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0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611111111111111" calcext:value-type="float">
            <text:p>0,00061111111111111100</text:p>
          </table:table-cell>
          <table:table-cell table:formula="of:=[.D178]-[.D17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0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614583333333333" calcext:value-type="float">
            <text:p>0,00061458333333333300</text:p>
          </table:table-cell>
          <table:table-cell table:formula="of:=[.D179]-[.D17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0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618055555555556" calcext:value-type="float">
            <text:p>0,00061805555555555600</text:p>
          </table:table-cell>
          <table:table-cell table:formula="of:=[.D180]-[.D179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0" office:value-type="float" office:value="5370" calcext:value-type="float">
            <text:p>537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621527777777778" calcext:value-type="float">
            <text:p>0,00062152777777777800</text:p>
          </table:table-cell>
          <table:table-cell table:formula="of:=[.D181]-[.D18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625" calcext:value-type="float">
            <text:p>0,00062500000000000000</text:p>
          </table:table-cell>
          <table:table-cell table:formula="of:=[.D182]-[.D18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0" office:value-type="float" office:value="5430" calcext:value-type="float">
            <text:p>543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628472222222222" calcext:value-type="float">
            <text:p>0,00062847222222222200</text:p>
          </table:table-cell>
          <table:table-cell table:formula="of:=[.D183]-[.D18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0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631944444444444" calcext:value-type="float">
            <text:p>0,00063194444444444400</text:p>
          </table:table-cell>
          <table:table-cell table:formula="of:=[.D184]-[.D18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0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635416666666667" calcext:value-type="float">
            <text:p>0,00063541666666666700</text:p>
          </table:table-cell>
          <table:table-cell table:formula="of:=[.D185]-[.D184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0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638888888888889" calcext:value-type="float">
            <text:p>0,00063888888888888900</text:p>
          </table:table-cell>
          <table:table-cell table:formula="of:=[.D186]-[.D18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0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642361111111111" calcext:value-type="float">
            <text:p>0,00064236111111111100</text:p>
          </table:table-cell>
          <table:table-cell table:formula="of:=[.D187]-[.D18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0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645833333333333" calcext:value-type="float">
            <text:p>0,00064583333333333300</text:p>
          </table:table-cell>
          <table:table-cell table:formula="of:=[.D188]-[.D18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0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649305555555556" calcext:value-type="float">
            <text:p>0,00064930555555555600</text:p>
          </table:table-cell>
          <table:table-cell table:formula="of:=[.D189]-[.D18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0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652777777777778" calcext:value-type="float">
            <text:p>0,00065277777777777800</text:p>
          </table:table-cell>
          <table:table-cell table:formula="of:=[.D190]-[.D189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0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65625" calcext:value-type="float">
            <text:p>0,00065625000000000000</text:p>
          </table:table-cell>
          <table:table-cell table:formula="of:=[.D191]-[.D19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0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659722222222222" calcext:value-type="float">
            <text:p>0,00065972222222222200</text:p>
          </table:table-cell>
          <table:table-cell table:formula="of:=[.D192]-[.D19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0" office:value-type="float" office:value="5730" calcext:value-type="float">
            <text:p>573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663194444444444" calcext:value-type="float">
            <text:p>0,00066319444444444400</text:p>
          </table:table-cell>
          <table:table-cell table:formula="of:=[.D193]-[.D19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666666666666667" calcext:value-type="float">
            <text:p>0,00066666666666666700</text:p>
          </table:table-cell>
          <table:table-cell table:formula="of:=[.D194]-[.D19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0" office:value-type="float" office:value="5790" calcext:value-type="float">
            <text:p>579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670138888888889" calcext:value-type="float">
            <text:p>0,00067013888888888900</text:p>
          </table:table-cell>
          <table:table-cell table:formula="of:=[.D195]-[.D194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0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673611111111111" calcext:value-type="float">
            <text:p>0,00067361111111111100</text:p>
          </table:table-cell>
          <table:table-cell table:formula="of:=[.D196]-[.D19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0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677083333333333" calcext:value-type="float">
            <text:p>0,00067708333333333300</text:p>
          </table:table-cell>
          <table:table-cell table:formula="of:=[.D197]-[.D19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0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680555555555556" calcext:value-type="float">
            <text:p>0,00068055555555555600</text:p>
          </table:table-cell>
          <table:table-cell table:formula="of:=[.D198]-[.D19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0" office:value-type="float" office:value="5910" calcext:value-type="float">
            <text:p>591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684027777777778" calcext:value-type="float">
            <text:p>0,00068402777777777800</text:p>
          </table:table-cell>
          <table:table-cell table:formula="of:=[.D199]-[.D19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0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6875" calcext:value-type="float">
            <text:p>0,00068750000000000000</text:p>
          </table:table-cell>
          <table:table-cell table:formula="of:=[.D200]-[.D199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0" office:value-type="float" office:value="5970" calcext:value-type="float">
            <text:p>597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690972222222222" calcext:value-type="float">
            <text:p>0,00069097222222222200</text:p>
          </table:table-cell>
          <table:table-cell table:formula="of:=[.D201]-[.D20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694444444444445" calcext:value-type="float">
            <text:p>0,00069444444444444500</text:p>
          </table:table-cell>
          <table:table-cell table:formula="of:=[.D202]-[.D20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0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697916666666667" calcext:value-type="float">
            <text:p>0,00069791666666666700</text:p>
          </table:table-cell>
          <table:table-cell table:formula="of:=[.D203]-[.D20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0" office:value-type="float" office:value="6060" calcext:value-type="float">
            <text:p>606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701388888888889" calcext:value-type="float">
            <text:p>0,00070138888888888900</text:p>
          </table:table-cell>
          <table:table-cell table:formula="of:=[.D204]-[.D20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0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704861111111111" calcext:value-type="float">
            <text:p>0,00070486111111111100</text:p>
          </table:table-cell>
          <table:table-cell table:formula="of:=[.D205]-[.D204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0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708333333333333" calcext:value-type="float">
            <text:p>0,00070833333333333300</text:p>
          </table:table-cell>
          <table:table-cell table:formula="of:=[.D206]-[.D20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0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711805555555556" calcext:value-type="float">
            <text:p>0,00071180555555555600</text:p>
          </table:table-cell>
          <table:table-cell table:formula="of:=[.D207]-[.D20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0" office:value-type="float" office:value="6180" calcext:value-type="float">
            <text:p>618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715277777777778" calcext:value-type="float">
            <text:p>0,00071527777777777800</text:p>
          </table:table-cell>
          <table:table-cell table:formula="of:=[.D208]-[.D20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0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71875" calcext:value-type="float">
            <text:p>0,00071875000000000000</text:p>
          </table:table-cell>
          <table:table-cell table:formula="of:=[.D209]-[.D20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0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722222222222222" calcext:value-type="float">
            <text:p>0,00072222222222222200</text:p>
          </table:table-cell>
          <table:table-cell table:formula="of:=[.D210]-[.D20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0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725694444444444" calcext:value-type="float">
            <text:p>0,00072569444444444400</text:p>
          </table:table-cell>
          <table:table-cell table:formula="of:=[.D211]-[.D210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729166666666667" calcext:value-type="float">
            <text:p>0,00072916666666666700</text:p>
          </table:table-cell>
          <table:table-cell table:formula="of:=[.D212]-[.D21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0" office:value-type="float" office:value="6330" calcext:value-type="float">
            <text:p>633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732638888888889" calcext:value-type="float">
            <text:p>0,00073263888888888900</text:p>
          </table:table-cell>
          <table:table-cell table:formula="of:=[.D213]-[.D21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0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736111111111111" calcext:value-type="float">
            <text:p>0,00073611111111111100</text:p>
          </table:table-cell>
          <table:table-cell table:formula="of:=[.D214]-[.D21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0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739583333333333" calcext:value-type="float">
            <text:p>0,00073958333333333300</text:p>
          </table:table-cell>
          <table:table-cell table:formula="of:=[.D215]-[.D21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0" office:value-type="float" office:value="6420" calcext:value-type="float">
            <text:p>642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743055555555556" calcext:value-type="float">
            <text:p>0,00074305555555555600</text:p>
          </table:table-cell>
          <table:table-cell table:formula="of:=[.D216]-[.D215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0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746527777777778" calcext:value-type="float">
            <text:p>0,00074652777777777800</text:p>
          </table:table-cell>
          <table:table-cell table:formula="of:=[.D217]-[.D21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75" calcext:value-type="float">
            <text:p>0,00075000000000000000</text:p>
          </table:table-cell>
          <table:table-cell table:formula="of:=[.D218]-[.D21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0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753472222222222" calcext:value-type="float">
            <text:p>0,00075347222222222200</text:p>
          </table:table-cell>
          <table:table-cell table:formula="of:=[.D219]-[.D21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0" office:value-type="float" office:value="6540" calcext:value-type="float">
            <text:p>654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756944444444444" calcext:value-type="float">
            <text:p>0,00075694444444444500</text:p>
          </table:table-cell>
          <table:table-cell table:formula="of:=[.D220]-[.D21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0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760416666666667" calcext:value-type="float">
            <text:p>0,00076041666666666700</text:p>
          </table:table-cell>
          <table:table-cell table:formula="of:=[.D221]-[.D220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763888888888889" calcext:value-type="float">
            <text:p>0,00076388888888888900</text:p>
          </table:table-cell>
          <table:table-cell table:formula="of:=[.D222]-[.D22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0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767361111111111" calcext:value-type="float">
            <text:p>0,00076736111111111100</text:p>
          </table:table-cell>
          <table:table-cell table:formula="of:=[.D223]-[.D22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0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770833333333333" calcext:value-type="float">
            <text:p>0,00077083333333333300</text:p>
          </table:table-cell>
          <table:table-cell table:formula="of:=[.D224]-[.D22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0" office:value-type="float" office:value="6690" calcext:value-type="float">
            <text:p>669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774305555555556" calcext:value-type="float">
            <text:p>0,00077430555555555600</text:p>
          </table:table-cell>
          <table:table-cell table:formula="of:=[.D225]-[.D22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777777777777778" calcext:value-type="float">
            <text:p>0,00077777777777777800</text:p>
          </table:table-cell>
          <table:table-cell table:formula="of:=[.D226]-[.D225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0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78125" calcext:value-type="float">
            <text:p>0,00078125000000000000</text:p>
          </table:table-cell>
          <table:table-cell table:formula="of:=[.D227]-[.D22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0" office:value-type="float" office:value="6780" calcext:value-type="float">
            <text:p>678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784722222222222" calcext:value-type="float">
            <text:p>0,00078472222222222200</text:p>
          </table:table-cell>
          <table:table-cell table:formula="of:=[.D228]-[.D22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0" office:value-type="float" office:value="6810" calcext:value-type="float">
            <text:p>681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788194444444444" calcext:value-type="float">
            <text:p>0,00078819444444444400</text:p>
          </table:table-cell>
          <table:table-cell table:formula="of:=[.D229]-[.D22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0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791666666666667" calcext:value-type="float">
            <text:p>0,00079166666666666700</text:p>
          </table:table-cell>
          <table:table-cell table:formula="of:=[.D230]-[.D22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0" office:value-type="float" office:value="6870" calcext:value-type="float">
            <text:p>687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795138888888889" calcext:value-type="float">
            <text:p>0,00079513888888888900</text:p>
          </table:table-cell>
          <table:table-cell table:formula="of:=[.D231]-[.D230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0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798611111111111" calcext:value-type="float">
            <text:p>0,00079861111111111100</text:p>
          </table:table-cell>
          <table:table-cell table:formula="of:=[.D232]-[.D23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0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802083333333333" calcext:value-type="float">
            <text:p>0,00080208333333333300</text:p>
          </table:table-cell>
          <table:table-cell table:formula="of:=[.D233]-[.D23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0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805555555555556" calcext:value-type="float">
            <text:p>0,00080555555555555600</text:p>
          </table:table-cell>
          <table:table-cell table:formula="of:=[.D234]-[.D23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0" office:value-type="float" office:value="6990" calcext:value-type="float">
            <text:p>699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809027777777778" calcext:value-type="float">
            <text:p>0,00080902777777777800</text:p>
          </table:table-cell>
          <table:table-cell table:formula="of:=[.D235]-[.D23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0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8125" calcext:value-type="float">
            <text:p>0,00081250000000000000</text:p>
          </table:table-cell>
          <table:table-cell table:formula="of:=[.D236]-[.D235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0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815972222222222" calcext:value-type="float">
            <text:p>0,00081597222222222200</text:p>
          </table:table-cell>
          <table:table-cell table:formula="of:=[.D237]-[.D23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0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819444444444445" calcext:value-type="float">
            <text:p>0,00081944444444444500</text:p>
          </table:table-cell>
          <table:table-cell table:formula="of:=[.D238]-[.D23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0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822916666666667" calcext:value-type="float">
            <text:p>0,00082291666666666700</text:p>
          </table:table-cell>
          <table:table-cell table:formula="of:=[.D239]-[.D23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0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826388888888889" calcext:value-type="float">
            <text:p>0,00082638888888888900</text:p>
          </table:table-cell>
          <table:table-cell table:formula="of:=[.D240]-[.D23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0" office:value-type="float" office:value="7170" calcext:value-type="float">
            <text:p>717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829861111111111" calcext:value-type="float">
            <text:p>0,00082986111111111100</text:p>
          </table:table-cell>
          <table:table-cell table:formula="of:=[.D241]-[.D240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833333333333333" calcext:value-type="float">
            <text:p>0,00083333333333333300</text:p>
          </table:table-cell>
          <table:table-cell table:formula="of:=[.D242]-[.D24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0" office:value-type="float" office:value="7230" calcext:value-type="float">
            <text:p>723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836805555555556" calcext:value-type="float">
            <text:p>0,00083680555555555600</text:p>
          </table:table-cell>
          <table:table-cell table:formula="of:=[.D243]-[.D24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0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840277777777778" calcext:value-type="float">
            <text:p>0,00084027777777777800</text:p>
          </table:table-cell>
          <table:table-cell table:formula="of:=[.D244]-[.D24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0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84375" calcext:value-type="float">
            <text:p>0,00084375000000000000</text:p>
          </table:table-cell>
          <table:table-cell table:formula="of:=[.D245]-[.D24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0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847222222222222" calcext:value-type="float">
            <text:p>0,00084722222222222200</text:p>
          </table:table-cell>
          <table:table-cell table:formula="of:=[.D246]-[.D24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0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850694444444444" calcext:value-type="float">
            <text:p>0,00085069444444444400</text:p>
          </table:table-cell>
          <table:table-cell table:formula="of:=[.D247]-[.D246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0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854166666666667" calcext:value-type="float">
            <text:p>0,00085416666666666700</text:p>
          </table:table-cell>
          <table:table-cell table:formula="of:=[.D248]-[.D24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0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857638888888889" calcext:value-type="float">
            <text:p>0,00085763888888888900</text:p>
          </table:table-cell>
          <table:table-cell table:formula="of:=[.D249]-[.D24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0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861111111111111" calcext:value-type="float">
            <text:p>0,00086111111111111100</text:p>
          </table:table-cell>
          <table:table-cell table:formula="of:=[.D250]-[.D24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0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864583333333333" calcext:value-type="float">
            <text:p>0,00086458333333333300</text:p>
          </table:table-cell>
          <table:table-cell table:formula="of:=[.D251]-[.D25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0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868055555555556" calcext:value-type="float">
            <text:p>0,00086805555555555600</text:p>
          </table:table-cell>
          <table:table-cell table:formula="of:=[.D252]-[.D251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0" office:value-type="float" office:value="7530" calcext:value-type="float">
            <text:p>753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871527777777778" calcext:value-type="float">
            <text:p>0,00087152777777777800</text:p>
          </table:table-cell>
          <table:table-cell table:formula="of:=[.D253]-[.D25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875" calcext:value-type="float">
            <text:p>0,00087500000000000000</text:p>
          </table:table-cell>
          <table:table-cell table:formula="of:=[.D254]-[.D25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0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878472222222222" calcext:value-type="float">
            <text:p>0,00087847222222222200</text:p>
          </table:table-cell>
          <table:table-cell table:formula="of:=[.D255]-[.D25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0" office:value-type="float" office:value="7620" calcext:value-type="float">
            <text:p>762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881944444444444" calcext:value-type="float">
            <text:p>0,00088194444444444500</text:p>
          </table:table-cell>
          <table:table-cell table:formula="of:=[.D256]-[.D25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0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885416666666667" calcext:value-type="float">
            <text:p>0,00088541666666666700</text:p>
          </table:table-cell>
          <table:table-cell table:formula="of:=[.D257]-[.D256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0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888888888888889" calcext:value-type="float">
            <text:p>0,00088888888888888900</text:p>
          </table:table-cell>
          <table:table-cell table:formula="of:=[.D258]-[.D25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0" office:value-type="float" office:value="7710" calcext:value-type="float">
            <text:p>771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892361111111111" calcext:value-type="float">
            <text:p>0,00089236111111111100</text:p>
          </table:table-cell>
          <table:table-cell table:formula="of:=[.D259]-[.D25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0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895833333333333" calcext:value-type="float">
            <text:p>0,00089583333333333300</text:p>
          </table:table-cell>
          <table:table-cell table:formula="of:=[.D260]-[.D25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0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899305555555556" calcext:value-type="float">
            <text:p>0,00089930555555555600</text:p>
          </table:table-cell>
          <table:table-cell table:formula="of:=[.D261]-[.D26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902777777777778" calcext:value-type="float">
            <text:p>0,00090277777777777800</text:p>
          </table:table-cell>
          <table:table-cell table:formula="of:=[.D262]-[.D261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0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90625" calcext:value-type="float">
            <text:p>0,00090625000000000000</text:p>
          </table:table-cell>
          <table:table-cell table:formula="of:=[.D263]-[.D26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0" office:value-type="float" office:value="7860" calcext:value-type="float">
            <text:p>786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909722222222222" calcext:value-type="float">
            <text:p>0,00090972222222222200</text:p>
          </table:table-cell>
          <table:table-cell table:formula="of:=[.D264]-[.D26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0" office:value-type="float" office:value="7890" calcext:value-type="float">
            <text:p>789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913194444444444" calcext:value-type="float">
            <text:p>0,00091319444444444400</text:p>
          </table:table-cell>
          <table:table-cell table:formula="of:=[.D265]-[.D26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916666666666667" calcext:value-type="float">
            <text:p>0,00091666666666666700</text:p>
          </table:table-cell>
          <table:table-cell table:formula="of:=[.D266]-[.D26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0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920138888888889" calcext:value-type="float">
            <text:p>0,00092013888888888900</text:p>
          </table:table-cell>
          <table:table-cell table:formula="of:=[.D267]-[.D266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0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923611111111111" calcext:value-type="float">
            <text:p>0,00092361111111111100</text:p>
          </table:table-cell>
          <table:table-cell table:formula="of:=[.D268]-[.D26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0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927083333333333" calcext:value-type="float">
            <text:p>0,00092708333333333400</text:p>
          </table:table-cell>
          <table:table-cell table:formula="of:=[.D269]-[.D26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0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930555555555556" calcext:value-type="float">
            <text:p>0,00093055555555555600</text:p>
          </table:table-cell>
          <table:table-cell table:formula="of:=[.D270]-[.D26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0" office:value-type="float" office:value="8070" calcext:value-type="float">
            <text:p>807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934027777777778" calcext:value-type="float">
            <text:p>0,00093402777777777800</text:p>
          </table:table-cell>
          <table:table-cell table:formula="of:=[.D271]-[.D27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9375" calcext:value-type="float">
            <text:p>0,00093750000000000000</text:p>
          </table:table-cell>
          <table:table-cell table:formula="of:=[.D272]-[.D271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0" office:value-type="float" office:value="8130" calcext:value-type="float">
            <text:p>813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940972222222222" calcext:value-type="float">
            <text:p>0,00094097222222222200</text:p>
          </table:table-cell>
          <table:table-cell table:formula="of:=[.D273]-[.D27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0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944444444444445" calcext:value-type="float">
            <text:p>0,00094444444444444500</text:p>
          </table:table-cell>
          <table:table-cell table:formula="of:=[.D274]-[.D27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0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947916666666667" calcext:value-type="float">
            <text:p>0,00094791666666666700</text:p>
          </table:table-cell>
          <table:table-cell table:formula="of:=[.D275]-[.D27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0" office:value-type="float" office:value="8220" calcext:value-type="float">
            <text:p>822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951388888888889" calcext:value-type="float">
            <text:p>0,00095138888888888900</text:p>
          </table:table-cell>
          <table:table-cell table:formula="of:=[.D276]-[.D27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0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954861111111111" calcext:value-type="float">
            <text:p>0,00095486111111111100</text:p>
          </table:table-cell>
          <table:table-cell table:formula="of:=[.D277]-[.D27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0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958333333333333" calcext:value-type="float">
            <text:p>0,00095833333333333300</text:p>
          </table:table-cell>
          <table:table-cell table:formula="of:=[.D278]-[.D277]" office:value-type="float" office:value="0.00000347222222222231" calcext:value-type="float">
            <text:p>0,000003472222222222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0" office:value-type="float" office:value="8310" calcext:value-type="float">
            <text:p>831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961805555555556" calcext:value-type="float">
            <text:p>0,00096180555555555600</text:p>
          </table:table-cell>
          <table:table-cell table:formula="of:=[.D279]-[.D27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0" office:value-type="float" office:value="8340" calcext:value-type="float">
            <text:p>834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965277777777778" calcext:value-type="float">
            <text:p>0,00096527777777777800</text:p>
          </table:table-cell>
          <table:table-cell table:formula="of:=[.D280]-[.D27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0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96875" calcext:value-type="float">
            <text:p>0,00096875000000000000</text:p>
          </table:table-cell>
          <table:table-cell table:formula="of:=[.D281]-[.D28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972222222222222" calcext:value-type="float">
            <text:p>0,00097222222222222200</text:p>
          </table:table-cell>
          <table:table-cell table:formula="of:=[.D282]-[.D28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0" office:value-type="float" office:value="8430" calcext:value-type="float">
            <text:p>843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975694444444444" calcext:value-type="float">
            <text:p>0,00097569444444444400</text:p>
          </table:table-cell>
          <table:table-cell table:formula="of:=[.D283]-[.D28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0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979166666666667" calcext:value-type="float">
            <text:p>0,00097916666666666700</text:p>
          </table:table-cell>
          <table:table-cell table:formula="of:=[.D284]-[.D28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0" office:value-type="float" office:value="8490" calcext:value-type="float">
            <text:p>849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982638888888889" calcext:value-type="float">
            <text:p>0,00098263888888888900</text:p>
          </table:table-cell>
          <table:table-cell table:formula="of:=[.D285]-[.D28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0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986111111111111" calcext:value-type="float">
            <text:p>0,00098611111111111100</text:p>
          </table:table-cell>
          <table:table-cell table:formula="of:=[.D286]-[.D28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0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989583333333333" calcext:value-type="float">
            <text:p>0,00098958333333333300</text:p>
          </table:table-cell>
          <table:table-cell table:formula="of:=[.D287]-[.D28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0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993055555555556" calcext:value-type="float">
            <text:p>0,00099305555555555600</text:p>
          </table:table-cell>
          <table:table-cell table:formula="of:=[.D288]-[.D28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0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996527777777778" calcext:value-type="float">
            <text:p>0,00099652777777777800</text:p>
          </table:table-cell>
          <table:table-cell table:formula="of:=[.D289]-[.D28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" calcext:value-type="float">
            <text:p>0,00100000000000000000</text:p>
          </table:table-cell>
          <table:table-cell table:formula="of:=[.D290]-[.D28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0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00347222222222" calcext:value-type="float">
            <text:p>0,00100347222222222000</text:p>
          </table:table-cell>
          <table:table-cell table:formula="of:=[.D291]-[.D29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0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00694444444444" calcext:value-type="float">
            <text:p>0,00100694444444444000</text:p>
          </table:table-cell>
          <table:table-cell table:formula="of:=[.D292]-[.D29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0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01041666666667" calcext:value-type="float">
            <text:p>0,00101041666666667000</text:p>
          </table:table-cell>
          <table:table-cell table:formula="of:=[.D293]-[.D29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0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01388888888889" calcext:value-type="float">
            <text:p>0,00101388888888889000</text:p>
          </table:table-cell>
          <table:table-cell table:formula="of:=[.D294]-[.D29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0" office:value-type="float" office:value="8790" calcext:value-type="float">
            <text:p>879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01736111111111" calcext:value-type="float">
            <text:p>0,00101736111111111000</text:p>
          </table:table-cell>
          <table:table-cell table:formula="of:=[.D295]-[.D29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0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02083333333333" calcext:value-type="float">
            <text:p>0,00102083333333333000</text:p>
          </table:table-cell>
          <table:table-cell table:formula="of:=[.D296]-[.D29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0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02430555555556" calcext:value-type="float">
            <text:p>0,00102430555555556000</text:p>
          </table:table-cell>
          <table:table-cell table:formula="of:=[.D297]-[.D29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0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02777777777778" calcext:value-type="float">
            <text:p>0,00102777777777778000</text:p>
          </table:table-cell>
          <table:table-cell table:formula="of:=[.D298]-[.D29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0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03125" calcext:value-type="float">
            <text:p>0,00103125000000000000</text:p>
          </table:table-cell>
          <table:table-cell table:formula="of:=[.D299]-[.D29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0" office:value-type="float" office:value="8940" calcext:value-type="float">
            <text:p>894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03472222222222" calcext:value-type="float">
            <text:p>0,00103472222222222000</text:p>
          </table:table-cell>
          <table:table-cell table:formula="of:=[.D300]-[.D29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0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03819444444444" calcext:value-type="float">
            <text:p>0,00103819444444444000</text:p>
          </table:table-cell>
          <table:table-cell table:formula="of:=[.D301]-[.D30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04166666666667" calcext:value-type="float">
            <text:p>0,00104166666666667000</text:p>
          </table:table-cell>
          <table:table-cell table:formula="of:=[.D302]-[.D30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0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04513888888889" calcext:value-type="float">
            <text:p>0,00104513888888889000</text:p>
          </table:table-cell>
          <table:table-cell table:formula="of:=[.D303]-[.D30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0" office:value-type="float" office:value="9060" calcext:value-type="float">
            <text:p>906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04861111111111" calcext:value-type="float">
            <text:p>0,00104861111111111000</text:p>
          </table:table-cell>
          <table:table-cell table:formula="of:=[.D304]-[.D30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0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05208333333333" calcext:value-type="float">
            <text:p>0,00105208333333333000</text:p>
          </table:table-cell>
          <table:table-cell table:formula="of:=[.D305]-[.D30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0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05555555555556" calcext:value-type="float">
            <text:p>0,00105555555555556000</text:p>
          </table:table-cell>
          <table:table-cell table:formula="of:=[.D306]-[.D30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0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05902777777778" calcext:value-type="float">
            <text:p>0,00105902777777778000</text:p>
          </table:table-cell>
          <table:table-cell table:formula="of:=[.D307]-[.D30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0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0625" calcext:value-type="float">
            <text:p>0,00106250000000000000</text:p>
          </table:table-cell>
          <table:table-cell table:formula="of:=[.D308]-[.D30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0" office:value-type="float" office:value="9210" calcext:value-type="float">
            <text:p>921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06597222222222" calcext:value-type="float">
            <text:p>0,00106597222222222000</text:p>
          </table:table-cell>
          <table:table-cell table:formula="of:=[.D309]-[.D30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0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06944444444444" calcext:value-type="float">
            <text:p>0,00106944444444444000</text:p>
          </table:table-cell>
          <table:table-cell table:formula="of:=[.D310]-[.D30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0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07291666666667" calcext:value-type="float">
            <text:p>0,00107291666666667000</text:p>
          </table:table-cell>
          <table:table-cell table:formula="of:=[.D311]-[.D31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0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07638888888889" calcext:value-type="float">
            <text:p>0,00107638888888889000</text:p>
          </table:table-cell>
          <table:table-cell table:formula="of:=[.D312]-[.D31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0" office:value-type="float" office:value="9330" calcext:value-type="float">
            <text:p>933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07986111111111" calcext:value-type="float">
            <text:p>0,00107986111111111000</text:p>
          </table:table-cell>
          <table:table-cell table:formula="of:=[.D313]-[.D31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08333333333333" calcext:value-type="float">
            <text:p>0,00108333333333333000</text:p>
          </table:table-cell>
          <table:table-cell table:formula="of:=[.D314]-[.D31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0" office:value-type="float" office:value="9390" calcext:value-type="float">
            <text:p>939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08680555555556" calcext:value-type="float">
            <text:p>0,00108680555555556000</text:p>
          </table:table-cell>
          <table:table-cell table:formula="of:=[.D315]-[.D31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0" office:value-type="float" office:value="9420" calcext:value-type="float">
            <text:p>942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09027777777778" calcext:value-type="float">
            <text:p>0,00109027777777778000</text:p>
          </table:table-cell>
          <table:table-cell table:formula="of:=[.D316]-[.D31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0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09375" calcext:value-type="float">
            <text:p>0,00109375000000000000</text:p>
          </table:table-cell>
          <table:table-cell table:formula="of:=[.D317]-[.D31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0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09722222222222" calcext:value-type="float">
            <text:p>0,00109722222222222000</text:p>
          </table:table-cell>
          <table:table-cell table:formula="of:=[.D318]-[.D31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0" office:value-type="float" office:value="9510" calcext:value-type="float">
            <text:p>951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10069444444444" calcext:value-type="float">
            <text:p>0,00110069444444444000</text:p>
          </table:table-cell>
          <table:table-cell table:formula="of:=[.D319]-[.D31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0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10416666666667" calcext:value-type="float">
            <text:p>0,00110416666666667000</text:p>
          </table:table-cell>
          <table:table-cell table:formula="of:=[.D320]-[.D31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0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10763888888889" calcext:value-type="float">
            <text:p>0,00110763888888889000</text:p>
          </table:table-cell>
          <table:table-cell table:formula="of:=[.D321]-[.D32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11111111111111" calcext:value-type="float">
            <text:p>0,00111111111111111000</text:p>
          </table:table-cell>
          <table:table-cell table:formula="of:=[.D322]-[.D32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0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11458333333333" calcext:value-type="float">
            <text:p>0,00111458333333333000</text:p>
          </table:table-cell>
          <table:table-cell table:formula="of:=[.D323]-[.D32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0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11805555555556" calcext:value-type="float">
            <text:p>0,00111805555555556000</text:p>
          </table:table-cell>
          <table:table-cell table:formula="of:=[.D324]-[.D32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0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12152777777778" calcext:value-type="float">
            <text:p>0,00112152777777778000</text:p>
          </table:table-cell>
          <table:table-cell table:formula="of:=[.D325]-[.D32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0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125" calcext:value-type="float">
            <text:p>0,00112500000000000000</text:p>
          </table:table-cell>
          <table:table-cell table:formula="of:=[.D326]-[.D32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0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12847222222222" calcext:value-type="float">
            <text:p>0,00112847222222222000</text:p>
          </table:table-cell>
          <table:table-cell table:formula="of:=[.D327]-[.D32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0" office:value-type="float" office:value="9780" calcext:value-type="float">
            <text:p>978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13194444444444" calcext:value-type="float">
            <text:p>0,00113194444444444000</text:p>
          </table:table-cell>
          <table:table-cell table:formula="of:=[.D328]-[.D32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0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13541666666667" calcext:value-type="float">
            <text:p>0,00113541666666667000</text:p>
          </table:table-cell>
          <table:table-cell table:formula="of:=[.D329]-[.D32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0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13888888888889" calcext:value-type="float">
            <text:p>0,00113888888888889000</text:p>
          </table:table-cell>
          <table:table-cell table:formula="of:=[.D330]-[.D32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0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14236111111111" calcext:value-type="float">
            <text:p>0,00114236111111111000</text:p>
          </table:table-cell>
          <table:table-cell table:formula="of:=[.D331]-[.D33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14583333333333" calcext:value-type="float">
            <text:p>0,00114583333333333000</text:p>
          </table:table-cell>
          <table:table-cell table:formula="of:=[.D332]-[.D33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0" office:value-type="float" office:value="9930" calcext:value-type="float">
            <text:p>993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14930555555556" calcext:value-type="float">
            <text:p>0,00114930555555556000</text:p>
          </table:table-cell>
          <table:table-cell table:formula="of:=[.D333]-[.D33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0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15277777777778" calcext:value-type="float">
            <text:p>0,00115277777777778000</text:p>
          </table:table-cell>
          <table:table-cell table:formula="of:=[.D334]-[.D33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0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15625" calcext:value-type="float">
            <text:p>0,00115625000000000000</text:p>
          </table:table-cell>
          <table:table-cell table:formula="of:=[.D335]-[.D33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0" office:value-type="float" office:value="10020" calcext:value-type="float">
            <text:p>1002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15972222222222" calcext:value-type="float">
            <text:p>0,00115972222222222000</text:p>
          </table:table-cell>
          <table:table-cell table:formula="of:=[.D336]-[.D33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0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16319444444444" calcext:value-type="float">
            <text:p>0,00116319444444444000</text:p>
          </table:table-cell>
          <table:table-cell table:formula="of:=[.D337]-[.D33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16666666666667" calcext:value-type="float">
            <text:p>0,00116666666666667000</text:p>
          </table:table-cell>
          <table:table-cell table:formula="of:=[.D338]-[.D33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0" office:value-type="float" office:value="10110" calcext:value-type="float">
            <text:p>1011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17013888888889" calcext:value-type="float">
            <text:p>0,00117013888888889000</text:p>
          </table:table-cell>
          <table:table-cell table:formula="of:=[.D339]-[.D33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0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17361111111111" calcext:value-type="float">
            <text:p>0,00117361111111111000</text:p>
          </table:table-cell>
          <table:table-cell table:formula="of:=[.D340]-[.D33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0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17708333333333" calcext:value-type="float">
            <text:p>0,00117708333333333000</text:p>
          </table:table-cell>
          <table:table-cell table:formula="of:=[.D341]-[.D34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18055555555556" calcext:value-type="float">
            <text:p>0,00118055555555556000</text:p>
          </table:table-cell>
          <table:table-cell table:formula="of:=[.D342]-[.D34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0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18402777777778" calcext:value-type="float">
            <text:p>0,00118402777777778000</text:p>
          </table:table-cell>
          <table:table-cell table:formula="of:=[.D343]-[.D34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0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1875" calcext:value-type="float">
            <text:p>0,00118750000000000000</text:p>
          </table:table-cell>
          <table:table-cell table:formula="of:=[.D344]-[.D34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0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19097222222222" calcext:value-type="float">
            <text:p>0,00119097222222222000</text:p>
          </table:table-cell>
          <table:table-cell table:formula="of:=[.D345]-[.D34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0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19444444444444" calcext:value-type="float">
            <text:p>0,00119444444444444000</text:p>
          </table:table-cell>
          <table:table-cell table:formula="of:=[.D346]-[.D34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0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19791666666667" calcext:value-type="float">
            <text:p>0,00119791666666667000</text:p>
          </table:table-cell>
          <table:table-cell table:formula="of:=[.D347]-[.D34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0" office:value-type="float" office:value="10380" calcext:value-type="float">
            <text:p>1038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20138888888889" calcext:value-type="float">
            <text:p>0,00120138888888889000</text:p>
          </table:table-cell>
          <table:table-cell table:formula="of:=[.D348]-[.D34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0" office:value-type="float" office:value="10410" calcext:value-type="float">
            <text:p>10410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20486111111111" calcext:value-type="float">
            <text:p>0,00120486111111111000</text:p>
          </table:table-cell>
          <table:table-cell table:formula="of:=[.D349]-[.D34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0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20833333333333" calcext:value-type="float">
            <text:p>0,00120833333333333000</text:p>
          </table:table-cell>
          <table:table-cell table:formula="of:=[.D350]-[.D34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0" office:value-type="float" office:value="10470" calcext:value-type="float">
            <text:p>10470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21180555555556" calcext:value-type="float">
            <text:p>0,00121180555555556000</text:p>
          </table:table-cell>
          <table:table-cell table:formula="of:=[.D351]-[.D35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21527777777778" calcext:value-type="float">
            <text:p>0,00121527777777778000</text:p>
          </table:table-cell>
          <table:table-cell table:formula="of:=[.D352]-[.D35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0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21875" calcext:value-type="float">
            <text:p>0,00121875000000000000</text:p>
          </table:table-cell>
          <table:table-cell table:formula="of:=[.D353]-[.D35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0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22222222222222" calcext:value-type="float">
            <text:p>0,00122222222222222000</text:p>
          </table:table-cell>
          <table:table-cell table:formula="of:=[.D354]-[.D35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0" office:value-type="float" office:value="10590" calcext:value-type="float">
            <text:p>10590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22569444444444" calcext:value-type="float">
            <text:p>0,00122569444444444000</text:p>
          </table:table-cell>
          <table:table-cell table:formula="of:=[.D355]-[.D35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0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22916666666667" calcext:value-type="float">
            <text:p>0,00122916666666667000</text:p>
          </table:table-cell>
          <table:table-cell table:formula="of:=[.D356]-[.D35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0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23263888888889" calcext:value-type="float">
            <text:p>0,00123263888888889000</text:p>
          </table:table-cell>
          <table:table-cell table:formula="of:=[.D357]-[.D35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0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23611111111111" calcext:value-type="float">
            <text:p>0,00123611111111111000</text:p>
          </table:table-cell>
          <table:table-cell table:formula="of:=[.D358]-[.D35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0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23958333333333" calcext:value-type="float">
            <text:p>0,00123958333333333000</text:p>
          </table:table-cell>
          <table:table-cell table:formula="of:=[.D359]-[.D35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0" office:value-type="float" office:value="10740" calcext:value-type="float">
            <text:p>1074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24305555555556" calcext:value-type="float">
            <text:p>0,00124305555555556000</text:p>
          </table:table-cell>
          <table:table-cell table:formula="of:=[.D360]-[.D35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0" office:value-type="float" office:value="10770" calcext:value-type="float">
            <text:p>10770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24652777777778" calcext:value-type="float">
            <text:p>0,00124652777777778000</text:p>
          </table:table-cell>
          <table:table-cell table:formula="of:=[.D361]-[.D36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25" calcext:value-type="float">
            <text:p>0,00125000000000000000</text:p>
          </table:table-cell>
          <table:table-cell table:formula="of:=[.D362]-[.D36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0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25347222222222" calcext:value-type="float">
            <text:p>0,00125347222222222000</text:p>
          </table:table-cell>
          <table:table-cell table:formula="of:=[.D363]-[.D36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0" office:value-type="float" office:value="10860" calcext:value-type="float">
            <text:p>1086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25694444444444" calcext:value-type="float">
            <text:p>0,00125694444444444000</text:p>
          </table:table-cell>
          <table:table-cell table:formula="of:=[.D364]-[.D36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0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26041666666667" calcext:value-type="float">
            <text:p>0,00126041666666667000</text:p>
          </table:table-cell>
          <table:table-cell table:formula="of:=[.D365]-[.D36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0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26388888888889" calcext:value-type="float">
            <text:p>0,00126388888888889000</text:p>
          </table:table-cell>
          <table:table-cell table:formula="of:=[.D366]-[.D36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0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26736111111111" calcext:value-type="float">
            <text:p>0,00126736111111111000</text:p>
          </table:table-cell>
          <table:table-cell table:formula="of:=[.D367]-[.D36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0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27083333333333" calcext:value-type="float">
            <text:p>0,00127083333333333000</text:p>
          </table:table-cell>
          <table:table-cell table:formula="of:=[.D368]-[.D36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0" office:value-type="float" office:value="11010" calcext:value-type="float">
            <text:p>11010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27430555555556" calcext:value-type="float">
            <text:p>0,00127430555555556000</text:p>
          </table:table-cell>
          <table:table-cell table:formula="of:=[.D369]-[.D36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0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27777777777778" calcext:value-type="float">
            <text:p>0,00127777777777778000</text:p>
          </table:table-cell>
          <table:table-cell table:formula="of:=[.D370]-[.D36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0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28125" calcext:value-type="float">
            <text:p>0,00128125000000000000</text:p>
          </table:table-cell>
          <table:table-cell table:formula="of:=[.D371]-[.D37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0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28472222222222" calcext:value-type="float">
            <text:p>0,00128472222222222000</text:p>
          </table:table-cell>
          <table:table-cell table:formula="of:=[.D372]-[.D37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0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28819444444444" calcext:value-type="float">
            <text:p>0,00128819444444444000</text:p>
          </table:table-cell>
          <table:table-cell table:formula="of:=[.D373]-[.D37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0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29166666666667" calcext:value-type="float">
            <text:p>0,00129166666666667000</text:p>
          </table:table-cell>
          <table:table-cell table:formula="of:=[.D374]-[.D37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0" office:value-type="float" office:value="11190" calcext:value-type="float">
            <text:p>11190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29513888888889" calcext:value-type="float">
            <text:p>0,00129513888888889000</text:p>
          </table:table-cell>
          <table:table-cell table:formula="of:=[.D375]-[.D37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0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29861111111111" calcext:value-type="float">
            <text:p>0,00129861111111111000</text:p>
          </table:table-cell>
          <table:table-cell table:formula="of:=[.D376]-[.D37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0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30208333333333" calcext:value-type="float">
            <text:p>0,00130208333333333000</text:p>
          </table:table-cell>
          <table:table-cell table:formula="of:=[.D377]-[.D37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0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30555555555556" calcext:value-type="float">
            <text:p>0,00130555555555556000</text:p>
          </table:table-cell>
          <table:table-cell table:formula="of:=[.D378]-[.D37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0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30902777777778" calcext:value-type="float">
            <text:p>0,00130902777777778000</text:p>
          </table:table-cell>
          <table:table-cell table:formula="of:=[.D379]-[.D37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0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3125" calcext:value-type="float">
            <text:p>0,00131250000000000000</text:p>
          </table:table-cell>
          <table:table-cell table:formula="of:=[.D380]-[.D37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0" office:value-type="float" office:value="11370" calcext:value-type="float">
            <text:p>11370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31597222222222" calcext:value-type="float">
            <text:p>0,00131597222222222000</text:p>
          </table:table-cell>
          <table:table-cell table:formula="of:=[.D381]-[.D38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31944444444444" calcext:value-type="float">
            <text:p>0,00131944444444444000</text:p>
          </table:table-cell>
          <table:table-cell table:formula="of:=[.D382]-[.D38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0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32291666666667" calcext:value-type="float">
            <text:p>0,00132291666666667000</text:p>
          </table:table-cell>
          <table:table-cell table:formula="of:=[.D383]-[.D38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0" office:value-type="float" office:value="11460" calcext:value-type="float">
            <text:p>1146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32638888888889" calcext:value-type="float">
            <text:p>0,00132638888888889000</text:p>
          </table:table-cell>
          <table:table-cell table:formula="of:=[.D384]-[.D38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0" office:value-type="float" office:value="11490" calcext:value-type="float">
            <text:p>11490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32986111111111" calcext:value-type="float">
            <text:p>0,00132986111111111000</text:p>
          </table:table-cell>
          <table:table-cell table:formula="of:=[.D385]-[.D38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33333333333333" calcext:value-type="float">
            <text:p>0,00133333333333333000</text:p>
          </table:table-cell>
          <table:table-cell table:formula="of:=[.D386]-[.D38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0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33680555555556" calcext:value-type="float">
            <text:p>0,00133680555555556000</text:p>
          </table:table-cell>
          <table:table-cell table:formula="of:=[.D387]-[.D38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0" office:value-type="float" office:value="11580" calcext:value-type="float">
            <text:p>1158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34027777777778" calcext:value-type="float">
            <text:p>0,00134027777777778000</text:p>
          </table:table-cell>
          <table:table-cell table:formula="of:=[.D388]-[.D38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0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34375" calcext:value-type="float">
            <text:p>0,00134375000000000000</text:p>
          </table:table-cell>
          <table:table-cell table:formula="of:=[.D389]-[.D38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0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34722222222222" calcext:value-type="float">
            <text:p>0,00134722222222222000</text:p>
          </table:table-cell>
          <table:table-cell table:formula="of:=[.D390]-[.D38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0" office:value-type="float" office:value="11670" calcext:value-type="float">
            <text:p>11670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35069444444444" calcext:value-type="float">
            <text:p>0,00135069444444444000</text:p>
          </table:table-cell>
          <table:table-cell table:formula="of:=[.D391]-[.D39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35416666666667" calcext:value-type="float">
            <text:p>0,00135416666666667000</text:p>
          </table:table-cell>
          <table:table-cell table:formula="of:=[.D392]-[.D39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0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35763888888889" calcext:value-type="float">
            <text:p>0,00135763888888889000</text:p>
          </table:table-cell>
          <table:table-cell table:formula="of:=[.D393]-[.D39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36111111111111" calcext:value-type="float">
            <text:p>0,00136111111111111000</text:p>
          </table:table-cell>
          <table:table-cell table:formula="of:=[.D394]-[.D39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0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36458333333333" calcext:value-type="float">
            <text:p>0,00136458333333333000</text:p>
          </table:table-cell>
          <table:table-cell table:formula="of:=[.D395]-[.D39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0" office:value-type="float" office:value="11820" calcext:value-type="float">
            <text:p>1182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36805555555556" calcext:value-type="float">
            <text:p>0,00136805555555556000</text:p>
          </table:table-cell>
          <table:table-cell table:formula="of:=[.D396]-[.D39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0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37152777777778" calcext:value-type="float">
            <text:p>0,00137152777777778000</text:p>
          </table:table-cell>
          <table:table-cell table:formula="of:=[.D397]-[.D39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0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375" calcext:value-type="float">
            <text:p>0,00137500000000000000</text:p>
          </table:table-cell>
          <table:table-cell table:formula="of:=[.D398]-[.D39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0" office:value-type="float" office:value="11910" calcext:value-type="float">
            <text:p>11910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37847222222222" calcext:value-type="float">
            <text:p>0,00137847222222222000</text:p>
          </table:table-cell>
          <table:table-cell table:formula="of:=[.D399]-[.D39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0" office:value-type="float" office:value="11940" calcext:value-type="float">
            <text:p>1194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38194444444444" calcext:value-type="float">
            <text:p>0,00138194444444444000</text:p>
          </table:table-cell>
          <table:table-cell table:formula="of:=[.D400]-[.D39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0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38541666666667" calcext:value-type="float">
            <text:p>0,00138541666666667000</text:p>
          </table:table-cell>
          <table:table-cell table:formula="of:=[.D401]-[.D40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38888888888889" calcext:value-type="float">
            <text:p>0,00138888888888889000</text:p>
          </table:table-cell>
          <table:table-cell table:formula="of:=[.D402]-[.D40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0" office:value-type="float" office:value="12030" calcext:value-type="float">
            <text:p>12030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39236111111111" calcext:value-type="float">
            <text:p>0,00139236111111111000</text:p>
          </table:table-cell>
          <table:table-cell table:formula="of:=[.D403]-[.D40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0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39583333333333" calcext:value-type="float">
            <text:p>0,00139583333333333000</text:p>
          </table:table-cell>
          <table:table-cell table:formula="of:=[.D404]-[.D40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0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39930555555556" calcext:value-type="float">
            <text:p>0,00139930555555556000</text:p>
          </table:table-cell>
          <table:table-cell table:formula="of:=[.D405]-[.D40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0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40277777777778" calcext:value-type="float">
            <text:p>0,00140277777777778000</text:p>
          </table:table-cell>
          <table:table-cell table:formula="of:=[.D406]-[.D40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0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40625" calcext:value-type="float">
            <text:p>0,00140625000000000000</text:p>
          </table:table-cell>
          <table:table-cell table:formula="of:=[.D407]-[.D40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0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40972222222222" calcext:value-type="float">
            <text:p>0,00140972222222222000</text:p>
          </table:table-cell>
          <table:table-cell table:formula="of:=[.D408]-[.D40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0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41319444444444" calcext:value-type="float">
            <text:p>0,00141319444444444000</text:p>
          </table:table-cell>
          <table:table-cell table:formula="of:=[.D409]-[.D40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41666666666667" calcext:value-type="float">
            <text:p>0,00141666666666667000</text:p>
          </table:table-cell>
          <table:table-cell table:formula="of:=[.D410]-[.D40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0" office:value-type="float" office:value="12270" calcext:value-type="float">
            <text:p>12270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42013888888889" calcext:value-type="float">
            <text:p>0,00142013888888889000</text:p>
          </table:table-cell>
          <table:table-cell table:formula="of:=[.D411]-[.D41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0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42361111111111" calcext:value-type="float">
            <text:p>0,00142361111111111000</text:p>
          </table:table-cell>
          <table:table-cell table:formula="of:=[.D412]-[.D41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0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42708333333333" calcext:value-type="float">
            <text:p>0,00142708333333333000</text:p>
          </table:table-cell>
          <table:table-cell table:formula="of:=[.D413]-[.D41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0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43055555555556" calcext:value-type="float">
            <text:p>0,00143055555555556000</text:p>
          </table:table-cell>
          <table:table-cell table:formula="of:=[.D414]-[.D41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0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43402777777778" calcext:value-type="float">
            <text:p>0,00143402777777778000</text:p>
          </table:table-cell>
          <table:table-cell table:formula="of:=[.D415]-[.D41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0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4375" calcext:value-type="float">
            <text:p>0,00143750000000000000</text:p>
          </table:table-cell>
          <table:table-cell table:formula="of:=[.D416]-[.D41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0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44097222222222" calcext:value-type="float">
            <text:p>0,00144097222222222000</text:p>
          </table:table-cell>
          <table:table-cell table:formula="of:=[.D417]-[.D41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0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44444444444444" calcext:value-type="float">
            <text:p>0,00144444444444444000</text:p>
          </table:table-cell>
          <table:table-cell table:formula="of:=[.D418]-[.D41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0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44791666666667" calcext:value-type="float">
            <text:p>0,00144791666666667000</text:p>
          </table:table-cell>
          <table:table-cell table:formula="of:=[.D419]-[.D41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0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45138888888889" calcext:value-type="float">
            <text:p>0,00145138888888889000</text:p>
          </table:table-cell>
          <table:table-cell table:formula="of:=[.D420]-[.D41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0" office:value-type="float" office:value="12570" calcext:value-type="float">
            <text:p>12570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45486111111111" calcext:value-type="float">
            <text:p>0,00145486111111111000</text:p>
          </table:table-cell>
          <table:table-cell table:formula="of:=[.D421]-[.D42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45833333333333" calcext:value-type="float">
            <text:p>0,00145833333333333000</text:p>
          </table:table-cell>
          <table:table-cell table:formula="of:=[.D422]-[.D42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0" office:value-type="float" office:value="12630" calcext:value-type="float">
            <text:p>12630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46180555555556" calcext:value-type="float">
            <text:p>0,00146180555555556000</text:p>
          </table:table-cell>
          <table:table-cell table:formula="of:=[.D423]-[.D42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0" office:value-type="float" office:value="12660" calcext:value-type="float">
            <text:p>1266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46527777777778" calcext:value-type="float">
            <text:p>0,00146527777777778000</text:p>
          </table:table-cell>
          <table:table-cell table:formula="of:=[.D424]-[.D42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0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46875" calcext:value-type="float">
            <text:p>0,00146875000000000000</text:p>
          </table:table-cell>
          <table:table-cell table:formula="of:=[.D425]-[.D42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0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47222222222222" calcext:value-type="float">
            <text:p>0,00147222222222222000</text:p>
          </table:table-cell>
          <table:table-cell table:formula="of:=[.D426]-[.D42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0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47569444444444" calcext:value-type="float">
            <text:p>0,00147569444444444000</text:p>
          </table:table-cell>
          <table:table-cell table:formula="of:=[.D427]-[.D42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0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47916666666667" calcext:value-type="float">
            <text:p>0,00147916666666667000</text:p>
          </table:table-cell>
          <table:table-cell table:formula="of:=[.D428]-[.D42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0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48263888888889" calcext:value-type="float">
            <text:p>0,00148263888888889000</text:p>
          </table:table-cell>
          <table:table-cell table:formula="of:=[.D429]-[.D42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0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48611111111111" calcext:value-type="float">
            <text:p>0,00148611111111111000</text:p>
          </table:table-cell>
          <table:table-cell table:formula="of:=[.D430]-[.D42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0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48958333333333" calcext:value-type="float">
            <text:p>0,00148958333333333000</text:p>
          </table:table-cell>
          <table:table-cell table:formula="of:=[.D431]-[.D43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0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49305555555556" calcext:value-type="float">
            <text:p>0,00149305555555556000</text:p>
          </table:table-cell>
          <table:table-cell table:formula="of:=[.D432]-[.D43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0" office:value-type="float" office:value="12930" calcext:value-type="float">
            <text:p>12930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49652777777778" calcext:value-type="float">
            <text:p>0,00149652777777778000</text:p>
          </table:table-cell>
          <table:table-cell table:formula="of:=[.D433]-[.D43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5" calcext:value-type="float">
            <text:p>0,00150000000000000000</text:p>
          </table:table-cell>
          <table:table-cell table:formula="of:=[.D434]-[.D43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0" office:value-type="float" office:value="12990" calcext:value-type="float">
            <text:p>12990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50347222222222" calcext:value-type="float">
            <text:p>0,00150347222222222000</text:p>
          </table:table-cell>
          <table:table-cell table:formula="of:=[.D435]-[.D43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0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50694444444444" calcext:value-type="float">
            <text:p>0,00150694444444444000</text:p>
          </table:table-cell>
          <table:table-cell table:formula="of:=[.D436]-[.D43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0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51041666666667" calcext:value-type="float">
            <text:p>0,00151041666666667000</text:p>
          </table:table-cell>
          <table:table-cell table:formula="of:=[.D437]-[.D43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0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51388888888889" calcext:value-type="float">
            <text:p>0,00151388888888889000</text:p>
          </table:table-cell>
          <table:table-cell table:formula="of:=[.D438]-[.D43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0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51736111111111" calcext:value-type="float">
            <text:p>0,00151736111111111000</text:p>
          </table:table-cell>
          <table:table-cell table:formula="of:=[.D439]-[.D43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0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52083333333333" calcext:value-type="float">
            <text:p>0,00152083333333333000</text:p>
          </table:table-cell>
          <table:table-cell table:formula="of:=[.D440]-[.D43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0" office:value-type="float" office:value="13170" calcext:value-type="float">
            <text:p>13170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52430555555556" calcext:value-type="float">
            <text:p>0,00152430555555556000</text:p>
          </table:table-cell>
          <table:table-cell table:formula="of:=[.D441]-[.D44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52777777777778" calcext:value-type="float">
            <text:p>0,00152777777777778000</text:p>
          </table:table-cell>
          <table:table-cell table:formula="of:=[.D442]-[.D44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0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53125" calcext:value-type="float">
            <text:p>0,00153125000000000000</text:p>
          </table:table-cell>
          <table:table-cell table:formula="of:=[.D443]-[.D44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0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53472222222222" calcext:value-type="float">
            <text:p>0,00153472222222222000</text:p>
          </table:table-cell>
          <table:table-cell table:formula="of:=[.D444]-[.D44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0" office:value-type="float" office:value="13290" calcext:value-type="float">
            <text:p>13290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53819444444444" calcext:value-type="float">
            <text:p>0,00153819444444444000</text:p>
          </table:table-cell>
          <table:table-cell table:formula="of:=[.D445]-[.D44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0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54166666666667" calcext:value-type="float">
            <text:p>0,00154166666666667000</text:p>
          </table:table-cell>
          <table:table-cell table:formula="of:=[.D446]-[.D44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0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54513888888889" calcext:value-type="float">
            <text:p>0,00154513888888889000</text:p>
          </table:table-cell>
          <table:table-cell table:formula="of:=[.D447]-[.D44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0" office:value-type="float" office:value="13380" calcext:value-type="float">
            <text:p>1338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54861111111111" calcext:value-type="float">
            <text:p>0,00154861111111111000</text:p>
          </table:table-cell>
          <table:table-cell table:formula="of:=[.D448]-[.D44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0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55208333333333" calcext:value-type="float">
            <text:p>0,00155208333333333000</text:p>
          </table:table-cell>
          <table:table-cell table:formula="of:=[.D449]-[.D44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55555555555556" calcext:value-type="float">
            <text:p>0,00155555555555556000</text:p>
          </table:table-cell>
          <table:table-cell table:formula="of:=[.D450]-[.D44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0" office:value-type="float" office:value="13470" calcext:value-type="float">
            <text:p>13470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55902777777778" calcext:value-type="float">
            <text:p>0,00155902777777778000</text:p>
          </table:table-cell>
          <table:table-cell table:formula="of:=[.D451]-[.D45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5625" calcext:value-type="float">
            <text:p>0,00156250000000000000</text:p>
          </table:table-cell>
          <table:table-cell table:formula="of:=[.D452]-[.D45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0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56597222222222" calcext:value-type="float">
            <text:p>0,00156597222222222000</text:p>
          </table:table-cell>
          <table:table-cell table:formula="of:=[.D453]-[.D45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0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56944444444444" calcext:value-type="float">
            <text:p>0,00156944444444444000</text:p>
          </table:table-cell>
          <table:table-cell table:formula="of:=[.D454]-[.D45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0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57291666666667" calcext:value-type="float">
            <text:p>0,00157291666666667000</text:p>
          </table:table-cell>
          <table:table-cell table:formula="of:=[.D455]-[.D45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0" office:value-type="float" office:value="13620" calcext:value-type="float">
            <text:p>1362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57638888888889" calcext:value-type="float">
            <text:p>0,00157638888888889000</text:p>
          </table:table-cell>
          <table:table-cell table:formula="of:=[.D456]-[.D45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0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57986111111111" calcext:value-type="float">
            <text:p>0,00157986111111111000</text:p>
          </table:table-cell>
          <table:table-cell table:formula="of:=[.D457]-[.D45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58333333333333" calcext:value-type="float">
            <text:p>0,00158333333333333000</text:p>
          </table:table-cell>
          <table:table-cell table:formula="of:=[.D458]-[.D45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0" office:value-type="float" office:value="13710" calcext:value-type="float">
            <text:p>13710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58680555555556" calcext:value-type="float">
            <text:p>0,00158680555555556000</text:p>
          </table:table-cell>
          <table:table-cell table:formula="of:=[.D459]-[.D45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0" office:value-type="float" office:value="13740" calcext:value-type="float">
            <text:p>1374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59027777777778" calcext:value-type="float">
            <text:p>0,00159027777777778000</text:p>
          </table:table-cell>
          <table:table-cell table:formula="of:=[.D460]-[.D45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0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59375" calcext:value-type="float">
            <text:p>0,00159375000000000000</text:p>
          </table:table-cell>
          <table:table-cell table:formula="of:=[.D461]-[.D46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59722222222222" calcext:value-type="float">
            <text:p>0,00159722222222222000</text:p>
          </table:table-cell>
          <table:table-cell table:formula="of:=[.D462]-[.D46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0" office:value-type="float" office:value="13830" calcext:value-type="float">
            <text:p>13830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60069444444444" calcext:value-type="float">
            <text:p>0,00160069444444444000</text:p>
          </table:table-cell>
          <table:table-cell table:formula="of:=[.D463]-[.D46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0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60416666666667" calcext:value-type="float">
            <text:p>0,00160416666666667000</text:p>
          </table:table-cell>
          <table:table-cell table:formula="of:=[.D464]-[.D46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0" office:value-type="float" office:value="13890" calcext:value-type="float">
            <text:p>13890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60763888888889" calcext:value-type="float">
            <text:p>0,00160763888888889000</text:p>
          </table:table-cell>
          <table:table-cell table:formula="of:=[.D465]-[.D46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0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61111111111111" calcext:value-type="float">
            <text:p>0,00161111111111111000</text:p>
          </table:table-cell>
          <table:table-cell table:formula="of:=[.D466]-[.D46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0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61458333333333" calcext:value-type="float">
            <text:p>0,00161458333333333000</text:p>
          </table:table-cell>
          <table:table-cell table:formula="of:=[.D467]-[.D46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0" office:value-type="float" office:value="13980" calcext:value-type="float">
            <text:p>1398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61805555555556" calcext:value-type="float">
            <text:p>0,00161805555555556000</text:p>
          </table:table-cell>
          <table:table-cell table:formula="of:=[.D468]-[.D46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0" office:value-type="float" office:value="14010" calcext:value-type="float">
            <text:p>14010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62152777777778" calcext:value-type="float">
            <text:p>0,00162152777777778000</text:p>
          </table:table-cell>
          <table:table-cell table:formula="of:=[.D469]-[.D46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0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625" calcext:value-type="float">
            <text:p>0,00162500000000000000</text:p>
          </table:table-cell>
          <table:table-cell table:formula="of:=[.D470]-[.D46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0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62847222222222" calcext:value-type="float">
            <text:p>0,00162847222222222000</text:p>
          </table:table-cell>
          <table:table-cell table:formula="of:=[.D471]-[.D47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0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63194444444444" calcext:value-type="float">
            <text:p>0,00163194444444444000</text:p>
          </table:table-cell>
          <table:table-cell table:formula="of:=[.D472]-[.D47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0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63541666666667" calcext:value-type="float">
            <text:p>0,00163541666666667000</text:p>
          </table:table-cell>
          <table:table-cell table:formula="of:=[.D473]-[.D47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0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63888888888889" calcext:value-type="float">
            <text:p>0,00163888888888889000</text:p>
          </table:table-cell>
          <table:table-cell table:formula="of:=[.D474]-[.D47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0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64236111111111" calcext:value-type="float">
            <text:p>0,00164236111111111000</text:p>
          </table:table-cell>
          <table:table-cell table:formula="of:=[.D475]-[.D47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0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64583333333333" calcext:value-type="float">
            <text:p>0,00164583333333333000</text:p>
          </table:table-cell>
          <table:table-cell table:formula="of:=[.D476]-[.D47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0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64930555555556" calcext:value-type="float">
            <text:p>0,00164930555555556000</text:p>
          </table:table-cell>
          <table:table-cell table:formula="of:=[.D477]-[.D47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0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65277777777778" calcext:value-type="float">
            <text:p>0,00165277777777778000</text:p>
          </table:table-cell>
          <table:table-cell table:formula="of:=[.D478]-[.D47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0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65625" calcext:value-type="float">
            <text:p>0,00165625000000000000</text:p>
          </table:table-cell>
          <table:table-cell table:formula="of:=[.D479]-[.D47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0" office:value-type="float" office:value="14340" calcext:value-type="float">
            <text:p>1434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65972222222222" calcext:value-type="float">
            <text:p>0,00165972222222222000</text:p>
          </table:table-cell>
          <table:table-cell table:formula="of:=[.D480]-[.D47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0" office:value-type="float" office:value="14370" calcext:value-type="float">
            <text:p>14370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66319444444444" calcext:value-type="float">
            <text:p>0,00166319444444444000</text:p>
          </table:table-cell>
          <table:table-cell table:formula="of:=[.D481]-[.D48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66666666666667" calcext:value-type="float">
            <text:p>0,00166666666666667000</text:p>
          </table:table-cell>
          <table:table-cell table:formula="of:=[.D482]-[.D48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0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67013888888889" calcext:value-type="float">
            <text:p>0,00167013888888889000</text:p>
          </table:table-cell>
          <table:table-cell table:formula="of:=[.D483]-[.D48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0" office:value-type="float" office:value="14460" calcext:value-type="float">
            <text:p>1446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67361111111111" calcext:value-type="float">
            <text:p>0,00167361111111111000</text:p>
          </table:table-cell>
          <table:table-cell table:formula="of:=[.D484]-[.D48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0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67708333333333" calcext:value-type="float">
            <text:p>0,00167708333333333000</text:p>
          </table:table-cell>
          <table:table-cell table:formula="of:=[.D485]-[.D48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0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68055555555556" calcext:value-type="float">
            <text:p>0,00168055555555556000</text:p>
          </table:table-cell>
          <table:table-cell table:formula="of:=[.D486]-[.D48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0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68402777777778" calcext:value-type="float">
            <text:p>0,00168402777777778000</text:p>
          </table:table-cell>
          <table:table-cell table:formula="of:=[.D487]-[.D48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0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6875" calcext:value-type="float">
            <text:p>0,00168750000000000000</text:p>
          </table:table-cell>
          <table:table-cell table:formula="of:=[.D488]-[.D48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0" office:value-type="float" office:value="14610" calcext:value-type="float">
            <text:p>14610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69097222222222" calcext:value-type="float">
            <text:p>0,00169097222222222000</text:p>
          </table:table-cell>
          <table:table-cell table:formula="of:=[.D489]-[.D48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0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69444444444444" calcext:value-type="float">
            <text:p>0,00169444444444444000</text:p>
          </table:table-cell>
          <table:table-cell table:formula="of:=[.D490]-[.D48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0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69791666666667" calcext:value-type="float">
            <text:p>0,00169791666666667000</text:p>
          </table:table-cell>
          <table:table-cell table:formula="of:=[.D491]-[.D49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70138888888889" calcext:value-type="float">
            <text:p>0,00170138888888889000</text:p>
          </table:table-cell>
          <table:table-cell table:formula="of:=[.D492]-[.D49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0" office:value-type="float" office:value="14730" calcext:value-type="float">
            <text:p>14730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70486111111111" calcext:value-type="float">
            <text:p>0,00170486111111111000</text:p>
          </table:table-cell>
          <table:table-cell table:formula="of:=[.D493]-[.D49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0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70833333333333" calcext:value-type="float">
            <text:p>0,00170833333333333000</text:p>
          </table:table-cell>
          <table:table-cell table:formula="of:=[.D494]-[.D49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0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71180555555556" calcext:value-type="float">
            <text:p>0,00171180555555556000</text:p>
          </table:table-cell>
          <table:table-cell table:formula="of:=[.D495]-[.D49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0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71527777777778" calcext:value-type="float">
            <text:p>0,00171527777777778000</text:p>
          </table:table-cell>
          <table:table-cell table:formula="of:=[.D496]-[.D49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0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71875" calcext:value-type="float">
            <text:p>0,00171875000000000000</text:p>
          </table:table-cell>
          <table:table-cell table:formula="of:=[.D497]-[.D49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0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72222222222222" calcext:value-type="float">
            <text:p>0,00172222222222222000</text:p>
          </table:table-cell>
          <table:table-cell table:formula="of:=[.D498]-[.D49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0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72569444444444" calcext:value-type="float">
            <text:p>0,00172569444444444000</text:p>
          </table:table-cell>
          <table:table-cell table:formula="of:=[.D499]-[.D49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0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72916666666667" calcext:value-type="float">
            <text:p>0,00172916666666667000</text:p>
          </table:table-cell>
          <table:table-cell table:formula="of:=[.D500]-[.D49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0" office:value-type="float" office:value="14970" calcext:value-type="float">
            <text:p>14970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73263888888889" calcext:value-type="float">
            <text:p>0,00173263888888889000</text:p>
          </table:table-cell>
          <table:table-cell table:formula="of:=[.D501]-[.D50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73611111111111" calcext:value-type="float">
            <text:p>0,00173611111111111000</text:p>
          </table:table-cell>
          <table:table-cell table:formula="of:=[.D502]-[.D50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0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73958333333333" calcext:value-type="float">
            <text:p>0,00173958333333333000</text:p>
          </table:table-cell>
          <table:table-cell table:formula="of:=[.D503]-[.D50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0" office:value-type="float" office:value="15060" calcext:value-type="float">
            <text:p>1506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74305555555556" calcext:value-type="float">
            <text:p>0,00174305555555556000</text:p>
          </table:table-cell>
          <table:table-cell table:formula="of:=[.D504]-[.D50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0" office:value-type="float" office:value="15090" calcext:value-type="float">
            <text:p>15090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74652777777778" calcext:value-type="float">
            <text:p>0,00174652777777778000</text:p>
          </table:table-cell>
          <table:table-cell table:formula="of:=[.D505]-[.D50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75" calcext:value-type="float">
            <text:p>0,00175000000000000000</text:p>
          </table:table-cell>
          <table:table-cell table:formula="of:=[.D506]-[.D50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0" office:value-type="float" office:value="15150" calcext:value-type="float">
            <text:p>1515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75347222222222" calcext:value-type="float">
            <text:p>0,00175347222222222000</text:p>
          </table:table-cell>
          <table:table-cell table:formula="of:=[.D507]-[.D50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0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75694444444444" calcext:value-type="float">
            <text:p>0,00175694444444444000</text:p>
          </table:table-cell>
          <table:table-cell table:formula="of:=[.D508]-[.D50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0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76041666666667" calcext:value-type="float">
            <text:p>0,00176041666666667000</text:p>
          </table:table-cell>
          <table:table-cell table:formula="of:=[.D509]-[.D50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0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76388888888889" calcext:value-type="float">
            <text:p>0,00176388888888889000</text:p>
          </table:table-cell>
          <table:table-cell table:formula="of:=[.D510]-[.D50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0" office:value-type="float" office:value="15270" calcext:value-type="float">
            <text:p>15270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76736111111111" calcext:value-type="float">
            <text:p>0,00176736111111111000</text:p>
          </table:table-cell>
          <table:table-cell table:formula="of:=[.D511]-[.D51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77083333333333" calcext:value-type="float">
            <text:p>0,00177083333333333000</text:p>
          </table:table-cell>
          <table:table-cell table:formula="of:=[.D512]-[.D51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0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77430555555556" calcext:value-type="float">
            <text:p>0,00177430555555556000</text:p>
          </table:table-cell>
          <table:table-cell table:formula="of:=[.D513]-[.D51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0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77777777777778" calcext:value-type="float">
            <text:p>0,00177777777777778000</text:p>
          </table:table-cell>
          <table:table-cell table:formula="of:=[.D514]-[.D51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0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78125" calcext:value-type="float">
            <text:p>0,00178125000000000000</text:p>
          </table:table-cell>
          <table:table-cell table:formula="of:=[.D515]-[.D51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0" office:value-type="float" office:value="15420" calcext:value-type="float">
            <text:p>1542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78472222222222" calcext:value-type="float">
            <text:p>0,00178472222222222000</text:p>
          </table:table-cell>
          <table:table-cell table:formula="of:=[.D516]-[.D51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0" office:value-type="float" office:value="15450" calcext:value-type="float">
            <text:p>1545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78819444444444" calcext:value-type="float">
            <text:p>0,00178819444444444000</text:p>
          </table:table-cell>
          <table:table-cell table:formula="of:=[.D517]-[.D51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0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79166666666667" calcext:value-type="float">
            <text:p>0,00179166666666667000</text:p>
          </table:table-cell>
          <table:table-cell table:formula="of:=[.D518]-[.D51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0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79513888888889" calcext:value-type="float">
            <text:p>0,00179513888888889000</text:p>
          </table:table-cell>
          <table:table-cell table:formula="of:=[.D519]-[.D51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0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79861111111111" calcext:value-type="float">
            <text:p>0,00179861111111111000</text:p>
          </table:table-cell>
          <table:table-cell table:formula="of:=[.D520]-[.D51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0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80208333333333" calcext:value-type="float">
            <text:p>0,00180208333333333000</text:p>
          </table:table-cell>
          <table:table-cell table:formula="of:=[.D521]-[.D52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80555555555556" calcext:value-type="float">
            <text:p>0,00180555555555556000</text:p>
          </table:table-cell>
          <table:table-cell table:formula="of:=[.D522]-[.D52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0" office:value-type="float" office:value="15630" calcext:value-type="float">
            <text:p>15630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80902777777778" calcext:value-type="float">
            <text:p>0,00180902777777778000</text:p>
          </table:table-cell>
          <table:table-cell table:formula="of:=[.D523]-[.D52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0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8125" calcext:value-type="float">
            <text:p>0,00181250000000000000</text:p>
          </table:table-cell>
          <table:table-cell table:formula="of:=[.D524]-[.D52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0" office:value-type="float" office:value="15690" calcext:value-type="float">
            <text:p>15690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81597222222222" calcext:value-type="float">
            <text:p>0,00181597222222222000</text:p>
          </table:table-cell>
          <table:table-cell table:formula="of:=[.D525]-[.D52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0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81944444444444" calcext:value-type="float">
            <text:p>0,00181944444444444000</text:p>
          </table:table-cell>
          <table:table-cell table:formula="of:=[.D526]-[.D52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0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82291666666667" calcext:value-type="float">
            <text:p>0,00182291666666667000</text:p>
          </table:table-cell>
          <table:table-cell table:formula="of:=[.D527]-[.D52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0" office:value-type="float" office:value="15780" calcext:value-type="float">
            <text:p>1578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82638888888889" calcext:value-type="float">
            <text:p>0,00182638888888889000</text:p>
          </table:table-cell>
          <table:table-cell table:formula="of:=[.D528]-[.D52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0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82986111111111" calcext:value-type="float">
            <text:p>0,00182986111111111000</text:p>
          </table:table-cell>
          <table:table-cell table:formula="of:=[.D529]-[.D52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83333333333333" calcext:value-type="float">
            <text:p>0,00183333333333333000</text:p>
          </table:table-cell>
          <table:table-cell table:formula="of:=[.D530]-[.D52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0" office:value-type="float" office:value="15870" calcext:value-type="float">
            <text:p>15870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83680555555556" calcext:value-type="float">
            <text:p>0,00183680555555556000</text:p>
          </table:table-cell>
          <table:table-cell table:formula="of:=[.D531]-[.D53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0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84027777777778" calcext:value-type="float">
            <text:p>0,00184027777777778000</text:p>
          </table:table-cell>
          <table:table-cell table:formula="of:=[.D532]-[.D53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0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84375" calcext:value-type="float">
            <text:p>0,00184375000000000000</text:p>
          </table:table-cell>
          <table:table-cell table:formula="of:=[.D533]-[.D53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0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84722222222222" calcext:value-type="float">
            <text:p>0,00184722222222222000</text:p>
          </table:table-cell>
          <table:table-cell table:formula="of:=[.D534]-[.D53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0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85069444444444" calcext:value-type="float">
            <text:p>0,00185069444444444000</text:p>
          </table:table-cell>
          <table:table-cell table:formula="of:=[.D535]-[.D53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0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85416666666667" calcext:value-type="float">
            <text:p>0,00185416666666667000</text:p>
          </table:table-cell>
          <table:table-cell table:formula="of:=[.D536]-[.D53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0" office:value-type="float" office:value="16050" calcext:value-type="float">
            <text:p>1605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85763888888889" calcext:value-type="float">
            <text:p>0,00185763888888889000</text:p>
          </table:table-cell>
          <table:table-cell table:formula="of:=[.D537]-[.D53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0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86111111111111" calcext:value-type="float">
            <text:p>0,00186111111111111000</text:p>
          </table:table-cell>
          <table:table-cell table:formula="of:=[.D538]-[.D53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0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86458333333333" calcext:value-type="float">
            <text:p>0,00186458333333333000</text:p>
          </table:table-cell>
          <table:table-cell table:formula="of:=[.D539]-[.D53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0" office:value-type="float" office:value="16140" calcext:value-type="float">
            <text:p>1614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86805555555556" calcext:value-type="float">
            <text:p>0,00186805555555556000</text:p>
          </table:table-cell>
          <table:table-cell table:formula="of:=[.D540]-[.D53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0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87152777777778" calcext:value-type="float">
            <text:p>0,00187152777777778000</text:p>
          </table:table-cell>
          <table:table-cell table:formula="of:=[.D541]-[.D54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875" calcext:value-type="float">
            <text:p>0,00187500000000000000</text:p>
          </table:table-cell>
          <table:table-cell table:formula="of:=[.D542]-[.D54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0" office:value-type="float" office:value="16230" calcext:value-type="float">
            <text:p>16230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87847222222222" calcext:value-type="float">
            <text:p>0,00187847222222222000</text:p>
          </table:table-cell>
          <table:table-cell table:formula="of:=[.D543]-[.D54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0" office:value-type="float" office:value="16260" calcext:value-type="float">
            <text:p>1626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88194444444444" calcext:value-type="float">
            <text:p>0,00188194444444444000</text:p>
          </table:table-cell>
          <table:table-cell table:formula="of:=[.D544]-[.D543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0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88541666666667" calcext:value-type="float">
            <text:p>0,00188541666666667000</text:p>
          </table:table-cell>
          <table:table-cell table:formula="of:=[.D545]-[.D54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0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88888888888889" calcext:value-type="float">
            <text:p>0,00188888888888889000</text:p>
          </table:table-cell>
          <table:table-cell table:formula="of:=[.D546]-[.D54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0" office:value-type="float" office:value="16350" calcext:value-type="float">
            <text:p>1635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89236111111111" calcext:value-type="float">
            <text:p>0,00189236111111111000</text:p>
          </table:table-cell>
          <table:table-cell table:formula="of:=[.D547]-[.D54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0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89583333333333" calcext:value-type="float">
            <text:p>0,00189583333333333000</text:p>
          </table:table-cell>
          <table:table-cell table:formula="of:=[.D548]-[.D54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0" office:value-type="float" office:value="16410" calcext:value-type="float">
            <text:p>16410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89930555555556" calcext:value-type="float">
            <text:p>0,00189930555555556000</text:p>
          </table:table-cell>
          <table:table-cell table:formula="of:=[.D549]-[.D54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0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90277777777778" calcext:value-type="float">
            <text:p>0,00190277777777778000</text:p>
          </table:table-cell>
          <table:table-cell table:formula="of:=[.D550]-[.D54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0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90625" calcext:value-type="float">
            <text:p>0,00190625000000000000</text:p>
          </table:table-cell>
          <table:table-cell table:formula="of:=[.D551]-[.D55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0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90972222222222" calcext:value-type="float">
            <text:p>0,00190972222222222000</text:p>
          </table:table-cell>
          <table:table-cell table:formula="of:=[.D552]-[.D55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0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91319444444444" calcext:value-type="float">
            <text:p>0,00191319444444444000</text:p>
          </table:table-cell>
          <table:table-cell table:formula="of:=[.D553]-[.D55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91666666666667" calcext:value-type="float">
            <text:p>0,00191666666666667000</text:p>
          </table:table-cell>
          <table:table-cell table:formula="of:=[.D554]-[.D55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0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92013888888889" calcext:value-type="float">
            <text:p>0,00192013888888889000</text:p>
          </table:table-cell>
          <table:table-cell table:formula="of:=[.D555]-[.D554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0" office:value-type="float" office:value="16620" calcext:value-type="float">
            <text:p>1662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92361111111111" calcext:value-type="float">
            <text:p>0,00192361111111111000</text:p>
          </table:table-cell>
          <table:table-cell table:formula="of:=[.D556]-[.D555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0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92708333333333" calcext:value-type="float">
            <text:p>0,00192708333333333000</text:p>
          </table:table-cell>
          <table:table-cell table:formula="of:=[.D557]-[.D556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0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93055555555556" calcext:value-type="float">
            <text:p>0,00193055555555556000</text:p>
          </table:table-cell>
          <table:table-cell table:formula="of:=[.D558]-[.D557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0" office:value-type="float" office:value="16710" calcext:value-type="float">
            <text:p>16710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93402777777778" calcext:value-type="float">
            <text:p>0,00193402777777778000</text:p>
          </table:table-cell>
          <table:table-cell table:formula="of:=[.D559]-[.D558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0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9375" calcext:value-type="float">
            <text:p>0,00193750000000000000</text:p>
          </table:table-cell>
          <table:table-cell table:formula="of:=[.D560]-[.D559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0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94097222222222" calcext:value-type="float">
            <text:p>0,00194097222222222000</text:p>
          </table:table-cell>
          <table:table-cell table:formula="of:=[.D561]-[.D560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94444444444444" calcext:value-type="float">
            <text:p>0,00194444444444444000</text:p>
          </table:table-cell>
          <table:table-cell table:formula="of:=[.D562]-[.D561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0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94791666666667" calcext:value-type="float">
            <text:p>0,00194791666666667000</text:p>
          </table:table-cell>
          <table:table-cell table:formula="of:=[.D563]-[.D562]" office:value-type="float" office:value="0.0000034722222222222" calcext:value-type="float">
            <text:p>0,0000034722222222222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0" office:value-type="float" office:value="16860" calcext:value-type="float">
            <text:p>1686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95138888888889" calcext:value-type="float">
            <text:p>0,00195138888888889000</text:p>
          </table:table-cell>
          <table:table-cell table:formula="of:=[.D564]-[.D56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0" office:value-type="float" office:value="16890" calcext:value-type="float">
            <text:p>16890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95486111111111" calcext:value-type="float">
            <text:p>0,00195486111111111000</text:p>
          </table:table-cell>
          <table:table-cell table:formula="of:=[.D565]-[.D56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0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95833333333333" calcext:value-type="float">
            <text:p>0,00195833333333333000</text:p>
          </table:table-cell>
          <table:table-cell table:formula="of:=[.D566]-[.D56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0" office:value-type="float" office:value="16950" calcext:value-type="float">
            <text:p>1695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96180555555556" calcext:value-type="float">
            <text:p>0,00196180555555556000</text:p>
          </table:table-cell>
          <table:table-cell table:formula="of:=[.D567]-[.D56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0" office:value-type="float" office:value="16980" calcext:value-type="float">
            <text:p>1698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96527777777778" calcext:value-type="float">
            <text:p>0,00196527777777778000</text:p>
          </table:table-cell>
          <table:table-cell table:formula="of:=[.D568]-[.D56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0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96875" calcext:value-type="float">
            <text:p>0,00196875000000000000</text:p>
          </table:table-cell>
          <table:table-cell table:formula="of:=[.D569]-[.D56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0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97222222222222" calcext:value-type="float">
            <text:p>0,00197222222222222000</text:p>
          </table:table-cell>
          <table:table-cell table:formula="of:=[.D570]-[.D56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0" office:value-type="float" office:value="17070" calcext:value-type="float">
            <text:p>17070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97569444444444" calcext:value-type="float">
            <text:p>0,00197569444444444000</text:p>
          </table:table-cell>
          <table:table-cell table:formula="of:=[.D571]-[.D57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97916666666667" calcext:value-type="float">
            <text:p>0,00197916666666667000</text:p>
          </table:table-cell>
          <table:table-cell table:formula="of:=[.D572]-[.D57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0" office:value-type="float" office:value="17130" calcext:value-type="float">
            <text:p>17130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98263888888889" calcext:value-type="float">
            <text:p>0,00198263888888889000</text:p>
          </table:table-cell>
          <table:table-cell table:formula="of:=[.D573]-[.D57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0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98611111111111" calcext:value-type="float">
            <text:p>0,00198611111111111000</text:p>
          </table:table-cell>
          <table:table-cell table:formula="of:=[.D574]-[.D57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0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98958333333333" calcext:value-type="float">
            <text:p>0,00198958333333333000</text:p>
          </table:table-cell>
          <table:table-cell table:formula="of:=[.D575]-[.D57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0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99305555555556" calcext:value-type="float">
            <text:p>0,00199305555555556000</text:p>
          </table:table-cell>
          <table:table-cell table:formula="of:=[.D576]-[.D57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0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99652777777778" calcext:value-type="float">
            <text:p>0,00199652777777778000</text:p>
          </table:table-cell>
          <table:table-cell table:formula="of:=[.D577]-[.D57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" calcext:value-type="float">
            <text:p>0,00200000000000000000</text:p>
          </table:table-cell>
          <table:table-cell table:formula="of:=[.D578]-[.D57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0" office:value-type="float" office:value="17310" calcext:value-type="float">
            <text:p>17310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00347222222222" calcext:value-type="float">
            <text:p>0,00200347222222222000</text:p>
          </table:table-cell>
          <table:table-cell table:formula="of:=[.D579]-[.D57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0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00694444444444" calcext:value-type="float">
            <text:p>0,00200694444444444000</text:p>
          </table:table-cell>
          <table:table-cell table:formula="of:=[.D580]-[.D57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0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01041666666667" calcext:value-type="float">
            <text:p>0,00201041666666667000</text:p>
          </table:table-cell>
          <table:table-cell table:formula="of:=[.D581]-[.D58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01388888888889" calcext:value-type="float">
            <text:p>0,00201388888888889000</text:p>
          </table:table-cell>
          <table:table-cell table:formula="of:=[.D582]-[.D58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0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01736111111111" calcext:value-type="float">
            <text:p>0,00201736111111111000</text:p>
          </table:table-cell>
          <table:table-cell table:formula="of:=[.D583]-[.D58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0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02083333333333" calcext:value-type="float">
            <text:p>0,00202083333333333000</text:p>
          </table:table-cell>
          <table:table-cell table:formula="of:=[.D584]-[.D58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0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02430555555556" calcext:value-type="float">
            <text:p>0,00202430555555556000</text:p>
          </table:table-cell>
          <table:table-cell table:formula="of:=[.D585]-[.D58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0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02777777777778" calcext:value-type="float">
            <text:p>0,00202777777777778000</text:p>
          </table:table-cell>
          <table:table-cell table:formula="of:=[.D586]-[.D58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0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03125" calcext:value-type="float">
            <text:p>0,00203125000000000000</text:p>
          </table:table-cell>
          <table:table-cell table:formula="of:=[.D587]-[.D58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0" office:value-type="float" office:value="17580" calcext:value-type="float">
            <text:p>1758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03472222222222" calcext:value-type="float">
            <text:p>0,00203472222222222000</text:p>
          </table:table-cell>
          <table:table-cell table:formula="of:=[.D588]-[.D58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0" office:value-type="float" office:value="17610" calcext:value-type="float">
            <text:p>17610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03819444444444" calcext:value-type="float">
            <text:p>0,00203819444444444000</text:p>
          </table:table-cell>
          <table:table-cell table:formula="of:=[.D589]-[.D58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04166666666667" calcext:value-type="float">
            <text:p>0,00204166666666667000</text:p>
          </table:table-cell>
          <table:table-cell table:formula="of:=[.D590]-[.D58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0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04513888888889" calcext:value-type="float">
            <text:p>0,00204513888888889000</text:p>
          </table:table-cell>
          <table:table-cell table:formula="of:=[.D591]-[.D59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0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04861111111111" calcext:value-type="float">
            <text:p>0,00204861111111111000</text:p>
          </table:table-cell>
          <table:table-cell table:formula="of:=[.D592]-[.D59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0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05208333333333" calcext:value-type="float">
            <text:p>0,00205208333333333000</text:p>
          </table:table-cell>
          <table:table-cell table:formula="of:=[.D593]-[.D59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0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05555555555556" calcext:value-type="float">
            <text:p>0,00205555555555556000</text:p>
          </table:table-cell>
          <table:table-cell table:formula="of:=[.D594]-[.D59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0" office:value-type="float" office:value="17790" calcext:value-type="float">
            <text:p>17790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05902777777778" calcext:value-type="float">
            <text:p>0,00205902777777778000</text:p>
          </table:table-cell>
          <table:table-cell table:formula="of:=[.D595]-[.D59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0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0625" calcext:value-type="float">
            <text:p>0,00206250000000000000</text:p>
          </table:table-cell>
          <table:table-cell table:formula="of:=[.D596]-[.D59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0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06597222222222" calcext:value-type="float">
            <text:p>0,00206597222222222000</text:p>
          </table:table-cell>
          <table:table-cell table:formula="of:=[.D597]-[.D59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0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06944444444444" calcext:value-type="float">
            <text:p>0,00206944444444444000</text:p>
          </table:table-cell>
          <table:table-cell table:formula="of:=[.D598]-[.D59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0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07291666666667" calcext:value-type="float">
            <text:p>0,00207291666666667000</text:p>
          </table:table-cell>
          <table:table-cell table:formula="of:=[.D599]-[.D59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0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07638888888889" calcext:value-type="float">
            <text:p>0,00207638888888889000</text:p>
          </table:table-cell>
          <table:table-cell table:formula="of:=[.D600]-[.D59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0" office:value-type="float" office:value="17970" calcext:value-type="float">
            <text:p>17970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07986111111111" calcext:value-type="float">
            <text:p>0,00207986111111111000</text:p>
          </table:table-cell>
          <table:table-cell table:formula="of:=[.D601]-[.D60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08333333333333" calcext:value-type="float">
            <text:p>0,00208333333333333000</text:p>
          </table:table-cell>
          <table:table-cell table:formula="of:=[.D602]-[.D60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0" office:value-type="float" office:value="18030" calcext:value-type="float">
            <text:p>18030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08680555555556" calcext:value-type="float">
            <text:p>0,00208680555555556000</text:p>
          </table:table-cell>
          <table:table-cell table:formula="of:=[.D603]-[.D60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0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09027777777778" calcext:value-type="float">
            <text:p>0,00209027777777778000</text:p>
          </table:table-cell>
          <table:table-cell table:formula="of:=[.D604]-[.D60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0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09375" calcext:value-type="float">
            <text:p>0,00209375000000000000</text:p>
          </table:table-cell>
          <table:table-cell table:formula="of:=[.D605]-[.D60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0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09722222222222" calcext:value-type="float">
            <text:p>0,00209722222222222000</text:p>
          </table:table-cell>
          <table:table-cell table:formula="of:=[.D606]-[.D60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0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10069444444444" calcext:value-type="float">
            <text:p>0,00210069444444444000</text:p>
          </table:table-cell>
          <table:table-cell table:formula="of:=[.D607]-[.D60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0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10416666666667" calcext:value-type="float">
            <text:p>0,00210416666666667000</text:p>
          </table:table-cell>
          <table:table-cell table:formula="of:=[.D608]-[.D60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0" office:value-type="float" office:value="18210" calcext:value-type="float">
            <text:p>18210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10763888888889" calcext:value-type="float">
            <text:p>0,00210763888888889000</text:p>
          </table:table-cell>
          <table:table-cell table:formula="of:=[.D609]-[.D60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0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11111111111111" calcext:value-type="float">
            <text:p>0,00211111111111111000</text:p>
          </table:table-cell>
          <table:table-cell table:formula="of:=[.D610]-[.D60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0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11458333333333" calcext:value-type="float">
            <text:p>0,00211458333333333000</text:p>
          </table:table-cell>
          <table:table-cell table:formula="of:=[.D611]-[.D61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0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11805555555556" calcext:value-type="float">
            <text:p>0,00211805555555556000</text:p>
          </table:table-cell>
          <table:table-cell table:formula="of:=[.D612]-[.D61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0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12152777777778" calcext:value-type="float">
            <text:p>0,00212152777777778000</text:p>
          </table:table-cell>
          <table:table-cell table:formula="of:=[.D613]-[.D61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0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125" calcext:value-type="float">
            <text:p>0,00212500000000000000</text:p>
          </table:table-cell>
          <table:table-cell table:formula="of:=[.D614]-[.D61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0" office:value-type="float" office:value="18390" calcext:value-type="float">
            <text:p>18390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12847222222222" calcext:value-type="float">
            <text:p>0,00212847222222222000</text:p>
          </table:table-cell>
          <table:table-cell table:formula="of:=[.D615]-[.D61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0" office:value-type="float" office:value="18420" calcext:value-type="float">
            <text:p>18420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13194444444444" calcext:value-type="float">
            <text:p>0,00213194444444444000</text:p>
          </table:table-cell>
          <table:table-cell table:formula="of:=[.D616]-[.D61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0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13541666666667" calcext:value-type="float">
            <text:p>0,00213541666666667000</text:p>
          </table:table-cell>
          <table:table-cell table:formula="of:=[.D617]-[.D61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13888888888889" calcext:value-type="float">
            <text:p>0,00213888888888889000</text:p>
          </table:table-cell>
          <table:table-cell table:formula="of:=[.D618]-[.D61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0" office:value-type="float" office:value="18510" calcext:value-type="float">
            <text:p>18510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14236111111111" calcext:value-type="float">
            <text:p>0,00214236111111111000</text:p>
          </table:table-cell>
          <table:table-cell table:formula="of:=[.D619]-[.D61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0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14583333333333" calcext:value-type="float">
            <text:p>0,00214583333333333000</text:p>
          </table:table-cell>
          <table:table-cell table:formula="of:=[.D620]-[.D61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0" office:value-type="float" office:value="18570" calcext:value-type="float">
            <text:p>18570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14930555555556" calcext:value-type="float">
            <text:p>0,00214930555555556000</text:p>
          </table:table-cell>
          <table:table-cell table:formula="of:=[.D621]-[.D62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15277777777778" calcext:value-type="float">
            <text:p>0,00215277777777778000</text:p>
          </table:table-cell>
          <table:table-cell table:formula="of:=[.D622]-[.D62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0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15625" calcext:value-type="float">
            <text:p>0,00215625000000000000</text:p>
          </table:table-cell>
          <table:table-cell table:formula="of:=[.D623]-[.D62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0" office:value-type="float" office:value="18660" calcext:value-type="float">
            <text:p>18660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15972222222222" calcext:value-type="float">
            <text:p>0,00215972222222222000</text:p>
          </table:table-cell>
          <table:table-cell table:formula="of:=[.D624]-[.D62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0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16319444444444" calcext:value-type="float">
            <text:p>0,00216319444444444000</text:p>
          </table:table-cell>
          <table:table-cell table:formula="of:=[.D625]-[.D62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16666666666667" calcext:value-type="float">
            <text:p>0,00216666666666667000</text:p>
          </table:table-cell>
          <table:table-cell table:formula="of:=[.D626]-[.D62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0" office:value-type="float" office:value="18750" calcext:value-type="float">
            <text:p>187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17013888888889" calcext:value-type="float">
            <text:p>0,00217013888888889000</text:p>
          </table:table-cell>
          <table:table-cell table:formula="of:=[.D627]-[.D62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0" office:value-type="float" office:value="18780" calcext:value-type="float">
            <text:p>18780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17361111111111" calcext:value-type="float">
            <text:p>0,00217361111111111000</text:p>
          </table:table-cell>
          <table:table-cell table:formula="of:=[.D628]-[.D62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0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17708333333333" calcext:value-type="float">
            <text:p>0,00217708333333333000</text:p>
          </table:table-cell>
          <table:table-cell table:formula="of:=[.D629]-[.D62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0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18055555555556" calcext:value-type="float">
            <text:p>0,00218055555555556000</text:p>
          </table:table-cell>
          <table:table-cell table:formula="of:=[.D630]-[.D62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0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18402777777778" calcext:value-type="float">
            <text:p>0,00218402777777778000</text:p>
          </table:table-cell>
          <table:table-cell table:formula="of:=[.D631]-[.D63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1875" calcext:value-type="float">
            <text:p>0,00218750000000000000</text:p>
          </table:table-cell>
          <table:table-cell table:formula="of:=[.D632]-[.D63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0" office:value-type="float" office:value="18930" calcext:value-type="float">
            <text:p>18930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19097222222222" calcext:value-type="float">
            <text:p>0,00219097222222222000</text:p>
          </table:table-cell>
          <table:table-cell table:formula="of:=[.D633]-[.D63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0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19444444444444" calcext:value-type="float">
            <text:p>0,00219444444444444000</text:p>
          </table:table-cell>
          <table:table-cell table:formula="of:=[.D634]-[.D63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0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19791666666667" calcext:value-type="float">
            <text:p>0,00219791666666667000</text:p>
          </table:table-cell>
          <table:table-cell table:formula="of:=[.D635]-[.D63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0" office:value-type="float" office:value="19020" calcext:value-type="float">
            <text:p>19020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20138888888889" calcext:value-type="float">
            <text:p>0,00220138888888889000</text:p>
          </table:table-cell>
          <table:table-cell table:formula="of:=[.D636]-[.D63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0" office:value-type="float" office:value="19050" calcext:value-type="float">
            <text:p>1905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20486111111111" calcext:value-type="float">
            <text:p>0,00220486111111111000</text:p>
          </table:table-cell>
          <table:table-cell table:formula="of:=[.D637]-[.D63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0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20833333333333" calcext:value-type="float">
            <text:p>0,00220833333333333000</text:p>
          </table:table-cell>
          <table:table-cell table:formula="of:=[.D638]-[.D63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0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21180555555556" calcext:value-type="float">
            <text:p>0,00221180555555556000</text:p>
          </table:table-cell>
          <table:table-cell table:formula="of:=[.D639]-[.D63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0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21527777777778" calcext:value-type="float">
            <text:p>0,00221527777777778000</text:p>
          </table:table-cell>
          <table:table-cell table:formula="of:=[.D640]-[.D63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0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21875" calcext:value-type="float">
            <text:p>0,00221875000000000000</text:p>
          </table:table-cell>
          <table:table-cell table:formula="of:=[.D641]-[.D64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22222222222222" calcext:value-type="float">
            <text:p>0,00222222222222222000</text:p>
          </table:table-cell>
          <table:table-cell table:formula="of:=[.D642]-[.D64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0" office:value-type="float" office:value="19230" calcext:value-type="float">
            <text:p>19230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22569444444444" calcext:value-type="float">
            <text:p>0,00222569444444444000</text:p>
          </table:table-cell>
          <table:table-cell table:formula="of:=[.D643]-[.D64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0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22916666666667" calcext:value-type="float">
            <text:p>0,00222916666666667000</text:p>
          </table:table-cell>
          <table:table-cell table:formula="of:=[.D644]-[.D64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0" office:value-type="float" office:value="19290" calcext:value-type="float">
            <text:p>19290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23263888888889" calcext:value-type="float">
            <text:p>0,00223263888888889000</text:p>
          </table:table-cell>
          <table:table-cell table:formula="of:=[.D645]-[.D64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0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23611111111111" calcext:value-type="float">
            <text:p>0,00223611111111111000</text:p>
          </table:table-cell>
          <table:table-cell table:formula="of:=[.D646]-[.D64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0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23958333333333" calcext:value-type="float">
            <text:p>0,00223958333333333000</text:p>
          </table:table-cell>
          <table:table-cell table:formula="of:=[.D647]-[.D64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0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24305555555556" calcext:value-type="float">
            <text:p>0,00224305555555556000</text:p>
          </table:table-cell>
          <table:table-cell table:formula="of:=[.D648]-[.D64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0" office:value-type="float" office:value="19410" calcext:value-type="float">
            <text:p>19410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24652777777778" calcext:value-type="float">
            <text:p>0,00224652777777778000</text:p>
          </table:table-cell>
          <table:table-cell table:formula="of:=[.D649]-[.D64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25" calcext:value-type="float">
            <text:p>0,00225000000000000000</text:p>
          </table:table-cell>
          <table:table-cell table:formula="of:=[.D650]-[.D64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0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25347222222222" calcext:value-type="float">
            <text:p>0,00225347222222222000</text:p>
          </table:table-cell>
          <table:table-cell table:formula="of:=[.D651]-[.D65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0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25694444444444" calcext:value-type="float">
            <text:p>0,00225694444444444000</text:p>
          </table:table-cell>
          <table:table-cell table:formula="of:=[.D652]-[.D65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0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26041666666667" calcext:value-type="float">
            <text:p>0,00226041666666667000</text:p>
          </table:table-cell>
          <table:table-cell table:formula="of:=[.D653]-[.D65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0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26388888888889" calcext:value-type="float">
            <text:p>0,00226388888888889000</text:p>
          </table:table-cell>
          <table:table-cell table:formula="of:=[.D654]-[.D65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0" office:value-type="float" office:value="19590" calcext:value-type="float">
            <text:p>19590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26736111111111" calcext:value-type="float">
            <text:p>0,00226736111111111000</text:p>
          </table:table-cell>
          <table:table-cell table:formula="of:=[.D655]-[.D65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0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27083333333333" calcext:value-type="float">
            <text:p>0,00227083333333333000</text:p>
          </table:table-cell>
          <table:table-cell table:formula="of:=[.D656]-[.D65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0" office:value-type="float" office:value="19650" calcext:value-type="float">
            <text:p>1965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27430555555556" calcext:value-type="float">
            <text:p>0,00227430555555556000</text:p>
          </table:table-cell>
          <table:table-cell table:formula="of:=[.D657]-[.D65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0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27777777777778" calcext:value-type="float">
            <text:p>0,00227777777777778000</text:p>
          </table:table-cell>
          <table:table-cell table:formula="of:=[.D658]-[.D65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0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28125" calcext:value-type="float">
            <text:p>0,00228125000000000000</text:p>
          </table:table-cell>
          <table:table-cell table:formula="of:=[.D659]-[.D65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0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28472222222222" calcext:value-type="float">
            <text:p>0,00228472222222222000</text:p>
          </table:table-cell>
          <table:table-cell table:formula="of:=[.D660]-[.D65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0" office:value-type="float" office:value="19770" calcext:value-type="float">
            <text:p>19770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28819444444444" calcext:value-type="float">
            <text:p>0,00228819444444444000</text:p>
          </table:table-cell>
          <table:table-cell table:formula="of:=[.D661]-[.D66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29166666666667" calcext:value-type="float">
            <text:p>0,00229166666666667000</text:p>
          </table:table-cell>
          <table:table-cell table:formula="of:=[.D662]-[.D66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0" office:value-type="float" office:value="19830" calcext:value-type="float">
            <text:p>19830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29513888888889" calcext:value-type="float">
            <text:p>0,00229513888888889000</text:p>
          </table:table-cell>
          <table:table-cell table:formula="of:=[.D663]-[.D66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0" office:value-type="float" office:value="19860" calcext:value-type="float">
            <text:p>19860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29861111111111" calcext:value-type="float">
            <text:p>0,00229861111111111000</text:p>
          </table:table-cell>
          <table:table-cell table:formula="of:=[.D664]-[.D66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0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30208333333333" calcext:value-type="float">
            <text:p>0,00230208333333333000</text:p>
          </table:table-cell>
          <table:table-cell table:formula="of:=[.D665]-[.D66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0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30555555555556" calcext:value-type="float">
            <text:p>0,00230555555555556000</text:p>
          </table:table-cell>
          <table:table-cell table:formula="of:=[.D666]-[.D66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0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30902777777778" calcext:value-type="float">
            <text:p>0,00230902777777778000</text:p>
          </table:table-cell>
          <table:table-cell table:formula="of:=[.D667]-[.D66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0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3125" calcext:value-type="float">
            <text:p>0,00231250000000000000</text:p>
          </table:table-cell>
          <table:table-cell table:formula="of:=[.D668]-[.D66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30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31597222222222" calcext:value-type="float">
            <text:p>0,00231597222222222000</text:p>
          </table:table-cell>
          <table:table-cell table:formula="of:=[.D669]-[.D66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30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31944444444444" calcext:value-type="float">
            <text:p>0,00231944444444444000</text:p>
          </table:table-cell>
          <table:table-cell table:formula="of:=[.D670]-[.D66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30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32291666666667" calcext:value-type="float">
            <text:p>0,00232291666666667000</text:p>
          </table:table-cell>
          <table:table-cell table:formula="of:=[.D671]-[.D67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30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32638888888889" calcext:value-type="float">
            <text:p>0,00232638888888889000</text:p>
          </table:table-cell>
          <table:table-cell table:formula="of:=[.D672]-[.D67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30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32986111111111" calcext:value-type="float">
            <text:p>0,00232986111111111000</text:p>
          </table:table-cell>
          <table:table-cell table:formula="of:=[.D673]-[.D67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3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33333333333333" calcext:value-type="float">
            <text:p>0,00233333333333333000</text:p>
          </table:table-cell>
          <table:table-cell table:formula="of:=[.D674]-[.D67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30" office:value-type="float" office:value="20190" calcext:value-type="float">
            <text:p>20190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33680555555556" calcext:value-type="float">
            <text:p>0,00233680555555556000</text:p>
          </table:table-cell>
          <table:table-cell table:formula="of:=[.D675]-[.D67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30" office:value-type="float" office:value="20220" calcext:value-type="float">
            <text:p>20220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34027777777778" calcext:value-type="float">
            <text:p>0,00234027777777778000</text:p>
          </table:table-cell>
          <table:table-cell table:formula="of:=[.D676]-[.D67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30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34375" calcext:value-type="float">
            <text:p>0,00234375000000000000</text:p>
          </table:table-cell>
          <table:table-cell table:formula="of:=[.D677]-[.D67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30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34722222222222" calcext:value-type="float">
            <text:p>0,00234722222222222000</text:p>
          </table:table-cell>
          <table:table-cell table:formula="of:=[.D678]-[.D67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30" office:value-type="float" office:value="20310" calcext:value-type="float">
            <text:p>20310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35069444444444" calcext:value-type="float">
            <text:p>0,00235069444444444000</text:p>
          </table:table-cell>
          <table:table-cell table:formula="of:=[.D679]-[.D67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30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35416666666667" calcext:value-type="float">
            <text:p>0,00235416666666667000</text:p>
          </table:table-cell>
          <table:table-cell table:formula="of:=[.D680]-[.D67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30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35763888888889" calcext:value-type="float">
            <text:p>0,00235763888888889000</text:p>
          </table:table-cell>
          <table:table-cell table:formula="of:=[.D681]-[.D68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3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36111111111111" calcext:value-type="float">
            <text:p>0,00236111111111111000</text:p>
          </table:table-cell>
          <table:table-cell table:formula="of:=[.D682]-[.D68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30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36458333333333" calcext:value-type="float">
            <text:p>0,00236458333333333000</text:p>
          </table:table-cell>
          <table:table-cell table:formula="of:=[.D683]-[.D68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30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36805555555556" calcext:value-type="float">
            <text:p>0,00236805555555556000</text:p>
          </table:table-cell>
          <table:table-cell table:formula="of:=[.D684]-[.D68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30" office:value-type="float" office:value="20490" calcext:value-type="float">
            <text:p>20490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37152777777778" calcext:value-type="float">
            <text:p>0,00237152777777778000</text:p>
          </table:table-cell>
          <table:table-cell table:formula="of:=[.D685]-[.D68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30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375" calcext:value-type="float">
            <text:p>0,00237500000000000000</text:p>
          </table:table-cell>
          <table:table-cell table:formula="of:=[.D686]-[.D68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30" office:value-type="float" office:value="20550" calcext:value-type="float">
            <text:p>2055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37847222222222" calcext:value-type="float">
            <text:p>0,00237847222222222000</text:p>
          </table:table-cell>
          <table:table-cell table:formula="of:=[.D687]-[.D68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30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38194444444444" calcext:value-type="float">
            <text:p>0,00238194444444444000</text:p>
          </table:table-cell>
          <table:table-cell table:formula="of:=[.D688]-[.D68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30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38541666666667" calcext:value-type="float">
            <text:p>0,00238541666666667000</text:p>
          </table:table-cell>
          <table:table-cell table:formula="of:=[.D689]-[.D68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30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38888888888889" calcext:value-type="float">
            <text:p>0,00238888888888889000</text:p>
          </table:table-cell>
          <table:table-cell table:formula="of:=[.D690]-[.D68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30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39236111111111" calcext:value-type="float">
            <text:p>0,00239236111111111000</text:p>
          </table:table-cell>
          <table:table-cell table:formula="of:=[.D691]-[.D69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3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39583333333333" calcext:value-type="float">
            <text:p>0,00239583333333333000</text:p>
          </table:table-cell>
          <table:table-cell table:formula="of:=[.D692]-[.D69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30" office:value-type="float" office:value="20730" calcext:value-type="float">
            <text:p>20730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39930555555556" calcext:value-type="float">
            <text:p>0,00239930555555556000</text:p>
          </table:table-cell>
          <table:table-cell table:formula="of:=[.D693]-[.D69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30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40277777777778" calcext:value-type="float">
            <text:p>0,00240277777777778000</text:p>
          </table:table-cell>
          <table:table-cell table:formula="of:=[.D694]-[.D69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30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40625" calcext:value-type="float">
            <text:p>0,00240625000000000000</text:p>
          </table:table-cell>
          <table:table-cell table:formula="of:=[.D695]-[.D69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30" office:value-type="float" office:value="20820" calcext:value-type="float">
            <text:p>20820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40972222222222" calcext:value-type="float">
            <text:p>0,00240972222222222000</text:p>
          </table:table-cell>
          <table:table-cell table:formula="of:=[.D696]-[.D69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30" office:value-type="float" office:value="20850" calcext:value-type="float">
            <text:p>2085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41319444444444" calcext:value-type="float">
            <text:p>0,00241319444444444000</text:p>
          </table:table-cell>
          <table:table-cell table:formula="of:=[.D697]-[.D69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3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41666666666667" calcext:value-type="float">
            <text:p>0,00241666666666667000</text:p>
          </table:table-cell>
          <table:table-cell table:formula="of:=[.D698]-[.D69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30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42013888888889" calcext:value-type="float">
            <text:p>0,00242013888888889000</text:p>
          </table:table-cell>
          <table:table-cell table:formula="of:=[.D699]-[.D69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30" office:value-type="float" office:value="20940" calcext:value-type="float">
            <text:p>20940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42361111111111" calcext:value-type="float">
            <text:p>0,00242361111111111000</text:p>
          </table:table-cell>
          <table:table-cell table:formula="of:=[.D700]-[.D69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30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42708333333333" calcext:value-type="float">
            <text:p>0,00242708333333333000</text:p>
          </table:table-cell>
          <table:table-cell table:formula="of:=[.D701]-[.D70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3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43055555555556" calcext:value-type="float">
            <text:p>0,00243055555555556000</text:p>
          </table:table-cell>
          <table:table-cell table:formula="of:=[.D702]-[.D70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30" office:value-type="float" office:value="21030" calcext:value-type="float">
            <text:p>21030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43402777777778" calcext:value-type="float">
            <text:p>0,00243402777777778000</text:p>
          </table:table-cell>
          <table:table-cell table:formula="of:=[.D703]-[.D70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30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4375" calcext:value-type="float">
            <text:p>0,00243750000000000000</text:p>
          </table:table-cell>
          <table:table-cell table:formula="of:=[.D704]-[.D70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30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44097222222222" calcext:value-type="float">
            <text:p>0,00244097222222222000</text:p>
          </table:table-cell>
          <table:table-cell table:formula="of:=[.D705]-[.D70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30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44444444444444" calcext:value-type="float">
            <text:p>0,00244444444444444000</text:p>
          </table:table-cell>
          <table:table-cell table:formula="of:=[.D706]-[.D70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30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44791666666667" calcext:value-type="float">
            <text:p>0,00244791666666667000</text:p>
          </table:table-cell>
          <table:table-cell table:formula="of:=[.D707]-[.D70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30" office:value-type="float" office:value="21180" calcext:value-type="float">
            <text:p>21180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45138888888889" calcext:value-type="float">
            <text:p>0,00245138888888889000</text:p>
          </table:table-cell>
          <table:table-cell table:formula="of:=[.D708]-[.D70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30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45486111111111" calcext:value-type="float">
            <text:p>0,00245486111111111000</text:p>
          </table:table-cell>
          <table:table-cell table:formula="of:=[.D709]-[.D70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30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45833333333333" calcext:value-type="float">
            <text:p>0,00245833333333333000</text:p>
          </table:table-cell>
          <table:table-cell table:formula="of:=[.D710]-[.D70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30" office:value-type="float" office:value="21270" calcext:value-type="float">
            <text:p>21270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46180555555556" calcext:value-type="float">
            <text:p>0,00246180555555556000</text:p>
          </table:table-cell>
          <table:table-cell table:formula="of:=[.D711]-[.D71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30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46527777777778" calcext:value-type="float">
            <text:p>0,00246527777777778000</text:p>
          </table:table-cell>
          <table:table-cell table:formula="of:=[.D712]-[.D71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30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46875" calcext:value-type="float">
            <text:p>0,00246875000000000000</text:p>
          </table:table-cell>
          <table:table-cell table:formula="of:=[.D713]-[.D71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30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47222222222222" calcext:value-type="float">
            <text:p>0,00247222222222222000</text:p>
          </table:table-cell>
          <table:table-cell table:formula="of:=[.D714]-[.D71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30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47569444444444" calcext:value-type="float">
            <text:p>0,00247569444444444000</text:p>
          </table:table-cell>
          <table:table-cell table:formula="of:=[.D715]-[.D71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30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47916666666667" calcext:value-type="float">
            <text:p>0,00247916666666667000</text:p>
          </table:table-cell>
          <table:table-cell table:formula="of:=[.D716]-[.D71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30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48263888888889" calcext:value-type="float">
            <text:p>0,00248263888888889000</text:p>
          </table:table-cell>
          <table:table-cell table:formula="of:=[.D717]-[.D71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30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48611111111111" calcext:value-type="float">
            <text:p>0,00248611111111111000</text:p>
          </table:table-cell>
          <table:table-cell table:formula="of:=[.D718]-[.D71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30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48958333333333" calcext:value-type="float">
            <text:p>0,00248958333333333000</text:p>
          </table:table-cell>
          <table:table-cell table:formula="of:=[.D719]-[.D71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30" office:value-type="float" office:value="21540" calcext:value-type="float">
            <text:p>21540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49305555555556" calcext:value-type="float">
            <text:p>0,00249305555555556000</text:p>
          </table:table-cell>
          <table:table-cell table:formula="of:=[.D720]-[.D71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30" office:value-type="float" office:value="21570" calcext:value-type="float">
            <text:p>21570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49652777777778" calcext:value-type="float">
            <text:p>0,00249652777777778000</text:p>
          </table:table-cell>
          <table:table-cell table:formula="of:=[.D721]-[.D72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3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5" calcext:value-type="float">
            <text:p>0,00250000000000000000</text:p>
          </table:table-cell>
          <table:table-cell table:formula="of:=[.D722]-[.D72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30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50347222222222" calcext:value-type="float">
            <text:p>0,00250347222222222000</text:p>
          </table:table-cell>
          <table:table-cell table:formula="of:=[.D723]-[.D72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30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50694444444444" calcext:value-type="float">
            <text:p>0,00250694444444444000</text:p>
          </table:table-cell>
          <table:table-cell table:formula="of:=[.D724]-[.D72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30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51041666666667" calcext:value-type="float">
            <text:p>0,00251041666666667000</text:p>
          </table:table-cell>
          <table:table-cell table:formula="of:=[.D725]-[.D72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30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51388888888889" calcext:value-type="float">
            <text:p>0,00251388888888889000</text:p>
          </table:table-cell>
          <table:table-cell table:formula="of:=[.D726]-[.D72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30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51736111111111" calcext:value-type="float">
            <text:p>0,00251736111111111000</text:p>
          </table:table-cell>
          <table:table-cell table:formula="of:=[.D727]-[.D72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30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52083333333333" calcext:value-type="float">
            <text:p>0,00252083333333333000</text:p>
          </table:table-cell>
          <table:table-cell table:formula="of:=[.D728]-[.D72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30" office:value-type="float" office:value="21810" calcext:value-type="float">
            <text:p>21810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52430555555556" calcext:value-type="float">
            <text:p>0,00252430555555556000</text:p>
          </table:table-cell>
          <table:table-cell table:formula="of:=[.D729]-[.D72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3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52777777777778" calcext:value-type="float">
            <text:p>0,00252777777777778000</text:p>
          </table:table-cell>
          <table:table-cell table:formula="of:=[.D730]-[.D72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30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53125" calcext:value-type="float">
            <text:p>0,00253125000000000000</text:p>
          </table:table-cell>
          <table:table-cell table:formula="of:=[.D731]-[.D73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30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53472222222222" calcext:value-type="float">
            <text:p>0,00253472222222222000</text:p>
          </table:table-cell>
          <table:table-cell table:formula="of:=[.D732]-[.D73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30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53819444444444" calcext:value-type="float">
            <text:p>0,00253819444444444000</text:p>
          </table:table-cell>
          <table:table-cell table:formula="of:=[.D733]-[.D73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30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54166666666667" calcext:value-type="float">
            <text:p>0,00254166666666667000</text:p>
          </table:table-cell>
          <table:table-cell table:formula="of:=[.D734]-[.D73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30" office:value-type="float" office:value="21990" calcext:value-type="float">
            <text:p>21990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54513888888889" calcext:value-type="float">
            <text:p>0,00254513888888889000</text:p>
          </table:table-cell>
          <table:table-cell table:formula="of:=[.D735]-[.D73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30" office:value-type="float" office:value="22020" calcext:value-type="float">
            <text:p>22020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54861111111111" calcext:value-type="float">
            <text:p>0,00254861111111111000</text:p>
          </table:table-cell>
          <table:table-cell table:formula="of:=[.D736]-[.D73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30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55208333333333" calcext:value-type="float">
            <text:p>0,00255208333333333000</text:p>
          </table:table-cell>
          <table:table-cell table:formula="of:=[.D737]-[.D73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30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55555555555556" calcext:value-type="float">
            <text:p>0,00255555555555556000</text:p>
          </table:table-cell>
          <table:table-cell table:formula="of:=[.D738]-[.D73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30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55902777777778" calcext:value-type="float">
            <text:p>0,00255902777777778000</text:p>
          </table:table-cell>
          <table:table-cell table:formula="of:=[.D739]-[.D73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30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5625" calcext:value-type="float">
            <text:p>0,00256250000000000000</text:p>
          </table:table-cell>
          <table:table-cell table:formula="of:=[.D740]-[.D73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30" office:value-type="float" office:value="22170" calcext:value-type="float">
            <text:p>22170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56597222222222" calcext:value-type="float">
            <text:p>0,00256597222222222000</text:p>
          </table:table-cell>
          <table:table-cell table:formula="of:=[.D741]-[.D74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3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56944444444444" calcext:value-type="float">
            <text:p>0,00256944444444444000</text:p>
          </table:table-cell>
          <table:table-cell table:formula="of:=[.D742]-[.D74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30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57291666666667" calcext:value-type="float">
            <text:p>0,00257291666666667000</text:p>
          </table:table-cell>
          <table:table-cell table:formula="of:=[.D743]-[.D74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30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57638888888889" calcext:value-type="float">
            <text:p>0,00257638888888889000</text:p>
          </table:table-cell>
          <table:table-cell table:formula="of:=[.D744]-[.D74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30" office:value-type="float" office:value="22290" calcext:value-type="float">
            <text:p>22290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57986111111111" calcext:value-type="float">
            <text:p>0,00257986111111111000</text:p>
          </table:table-cell>
          <table:table-cell table:formula="of:=[.D745]-[.D74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3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58333333333333" calcext:value-type="float">
            <text:p>0,00258333333333333000</text:p>
          </table:table-cell>
          <table:table-cell table:formula="of:=[.D746]-[.D74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30" office:value-type="float" office:value="22350" calcext:value-type="float">
            <text:p>2235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58680555555556" calcext:value-type="float">
            <text:p>0,00258680555555556000</text:p>
          </table:table-cell>
          <table:table-cell table:formula="of:=[.D747]-[.D74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30" office:value-type="float" office:value="22380" calcext:value-type="float">
            <text:p>22380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59027777777778" calcext:value-type="float">
            <text:p>0,00259027777777778000</text:p>
          </table:table-cell>
          <table:table-cell table:formula="of:=[.D748]-[.D74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30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59375" calcext:value-type="float">
            <text:p>0,00259375000000000000</text:p>
          </table:table-cell>
          <table:table-cell table:formula="of:=[.D749]-[.D74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30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59722222222222" calcext:value-type="float">
            <text:p>0,00259722222222222000</text:p>
          </table:table-cell>
          <table:table-cell table:formula="of:=[.D750]-[.D74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30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60069444444444" calcext:value-type="float">
            <text:p>0,00260069444444444000</text:p>
          </table:table-cell>
          <table:table-cell table:formula="of:=[.D751]-[.D75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3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60416666666667" calcext:value-type="float">
            <text:p>0,00260416666666667000</text:p>
          </table:table-cell>
          <table:table-cell table:formula="of:=[.D752]-[.D75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30" office:value-type="float" office:value="22530" calcext:value-type="float">
            <text:p>22530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60763888888889" calcext:value-type="float">
            <text:p>0,00260763888888889000</text:p>
          </table:table-cell>
          <table:table-cell table:formula="of:=[.D753]-[.D75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30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61111111111111" calcext:value-type="float">
            <text:p>0,00261111111111111000</text:p>
          </table:table-cell>
          <table:table-cell table:formula="of:=[.D754]-[.D75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30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61458333333333" calcext:value-type="float">
            <text:p>0,00261458333333333000</text:p>
          </table:table-cell>
          <table:table-cell table:formula="of:=[.D755]-[.D75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30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61805555555556" calcext:value-type="float">
            <text:p>0,00261805555555556000</text:p>
          </table:table-cell>
          <table:table-cell table:formula="of:=[.D756]-[.D755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30" office:value-type="float" office:value="22650" calcext:value-type="float">
            <text:p>2265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62152777777778" calcext:value-type="float">
            <text:p>0,00262152777777778000</text:p>
          </table:table-cell>
          <table:table-cell table:formula="of:=[.D757]-[.D75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3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625" calcext:value-type="float">
            <text:p>0,00262500000000000000</text:p>
          </table:table-cell>
          <table:table-cell table:formula="of:=[.D758]-[.D75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30" office:value-type="float" office:value="22710" calcext:value-type="float">
            <text:p>22710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62847222222222" calcext:value-type="float">
            <text:p>0,00262847222222222000</text:p>
          </table:table-cell>
          <table:table-cell table:formula="of:=[.D759]-[.D75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30" office:value-type="float" office:value="22740" calcext:value-type="float">
            <text:p>22740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63194444444444" calcext:value-type="float">
            <text:p>0,00263194444444444000</text:p>
          </table:table-cell>
          <table:table-cell table:formula="of:=[.D760]-[.D75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30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63541666666667" calcext:value-type="float">
            <text:p>0,00263541666666667000</text:p>
          </table:table-cell>
          <table:table-cell table:formula="of:=[.D761]-[.D76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3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63888888888889" calcext:value-type="float">
            <text:p>0,00263888888888889000</text:p>
          </table:table-cell>
          <table:table-cell table:formula="of:=[.D762]-[.D76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30" office:value-type="float" office:value="22830" calcext:value-type="float">
            <text:p>22830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64236111111111" calcext:value-type="float">
            <text:p>0,00264236111111111000</text:p>
          </table:table-cell>
          <table:table-cell table:formula="of:=[.D763]-[.D76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30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64583333333333" calcext:value-type="float">
            <text:p>0,00264583333333333000</text:p>
          </table:table-cell>
          <table:table-cell table:formula="of:=[.D764]-[.D76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30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64930555555556" calcext:value-type="float">
            <text:p>0,00264930555555556000</text:p>
          </table:table-cell>
          <table:table-cell table:formula="of:=[.D765]-[.D76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30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65277777777778" calcext:value-type="float">
            <text:p>0,00265277777777778000</text:p>
          </table:table-cell>
          <table:table-cell table:formula="of:=[.D766]-[.D76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30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65625" calcext:value-type="float">
            <text:p>0,00265625000000000000</text:p>
          </table:table-cell>
          <table:table-cell table:formula="of:=[.D767]-[.D76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30" office:value-type="float" office:value="22980" calcext:value-type="float">
            <text:p>22980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65972222222222" calcext:value-type="float">
            <text:p>0,00265972222222222000</text:p>
          </table:table-cell>
          <table:table-cell table:formula="of:=[.D768]-[.D76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30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66319444444444" calcext:value-type="float">
            <text:p>0,00266319444444444000</text:p>
          </table:table-cell>
          <table:table-cell table:formula="of:=[.D769]-[.D76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3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66666666666667" calcext:value-type="float">
            <text:p>0,00266666666666667000</text:p>
          </table:table-cell>
          <table:table-cell table:formula="of:=[.D770]-[.D76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30" office:value-type="float" office:value="23070" calcext:value-type="float">
            <text:p>23070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67013888888889" calcext:value-type="float">
            <text:p>0,00267013888888889000</text:p>
          </table:table-cell>
          <table:table-cell table:formula="of:=[.D771]-[.D77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3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67361111111111" calcext:value-type="float">
            <text:p>0,00267361111111111000</text:p>
          </table:table-cell>
          <table:table-cell table:formula="of:=[.D772]-[.D77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30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67708333333333" calcext:value-type="float">
            <text:p>0,00267708333333333000</text:p>
          </table:table-cell>
          <table:table-cell table:formula="of:=[.D773]-[.D77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30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68055555555556" calcext:value-type="float">
            <text:p>0,00268055555555556000</text:p>
          </table:table-cell>
          <table:table-cell table:formula="of:=[.D774]-[.D77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30" office:value-type="float" office:value="23190" calcext:value-type="float">
            <text:p>23190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68402777777778" calcext:value-type="float">
            <text:p>0,00268402777777778000</text:p>
          </table:table-cell>
          <table:table-cell table:formula="of:=[.D775]-[.D77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30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6875" calcext:value-type="float">
            <text:p>0,00268750000000000000</text:p>
          </table:table-cell>
          <table:table-cell table:formula="of:=[.D776]-[.D77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30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69097222222222" calcext:value-type="float">
            <text:p>0,00269097222222222000</text:p>
          </table:table-cell>
          <table:table-cell table:formula="of:=[.D777]-[.D77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30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69444444444444" calcext:value-type="float">
            <text:p>0,00269444444444444000</text:p>
          </table:table-cell>
          <table:table-cell table:formula="of:=[.D778]-[.D77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30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69791666666667" calcext:value-type="float">
            <text:p>0,00269791666666667000</text:p>
          </table:table-cell>
          <table:table-cell table:formula="of:=[.D779]-[.D77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30" office:value-type="float" office:value="23340" calcext:value-type="float">
            <text:p>23340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70138888888889" calcext:value-type="float">
            <text:p>0,00270138888888889000</text:p>
          </table:table-cell>
          <table:table-cell table:formula="of:=[.D780]-[.D77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30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70486111111111" calcext:value-type="float">
            <text:p>0,00270486111111111000</text:p>
          </table:table-cell>
          <table:table-cell table:formula="of:=[.D781]-[.D78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3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70833333333333" calcext:value-type="float">
            <text:p>0,00270833333333333000</text:p>
          </table:table-cell>
          <table:table-cell table:formula="of:=[.D782]-[.D781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30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71180555555556" calcext:value-type="float">
            <text:p>0,00271180555555556000</text:p>
          </table:table-cell>
          <table:table-cell table:formula="of:=[.D783]-[.D782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30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71527777777778" calcext:value-type="float">
            <text:p>0,00271527777777778000</text:p>
          </table:table-cell>
          <table:table-cell table:formula="of:=[.D784]-[.D783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30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71875" calcext:value-type="float">
            <text:p>0,00271875000000000000</text:p>
          </table:table-cell>
          <table:table-cell table:formula="of:=[.D785]-[.D784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3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72222222222222" calcext:value-type="float">
            <text:p>0,00272222222222222000</text:p>
          </table:table-cell>
          <table:table-cell table:formula="of:=[.D786]-[.D78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30" office:value-type="float" office:value="23550" calcext:value-type="float">
            <text:p>2355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72569444444444" calcext:value-type="float">
            <text:p>0,00272569444444444000</text:p>
          </table:table-cell>
          <table:table-cell table:formula="of:=[.D787]-[.D786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30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72916666666667" calcext:value-type="float">
            <text:p>0,00272916666666667000</text:p>
          </table:table-cell>
          <table:table-cell table:formula="of:=[.D788]-[.D787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30" office:value-type="float" office:value="23610" calcext:value-type="float">
            <text:p>23610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73263888888889" calcext:value-type="float">
            <text:p>0,00273263888888889000</text:p>
          </table:table-cell>
          <table:table-cell table:formula="of:=[.D789]-[.D788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30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73611111111111" calcext:value-type="float">
            <text:p>0,00273611111111111000</text:p>
          </table:table-cell>
          <table:table-cell table:formula="of:=[.D790]-[.D789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30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73958333333333" calcext:value-type="float">
            <text:p>0,00273958333333333000</text:p>
          </table:table-cell>
          <table:table-cell table:formula="of:=[.D791]-[.D790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30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74305555555556" calcext:value-type="float">
            <text:p>0,00274305555555556000</text:p>
          </table:table-cell>
          <table:table-cell table:formula="of:=[.D792]-[.D791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30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74652777777778" calcext:value-type="float">
            <text:p>0,00274652777777778000</text:p>
          </table:table-cell>
          <table:table-cell table:formula="of:=[.D793]-[.D792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3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75" calcext:value-type="float">
            <text:p>0,00275000000000000000</text:p>
          </table:table-cell>
          <table:table-cell table:formula="of:=[.D794]-[.D793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30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75347222222222" calcext:value-type="float">
            <text:p>0,00275347222222222000</text:p>
          </table:table-cell>
          <table:table-cell table:formula="of:=[.D795]-[.D794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30" office:value-type="float" office:value="23820" calcext:value-type="float">
            <text:p>23820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75694444444444" calcext:value-type="float">
            <text:p>0,00275694444444444000</text:p>
          </table:table-cell>
          <table:table-cell table:formula="of:=[.D796]-[.D795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30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76041666666667" calcext:value-type="float">
            <text:p>0,00276041666666667000</text:p>
          </table:table-cell>
          <table:table-cell table:formula="of:=[.D797]-[.D796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30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76388888888889" calcext:value-type="float">
            <text:p>0,00276388888888889000</text:p>
          </table:table-cell>
          <table:table-cell table:formula="of:=[.D798]-[.D797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30" office:value-type="float" office:value="23910" calcext:value-type="float">
            <text:p>23910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76736111111111" calcext:value-type="float">
            <text:p>0,00276736111111111000</text:p>
          </table:table-cell>
          <table:table-cell table:formula="of:=[.D799]-[.D798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30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77083333333333" calcext:value-type="float">
            <text:p>0,00277083333333333000</text:p>
          </table:table-cell>
          <table:table-cell table:formula="of:=[.D800]-[.D799]" office:value-type="float" office:value="0.00000347222222222198" calcext:value-type="float">
            <text:p>0,000003472222222221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30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77430555555556" calcext:value-type="float">
            <text:p>0,00277430555555556000</text:p>
          </table:table-cell>
          <table:table-cell table:formula="of:=[.D801]-[.D800]" office:value-type="float" office:value="0.00000347222222222242" calcext:value-type="float">
            <text:p>0,000003472222222222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3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77777777777778" calcext:value-type="float">
            <text:p>0,00277777777777778000</text:p>
          </table:table-cell>
          <table:table-cell table:formula="of:=#REF!-[.D801]" office:value-type="string" office:string-value="" calcext:value-type="error">
            <text:p>#REF!</text:p>
          </table:table-cell>
        </table:table-row>
        <table:table-row table:style-name="ro1" table:number-rows-repeated="10477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5:57.243165454</meta:creation-date>
    <dc:date>2026-05-17T15:56:06.087803260</dc:date>
    <meta:editing-duration>PT10S</meta:editing-duration>
    <meta:editing-cycles>1</meta:editing-cycles>
    <meta:document-statistic meta:table-count="1" meta:cell-count="4005" meta:object-count="0"/>
    <meta:generator>LibreOffice/24.2.7.2$Linux_X86_64 LibreOffice_project/420$Build-2</meta:generator>
  </office:meta>
</office:document-meta>
</file>