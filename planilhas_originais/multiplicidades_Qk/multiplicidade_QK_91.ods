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5324074074074" calcext:value-type="float">
            <text:p>0,00001053240740740740</text:p>
          </table:table-cell>
          <table:table-cell table:formula="of:=[.D3]-[.D2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1" office:value-type="float" office:value="182" calcext:value-type="float">
            <text:p>18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10648148148148" calcext:value-type="float">
            <text:p>0,00002106481481481480</text:p>
          </table:table-cell>
          <table:table-cell table:formula="of:=[.D4]-[.D3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1" office:value-type="float" office:value="273" calcext:value-type="float">
            <text:p>27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15972222222222" calcext:value-type="float">
            <text:p>0,00003159722222222220</text:p>
          </table:table-cell>
          <table:table-cell table:formula="of:=[.D5]-[.D4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1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21296296296296" calcext:value-type="float">
            <text:p>0,00004212962962962960</text:p>
          </table:table-cell>
          <table:table-cell table:formula="of:=[.D6]-[.D5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1" office:value-type="float" office:value="455" calcext:value-type="float">
            <text:p>45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2662037037037" calcext:value-type="float">
            <text:p>0,00005266203703703700</text:p>
          </table:table-cell>
          <table:table-cell table:formula="of:=[.D7]-[.D6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1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31944444444444" calcext:value-type="float">
            <text:p>0,00006319444444444440</text:p>
          </table:table-cell>
          <table:table-cell table:formula="of:=[.D8]-[.D7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1" office:value-type="float" office:value="637" calcext:value-type="float">
            <text:p>63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37268518518519" calcext:value-type="float">
            <text:p>0,00007372685185185190</text:p>
          </table:table-cell>
          <table:table-cell table:formula="of:=[.D9]-[.D8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1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42592592592593" calcext:value-type="float">
            <text:p>0,00008425925925925930</text:p>
          </table:table-cell>
          <table:table-cell table:formula="of:=[.D10]-[.D9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1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47916666666667" calcext:value-type="float">
            <text:p>0,00009479166666666670</text:p>
          </table:table-cell>
          <table:table-cell table:formula="of:=[.D11]-[.D10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1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5324074074074" calcext:value-type="float">
            <text:p>0,00010532407407407400</text:p>
          </table:table-cell>
          <table:table-cell table:formula="of:=[.D12]-[.D11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1" office:value-type="float" office:value="1001" calcext:value-type="float">
            <text:p>100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5856481481481" calcext:value-type="float">
            <text:p>0,00011585648148148100</text:p>
          </table:table-cell>
          <table:table-cell table:formula="of:=[.D13]-[.D12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1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6388888888889" calcext:value-type="float">
            <text:p>0,00012638888888888900</text:p>
          </table:table-cell>
          <table:table-cell table:formula="of:=[.D14]-[.D13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1" office:value-type="float" office:value="1183" calcext:value-type="float">
            <text:p>118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6921296296296" calcext:value-type="float">
            <text:p>0,00013692129629629600</text:p>
          </table:table-cell>
          <table:table-cell table:formula="of:=[.D15]-[.D14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1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47453703703704" calcext:value-type="float">
            <text:p>0,00014745370370370400</text:p>
          </table:table-cell>
          <table:table-cell table:formula="of:=[.D16]-[.D15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1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57986111111111" calcext:value-type="float">
            <text:p>0,00015798611111111100</text:p>
          </table:table-cell>
          <table:table-cell table:formula="of:=[.D17]-[.D16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1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68518518518519" calcext:value-type="float">
            <text:p>0,00016851851851851900</text:p>
          </table:table-cell>
          <table:table-cell table:formula="of:=[.D18]-[.D17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1" office:value-type="float" office:value="1547" calcext:value-type="float">
            <text:p>154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79050925925926" calcext:value-type="float">
            <text:p>0,00017905092592592600</text:p>
          </table:table-cell>
          <table:table-cell table:formula="of:=[.D19]-[.D18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1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89583333333333" calcext:value-type="float">
            <text:p>0,00018958333333333300</text:p>
          </table:table-cell>
          <table:table-cell table:formula="of:=[.D20]-[.D19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1" office:value-type="float" office:value="1729" calcext:value-type="float">
            <text:p>172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00115740740741" calcext:value-type="float">
            <text:p>0,00020011574074074100</text:p>
          </table:table-cell>
          <table:table-cell table:formula="of:=[.D21]-[.D20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1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10648148148148" calcext:value-type="float">
            <text:p>0,00021064814814814800</text:p>
          </table:table-cell>
          <table:table-cell table:formula="of:=[.D22]-[.D21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1" office:value-type="float" office:value="1911" calcext:value-type="float">
            <text:p>191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21180555555556" calcext:value-type="float">
            <text:p>0,00022118055555555600</text:p>
          </table:table-cell>
          <table:table-cell table:formula="of:=[.D23]-[.D22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1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31712962962963" calcext:value-type="float">
            <text:p>0,00023171296296296300</text:p>
          </table:table-cell>
          <table:table-cell table:formula="of:=[.D24]-[.D23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1" office:value-type="float" office:value="2093" calcext:value-type="float">
            <text:p>209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4224537037037" calcext:value-type="float">
            <text:p>0,00024224537037037000</text:p>
          </table:table-cell>
          <table:table-cell table:formula="of:=[.D25]-[.D24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1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52777777777778" calcext:value-type="float">
            <text:p>0,00025277777777777800</text:p>
          </table:table-cell>
          <table:table-cell table:formula="of:=[.D26]-[.D25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1" office:value-type="float" office:value="2275" calcext:value-type="float">
            <text:p>22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63310185185185" calcext:value-type="float">
            <text:p>0,00026331018518518500</text:p>
          </table:table-cell>
          <table:table-cell table:formula="of:=[.D27]-[.D2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1" office:value-type="float" office:value="2366" calcext:value-type="float">
            <text:p>236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73842592592593" calcext:value-type="float">
            <text:p>0,00027384259259259300</text:p>
          </table:table-cell>
          <table:table-cell table:formula="of:=[.D28]-[.D27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1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84375" calcext:value-type="float">
            <text:p>0,00028437500000000000</text:p>
          </table:table-cell>
          <table:table-cell table:formula="of:=[.D29]-[.D28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1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94907407407407" calcext:value-type="float">
            <text:p>0,00029490740740740700</text:p>
          </table:table-cell>
          <table:table-cell table:formula="of:=[.D30]-[.D29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1" office:value-type="float" office:value="2639" calcext:value-type="float">
            <text:p>263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05439814814815" calcext:value-type="float">
            <text:p>0,00030543981481481500</text:p>
          </table:table-cell>
          <table:table-cell table:formula="of:=[.D31]-[.D30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1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15972222222222" calcext:value-type="float">
            <text:p>0,00031597222222222200</text:p>
          </table:table-cell>
          <table:table-cell table:formula="of:=[.D32]-[.D31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1" office:value-type="float" office:value="2821" calcext:value-type="float">
            <text:p>282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2650462962963" calcext:value-type="float">
            <text:p>0,00032650462962963000</text:p>
          </table:table-cell>
          <table:table-cell table:formula="of:=[.D33]-[.D3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1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37037037037037" calcext:value-type="float">
            <text:p>0,00033703703703703700</text:p>
          </table:table-cell>
          <table:table-cell table:formula="of:=[.D34]-[.D33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1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47569444444444" calcext:value-type="float">
            <text:p>0,00034756944444444400</text:p>
          </table:table-cell>
          <table:table-cell table:formula="of:=[.D35]-[.D34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1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58101851851852" calcext:value-type="float">
            <text:p>0,00035810185185185200</text:p>
          </table:table-cell>
          <table:table-cell table:formula="of:=[.D36]-[.D35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1" office:value-type="float" office:value="3185" calcext:value-type="float">
            <text:p>318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68634259259259" calcext:value-type="float">
            <text:p>0,00036863425925925900</text:p>
          </table:table-cell>
          <table:table-cell table:formula="of:=[.D37]-[.D36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1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79166666666667" calcext:value-type="float">
            <text:p>0,00037916666666666700</text:p>
          </table:table-cell>
          <table:table-cell table:formula="of:=[.D38]-[.D37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1" office:value-type="float" office:value="3367" calcext:value-type="float">
            <text:p>336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89699074074074" calcext:value-type="float">
            <text:p>0,00038969907407407400</text:p>
          </table:table-cell>
          <table:table-cell table:formula="of:=[.D39]-[.D3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1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00231481481482" calcext:value-type="float">
            <text:p>0,00040023148148148200</text:p>
          </table:table-cell>
          <table:table-cell table:formula="of:=[.D40]-[.D39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1" office:value-type="float" office:value="3549" calcext:value-type="float">
            <text:p>354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10763888888889" calcext:value-type="float">
            <text:p>0,00041076388888888900</text:p>
          </table:table-cell>
          <table:table-cell table:formula="of:=[.D41]-[.D40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1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21296296296296" calcext:value-type="float">
            <text:p>0,00042129629629629600</text:p>
          </table:table-cell>
          <table:table-cell table:formula="of:=[.D42]-[.D41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1" office:value-type="float" office:value="3731" calcext:value-type="float">
            <text:p>373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31828703703704" calcext:value-type="float">
            <text:p>0,00043182870370370400</text:p>
          </table:table-cell>
          <table:table-cell table:formula="of:=[.D43]-[.D42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1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42361111111111" calcext:value-type="float">
            <text:p>0,00044236111111111100</text:p>
          </table:table-cell>
          <table:table-cell table:formula="of:=[.D44]-[.D4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1" office:value-type="float" office:value="3913" calcext:value-type="float">
            <text:p>391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52893518518519" calcext:value-type="float">
            <text:p>0,00045289351851851900</text:p>
          </table:table-cell>
          <table:table-cell table:formula="of:=[.D45]-[.D44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1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63425925925926" calcext:value-type="float">
            <text:p>0,00046342592592592600</text:p>
          </table:table-cell>
          <table:table-cell table:formula="of:=[.D46]-[.D45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1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73958333333333" calcext:value-type="float">
            <text:p>0,00047395833333333300</text:p>
          </table:table-cell>
          <table:table-cell table:formula="of:=[.D47]-[.D46]" office:value-type="float" office:value="0.0000105324074074074" calcext:value-type="float">
            <text:p>0,0000105324074074074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1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84490740740741" calcext:value-type="float">
            <text:p>0,00048449074074074100</text:p>
          </table:table-cell>
          <table:table-cell table:formula="of:=[.D48]-[.D4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1" office:value-type="float" office:value="4277" calcext:value-type="float">
            <text:p>427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95023148148148" calcext:value-type="float">
            <text:p>0,00049502314814814800</text:p>
          </table:table-cell>
          <table:table-cell table:formula="of:=[.D49]-[.D48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1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05555555555556" calcext:value-type="float">
            <text:p>0,00050555555555555600</text:p>
          </table:table-cell>
          <table:table-cell table:formula="of:=[.D50]-[.D4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1" office:value-type="float" office:value="4459" calcext:value-type="float">
            <text:p>445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16087962962963" calcext:value-type="float">
            <text:p>0,00051608796296296300</text:p>
          </table:table-cell>
          <table:table-cell table:formula="of:=[.D51]-[.D50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1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2662037037037" calcext:value-type="float">
            <text:p>0,00052662037037037000</text:p>
          </table:table-cell>
          <table:table-cell table:formula="of:=[.D52]-[.D5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1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37152777777778" calcext:value-type="float">
            <text:p>0,00053715277777777800</text:p>
          </table:table-cell>
          <table:table-cell table:formula="of:=[.D53]-[.D5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1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47685185185185" calcext:value-type="float">
            <text:p>0,00054768518518518500</text:p>
          </table:table-cell>
          <table:table-cell table:formula="of:=[.D54]-[.D53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1" office:value-type="float" office:value="4823" calcext:value-type="float">
            <text:p>482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58217592592593" calcext:value-type="float">
            <text:p>0,00055821759259259300</text:p>
          </table:table-cell>
          <table:table-cell table:formula="of:=[.D55]-[.D5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1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6875" calcext:value-type="float">
            <text:p>0,00056875000000000000</text:p>
          </table:table-cell>
          <table:table-cell table:formula="of:=[.D56]-[.D55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1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79282407407407" calcext:value-type="float">
            <text:p>0,00057928240740740700</text:p>
          </table:table-cell>
          <table:table-cell table:formula="of:=[.D57]-[.D5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1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89814814814815" calcext:value-type="float">
            <text:p>0,00058981481481481500</text:p>
          </table:table-cell>
          <table:table-cell table:formula="of:=[.D58]-[.D5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1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00347222222222" calcext:value-type="float">
            <text:p>0,00060034722222222200</text:p>
          </table:table-cell>
          <table:table-cell table:formula="of:=[.D59]-[.D58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1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1087962962963" calcext:value-type="float">
            <text:p>0,00061087962962963000</text:p>
          </table:table-cell>
          <table:table-cell table:formula="of:=[.D60]-[.D5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1" office:value-type="float" office:value="5369" calcext:value-type="float">
            <text:p>536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21412037037037" calcext:value-type="float">
            <text:p>0,00062141203703703700</text:p>
          </table:table-cell>
          <table:table-cell table:formula="of:=[.D61]-[.D60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1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31944444444444" calcext:value-type="float">
            <text:p>0,00063194444444444400</text:p>
          </table:table-cell>
          <table:table-cell table:formula="of:=[.D62]-[.D6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1" office:value-type="float" office:value="5551" calcext:value-type="float">
            <text:p>555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42476851851852" calcext:value-type="float">
            <text:p>0,00064247685185185200</text:p>
          </table:table-cell>
          <table:table-cell table:formula="of:=[.D63]-[.D62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1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53009259259259" calcext:value-type="float">
            <text:p>0,00065300925925925900</text:p>
          </table:table-cell>
          <table:table-cell table:formula="of:=[.D64]-[.D6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1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63541666666667" calcext:value-type="float">
            <text:p>0,00066354166666666700</text:p>
          </table:table-cell>
          <table:table-cell table:formula="of:=[.D65]-[.D6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1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74074074074074" calcext:value-type="float">
            <text:p>0,00067407407407407400</text:p>
          </table:table-cell>
          <table:table-cell table:formula="of:=[.D66]-[.D65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1" office:value-type="float" office:value="5915" calcext:value-type="float">
            <text:p>591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84606481481482" calcext:value-type="float">
            <text:p>0,00068460648148148200</text:p>
          </table:table-cell>
          <table:table-cell table:formula="of:=[.D67]-[.D6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1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95138888888889" calcext:value-type="float">
            <text:p>0,00069513888888888900</text:p>
          </table:table-cell>
          <table:table-cell table:formula="of:=[.D68]-[.D67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1" office:value-type="float" office:value="6097" calcext:value-type="float">
            <text:p>609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05671296296296" calcext:value-type="float">
            <text:p>0,00070567129629629600</text:p>
          </table:table-cell>
          <table:table-cell table:formula="of:=[.D69]-[.D6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1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16203703703704" calcext:value-type="float">
            <text:p>0,00071620370370370400</text:p>
          </table:table-cell>
          <table:table-cell table:formula="of:=[.D70]-[.D6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1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26736111111111" calcext:value-type="float">
            <text:p>0,00072673611111111100</text:p>
          </table:table-cell>
          <table:table-cell table:formula="of:=[.D71]-[.D70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1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37268518518519" calcext:value-type="float">
            <text:p>0,00073726851851851900</text:p>
          </table:table-cell>
          <table:table-cell table:formula="of:=[.D72]-[.D7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1" office:value-type="float" office:value="6461" calcext:value-type="float">
            <text:p>646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47800925925926" calcext:value-type="float">
            <text:p>0,00074780092592592600</text:p>
          </table:table-cell>
          <table:table-cell table:formula="of:=[.D73]-[.D72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1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58333333333333" calcext:value-type="float">
            <text:p>0,00075833333333333300</text:p>
          </table:table-cell>
          <table:table-cell table:formula="of:=[.D74]-[.D7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1" office:value-type="float" office:value="6643" calcext:value-type="float">
            <text:p>664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68865740740741" calcext:value-type="float">
            <text:p>0,00076886574074074100</text:p>
          </table:table-cell>
          <table:table-cell table:formula="of:=[.D75]-[.D74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1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79398148148148" calcext:value-type="float">
            <text:p>0,00077939814814814800</text:p>
          </table:table-cell>
          <table:table-cell table:formula="of:=[.D76]-[.D7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1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89930555555556" calcext:value-type="float">
            <text:p>0,00078993055555555600</text:p>
          </table:table-cell>
          <table:table-cell table:formula="of:=[.D77]-[.D7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1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00462962962963" calcext:value-type="float">
            <text:p>0,00080046296296296300</text:p>
          </table:table-cell>
          <table:table-cell table:formula="of:=[.D78]-[.D77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1" office:value-type="float" office:value="7007" calcext:value-type="float">
            <text:p>700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1099537037037" calcext:value-type="float">
            <text:p>0,00081099537037037100</text:p>
          </table:table-cell>
          <table:table-cell table:formula="of:=[.D79]-[.D7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1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21527777777778" calcext:value-type="float">
            <text:p>0,00082152777777777800</text:p>
          </table:table-cell>
          <table:table-cell table:formula="of:=[.D80]-[.D79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1" office:value-type="float" office:value="7189" calcext:value-type="float">
            <text:p>718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32060185185185" calcext:value-type="float">
            <text:p>0,00083206018518518500</text:p>
          </table:table-cell>
          <table:table-cell table:formula="of:=[.D81]-[.D8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1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42592592592593" calcext:value-type="float">
            <text:p>0,00084259259259259300</text:p>
          </table:table-cell>
          <table:table-cell table:formula="of:=[.D82]-[.D8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1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53125" calcext:value-type="float">
            <text:p>0,00085312500000000000</text:p>
          </table:table-cell>
          <table:table-cell table:formula="of:=[.D83]-[.D82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1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63657407407407" calcext:value-type="float">
            <text:p>0,00086365740740740700</text:p>
          </table:table-cell>
          <table:table-cell table:formula="of:=[.D84]-[.D8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1" office:value-type="float" office:value="7553" calcext:value-type="float">
            <text:p>755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74189814814815" calcext:value-type="float">
            <text:p>0,00087418981481481500</text:p>
          </table:table-cell>
          <table:table-cell table:formula="of:=[.D85]-[.D84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1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84722222222222" calcext:value-type="float">
            <text:p>0,00088472222222222200</text:p>
          </table:table-cell>
          <table:table-cell table:formula="of:=[.D86]-[.D8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1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9525462962963" calcext:value-type="float">
            <text:p>0,00089525462962963000</text:p>
          </table:table-cell>
          <table:table-cell table:formula="of:=[.D87]-[.D8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1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05787037037037" calcext:value-type="float">
            <text:p>0,00090578703703703700</text:p>
          </table:table-cell>
          <table:table-cell table:formula="of:=[.D88]-[.D87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1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16319444444444" calcext:value-type="float">
            <text:p>0,00091631944444444400</text:p>
          </table:table-cell>
          <table:table-cell table:formula="of:=[.D89]-[.D8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1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26851851851852" calcext:value-type="float">
            <text:p>0,00092685185185185200</text:p>
          </table:table-cell>
          <table:table-cell table:formula="of:=[.D90]-[.D89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1" office:value-type="float" office:value="8099" calcext:value-type="float">
            <text:p>809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37384259259259" calcext:value-type="float">
            <text:p>0,00093738425925925900</text:p>
          </table:table-cell>
          <table:table-cell table:formula="of:=[.D91]-[.D9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1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47916666666667" calcext:value-type="float">
            <text:p>0,00094791666666666700</text:p>
          </table:table-cell>
          <table:table-cell table:formula="of:=[.D92]-[.D91]" office:value-type="float" office:value="0.0000105324074074073" calcext:value-type="float">
            <text:p>0,0000105324074074073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1" office:value-type="float" office:value="8281" calcext:value-type="float">
            <text:p>828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58449074074074" calcext:value-type="float">
            <text:p>0,00095844907407407400</text:p>
          </table:table-cell>
          <table:table-cell table:formula="of:=[.D93]-[.D9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1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68981481481482" calcext:value-type="float">
            <text:p>0,00096898148148148200</text:p>
          </table:table-cell>
          <table:table-cell table:formula="of:=[.D94]-[.D9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1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79513888888889" calcext:value-type="float">
            <text:p>0,00097951388888888900</text:p>
          </table:table-cell>
          <table:table-cell table:formula="of:=[.D95]-[.D9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1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90046296296296" calcext:value-type="float">
            <text:p>0,00099004629629629600</text:p>
          </table:table-cell>
          <table:table-cell table:formula="of:=[.D96]-[.D95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1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005787037037" calcext:value-type="float">
            <text:p>0,00100057870370370000</text:p>
          </table:table-cell>
          <table:table-cell table:formula="of:=[.D97]-[.D9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1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1111111111111" calcext:value-type="float">
            <text:p>0,00101111111111111000</text:p>
          </table:table-cell>
          <table:table-cell table:formula="of:=[.D98]-[.D9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1" office:value-type="float" office:value="8827" calcext:value-type="float">
            <text:p>882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2164351851852" calcext:value-type="float">
            <text:p>0,00102164351851852000</text:p>
          </table:table-cell>
          <table:table-cell table:formula="of:=[.D99]-[.D9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1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3217592592593" calcext:value-type="float">
            <text:p>0,00103217592592593000</text:p>
          </table:table-cell>
          <table:table-cell table:formula="of:=[.D100]-[.D9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1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4270833333333" calcext:value-type="float">
            <text:p>0,00104270833333333000</text:p>
          </table:table-cell>
          <table:table-cell table:formula="of:=[.D101]-[.D100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1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5324074074074" calcext:value-type="float">
            <text:p>0,00105324074074074000</text:p>
          </table:table-cell>
          <table:table-cell table:formula="of:=[.D102]-[.D10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1" office:value-type="float" office:value="9191" calcext:value-type="float">
            <text:p>919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6377314814815" calcext:value-type="float">
            <text:p>0,00106377314814815000</text:p>
          </table:table-cell>
          <table:table-cell table:formula="of:=[.D103]-[.D10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1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7430555555556" calcext:value-type="float">
            <text:p>0,00107430555555556000</text:p>
          </table:table-cell>
          <table:table-cell table:formula="of:=[.D104]-[.D10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1" office:value-type="float" office:value="9373" calcext:value-type="float">
            <text:p>937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8483796296296" calcext:value-type="float">
            <text:p>0,00108483796296296000</text:p>
          </table:table-cell>
          <table:table-cell table:formula="of:=[.D105]-[.D10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1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9537037037037" calcext:value-type="float">
            <text:p>0,00109537037037037000</text:p>
          </table:table-cell>
          <table:table-cell table:formula="of:=[.D106]-[.D105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1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0590277777778" calcext:value-type="float">
            <text:p>0,00110590277777778000</text:p>
          </table:table-cell>
          <table:table-cell table:formula="of:=[.D107]-[.D10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1" office:value-type="float" office:value="9646" calcext:value-type="float">
            <text:p>964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1643518518519" calcext:value-type="float">
            <text:p>0,00111643518518519000</text:p>
          </table:table-cell>
          <table:table-cell table:formula="of:=[.D108]-[.D10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1" office:value-type="float" office:value="9737" calcext:value-type="float">
            <text:p>973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2696759259259" calcext:value-type="float">
            <text:p>0,00112696759259259000</text:p>
          </table:table-cell>
          <table:table-cell table:formula="of:=[.D109]-[.D10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1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375" calcext:value-type="float">
            <text:p>0,00113750000000000000</text:p>
          </table:table-cell>
          <table:table-cell table:formula="of:=[.D110]-[.D10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1" office:value-type="float" office:value="9919" calcext:value-type="float">
            <text:p>991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4803240740741" calcext:value-type="float">
            <text:p>0,00114803240740741000</text:p>
          </table:table-cell>
          <table:table-cell table:formula="of:=[.D111]-[.D110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1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5856481481481" calcext:value-type="float">
            <text:p>0,00115856481481481000</text:p>
          </table:table-cell>
          <table:table-cell table:formula="of:=[.D112]-[.D11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1" office:value-type="float" office:value="10101" calcext:value-type="float">
            <text:p>1010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6909722222222" calcext:value-type="float">
            <text:p>0,00116909722222222000</text:p>
          </table:table-cell>
          <table:table-cell table:formula="of:=[.D113]-[.D11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1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7962962962963" calcext:value-type="float">
            <text:p>0,00117962962962963000</text:p>
          </table:table-cell>
          <table:table-cell table:formula="of:=[.D114]-[.D11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1" office:value-type="float" office:value="10283" calcext:value-type="float">
            <text:p>1028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9016203703704" calcext:value-type="float">
            <text:p>0,00119016203703704000</text:p>
          </table:table-cell>
          <table:table-cell table:formula="of:=[.D115]-[.D11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1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0069444444444" calcext:value-type="float">
            <text:p>0,00120069444444444000</text:p>
          </table:table-cell>
          <table:table-cell table:formula="of:=[.D116]-[.D115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1" office:value-type="float" office:value="10465" calcext:value-type="float">
            <text:p>1046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1122685185185" calcext:value-type="float">
            <text:p>0,00121122685185185000</text:p>
          </table:table-cell>
          <table:table-cell table:formula="of:=[.D117]-[.D11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1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2175925925926" calcext:value-type="float">
            <text:p>0,00122175925925926000</text:p>
          </table:table-cell>
          <table:table-cell table:formula="of:=[.D118]-[.D11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1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3229166666667" calcext:value-type="float">
            <text:p>0,00123229166666667000</text:p>
          </table:table-cell>
          <table:table-cell table:formula="of:=[.D119]-[.D11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1" office:value-type="float" office:value="10738" calcext:value-type="float">
            <text:p>1073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4282407407407" calcext:value-type="float">
            <text:p>0,00124282407407407000</text:p>
          </table:table-cell>
          <table:table-cell table:formula="of:=[.D120]-[.D119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1" office:value-type="float" office:value="10829" calcext:value-type="float">
            <text:p>1082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5335648148148" calcext:value-type="float">
            <text:p>0,00125335648148148000</text:p>
          </table:table-cell>
          <table:table-cell table:formula="of:=[.D121]-[.D12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1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6388888888889" calcext:value-type="float">
            <text:p>0,00126388888888889000</text:p>
          </table:table-cell>
          <table:table-cell table:formula="of:=[.D122]-[.D12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1" office:value-type="float" office:value="11011" calcext:value-type="float">
            <text:p>1101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744212962963" calcext:value-type="float">
            <text:p>0,00127442129629630000</text:p>
          </table:table-cell>
          <table:table-cell table:formula="of:=[.D123]-[.D12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1" office:value-type="float" office:value="11102" calcext:value-type="float">
            <text:p>1110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849537037037" calcext:value-type="float">
            <text:p>0,00128495370370370000</text:p>
          </table:table-cell>
          <table:table-cell table:formula="of:=[.D124]-[.D12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1" office:value-type="float" office:value="11193" calcext:value-type="float">
            <text:p>1119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9548611111111" calcext:value-type="float">
            <text:p>0,00129548611111111000</text:p>
          </table:table-cell>
          <table:table-cell table:formula="of:=[.D125]-[.D124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1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0601851851852" calcext:value-type="float">
            <text:p>0,00130601851851852000</text:p>
          </table:table-cell>
          <table:table-cell table:formula="of:=[.D126]-[.D12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1" office:value-type="float" office:value="11375" calcext:value-type="float">
            <text:p>11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1655092592593" calcext:value-type="float">
            <text:p>0,00131655092592593000</text:p>
          </table:table-cell>
          <table:table-cell table:formula="of:=[.D127]-[.D12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1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32708333333333" calcext:value-type="float">
            <text:p>0,00132708333333333000</text:p>
          </table:table-cell>
          <table:table-cell table:formula="of:=[.D128]-[.D12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1" office:value-type="float" office:value="11557" calcext:value-type="float">
            <text:p>1155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3761574074074" calcext:value-type="float">
            <text:p>0,00133761574074074000</text:p>
          </table:table-cell>
          <table:table-cell table:formula="of:=[.D129]-[.D12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1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4814814814815" calcext:value-type="float">
            <text:p>0,00134814814814815000</text:p>
          </table:table-cell>
          <table:table-cell table:formula="of:=[.D130]-[.D129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1" office:value-type="float" office:value="11739" calcext:value-type="float">
            <text:p>1173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35868055555556" calcext:value-type="float">
            <text:p>0,00135868055555556000</text:p>
          </table:table-cell>
          <table:table-cell table:formula="of:=[.D131]-[.D13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1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6921296296296" calcext:value-type="float">
            <text:p>0,00136921296296296000</text:p>
          </table:table-cell>
          <table:table-cell table:formula="of:=[.D132]-[.D13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1" office:value-type="float" office:value="11921" calcext:value-type="float">
            <text:p>1192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7974537037037" calcext:value-type="float">
            <text:p>0,00137974537037037000</text:p>
          </table:table-cell>
          <table:table-cell table:formula="of:=[.D133]-[.D13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1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39027777777778" calcext:value-type="float">
            <text:p>0,00139027777777778000</text:p>
          </table:table-cell>
          <table:table-cell table:formula="of:=[.D134]-[.D13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1" office:value-type="float" office:value="12103" calcext:value-type="float">
            <text:p>1210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0081018518519" calcext:value-type="float">
            <text:p>0,00140081018518519000</text:p>
          </table:table-cell>
          <table:table-cell table:formula="of:=[.D135]-[.D134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1" office:value-type="float" office:value="12194" calcext:value-type="float">
            <text:p>1219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41134259259259" calcext:value-type="float">
            <text:p>0,00141134259259259000</text:p>
          </table:table-cell>
          <table:table-cell table:formula="of:=[.D136]-[.D13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1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421875" calcext:value-type="float">
            <text:p>0,00142187500000000000</text:p>
          </table:table-cell>
          <table:table-cell table:formula="of:=[.D137]-[.D13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1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3240740740741" calcext:value-type="float">
            <text:p>0,00143240740740741000</text:p>
          </table:table-cell>
          <table:table-cell table:formula="of:=[.D138]-[.D13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1" office:value-type="float" office:value="12467" calcext:value-type="float">
            <text:p>1246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44293981481481" calcext:value-type="float">
            <text:p>0,00144293981481481000</text:p>
          </table:table-cell>
          <table:table-cell table:formula="of:=[.D139]-[.D13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1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45347222222222" calcext:value-type="float">
            <text:p>0,00145347222222222000</text:p>
          </table:table-cell>
          <table:table-cell table:formula="of:=[.D140]-[.D139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1" office:value-type="float" office:value="12649" calcext:value-type="float">
            <text:p>1264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46400462962963" calcext:value-type="float">
            <text:p>0,00146400462962963000</text:p>
          </table:table-cell>
          <table:table-cell table:formula="of:=[.D141]-[.D14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1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47453703703704" calcext:value-type="float">
            <text:p>0,00147453703703704000</text:p>
          </table:table-cell>
          <table:table-cell table:formula="of:=[.D142]-[.D14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1" office:value-type="float" office:value="12831" calcext:value-type="float">
            <text:p>1283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48506944444444" calcext:value-type="float">
            <text:p>0,00148506944444444000</text:p>
          </table:table-cell>
          <table:table-cell table:formula="of:=[.D143]-[.D14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1" office:value-type="float" office:value="12922" calcext:value-type="float">
            <text:p>1292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49560185185185" calcext:value-type="float">
            <text:p>0,00149560185185185000</text:p>
          </table:table-cell>
          <table:table-cell table:formula="of:=[.D144]-[.D14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1" office:value-type="float" office:value="13013" calcext:value-type="float">
            <text:p>1301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50613425925926" calcext:value-type="float">
            <text:p>0,00150613425925926000</text:p>
          </table:table-cell>
          <table:table-cell table:formula="of:=[.D145]-[.D144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1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51666666666667" calcext:value-type="float">
            <text:p>0,00151666666666667000</text:p>
          </table:table-cell>
          <table:table-cell table:formula="of:=[.D146]-[.D14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1" office:value-type="float" office:value="13195" calcext:value-type="float">
            <text:p>1319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52719907407407" calcext:value-type="float">
            <text:p>0,00152719907407407000</text:p>
          </table:table-cell>
          <table:table-cell table:formula="of:=[.D147]-[.D14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1" office:value-type="float" office:value="13286" calcext:value-type="float">
            <text:p>1328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53773148148148" calcext:value-type="float">
            <text:p>0,00153773148148148000</text:p>
          </table:table-cell>
          <table:table-cell table:formula="of:=[.D148]-[.D14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1" office:value-type="float" office:value="13377" calcext:value-type="float">
            <text:p>1337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54826388888889" calcext:value-type="float">
            <text:p>0,00154826388888889000</text:p>
          </table:table-cell>
          <table:table-cell table:formula="of:=[.D149]-[.D148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1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5587962962963" calcext:value-type="float">
            <text:p>0,00155879629629630000</text:p>
          </table:table-cell>
          <table:table-cell table:formula="of:=[.D150]-[.D14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1" office:value-type="float" office:value="13559" calcext:value-type="float">
            <text:p>1355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5693287037037" calcext:value-type="float">
            <text:p>0,00156932870370370000</text:p>
          </table:table-cell>
          <table:table-cell table:formula="of:=[.D151]-[.D15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1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57986111111111" calcext:value-type="float">
            <text:p>0,00157986111111111000</text:p>
          </table:table-cell>
          <table:table-cell table:formula="of:=[.D152]-[.D15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1" office:value-type="float" office:value="13741" calcext:value-type="float">
            <text:p>1374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59039351851852" calcext:value-type="float">
            <text:p>0,00159039351851852000</text:p>
          </table:table-cell>
          <table:table-cell table:formula="of:=[.D153]-[.D15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1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60092592592593" calcext:value-type="float">
            <text:p>0,00160092592592593000</text:p>
          </table:table-cell>
          <table:table-cell table:formula="of:=[.D154]-[.D153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1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61145833333333" calcext:value-type="float">
            <text:p>0,00161145833333333000</text:p>
          </table:table-cell>
          <table:table-cell table:formula="of:=[.D155]-[.D15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1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62199074074074" calcext:value-type="float">
            <text:p>0,00162199074074074000</text:p>
          </table:table-cell>
          <table:table-cell table:formula="of:=[.D156]-[.D15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1" office:value-type="float" office:value="14105" calcext:value-type="float">
            <text:p>1410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63252314814815" calcext:value-type="float">
            <text:p>0,00163252314814815000</text:p>
          </table:table-cell>
          <table:table-cell table:formula="of:=[.D157]-[.D15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1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64305555555556" calcext:value-type="float">
            <text:p>0,00164305555555556000</text:p>
          </table:table-cell>
          <table:table-cell table:formula="of:=[.D158]-[.D15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1" office:value-type="float" office:value="14287" calcext:value-type="float">
            <text:p>1428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65358796296296" calcext:value-type="float">
            <text:p>0,00165358796296296000</text:p>
          </table:table-cell>
          <table:table-cell table:formula="of:=[.D159]-[.D158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1" office:value-type="float" office:value="14378" calcext:value-type="float">
            <text:p>1437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66412037037037" calcext:value-type="float">
            <text:p>0,00166412037037037000</text:p>
          </table:table-cell>
          <table:table-cell table:formula="of:=[.D160]-[.D15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1" office:value-type="float" office:value="14469" calcext:value-type="float">
            <text:p>1446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67465277777778" calcext:value-type="float">
            <text:p>0,00167465277777778000</text:p>
          </table:table-cell>
          <table:table-cell table:formula="of:=[.D161]-[.D16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1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68518518518519" calcext:value-type="float">
            <text:p>0,00168518518518519000</text:p>
          </table:table-cell>
          <table:table-cell table:formula="of:=[.D162]-[.D16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1" office:value-type="float" office:value="14651" calcext:value-type="float">
            <text:p>1465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69571759259259" calcext:value-type="float">
            <text:p>0,00169571759259259000</text:p>
          </table:table-cell>
          <table:table-cell table:formula="of:=[.D163]-[.D16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1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70625" calcext:value-type="float">
            <text:p>0,00170625000000000000</text:p>
          </table:table-cell>
          <table:table-cell table:formula="of:=[.D164]-[.D163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1" office:value-type="float" office:value="14833" calcext:value-type="float">
            <text:p>1483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71678240740741" calcext:value-type="float">
            <text:p>0,00171678240740741000</text:p>
          </table:table-cell>
          <table:table-cell table:formula="of:=[.D165]-[.D16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1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72731481481481" calcext:value-type="float">
            <text:p>0,00172731481481481000</text:p>
          </table:table-cell>
          <table:table-cell table:formula="of:=[.D166]-[.D16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1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73784722222222" calcext:value-type="float">
            <text:p>0,00173784722222222000</text:p>
          </table:table-cell>
          <table:table-cell table:formula="of:=[.D167]-[.D16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1" office:value-type="float" office:value="15106" calcext:value-type="float">
            <text:p>1510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74837962962963" calcext:value-type="float">
            <text:p>0,00174837962962963000</text:p>
          </table:table-cell>
          <table:table-cell table:formula="of:=[.D168]-[.D16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1" office:value-type="float" office:value="15197" calcext:value-type="float">
            <text:p>1519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75891203703704" calcext:value-type="float">
            <text:p>0,00175891203703704000</text:p>
          </table:table-cell>
          <table:table-cell table:formula="of:=[.D169]-[.D168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1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76944444444444" calcext:value-type="float">
            <text:p>0,00176944444444444000</text:p>
          </table:table-cell>
          <table:table-cell table:formula="of:=[.D170]-[.D16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1" office:value-type="float" office:value="15379" calcext:value-type="float">
            <text:p>1537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77997685185185" calcext:value-type="float">
            <text:p>0,00177997685185185000</text:p>
          </table:table-cell>
          <table:table-cell table:formula="of:=[.D171]-[.D17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1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79050925925926" calcext:value-type="float">
            <text:p>0,00179050925925926000</text:p>
          </table:table-cell>
          <table:table-cell table:formula="of:=[.D172]-[.D17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1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80104166666667" calcext:value-type="float">
            <text:p>0,00180104166666667000</text:p>
          </table:table-cell>
          <table:table-cell table:formula="of:=[.D173]-[.D17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1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81157407407407" calcext:value-type="float">
            <text:p>0,00181157407407407000</text:p>
          </table:table-cell>
          <table:table-cell table:formula="of:=[.D174]-[.D173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1" office:value-type="float" office:value="15743" calcext:value-type="float">
            <text:p>1574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82210648148148" calcext:value-type="float">
            <text:p>0,00182210648148148000</text:p>
          </table:table-cell>
          <table:table-cell table:formula="of:=[.D175]-[.D17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1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83263888888889" calcext:value-type="float">
            <text:p>0,00183263888888889000</text:p>
          </table:table-cell>
          <table:table-cell table:formula="of:=[.D176]-[.D17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1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8431712962963" calcext:value-type="float">
            <text:p>0,00184317129629630000</text:p>
          </table:table-cell>
          <table:table-cell table:formula="of:=[.D177]-[.D17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1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8537037037037" calcext:value-type="float">
            <text:p>0,00185370370370370000</text:p>
          </table:table-cell>
          <table:table-cell table:formula="of:=[.D178]-[.D17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1" office:value-type="float" office:value="16107" calcext:value-type="float">
            <text:p>1610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86423611111111" calcext:value-type="float">
            <text:p>0,00186423611111111000</text:p>
          </table:table-cell>
          <table:table-cell table:formula="of:=[.D179]-[.D178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1" office:value-type="float" office:value="16198" calcext:value-type="float">
            <text:p>1619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87476851851852" calcext:value-type="float">
            <text:p>0,00187476851851852000</text:p>
          </table:table-cell>
          <table:table-cell table:formula="of:=[.D180]-[.D17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1" office:value-type="float" office:value="16289" calcext:value-type="float">
            <text:p>1628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88530092592593" calcext:value-type="float">
            <text:p>0,00188530092592593000</text:p>
          </table:table-cell>
          <table:table-cell table:formula="of:=[.D181]-[.D18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1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89583333333333" calcext:value-type="float">
            <text:p>0,00189583333333333000</text:p>
          </table:table-cell>
          <table:table-cell table:formula="of:=[.D182]-[.D18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1" office:value-type="float" office:value="16471" calcext:value-type="float">
            <text:p>1647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90636574074074" calcext:value-type="float">
            <text:p>0,00190636574074074000</text:p>
          </table:table-cell>
          <table:table-cell table:formula="of:=[.D183]-[.D182]" office:value-type="float" office:value="0.0000105324074074072" calcext:value-type="float">
            <text:p>0,0000105324074074072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1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91689814814815" calcext:value-type="float">
            <text:p>0,00191689814814815000</text:p>
          </table:table-cell>
          <table:table-cell table:formula="of:=[.D184]-[.D18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1" office:value-type="float" office:value="16653" calcext:value-type="float">
            <text:p>1665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92743055555556" calcext:value-type="float">
            <text:p>0,00192743055555556000</text:p>
          </table:table-cell>
          <table:table-cell table:formula="of:=[.D185]-[.D18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1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93796296296296" calcext:value-type="float">
            <text:p>0,00193796296296296000</text:p>
          </table:table-cell>
          <table:table-cell table:formula="of:=[.D186]-[.D18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1" office:value-type="float" office:value="16835" calcext:value-type="float">
            <text:p>1683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94849537037037" calcext:value-type="float">
            <text:p>0,00194849537037037000</text:p>
          </table:table-cell>
          <table:table-cell table:formula="of:=[.D187]-[.D18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1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95902777777778" calcext:value-type="float">
            <text:p>0,00195902777777778000</text:p>
          </table:table-cell>
          <table:table-cell table:formula="of:=[.D188]-[.D18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1" office:value-type="float" office:value="17017" calcext:value-type="float">
            <text:p>1701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96956018518519" calcext:value-type="float">
            <text:p>0,00196956018518519000</text:p>
          </table:table-cell>
          <table:table-cell table:formula="of:=[.D189]-[.D18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1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98009259259259" calcext:value-type="float">
            <text:p>0,00198009259259259000</text:p>
          </table:table-cell>
          <table:table-cell table:formula="of:=[.D190]-[.D18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1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990625" calcext:value-type="float">
            <text:p>0,00199062500000000000</text:p>
          </table:table-cell>
          <table:table-cell table:formula="of:=[.D191]-[.D190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1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00115740740741" calcext:value-type="float">
            <text:p>0,00200115740740741000</text:p>
          </table:table-cell>
          <table:table-cell table:formula="of:=[.D192]-[.D19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1" office:value-type="float" office:value="17381" calcext:value-type="float">
            <text:p>1738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01168981481481" calcext:value-type="float">
            <text:p>0,00201168981481481000</text:p>
          </table:table-cell>
          <table:table-cell table:formula="of:=[.D193]-[.D19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1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02222222222222" calcext:value-type="float">
            <text:p>0,00202222222222222000</text:p>
          </table:table-cell>
          <table:table-cell table:formula="of:=[.D194]-[.D19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1" office:value-type="float" office:value="17563" calcext:value-type="float">
            <text:p>1756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03275462962963" calcext:value-type="float">
            <text:p>0,00203275462962963000</text:p>
          </table:table-cell>
          <table:table-cell table:formula="of:=[.D195]-[.D19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1" office:value-type="float" office:value="17654" calcext:value-type="float">
            <text:p>1765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04328703703704" calcext:value-type="float">
            <text:p>0,00204328703703704000</text:p>
          </table:table-cell>
          <table:table-cell table:formula="of:=[.D196]-[.D19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1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05381944444444" calcext:value-type="float">
            <text:p>0,00205381944444444000</text:p>
          </table:table-cell>
          <table:table-cell table:formula="of:=[.D197]-[.D19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1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06435185185185" calcext:value-type="float">
            <text:p>0,00206435185185185000</text:p>
          </table:table-cell>
          <table:table-cell table:formula="of:=[.D198]-[.D19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1" office:value-type="float" office:value="17927" calcext:value-type="float">
            <text:p>1792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07488425925926" calcext:value-type="float">
            <text:p>0,00207488425925926000</text:p>
          </table:table-cell>
          <table:table-cell table:formula="of:=[.D199]-[.D19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1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08541666666667" calcext:value-type="float">
            <text:p>0,00208541666666667000</text:p>
          </table:table-cell>
          <table:table-cell table:formula="of:=[.D200]-[.D199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1" office:value-type="float" office:value="18109" calcext:value-type="float">
            <text:p>1810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09594907407407" calcext:value-type="float">
            <text:p>0,00209594907407407000</text:p>
          </table:table-cell>
          <table:table-cell table:formula="of:=[.D201]-[.D20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1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10648148148148" calcext:value-type="float">
            <text:p>0,00210648148148148000</text:p>
          </table:table-cell>
          <table:table-cell table:formula="of:=[.D202]-[.D20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1" office:value-type="float" office:value="18291" calcext:value-type="float">
            <text:p>1829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11701388888889" calcext:value-type="float">
            <text:p>0,00211701388888889000</text:p>
          </table:table-cell>
          <table:table-cell table:formula="of:=[.D203]-[.D20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1" office:value-type="float" office:value="18382" calcext:value-type="float">
            <text:p>1838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1275462962963" calcext:value-type="float">
            <text:p>0,00212754629629630000</text:p>
          </table:table-cell>
          <table:table-cell table:formula="of:=[.D204]-[.D20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1" office:value-type="float" office:value="18473" calcext:value-type="float">
            <text:p>1847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1380787037037" calcext:value-type="float">
            <text:p>0,00213807870370370000</text:p>
          </table:table-cell>
          <table:table-cell table:formula="of:=[.D205]-[.D20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1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14861111111111" calcext:value-type="float">
            <text:p>0,00214861111111111000</text:p>
          </table:table-cell>
          <table:table-cell table:formula="of:=[.D206]-[.D20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1" office:value-type="float" office:value="18655" calcext:value-type="float">
            <text:p>1865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15914351851852" calcext:value-type="float">
            <text:p>0,00215914351851852000</text:p>
          </table:table-cell>
          <table:table-cell table:formula="of:=[.D207]-[.D20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1" office:value-type="float" office:value="18746" calcext:value-type="float">
            <text:p>1874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16967592592593" calcext:value-type="float">
            <text:p>0,00216967592592593000</text:p>
          </table:table-cell>
          <table:table-cell table:formula="of:=[.D208]-[.D20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1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18020833333333" calcext:value-type="float">
            <text:p>0,00218020833333333000</text:p>
          </table:table-cell>
          <table:table-cell table:formula="of:=[.D209]-[.D20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1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19074074074074" calcext:value-type="float">
            <text:p>0,00219074074074074000</text:p>
          </table:table-cell>
          <table:table-cell table:formula="of:=[.D210]-[.D209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1" office:value-type="float" office:value="19019" calcext:value-type="float">
            <text:p>1901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20127314814815" calcext:value-type="float">
            <text:p>0,00220127314814815000</text:p>
          </table:table-cell>
          <table:table-cell table:formula="of:=[.D211]-[.D21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1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21180555555556" calcext:value-type="float">
            <text:p>0,00221180555555556000</text:p>
          </table:table-cell>
          <table:table-cell table:formula="of:=[.D212]-[.D21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1" office:value-type="float" office:value="19201" calcext:value-type="float">
            <text:p>1920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22233796296296" calcext:value-type="float">
            <text:p>0,00222233796296296000</text:p>
          </table:table-cell>
          <table:table-cell table:formula="of:=[.D213]-[.D21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1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23287037037037" calcext:value-type="float">
            <text:p>0,00223287037037037000</text:p>
          </table:table-cell>
          <table:table-cell table:formula="of:=[.D214]-[.D21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1" office:value-type="float" office:value="19383" calcext:value-type="float">
            <text:p>1938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24340277777778" calcext:value-type="float">
            <text:p>0,00224340277777778000</text:p>
          </table:table-cell>
          <table:table-cell table:formula="of:=[.D215]-[.D21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1" office:value-type="float" office:value="19474" calcext:value-type="float">
            <text:p>1947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25393518518519" calcext:value-type="float">
            <text:p>0,00225393518518519000</text:p>
          </table:table-cell>
          <table:table-cell table:formula="of:=[.D216]-[.D21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1" office:value-type="float" office:value="19565" calcext:value-type="float">
            <text:p>1956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26446759259259" calcext:value-type="float">
            <text:p>0,00226446759259259000</text:p>
          </table:table-cell>
          <table:table-cell table:formula="of:=[.D217]-[.D21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1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275" calcext:value-type="float">
            <text:p>0,00227500000000000000</text:p>
          </table:table-cell>
          <table:table-cell table:formula="of:=[.D218]-[.D21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1" office:value-type="float" office:value="19747" calcext:value-type="float">
            <text:p>1974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28553240740741" calcext:value-type="float">
            <text:p>0,00228553240740741000</text:p>
          </table:table-cell>
          <table:table-cell table:formula="of:=[.D219]-[.D21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1" office:value-type="float" office:value="19838" calcext:value-type="float">
            <text:p>1983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29606481481482" calcext:value-type="float">
            <text:p>0,00229606481481482000</text:p>
          </table:table-cell>
          <table:table-cell table:formula="of:=[.D220]-[.D219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1" office:value-type="float" office:value="19929" calcext:value-type="float">
            <text:p>1992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30659722222222" calcext:value-type="float">
            <text:p>0,00230659722222222000</text:p>
          </table:table-cell>
          <table:table-cell table:formula="of:=[.D221]-[.D22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1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31712962962963" calcext:value-type="float">
            <text:p>0,00231712962962963000</text:p>
          </table:table-cell>
          <table:table-cell table:formula="of:=[.D222]-[.D22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1" office:value-type="float" office:value="20111" calcext:value-type="float">
            <text:p>2011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32766203703704" calcext:value-type="float">
            <text:p>0,00232766203703704000</text:p>
          </table:table-cell>
          <table:table-cell table:formula="of:=[.D223]-[.D22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1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33819444444444" calcext:value-type="float">
            <text:p>0,00233819444444444000</text:p>
          </table:table-cell>
          <table:table-cell table:formula="of:=[.D224]-[.D22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1" office:value-type="float" office:value="20293" calcext:value-type="float">
            <text:p>2029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34872685185185" calcext:value-type="float">
            <text:p>0,00234872685185185000</text:p>
          </table:table-cell>
          <table:table-cell table:formula="of:=[.D225]-[.D22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1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35925925925926" calcext:value-type="float">
            <text:p>0,00235925925925926000</text:p>
          </table:table-cell>
          <table:table-cell table:formula="of:=[.D226]-[.D22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1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36979166666667" calcext:value-type="float">
            <text:p>0,00236979166666667000</text:p>
          </table:table-cell>
          <table:table-cell table:formula="of:=[.D227]-[.D22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1" office:value-type="float" office:value="20566" calcext:value-type="float">
            <text:p>2056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38032407407407" calcext:value-type="float">
            <text:p>0,00238032407407407000</text:p>
          </table:table-cell>
          <table:table-cell table:formula="of:=[.D228]-[.D22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1" office:value-type="float" office:value="20657" calcext:value-type="float">
            <text:p>2065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39085648148148" calcext:value-type="float">
            <text:p>0,00239085648148148000</text:p>
          </table:table-cell>
          <table:table-cell table:formula="of:=[.D229]-[.D228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1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40138888888889" calcext:value-type="float">
            <text:p>0,00240138888888889000</text:p>
          </table:table-cell>
          <table:table-cell table:formula="of:=[.D230]-[.D229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1" office:value-type="float" office:value="20839" calcext:value-type="float">
            <text:p>2083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4119212962963" calcext:value-type="float">
            <text:p>0,00241192129629630000</text:p>
          </table:table-cell>
          <table:table-cell table:formula="of:=[.D231]-[.D23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1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4224537037037" calcext:value-type="float">
            <text:p>0,00242245370370370000</text:p>
          </table:table-cell>
          <table:table-cell table:formula="of:=[.D232]-[.D23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1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43298611111111" calcext:value-type="float">
            <text:p>0,00243298611111111000</text:p>
          </table:table-cell>
          <table:table-cell table:formula="of:=[.D233]-[.D23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1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44351851851852" calcext:value-type="float">
            <text:p>0,00244351851851852000</text:p>
          </table:table-cell>
          <table:table-cell table:formula="of:=[.D234]-[.D23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1" office:value-type="float" office:value="21203" calcext:value-type="float">
            <text:p>2120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45405092592593" calcext:value-type="float">
            <text:p>0,00245405092592593000</text:p>
          </table:table-cell>
          <table:table-cell table:formula="of:=[.D235]-[.D23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1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46458333333333" calcext:value-type="float">
            <text:p>0,00246458333333333000</text:p>
          </table:table-cell>
          <table:table-cell table:formula="of:=[.D236]-[.D23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1" office:value-type="float" office:value="21385" calcext:value-type="float">
            <text:p>2138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47511574074074" calcext:value-type="float">
            <text:p>0,00247511574074074000</text:p>
          </table:table-cell>
          <table:table-cell table:formula="of:=[.D237]-[.D23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1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48564814814815" calcext:value-type="float">
            <text:p>0,00248564814814815000</text:p>
          </table:table-cell>
          <table:table-cell table:formula="of:=[.D238]-[.D23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1" office:value-type="float" office:value="21567" calcext:value-type="float">
            <text:p>2156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49618055555556" calcext:value-type="float">
            <text:p>0,00249618055555556000</text:p>
          </table:table-cell>
          <table:table-cell table:formula="of:=[.D239]-[.D238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1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50671296296296" calcext:value-type="float">
            <text:p>0,00250671296296296000</text:p>
          </table:table-cell>
          <table:table-cell table:formula="of:=[.D240]-[.D23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1" office:value-type="float" office:value="21749" calcext:value-type="float">
            <text:p>2174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51724537037037" calcext:value-type="float">
            <text:p>0,00251724537037037000</text:p>
          </table:table-cell>
          <table:table-cell table:formula="of:=[.D241]-[.D24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1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52777777777778" calcext:value-type="float">
            <text:p>0,00252777777777778000</text:p>
          </table:table-cell>
          <table:table-cell table:formula="of:=[.D242]-[.D24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1" office:value-type="float" office:value="21931" calcext:value-type="float">
            <text:p>2193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53831018518519" calcext:value-type="float">
            <text:p>0,00253831018518519000</text:p>
          </table:table-cell>
          <table:table-cell table:formula="of:=[.D243]-[.D24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1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54884259259259" calcext:value-type="float">
            <text:p>0,00254884259259259000</text:p>
          </table:table-cell>
          <table:table-cell table:formula="of:=[.D244]-[.D24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1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559375" calcext:value-type="float">
            <text:p>0,00255937500000000000</text:p>
          </table:table-cell>
          <table:table-cell table:formula="of:=[.D245]-[.D24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1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56990740740741" calcext:value-type="float">
            <text:p>0,00256990740740741000</text:p>
          </table:table-cell>
          <table:table-cell table:formula="of:=[.D246]-[.D24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1" office:value-type="float" office:value="22295" calcext:value-type="float">
            <text:p>2229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58043981481482" calcext:value-type="float">
            <text:p>0,00258043981481482000</text:p>
          </table:table-cell>
          <table:table-cell table:formula="of:=[.D247]-[.D24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1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59097222222222" calcext:value-type="float">
            <text:p>0,00259097222222222000</text:p>
          </table:table-cell>
          <table:table-cell table:formula="of:=[.D248]-[.D24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1" office:value-type="float" office:value="22477" calcext:value-type="float">
            <text:p>2247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60150462962963" calcext:value-type="float">
            <text:p>0,00260150462962963000</text:p>
          </table:table-cell>
          <table:table-cell table:formula="of:=[.D249]-[.D248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1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61203703703704" calcext:value-type="float">
            <text:p>0,00261203703703704000</text:p>
          </table:table-cell>
          <table:table-cell table:formula="of:=[.D250]-[.D24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1" office:value-type="float" office:value="22659" calcext:value-type="float">
            <text:p>2265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62256944444444" calcext:value-type="float">
            <text:p>0,00262256944444444000</text:p>
          </table:table-cell>
          <table:table-cell table:formula="of:=[.D251]-[.D25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1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63310185185185" calcext:value-type="float">
            <text:p>0,00263310185185185000</text:p>
          </table:table-cell>
          <table:table-cell table:formula="of:=[.D252]-[.D25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1" office:value-type="float" office:value="22841" calcext:value-type="float">
            <text:p>2284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64363425925926" calcext:value-type="float">
            <text:p>0,00264363425925926000</text:p>
          </table:table-cell>
          <table:table-cell table:formula="of:=[.D253]-[.D25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1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65416666666667" calcext:value-type="float">
            <text:p>0,00265416666666667000</text:p>
          </table:table-cell>
          <table:table-cell table:formula="of:=[.D254]-[.D25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91" office:value-type="float" office:value="23023" calcext:value-type="float">
            <text:p>2302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66469907407407" calcext:value-type="float">
            <text:p>0,00266469907407407000</text:p>
          </table:table-cell>
          <table:table-cell table:formula="of:=[.D255]-[.D254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91" office:value-type="float" office:value="23114" calcext:value-type="float">
            <text:p>2311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67523148148148" calcext:value-type="float">
            <text:p>0,00267523148148148000</text:p>
          </table:table-cell>
          <table:table-cell table:formula="of:=[.D256]-[.D255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91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68576388888889" calcext:value-type="float">
            <text:p>0,00268576388888889000</text:p>
          </table:table-cell>
          <table:table-cell table:formula="of:=[.D257]-[.D256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91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6962962962963" calcext:value-type="float">
            <text:p>0,00269629629629630000</text:p>
          </table:table-cell>
          <table:table-cell table:formula="of:=[.D258]-[.D257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91" office:value-type="float" office:value="23387" calcext:value-type="float">
            <text:p>2338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7068287037037" calcext:value-type="float">
            <text:p>0,00270682870370370000</text:p>
          </table:table-cell>
          <table:table-cell table:formula="of:=[.D259]-[.D258]" office:value-type="float" office:value="0.000010532407407407" calcext:value-type="float">
            <text:p>0,00001053240740740700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91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71736111111111" calcext:value-type="float">
            <text:p>0,00271736111111111000</text:p>
          </table:table-cell>
          <table:table-cell table:formula="of:=[.D260]-[.D259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91" office:value-type="float" office:value="23569" calcext:value-type="float">
            <text:p>2356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72789351851852" calcext:value-type="float">
            <text:p>0,00272789351851852000</text:p>
          </table:table-cell>
          <table:table-cell table:formula="of:=[.D261]-[.D260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91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73842592592593" calcext:value-type="float">
            <text:p>0,00273842592592593000</text:p>
          </table:table-cell>
          <table:table-cell table:formula="of:=[.D262]-[.D261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91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74895833333333" calcext:value-type="float">
            <text:p>0,00274895833333333000</text:p>
          </table:table-cell>
          <table:table-cell table:formula="of:=[.D263]-[.D262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91" office:value-type="float" office:value="23842" calcext:value-type="float">
            <text:p>2384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75949074074074" calcext:value-type="float">
            <text:p>0,00275949074074074000</text:p>
          </table:table-cell>
          <table:table-cell table:formula="of:=[.D264]-[.D263]" office:value-type="float" office:value="0.0000105324074074075" calcext:value-type="float">
            <text:p>0,00001053240740740750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91" office:value-type="float" office:value="23933" calcext:value-type="float">
            <text:p>2393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77002314814815" calcext:value-type="float">
            <text:p>0,00277002314814815000</text:p>
          </table:table-cell>
          <table:table-cell table:formula="of:=#REF!-[.D264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3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25:41.698516471</meta:creation-date>
    <dc:date>2026-05-17T19:25:52.801408517</dc:date>
    <meta:editing-duration>PT12S</meta:editing-duration>
    <meta:editing-cycles>1</meta:editing-cycles>
    <meta:document-statistic meta:table-count="1" meta:cell-count="1320" meta:object-count="0"/>
    <meta:generator>LibreOffice/24.2.7.2$Linux_X86_64 LibreOffice_project/420$Build-2</meta:generator>
  </office:meta>
</office:document-meta>
</file>