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4.7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1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11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127314814814815" calcext:value-type="float">
            <text:p>0,00000127314814814815</text:p>
          </table:table-cell>
          <table:table-cell table:formula="of:=[.D3]-[.D2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11" office:value-type="float" office:value="22" calcext:value-type="float">
            <text:p>22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025462962962963" calcext:value-type="float">
            <text:p>0,00000254629629629630</text:p>
          </table:table-cell>
          <table:table-cell table:formula="of:=[.D4]-[.D3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11" office:value-type="float" office:value="33" calcext:value-type="float">
            <text:p>33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0381944444444444" calcext:value-type="float">
            <text:p>0,00000381944444444444</text:p>
          </table:table-cell>
          <table:table-cell table:formula="of:=[.D5]-[.D4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11" office:value-type="float" office:value="44" calcext:value-type="float">
            <text:p>44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0509259259259259" calcext:value-type="float">
            <text:p>0,00000509259259259259</text:p>
          </table:table-cell>
          <table:table-cell table:formula="of:=[.D6]-[.D5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11" office:value-type="float" office:value="55" calcext:value-type="float">
            <text:p>55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0636574074074074" calcext:value-type="float">
            <text:p>0,00000636574074074074</text:p>
          </table:table-cell>
          <table:table-cell table:formula="of:=[.D7]-[.D6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11" office:value-type="float" office:value="66" calcext:value-type="float">
            <text:p>66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0763888888888889" calcext:value-type="float">
            <text:p>0,00000763888888888889</text:p>
          </table:table-cell>
          <table:table-cell table:formula="of:=[.D8]-[.D7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11" office:value-type="float" office:value="77" calcext:value-type="float">
            <text:p>77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0891203703703704" calcext:value-type="float">
            <text:p>0,00000891203703703704</text:p>
          </table:table-cell>
          <table:table-cell table:formula="of:=[.D9]-[.D8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11" office:value-type="float" office:value="88" calcext:value-type="float">
            <text:p>88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101851851851852" calcext:value-type="float">
            <text:p>0,00001018518518518520</text:p>
          </table:table-cell>
          <table:table-cell table:formula="of:=[.D10]-[.D9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11" office:value-type="float" office:value="99" calcext:value-type="float">
            <text:p>99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114583333333333" calcext:value-type="float">
            <text:p>0,00001145833333333330</text:p>
          </table:table-cell>
          <table:table-cell table:formula="of:=[.D11]-[.D10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11" office:value-type="float" office:value="110" calcext:value-type="float">
            <text:p>11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127314814814815" calcext:value-type="float">
            <text:p>0,00001273148148148150</text:p>
          </table:table-cell>
          <table:table-cell table:formula="of:=[.D12]-[.D11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11" office:value-type="float" office:value="121" calcext:value-type="float">
            <text:p>121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140046296296296" calcext:value-type="float">
            <text:p>0,00001400462962962960</text:p>
          </table:table-cell>
          <table:table-cell table:formula="of:=[.D13]-[.D12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11" office:value-type="float" office:value="132" calcext:value-type="float">
            <text:p>132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152777777777778" calcext:value-type="float">
            <text:p>0,00001527777777777780</text:p>
          </table:table-cell>
          <table:table-cell table:formula="of:=[.D14]-[.D13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11" office:value-type="float" office:value="143" calcext:value-type="float">
            <text:p>143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165509259259259" calcext:value-type="float">
            <text:p>0,00001655092592592590</text:p>
          </table:table-cell>
          <table:table-cell table:formula="of:=[.D15]-[.D14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11" office:value-type="float" office:value="154" calcext:value-type="float">
            <text:p>154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178240740740741" calcext:value-type="float">
            <text:p>0,00001782407407407410</text:p>
          </table:table-cell>
          <table:table-cell table:formula="of:=[.D16]-[.D15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11" office:value-type="float" office:value="165" calcext:value-type="float">
            <text:p>165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0190972222222222" calcext:value-type="float">
            <text:p>0,00001909722222222220</text:p>
          </table:table-cell>
          <table:table-cell table:formula="of:=[.D17]-[.D16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11" office:value-type="float" office:value="176" calcext:value-type="float">
            <text:p>176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0203703703703704" calcext:value-type="float">
            <text:p>0,00002037037037037040</text:p>
          </table:table-cell>
          <table:table-cell table:formula="of:=[.D18]-[.D17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11" office:value-type="float" office:value="187" calcext:value-type="float">
            <text:p>187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0216435185185185" calcext:value-type="float">
            <text:p>0,00002164351851851850</text:p>
          </table:table-cell>
          <table:table-cell table:formula="of:=[.D19]-[.D18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11" office:value-type="float" office:value="198" calcext:value-type="float">
            <text:p>198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0229166666666667" calcext:value-type="float">
            <text:p>0,00002291666666666670</text:p>
          </table:table-cell>
          <table:table-cell table:formula="of:=[.D20]-[.D19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11" office:value-type="float" office:value="209" calcext:value-type="float">
            <text:p>209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0241898148148148" calcext:value-type="float">
            <text:p>0,00002418981481481480</text:p>
          </table:table-cell>
          <table:table-cell table:formula="of:=[.D21]-[.D20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11" office:value-type="float" office:value="220" calcext:value-type="float">
            <text:p>22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025462962962963" calcext:value-type="float">
            <text:p>0,00002546296296296300</text:p>
          </table:table-cell>
          <table:table-cell table:formula="of:=[.D22]-[.D21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11" office:value-type="float" office:value="231" calcext:value-type="float">
            <text:p>231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0267361111111111" calcext:value-type="float">
            <text:p>0,00002673611111111110</text:p>
          </table:table-cell>
          <table:table-cell table:formula="of:=[.D23]-[.D22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11" office:value-type="float" office:value="242" calcext:value-type="float">
            <text:p>242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0280092592592593" calcext:value-type="float">
            <text:p>0,00002800925925925930</text:p>
          </table:table-cell>
          <table:table-cell table:formula="of:=[.D24]-[.D23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11" office:value-type="float" office:value="253" calcext:value-type="float">
            <text:p>253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0292824074074074" calcext:value-type="float">
            <text:p>0,00002928240740740740</text:p>
          </table:table-cell>
          <table:table-cell table:formula="of:=[.D25]-[.D24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11" office:value-type="float" office:value="264" calcext:value-type="float">
            <text:p>264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0305555555555556" calcext:value-type="float">
            <text:p>0,00003055555555555560</text:p>
          </table:table-cell>
          <table:table-cell table:formula="of:=[.D26]-[.D25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11" office:value-type="float" office:value="275" calcext:value-type="float">
            <text:p>275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0318287037037037" calcext:value-type="float">
            <text:p>0,00003182870370370370</text:p>
          </table:table-cell>
          <table:table-cell table:formula="of:=[.D27]-[.D26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11" office:value-type="float" office:value="286" calcext:value-type="float">
            <text:p>286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0331018518518519" calcext:value-type="float">
            <text:p>0,00003310185185185190</text:p>
          </table:table-cell>
          <table:table-cell table:formula="of:=[.D28]-[.D27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11" office:value-type="float" office:value="297" calcext:value-type="float">
            <text:p>297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034375" calcext:value-type="float">
            <text:p>0,00003437500000000000</text:p>
          </table:table-cell>
          <table:table-cell table:formula="of:=[.D29]-[.D28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11" office:value-type="float" office:value="308" calcext:value-type="float">
            <text:p>308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0356481481481482" calcext:value-type="float">
            <text:p>0,00003564814814814820</text:p>
          </table:table-cell>
          <table:table-cell table:formula="of:=[.D30]-[.D29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11" office:value-type="float" office:value="319" calcext:value-type="float">
            <text:p>319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0369212962962963" calcext:value-type="float">
            <text:p>0,00003692129629629630</text:p>
          </table:table-cell>
          <table:table-cell table:formula="of:=[.D31]-[.D30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11" office:value-type="float" office:value="330" calcext:value-type="float">
            <text:p>33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0381944444444444" calcext:value-type="float">
            <text:p>0,00003819444444444450</text:p>
          </table:table-cell>
          <table:table-cell table:formula="of:=[.D32]-[.D31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11" office:value-type="float" office:value="341" calcext:value-type="float">
            <text:p>341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0394675925925926" calcext:value-type="float">
            <text:p>0,00003946759259259260</text:p>
          </table:table-cell>
          <table:table-cell table:formula="of:=[.D33]-[.D32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11" office:value-type="float" office:value="352" calcext:value-type="float">
            <text:p>352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0407407407407407" calcext:value-type="float">
            <text:p>0,00004074074074074070</text:p>
          </table:table-cell>
          <table:table-cell table:formula="of:=[.D34]-[.D33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11" office:value-type="float" office:value="363" calcext:value-type="float">
            <text:p>363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0420138888888889" calcext:value-type="float">
            <text:p>0,00004201388888888890</text:p>
          </table:table-cell>
          <table:table-cell table:formula="of:=[.D35]-[.D34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11" office:value-type="float" office:value="374" calcext:value-type="float">
            <text:p>374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043287037037037" calcext:value-type="float">
            <text:p>0,00004328703703703700</text:p>
          </table:table-cell>
          <table:table-cell table:formula="of:=[.D36]-[.D35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11" office:value-type="float" office:value="385" calcext:value-type="float">
            <text:p>385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0445601851851852" calcext:value-type="float">
            <text:p>0,00004456018518518520</text:p>
          </table:table-cell>
          <table:table-cell table:formula="of:=[.D37]-[.D36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11" office:value-type="float" office:value="396" calcext:value-type="float">
            <text:p>396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0458333333333333" calcext:value-type="float">
            <text:p>0,00004583333333333330</text:p>
          </table:table-cell>
          <table:table-cell table:formula="of:=[.D38]-[.D37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11" office:value-type="float" office:value="407" calcext:value-type="float">
            <text:p>407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0471064814814815" calcext:value-type="float">
            <text:p>0,00004710648148148150</text:p>
          </table:table-cell>
          <table:table-cell table:formula="of:=[.D39]-[.D38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11" office:value-type="float" office:value="418" calcext:value-type="float">
            <text:p>418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0483796296296296" calcext:value-type="float">
            <text:p>0,00004837962962962960</text:p>
          </table:table-cell>
          <table:table-cell table:formula="of:=[.D40]-[.D39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11" office:value-type="float" office:value="429" calcext:value-type="float">
            <text:p>429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0496527777777778" calcext:value-type="float">
            <text:p>0,00004965277777777780</text:p>
          </table:table-cell>
          <table:table-cell table:formula="of:=[.D41]-[.D40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11" office:value-type="float" office:value="440" calcext:value-type="float">
            <text:p>44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0509259259259259" calcext:value-type="float">
            <text:p>0,00005092592592592590</text:p>
          </table:table-cell>
          <table:table-cell table:formula="of:=[.D42]-[.D41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11" office:value-type="float" office:value="451" calcext:value-type="float">
            <text:p>451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0521990740740741" calcext:value-type="float">
            <text:p>0,00005219907407407410</text:p>
          </table:table-cell>
          <table:table-cell table:formula="of:=[.D43]-[.D42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11" office:value-type="float" office:value="462" calcext:value-type="float">
            <text:p>462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0534722222222222" calcext:value-type="float">
            <text:p>0,00005347222222222220</text:p>
          </table:table-cell>
          <table:table-cell table:formula="of:=[.D44]-[.D43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11" office:value-type="float" office:value="473" calcext:value-type="float">
            <text:p>473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0547453703703704" calcext:value-type="float">
            <text:p>0,00005474537037037040</text:p>
          </table:table-cell>
          <table:table-cell table:formula="of:=[.D45]-[.D44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11" office:value-type="float" office:value="484" calcext:value-type="float">
            <text:p>484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0560185185185185" calcext:value-type="float">
            <text:p>0,00005601851851851850</text:p>
          </table:table-cell>
          <table:table-cell table:formula="of:=[.D46]-[.D45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11" office:value-type="float" office:value="495" calcext:value-type="float">
            <text:p>495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0572916666666667" calcext:value-type="float">
            <text:p>0,00005729166666666670</text:p>
          </table:table-cell>
          <table:table-cell table:formula="of:=[.D47]-[.D46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11" office:value-type="float" office:value="506" calcext:value-type="float">
            <text:p>506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0585648148148148" calcext:value-type="float">
            <text:p>0,00005856481481481480</text:p>
          </table:table-cell>
          <table:table-cell table:formula="of:=[.D48]-[.D47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11" office:value-type="float" office:value="517" calcext:value-type="float">
            <text:p>517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059837962962963" calcext:value-type="float">
            <text:p>0,00005983796296296300</text:p>
          </table:table-cell>
          <table:table-cell table:formula="of:=[.D49]-[.D48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11" office:value-type="float" office:value="528" calcext:value-type="float">
            <text:p>528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0611111111111111" calcext:value-type="float">
            <text:p>0,00006111111111111110</text:p>
          </table:table-cell>
          <table:table-cell table:formula="of:=[.D50]-[.D49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11" office:value-type="float" office:value="539" calcext:value-type="float">
            <text:p>539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0623842592592593" calcext:value-type="float">
            <text:p>0,00006238425925925930</text:p>
          </table:table-cell>
          <table:table-cell table:formula="of:=[.D51]-[.D5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11" office:value-type="float" office:value="550" calcext:value-type="float">
            <text:p>55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0636574074074074" calcext:value-type="float">
            <text:p>0,00006365740740740740</text:p>
          </table:table-cell>
          <table:table-cell table:formula="of:=[.D52]-[.D51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11" office:value-type="float" office:value="561" calcext:value-type="float">
            <text:p>561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0649305555555556" calcext:value-type="float">
            <text:p>0,00006493055555555560</text:p>
          </table:table-cell>
          <table:table-cell table:formula="of:=[.D53]-[.D52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11" office:value-type="float" office:value="572" calcext:value-type="float">
            <text:p>572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0662037037037037" calcext:value-type="float">
            <text:p>0,00006620370370370370</text:p>
          </table:table-cell>
          <table:table-cell table:formula="of:=[.D54]-[.D5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11" office:value-type="float" office:value="583" calcext:value-type="float">
            <text:p>583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0674768518518519" calcext:value-type="float">
            <text:p>0,00006747685185185190</text:p>
          </table:table-cell>
          <table:table-cell table:formula="of:=[.D55]-[.D54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11" office:value-type="float" office:value="594" calcext:value-type="float">
            <text:p>594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06875" calcext:value-type="float">
            <text:p>0,00006875000000000000</text:p>
          </table:table-cell>
          <table:table-cell table:formula="of:=[.D56]-[.D5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11" office:value-type="float" office:value="605" calcext:value-type="float">
            <text:p>605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0700231481481481" calcext:value-type="float">
            <text:p>0,00007002314814814810</text:p>
          </table:table-cell>
          <table:table-cell table:formula="of:=[.D57]-[.D56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11" office:value-type="float" office:value="616" calcext:value-type="float">
            <text:p>616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0712962962962963" calcext:value-type="float">
            <text:p>0,00007129629629629630</text:p>
          </table:table-cell>
          <table:table-cell table:formula="of:=[.D58]-[.D5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11" office:value-type="float" office:value="627" calcext:value-type="float">
            <text:p>627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0725694444444444" calcext:value-type="float">
            <text:p>0,00007256944444444440</text:p>
          </table:table-cell>
          <table:table-cell table:formula="of:=[.D59]-[.D58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11" office:value-type="float" office:value="638" calcext:value-type="float">
            <text:p>638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0738425925925926" calcext:value-type="float">
            <text:p>0,00007384259259259260</text:p>
          </table:table-cell>
          <table:table-cell table:formula="of:=[.D60]-[.D59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11" office:value-type="float" office:value="649" calcext:value-type="float">
            <text:p>649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0751157407407408" calcext:value-type="float">
            <text:p>0,00007511574074074080</text:p>
          </table:table-cell>
          <table:table-cell table:formula="of:=[.D61]-[.D6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11" office:value-type="float" office:value="660" calcext:value-type="float">
            <text:p>66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0763888888888889" calcext:value-type="float">
            <text:p>0,00007638888888888890</text:p>
          </table:table-cell>
          <table:table-cell table:formula="of:=[.D62]-[.D61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11" office:value-type="float" office:value="671" calcext:value-type="float">
            <text:p>671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077662037037037" calcext:value-type="float">
            <text:p>0,00007766203703703700</text:p>
          </table:table-cell>
          <table:table-cell table:formula="of:=[.D63]-[.D6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11" office:value-type="float" office:value="682" calcext:value-type="float">
            <text:p>682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0789351851851852" calcext:value-type="float">
            <text:p>0,00007893518518518520</text:p>
          </table:table-cell>
          <table:table-cell table:formula="of:=[.D64]-[.D63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11" office:value-type="float" office:value="693" calcext:value-type="float">
            <text:p>693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0802083333333333" calcext:value-type="float">
            <text:p>0,00008020833333333330</text:p>
          </table:table-cell>
          <table:table-cell table:formula="of:=[.D65]-[.D6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11" office:value-type="float" office:value="704" calcext:value-type="float">
            <text:p>704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0814814814814815" calcext:value-type="float">
            <text:p>0,00008148148148148150</text:p>
          </table:table-cell>
          <table:table-cell table:formula="of:=[.D66]-[.D65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11" office:value-type="float" office:value="715" calcext:value-type="float">
            <text:p>715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0827546296296296" calcext:value-type="float">
            <text:p>0,00008275462962962960</text:p>
          </table:table-cell>
          <table:table-cell table:formula="of:=[.D67]-[.D66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11" office:value-type="float" office:value="726" calcext:value-type="float">
            <text:p>726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0840277777777778" calcext:value-type="float">
            <text:p>0,00008402777777777780</text:p>
          </table:table-cell>
          <table:table-cell table:formula="of:=[.D68]-[.D6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11" office:value-type="float" office:value="737" calcext:value-type="float">
            <text:p>737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0853009259259259" calcext:value-type="float">
            <text:p>0,00008530092592592590</text:p>
          </table:table-cell>
          <table:table-cell table:formula="of:=[.D69]-[.D68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11" office:value-type="float" office:value="748" calcext:value-type="float">
            <text:p>748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0865740740740741" calcext:value-type="float">
            <text:p>0,00008657407407407410</text:p>
          </table:table-cell>
          <table:table-cell table:formula="of:=[.D70]-[.D6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11" office:value-type="float" office:value="759" calcext:value-type="float">
            <text:p>759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0878472222222222" calcext:value-type="float">
            <text:p>0,00008784722222222220</text:p>
          </table:table-cell>
          <table:table-cell table:formula="of:=[.D71]-[.D70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11" office:value-type="float" office:value="770" calcext:value-type="float">
            <text:p>77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0891203703703704" calcext:value-type="float">
            <text:p>0,00008912037037037040</text:p>
          </table:table-cell>
          <table:table-cell table:formula="of:=[.D72]-[.D7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11" office:value-type="float" office:value="781" calcext:value-type="float">
            <text:p>781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0903935185185185" calcext:value-type="float">
            <text:p>0,00009039351851851850</text:p>
          </table:table-cell>
          <table:table-cell table:formula="of:=[.D73]-[.D72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11" office:value-type="float" office:value="792" calcext:value-type="float">
            <text:p>792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0916666666666667" calcext:value-type="float">
            <text:p>0,00009166666666666670</text:p>
          </table:table-cell>
          <table:table-cell table:formula="of:=[.D74]-[.D7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11" office:value-type="float" office:value="803" calcext:value-type="float">
            <text:p>803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0929398148148148" calcext:value-type="float">
            <text:p>0,00009293981481481480</text:p>
          </table:table-cell>
          <table:table-cell table:formula="of:=[.D75]-[.D74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11" office:value-type="float" office:value="814" calcext:value-type="float">
            <text:p>814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094212962962963" calcext:value-type="float">
            <text:p>0,00009421296296296300</text:p>
          </table:table-cell>
          <table:table-cell table:formula="of:=[.D76]-[.D75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11" office:value-type="float" office:value="825" calcext:value-type="float">
            <text:p>825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0954861111111111" calcext:value-type="float">
            <text:p>0,00009548611111111110</text:p>
          </table:table-cell>
          <table:table-cell table:formula="of:=[.D77]-[.D7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11" office:value-type="float" office:value="836" calcext:value-type="float">
            <text:p>836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0967592592592593" calcext:value-type="float">
            <text:p>0,00009675925925925930</text:p>
          </table:table-cell>
          <table:table-cell table:formula="of:=[.D78]-[.D77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11" office:value-type="float" office:value="847" calcext:value-type="float">
            <text:p>847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0980324074074074" calcext:value-type="float">
            <text:p>0,00009803240740740740</text:p>
          </table:table-cell>
          <table:table-cell table:formula="of:=[.D79]-[.D7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11" office:value-type="float" office:value="858" calcext:value-type="float">
            <text:p>858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0993055555555556" calcext:value-type="float">
            <text:p>0,00009930555555555560</text:p>
          </table:table-cell>
          <table:table-cell table:formula="of:=[.D80]-[.D79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11" office:value-type="float" office:value="869" calcext:value-type="float">
            <text:p>869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100578703703704" calcext:value-type="float">
            <text:p>0,00010057870370370400</text:p>
          </table:table-cell>
          <table:table-cell table:formula="of:=[.D81]-[.D8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11" office:value-type="float" office:value="880" calcext:value-type="float">
            <text:p>88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101851851851852" calcext:value-type="float">
            <text:p>0,00010185185185185200</text:p>
          </table:table-cell>
          <table:table-cell table:formula="of:=[.D82]-[.D81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11" office:value-type="float" office:value="891" calcext:value-type="float">
            <text:p>891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103125" calcext:value-type="float">
            <text:p>0,00010312500000000000</text:p>
          </table:table-cell>
          <table:table-cell table:formula="of:=[.D83]-[.D82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11" office:value-type="float" office:value="902" calcext:value-type="float">
            <text:p>902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104398148148148" calcext:value-type="float">
            <text:p>0,00010439814814814800</text:p>
          </table:table-cell>
          <table:table-cell table:formula="of:=[.D84]-[.D8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11" office:value-type="float" office:value="913" calcext:value-type="float">
            <text:p>913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105671296296296" calcext:value-type="float">
            <text:p>0,00010567129629629600</text:p>
          </table:table-cell>
          <table:table-cell table:formula="of:=[.D85]-[.D84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11" office:value-type="float" office:value="924" calcext:value-type="float">
            <text:p>924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106944444444444" calcext:value-type="float">
            <text:p>0,00010694444444444400</text:p>
          </table:table-cell>
          <table:table-cell table:formula="of:=[.D86]-[.D8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11" office:value-type="float" office:value="935" calcext:value-type="float">
            <text:p>935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108217592592593" calcext:value-type="float">
            <text:p>0,00010821759259259300</text:p>
          </table:table-cell>
          <table:table-cell table:formula="of:=[.D87]-[.D86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11" office:value-type="float" office:value="946" calcext:value-type="float">
            <text:p>946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109490740740741" calcext:value-type="float">
            <text:p>0,00010949074074074100</text:p>
          </table:table-cell>
          <table:table-cell table:formula="of:=[.D88]-[.D8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11" office:value-type="float" office:value="957" calcext:value-type="float">
            <text:p>957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110763888888889" calcext:value-type="float">
            <text:p>0,00011076388888888900</text:p>
          </table:table-cell>
          <table:table-cell table:formula="of:=[.D89]-[.D88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11" office:value-type="float" office:value="968" calcext:value-type="float">
            <text:p>968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112037037037037" calcext:value-type="float">
            <text:p>0,00011203703703703700</text:p>
          </table:table-cell>
          <table:table-cell table:formula="of:=[.D90]-[.D89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11" office:value-type="float" office:value="979" calcext:value-type="float">
            <text:p>979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113310185185185" calcext:value-type="float">
            <text:p>0,00011331018518518500</text:p>
          </table:table-cell>
          <table:table-cell table:formula="of:=[.D91]-[.D9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11" office:value-type="float" office:value="990" calcext:value-type="float">
            <text:p>99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114583333333333" calcext:value-type="float">
            <text:p>0,00011458333333333300</text:p>
          </table:table-cell>
          <table:table-cell table:formula="of:=[.D92]-[.D91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11" office:value-type="float" office:value="1001" calcext:value-type="float">
            <text:p>1001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115856481481481" calcext:value-type="float">
            <text:p>0,00011585648148148100</text:p>
          </table:table-cell>
          <table:table-cell table:formula="of:=[.D93]-[.D9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11" office:value-type="float" office:value="1012" calcext:value-type="float">
            <text:p>1012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11712962962963" calcext:value-type="float">
            <text:p>0,00011712962962963000</text:p>
          </table:table-cell>
          <table:table-cell table:formula="of:=[.D94]-[.D93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11" office:value-type="float" office:value="1023" calcext:value-type="float">
            <text:p>1023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118402777777778" calcext:value-type="float">
            <text:p>0,00011840277777777800</text:p>
          </table:table-cell>
          <table:table-cell table:formula="of:=[.D95]-[.D9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11" office:value-type="float" office:value="1034" calcext:value-type="float">
            <text:p>1034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119675925925926" calcext:value-type="float">
            <text:p>0,00011967592592592600</text:p>
          </table:table-cell>
          <table:table-cell table:formula="of:=[.D96]-[.D95]" office:value-type="float" office:value="0.00000127314814814815" calcext:value-type="float">
            <text:p>0,0000012731481481481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11" office:value-type="float" office:value="1045" calcext:value-type="float">
            <text:p>1045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120949074074074" calcext:value-type="float">
            <text:p>0,00012094907407407400</text:p>
          </table:table-cell>
          <table:table-cell table:formula="of:=[.D97]-[.D9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11" office:value-type="float" office:value="1056" calcext:value-type="float">
            <text:p>1056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122222222222222" calcext:value-type="float">
            <text:p>0,00012222222222222200</text:p>
          </table:table-cell>
          <table:table-cell table:formula="of:=[.D98]-[.D97]" office:value-type="float" office:value="0.00000127314814814817" calcext:value-type="float">
            <text:p>0,0000012731481481481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11" office:value-type="float" office:value="1067" calcext:value-type="float">
            <text:p>1067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12349537037037" calcext:value-type="float">
            <text:p>0,00012349537037037000</text:p>
          </table:table-cell>
          <table:table-cell table:formula="of:=[.D99]-[.D9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11" office:value-type="float" office:value="1078" calcext:value-type="float">
            <text:p>1078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124768518518519" calcext:value-type="float">
            <text:p>0,00012476851851851900</text:p>
          </table:table-cell>
          <table:table-cell table:formula="of:=[.D100]-[.D9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11" office:value-type="float" office:value="1089" calcext:value-type="float">
            <text:p>1089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126041666666667" calcext:value-type="float">
            <text:p>0,00012604166666666700</text:p>
          </table:table-cell>
          <table:table-cell table:formula="of:=[.D101]-[.D10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11" office:value-type="float" office:value="1100" calcext:value-type="float">
            <text:p>11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127314814814815" calcext:value-type="float">
            <text:p>0,00012731481481481500</text:p>
          </table:table-cell>
          <table:table-cell table:formula="of:=[.D102]-[.D101]" office:value-type="float" office:value="0.00000127314814814817" calcext:value-type="float">
            <text:p>0,0000012731481481481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11" office:value-type="float" office:value="1111" calcext:value-type="float">
            <text:p>1111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128587962962963" calcext:value-type="float">
            <text:p>0,00012858796296296300</text:p>
          </table:table-cell>
          <table:table-cell table:formula="of:=[.D103]-[.D10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11" office:value-type="float" office:value="1122" calcext:value-type="float">
            <text:p>1122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129861111111111" calcext:value-type="float">
            <text:p>0,00012986111111111100</text:p>
          </table:table-cell>
          <table:table-cell table:formula="of:=[.D104]-[.D10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11" office:value-type="float" office:value="1133" calcext:value-type="float">
            <text:p>1133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131134259259259" calcext:value-type="float">
            <text:p>0,00013113425925925900</text:p>
          </table:table-cell>
          <table:table-cell table:formula="of:=[.D105]-[.D104]" office:value-type="float" office:value="0.00000127314814814817" calcext:value-type="float">
            <text:p>0,0000012731481481481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11" office:value-type="float" office:value="1144" calcext:value-type="float">
            <text:p>1144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132407407407407" calcext:value-type="float">
            <text:p>0,00013240740740740700</text:p>
          </table:table-cell>
          <table:table-cell table:formula="of:=[.D106]-[.D10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11" office:value-type="float" office:value="1155" calcext:value-type="float">
            <text:p>1155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133680555555556" calcext:value-type="float">
            <text:p>0,00013368055555555600</text:p>
          </table:table-cell>
          <table:table-cell table:formula="of:=[.D107]-[.D10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11" office:value-type="float" office:value="1166" calcext:value-type="float">
            <text:p>1166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134953703703704" calcext:value-type="float">
            <text:p>0,00013495370370370400</text:p>
          </table:table-cell>
          <table:table-cell table:formula="of:=[.D108]-[.D10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11" office:value-type="float" office:value="1177" calcext:value-type="float">
            <text:p>1177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136226851851852" calcext:value-type="float">
            <text:p>0,00013622685185185200</text:p>
          </table:table-cell>
          <table:table-cell table:formula="of:=[.D109]-[.D108]" office:value-type="float" office:value="0.00000127314814814817" calcext:value-type="float">
            <text:p>0,0000012731481481481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11" office:value-type="float" office:value="1188" calcext:value-type="float">
            <text:p>1188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1375" calcext:value-type="float">
            <text:p>0,00013750000000000000</text:p>
          </table:table-cell>
          <table:table-cell table:formula="of:=[.D110]-[.D10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11" office:value-type="float" office:value="1199" calcext:value-type="float">
            <text:p>1199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138773148148148" calcext:value-type="float">
            <text:p>0,00013877314814814800</text:p>
          </table:table-cell>
          <table:table-cell table:formula="of:=[.D111]-[.D11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11" office:value-type="float" office:value="1210" calcext:value-type="float">
            <text:p>121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140046296296296" calcext:value-type="float">
            <text:p>0,00014004629629629600</text:p>
          </table:table-cell>
          <table:table-cell table:formula="of:=[.D112]-[.D111]" office:value-type="float" office:value="0.00000127314814814817" calcext:value-type="float">
            <text:p>0,0000012731481481481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11" office:value-type="float" office:value="1221" calcext:value-type="float">
            <text:p>1221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141319444444444" calcext:value-type="float">
            <text:p>0,00014131944444444400</text:p>
          </table:table-cell>
          <table:table-cell table:formula="of:=[.D113]-[.D11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11" office:value-type="float" office:value="1232" calcext:value-type="float">
            <text:p>1232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142592592592593" calcext:value-type="float">
            <text:p>0,00014259259259259300</text:p>
          </table:table-cell>
          <table:table-cell table:formula="of:=[.D114]-[.D11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11" office:value-type="float" office:value="1243" calcext:value-type="float">
            <text:p>1243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143865740740741" calcext:value-type="float">
            <text:p>0,00014386574074074100</text:p>
          </table:table-cell>
          <table:table-cell table:formula="of:=[.D115]-[.D11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11" office:value-type="float" office:value="1254" calcext:value-type="float">
            <text:p>1254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145138888888889" calcext:value-type="float">
            <text:p>0,00014513888888888900</text:p>
          </table:table-cell>
          <table:table-cell table:formula="of:=[.D116]-[.D115]" office:value-type="float" office:value="0.00000127314814814817" calcext:value-type="float">
            <text:p>0,0000012731481481481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11" office:value-type="float" office:value="1265" calcext:value-type="float">
            <text:p>1265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146412037037037" calcext:value-type="float">
            <text:p>0,00014641203703703700</text:p>
          </table:table-cell>
          <table:table-cell table:formula="of:=[.D117]-[.D11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11" office:value-type="float" office:value="1276" calcext:value-type="float">
            <text:p>1276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147685185185185" calcext:value-type="float">
            <text:p>0,00014768518518518500</text:p>
          </table:table-cell>
          <table:table-cell table:formula="of:=[.D118]-[.D11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11" office:value-type="float" office:value="1287" calcext:value-type="float">
            <text:p>1287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148958333333333" calcext:value-type="float">
            <text:p>0,00014895833333333300</text:p>
          </table:table-cell>
          <table:table-cell table:formula="of:=[.D119]-[.D118]" office:value-type="float" office:value="0.00000127314814814817" calcext:value-type="float">
            <text:p>0,000001273148148148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11" office:value-type="float" office:value="1298" calcext:value-type="float">
            <text:p>1298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150231481481482" calcext:value-type="float">
            <text:p>0,00015023148148148200</text:p>
          </table:table-cell>
          <table:table-cell table:formula="of:=[.D120]-[.D11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11" office:value-type="float" office:value="1309" calcext:value-type="float">
            <text:p>1309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15150462962963" calcext:value-type="float">
            <text:p>0,00015150462962963000</text:p>
          </table:table-cell>
          <table:table-cell table:formula="of:=[.D121]-[.D12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11" office:value-type="float" office:value="1320" calcext:value-type="float">
            <text:p>132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152777777777778" calcext:value-type="float">
            <text:p>0,00015277777777777800</text:p>
          </table:table-cell>
          <table:table-cell table:formula="of:=[.D122]-[.D12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11" office:value-type="float" office:value="1331" calcext:value-type="float">
            <text:p>1331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154050925925926" calcext:value-type="float">
            <text:p>0,00015405092592592600</text:p>
          </table:table-cell>
          <table:table-cell table:formula="of:=[.D123]-[.D122]" office:value-type="float" office:value="0.00000127314814814817" calcext:value-type="float">
            <text:p>0,0000012731481481481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11" office:value-type="float" office:value="1342" calcext:value-type="float">
            <text:p>1342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155324074074074" calcext:value-type="float">
            <text:p>0,00015532407407407400</text:p>
          </table:table-cell>
          <table:table-cell table:formula="of:=[.D124]-[.D12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11" office:value-type="float" office:value="1353" calcext:value-type="float">
            <text:p>1353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156597222222222" calcext:value-type="float">
            <text:p>0,00015659722222222200</text:p>
          </table:table-cell>
          <table:table-cell table:formula="of:=[.D125]-[.D12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11" office:value-type="float" office:value="1364" calcext:value-type="float">
            <text:p>1364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15787037037037" calcext:value-type="float">
            <text:p>0,00015787037037037000</text:p>
          </table:table-cell>
          <table:table-cell table:formula="of:=[.D126]-[.D125]" office:value-type="float" office:value="0.00000127314814814817" calcext:value-type="float">
            <text:p>0,0000012731481481481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11" office:value-type="float" office:value="1375" calcext:value-type="float">
            <text:p>1375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159143518518519" calcext:value-type="float">
            <text:p>0,00015914351851851900</text:p>
          </table:table-cell>
          <table:table-cell table:formula="of:=[.D127]-[.D12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11" office:value-type="float" office:value="1386" calcext:value-type="float">
            <text:p>1386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160416666666667" calcext:value-type="float">
            <text:p>0,00016041666666666700</text:p>
          </table:table-cell>
          <table:table-cell table:formula="of:=[.D128]-[.D12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11" office:value-type="float" office:value="1397" calcext:value-type="float">
            <text:p>1397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161689814814815" calcext:value-type="float">
            <text:p>0,00016168981481481500</text:p>
          </table:table-cell>
          <table:table-cell table:formula="of:=[.D129]-[.D12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11" office:value-type="float" office:value="1408" calcext:value-type="float">
            <text:p>1408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162962962962963" calcext:value-type="float">
            <text:p>0,00016296296296296300</text:p>
          </table:table-cell>
          <table:table-cell table:formula="of:=[.D130]-[.D129]" office:value-type="float" office:value="0.00000127314814814817" calcext:value-type="float">
            <text:p>0,0000012731481481481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11" office:value-type="float" office:value="1419" calcext:value-type="float">
            <text:p>1419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164236111111111" calcext:value-type="float">
            <text:p>0,00016423611111111100</text:p>
          </table:table-cell>
          <table:table-cell table:formula="of:=[.D131]-[.D13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11" office:value-type="float" office:value="1430" calcext:value-type="float">
            <text:p>143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165509259259259" calcext:value-type="float">
            <text:p>0,00016550925925925900</text:p>
          </table:table-cell>
          <table:table-cell table:formula="of:=[.D132]-[.D13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11" office:value-type="float" office:value="1441" calcext:value-type="float">
            <text:p>1441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166782407407407" calcext:value-type="float">
            <text:p>0,00016678240740740700</text:p>
          </table:table-cell>
          <table:table-cell table:formula="of:=[.D133]-[.D132]" office:value-type="float" office:value="0.00000127314814814817" calcext:value-type="float">
            <text:p>0,0000012731481481481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11" office:value-type="float" office:value="1452" calcext:value-type="float">
            <text:p>1452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168055555555556" calcext:value-type="float">
            <text:p>0,00016805555555555600</text:p>
          </table:table-cell>
          <table:table-cell table:formula="of:=[.D134]-[.D13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11" office:value-type="float" office:value="1463" calcext:value-type="float">
            <text:p>1463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169328703703704" calcext:value-type="float">
            <text:p>0,00016932870370370400</text:p>
          </table:table-cell>
          <table:table-cell table:formula="of:=[.D135]-[.D13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11" office:value-type="float" office:value="1474" calcext:value-type="float">
            <text:p>1474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170601851851852" calcext:value-type="float">
            <text:p>0,00017060185185185200</text:p>
          </table:table-cell>
          <table:table-cell table:formula="of:=[.D136]-[.D13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11" office:value-type="float" office:value="1485" calcext:value-type="float">
            <text:p>1485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171875" calcext:value-type="float">
            <text:p>0,00017187500000000000</text:p>
          </table:table-cell>
          <table:table-cell table:formula="of:=[.D137]-[.D136]" office:value-type="float" office:value="0.00000127314814814817" calcext:value-type="float">
            <text:p>0,0000012731481481481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11" office:value-type="float" office:value="1496" calcext:value-type="float">
            <text:p>1496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173148148148148" calcext:value-type="float">
            <text:p>0,00017314814814814800</text:p>
          </table:table-cell>
          <table:table-cell table:formula="of:=[.D138]-[.D13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11" office:value-type="float" office:value="1507" calcext:value-type="float">
            <text:p>1507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174421296296296" calcext:value-type="float">
            <text:p>0,00017442129629629600</text:p>
          </table:table-cell>
          <table:table-cell table:formula="of:=[.D139]-[.D13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11" office:value-type="float" office:value="1518" calcext:value-type="float">
            <text:p>1518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175694444444444" calcext:value-type="float">
            <text:p>0,00017569444444444400</text:p>
          </table:table-cell>
          <table:table-cell table:formula="of:=[.D140]-[.D139]" office:value-type="float" office:value="0.00000127314814814817" calcext:value-type="float">
            <text:p>0,0000012731481481481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11" office:value-type="float" office:value="1529" calcext:value-type="float">
            <text:p>1529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176967592592593" calcext:value-type="float">
            <text:p>0,00017696759259259300</text:p>
          </table:table-cell>
          <table:table-cell table:formula="of:=[.D141]-[.D14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11" office:value-type="float" office:value="1540" calcext:value-type="float">
            <text:p>154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178240740740741" calcext:value-type="float">
            <text:p>0,00017824074074074100</text:p>
          </table:table-cell>
          <table:table-cell table:formula="of:=[.D142]-[.D14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11" office:value-type="float" office:value="1551" calcext:value-type="float">
            <text:p>1551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179513888888889" calcext:value-type="float">
            <text:p>0,00017951388888888900</text:p>
          </table:table-cell>
          <table:table-cell table:formula="of:=[.D143]-[.D14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11" office:value-type="float" office:value="1562" calcext:value-type="float">
            <text:p>1562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180787037037037" calcext:value-type="float">
            <text:p>0,00018078703703703700</text:p>
          </table:table-cell>
          <table:table-cell table:formula="of:=[.D144]-[.D143]" office:value-type="float" office:value="0.00000127314814814817" calcext:value-type="float">
            <text:p>0,0000012731481481481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11" office:value-type="float" office:value="1573" calcext:value-type="float">
            <text:p>1573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182060185185185" calcext:value-type="float">
            <text:p>0,00018206018518518500</text:p>
          </table:table-cell>
          <table:table-cell table:formula="of:=[.D145]-[.D14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11" office:value-type="float" office:value="1584" calcext:value-type="float">
            <text:p>1584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183333333333333" calcext:value-type="float">
            <text:p>0,00018333333333333300</text:p>
          </table:table-cell>
          <table:table-cell table:formula="of:=[.D146]-[.D14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11" office:value-type="float" office:value="1595" calcext:value-type="float">
            <text:p>1595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184606481481481" calcext:value-type="float">
            <text:p>0,00018460648148148100</text:p>
          </table:table-cell>
          <table:table-cell table:formula="of:=[.D147]-[.D14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11" office:value-type="float" office:value="1606" calcext:value-type="float">
            <text:p>1606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18587962962963" calcext:value-type="float">
            <text:p>0,00018587962962963000</text:p>
          </table:table-cell>
          <table:table-cell table:formula="of:=[.D148]-[.D147]" office:value-type="float" office:value="0.00000127314814814817" calcext:value-type="float">
            <text:p>0,0000012731481481481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11" office:value-type="float" office:value="1617" calcext:value-type="float">
            <text:p>1617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187152777777778" calcext:value-type="float">
            <text:p>0,00018715277777777800</text:p>
          </table:table-cell>
          <table:table-cell table:formula="of:=[.D149]-[.D14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11" office:value-type="float" office:value="1628" calcext:value-type="float">
            <text:p>1628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188425925925926" calcext:value-type="float">
            <text:p>0,00018842592592592600</text:p>
          </table:table-cell>
          <table:table-cell table:formula="of:=[.D150]-[.D14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11" office:value-type="float" office:value="1639" calcext:value-type="float">
            <text:p>1639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0189699074074074" calcext:value-type="float">
            <text:p>0,00018969907407407400</text:p>
          </table:table-cell>
          <table:table-cell table:formula="of:=[.D151]-[.D150]" office:value-type="float" office:value="0.00000127314814814817" calcext:value-type="float">
            <text:p>0,000001273148148148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11" office:value-type="float" office:value="1650" calcext:value-type="float">
            <text:p>165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0190972222222222" calcext:value-type="float">
            <text:p>0,00019097222222222200</text:p>
          </table:table-cell>
          <table:table-cell table:formula="of:=[.D152]-[.D15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11" office:value-type="float" office:value="1661" calcext:value-type="float">
            <text:p>1661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019224537037037" calcext:value-type="float">
            <text:p>0,00019224537037037000</text:p>
          </table:table-cell>
          <table:table-cell table:formula="of:=[.D153]-[.D15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11" office:value-type="float" office:value="1672" calcext:value-type="float">
            <text:p>1672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0193518518518519" calcext:value-type="float">
            <text:p>0,00019351851851851900</text:p>
          </table:table-cell>
          <table:table-cell table:formula="of:=[.D154]-[.D15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11" office:value-type="float" office:value="1683" calcext:value-type="float">
            <text:p>1683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0194791666666667" calcext:value-type="float">
            <text:p>0,00019479166666666700</text:p>
          </table:table-cell>
          <table:table-cell table:formula="of:=[.D155]-[.D154]" office:value-type="float" office:value="0.00000127314814814817" calcext:value-type="float">
            <text:p>0,0000012731481481481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11" office:value-type="float" office:value="1694" calcext:value-type="float">
            <text:p>1694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0196064814814815" calcext:value-type="float">
            <text:p>0,00019606481481481500</text:p>
          </table:table-cell>
          <table:table-cell table:formula="of:=[.D156]-[.D15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11" office:value-type="float" office:value="1705" calcext:value-type="float">
            <text:p>1705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0197337962962963" calcext:value-type="float">
            <text:p>0,00019733796296296300</text:p>
          </table:table-cell>
          <table:table-cell table:formula="of:=[.D157]-[.D15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11" office:value-type="float" office:value="1716" calcext:value-type="float">
            <text:p>1716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0198611111111111" calcext:value-type="float">
            <text:p>0,00019861111111111100</text:p>
          </table:table-cell>
          <table:table-cell table:formula="of:=[.D158]-[.D157]" office:value-type="float" office:value="0.00000127314814814817" calcext:value-type="float">
            <text:p>0,0000012731481481481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11" office:value-type="float" office:value="1727" calcext:value-type="float">
            <text:p>1727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0199884259259259" calcext:value-type="float">
            <text:p>0,00019988425925925900</text:p>
          </table:table-cell>
          <table:table-cell table:formula="of:=[.D159]-[.D15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11" office:value-type="float" office:value="1738" calcext:value-type="float">
            <text:p>1738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0201157407407407" calcext:value-type="float">
            <text:p>0,00020115740740740700</text:p>
          </table:table-cell>
          <table:table-cell table:formula="of:=[.D160]-[.D15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11" office:value-type="float" office:value="1749" calcext:value-type="float">
            <text:p>1749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0202430555555556" calcext:value-type="float">
            <text:p>0,00020243055555555600</text:p>
          </table:table-cell>
          <table:table-cell table:formula="of:=[.D161]-[.D16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11" office:value-type="float" office:value="1760" calcext:value-type="float">
            <text:p>176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0203703703703704" calcext:value-type="float">
            <text:p>0,00020370370370370400</text:p>
          </table:table-cell>
          <table:table-cell table:formula="of:=[.D162]-[.D161]" office:value-type="float" office:value="0.00000127314814814817" calcext:value-type="float">
            <text:p>0,0000012731481481481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11" office:value-type="float" office:value="1771" calcext:value-type="float">
            <text:p>1771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0204976851851852" calcext:value-type="float">
            <text:p>0,00020497685185185200</text:p>
          </table:table-cell>
          <table:table-cell table:formula="of:=[.D163]-[.D16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11" office:value-type="float" office:value="1782" calcext:value-type="float">
            <text:p>1782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020625" calcext:value-type="float">
            <text:p>0,00020625000000000000</text:p>
          </table:table-cell>
          <table:table-cell table:formula="of:=[.D164]-[.D16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11" office:value-type="float" office:value="1793" calcext:value-type="float">
            <text:p>1793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0207523148148148" calcext:value-type="float">
            <text:p>0,00020752314814814800</text:p>
          </table:table-cell>
          <table:table-cell table:formula="of:=[.D165]-[.D164]" office:value-type="float" office:value="0.00000127314814814817" calcext:value-type="float">
            <text:p>0,0000012731481481481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11" office:value-type="float" office:value="1804" calcext:value-type="float">
            <text:p>1804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0208796296296296" calcext:value-type="float">
            <text:p>0,00020879629629629600</text:p>
          </table:table-cell>
          <table:table-cell table:formula="of:=[.D166]-[.D16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11" office:value-type="float" office:value="1815" calcext:value-type="float">
            <text:p>1815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0210069444444444" calcext:value-type="float">
            <text:p>0,00021006944444444400</text:p>
          </table:table-cell>
          <table:table-cell table:formula="of:=[.D167]-[.D16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11" office:value-type="float" office:value="1826" calcext:value-type="float">
            <text:p>1826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0211342592592593" calcext:value-type="float">
            <text:p>0,00021134259259259300</text:p>
          </table:table-cell>
          <table:table-cell table:formula="of:=[.D168]-[.D16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11" office:value-type="float" office:value="1837" calcext:value-type="float">
            <text:p>1837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0212615740740741" calcext:value-type="float">
            <text:p>0,00021261574074074100</text:p>
          </table:table-cell>
          <table:table-cell table:formula="of:=[.D169]-[.D168]" office:value-type="float" office:value="0.00000127314814814817" calcext:value-type="float">
            <text:p>0,0000012731481481481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11" office:value-type="float" office:value="1848" calcext:value-type="float">
            <text:p>1848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0213888888888889" calcext:value-type="float">
            <text:p>0,00021388888888888900</text:p>
          </table:table-cell>
          <table:table-cell table:formula="of:=[.D170]-[.D16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11" office:value-type="float" office:value="1859" calcext:value-type="float">
            <text:p>1859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0215162037037037" calcext:value-type="float">
            <text:p>0,00021516203703703700</text:p>
          </table:table-cell>
          <table:table-cell table:formula="of:=[.D171]-[.D17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11" office:value-type="float" office:value="1870" calcext:value-type="float">
            <text:p>187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0216435185185185" calcext:value-type="float">
            <text:p>0,00021643518518518500</text:p>
          </table:table-cell>
          <table:table-cell table:formula="of:=[.D172]-[.D171]" office:value-type="float" office:value="0.00000127314814814817" calcext:value-type="float">
            <text:p>0,0000012731481481481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11" office:value-type="float" office:value="1881" calcext:value-type="float">
            <text:p>1881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0217708333333333" calcext:value-type="float">
            <text:p>0,00021770833333333300</text:p>
          </table:table-cell>
          <table:table-cell table:formula="of:=[.D173]-[.D17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11" office:value-type="float" office:value="1892" calcext:value-type="float">
            <text:p>1892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0218981481481481" calcext:value-type="float">
            <text:p>0,00021898148148148100</text:p>
          </table:table-cell>
          <table:table-cell table:formula="of:=[.D174]-[.D17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11" office:value-type="float" office:value="1903" calcext:value-type="float">
            <text:p>1903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022025462962963" calcext:value-type="float">
            <text:p>0,00022025462962963000</text:p>
          </table:table-cell>
          <table:table-cell table:formula="of:=[.D175]-[.D17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11" office:value-type="float" office:value="1914" calcext:value-type="float">
            <text:p>1914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0221527777777778" calcext:value-type="float">
            <text:p>0,00022152777777777800</text:p>
          </table:table-cell>
          <table:table-cell table:formula="of:=[.D176]-[.D175]" office:value-type="float" office:value="0.00000127314814814817" calcext:value-type="float">
            <text:p>0,0000012731481481481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11" office:value-type="float" office:value="1925" calcext:value-type="float">
            <text:p>1925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0222800925925926" calcext:value-type="float">
            <text:p>0,00022280092592592600</text:p>
          </table:table-cell>
          <table:table-cell table:formula="of:=[.D177]-[.D17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11" office:value-type="float" office:value="1936" calcext:value-type="float">
            <text:p>1936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0224074074074074" calcext:value-type="float">
            <text:p>0,00022407407407407400</text:p>
          </table:table-cell>
          <table:table-cell table:formula="of:=[.D178]-[.D17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11" office:value-type="float" office:value="1947" calcext:value-type="float">
            <text:p>1947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0225347222222222" calcext:value-type="float">
            <text:p>0,00022534722222222200</text:p>
          </table:table-cell>
          <table:table-cell table:formula="of:=[.D179]-[.D178]" office:value-type="float" office:value="0.00000127314814814817" calcext:value-type="float">
            <text:p>0,0000012731481481481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11" office:value-type="float" office:value="1958" calcext:value-type="float">
            <text:p>1958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022662037037037" calcext:value-type="float">
            <text:p>0,00022662037037037000</text:p>
          </table:table-cell>
          <table:table-cell table:formula="of:=[.D180]-[.D17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11" office:value-type="float" office:value="1969" calcext:value-type="float">
            <text:p>1969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0227893518518519" calcext:value-type="float">
            <text:p>0,00022789351851851900</text:p>
          </table:table-cell>
          <table:table-cell table:formula="of:=[.D181]-[.D18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11" office:value-type="float" office:value="1980" calcext:value-type="float">
            <text:p>198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0229166666666667" calcext:value-type="float">
            <text:p>0,00022916666666666700</text:p>
          </table:table-cell>
          <table:table-cell table:formula="of:=[.D182]-[.D18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11" office:value-type="float" office:value="1991" calcext:value-type="float">
            <text:p>1991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0230439814814815" calcext:value-type="float">
            <text:p>0,00023043981481481500</text:p>
          </table:table-cell>
          <table:table-cell table:formula="of:=[.D183]-[.D182]" office:value-type="float" office:value="0.00000127314814814817" calcext:value-type="float">
            <text:p>0,0000012731481481481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11" office:value-type="float" office:value="2002" calcext:value-type="float">
            <text:p>2002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0231712962962963" calcext:value-type="float">
            <text:p>0,00023171296296296300</text:p>
          </table:table-cell>
          <table:table-cell table:formula="of:=[.D184]-[.D18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11" office:value-type="float" office:value="2013" calcext:value-type="float">
            <text:p>2013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0232986111111111" calcext:value-type="float">
            <text:p>0,00023298611111111100</text:p>
          </table:table-cell>
          <table:table-cell table:formula="of:=[.D185]-[.D18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11" office:value-type="float" office:value="2024" calcext:value-type="float">
            <text:p>2024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0234259259259259" calcext:value-type="float">
            <text:p>0,00023425925925925900</text:p>
          </table:table-cell>
          <table:table-cell table:formula="of:=[.D186]-[.D185]" office:value-type="float" office:value="0.00000127314814814817" calcext:value-type="float">
            <text:p>0,0000012731481481481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11" office:value-type="float" office:value="2035" calcext:value-type="float">
            <text:p>2035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0235532407407407" calcext:value-type="float">
            <text:p>0,00023553240740740700</text:p>
          </table:table-cell>
          <table:table-cell table:formula="of:=[.D187]-[.D18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11" office:value-type="float" office:value="2046" calcext:value-type="float">
            <text:p>2046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0236805555555556" calcext:value-type="float">
            <text:p>0,00023680555555555600</text:p>
          </table:table-cell>
          <table:table-cell table:formula="of:=[.D188]-[.D18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11" office:value-type="float" office:value="2057" calcext:value-type="float">
            <text:p>2057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0238078703703704" calcext:value-type="float">
            <text:p>0,00023807870370370400</text:p>
          </table:table-cell>
          <table:table-cell table:formula="of:=[.D189]-[.D18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11" office:value-type="float" office:value="2068" calcext:value-type="float">
            <text:p>2068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0239351851851852" calcext:value-type="float">
            <text:p>0,00023935185185185200</text:p>
          </table:table-cell>
          <table:table-cell table:formula="of:=[.D190]-[.D189]" office:value-type="float" office:value="0.00000127314814814817" calcext:value-type="float">
            <text:p>0,0000012731481481481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11" office:value-type="float" office:value="2079" calcext:value-type="float">
            <text:p>2079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0240625" calcext:value-type="float">
            <text:p>0,00024062500000000000</text:p>
          </table:table-cell>
          <table:table-cell table:formula="of:=[.D191]-[.D19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11" office:value-type="float" office:value="2090" calcext:value-type="float">
            <text:p>209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0241898148148148" calcext:value-type="float">
            <text:p>0,00024189814814814800</text:p>
          </table:table-cell>
          <table:table-cell table:formula="of:=[.D192]-[.D19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11" office:value-type="float" office:value="2101" calcext:value-type="float">
            <text:p>2101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0243171296296296" calcext:value-type="float">
            <text:p>0,00024317129629629600</text:p>
          </table:table-cell>
          <table:table-cell table:formula="of:=[.D193]-[.D19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11" office:value-type="float" office:value="2112" calcext:value-type="float">
            <text:p>2112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0244444444444444" calcext:value-type="float">
            <text:p>0,00024444444444444400</text:p>
          </table:table-cell>
          <table:table-cell table:formula="of:=[.D194]-[.D19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11" office:value-type="float" office:value="2123" calcext:value-type="float">
            <text:p>2123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0245717592592593" calcext:value-type="float">
            <text:p>0,00024571759259259300</text:p>
          </table:table-cell>
          <table:table-cell table:formula="of:=[.D195]-[.D194]" office:value-type="float" office:value="0.00000127314814814819" calcext:value-type="float">
            <text:p>0,0000012731481481481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11" office:value-type="float" office:value="2134" calcext:value-type="float">
            <text:p>2134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0246990740740741" calcext:value-type="float">
            <text:p>0,00024699074074074100</text:p>
          </table:table-cell>
          <table:table-cell table:formula="of:=[.D196]-[.D19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11" office:value-type="float" office:value="2145" calcext:value-type="float">
            <text:p>2145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0248263888888889" calcext:value-type="float">
            <text:p>0,00024826388888888900</text:p>
          </table:table-cell>
          <table:table-cell table:formula="of:=[.D197]-[.D19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11" office:value-type="float" office:value="2156" calcext:value-type="float">
            <text:p>2156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0249537037037037" calcext:value-type="float">
            <text:p>0,00024953703703703700</text:p>
          </table:table-cell>
          <table:table-cell table:formula="of:=[.D198]-[.D19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11" office:value-type="float" office:value="2167" calcext:value-type="float">
            <text:p>2167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0250810185185185" calcext:value-type="float">
            <text:p>0,00025081018518518500</text:p>
          </table:table-cell>
          <table:table-cell table:formula="of:=[.D199]-[.D19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11" office:value-type="float" office:value="2178" calcext:value-type="float">
            <text:p>2178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0252083333333333" calcext:value-type="float">
            <text:p>0,00025208333333333300</text:p>
          </table:table-cell>
          <table:table-cell table:formula="of:=[.D200]-[.D19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11" office:value-type="float" office:value="2189" calcext:value-type="float">
            <text:p>2189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0253356481481481" calcext:value-type="float">
            <text:p>0,00025335648148148100</text:p>
          </table:table-cell>
          <table:table-cell table:formula="of:=[.D201]-[.D20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11" office:value-type="float" office:value="2200" calcext:value-type="float">
            <text:p>22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025462962962963" calcext:value-type="float">
            <text:p>0,00025462962962963000</text:p>
          </table:table-cell>
          <table:table-cell table:formula="of:=[.D202]-[.D201]" office:value-type="float" office:value="0.00000127314814814819" calcext:value-type="float">
            <text:p>0,0000012731481481481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11" office:value-type="float" office:value="2211" calcext:value-type="float">
            <text:p>2211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0255902777777778" calcext:value-type="float">
            <text:p>0,00025590277777777800</text:p>
          </table:table-cell>
          <table:table-cell table:formula="of:=[.D203]-[.D20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11" office:value-type="float" office:value="2222" calcext:value-type="float">
            <text:p>2222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0257175925925926" calcext:value-type="float">
            <text:p>0,00025717592592592600</text:p>
          </table:table-cell>
          <table:table-cell table:formula="of:=[.D204]-[.D20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11" office:value-type="float" office:value="2233" calcext:value-type="float">
            <text:p>2233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0258449074074074" calcext:value-type="float">
            <text:p>0,00025844907407407400</text:p>
          </table:table-cell>
          <table:table-cell table:formula="of:=[.D205]-[.D20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11" office:value-type="float" office:value="2244" calcext:value-type="float">
            <text:p>2244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0259722222222222" calcext:value-type="float">
            <text:p>0,00025972222222222200</text:p>
          </table:table-cell>
          <table:table-cell table:formula="of:=[.D206]-[.D20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11" office:value-type="float" office:value="2255" calcext:value-type="float">
            <text:p>2255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026099537037037" calcext:value-type="float">
            <text:p>0,00026099537037037000</text:p>
          </table:table-cell>
          <table:table-cell table:formula="of:=[.D207]-[.D20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11" office:value-type="float" office:value="2266" calcext:value-type="float">
            <text:p>2266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0262268518518519" calcext:value-type="float">
            <text:p>0,00026226851851851900</text:p>
          </table:table-cell>
          <table:table-cell table:formula="of:=[.D208]-[.D20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11" office:value-type="float" office:value="2277" calcext:value-type="float">
            <text:p>2277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0263541666666667" calcext:value-type="float">
            <text:p>0,00026354166666666700</text:p>
          </table:table-cell>
          <table:table-cell table:formula="of:=[.D209]-[.D208]" office:value-type="float" office:value="0.00000127314814814819" calcext:value-type="float">
            <text:p>0,0000012731481481481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11" office:value-type="float" office:value="2288" calcext:value-type="float">
            <text:p>2288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0264814814814815" calcext:value-type="float">
            <text:p>0,00026481481481481500</text:p>
          </table:table-cell>
          <table:table-cell table:formula="of:=[.D210]-[.D20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11" office:value-type="float" office:value="2299" calcext:value-type="float">
            <text:p>2299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0266087962962963" calcext:value-type="float">
            <text:p>0,00026608796296296300</text:p>
          </table:table-cell>
          <table:table-cell table:formula="of:=[.D211]-[.D21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11" office:value-type="float" office:value="2310" calcext:value-type="float">
            <text:p>231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0267361111111111" calcext:value-type="float">
            <text:p>0,00026736111111111100</text:p>
          </table:table-cell>
          <table:table-cell table:formula="of:=[.D212]-[.D21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11" office:value-type="float" office:value="2321" calcext:value-type="float">
            <text:p>2321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0268634259259259" calcext:value-type="float">
            <text:p>0,00026863425925925900</text:p>
          </table:table-cell>
          <table:table-cell table:formula="of:=[.D213]-[.D21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11" office:value-type="float" office:value="2332" calcext:value-type="float">
            <text:p>2332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0269907407407407" calcext:value-type="float">
            <text:p>0,00026990740740740700</text:p>
          </table:table-cell>
          <table:table-cell table:formula="of:=[.D214]-[.D21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11" office:value-type="float" office:value="2343" calcext:value-type="float">
            <text:p>2343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0271180555555556" calcext:value-type="float">
            <text:p>0,00027118055555555600</text:p>
          </table:table-cell>
          <table:table-cell table:formula="of:=[.D215]-[.D21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11" office:value-type="float" office:value="2354" calcext:value-type="float">
            <text:p>2354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0272453703703704" calcext:value-type="float">
            <text:p>0,00027245370370370400</text:p>
          </table:table-cell>
          <table:table-cell table:formula="of:=[.D216]-[.D215]" office:value-type="float" office:value="0.00000127314814814819" calcext:value-type="float">
            <text:p>0,0000012731481481481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11" office:value-type="float" office:value="2365" calcext:value-type="float">
            <text:p>2365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0273726851851852" calcext:value-type="float">
            <text:p>0,00027372685185185200</text:p>
          </table:table-cell>
          <table:table-cell table:formula="of:=[.D217]-[.D21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11" office:value-type="float" office:value="2376" calcext:value-type="float">
            <text:p>2376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0275" calcext:value-type="float">
            <text:p>0,00027500000000000000</text:p>
          </table:table-cell>
          <table:table-cell table:formula="of:=[.D218]-[.D21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11" office:value-type="float" office:value="2387" calcext:value-type="float">
            <text:p>2387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0276273148148148" calcext:value-type="float">
            <text:p>0,00027627314814814800</text:p>
          </table:table-cell>
          <table:table-cell table:formula="of:=[.D219]-[.D21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11" office:value-type="float" office:value="2398" calcext:value-type="float">
            <text:p>2398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0277546296296296" calcext:value-type="float">
            <text:p>0,00027754629629629600</text:p>
          </table:table-cell>
          <table:table-cell table:formula="of:=[.D220]-[.D21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11" office:value-type="float" office:value="2409" calcext:value-type="float">
            <text:p>2409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0278819444444444" calcext:value-type="float">
            <text:p>0,00027881944444444400</text:p>
          </table:table-cell>
          <table:table-cell table:formula="of:=[.D221]-[.D22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11" office:value-type="float" office:value="2420" calcext:value-type="float">
            <text:p>242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0280092592592593" calcext:value-type="float">
            <text:p>0,00028009259259259300</text:p>
          </table:table-cell>
          <table:table-cell table:formula="of:=[.D222]-[.D22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11" office:value-type="float" office:value="2431" calcext:value-type="float">
            <text:p>2431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0281365740740741" calcext:value-type="float">
            <text:p>0,00028136574074074100</text:p>
          </table:table-cell>
          <table:table-cell table:formula="of:=[.D223]-[.D222]" office:value-type="float" office:value="0.00000127314814814819" calcext:value-type="float">
            <text:p>0,0000012731481481481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11" office:value-type="float" office:value="2442" calcext:value-type="float">
            <text:p>2442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0282638888888889" calcext:value-type="float">
            <text:p>0,00028263888888888900</text:p>
          </table:table-cell>
          <table:table-cell table:formula="of:=[.D224]-[.D22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11" office:value-type="float" office:value="2453" calcext:value-type="float">
            <text:p>2453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0283912037037037" calcext:value-type="float">
            <text:p>0,00028391203703703700</text:p>
          </table:table-cell>
          <table:table-cell table:formula="of:=[.D225]-[.D22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11" office:value-type="float" office:value="2464" calcext:value-type="float">
            <text:p>2464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0285185185185185" calcext:value-type="float">
            <text:p>0,00028518518518518500</text:p>
          </table:table-cell>
          <table:table-cell table:formula="of:=[.D226]-[.D22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11" office:value-type="float" office:value="2475" calcext:value-type="float">
            <text:p>2475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0286458333333333" calcext:value-type="float">
            <text:p>0,00028645833333333300</text:p>
          </table:table-cell>
          <table:table-cell table:formula="of:=[.D227]-[.D22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11" office:value-type="float" office:value="2486" calcext:value-type="float">
            <text:p>2486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0287731481481482" calcext:value-type="float">
            <text:p>0,00028773148148148200</text:p>
          </table:table-cell>
          <table:table-cell table:formula="of:=[.D228]-[.D22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11" office:value-type="float" office:value="2497" calcext:value-type="float">
            <text:p>2497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028900462962963" calcext:value-type="float">
            <text:p>0,00028900462962963000</text:p>
          </table:table-cell>
          <table:table-cell table:formula="of:=[.D229]-[.D22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11" office:value-type="float" office:value="2508" calcext:value-type="float">
            <text:p>2508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0290277777777778" calcext:value-type="float">
            <text:p>0,00029027777777777800</text:p>
          </table:table-cell>
          <table:table-cell table:formula="of:=[.D230]-[.D229]" office:value-type="float" office:value="0.00000127314814814819" calcext:value-type="float">
            <text:p>0,0000012731481481481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11" office:value-type="float" office:value="2519" calcext:value-type="float">
            <text:p>2519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0291550925925926" calcext:value-type="float">
            <text:p>0,00029155092592592600</text:p>
          </table:table-cell>
          <table:table-cell table:formula="of:=[.D231]-[.D23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11" office:value-type="float" office:value="2530" calcext:value-type="float">
            <text:p>253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0292824074074074" calcext:value-type="float">
            <text:p>0,00029282407407407400</text:p>
          </table:table-cell>
          <table:table-cell table:formula="of:=[.D232]-[.D23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11" office:value-type="float" office:value="2541" calcext:value-type="float">
            <text:p>2541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0294097222222222" calcext:value-type="float">
            <text:p>0,00029409722222222200</text:p>
          </table:table-cell>
          <table:table-cell table:formula="of:=[.D233]-[.D23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11" office:value-type="float" office:value="2552" calcext:value-type="float">
            <text:p>2552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029537037037037" calcext:value-type="float">
            <text:p>0,00029537037037037000</text:p>
          </table:table-cell>
          <table:table-cell table:formula="of:=[.D234]-[.D23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11" office:value-type="float" office:value="2563" calcext:value-type="float">
            <text:p>2563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0296643518518519" calcext:value-type="float">
            <text:p>0,00029664351851851900</text:p>
          </table:table-cell>
          <table:table-cell table:formula="of:=[.D235]-[.D23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11" office:value-type="float" office:value="2574" calcext:value-type="float">
            <text:p>2574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0297916666666667" calcext:value-type="float">
            <text:p>0,00029791666666666700</text:p>
          </table:table-cell>
          <table:table-cell table:formula="of:=[.D236]-[.D23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11" office:value-type="float" office:value="2585" calcext:value-type="float">
            <text:p>2585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0299189814814815" calcext:value-type="float">
            <text:p>0,00029918981481481500</text:p>
          </table:table-cell>
          <table:table-cell table:formula="of:=[.D237]-[.D236]" office:value-type="float" office:value="0.00000127314814814819" calcext:value-type="float">
            <text:p>0,0000012731481481481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11" office:value-type="float" office:value="2596" calcext:value-type="float">
            <text:p>2596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0300462962962963" calcext:value-type="float">
            <text:p>0,00030046296296296300</text:p>
          </table:table-cell>
          <table:table-cell table:formula="of:=[.D238]-[.D23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11" office:value-type="float" office:value="2607" calcext:value-type="float">
            <text:p>2607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0301736111111111" calcext:value-type="float">
            <text:p>0,00030173611111111100</text:p>
          </table:table-cell>
          <table:table-cell table:formula="of:=[.D239]-[.D23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11" office:value-type="float" office:value="2618" calcext:value-type="float">
            <text:p>2618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0303009259259259" calcext:value-type="float">
            <text:p>0,00030300925925925900</text:p>
          </table:table-cell>
          <table:table-cell table:formula="of:=[.D240]-[.D23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11" office:value-type="float" office:value="2629" calcext:value-type="float">
            <text:p>2629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0304282407407407" calcext:value-type="float">
            <text:p>0,00030428240740740700</text:p>
          </table:table-cell>
          <table:table-cell table:formula="of:=[.D241]-[.D24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11" office:value-type="float" office:value="2640" calcext:value-type="float">
            <text:p>264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0305555555555556" calcext:value-type="float">
            <text:p>0,00030555555555555600</text:p>
          </table:table-cell>
          <table:table-cell table:formula="of:=[.D242]-[.D24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11" office:value-type="float" office:value="2651" calcext:value-type="float">
            <text:p>2651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0306828703703704" calcext:value-type="float">
            <text:p>0,00030682870370370400</text:p>
          </table:table-cell>
          <table:table-cell table:formula="of:=[.D243]-[.D24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11" office:value-type="float" office:value="2662" calcext:value-type="float">
            <text:p>2662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0308101851851852" calcext:value-type="float">
            <text:p>0,00030810185185185200</text:p>
          </table:table-cell>
          <table:table-cell table:formula="of:=[.D244]-[.D243]" office:value-type="float" office:value="0.00000127314814814819" calcext:value-type="float">
            <text:p>0,0000012731481481481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11" office:value-type="float" office:value="2673" calcext:value-type="float">
            <text:p>2673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0309375" calcext:value-type="float">
            <text:p>0,00030937500000000000</text:p>
          </table:table-cell>
          <table:table-cell table:formula="of:=[.D245]-[.D24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11" office:value-type="float" office:value="2684" calcext:value-type="float">
            <text:p>2684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0310648148148148" calcext:value-type="float">
            <text:p>0,00031064814814814800</text:p>
          </table:table-cell>
          <table:table-cell table:formula="of:=[.D246]-[.D24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11" office:value-type="float" office:value="2695" calcext:value-type="float">
            <text:p>2695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0311921296296296" calcext:value-type="float">
            <text:p>0,00031192129629629600</text:p>
          </table:table-cell>
          <table:table-cell table:formula="of:=[.D247]-[.D24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11" office:value-type="float" office:value="2706" calcext:value-type="float">
            <text:p>2706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0313194444444444" calcext:value-type="float">
            <text:p>0,00031319444444444400</text:p>
          </table:table-cell>
          <table:table-cell table:formula="of:=[.D248]-[.D24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11" office:value-type="float" office:value="2717" calcext:value-type="float">
            <text:p>2717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0314467592592593" calcext:value-type="float">
            <text:p>0,00031446759259259300</text:p>
          </table:table-cell>
          <table:table-cell table:formula="of:=[.D249]-[.D24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11" office:value-type="float" office:value="2728" calcext:value-type="float">
            <text:p>2728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0315740740740741" calcext:value-type="float">
            <text:p>0,00031574074074074100</text:p>
          </table:table-cell>
          <table:table-cell table:formula="of:=[.D250]-[.D24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11" office:value-type="float" office:value="2739" calcext:value-type="float">
            <text:p>2739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0317013888888889" calcext:value-type="float">
            <text:p>0,00031701388888888900</text:p>
          </table:table-cell>
          <table:table-cell table:formula="of:=[.D251]-[.D250]" office:value-type="float" office:value="0.00000127314814814819" calcext:value-type="float">
            <text:p>0,0000012731481481481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11" office:value-type="float" office:value="2750" calcext:value-type="float">
            <text:p>275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0318287037037037" calcext:value-type="float">
            <text:p>0,00031828703703703700</text:p>
          </table:table-cell>
          <table:table-cell table:formula="of:=[.D252]-[.D25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11" office:value-type="float" office:value="2761" calcext:value-type="float">
            <text:p>2761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0319560185185185" calcext:value-type="float">
            <text:p>0,00031956018518518500</text:p>
          </table:table-cell>
          <table:table-cell table:formula="of:=[.D253]-[.D25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11" office:value-type="float" office:value="2772" calcext:value-type="float">
            <text:p>2772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0320833333333333" calcext:value-type="float">
            <text:p>0,00032083333333333300</text:p>
          </table:table-cell>
          <table:table-cell table:formula="of:=[.D254]-[.D25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11" office:value-type="float" office:value="2783" calcext:value-type="float">
            <text:p>2783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0322106481481482" calcext:value-type="float">
            <text:p>0,00032210648148148200</text:p>
          </table:table-cell>
          <table:table-cell table:formula="of:=[.D255]-[.D25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11" office:value-type="float" office:value="2794" calcext:value-type="float">
            <text:p>2794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032337962962963" calcext:value-type="float">
            <text:p>0,00032337962962963000</text:p>
          </table:table-cell>
          <table:table-cell table:formula="of:=[.D256]-[.D25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11" office:value-type="float" office:value="2805" calcext:value-type="float">
            <text:p>2805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0324652777777778" calcext:value-type="float">
            <text:p>0,00032465277777777800</text:p>
          </table:table-cell>
          <table:table-cell table:formula="of:=[.D257]-[.D25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11" office:value-type="float" office:value="2816" calcext:value-type="float">
            <text:p>2816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0325925925925926" calcext:value-type="float">
            <text:p>0,00032592592592592600</text:p>
          </table:table-cell>
          <table:table-cell table:formula="of:=[.D258]-[.D257]" office:value-type="float" office:value="0.00000127314814814819" calcext:value-type="float">
            <text:p>0,0000012731481481481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11" office:value-type="float" office:value="2827" calcext:value-type="float">
            <text:p>2827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0327199074074074" calcext:value-type="float">
            <text:p>0,00032719907407407400</text:p>
          </table:table-cell>
          <table:table-cell table:formula="of:=[.D259]-[.D25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11" office:value-type="float" office:value="2838" calcext:value-type="float">
            <text:p>2838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0328472222222222" calcext:value-type="float">
            <text:p>0,00032847222222222200</text:p>
          </table:table-cell>
          <table:table-cell table:formula="of:=[.D260]-[.D25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11" office:value-type="float" office:value="2849" calcext:value-type="float">
            <text:p>2849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032974537037037" calcext:value-type="float">
            <text:p>0,00032974537037037000</text:p>
          </table:table-cell>
          <table:table-cell table:formula="of:=[.D261]-[.D26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11" office:value-type="float" office:value="2860" calcext:value-type="float">
            <text:p>286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0331018518518519" calcext:value-type="float">
            <text:p>0,00033101851851851900</text:p>
          </table:table-cell>
          <table:table-cell table:formula="of:=[.D262]-[.D26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11" office:value-type="float" office:value="2871" calcext:value-type="float">
            <text:p>2871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0332291666666667" calcext:value-type="float">
            <text:p>0,00033229166666666700</text:p>
          </table:table-cell>
          <table:table-cell table:formula="of:=[.D263]-[.D26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11" office:value-type="float" office:value="2882" calcext:value-type="float">
            <text:p>2882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0333564814814815" calcext:value-type="float">
            <text:p>0,00033356481481481500</text:p>
          </table:table-cell>
          <table:table-cell table:formula="of:=[.D264]-[.D26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11" office:value-type="float" office:value="2893" calcext:value-type="float">
            <text:p>2893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0334837962962963" calcext:value-type="float">
            <text:p>0,00033483796296296300</text:p>
          </table:table-cell>
          <table:table-cell table:formula="of:=[.D265]-[.D264]" office:value-type="float" office:value="0.00000127314814814819" calcext:value-type="float">
            <text:p>0,0000012731481481481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11" office:value-type="float" office:value="2904" calcext:value-type="float">
            <text:p>2904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0336111111111111" calcext:value-type="float">
            <text:p>0,00033611111111111100</text:p>
          </table:table-cell>
          <table:table-cell table:formula="of:=[.D266]-[.D26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11" office:value-type="float" office:value="2915" calcext:value-type="float">
            <text:p>2915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0337384259259259" calcext:value-type="float">
            <text:p>0,00033738425925925900</text:p>
          </table:table-cell>
          <table:table-cell table:formula="of:=[.D267]-[.D26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11" office:value-type="float" office:value="2926" calcext:value-type="float">
            <text:p>2926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0338657407407407" calcext:value-type="float">
            <text:p>0,00033865740740740700</text:p>
          </table:table-cell>
          <table:table-cell table:formula="of:=[.D268]-[.D26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11" office:value-type="float" office:value="2937" calcext:value-type="float">
            <text:p>2937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0339930555555556" calcext:value-type="float">
            <text:p>0,00033993055555555600</text:p>
          </table:table-cell>
          <table:table-cell table:formula="of:=[.D269]-[.D26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11" office:value-type="float" office:value="2948" calcext:value-type="float">
            <text:p>2948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0341203703703704" calcext:value-type="float">
            <text:p>0,00034120370370370400</text:p>
          </table:table-cell>
          <table:table-cell table:formula="of:=[.D270]-[.D26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11" office:value-type="float" office:value="2959" calcext:value-type="float">
            <text:p>2959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0342476851851852" calcext:value-type="float">
            <text:p>0,00034247685185185200</text:p>
          </table:table-cell>
          <table:table-cell table:formula="of:=[.D271]-[.D27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11" office:value-type="float" office:value="2970" calcext:value-type="float">
            <text:p>297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034375" calcext:value-type="float">
            <text:p>0,00034375000000000000</text:p>
          </table:table-cell>
          <table:table-cell table:formula="of:=[.D272]-[.D271]" office:value-type="float" office:value="0.00000127314814814819" calcext:value-type="float">
            <text:p>0,0000012731481481481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11" office:value-type="float" office:value="2981" calcext:value-type="float">
            <text:p>2981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0345023148148148" calcext:value-type="float">
            <text:p>0,00034502314814814800</text:p>
          </table:table-cell>
          <table:table-cell table:formula="of:=[.D273]-[.D27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11" office:value-type="float" office:value="2992" calcext:value-type="float">
            <text:p>2992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0346296296296296" calcext:value-type="float">
            <text:p>0,00034629629629629600</text:p>
          </table:table-cell>
          <table:table-cell table:formula="of:=[.D274]-[.D27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11" office:value-type="float" office:value="3003" calcext:value-type="float">
            <text:p>3003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0347569444444444" calcext:value-type="float">
            <text:p>0,00034756944444444400</text:p>
          </table:table-cell>
          <table:table-cell table:formula="of:=[.D275]-[.D27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11" office:value-type="float" office:value="3014" calcext:value-type="float">
            <text:p>3014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0348842592592593" calcext:value-type="float">
            <text:p>0,00034884259259259300</text:p>
          </table:table-cell>
          <table:table-cell table:formula="of:=[.D276]-[.D27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11" office:value-type="float" office:value="3025" calcext:value-type="float">
            <text:p>3025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0350115740740741" calcext:value-type="float">
            <text:p>0,00035011574074074100</text:p>
          </table:table-cell>
          <table:table-cell table:formula="of:=[.D277]-[.D27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11" office:value-type="float" office:value="3036" calcext:value-type="float">
            <text:p>3036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0351388888888889" calcext:value-type="float">
            <text:p>0,00035138888888888900</text:p>
          </table:table-cell>
          <table:table-cell table:formula="of:=[.D278]-[.D27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11" office:value-type="float" office:value="3047" calcext:value-type="float">
            <text:p>3047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0352662037037037" calcext:value-type="float">
            <text:p>0,00035266203703703700</text:p>
          </table:table-cell>
          <table:table-cell table:formula="of:=[.D279]-[.D278]" office:value-type="float" office:value="0.00000127314814814819" calcext:value-type="float">
            <text:p>0,0000012731481481481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11" office:value-type="float" office:value="3058" calcext:value-type="float">
            <text:p>3058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0353935185185185" calcext:value-type="float">
            <text:p>0,00035393518518518500</text:p>
          </table:table-cell>
          <table:table-cell table:formula="of:=[.D280]-[.D27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11" office:value-type="float" office:value="3069" calcext:value-type="float">
            <text:p>3069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0355208333333333" calcext:value-type="float">
            <text:p>0,00035520833333333300</text:p>
          </table:table-cell>
          <table:table-cell table:formula="of:=[.D281]-[.D28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11" office:value-type="float" office:value="3080" calcext:value-type="float">
            <text:p>308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0356481481481482" calcext:value-type="float">
            <text:p>0,00035648148148148200</text:p>
          </table:table-cell>
          <table:table-cell table:formula="of:=[.D282]-[.D28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11" office:value-type="float" office:value="3091" calcext:value-type="float">
            <text:p>3091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035775462962963" calcext:value-type="float">
            <text:p>0,00035775462962963000</text:p>
          </table:table-cell>
          <table:table-cell table:formula="of:=[.D283]-[.D28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11" office:value-type="float" office:value="3102" calcext:value-type="float">
            <text:p>3102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0359027777777778" calcext:value-type="float">
            <text:p>0,00035902777777777800</text:p>
          </table:table-cell>
          <table:table-cell table:formula="of:=[.D284]-[.D28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11" office:value-type="float" office:value="3113" calcext:value-type="float">
            <text:p>3113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0360300925925926" calcext:value-type="float">
            <text:p>0,00036030092592592600</text:p>
          </table:table-cell>
          <table:table-cell table:formula="of:=[.D285]-[.D28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11" office:value-type="float" office:value="3124" calcext:value-type="float">
            <text:p>3124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0361574074074074" calcext:value-type="float">
            <text:p>0,00036157407407407400</text:p>
          </table:table-cell>
          <table:table-cell table:formula="of:=[.D286]-[.D28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11" office:value-type="float" office:value="3135" calcext:value-type="float">
            <text:p>3135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0362847222222222" calcext:value-type="float">
            <text:p>0,00036284722222222200</text:p>
          </table:table-cell>
          <table:table-cell table:formula="of:=[.D287]-[.D286]" office:value-type="float" office:value="0.00000127314814814819" calcext:value-type="float">
            <text:p>0,0000012731481481481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11" office:value-type="float" office:value="3146" calcext:value-type="float">
            <text:p>3146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036412037037037" calcext:value-type="float">
            <text:p>0,00036412037037037000</text:p>
          </table:table-cell>
          <table:table-cell table:formula="of:=[.D288]-[.D28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11" office:value-type="float" office:value="3157" calcext:value-type="float">
            <text:p>3157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0365393518518519" calcext:value-type="float">
            <text:p>0,00036539351851851900</text:p>
          </table:table-cell>
          <table:table-cell table:formula="of:=[.D289]-[.D28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11" office:value-type="float" office:value="3168" calcext:value-type="float">
            <text:p>3168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0366666666666667" calcext:value-type="float">
            <text:p>0,00036666666666666700</text:p>
          </table:table-cell>
          <table:table-cell table:formula="of:=[.D290]-[.D28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11" office:value-type="float" office:value="3179" calcext:value-type="float">
            <text:p>3179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0367939814814815" calcext:value-type="float">
            <text:p>0,00036793981481481500</text:p>
          </table:table-cell>
          <table:table-cell table:formula="of:=[.D291]-[.D29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11" office:value-type="float" office:value="3190" calcext:value-type="float">
            <text:p>319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0369212962962963" calcext:value-type="float">
            <text:p>0,00036921296296296300</text:p>
          </table:table-cell>
          <table:table-cell table:formula="of:=[.D292]-[.D29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11" office:value-type="float" office:value="3201" calcext:value-type="float">
            <text:p>3201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0370486111111111" calcext:value-type="float">
            <text:p>0,00037048611111111100</text:p>
          </table:table-cell>
          <table:table-cell table:formula="of:=[.D293]-[.D29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11" office:value-type="float" office:value="3212" calcext:value-type="float">
            <text:p>3212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0371759259259259" calcext:value-type="float">
            <text:p>0,00037175925925925900</text:p>
          </table:table-cell>
          <table:table-cell table:formula="of:=[.D294]-[.D293]" office:value-type="float" office:value="0.00000127314814814819" calcext:value-type="float">
            <text:p>0,0000012731481481481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11" office:value-type="float" office:value="3223" calcext:value-type="float">
            <text:p>3223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0373032407407407" calcext:value-type="float">
            <text:p>0,00037303240740740700</text:p>
          </table:table-cell>
          <table:table-cell table:formula="of:=[.D295]-[.D29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11" office:value-type="float" office:value="3234" calcext:value-type="float">
            <text:p>3234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0374305555555556" calcext:value-type="float">
            <text:p>0,00037430555555555600</text:p>
          </table:table-cell>
          <table:table-cell table:formula="of:=[.D296]-[.D29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11" office:value-type="float" office:value="3245" calcext:value-type="float">
            <text:p>3245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0375578703703704" calcext:value-type="float">
            <text:p>0,00037557870370370400</text:p>
          </table:table-cell>
          <table:table-cell table:formula="of:=[.D297]-[.D29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11" office:value-type="float" office:value="3256" calcext:value-type="float">
            <text:p>3256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0376851851851852" calcext:value-type="float">
            <text:p>0,00037685185185185200</text:p>
          </table:table-cell>
          <table:table-cell table:formula="of:=[.D298]-[.D29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11" office:value-type="float" office:value="3267" calcext:value-type="float">
            <text:p>3267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0378125" calcext:value-type="float">
            <text:p>0,00037812500000000000</text:p>
          </table:table-cell>
          <table:table-cell table:formula="of:=[.D299]-[.D29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11" office:value-type="float" office:value="3278" calcext:value-type="float">
            <text:p>3278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0379398148148148" calcext:value-type="float">
            <text:p>0,00037939814814814800</text:p>
          </table:table-cell>
          <table:table-cell table:formula="of:=[.D300]-[.D29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11" office:value-type="float" office:value="3289" calcext:value-type="float">
            <text:p>3289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0380671296296296" calcext:value-type="float">
            <text:p>0,00038067129629629600</text:p>
          </table:table-cell>
          <table:table-cell table:formula="of:=[.D301]-[.D300]" office:value-type="float" office:value="0.00000127314814814819" calcext:value-type="float">
            <text:p>0,0000012731481481481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11" office:value-type="float" office:value="3300" calcext:value-type="float">
            <text:p>33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0381944444444444" calcext:value-type="float">
            <text:p>0,00038194444444444400</text:p>
          </table:table-cell>
          <table:table-cell table:formula="of:=[.D302]-[.D30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11" office:value-type="float" office:value="3311" calcext:value-type="float">
            <text:p>3311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0383217592592593" calcext:value-type="float">
            <text:p>0,00038321759259259300</text:p>
          </table:table-cell>
          <table:table-cell table:formula="of:=[.D303]-[.D30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11" office:value-type="float" office:value="3322" calcext:value-type="float">
            <text:p>3322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0384490740740741" calcext:value-type="float">
            <text:p>0,00038449074074074100</text:p>
          </table:table-cell>
          <table:table-cell table:formula="of:=[.D304]-[.D30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11" office:value-type="float" office:value="3333" calcext:value-type="float">
            <text:p>3333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0385763888888889" calcext:value-type="float">
            <text:p>0,00038576388888888900</text:p>
          </table:table-cell>
          <table:table-cell table:formula="of:=[.D305]-[.D30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11" office:value-type="float" office:value="3344" calcext:value-type="float">
            <text:p>3344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0387037037037037" calcext:value-type="float">
            <text:p>0,00038703703703703700</text:p>
          </table:table-cell>
          <table:table-cell table:formula="of:=[.D306]-[.D30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11" office:value-type="float" office:value="3355" calcext:value-type="float">
            <text:p>3355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0388310185185185" calcext:value-type="float">
            <text:p>0,00038831018518518500</text:p>
          </table:table-cell>
          <table:table-cell table:formula="of:=[.D307]-[.D30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11" office:value-type="float" office:value="3366" calcext:value-type="float">
            <text:p>3366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0389583333333333" calcext:value-type="float">
            <text:p>0,00038958333333333300</text:p>
          </table:table-cell>
          <table:table-cell table:formula="of:=[.D308]-[.D307]" office:value-type="float" office:value="0.00000127314814814819" calcext:value-type="float">
            <text:p>0,0000012731481481481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11" office:value-type="float" office:value="3377" calcext:value-type="float">
            <text:p>3377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0390856481481482" calcext:value-type="float">
            <text:p>0,00039085648148148200</text:p>
          </table:table-cell>
          <table:table-cell table:formula="of:=[.D309]-[.D30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11" office:value-type="float" office:value="3388" calcext:value-type="float">
            <text:p>3388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039212962962963" calcext:value-type="float">
            <text:p>0,00039212962962963000</text:p>
          </table:table-cell>
          <table:table-cell table:formula="of:=[.D310]-[.D30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11" office:value-type="float" office:value="3399" calcext:value-type="float">
            <text:p>3399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0393402777777778" calcext:value-type="float">
            <text:p>0,00039340277777777800</text:p>
          </table:table-cell>
          <table:table-cell table:formula="of:=[.D311]-[.D31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11" office:value-type="float" office:value="3410" calcext:value-type="float">
            <text:p>341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0394675925925926" calcext:value-type="float">
            <text:p>0,00039467592592592600</text:p>
          </table:table-cell>
          <table:table-cell table:formula="of:=[.D312]-[.D31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11" office:value-type="float" office:value="3421" calcext:value-type="float">
            <text:p>3421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0395949074074074" calcext:value-type="float">
            <text:p>0,00039594907407407400</text:p>
          </table:table-cell>
          <table:table-cell table:formula="of:=[.D313]-[.D31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11" office:value-type="float" office:value="3432" calcext:value-type="float">
            <text:p>3432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0397222222222222" calcext:value-type="float">
            <text:p>0,00039722222222222200</text:p>
          </table:table-cell>
          <table:table-cell table:formula="of:=[.D314]-[.D31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11" office:value-type="float" office:value="3443" calcext:value-type="float">
            <text:p>3443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039849537037037" calcext:value-type="float">
            <text:p>0,00039849537037037000</text:p>
          </table:table-cell>
          <table:table-cell table:formula="of:=[.D315]-[.D314]" office:value-type="float" office:value="0.00000127314814814819" calcext:value-type="float">
            <text:p>0,0000012731481481481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11" office:value-type="float" office:value="3454" calcext:value-type="float">
            <text:p>3454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0399768518518519" calcext:value-type="float">
            <text:p>0,00039976851851851900</text:p>
          </table:table-cell>
          <table:table-cell table:formula="of:=[.D316]-[.D31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11" office:value-type="float" office:value="3465" calcext:value-type="float">
            <text:p>3465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0401041666666667" calcext:value-type="float">
            <text:p>0,00040104166666666700</text:p>
          </table:table-cell>
          <table:table-cell table:formula="of:=[.D317]-[.D31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11" office:value-type="float" office:value="3476" calcext:value-type="float">
            <text:p>3476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0402314814814815" calcext:value-type="float">
            <text:p>0,00040231481481481500</text:p>
          </table:table-cell>
          <table:table-cell table:formula="of:=[.D318]-[.D31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11" office:value-type="float" office:value="3487" calcext:value-type="float">
            <text:p>3487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0403587962962963" calcext:value-type="float">
            <text:p>0,00040358796296296300</text:p>
          </table:table-cell>
          <table:table-cell table:formula="of:=[.D319]-[.D31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11" office:value-type="float" office:value="3498" calcext:value-type="float">
            <text:p>3498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0404861111111111" calcext:value-type="float">
            <text:p>0,00040486111111111100</text:p>
          </table:table-cell>
          <table:table-cell table:formula="of:=[.D320]-[.D31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11" office:value-type="float" office:value="3509" calcext:value-type="float">
            <text:p>3509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0406134259259259" calcext:value-type="float">
            <text:p>0,00040613425925925900</text:p>
          </table:table-cell>
          <table:table-cell table:formula="of:=[.D321]-[.D32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11" office:value-type="float" office:value="3520" calcext:value-type="float">
            <text:p>352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0407407407407407" calcext:value-type="float">
            <text:p>0,00040740740740740700</text:p>
          </table:table-cell>
          <table:table-cell table:formula="of:=[.D322]-[.D321]" office:value-type="float" office:value="0.00000127314814814819" calcext:value-type="float">
            <text:p>0,0000012731481481481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11" office:value-type="float" office:value="3531" calcext:value-type="float">
            <text:p>3531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0408680555555556" calcext:value-type="float">
            <text:p>0,00040868055555555600</text:p>
          </table:table-cell>
          <table:table-cell table:formula="of:=[.D323]-[.D32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11" office:value-type="float" office:value="3542" calcext:value-type="float">
            <text:p>3542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0409953703703704" calcext:value-type="float">
            <text:p>0,00040995370370370400</text:p>
          </table:table-cell>
          <table:table-cell table:formula="of:=[.D324]-[.D32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11" office:value-type="float" office:value="3553" calcext:value-type="float">
            <text:p>3553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0411226851851852" calcext:value-type="float">
            <text:p>0,00041122685185185200</text:p>
          </table:table-cell>
          <table:table-cell table:formula="of:=[.D325]-[.D32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11" office:value-type="float" office:value="3564" calcext:value-type="float">
            <text:p>3564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04125" calcext:value-type="float">
            <text:p>0,00041250000000000000</text:p>
          </table:table-cell>
          <table:table-cell table:formula="of:=[.D326]-[.D32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11" office:value-type="float" office:value="3575" calcext:value-type="float">
            <text:p>3575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0413773148148148" calcext:value-type="float">
            <text:p>0,00041377314814814800</text:p>
          </table:table-cell>
          <table:table-cell table:formula="of:=[.D327]-[.D32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11" office:value-type="float" office:value="3586" calcext:value-type="float">
            <text:p>3586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0415046296296296" calcext:value-type="float">
            <text:p>0,00041504629629629600</text:p>
          </table:table-cell>
          <table:table-cell table:formula="of:=[.D328]-[.D32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11" office:value-type="float" office:value="3597" calcext:value-type="float">
            <text:p>3597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0416319444444444" calcext:value-type="float">
            <text:p>0,00041631944444444400</text:p>
          </table:table-cell>
          <table:table-cell table:formula="of:=[.D329]-[.D328]" office:value-type="float" office:value="0.00000127314814814819" calcext:value-type="float">
            <text:p>0,0000012731481481481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11" office:value-type="float" office:value="3608" calcext:value-type="float">
            <text:p>3608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0417592592592593" calcext:value-type="float">
            <text:p>0,00041759259259259300</text:p>
          </table:table-cell>
          <table:table-cell table:formula="of:=[.D330]-[.D32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11" office:value-type="float" office:value="3619" calcext:value-type="float">
            <text:p>3619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0418865740740741" calcext:value-type="float">
            <text:p>0,00041886574074074100</text:p>
          </table:table-cell>
          <table:table-cell table:formula="of:=[.D331]-[.D33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11" office:value-type="float" office:value="3630" calcext:value-type="float">
            <text:p>363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0420138888888889" calcext:value-type="float">
            <text:p>0,00042013888888888900</text:p>
          </table:table-cell>
          <table:table-cell table:formula="of:=[.D332]-[.D33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11" office:value-type="float" office:value="3641" calcext:value-type="float">
            <text:p>3641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0421412037037037" calcext:value-type="float">
            <text:p>0,00042141203703703700</text:p>
          </table:table-cell>
          <table:table-cell table:formula="of:=[.D333]-[.D33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11" office:value-type="float" office:value="3652" calcext:value-type="float">
            <text:p>3652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0422685185185185" calcext:value-type="float">
            <text:p>0,00042268518518518500</text:p>
          </table:table-cell>
          <table:table-cell table:formula="of:=[.D334]-[.D33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11" office:value-type="float" office:value="3663" calcext:value-type="float">
            <text:p>3663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0423958333333333" calcext:value-type="float">
            <text:p>0,00042395833333333300</text:p>
          </table:table-cell>
          <table:table-cell table:formula="of:=[.D335]-[.D33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11" office:value-type="float" office:value="3674" calcext:value-type="float">
            <text:p>3674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0425231481481481" calcext:value-type="float">
            <text:p>0,00042523148148148100</text:p>
          </table:table-cell>
          <table:table-cell table:formula="of:=[.D336]-[.D335]" office:value-type="float" office:value="0.00000127314814814819" calcext:value-type="float">
            <text:p>0,0000012731481481481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11" office:value-type="float" office:value="3685" calcext:value-type="float">
            <text:p>3685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042650462962963" calcext:value-type="float">
            <text:p>0,00042650462962963000</text:p>
          </table:table-cell>
          <table:table-cell table:formula="of:=[.D337]-[.D33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11" office:value-type="float" office:value="3696" calcext:value-type="float">
            <text:p>3696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0427777777777778" calcext:value-type="float">
            <text:p>0,00042777777777777800</text:p>
          </table:table-cell>
          <table:table-cell table:formula="of:=[.D338]-[.D33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11" office:value-type="float" office:value="3707" calcext:value-type="float">
            <text:p>3707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0429050925925926" calcext:value-type="float">
            <text:p>0,00042905092592592600</text:p>
          </table:table-cell>
          <table:table-cell table:formula="of:=[.D339]-[.D33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11" office:value-type="float" office:value="3718" calcext:value-type="float">
            <text:p>3718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0430324074074074" calcext:value-type="float">
            <text:p>0,00043032407407407400</text:p>
          </table:table-cell>
          <table:table-cell table:formula="of:=[.D340]-[.D33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11" office:value-type="float" office:value="3729" calcext:value-type="float">
            <text:p>3729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0431597222222222" calcext:value-type="float">
            <text:p>0,00043159722222222200</text:p>
          </table:table-cell>
          <table:table-cell table:formula="of:=[.D341]-[.D34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11" office:value-type="float" office:value="3740" calcext:value-type="float">
            <text:p>374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043287037037037" calcext:value-type="float">
            <text:p>0,00043287037037037000</text:p>
          </table:table-cell>
          <table:table-cell table:formula="of:=[.D342]-[.D34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11" office:value-type="float" office:value="3751" calcext:value-type="float">
            <text:p>3751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0434143518518519" calcext:value-type="float">
            <text:p>0,00043414351851851900</text:p>
          </table:table-cell>
          <table:table-cell table:formula="of:=[.D343]-[.D342]" office:value-type="float" office:value="0.00000127314814814819" calcext:value-type="float">
            <text:p>0,0000012731481481481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11" office:value-type="float" office:value="3762" calcext:value-type="float">
            <text:p>3762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0435416666666667" calcext:value-type="float">
            <text:p>0,00043541666666666700</text:p>
          </table:table-cell>
          <table:table-cell table:formula="of:=[.D344]-[.D34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11" office:value-type="float" office:value="3773" calcext:value-type="float">
            <text:p>3773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0436689814814815" calcext:value-type="float">
            <text:p>0,00043668981481481500</text:p>
          </table:table-cell>
          <table:table-cell table:formula="of:=[.D345]-[.D34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11" office:value-type="float" office:value="3784" calcext:value-type="float">
            <text:p>3784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0437962962962963" calcext:value-type="float">
            <text:p>0,00043796296296296300</text:p>
          </table:table-cell>
          <table:table-cell table:formula="of:=[.D346]-[.D34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11" office:value-type="float" office:value="3795" calcext:value-type="float">
            <text:p>3795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0439236111111111" calcext:value-type="float">
            <text:p>0,00043923611111111100</text:p>
          </table:table-cell>
          <table:table-cell table:formula="of:=[.D347]-[.D34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11" office:value-type="float" office:value="3806" calcext:value-type="float">
            <text:p>3806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0440509259259259" calcext:value-type="float">
            <text:p>0,00044050925925925900</text:p>
          </table:table-cell>
          <table:table-cell table:formula="of:=[.D348]-[.D34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11" office:value-type="float" office:value="3817" calcext:value-type="float">
            <text:p>3817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0441782407407407" calcext:value-type="float">
            <text:p>0,00044178240740740700</text:p>
          </table:table-cell>
          <table:table-cell table:formula="of:=[.D349]-[.D34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11" office:value-type="float" office:value="3828" calcext:value-type="float">
            <text:p>3828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0443055555555556" calcext:value-type="float">
            <text:p>0,00044305555555555600</text:p>
          </table:table-cell>
          <table:table-cell table:formula="of:=[.D350]-[.D349]" office:value-type="float" office:value="0.00000127314814814819" calcext:value-type="float">
            <text:p>0,0000012731481481481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11" office:value-type="float" office:value="3839" calcext:value-type="float">
            <text:p>3839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0444328703703704" calcext:value-type="float">
            <text:p>0,00044432870370370400</text:p>
          </table:table-cell>
          <table:table-cell table:formula="of:=[.D351]-[.D35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11" office:value-type="float" office:value="3850" calcext:value-type="float">
            <text:p>385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0445601851851852" calcext:value-type="float">
            <text:p>0,00044560185185185200</text:p>
          </table:table-cell>
          <table:table-cell table:formula="of:=[.D352]-[.D35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11" office:value-type="float" office:value="3861" calcext:value-type="float">
            <text:p>3861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0446875" calcext:value-type="float">
            <text:p>0,00044687500000000000</text:p>
          </table:table-cell>
          <table:table-cell table:formula="of:=[.D353]-[.D35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11" office:value-type="float" office:value="3872" calcext:value-type="float">
            <text:p>3872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0448148148148148" calcext:value-type="float">
            <text:p>0,00044814814814814800</text:p>
          </table:table-cell>
          <table:table-cell table:formula="of:=[.D354]-[.D35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11" office:value-type="float" office:value="3883" calcext:value-type="float">
            <text:p>3883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0449421296296296" calcext:value-type="float">
            <text:p>0,00044942129629629600</text:p>
          </table:table-cell>
          <table:table-cell table:formula="of:=[.D355]-[.D35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11" office:value-type="float" office:value="3894" calcext:value-type="float">
            <text:p>3894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0450694444444444" calcext:value-type="float">
            <text:p>0,00045069444444444400</text:p>
          </table:table-cell>
          <table:table-cell table:formula="of:=[.D356]-[.D35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11" office:value-type="float" office:value="3905" calcext:value-type="float">
            <text:p>3905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0451967592592593" calcext:value-type="float">
            <text:p>0,00045196759259259300</text:p>
          </table:table-cell>
          <table:table-cell table:formula="of:=[.D357]-[.D356]" office:value-type="float" office:value="0.00000127314814814819" calcext:value-type="float">
            <text:p>0,0000012731481481481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11" office:value-type="float" office:value="3916" calcext:value-type="float">
            <text:p>3916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0453240740740741" calcext:value-type="float">
            <text:p>0,00045324074074074100</text:p>
          </table:table-cell>
          <table:table-cell table:formula="of:=[.D358]-[.D35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11" office:value-type="float" office:value="3927" calcext:value-type="float">
            <text:p>3927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0454513888888889" calcext:value-type="float">
            <text:p>0,00045451388888888900</text:p>
          </table:table-cell>
          <table:table-cell table:formula="of:=[.D359]-[.D35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11" office:value-type="float" office:value="3938" calcext:value-type="float">
            <text:p>3938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0455787037037037" calcext:value-type="float">
            <text:p>0,00045578703703703700</text:p>
          </table:table-cell>
          <table:table-cell table:formula="of:=[.D360]-[.D35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11" office:value-type="float" office:value="3949" calcext:value-type="float">
            <text:p>3949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0457060185185185" calcext:value-type="float">
            <text:p>0,00045706018518518500</text:p>
          </table:table-cell>
          <table:table-cell table:formula="of:=[.D361]-[.D36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11" office:value-type="float" office:value="3960" calcext:value-type="float">
            <text:p>396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0458333333333333" calcext:value-type="float">
            <text:p>0,00045833333333333300</text:p>
          </table:table-cell>
          <table:table-cell table:formula="of:=[.D362]-[.D36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11" office:value-type="float" office:value="3971" calcext:value-type="float">
            <text:p>3971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0459606481481481" calcext:value-type="float">
            <text:p>0,00045960648148148100</text:p>
          </table:table-cell>
          <table:table-cell table:formula="of:=[.D363]-[.D36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11" office:value-type="float" office:value="3982" calcext:value-type="float">
            <text:p>3982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046087962962963" calcext:value-type="float">
            <text:p>0,00046087962962963000</text:p>
          </table:table-cell>
          <table:table-cell table:formula="of:=[.D364]-[.D363]" office:value-type="float" office:value="0.00000127314814814819" calcext:value-type="float">
            <text:p>0,0000012731481481481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11" office:value-type="float" office:value="3993" calcext:value-type="float">
            <text:p>3993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0462152777777778" calcext:value-type="float">
            <text:p>0,00046215277777777800</text:p>
          </table:table-cell>
          <table:table-cell table:formula="of:=[.D365]-[.D36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11" office:value-type="float" office:value="4004" calcext:value-type="float">
            <text:p>4004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0463425925925926" calcext:value-type="float">
            <text:p>0,00046342592592592600</text:p>
          </table:table-cell>
          <table:table-cell table:formula="of:=[.D366]-[.D36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11" office:value-type="float" office:value="4015" calcext:value-type="float">
            <text:p>4015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0464699074074074" calcext:value-type="float">
            <text:p>0,00046469907407407400</text:p>
          </table:table-cell>
          <table:table-cell table:formula="of:=[.D367]-[.D36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11" office:value-type="float" office:value="4026" calcext:value-type="float">
            <text:p>4026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0465972222222222" calcext:value-type="float">
            <text:p>0,00046597222222222200</text:p>
          </table:table-cell>
          <table:table-cell table:formula="of:=[.D368]-[.D36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11" office:value-type="float" office:value="4037" calcext:value-type="float">
            <text:p>4037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046724537037037" calcext:value-type="float">
            <text:p>0,00046724537037037000</text:p>
          </table:table-cell>
          <table:table-cell table:formula="of:=[.D369]-[.D36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11" office:value-type="float" office:value="4048" calcext:value-type="float">
            <text:p>4048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0468518518518519" calcext:value-type="float">
            <text:p>0,00046851851851851900</text:p>
          </table:table-cell>
          <table:table-cell table:formula="of:=[.D370]-[.D36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11" office:value-type="float" office:value="4059" calcext:value-type="float">
            <text:p>4059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0469791666666667" calcext:value-type="float">
            <text:p>0,00046979166666666700</text:p>
          </table:table-cell>
          <table:table-cell table:formula="of:=[.D371]-[.D370]" office:value-type="float" office:value="0.00000127314814814819" calcext:value-type="float">
            <text:p>0,0000012731481481481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11" office:value-type="float" office:value="4070" calcext:value-type="float">
            <text:p>407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0471064814814815" calcext:value-type="float">
            <text:p>0,00047106481481481500</text:p>
          </table:table-cell>
          <table:table-cell table:formula="of:=[.D372]-[.D37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11" office:value-type="float" office:value="4081" calcext:value-type="float">
            <text:p>4081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0472337962962963" calcext:value-type="float">
            <text:p>0,00047233796296296300</text:p>
          </table:table-cell>
          <table:table-cell table:formula="of:=[.D373]-[.D37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11" office:value-type="float" office:value="4092" calcext:value-type="float">
            <text:p>4092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0473611111111111" calcext:value-type="float">
            <text:p>0,00047361111111111100</text:p>
          </table:table-cell>
          <table:table-cell table:formula="of:=[.D374]-[.D37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11" office:value-type="float" office:value="4103" calcext:value-type="float">
            <text:p>4103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0474884259259259" calcext:value-type="float">
            <text:p>0,00047488425925925900</text:p>
          </table:table-cell>
          <table:table-cell table:formula="of:=[.D375]-[.D37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11" office:value-type="float" office:value="4114" calcext:value-type="float">
            <text:p>4114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0476157407407407" calcext:value-type="float">
            <text:p>0,00047615740740740700</text:p>
          </table:table-cell>
          <table:table-cell table:formula="of:=[.D376]-[.D37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11" office:value-type="float" office:value="4125" calcext:value-type="float">
            <text:p>4125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0477430555555556" calcext:value-type="float">
            <text:p>0,00047743055555555600</text:p>
          </table:table-cell>
          <table:table-cell table:formula="of:=[.D377]-[.D37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11" office:value-type="float" office:value="4136" calcext:value-type="float">
            <text:p>4136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0478703703703704" calcext:value-type="float">
            <text:p>0,00047870370370370400</text:p>
          </table:table-cell>
          <table:table-cell table:formula="of:=[.D378]-[.D377]" office:value-type="float" office:value="0.00000127314814814819" calcext:value-type="float">
            <text:p>0,0000012731481481481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11" office:value-type="float" office:value="4147" calcext:value-type="float">
            <text:p>4147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0479976851851852" calcext:value-type="float">
            <text:p>0,00047997685185185200</text:p>
          </table:table-cell>
          <table:table-cell table:formula="of:=[.D379]-[.D37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11" office:value-type="float" office:value="4158" calcext:value-type="float">
            <text:p>4158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048125" calcext:value-type="float">
            <text:p>0,00048125000000000000</text:p>
          </table:table-cell>
          <table:table-cell table:formula="of:=[.D380]-[.D37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11" office:value-type="float" office:value="4169" calcext:value-type="float">
            <text:p>4169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0482523148148148" calcext:value-type="float">
            <text:p>0,00048252314814814800</text:p>
          </table:table-cell>
          <table:table-cell table:formula="of:=[.D381]-[.D38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11" office:value-type="float" office:value="4180" calcext:value-type="float">
            <text:p>418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0483796296296296" calcext:value-type="float">
            <text:p>0,00048379629629629600</text:p>
          </table:table-cell>
          <table:table-cell table:formula="of:=[.D382]-[.D38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11" office:value-type="float" office:value="4191" calcext:value-type="float">
            <text:p>4191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0485069444444444" calcext:value-type="float">
            <text:p>0,00048506944444444400</text:p>
          </table:table-cell>
          <table:table-cell table:formula="of:=[.D383]-[.D38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11" office:value-type="float" office:value="4202" calcext:value-type="float">
            <text:p>4202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0486342592592593" calcext:value-type="float">
            <text:p>0,00048634259259259300</text:p>
          </table:table-cell>
          <table:table-cell table:formula="of:=[.D384]-[.D38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11" office:value-type="float" office:value="4213" calcext:value-type="float">
            <text:p>4213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0487615740740741" calcext:value-type="float">
            <text:p>0,00048761574074074100</text:p>
          </table:table-cell>
          <table:table-cell table:formula="of:=[.D385]-[.D38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11" office:value-type="float" office:value="4224" calcext:value-type="float">
            <text:p>4224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0488888888888889" calcext:value-type="float">
            <text:p>0,00048888888888888900</text:p>
          </table:table-cell>
          <table:table-cell table:formula="of:=[.D386]-[.D38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11" office:value-type="float" office:value="4235" calcext:value-type="float">
            <text:p>4235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0490162037037037" calcext:value-type="float">
            <text:p>0,00049016203703703700</text:p>
          </table:table-cell>
          <table:table-cell table:formula="of:=[.D387]-[.D38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11" office:value-type="float" office:value="4246" calcext:value-type="float">
            <text:p>4246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0491435185185185" calcext:value-type="float">
            <text:p>0,00049143518518518500</text:p>
          </table:table-cell>
          <table:table-cell table:formula="of:=[.D388]-[.D38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11" office:value-type="float" office:value="4257" calcext:value-type="float">
            <text:p>4257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0492708333333333" calcext:value-type="float">
            <text:p>0,00049270833333333300</text:p>
          </table:table-cell>
          <table:table-cell table:formula="of:=[.D389]-[.D38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11" office:value-type="float" office:value="4268" calcext:value-type="float">
            <text:p>4268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0493981481481482" calcext:value-type="float">
            <text:p>0,00049398148148148200</text:p>
          </table:table-cell>
          <table:table-cell table:formula="of:=[.D390]-[.D38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11" office:value-type="float" office:value="4279" calcext:value-type="float">
            <text:p>4279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049525462962963" calcext:value-type="float">
            <text:p>0,00049525462962963000</text:p>
          </table:table-cell>
          <table:table-cell table:formula="of:=[.D391]-[.D39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11" office:value-type="float" office:value="4290" calcext:value-type="float">
            <text:p>429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0496527777777778" calcext:value-type="float">
            <text:p>0,00049652777777777800</text:p>
          </table:table-cell>
          <table:table-cell table:formula="of:=[.D392]-[.D39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11" office:value-type="float" office:value="4301" calcext:value-type="float">
            <text:p>4301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0497800925925926" calcext:value-type="float">
            <text:p>0,00049780092592592600</text:p>
          </table:table-cell>
          <table:table-cell table:formula="of:=[.D393]-[.D39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11" office:value-type="float" office:value="4312" calcext:value-type="float">
            <text:p>4312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0499074074074074" calcext:value-type="float">
            <text:p>0,00049907407407407400</text:p>
          </table:table-cell>
          <table:table-cell table:formula="of:=[.D394]-[.D39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11" office:value-type="float" office:value="4323" calcext:value-type="float">
            <text:p>4323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0500347222222222" calcext:value-type="float">
            <text:p>0,00050034722222222200</text:p>
          </table:table-cell>
          <table:table-cell table:formula="of:=[.D395]-[.D39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11" office:value-type="float" office:value="4334" calcext:value-type="float">
            <text:p>4334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050162037037037" calcext:value-type="float">
            <text:p>0,00050162037037037000</text:p>
          </table:table-cell>
          <table:table-cell table:formula="of:=[.D396]-[.D39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11" office:value-type="float" office:value="4345" calcext:value-type="float">
            <text:p>4345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0502893518518519" calcext:value-type="float">
            <text:p>0,00050289351851851900</text:p>
          </table:table-cell>
          <table:table-cell table:formula="of:=[.D397]-[.D39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11" office:value-type="float" office:value="4356" calcext:value-type="float">
            <text:p>4356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0504166666666667" calcext:value-type="float">
            <text:p>0,00050416666666666700</text:p>
          </table:table-cell>
          <table:table-cell table:formula="of:=[.D398]-[.D39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11" office:value-type="float" office:value="4367" calcext:value-type="float">
            <text:p>4367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0505439814814815" calcext:value-type="float">
            <text:p>0,00050543981481481500</text:p>
          </table:table-cell>
          <table:table-cell table:formula="of:=[.D399]-[.D39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11" office:value-type="float" office:value="4378" calcext:value-type="float">
            <text:p>4378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0506712962962963" calcext:value-type="float">
            <text:p>0,00050671296296296300</text:p>
          </table:table-cell>
          <table:table-cell table:formula="of:=[.D400]-[.D39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11" office:value-type="float" office:value="4389" calcext:value-type="float">
            <text:p>4389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0507986111111111" calcext:value-type="float">
            <text:p>0,00050798611111111100</text:p>
          </table:table-cell>
          <table:table-cell table:formula="of:=[.D401]-[.D40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11" office:value-type="float" office:value="4400" calcext:value-type="float">
            <text:p>44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0509259259259259" calcext:value-type="float">
            <text:p>0,00050925925925925900</text:p>
          </table:table-cell>
          <table:table-cell table:formula="of:=[.D402]-[.D40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11" office:value-type="float" office:value="4411" calcext:value-type="float">
            <text:p>4411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0510532407407407" calcext:value-type="float">
            <text:p>0,00051053240740740700</text:p>
          </table:table-cell>
          <table:table-cell table:formula="of:=[.D403]-[.D40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11" office:value-type="float" office:value="4422" calcext:value-type="float">
            <text:p>4422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0511805555555556" calcext:value-type="float">
            <text:p>0,00051180555555555600</text:p>
          </table:table-cell>
          <table:table-cell table:formula="of:=[.D404]-[.D40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11" office:value-type="float" office:value="4433" calcext:value-type="float">
            <text:p>4433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0513078703703704" calcext:value-type="float">
            <text:p>0,00051307870370370400</text:p>
          </table:table-cell>
          <table:table-cell table:formula="of:=[.D405]-[.D40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11" office:value-type="float" office:value="4444" calcext:value-type="float">
            <text:p>4444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0514351851851852" calcext:value-type="float">
            <text:p>0,00051435185185185200</text:p>
          </table:table-cell>
          <table:table-cell table:formula="of:=[.D406]-[.D40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11" office:value-type="float" office:value="4455" calcext:value-type="float">
            <text:p>4455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0515625" calcext:value-type="float">
            <text:p>0,00051562500000000000</text:p>
          </table:table-cell>
          <table:table-cell table:formula="of:=[.D407]-[.D40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11" office:value-type="float" office:value="4466" calcext:value-type="float">
            <text:p>4466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0516898148148148" calcext:value-type="float">
            <text:p>0,00051689814814814800</text:p>
          </table:table-cell>
          <table:table-cell table:formula="of:=[.D408]-[.D40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11" office:value-type="float" office:value="4477" calcext:value-type="float">
            <text:p>4477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0518171296296296" calcext:value-type="float">
            <text:p>0,00051817129629629600</text:p>
          </table:table-cell>
          <table:table-cell table:formula="of:=[.D409]-[.D40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11" office:value-type="float" office:value="4488" calcext:value-type="float">
            <text:p>4488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0519444444444444" calcext:value-type="float">
            <text:p>0,00051944444444444400</text:p>
          </table:table-cell>
          <table:table-cell table:formula="of:=[.D410]-[.D40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11" office:value-type="float" office:value="4499" calcext:value-type="float">
            <text:p>4499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0520717592592593" calcext:value-type="float">
            <text:p>0,00052071759259259300</text:p>
          </table:table-cell>
          <table:table-cell table:formula="of:=[.D411]-[.D41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11" office:value-type="float" office:value="4510" calcext:value-type="float">
            <text:p>451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0521990740740741" calcext:value-type="float">
            <text:p>0,00052199074074074100</text:p>
          </table:table-cell>
          <table:table-cell table:formula="of:=[.D412]-[.D41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11" office:value-type="float" office:value="4521" calcext:value-type="float">
            <text:p>4521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0523263888888889" calcext:value-type="float">
            <text:p>0,00052326388888888900</text:p>
          </table:table-cell>
          <table:table-cell table:formula="of:=[.D413]-[.D41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11" office:value-type="float" office:value="4532" calcext:value-type="float">
            <text:p>4532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0524537037037037" calcext:value-type="float">
            <text:p>0,00052453703703703700</text:p>
          </table:table-cell>
          <table:table-cell table:formula="of:=[.D414]-[.D41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11" office:value-type="float" office:value="4543" calcext:value-type="float">
            <text:p>4543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0525810185185185" calcext:value-type="float">
            <text:p>0,00052581018518518500</text:p>
          </table:table-cell>
          <table:table-cell table:formula="of:=[.D415]-[.D41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11" office:value-type="float" office:value="4554" calcext:value-type="float">
            <text:p>4554</text:p>
          </table:table-cell>
          <table:table-cell office:value-type="float" office:value="8640000" calcext:value-type="float">
            <text:p>8640000</text:p>
          </table:table-cell>
          <table:table-cell table:formula="of:=[.B415]/[.C415]" office:value-type="float" office:value="0.000527083333333333" calcext:value-type="float">
            <text:p>0,00052708333333333300</text:p>
          </table:table-cell>
          <table:table-cell table:formula="of:=[.D416]-[.D41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11" office:value-type="float" office:value="4565" calcext:value-type="float">
            <text:p>4565</text:p>
          </table:table-cell>
          <table:table-cell office:value-type="float" office:value="8640000" calcext:value-type="float">
            <text:p>8640000</text:p>
          </table:table-cell>
          <table:table-cell table:formula="of:=[.B416]/[.C416]" office:value-type="float" office:value="0.000528356481481481" calcext:value-type="float">
            <text:p>0,00052835648148148100</text:p>
          </table:table-cell>
          <table:table-cell table:formula="of:=[.D417]-[.D41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11" office:value-type="float" office:value="4576" calcext:value-type="float">
            <text:p>4576</text:p>
          </table:table-cell>
          <table:table-cell office:value-type="float" office:value="8640000" calcext:value-type="float">
            <text:p>8640000</text:p>
          </table:table-cell>
          <table:table-cell table:formula="of:=[.B417]/[.C417]" office:value-type="float" office:value="0.00052962962962963" calcext:value-type="float">
            <text:p>0,00052962962962963000</text:p>
          </table:table-cell>
          <table:table-cell table:formula="of:=[.D418]-[.D41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11" office:value-type="float" office:value="4587" calcext:value-type="float">
            <text:p>4587</text:p>
          </table:table-cell>
          <table:table-cell office:value-type="float" office:value="8640000" calcext:value-type="float">
            <text:p>8640000</text:p>
          </table:table-cell>
          <table:table-cell table:formula="of:=[.B418]/[.C418]" office:value-type="float" office:value="0.000530902777777778" calcext:value-type="float">
            <text:p>0,00053090277777777800</text:p>
          </table:table-cell>
          <table:table-cell table:formula="of:=[.D419]-[.D41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11" office:value-type="float" office:value="4598" calcext:value-type="float">
            <text:p>4598</text:p>
          </table:table-cell>
          <table:table-cell office:value-type="float" office:value="8640000" calcext:value-type="float">
            <text:p>8640000</text:p>
          </table:table-cell>
          <table:table-cell table:formula="of:=[.B419]/[.C419]" office:value-type="float" office:value="0.000532175925925926" calcext:value-type="float">
            <text:p>0,00053217592592592600</text:p>
          </table:table-cell>
          <table:table-cell table:formula="of:=[.D420]-[.D41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11" office:value-type="float" office:value="4609" calcext:value-type="float">
            <text:p>4609</text:p>
          </table:table-cell>
          <table:table-cell office:value-type="float" office:value="8640000" calcext:value-type="float">
            <text:p>8640000</text:p>
          </table:table-cell>
          <table:table-cell table:formula="of:=[.B420]/[.C420]" office:value-type="float" office:value="0.000533449074074074" calcext:value-type="float">
            <text:p>0,00053344907407407400</text:p>
          </table:table-cell>
          <table:table-cell table:formula="of:=[.D421]-[.D42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11" office:value-type="float" office:value="4620" calcext:value-type="float">
            <text:p>4620</text:p>
          </table:table-cell>
          <table:table-cell office:value-type="float" office:value="8640000" calcext:value-type="float">
            <text:p>8640000</text:p>
          </table:table-cell>
          <table:table-cell table:formula="of:=[.B421]/[.C421]" office:value-type="float" office:value="0.000534722222222222" calcext:value-type="float">
            <text:p>0,00053472222222222200</text:p>
          </table:table-cell>
          <table:table-cell table:formula="of:=[.D422]-[.D42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11" office:value-type="float" office:value="4631" calcext:value-type="float">
            <text:p>4631</text:p>
          </table:table-cell>
          <table:table-cell office:value-type="float" office:value="8640000" calcext:value-type="float">
            <text:p>8640000</text:p>
          </table:table-cell>
          <table:table-cell table:formula="of:=[.B422]/[.C422]" office:value-type="float" office:value="0.00053599537037037" calcext:value-type="float">
            <text:p>0,00053599537037037000</text:p>
          </table:table-cell>
          <table:table-cell table:formula="of:=[.D423]-[.D42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+11" office:value-type="float" office:value="4642" calcext:value-type="float">
            <text:p>4642</text:p>
          </table:table-cell>
          <table:table-cell office:value-type="float" office:value="8640000" calcext:value-type="float">
            <text:p>8640000</text:p>
          </table:table-cell>
          <table:table-cell table:formula="of:=[.B423]/[.C423]" office:value-type="float" office:value="0.000537268518518519" calcext:value-type="float">
            <text:p>0,00053726851851851900</text:p>
          </table:table-cell>
          <table:table-cell table:formula="of:=[.D424]-[.D42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+11" office:value-type="float" office:value="4653" calcext:value-type="float">
            <text:p>4653</text:p>
          </table:table-cell>
          <table:table-cell office:value-type="float" office:value="8640000" calcext:value-type="float">
            <text:p>8640000</text:p>
          </table:table-cell>
          <table:table-cell table:formula="of:=[.B424]/[.C424]" office:value-type="float" office:value="0.000538541666666667" calcext:value-type="float">
            <text:p>0,00053854166666666700</text:p>
          </table:table-cell>
          <table:table-cell table:formula="of:=[.D425]-[.D42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+11" office:value-type="float" office:value="4664" calcext:value-type="float">
            <text:p>4664</text:p>
          </table:table-cell>
          <table:table-cell office:value-type="float" office:value="8640000" calcext:value-type="float">
            <text:p>8640000</text:p>
          </table:table-cell>
          <table:table-cell table:formula="of:=[.B425]/[.C425]" office:value-type="float" office:value="0.000539814814814815" calcext:value-type="float">
            <text:p>0,00053981481481481500</text:p>
          </table:table-cell>
          <table:table-cell table:formula="of:=[.D426]-[.D42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+11" office:value-type="float" office:value="4675" calcext:value-type="float">
            <text:p>4675</text:p>
          </table:table-cell>
          <table:table-cell office:value-type="float" office:value="8640000" calcext:value-type="float">
            <text:p>8640000</text:p>
          </table:table-cell>
          <table:table-cell table:formula="of:=[.B426]/[.C426]" office:value-type="float" office:value="0.000541087962962963" calcext:value-type="float">
            <text:p>0,00054108796296296300</text:p>
          </table:table-cell>
          <table:table-cell table:formula="of:=[.D427]-[.D42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+11" office:value-type="float" office:value="4686" calcext:value-type="float">
            <text:p>4686</text:p>
          </table:table-cell>
          <table:table-cell office:value-type="float" office:value="8640000" calcext:value-type="float">
            <text:p>8640000</text:p>
          </table:table-cell>
          <table:table-cell table:formula="of:=[.B427]/[.C427]" office:value-type="float" office:value="0.000542361111111111" calcext:value-type="float">
            <text:p>0,00054236111111111100</text:p>
          </table:table-cell>
          <table:table-cell table:formula="of:=[.D428]-[.D42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+11" office:value-type="float" office:value="4697" calcext:value-type="float">
            <text:p>4697</text:p>
          </table:table-cell>
          <table:table-cell office:value-type="float" office:value="8640000" calcext:value-type="float">
            <text:p>8640000</text:p>
          </table:table-cell>
          <table:table-cell table:formula="of:=[.B428]/[.C428]" office:value-type="float" office:value="0.000543634259259259" calcext:value-type="float">
            <text:p>0,00054363425925925900</text:p>
          </table:table-cell>
          <table:table-cell table:formula="of:=[.D429]-[.D42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+11" office:value-type="float" office:value="4708" calcext:value-type="float">
            <text:p>4708</text:p>
          </table:table-cell>
          <table:table-cell office:value-type="float" office:value="8640000" calcext:value-type="float">
            <text:p>8640000</text:p>
          </table:table-cell>
          <table:table-cell table:formula="of:=[.B429]/[.C429]" office:value-type="float" office:value="0.000544907407407407" calcext:value-type="float">
            <text:p>0,00054490740740740700</text:p>
          </table:table-cell>
          <table:table-cell table:formula="of:=[.D430]-[.D42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+11" office:value-type="float" office:value="4719" calcext:value-type="float">
            <text:p>4719</text:p>
          </table:table-cell>
          <table:table-cell office:value-type="float" office:value="8640000" calcext:value-type="float">
            <text:p>8640000</text:p>
          </table:table-cell>
          <table:table-cell table:formula="of:=[.B430]/[.C430]" office:value-type="float" office:value="0.000546180555555556" calcext:value-type="float">
            <text:p>0,00054618055555555600</text:p>
          </table:table-cell>
          <table:table-cell table:formula="of:=[.D431]-[.D43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+11" office:value-type="float" office:value="4730" calcext:value-type="float">
            <text:p>4730</text:p>
          </table:table-cell>
          <table:table-cell office:value-type="float" office:value="8640000" calcext:value-type="float">
            <text:p>8640000</text:p>
          </table:table-cell>
          <table:table-cell table:formula="of:=[.B431]/[.C431]" office:value-type="float" office:value="0.000547453703703704" calcext:value-type="float">
            <text:p>0,00054745370370370400</text:p>
          </table:table-cell>
          <table:table-cell table:formula="of:=[.D432]-[.D43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1]+11" office:value-type="float" office:value="4741" calcext:value-type="float">
            <text:p>4741</text:p>
          </table:table-cell>
          <table:table-cell office:value-type="float" office:value="8640000" calcext:value-type="float">
            <text:p>8640000</text:p>
          </table:table-cell>
          <table:table-cell table:formula="of:=[.B432]/[.C432]" office:value-type="float" office:value="0.000548726851851852" calcext:value-type="float">
            <text:p>0,00054872685185185200</text:p>
          </table:table-cell>
          <table:table-cell table:formula="of:=[.D433]-[.D43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+11" office:value-type="float" office:value="4752" calcext:value-type="float">
            <text:p>4752</text:p>
          </table:table-cell>
          <table:table-cell office:value-type="float" office:value="8640000" calcext:value-type="float">
            <text:p>8640000</text:p>
          </table:table-cell>
          <table:table-cell table:formula="of:=[.B433]/[.C433]" office:value-type="float" office:value="0.00055" calcext:value-type="float">
            <text:p>0,00055000000000000000</text:p>
          </table:table-cell>
          <table:table-cell table:formula="of:=[.D434]-[.D43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+11" office:value-type="float" office:value="4763" calcext:value-type="float">
            <text:p>4763</text:p>
          </table:table-cell>
          <table:table-cell office:value-type="float" office:value="8640000" calcext:value-type="float">
            <text:p>8640000</text:p>
          </table:table-cell>
          <table:table-cell table:formula="of:=[.B434]/[.C434]" office:value-type="float" office:value="0.000551273148148148" calcext:value-type="float">
            <text:p>0,00055127314814814800</text:p>
          </table:table-cell>
          <table:table-cell table:formula="of:=[.D435]-[.D43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+11" office:value-type="float" office:value="4774" calcext:value-type="float">
            <text:p>4774</text:p>
          </table:table-cell>
          <table:table-cell office:value-type="float" office:value="8640000" calcext:value-type="float">
            <text:p>8640000</text:p>
          </table:table-cell>
          <table:table-cell table:formula="of:=[.B435]/[.C435]" office:value-type="float" office:value="0.000552546296296296" calcext:value-type="float">
            <text:p>0,00055254629629629600</text:p>
          </table:table-cell>
          <table:table-cell table:formula="of:=[.D436]-[.D43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+11" office:value-type="float" office:value="4785" calcext:value-type="float">
            <text:p>4785</text:p>
          </table:table-cell>
          <table:table-cell office:value-type="float" office:value="8640000" calcext:value-type="float">
            <text:p>8640000</text:p>
          </table:table-cell>
          <table:table-cell table:formula="of:=[.B436]/[.C436]" office:value-type="float" office:value="0.000553819444444445" calcext:value-type="float">
            <text:p>0,00055381944444444500</text:p>
          </table:table-cell>
          <table:table-cell table:formula="of:=[.D437]-[.D43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+11" office:value-type="float" office:value="4796" calcext:value-type="float">
            <text:p>4796</text:p>
          </table:table-cell>
          <table:table-cell office:value-type="float" office:value="8640000" calcext:value-type="float">
            <text:p>8640000</text:p>
          </table:table-cell>
          <table:table-cell table:formula="of:=[.B437]/[.C437]" office:value-type="float" office:value="0.000555092592592593" calcext:value-type="float">
            <text:p>0,00055509259259259300</text:p>
          </table:table-cell>
          <table:table-cell table:formula="of:=[.D438]-[.D43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7]+11" office:value-type="float" office:value="4807" calcext:value-type="float">
            <text:p>4807</text:p>
          </table:table-cell>
          <table:table-cell office:value-type="float" office:value="8640000" calcext:value-type="float">
            <text:p>8640000</text:p>
          </table:table-cell>
          <table:table-cell table:formula="of:=[.B438]/[.C438]" office:value-type="float" office:value="0.000556365740740741" calcext:value-type="float">
            <text:p>0,00055636574074074100</text:p>
          </table:table-cell>
          <table:table-cell table:formula="of:=[.D439]-[.D43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8]+11" office:value-type="float" office:value="4818" calcext:value-type="float">
            <text:p>4818</text:p>
          </table:table-cell>
          <table:table-cell office:value-type="float" office:value="8640000" calcext:value-type="float">
            <text:p>8640000</text:p>
          </table:table-cell>
          <table:table-cell table:formula="of:=[.B439]/[.C439]" office:value-type="float" office:value="0.000557638888888889" calcext:value-type="float">
            <text:p>0,00055763888888888900</text:p>
          </table:table-cell>
          <table:table-cell table:formula="of:=[.D440]-[.D43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39]+11" office:value-type="float" office:value="4829" calcext:value-type="float">
            <text:p>4829</text:p>
          </table:table-cell>
          <table:table-cell office:value-type="float" office:value="8640000" calcext:value-type="float">
            <text:p>8640000</text:p>
          </table:table-cell>
          <table:table-cell table:formula="of:=[.B440]/[.C440]" office:value-type="float" office:value="0.000558912037037037" calcext:value-type="float">
            <text:p>0,00055891203703703700</text:p>
          </table:table-cell>
          <table:table-cell table:formula="of:=[.D441]-[.D44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0]+11" office:value-type="float" office:value="4840" calcext:value-type="float">
            <text:p>4840</text:p>
          </table:table-cell>
          <table:table-cell office:value-type="float" office:value="8640000" calcext:value-type="float">
            <text:p>8640000</text:p>
          </table:table-cell>
          <table:table-cell table:formula="of:=[.B441]/[.C441]" office:value-type="float" office:value="0.000560185185185185" calcext:value-type="float">
            <text:p>0,00056018518518518500</text:p>
          </table:table-cell>
          <table:table-cell table:formula="of:=[.D442]-[.D44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1]+11" office:value-type="float" office:value="4851" calcext:value-type="float">
            <text:p>4851</text:p>
          </table:table-cell>
          <table:table-cell office:value-type="float" office:value="8640000" calcext:value-type="float">
            <text:p>8640000</text:p>
          </table:table-cell>
          <table:table-cell table:formula="of:=[.B442]/[.C442]" office:value-type="float" office:value="0.000561458333333333" calcext:value-type="float">
            <text:p>0,00056145833333333300</text:p>
          </table:table-cell>
          <table:table-cell table:formula="of:=[.D443]-[.D44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2]+11" office:value-type="float" office:value="4862" calcext:value-type="float">
            <text:p>4862</text:p>
          </table:table-cell>
          <table:table-cell office:value-type="float" office:value="8640000" calcext:value-type="float">
            <text:p>8640000</text:p>
          </table:table-cell>
          <table:table-cell table:formula="of:=[.B443]/[.C443]" office:value-type="float" office:value="0.000562731481481481" calcext:value-type="float">
            <text:p>0,00056273148148148100</text:p>
          </table:table-cell>
          <table:table-cell table:formula="of:=[.D444]-[.D44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3]+11" office:value-type="float" office:value="4873" calcext:value-type="float">
            <text:p>4873</text:p>
          </table:table-cell>
          <table:table-cell office:value-type="float" office:value="8640000" calcext:value-type="float">
            <text:p>8640000</text:p>
          </table:table-cell>
          <table:table-cell table:formula="of:=[.B444]/[.C444]" office:value-type="float" office:value="0.00056400462962963" calcext:value-type="float">
            <text:p>0,00056400462962963000</text:p>
          </table:table-cell>
          <table:table-cell table:formula="of:=[.D445]-[.D44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4]+11" office:value-type="float" office:value="4884" calcext:value-type="float">
            <text:p>4884</text:p>
          </table:table-cell>
          <table:table-cell office:value-type="float" office:value="8640000" calcext:value-type="float">
            <text:p>8640000</text:p>
          </table:table-cell>
          <table:table-cell table:formula="of:=[.B445]/[.C445]" office:value-type="float" office:value="0.000565277777777778" calcext:value-type="float">
            <text:p>0,00056527777777777800</text:p>
          </table:table-cell>
          <table:table-cell table:formula="of:=[.D446]-[.D44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5]+11" office:value-type="float" office:value="4895" calcext:value-type="float">
            <text:p>4895</text:p>
          </table:table-cell>
          <table:table-cell office:value-type="float" office:value="8640000" calcext:value-type="float">
            <text:p>8640000</text:p>
          </table:table-cell>
          <table:table-cell table:formula="of:=[.B446]/[.C446]" office:value-type="float" office:value="0.000566550925925926" calcext:value-type="float">
            <text:p>0,00056655092592592600</text:p>
          </table:table-cell>
          <table:table-cell table:formula="of:=[.D447]-[.D44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6]+11" office:value-type="float" office:value="4906" calcext:value-type="float">
            <text:p>4906</text:p>
          </table:table-cell>
          <table:table-cell office:value-type="float" office:value="8640000" calcext:value-type="float">
            <text:p>8640000</text:p>
          </table:table-cell>
          <table:table-cell table:formula="of:=[.B447]/[.C447]" office:value-type="float" office:value="0.000567824074074074" calcext:value-type="float">
            <text:p>0,00056782407407407400</text:p>
          </table:table-cell>
          <table:table-cell table:formula="of:=[.D448]-[.D44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7]+11" office:value-type="float" office:value="4917" calcext:value-type="float">
            <text:p>4917</text:p>
          </table:table-cell>
          <table:table-cell office:value-type="float" office:value="8640000" calcext:value-type="float">
            <text:p>8640000</text:p>
          </table:table-cell>
          <table:table-cell table:formula="of:=[.B448]/[.C448]" office:value-type="float" office:value="0.000569097222222222" calcext:value-type="float">
            <text:p>0,00056909722222222200</text:p>
          </table:table-cell>
          <table:table-cell table:formula="of:=[.D449]-[.D44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8]+11" office:value-type="float" office:value="4928" calcext:value-type="float">
            <text:p>4928</text:p>
          </table:table-cell>
          <table:table-cell office:value-type="float" office:value="8640000" calcext:value-type="float">
            <text:p>8640000</text:p>
          </table:table-cell>
          <table:table-cell table:formula="of:=[.B449]/[.C449]" office:value-type="float" office:value="0.00057037037037037" calcext:value-type="float">
            <text:p>0,00057037037037037000</text:p>
          </table:table-cell>
          <table:table-cell table:formula="of:=[.D450]-[.D44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49]+11" office:value-type="float" office:value="4939" calcext:value-type="float">
            <text:p>4939</text:p>
          </table:table-cell>
          <table:table-cell office:value-type="float" office:value="8640000" calcext:value-type="float">
            <text:p>8640000</text:p>
          </table:table-cell>
          <table:table-cell table:formula="of:=[.B450]/[.C450]" office:value-type="float" office:value="0.000571643518518519" calcext:value-type="float">
            <text:p>0,00057164351851851900</text:p>
          </table:table-cell>
          <table:table-cell table:formula="of:=[.D451]-[.D45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0]+11" office:value-type="float" office:value="4950" calcext:value-type="float">
            <text:p>4950</text:p>
          </table:table-cell>
          <table:table-cell office:value-type="float" office:value="8640000" calcext:value-type="float">
            <text:p>8640000</text:p>
          </table:table-cell>
          <table:table-cell table:formula="of:=[.B451]/[.C451]" office:value-type="float" office:value="0.000572916666666667" calcext:value-type="float">
            <text:p>0,00057291666666666700</text:p>
          </table:table-cell>
          <table:table-cell table:formula="of:=[.D452]-[.D45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1]+11" office:value-type="float" office:value="4961" calcext:value-type="float">
            <text:p>4961</text:p>
          </table:table-cell>
          <table:table-cell office:value-type="float" office:value="8640000" calcext:value-type="float">
            <text:p>8640000</text:p>
          </table:table-cell>
          <table:table-cell table:formula="of:=[.B452]/[.C452]" office:value-type="float" office:value="0.000574189814814815" calcext:value-type="float">
            <text:p>0,00057418981481481500</text:p>
          </table:table-cell>
          <table:table-cell table:formula="of:=[.D453]-[.D45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2]+11" office:value-type="float" office:value="4972" calcext:value-type="float">
            <text:p>4972</text:p>
          </table:table-cell>
          <table:table-cell office:value-type="float" office:value="8640000" calcext:value-type="float">
            <text:p>8640000</text:p>
          </table:table-cell>
          <table:table-cell table:formula="of:=[.B453]/[.C453]" office:value-type="float" office:value="0.000575462962962963" calcext:value-type="float">
            <text:p>0,00057546296296296300</text:p>
          </table:table-cell>
          <table:table-cell table:formula="of:=[.D454]-[.D45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3]+11" office:value-type="float" office:value="4983" calcext:value-type="float">
            <text:p>4983</text:p>
          </table:table-cell>
          <table:table-cell office:value-type="float" office:value="8640000" calcext:value-type="float">
            <text:p>8640000</text:p>
          </table:table-cell>
          <table:table-cell table:formula="of:=[.B454]/[.C454]" office:value-type="float" office:value="0.000576736111111111" calcext:value-type="float">
            <text:p>0,00057673611111111100</text:p>
          </table:table-cell>
          <table:table-cell table:formula="of:=[.D455]-[.D45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4]+11" office:value-type="float" office:value="4994" calcext:value-type="float">
            <text:p>4994</text:p>
          </table:table-cell>
          <table:table-cell office:value-type="float" office:value="8640000" calcext:value-type="float">
            <text:p>8640000</text:p>
          </table:table-cell>
          <table:table-cell table:formula="of:=[.B455]/[.C455]" office:value-type="float" office:value="0.000578009259259259" calcext:value-type="float">
            <text:p>0,00057800925925925900</text:p>
          </table:table-cell>
          <table:table-cell table:formula="of:=[.D456]-[.D45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5]+11" office:value-type="float" office:value="5005" calcext:value-type="float">
            <text:p>5005</text:p>
          </table:table-cell>
          <table:table-cell office:value-type="float" office:value="8640000" calcext:value-type="float">
            <text:p>8640000</text:p>
          </table:table-cell>
          <table:table-cell table:formula="of:=[.B456]/[.C456]" office:value-type="float" office:value="0.000579282407407407" calcext:value-type="float">
            <text:p>0,00057928240740740700</text:p>
          </table:table-cell>
          <table:table-cell table:formula="of:=[.D457]-[.D45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6]+11" office:value-type="float" office:value="5016" calcext:value-type="float">
            <text:p>5016</text:p>
          </table:table-cell>
          <table:table-cell office:value-type="float" office:value="8640000" calcext:value-type="float">
            <text:p>8640000</text:p>
          </table:table-cell>
          <table:table-cell table:formula="of:=[.B457]/[.C457]" office:value-type="float" office:value="0.000580555555555556" calcext:value-type="float">
            <text:p>0,00058055555555555600</text:p>
          </table:table-cell>
          <table:table-cell table:formula="of:=[.D458]-[.D45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7]+11" office:value-type="float" office:value="5027" calcext:value-type="float">
            <text:p>5027</text:p>
          </table:table-cell>
          <table:table-cell office:value-type="float" office:value="8640000" calcext:value-type="float">
            <text:p>8640000</text:p>
          </table:table-cell>
          <table:table-cell table:formula="of:=[.B458]/[.C458]" office:value-type="float" office:value="0.000581828703703704" calcext:value-type="float">
            <text:p>0,00058182870370370400</text:p>
          </table:table-cell>
          <table:table-cell table:formula="of:=[.D459]-[.D45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8]+11" office:value-type="float" office:value="5038" calcext:value-type="float">
            <text:p>5038</text:p>
          </table:table-cell>
          <table:table-cell office:value-type="float" office:value="8640000" calcext:value-type="float">
            <text:p>8640000</text:p>
          </table:table-cell>
          <table:table-cell table:formula="of:=[.B459]/[.C459]" office:value-type="float" office:value="0.000583101851851852" calcext:value-type="float">
            <text:p>0,00058310185185185200</text:p>
          </table:table-cell>
          <table:table-cell table:formula="of:=[.D460]-[.D45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59]+11" office:value-type="float" office:value="5049" calcext:value-type="float">
            <text:p>5049</text:p>
          </table:table-cell>
          <table:table-cell office:value-type="float" office:value="8640000" calcext:value-type="float">
            <text:p>8640000</text:p>
          </table:table-cell>
          <table:table-cell table:formula="of:=[.B460]/[.C460]" office:value-type="float" office:value="0.000584375" calcext:value-type="float">
            <text:p>0,00058437500000000000</text:p>
          </table:table-cell>
          <table:table-cell table:formula="of:=[.D461]-[.D46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0]+11" office:value-type="float" office:value="5060" calcext:value-type="float">
            <text:p>5060</text:p>
          </table:table-cell>
          <table:table-cell office:value-type="float" office:value="8640000" calcext:value-type="float">
            <text:p>8640000</text:p>
          </table:table-cell>
          <table:table-cell table:formula="of:=[.B461]/[.C461]" office:value-type="float" office:value="0.000585648148148148" calcext:value-type="float">
            <text:p>0,00058564814814814800</text:p>
          </table:table-cell>
          <table:table-cell table:formula="of:=[.D462]-[.D46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1]+11" office:value-type="float" office:value="5071" calcext:value-type="float">
            <text:p>5071</text:p>
          </table:table-cell>
          <table:table-cell office:value-type="float" office:value="8640000" calcext:value-type="float">
            <text:p>8640000</text:p>
          </table:table-cell>
          <table:table-cell table:formula="of:=[.B462]/[.C462]" office:value-type="float" office:value="0.000586921296296296" calcext:value-type="float">
            <text:p>0,00058692129629629600</text:p>
          </table:table-cell>
          <table:table-cell table:formula="of:=[.D463]-[.D46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2]+11" office:value-type="float" office:value="5082" calcext:value-type="float">
            <text:p>5082</text:p>
          </table:table-cell>
          <table:table-cell office:value-type="float" office:value="8640000" calcext:value-type="float">
            <text:p>8640000</text:p>
          </table:table-cell>
          <table:table-cell table:formula="of:=[.B463]/[.C463]" office:value-type="float" office:value="0.000588194444444445" calcext:value-type="float">
            <text:p>0,00058819444444444500</text:p>
          </table:table-cell>
          <table:table-cell table:formula="of:=[.D464]-[.D46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3]+11" office:value-type="float" office:value="5093" calcext:value-type="float">
            <text:p>5093</text:p>
          </table:table-cell>
          <table:table-cell office:value-type="float" office:value="8640000" calcext:value-type="float">
            <text:p>8640000</text:p>
          </table:table-cell>
          <table:table-cell table:formula="of:=[.B464]/[.C464]" office:value-type="float" office:value="0.000589467592592593" calcext:value-type="float">
            <text:p>0,00058946759259259300</text:p>
          </table:table-cell>
          <table:table-cell table:formula="of:=[.D465]-[.D46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4]+11" office:value-type="float" office:value="5104" calcext:value-type="float">
            <text:p>5104</text:p>
          </table:table-cell>
          <table:table-cell office:value-type="float" office:value="8640000" calcext:value-type="float">
            <text:p>8640000</text:p>
          </table:table-cell>
          <table:table-cell table:formula="of:=[.B465]/[.C465]" office:value-type="float" office:value="0.000590740740740741" calcext:value-type="float">
            <text:p>0,00059074074074074100</text:p>
          </table:table-cell>
          <table:table-cell table:formula="of:=[.D466]-[.D46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5]+11" office:value-type="float" office:value="5115" calcext:value-type="float">
            <text:p>5115</text:p>
          </table:table-cell>
          <table:table-cell office:value-type="float" office:value="8640000" calcext:value-type="float">
            <text:p>8640000</text:p>
          </table:table-cell>
          <table:table-cell table:formula="of:=[.B466]/[.C466]" office:value-type="float" office:value="0.000592013888888889" calcext:value-type="float">
            <text:p>0,00059201388888888900</text:p>
          </table:table-cell>
          <table:table-cell table:formula="of:=[.D467]-[.D46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6]+11" office:value-type="float" office:value="5126" calcext:value-type="float">
            <text:p>5126</text:p>
          </table:table-cell>
          <table:table-cell office:value-type="float" office:value="8640000" calcext:value-type="float">
            <text:p>8640000</text:p>
          </table:table-cell>
          <table:table-cell table:formula="of:=[.B467]/[.C467]" office:value-type="float" office:value="0.000593287037037037" calcext:value-type="float">
            <text:p>0,00059328703703703700</text:p>
          </table:table-cell>
          <table:table-cell table:formula="of:=[.D468]-[.D46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7]+11" office:value-type="float" office:value="5137" calcext:value-type="float">
            <text:p>5137</text:p>
          </table:table-cell>
          <table:table-cell office:value-type="float" office:value="8640000" calcext:value-type="float">
            <text:p>8640000</text:p>
          </table:table-cell>
          <table:table-cell table:formula="of:=[.B468]/[.C468]" office:value-type="float" office:value="0.000594560185185185" calcext:value-type="float">
            <text:p>0,00059456018518518500</text:p>
          </table:table-cell>
          <table:table-cell table:formula="of:=[.D469]-[.D46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8]+11" office:value-type="float" office:value="5148" calcext:value-type="float">
            <text:p>5148</text:p>
          </table:table-cell>
          <table:table-cell office:value-type="float" office:value="8640000" calcext:value-type="float">
            <text:p>8640000</text:p>
          </table:table-cell>
          <table:table-cell table:formula="of:=[.B469]/[.C469]" office:value-type="float" office:value="0.000595833333333333" calcext:value-type="float">
            <text:p>0,00059583333333333300</text:p>
          </table:table-cell>
          <table:table-cell table:formula="of:=[.D470]-[.D46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69]+11" office:value-type="float" office:value="5159" calcext:value-type="float">
            <text:p>5159</text:p>
          </table:table-cell>
          <table:table-cell office:value-type="float" office:value="8640000" calcext:value-type="float">
            <text:p>8640000</text:p>
          </table:table-cell>
          <table:table-cell table:formula="of:=[.B470]/[.C470]" office:value-type="float" office:value="0.000597106481481481" calcext:value-type="float">
            <text:p>0,00059710648148148100</text:p>
          </table:table-cell>
          <table:table-cell table:formula="of:=[.D471]-[.D47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0]+11" office:value-type="float" office:value="5170" calcext:value-type="float">
            <text:p>5170</text:p>
          </table:table-cell>
          <table:table-cell office:value-type="float" office:value="8640000" calcext:value-type="float">
            <text:p>8640000</text:p>
          </table:table-cell>
          <table:table-cell table:formula="of:=[.B471]/[.C471]" office:value-type="float" office:value="0.00059837962962963" calcext:value-type="float">
            <text:p>0,00059837962962963000</text:p>
          </table:table-cell>
          <table:table-cell table:formula="of:=[.D472]-[.D47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471]+11" office:value-type="float" office:value="5181" calcext:value-type="float">
            <text:p>5181</text:p>
          </table:table-cell>
          <table:table-cell office:value-type="float" office:value="8640000" calcext:value-type="float">
            <text:p>8640000</text:p>
          </table:table-cell>
          <table:table-cell table:formula="of:=[.B472]/[.C472]" office:value-type="float" office:value="0.000599652777777778" calcext:value-type="float">
            <text:p>0,00059965277777777800</text:p>
          </table:table-cell>
          <table:table-cell table:formula="of:=[.D473]-[.D47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2]+11" office:value-type="float" office:value="5192" calcext:value-type="float">
            <text:p>5192</text:p>
          </table:table-cell>
          <table:table-cell office:value-type="float" office:value="8640000" calcext:value-type="float">
            <text:p>8640000</text:p>
          </table:table-cell>
          <table:table-cell table:formula="of:=[.B473]/[.C473]" office:value-type="float" office:value="0.000600925925925926" calcext:value-type="float">
            <text:p>0,00060092592592592600</text:p>
          </table:table-cell>
          <table:table-cell table:formula="of:=[.D474]-[.D47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3]+11" office:value-type="float" office:value="5203" calcext:value-type="float">
            <text:p>5203</text:p>
          </table:table-cell>
          <table:table-cell office:value-type="float" office:value="8640000" calcext:value-type="float">
            <text:p>8640000</text:p>
          </table:table-cell>
          <table:table-cell table:formula="of:=[.B474]/[.C474]" office:value-type="float" office:value="0.000602199074074074" calcext:value-type="float">
            <text:p>0,00060219907407407400</text:p>
          </table:table-cell>
          <table:table-cell table:formula="of:=[.D475]-[.D47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4]+11" office:value-type="float" office:value="5214" calcext:value-type="float">
            <text:p>5214</text:p>
          </table:table-cell>
          <table:table-cell office:value-type="float" office:value="8640000" calcext:value-type="float">
            <text:p>8640000</text:p>
          </table:table-cell>
          <table:table-cell table:formula="of:=[.B475]/[.C475]" office:value-type="float" office:value="0.000603472222222222" calcext:value-type="float">
            <text:p>0,00060347222222222200</text:p>
          </table:table-cell>
          <table:table-cell table:formula="of:=[.D476]-[.D47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5]+11" office:value-type="float" office:value="5225" calcext:value-type="float">
            <text:p>5225</text:p>
          </table:table-cell>
          <table:table-cell office:value-type="float" office:value="8640000" calcext:value-type="float">
            <text:p>8640000</text:p>
          </table:table-cell>
          <table:table-cell table:formula="of:=[.B476]/[.C476]" office:value-type="float" office:value="0.00060474537037037" calcext:value-type="float">
            <text:p>0,00060474537037037000</text:p>
          </table:table-cell>
          <table:table-cell table:formula="of:=[.D477]-[.D47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6]+11" office:value-type="float" office:value="5236" calcext:value-type="float">
            <text:p>5236</text:p>
          </table:table-cell>
          <table:table-cell office:value-type="float" office:value="8640000" calcext:value-type="float">
            <text:p>8640000</text:p>
          </table:table-cell>
          <table:table-cell table:formula="of:=[.B477]/[.C477]" office:value-type="float" office:value="0.000606018518518519" calcext:value-type="float">
            <text:p>0,00060601851851851900</text:p>
          </table:table-cell>
          <table:table-cell table:formula="of:=[.D478]-[.D47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77]+11" office:value-type="float" office:value="5247" calcext:value-type="float">
            <text:p>5247</text:p>
          </table:table-cell>
          <table:table-cell office:value-type="float" office:value="8640000" calcext:value-type="float">
            <text:p>8640000</text:p>
          </table:table-cell>
          <table:table-cell table:formula="of:=[.B478]/[.C478]" office:value-type="float" office:value="0.000607291666666667" calcext:value-type="float">
            <text:p>0,00060729166666666700</text:p>
          </table:table-cell>
          <table:table-cell table:formula="of:=[.D479]-[.D47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78]+11" office:value-type="float" office:value="5258" calcext:value-type="float">
            <text:p>5258</text:p>
          </table:table-cell>
          <table:table-cell office:value-type="float" office:value="8640000" calcext:value-type="float">
            <text:p>8640000</text:p>
          </table:table-cell>
          <table:table-cell table:formula="of:=[.B479]/[.C479]" office:value-type="float" office:value="0.000608564814814815" calcext:value-type="float">
            <text:p>0,00060856481481481500</text:p>
          </table:table-cell>
          <table:table-cell table:formula="of:=[.D480]-[.D47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479]+11" office:value-type="float" office:value="5269" calcext:value-type="float">
            <text:p>5269</text:p>
          </table:table-cell>
          <table:table-cell office:value-type="float" office:value="8640000" calcext:value-type="float">
            <text:p>8640000</text:p>
          </table:table-cell>
          <table:table-cell table:formula="of:=[.B480]/[.C480]" office:value-type="float" office:value="0.000609837962962963" calcext:value-type="float">
            <text:p>0,00060983796296296300</text:p>
          </table:table-cell>
          <table:table-cell table:formula="of:=[.D481]-[.D48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480]+11" office:value-type="float" office:value="5280" calcext:value-type="float">
            <text:p>5280</text:p>
          </table:table-cell>
          <table:table-cell office:value-type="float" office:value="8640000" calcext:value-type="float">
            <text:p>8640000</text:p>
          </table:table-cell>
          <table:table-cell table:formula="of:=[.B481]/[.C481]" office:value-type="float" office:value="0.000611111111111111" calcext:value-type="float">
            <text:p>0,00061111111111111100</text:p>
          </table:table-cell>
          <table:table-cell table:formula="of:=[.D482]-[.D48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B481]+11" office:value-type="float" office:value="5291" calcext:value-type="float">
            <text:p>5291</text:p>
          </table:table-cell>
          <table:table-cell office:value-type="float" office:value="8640000" calcext:value-type="float">
            <text:p>8640000</text:p>
          </table:table-cell>
          <table:table-cell table:formula="of:=[.B482]/[.C482]" office:value-type="float" office:value="0.000612384259259259" calcext:value-type="float">
            <text:p>0,00061238425925925900</text:p>
          </table:table-cell>
          <table:table-cell table:formula="of:=[.D483]-[.D48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B482]+11" office:value-type="float" office:value="5302" calcext:value-type="float">
            <text:p>5302</text:p>
          </table:table-cell>
          <table:table-cell office:value-type="float" office:value="8640000" calcext:value-type="float">
            <text:p>8640000</text:p>
          </table:table-cell>
          <table:table-cell table:formula="of:=[.B483]/[.C483]" office:value-type="float" office:value="0.000613657407407407" calcext:value-type="float">
            <text:p>0,00061365740740740700</text:p>
          </table:table-cell>
          <table:table-cell table:formula="of:=[.D484]-[.D48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B483]+11" office:value-type="float" office:value="5313" calcext:value-type="float">
            <text:p>5313</text:p>
          </table:table-cell>
          <table:table-cell office:value-type="float" office:value="8640000" calcext:value-type="float">
            <text:p>8640000</text:p>
          </table:table-cell>
          <table:table-cell table:formula="of:=[.B484]/[.C484]" office:value-type="float" office:value="0.000614930555555556" calcext:value-type="float">
            <text:p>0,00061493055555555600</text:p>
          </table:table-cell>
          <table:table-cell table:formula="of:=[.D485]-[.D48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B484]+11" office:value-type="float" office:value="5324" calcext:value-type="float">
            <text:p>5324</text:p>
          </table:table-cell>
          <table:table-cell office:value-type="float" office:value="8640000" calcext:value-type="float">
            <text:p>8640000</text:p>
          </table:table-cell>
          <table:table-cell table:formula="of:=[.B485]/[.C485]" office:value-type="float" office:value="0.000616203703703704" calcext:value-type="float">
            <text:p>0,00061620370370370400</text:p>
          </table:table-cell>
          <table:table-cell table:formula="of:=[.D486]-[.D48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B485]+11" office:value-type="float" office:value="5335" calcext:value-type="float">
            <text:p>5335</text:p>
          </table:table-cell>
          <table:table-cell office:value-type="float" office:value="8640000" calcext:value-type="float">
            <text:p>8640000</text:p>
          </table:table-cell>
          <table:table-cell table:formula="of:=[.B486]/[.C486]" office:value-type="float" office:value="0.000617476851851852" calcext:value-type="float">
            <text:p>0,00061747685185185200</text:p>
          </table:table-cell>
          <table:table-cell table:formula="of:=[.D487]-[.D48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B486]+11" office:value-type="float" office:value="5346" calcext:value-type="float">
            <text:p>5346</text:p>
          </table:table-cell>
          <table:table-cell office:value-type="float" office:value="8640000" calcext:value-type="float">
            <text:p>8640000</text:p>
          </table:table-cell>
          <table:table-cell table:formula="of:=[.B487]/[.C487]" office:value-type="float" office:value="0.00061875" calcext:value-type="float">
            <text:p>0,00061875000000000000</text:p>
          </table:table-cell>
          <table:table-cell table:formula="of:=[.D488]-[.D48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B487]+11" office:value-type="float" office:value="5357" calcext:value-type="float">
            <text:p>5357</text:p>
          </table:table-cell>
          <table:table-cell office:value-type="float" office:value="8640000" calcext:value-type="float">
            <text:p>8640000</text:p>
          </table:table-cell>
          <table:table-cell table:formula="of:=[.B488]/[.C488]" office:value-type="float" office:value="0.000620023148148148" calcext:value-type="float">
            <text:p>0,00062002314814814800</text:p>
          </table:table-cell>
          <table:table-cell table:formula="of:=[.D489]-[.D48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B488]+11" office:value-type="float" office:value="5368" calcext:value-type="float">
            <text:p>5368</text:p>
          </table:table-cell>
          <table:table-cell office:value-type="float" office:value="8640000" calcext:value-type="float">
            <text:p>8640000</text:p>
          </table:table-cell>
          <table:table-cell table:formula="of:=[.B489]/[.C489]" office:value-type="float" office:value="0.000621296296296296" calcext:value-type="float">
            <text:p>0,00062129629629629600</text:p>
          </table:table-cell>
          <table:table-cell table:formula="of:=[.D490]-[.D48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489]+11" office:value-type="float" office:value="5379" calcext:value-type="float">
            <text:p>5379</text:p>
          </table:table-cell>
          <table:table-cell office:value-type="float" office:value="8640000" calcext:value-type="float">
            <text:p>8640000</text:p>
          </table:table-cell>
          <table:table-cell table:formula="of:=[.B490]/[.C490]" office:value-type="float" office:value="0.000622569444444445" calcext:value-type="float">
            <text:p>0,00062256944444444500</text:p>
          </table:table-cell>
          <table:table-cell table:formula="of:=[.D491]-[.D49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B490]+11" office:value-type="float" office:value="5390" calcext:value-type="float">
            <text:p>5390</text:p>
          </table:table-cell>
          <table:table-cell office:value-type="float" office:value="8640000" calcext:value-type="float">
            <text:p>8640000</text:p>
          </table:table-cell>
          <table:table-cell table:formula="of:=[.B491]/[.C491]" office:value-type="float" office:value="0.000623842592592593" calcext:value-type="float">
            <text:p>0,00062384259259259300</text:p>
          </table:table-cell>
          <table:table-cell table:formula="of:=[.D492]-[.D49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B491]+11" office:value-type="float" office:value="5401" calcext:value-type="float">
            <text:p>5401</text:p>
          </table:table-cell>
          <table:table-cell office:value-type="float" office:value="8640000" calcext:value-type="float">
            <text:p>8640000</text:p>
          </table:table-cell>
          <table:table-cell table:formula="of:=[.B492]/[.C492]" office:value-type="float" office:value="0.000625115740740741" calcext:value-type="float">
            <text:p>0,00062511574074074100</text:p>
          </table:table-cell>
          <table:table-cell table:formula="of:=[.D493]-[.D49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B492]+11" office:value-type="float" office:value="5412" calcext:value-type="float">
            <text:p>5412</text:p>
          </table:table-cell>
          <table:table-cell office:value-type="float" office:value="8640000" calcext:value-type="float">
            <text:p>8640000</text:p>
          </table:table-cell>
          <table:table-cell table:formula="of:=[.B493]/[.C493]" office:value-type="float" office:value="0.000626388888888889" calcext:value-type="float">
            <text:p>0,00062638888888888900</text:p>
          </table:table-cell>
          <table:table-cell table:formula="of:=[.D494]-[.D49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B493]+11" office:value-type="float" office:value="5423" calcext:value-type="float">
            <text:p>5423</text:p>
          </table:table-cell>
          <table:table-cell office:value-type="float" office:value="8640000" calcext:value-type="float">
            <text:p>8640000</text:p>
          </table:table-cell>
          <table:table-cell table:formula="of:=[.B494]/[.C494]" office:value-type="float" office:value="0.000627662037037037" calcext:value-type="float">
            <text:p>0,00062766203703703700</text:p>
          </table:table-cell>
          <table:table-cell table:formula="of:=[.D495]-[.D49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B494]+11" office:value-type="float" office:value="5434" calcext:value-type="float">
            <text:p>5434</text:p>
          </table:table-cell>
          <table:table-cell office:value-type="float" office:value="8640000" calcext:value-type="float">
            <text:p>8640000</text:p>
          </table:table-cell>
          <table:table-cell table:formula="of:=[.B495]/[.C495]" office:value-type="float" office:value="0.000628935185185185" calcext:value-type="float">
            <text:p>0,00062893518518518500</text:p>
          </table:table-cell>
          <table:table-cell table:formula="of:=[.D496]-[.D49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495]+11" office:value-type="float" office:value="5445" calcext:value-type="float">
            <text:p>5445</text:p>
          </table:table-cell>
          <table:table-cell office:value-type="float" office:value="8640000" calcext:value-type="float">
            <text:p>8640000</text:p>
          </table:table-cell>
          <table:table-cell table:formula="of:=[.B496]/[.C496]" office:value-type="float" office:value="0.000630208333333333" calcext:value-type="float">
            <text:p>0,00063020833333333300</text:p>
          </table:table-cell>
          <table:table-cell table:formula="of:=[.D497]-[.D49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B496]+11" office:value-type="float" office:value="5456" calcext:value-type="float">
            <text:p>5456</text:p>
          </table:table-cell>
          <table:table-cell office:value-type="float" office:value="8640000" calcext:value-type="float">
            <text:p>8640000</text:p>
          </table:table-cell>
          <table:table-cell table:formula="of:=[.B497]/[.C497]" office:value-type="float" office:value="0.000631481481481482" calcext:value-type="float">
            <text:p>0,00063148148148148200</text:p>
          </table:table-cell>
          <table:table-cell table:formula="of:=[.D498]-[.D49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B497]+11" office:value-type="float" office:value="5467" calcext:value-type="float">
            <text:p>5467</text:p>
          </table:table-cell>
          <table:table-cell office:value-type="float" office:value="8640000" calcext:value-type="float">
            <text:p>8640000</text:p>
          </table:table-cell>
          <table:table-cell table:formula="of:=[.B498]/[.C498]" office:value-type="float" office:value="0.00063275462962963" calcext:value-type="float">
            <text:p>0,00063275462962963000</text:p>
          </table:table-cell>
          <table:table-cell table:formula="of:=[.D499]-[.D49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B498]+11" office:value-type="float" office:value="5478" calcext:value-type="float">
            <text:p>5478</text:p>
          </table:table-cell>
          <table:table-cell office:value-type="float" office:value="8640000" calcext:value-type="float">
            <text:p>8640000</text:p>
          </table:table-cell>
          <table:table-cell table:formula="of:=[.B499]/[.C499]" office:value-type="float" office:value="0.000634027777777778" calcext:value-type="float">
            <text:p>0,00063402777777777800</text:p>
          </table:table-cell>
          <table:table-cell table:formula="of:=[.D500]-[.D49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B499]+11" office:value-type="float" office:value="5489" calcext:value-type="float">
            <text:p>5489</text:p>
          </table:table-cell>
          <table:table-cell office:value-type="float" office:value="8640000" calcext:value-type="float">
            <text:p>8640000</text:p>
          </table:table-cell>
          <table:table-cell table:formula="of:=[.B500]/[.C500]" office:value-type="float" office:value="0.000635300925925926" calcext:value-type="float">
            <text:p>0,00063530092592592600</text:p>
          </table:table-cell>
          <table:table-cell table:formula="of:=[.D501]-[.D50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500]+11" office:value-type="float" office:value="5500" calcext:value-type="float">
            <text:p>5500</text:p>
          </table:table-cell>
          <table:table-cell office:value-type="float" office:value="8640000" calcext:value-type="float">
            <text:p>8640000</text:p>
          </table:table-cell>
          <table:table-cell table:formula="of:=[.B501]/[.C501]" office:value-type="float" office:value="0.000636574074074074" calcext:value-type="float">
            <text:p>0,00063657407407407400</text:p>
          </table:table-cell>
          <table:table-cell table:formula="of:=[.D502]-[.D50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B501]+11" office:value-type="float" office:value="5511" calcext:value-type="float">
            <text:p>5511</text:p>
          </table:table-cell>
          <table:table-cell office:value-type="float" office:value="8640000" calcext:value-type="float">
            <text:p>8640000</text:p>
          </table:table-cell>
          <table:table-cell table:formula="of:=[.B502]/[.C502]" office:value-type="float" office:value="0.000637847222222222" calcext:value-type="float">
            <text:p>0,00063784722222222200</text:p>
          </table:table-cell>
          <table:table-cell table:formula="of:=[.D503]-[.D50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B502]+11" office:value-type="float" office:value="5522" calcext:value-type="float">
            <text:p>5522</text:p>
          </table:table-cell>
          <table:table-cell office:value-type="float" office:value="8640000" calcext:value-type="float">
            <text:p>8640000</text:p>
          </table:table-cell>
          <table:table-cell table:formula="of:=[.B503]/[.C503]" office:value-type="float" office:value="0.00063912037037037" calcext:value-type="float">
            <text:p>0,00063912037037037000</text:p>
          </table:table-cell>
          <table:table-cell table:formula="of:=[.D504]-[.D50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B503]+11" office:value-type="float" office:value="5533" calcext:value-type="float">
            <text:p>5533</text:p>
          </table:table-cell>
          <table:table-cell office:value-type="float" office:value="8640000" calcext:value-type="float">
            <text:p>8640000</text:p>
          </table:table-cell>
          <table:table-cell table:formula="of:=[.B504]/[.C504]" office:value-type="float" office:value="0.000640393518518519" calcext:value-type="float">
            <text:p>0,00064039351851851900</text:p>
          </table:table-cell>
          <table:table-cell table:formula="of:=[.D505]-[.D50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B504]+11" office:value-type="float" office:value="5544" calcext:value-type="float">
            <text:p>5544</text:p>
          </table:table-cell>
          <table:table-cell office:value-type="float" office:value="8640000" calcext:value-type="float">
            <text:p>8640000</text:p>
          </table:table-cell>
          <table:table-cell table:formula="of:=[.B505]/[.C505]" office:value-type="float" office:value="0.000641666666666667" calcext:value-type="float">
            <text:p>0,00064166666666666700</text:p>
          </table:table-cell>
          <table:table-cell table:formula="of:=[.D506]-[.D50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B505]+11" office:value-type="float" office:value="5555" calcext:value-type="float">
            <text:p>5555</text:p>
          </table:table-cell>
          <table:table-cell office:value-type="float" office:value="8640000" calcext:value-type="float">
            <text:p>8640000</text:p>
          </table:table-cell>
          <table:table-cell table:formula="of:=[.B506]/[.C506]" office:value-type="float" office:value="0.000642939814814815" calcext:value-type="float">
            <text:p>0,00064293981481481500</text:p>
          </table:table-cell>
          <table:table-cell table:formula="of:=[.D507]-[.D50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B506]+11" office:value-type="float" office:value="5566" calcext:value-type="float">
            <text:p>5566</text:p>
          </table:table-cell>
          <table:table-cell office:value-type="float" office:value="8640000" calcext:value-type="float">
            <text:p>8640000</text:p>
          </table:table-cell>
          <table:table-cell table:formula="of:=[.B507]/[.C507]" office:value-type="float" office:value="0.000644212962962963" calcext:value-type="float">
            <text:p>0,00064421296296296300</text:p>
          </table:table-cell>
          <table:table-cell table:formula="of:=[.D508]-[.D50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B507]+11" office:value-type="float" office:value="5577" calcext:value-type="float">
            <text:p>5577</text:p>
          </table:table-cell>
          <table:table-cell office:value-type="float" office:value="8640000" calcext:value-type="float">
            <text:p>8640000</text:p>
          </table:table-cell>
          <table:table-cell table:formula="of:=[.B508]/[.C508]" office:value-type="float" office:value="0.000645486111111111" calcext:value-type="float">
            <text:p>0,00064548611111111100</text:p>
          </table:table-cell>
          <table:table-cell table:formula="of:=[.D509]-[.D50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B508]+11" office:value-type="float" office:value="5588" calcext:value-type="float">
            <text:p>5588</text:p>
          </table:table-cell>
          <table:table-cell office:value-type="float" office:value="8640000" calcext:value-type="float">
            <text:p>8640000</text:p>
          </table:table-cell>
          <table:table-cell table:formula="of:=[.B509]/[.C509]" office:value-type="float" office:value="0.000646759259259259" calcext:value-type="float">
            <text:p>0,00064675925925925900</text:p>
          </table:table-cell>
          <table:table-cell table:formula="of:=[.D510]-[.D50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B509]+11" office:value-type="float" office:value="5599" calcext:value-type="float">
            <text:p>5599</text:p>
          </table:table-cell>
          <table:table-cell office:value-type="float" office:value="8640000" calcext:value-type="float">
            <text:p>8640000</text:p>
          </table:table-cell>
          <table:table-cell table:formula="of:=[.B510]/[.C510]" office:value-type="float" office:value="0.000648032407407407" calcext:value-type="float">
            <text:p>0,00064803240740740700</text:p>
          </table:table-cell>
          <table:table-cell table:formula="of:=[.D511]-[.D51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B510]+11" office:value-type="float" office:value="5610" calcext:value-type="float">
            <text:p>5610</text:p>
          </table:table-cell>
          <table:table-cell office:value-type="float" office:value="8640000" calcext:value-type="float">
            <text:p>8640000</text:p>
          </table:table-cell>
          <table:table-cell table:formula="of:=[.B511]/[.C511]" office:value-type="float" office:value="0.000649305555555556" calcext:value-type="float">
            <text:p>0,00064930555555555600</text:p>
          </table:table-cell>
          <table:table-cell table:formula="of:=[.D512]-[.D51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B511]+11" office:value-type="float" office:value="5621" calcext:value-type="float">
            <text:p>5621</text:p>
          </table:table-cell>
          <table:table-cell office:value-type="float" office:value="8640000" calcext:value-type="float">
            <text:p>8640000</text:p>
          </table:table-cell>
          <table:table-cell table:formula="of:=[.B512]/[.C512]" office:value-type="float" office:value="0.000650578703703704" calcext:value-type="float">
            <text:p>0,00065057870370370400</text:p>
          </table:table-cell>
          <table:table-cell table:formula="of:=[.D513]-[.D51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512]+11" office:value-type="float" office:value="5632" calcext:value-type="float">
            <text:p>5632</text:p>
          </table:table-cell>
          <table:table-cell office:value-type="float" office:value="8640000" calcext:value-type="float">
            <text:p>8640000</text:p>
          </table:table-cell>
          <table:table-cell table:formula="of:=[.B513]/[.C513]" office:value-type="float" office:value="0.000651851851851852" calcext:value-type="float">
            <text:p>0,00065185185185185200</text:p>
          </table:table-cell>
          <table:table-cell table:formula="of:=[.D514]-[.D51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B513]+11" office:value-type="float" office:value="5643" calcext:value-type="float">
            <text:p>5643</text:p>
          </table:table-cell>
          <table:table-cell office:value-type="float" office:value="8640000" calcext:value-type="float">
            <text:p>8640000</text:p>
          </table:table-cell>
          <table:table-cell table:formula="of:=[.B514]/[.C514]" office:value-type="float" office:value="0.000653125" calcext:value-type="float">
            <text:p>0,00065312500000000000</text:p>
          </table:table-cell>
          <table:table-cell table:formula="of:=[.D515]-[.D51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B514]+11" office:value-type="float" office:value="5654" calcext:value-type="float">
            <text:p>5654</text:p>
          </table:table-cell>
          <table:table-cell office:value-type="float" office:value="8640000" calcext:value-type="float">
            <text:p>8640000</text:p>
          </table:table-cell>
          <table:table-cell table:formula="of:=[.B515]/[.C515]" office:value-type="float" office:value="0.000654398148148148" calcext:value-type="float">
            <text:p>0,00065439814814814800</text:p>
          </table:table-cell>
          <table:table-cell table:formula="of:=[.D516]-[.D51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B515]+11" office:value-type="float" office:value="5665" calcext:value-type="float">
            <text:p>5665</text:p>
          </table:table-cell>
          <table:table-cell office:value-type="float" office:value="8640000" calcext:value-type="float">
            <text:p>8640000</text:p>
          </table:table-cell>
          <table:table-cell table:formula="of:=[.B516]/[.C516]" office:value-type="float" office:value="0.000655671296296296" calcext:value-type="float">
            <text:p>0,00065567129629629600</text:p>
          </table:table-cell>
          <table:table-cell table:formula="of:=[.D517]-[.D51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B516]+11" office:value-type="float" office:value="5676" calcext:value-type="float">
            <text:p>5676</text:p>
          </table:table-cell>
          <table:table-cell office:value-type="float" office:value="8640000" calcext:value-type="float">
            <text:p>8640000</text:p>
          </table:table-cell>
          <table:table-cell table:formula="of:=[.B517]/[.C517]" office:value-type="float" office:value="0.000656944444444445" calcext:value-type="float">
            <text:p>0,00065694444444444500</text:p>
          </table:table-cell>
          <table:table-cell table:formula="of:=[.D518]-[.D51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B517]+11" office:value-type="float" office:value="5687" calcext:value-type="float">
            <text:p>5687</text:p>
          </table:table-cell>
          <table:table-cell office:value-type="float" office:value="8640000" calcext:value-type="float">
            <text:p>8640000</text:p>
          </table:table-cell>
          <table:table-cell table:formula="of:=[.B518]/[.C518]" office:value-type="float" office:value="0.000658217592592593" calcext:value-type="float">
            <text:p>0,00065821759259259300</text:p>
          </table:table-cell>
          <table:table-cell table:formula="of:=[.D519]-[.D51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B518]+11" office:value-type="float" office:value="5698" calcext:value-type="float">
            <text:p>5698</text:p>
          </table:table-cell>
          <table:table-cell office:value-type="float" office:value="8640000" calcext:value-type="float">
            <text:p>8640000</text:p>
          </table:table-cell>
          <table:table-cell table:formula="of:=[.B519]/[.C519]" office:value-type="float" office:value="0.000659490740740741" calcext:value-type="float">
            <text:p>0,00065949074074074100</text:p>
          </table:table-cell>
          <table:table-cell table:formula="of:=[.D520]-[.D51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B519]+11" office:value-type="float" office:value="5709" calcext:value-type="float">
            <text:p>5709</text:p>
          </table:table-cell>
          <table:table-cell office:value-type="float" office:value="8640000" calcext:value-type="float">
            <text:p>8640000</text:p>
          </table:table-cell>
          <table:table-cell table:formula="of:=[.B520]/[.C520]" office:value-type="float" office:value="0.000660763888888889" calcext:value-type="float">
            <text:p>0,00066076388888888900</text:p>
          </table:table-cell>
          <table:table-cell table:formula="of:=[.D521]-[.D52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B520]+11" office:value-type="float" office:value="5720" calcext:value-type="float">
            <text:p>5720</text:p>
          </table:table-cell>
          <table:table-cell office:value-type="float" office:value="8640000" calcext:value-type="float">
            <text:p>8640000</text:p>
          </table:table-cell>
          <table:table-cell table:formula="of:=[.B521]/[.C521]" office:value-type="float" office:value="0.000662037037037037" calcext:value-type="float">
            <text:p>0,00066203703703703700</text:p>
          </table:table-cell>
          <table:table-cell table:formula="of:=[.D522]-[.D52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B521]+11" office:value-type="float" office:value="5731" calcext:value-type="float">
            <text:p>5731</text:p>
          </table:table-cell>
          <table:table-cell office:value-type="float" office:value="8640000" calcext:value-type="float">
            <text:p>8640000</text:p>
          </table:table-cell>
          <table:table-cell table:formula="of:=[.B522]/[.C522]" office:value-type="float" office:value="0.000663310185185185" calcext:value-type="float">
            <text:p>0,00066331018518518500</text:p>
          </table:table-cell>
          <table:table-cell table:formula="of:=[.D523]-[.D52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B522]+11" office:value-type="float" office:value="5742" calcext:value-type="float">
            <text:p>5742</text:p>
          </table:table-cell>
          <table:table-cell office:value-type="float" office:value="8640000" calcext:value-type="float">
            <text:p>8640000</text:p>
          </table:table-cell>
          <table:table-cell table:formula="of:=[.B523]/[.C523]" office:value-type="float" office:value="0.000664583333333333" calcext:value-type="float">
            <text:p>0,00066458333333333300</text:p>
          </table:table-cell>
          <table:table-cell table:formula="of:=[.D524]-[.D52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B523]+11" office:value-type="float" office:value="5753" calcext:value-type="float">
            <text:p>5753</text:p>
          </table:table-cell>
          <table:table-cell office:value-type="float" office:value="8640000" calcext:value-type="float">
            <text:p>8640000</text:p>
          </table:table-cell>
          <table:table-cell table:formula="of:=[.B524]/[.C524]" office:value-type="float" office:value="0.000665856481481482" calcext:value-type="float">
            <text:p>0,00066585648148148200</text:p>
          </table:table-cell>
          <table:table-cell table:formula="of:=[.D525]-[.D52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B524]+11" office:value-type="float" office:value="5764" calcext:value-type="float">
            <text:p>5764</text:p>
          </table:table-cell>
          <table:table-cell office:value-type="float" office:value="8640000" calcext:value-type="float">
            <text:p>8640000</text:p>
          </table:table-cell>
          <table:table-cell table:formula="of:=[.B525]/[.C525]" office:value-type="float" office:value="0.00066712962962963" calcext:value-type="float">
            <text:p>0,00066712962962963000</text:p>
          </table:table-cell>
          <table:table-cell table:formula="of:=[.D526]-[.D52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B525]+11" office:value-type="float" office:value="5775" calcext:value-type="float">
            <text:p>5775</text:p>
          </table:table-cell>
          <table:table-cell office:value-type="float" office:value="8640000" calcext:value-type="float">
            <text:p>8640000</text:p>
          </table:table-cell>
          <table:table-cell table:formula="of:=[.B526]/[.C526]" office:value-type="float" office:value="0.000668402777777778" calcext:value-type="float">
            <text:p>0,00066840277777777800</text:p>
          </table:table-cell>
          <table:table-cell table:formula="of:=[.D527]-[.D52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B526]+11" office:value-type="float" office:value="5786" calcext:value-type="float">
            <text:p>5786</text:p>
          </table:table-cell>
          <table:table-cell office:value-type="float" office:value="8640000" calcext:value-type="float">
            <text:p>8640000</text:p>
          </table:table-cell>
          <table:table-cell table:formula="of:=[.B527]/[.C527]" office:value-type="float" office:value="0.000669675925925926" calcext:value-type="float">
            <text:p>0,00066967592592592600</text:p>
          </table:table-cell>
          <table:table-cell table:formula="of:=[.D528]-[.D52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B527]+11" office:value-type="float" office:value="5797" calcext:value-type="float">
            <text:p>5797</text:p>
          </table:table-cell>
          <table:table-cell office:value-type="float" office:value="8640000" calcext:value-type="float">
            <text:p>8640000</text:p>
          </table:table-cell>
          <table:table-cell table:formula="of:=[.B528]/[.C528]" office:value-type="float" office:value="0.000670949074074074" calcext:value-type="float">
            <text:p>0,00067094907407407400</text:p>
          </table:table-cell>
          <table:table-cell table:formula="of:=[.D529]-[.D52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B528]+11" office:value-type="float" office:value="5808" calcext:value-type="float">
            <text:p>5808</text:p>
          </table:table-cell>
          <table:table-cell office:value-type="float" office:value="8640000" calcext:value-type="float">
            <text:p>8640000</text:p>
          </table:table-cell>
          <table:table-cell table:formula="of:=[.B529]/[.C529]" office:value-type="float" office:value="0.000672222222222222" calcext:value-type="float">
            <text:p>0,00067222222222222200</text:p>
          </table:table-cell>
          <table:table-cell table:formula="of:=[.D530]-[.D52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B529]+11" office:value-type="float" office:value="5819" calcext:value-type="float">
            <text:p>5819</text:p>
          </table:table-cell>
          <table:table-cell office:value-type="float" office:value="8640000" calcext:value-type="float">
            <text:p>8640000</text:p>
          </table:table-cell>
          <table:table-cell table:formula="of:=[.B530]/[.C530]" office:value-type="float" office:value="0.00067349537037037" calcext:value-type="float">
            <text:p>0,00067349537037037000</text:p>
          </table:table-cell>
          <table:table-cell table:formula="of:=[.D531]-[.D53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B530]+11" office:value-type="float" office:value="5830" calcext:value-type="float">
            <text:p>5830</text:p>
          </table:table-cell>
          <table:table-cell office:value-type="float" office:value="8640000" calcext:value-type="float">
            <text:p>8640000</text:p>
          </table:table-cell>
          <table:table-cell table:formula="of:=[.B531]/[.C531]" office:value-type="float" office:value="0.000674768518518519" calcext:value-type="float">
            <text:p>0,00067476851851851900</text:p>
          </table:table-cell>
          <table:table-cell table:formula="of:=[.D532]-[.D53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B531]+11" office:value-type="float" office:value="5841" calcext:value-type="float">
            <text:p>5841</text:p>
          </table:table-cell>
          <table:table-cell office:value-type="float" office:value="8640000" calcext:value-type="float">
            <text:p>8640000</text:p>
          </table:table-cell>
          <table:table-cell table:formula="of:=[.B532]/[.C532]" office:value-type="float" office:value="0.000676041666666667" calcext:value-type="float">
            <text:p>0,00067604166666666700</text:p>
          </table:table-cell>
          <table:table-cell table:formula="of:=[.D533]-[.D53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B532]+11" office:value-type="float" office:value="5852" calcext:value-type="float">
            <text:p>5852</text:p>
          </table:table-cell>
          <table:table-cell office:value-type="float" office:value="8640000" calcext:value-type="float">
            <text:p>8640000</text:p>
          </table:table-cell>
          <table:table-cell table:formula="of:=[.B533]/[.C533]" office:value-type="float" office:value="0.000677314814814815" calcext:value-type="float">
            <text:p>0,00067731481481481500</text:p>
          </table:table-cell>
          <table:table-cell table:formula="of:=[.D534]-[.D53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B533]+11" office:value-type="float" office:value="5863" calcext:value-type="float">
            <text:p>5863</text:p>
          </table:table-cell>
          <table:table-cell office:value-type="float" office:value="8640000" calcext:value-type="float">
            <text:p>8640000</text:p>
          </table:table-cell>
          <table:table-cell table:formula="of:=[.B534]/[.C534]" office:value-type="float" office:value="0.000678587962962963" calcext:value-type="float">
            <text:p>0,00067858796296296300</text:p>
          </table:table-cell>
          <table:table-cell table:formula="of:=[.D535]-[.D53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B534]+11" office:value-type="float" office:value="5874" calcext:value-type="float">
            <text:p>5874</text:p>
          </table:table-cell>
          <table:table-cell office:value-type="float" office:value="8640000" calcext:value-type="float">
            <text:p>8640000</text:p>
          </table:table-cell>
          <table:table-cell table:formula="of:=[.B535]/[.C535]" office:value-type="float" office:value="0.000679861111111111" calcext:value-type="float">
            <text:p>0,00067986111111111100</text:p>
          </table:table-cell>
          <table:table-cell table:formula="of:=[.D536]-[.D53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B535]+11" office:value-type="float" office:value="5885" calcext:value-type="float">
            <text:p>5885</text:p>
          </table:table-cell>
          <table:table-cell office:value-type="float" office:value="8640000" calcext:value-type="float">
            <text:p>8640000</text:p>
          </table:table-cell>
          <table:table-cell table:formula="of:=[.B536]/[.C536]" office:value-type="float" office:value="0.000681134259259259" calcext:value-type="float">
            <text:p>0,00068113425925925900</text:p>
          </table:table-cell>
          <table:table-cell table:formula="of:=[.D537]-[.D53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B536]+11" office:value-type="float" office:value="5896" calcext:value-type="float">
            <text:p>5896</text:p>
          </table:table-cell>
          <table:table-cell office:value-type="float" office:value="8640000" calcext:value-type="float">
            <text:p>8640000</text:p>
          </table:table-cell>
          <table:table-cell table:formula="of:=[.B537]/[.C537]" office:value-type="float" office:value="0.000682407407407407" calcext:value-type="float">
            <text:p>0,00068240740740740700</text:p>
          </table:table-cell>
          <table:table-cell table:formula="of:=[.D538]-[.D53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B537]+11" office:value-type="float" office:value="5907" calcext:value-type="float">
            <text:p>5907</text:p>
          </table:table-cell>
          <table:table-cell office:value-type="float" office:value="8640000" calcext:value-type="float">
            <text:p>8640000</text:p>
          </table:table-cell>
          <table:table-cell table:formula="of:=[.B538]/[.C538]" office:value-type="float" office:value="0.000683680555555556" calcext:value-type="float">
            <text:p>0,00068368055555555600</text:p>
          </table:table-cell>
          <table:table-cell table:formula="of:=[.D539]-[.D53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B538]+11" office:value-type="float" office:value="5918" calcext:value-type="float">
            <text:p>5918</text:p>
          </table:table-cell>
          <table:table-cell office:value-type="float" office:value="8640000" calcext:value-type="float">
            <text:p>8640000</text:p>
          </table:table-cell>
          <table:table-cell table:formula="of:=[.B539]/[.C539]" office:value-type="float" office:value="0.000684953703703704" calcext:value-type="float">
            <text:p>0,00068495370370370400</text:p>
          </table:table-cell>
          <table:table-cell table:formula="of:=[.D540]-[.D53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B539]+11" office:value-type="float" office:value="5929" calcext:value-type="float">
            <text:p>5929</text:p>
          </table:table-cell>
          <table:table-cell office:value-type="float" office:value="8640000" calcext:value-type="float">
            <text:p>8640000</text:p>
          </table:table-cell>
          <table:table-cell table:formula="of:=[.B540]/[.C540]" office:value-type="float" office:value="0.000686226851851852" calcext:value-type="float">
            <text:p>0,00068622685185185200</text:p>
          </table:table-cell>
          <table:table-cell table:formula="of:=[.D541]-[.D54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B540]+11" office:value-type="float" office:value="5940" calcext:value-type="float">
            <text:p>5940</text:p>
          </table:table-cell>
          <table:table-cell office:value-type="float" office:value="8640000" calcext:value-type="float">
            <text:p>8640000</text:p>
          </table:table-cell>
          <table:table-cell table:formula="of:=[.B541]/[.C541]" office:value-type="float" office:value="0.0006875" calcext:value-type="float">
            <text:p>0,00068750000000000000</text:p>
          </table:table-cell>
          <table:table-cell table:formula="of:=[.D542]-[.D54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B541]+11" office:value-type="float" office:value="5951" calcext:value-type="float">
            <text:p>5951</text:p>
          </table:table-cell>
          <table:table-cell office:value-type="float" office:value="8640000" calcext:value-type="float">
            <text:p>8640000</text:p>
          </table:table-cell>
          <table:table-cell table:formula="of:=[.B542]/[.C542]" office:value-type="float" office:value="0.000688773148148148" calcext:value-type="float">
            <text:p>0,00068877314814814800</text:p>
          </table:table-cell>
          <table:table-cell table:formula="of:=[.D543]-[.D54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B542]+11" office:value-type="float" office:value="5962" calcext:value-type="float">
            <text:p>5962</text:p>
          </table:table-cell>
          <table:table-cell office:value-type="float" office:value="8640000" calcext:value-type="float">
            <text:p>8640000</text:p>
          </table:table-cell>
          <table:table-cell table:formula="of:=[.B543]/[.C543]" office:value-type="float" office:value="0.000690046296296296" calcext:value-type="float">
            <text:p>0,00069004629629629600</text:p>
          </table:table-cell>
          <table:table-cell table:formula="of:=[.D544]-[.D54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B543]+11" office:value-type="float" office:value="5973" calcext:value-type="float">
            <text:p>5973</text:p>
          </table:table-cell>
          <table:table-cell office:value-type="float" office:value="8640000" calcext:value-type="float">
            <text:p>8640000</text:p>
          </table:table-cell>
          <table:table-cell table:formula="of:=[.B544]/[.C544]" office:value-type="float" office:value="0.000691319444444445" calcext:value-type="float">
            <text:p>0,00069131944444444500</text:p>
          </table:table-cell>
          <table:table-cell table:formula="of:=[.D545]-[.D54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B544]+11" office:value-type="float" office:value="5984" calcext:value-type="float">
            <text:p>5984</text:p>
          </table:table-cell>
          <table:table-cell office:value-type="float" office:value="8640000" calcext:value-type="float">
            <text:p>8640000</text:p>
          </table:table-cell>
          <table:table-cell table:formula="of:=[.B545]/[.C545]" office:value-type="float" office:value="0.000692592592592593" calcext:value-type="float">
            <text:p>0,00069259259259259300</text:p>
          </table:table-cell>
          <table:table-cell table:formula="of:=[.D546]-[.D54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B545]+11" office:value-type="float" office:value="5995" calcext:value-type="float">
            <text:p>5995</text:p>
          </table:table-cell>
          <table:table-cell office:value-type="float" office:value="8640000" calcext:value-type="float">
            <text:p>8640000</text:p>
          </table:table-cell>
          <table:table-cell table:formula="of:=[.B546]/[.C546]" office:value-type="float" office:value="0.000693865740740741" calcext:value-type="float">
            <text:p>0,00069386574074074100</text:p>
          </table:table-cell>
          <table:table-cell table:formula="of:=[.D547]-[.D54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B546]+11" office:value-type="float" office:value="6006" calcext:value-type="float">
            <text:p>6006</text:p>
          </table:table-cell>
          <table:table-cell office:value-type="float" office:value="8640000" calcext:value-type="float">
            <text:p>8640000</text:p>
          </table:table-cell>
          <table:table-cell table:formula="of:=[.B547]/[.C547]" office:value-type="float" office:value="0.000695138888888889" calcext:value-type="float">
            <text:p>0,00069513888888888900</text:p>
          </table:table-cell>
          <table:table-cell table:formula="of:=[.D548]-[.D54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B547]+11" office:value-type="float" office:value="6017" calcext:value-type="float">
            <text:p>6017</text:p>
          </table:table-cell>
          <table:table-cell office:value-type="float" office:value="8640000" calcext:value-type="float">
            <text:p>8640000</text:p>
          </table:table-cell>
          <table:table-cell table:formula="of:=[.B548]/[.C548]" office:value-type="float" office:value="0.000696412037037037" calcext:value-type="float">
            <text:p>0,00069641203703703700</text:p>
          </table:table-cell>
          <table:table-cell table:formula="of:=[.D549]-[.D54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B548]+11" office:value-type="float" office:value="6028" calcext:value-type="float">
            <text:p>6028</text:p>
          </table:table-cell>
          <table:table-cell office:value-type="float" office:value="8640000" calcext:value-type="float">
            <text:p>8640000</text:p>
          </table:table-cell>
          <table:table-cell table:formula="of:=[.B549]/[.C549]" office:value-type="float" office:value="0.000697685185185185" calcext:value-type="float">
            <text:p>0,00069768518518518500</text:p>
          </table:table-cell>
          <table:table-cell table:formula="of:=[.D550]-[.D54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B549]+11" office:value-type="float" office:value="6039" calcext:value-type="float">
            <text:p>6039</text:p>
          </table:table-cell>
          <table:table-cell office:value-type="float" office:value="8640000" calcext:value-type="float">
            <text:p>8640000</text:p>
          </table:table-cell>
          <table:table-cell table:formula="of:=[.B550]/[.C550]" office:value-type="float" office:value="0.000698958333333333" calcext:value-type="float">
            <text:p>0,00069895833333333300</text:p>
          </table:table-cell>
          <table:table-cell table:formula="of:=[.D551]-[.D55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B550]+11" office:value-type="float" office:value="6050" calcext:value-type="float">
            <text:p>6050</text:p>
          </table:table-cell>
          <table:table-cell office:value-type="float" office:value="8640000" calcext:value-type="float">
            <text:p>8640000</text:p>
          </table:table-cell>
          <table:table-cell table:formula="of:=[.B551]/[.C551]" office:value-type="float" office:value="0.000700231481481482" calcext:value-type="float">
            <text:p>0,00070023148148148200</text:p>
          </table:table-cell>
          <table:table-cell table:formula="of:=[.D552]-[.D55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B551]+11" office:value-type="float" office:value="6061" calcext:value-type="float">
            <text:p>6061</text:p>
          </table:table-cell>
          <table:table-cell office:value-type="float" office:value="8640000" calcext:value-type="float">
            <text:p>8640000</text:p>
          </table:table-cell>
          <table:table-cell table:formula="of:=[.B552]/[.C552]" office:value-type="float" office:value="0.00070150462962963" calcext:value-type="float">
            <text:p>0,00070150462962963000</text:p>
          </table:table-cell>
          <table:table-cell table:formula="of:=[.D553]-[.D55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B552]+11" office:value-type="float" office:value="6072" calcext:value-type="float">
            <text:p>6072</text:p>
          </table:table-cell>
          <table:table-cell office:value-type="float" office:value="8640000" calcext:value-type="float">
            <text:p>8640000</text:p>
          </table:table-cell>
          <table:table-cell table:formula="of:=[.B553]/[.C553]" office:value-type="float" office:value="0.000702777777777778" calcext:value-type="float">
            <text:p>0,00070277777777777800</text:p>
          </table:table-cell>
          <table:table-cell table:formula="of:=[.D554]-[.D55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B553]+11" office:value-type="float" office:value="6083" calcext:value-type="float">
            <text:p>6083</text:p>
          </table:table-cell>
          <table:table-cell office:value-type="float" office:value="8640000" calcext:value-type="float">
            <text:p>8640000</text:p>
          </table:table-cell>
          <table:table-cell table:formula="of:=[.B554]/[.C554]" office:value-type="float" office:value="0.000704050925925926" calcext:value-type="float">
            <text:p>0,00070405092592592600</text:p>
          </table:table-cell>
          <table:table-cell table:formula="of:=[.D555]-[.D55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B554]+11" office:value-type="float" office:value="6094" calcext:value-type="float">
            <text:p>6094</text:p>
          </table:table-cell>
          <table:table-cell office:value-type="float" office:value="8640000" calcext:value-type="float">
            <text:p>8640000</text:p>
          </table:table-cell>
          <table:table-cell table:formula="of:=[.B555]/[.C555]" office:value-type="float" office:value="0.000705324074074074" calcext:value-type="float">
            <text:p>0,00070532407407407400</text:p>
          </table:table-cell>
          <table:table-cell table:formula="of:=[.D556]-[.D55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B555]+11" office:value-type="float" office:value="6105" calcext:value-type="float">
            <text:p>6105</text:p>
          </table:table-cell>
          <table:table-cell office:value-type="float" office:value="8640000" calcext:value-type="float">
            <text:p>8640000</text:p>
          </table:table-cell>
          <table:table-cell table:formula="of:=[.B556]/[.C556]" office:value-type="float" office:value="0.000706597222222222" calcext:value-type="float">
            <text:p>0,00070659722222222200</text:p>
          </table:table-cell>
          <table:table-cell table:formula="of:=[.D557]-[.D55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B556]+11" office:value-type="float" office:value="6116" calcext:value-type="float">
            <text:p>6116</text:p>
          </table:table-cell>
          <table:table-cell office:value-type="float" office:value="8640000" calcext:value-type="float">
            <text:p>8640000</text:p>
          </table:table-cell>
          <table:table-cell table:formula="of:=[.B557]/[.C557]" office:value-type="float" office:value="0.00070787037037037" calcext:value-type="float">
            <text:p>0,00070787037037037000</text:p>
          </table:table-cell>
          <table:table-cell table:formula="of:=[.D558]-[.D55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B557]+11" office:value-type="float" office:value="6127" calcext:value-type="float">
            <text:p>6127</text:p>
          </table:table-cell>
          <table:table-cell office:value-type="float" office:value="8640000" calcext:value-type="float">
            <text:p>8640000</text:p>
          </table:table-cell>
          <table:table-cell table:formula="of:=[.B558]/[.C558]" office:value-type="float" office:value="0.000709143518518519" calcext:value-type="float">
            <text:p>0,00070914351851851900</text:p>
          </table:table-cell>
          <table:table-cell table:formula="of:=[.D559]-[.D55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B558]+11" office:value-type="float" office:value="6138" calcext:value-type="float">
            <text:p>6138</text:p>
          </table:table-cell>
          <table:table-cell office:value-type="float" office:value="8640000" calcext:value-type="float">
            <text:p>8640000</text:p>
          </table:table-cell>
          <table:table-cell table:formula="of:=[.B559]/[.C559]" office:value-type="float" office:value="0.000710416666666667" calcext:value-type="float">
            <text:p>0,00071041666666666700</text:p>
          </table:table-cell>
          <table:table-cell table:formula="of:=[.D560]-[.D55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B559]+11" office:value-type="float" office:value="6149" calcext:value-type="float">
            <text:p>6149</text:p>
          </table:table-cell>
          <table:table-cell office:value-type="float" office:value="8640000" calcext:value-type="float">
            <text:p>8640000</text:p>
          </table:table-cell>
          <table:table-cell table:formula="of:=[.B560]/[.C560]" office:value-type="float" office:value="0.000711689814814815" calcext:value-type="float">
            <text:p>0,00071168981481481500</text:p>
          </table:table-cell>
          <table:table-cell table:formula="of:=[.D561]-[.D56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B560]+11" office:value-type="float" office:value="6160" calcext:value-type="float">
            <text:p>6160</text:p>
          </table:table-cell>
          <table:table-cell office:value-type="float" office:value="8640000" calcext:value-type="float">
            <text:p>8640000</text:p>
          </table:table-cell>
          <table:table-cell table:formula="of:=[.B561]/[.C561]" office:value-type="float" office:value="0.000712962962962963" calcext:value-type="float">
            <text:p>0,00071296296296296300</text:p>
          </table:table-cell>
          <table:table-cell table:formula="of:=[.D562]-[.D56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B561]+11" office:value-type="float" office:value="6171" calcext:value-type="float">
            <text:p>6171</text:p>
          </table:table-cell>
          <table:table-cell office:value-type="float" office:value="8640000" calcext:value-type="float">
            <text:p>8640000</text:p>
          </table:table-cell>
          <table:table-cell table:formula="of:=[.B562]/[.C562]" office:value-type="float" office:value="0.000714236111111111" calcext:value-type="float">
            <text:p>0,00071423611111111100</text:p>
          </table:table-cell>
          <table:table-cell table:formula="of:=[.D563]-[.D56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B562]+11" office:value-type="float" office:value="6182" calcext:value-type="float">
            <text:p>6182</text:p>
          </table:table-cell>
          <table:table-cell office:value-type="float" office:value="8640000" calcext:value-type="float">
            <text:p>8640000</text:p>
          </table:table-cell>
          <table:table-cell table:formula="of:=[.B563]/[.C563]" office:value-type="float" office:value="0.000715509259259259" calcext:value-type="float">
            <text:p>0,00071550925925925900</text:p>
          </table:table-cell>
          <table:table-cell table:formula="of:=[.D564]-[.D56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B563]+11" office:value-type="float" office:value="6193" calcext:value-type="float">
            <text:p>6193</text:p>
          </table:table-cell>
          <table:table-cell office:value-type="float" office:value="8640000" calcext:value-type="float">
            <text:p>8640000</text:p>
          </table:table-cell>
          <table:table-cell table:formula="of:=[.B564]/[.C564]" office:value-type="float" office:value="0.000716782407407407" calcext:value-type="float">
            <text:p>0,00071678240740740700</text:p>
          </table:table-cell>
          <table:table-cell table:formula="of:=[.D565]-[.D56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B564]+11" office:value-type="float" office:value="6204" calcext:value-type="float">
            <text:p>6204</text:p>
          </table:table-cell>
          <table:table-cell office:value-type="float" office:value="8640000" calcext:value-type="float">
            <text:p>8640000</text:p>
          </table:table-cell>
          <table:table-cell table:formula="of:=[.B565]/[.C565]" office:value-type="float" office:value="0.000718055555555556" calcext:value-type="float">
            <text:p>0,00071805555555555600</text:p>
          </table:table-cell>
          <table:table-cell table:formula="of:=[.D566]-[.D56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B565]+11" office:value-type="float" office:value="6215" calcext:value-type="float">
            <text:p>6215</text:p>
          </table:table-cell>
          <table:table-cell office:value-type="float" office:value="8640000" calcext:value-type="float">
            <text:p>8640000</text:p>
          </table:table-cell>
          <table:table-cell table:formula="of:=[.B566]/[.C566]" office:value-type="float" office:value="0.000719328703703704" calcext:value-type="float">
            <text:p>0,00071932870370370400</text:p>
          </table:table-cell>
          <table:table-cell table:formula="of:=[.D567]-[.D56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B566]+11" office:value-type="float" office:value="6226" calcext:value-type="float">
            <text:p>6226</text:p>
          </table:table-cell>
          <table:table-cell office:value-type="float" office:value="8640000" calcext:value-type="float">
            <text:p>8640000</text:p>
          </table:table-cell>
          <table:table-cell table:formula="of:=[.B567]/[.C567]" office:value-type="float" office:value="0.000720601851851852" calcext:value-type="float">
            <text:p>0,00072060185185185200</text:p>
          </table:table-cell>
          <table:table-cell table:formula="of:=[.D568]-[.D56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B567]+11" office:value-type="float" office:value="6237" calcext:value-type="float">
            <text:p>6237</text:p>
          </table:table-cell>
          <table:table-cell office:value-type="float" office:value="8640000" calcext:value-type="float">
            <text:p>8640000</text:p>
          </table:table-cell>
          <table:table-cell table:formula="of:=[.B568]/[.C568]" office:value-type="float" office:value="0.000721875" calcext:value-type="float">
            <text:p>0,00072187500000000000</text:p>
          </table:table-cell>
          <table:table-cell table:formula="of:=[.D569]-[.D56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B568]+11" office:value-type="float" office:value="6248" calcext:value-type="float">
            <text:p>6248</text:p>
          </table:table-cell>
          <table:table-cell office:value-type="float" office:value="8640000" calcext:value-type="float">
            <text:p>8640000</text:p>
          </table:table-cell>
          <table:table-cell table:formula="of:=[.B569]/[.C569]" office:value-type="float" office:value="0.000723148148148148" calcext:value-type="float">
            <text:p>0,00072314814814814800</text:p>
          </table:table-cell>
          <table:table-cell table:formula="of:=[.D570]-[.D56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B569]+11" office:value-type="float" office:value="6259" calcext:value-type="float">
            <text:p>6259</text:p>
          </table:table-cell>
          <table:table-cell office:value-type="float" office:value="8640000" calcext:value-type="float">
            <text:p>8640000</text:p>
          </table:table-cell>
          <table:table-cell table:formula="of:=[.B570]/[.C570]" office:value-type="float" office:value="0.000724421296296296" calcext:value-type="float">
            <text:p>0,00072442129629629600</text:p>
          </table:table-cell>
          <table:table-cell table:formula="of:=[.D571]-[.D57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B570]+11" office:value-type="float" office:value="6270" calcext:value-type="float">
            <text:p>6270</text:p>
          </table:table-cell>
          <table:table-cell office:value-type="float" office:value="8640000" calcext:value-type="float">
            <text:p>8640000</text:p>
          </table:table-cell>
          <table:table-cell table:formula="of:=[.B571]/[.C571]" office:value-type="float" office:value="0.000725694444444444" calcext:value-type="float">
            <text:p>0,00072569444444444400</text:p>
          </table:table-cell>
          <table:table-cell table:formula="of:=[.D572]-[.D57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B571]+11" office:value-type="float" office:value="6281" calcext:value-type="float">
            <text:p>6281</text:p>
          </table:table-cell>
          <table:table-cell office:value-type="float" office:value="8640000" calcext:value-type="float">
            <text:p>8640000</text:p>
          </table:table-cell>
          <table:table-cell table:formula="of:=[.B572]/[.C572]" office:value-type="float" office:value="0.000726967592592593" calcext:value-type="float">
            <text:p>0,00072696759259259300</text:p>
          </table:table-cell>
          <table:table-cell table:formula="of:=[.D573]-[.D57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B572]+11" office:value-type="float" office:value="6292" calcext:value-type="float">
            <text:p>6292</text:p>
          </table:table-cell>
          <table:table-cell office:value-type="float" office:value="8640000" calcext:value-type="float">
            <text:p>8640000</text:p>
          </table:table-cell>
          <table:table-cell table:formula="of:=[.B573]/[.C573]" office:value-type="float" office:value="0.000728240740740741" calcext:value-type="float">
            <text:p>0,00072824074074074100</text:p>
          </table:table-cell>
          <table:table-cell table:formula="of:=[.D574]-[.D57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B573]+11" office:value-type="float" office:value="6303" calcext:value-type="float">
            <text:p>6303</text:p>
          </table:table-cell>
          <table:table-cell office:value-type="float" office:value="8640000" calcext:value-type="float">
            <text:p>8640000</text:p>
          </table:table-cell>
          <table:table-cell table:formula="of:=[.B574]/[.C574]" office:value-type="float" office:value="0.000729513888888889" calcext:value-type="float">
            <text:p>0,00072951388888888900</text:p>
          </table:table-cell>
          <table:table-cell table:formula="of:=[.D575]-[.D57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B574]+11" office:value-type="float" office:value="6314" calcext:value-type="float">
            <text:p>6314</text:p>
          </table:table-cell>
          <table:table-cell office:value-type="float" office:value="8640000" calcext:value-type="float">
            <text:p>8640000</text:p>
          </table:table-cell>
          <table:table-cell table:formula="of:=[.B575]/[.C575]" office:value-type="float" office:value="0.000730787037037037" calcext:value-type="float">
            <text:p>0,00073078703703703700</text:p>
          </table:table-cell>
          <table:table-cell table:formula="of:=[.D576]-[.D57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B575]+11" office:value-type="float" office:value="6325" calcext:value-type="float">
            <text:p>6325</text:p>
          </table:table-cell>
          <table:table-cell office:value-type="float" office:value="8640000" calcext:value-type="float">
            <text:p>8640000</text:p>
          </table:table-cell>
          <table:table-cell table:formula="of:=[.B576]/[.C576]" office:value-type="float" office:value="0.000732060185185185" calcext:value-type="float">
            <text:p>0,00073206018518518500</text:p>
          </table:table-cell>
          <table:table-cell table:formula="of:=[.D577]-[.D57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B576]+11" office:value-type="float" office:value="6336" calcext:value-type="float">
            <text:p>6336</text:p>
          </table:table-cell>
          <table:table-cell office:value-type="float" office:value="8640000" calcext:value-type="float">
            <text:p>8640000</text:p>
          </table:table-cell>
          <table:table-cell table:formula="of:=[.B577]/[.C577]" office:value-type="float" office:value="0.000733333333333333" calcext:value-type="float">
            <text:p>0,00073333333333333300</text:p>
          </table:table-cell>
          <table:table-cell table:formula="of:=[.D578]-[.D57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B577]+11" office:value-type="float" office:value="6347" calcext:value-type="float">
            <text:p>6347</text:p>
          </table:table-cell>
          <table:table-cell office:value-type="float" office:value="8640000" calcext:value-type="float">
            <text:p>8640000</text:p>
          </table:table-cell>
          <table:table-cell table:formula="of:=[.B578]/[.C578]" office:value-type="float" office:value="0.000734606481481482" calcext:value-type="float">
            <text:p>0,00073460648148148200</text:p>
          </table:table-cell>
          <table:table-cell table:formula="of:=[.D579]-[.D57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B578]+11" office:value-type="float" office:value="6358" calcext:value-type="float">
            <text:p>6358</text:p>
          </table:table-cell>
          <table:table-cell office:value-type="float" office:value="8640000" calcext:value-type="float">
            <text:p>8640000</text:p>
          </table:table-cell>
          <table:table-cell table:formula="of:=[.B579]/[.C579]" office:value-type="float" office:value="0.00073587962962963" calcext:value-type="float">
            <text:p>0,00073587962962963000</text:p>
          </table:table-cell>
          <table:table-cell table:formula="of:=[.D580]-[.D57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B579]+11" office:value-type="float" office:value="6369" calcext:value-type="float">
            <text:p>6369</text:p>
          </table:table-cell>
          <table:table-cell office:value-type="float" office:value="8640000" calcext:value-type="float">
            <text:p>8640000</text:p>
          </table:table-cell>
          <table:table-cell table:formula="of:=[.B580]/[.C580]" office:value-type="float" office:value="0.000737152777777778" calcext:value-type="float">
            <text:p>0,00073715277777777800</text:p>
          </table:table-cell>
          <table:table-cell table:formula="of:=[.D581]-[.D58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B580]+11" office:value-type="float" office:value="6380" calcext:value-type="float">
            <text:p>6380</text:p>
          </table:table-cell>
          <table:table-cell office:value-type="float" office:value="8640000" calcext:value-type="float">
            <text:p>8640000</text:p>
          </table:table-cell>
          <table:table-cell table:formula="of:=[.B581]/[.C581]" office:value-type="float" office:value="0.000738425925925926" calcext:value-type="float">
            <text:p>0,00073842592592592600</text:p>
          </table:table-cell>
          <table:table-cell table:formula="of:=[.D582]-[.D58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B581]+11" office:value-type="float" office:value="6391" calcext:value-type="float">
            <text:p>6391</text:p>
          </table:table-cell>
          <table:table-cell office:value-type="float" office:value="8640000" calcext:value-type="float">
            <text:p>8640000</text:p>
          </table:table-cell>
          <table:table-cell table:formula="of:=[.B582]/[.C582]" office:value-type="float" office:value="0.000739699074074074" calcext:value-type="float">
            <text:p>0,00073969907407407400</text:p>
          </table:table-cell>
          <table:table-cell table:formula="of:=[.D583]-[.D58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B582]+11" office:value-type="float" office:value="6402" calcext:value-type="float">
            <text:p>6402</text:p>
          </table:table-cell>
          <table:table-cell office:value-type="float" office:value="8640000" calcext:value-type="float">
            <text:p>8640000</text:p>
          </table:table-cell>
          <table:table-cell table:formula="of:=[.B583]/[.C583]" office:value-type="float" office:value="0.000740972222222222" calcext:value-type="float">
            <text:p>0,00074097222222222200</text:p>
          </table:table-cell>
          <table:table-cell table:formula="of:=[.D584]-[.D58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B583]+11" office:value-type="float" office:value="6413" calcext:value-type="float">
            <text:p>6413</text:p>
          </table:table-cell>
          <table:table-cell office:value-type="float" office:value="8640000" calcext:value-type="float">
            <text:p>8640000</text:p>
          </table:table-cell>
          <table:table-cell table:formula="of:=[.B584]/[.C584]" office:value-type="float" office:value="0.00074224537037037" calcext:value-type="float">
            <text:p>0,00074224537037037000</text:p>
          </table:table-cell>
          <table:table-cell table:formula="of:=[.D585]-[.D58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B584]+11" office:value-type="float" office:value="6424" calcext:value-type="float">
            <text:p>6424</text:p>
          </table:table-cell>
          <table:table-cell office:value-type="float" office:value="8640000" calcext:value-type="float">
            <text:p>8640000</text:p>
          </table:table-cell>
          <table:table-cell table:formula="of:=[.B585]/[.C585]" office:value-type="float" office:value="0.000743518518518519" calcext:value-type="float">
            <text:p>0,00074351851851851800</text:p>
          </table:table-cell>
          <table:table-cell table:formula="of:=[.D586]-[.D58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B585]+11" office:value-type="float" office:value="6435" calcext:value-type="float">
            <text:p>6435</text:p>
          </table:table-cell>
          <table:table-cell office:value-type="float" office:value="8640000" calcext:value-type="float">
            <text:p>8640000</text:p>
          </table:table-cell>
          <table:table-cell table:formula="of:=[.B586]/[.C586]" office:value-type="float" office:value="0.000744791666666667" calcext:value-type="float">
            <text:p>0,00074479166666666700</text:p>
          </table:table-cell>
          <table:table-cell table:formula="of:=[.D587]-[.D58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B586]+11" office:value-type="float" office:value="6446" calcext:value-type="float">
            <text:p>6446</text:p>
          </table:table-cell>
          <table:table-cell office:value-type="float" office:value="8640000" calcext:value-type="float">
            <text:p>8640000</text:p>
          </table:table-cell>
          <table:table-cell table:formula="of:=[.B587]/[.C587]" office:value-type="float" office:value="0.000746064814814815" calcext:value-type="float">
            <text:p>0,00074606481481481500</text:p>
          </table:table-cell>
          <table:table-cell table:formula="of:=[.D588]-[.D58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B587]+11" office:value-type="float" office:value="6457" calcext:value-type="float">
            <text:p>6457</text:p>
          </table:table-cell>
          <table:table-cell office:value-type="float" office:value="8640000" calcext:value-type="float">
            <text:p>8640000</text:p>
          </table:table-cell>
          <table:table-cell table:formula="of:=[.B588]/[.C588]" office:value-type="float" office:value="0.000747337962962963" calcext:value-type="float">
            <text:p>0,00074733796296296300</text:p>
          </table:table-cell>
          <table:table-cell table:formula="of:=[.D589]-[.D58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B588]+11" office:value-type="float" office:value="6468" calcext:value-type="float">
            <text:p>6468</text:p>
          </table:table-cell>
          <table:table-cell office:value-type="float" office:value="8640000" calcext:value-type="float">
            <text:p>8640000</text:p>
          </table:table-cell>
          <table:table-cell table:formula="of:=[.B589]/[.C589]" office:value-type="float" office:value="0.000748611111111111" calcext:value-type="float">
            <text:p>0,00074861111111111100</text:p>
          </table:table-cell>
          <table:table-cell table:formula="of:=[.D590]-[.D58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B589]+11" office:value-type="float" office:value="6479" calcext:value-type="float">
            <text:p>6479</text:p>
          </table:table-cell>
          <table:table-cell office:value-type="float" office:value="8640000" calcext:value-type="float">
            <text:p>8640000</text:p>
          </table:table-cell>
          <table:table-cell table:formula="of:=[.B590]/[.C590]" office:value-type="float" office:value="0.000749884259259259" calcext:value-type="float">
            <text:p>0,00074988425925925900</text:p>
          </table:table-cell>
          <table:table-cell table:formula="of:=[.D591]-[.D59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B590]+11" office:value-type="float" office:value="6490" calcext:value-type="float">
            <text:p>6490</text:p>
          </table:table-cell>
          <table:table-cell office:value-type="float" office:value="8640000" calcext:value-type="float">
            <text:p>8640000</text:p>
          </table:table-cell>
          <table:table-cell table:formula="of:=[.B591]/[.C591]" office:value-type="float" office:value="0.000751157407407407" calcext:value-type="float">
            <text:p>0,00075115740740740700</text:p>
          </table:table-cell>
          <table:table-cell table:formula="of:=[.D592]-[.D59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B591]+11" office:value-type="float" office:value="6501" calcext:value-type="float">
            <text:p>6501</text:p>
          </table:table-cell>
          <table:table-cell office:value-type="float" office:value="8640000" calcext:value-type="float">
            <text:p>8640000</text:p>
          </table:table-cell>
          <table:table-cell table:formula="of:=[.B592]/[.C592]" office:value-type="float" office:value="0.000752430555555556" calcext:value-type="float">
            <text:p>0,00075243055555555600</text:p>
          </table:table-cell>
          <table:table-cell table:formula="of:=[.D593]-[.D59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B592]+11" office:value-type="float" office:value="6512" calcext:value-type="float">
            <text:p>6512</text:p>
          </table:table-cell>
          <table:table-cell office:value-type="float" office:value="8640000" calcext:value-type="float">
            <text:p>8640000</text:p>
          </table:table-cell>
          <table:table-cell table:formula="of:=[.B593]/[.C593]" office:value-type="float" office:value="0.000753703703703704" calcext:value-type="float">
            <text:p>0,00075370370370370400</text:p>
          </table:table-cell>
          <table:table-cell table:formula="of:=[.D594]-[.D59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B593]+11" office:value-type="float" office:value="6523" calcext:value-type="float">
            <text:p>6523</text:p>
          </table:table-cell>
          <table:table-cell office:value-type="float" office:value="8640000" calcext:value-type="float">
            <text:p>8640000</text:p>
          </table:table-cell>
          <table:table-cell table:formula="of:=[.B594]/[.C594]" office:value-type="float" office:value="0.000754976851851852" calcext:value-type="float">
            <text:p>0,00075497685185185200</text:p>
          </table:table-cell>
          <table:table-cell table:formula="of:=[.D595]-[.D59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B594]+11" office:value-type="float" office:value="6534" calcext:value-type="float">
            <text:p>6534</text:p>
          </table:table-cell>
          <table:table-cell office:value-type="float" office:value="8640000" calcext:value-type="float">
            <text:p>8640000</text:p>
          </table:table-cell>
          <table:table-cell table:formula="of:=[.B595]/[.C595]" office:value-type="float" office:value="0.00075625" calcext:value-type="float">
            <text:p>0,00075625000000000000</text:p>
          </table:table-cell>
          <table:table-cell table:formula="of:=[.D596]-[.D59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B595]+11" office:value-type="float" office:value="6545" calcext:value-type="float">
            <text:p>6545</text:p>
          </table:table-cell>
          <table:table-cell office:value-type="float" office:value="8640000" calcext:value-type="float">
            <text:p>8640000</text:p>
          </table:table-cell>
          <table:table-cell table:formula="of:=[.B596]/[.C596]" office:value-type="float" office:value="0.000757523148148148" calcext:value-type="float">
            <text:p>0,00075752314814814800</text:p>
          </table:table-cell>
          <table:table-cell table:formula="of:=[.D597]-[.D59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B596]+11" office:value-type="float" office:value="6556" calcext:value-type="float">
            <text:p>6556</text:p>
          </table:table-cell>
          <table:table-cell office:value-type="float" office:value="8640000" calcext:value-type="float">
            <text:p>8640000</text:p>
          </table:table-cell>
          <table:table-cell table:formula="of:=[.B597]/[.C597]" office:value-type="float" office:value="0.000758796296296296" calcext:value-type="float">
            <text:p>0,00075879629629629600</text:p>
          </table:table-cell>
          <table:table-cell table:formula="of:=[.D598]-[.D59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B597]+11" office:value-type="float" office:value="6567" calcext:value-type="float">
            <text:p>6567</text:p>
          </table:table-cell>
          <table:table-cell office:value-type="float" office:value="8640000" calcext:value-type="float">
            <text:p>8640000</text:p>
          </table:table-cell>
          <table:table-cell table:formula="of:=[.B598]/[.C598]" office:value-type="float" office:value="0.000760069444444444" calcext:value-type="float">
            <text:p>0,00076006944444444400</text:p>
          </table:table-cell>
          <table:table-cell table:formula="of:=[.D599]-[.D59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B598]+11" office:value-type="float" office:value="6578" calcext:value-type="float">
            <text:p>6578</text:p>
          </table:table-cell>
          <table:table-cell office:value-type="float" office:value="8640000" calcext:value-type="float">
            <text:p>8640000</text:p>
          </table:table-cell>
          <table:table-cell table:formula="of:=[.B599]/[.C599]" office:value-type="float" office:value="0.000761342592592593" calcext:value-type="float">
            <text:p>0,00076134259259259200</text:p>
          </table:table-cell>
          <table:table-cell table:formula="of:=[.D600]-[.D59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B599]+11" office:value-type="float" office:value="6589" calcext:value-type="float">
            <text:p>6589</text:p>
          </table:table-cell>
          <table:table-cell office:value-type="float" office:value="8640000" calcext:value-type="float">
            <text:p>8640000</text:p>
          </table:table-cell>
          <table:table-cell table:formula="of:=[.B600]/[.C600]" office:value-type="float" office:value="0.000762615740740741" calcext:value-type="float">
            <text:p>0,00076261574074074100</text:p>
          </table:table-cell>
          <table:table-cell table:formula="of:=[.D601]-[.D60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B600]+11" office:value-type="float" office:value="6600" calcext:value-type="float">
            <text:p>6600</text:p>
          </table:table-cell>
          <table:table-cell office:value-type="float" office:value="8640000" calcext:value-type="float">
            <text:p>8640000</text:p>
          </table:table-cell>
          <table:table-cell table:formula="of:=[.B601]/[.C601]" office:value-type="float" office:value="0.000763888888888889" calcext:value-type="float">
            <text:p>0,00076388888888888900</text:p>
          </table:table-cell>
          <table:table-cell table:formula="of:=[.D602]-[.D60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B601]+11" office:value-type="float" office:value="6611" calcext:value-type="float">
            <text:p>6611</text:p>
          </table:table-cell>
          <table:table-cell office:value-type="float" office:value="8640000" calcext:value-type="float">
            <text:p>8640000</text:p>
          </table:table-cell>
          <table:table-cell table:formula="of:=[.B602]/[.C602]" office:value-type="float" office:value="0.000765162037037037" calcext:value-type="float">
            <text:p>0,00076516203703703700</text:p>
          </table:table-cell>
          <table:table-cell table:formula="of:=[.D603]-[.D60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B602]+11" office:value-type="float" office:value="6622" calcext:value-type="float">
            <text:p>6622</text:p>
          </table:table-cell>
          <table:table-cell office:value-type="float" office:value="8640000" calcext:value-type="float">
            <text:p>8640000</text:p>
          </table:table-cell>
          <table:table-cell table:formula="of:=[.B603]/[.C603]" office:value-type="float" office:value="0.000766435185185185" calcext:value-type="float">
            <text:p>0,00076643518518518500</text:p>
          </table:table-cell>
          <table:table-cell table:formula="of:=[.D604]-[.D60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B603]+11" office:value-type="float" office:value="6633" calcext:value-type="float">
            <text:p>6633</text:p>
          </table:table-cell>
          <table:table-cell office:value-type="float" office:value="8640000" calcext:value-type="float">
            <text:p>8640000</text:p>
          </table:table-cell>
          <table:table-cell table:formula="of:=[.B604]/[.C604]" office:value-type="float" office:value="0.000767708333333333" calcext:value-type="float">
            <text:p>0,00076770833333333300</text:p>
          </table:table-cell>
          <table:table-cell table:formula="of:=[.D605]-[.D60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B604]+11" office:value-type="float" office:value="6644" calcext:value-type="float">
            <text:p>6644</text:p>
          </table:table-cell>
          <table:table-cell office:value-type="float" office:value="8640000" calcext:value-type="float">
            <text:p>8640000</text:p>
          </table:table-cell>
          <table:table-cell table:formula="of:=[.B605]/[.C605]" office:value-type="float" office:value="0.000768981481481482" calcext:value-type="float">
            <text:p>0,00076898148148148200</text:p>
          </table:table-cell>
          <table:table-cell table:formula="of:=[.D606]-[.D60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B605]+11" office:value-type="float" office:value="6655" calcext:value-type="float">
            <text:p>6655</text:p>
          </table:table-cell>
          <table:table-cell office:value-type="float" office:value="8640000" calcext:value-type="float">
            <text:p>8640000</text:p>
          </table:table-cell>
          <table:table-cell table:formula="of:=[.B606]/[.C606]" office:value-type="float" office:value="0.00077025462962963" calcext:value-type="float">
            <text:p>0,00077025462962963000</text:p>
          </table:table-cell>
          <table:table-cell table:formula="of:=[.D607]-[.D60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B606]+11" office:value-type="float" office:value="6666" calcext:value-type="float">
            <text:p>6666</text:p>
          </table:table-cell>
          <table:table-cell office:value-type="float" office:value="8640000" calcext:value-type="float">
            <text:p>8640000</text:p>
          </table:table-cell>
          <table:table-cell table:formula="of:=[.B607]/[.C607]" office:value-type="float" office:value="0.000771527777777778" calcext:value-type="float">
            <text:p>0,00077152777777777800</text:p>
          </table:table-cell>
          <table:table-cell table:formula="of:=[.D608]-[.D60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B607]+11" office:value-type="float" office:value="6677" calcext:value-type="float">
            <text:p>6677</text:p>
          </table:table-cell>
          <table:table-cell office:value-type="float" office:value="8640000" calcext:value-type="float">
            <text:p>8640000</text:p>
          </table:table-cell>
          <table:table-cell table:formula="of:=[.B608]/[.C608]" office:value-type="float" office:value="0.000772800925925926" calcext:value-type="float">
            <text:p>0,00077280092592592600</text:p>
          </table:table-cell>
          <table:table-cell table:formula="of:=[.D609]-[.D60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B608]+11" office:value-type="float" office:value="6688" calcext:value-type="float">
            <text:p>6688</text:p>
          </table:table-cell>
          <table:table-cell office:value-type="float" office:value="8640000" calcext:value-type="float">
            <text:p>8640000</text:p>
          </table:table-cell>
          <table:table-cell table:formula="of:=[.B609]/[.C609]" office:value-type="float" office:value="0.000774074074074074" calcext:value-type="float">
            <text:p>0,00077407407407407400</text:p>
          </table:table-cell>
          <table:table-cell table:formula="of:=[.D610]-[.D60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B609]+11" office:value-type="float" office:value="6699" calcext:value-type="float">
            <text:p>6699</text:p>
          </table:table-cell>
          <table:table-cell office:value-type="float" office:value="8640000" calcext:value-type="float">
            <text:p>8640000</text:p>
          </table:table-cell>
          <table:table-cell table:formula="of:=[.B610]/[.C610]" office:value-type="float" office:value="0.000775347222222222" calcext:value-type="float">
            <text:p>0,00077534722222222200</text:p>
          </table:table-cell>
          <table:table-cell table:formula="of:=[.D611]-[.D61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B610]+11" office:value-type="float" office:value="6710" calcext:value-type="float">
            <text:p>6710</text:p>
          </table:table-cell>
          <table:table-cell office:value-type="float" office:value="8640000" calcext:value-type="float">
            <text:p>8640000</text:p>
          </table:table-cell>
          <table:table-cell table:formula="of:=[.B611]/[.C611]" office:value-type="float" office:value="0.00077662037037037" calcext:value-type="float">
            <text:p>0,00077662037037037000</text:p>
          </table:table-cell>
          <table:table-cell table:formula="of:=[.D612]-[.D61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B611]+11" office:value-type="float" office:value="6721" calcext:value-type="float">
            <text:p>6721</text:p>
          </table:table-cell>
          <table:table-cell office:value-type="float" office:value="8640000" calcext:value-type="float">
            <text:p>8640000</text:p>
          </table:table-cell>
          <table:table-cell table:formula="of:=[.B612]/[.C612]" office:value-type="float" office:value="0.000777893518518519" calcext:value-type="float">
            <text:p>0,00077789351851851800</text:p>
          </table:table-cell>
          <table:table-cell table:formula="of:=[.D613]-[.D61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B612]+11" office:value-type="float" office:value="6732" calcext:value-type="float">
            <text:p>6732</text:p>
          </table:table-cell>
          <table:table-cell office:value-type="float" office:value="8640000" calcext:value-type="float">
            <text:p>8640000</text:p>
          </table:table-cell>
          <table:table-cell table:formula="of:=[.B613]/[.C613]" office:value-type="float" office:value="0.000779166666666667" calcext:value-type="float">
            <text:p>0,00077916666666666700</text:p>
          </table:table-cell>
          <table:table-cell table:formula="of:=[.D614]-[.D61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B613]+11" office:value-type="float" office:value="6743" calcext:value-type="float">
            <text:p>6743</text:p>
          </table:table-cell>
          <table:table-cell office:value-type="float" office:value="8640000" calcext:value-type="float">
            <text:p>8640000</text:p>
          </table:table-cell>
          <table:table-cell table:formula="of:=[.B614]/[.C614]" office:value-type="float" office:value="0.000780439814814815" calcext:value-type="float">
            <text:p>0,00078043981481481500</text:p>
          </table:table-cell>
          <table:table-cell table:formula="of:=[.D615]-[.D61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B614]+11" office:value-type="float" office:value="6754" calcext:value-type="float">
            <text:p>6754</text:p>
          </table:table-cell>
          <table:table-cell office:value-type="float" office:value="8640000" calcext:value-type="float">
            <text:p>8640000</text:p>
          </table:table-cell>
          <table:table-cell table:formula="of:=[.B615]/[.C615]" office:value-type="float" office:value="0.000781712962962963" calcext:value-type="float">
            <text:p>0,00078171296296296300</text:p>
          </table:table-cell>
          <table:table-cell table:formula="of:=[.D616]-[.D61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B615]+11" office:value-type="float" office:value="6765" calcext:value-type="float">
            <text:p>6765</text:p>
          </table:table-cell>
          <table:table-cell office:value-type="float" office:value="8640000" calcext:value-type="float">
            <text:p>8640000</text:p>
          </table:table-cell>
          <table:table-cell table:formula="of:=[.B616]/[.C616]" office:value-type="float" office:value="0.000782986111111111" calcext:value-type="float">
            <text:p>0,00078298611111111100</text:p>
          </table:table-cell>
          <table:table-cell table:formula="of:=[.D617]-[.D61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B616]+11" office:value-type="float" office:value="6776" calcext:value-type="float">
            <text:p>6776</text:p>
          </table:table-cell>
          <table:table-cell office:value-type="float" office:value="8640000" calcext:value-type="float">
            <text:p>8640000</text:p>
          </table:table-cell>
          <table:table-cell table:formula="of:=[.B617]/[.C617]" office:value-type="float" office:value="0.000784259259259259" calcext:value-type="float">
            <text:p>0,00078425925925925900</text:p>
          </table:table-cell>
          <table:table-cell table:formula="of:=[.D618]-[.D61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B617]+11" office:value-type="float" office:value="6787" calcext:value-type="float">
            <text:p>6787</text:p>
          </table:table-cell>
          <table:table-cell office:value-type="float" office:value="8640000" calcext:value-type="float">
            <text:p>8640000</text:p>
          </table:table-cell>
          <table:table-cell table:formula="of:=[.B618]/[.C618]" office:value-type="float" office:value="0.000785532407407407" calcext:value-type="float">
            <text:p>0,00078553240740740700</text:p>
          </table:table-cell>
          <table:table-cell table:formula="of:=[.D619]-[.D61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B618]+11" office:value-type="float" office:value="6798" calcext:value-type="float">
            <text:p>6798</text:p>
          </table:table-cell>
          <table:table-cell office:value-type="float" office:value="8640000" calcext:value-type="float">
            <text:p>8640000</text:p>
          </table:table-cell>
          <table:table-cell table:formula="of:=[.B619]/[.C619]" office:value-type="float" office:value="0.000786805555555556" calcext:value-type="float">
            <text:p>0,00078680555555555600</text:p>
          </table:table-cell>
          <table:table-cell table:formula="of:=[.D620]-[.D61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B619]+11" office:value-type="float" office:value="6809" calcext:value-type="float">
            <text:p>6809</text:p>
          </table:table-cell>
          <table:table-cell office:value-type="float" office:value="8640000" calcext:value-type="float">
            <text:p>8640000</text:p>
          </table:table-cell>
          <table:table-cell table:formula="of:=[.B620]/[.C620]" office:value-type="float" office:value="0.000788078703703704" calcext:value-type="float">
            <text:p>0,00078807870370370400</text:p>
          </table:table-cell>
          <table:table-cell table:formula="of:=[.D621]-[.D62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B620]+11" office:value-type="float" office:value="6820" calcext:value-type="float">
            <text:p>6820</text:p>
          </table:table-cell>
          <table:table-cell office:value-type="float" office:value="8640000" calcext:value-type="float">
            <text:p>8640000</text:p>
          </table:table-cell>
          <table:table-cell table:formula="of:=[.B621]/[.C621]" office:value-type="float" office:value="0.000789351851851852" calcext:value-type="float">
            <text:p>0,00078935185185185200</text:p>
          </table:table-cell>
          <table:table-cell table:formula="of:=[.D622]-[.D62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B621]+11" office:value-type="float" office:value="6831" calcext:value-type="float">
            <text:p>6831</text:p>
          </table:table-cell>
          <table:table-cell office:value-type="float" office:value="8640000" calcext:value-type="float">
            <text:p>8640000</text:p>
          </table:table-cell>
          <table:table-cell table:formula="of:=[.B622]/[.C622]" office:value-type="float" office:value="0.000790625" calcext:value-type="float">
            <text:p>0,00079062500000000000</text:p>
          </table:table-cell>
          <table:table-cell table:formula="of:=[.D623]-[.D62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B622]+11" office:value-type="float" office:value="6842" calcext:value-type="float">
            <text:p>6842</text:p>
          </table:table-cell>
          <table:table-cell office:value-type="float" office:value="8640000" calcext:value-type="float">
            <text:p>8640000</text:p>
          </table:table-cell>
          <table:table-cell table:formula="of:=[.B623]/[.C623]" office:value-type="float" office:value="0.000791898148148148" calcext:value-type="float">
            <text:p>0,00079189814814814800</text:p>
          </table:table-cell>
          <table:table-cell table:formula="of:=[.D624]-[.D62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B623]+11" office:value-type="float" office:value="6853" calcext:value-type="float">
            <text:p>6853</text:p>
          </table:table-cell>
          <table:table-cell office:value-type="float" office:value="8640000" calcext:value-type="float">
            <text:p>8640000</text:p>
          </table:table-cell>
          <table:table-cell table:formula="of:=[.B624]/[.C624]" office:value-type="float" office:value="0.000793171296296296" calcext:value-type="float">
            <text:p>0,00079317129629629600</text:p>
          </table:table-cell>
          <table:table-cell table:formula="of:=[.D625]-[.D62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B624]+11" office:value-type="float" office:value="6864" calcext:value-type="float">
            <text:p>6864</text:p>
          </table:table-cell>
          <table:table-cell office:value-type="float" office:value="8640000" calcext:value-type="float">
            <text:p>8640000</text:p>
          </table:table-cell>
          <table:table-cell table:formula="of:=[.B625]/[.C625]" office:value-type="float" office:value="0.000794444444444444" calcext:value-type="float">
            <text:p>0,00079444444444444500</text:p>
          </table:table-cell>
          <table:table-cell table:formula="of:=[.D626]-[.D62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B625]+11" office:value-type="float" office:value="6875" calcext:value-type="float">
            <text:p>6875</text:p>
          </table:table-cell>
          <table:table-cell office:value-type="float" office:value="8640000" calcext:value-type="float">
            <text:p>8640000</text:p>
          </table:table-cell>
          <table:table-cell table:formula="of:=[.B626]/[.C626]" office:value-type="float" office:value="0.000795717592592593" calcext:value-type="float">
            <text:p>0,00079571759259259200</text:p>
          </table:table-cell>
          <table:table-cell table:formula="of:=[.D627]-[.D62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B626]+11" office:value-type="float" office:value="6886" calcext:value-type="float">
            <text:p>6886</text:p>
          </table:table-cell>
          <table:table-cell office:value-type="float" office:value="8640000" calcext:value-type="float">
            <text:p>8640000</text:p>
          </table:table-cell>
          <table:table-cell table:formula="of:=[.B627]/[.C627]" office:value-type="float" office:value="0.000796990740740741" calcext:value-type="float">
            <text:p>0,00079699074074074100</text:p>
          </table:table-cell>
          <table:table-cell table:formula="of:=[.D628]-[.D62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B627]+11" office:value-type="float" office:value="6897" calcext:value-type="float">
            <text:p>6897</text:p>
          </table:table-cell>
          <table:table-cell office:value-type="float" office:value="8640000" calcext:value-type="float">
            <text:p>8640000</text:p>
          </table:table-cell>
          <table:table-cell table:formula="of:=[.B628]/[.C628]" office:value-type="float" office:value="0.000798263888888889" calcext:value-type="float">
            <text:p>0,00079826388888888900</text:p>
          </table:table-cell>
          <table:table-cell table:formula="of:=[.D629]-[.D62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B628]+11" office:value-type="float" office:value="6908" calcext:value-type="float">
            <text:p>6908</text:p>
          </table:table-cell>
          <table:table-cell office:value-type="float" office:value="8640000" calcext:value-type="float">
            <text:p>8640000</text:p>
          </table:table-cell>
          <table:table-cell table:formula="of:=[.B629]/[.C629]" office:value-type="float" office:value="0.000799537037037037" calcext:value-type="float">
            <text:p>0,00079953703703703700</text:p>
          </table:table-cell>
          <table:table-cell table:formula="of:=[.D630]-[.D62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B629]+11" office:value-type="float" office:value="6919" calcext:value-type="float">
            <text:p>6919</text:p>
          </table:table-cell>
          <table:table-cell office:value-type="float" office:value="8640000" calcext:value-type="float">
            <text:p>8640000</text:p>
          </table:table-cell>
          <table:table-cell table:formula="of:=[.B630]/[.C630]" office:value-type="float" office:value="0.000800810185185185" calcext:value-type="float">
            <text:p>0,00080081018518518500</text:p>
          </table:table-cell>
          <table:table-cell table:formula="of:=[.D631]-[.D63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B630]+11" office:value-type="float" office:value="6930" calcext:value-type="float">
            <text:p>6930</text:p>
          </table:table-cell>
          <table:table-cell office:value-type="float" office:value="8640000" calcext:value-type="float">
            <text:p>8640000</text:p>
          </table:table-cell>
          <table:table-cell table:formula="of:=[.B631]/[.C631]" office:value-type="float" office:value="0.000802083333333333" calcext:value-type="float">
            <text:p>0,00080208333333333300</text:p>
          </table:table-cell>
          <table:table-cell table:formula="of:=[.D632]-[.D63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B631]+11" office:value-type="float" office:value="6941" calcext:value-type="float">
            <text:p>6941</text:p>
          </table:table-cell>
          <table:table-cell office:value-type="float" office:value="8640000" calcext:value-type="float">
            <text:p>8640000</text:p>
          </table:table-cell>
          <table:table-cell table:formula="of:=[.B632]/[.C632]" office:value-type="float" office:value="0.000803356481481482" calcext:value-type="float">
            <text:p>0,00080335648148148100</text:p>
          </table:table-cell>
          <table:table-cell table:formula="of:=[.D633]-[.D63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B632]+11" office:value-type="float" office:value="6952" calcext:value-type="float">
            <text:p>6952</text:p>
          </table:table-cell>
          <table:table-cell office:value-type="float" office:value="8640000" calcext:value-type="float">
            <text:p>8640000</text:p>
          </table:table-cell>
          <table:table-cell table:formula="of:=[.B633]/[.C633]" office:value-type="float" office:value="0.00080462962962963" calcext:value-type="float">
            <text:p>0,00080462962962963000</text:p>
          </table:table-cell>
          <table:table-cell table:formula="of:=[.D634]-[.D63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B633]+11" office:value-type="float" office:value="6963" calcext:value-type="float">
            <text:p>6963</text:p>
          </table:table-cell>
          <table:table-cell office:value-type="float" office:value="8640000" calcext:value-type="float">
            <text:p>8640000</text:p>
          </table:table-cell>
          <table:table-cell table:formula="of:=[.B634]/[.C634]" office:value-type="float" office:value="0.000805902777777778" calcext:value-type="float">
            <text:p>0,00080590277777777800</text:p>
          </table:table-cell>
          <table:table-cell table:formula="of:=[.D635]-[.D63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B634]+11" office:value-type="float" office:value="6974" calcext:value-type="float">
            <text:p>6974</text:p>
          </table:table-cell>
          <table:table-cell office:value-type="float" office:value="8640000" calcext:value-type="float">
            <text:p>8640000</text:p>
          </table:table-cell>
          <table:table-cell table:formula="of:=[.B635]/[.C635]" office:value-type="float" office:value="0.000807175925925926" calcext:value-type="float">
            <text:p>0,00080717592592592600</text:p>
          </table:table-cell>
          <table:table-cell table:formula="of:=[.D636]-[.D63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B635]+11" office:value-type="float" office:value="6985" calcext:value-type="float">
            <text:p>6985</text:p>
          </table:table-cell>
          <table:table-cell office:value-type="float" office:value="8640000" calcext:value-type="float">
            <text:p>8640000</text:p>
          </table:table-cell>
          <table:table-cell table:formula="of:=[.B636]/[.C636]" office:value-type="float" office:value="0.000808449074074074" calcext:value-type="float">
            <text:p>0,00080844907407407400</text:p>
          </table:table-cell>
          <table:table-cell table:formula="of:=[.D637]-[.D63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B636]+11" office:value-type="float" office:value="6996" calcext:value-type="float">
            <text:p>6996</text:p>
          </table:table-cell>
          <table:table-cell office:value-type="float" office:value="8640000" calcext:value-type="float">
            <text:p>8640000</text:p>
          </table:table-cell>
          <table:table-cell table:formula="of:=[.B637]/[.C637]" office:value-type="float" office:value="0.000809722222222222" calcext:value-type="float">
            <text:p>0,00080972222222222200</text:p>
          </table:table-cell>
          <table:table-cell table:formula="of:=[.D638]-[.D63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B637]+11" office:value-type="float" office:value="7007" calcext:value-type="float">
            <text:p>7007</text:p>
          </table:table-cell>
          <table:table-cell office:value-type="float" office:value="8640000" calcext:value-type="float">
            <text:p>8640000</text:p>
          </table:table-cell>
          <table:table-cell table:formula="of:=[.B638]/[.C638]" office:value-type="float" office:value="0.00081099537037037" calcext:value-type="float">
            <text:p>0,00081099537037037100</text:p>
          </table:table-cell>
          <table:table-cell table:formula="of:=[.D639]-[.D63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B638]+11" office:value-type="float" office:value="7018" calcext:value-type="float">
            <text:p>7018</text:p>
          </table:table-cell>
          <table:table-cell office:value-type="float" office:value="8640000" calcext:value-type="float">
            <text:p>8640000</text:p>
          </table:table-cell>
          <table:table-cell table:formula="of:=[.B639]/[.C639]" office:value-type="float" office:value="0.000812268518518519" calcext:value-type="float">
            <text:p>0,00081226851851851900</text:p>
          </table:table-cell>
          <table:table-cell table:formula="of:=[.D640]-[.D63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B639]+11" office:value-type="float" office:value="7029" calcext:value-type="float">
            <text:p>7029</text:p>
          </table:table-cell>
          <table:table-cell office:value-type="float" office:value="8640000" calcext:value-type="float">
            <text:p>8640000</text:p>
          </table:table-cell>
          <table:table-cell table:formula="of:=[.B640]/[.C640]" office:value-type="float" office:value="0.000813541666666667" calcext:value-type="float">
            <text:p>0,00081354166666666700</text:p>
          </table:table-cell>
          <table:table-cell table:formula="of:=[.D641]-[.D64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B640]+11" office:value-type="float" office:value="7040" calcext:value-type="float">
            <text:p>7040</text:p>
          </table:table-cell>
          <table:table-cell office:value-type="float" office:value="8640000" calcext:value-type="float">
            <text:p>8640000</text:p>
          </table:table-cell>
          <table:table-cell table:formula="of:=[.B641]/[.C641]" office:value-type="float" office:value="0.000814814814814815" calcext:value-type="float">
            <text:p>0,00081481481481481500</text:p>
          </table:table-cell>
          <table:table-cell table:formula="of:=[.D642]-[.D64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B641]+11" office:value-type="float" office:value="7051" calcext:value-type="float">
            <text:p>7051</text:p>
          </table:table-cell>
          <table:table-cell office:value-type="float" office:value="8640000" calcext:value-type="float">
            <text:p>8640000</text:p>
          </table:table-cell>
          <table:table-cell table:formula="of:=[.B642]/[.C642]" office:value-type="float" office:value="0.000816087962962963" calcext:value-type="float">
            <text:p>0,00081608796296296300</text:p>
          </table:table-cell>
          <table:table-cell table:formula="of:=[.D643]-[.D64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B642]+11" office:value-type="float" office:value="7062" calcext:value-type="float">
            <text:p>7062</text:p>
          </table:table-cell>
          <table:table-cell office:value-type="float" office:value="8640000" calcext:value-type="float">
            <text:p>8640000</text:p>
          </table:table-cell>
          <table:table-cell table:formula="of:=[.B643]/[.C643]" office:value-type="float" office:value="0.000817361111111111" calcext:value-type="float">
            <text:p>0,00081736111111111100</text:p>
          </table:table-cell>
          <table:table-cell table:formula="of:=[.D644]-[.D64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B643]+11" office:value-type="float" office:value="7073" calcext:value-type="float">
            <text:p>7073</text:p>
          </table:table-cell>
          <table:table-cell office:value-type="float" office:value="8640000" calcext:value-type="float">
            <text:p>8640000</text:p>
          </table:table-cell>
          <table:table-cell table:formula="of:=[.B644]/[.C644]" office:value-type="float" office:value="0.000818634259259259" calcext:value-type="float">
            <text:p>0,00081863425925925900</text:p>
          </table:table-cell>
          <table:table-cell table:formula="of:=[.D645]-[.D64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B644]+11" office:value-type="float" office:value="7084" calcext:value-type="float">
            <text:p>7084</text:p>
          </table:table-cell>
          <table:table-cell office:value-type="float" office:value="8640000" calcext:value-type="float">
            <text:p>8640000</text:p>
          </table:table-cell>
          <table:table-cell table:formula="of:=[.B645]/[.C645]" office:value-type="float" office:value="0.000819907407407407" calcext:value-type="float">
            <text:p>0,00081990740740740700</text:p>
          </table:table-cell>
          <table:table-cell table:formula="of:=[.D646]-[.D64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B645]+11" office:value-type="float" office:value="7095" calcext:value-type="float">
            <text:p>7095</text:p>
          </table:table-cell>
          <table:table-cell office:value-type="float" office:value="8640000" calcext:value-type="float">
            <text:p>8640000</text:p>
          </table:table-cell>
          <table:table-cell table:formula="of:=[.B646]/[.C646]" office:value-type="float" office:value="0.000821180555555556" calcext:value-type="float">
            <text:p>0,00082118055555555600</text:p>
          </table:table-cell>
          <table:table-cell table:formula="of:=[.D647]-[.D64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B646]+11" office:value-type="float" office:value="7106" calcext:value-type="float">
            <text:p>7106</text:p>
          </table:table-cell>
          <table:table-cell office:value-type="float" office:value="8640000" calcext:value-type="float">
            <text:p>8640000</text:p>
          </table:table-cell>
          <table:table-cell table:formula="of:=[.B647]/[.C647]" office:value-type="float" office:value="0.000822453703703704" calcext:value-type="float">
            <text:p>0,00082245370370370400</text:p>
          </table:table-cell>
          <table:table-cell table:formula="of:=[.D648]-[.D64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B647]+11" office:value-type="float" office:value="7117" calcext:value-type="float">
            <text:p>7117</text:p>
          </table:table-cell>
          <table:table-cell office:value-type="float" office:value="8640000" calcext:value-type="float">
            <text:p>8640000</text:p>
          </table:table-cell>
          <table:table-cell table:formula="of:=[.B648]/[.C648]" office:value-type="float" office:value="0.000823726851851852" calcext:value-type="float">
            <text:p>0,00082372685185185200</text:p>
          </table:table-cell>
          <table:table-cell table:formula="of:=[.D649]-[.D64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B648]+11" office:value-type="float" office:value="7128" calcext:value-type="float">
            <text:p>7128</text:p>
          </table:table-cell>
          <table:table-cell office:value-type="float" office:value="8640000" calcext:value-type="float">
            <text:p>8640000</text:p>
          </table:table-cell>
          <table:table-cell table:formula="of:=[.B649]/[.C649]" office:value-type="float" office:value="0.000825" calcext:value-type="float">
            <text:p>0,00082500000000000000</text:p>
          </table:table-cell>
          <table:table-cell table:formula="of:=[.D650]-[.D64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B649]+11" office:value-type="float" office:value="7139" calcext:value-type="float">
            <text:p>7139</text:p>
          </table:table-cell>
          <table:table-cell office:value-type="float" office:value="8640000" calcext:value-type="float">
            <text:p>8640000</text:p>
          </table:table-cell>
          <table:table-cell table:formula="of:=[.B650]/[.C650]" office:value-type="float" office:value="0.000826273148148148" calcext:value-type="float">
            <text:p>0,00082627314814814800</text:p>
          </table:table-cell>
          <table:table-cell table:formula="of:=[.D651]-[.D65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B650]+11" office:value-type="float" office:value="7150" calcext:value-type="float">
            <text:p>7150</text:p>
          </table:table-cell>
          <table:table-cell office:value-type="float" office:value="8640000" calcext:value-type="float">
            <text:p>8640000</text:p>
          </table:table-cell>
          <table:table-cell table:formula="of:=[.B651]/[.C651]" office:value-type="float" office:value="0.000827546296296296" calcext:value-type="float">
            <text:p>0,00082754629629629600</text:p>
          </table:table-cell>
          <table:table-cell table:formula="of:=[.D652]-[.D65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B651]+11" office:value-type="float" office:value="7161" calcext:value-type="float">
            <text:p>7161</text:p>
          </table:table-cell>
          <table:table-cell office:value-type="float" office:value="8640000" calcext:value-type="float">
            <text:p>8640000</text:p>
          </table:table-cell>
          <table:table-cell table:formula="of:=[.B652]/[.C652]" office:value-type="float" office:value="0.000828819444444444" calcext:value-type="float">
            <text:p>0,00082881944444444500</text:p>
          </table:table-cell>
          <table:table-cell table:formula="of:=[.D653]-[.D65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B652]+11" office:value-type="float" office:value="7172" calcext:value-type="float">
            <text:p>7172</text:p>
          </table:table-cell>
          <table:table-cell office:value-type="float" office:value="8640000" calcext:value-type="float">
            <text:p>8640000</text:p>
          </table:table-cell>
          <table:table-cell table:formula="of:=[.B653]/[.C653]" office:value-type="float" office:value="0.000830092592592593" calcext:value-type="float">
            <text:p>0,00083009259259259200</text:p>
          </table:table-cell>
          <table:table-cell table:formula="of:=[.D654]-[.D65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B653]+11" office:value-type="float" office:value="7183" calcext:value-type="float">
            <text:p>7183</text:p>
          </table:table-cell>
          <table:table-cell office:value-type="float" office:value="8640000" calcext:value-type="float">
            <text:p>8640000</text:p>
          </table:table-cell>
          <table:table-cell table:formula="of:=[.B654]/[.C654]" office:value-type="float" office:value="0.000831365740740741" calcext:value-type="float">
            <text:p>0,00083136574074074100</text:p>
          </table:table-cell>
          <table:table-cell table:formula="of:=[.D655]-[.D65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B654]+11" office:value-type="float" office:value="7194" calcext:value-type="float">
            <text:p>7194</text:p>
          </table:table-cell>
          <table:table-cell office:value-type="float" office:value="8640000" calcext:value-type="float">
            <text:p>8640000</text:p>
          </table:table-cell>
          <table:table-cell table:formula="of:=[.B655]/[.C655]" office:value-type="float" office:value="0.000832638888888889" calcext:value-type="float">
            <text:p>0,00083263888888888900</text:p>
          </table:table-cell>
          <table:table-cell table:formula="of:=[.D656]-[.D65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B655]+11" office:value-type="float" office:value="7205" calcext:value-type="float">
            <text:p>7205</text:p>
          </table:table-cell>
          <table:table-cell office:value-type="float" office:value="8640000" calcext:value-type="float">
            <text:p>8640000</text:p>
          </table:table-cell>
          <table:table-cell table:formula="of:=[.B656]/[.C656]" office:value-type="float" office:value="0.000833912037037037" calcext:value-type="float">
            <text:p>0,00083391203703703700</text:p>
          </table:table-cell>
          <table:table-cell table:formula="of:=[.D657]-[.D65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B656]+11" office:value-type="float" office:value="7216" calcext:value-type="float">
            <text:p>7216</text:p>
          </table:table-cell>
          <table:table-cell office:value-type="float" office:value="8640000" calcext:value-type="float">
            <text:p>8640000</text:p>
          </table:table-cell>
          <table:table-cell table:formula="of:=[.B657]/[.C657]" office:value-type="float" office:value="0.000835185185185185" calcext:value-type="float">
            <text:p>0,00083518518518518500</text:p>
          </table:table-cell>
          <table:table-cell table:formula="of:=[.D658]-[.D65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B657]+11" office:value-type="float" office:value="7227" calcext:value-type="float">
            <text:p>7227</text:p>
          </table:table-cell>
          <table:table-cell office:value-type="float" office:value="8640000" calcext:value-type="float">
            <text:p>8640000</text:p>
          </table:table-cell>
          <table:table-cell table:formula="of:=[.B658]/[.C658]" office:value-type="float" office:value="0.000836458333333333" calcext:value-type="float">
            <text:p>0,00083645833333333400</text:p>
          </table:table-cell>
          <table:table-cell table:formula="of:=[.D659]-[.D65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B658]+11" office:value-type="float" office:value="7238" calcext:value-type="float">
            <text:p>7238</text:p>
          </table:table-cell>
          <table:table-cell office:value-type="float" office:value="8640000" calcext:value-type="float">
            <text:p>8640000</text:p>
          </table:table-cell>
          <table:table-cell table:formula="of:=[.B659]/[.C659]" office:value-type="float" office:value="0.000837731481481482" calcext:value-type="float">
            <text:p>0,00083773148148148100</text:p>
          </table:table-cell>
          <table:table-cell table:formula="of:=[.D660]-[.D65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B659]+11" office:value-type="float" office:value="7249" calcext:value-type="float">
            <text:p>7249</text:p>
          </table:table-cell>
          <table:table-cell office:value-type="float" office:value="8640000" calcext:value-type="float">
            <text:p>8640000</text:p>
          </table:table-cell>
          <table:table-cell table:formula="of:=[.B660]/[.C660]" office:value-type="float" office:value="0.00083900462962963" calcext:value-type="float">
            <text:p>0,00083900462962963000</text:p>
          </table:table-cell>
          <table:table-cell table:formula="of:=[.D661]-[.D66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B660]+11" office:value-type="float" office:value="7260" calcext:value-type="float">
            <text:p>7260</text:p>
          </table:table-cell>
          <table:table-cell office:value-type="float" office:value="8640000" calcext:value-type="float">
            <text:p>8640000</text:p>
          </table:table-cell>
          <table:table-cell table:formula="of:=[.B661]/[.C661]" office:value-type="float" office:value="0.000840277777777778" calcext:value-type="float">
            <text:p>0,00084027777777777800</text:p>
          </table:table-cell>
          <table:table-cell table:formula="of:=[.D662]-[.D66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B661]+11" office:value-type="float" office:value="7271" calcext:value-type="float">
            <text:p>7271</text:p>
          </table:table-cell>
          <table:table-cell office:value-type="float" office:value="8640000" calcext:value-type="float">
            <text:p>8640000</text:p>
          </table:table-cell>
          <table:table-cell table:formula="of:=[.B662]/[.C662]" office:value-type="float" office:value="0.000841550925925926" calcext:value-type="float">
            <text:p>0,00084155092592592600</text:p>
          </table:table-cell>
          <table:table-cell table:formula="of:=[.D663]-[.D66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B662]+11" office:value-type="float" office:value="7282" calcext:value-type="float">
            <text:p>7282</text:p>
          </table:table-cell>
          <table:table-cell office:value-type="float" office:value="8640000" calcext:value-type="float">
            <text:p>8640000</text:p>
          </table:table-cell>
          <table:table-cell table:formula="of:=[.B663]/[.C663]" office:value-type="float" office:value="0.000842824074074074" calcext:value-type="float">
            <text:p>0,00084282407407407400</text:p>
          </table:table-cell>
          <table:table-cell table:formula="of:=[.D664]-[.D66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B663]+11" office:value-type="float" office:value="7293" calcext:value-type="float">
            <text:p>7293</text:p>
          </table:table-cell>
          <table:table-cell office:value-type="float" office:value="8640000" calcext:value-type="float">
            <text:p>8640000</text:p>
          </table:table-cell>
          <table:table-cell table:formula="of:=[.B664]/[.C664]" office:value-type="float" office:value="0.000844097222222222" calcext:value-type="float">
            <text:p>0,00084409722222222200</text:p>
          </table:table-cell>
          <table:table-cell table:formula="of:=[.D665]-[.D66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B664]+11" office:value-type="float" office:value="7304" calcext:value-type="float">
            <text:p>7304</text:p>
          </table:table-cell>
          <table:table-cell office:value-type="float" office:value="8640000" calcext:value-type="float">
            <text:p>8640000</text:p>
          </table:table-cell>
          <table:table-cell table:formula="of:=[.B665]/[.C665]" office:value-type="float" office:value="0.00084537037037037" calcext:value-type="float">
            <text:p>0,00084537037037037000</text:p>
          </table:table-cell>
          <table:table-cell table:formula="of:=[.D666]-[.D66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B665]+11" office:value-type="float" office:value="7315" calcext:value-type="float">
            <text:p>7315</text:p>
          </table:table-cell>
          <table:table-cell office:value-type="float" office:value="8640000" calcext:value-type="float">
            <text:p>8640000</text:p>
          </table:table-cell>
          <table:table-cell table:formula="of:=[.B666]/[.C666]" office:value-type="float" office:value="0.000846643518518519" calcext:value-type="float">
            <text:p>0,00084664351851851900</text:p>
          </table:table-cell>
          <table:table-cell table:formula="of:=[.D667]-[.D66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B666]+11" office:value-type="float" office:value="7326" calcext:value-type="float">
            <text:p>7326</text:p>
          </table:table-cell>
          <table:table-cell office:value-type="float" office:value="8640000" calcext:value-type="float">
            <text:p>8640000</text:p>
          </table:table-cell>
          <table:table-cell table:formula="of:=[.B667]/[.C667]" office:value-type="float" office:value="0.000847916666666667" calcext:value-type="float">
            <text:p>0,00084791666666666700</text:p>
          </table:table-cell>
          <table:table-cell table:formula="of:=[.D668]-[.D66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B667]+11" office:value-type="float" office:value="7337" calcext:value-type="float">
            <text:p>7337</text:p>
          </table:table-cell>
          <table:table-cell office:value-type="float" office:value="8640000" calcext:value-type="float">
            <text:p>8640000</text:p>
          </table:table-cell>
          <table:table-cell table:formula="of:=[.B668]/[.C668]" office:value-type="float" office:value="0.000849189814814815" calcext:value-type="float">
            <text:p>0,00084918981481481500</text:p>
          </table:table-cell>
          <table:table-cell table:formula="of:=[.D669]-[.D66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B668]+11" office:value-type="float" office:value="7348" calcext:value-type="float">
            <text:p>7348</text:p>
          </table:table-cell>
          <table:table-cell office:value-type="float" office:value="8640000" calcext:value-type="float">
            <text:p>8640000</text:p>
          </table:table-cell>
          <table:table-cell table:formula="of:=[.B669]/[.C669]" office:value-type="float" office:value="0.000850462962962963" calcext:value-type="float">
            <text:p>0,00085046296296296300</text:p>
          </table:table-cell>
          <table:table-cell table:formula="of:=[.D670]-[.D66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B669]+11" office:value-type="float" office:value="7359" calcext:value-type="float">
            <text:p>7359</text:p>
          </table:table-cell>
          <table:table-cell office:value-type="float" office:value="8640000" calcext:value-type="float">
            <text:p>8640000</text:p>
          </table:table-cell>
          <table:table-cell table:formula="of:=[.B670]/[.C670]" office:value-type="float" office:value="0.000851736111111111" calcext:value-type="float">
            <text:p>0,00085173611111111100</text:p>
          </table:table-cell>
          <table:table-cell table:formula="of:=[.D671]-[.D67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B670]+11" office:value-type="float" office:value="7370" calcext:value-type="float">
            <text:p>7370</text:p>
          </table:table-cell>
          <table:table-cell office:value-type="float" office:value="8640000" calcext:value-type="float">
            <text:p>8640000</text:p>
          </table:table-cell>
          <table:table-cell table:formula="of:=[.B671]/[.C671]" office:value-type="float" office:value="0.000853009259259259" calcext:value-type="float">
            <text:p>0,00085300925925925900</text:p>
          </table:table-cell>
          <table:table-cell table:formula="of:=[.D672]-[.D67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B671]+11" office:value-type="float" office:value="7381" calcext:value-type="float">
            <text:p>7381</text:p>
          </table:table-cell>
          <table:table-cell office:value-type="float" office:value="8640000" calcext:value-type="float">
            <text:p>8640000</text:p>
          </table:table-cell>
          <table:table-cell table:formula="of:=[.B672]/[.C672]" office:value-type="float" office:value="0.000854282407407407" calcext:value-type="float">
            <text:p>0,00085428240740740800</text:p>
          </table:table-cell>
          <table:table-cell table:formula="of:=[.D673]-[.D67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B672]+11" office:value-type="float" office:value="7392" calcext:value-type="float">
            <text:p>7392</text:p>
          </table:table-cell>
          <table:table-cell office:value-type="float" office:value="8640000" calcext:value-type="float">
            <text:p>8640000</text:p>
          </table:table-cell>
          <table:table-cell table:formula="of:=[.B673]/[.C673]" office:value-type="float" office:value="0.000855555555555556" calcext:value-type="float">
            <text:p>0,00085555555555555600</text:p>
          </table:table-cell>
          <table:table-cell table:formula="of:=[.D674]-[.D67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B673]+11" office:value-type="float" office:value="7403" calcext:value-type="float">
            <text:p>7403</text:p>
          </table:table-cell>
          <table:table-cell office:value-type="float" office:value="8640000" calcext:value-type="float">
            <text:p>8640000</text:p>
          </table:table-cell>
          <table:table-cell table:formula="of:=[.B674]/[.C674]" office:value-type="float" office:value="0.000856828703703704" calcext:value-type="float">
            <text:p>0,00085682870370370400</text:p>
          </table:table-cell>
          <table:table-cell table:formula="of:=[.D675]-[.D67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B674]+11" office:value-type="float" office:value="7414" calcext:value-type="float">
            <text:p>7414</text:p>
          </table:table-cell>
          <table:table-cell office:value-type="float" office:value="8640000" calcext:value-type="float">
            <text:p>8640000</text:p>
          </table:table-cell>
          <table:table-cell table:formula="of:=[.B675]/[.C675]" office:value-type="float" office:value="0.000858101851851852" calcext:value-type="float">
            <text:p>0,00085810185185185200</text:p>
          </table:table-cell>
          <table:table-cell table:formula="of:=[.D676]-[.D67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B675]+11" office:value-type="float" office:value="7425" calcext:value-type="float">
            <text:p>7425</text:p>
          </table:table-cell>
          <table:table-cell office:value-type="float" office:value="8640000" calcext:value-type="float">
            <text:p>8640000</text:p>
          </table:table-cell>
          <table:table-cell table:formula="of:=[.B676]/[.C676]" office:value-type="float" office:value="0.000859375" calcext:value-type="float">
            <text:p>0,00085937500000000000</text:p>
          </table:table-cell>
          <table:table-cell table:formula="of:=[.D677]-[.D67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B676]+11" office:value-type="float" office:value="7436" calcext:value-type="float">
            <text:p>7436</text:p>
          </table:table-cell>
          <table:table-cell office:value-type="float" office:value="8640000" calcext:value-type="float">
            <text:p>8640000</text:p>
          </table:table-cell>
          <table:table-cell table:formula="of:=[.B677]/[.C677]" office:value-type="float" office:value="0.000860648148148148" calcext:value-type="float">
            <text:p>0,00086064814814814800</text:p>
          </table:table-cell>
          <table:table-cell table:formula="of:=[.D678]-[.D67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B677]+11" office:value-type="float" office:value="7447" calcext:value-type="float">
            <text:p>7447</text:p>
          </table:table-cell>
          <table:table-cell office:value-type="float" office:value="8640000" calcext:value-type="float">
            <text:p>8640000</text:p>
          </table:table-cell>
          <table:table-cell table:formula="of:=[.B678]/[.C678]" office:value-type="float" office:value="0.000861921296296296" calcext:value-type="float">
            <text:p>0,00086192129629629600</text:p>
          </table:table-cell>
          <table:table-cell table:formula="of:=[.D679]-[.D67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B678]+11" office:value-type="float" office:value="7458" calcext:value-type="float">
            <text:p>7458</text:p>
          </table:table-cell>
          <table:table-cell office:value-type="float" office:value="8640000" calcext:value-type="float">
            <text:p>8640000</text:p>
          </table:table-cell>
          <table:table-cell table:formula="of:=[.B679]/[.C679]" office:value-type="float" office:value="0.000863194444444444" calcext:value-type="float">
            <text:p>0,00086319444444444500</text:p>
          </table:table-cell>
          <table:table-cell table:formula="of:=[.D680]-[.D67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B679]+11" office:value-type="float" office:value="7469" calcext:value-type="float">
            <text:p>7469</text:p>
          </table:table-cell>
          <table:table-cell office:value-type="float" office:value="8640000" calcext:value-type="float">
            <text:p>8640000</text:p>
          </table:table-cell>
          <table:table-cell table:formula="of:=[.B680]/[.C680]" office:value-type="float" office:value="0.000864467592592593" calcext:value-type="float">
            <text:p>0,00086446759259259300</text:p>
          </table:table-cell>
          <table:table-cell table:formula="of:=[.D681]-[.D68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B680]+11" office:value-type="float" office:value="7480" calcext:value-type="float">
            <text:p>7480</text:p>
          </table:table-cell>
          <table:table-cell office:value-type="float" office:value="8640000" calcext:value-type="float">
            <text:p>8640000</text:p>
          </table:table-cell>
          <table:table-cell table:formula="of:=[.B681]/[.C681]" office:value-type="float" office:value="0.000865740740740741" calcext:value-type="float">
            <text:p>0,00086574074074074100</text:p>
          </table:table-cell>
          <table:table-cell table:formula="of:=[.D682]-[.D68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B681]+11" office:value-type="float" office:value="7491" calcext:value-type="float">
            <text:p>7491</text:p>
          </table:table-cell>
          <table:table-cell office:value-type="float" office:value="8640000" calcext:value-type="float">
            <text:p>8640000</text:p>
          </table:table-cell>
          <table:table-cell table:formula="of:=[.B682]/[.C682]" office:value-type="float" office:value="0.000867013888888889" calcext:value-type="float">
            <text:p>0,00086701388888888900</text:p>
          </table:table-cell>
          <table:table-cell table:formula="of:=[.D683]-[.D68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B682]+11" office:value-type="float" office:value="7502" calcext:value-type="float">
            <text:p>7502</text:p>
          </table:table-cell>
          <table:table-cell office:value-type="float" office:value="8640000" calcext:value-type="float">
            <text:p>8640000</text:p>
          </table:table-cell>
          <table:table-cell table:formula="of:=[.B683]/[.C683]" office:value-type="float" office:value="0.000868287037037037" calcext:value-type="float">
            <text:p>0,00086828703703703700</text:p>
          </table:table-cell>
          <table:table-cell table:formula="of:=[.D684]-[.D68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B683]+11" office:value-type="float" office:value="7513" calcext:value-type="float">
            <text:p>7513</text:p>
          </table:table-cell>
          <table:table-cell office:value-type="float" office:value="8640000" calcext:value-type="float">
            <text:p>8640000</text:p>
          </table:table-cell>
          <table:table-cell table:formula="of:=[.B684]/[.C684]" office:value-type="float" office:value="0.000869560185185185" calcext:value-type="float">
            <text:p>0,00086956018518518500</text:p>
          </table:table-cell>
          <table:table-cell table:formula="of:=[.D685]-[.D68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B684]+11" office:value-type="float" office:value="7524" calcext:value-type="float">
            <text:p>7524</text:p>
          </table:table-cell>
          <table:table-cell office:value-type="float" office:value="8640000" calcext:value-type="float">
            <text:p>8640000</text:p>
          </table:table-cell>
          <table:table-cell table:formula="of:=[.B685]/[.C685]" office:value-type="float" office:value="0.000870833333333333" calcext:value-type="float">
            <text:p>0,00087083333333333400</text:p>
          </table:table-cell>
          <table:table-cell table:formula="of:=[.D686]-[.D68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B685]+11" office:value-type="float" office:value="7535" calcext:value-type="float">
            <text:p>7535</text:p>
          </table:table-cell>
          <table:table-cell office:value-type="float" office:value="8640000" calcext:value-type="float">
            <text:p>8640000</text:p>
          </table:table-cell>
          <table:table-cell table:formula="of:=[.B686]/[.C686]" office:value-type="float" office:value="0.000872106481481482" calcext:value-type="float">
            <text:p>0,00087210648148148100</text:p>
          </table:table-cell>
          <table:table-cell table:formula="of:=[.D687]-[.D68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B686]+11" office:value-type="float" office:value="7546" calcext:value-type="float">
            <text:p>7546</text:p>
          </table:table-cell>
          <table:table-cell office:value-type="float" office:value="8640000" calcext:value-type="float">
            <text:p>8640000</text:p>
          </table:table-cell>
          <table:table-cell table:formula="of:=[.B687]/[.C687]" office:value-type="float" office:value="0.00087337962962963" calcext:value-type="float">
            <text:p>0,00087337962962963000</text:p>
          </table:table-cell>
          <table:table-cell table:formula="of:=[.D688]-[.D68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B687]+11" office:value-type="float" office:value="7557" calcext:value-type="float">
            <text:p>7557</text:p>
          </table:table-cell>
          <table:table-cell office:value-type="float" office:value="8640000" calcext:value-type="float">
            <text:p>8640000</text:p>
          </table:table-cell>
          <table:table-cell table:formula="of:=[.B688]/[.C688]" office:value-type="float" office:value="0.000874652777777778" calcext:value-type="float">
            <text:p>0,00087465277777777800</text:p>
          </table:table-cell>
          <table:table-cell table:formula="of:=[.D689]-[.D68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B688]+11" office:value-type="float" office:value="7568" calcext:value-type="float">
            <text:p>7568</text:p>
          </table:table-cell>
          <table:table-cell office:value-type="float" office:value="8640000" calcext:value-type="float">
            <text:p>8640000</text:p>
          </table:table-cell>
          <table:table-cell table:formula="of:=[.B689]/[.C689]" office:value-type="float" office:value="0.000875925925925926" calcext:value-type="float">
            <text:p>0,00087592592592592600</text:p>
          </table:table-cell>
          <table:table-cell table:formula="of:=[.D690]-[.D68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B689]+11" office:value-type="float" office:value="7579" calcext:value-type="float">
            <text:p>7579</text:p>
          </table:table-cell>
          <table:table-cell office:value-type="float" office:value="8640000" calcext:value-type="float">
            <text:p>8640000</text:p>
          </table:table-cell>
          <table:table-cell table:formula="of:=[.B690]/[.C690]" office:value-type="float" office:value="0.000877199074074074" calcext:value-type="float">
            <text:p>0,00087719907407407400</text:p>
          </table:table-cell>
          <table:table-cell table:formula="of:=[.D691]-[.D69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B690]+11" office:value-type="float" office:value="7590" calcext:value-type="float">
            <text:p>7590</text:p>
          </table:table-cell>
          <table:table-cell office:value-type="float" office:value="8640000" calcext:value-type="float">
            <text:p>8640000</text:p>
          </table:table-cell>
          <table:table-cell table:formula="of:=[.B691]/[.C691]" office:value-type="float" office:value="0.000878472222222222" calcext:value-type="float">
            <text:p>0,00087847222222222200</text:p>
          </table:table-cell>
          <table:table-cell table:formula="of:=[.D692]-[.D69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B691]+11" office:value-type="float" office:value="7601" calcext:value-type="float">
            <text:p>7601</text:p>
          </table:table-cell>
          <table:table-cell office:value-type="float" office:value="8640000" calcext:value-type="float">
            <text:p>8640000</text:p>
          </table:table-cell>
          <table:table-cell table:formula="of:=[.B692]/[.C692]" office:value-type="float" office:value="0.00087974537037037" calcext:value-type="float">
            <text:p>0,00087974537037037000</text:p>
          </table:table-cell>
          <table:table-cell table:formula="of:=[.D693]-[.D69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B692]+11" office:value-type="float" office:value="7612" calcext:value-type="float">
            <text:p>7612</text:p>
          </table:table-cell>
          <table:table-cell office:value-type="float" office:value="8640000" calcext:value-type="float">
            <text:p>8640000</text:p>
          </table:table-cell>
          <table:table-cell table:formula="of:=[.B693]/[.C693]" office:value-type="float" office:value="0.000881018518518519" calcext:value-type="float">
            <text:p>0,00088101851851851900</text:p>
          </table:table-cell>
          <table:table-cell table:formula="of:=[.D694]-[.D69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B693]+11" office:value-type="float" office:value="7623" calcext:value-type="float">
            <text:p>7623</text:p>
          </table:table-cell>
          <table:table-cell office:value-type="float" office:value="8640000" calcext:value-type="float">
            <text:p>8640000</text:p>
          </table:table-cell>
          <table:table-cell table:formula="of:=[.B694]/[.C694]" office:value-type="float" office:value="0.000882291666666667" calcext:value-type="float">
            <text:p>0,00088229166666666700</text:p>
          </table:table-cell>
          <table:table-cell table:formula="of:=[.D695]-[.D69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B694]+11" office:value-type="float" office:value="7634" calcext:value-type="float">
            <text:p>7634</text:p>
          </table:table-cell>
          <table:table-cell office:value-type="float" office:value="8640000" calcext:value-type="float">
            <text:p>8640000</text:p>
          </table:table-cell>
          <table:table-cell table:formula="of:=[.B695]/[.C695]" office:value-type="float" office:value="0.000883564814814815" calcext:value-type="float">
            <text:p>0,00088356481481481500</text:p>
          </table:table-cell>
          <table:table-cell table:formula="of:=[.D696]-[.D69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B695]+11" office:value-type="float" office:value="7645" calcext:value-type="float">
            <text:p>7645</text:p>
          </table:table-cell>
          <table:table-cell office:value-type="float" office:value="8640000" calcext:value-type="float">
            <text:p>8640000</text:p>
          </table:table-cell>
          <table:table-cell table:formula="of:=[.B696]/[.C696]" office:value-type="float" office:value="0.000884837962962963" calcext:value-type="float">
            <text:p>0,00088483796296296300</text:p>
          </table:table-cell>
          <table:table-cell table:formula="of:=[.D697]-[.D69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B696]+11" office:value-type="float" office:value="7656" calcext:value-type="float">
            <text:p>7656</text:p>
          </table:table-cell>
          <table:table-cell office:value-type="float" office:value="8640000" calcext:value-type="float">
            <text:p>8640000</text:p>
          </table:table-cell>
          <table:table-cell table:formula="of:=[.B697]/[.C697]" office:value-type="float" office:value="0.000886111111111111" calcext:value-type="float">
            <text:p>0,00088611111111111100</text:p>
          </table:table-cell>
          <table:table-cell table:formula="of:=[.D698]-[.D69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B697]+11" office:value-type="float" office:value="7667" calcext:value-type="float">
            <text:p>7667</text:p>
          </table:table-cell>
          <table:table-cell office:value-type="float" office:value="8640000" calcext:value-type="float">
            <text:p>8640000</text:p>
          </table:table-cell>
          <table:table-cell table:formula="of:=[.B698]/[.C698]" office:value-type="float" office:value="0.000887384259259259" calcext:value-type="float">
            <text:p>0,00088738425925925900</text:p>
          </table:table-cell>
          <table:table-cell table:formula="of:=[.D699]-[.D69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B698]+11" office:value-type="float" office:value="7678" calcext:value-type="float">
            <text:p>7678</text:p>
          </table:table-cell>
          <table:table-cell office:value-type="float" office:value="8640000" calcext:value-type="float">
            <text:p>8640000</text:p>
          </table:table-cell>
          <table:table-cell table:formula="of:=[.B699]/[.C699]" office:value-type="float" office:value="0.000888657407407408" calcext:value-type="float">
            <text:p>0,00088865740740740800</text:p>
          </table:table-cell>
          <table:table-cell table:formula="of:=[.D700]-[.D69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B699]+11" office:value-type="float" office:value="7689" calcext:value-type="float">
            <text:p>7689</text:p>
          </table:table-cell>
          <table:table-cell office:value-type="float" office:value="8640000" calcext:value-type="float">
            <text:p>8640000</text:p>
          </table:table-cell>
          <table:table-cell table:formula="of:=[.B700]/[.C700]" office:value-type="float" office:value="0.000889930555555556" calcext:value-type="float">
            <text:p>0,00088993055555555600</text:p>
          </table:table-cell>
          <table:table-cell table:formula="of:=[.D701]-[.D70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B700]+11" office:value-type="float" office:value="7700" calcext:value-type="float">
            <text:p>7700</text:p>
          </table:table-cell>
          <table:table-cell office:value-type="float" office:value="8640000" calcext:value-type="float">
            <text:p>8640000</text:p>
          </table:table-cell>
          <table:table-cell table:formula="of:=[.B701]/[.C701]" office:value-type="float" office:value="0.000891203703703704" calcext:value-type="float">
            <text:p>0,00089120370370370400</text:p>
          </table:table-cell>
          <table:table-cell table:formula="of:=[.D702]-[.D70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B701]+11" office:value-type="float" office:value="7711" calcext:value-type="float">
            <text:p>7711</text:p>
          </table:table-cell>
          <table:table-cell office:value-type="float" office:value="8640000" calcext:value-type="float">
            <text:p>8640000</text:p>
          </table:table-cell>
          <table:table-cell table:formula="of:=[.B702]/[.C702]" office:value-type="float" office:value="0.000892476851851852" calcext:value-type="float">
            <text:p>0,00089247685185185200</text:p>
          </table:table-cell>
          <table:table-cell table:formula="of:=[.D703]-[.D70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B702]+11" office:value-type="float" office:value="7722" calcext:value-type="float">
            <text:p>7722</text:p>
          </table:table-cell>
          <table:table-cell office:value-type="float" office:value="8640000" calcext:value-type="float">
            <text:p>8640000</text:p>
          </table:table-cell>
          <table:table-cell table:formula="of:=[.B703]/[.C703]" office:value-type="float" office:value="0.00089375" calcext:value-type="float">
            <text:p>0,00089375000000000000</text:p>
          </table:table-cell>
          <table:table-cell table:formula="of:=[.D704]-[.D70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B703]+11" office:value-type="float" office:value="7733" calcext:value-type="float">
            <text:p>7733</text:p>
          </table:table-cell>
          <table:table-cell office:value-type="float" office:value="8640000" calcext:value-type="float">
            <text:p>8640000</text:p>
          </table:table-cell>
          <table:table-cell table:formula="of:=[.B704]/[.C704]" office:value-type="float" office:value="0.000895023148148148" calcext:value-type="float">
            <text:p>0,00089502314814814800</text:p>
          </table:table-cell>
          <table:table-cell table:formula="of:=[.D705]-[.D70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B704]+11" office:value-type="float" office:value="7744" calcext:value-type="float">
            <text:p>7744</text:p>
          </table:table-cell>
          <table:table-cell office:value-type="float" office:value="8640000" calcext:value-type="float">
            <text:p>8640000</text:p>
          </table:table-cell>
          <table:table-cell table:formula="of:=[.B705]/[.C705]" office:value-type="float" office:value="0.000896296296296296" calcext:value-type="float">
            <text:p>0,00089629629629629600</text:p>
          </table:table-cell>
          <table:table-cell table:formula="of:=[.D706]-[.D70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B705]+11" office:value-type="float" office:value="7755" calcext:value-type="float">
            <text:p>7755</text:p>
          </table:table-cell>
          <table:table-cell office:value-type="float" office:value="8640000" calcext:value-type="float">
            <text:p>8640000</text:p>
          </table:table-cell>
          <table:table-cell table:formula="of:=[.B706]/[.C706]" office:value-type="float" office:value="0.000897569444444444" calcext:value-type="float">
            <text:p>0,00089756944444444400</text:p>
          </table:table-cell>
          <table:table-cell table:formula="of:=[.D707]-[.D70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B706]+11" office:value-type="float" office:value="7766" calcext:value-type="float">
            <text:p>7766</text:p>
          </table:table-cell>
          <table:table-cell office:value-type="float" office:value="8640000" calcext:value-type="float">
            <text:p>8640000</text:p>
          </table:table-cell>
          <table:table-cell table:formula="of:=[.B707]/[.C707]" office:value-type="float" office:value="0.000898842592592593" calcext:value-type="float">
            <text:p>0,00089884259259259300</text:p>
          </table:table-cell>
          <table:table-cell table:formula="of:=[.D708]-[.D70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B707]+11" office:value-type="float" office:value="7777" calcext:value-type="float">
            <text:p>7777</text:p>
          </table:table-cell>
          <table:table-cell office:value-type="float" office:value="8640000" calcext:value-type="float">
            <text:p>8640000</text:p>
          </table:table-cell>
          <table:table-cell table:formula="of:=[.B708]/[.C708]" office:value-type="float" office:value="0.000900115740740741" calcext:value-type="float">
            <text:p>0,00090011574074074100</text:p>
          </table:table-cell>
          <table:table-cell table:formula="of:=[.D709]-[.D70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B708]+11" office:value-type="float" office:value="7788" calcext:value-type="float">
            <text:p>7788</text:p>
          </table:table-cell>
          <table:table-cell office:value-type="float" office:value="8640000" calcext:value-type="float">
            <text:p>8640000</text:p>
          </table:table-cell>
          <table:table-cell table:formula="of:=[.B709]/[.C709]" office:value-type="float" office:value="0.000901388888888889" calcext:value-type="float">
            <text:p>0,00090138888888888900</text:p>
          </table:table-cell>
          <table:table-cell table:formula="of:=[.D710]-[.D70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B709]+11" office:value-type="float" office:value="7799" calcext:value-type="float">
            <text:p>7799</text:p>
          </table:table-cell>
          <table:table-cell office:value-type="float" office:value="8640000" calcext:value-type="float">
            <text:p>8640000</text:p>
          </table:table-cell>
          <table:table-cell table:formula="of:=[.B710]/[.C710]" office:value-type="float" office:value="0.000902662037037037" calcext:value-type="float">
            <text:p>0,00090266203703703700</text:p>
          </table:table-cell>
          <table:table-cell table:formula="of:=[.D711]-[.D71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B710]+11" office:value-type="float" office:value="7810" calcext:value-type="float">
            <text:p>7810</text:p>
          </table:table-cell>
          <table:table-cell office:value-type="float" office:value="8640000" calcext:value-type="float">
            <text:p>8640000</text:p>
          </table:table-cell>
          <table:table-cell table:formula="of:=[.B711]/[.C711]" office:value-type="float" office:value="0.000903935185185185" calcext:value-type="float">
            <text:p>0,00090393518518518500</text:p>
          </table:table-cell>
          <table:table-cell table:formula="of:=[.D712]-[.D71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B711]+11" office:value-type="float" office:value="7821" calcext:value-type="float">
            <text:p>7821</text:p>
          </table:table-cell>
          <table:table-cell office:value-type="float" office:value="8640000" calcext:value-type="float">
            <text:p>8640000</text:p>
          </table:table-cell>
          <table:table-cell table:formula="of:=[.B712]/[.C712]" office:value-type="float" office:value="0.000905208333333333" calcext:value-type="float">
            <text:p>0,00090520833333333400</text:p>
          </table:table-cell>
          <table:table-cell table:formula="of:=[.D713]-[.D71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B712]+11" office:value-type="float" office:value="7832" calcext:value-type="float">
            <text:p>7832</text:p>
          </table:table-cell>
          <table:table-cell office:value-type="float" office:value="8640000" calcext:value-type="float">
            <text:p>8640000</text:p>
          </table:table-cell>
          <table:table-cell table:formula="of:=[.B713]/[.C713]" office:value-type="float" office:value="0.000906481481481482" calcext:value-type="float">
            <text:p>0,00090648148148148200</text:p>
          </table:table-cell>
          <table:table-cell table:formula="of:=[.D714]-[.D71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B713]+11" office:value-type="float" office:value="7843" calcext:value-type="float">
            <text:p>7843</text:p>
          </table:table-cell>
          <table:table-cell office:value-type="float" office:value="8640000" calcext:value-type="float">
            <text:p>8640000</text:p>
          </table:table-cell>
          <table:table-cell table:formula="of:=[.B714]/[.C714]" office:value-type="float" office:value="0.00090775462962963" calcext:value-type="float">
            <text:p>0,00090775462962963000</text:p>
          </table:table-cell>
          <table:table-cell table:formula="of:=[.D715]-[.D71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B714]+11" office:value-type="float" office:value="7854" calcext:value-type="float">
            <text:p>7854</text:p>
          </table:table-cell>
          <table:table-cell office:value-type="float" office:value="8640000" calcext:value-type="float">
            <text:p>8640000</text:p>
          </table:table-cell>
          <table:table-cell table:formula="of:=[.B715]/[.C715]" office:value-type="float" office:value="0.000909027777777778" calcext:value-type="float">
            <text:p>0,00090902777777777800</text:p>
          </table:table-cell>
          <table:table-cell table:formula="of:=[.D716]-[.D71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B715]+11" office:value-type="float" office:value="7865" calcext:value-type="float">
            <text:p>7865</text:p>
          </table:table-cell>
          <table:table-cell office:value-type="float" office:value="8640000" calcext:value-type="float">
            <text:p>8640000</text:p>
          </table:table-cell>
          <table:table-cell table:formula="of:=[.B716]/[.C716]" office:value-type="float" office:value="0.000910300925925926" calcext:value-type="float">
            <text:p>0,00091030092592592600</text:p>
          </table:table-cell>
          <table:table-cell table:formula="of:=[.D717]-[.D71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B716]+11" office:value-type="float" office:value="7876" calcext:value-type="float">
            <text:p>7876</text:p>
          </table:table-cell>
          <table:table-cell office:value-type="float" office:value="8640000" calcext:value-type="float">
            <text:p>8640000</text:p>
          </table:table-cell>
          <table:table-cell table:formula="of:=[.B717]/[.C717]" office:value-type="float" office:value="0.000911574074074074" calcext:value-type="float">
            <text:p>0,00091157407407407400</text:p>
          </table:table-cell>
          <table:table-cell table:formula="of:=[.D718]-[.D71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B717]+11" office:value-type="float" office:value="7887" calcext:value-type="float">
            <text:p>7887</text:p>
          </table:table-cell>
          <table:table-cell office:value-type="float" office:value="8640000" calcext:value-type="float">
            <text:p>8640000</text:p>
          </table:table-cell>
          <table:table-cell table:formula="of:=[.B718]/[.C718]" office:value-type="float" office:value="0.000912847222222222" calcext:value-type="float">
            <text:p>0,00091284722222222200</text:p>
          </table:table-cell>
          <table:table-cell table:formula="of:=[.D719]-[.D71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B718]+11" office:value-type="float" office:value="7898" calcext:value-type="float">
            <text:p>7898</text:p>
          </table:table-cell>
          <table:table-cell office:value-type="float" office:value="8640000" calcext:value-type="float">
            <text:p>8640000</text:p>
          </table:table-cell>
          <table:table-cell table:formula="of:=[.B719]/[.C719]" office:value-type="float" office:value="0.00091412037037037" calcext:value-type="float">
            <text:p>0,00091412037037037000</text:p>
          </table:table-cell>
          <table:table-cell table:formula="of:=[.D720]-[.D71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B719]+11" office:value-type="float" office:value="7909" calcext:value-type="float">
            <text:p>7909</text:p>
          </table:table-cell>
          <table:table-cell office:value-type="float" office:value="8640000" calcext:value-type="float">
            <text:p>8640000</text:p>
          </table:table-cell>
          <table:table-cell table:formula="of:=[.B720]/[.C720]" office:value-type="float" office:value="0.000915393518518519" calcext:value-type="float">
            <text:p>0,00091539351851851900</text:p>
          </table:table-cell>
          <table:table-cell table:formula="of:=[.D721]-[.D72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B720]+11" office:value-type="float" office:value="7920" calcext:value-type="float">
            <text:p>7920</text:p>
          </table:table-cell>
          <table:table-cell office:value-type="float" office:value="8640000" calcext:value-type="float">
            <text:p>8640000</text:p>
          </table:table-cell>
          <table:table-cell table:formula="of:=[.B721]/[.C721]" office:value-type="float" office:value="0.000916666666666667" calcext:value-type="float">
            <text:p>0,00091666666666666700</text:p>
          </table:table-cell>
          <table:table-cell table:formula="of:=[.D722]-[.D72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B721]+11" office:value-type="float" office:value="7931" calcext:value-type="float">
            <text:p>7931</text:p>
          </table:table-cell>
          <table:table-cell office:value-type="float" office:value="8640000" calcext:value-type="float">
            <text:p>8640000</text:p>
          </table:table-cell>
          <table:table-cell table:formula="of:=[.B722]/[.C722]" office:value-type="float" office:value="0.000917939814814815" calcext:value-type="float">
            <text:p>0,00091793981481481500</text:p>
          </table:table-cell>
          <table:table-cell table:formula="of:=[.D723]-[.D72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B722]+11" office:value-type="float" office:value="7942" calcext:value-type="float">
            <text:p>7942</text:p>
          </table:table-cell>
          <table:table-cell office:value-type="float" office:value="8640000" calcext:value-type="float">
            <text:p>8640000</text:p>
          </table:table-cell>
          <table:table-cell table:formula="of:=[.B723]/[.C723]" office:value-type="float" office:value="0.000919212962962963" calcext:value-type="float">
            <text:p>0,00091921296296296300</text:p>
          </table:table-cell>
          <table:table-cell table:formula="of:=[.D724]-[.D72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B723]+11" office:value-type="float" office:value="7953" calcext:value-type="float">
            <text:p>7953</text:p>
          </table:table-cell>
          <table:table-cell office:value-type="float" office:value="8640000" calcext:value-type="float">
            <text:p>8640000</text:p>
          </table:table-cell>
          <table:table-cell table:formula="of:=[.B724]/[.C724]" office:value-type="float" office:value="0.000920486111111111" calcext:value-type="float">
            <text:p>0,00092048611111111100</text:p>
          </table:table-cell>
          <table:table-cell table:formula="of:=[.D725]-[.D72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B724]+11" office:value-type="float" office:value="7964" calcext:value-type="float">
            <text:p>7964</text:p>
          </table:table-cell>
          <table:table-cell office:value-type="float" office:value="8640000" calcext:value-type="float">
            <text:p>8640000</text:p>
          </table:table-cell>
          <table:table-cell table:formula="of:=[.B725]/[.C725]" office:value-type="float" office:value="0.000921759259259259" calcext:value-type="float">
            <text:p>0,00092175925925925900</text:p>
          </table:table-cell>
          <table:table-cell table:formula="of:=[.D726]-[.D72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B725]+11" office:value-type="float" office:value="7975" calcext:value-type="float">
            <text:p>7975</text:p>
          </table:table-cell>
          <table:table-cell office:value-type="float" office:value="8640000" calcext:value-type="float">
            <text:p>8640000</text:p>
          </table:table-cell>
          <table:table-cell table:formula="of:=[.B726]/[.C726]" office:value-type="float" office:value="0.000923032407407408" calcext:value-type="float">
            <text:p>0,00092303240740740800</text:p>
          </table:table-cell>
          <table:table-cell table:formula="of:=[.D727]-[.D72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B726]+11" office:value-type="float" office:value="7986" calcext:value-type="float">
            <text:p>7986</text:p>
          </table:table-cell>
          <table:table-cell office:value-type="float" office:value="8640000" calcext:value-type="float">
            <text:p>8640000</text:p>
          </table:table-cell>
          <table:table-cell table:formula="of:=[.B727]/[.C727]" office:value-type="float" office:value="0.000924305555555556" calcext:value-type="float">
            <text:p>0,00092430555555555600</text:p>
          </table:table-cell>
          <table:table-cell table:formula="of:=[.D728]-[.D72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B727]+11" office:value-type="float" office:value="7997" calcext:value-type="float">
            <text:p>7997</text:p>
          </table:table-cell>
          <table:table-cell office:value-type="float" office:value="8640000" calcext:value-type="float">
            <text:p>8640000</text:p>
          </table:table-cell>
          <table:table-cell table:formula="of:=[.B728]/[.C728]" office:value-type="float" office:value="0.000925578703703704" calcext:value-type="float">
            <text:p>0,00092557870370370400</text:p>
          </table:table-cell>
          <table:table-cell table:formula="of:=[.D729]-[.D72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B728]+11" office:value-type="float" office:value="8008" calcext:value-type="float">
            <text:p>8008</text:p>
          </table:table-cell>
          <table:table-cell office:value-type="float" office:value="8640000" calcext:value-type="float">
            <text:p>8640000</text:p>
          </table:table-cell>
          <table:table-cell table:formula="of:=[.B729]/[.C729]" office:value-type="float" office:value="0.000926851851851852" calcext:value-type="float">
            <text:p>0,00092685185185185200</text:p>
          </table:table-cell>
          <table:table-cell table:formula="of:=[.D730]-[.D72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B729]+11" office:value-type="float" office:value="8019" calcext:value-type="float">
            <text:p>8019</text:p>
          </table:table-cell>
          <table:table-cell office:value-type="float" office:value="8640000" calcext:value-type="float">
            <text:p>8640000</text:p>
          </table:table-cell>
          <table:table-cell table:formula="of:=[.B730]/[.C730]" office:value-type="float" office:value="0.000928125" calcext:value-type="float">
            <text:p>0,00092812500000000000</text:p>
          </table:table-cell>
          <table:table-cell table:formula="of:=[.D731]-[.D73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B730]+11" office:value-type="float" office:value="8030" calcext:value-type="float">
            <text:p>8030</text:p>
          </table:table-cell>
          <table:table-cell office:value-type="float" office:value="8640000" calcext:value-type="float">
            <text:p>8640000</text:p>
          </table:table-cell>
          <table:table-cell table:formula="of:=[.B731]/[.C731]" office:value-type="float" office:value="0.000929398148148148" calcext:value-type="float">
            <text:p>0,00092939814814814800</text:p>
          </table:table-cell>
          <table:table-cell table:formula="of:=[.D732]-[.D73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B731]+11" office:value-type="float" office:value="8041" calcext:value-type="float">
            <text:p>8041</text:p>
          </table:table-cell>
          <table:table-cell office:value-type="float" office:value="8640000" calcext:value-type="float">
            <text:p>8640000</text:p>
          </table:table-cell>
          <table:table-cell table:formula="of:=[.B732]/[.C732]" office:value-type="float" office:value="0.000930671296296296" calcext:value-type="float">
            <text:p>0,00093067129629629600</text:p>
          </table:table-cell>
          <table:table-cell table:formula="of:=[.D733]-[.D73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B732]+11" office:value-type="float" office:value="8052" calcext:value-type="float">
            <text:p>8052</text:p>
          </table:table-cell>
          <table:table-cell office:value-type="float" office:value="8640000" calcext:value-type="float">
            <text:p>8640000</text:p>
          </table:table-cell>
          <table:table-cell table:formula="of:=[.B733]/[.C733]" office:value-type="float" office:value="0.000931944444444444" calcext:value-type="float">
            <text:p>0,00093194444444444400</text:p>
          </table:table-cell>
          <table:table-cell table:formula="of:=[.D734]-[.D73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B733]+11" office:value-type="float" office:value="8063" calcext:value-type="float">
            <text:p>8063</text:p>
          </table:table-cell>
          <table:table-cell office:value-type="float" office:value="8640000" calcext:value-type="float">
            <text:p>8640000</text:p>
          </table:table-cell>
          <table:table-cell table:formula="of:=[.B734]/[.C734]" office:value-type="float" office:value="0.000933217592592593" calcext:value-type="float">
            <text:p>0,00093321759259259300</text:p>
          </table:table-cell>
          <table:table-cell table:formula="of:=[.D735]-[.D73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B734]+11" office:value-type="float" office:value="8074" calcext:value-type="float">
            <text:p>8074</text:p>
          </table:table-cell>
          <table:table-cell office:value-type="float" office:value="8640000" calcext:value-type="float">
            <text:p>8640000</text:p>
          </table:table-cell>
          <table:table-cell table:formula="of:=[.B735]/[.C735]" office:value-type="float" office:value="0.000934490740740741" calcext:value-type="float">
            <text:p>0,00093449074074074100</text:p>
          </table:table-cell>
          <table:table-cell table:formula="of:=[.D736]-[.D73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B735]+11" office:value-type="float" office:value="8085" calcext:value-type="float">
            <text:p>8085</text:p>
          </table:table-cell>
          <table:table-cell office:value-type="float" office:value="8640000" calcext:value-type="float">
            <text:p>8640000</text:p>
          </table:table-cell>
          <table:table-cell table:formula="of:=[.B736]/[.C736]" office:value-type="float" office:value="0.000935763888888889" calcext:value-type="float">
            <text:p>0,00093576388888888900</text:p>
          </table:table-cell>
          <table:table-cell table:formula="of:=[.D737]-[.D73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B736]+11" office:value-type="float" office:value="8096" calcext:value-type="float">
            <text:p>8096</text:p>
          </table:table-cell>
          <table:table-cell office:value-type="float" office:value="8640000" calcext:value-type="float">
            <text:p>8640000</text:p>
          </table:table-cell>
          <table:table-cell table:formula="of:=[.B737]/[.C737]" office:value-type="float" office:value="0.000937037037037037" calcext:value-type="float">
            <text:p>0,00093703703703703700</text:p>
          </table:table-cell>
          <table:table-cell table:formula="of:=[.D738]-[.D73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B737]+11" office:value-type="float" office:value="8107" calcext:value-type="float">
            <text:p>8107</text:p>
          </table:table-cell>
          <table:table-cell office:value-type="float" office:value="8640000" calcext:value-type="float">
            <text:p>8640000</text:p>
          </table:table-cell>
          <table:table-cell table:formula="of:=[.B738]/[.C738]" office:value-type="float" office:value="0.000938310185185185" calcext:value-type="float">
            <text:p>0,00093831018518518500</text:p>
          </table:table-cell>
          <table:table-cell table:formula="of:=[.D739]-[.D73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B738]+11" office:value-type="float" office:value="8118" calcext:value-type="float">
            <text:p>8118</text:p>
          </table:table-cell>
          <table:table-cell office:value-type="float" office:value="8640000" calcext:value-type="float">
            <text:p>8640000</text:p>
          </table:table-cell>
          <table:table-cell table:formula="of:=[.B739]/[.C739]" office:value-type="float" office:value="0.000939583333333333" calcext:value-type="float">
            <text:p>0,00093958333333333300</text:p>
          </table:table-cell>
          <table:table-cell table:formula="of:=[.D740]-[.D73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B739]+11" office:value-type="float" office:value="8129" calcext:value-type="float">
            <text:p>8129</text:p>
          </table:table-cell>
          <table:table-cell office:value-type="float" office:value="8640000" calcext:value-type="float">
            <text:p>8640000</text:p>
          </table:table-cell>
          <table:table-cell table:formula="of:=[.B740]/[.C740]" office:value-type="float" office:value="0.000940856481481482" calcext:value-type="float">
            <text:p>0,00094085648148148200</text:p>
          </table:table-cell>
          <table:table-cell table:formula="of:=[.D741]-[.D74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B740]+11" office:value-type="float" office:value="8140" calcext:value-type="float">
            <text:p>8140</text:p>
          </table:table-cell>
          <table:table-cell office:value-type="float" office:value="8640000" calcext:value-type="float">
            <text:p>8640000</text:p>
          </table:table-cell>
          <table:table-cell table:formula="of:=[.B741]/[.C741]" office:value-type="float" office:value="0.00094212962962963" calcext:value-type="float">
            <text:p>0,00094212962962963000</text:p>
          </table:table-cell>
          <table:table-cell table:formula="of:=[.D742]-[.D74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B741]+11" office:value-type="float" office:value="8151" calcext:value-type="float">
            <text:p>8151</text:p>
          </table:table-cell>
          <table:table-cell office:value-type="float" office:value="8640000" calcext:value-type="float">
            <text:p>8640000</text:p>
          </table:table-cell>
          <table:table-cell table:formula="of:=[.B742]/[.C742]" office:value-type="float" office:value="0.000943402777777778" calcext:value-type="float">
            <text:p>0,00094340277777777800</text:p>
          </table:table-cell>
          <table:table-cell table:formula="of:=[.D743]-[.D74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B742]+11" office:value-type="float" office:value="8162" calcext:value-type="float">
            <text:p>8162</text:p>
          </table:table-cell>
          <table:table-cell office:value-type="float" office:value="8640000" calcext:value-type="float">
            <text:p>8640000</text:p>
          </table:table-cell>
          <table:table-cell table:formula="of:=[.B743]/[.C743]" office:value-type="float" office:value="0.000944675925925926" calcext:value-type="float">
            <text:p>0,00094467592592592600</text:p>
          </table:table-cell>
          <table:table-cell table:formula="of:=[.D744]-[.D74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B743]+11" office:value-type="float" office:value="8173" calcext:value-type="float">
            <text:p>8173</text:p>
          </table:table-cell>
          <table:table-cell office:value-type="float" office:value="8640000" calcext:value-type="float">
            <text:p>8640000</text:p>
          </table:table-cell>
          <table:table-cell table:formula="of:=[.B744]/[.C744]" office:value-type="float" office:value="0.000945949074074074" calcext:value-type="float">
            <text:p>0,00094594907407407400</text:p>
          </table:table-cell>
          <table:table-cell table:formula="of:=[.D745]-[.D74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B744]+11" office:value-type="float" office:value="8184" calcext:value-type="float">
            <text:p>8184</text:p>
          </table:table-cell>
          <table:table-cell office:value-type="float" office:value="8640000" calcext:value-type="float">
            <text:p>8640000</text:p>
          </table:table-cell>
          <table:table-cell table:formula="of:=[.B745]/[.C745]" office:value-type="float" office:value="0.000947222222222222" calcext:value-type="float">
            <text:p>0,00094722222222222200</text:p>
          </table:table-cell>
          <table:table-cell table:formula="of:=[.D746]-[.D74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B745]+11" office:value-type="float" office:value="8195" calcext:value-type="float">
            <text:p>8195</text:p>
          </table:table-cell>
          <table:table-cell office:value-type="float" office:value="8640000" calcext:value-type="float">
            <text:p>8640000</text:p>
          </table:table-cell>
          <table:table-cell table:formula="of:=[.B746]/[.C746]" office:value-type="float" office:value="0.00094849537037037" calcext:value-type="float">
            <text:p>0,00094849537037037000</text:p>
          </table:table-cell>
          <table:table-cell table:formula="of:=[.D747]-[.D74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B746]+11" office:value-type="float" office:value="8206" calcext:value-type="float">
            <text:p>8206</text:p>
          </table:table-cell>
          <table:table-cell office:value-type="float" office:value="8640000" calcext:value-type="float">
            <text:p>8640000</text:p>
          </table:table-cell>
          <table:table-cell table:formula="of:=[.B747]/[.C747]" office:value-type="float" office:value="0.000949768518518519" calcext:value-type="float">
            <text:p>0,00094976851851851900</text:p>
          </table:table-cell>
          <table:table-cell table:formula="of:=[.D748]-[.D74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B747]+11" office:value-type="float" office:value="8217" calcext:value-type="float">
            <text:p>8217</text:p>
          </table:table-cell>
          <table:table-cell office:value-type="float" office:value="8640000" calcext:value-type="float">
            <text:p>8640000</text:p>
          </table:table-cell>
          <table:table-cell table:formula="of:=[.B748]/[.C748]" office:value-type="float" office:value="0.000951041666666667" calcext:value-type="float">
            <text:p>0,00095104166666666700</text:p>
          </table:table-cell>
          <table:table-cell table:formula="of:=[.D749]-[.D74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B748]+11" office:value-type="float" office:value="8228" calcext:value-type="float">
            <text:p>8228</text:p>
          </table:table-cell>
          <table:table-cell office:value-type="float" office:value="8640000" calcext:value-type="float">
            <text:p>8640000</text:p>
          </table:table-cell>
          <table:table-cell table:formula="of:=[.B749]/[.C749]" office:value-type="float" office:value="0.000952314814814815" calcext:value-type="float">
            <text:p>0,00095231481481481500</text:p>
          </table:table-cell>
          <table:table-cell table:formula="of:=[.D750]-[.D74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B749]+11" office:value-type="float" office:value="8239" calcext:value-type="float">
            <text:p>8239</text:p>
          </table:table-cell>
          <table:table-cell office:value-type="float" office:value="8640000" calcext:value-type="float">
            <text:p>8640000</text:p>
          </table:table-cell>
          <table:table-cell table:formula="of:=[.B750]/[.C750]" office:value-type="float" office:value="0.000953587962962963" calcext:value-type="float">
            <text:p>0,00095358796296296300</text:p>
          </table:table-cell>
          <table:table-cell table:formula="of:=[.D751]-[.D75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B750]+11" office:value-type="float" office:value="8250" calcext:value-type="float">
            <text:p>8250</text:p>
          </table:table-cell>
          <table:table-cell office:value-type="float" office:value="8640000" calcext:value-type="float">
            <text:p>8640000</text:p>
          </table:table-cell>
          <table:table-cell table:formula="of:=[.B751]/[.C751]" office:value-type="float" office:value="0.000954861111111111" calcext:value-type="float">
            <text:p>0,00095486111111111100</text:p>
          </table:table-cell>
          <table:table-cell table:formula="of:=[.D752]-[.D75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B751]+11" office:value-type="float" office:value="8261" calcext:value-type="float">
            <text:p>8261</text:p>
          </table:table-cell>
          <table:table-cell office:value-type="float" office:value="8640000" calcext:value-type="float">
            <text:p>8640000</text:p>
          </table:table-cell>
          <table:table-cell table:formula="of:=[.B752]/[.C752]" office:value-type="float" office:value="0.000956134259259259" calcext:value-type="float">
            <text:p>0,00095613425925925900</text:p>
          </table:table-cell>
          <table:table-cell table:formula="of:=[.D753]-[.D75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B752]+11" office:value-type="float" office:value="8272" calcext:value-type="float">
            <text:p>8272</text:p>
          </table:table-cell>
          <table:table-cell office:value-type="float" office:value="8640000" calcext:value-type="float">
            <text:p>8640000</text:p>
          </table:table-cell>
          <table:table-cell table:formula="of:=[.B753]/[.C753]" office:value-type="float" office:value="0.000957407407407407" calcext:value-type="float">
            <text:p>0,00095740740740740700</text:p>
          </table:table-cell>
          <table:table-cell table:formula="of:=[.D754]-[.D75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B753]+11" office:value-type="float" office:value="8283" calcext:value-type="float">
            <text:p>8283</text:p>
          </table:table-cell>
          <table:table-cell office:value-type="float" office:value="8640000" calcext:value-type="float">
            <text:p>8640000</text:p>
          </table:table-cell>
          <table:table-cell table:formula="of:=[.B754]/[.C754]" office:value-type="float" office:value="0.000958680555555556" calcext:value-type="float">
            <text:p>0,00095868055555555600</text:p>
          </table:table-cell>
          <table:table-cell table:formula="of:=[.D755]-[.D75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B754]+11" office:value-type="float" office:value="8294" calcext:value-type="float">
            <text:p>8294</text:p>
          </table:table-cell>
          <table:table-cell office:value-type="float" office:value="8640000" calcext:value-type="float">
            <text:p>8640000</text:p>
          </table:table-cell>
          <table:table-cell table:formula="of:=[.B755]/[.C755]" office:value-type="float" office:value="0.000959953703703704" calcext:value-type="float">
            <text:p>0,00095995370370370400</text:p>
          </table:table-cell>
          <table:table-cell table:formula="of:=[.D756]-[.D75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B755]+11" office:value-type="float" office:value="8305" calcext:value-type="float">
            <text:p>8305</text:p>
          </table:table-cell>
          <table:table-cell office:value-type="float" office:value="8640000" calcext:value-type="float">
            <text:p>8640000</text:p>
          </table:table-cell>
          <table:table-cell table:formula="of:=[.B756]/[.C756]" office:value-type="float" office:value="0.000961226851851852" calcext:value-type="float">
            <text:p>0,00096122685185185200</text:p>
          </table:table-cell>
          <table:table-cell table:formula="of:=[.D757]-[.D75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B756]+11" office:value-type="float" office:value="8316" calcext:value-type="float">
            <text:p>8316</text:p>
          </table:table-cell>
          <table:table-cell office:value-type="float" office:value="8640000" calcext:value-type="float">
            <text:p>8640000</text:p>
          </table:table-cell>
          <table:table-cell table:formula="of:=[.B757]/[.C757]" office:value-type="float" office:value="0.0009625" calcext:value-type="float">
            <text:p>0,00096250000000000000</text:p>
          </table:table-cell>
          <table:table-cell table:formula="of:=[.D758]-[.D75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B757]+11" office:value-type="float" office:value="8327" calcext:value-type="float">
            <text:p>8327</text:p>
          </table:table-cell>
          <table:table-cell office:value-type="float" office:value="8640000" calcext:value-type="float">
            <text:p>8640000</text:p>
          </table:table-cell>
          <table:table-cell table:formula="of:=[.B758]/[.C758]" office:value-type="float" office:value="0.000963773148148148" calcext:value-type="float">
            <text:p>0,00096377314814814800</text:p>
          </table:table-cell>
          <table:table-cell table:formula="of:=[.D759]-[.D75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B758]+11" office:value-type="float" office:value="8338" calcext:value-type="float">
            <text:p>8338</text:p>
          </table:table-cell>
          <table:table-cell office:value-type="float" office:value="8640000" calcext:value-type="float">
            <text:p>8640000</text:p>
          </table:table-cell>
          <table:table-cell table:formula="of:=[.B759]/[.C759]" office:value-type="float" office:value="0.000965046296296296" calcext:value-type="float">
            <text:p>0,00096504629629629600</text:p>
          </table:table-cell>
          <table:table-cell table:formula="of:=[.D760]-[.D759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B759]+11" office:value-type="float" office:value="8349" calcext:value-type="float">
            <text:p>8349</text:p>
          </table:table-cell>
          <table:table-cell office:value-type="float" office:value="8640000" calcext:value-type="float">
            <text:p>8640000</text:p>
          </table:table-cell>
          <table:table-cell table:formula="of:=[.B760]/[.C760]" office:value-type="float" office:value="0.000966319444444445" calcext:value-type="float">
            <text:p>0,00096631944444444500</text:p>
          </table:table-cell>
          <table:table-cell table:formula="of:=[.D761]-[.D760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B760]+11" office:value-type="float" office:value="8360" calcext:value-type="float">
            <text:p>8360</text:p>
          </table:table-cell>
          <table:table-cell office:value-type="float" office:value="8640000" calcext:value-type="float">
            <text:p>8640000</text:p>
          </table:table-cell>
          <table:table-cell table:formula="of:=[.B761]/[.C761]" office:value-type="float" office:value="0.000967592592592593" calcext:value-type="float">
            <text:p>0,00096759259259259300</text:p>
          </table:table-cell>
          <table:table-cell table:formula="of:=[.D762]-[.D761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B761]+11" office:value-type="float" office:value="8371" calcext:value-type="float">
            <text:p>8371</text:p>
          </table:table-cell>
          <table:table-cell office:value-type="float" office:value="8640000" calcext:value-type="float">
            <text:p>8640000</text:p>
          </table:table-cell>
          <table:table-cell table:formula="of:=[.B762]/[.C762]" office:value-type="float" office:value="0.000968865740740741" calcext:value-type="float">
            <text:p>0,00096886574074074100</text:p>
          </table:table-cell>
          <table:table-cell table:formula="of:=[.D763]-[.D762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B762]+11" office:value-type="float" office:value="8382" calcext:value-type="float">
            <text:p>8382</text:p>
          </table:table-cell>
          <table:table-cell office:value-type="float" office:value="8640000" calcext:value-type="float">
            <text:p>8640000</text:p>
          </table:table-cell>
          <table:table-cell table:formula="of:=[.B763]/[.C763]" office:value-type="float" office:value="0.000970138888888889" calcext:value-type="float">
            <text:p>0,00097013888888888900</text:p>
          </table:table-cell>
          <table:table-cell table:formula="of:=[.D764]-[.D763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B763]+11" office:value-type="float" office:value="8393" calcext:value-type="float">
            <text:p>8393</text:p>
          </table:table-cell>
          <table:table-cell office:value-type="float" office:value="8640000" calcext:value-type="float">
            <text:p>8640000</text:p>
          </table:table-cell>
          <table:table-cell table:formula="of:=[.B764]/[.C764]" office:value-type="float" office:value="0.000971412037037037" calcext:value-type="float">
            <text:p>0,00097141203703703700</text:p>
          </table:table-cell>
          <table:table-cell table:formula="of:=[.D765]-[.D764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B764]+11" office:value-type="float" office:value="8404" calcext:value-type="float">
            <text:p>8404</text:p>
          </table:table-cell>
          <table:table-cell office:value-type="float" office:value="8640000" calcext:value-type="float">
            <text:p>8640000</text:p>
          </table:table-cell>
          <table:table-cell table:formula="of:=[.B765]/[.C765]" office:value-type="float" office:value="0.000972685185185185" calcext:value-type="float">
            <text:p>0,00097268518518518500</text:p>
          </table:table-cell>
          <table:table-cell table:formula="of:=[.D766]-[.D765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B765]+11" office:value-type="float" office:value="8415" calcext:value-type="float">
            <text:p>8415</text:p>
          </table:table-cell>
          <table:table-cell office:value-type="float" office:value="8640000" calcext:value-type="float">
            <text:p>8640000</text:p>
          </table:table-cell>
          <table:table-cell table:formula="of:=[.B766]/[.C766]" office:value-type="float" office:value="0.000973958333333333" calcext:value-type="float">
            <text:p>0,00097395833333333300</text:p>
          </table:table-cell>
          <table:table-cell table:formula="of:=[.D767]-[.D766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B766]+11" office:value-type="float" office:value="8426" calcext:value-type="float">
            <text:p>8426</text:p>
          </table:table-cell>
          <table:table-cell office:value-type="float" office:value="8640000" calcext:value-type="float">
            <text:p>8640000</text:p>
          </table:table-cell>
          <table:table-cell table:formula="of:=[.B767]/[.C767]" office:value-type="float" office:value="0.000975231481481481" calcext:value-type="float">
            <text:p>0,00097523148148148100</text:p>
          </table:table-cell>
          <table:table-cell table:formula="of:=[.D768]-[.D767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B767]+11" office:value-type="float" office:value="8437" calcext:value-type="float">
            <text:p>8437</text:p>
          </table:table-cell>
          <table:table-cell office:value-type="float" office:value="8640000" calcext:value-type="float">
            <text:p>8640000</text:p>
          </table:table-cell>
          <table:table-cell table:formula="of:=[.B768]/[.C768]" office:value-type="float" office:value="0.00097650462962963" calcext:value-type="float">
            <text:p>0,00097650462962963000</text:p>
          </table:table-cell>
          <table:table-cell table:formula="of:=[.D769]-[.D768]" office:value-type="float" office:value="0.00000127314814814814" calcext:value-type="float">
            <text:p>0,0000012731481481481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B768]+11" office:value-type="float" office:value="8448" calcext:value-type="float">
            <text:p>8448</text:p>
          </table:table-cell>
          <table:table-cell office:value-type="float" office:value="8640000" calcext:value-type="float">
            <text:p>8640000</text:p>
          </table:table-cell>
          <table:table-cell table:formula="of:=[.B769]/[.C769]" office:value-type="float" office:value="0.000977777777777778" calcext:value-type="float">
            <text:p>0,00097777777777777800</text:p>
          </table:table-cell>
          <table:table-cell table:formula="of:=[.D770]-[.D76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B769]+11" office:value-type="float" office:value="8459" calcext:value-type="float">
            <text:p>8459</text:p>
          </table:table-cell>
          <table:table-cell office:value-type="float" office:value="8640000" calcext:value-type="float">
            <text:p>8640000</text:p>
          </table:table-cell>
          <table:table-cell table:formula="of:=[.B770]/[.C770]" office:value-type="float" office:value="0.000979050925925926" calcext:value-type="float">
            <text:p>0,00097905092592592600</text:p>
          </table:table-cell>
          <table:table-cell table:formula="of:=[.D771]-[.D770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B770]+11" office:value-type="float" office:value="8470" calcext:value-type="float">
            <text:p>8470</text:p>
          </table:table-cell>
          <table:table-cell office:value-type="float" office:value="8640000" calcext:value-type="float">
            <text:p>8640000</text:p>
          </table:table-cell>
          <table:table-cell table:formula="of:=[.B771]/[.C771]" office:value-type="float" office:value="0.000980324074074074" calcext:value-type="float">
            <text:p>0,00098032407407407400</text:p>
          </table:table-cell>
          <table:table-cell table:formula="of:=[.D772]-[.D77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B771]+11" office:value-type="float" office:value="8481" calcext:value-type="float">
            <text:p>8481</text:p>
          </table:table-cell>
          <table:table-cell office:value-type="float" office:value="8640000" calcext:value-type="float">
            <text:p>8640000</text:p>
          </table:table-cell>
          <table:table-cell table:formula="of:=[.B772]/[.C772]" office:value-type="float" office:value="0.000981597222222222" calcext:value-type="float">
            <text:p>0,00098159722222222200</text:p>
          </table:table-cell>
          <table:table-cell table:formula="of:=[.D773]-[.D772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B772]+11" office:value-type="float" office:value="8492" calcext:value-type="float">
            <text:p>8492</text:p>
          </table:table-cell>
          <table:table-cell office:value-type="float" office:value="8640000" calcext:value-type="float">
            <text:p>8640000</text:p>
          </table:table-cell>
          <table:table-cell table:formula="of:=[.B773]/[.C773]" office:value-type="float" office:value="0.00098287037037037" calcext:value-type="float">
            <text:p>0,00098287037037037000</text:p>
          </table:table-cell>
          <table:table-cell table:formula="of:=[.D774]-[.D77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B773]+11" office:value-type="float" office:value="8503" calcext:value-type="float">
            <text:p>8503</text:p>
          </table:table-cell>
          <table:table-cell office:value-type="float" office:value="8640000" calcext:value-type="float">
            <text:p>8640000</text:p>
          </table:table-cell>
          <table:table-cell table:formula="of:=[.B774]/[.C774]" office:value-type="float" office:value="0.000984143518518519" calcext:value-type="float">
            <text:p>0,00098414351851851900</text:p>
          </table:table-cell>
          <table:table-cell table:formula="of:=[.D775]-[.D774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B774]+11" office:value-type="float" office:value="8514" calcext:value-type="float">
            <text:p>8514</text:p>
          </table:table-cell>
          <table:table-cell office:value-type="float" office:value="8640000" calcext:value-type="float">
            <text:p>8640000</text:p>
          </table:table-cell>
          <table:table-cell table:formula="of:=[.B775]/[.C775]" office:value-type="float" office:value="0.000985416666666667" calcext:value-type="float">
            <text:p>0,00098541666666666700</text:p>
          </table:table-cell>
          <table:table-cell table:formula="of:=[.D776]-[.D77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B775]+11" office:value-type="float" office:value="8525" calcext:value-type="float">
            <text:p>8525</text:p>
          </table:table-cell>
          <table:table-cell office:value-type="float" office:value="8640000" calcext:value-type="float">
            <text:p>8640000</text:p>
          </table:table-cell>
          <table:table-cell table:formula="of:=[.B776]/[.C776]" office:value-type="float" office:value="0.000986689814814815" calcext:value-type="float">
            <text:p>0,00098668981481481500</text:p>
          </table:table-cell>
          <table:table-cell table:formula="of:=[.D777]-[.D77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B776]+11" office:value-type="float" office:value="8536" calcext:value-type="float">
            <text:p>8536</text:p>
          </table:table-cell>
          <table:table-cell office:value-type="float" office:value="8640000" calcext:value-type="float">
            <text:p>8640000</text:p>
          </table:table-cell>
          <table:table-cell table:formula="of:=[.B777]/[.C777]" office:value-type="float" office:value="0.000987962962962963" calcext:value-type="float">
            <text:p>0,00098796296296296300</text:p>
          </table:table-cell>
          <table:table-cell table:formula="of:=[.D778]-[.D777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B777]+11" office:value-type="float" office:value="8547" calcext:value-type="float">
            <text:p>8547</text:p>
          </table:table-cell>
          <table:table-cell office:value-type="float" office:value="8640000" calcext:value-type="float">
            <text:p>8640000</text:p>
          </table:table-cell>
          <table:table-cell table:formula="of:=[.B778]/[.C778]" office:value-type="float" office:value="0.000989236111111111" calcext:value-type="float">
            <text:p>0,00098923611111111100</text:p>
          </table:table-cell>
          <table:table-cell table:formula="of:=[.D779]-[.D77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B778]+11" office:value-type="float" office:value="8558" calcext:value-type="float">
            <text:p>8558</text:p>
          </table:table-cell>
          <table:table-cell office:value-type="float" office:value="8640000" calcext:value-type="float">
            <text:p>8640000</text:p>
          </table:table-cell>
          <table:table-cell table:formula="of:=[.B779]/[.C779]" office:value-type="float" office:value="0.000990509259259259" calcext:value-type="float">
            <text:p>0,00099050925925925900</text:p>
          </table:table-cell>
          <table:table-cell table:formula="of:=[.D780]-[.D779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B779]+11" office:value-type="float" office:value="8569" calcext:value-type="float">
            <text:p>8569</text:p>
          </table:table-cell>
          <table:table-cell office:value-type="float" office:value="8640000" calcext:value-type="float">
            <text:p>8640000</text:p>
          </table:table-cell>
          <table:table-cell table:formula="of:=[.B780]/[.C780]" office:value-type="float" office:value="0.000991782407407407" calcext:value-type="float">
            <text:p>0,00099178240740740700</text:p>
          </table:table-cell>
          <table:table-cell table:formula="of:=[.D781]-[.D78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B780]+11" office:value-type="float" office:value="8580" calcext:value-type="float">
            <text:p>8580</text:p>
          </table:table-cell>
          <table:table-cell office:value-type="float" office:value="8640000" calcext:value-type="float">
            <text:p>8640000</text:p>
          </table:table-cell>
          <table:table-cell table:formula="of:=[.B781]/[.C781]" office:value-type="float" office:value="0.000993055555555556" calcext:value-type="float">
            <text:p>0,00099305555555555600</text:p>
          </table:table-cell>
          <table:table-cell table:formula="of:=[.D782]-[.D781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B781]+11" office:value-type="float" office:value="8591" calcext:value-type="float">
            <text:p>8591</text:p>
          </table:table-cell>
          <table:table-cell office:value-type="float" office:value="8640000" calcext:value-type="float">
            <text:p>8640000</text:p>
          </table:table-cell>
          <table:table-cell table:formula="of:=[.B782]/[.C782]" office:value-type="float" office:value="0.000994328703703704" calcext:value-type="float">
            <text:p>0,00099432870370370400</text:p>
          </table:table-cell>
          <table:table-cell table:formula="of:=[.D783]-[.D78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B782]+11" office:value-type="float" office:value="8602" calcext:value-type="float">
            <text:p>8602</text:p>
          </table:table-cell>
          <table:table-cell office:value-type="float" office:value="8640000" calcext:value-type="float">
            <text:p>8640000</text:p>
          </table:table-cell>
          <table:table-cell table:formula="of:=[.B783]/[.C783]" office:value-type="float" office:value="0.000995601851851852" calcext:value-type="float">
            <text:p>0,00099560185185185200</text:p>
          </table:table-cell>
          <table:table-cell table:formula="of:=[.D784]-[.D783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B783]+11" office:value-type="float" office:value="8613" calcext:value-type="float">
            <text:p>8613</text:p>
          </table:table-cell>
          <table:table-cell office:value-type="float" office:value="8640000" calcext:value-type="float">
            <text:p>8640000</text:p>
          </table:table-cell>
          <table:table-cell table:formula="of:=[.B784]/[.C784]" office:value-type="float" office:value="0.000996875" calcext:value-type="float">
            <text:p>0,00099687500000000000</text:p>
          </table:table-cell>
          <table:table-cell table:formula="of:=[.D785]-[.D78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B784]+11" office:value-type="float" office:value="8624" calcext:value-type="float">
            <text:p>8624</text:p>
          </table:table-cell>
          <table:table-cell office:value-type="float" office:value="8640000" calcext:value-type="float">
            <text:p>8640000</text:p>
          </table:table-cell>
          <table:table-cell table:formula="of:=[.B785]/[.C785]" office:value-type="float" office:value="0.000998148148148148" calcext:value-type="float">
            <text:p>0,00099814814814814800</text:p>
          </table:table-cell>
          <table:table-cell table:formula="of:=[.D786]-[.D785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B785]+11" office:value-type="float" office:value="8635" calcext:value-type="float">
            <text:p>8635</text:p>
          </table:table-cell>
          <table:table-cell office:value-type="float" office:value="8640000" calcext:value-type="float">
            <text:p>8640000</text:p>
          </table:table-cell>
          <table:table-cell table:formula="of:=[.B786]/[.C786]" office:value-type="float" office:value="0.000999421296296296" calcext:value-type="float">
            <text:p>0,00099942129629629600</text:p>
          </table:table-cell>
          <table:table-cell table:formula="of:=[.D787]-[.D78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B786]+11" office:value-type="float" office:value="8646" calcext:value-type="float">
            <text:p>8646</text:p>
          </table:table-cell>
          <table:table-cell office:value-type="float" office:value="8640000" calcext:value-type="float">
            <text:p>8640000</text:p>
          </table:table-cell>
          <table:table-cell table:formula="of:=[.B787]/[.C787]" office:value-type="float" office:value="0.00100069444444444" calcext:value-type="float">
            <text:p>0,00100069444444444000</text:p>
          </table:table-cell>
          <table:table-cell table:formula="of:=[.D788]-[.D787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B787]+11" office:value-type="float" office:value="8657" calcext:value-type="float">
            <text:p>8657</text:p>
          </table:table-cell>
          <table:table-cell office:value-type="float" office:value="8640000" calcext:value-type="float">
            <text:p>8640000</text:p>
          </table:table-cell>
          <table:table-cell table:formula="of:=[.B788]/[.C788]" office:value-type="float" office:value="0.00100196759259259" calcext:value-type="float">
            <text:p>0,00100196759259259000</text:p>
          </table:table-cell>
          <table:table-cell table:formula="of:=[.D789]-[.D78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B788]+11" office:value-type="float" office:value="8668" calcext:value-type="float">
            <text:p>8668</text:p>
          </table:table-cell>
          <table:table-cell office:value-type="float" office:value="8640000" calcext:value-type="float">
            <text:p>8640000</text:p>
          </table:table-cell>
          <table:table-cell table:formula="of:=[.B789]/[.C789]" office:value-type="float" office:value="0.00100324074074074" calcext:value-type="float">
            <text:p>0,00100324074074074000</text:p>
          </table:table-cell>
          <table:table-cell table:formula="of:=[.D790]-[.D78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B789]+11" office:value-type="float" office:value="8679" calcext:value-type="float">
            <text:p>8679</text:p>
          </table:table-cell>
          <table:table-cell office:value-type="float" office:value="8640000" calcext:value-type="float">
            <text:p>8640000</text:p>
          </table:table-cell>
          <table:table-cell table:formula="of:=[.B790]/[.C790]" office:value-type="float" office:value="0.00100451388888889" calcext:value-type="float">
            <text:p>0,00100451388888889000</text:p>
          </table:table-cell>
          <table:table-cell table:formula="of:=[.D791]-[.D790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B790]+11" office:value-type="float" office:value="8690" calcext:value-type="float">
            <text:p>8690</text:p>
          </table:table-cell>
          <table:table-cell office:value-type="float" office:value="8640000" calcext:value-type="float">
            <text:p>8640000</text:p>
          </table:table-cell>
          <table:table-cell table:formula="of:=[.B791]/[.C791]" office:value-type="float" office:value="0.00100578703703704" calcext:value-type="float">
            <text:p>0,00100578703703704000</text:p>
          </table:table-cell>
          <table:table-cell table:formula="of:=[.D792]-[.D79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B791]+11" office:value-type="float" office:value="8701" calcext:value-type="float">
            <text:p>8701</text:p>
          </table:table-cell>
          <table:table-cell office:value-type="float" office:value="8640000" calcext:value-type="float">
            <text:p>8640000</text:p>
          </table:table-cell>
          <table:table-cell table:formula="of:=[.B792]/[.C792]" office:value-type="float" office:value="0.00100706018518519" calcext:value-type="float">
            <text:p>0,00100706018518519000</text:p>
          </table:table-cell>
          <table:table-cell table:formula="of:=[.D793]-[.D792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B792]+11" office:value-type="float" office:value="8712" calcext:value-type="float">
            <text:p>8712</text:p>
          </table:table-cell>
          <table:table-cell office:value-type="float" office:value="8640000" calcext:value-type="float">
            <text:p>8640000</text:p>
          </table:table-cell>
          <table:table-cell table:formula="of:=[.B793]/[.C793]" office:value-type="float" office:value="0.00100833333333333" calcext:value-type="float">
            <text:p>0,00100833333333333000</text:p>
          </table:table-cell>
          <table:table-cell table:formula="of:=[.D794]-[.D79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B793]+11" office:value-type="float" office:value="8723" calcext:value-type="float">
            <text:p>8723</text:p>
          </table:table-cell>
          <table:table-cell office:value-type="float" office:value="8640000" calcext:value-type="float">
            <text:p>8640000</text:p>
          </table:table-cell>
          <table:table-cell table:formula="of:=[.B794]/[.C794]" office:value-type="float" office:value="0.00100960648148148" calcext:value-type="float">
            <text:p>0,00100960648148148000</text:p>
          </table:table-cell>
          <table:table-cell table:formula="of:=[.D795]-[.D794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B794]+11" office:value-type="float" office:value="8734" calcext:value-type="float">
            <text:p>8734</text:p>
          </table:table-cell>
          <table:table-cell office:value-type="float" office:value="8640000" calcext:value-type="float">
            <text:p>8640000</text:p>
          </table:table-cell>
          <table:table-cell table:formula="of:=[.B795]/[.C795]" office:value-type="float" office:value="0.00101087962962963" calcext:value-type="float">
            <text:p>0,00101087962962963000</text:p>
          </table:table-cell>
          <table:table-cell table:formula="of:=[.D796]-[.D79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B795]+11" office:value-type="float" office:value="8745" calcext:value-type="float">
            <text:p>8745</text:p>
          </table:table-cell>
          <table:table-cell office:value-type="float" office:value="8640000" calcext:value-type="float">
            <text:p>8640000</text:p>
          </table:table-cell>
          <table:table-cell table:formula="of:=[.B796]/[.C796]" office:value-type="float" office:value="0.00101215277777778" calcext:value-type="float">
            <text:p>0,00101215277777778000</text:p>
          </table:table-cell>
          <table:table-cell table:formula="of:=[.D797]-[.D796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B796]+11" office:value-type="float" office:value="8756" calcext:value-type="float">
            <text:p>8756</text:p>
          </table:table-cell>
          <table:table-cell office:value-type="float" office:value="8640000" calcext:value-type="float">
            <text:p>8640000</text:p>
          </table:table-cell>
          <table:table-cell table:formula="of:=[.B797]/[.C797]" office:value-type="float" office:value="0.00101342592592593" calcext:value-type="float">
            <text:p>0,00101342592592593000</text:p>
          </table:table-cell>
          <table:table-cell table:formula="of:=[.D798]-[.D79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B797]+11" office:value-type="float" office:value="8767" calcext:value-type="float">
            <text:p>8767</text:p>
          </table:table-cell>
          <table:table-cell office:value-type="float" office:value="8640000" calcext:value-type="float">
            <text:p>8640000</text:p>
          </table:table-cell>
          <table:table-cell table:formula="of:=[.B798]/[.C798]" office:value-type="float" office:value="0.00101469907407407" calcext:value-type="float">
            <text:p>0,00101469907407407000</text:p>
          </table:table-cell>
          <table:table-cell table:formula="of:=[.D799]-[.D798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B798]+11" office:value-type="float" office:value="8778" calcext:value-type="float">
            <text:p>8778</text:p>
          </table:table-cell>
          <table:table-cell office:value-type="float" office:value="8640000" calcext:value-type="float">
            <text:p>8640000</text:p>
          </table:table-cell>
          <table:table-cell table:formula="of:=[.B799]/[.C799]" office:value-type="float" office:value="0.00101597222222222" calcext:value-type="float">
            <text:p>0,00101597222222222000</text:p>
          </table:table-cell>
          <table:table-cell table:formula="of:=[.D800]-[.D79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B799]+11" office:value-type="float" office:value="8789" calcext:value-type="float">
            <text:p>8789</text:p>
          </table:table-cell>
          <table:table-cell office:value-type="float" office:value="8640000" calcext:value-type="float">
            <text:p>8640000</text:p>
          </table:table-cell>
          <table:table-cell table:formula="of:=[.B800]/[.C800]" office:value-type="float" office:value="0.00101724537037037" calcext:value-type="float">
            <text:p>0,00101724537037037000</text:p>
          </table:table-cell>
          <table:table-cell table:formula="of:=[.D801]-[.D800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B800]+11" office:value-type="float" office:value="8800" calcext:value-type="float">
            <text:p>8800</text:p>
          </table:table-cell>
          <table:table-cell office:value-type="float" office:value="8640000" calcext:value-type="float">
            <text:p>8640000</text:p>
          </table:table-cell>
          <table:table-cell table:formula="of:=[.B801]/[.C801]" office:value-type="float" office:value="0.00101851851851852" calcext:value-type="float">
            <text:p>0,00101851851851852000</text:p>
          </table:table-cell>
          <table:table-cell table:formula="of:=[.D802]-[.D80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B801]+11" office:value-type="float" office:value="8811" calcext:value-type="float">
            <text:p>8811</text:p>
          </table:table-cell>
          <table:table-cell office:value-type="float" office:value="8640000" calcext:value-type="float">
            <text:p>8640000</text:p>
          </table:table-cell>
          <table:table-cell table:formula="of:=[.B802]/[.C802]" office:value-type="float" office:value="0.00101979166666667" calcext:value-type="float">
            <text:p>0,00101979166666667000</text:p>
          </table:table-cell>
          <table:table-cell table:formula="of:=[.D803]-[.D802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B802]+11" office:value-type="float" office:value="8822" calcext:value-type="float">
            <text:p>8822</text:p>
          </table:table-cell>
          <table:table-cell office:value-type="float" office:value="8640000" calcext:value-type="float">
            <text:p>8640000</text:p>
          </table:table-cell>
          <table:table-cell table:formula="of:=[.B803]/[.C803]" office:value-type="float" office:value="0.00102106481481481" calcext:value-type="float">
            <text:p>0,00102106481481481000</text:p>
          </table:table-cell>
          <table:table-cell table:formula="of:=[.D804]-[.D80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B803]+11" office:value-type="float" office:value="8833" calcext:value-type="float">
            <text:p>8833</text:p>
          </table:table-cell>
          <table:table-cell office:value-type="float" office:value="8640000" calcext:value-type="float">
            <text:p>8640000</text:p>
          </table:table-cell>
          <table:table-cell table:formula="of:=[.B804]/[.C804]" office:value-type="float" office:value="0.00102233796296296" calcext:value-type="float">
            <text:p>0,00102233796296296000</text:p>
          </table:table-cell>
          <table:table-cell table:formula="of:=[.D805]-[.D80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B804]+11" office:value-type="float" office:value="8844" calcext:value-type="float">
            <text:p>8844</text:p>
          </table:table-cell>
          <table:table-cell office:value-type="float" office:value="8640000" calcext:value-type="float">
            <text:p>8640000</text:p>
          </table:table-cell>
          <table:table-cell table:formula="of:=[.B805]/[.C805]" office:value-type="float" office:value="0.00102361111111111" calcext:value-type="float">
            <text:p>0,00102361111111111000</text:p>
          </table:table-cell>
          <table:table-cell table:formula="of:=[.D806]-[.D805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B805]+11" office:value-type="float" office:value="8855" calcext:value-type="float">
            <text:p>8855</text:p>
          </table:table-cell>
          <table:table-cell office:value-type="float" office:value="8640000" calcext:value-type="float">
            <text:p>8640000</text:p>
          </table:table-cell>
          <table:table-cell table:formula="of:=[.B806]/[.C806]" office:value-type="float" office:value="0.00102488425925926" calcext:value-type="float">
            <text:p>0,00102488425925926000</text:p>
          </table:table-cell>
          <table:table-cell table:formula="of:=[.D807]-[.D80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B806]+11" office:value-type="float" office:value="8866" calcext:value-type="float">
            <text:p>8866</text:p>
          </table:table-cell>
          <table:table-cell office:value-type="float" office:value="8640000" calcext:value-type="float">
            <text:p>8640000</text:p>
          </table:table-cell>
          <table:table-cell table:formula="of:=[.B807]/[.C807]" office:value-type="float" office:value="0.00102615740740741" calcext:value-type="float">
            <text:p>0,00102615740740741000</text:p>
          </table:table-cell>
          <table:table-cell table:formula="of:=[.D808]-[.D807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B807]+11" office:value-type="float" office:value="8877" calcext:value-type="float">
            <text:p>8877</text:p>
          </table:table-cell>
          <table:table-cell office:value-type="float" office:value="8640000" calcext:value-type="float">
            <text:p>8640000</text:p>
          </table:table-cell>
          <table:table-cell table:formula="of:=[.B808]/[.C808]" office:value-type="float" office:value="0.00102743055555556" calcext:value-type="float">
            <text:p>0,00102743055555556000</text:p>
          </table:table-cell>
          <table:table-cell table:formula="of:=[.D809]-[.D80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B808]+11" office:value-type="float" office:value="8888" calcext:value-type="float">
            <text:p>8888</text:p>
          </table:table-cell>
          <table:table-cell office:value-type="float" office:value="8640000" calcext:value-type="float">
            <text:p>8640000</text:p>
          </table:table-cell>
          <table:table-cell table:formula="of:=[.B809]/[.C809]" office:value-type="float" office:value="0.0010287037037037" calcext:value-type="float">
            <text:p>0,00102870370370370000</text:p>
          </table:table-cell>
          <table:table-cell table:formula="of:=[.D810]-[.D809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B809]+11" office:value-type="float" office:value="8899" calcext:value-type="float">
            <text:p>8899</text:p>
          </table:table-cell>
          <table:table-cell office:value-type="float" office:value="8640000" calcext:value-type="float">
            <text:p>8640000</text:p>
          </table:table-cell>
          <table:table-cell table:formula="of:=[.B810]/[.C810]" office:value-type="float" office:value="0.00102997685185185" calcext:value-type="float">
            <text:p>0,00102997685185185000</text:p>
          </table:table-cell>
          <table:table-cell table:formula="of:=[.D811]-[.D81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B810]+11" office:value-type="float" office:value="8910" calcext:value-type="float">
            <text:p>8910</text:p>
          </table:table-cell>
          <table:table-cell office:value-type="float" office:value="8640000" calcext:value-type="float">
            <text:p>8640000</text:p>
          </table:table-cell>
          <table:table-cell table:formula="of:=[.B811]/[.C811]" office:value-type="float" office:value="0.00103125" calcext:value-type="float">
            <text:p>0,00103125000000000000</text:p>
          </table:table-cell>
          <table:table-cell table:formula="of:=[.D812]-[.D811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B811]+11" office:value-type="float" office:value="8921" calcext:value-type="float">
            <text:p>8921</text:p>
          </table:table-cell>
          <table:table-cell office:value-type="float" office:value="8640000" calcext:value-type="float">
            <text:p>8640000</text:p>
          </table:table-cell>
          <table:table-cell table:formula="of:=[.B812]/[.C812]" office:value-type="float" office:value="0.00103252314814815" calcext:value-type="float">
            <text:p>0,00103252314814815000</text:p>
          </table:table-cell>
          <table:table-cell table:formula="of:=[.D813]-[.D81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B812]+11" office:value-type="float" office:value="8932" calcext:value-type="float">
            <text:p>8932</text:p>
          </table:table-cell>
          <table:table-cell office:value-type="float" office:value="8640000" calcext:value-type="float">
            <text:p>8640000</text:p>
          </table:table-cell>
          <table:table-cell table:formula="of:=[.B813]/[.C813]" office:value-type="float" office:value="0.0010337962962963" calcext:value-type="float">
            <text:p>0,00103379629629630000</text:p>
          </table:table-cell>
          <table:table-cell table:formula="of:=[.D814]-[.D813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B813]+11" office:value-type="float" office:value="8943" calcext:value-type="float">
            <text:p>8943</text:p>
          </table:table-cell>
          <table:table-cell office:value-type="float" office:value="8640000" calcext:value-type="float">
            <text:p>8640000</text:p>
          </table:table-cell>
          <table:table-cell table:formula="of:=[.B814]/[.C814]" office:value-type="float" office:value="0.00103506944444444" calcext:value-type="float">
            <text:p>0,00103506944444444000</text:p>
          </table:table-cell>
          <table:table-cell table:formula="of:=[.D815]-[.D81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B814]+11" office:value-type="float" office:value="8954" calcext:value-type="float">
            <text:p>8954</text:p>
          </table:table-cell>
          <table:table-cell office:value-type="float" office:value="8640000" calcext:value-type="float">
            <text:p>8640000</text:p>
          </table:table-cell>
          <table:table-cell table:formula="of:=[.B815]/[.C815]" office:value-type="float" office:value="0.00103634259259259" calcext:value-type="float">
            <text:p>0,00103634259259259000</text:p>
          </table:table-cell>
          <table:table-cell table:formula="of:=[.D816]-[.D815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B815]+11" office:value-type="float" office:value="8965" calcext:value-type="float">
            <text:p>8965</text:p>
          </table:table-cell>
          <table:table-cell office:value-type="float" office:value="8640000" calcext:value-type="float">
            <text:p>8640000</text:p>
          </table:table-cell>
          <table:table-cell table:formula="of:=[.B816]/[.C816]" office:value-type="float" office:value="0.00103761574074074" calcext:value-type="float">
            <text:p>0,00103761574074074000</text:p>
          </table:table-cell>
          <table:table-cell table:formula="of:=[.D817]-[.D81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B816]+11" office:value-type="float" office:value="8976" calcext:value-type="float">
            <text:p>8976</text:p>
          </table:table-cell>
          <table:table-cell office:value-type="float" office:value="8640000" calcext:value-type="float">
            <text:p>8640000</text:p>
          </table:table-cell>
          <table:table-cell table:formula="of:=[.B817]/[.C817]" office:value-type="float" office:value="0.00103888888888889" calcext:value-type="float">
            <text:p>0,00103888888888889000</text:p>
          </table:table-cell>
          <table:table-cell table:formula="of:=[.D818]-[.D81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B817]+11" office:value-type="float" office:value="8987" calcext:value-type="float">
            <text:p>8987</text:p>
          </table:table-cell>
          <table:table-cell office:value-type="float" office:value="8640000" calcext:value-type="float">
            <text:p>8640000</text:p>
          </table:table-cell>
          <table:table-cell table:formula="of:=[.B818]/[.C818]" office:value-type="float" office:value="0.00104016203703704" calcext:value-type="float">
            <text:p>0,00104016203703704000</text:p>
          </table:table-cell>
          <table:table-cell table:formula="of:=[.D819]-[.D818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B818]+11" office:value-type="float" office:value="8998" calcext:value-type="float">
            <text:p>8998</text:p>
          </table:table-cell>
          <table:table-cell office:value-type="float" office:value="8640000" calcext:value-type="float">
            <text:p>8640000</text:p>
          </table:table-cell>
          <table:table-cell table:formula="of:=[.B819]/[.C819]" office:value-type="float" office:value="0.00104143518518519" calcext:value-type="float">
            <text:p>0,00104143518518519000</text:p>
          </table:table-cell>
          <table:table-cell table:formula="of:=[.D820]-[.D81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B819]+11" office:value-type="float" office:value="9009" calcext:value-type="float">
            <text:p>9009</text:p>
          </table:table-cell>
          <table:table-cell office:value-type="float" office:value="8640000" calcext:value-type="float">
            <text:p>8640000</text:p>
          </table:table-cell>
          <table:table-cell table:formula="of:=[.B820]/[.C820]" office:value-type="float" office:value="0.00104270833333333" calcext:value-type="float">
            <text:p>0,00104270833333333000</text:p>
          </table:table-cell>
          <table:table-cell table:formula="of:=[.D821]-[.D820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B820]+11" office:value-type="float" office:value="9020" calcext:value-type="float">
            <text:p>9020</text:p>
          </table:table-cell>
          <table:table-cell office:value-type="float" office:value="8640000" calcext:value-type="float">
            <text:p>8640000</text:p>
          </table:table-cell>
          <table:table-cell table:formula="of:=[.B821]/[.C821]" office:value-type="float" office:value="0.00104398148148148" calcext:value-type="float">
            <text:p>0,00104398148148148000</text:p>
          </table:table-cell>
          <table:table-cell table:formula="of:=[.D822]-[.D82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B821]+11" office:value-type="float" office:value="9031" calcext:value-type="float">
            <text:p>9031</text:p>
          </table:table-cell>
          <table:table-cell office:value-type="float" office:value="8640000" calcext:value-type="float">
            <text:p>8640000</text:p>
          </table:table-cell>
          <table:table-cell table:formula="of:=[.B822]/[.C822]" office:value-type="float" office:value="0.00104525462962963" calcext:value-type="float">
            <text:p>0,00104525462962963000</text:p>
          </table:table-cell>
          <table:table-cell table:formula="of:=[.D823]-[.D822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B822]+11" office:value-type="float" office:value="9042" calcext:value-type="float">
            <text:p>9042</text:p>
          </table:table-cell>
          <table:table-cell office:value-type="float" office:value="8640000" calcext:value-type="float">
            <text:p>8640000</text:p>
          </table:table-cell>
          <table:table-cell table:formula="of:=[.B823]/[.C823]" office:value-type="float" office:value="0.00104652777777778" calcext:value-type="float">
            <text:p>0,00104652777777778000</text:p>
          </table:table-cell>
          <table:table-cell table:formula="of:=[.D824]-[.D82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B823]+11" office:value-type="float" office:value="9053" calcext:value-type="float">
            <text:p>9053</text:p>
          </table:table-cell>
          <table:table-cell office:value-type="float" office:value="8640000" calcext:value-type="float">
            <text:p>8640000</text:p>
          </table:table-cell>
          <table:table-cell table:formula="of:=[.B824]/[.C824]" office:value-type="float" office:value="0.00104780092592593" calcext:value-type="float">
            <text:p>0,00104780092592593000</text:p>
          </table:table-cell>
          <table:table-cell table:formula="of:=[.D825]-[.D824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B824]+11" office:value-type="float" office:value="9064" calcext:value-type="float">
            <text:p>9064</text:p>
          </table:table-cell>
          <table:table-cell office:value-type="float" office:value="8640000" calcext:value-type="float">
            <text:p>8640000</text:p>
          </table:table-cell>
          <table:table-cell table:formula="of:=[.B825]/[.C825]" office:value-type="float" office:value="0.00104907407407407" calcext:value-type="float">
            <text:p>0,00104907407407407000</text:p>
          </table:table-cell>
          <table:table-cell table:formula="of:=[.D826]-[.D82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B825]+11" office:value-type="float" office:value="9075" calcext:value-type="float">
            <text:p>9075</text:p>
          </table:table-cell>
          <table:table-cell office:value-type="float" office:value="8640000" calcext:value-type="float">
            <text:p>8640000</text:p>
          </table:table-cell>
          <table:table-cell table:formula="of:=[.B826]/[.C826]" office:value-type="float" office:value="0.00105034722222222" calcext:value-type="float">
            <text:p>0,00105034722222222000</text:p>
          </table:table-cell>
          <table:table-cell table:formula="of:=[.D827]-[.D826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B826]+11" office:value-type="float" office:value="9086" calcext:value-type="float">
            <text:p>9086</text:p>
          </table:table-cell>
          <table:table-cell office:value-type="float" office:value="8640000" calcext:value-type="float">
            <text:p>8640000</text:p>
          </table:table-cell>
          <table:table-cell table:formula="of:=[.B827]/[.C827]" office:value-type="float" office:value="0.00105162037037037" calcext:value-type="float">
            <text:p>0,00105162037037037000</text:p>
          </table:table-cell>
          <table:table-cell table:formula="of:=[.D828]-[.D82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B827]+11" office:value-type="float" office:value="9097" calcext:value-type="float">
            <text:p>9097</text:p>
          </table:table-cell>
          <table:table-cell office:value-type="float" office:value="8640000" calcext:value-type="float">
            <text:p>8640000</text:p>
          </table:table-cell>
          <table:table-cell table:formula="of:=[.B828]/[.C828]" office:value-type="float" office:value="0.00105289351851852" calcext:value-type="float">
            <text:p>0,00105289351851852000</text:p>
          </table:table-cell>
          <table:table-cell table:formula="of:=[.D829]-[.D828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B828]+11" office:value-type="float" office:value="9108" calcext:value-type="float">
            <text:p>9108</text:p>
          </table:table-cell>
          <table:table-cell office:value-type="float" office:value="8640000" calcext:value-type="float">
            <text:p>8640000</text:p>
          </table:table-cell>
          <table:table-cell table:formula="of:=[.B829]/[.C829]" office:value-type="float" office:value="0.00105416666666667" calcext:value-type="float">
            <text:p>0,00105416666666667000</text:p>
          </table:table-cell>
          <table:table-cell table:formula="of:=[.D830]-[.D82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B829]+11" office:value-type="float" office:value="9119" calcext:value-type="float">
            <text:p>9119</text:p>
          </table:table-cell>
          <table:table-cell office:value-type="float" office:value="8640000" calcext:value-type="float">
            <text:p>8640000</text:p>
          </table:table-cell>
          <table:table-cell table:formula="of:=[.B830]/[.C830]" office:value-type="float" office:value="0.00105543981481481" calcext:value-type="float">
            <text:p>0,00105543981481481000</text:p>
          </table:table-cell>
          <table:table-cell table:formula="of:=[.D831]-[.D830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B830]+11" office:value-type="float" office:value="9130" calcext:value-type="float">
            <text:p>9130</text:p>
          </table:table-cell>
          <table:table-cell office:value-type="float" office:value="8640000" calcext:value-type="float">
            <text:p>8640000</text:p>
          </table:table-cell>
          <table:table-cell table:formula="of:=[.B831]/[.C831]" office:value-type="float" office:value="0.00105671296296296" calcext:value-type="float">
            <text:p>0,00105671296296296000</text:p>
          </table:table-cell>
          <table:table-cell table:formula="of:=[.D832]-[.D83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B831]+11" office:value-type="float" office:value="9141" calcext:value-type="float">
            <text:p>9141</text:p>
          </table:table-cell>
          <table:table-cell office:value-type="float" office:value="8640000" calcext:value-type="float">
            <text:p>8640000</text:p>
          </table:table-cell>
          <table:table-cell table:formula="of:=[.B832]/[.C832]" office:value-type="float" office:value="0.00105798611111111" calcext:value-type="float">
            <text:p>0,00105798611111111000</text:p>
          </table:table-cell>
          <table:table-cell table:formula="of:=[.D833]-[.D83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B832]+11" office:value-type="float" office:value="9152" calcext:value-type="float">
            <text:p>9152</text:p>
          </table:table-cell>
          <table:table-cell office:value-type="float" office:value="8640000" calcext:value-type="float">
            <text:p>8640000</text:p>
          </table:table-cell>
          <table:table-cell table:formula="of:=[.B833]/[.C833]" office:value-type="float" office:value="0.00105925925925926" calcext:value-type="float">
            <text:p>0,00105925925925926000</text:p>
          </table:table-cell>
          <table:table-cell table:formula="of:=[.D834]-[.D833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B833]+11" office:value-type="float" office:value="9163" calcext:value-type="float">
            <text:p>9163</text:p>
          </table:table-cell>
          <table:table-cell office:value-type="float" office:value="8640000" calcext:value-type="float">
            <text:p>8640000</text:p>
          </table:table-cell>
          <table:table-cell table:formula="of:=[.B834]/[.C834]" office:value-type="float" office:value="0.00106053240740741" calcext:value-type="float">
            <text:p>0,00106053240740741000</text:p>
          </table:table-cell>
          <table:table-cell table:formula="of:=[.D835]-[.D83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B834]+11" office:value-type="float" office:value="9174" calcext:value-type="float">
            <text:p>9174</text:p>
          </table:table-cell>
          <table:table-cell office:value-type="float" office:value="8640000" calcext:value-type="float">
            <text:p>8640000</text:p>
          </table:table-cell>
          <table:table-cell table:formula="of:=[.B835]/[.C835]" office:value-type="float" office:value="0.00106180555555556" calcext:value-type="float">
            <text:p>0,00106180555555556000</text:p>
          </table:table-cell>
          <table:table-cell table:formula="of:=[.D836]-[.D835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B835]+11" office:value-type="float" office:value="9185" calcext:value-type="float">
            <text:p>9185</text:p>
          </table:table-cell>
          <table:table-cell office:value-type="float" office:value="8640000" calcext:value-type="float">
            <text:p>8640000</text:p>
          </table:table-cell>
          <table:table-cell table:formula="of:=[.B836]/[.C836]" office:value-type="float" office:value="0.0010630787037037" calcext:value-type="float">
            <text:p>0,00106307870370370000</text:p>
          </table:table-cell>
          <table:table-cell table:formula="of:=[.D837]-[.D83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B836]+11" office:value-type="float" office:value="9196" calcext:value-type="float">
            <text:p>9196</text:p>
          </table:table-cell>
          <table:table-cell office:value-type="float" office:value="8640000" calcext:value-type="float">
            <text:p>8640000</text:p>
          </table:table-cell>
          <table:table-cell table:formula="of:=[.B837]/[.C837]" office:value-type="float" office:value="0.00106435185185185" calcext:value-type="float">
            <text:p>0,00106435185185185000</text:p>
          </table:table-cell>
          <table:table-cell table:formula="of:=[.D838]-[.D837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B837]+11" office:value-type="float" office:value="9207" calcext:value-type="float">
            <text:p>9207</text:p>
          </table:table-cell>
          <table:table-cell office:value-type="float" office:value="8640000" calcext:value-type="float">
            <text:p>8640000</text:p>
          </table:table-cell>
          <table:table-cell table:formula="of:=[.B838]/[.C838]" office:value-type="float" office:value="0.001065625" calcext:value-type="float">
            <text:p>0,00106562500000000000</text:p>
          </table:table-cell>
          <table:table-cell table:formula="of:=[.D839]-[.D83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B838]+11" office:value-type="float" office:value="9218" calcext:value-type="float">
            <text:p>9218</text:p>
          </table:table-cell>
          <table:table-cell office:value-type="float" office:value="8640000" calcext:value-type="float">
            <text:p>8640000</text:p>
          </table:table-cell>
          <table:table-cell table:formula="of:=[.B839]/[.C839]" office:value-type="float" office:value="0.00106689814814815" calcext:value-type="float">
            <text:p>0,00106689814814815000</text:p>
          </table:table-cell>
          <table:table-cell table:formula="of:=[.D840]-[.D839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B839]+11" office:value-type="float" office:value="9229" calcext:value-type="float">
            <text:p>9229</text:p>
          </table:table-cell>
          <table:table-cell office:value-type="float" office:value="8640000" calcext:value-type="float">
            <text:p>8640000</text:p>
          </table:table-cell>
          <table:table-cell table:formula="of:=[.B840]/[.C840]" office:value-type="float" office:value="0.0010681712962963" calcext:value-type="float">
            <text:p>0,00106817129629630000</text:p>
          </table:table-cell>
          <table:table-cell table:formula="of:=[.D841]-[.D84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B840]+11" office:value-type="float" office:value="9240" calcext:value-type="float">
            <text:p>9240</text:p>
          </table:table-cell>
          <table:table-cell office:value-type="float" office:value="8640000" calcext:value-type="float">
            <text:p>8640000</text:p>
          </table:table-cell>
          <table:table-cell table:formula="of:=[.B841]/[.C841]" office:value-type="float" office:value="0.00106944444444444" calcext:value-type="float">
            <text:p>0,00106944444444444000</text:p>
          </table:table-cell>
          <table:table-cell table:formula="of:=[.D842]-[.D841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B841]+11" office:value-type="float" office:value="9251" calcext:value-type="float">
            <text:p>9251</text:p>
          </table:table-cell>
          <table:table-cell office:value-type="float" office:value="8640000" calcext:value-type="float">
            <text:p>8640000</text:p>
          </table:table-cell>
          <table:table-cell table:formula="of:=[.B842]/[.C842]" office:value-type="float" office:value="0.00107071759259259" calcext:value-type="float">
            <text:p>0,00107071759259259000</text:p>
          </table:table-cell>
          <table:table-cell table:formula="of:=[.D843]-[.D84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B842]+11" office:value-type="float" office:value="9262" calcext:value-type="float">
            <text:p>9262</text:p>
          </table:table-cell>
          <table:table-cell office:value-type="float" office:value="8640000" calcext:value-type="float">
            <text:p>8640000</text:p>
          </table:table-cell>
          <table:table-cell table:formula="of:=[.B843]/[.C843]" office:value-type="float" office:value="0.00107199074074074" calcext:value-type="float">
            <text:p>0,00107199074074074000</text:p>
          </table:table-cell>
          <table:table-cell table:formula="of:=[.D844]-[.D843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B843]+11" office:value-type="float" office:value="9273" calcext:value-type="float">
            <text:p>9273</text:p>
          </table:table-cell>
          <table:table-cell office:value-type="float" office:value="8640000" calcext:value-type="float">
            <text:p>8640000</text:p>
          </table:table-cell>
          <table:table-cell table:formula="of:=[.B844]/[.C844]" office:value-type="float" office:value="0.00107326388888889" calcext:value-type="float">
            <text:p>0,00107326388888889000</text:p>
          </table:table-cell>
          <table:table-cell table:formula="of:=[.D845]-[.D84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B844]+11" office:value-type="float" office:value="9284" calcext:value-type="float">
            <text:p>9284</text:p>
          </table:table-cell>
          <table:table-cell office:value-type="float" office:value="8640000" calcext:value-type="float">
            <text:p>8640000</text:p>
          </table:table-cell>
          <table:table-cell table:formula="of:=[.B845]/[.C845]" office:value-type="float" office:value="0.00107453703703704" calcext:value-type="float">
            <text:p>0,00107453703703704000</text:p>
          </table:table-cell>
          <table:table-cell table:formula="of:=[.D846]-[.D84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B845]+11" office:value-type="float" office:value="9295" calcext:value-type="float">
            <text:p>9295</text:p>
          </table:table-cell>
          <table:table-cell office:value-type="float" office:value="8640000" calcext:value-type="float">
            <text:p>8640000</text:p>
          </table:table-cell>
          <table:table-cell table:formula="of:=[.B846]/[.C846]" office:value-type="float" office:value="0.00107581018518519" calcext:value-type="float">
            <text:p>0,00107581018518519000</text:p>
          </table:table-cell>
          <table:table-cell table:formula="of:=[.D847]-[.D846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B846]+11" office:value-type="float" office:value="9306" calcext:value-type="float">
            <text:p>9306</text:p>
          </table:table-cell>
          <table:table-cell office:value-type="float" office:value="8640000" calcext:value-type="float">
            <text:p>8640000</text:p>
          </table:table-cell>
          <table:table-cell table:formula="of:=[.B847]/[.C847]" office:value-type="float" office:value="0.00107708333333333" calcext:value-type="float">
            <text:p>0,00107708333333333000</text:p>
          </table:table-cell>
          <table:table-cell table:formula="of:=[.D848]-[.D84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B847]+11" office:value-type="float" office:value="9317" calcext:value-type="float">
            <text:p>9317</text:p>
          </table:table-cell>
          <table:table-cell office:value-type="float" office:value="8640000" calcext:value-type="float">
            <text:p>8640000</text:p>
          </table:table-cell>
          <table:table-cell table:formula="of:=[.B848]/[.C848]" office:value-type="float" office:value="0.00107835648148148" calcext:value-type="float">
            <text:p>0,00107835648148148000</text:p>
          </table:table-cell>
          <table:table-cell table:formula="of:=[.D849]-[.D848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B848]+11" office:value-type="float" office:value="9328" calcext:value-type="float">
            <text:p>9328</text:p>
          </table:table-cell>
          <table:table-cell office:value-type="float" office:value="8640000" calcext:value-type="float">
            <text:p>8640000</text:p>
          </table:table-cell>
          <table:table-cell table:formula="of:=[.B849]/[.C849]" office:value-type="float" office:value="0.00107962962962963" calcext:value-type="float">
            <text:p>0,00107962962962963000</text:p>
          </table:table-cell>
          <table:table-cell table:formula="of:=[.D850]-[.D84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B849]+11" office:value-type="float" office:value="9339" calcext:value-type="float">
            <text:p>9339</text:p>
          </table:table-cell>
          <table:table-cell office:value-type="float" office:value="8640000" calcext:value-type="float">
            <text:p>8640000</text:p>
          </table:table-cell>
          <table:table-cell table:formula="of:=[.B850]/[.C850]" office:value-type="float" office:value="0.00108090277777778" calcext:value-type="float">
            <text:p>0,00108090277777778000</text:p>
          </table:table-cell>
          <table:table-cell table:formula="of:=[.D851]-[.D850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B850]+11" office:value-type="float" office:value="9350" calcext:value-type="float">
            <text:p>9350</text:p>
          </table:table-cell>
          <table:table-cell office:value-type="float" office:value="8640000" calcext:value-type="float">
            <text:p>8640000</text:p>
          </table:table-cell>
          <table:table-cell table:formula="of:=[.B851]/[.C851]" office:value-type="float" office:value="0.00108217592592593" calcext:value-type="float">
            <text:p>0,00108217592592593000</text:p>
          </table:table-cell>
          <table:table-cell table:formula="of:=[.D852]-[.D85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B851]+11" office:value-type="float" office:value="9361" calcext:value-type="float">
            <text:p>9361</text:p>
          </table:table-cell>
          <table:table-cell office:value-type="float" office:value="8640000" calcext:value-type="float">
            <text:p>8640000</text:p>
          </table:table-cell>
          <table:table-cell table:formula="of:=[.B852]/[.C852]" office:value-type="float" office:value="0.00108344907407407" calcext:value-type="float">
            <text:p>0,00108344907407407000</text:p>
          </table:table-cell>
          <table:table-cell table:formula="of:=[.D853]-[.D852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B852]+11" office:value-type="float" office:value="9372" calcext:value-type="float">
            <text:p>9372</text:p>
          </table:table-cell>
          <table:table-cell office:value-type="float" office:value="8640000" calcext:value-type="float">
            <text:p>8640000</text:p>
          </table:table-cell>
          <table:table-cell table:formula="of:=[.B853]/[.C853]" office:value-type="float" office:value="0.00108472222222222" calcext:value-type="float">
            <text:p>0,00108472222222222000</text:p>
          </table:table-cell>
          <table:table-cell table:formula="of:=[.D854]-[.D85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B853]+11" office:value-type="float" office:value="9383" calcext:value-type="float">
            <text:p>9383</text:p>
          </table:table-cell>
          <table:table-cell office:value-type="float" office:value="8640000" calcext:value-type="float">
            <text:p>8640000</text:p>
          </table:table-cell>
          <table:table-cell table:formula="of:=[.B854]/[.C854]" office:value-type="float" office:value="0.00108599537037037" calcext:value-type="float">
            <text:p>0,00108599537037037000</text:p>
          </table:table-cell>
          <table:table-cell table:formula="of:=[.D855]-[.D854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B854]+11" office:value-type="float" office:value="9394" calcext:value-type="float">
            <text:p>9394</text:p>
          </table:table-cell>
          <table:table-cell office:value-type="float" office:value="8640000" calcext:value-type="float">
            <text:p>8640000</text:p>
          </table:table-cell>
          <table:table-cell table:formula="of:=[.B855]/[.C855]" office:value-type="float" office:value="0.00108726851851852" calcext:value-type="float">
            <text:p>0,00108726851851852000</text:p>
          </table:table-cell>
          <table:table-cell table:formula="of:=[.D856]-[.D85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B855]+11" office:value-type="float" office:value="9405" calcext:value-type="float">
            <text:p>9405</text:p>
          </table:table-cell>
          <table:table-cell office:value-type="float" office:value="8640000" calcext:value-type="float">
            <text:p>8640000</text:p>
          </table:table-cell>
          <table:table-cell table:formula="of:=[.B856]/[.C856]" office:value-type="float" office:value="0.00108854166666667" calcext:value-type="float">
            <text:p>0,00108854166666667000</text:p>
          </table:table-cell>
          <table:table-cell table:formula="of:=[.D857]-[.D856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B856]+11" office:value-type="float" office:value="9416" calcext:value-type="float">
            <text:p>9416</text:p>
          </table:table-cell>
          <table:table-cell office:value-type="float" office:value="8640000" calcext:value-type="float">
            <text:p>8640000</text:p>
          </table:table-cell>
          <table:table-cell table:formula="of:=[.B857]/[.C857]" office:value-type="float" office:value="0.00108981481481481" calcext:value-type="float">
            <text:p>0,00108981481481481000</text:p>
          </table:table-cell>
          <table:table-cell table:formula="of:=[.D858]-[.D85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B857]+11" office:value-type="float" office:value="9427" calcext:value-type="float">
            <text:p>9427</text:p>
          </table:table-cell>
          <table:table-cell office:value-type="float" office:value="8640000" calcext:value-type="float">
            <text:p>8640000</text:p>
          </table:table-cell>
          <table:table-cell table:formula="of:=[.B858]/[.C858]" office:value-type="float" office:value="0.00109108796296296" calcext:value-type="float">
            <text:p>0,00109108796296296000</text:p>
          </table:table-cell>
          <table:table-cell table:formula="of:=[.D859]-[.D858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B858]+11" office:value-type="float" office:value="9438" calcext:value-type="float">
            <text:p>9438</text:p>
          </table:table-cell>
          <table:table-cell office:value-type="float" office:value="8640000" calcext:value-type="float">
            <text:p>8640000</text:p>
          </table:table-cell>
          <table:table-cell table:formula="of:=[.B859]/[.C859]" office:value-type="float" office:value="0.00109236111111111" calcext:value-type="float">
            <text:p>0,00109236111111111000</text:p>
          </table:table-cell>
          <table:table-cell table:formula="of:=[.D860]-[.D85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B859]+11" office:value-type="float" office:value="9449" calcext:value-type="float">
            <text:p>9449</text:p>
          </table:table-cell>
          <table:table-cell office:value-type="float" office:value="8640000" calcext:value-type="float">
            <text:p>8640000</text:p>
          </table:table-cell>
          <table:table-cell table:formula="of:=[.B860]/[.C860]" office:value-type="float" office:value="0.00109363425925926" calcext:value-type="float">
            <text:p>0,00109363425925926000</text:p>
          </table:table-cell>
          <table:table-cell table:formula="of:=[.D861]-[.D86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B860]+11" office:value-type="float" office:value="9460" calcext:value-type="float">
            <text:p>9460</text:p>
          </table:table-cell>
          <table:table-cell office:value-type="float" office:value="8640000" calcext:value-type="float">
            <text:p>8640000</text:p>
          </table:table-cell>
          <table:table-cell table:formula="of:=[.B861]/[.C861]" office:value-type="float" office:value="0.00109490740740741" calcext:value-type="float">
            <text:p>0,00109490740740741000</text:p>
          </table:table-cell>
          <table:table-cell table:formula="of:=[.D862]-[.D861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B861]+11" office:value-type="float" office:value="9471" calcext:value-type="float">
            <text:p>9471</text:p>
          </table:table-cell>
          <table:table-cell office:value-type="float" office:value="8640000" calcext:value-type="float">
            <text:p>8640000</text:p>
          </table:table-cell>
          <table:table-cell table:formula="of:=[.B862]/[.C862]" office:value-type="float" office:value="0.00109618055555556" calcext:value-type="float">
            <text:p>0,00109618055555556000</text:p>
          </table:table-cell>
          <table:table-cell table:formula="of:=[.D863]-[.D86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B862]+11" office:value-type="float" office:value="9482" calcext:value-type="float">
            <text:p>9482</text:p>
          </table:table-cell>
          <table:table-cell office:value-type="float" office:value="8640000" calcext:value-type="float">
            <text:p>8640000</text:p>
          </table:table-cell>
          <table:table-cell table:formula="of:=[.B863]/[.C863]" office:value-type="float" office:value="0.0010974537037037" calcext:value-type="float">
            <text:p>0,00109745370370370000</text:p>
          </table:table-cell>
          <table:table-cell table:formula="of:=[.D864]-[.D863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B863]+11" office:value-type="float" office:value="9493" calcext:value-type="float">
            <text:p>9493</text:p>
          </table:table-cell>
          <table:table-cell office:value-type="float" office:value="8640000" calcext:value-type="float">
            <text:p>8640000</text:p>
          </table:table-cell>
          <table:table-cell table:formula="of:=[.B864]/[.C864]" office:value-type="float" office:value="0.00109872685185185" calcext:value-type="float">
            <text:p>0,00109872685185185000</text:p>
          </table:table-cell>
          <table:table-cell table:formula="of:=[.D865]-[.D86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B864]+11" office:value-type="float" office:value="9504" calcext:value-type="float">
            <text:p>9504</text:p>
          </table:table-cell>
          <table:table-cell office:value-type="float" office:value="8640000" calcext:value-type="float">
            <text:p>8640000</text:p>
          </table:table-cell>
          <table:table-cell table:formula="of:=[.B865]/[.C865]" office:value-type="float" office:value="0.0011" calcext:value-type="float">
            <text:p>0,00110000000000000000</text:p>
          </table:table-cell>
          <table:table-cell table:formula="of:=[.D866]-[.D865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B865]+11" office:value-type="float" office:value="9515" calcext:value-type="float">
            <text:p>9515</text:p>
          </table:table-cell>
          <table:table-cell office:value-type="float" office:value="8640000" calcext:value-type="float">
            <text:p>8640000</text:p>
          </table:table-cell>
          <table:table-cell table:formula="of:=[.B866]/[.C866]" office:value-type="float" office:value="0.00110127314814815" calcext:value-type="float">
            <text:p>0,00110127314814815000</text:p>
          </table:table-cell>
          <table:table-cell table:formula="of:=[.D867]-[.D86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B866]+11" office:value-type="float" office:value="9526" calcext:value-type="float">
            <text:p>9526</text:p>
          </table:table-cell>
          <table:table-cell office:value-type="float" office:value="8640000" calcext:value-type="float">
            <text:p>8640000</text:p>
          </table:table-cell>
          <table:table-cell table:formula="of:=[.B867]/[.C867]" office:value-type="float" office:value="0.0011025462962963" calcext:value-type="float">
            <text:p>0,00110254629629630000</text:p>
          </table:table-cell>
          <table:table-cell table:formula="of:=[.D868]-[.D867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B867]+11" office:value-type="float" office:value="9537" calcext:value-type="float">
            <text:p>9537</text:p>
          </table:table-cell>
          <table:table-cell office:value-type="float" office:value="8640000" calcext:value-type="float">
            <text:p>8640000</text:p>
          </table:table-cell>
          <table:table-cell table:formula="of:=[.B868]/[.C868]" office:value-type="float" office:value="0.00110381944444444" calcext:value-type="float">
            <text:p>0,00110381944444444000</text:p>
          </table:table-cell>
          <table:table-cell table:formula="of:=[.D869]-[.D86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B868]+11" office:value-type="float" office:value="9548" calcext:value-type="float">
            <text:p>9548</text:p>
          </table:table-cell>
          <table:table-cell office:value-type="float" office:value="8640000" calcext:value-type="float">
            <text:p>8640000</text:p>
          </table:table-cell>
          <table:table-cell table:formula="of:=[.B869]/[.C869]" office:value-type="float" office:value="0.00110509259259259" calcext:value-type="float">
            <text:p>0,00110509259259259000</text:p>
          </table:table-cell>
          <table:table-cell table:formula="of:=[.D870]-[.D869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B869]+11" office:value-type="float" office:value="9559" calcext:value-type="float">
            <text:p>9559</text:p>
          </table:table-cell>
          <table:table-cell office:value-type="float" office:value="8640000" calcext:value-type="float">
            <text:p>8640000</text:p>
          </table:table-cell>
          <table:table-cell table:formula="of:=[.B870]/[.C870]" office:value-type="float" office:value="0.00110636574074074" calcext:value-type="float">
            <text:p>0,00110636574074074000</text:p>
          </table:table-cell>
          <table:table-cell table:formula="of:=[.D871]-[.D87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B870]+11" office:value-type="float" office:value="9570" calcext:value-type="float">
            <text:p>9570</text:p>
          </table:table-cell>
          <table:table-cell office:value-type="float" office:value="8640000" calcext:value-type="float">
            <text:p>8640000</text:p>
          </table:table-cell>
          <table:table-cell table:formula="of:=[.B871]/[.C871]" office:value-type="float" office:value="0.00110763888888889" calcext:value-type="float">
            <text:p>0,00110763888888889000</text:p>
          </table:table-cell>
          <table:table-cell table:formula="of:=[.D872]-[.D871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B871]+11" office:value-type="float" office:value="9581" calcext:value-type="float">
            <text:p>9581</text:p>
          </table:table-cell>
          <table:table-cell office:value-type="float" office:value="8640000" calcext:value-type="float">
            <text:p>8640000</text:p>
          </table:table-cell>
          <table:table-cell table:formula="of:=[.B872]/[.C872]" office:value-type="float" office:value="0.00110891203703704" calcext:value-type="float">
            <text:p>0,00110891203703704000</text:p>
          </table:table-cell>
          <table:table-cell table:formula="of:=[.D873]-[.D87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B872]+11" office:value-type="float" office:value="9592" calcext:value-type="float">
            <text:p>9592</text:p>
          </table:table-cell>
          <table:table-cell office:value-type="float" office:value="8640000" calcext:value-type="float">
            <text:p>8640000</text:p>
          </table:table-cell>
          <table:table-cell table:formula="of:=[.B873]/[.C873]" office:value-type="float" office:value="0.00111018518518519" calcext:value-type="float">
            <text:p>0,00111018518518519000</text:p>
          </table:table-cell>
          <table:table-cell table:formula="of:=[.D874]-[.D87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B873]+11" office:value-type="float" office:value="9603" calcext:value-type="float">
            <text:p>9603</text:p>
          </table:table-cell>
          <table:table-cell office:value-type="float" office:value="8640000" calcext:value-type="float">
            <text:p>8640000</text:p>
          </table:table-cell>
          <table:table-cell table:formula="of:=[.B874]/[.C874]" office:value-type="float" office:value="0.00111145833333333" calcext:value-type="float">
            <text:p>0,00111145833333333000</text:p>
          </table:table-cell>
          <table:table-cell table:formula="of:=[.D875]-[.D874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B874]+11" office:value-type="float" office:value="9614" calcext:value-type="float">
            <text:p>9614</text:p>
          </table:table-cell>
          <table:table-cell office:value-type="float" office:value="8640000" calcext:value-type="float">
            <text:p>8640000</text:p>
          </table:table-cell>
          <table:table-cell table:formula="of:=[.B875]/[.C875]" office:value-type="float" office:value="0.00111273148148148" calcext:value-type="float">
            <text:p>0,00111273148148148000</text:p>
          </table:table-cell>
          <table:table-cell table:formula="of:=[.D876]-[.D87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B875]+11" office:value-type="float" office:value="9625" calcext:value-type="float">
            <text:p>9625</text:p>
          </table:table-cell>
          <table:table-cell office:value-type="float" office:value="8640000" calcext:value-type="float">
            <text:p>8640000</text:p>
          </table:table-cell>
          <table:table-cell table:formula="of:=[.B876]/[.C876]" office:value-type="float" office:value="0.00111400462962963" calcext:value-type="float">
            <text:p>0,00111400462962963000</text:p>
          </table:table-cell>
          <table:table-cell table:formula="of:=[.D877]-[.D876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B876]+11" office:value-type="float" office:value="9636" calcext:value-type="float">
            <text:p>9636</text:p>
          </table:table-cell>
          <table:table-cell office:value-type="float" office:value="8640000" calcext:value-type="float">
            <text:p>8640000</text:p>
          </table:table-cell>
          <table:table-cell table:formula="of:=[.B877]/[.C877]" office:value-type="float" office:value="0.00111527777777778" calcext:value-type="float">
            <text:p>0,00111527777777778000</text:p>
          </table:table-cell>
          <table:table-cell table:formula="of:=[.D878]-[.D87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B877]+11" office:value-type="float" office:value="9647" calcext:value-type="float">
            <text:p>9647</text:p>
          </table:table-cell>
          <table:table-cell office:value-type="float" office:value="8640000" calcext:value-type="float">
            <text:p>8640000</text:p>
          </table:table-cell>
          <table:table-cell table:formula="of:=[.B878]/[.C878]" office:value-type="float" office:value="0.00111655092592593" calcext:value-type="float">
            <text:p>0,00111655092592593000</text:p>
          </table:table-cell>
          <table:table-cell table:formula="of:=[.D879]-[.D878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B878]+11" office:value-type="float" office:value="9658" calcext:value-type="float">
            <text:p>9658</text:p>
          </table:table-cell>
          <table:table-cell office:value-type="float" office:value="8640000" calcext:value-type="float">
            <text:p>8640000</text:p>
          </table:table-cell>
          <table:table-cell table:formula="of:=[.B879]/[.C879]" office:value-type="float" office:value="0.00111782407407407" calcext:value-type="float">
            <text:p>0,00111782407407407000</text:p>
          </table:table-cell>
          <table:table-cell table:formula="of:=[.D880]-[.D87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B879]+11" office:value-type="float" office:value="9669" calcext:value-type="float">
            <text:p>9669</text:p>
          </table:table-cell>
          <table:table-cell office:value-type="float" office:value="8640000" calcext:value-type="float">
            <text:p>8640000</text:p>
          </table:table-cell>
          <table:table-cell table:formula="of:=[.B880]/[.C880]" office:value-type="float" office:value="0.00111909722222222" calcext:value-type="float">
            <text:p>0,00111909722222222000</text:p>
          </table:table-cell>
          <table:table-cell table:formula="of:=[.D881]-[.D880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B880]+11" office:value-type="float" office:value="9680" calcext:value-type="float">
            <text:p>9680</text:p>
          </table:table-cell>
          <table:table-cell office:value-type="float" office:value="8640000" calcext:value-type="float">
            <text:p>8640000</text:p>
          </table:table-cell>
          <table:table-cell table:formula="of:=[.B881]/[.C881]" office:value-type="float" office:value="0.00112037037037037" calcext:value-type="float">
            <text:p>0,00112037037037037000</text:p>
          </table:table-cell>
          <table:table-cell table:formula="of:=[.D882]-[.D88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B881]+11" office:value-type="float" office:value="9691" calcext:value-type="float">
            <text:p>9691</text:p>
          </table:table-cell>
          <table:table-cell office:value-type="float" office:value="8640000" calcext:value-type="float">
            <text:p>8640000</text:p>
          </table:table-cell>
          <table:table-cell table:formula="of:=[.B882]/[.C882]" office:value-type="float" office:value="0.00112164351851852" calcext:value-type="float">
            <text:p>0,00112164351851852000</text:p>
          </table:table-cell>
          <table:table-cell table:formula="of:=[.D883]-[.D882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B882]+11" office:value-type="float" office:value="9702" calcext:value-type="float">
            <text:p>9702</text:p>
          </table:table-cell>
          <table:table-cell office:value-type="float" office:value="8640000" calcext:value-type="float">
            <text:p>8640000</text:p>
          </table:table-cell>
          <table:table-cell table:formula="of:=[.B883]/[.C883]" office:value-type="float" office:value="0.00112291666666667" calcext:value-type="float">
            <text:p>0,00112291666666667000</text:p>
          </table:table-cell>
          <table:table-cell table:formula="of:=[.D884]-[.D88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B883]+11" office:value-type="float" office:value="9713" calcext:value-type="float">
            <text:p>9713</text:p>
          </table:table-cell>
          <table:table-cell office:value-type="float" office:value="8640000" calcext:value-type="float">
            <text:p>8640000</text:p>
          </table:table-cell>
          <table:table-cell table:formula="of:=[.B884]/[.C884]" office:value-type="float" office:value="0.00112418981481481" calcext:value-type="float">
            <text:p>0,00112418981481481000</text:p>
          </table:table-cell>
          <table:table-cell table:formula="of:=[.D885]-[.D884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B884]+11" office:value-type="float" office:value="9724" calcext:value-type="float">
            <text:p>9724</text:p>
          </table:table-cell>
          <table:table-cell office:value-type="float" office:value="8640000" calcext:value-type="float">
            <text:p>8640000</text:p>
          </table:table-cell>
          <table:table-cell table:formula="of:=[.B885]/[.C885]" office:value-type="float" office:value="0.00112546296296296" calcext:value-type="float">
            <text:p>0,00112546296296296000</text:p>
          </table:table-cell>
          <table:table-cell table:formula="of:=[.D886]-[.D88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B885]+11" office:value-type="float" office:value="9735" calcext:value-type="float">
            <text:p>9735</text:p>
          </table:table-cell>
          <table:table-cell office:value-type="float" office:value="8640000" calcext:value-type="float">
            <text:p>8640000</text:p>
          </table:table-cell>
          <table:table-cell table:formula="of:=[.B886]/[.C886]" office:value-type="float" office:value="0.00112673611111111" calcext:value-type="float">
            <text:p>0,00112673611111111000</text:p>
          </table:table-cell>
          <table:table-cell table:formula="of:=[.D887]-[.D886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B886]+11" office:value-type="float" office:value="9746" calcext:value-type="float">
            <text:p>9746</text:p>
          </table:table-cell>
          <table:table-cell office:value-type="float" office:value="8640000" calcext:value-type="float">
            <text:p>8640000</text:p>
          </table:table-cell>
          <table:table-cell table:formula="of:=[.B887]/[.C887]" office:value-type="float" office:value="0.00112800925925926" calcext:value-type="float">
            <text:p>0,00112800925925926000</text:p>
          </table:table-cell>
          <table:table-cell table:formula="of:=[.D888]-[.D88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B887]+11" office:value-type="float" office:value="9757" calcext:value-type="float">
            <text:p>9757</text:p>
          </table:table-cell>
          <table:table-cell office:value-type="float" office:value="8640000" calcext:value-type="float">
            <text:p>8640000</text:p>
          </table:table-cell>
          <table:table-cell table:formula="of:=[.B888]/[.C888]" office:value-type="float" office:value="0.00112928240740741" calcext:value-type="float">
            <text:p>0,00112928240740741000</text:p>
          </table:table-cell>
          <table:table-cell table:formula="of:=[.D889]-[.D88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B888]+11" office:value-type="float" office:value="9768" calcext:value-type="float">
            <text:p>9768</text:p>
          </table:table-cell>
          <table:table-cell office:value-type="float" office:value="8640000" calcext:value-type="float">
            <text:p>8640000</text:p>
          </table:table-cell>
          <table:table-cell table:formula="of:=[.B889]/[.C889]" office:value-type="float" office:value="0.00113055555555556" calcext:value-type="float">
            <text:p>0,00113055555555556000</text:p>
          </table:table-cell>
          <table:table-cell table:formula="of:=[.D890]-[.D889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B889]+11" office:value-type="float" office:value="9779" calcext:value-type="float">
            <text:p>9779</text:p>
          </table:table-cell>
          <table:table-cell office:value-type="float" office:value="8640000" calcext:value-type="float">
            <text:p>8640000</text:p>
          </table:table-cell>
          <table:table-cell table:formula="of:=[.B890]/[.C890]" office:value-type="float" office:value="0.0011318287037037" calcext:value-type="float">
            <text:p>0,00113182870370370000</text:p>
          </table:table-cell>
          <table:table-cell table:formula="of:=[.D891]-[.D89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B890]+11" office:value-type="float" office:value="9790" calcext:value-type="float">
            <text:p>9790</text:p>
          </table:table-cell>
          <table:table-cell office:value-type="float" office:value="8640000" calcext:value-type="float">
            <text:p>8640000</text:p>
          </table:table-cell>
          <table:table-cell table:formula="of:=[.B891]/[.C891]" office:value-type="float" office:value="0.00113310185185185" calcext:value-type="float">
            <text:p>0,00113310185185185000</text:p>
          </table:table-cell>
          <table:table-cell table:formula="of:=[.D892]-[.D891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B891]+11" office:value-type="float" office:value="9801" calcext:value-type="float">
            <text:p>9801</text:p>
          </table:table-cell>
          <table:table-cell office:value-type="float" office:value="8640000" calcext:value-type="float">
            <text:p>8640000</text:p>
          </table:table-cell>
          <table:table-cell table:formula="of:=[.B892]/[.C892]" office:value-type="float" office:value="0.001134375" calcext:value-type="float">
            <text:p>0,00113437500000000000</text:p>
          </table:table-cell>
          <table:table-cell table:formula="of:=[.D893]-[.D89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B892]+11" office:value-type="float" office:value="9812" calcext:value-type="float">
            <text:p>9812</text:p>
          </table:table-cell>
          <table:table-cell office:value-type="float" office:value="8640000" calcext:value-type="float">
            <text:p>8640000</text:p>
          </table:table-cell>
          <table:table-cell table:formula="of:=[.B893]/[.C893]" office:value-type="float" office:value="0.00113564814814815" calcext:value-type="float">
            <text:p>0,00113564814814815000</text:p>
          </table:table-cell>
          <table:table-cell table:formula="of:=[.D894]-[.D893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B893]+11" office:value-type="float" office:value="9823" calcext:value-type="float">
            <text:p>9823</text:p>
          </table:table-cell>
          <table:table-cell office:value-type="float" office:value="8640000" calcext:value-type="float">
            <text:p>8640000</text:p>
          </table:table-cell>
          <table:table-cell table:formula="of:=[.B894]/[.C894]" office:value-type="float" office:value="0.0011369212962963" calcext:value-type="float">
            <text:p>0,00113692129629630000</text:p>
          </table:table-cell>
          <table:table-cell table:formula="of:=[.D895]-[.D89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B894]+11" office:value-type="float" office:value="9834" calcext:value-type="float">
            <text:p>9834</text:p>
          </table:table-cell>
          <table:table-cell office:value-type="float" office:value="8640000" calcext:value-type="float">
            <text:p>8640000</text:p>
          </table:table-cell>
          <table:table-cell table:formula="of:=[.B895]/[.C895]" office:value-type="float" office:value="0.00113819444444444" calcext:value-type="float">
            <text:p>0,00113819444444444000</text:p>
          </table:table-cell>
          <table:table-cell table:formula="of:=[.D896]-[.D895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B895]+11" office:value-type="float" office:value="9845" calcext:value-type="float">
            <text:p>9845</text:p>
          </table:table-cell>
          <table:table-cell office:value-type="float" office:value="8640000" calcext:value-type="float">
            <text:p>8640000</text:p>
          </table:table-cell>
          <table:table-cell table:formula="of:=[.B896]/[.C896]" office:value-type="float" office:value="0.00113946759259259" calcext:value-type="float">
            <text:p>0,00113946759259259000</text:p>
          </table:table-cell>
          <table:table-cell table:formula="of:=[.D897]-[.D89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B896]+11" office:value-type="float" office:value="9856" calcext:value-type="float">
            <text:p>9856</text:p>
          </table:table-cell>
          <table:table-cell office:value-type="float" office:value="8640000" calcext:value-type="float">
            <text:p>8640000</text:p>
          </table:table-cell>
          <table:table-cell table:formula="of:=[.B897]/[.C897]" office:value-type="float" office:value="0.00114074074074074" calcext:value-type="float">
            <text:p>0,00114074074074074000</text:p>
          </table:table-cell>
          <table:table-cell table:formula="of:=[.D898]-[.D897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B897]+11" office:value-type="float" office:value="9867" calcext:value-type="float">
            <text:p>9867</text:p>
          </table:table-cell>
          <table:table-cell office:value-type="float" office:value="8640000" calcext:value-type="float">
            <text:p>8640000</text:p>
          </table:table-cell>
          <table:table-cell table:formula="of:=[.B898]/[.C898]" office:value-type="float" office:value="0.00114201388888889" calcext:value-type="float">
            <text:p>0,00114201388888889000</text:p>
          </table:table-cell>
          <table:table-cell table:formula="of:=[.D899]-[.D89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B898]+11" office:value-type="float" office:value="9878" calcext:value-type="float">
            <text:p>9878</text:p>
          </table:table-cell>
          <table:table-cell office:value-type="float" office:value="8640000" calcext:value-type="float">
            <text:p>8640000</text:p>
          </table:table-cell>
          <table:table-cell table:formula="of:=[.B899]/[.C899]" office:value-type="float" office:value="0.00114328703703704" calcext:value-type="float">
            <text:p>0,00114328703703704000</text:p>
          </table:table-cell>
          <table:table-cell table:formula="of:=[.D900]-[.D899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B899]+11" office:value-type="float" office:value="9889" calcext:value-type="float">
            <text:p>9889</text:p>
          </table:table-cell>
          <table:table-cell office:value-type="float" office:value="8640000" calcext:value-type="float">
            <text:p>8640000</text:p>
          </table:table-cell>
          <table:table-cell table:formula="of:=[.B900]/[.C900]" office:value-type="float" office:value="0.00114456018518519" calcext:value-type="float">
            <text:p>0,00114456018518519000</text:p>
          </table:table-cell>
          <table:table-cell table:formula="of:=[.D901]-[.D90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B900]+11" office:value-type="float" office:value="9900" calcext:value-type="float">
            <text:p>9900</text:p>
          </table:table-cell>
          <table:table-cell office:value-type="float" office:value="8640000" calcext:value-type="float">
            <text:p>8640000</text:p>
          </table:table-cell>
          <table:table-cell table:formula="of:=[.B901]/[.C901]" office:value-type="float" office:value="0.00114583333333333" calcext:value-type="float">
            <text:p>0,00114583333333333000</text:p>
          </table:table-cell>
          <table:table-cell table:formula="of:=[.D902]-[.D90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B901]+11" office:value-type="float" office:value="9911" calcext:value-type="float">
            <text:p>9911</text:p>
          </table:table-cell>
          <table:table-cell office:value-type="float" office:value="8640000" calcext:value-type="float">
            <text:p>8640000</text:p>
          </table:table-cell>
          <table:table-cell table:formula="of:=[.B902]/[.C902]" office:value-type="float" office:value="0.00114710648148148" calcext:value-type="float">
            <text:p>0,00114710648148148000</text:p>
          </table:table-cell>
          <table:table-cell table:formula="of:=[.D903]-[.D902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B902]+11" office:value-type="float" office:value="9922" calcext:value-type="float">
            <text:p>9922</text:p>
          </table:table-cell>
          <table:table-cell office:value-type="float" office:value="8640000" calcext:value-type="float">
            <text:p>8640000</text:p>
          </table:table-cell>
          <table:table-cell table:formula="of:=[.B903]/[.C903]" office:value-type="float" office:value="0.00114837962962963" calcext:value-type="float">
            <text:p>0,00114837962962963000</text:p>
          </table:table-cell>
          <table:table-cell table:formula="of:=[.D904]-[.D90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B903]+11" office:value-type="float" office:value="9933" calcext:value-type="float">
            <text:p>9933</text:p>
          </table:table-cell>
          <table:table-cell office:value-type="float" office:value="8640000" calcext:value-type="float">
            <text:p>8640000</text:p>
          </table:table-cell>
          <table:table-cell table:formula="of:=[.B904]/[.C904]" office:value-type="float" office:value="0.00114965277777778" calcext:value-type="float">
            <text:p>0,00114965277777778000</text:p>
          </table:table-cell>
          <table:table-cell table:formula="of:=[.D905]-[.D904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B904]+11" office:value-type="float" office:value="9944" calcext:value-type="float">
            <text:p>9944</text:p>
          </table:table-cell>
          <table:table-cell office:value-type="float" office:value="8640000" calcext:value-type="float">
            <text:p>8640000</text:p>
          </table:table-cell>
          <table:table-cell table:formula="of:=[.B905]/[.C905]" office:value-type="float" office:value="0.00115092592592593" calcext:value-type="float">
            <text:p>0,00115092592592593000</text:p>
          </table:table-cell>
          <table:table-cell table:formula="of:=[.D906]-[.D90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B905]+11" office:value-type="float" office:value="9955" calcext:value-type="float">
            <text:p>9955</text:p>
          </table:table-cell>
          <table:table-cell office:value-type="float" office:value="8640000" calcext:value-type="float">
            <text:p>8640000</text:p>
          </table:table-cell>
          <table:table-cell table:formula="of:=[.B906]/[.C906]" office:value-type="float" office:value="0.00115219907407407" calcext:value-type="float">
            <text:p>0,00115219907407407000</text:p>
          </table:table-cell>
          <table:table-cell table:formula="of:=[.D907]-[.D906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B906]+11" office:value-type="float" office:value="9966" calcext:value-type="float">
            <text:p>9966</text:p>
          </table:table-cell>
          <table:table-cell office:value-type="float" office:value="8640000" calcext:value-type="float">
            <text:p>8640000</text:p>
          </table:table-cell>
          <table:table-cell table:formula="of:=[.B907]/[.C907]" office:value-type="float" office:value="0.00115347222222222" calcext:value-type="float">
            <text:p>0,00115347222222222000</text:p>
          </table:table-cell>
          <table:table-cell table:formula="of:=[.D908]-[.D90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B907]+11" office:value-type="float" office:value="9977" calcext:value-type="float">
            <text:p>9977</text:p>
          </table:table-cell>
          <table:table-cell office:value-type="float" office:value="8640000" calcext:value-type="float">
            <text:p>8640000</text:p>
          </table:table-cell>
          <table:table-cell table:formula="of:=[.B908]/[.C908]" office:value-type="float" office:value="0.00115474537037037" calcext:value-type="float">
            <text:p>0,00115474537037037000</text:p>
          </table:table-cell>
          <table:table-cell table:formula="of:=[.D909]-[.D908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B908]+11" office:value-type="float" office:value="9988" calcext:value-type="float">
            <text:p>9988</text:p>
          </table:table-cell>
          <table:table-cell office:value-type="float" office:value="8640000" calcext:value-type="float">
            <text:p>8640000</text:p>
          </table:table-cell>
          <table:table-cell table:formula="of:=[.B909]/[.C909]" office:value-type="float" office:value="0.00115601851851852" calcext:value-type="float">
            <text:p>0,00115601851851852000</text:p>
          </table:table-cell>
          <table:table-cell table:formula="of:=[.D910]-[.D90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B909]+11" office:value-type="float" office:value="9999" calcext:value-type="float">
            <text:p>9999</text:p>
          </table:table-cell>
          <table:table-cell office:value-type="float" office:value="8640000" calcext:value-type="float">
            <text:p>8640000</text:p>
          </table:table-cell>
          <table:table-cell table:formula="of:=[.B910]/[.C910]" office:value-type="float" office:value="0.00115729166666667" calcext:value-type="float">
            <text:p>0,00115729166666667000</text:p>
          </table:table-cell>
          <table:table-cell table:formula="of:=[.D911]-[.D910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B910]+11" office:value-type="float" office:value="10010" calcext:value-type="float">
            <text:p>10010</text:p>
          </table:table-cell>
          <table:table-cell office:value-type="float" office:value="8640000" calcext:value-type="float">
            <text:p>8640000</text:p>
          </table:table-cell>
          <table:table-cell table:formula="of:=[.B911]/[.C911]" office:value-type="float" office:value="0.00115856481481481" calcext:value-type="float">
            <text:p>0,00115856481481481000</text:p>
          </table:table-cell>
          <table:table-cell table:formula="of:=[.D912]-[.D91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B911]+11" office:value-type="float" office:value="10021" calcext:value-type="float">
            <text:p>10021</text:p>
          </table:table-cell>
          <table:table-cell office:value-type="float" office:value="8640000" calcext:value-type="float">
            <text:p>8640000</text:p>
          </table:table-cell>
          <table:table-cell table:formula="of:=[.B912]/[.C912]" office:value-type="float" office:value="0.00115983796296296" calcext:value-type="float">
            <text:p>0,00115983796296296000</text:p>
          </table:table-cell>
          <table:table-cell table:formula="of:=[.D913]-[.D912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B912]+11" office:value-type="float" office:value="10032" calcext:value-type="float">
            <text:p>10032</text:p>
          </table:table-cell>
          <table:table-cell office:value-type="float" office:value="8640000" calcext:value-type="float">
            <text:p>8640000</text:p>
          </table:table-cell>
          <table:table-cell table:formula="of:=[.B913]/[.C913]" office:value-type="float" office:value="0.00116111111111111" calcext:value-type="float">
            <text:p>0,00116111111111111000</text:p>
          </table:table-cell>
          <table:table-cell table:formula="of:=[.D914]-[.D91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B913]+11" office:value-type="float" office:value="10043" calcext:value-type="float">
            <text:p>10043</text:p>
          </table:table-cell>
          <table:table-cell office:value-type="float" office:value="8640000" calcext:value-type="float">
            <text:p>8640000</text:p>
          </table:table-cell>
          <table:table-cell table:formula="of:=[.B914]/[.C914]" office:value-type="float" office:value="0.00116238425925926" calcext:value-type="float">
            <text:p>0,00116238425925926000</text:p>
          </table:table-cell>
          <table:table-cell table:formula="of:=[.D915]-[.D914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B914]+11" office:value-type="float" office:value="10054" calcext:value-type="float">
            <text:p>10054</text:p>
          </table:table-cell>
          <table:table-cell office:value-type="float" office:value="8640000" calcext:value-type="float">
            <text:p>8640000</text:p>
          </table:table-cell>
          <table:table-cell table:formula="of:=[.B915]/[.C915]" office:value-type="float" office:value="0.00116365740740741" calcext:value-type="float">
            <text:p>0,00116365740740741000</text:p>
          </table:table-cell>
          <table:table-cell table:formula="of:=[.D916]-[.D91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B915]+11" office:value-type="float" office:value="10065" calcext:value-type="float">
            <text:p>10065</text:p>
          </table:table-cell>
          <table:table-cell office:value-type="float" office:value="8640000" calcext:value-type="float">
            <text:p>8640000</text:p>
          </table:table-cell>
          <table:table-cell table:formula="of:=[.B916]/[.C916]" office:value-type="float" office:value="0.00116493055555556" calcext:value-type="float">
            <text:p>0,00116493055555556000</text:p>
          </table:table-cell>
          <table:table-cell table:formula="of:=[.D917]-[.D91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B916]+11" office:value-type="float" office:value="10076" calcext:value-type="float">
            <text:p>10076</text:p>
          </table:table-cell>
          <table:table-cell office:value-type="float" office:value="8640000" calcext:value-type="float">
            <text:p>8640000</text:p>
          </table:table-cell>
          <table:table-cell table:formula="of:=[.B917]/[.C917]" office:value-type="float" office:value="0.0011662037037037" calcext:value-type="float">
            <text:p>0,00116620370370370000</text:p>
          </table:table-cell>
          <table:table-cell table:formula="of:=[.D918]-[.D917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B917]+11" office:value-type="float" office:value="10087" calcext:value-type="float">
            <text:p>10087</text:p>
          </table:table-cell>
          <table:table-cell office:value-type="float" office:value="8640000" calcext:value-type="float">
            <text:p>8640000</text:p>
          </table:table-cell>
          <table:table-cell table:formula="of:=[.B918]/[.C918]" office:value-type="float" office:value="0.00116747685185185" calcext:value-type="float">
            <text:p>0,00116747685185185000</text:p>
          </table:table-cell>
          <table:table-cell table:formula="of:=[.D919]-[.D91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B918]+11" office:value-type="float" office:value="10098" calcext:value-type="float">
            <text:p>10098</text:p>
          </table:table-cell>
          <table:table-cell office:value-type="float" office:value="8640000" calcext:value-type="float">
            <text:p>8640000</text:p>
          </table:table-cell>
          <table:table-cell table:formula="of:=[.B919]/[.C919]" office:value-type="float" office:value="0.00116875" calcext:value-type="float">
            <text:p>0,00116875000000000000</text:p>
          </table:table-cell>
          <table:table-cell table:formula="of:=[.D920]-[.D919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B919]+11" office:value-type="float" office:value="10109" calcext:value-type="float">
            <text:p>10109</text:p>
          </table:table-cell>
          <table:table-cell office:value-type="float" office:value="8640000" calcext:value-type="float">
            <text:p>8640000</text:p>
          </table:table-cell>
          <table:table-cell table:formula="of:=[.B920]/[.C920]" office:value-type="float" office:value="0.00117002314814815" calcext:value-type="float">
            <text:p>0,00117002314814815000</text:p>
          </table:table-cell>
          <table:table-cell table:formula="of:=[.D921]-[.D92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B920]+11" office:value-type="float" office:value="10120" calcext:value-type="float">
            <text:p>10120</text:p>
          </table:table-cell>
          <table:table-cell office:value-type="float" office:value="8640000" calcext:value-type="float">
            <text:p>8640000</text:p>
          </table:table-cell>
          <table:table-cell table:formula="of:=[.B921]/[.C921]" office:value-type="float" office:value="0.0011712962962963" calcext:value-type="float">
            <text:p>0,00117129629629630000</text:p>
          </table:table-cell>
          <table:table-cell table:formula="of:=[.D922]-[.D921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B921]+11" office:value-type="float" office:value="10131" calcext:value-type="float">
            <text:p>10131</text:p>
          </table:table-cell>
          <table:table-cell office:value-type="float" office:value="8640000" calcext:value-type="float">
            <text:p>8640000</text:p>
          </table:table-cell>
          <table:table-cell table:formula="of:=[.B922]/[.C922]" office:value-type="float" office:value="0.00117256944444444" calcext:value-type="float">
            <text:p>0,00117256944444444000</text:p>
          </table:table-cell>
          <table:table-cell table:formula="of:=[.D923]-[.D92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B922]+11" office:value-type="float" office:value="10142" calcext:value-type="float">
            <text:p>10142</text:p>
          </table:table-cell>
          <table:table-cell office:value-type="float" office:value="8640000" calcext:value-type="float">
            <text:p>8640000</text:p>
          </table:table-cell>
          <table:table-cell table:formula="of:=[.B923]/[.C923]" office:value-type="float" office:value="0.00117384259259259" calcext:value-type="float">
            <text:p>0,00117384259259259000</text:p>
          </table:table-cell>
          <table:table-cell table:formula="of:=[.D924]-[.D923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B923]+11" office:value-type="float" office:value="10153" calcext:value-type="float">
            <text:p>10153</text:p>
          </table:table-cell>
          <table:table-cell office:value-type="float" office:value="8640000" calcext:value-type="float">
            <text:p>8640000</text:p>
          </table:table-cell>
          <table:table-cell table:formula="of:=[.B924]/[.C924]" office:value-type="float" office:value="0.00117511574074074" calcext:value-type="float">
            <text:p>0,00117511574074074000</text:p>
          </table:table-cell>
          <table:table-cell table:formula="of:=[.D925]-[.D92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B924]+11" office:value-type="float" office:value="10164" calcext:value-type="float">
            <text:p>10164</text:p>
          </table:table-cell>
          <table:table-cell office:value-type="float" office:value="8640000" calcext:value-type="float">
            <text:p>8640000</text:p>
          </table:table-cell>
          <table:table-cell table:formula="of:=[.B925]/[.C925]" office:value-type="float" office:value="0.00117638888888889" calcext:value-type="float">
            <text:p>0,00117638888888889000</text:p>
          </table:table-cell>
          <table:table-cell table:formula="of:=[.D926]-[.D925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B925]+11" office:value-type="float" office:value="10175" calcext:value-type="float">
            <text:p>10175</text:p>
          </table:table-cell>
          <table:table-cell office:value-type="float" office:value="8640000" calcext:value-type="float">
            <text:p>8640000</text:p>
          </table:table-cell>
          <table:table-cell table:formula="of:=[.B926]/[.C926]" office:value-type="float" office:value="0.00117766203703704" calcext:value-type="float">
            <text:p>0,00117766203703704000</text:p>
          </table:table-cell>
          <table:table-cell table:formula="of:=[.D927]-[.D92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B926]+11" office:value-type="float" office:value="10186" calcext:value-type="float">
            <text:p>10186</text:p>
          </table:table-cell>
          <table:table-cell office:value-type="float" office:value="8640000" calcext:value-type="float">
            <text:p>8640000</text:p>
          </table:table-cell>
          <table:table-cell table:formula="of:=[.B927]/[.C927]" office:value-type="float" office:value="0.00117893518518519" calcext:value-type="float">
            <text:p>0,00117893518518519000</text:p>
          </table:table-cell>
          <table:table-cell table:formula="of:=[.D928]-[.D927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B927]+11" office:value-type="float" office:value="10197" calcext:value-type="float">
            <text:p>10197</text:p>
          </table:table-cell>
          <table:table-cell office:value-type="float" office:value="8640000" calcext:value-type="float">
            <text:p>8640000</text:p>
          </table:table-cell>
          <table:table-cell table:formula="of:=[.B928]/[.C928]" office:value-type="float" office:value="0.00118020833333333" calcext:value-type="float">
            <text:p>0,00118020833333333000</text:p>
          </table:table-cell>
          <table:table-cell table:formula="of:=[.D929]-[.D92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B928]+11" office:value-type="float" office:value="10208" calcext:value-type="float">
            <text:p>10208</text:p>
          </table:table-cell>
          <table:table-cell office:value-type="float" office:value="8640000" calcext:value-type="float">
            <text:p>8640000</text:p>
          </table:table-cell>
          <table:table-cell table:formula="of:=[.B929]/[.C929]" office:value-type="float" office:value="0.00118148148148148" calcext:value-type="float">
            <text:p>0,00118148148148148000</text:p>
          </table:table-cell>
          <table:table-cell table:formula="of:=[.D930]-[.D92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B929]+11" office:value-type="float" office:value="10219" calcext:value-type="float">
            <text:p>10219</text:p>
          </table:table-cell>
          <table:table-cell office:value-type="float" office:value="8640000" calcext:value-type="float">
            <text:p>8640000</text:p>
          </table:table-cell>
          <table:table-cell table:formula="of:=[.B930]/[.C930]" office:value-type="float" office:value="0.00118275462962963" calcext:value-type="float">
            <text:p>0,00118275462962963000</text:p>
          </table:table-cell>
          <table:table-cell table:formula="of:=[.D931]-[.D930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B930]+11" office:value-type="float" office:value="10230" calcext:value-type="float">
            <text:p>10230</text:p>
          </table:table-cell>
          <table:table-cell office:value-type="float" office:value="8640000" calcext:value-type="float">
            <text:p>8640000</text:p>
          </table:table-cell>
          <table:table-cell table:formula="of:=[.B931]/[.C931]" office:value-type="float" office:value="0.00118402777777778" calcext:value-type="float">
            <text:p>0,00118402777777778000</text:p>
          </table:table-cell>
          <table:table-cell table:formula="of:=[.D932]-[.D93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B931]+11" office:value-type="float" office:value="10241" calcext:value-type="float">
            <text:p>10241</text:p>
          </table:table-cell>
          <table:table-cell office:value-type="float" office:value="8640000" calcext:value-type="float">
            <text:p>8640000</text:p>
          </table:table-cell>
          <table:table-cell table:formula="of:=[.B932]/[.C932]" office:value-type="float" office:value="0.00118530092592593" calcext:value-type="float">
            <text:p>0,00118530092592593000</text:p>
          </table:table-cell>
          <table:table-cell table:formula="of:=[.D933]-[.D932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B932]+11" office:value-type="float" office:value="10252" calcext:value-type="float">
            <text:p>10252</text:p>
          </table:table-cell>
          <table:table-cell office:value-type="float" office:value="8640000" calcext:value-type="float">
            <text:p>8640000</text:p>
          </table:table-cell>
          <table:table-cell table:formula="of:=[.B933]/[.C933]" office:value-type="float" office:value="0.00118657407407407" calcext:value-type="float">
            <text:p>0,00118657407407407000</text:p>
          </table:table-cell>
          <table:table-cell table:formula="of:=[.D934]-[.D93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B933]+11" office:value-type="float" office:value="10263" calcext:value-type="float">
            <text:p>10263</text:p>
          </table:table-cell>
          <table:table-cell office:value-type="float" office:value="8640000" calcext:value-type="float">
            <text:p>8640000</text:p>
          </table:table-cell>
          <table:table-cell table:formula="of:=[.B934]/[.C934]" office:value-type="float" office:value="0.00118784722222222" calcext:value-type="float">
            <text:p>0,00118784722222222000</text:p>
          </table:table-cell>
          <table:table-cell table:formula="of:=[.D935]-[.D934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B934]+11" office:value-type="float" office:value="10274" calcext:value-type="float">
            <text:p>10274</text:p>
          </table:table-cell>
          <table:table-cell office:value-type="float" office:value="8640000" calcext:value-type="float">
            <text:p>8640000</text:p>
          </table:table-cell>
          <table:table-cell table:formula="of:=[.B935]/[.C935]" office:value-type="float" office:value="0.00118912037037037" calcext:value-type="float">
            <text:p>0,00118912037037037000</text:p>
          </table:table-cell>
          <table:table-cell table:formula="of:=[.D936]-[.D93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B935]+11" office:value-type="float" office:value="10285" calcext:value-type="float">
            <text:p>10285</text:p>
          </table:table-cell>
          <table:table-cell office:value-type="float" office:value="8640000" calcext:value-type="float">
            <text:p>8640000</text:p>
          </table:table-cell>
          <table:table-cell table:formula="of:=[.B936]/[.C936]" office:value-type="float" office:value="0.00119039351851852" calcext:value-type="float">
            <text:p>0,00119039351851852000</text:p>
          </table:table-cell>
          <table:table-cell table:formula="of:=[.D937]-[.D936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B936]+11" office:value-type="float" office:value="10296" calcext:value-type="float">
            <text:p>10296</text:p>
          </table:table-cell>
          <table:table-cell office:value-type="float" office:value="8640000" calcext:value-type="float">
            <text:p>8640000</text:p>
          </table:table-cell>
          <table:table-cell table:formula="of:=[.B937]/[.C937]" office:value-type="float" office:value="0.00119166666666667" calcext:value-type="float">
            <text:p>0,00119166666666667000</text:p>
          </table:table-cell>
          <table:table-cell table:formula="of:=[.D938]-[.D93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B937]+11" office:value-type="float" office:value="10307" calcext:value-type="float">
            <text:p>10307</text:p>
          </table:table-cell>
          <table:table-cell office:value-type="float" office:value="8640000" calcext:value-type="float">
            <text:p>8640000</text:p>
          </table:table-cell>
          <table:table-cell table:formula="of:=[.B938]/[.C938]" office:value-type="float" office:value="0.00119293981481481" calcext:value-type="float">
            <text:p>0,00119293981481481000</text:p>
          </table:table-cell>
          <table:table-cell table:formula="of:=[.D939]-[.D938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B938]+11" office:value-type="float" office:value="10318" calcext:value-type="float">
            <text:p>10318</text:p>
          </table:table-cell>
          <table:table-cell office:value-type="float" office:value="8640000" calcext:value-type="float">
            <text:p>8640000</text:p>
          </table:table-cell>
          <table:table-cell table:formula="of:=[.B939]/[.C939]" office:value-type="float" office:value="0.00119421296296296" calcext:value-type="float">
            <text:p>0,00119421296296296000</text:p>
          </table:table-cell>
          <table:table-cell table:formula="of:=[.D940]-[.D93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B939]+11" office:value-type="float" office:value="10329" calcext:value-type="float">
            <text:p>10329</text:p>
          </table:table-cell>
          <table:table-cell office:value-type="float" office:value="8640000" calcext:value-type="float">
            <text:p>8640000</text:p>
          </table:table-cell>
          <table:table-cell table:formula="of:=[.B940]/[.C940]" office:value-type="float" office:value="0.00119548611111111" calcext:value-type="float">
            <text:p>0,00119548611111111000</text:p>
          </table:table-cell>
          <table:table-cell table:formula="of:=[.D941]-[.D940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B940]+11" office:value-type="float" office:value="10340" calcext:value-type="float">
            <text:p>10340</text:p>
          </table:table-cell>
          <table:table-cell office:value-type="float" office:value="8640000" calcext:value-type="float">
            <text:p>8640000</text:p>
          </table:table-cell>
          <table:table-cell table:formula="of:=[.B941]/[.C941]" office:value-type="float" office:value="0.00119675925925926" calcext:value-type="float">
            <text:p>0,00119675925925926000</text:p>
          </table:table-cell>
          <table:table-cell table:formula="of:=[.D942]-[.D94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B941]+11" office:value-type="float" office:value="10351" calcext:value-type="float">
            <text:p>10351</text:p>
          </table:table-cell>
          <table:table-cell office:value-type="float" office:value="8640000" calcext:value-type="float">
            <text:p>8640000</text:p>
          </table:table-cell>
          <table:table-cell table:formula="of:=[.B942]/[.C942]" office:value-type="float" office:value="0.00119803240740741" calcext:value-type="float">
            <text:p>0,00119803240740741000</text:p>
          </table:table-cell>
          <table:table-cell table:formula="of:=[.D943]-[.D942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B942]+11" office:value-type="float" office:value="10362" calcext:value-type="float">
            <text:p>10362</text:p>
          </table:table-cell>
          <table:table-cell office:value-type="float" office:value="8640000" calcext:value-type="float">
            <text:p>8640000</text:p>
          </table:table-cell>
          <table:table-cell table:formula="of:=[.B943]/[.C943]" office:value-type="float" office:value="0.00119930555555556" calcext:value-type="float">
            <text:p>0,00119930555555556000</text:p>
          </table:table-cell>
          <table:table-cell table:formula="of:=[.D944]-[.D94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B943]+11" office:value-type="float" office:value="10373" calcext:value-type="float">
            <text:p>10373</text:p>
          </table:table-cell>
          <table:table-cell office:value-type="float" office:value="8640000" calcext:value-type="float">
            <text:p>8640000</text:p>
          </table:table-cell>
          <table:table-cell table:formula="of:=[.B944]/[.C944]" office:value-type="float" office:value="0.0012005787037037" calcext:value-type="float">
            <text:p>0,00120057870370370000</text:p>
          </table:table-cell>
          <table:table-cell table:formula="of:=[.D945]-[.D94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B944]+11" office:value-type="float" office:value="10384" calcext:value-type="float">
            <text:p>10384</text:p>
          </table:table-cell>
          <table:table-cell office:value-type="float" office:value="8640000" calcext:value-type="float">
            <text:p>8640000</text:p>
          </table:table-cell>
          <table:table-cell table:formula="of:=[.B945]/[.C945]" office:value-type="float" office:value="0.00120185185185185" calcext:value-type="float">
            <text:p>0,00120185185185185000</text:p>
          </table:table-cell>
          <table:table-cell table:formula="of:=[.D946]-[.D945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B945]+11" office:value-type="float" office:value="10395" calcext:value-type="float">
            <text:p>10395</text:p>
          </table:table-cell>
          <table:table-cell office:value-type="float" office:value="8640000" calcext:value-type="float">
            <text:p>8640000</text:p>
          </table:table-cell>
          <table:table-cell table:formula="of:=[.B946]/[.C946]" office:value-type="float" office:value="0.001203125" calcext:value-type="float">
            <text:p>0,00120312500000000000</text:p>
          </table:table-cell>
          <table:table-cell table:formula="of:=[.D947]-[.D94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B946]+11" office:value-type="float" office:value="10406" calcext:value-type="float">
            <text:p>10406</text:p>
          </table:table-cell>
          <table:table-cell office:value-type="float" office:value="8640000" calcext:value-type="float">
            <text:p>8640000</text:p>
          </table:table-cell>
          <table:table-cell table:formula="of:=[.B947]/[.C947]" office:value-type="float" office:value="0.00120439814814815" calcext:value-type="float">
            <text:p>0,00120439814814815000</text:p>
          </table:table-cell>
          <table:table-cell table:formula="of:=[.D948]-[.D947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B947]+11" office:value-type="float" office:value="10417" calcext:value-type="float">
            <text:p>10417</text:p>
          </table:table-cell>
          <table:table-cell office:value-type="float" office:value="8640000" calcext:value-type="float">
            <text:p>8640000</text:p>
          </table:table-cell>
          <table:table-cell table:formula="of:=[.B948]/[.C948]" office:value-type="float" office:value="0.0012056712962963" calcext:value-type="float">
            <text:p>0,00120567129629630000</text:p>
          </table:table-cell>
          <table:table-cell table:formula="of:=[.D949]-[.D94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B948]+11" office:value-type="float" office:value="10428" calcext:value-type="float">
            <text:p>10428</text:p>
          </table:table-cell>
          <table:table-cell office:value-type="float" office:value="8640000" calcext:value-type="float">
            <text:p>8640000</text:p>
          </table:table-cell>
          <table:table-cell table:formula="of:=[.B949]/[.C949]" office:value-type="float" office:value="0.00120694444444444" calcext:value-type="float">
            <text:p>0,00120694444444444000</text:p>
          </table:table-cell>
          <table:table-cell table:formula="of:=[.D950]-[.D949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B949]+11" office:value-type="float" office:value="10439" calcext:value-type="float">
            <text:p>10439</text:p>
          </table:table-cell>
          <table:table-cell office:value-type="float" office:value="8640000" calcext:value-type="float">
            <text:p>8640000</text:p>
          </table:table-cell>
          <table:table-cell table:formula="of:=[.B950]/[.C950]" office:value-type="float" office:value="0.00120821759259259" calcext:value-type="float">
            <text:p>0,00120821759259259000</text:p>
          </table:table-cell>
          <table:table-cell table:formula="of:=[.D951]-[.D95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B950]+11" office:value-type="float" office:value="10450" calcext:value-type="float">
            <text:p>10450</text:p>
          </table:table-cell>
          <table:table-cell office:value-type="float" office:value="8640000" calcext:value-type="float">
            <text:p>8640000</text:p>
          </table:table-cell>
          <table:table-cell table:formula="of:=[.B951]/[.C951]" office:value-type="float" office:value="0.00120949074074074" calcext:value-type="float">
            <text:p>0,00120949074074074000</text:p>
          </table:table-cell>
          <table:table-cell table:formula="of:=[.D952]-[.D951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B951]+11" office:value-type="float" office:value="10461" calcext:value-type="float">
            <text:p>10461</text:p>
          </table:table-cell>
          <table:table-cell office:value-type="float" office:value="8640000" calcext:value-type="float">
            <text:p>8640000</text:p>
          </table:table-cell>
          <table:table-cell table:formula="of:=[.B952]/[.C952]" office:value-type="float" office:value="0.00121076388888889" calcext:value-type="float">
            <text:p>0,00121076388888889000</text:p>
          </table:table-cell>
          <table:table-cell table:formula="of:=[.D953]-[.D95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B952]+11" office:value-type="float" office:value="10472" calcext:value-type="float">
            <text:p>10472</text:p>
          </table:table-cell>
          <table:table-cell office:value-type="float" office:value="8640000" calcext:value-type="float">
            <text:p>8640000</text:p>
          </table:table-cell>
          <table:table-cell table:formula="of:=[.B953]/[.C953]" office:value-type="float" office:value="0.00121203703703704" calcext:value-type="float">
            <text:p>0,00121203703703704000</text:p>
          </table:table-cell>
          <table:table-cell table:formula="of:=[.D954]-[.D953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B953]+11" office:value-type="float" office:value="10483" calcext:value-type="float">
            <text:p>10483</text:p>
          </table:table-cell>
          <table:table-cell office:value-type="float" office:value="8640000" calcext:value-type="float">
            <text:p>8640000</text:p>
          </table:table-cell>
          <table:table-cell table:formula="of:=[.B954]/[.C954]" office:value-type="float" office:value="0.00121331018518519" calcext:value-type="float">
            <text:p>0,00121331018518519000</text:p>
          </table:table-cell>
          <table:table-cell table:formula="of:=[.D955]-[.D95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B954]+11" office:value-type="float" office:value="10494" calcext:value-type="float">
            <text:p>10494</text:p>
          </table:table-cell>
          <table:table-cell office:value-type="float" office:value="8640000" calcext:value-type="float">
            <text:p>8640000</text:p>
          </table:table-cell>
          <table:table-cell table:formula="of:=[.B955]/[.C955]" office:value-type="float" office:value="0.00121458333333333" calcext:value-type="float">
            <text:p>0,00121458333333333000</text:p>
          </table:table-cell>
          <table:table-cell table:formula="of:=[.D956]-[.D955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B955]+11" office:value-type="float" office:value="10505" calcext:value-type="float">
            <text:p>10505</text:p>
          </table:table-cell>
          <table:table-cell office:value-type="float" office:value="8640000" calcext:value-type="float">
            <text:p>8640000</text:p>
          </table:table-cell>
          <table:table-cell table:formula="of:=[.B956]/[.C956]" office:value-type="float" office:value="0.00121585648148148" calcext:value-type="float">
            <text:p>0,00121585648148148000</text:p>
          </table:table-cell>
          <table:table-cell table:formula="of:=[.D957]-[.D95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B956]+11" office:value-type="float" office:value="10516" calcext:value-type="float">
            <text:p>10516</text:p>
          </table:table-cell>
          <table:table-cell office:value-type="float" office:value="8640000" calcext:value-type="float">
            <text:p>8640000</text:p>
          </table:table-cell>
          <table:table-cell table:formula="of:=[.B957]/[.C957]" office:value-type="float" office:value="0.00121712962962963" calcext:value-type="float">
            <text:p>0,00121712962962963000</text:p>
          </table:table-cell>
          <table:table-cell table:formula="of:=[.D958]-[.D957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B957]+11" office:value-type="float" office:value="10527" calcext:value-type="float">
            <text:p>10527</text:p>
          </table:table-cell>
          <table:table-cell office:value-type="float" office:value="8640000" calcext:value-type="float">
            <text:p>8640000</text:p>
          </table:table-cell>
          <table:table-cell table:formula="of:=[.B958]/[.C958]" office:value-type="float" office:value="0.00121840277777778" calcext:value-type="float">
            <text:p>0,00121840277777778000</text:p>
          </table:table-cell>
          <table:table-cell table:formula="of:=[.D959]-[.D95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B958]+11" office:value-type="float" office:value="10538" calcext:value-type="float">
            <text:p>10538</text:p>
          </table:table-cell>
          <table:table-cell office:value-type="float" office:value="8640000" calcext:value-type="float">
            <text:p>8640000</text:p>
          </table:table-cell>
          <table:table-cell table:formula="of:=[.B959]/[.C959]" office:value-type="float" office:value="0.00121967592592593" calcext:value-type="float">
            <text:p>0,00121967592592593000</text:p>
          </table:table-cell>
          <table:table-cell table:formula="of:=[.D960]-[.D95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B959]+11" office:value-type="float" office:value="10549" calcext:value-type="float">
            <text:p>10549</text:p>
          </table:table-cell>
          <table:table-cell office:value-type="float" office:value="8640000" calcext:value-type="float">
            <text:p>8640000</text:p>
          </table:table-cell>
          <table:table-cell table:formula="of:=[.B960]/[.C960]" office:value-type="float" office:value="0.00122094907407407" calcext:value-type="float">
            <text:p>0,00122094907407407000</text:p>
          </table:table-cell>
          <table:table-cell table:formula="of:=[.D961]-[.D960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B960]+11" office:value-type="float" office:value="10560" calcext:value-type="float">
            <text:p>10560</text:p>
          </table:table-cell>
          <table:table-cell office:value-type="float" office:value="8640000" calcext:value-type="float">
            <text:p>8640000</text:p>
          </table:table-cell>
          <table:table-cell table:formula="of:=[.B961]/[.C961]" office:value-type="float" office:value="0.00122222222222222" calcext:value-type="float">
            <text:p>0,00122222222222222000</text:p>
          </table:table-cell>
          <table:table-cell table:formula="of:=[.D962]-[.D96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B961]+11" office:value-type="float" office:value="10571" calcext:value-type="float">
            <text:p>10571</text:p>
          </table:table-cell>
          <table:table-cell office:value-type="float" office:value="8640000" calcext:value-type="float">
            <text:p>8640000</text:p>
          </table:table-cell>
          <table:table-cell table:formula="of:=[.B962]/[.C962]" office:value-type="float" office:value="0.00122349537037037" calcext:value-type="float">
            <text:p>0,00122349537037037000</text:p>
          </table:table-cell>
          <table:table-cell table:formula="of:=[.D963]-[.D962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B962]+11" office:value-type="float" office:value="10582" calcext:value-type="float">
            <text:p>10582</text:p>
          </table:table-cell>
          <table:table-cell office:value-type="float" office:value="8640000" calcext:value-type="float">
            <text:p>8640000</text:p>
          </table:table-cell>
          <table:table-cell table:formula="of:=[.B963]/[.C963]" office:value-type="float" office:value="0.00122476851851852" calcext:value-type="float">
            <text:p>0,00122476851851852000</text:p>
          </table:table-cell>
          <table:table-cell table:formula="of:=[.D964]-[.D96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B963]+11" office:value-type="float" office:value="10593" calcext:value-type="float">
            <text:p>10593</text:p>
          </table:table-cell>
          <table:table-cell office:value-type="float" office:value="8640000" calcext:value-type="float">
            <text:p>8640000</text:p>
          </table:table-cell>
          <table:table-cell table:formula="of:=[.B964]/[.C964]" office:value-type="float" office:value="0.00122604166666667" calcext:value-type="float">
            <text:p>0,00122604166666667000</text:p>
          </table:table-cell>
          <table:table-cell table:formula="of:=[.D965]-[.D964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B964]+11" office:value-type="float" office:value="10604" calcext:value-type="float">
            <text:p>10604</text:p>
          </table:table-cell>
          <table:table-cell office:value-type="float" office:value="8640000" calcext:value-type="float">
            <text:p>8640000</text:p>
          </table:table-cell>
          <table:table-cell table:formula="of:=[.B965]/[.C965]" office:value-type="float" office:value="0.00122731481481481" calcext:value-type="float">
            <text:p>0,00122731481481481000</text:p>
          </table:table-cell>
          <table:table-cell table:formula="of:=[.D966]-[.D96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B965]+11" office:value-type="float" office:value="10615" calcext:value-type="float">
            <text:p>10615</text:p>
          </table:table-cell>
          <table:table-cell office:value-type="float" office:value="8640000" calcext:value-type="float">
            <text:p>8640000</text:p>
          </table:table-cell>
          <table:table-cell table:formula="of:=[.B966]/[.C966]" office:value-type="float" office:value="0.00122858796296296" calcext:value-type="float">
            <text:p>0,00122858796296296000</text:p>
          </table:table-cell>
          <table:table-cell table:formula="of:=[.D967]-[.D966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B966]+11" office:value-type="float" office:value="10626" calcext:value-type="float">
            <text:p>10626</text:p>
          </table:table-cell>
          <table:table-cell office:value-type="float" office:value="8640000" calcext:value-type="float">
            <text:p>8640000</text:p>
          </table:table-cell>
          <table:table-cell table:formula="of:=[.B967]/[.C967]" office:value-type="float" office:value="0.00122986111111111" calcext:value-type="float">
            <text:p>0,00122986111111111000</text:p>
          </table:table-cell>
          <table:table-cell table:formula="of:=[.D968]-[.D96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B967]+11" office:value-type="float" office:value="10637" calcext:value-type="float">
            <text:p>10637</text:p>
          </table:table-cell>
          <table:table-cell office:value-type="float" office:value="8640000" calcext:value-type="float">
            <text:p>8640000</text:p>
          </table:table-cell>
          <table:table-cell table:formula="of:=[.B968]/[.C968]" office:value-type="float" office:value="0.00123113425925926" calcext:value-type="float">
            <text:p>0,00123113425925926000</text:p>
          </table:table-cell>
          <table:table-cell table:formula="of:=[.D969]-[.D968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B968]+11" office:value-type="float" office:value="10648" calcext:value-type="float">
            <text:p>10648</text:p>
          </table:table-cell>
          <table:table-cell office:value-type="float" office:value="8640000" calcext:value-type="float">
            <text:p>8640000</text:p>
          </table:table-cell>
          <table:table-cell table:formula="of:=[.B969]/[.C969]" office:value-type="float" office:value="0.00123240740740741" calcext:value-type="float">
            <text:p>0,00123240740740741000</text:p>
          </table:table-cell>
          <table:table-cell table:formula="of:=[.D970]-[.D96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B969]+11" office:value-type="float" office:value="10659" calcext:value-type="float">
            <text:p>10659</text:p>
          </table:table-cell>
          <table:table-cell office:value-type="float" office:value="8640000" calcext:value-type="float">
            <text:p>8640000</text:p>
          </table:table-cell>
          <table:table-cell table:formula="of:=[.B970]/[.C970]" office:value-type="float" office:value="0.00123368055555556" calcext:value-type="float">
            <text:p>0,00123368055555556000</text:p>
          </table:table-cell>
          <table:table-cell table:formula="of:=[.D971]-[.D970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B970]+11" office:value-type="float" office:value="10670" calcext:value-type="float">
            <text:p>10670</text:p>
          </table:table-cell>
          <table:table-cell office:value-type="float" office:value="8640000" calcext:value-type="float">
            <text:p>8640000</text:p>
          </table:table-cell>
          <table:table-cell table:formula="of:=[.B971]/[.C971]" office:value-type="float" office:value="0.0012349537037037" calcext:value-type="float">
            <text:p>0,00123495370370370000</text:p>
          </table:table-cell>
          <table:table-cell table:formula="of:=[.D972]-[.D97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B971]+11" office:value-type="float" office:value="10681" calcext:value-type="float">
            <text:p>10681</text:p>
          </table:table-cell>
          <table:table-cell office:value-type="float" office:value="8640000" calcext:value-type="float">
            <text:p>8640000</text:p>
          </table:table-cell>
          <table:table-cell table:formula="of:=[.B972]/[.C972]" office:value-type="float" office:value="0.00123622685185185" calcext:value-type="float">
            <text:p>0,00123622685185185000</text:p>
          </table:table-cell>
          <table:table-cell table:formula="of:=[.D973]-[.D97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B972]+11" office:value-type="float" office:value="10692" calcext:value-type="float">
            <text:p>10692</text:p>
          </table:table-cell>
          <table:table-cell office:value-type="float" office:value="8640000" calcext:value-type="float">
            <text:p>8640000</text:p>
          </table:table-cell>
          <table:table-cell table:formula="of:=[.B973]/[.C973]" office:value-type="float" office:value="0.0012375" calcext:value-type="float">
            <text:p>0,00123750000000000000</text:p>
          </table:table-cell>
          <table:table-cell table:formula="of:=[.D974]-[.D973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B973]+11" office:value-type="float" office:value="10703" calcext:value-type="float">
            <text:p>10703</text:p>
          </table:table-cell>
          <table:table-cell office:value-type="float" office:value="8640000" calcext:value-type="float">
            <text:p>8640000</text:p>
          </table:table-cell>
          <table:table-cell table:formula="of:=[.B974]/[.C974]" office:value-type="float" office:value="0.00123877314814815" calcext:value-type="float">
            <text:p>0,00123877314814815000</text:p>
          </table:table-cell>
          <table:table-cell table:formula="of:=[.D975]-[.D97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B974]+11" office:value-type="float" office:value="10714" calcext:value-type="float">
            <text:p>10714</text:p>
          </table:table-cell>
          <table:table-cell office:value-type="float" office:value="8640000" calcext:value-type="float">
            <text:p>8640000</text:p>
          </table:table-cell>
          <table:table-cell table:formula="of:=[.B975]/[.C975]" office:value-type="float" office:value="0.0012400462962963" calcext:value-type="float">
            <text:p>0,00124004629629630000</text:p>
          </table:table-cell>
          <table:table-cell table:formula="of:=[.D976]-[.D975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B975]+11" office:value-type="float" office:value="10725" calcext:value-type="float">
            <text:p>10725</text:p>
          </table:table-cell>
          <table:table-cell office:value-type="float" office:value="8640000" calcext:value-type="float">
            <text:p>8640000</text:p>
          </table:table-cell>
          <table:table-cell table:formula="of:=[.B976]/[.C976]" office:value-type="float" office:value="0.00124131944444444" calcext:value-type="float">
            <text:p>0,00124131944444444000</text:p>
          </table:table-cell>
          <table:table-cell table:formula="of:=[.D977]-[.D97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B976]+11" office:value-type="float" office:value="10736" calcext:value-type="float">
            <text:p>10736</text:p>
          </table:table-cell>
          <table:table-cell office:value-type="float" office:value="8640000" calcext:value-type="float">
            <text:p>8640000</text:p>
          </table:table-cell>
          <table:table-cell table:formula="of:=[.B977]/[.C977]" office:value-type="float" office:value="0.00124259259259259" calcext:value-type="float">
            <text:p>0,00124259259259259000</text:p>
          </table:table-cell>
          <table:table-cell table:formula="of:=[.D978]-[.D977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B977]+11" office:value-type="float" office:value="10747" calcext:value-type="float">
            <text:p>10747</text:p>
          </table:table-cell>
          <table:table-cell office:value-type="float" office:value="8640000" calcext:value-type="float">
            <text:p>8640000</text:p>
          </table:table-cell>
          <table:table-cell table:formula="of:=[.B978]/[.C978]" office:value-type="float" office:value="0.00124386574074074" calcext:value-type="float">
            <text:p>0,00124386574074074000</text:p>
          </table:table-cell>
          <table:table-cell table:formula="of:=[.D979]-[.D97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B978]+11" office:value-type="float" office:value="10758" calcext:value-type="float">
            <text:p>10758</text:p>
          </table:table-cell>
          <table:table-cell office:value-type="float" office:value="8640000" calcext:value-type="float">
            <text:p>8640000</text:p>
          </table:table-cell>
          <table:table-cell table:formula="of:=[.B979]/[.C979]" office:value-type="float" office:value="0.00124513888888889" calcext:value-type="float">
            <text:p>0,00124513888888889000</text:p>
          </table:table-cell>
          <table:table-cell table:formula="of:=[.D980]-[.D979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B979]+11" office:value-type="float" office:value="10769" calcext:value-type="float">
            <text:p>10769</text:p>
          </table:table-cell>
          <table:table-cell office:value-type="float" office:value="8640000" calcext:value-type="float">
            <text:p>8640000</text:p>
          </table:table-cell>
          <table:table-cell table:formula="of:=[.B980]/[.C980]" office:value-type="float" office:value="0.00124641203703704" calcext:value-type="float">
            <text:p>0,00124641203703704000</text:p>
          </table:table-cell>
          <table:table-cell table:formula="of:=[.D981]-[.D98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B980]+11" office:value-type="float" office:value="10780" calcext:value-type="float">
            <text:p>10780</text:p>
          </table:table-cell>
          <table:table-cell office:value-type="float" office:value="8640000" calcext:value-type="float">
            <text:p>8640000</text:p>
          </table:table-cell>
          <table:table-cell table:formula="of:=[.B981]/[.C981]" office:value-type="float" office:value="0.00124768518518519" calcext:value-type="float">
            <text:p>0,00124768518518519000</text:p>
          </table:table-cell>
          <table:table-cell table:formula="of:=[.D982]-[.D981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B981]+11" office:value-type="float" office:value="10791" calcext:value-type="float">
            <text:p>10791</text:p>
          </table:table-cell>
          <table:table-cell office:value-type="float" office:value="8640000" calcext:value-type="float">
            <text:p>8640000</text:p>
          </table:table-cell>
          <table:table-cell table:formula="of:=[.B982]/[.C982]" office:value-type="float" office:value="0.00124895833333333" calcext:value-type="float">
            <text:p>0,00124895833333333000</text:p>
          </table:table-cell>
          <table:table-cell table:formula="of:=[.D983]-[.D98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B982]+11" office:value-type="float" office:value="10802" calcext:value-type="float">
            <text:p>10802</text:p>
          </table:table-cell>
          <table:table-cell office:value-type="float" office:value="8640000" calcext:value-type="float">
            <text:p>8640000</text:p>
          </table:table-cell>
          <table:table-cell table:formula="of:=[.B983]/[.C983]" office:value-type="float" office:value="0.00125023148148148" calcext:value-type="float">
            <text:p>0,00125023148148148000</text:p>
          </table:table-cell>
          <table:table-cell table:formula="of:=[.D984]-[.D983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B983]+11" office:value-type="float" office:value="10813" calcext:value-type="float">
            <text:p>10813</text:p>
          </table:table-cell>
          <table:table-cell office:value-type="float" office:value="8640000" calcext:value-type="float">
            <text:p>8640000</text:p>
          </table:table-cell>
          <table:table-cell table:formula="of:=[.B984]/[.C984]" office:value-type="float" office:value="0.00125150462962963" calcext:value-type="float">
            <text:p>0,00125150462962963000</text:p>
          </table:table-cell>
          <table:table-cell table:formula="of:=[.D985]-[.D98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B984]+11" office:value-type="float" office:value="10824" calcext:value-type="float">
            <text:p>10824</text:p>
          </table:table-cell>
          <table:table-cell office:value-type="float" office:value="8640000" calcext:value-type="float">
            <text:p>8640000</text:p>
          </table:table-cell>
          <table:table-cell table:formula="of:=[.B985]/[.C985]" office:value-type="float" office:value="0.00125277777777778" calcext:value-type="float">
            <text:p>0,00125277777777778000</text:p>
          </table:table-cell>
          <table:table-cell table:formula="of:=[.D986]-[.D985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B985]+11" office:value-type="float" office:value="10835" calcext:value-type="float">
            <text:p>10835</text:p>
          </table:table-cell>
          <table:table-cell office:value-type="float" office:value="8640000" calcext:value-type="float">
            <text:p>8640000</text:p>
          </table:table-cell>
          <table:table-cell table:formula="of:=[.B986]/[.C986]" office:value-type="float" office:value="0.00125405092592593" calcext:value-type="float">
            <text:p>0,00125405092592593000</text:p>
          </table:table-cell>
          <table:table-cell table:formula="of:=[.D987]-[.D98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B986]+11" office:value-type="float" office:value="10846" calcext:value-type="float">
            <text:p>10846</text:p>
          </table:table-cell>
          <table:table-cell office:value-type="float" office:value="8640000" calcext:value-type="float">
            <text:p>8640000</text:p>
          </table:table-cell>
          <table:table-cell table:formula="of:=[.B987]/[.C987]" office:value-type="float" office:value="0.00125532407407407" calcext:value-type="float">
            <text:p>0,00125532407407407000</text:p>
          </table:table-cell>
          <table:table-cell table:formula="of:=[.D988]-[.D98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B987]+11" office:value-type="float" office:value="10857" calcext:value-type="float">
            <text:p>10857</text:p>
          </table:table-cell>
          <table:table-cell office:value-type="float" office:value="8640000" calcext:value-type="float">
            <text:p>8640000</text:p>
          </table:table-cell>
          <table:table-cell table:formula="of:=[.B988]/[.C988]" office:value-type="float" office:value="0.00125659722222222" calcext:value-type="float">
            <text:p>0,00125659722222222000</text:p>
          </table:table-cell>
          <table:table-cell table:formula="of:=[.D989]-[.D988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B988]+11" office:value-type="float" office:value="10868" calcext:value-type="float">
            <text:p>10868</text:p>
          </table:table-cell>
          <table:table-cell office:value-type="float" office:value="8640000" calcext:value-type="float">
            <text:p>8640000</text:p>
          </table:table-cell>
          <table:table-cell table:formula="of:=[.B989]/[.C989]" office:value-type="float" office:value="0.00125787037037037" calcext:value-type="float">
            <text:p>0,00125787037037037000</text:p>
          </table:table-cell>
          <table:table-cell table:formula="of:=[.D990]-[.D98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B989]+11" office:value-type="float" office:value="10879" calcext:value-type="float">
            <text:p>10879</text:p>
          </table:table-cell>
          <table:table-cell office:value-type="float" office:value="8640000" calcext:value-type="float">
            <text:p>8640000</text:p>
          </table:table-cell>
          <table:table-cell table:formula="of:=[.B990]/[.C990]" office:value-type="float" office:value="0.00125914351851852" calcext:value-type="float">
            <text:p>0,00125914351851852000</text:p>
          </table:table-cell>
          <table:table-cell table:formula="of:=[.D991]-[.D990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B990]+11" office:value-type="float" office:value="10890" calcext:value-type="float">
            <text:p>10890</text:p>
          </table:table-cell>
          <table:table-cell office:value-type="float" office:value="8640000" calcext:value-type="float">
            <text:p>8640000</text:p>
          </table:table-cell>
          <table:table-cell table:formula="of:=[.B991]/[.C991]" office:value-type="float" office:value="0.00126041666666667" calcext:value-type="float">
            <text:p>0,00126041666666667000</text:p>
          </table:table-cell>
          <table:table-cell table:formula="of:=[.D992]-[.D99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B991]+11" office:value-type="float" office:value="10901" calcext:value-type="float">
            <text:p>10901</text:p>
          </table:table-cell>
          <table:table-cell office:value-type="float" office:value="8640000" calcext:value-type="float">
            <text:p>8640000</text:p>
          </table:table-cell>
          <table:table-cell table:formula="of:=[.B992]/[.C992]" office:value-type="float" office:value="0.00126168981481481" calcext:value-type="float">
            <text:p>0,00126168981481481000</text:p>
          </table:table-cell>
          <table:table-cell table:formula="of:=[.D993]-[.D992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B992]+11" office:value-type="float" office:value="10912" calcext:value-type="float">
            <text:p>10912</text:p>
          </table:table-cell>
          <table:table-cell office:value-type="float" office:value="8640000" calcext:value-type="float">
            <text:p>8640000</text:p>
          </table:table-cell>
          <table:table-cell table:formula="of:=[.B993]/[.C993]" office:value-type="float" office:value="0.00126296296296296" calcext:value-type="float">
            <text:p>0,00126296296296296000</text:p>
          </table:table-cell>
          <table:table-cell table:formula="of:=[.D994]-[.D99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B993]+11" office:value-type="float" office:value="10923" calcext:value-type="float">
            <text:p>10923</text:p>
          </table:table-cell>
          <table:table-cell office:value-type="float" office:value="8640000" calcext:value-type="float">
            <text:p>8640000</text:p>
          </table:table-cell>
          <table:table-cell table:formula="of:=[.B994]/[.C994]" office:value-type="float" office:value="0.00126423611111111" calcext:value-type="float">
            <text:p>0,00126423611111111000</text:p>
          </table:table-cell>
          <table:table-cell table:formula="of:=[.D995]-[.D994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B994]+11" office:value-type="float" office:value="10934" calcext:value-type="float">
            <text:p>10934</text:p>
          </table:table-cell>
          <table:table-cell office:value-type="float" office:value="8640000" calcext:value-type="float">
            <text:p>8640000</text:p>
          </table:table-cell>
          <table:table-cell table:formula="of:=[.B995]/[.C995]" office:value-type="float" office:value="0.00126550925925926" calcext:value-type="float">
            <text:p>0,00126550925925926000</text:p>
          </table:table-cell>
          <table:table-cell table:formula="of:=[.D996]-[.D99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B995]+11" office:value-type="float" office:value="10945" calcext:value-type="float">
            <text:p>10945</text:p>
          </table:table-cell>
          <table:table-cell office:value-type="float" office:value="8640000" calcext:value-type="float">
            <text:p>8640000</text:p>
          </table:table-cell>
          <table:table-cell table:formula="of:=[.B996]/[.C996]" office:value-type="float" office:value="0.00126678240740741" calcext:value-type="float">
            <text:p>0,00126678240740741000</text:p>
          </table:table-cell>
          <table:table-cell table:formula="of:=[.D997]-[.D996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B996]+11" office:value-type="float" office:value="10956" calcext:value-type="float">
            <text:p>10956</text:p>
          </table:table-cell>
          <table:table-cell office:value-type="float" office:value="8640000" calcext:value-type="float">
            <text:p>8640000</text:p>
          </table:table-cell>
          <table:table-cell table:formula="of:=[.B997]/[.C997]" office:value-type="float" office:value="0.00126805555555556" calcext:value-type="float">
            <text:p>0,00126805555555556000</text:p>
          </table:table-cell>
          <table:table-cell table:formula="of:=[.D998]-[.D99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B997]+11" office:value-type="float" office:value="10967" calcext:value-type="float">
            <text:p>10967</text:p>
          </table:table-cell>
          <table:table-cell office:value-type="float" office:value="8640000" calcext:value-type="float">
            <text:p>8640000</text:p>
          </table:table-cell>
          <table:table-cell table:formula="of:=[.B998]/[.C998]" office:value-type="float" office:value="0.0012693287037037" calcext:value-type="float">
            <text:p>0,00126932870370370000</text:p>
          </table:table-cell>
          <table:table-cell table:formula="of:=[.D999]-[.D998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B998]+11" office:value-type="float" office:value="10978" calcext:value-type="float">
            <text:p>10978</text:p>
          </table:table-cell>
          <table:table-cell office:value-type="float" office:value="8640000" calcext:value-type="float">
            <text:p>8640000</text:p>
          </table:table-cell>
          <table:table-cell table:formula="of:=[.B999]/[.C999]" office:value-type="float" office:value="0.00127060185185185" calcext:value-type="float">
            <text:p>0,00127060185185185000</text:p>
          </table:table-cell>
          <table:table-cell table:formula="of:=[.D1000]-[.D99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B999]+11" office:value-type="float" office:value="10989" calcext:value-type="float">
            <text:p>10989</text:p>
          </table:table-cell>
          <table:table-cell office:value-type="float" office:value="8640000" calcext:value-type="float">
            <text:p>8640000</text:p>
          </table:table-cell>
          <table:table-cell table:formula="of:=[.B1000]/[.C1000]" office:value-type="float" office:value="0.001271875" calcext:value-type="float">
            <text:p>0,00127187500000000000</text:p>
          </table:table-cell>
          <table:table-cell table:formula="of:=[.D1001]-[.D100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1000]+11" office:value-type="float" office:value="11000" calcext:value-type="float">
            <text:p>11000</text:p>
          </table:table-cell>
          <table:table-cell office:value-type="float" office:value="8640000" calcext:value-type="float">
            <text:p>8640000</text:p>
          </table:table-cell>
          <table:table-cell table:formula="of:=[.B1001]/[.C1001]" office:value-type="float" office:value="0.00127314814814815" calcext:value-type="float">
            <text:p>0,00127314814814815000</text:p>
          </table:table-cell>
          <table:table-cell table:formula="of:=[.D1002]-[.D1001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[.B1001]+11" office:value-type="float" office:value="11011" calcext:value-type="float">
            <text:p>11011</text:p>
          </table:table-cell>
          <table:table-cell office:value-type="float" office:value="8640000" calcext:value-type="float">
            <text:p>8640000</text:p>
          </table:table-cell>
          <table:table-cell table:formula="of:=[.B1002]/[.C1002]" office:value-type="float" office:value="0.0012744212962963" calcext:value-type="float">
            <text:p>0,00127442129629630000</text:p>
          </table:table-cell>
          <table:table-cell table:formula="of:=[.D1003]-[.D100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[.B1002]+11" office:value-type="float" office:value="11022" calcext:value-type="float">
            <text:p>11022</text:p>
          </table:table-cell>
          <table:table-cell office:value-type="float" office:value="8640000" calcext:value-type="float">
            <text:p>8640000</text:p>
          </table:table-cell>
          <table:table-cell table:formula="of:=[.B1003]/[.C1003]" office:value-type="float" office:value="0.00127569444444444" calcext:value-type="float">
            <text:p>0,00127569444444444000</text:p>
          </table:table-cell>
          <table:table-cell table:formula="of:=[.D1004]-[.D1003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[.B1003]+11" office:value-type="float" office:value="11033" calcext:value-type="float">
            <text:p>11033</text:p>
          </table:table-cell>
          <table:table-cell office:value-type="float" office:value="8640000" calcext:value-type="float">
            <text:p>8640000</text:p>
          </table:table-cell>
          <table:table-cell table:formula="of:=[.B1004]/[.C1004]" office:value-type="float" office:value="0.00127696759259259" calcext:value-type="float">
            <text:p>0,00127696759259259000</text:p>
          </table:table-cell>
          <table:table-cell table:formula="of:=[.D1005]-[.D100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[.B1004]+11" office:value-type="float" office:value="11044" calcext:value-type="float">
            <text:p>11044</text:p>
          </table:table-cell>
          <table:table-cell office:value-type="float" office:value="8640000" calcext:value-type="float">
            <text:p>8640000</text:p>
          </table:table-cell>
          <table:table-cell table:formula="of:=[.B1005]/[.C1005]" office:value-type="float" office:value="0.00127824074074074" calcext:value-type="float">
            <text:p>0,00127824074074074000</text:p>
          </table:table-cell>
          <table:table-cell table:formula="of:=[.D1006]-[.D1005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[.B1005]+11" office:value-type="float" office:value="11055" calcext:value-type="float">
            <text:p>11055</text:p>
          </table:table-cell>
          <table:table-cell office:value-type="float" office:value="8640000" calcext:value-type="float">
            <text:p>8640000</text:p>
          </table:table-cell>
          <table:table-cell table:formula="of:=[.B1006]/[.C1006]" office:value-type="float" office:value="0.00127951388888889" calcext:value-type="float">
            <text:p>0,00127951388888889000</text:p>
          </table:table-cell>
          <table:table-cell table:formula="of:=[.D1007]-[.D100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[.B1006]+11" office:value-type="float" office:value="11066" calcext:value-type="float">
            <text:p>11066</text:p>
          </table:table-cell>
          <table:table-cell office:value-type="float" office:value="8640000" calcext:value-type="float">
            <text:p>8640000</text:p>
          </table:table-cell>
          <table:table-cell table:formula="of:=[.B1007]/[.C1007]" office:value-type="float" office:value="0.00128078703703704" calcext:value-type="float">
            <text:p>0,00128078703703704000</text:p>
          </table:table-cell>
          <table:table-cell table:formula="of:=[.D1008]-[.D1007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[.B1007]+11" office:value-type="float" office:value="11077" calcext:value-type="float">
            <text:p>11077</text:p>
          </table:table-cell>
          <table:table-cell office:value-type="float" office:value="8640000" calcext:value-type="float">
            <text:p>8640000</text:p>
          </table:table-cell>
          <table:table-cell table:formula="of:=[.B1008]/[.C1008]" office:value-type="float" office:value="0.00128206018518519" calcext:value-type="float">
            <text:p>0,00128206018518519000</text:p>
          </table:table-cell>
          <table:table-cell table:formula="of:=[.D1009]-[.D100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[.B1008]+11" office:value-type="float" office:value="11088" calcext:value-type="float">
            <text:p>11088</text:p>
          </table:table-cell>
          <table:table-cell office:value-type="float" office:value="8640000" calcext:value-type="float">
            <text:p>8640000</text:p>
          </table:table-cell>
          <table:table-cell table:formula="of:=[.B1009]/[.C1009]" office:value-type="float" office:value="0.00128333333333333" calcext:value-type="float">
            <text:p>0,00128333333333333000</text:p>
          </table:table-cell>
          <table:table-cell table:formula="of:=[.D1010]-[.D1009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[.B1009]+11" office:value-type="float" office:value="11099" calcext:value-type="float">
            <text:p>11099</text:p>
          </table:table-cell>
          <table:table-cell office:value-type="float" office:value="8640000" calcext:value-type="float">
            <text:p>8640000</text:p>
          </table:table-cell>
          <table:table-cell table:formula="of:=[.B1010]/[.C1010]" office:value-type="float" office:value="0.00128460648148148" calcext:value-type="float">
            <text:p>0,00128460648148148000</text:p>
          </table:table-cell>
          <table:table-cell table:formula="of:=[.D1011]-[.D101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.B1010]+11" office:value-type="float" office:value="11110" calcext:value-type="float">
            <text:p>11110</text:p>
          </table:table-cell>
          <table:table-cell office:value-type="float" office:value="8640000" calcext:value-type="float">
            <text:p>8640000</text:p>
          </table:table-cell>
          <table:table-cell table:formula="of:=[.B1011]/[.C1011]" office:value-type="float" office:value="0.00128587962962963" calcext:value-type="float">
            <text:p>0,00128587962962963000</text:p>
          </table:table-cell>
          <table:table-cell table:formula="of:=[.D1012]-[.D1011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[.B1011]+11" office:value-type="float" office:value="11121" calcext:value-type="float">
            <text:p>11121</text:p>
          </table:table-cell>
          <table:table-cell office:value-type="float" office:value="8640000" calcext:value-type="float">
            <text:p>8640000</text:p>
          </table:table-cell>
          <table:table-cell table:formula="of:=[.B1012]/[.C1012]" office:value-type="float" office:value="0.00128715277777778" calcext:value-type="float">
            <text:p>0,00128715277777778000</text:p>
          </table:table-cell>
          <table:table-cell table:formula="of:=[.D1013]-[.D101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[.B1012]+11" office:value-type="float" office:value="11132" calcext:value-type="float">
            <text:p>11132</text:p>
          </table:table-cell>
          <table:table-cell office:value-type="float" office:value="8640000" calcext:value-type="float">
            <text:p>8640000</text:p>
          </table:table-cell>
          <table:table-cell table:formula="of:=[.B1013]/[.C1013]" office:value-type="float" office:value="0.00128842592592593" calcext:value-type="float">
            <text:p>0,00128842592592593000</text:p>
          </table:table-cell>
          <table:table-cell table:formula="of:=[.D1014]-[.D1013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[.B1013]+11" office:value-type="float" office:value="11143" calcext:value-type="float">
            <text:p>11143</text:p>
          </table:table-cell>
          <table:table-cell office:value-type="float" office:value="8640000" calcext:value-type="float">
            <text:p>8640000</text:p>
          </table:table-cell>
          <table:table-cell table:formula="of:=[.B1014]/[.C1014]" office:value-type="float" office:value="0.00128969907407407" calcext:value-type="float">
            <text:p>0,00128969907407407000</text:p>
          </table:table-cell>
          <table:table-cell table:formula="of:=[.D1015]-[.D101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[.B1014]+11" office:value-type="float" office:value="11154" calcext:value-type="float">
            <text:p>11154</text:p>
          </table:table-cell>
          <table:table-cell office:value-type="float" office:value="8640000" calcext:value-type="float">
            <text:p>8640000</text:p>
          </table:table-cell>
          <table:table-cell table:formula="of:=[.B1015]/[.C1015]" office:value-type="float" office:value="0.00129097222222222" calcext:value-type="float">
            <text:p>0,00129097222222222000</text:p>
          </table:table-cell>
          <table:table-cell table:formula="of:=[.D1016]-[.D101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[.B1015]+11" office:value-type="float" office:value="11165" calcext:value-type="float">
            <text:p>11165</text:p>
          </table:table-cell>
          <table:table-cell office:value-type="float" office:value="8640000" calcext:value-type="float">
            <text:p>8640000</text:p>
          </table:table-cell>
          <table:table-cell table:formula="of:=[.B1016]/[.C1016]" office:value-type="float" office:value="0.00129224537037037" calcext:value-type="float">
            <text:p>0,00129224537037037000</text:p>
          </table:table-cell>
          <table:table-cell table:formula="of:=[.D1017]-[.D1016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[.B1016]+11" office:value-type="float" office:value="11176" calcext:value-type="float">
            <text:p>11176</text:p>
          </table:table-cell>
          <table:table-cell office:value-type="float" office:value="8640000" calcext:value-type="float">
            <text:p>8640000</text:p>
          </table:table-cell>
          <table:table-cell table:formula="of:=[.B1017]/[.C1017]" office:value-type="float" office:value="0.00129351851851852" calcext:value-type="float">
            <text:p>0,00129351851851852000</text:p>
          </table:table-cell>
          <table:table-cell table:formula="of:=[.D1018]-[.D101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[.B1017]+11" office:value-type="float" office:value="11187" calcext:value-type="float">
            <text:p>11187</text:p>
          </table:table-cell>
          <table:table-cell office:value-type="float" office:value="8640000" calcext:value-type="float">
            <text:p>8640000</text:p>
          </table:table-cell>
          <table:table-cell table:formula="of:=[.B1018]/[.C1018]" office:value-type="float" office:value="0.00129479166666667" calcext:value-type="float">
            <text:p>0,00129479166666667000</text:p>
          </table:table-cell>
          <table:table-cell table:formula="of:=[.D1019]-[.D1018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[.B1018]+11" office:value-type="float" office:value="11198" calcext:value-type="float">
            <text:p>11198</text:p>
          </table:table-cell>
          <table:table-cell office:value-type="float" office:value="8640000" calcext:value-type="float">
            <text:p>8640000</text:p>
          </table:table-cell>
          <table:table-cell table:formula="of:=[.B1019]/[.C1019]" office:value-type="float" office:value="0.00129606481481481" calcext:value-type="float">
            <text:p>0,00129606481481481000</text:p>
          </table:table-cell>
          <table:table-cell table:formula="of:=[.D1020]-[.D101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[.B1019]+11" office:value-type="float" office:value="11209" calcext:value-type="float">
            <text:p>11209</text:p>
          </table:table-cell>
          <table:table-cell office:value-type="float" office:value="8640000" calcext:value-type="float">
            <text:p>8640000</text:p>
          </table:table-cell>
          <table:table-cell table:formula="of:=[.B1020]/[.C1020]" office:value-type="float" office:value="0.00129733796296296" calcext:value-type="float">
            <text:p>0,00129733796296296000</text:p>
          </table:table-cell>
          <table:table-cell table:formula="of:=[.D1021]-[.D1020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[.B1020]+11" office:value-type="float" office:value="11220" calcext:value-type="float">
            <text:p>11220</text:p>
          </table:table-cell>
          <table:table-cell office:value-type="float" office:value="8640000" calcext:value-type="float">
            <text:p>8640000</text:p>
          </table:table-cell>
          <table:table-cell table:formula="of:=[.B1021]/[.C1021]" office:value-type="float" office:value="0.00129861111111111" calcext:value-type="float">
            <text:p>0,00129861111111111000</text:p>
          </table:table-cell>
          <table:table-cell table:formula="of:=[.D1022]-[.D102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[.B1021]+11" office:value-type="float" office:value="11231" calcext:value-type="float">
            <text:p>11231</text:p>
          </table:table-cell>
          <table:table-cell office:value-type="float" office:value="8640000" calcext:value-type="float">
            <text:p>8640000</text:p>
          </table:table-cell>
          <table:table-cell table:formula="of:=[.B1022]/[.C1022]" office:value-type="float" office:value="0.00129988425925926" calcext:value-type="float">
            <text:p>0,00129988425925926000</text:p>
          </table:table-cell>
          <table:table-cell table:formula="of:=[.D1023]-[.D1022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[.B1022]+11" office:value-type="float" office:value="11242" calcext:value-type="float">
            <text:p>11242</text:p>
          </table:table-cell>
          <table:table-cell office:value-type="float" office:value="8640000" calcext:value-type="float">
            <text:p>8640000</text:p>
          </table:table-cell>
          <table:table-cell table:formula="of:=[.B1023]/[.C1023]" office:value-type="float" office:value="0.00130115740740741" calcext:value-type="float">
            <text:p>0,00130115740740741000</text:p>
          </table:table-cell>
          <table:table-cell table:formula="of:=[.D1024]-[.D102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[.B1023]+11" office:value-type="float" office:value="11253" calcext:value-type="float">
            <text:p>11253</text:p>
          </table:table-cell>
          <table:table-cell office:value-type="float" office:value="8640000" calcext:value-type="float">
            <text:p>8640000</text:p>
          </table:table-cell>
          <table:table-cell table:formula="of:=[.B1024]/[.C1024]" office:value-type="float" office:value="0.00130243055555556" calcext:value-type="float">
            <text:p>0,00130243055555556000</text:p>
          </table:table-cell>
          <table:table-cell table:formula="of:=[.D1025]-[.D1024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B1024]+11" office:value-type="float" office:value="11264" calcext:value-type="float">
            <text:p>11264</text:p>
          </table:table-cell>
          <table:table-cell office:value-type="float" office:value="8640000" calcext:value-type="float">
            <text:p>8640000</text:p>
          </table:table-cell>
          <table:table-cell table:formula="of:=[.B1025]/[.C1025]" office:value-type="float" office:value="0.0013037037037037" calcext:value-type="float">
            <text:p>0,00130370370370370000</text:p>
          </table:table-cell>
          <table:table-cell table:formula="of:=[.D1026]-[.D102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[.B1025]+11" office:value-type="float" office:value="11275" calcext:value-type="float">
            <text:p>11275</text:p>
          </table:table-cell>
          <table:table-cell office:value-type="float" office:value="8640000" calcext:value-type="float">
            <text:p>8640000</text:p>
          </table:table-cell>
          <table:table-cell table:formula="of:=[.B1026]/[.C1026]" office:value-type="float" office:value="0.00130497685185185" calcext:value-type="float">
            <text:p>0,00130497685185185000</text:p>
          </table:table-cell>
          <table:table-cell table:formula="of:=[.D1027]-[.D1026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table:formula="of:=[.B1026]+11" office:value-type="float" office:value="11286" calcext:value-type="float">
            <text:p>11286</text:p>
          </table:table-cell>
          <table:table-cell office:value-type="float" office:value="8640000" calcext:value-type="float">
            <text:p>8640000</text:p>
          </table:table-cell>
          <table:table-cell table:formula="of:=[.B1027]/[.C1027]" office:value-type="float" office:value="0.00130625" calcext:value-type="float">
            <text:p>0,00130625000000000000</text:p>
          </table:table-cell>
          <table:table-cell table:formula="of:=[.D1028]-[.D102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table:formula="of:=[.B1027]+11" office:value-type="float" office:value="11297" calcext:value-type="float">
            <text:p>11297</text:p>
          </table:table-cell>
          <table:table-cell office:value-type="float" office:value="8640000" calcext:value-type="float">
            <text:p>8640000</text:p>
          </table:table-cell>
          <table:table-cell table:formula="of:=[.B1028]/[.C1028]" office:value-type="float" office:value="0.00130752314814815" calcext:value-type="float">
            <text:p>0,00130752314814815000</text:p>
          </table:table-cell>
          <table:table-cell table:formula="of:=[.D1029]-[.D102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table:formula="of:=[.B1028]+11" office:value-type="float" office:value="11308" calcext:value-type="float">
            <text:p>11308</text:p>
          </table:table-cell>
          <table:table-cell office:value-type="float" office:value="8640000" calcext:value-type="float">
            <text:p>8640000</text:p>
          </table:table-cell>
          <table:table-cell table:formula="of:=[.B1029]/[.C1029]" office:value-type="float" office:value="0.0013087962962963" calcext:value-type="float">
            <text:p>0,00130879629629630000</text:p>
          </table:table-cell>
          <table:table-cell table:formula="of:=[.D1030]-[.D1029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[.B1029]+11" office:value-type="float" office:value="11319" calcext:value-type="float">
            <text:p>11319</text:p>
          </table:table-cell>
          <table:table-cell office:value-type="float" office:value="8640000" calcext:value-type="float">
            <text:p>8640000</text:p>
          </table:table-cell>
          <table:table-cell table:formula="of:=[.B1030]/[.C1030]" office:value-type="float" office:value="0.00131006944444444" calcext:value-type="float">
            <text:p>0,00131006944444444000</text:p>
          </table:table-cell>
          <table:table-cell table:formula="of:=[.D1031]-[.D103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[.B1030]+11" office:value-type="float" office:value="11330" calcext:value-type="float">
            <text:p>11330</text:p>
          </table:table-cell>
          <table:table-cell office:value-type="float" office:value="8640000" calcext:value-type="float">
            <text:p>8640000</text:p>
          </table:table-cell>
          <table:table-cell table:formula="of:=[.B1031]/[.C1031]" office:value-type="float" office:value="0.00131134259259259" calcext:value-type="float">
            <text:p>0,00131134259259259000</text:p>
          </table:table-cell>
          <table:table-cell table:formula="of:=[.D1032]-[.D1031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[.B1031]+11" office:value-type="float" office:value="11341" calcext:value-type="float">
            <text:p>11341</text:p>
          </table:table-cell>
          <table:table-cell office:value-type="float" office:value="8640000" calcext:value-type="float">
            <text:p>8640000</text:p>
          </table:table-cell>
          <table:table-cell table:formula="of:=[.B1032]/[.C1032]" office:value-type="float" office:value="0.00131261574074074" calcext:value-type="float">
            <text:p>0,00131261574074074000</text:p>
          </table:table-cell>
          <table:table-cell table:formula="of:=[.D1033]-[.D103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table:formula="of:=[.B1032]+11" office:value-type="float" office:value="11352" calcext:value-type="float">
            <text:p>11352</text:p>
          </table:table-cell>
          <table:table-cell office:value-type="float" office:value="8640000" calcext:value-type="float">
            <text:p>8640000</text:p>
          </table:table-cell>
          <table:table-cell table:formula="of:=[.B1033]/[.C1033]" office:value-type="float" office:value="0.00131388888888889" calcext:value-type="float">
            <text:p>0,00131388888888889000</text:p>
          </table:table-cell>
          <table:table-cell table:formula="of:=[.D1034]-[.D1033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[.B1033]+11" office:value-type="float" office:value="11363" calcext:value-type="float">
            <text:p>11363</text:p>
          </table:table-cell>
          <table:table-cell office:value-type="float" office:value="8640000" calcext:value-type="float">
            <text:p>8640000</text:p>
          </table:table-cell>
          <table:table-cell table:formula="of:=[.B1034]/[.C1034]" office:value-type="float" office:value="0.00131516203703704" calcext:value-type="float">
            <text:p>0,00131516203703704000</text:p>
          </table:table-cell>
          <table:table-cell table:formula="of:=[.D1035]-[.D103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table:formula="of:=[.B1034]+11" office:value-type="float" office:value="11374" calcext:value-type="float">
            <text:p>11374</text:p>
          </table:table-cell>
          <table:table-cell office:value-type="float" office:value="8640000" calcext:value-type="float">
            <text:p>8640000</text:p>
          </table:table-cell>
          <table:table-cell table:formula="of:=[.B1035]/[.C1035]" office:value-type="float" office:value="0.00131643518518519" calcext:value-type="float">
            <text:p>0,00131643518518519000</text:p>
          </table:table-cell>
          <table:table-cell table:formula="of:=[.D1036]-[.D1035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[.B1035]+11" office:value-type="float" office:value="11385" calcext:value-type="float">
            <text:p>11385</text:p>
          </table:table-cell>
          <table:table-cell office:value-type="float" office:value="8640000" calcext:value-type="float">
            <text:p>8640000</text:p>
          </table:table-cell>
          <table:table-cell table:formula="of:=[.B1036]/[.C1036]" office:value-type="float" office:value="0.00131770833333333" calcext:value-type="float">
            <text:p>0,00131770833333333000</text:p>
          </table:table-cell>
          <table:table-cell table:formula="of:=[.D1037]-[.D103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[.B1036]+11" office:value-type="float" office:value="11396" calcext:value-type="float">
            <text:p>11396</text:p>
          </table:table-cell>
          <table:table-cell office:value-type="float" office:value="8640000" calcext:value-type="float">
            <text:p>8640000</text:p>
          </table:table-cell>
          <table:table-cell table:formula="of:=[.B1037]/[.C1037]" office:value-type="float" office:value="0.00131898148148148" calcext:value-type="float">
            <text:p>0,00131898148148148000</text:p>
          </table:table-cell>
          <table:table-cell table:formula="of:=[.D1038]-[.D1037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table:formula="of:=[.B1037]+11" office:value-type="float" office:value="11407" calcext:value-type="float">
            <text:p>11407</text:p>
          </table:table-cell>
          <table:table-cell office:value-type="float" office:value="8640000" calcext:value-type="float">
            <text:p>8640000</text:p>
          </table:table-cell>
          <table:table-cell table:formula="of:=[.B1038]/[.C1038]" office:value-type="float" office:value="0.00132025462962963" calcext:value-type="float">
            <text:p>0,00132025462962963000</text:p>
          </table:table-cell>
          <table:table-cell table:formula="of:=[.D1039]-[.D103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table:formula="of:=[.B1038]+11" office:value-type="float" office:value="11418" calcext:value-type="float">
            <text:p>11418</text:p>
          </table:table-cell>
          <table:table-cell office:value-type="float" office:value="8640000" calcext:value-type="float">
            <text:p>8640000</text:p>
          </table:table-cell>
          <table:table-cell table:formula="of:=[.B1039]/[.C1039]" office:value-type="float" office:value="0.00132152777777778" calcext:value-type="float">
            <text:p>0,00132152777777778000</text:p>
          </table:table-cell>
          <table:table-cell table:formula="of:=[.D1040]-[.D1039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[.B1039]+11" office:value-type="float" office:value="11429" calcext:value-type="float">
            <text:p>11429</text:p>
          </table:table-cell>
          <table:table-cell office:value-type="float" office:value="8640000" calcext:value-type="float">
            <text:p>8640000</text:p>
          </table:table-cell>
          <table:table-cell table:formula="of:=[.B1040]/[.C1040]" office:value-type="float" office:value="0.00132280092592593" calcext:value-type="float">
            <text:p>0,00132280092592593000</text:p>
          </table:table-cell>
          <table:table-cell table:formula="of:=[.D1041]-[.D104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[.B1040]+11" office:value-type="float" office:value="11440" calcext:value-type="float">
            <text:p>11440</text:p>
          </table:table-cell>
          <table:table-cell office:value-type="float" office:value="8640000" calcext:value-type="float">
            <text:p>8640000</text:p>
          </table:table-cell>
          <table:table-cell table:formula="of:=[.B1041]/[.C1041]" office:value-type="float" office:value="0.00132407407407407" calcext:value-type="float">
            <text:p>0,00132407407407407000</text:p>
          </table:table-cell>
          <table:table-cell table:formula="of:=[.D1042]-[.D1041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table:formula="of:=[.B1041]+11" office:value-type="float" office:value="11451" calcext:value-type="float">
            <text:p>11451</text:p>
          </table:table-cell>
          <table:table-cell office:value-type="float" office:value="8640000" calcext:value-type="float">
            <text:p>8640000</text:p>
          </table:table-cell>
          <table:table-cell table:formula="of:=[.B1042]/[.C1042]" office:value-type="float" office:value="0.00132534722222222" calcext:value-type="float">
            <text:p>0,00132534722222222000</text:p>
          </table:table-cell>
          <table:table-cell table:formula="of:=[.D1043]-[.D104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table:formula="of:=[.B1042]+11" office:value-type="float" office:value="11462" calcext:value-type="float">
            <text:p>11462</text:p>
          </table:table-cell>
          <table:table-cell office:value-type="float" office:value="8640000" calcext:value-type="float">
            <text:p>8640000</text:p>
          </table:table-cell>
          <table:table-cell table:formula="of:=[.B1043]/[.C1043]" office:value-type="float" office:value="0.00132662037037037" calcext:value-type="float">
            <text:p>0,00132662037037037000</text:p>
          </table:table-cell>
          <table:table-cell table:formula="of:=[.D1044]-[.D104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table:formula="of:=[.B1043]+11" office:value-type="float" office:value="11473" calcext:value-type="float">
            <text:p>11473</text:p>
          </table:table-cell>
          <table:table-cell office:value-type="float" office:value="8640000" calcext:value-type="float">
            <text:p>8640000</text:p>
          </table:table-cell>
          <table:table-cell table:formula="of:=[.B1044]/[.C1044]" office:value-type="float" office:value="0.00132789351851852" calcext:value-type="float">
            <text:p>0,00132789351851852000</text:p>
          </table:table-cell>
          <table:table-cell table:formula="of:=[.D1045]-[.D1044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table:formula="of:=[.B1044]+11" office:value-type="float" office:value="11484" calcext:value-type="float">
            <text:p>11484</text:p>
          </table:table-cell>
          <table:table-cell office:value-type="float" office:value="8640000" calcext:value-type="float">
            <text:p>8640000</text:p>
          </table:table-cell>
          <table:table-cell table:formula="of:=[.B1045]/[.C1045]" office:value-type="float" office:value="0.00132916666666667" calcext:value-type="float">
            <text:p>0,00132916666666667000</text:p>
          </table:table-cell>
          <table:table-cell table:formula="of:=[.D1046]-[.D104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table:formula="of:=[.B1045]+11" office:value-type="float" office:value="11495" calcext:value-type="float">
            <text:p>11495</text:p>
          </table:table-cell>
          <table:table-cell office:value-type="float" office:value="8640000" calcext:value-type="float">
            <text:p>8640000</text:p>
          </table:table-cell>
          <table:table-cell table:formula="of:=[.B1046]/[.C1046]" office:value-type="float" office:value="0.00133043981481482" calcext:value-type="float">
            <text:p>0,00133043981481482000</text:p>
          </table:table-cell>
          <table:table-cell table:formula="of:=[.D1047]-[.D1046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[.B1046]+11" office:value-type="float" office:value="11506" calcext:value-type="float">
            <text:p>11506</text:p>
          </table:table-cell>
          <table:table-cell office:value-type="float" office:value="8640000" calcext:value-type="float">
            <text:p>8640000</text:p>
          </table:table-cell>
          <table:table-cell table:formula="of:=[.B1047]/[.C1047]" office:value-type="float" office:value="0.00133171296296296" calcext:value-type="float">
            <text:p>0,00133171296296296000</text:p>
          </table:table-cell>
          <table:table-cell table:formula="of:=[.D1048]-[.D104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table:formula="of:=[.B1047]+11" office:value-type="float" office:value="11517" calcext:value-type="float">
            <text:p>11517</text:p>
          </table:table-cell>
          <table:table-cell office:value-type="float" office:value="8640000" calcext:value-type="float">
            <text:p>8640000</text:p>
          </table:table-cell>
          <table:table-cell table:formula="of:=[.B1048]/[.C1048]" office:value-type="float" office:value="0.00133298611111111" calcext:value-type="float">
            <text:p>0,00133298611111111000</text:p>
          </table:table-cell>
          <table:table-cell table:formula="of:=[.D1049]-[.D1048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table:formula="of:=[.B1048]+11" office:value-type="float" office:value="11528" calcext:value-type="float">
            <text:p>11528</text:p>
          </table:table-cell>
          <table:table-cell office:value-type="float" office:value="8640000" calcext:value-type="float">
            <text:p>8640000</text:p>
          </table:table-cell>
          <table:table-cell table:formula="of:=[.B1049]/[.C1049]" office:value-type="float" office:value="0.00133425925925926" calcext:value-type="float">
            <text:p>0,00133425925925926000</text:p>
          </table:table-cell>
          <table:table-cell table:formula="of:=[.D1050]-[.D104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table:formula="of:=[.B1049]+11" office:value-type="float" office:value="11539" calcext:value-type="float">
            <text:p>11539</text:p>
          </table:table-cell>
          <table:table-cell office:value-type="float" office:value="8640000" calcext:value-type="float">
            <text:p>8640000</text:p>
          </table:table-cell>
          <table:table-cell table:formula="of:=[.B1050]/[.C1050]" office:value-type="float" office:value="0.00133553240740741" calcext:value-type="float">
            <text:p>0,00133553240740741000</text:p>
          </table:table-cell>
          <table:table-cell table:formula="of:=[.D1051]-[.D1050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[.B1050]+11" office:value-type="float" office:value="11550" calcext:value-type="float">
            <text:p>11550</text:p>
          </table:table-cell>
          <table:table-cell office:value-type="float" office:value="8640000" calcext:value-type="float">
            <text:p>8640000</text:p>
          </table:table-cell>
          <table:table-cell table:formula="of:=[.B1051]/[.C1051]" office:value-type="float" office:value="0.00133680555555556" calcext:value-type="float">
            <text:p>0,00133680555555556000</text:p>
          </table:table-cell>
          <table:table-cell table:formula="of:=[.D1052]-[.D105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table:formula="of:=[.B1051]+11" office:value-type="float" office:value="11561" calcext:value-type="float">
            <text:p>11561</text:p>
          </table:table-cell>
          <table:table-cell office:value-type="float" office:value="8640000" calcext:value-type="float">
            <text:p>8640000</text:p>
          </table:table-cell>
          <table:table-cell table:formula="of:=[.B1052]/[.C1052]" office:value-type="float" office:value="0.0013380787037037" calcext:value-type="float">
            <text:p>0,00133807870370370000</text:p>
          </table:table-cell>
          <table:table-cell table:formula="of:=[.D1053]-[.D1052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table:formula="of:=[.B1052]+11" office:value-type="float" office:value="11572" calcext:value-type="float">
            <text:p>11572</text:p>
          </table:table-cell>
          <table:table-cell office:value-type="float" office:value="8640000" calcext:value-type="float">
            <text:p>8640000</text:p>
          </table:table-cell>
          <table:table-cell table:formula="of:=[.B1053]/[.C1053]" office:value-type="float" office:value="0.00133935185185185" calcext:value-type="float">
            <text:p>0,00133935185185185000</text:p>
          </table:table-cell>
          <table:table-cell table:formula="of:=[.D1054]-[.D105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table:formula="of:=[.B1053]+11" office:value-type="float" office:value="11583" calcext:value-type="float">
            <text:p>11583</text:p>
          </table:table-cell>
          <table:table-cell office:value-type="float" office:value="8640000" calcext:value-type="float">
            <text:p>8640000</text:p>
          </table:table-cell>
          <table:table-cell table:formula="of:=[.B1054]/[.C1054]" office:value-type="float" office:value="0.001340625" calcext:value-type="float">
            <text:p>0,00134062500000000000</text:p>
          </table:table-cell>
          <table:table-cell table:formula="of:=[.D1055]-[.D1054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table:formula="of:=[.B1054]+11" office:value-type="float" office:value="11594" calcext:value-type="float">
            <text:p>11594</text:p>
          </table:table-cell>
          <table:table-cell office:value-type="float" office:value="8640000" calcext:value-type="float">
            <text:p>8640000</text:p>
          </table:table-cell>
          <table:table-cell table:formula="of:=[.B1055]/[.C1055]" office:value-type="float" office:value="0.00134189814814815" calcext:value-type="float">
            <text:p>0,00134189814814815000</text:p>
          </table:table-cell>
          <table:table-cell table:formula="of:=[.D1056]-[.D105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[.B1055]+11" office:value-type="float" office:value="11605" calcext:value-type="float">
            <text:p>11605</text:p>
          </table:table-cell>
          <table:table-cell office:value-type="float" office:value="8640000" calcext:value-type="float">
            <text:p>8640000</text:p>
          </table:table-cell>
          <table:table-cell table:formula="of:=[.B1056]/[.C1056]" office:value-type="float" office:value="0.0013431712962963" calcext:value-type="float">
            <text:p>0,00134317129629630000</text:p>
          </table:table-cell>
          <table:table-cell table:formula="of:=[.D1057]-[.D105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[.B1056]+11" office:value-type="float" office:value="11616" calcext:value-type="float">
            <text:p>11616</text:p>
          </table:table-cell>
          <table:table-cell office:value-type="float" office:value="8640000" calcext:value-type="float">
            <text:p>8640000</text:p>
          </table:table-cell>
          <table:table-cell table:formula="of:=[.B1057]/[.C1057]" office:value-type="float" office:value="0.00134444444444444" calcext:value-type="float">
            <text:p>0,00134444444444444000</text:p>
          </table:table-cell>
          <table:table-cell table:formula="of:=[.D1058]-[.D1057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[.B1057]+11" office:value-type="float" office:value="11627" calcext:value-type="float">
            <text:p>11627</text:p>
          </table:table-cell>
          <table:table-cell office:value-type="float" office:value="8640000" calcext:value-type="float">
            <text:p>8640000</text:p>
          </table:table-cell>
          <table:table-cell table:formula="of:=[.B1058]/[.C1058]" office:value-type="float" office:value="0.00134571759259259" calcext:value-type="float">
            <text:p>0,00134571759259259000</text:p>
          </table:table-cell>
          <table:table-cell table:formula="of:=[.D1059]-[.D105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table:formula="of:=[.B1058]+11" office:value-type="float" office:value="11638" calcext:value-type="float">
            <text:p>11638</text:p>
          </table:table-cell>
          <table:table-cell office:value-type="float" office:value="8640000" calcext:value-type="float">
            <text:p>8640000</text:p>
          </table:table-cell>
          <table:table-cell table:formula="of:=[.B1059]/[.C1059]" office:value-type="float" office:value="0.00134699074074074" calcext:value-type="float">
            <text:p>0,00134699074074074000</text:p>
          </table:table-cell>
          <table:table-cell table:formula="of:=[.D1060]-[.D1059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table:formula="of:=[.B1059]+11" office:value-type="float" office:value="11649" calcext:value-type="float">
            <text:p>11649</text:p>
          </table:table-cell>
          <table:table-cell office:value-type="float" office:value="8640000" calcext:value-type="float">
            <text:p>8640000</text:p>
          </table:table-cell>
          <table:table-cell table:formula="of:=[.B1060]/[.C1060]" office:value-type="float" office:value="0.00134826388888889" calcext:value-type="float">
            <text:p>0,00134826388888889000</text:p>
          </table:table-cell>
          <table:table-cell table:formula="of:=[.D1061]-[.D106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[.B1060]+11" office:value-type="float" office:value="11660" calcext:value-type="float">
            <text:p>11660</text:p>
          </table:table-cell>
          <table:table-cell office:value-type="float" office:value="8640000" calcext:value-type="float">
            <text:p>8640000</text:p>
          </table:table-cell>
          <table:table-cell table:formula="of:=[.B1061]/[.C1061]" office:value-type="float" office:value="0.00134953703703704" calcext:value-type="float">
            <text:p>0,00134953703703704000</text:p>
          </table:table-cell>
          <table:table-cell table:formula="of:=[.D1062]-[.D1061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[.B1061]+11" office:value-type="float" office:value="11671" calcext:value-type="float">
            <text:p>11671</text:p>
          </table:table-cell>
          <table:table-cell office:value-type="float" office:value="8640000" calcext:value-type="float">
            <text:p>8640000</text:p>
          </table:table-cell>
          <table:table-cell table:formula="of:=[.B1062]/[.C1062]" office:value-type="float" office:value="0.00135081018518519" calcext:value-type="float">
            <text:p>0,00135081018518519000</text:p>
          </table:table-cell>
          <table:table-cell table:formula="of:=[.D1063]-[.D106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[.B1062]+11" office:value-type="float" office:value="11682" calcext:value-type="float">
            <text:p>11682</text:p>
          </table:table-cell>
          <table:table-cell office:value-type="float" office:value="8640000" calcext:value-type="float">
            <text:p>8640000</text:p>
          </table:table-cell>
          <table:table-cell table:formula="of:=[.B1063]/[.C1063]" office:value-type="float" office:value="0.00135208333333333" calcext:value-type="float">
            <text:p>0,00135208333333333000</text:p>
          </table:table-cell>
          <table:table-cell table:formula="of:=[.D1064]-[.D1063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[.B1063]+11" office:value-type="float" office:value="11693" calcext:value-type="float">
            <text:p>11693</text:p>
          </table:table-cell>
          <table:table-cell office:value-type="float" office:value="8640000" calcext:value-type="float">
            <text:p>8640000</text:p>
          </table:table-cell>
          <table:table-cell table:formula="of:=[.B1064]/[.C1064]" office:value-type="float" office:value="0.00135335648148148" calcext:value-type="float">
            <text:p>0,00135335648148148000</text:p>
          </table:table-cell>
          <table:table-cell table:formula="of:=[.D1065]-[.D106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[.B1064]+11" office:value-type="float" office:value="11704" calcext:value-type="float">
            <text:p>11704</text:p>
          </table:table-cell>
          <table:table-cell office:value-type="float" office:value="8640000" calcext:value-type="float">
            <text:p>8640000</text:p>
          </table:table-cell>
          <table:table-cell table:formula="of:=[.B1065]/[.C1065]" office:value-type="float" office:value="0.00135462962962963" calcext:value-type="float">
            <text:p>0,00135462962962963000</text:p>
          </table:table-cell>
          <table:table-cell table:formula="of:=[.D1066]-[.D1065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[.B1065]+11" office:value-type="float" office:value="11715" calcext:value-type="float">
            <text:p>11715</text:p>
          </table:table-cell>
          <table:table-cell office:value-type="float" office:value="8640000" calcext:value-type="float">
            <text:p>8640000</text:p>
          </table:table-cell>
          <table:table-cell table:formula="of:=[.B1066]/[.C1066]" office:value-type="float" office:value="0.00135590277777778" calcext:value-type="float">
            <text:p>0,00135590277777778000</text:p>
          </table:table-cell>
          <table:table-cell table:formula="of:=[.D1067]-[.D106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[.B1066]+11" office:value-type="float" office:value="11726" calcext:value-type="float">
            <text:p>11726</text:p>
          </table:table-cell>
          <table:table-cell office:value-type="float" office:value="8640000" calcext:value-type="float">
            <text:p>8640000</text:p>
          </table:table-cell>
          <table:table-cell table:formula="of:=[.B1067]/[.C1067]" office:value-type="float" office:value="0.00135717592592593" calcext:value-type="float">
            <text:p>0,00135717592592593000</text:p>
          </table:table-cell>
          <table:table-cell table:formula="of:=[.D1068]-[.D1067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[.B1067]+11" office:value-type="float" office:value="11737" calcext:value-type="float">
            <text:p>11737</text:p>
          </table:table-cell>
          <table:table-cell office:value-type="float" office:value="8640000" calcext:value-type="float">
            <text:p>8640000</text:p>
          </table:table-cell>
          <table:table-cell table:formula="of:=[.B1068]/[.C1068]" office:value-type="float" office:value="0.00135844907407407" calcext:value-type="float">
            <text:p>0,00135844907407407000</text:p>
          </table:table-cell>
          <table:table-cell table:formula="of:=[.D1069]-[.D106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[.B1068]+11" office:value-type="float" office:value="11748" calcext:value-type="float">
            <text:p>11748</text:p>
          </table:table-cell>
          <table:table-cell office:value-type="float" office:value="8640000" calcext:value-type="float">
            <text:p>8640000</text:p>
          </table:table-cell>
          <table:table-cell table:formula="of:=[.B1069]/[.C1069]" office:value-type="float" office:value="0.00135972222222222" calcext:value-type="float">
            <text:p>0,00135972222222222000</text:p>
          </table:table-cell>
          <table:table-cell table:formula="of:=[.D1070]-[.D1069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[.B1069]+11" office:value-type="float" office:value="11759" calcext:value-type="float">
            <text:p>11759</text:p>
          </table:table-cell>
          <table:table-cell office:value-type="float" office:value="8640000" calcext:value-type="float">
            <text:p>8640000</text:p>
          </table:table-cell>
          <table:table-cell table:formula="of:=[.B1070]/[.C1070]" office:value-type="float" office:value="0.00136099537037037" calcext:value-type="float">
            <text:p>0,00136099537037037000</text:p>
          </table:table-cell>
          <table:table-cell table:formula="of:=[.D1071]-[.D107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[.B1070]+11" office:value-type="float" office:value="11770" calcext:value-type="float">
            <text:p>11770</text:p>
          </table:table-cell>
          <table:table-cell office:value-type="float" office:value="8640000" calcext:value-type="float">
            <text:p>8640000</text:p>
          </table:table-cell>
          <table:table-cell table:formula="of:=[.B1071]/[.C1071]" office:value-type="float" office:value="0.00136226851851852" calcext:value-type="float">
            <text:p>0,00136226851851852000</text:p>
          </table:table-cell>
          <table:table-cell table:formula="of:=[.D1072]-[.D107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table:formula="of:=[.B1071]+11" office:value-type="float" office:value="11781" calcext:value-type="float">
            <text:p>11781</text:p>
          </table:table-cell>
          <table:table-cell office:value-type="float" office:value="8640000" calcext:value-type="float">
            <text:p>8640000</text:p>
          </table:table-cell>
          <table:table-cell table:formula="of:=[.B1072]/[.C1072]" office:value-type="float" office:value="0.00136354166666667" calcext:value-type="float">
            <text:p>0,00136354166666667000</text:p>
          </table:table-cell>
          <table:table-cell table:formula="of:=[.D1073]-[.D1072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table:formula="of:=[.B1072]+11" office:value-type="float" office:value="11792" calcext:value-type="float">
            <text:p>11792</text:p>
          </table:table-cell>
          <table:table-cell office:value-type="float" office:value="8640000" calcext:value-type="float">
            <text:p>8640000</text:p>
          </table:table-cell>
          <table:table-cell table:formula="of:=[.B1073]/[.C1073]" office:value-type="float" office:value="0.00136481481481481" calcext:value-type="float">
            <text:p>0,00136481481481481000</text:p>
          </table:table-cell>
          <table:table-cell table:formula="of:=[.D1074]-[.D107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table:formula="of:=[.B1073]+11" office:value-type="float" office:value="11803" calcext:value-type="float">
            <text:p>11803</text:p>
          </table:table-cell>
          <table:table-cell office:value-type="float" office:value="8640000" calcext:value-type="float">
            <text:p>8640000</text:p>
          </table:table-cell>
          <table:table-cell table:formula="of:=[.B1074]/[.C1074]" office:value-type="float" office:value="0.00136608796296296" calcext:value-type="float">
            <text:p>0,00136608796296296000</text:p>
          </table:table-cell>
          <table:table-cell table:formula="of:=[.D1075]-[.D1074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table:formula="of:=[.B1074]+11" office:value-type="float" office:value="11814" calcext:value-type="float">
            <text:p>11814</text:p>
          </table:table-cell>
          <table:table-cell office:value-type="float" office:value="8640000" calcext:value-type="float">
            <text:p>8640000</text:p>
          </table:table-cell>
          <table:table-cell table:formula="of:=[.B1075]/[.C1075]" office:value-type="float" office:value="0.00136736111111111" calcext:value-type="float">
            <text:p>0,00136736111111111000</text:p>
          </table:table-cell>
          <table:table-cell table:formula="of:=[.D1076]-[.D107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[.B1075]+11" office:value-type="float" office:value="11825" calcext:value-type="float">
            <text:p>11825</text:p>
          </table:table-cell>
          <table:table-cell office:value-type="float" office:value="8640000" calcext:value-type="float">
            <text:p>8640000</text:p>
          </table:table-cell>
          <table:table-cell table:formula="of:=[.B1076]/[.C1076]" office:value-type="float" office:value="0.00136863425925926" calcext:value-type="float">
            <text:p>0,00136863425925926000</text:p>
          </table:table-cell>
          <table:table-cell table:formula="of:=[.D1077]-[.D1076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[.B1076]+11" office:value-type="float" office:value="11836" calcext:value-type="float">
            <text:p>11836</text:p>
          </table:table-cell>
          <table:table-cell office:value-type="float" office:value="8640000" calcext:value-type="float">
            <text:p>8640000</text:p>
          </table:table-cell>
          <table:table-cell table:formula="of:=[.B1077]/[.C1077]" office:value-type="float" office:value="0.00136990740740741" calcext:value-type="float">
            <text:p>0,00136990740740741000</text:p>
          </table:table-cell>
          <table:table-cell table:formula="of:=[.D1078]-[.D107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[.B1077]+11" office:value-type="float" office:value="11847" calcext:value-type="float">
            <text:p>11847</text:p>
          </table:table-cell>
          <table:table-cell office:value-type="float" office:value="8640000" calcext:value-type="float">
            <text:p>8640000</text:p>
          </table:table-cell>
          <table:table-cell table:formula="of:=[.B1078]/[.C1078]" office:value-type="float" office:value="0.00137118055555556" calcext:value-type="float">
            <text:p>0,00137118055555556000</text:p>
          </table:table-cell>
          <table:table-cell table:formula="of:=[.D1079]-[.D1078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[.B1078]+11" office:value-type="float" office:value="11858" calcext:value-type="float">
            <text:p>11858</text:p>
          </table:table-cell>
          <table:table-cell office:value-type="float" office:value="8640000" calcext:value-type="float">
            <text:p>8640000</text:p>
          </table:table-cell>
          <table:table-cell table:formula="of:=[.B1079]/[.C1079]" office:value-type="float" office:value="0.0013724537037037" calcext:value-type="float">
            <text:p>0,00137245370370370000</text:p>
          </table:table-cell>
          <table:table-cell table:formula="of:=[.D1080]-[.D107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[.B1079]+11" office:value-type="float" office:value="11869" calcext:value-type="float">
            <text:p>11869</text:p>
          </table:table-cell>
          <table:table-cell office:value-type="float" office:value="8640000" calcext:value-type="float">
            <text:p>8640000</text:p>
          </table:table-cell>
          <table:table-cell table:formula="of:=[.B1080]/[.C1080]" office:value-type="float" office:value="0.00137372685185185" calcext:value-type="float">
            <text:p>0,00137372685185185000</text:p>
          </table:table-cell>
          <table:table-cell table:formula="of:=[.D1081]-[.D1080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[.B1080]+11" office:value-type="float" office:value="11880" calcext:value-type="float">
            <text:p>11880</text:p>
          </table:table-cell>
          <table:table-cell office:value-type="float" office:value="8640000" calcext:value-type="float">
            <text:p>8640000</text:p>
          </table:table-cell>
          <table:table-cell table:formula="of:=[.B1081]/[.C1081]" office:value-type="float" office:value="0.001375" calcext:value-type="float">
            <text:p>0,00137500000000000000</text:p>
          </table:table-cell>
          <table:table-cell table:formula="of:=[.D1082]-[.D108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[.B1081]+11" office:value-type="float" office:value="11891" calcext:value-type="float">
            <text:p>11891</text:p>
          </table:table-cell>
          <table:table-cell office:value-type="float" office:value="8640000" calcext:value-type="float">
            <text:p>8640000</text:p>
          </table:table-cell>
          <table:table-cell table:formula="of:=[.B1082]/[.C1082]" office:value-type="float" office:value="0.00137627314814815" calcext:value-type="float">
            <text:p>0,00137627314814815000</text:p>
          </table:table-cell>
          <table:table-cell table:formula="of:=[.D1083]-[.D1082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[.B1082]+11" office:value-type="float" office:value="11902" calcext:value-type="float">
            <text:p>11902</text:p>
          </table:table-cell>
          <table:table-cell office:value-type="float" office:value="8640000" calcext:value-type="float">
            <text:p>8640000</text:p>
          </table:table-cell>
          <table:table-cell table:formula="of:=[.B1083]/[.C1083]" office:value-type="float" office:value="0.0013775462962963" calcext:value-type="float">
            <text:p>0,00137754629629630000</text:p>
          </table:table-cell>
          <table:table-cell table:formula="of:=[.D1084]-[.D108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[.B1083]+11" office:value-type="float" office:value="11913" calcext:value-type="float">
            <text:p>11913</text:p>
          </table:table-cell>
          <table:table-cell office:value-type="float" office:value="8640000" calcext:value-type="float">
            <text:p>8640000</text:p>
          </table:table-cell>
          <table:table-cell table:formula="of:=[.B1084]/[.C1084]" office:value-type="float" office:value="0.00137881944444444" calcext:value-type="float">
            <text:p>0,00137881944444444000</text:p>
          </table:table-cell>
          <table:table-cell table:formula="of:=[.D1085]-[.D108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[.B1084]+11" office:value-type="float" office:value="11924" calcext:value-type="float">
            <text:p>11924</text:p>
          </table:table-cell>
          <table:table-cell office:value-type="float" office:value="8640000" calcext:value-type="float">
            <text:p>8640000</text:p>
          </table:table-cell>
          <table:table-cell table:formula="of:=[.B1085]/[.C1085]" office:value-type="float" office:value="0.00138009259259259" calcext:value-type="float">
            <text:p>0,00138009259259259000</text:p>
          </table:table-cell>
          <table:table-cell table:formula="of:=[.D1086]-[.D1085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[.B1085]+11" office:value-type="float" office:value="11935" calcext:value-type="float">
            <text:p>11935</text:p>
          </table:table-cell>
          <table:table-cell office:value-type="float" office:value="8640000" calcext:value-type="float">
            <text:p>8640000</text:p>
          </table:table-cell>
          <table:table-cell table:formula="of:=[.B1086]/[.C1086]" office:value-type="float" office:value="0.00138136574074074" calcext:value-type="float">
            <text:p>0,00138136574074074000</text:p>
          </table:table-cell>
          <table:table-cell table:formula="of:=[.D1087]-[.D108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table:formula="of:=[.B1086]+11" office:value-type="float" office:value="11946" calcext:value-type="float">
            <text:p>11946</text:p>
          </table:table-cell>
          <table:table-cell office:value-type="float" office:value="8640000" calcext:value-type="float">
            <text:p>8640000</text:p>
          </table:table-cell>
          <table:table-cell table:formula="of:=[.B1087]/[.C1087]" office:value-type="float" office:value="0.00138263888888889" calcext:value-type="float">
            <text:p>0,00138263888888889000</text:p>
          </table:table-cell>
          <table:table-cell table:formula="of:=[.D1088]-[.D1087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[.B1087]+11" office:value-type="float" office:value="11957" calcext:value-type="float">
            <text:p>11957</text:p>
          </table:table-cell>
          <table:table-cell office:value-type="float" office:value="8640000" calcext:value-type="float">
            <text:p>8640000</text:p>
          </table:table-cell>
          <table:table-cell table:formula="of:=[.B1088]/[.C1088]" office:value-type="float" office:value="0.00138391203703704" calcext:value-type="float">
            <text:p>0,00138391203703704000</text:p>
          </table:table-cell>
          <table:table-cell table:formula="of:=[.D1089]-[.D108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[.B1088]+11" office:value-type="float" office:value="11968" calcext:value-type="float">
            <text:p>11968</text:p>
          </table:table-cell>
          <table:table-cell office:value-type="float" office:value="8640000" calcext:value-type="float">
            <text:p>8640000</text:p>
          </table:table-cell>
          <table:table-cell table:formula="of:=[.B1089]/[.C1089]" office:value-type="float" office:value="0.00138518518518519" calcext:value-type="float">
            <text:p>0,00138518518518519000</text:p>
          </table:table-cell>
          <table:table-cell table:formula="of:=[.D1090]-[.D1089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table:formula="of:=[.B1089]+11" office:value-type="float" office:value="11979" calcext:value-type="float">
            <text:p>11979</text:p>
          </table:table-cell>
          <table:table-cell office:value-type="float" office:value="8640000" calcext:value-type="float">
            <text:p>8640000</text:p>
          </table:table-cell>
          <table:table-cell table:formula="of:=[.B1090]/[.C1090]" office:value-type="float" office:value="0.00138645833333333" calcext:value-type="float">
            <text:p>0,00138645833333333000</text:p>
          </table:table-cell>
          <table:table-cell table:formula="of:=[.D1091]-[.D109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[.B1090]+11" office:value-type="float" office:value="11990" calcext:value-type="float">
            <text:p>11990</text:p>
          </table:table-cell>
          <table:table-cell office:value-type="float" office:value="8640000" calcext:value-type="float">
            <text:p>8640000</text:p>
          </table:table-cell>
          <table:table-cell table:formula="of:=[.B1091]/[.C1091]" office:value-type="float" office:value="0.00138773148148148" calcext:value-type="float">
            <text:p>0,00138773148148148000</text:p>
          </table:table-cell>
          <table:table-cell table:formula="of:=[.D1092]-[.D1091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[.B1091]+11" office:value-type="float" office:value="12001" calcext:value-type="float">
            <text:p>12001</text:p>
          </table:table-cell>
          <table:table-cell office:value-type="float" office:value="8640000" calcext:value-type="float">
            <text:p>8640000</text:p>
          </table:table-cell>
          <table:table-cell table:formula="of:=[.B1092]/[.C1092]" office:value-type="float" office:value="0.00138900462962963" calcext:value-type="float">
            <text:p>0,00138900462962963000</text:p>
          </table:table-cell>
          <table:table-cell table:formula="of:=[.D1093]-[.D109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[.B1092]+11" office:value-type="float" office:value="12012" calcext:value-type="float">
            <text:p>12012</text:p>
          </table:table-cell>
          <table:table-cell office:value-type="float" office:value="8640000" calcext:value-type="float">
            <text:p>8640000</text:p>
          </table:table-cell>
          <table:table-cell table:formula="of:=[.B1093]/[.C1093]" office:value-type="float" office:value="0.00139027777777778" calcext:value-type="float">
            <text:p>0,00139027777777778000</text:p>
          </table:table-cell>
          <table:table-cell table:formula="of:=[.D1094]-[.D1093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[.B1093]+11" office:value-type="float" office:value="12023" calcext:value-type="float">
            <text:p>12023</text:p>
          </table:table-cell>
          <table:table-cell office:value-type="float" office:value="8640000" calcext:value-type="float">
            <text:p>8640000</text:p>
          </table:table-cell>
          <table:table-cell table:formula="of:=[.B1094]/[.C1094]" office:value-type="float" office:value="0.00139155092592593" calcext:value-type="float">
            <text:p>0,00139155092592593000</text:p>
          </table:table-cell>
          <table:table-cell table:formula="of:=[.D1095]-[.D109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[.B1094]+11" office:value-type="float" office:value="12034" calcext:value-type="float">
            <text:p>12034</text:p>
          </table:table-cell>
          <table:table-cell office:value-type="float" office:value="8640000" calcext:value-type="float">
            <text:p>8640000</text:p>
          </table:table-cell>
          <table:table-cell table:formula="of:=[.B1095]/[.C1095]" office:value-type="float" office:value="0.00139282407407407" calcext:value-type="float">
            <text:p>0,00139282407407407000</text:p>
          </table:table-cell>
          <table:table-cell table:formula="of:=[.D1096]-[.D1095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[.B1095]+11" office:value-type="float" office:value="12045" calcext:value-type="float">
            <text:p>12045</text:p>
          </table:table-cell>
          <table:table-cell office:value-type="float" office:value="8640000" calcext:value-type="float">
            <text:p>8640000</text:p>
          </table:table-cell>
          <table:table-cell table:formula="of:=[.B1096]/[.C1096]" office:value-type="float" office:value="0.00139409722222222" calcext:value-type="float">
            <text:p>0,00139409722222222000</text:p>
          </table:table-cell>
          <table:table-cell table:formula="of:=[.D1097]-[.D109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[.B1096]+11" office:value-type="float" office:value="12056" calcext:value-type="float">
            <text:p>12056</text:p>
          </table:table-cell>
          <table:table-cell office:value-type="float" office:value="8640000" calcext:value-type="float">
            <text:p>8640000</text:p>
          </table:table-cell>
          <table:table-cell table:formula="of:=[.B1097]/[.C1097]" office:value-type="float" office:value="0.00139537037037037" calcext:value-type="float">
            <text:p>0,00139537037037037000</text:p>
          </table:table-cell>
          <table:table-cell table:formula="of:=[.D1098]-[.D1097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[.B1097]+11" office:value-type="float" office:value="12067" calcext:value-type="float">
            <text:p>12067</text:p>
          </table:table-cell>
          <table:table-cell office:value-type="float" office:value="8640000" calcext:value-type="float">
            <text:p>8640000</text:p>
          </table:table-cell>
          <table:table-cell table:formula="of:=[.B1098]/[.C1098]" office:value-type="float" office:value="0.00139664351851852" calcext:value-type="float">
            <text:p>0,00139664351851852000</text:p>
          </table:table-cell>
          <table:table-cell table:formula="of:=[.D1099]-[.D109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[.B1098]+11" office:value-type="float" office:value="12078" calcext:value-type="float">
            <text:p>12078</text:p>
          </table:table-cell>
          <table:table-cell office:value-type="float" office:value="8640000" calcext:value-type="float">
            <text:p>8640000</text:p>
          </table:table-cell>
          <table:table-cell table:formula="of:=[.B1099]/[.C1099]" office:value-type="float" office:value="0.00139791666666667" calcext:value-type="float">
            <text:p>0,00139791666666667000</text:p>
          </table:table-cell>
          <table:table-cell table:formula="of:=[.D1100]-[.D109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[.B1099]+11" office:value-type="float" office:value="12089" calcext:value-type="float">
            <text:p>12089</text:p>
          </table:table-cell>
          <table:table-cell office:value-type="float" office:value="8640000" calcext:value-type="float">
            <text:p>8640000</text:p>
          </table:table-cell>
          <table:table-cell table:formula="of:=[.B1100]/[.C1100]" office:value-type="float" office:value="0.00139918981481482" calcext:value-type="float">
            <text:p>0,00139918981481482000</text:p>
          </table:table-cell>
          <table:table-cell table:formula="of:=[.D1101]-[.D1100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.B1100]+11" office:value-type="float" office:value="12100" calcext:value-type="float">
            <text:p>12100</text:p>
          </table:table-cell>
          <table:table-cell office:value-type="float" office:value="8640000" calcext:value-type="float">
            <text:p>8640000</text:p>
          </table:table-cell>
          <table:table-cell table:formula="of:=[.B1101]/[.C1101]" office:value-type="float" office:value="0.00140046296296296" calcext:value-type="float">
            <text:p>0,00140046296296296000</text:p>
          </table:table-cell>
          <table:table-cell table:formula="of:=[.D1102]-[.D110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[.B1101]+11" office:value-type="float" office:value="12111" calcext:value-type="float">
            <text:p>12111</text:p>
          </table:table-cell>
          <table:table-cell office:value-type="float" office:value="8640000" calcext:value-type="float">
            <text:p>8640000</text:p>
          </table:table-cell>
          <table:table-cell table:formula="of:=[.B1102]/[.C1102]" office:value-type="float" office:value="0.00140173611111111" calcext:value-type="float">
            <text:p>0,00140173611111111000</text:p>
          </table:table-cell>
          <table:table-cell table:formula="of:=[.D1103]-[.D1102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[.B1102]+11" office:value-type="float" office:value="12122" calcext:value-type="float">
            <text:p>12122</text:p>
          </table:table-cell>
          <table:table-cell office:value-type="float" office:value="8640000" calcext:value-type="float">
            <text:p>8640000</text:p>
          </table:table-cell>
          <table:table-cell table:formula="of:=[.B1103]/[.C1103]" office:value-type="float" office:value="0.00140300925925926" calcext:value-type="float">
            <text:p>0,00140300925925926000</text:p>
          </table:table-cell>
          <table:table-cell table:formula="of:=[.D1104]-[.D110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[.B1103]+11" office:value-type="float" office:value="12133" calcext:value-type="float">
            <text:p>12133</text:p>
          </table:table-cell>
          <table:table-cell office:value-type="float" office:value="8640000" calcext:value-type="float">
            <text:p>8640000</text:p>
          </table:table-cell>
          <table:table-cell table:formula="of:=[.B1104]/[.C1104]" office:value-type="float" office:value="0.00140428240740741" calcext:value-type="float">
            <text:p>0,00140428240740741000</text:p>
          </table:table-cell>
          <table:table-cell table:formula="of:=[.D1105]-[.D1104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[.B1104]+11" office:value-type="float" office:value="12144" calcext:value-type="float">
            <text:p>12144</text:p>
          </table:table-cell>
          <table:table-cell office:value-type="float" office:value="8640000" calcext:value-type="float">
            <text:p>8640000</text:p>
          </table:table-cell>
          <table:table-cell table:formula="of:=[.B1105]/[.C1105]" office:value-type="float" office:value="0.00140555555555556" calcext:value-type="float">
            <text:p>0,00140555555555556000</text:p>
          </table:table-cell>
          <table:table-cell table:formula="of:=[.D1106]-[.D110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[.B1105]+11" office:value-type="float" office:value="12155" calcext:value-type="float">
            <text:p>12155</text:p>
          </table:table-cell>
          <table:table-cell office:value-type="float" office:value="8640000" calcext:value-type="float">
            <text:p>8640000</text:p>
          </table:table-cell>
          <table:table-cell table:formula="of:=[.B1106]/[.C1106]" office:value-type="float" office:value="0.0014068287037037" calcext:value-type="float">
            <text:p>0,00140682870370370000</text:p>
          </table:table-cell>
          <table:table-cell table:formula="of:=[.D1107]-[.D1106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table:formula="of:=[.B1106]+11" office:value-type="float" office:value="12166" calcext:value-type="float">
            <text:p>12166</text:p>
          </table:table-cell>
          <table:table-cell office:value-type="float" office:value="8640000" calcext:value-type="float">
            <text:p>8640000</text:p>
          </table:table-cell>
          <table:table-cell table:formula="of:=[.B1107]/[.C1107]" office:value-type="float" office:value="0.00140810185185185" calcext:value-type="float">
            <text:p>0,00140810185185185000</text:p>
          </table:table-cell>
          <table:table-cell table:formula="of:=[.D1108]-[.D110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[.B1107]+11" office:value-type="float" office:value="12177" calcext:value-type="float">
            <text:p>12177</text:p>
          </table:table-cell>
          <table:table-cell office:value-type="float" office:value="8640000" calcext:value-type="float">
            <text:p>8640000</text:p>
          </table:table-cell>
          <table:table-cell table:formula="of:=[.B1108]/[.C1108]" office:value-type="float" office:value="0.001409375" calcext:value-type="float">
            <text:p>0,00140937500000000000</text:p>
          </table:table-cell>
          <table:table-cell table:formula="of:=[.D1109]-[.D1108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[.B1108]+11" office:value-type="float" office:value="12188" calcext:value-type="float">
            <text:p>12188</text:p>
          </table:table-cell>
          <table:table-cell office:value-type="float" office:value="8640000" calcext:value-type="float">
            <text:p>8640000</text:p>
          </table:table-cell>
          <table:table-cell table:formula="of:=[.B1109]/[.C1109]" office:value-type="float" office:value="0.00141064814814815" calcext:value-type="float">
            <text:p>0,00141064814814815000</text:p>
          </table:table-cell>
          <table:table-cell table:formula="of:=[.D1110]-[.D110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[.B1109]+11" office:value-type="float" office:value="12199" calcext:value-type="float">
            <text:p>12199</text:p>
          </table:table-cell>
          <table:table-cell office:value-type="float" office:value="8640000" calcext:value-type="float">
            <text:p>8640000</text:p>
          </table:table-cell>
          <table:table-cell table:formula="of:=[.B1110]/[.C1110]" office:value-type="float" office:value="0.0014119212962963" calcext:value-type="float">
            <text:p>0,00141192129629630000</text:p>
          </table:table-cell>
          <table:table-cell table:formula="of:=[.D1111]-[.D1110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[.B1110]+11" office:value-type="float" office:value="12210" calcext:value-type="float">
            <text:p>12210</text:p>
          </table:table-cell>
          <table:table-cell office:value-type="float" office:value="8640000" calcext:value-type="float">
            <text:p>8640000</text:p>
          </table:table-cell>
          <table:table-cell table:formula="of:=[.B1111]/[.C1111]" office:value-type="float" office:value="0.00141319444444444" calcext:value-type="float">
            <text:p>0,00141319444444444000</text:p>
          </table:table-cell>
          <table:table-cell table:formula="of:=[.D1112]-[.D111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[.B1111]+11" office:value-type="float" office:value="12221" calcext:value-type="float">
            <text:p>12221</text:p>
          </table:table-cell>
          <table:table-cell office:value-type="float" office:value="8640000" calcext:value-type="float">
            <text:p>8640000</text:p>
          </table:table-cell>
          <table:table-cell table:formula="of:=[.B1112]/[.C1112]" office:value-type="float" office:value="0.00141446759259259" calcext:value-type="float">
            <text:p>0,00141446759259259000</text:p>
          </table:table-cell>
          <table:table-cell table:formula="of:=[.D1113]-[.D111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[.B1112]+11" office:value-type="float" office:value="12232" calcext:value-type="float">
            <text:p>12232</text:p>
          </table:table-cell>
          <table:table-cell office:value-type="float" office:value="8640000" calcext:value-type="float">
            <text:p>8640000</text:p>
          </table:table-cell>
          <table:table-cell table:formula="of:=[.B1113]/[.C1113]" office:value-type="float" office:value="0.00141574074074074" calcext:value-type="float">
            <text:p>0,00141574074074074000</text:p>
          </table:table-cell>
          <table:table-cell table:formula="of:=[.D1114]-[.D1113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[.B1113]+11" office:value-type="float" office:value="12243" calcext:value-type="float">
            <text:p>12243</text:p>
          </table:table-cell>
          <table:table-cell office:value-type="float" office:value="8640000" calcext:value-type="float">
            <text:p>8640000</text:p>
          </table:table-cell>
          <table:table-cell table:formula="of:=[.B1114]/[.C1114]" office:value-type="float" office:value="0.00141701388888889" calcext:value-type="float">
            <text:p>0,00141701388888889000</text:p>
          </table:table-cell>
          <table:table-cell table:formula="of:=[.D1115]-[.D111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[.B1114]+11" office:value-type="float" office:value="12254" calcext:value-type="float">
            <text:p>12254</text:p>
          </table:table-cell>
          <table:table-cell office:value-type="float" office:value="8640000" calcext:value-type="float">
            <text:p>8640000</text:p>
          </table:table-cell>
          <table:table-cell table:formula="of:=[.B1115]/[.C1115]" office:value-type="float" office:value="0.00141828703703704" calcext:value-type="float">
            <text:p>0,00141828703703704000</text:p>
          </table:table-cell>
          <table:table-cell table:formula="of:=[.D1116]-[.D1115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[.B1115]+11" office:value-type="float" office:value="12265" calcext:value-type="float">
            <text:p>12265</text:p>
          </table:table-cell>
          <table:table-cell office:value-type="float" office:value="8640000" calcext:value-type="float">
            <text:p>8640000</text:p>
          </table:table-cell>
          <table:table-cell table:formula="of:=[.B1116]/[.C1116]" office:value-type="float" office:value="0.00141956018518519" calcext:value-type="float">
            <text:p>0,00141956018518519000</text:p>
          </table:table-cell>
          <table:table-cell table:formula="of:=[.D1117]-[.D111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[.B1116]+11" office:value-type="float" office:value="12276" calcext:value-type="float">
            <text:p>12276</text:p>
          </table:table-cell>
          <table:table-cell office:value-type="float" office:value="8640000" calcext:value-type="float">
            <text:p>8640000</text:p>
          </table:table-cell>
          <table:table-cell table:formula="of:=[.B1117]/[.C1117]" office:value-type="float" office:value="0.00142083333333333" calcext:value-type="float">
            <text:p>0,00142083333333333000</text:p>
          </table:table-cell>
          <table:table-cell table:formula="of:=[.D1118]-[.D1117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[.B1117]+11" office:value-type="float" office:value="12287" calcext:value-type="float">
            <text:p>12287</text:p>
          </table:table-cell>
          <table:table-cell office:value-type="float" office:value="8640000" calcext:value-type="float">
            <text:p>8640000</text:p>
          </table:table-cell>
          <table:table-cell table:formula="of:=[.B1118]/[.C1118]" office:value-type="float" office:value="0.00142210648148148" calcext:value-type="float">
            <text:p>0,00142210648148148000</text:p>
          </table:table-cell>
          <table:table-cell table:formula="of:=[.D1119]-[.D111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[.B1118]+11" office:value-type="float" office:value="12298" calcext:value-type="float">
            <text:p>12298</text:p>
          </table:table-cell>
          <table:table-cell office:value-type="float" office:value="8640000" calcext:value-type="float">
            <text:p>8640000</text:p>
          </table:table-cell>
          <table:table-cell table:formula="of:=[.B1119]/[.C1119]" office:value-type="float" office:value="0.00142337962962963" calcext:value-type="float">
            <text:p>0,00142337962962963000</text:p>
          </table:table-cell>
          <table:table-cell table:formula="of:=[.D1120]-[.D1119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table:formula="of:=[.B1119]+11" office:value-type="float" office:value="12309" calcext:value-type="float">
            <text:p>12309</text:p>
          </table:table-cell>
          <table:table-cell office:value-type="float" office:value="8640000" calcext:value-type="float">
            <text:p>8640000</text:p>
          </table:table-cell>
          <table:table-cell table:formula="of:=[.B1120]/[.C1120]" office:value-type="float" office:value="0.00142465277777778" calcext:value-type="float">
            <text:p>0,00142465277777778000</text:p>
          </table:table-cell>
          <table:table-cell table:formula="of:=[.D1121]-[.D112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[.B1120]+11" office:value-type="float" office:value="12320" calcext:value-type="float">
            <text:p>12320</text:p>
          </table:table-cell>
          <table:table-cell office:value-type="float" office:value="8640000" calcext:value-type="float">
            <text:p>8640000</text:p>
          </table:table-cell>
          <table:table-cell table:formula="of:=[.B1121]/[.C1121]" office:value-type="float" office:value="0.00142592592592593" calcext:value-type="float">
            <text:p>0,00142592592592593000</text:p>
          </table:table-cell>
          <table:table-cell table:formula="of:=[.D1122]-[.D1121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formula="of:=[.B1121]+11" office:value-type="float" office:value="12331" calcext:value-type="float">
            <text:p>12331</text:p>
          </table:table-cell>
          <table:table-cell office:value-type="float" office:value="8640000" calcext:value-type="float">
            <text:p>8640000</text:p>
          </table:table-cell>
          <table:table-cell table:formula="of:=[.B1122]/[.C1122]" office:value-type="float" office:value="0.00142719907407407" calcext:value-type="float">
            <text:p>0,00142719907407407000</text:p>
          </table:table-cell>
          <table:table-cell table:formula="of:=[.D1123]-[.D112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table:formula="of:=[.B1122]+11" office:value-type="float" office:value="12342" calcext:value-type="float">
            <text:p>12342</text:p>
          </table:table-cell>
          <table:table-cell office:value-type="float" office:value="8640000" calcext:value-type="float">
            <text:p>8640000</text:p>
          </table:table-cell>
          <table:table-cell table:formula="of:=[.B1123]/[.C1123]" office:value-type="float" office:value="0.00142847222222222" calcext:value-type="float">
            <text:p>0,00142847222222222000</text:p>
          </table:table-cell>
          <table:table-cell table:formula="of:=[.D1124]-[.D1123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table:formula="of:=[.B1123]+11" office:value-type="float" office:value="12353" calcext:value-type="float">
            <text:p>12353</text:p>
          </table:table-cell>
          <table:table-cell office:value-type="float" office:value="8640000" calcext:value-type="float">
            <text:p>8640000</text:p>
          </table:table-cell>
          <table:table-cell table:formula="of:=[.B1124]/[.C1124]" office:value-type="float" office:value="0.00142974537037037" calcext:value-type="float">
            <text:p>0,00142974537037037000</text:p>
          </table:table-cell>
          <table:table-cell table:formula="of:=[.D1125]-[.D112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[.B1124]+11" office:value-type="float" office:value="12364" calcext:value-type="float">
            <text:p>12364</text:p>
          </table:table-cell>
          <table:table-cell office:value-type="float" office:value="8640000" calcext:value-type="float">
            <text:p>8640000</text:p>
          </table:table-cell>
          <table:table-cell table:formula="of:=[.B1125]/[.C1125]" office:value-type="float" office:value="0.00143101851851852" calcext:value-type="float">
            <text:p>0,00143101851851852000</text:p>
          </table:table-cell>
          <table:table-cell table:formula="of:=[.D1126]-[.D1125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formula="of:=[.B1125]+11" office:value-type="float" office:value="12375" calcext:value-type="float">
            <text:p>12375</text:p>
          </table:table-cell>
          <table:table-cell office:value-type="float" office:value="8640000" calcext:value-type="float">
            <text:p>8640000</text:p>
          </table:table-cell>
          <table:table-cell table:formula="of:=[.B1126]/[.C1126]" office:value-type="float" office:value="0.00143229166666667" calcext:value-type="float">
            <text:p>0,00143229166666667000</text:p>
          </table:table-cell>
          <table:table-cell table:formula="of:=[.D1127]-[.D112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table:formula="of:=[.B1126]+11" office:value-type="float" office:value="12386" calcext:value-type="float">
            <text:p>12386</text:p>
          </table:table-cell>
          <table:table-cell office:value-type="float" office:value="8640000" calcext:value-type="float">
            <text:p>8640000</text:p>
          </table:table-cell>
          <table:table-cell table:formula="of:=[.B1127]/[.C1127]" office:value-type="float" office:value="0.00143356481481481" calcext:value-type="float">
            <text:p>0,00143356481481481000</text:p>
          </table:table-cell>
          <table:table-cell table:formula="of:=[.D1128]-[.D112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table:formula="of:=[.B1127]+11" office:value-type="float" office:value="12397" calcext:value-type="float">
            <text:p>12397</text:p>
          </table:table-cell>
          <table:table-cell office:value-type="float" office:value="8640000" calcext:value-type="float">
            <text:p>8640000</text:p>
          </table:table-cell>
          <table:table-cell table:formula="of:=[.B1128]/[.C1128]" office:value-type="float" office:value="0.00143483796296296" calcext:value-type="float">
            <text:p>0,00143483796296296000</text:p>
          </table:table-cell>
          <table:table-cell table:formula="of:=[.D1129]-[.D1128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[.B1128]+11" office:value-type="float" office:value="12408" calcext:value-type="float">
            <text:p>12408</text:p>
          </table:table-cell>
          <table:table-cell office:value-type="float" office:value="8640000" calcext:value-type="float">
            <text:p>8640000</text:p>
          </table:table-cell>
          <table:table-cell table:formula="of:=[.B1129]/[.C1129]" office:value-type="float" office:value="0.00143611111111111" calcext:value-type="float">
            <text:p>0,00143611111111111000</text:p>
          </table:table-cell>
          <table:table-cell table:formula="of:=[.D1130]-[.D112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[.B1129]+11" office:value-type="float" office:value="12419" calcext:value-type="float">
            <text:p>12419</text:p>
          </table:table-cell>
          <table:table-cell office:value-type="float" office:value="8640000" calcext:value-type="float">
            <text:p>8640000</text:p>
          </table:table-cell>
          <table:table-cell table:formula="of:=[.B1130]/[.C1130]" office:value-type="float" office:value="0.00143738425925926" calcext:value-type="float">
            <text:p>0,00143738425925926000</text:p>
          </table:table-cell>
          <table:table-cell table:formula="of:=[.D1131]-[.D1130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[.B1130]+11" office:value-type="float" office:value="12430" calcext:value-type="float">
            <text:p>12430</text:p>
          </table:table-cell>
          <table:table-cell office:value-type="float" office:value="8640000" calcext:value-type="float">
            <text:p>8640000</text:p>
          </table:table-cell>
          <table:table-cell table:formula="of:=[.B1131]/[.C1131]" office:value-type="float" office:value="0.00143865740740741" calcext:value-type="float">
            <text:p>0,00143865740740741000</text:p>
          </table:table-cell>
          <table:table-cell table:formula="of:=[.D1132]-[.D113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formula="of:=[.B1131]+11" office:value-type="float" office:value="12441" calcext:value-type="float">
            <text:p>12441</text:p>
          </table:table-cell>
          <table:table-cell office:value-type="float" office:value="8640000" calcext:value-type="float">
            <text:p>8640000</text:p>
          </table:table-cell>
          <table:table-cell table:formula="of:=[.B1132]/[.C1132]" office:value-type="float" office:value="0.00143993055555556" calcext:value-type="float">
            <text:p>0,00143993055555556000</text:p>
          </table:table-cell>
          <table:table-cell table:formula="of:=[.D1133]-[.D1132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table:formula="of:=[.B1132]+11" office:value-type="float" office:value="12452" calcext:value-type="float">
            <text:p>12452</text:p>
          </table:table-cell>
          <table:table-cell office:value-type="float" office:value="8640000" calcext:value-type="float">
            <text:p>8640000</text:p>
          </table:table-cell>
          <table:table-cell table:formula="of:=[.B1133]/[.C1133]" office:value-type="float" office:value="0.0014412037037037" calcext:value-type="float">
            <text:p>0,00144120370370370000</text:p>
          </table:table-cell>
          <table:table-cell table:formula="of:=[.D1134]-[.D113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[.B1133]+11" office:value-type="float" office:value="12463" calcext:value-type="float">
            <text:p>12463</text:p>
          </table:table-cell>
          <table:table-cell office:value-type="float" office:value="8640000" calcext:value-type="float">
            <text:p>8640000</text:p>
          </table:table-cell>
          <table:table-cell table:formula="of:=[.B1134]/[.C1134]" office:value-type="float" office:value="0.00144247685185185" calcext:value-type="float">
            <text:p>0,00144247685185185000</text:p>
          </table:table-cell>
          <table:table-cell table:formula="of:=[.D1135]-[.D1134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table:formula="of:=[.B1134]+11" office:value-type="float" office:value="12474" calcext:value-type="float">
            <text:p>12474</text:p>
          </table:table-cell>
          <table:table-cell office:value-type="float" office:value="8640000" calcext:value-type="float">
            <text:p>8640000</text:p>
          </table:table-cell>
          <table:table-cell table:formula="of:=[.B1135]/[.C1135]" office:value-type="float" office:value="0.00144375" calcext:value-type="float">
            <text:p>0,00144375000000000000</text:p>
          </table:table-cell>
          <table:table-cell table:formula="of:=[.D1136]-[.D113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table:formula="of:=[.B1135]+11" office:value-type="float" office:value="12485" calcext:value-type="float">
            <text:p>12485</text:p>
          </table:table-cell>
          <table:table-cell office:value-type="float" office:value="8640000" calcext:value-type="float">
            <text:p>8640000</text:p>
          </table:table-cell>
          <table:table-cell table:formula="of:=[.B1136]/[.C1136]" office:value-type="float" office:value="0.00144502314814815" calcext:value-type="float">
            <text:p>0,00144502314814815000</text:p>
          </table:table-cell>
          <table:table-cell table:formula="of:=[.D1137]-[.D1136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table:formula="of:=[.B1136]+11" office:value-type="float" office:value="12496" calcext:value-type="float">
            <text:p>12496</text:p>
          </table:table-cell>
          <table:table-cell office:value-type="float" office:value="8640000" calcext:value-type="float">
            <text:p>8640000</text:p>
          </table:table-cell>
          <table:table-cell table:formula="of:=[.B1137]/[.C1137]" office:value-type="float" office:value="0.0014462962962963" calcext:value-type="float">
            <text:p>0,00144629629629630000</text:p>
          </table:table-cell>
          <table:table-cell table:formula="of:=[.D1138]-[.D113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[.B1137]+11" office:value-type="float" office:value="12507" calcext:value-type="float">
            <text:p>12507</text:p>
          </table:table-cell>
          <table:table-cell office:value-type="float" office:value="8640000" calcext:value-type="float">
            <text:p>8640000</text:p>
          </table:table-cell>
          <table:table-cell table:formula="of:=[.B1138]/[.C1138]" office:value-type="float" office:value="0.00144756944444444" calcext:value-type="float">
            <text:p>0,00144756944444444000</text:p>
          </table:table-cell>
          <table:table-cell table:formula="of:=[.D1139]-[.D1138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table:formula="of:=[.B1138]+11" office:value-type="float" office:value="12518" calcext:value-type="float">
            <text:p>12518</text:p>
          </table:table-cell>
          <table:table-cell office:value-type="float" office:value="8640000" calcext:value-type="float">
            <text:p>8640000</text:p>
          </table:table-cell>
          <table:table-cell table:formula="of:=[.B1139]/[.C1139]" office:value-type="float" office:value="0.00144884259259259" calcext:value-type="float">
            <text:p>0,00144884259259259000</text:p>
          </table:table-cell>
          <table:table-cell table:formula="of:=[.D1140]-[.D113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table:formula="of:=[.B1139]+11" office:value-type="float" office:value="12529" calcext:value-type="float">
            <text:p>12529</text:p>
          </table:table-cell>
          <table:table-cell office:value-type="float" office:value="8640000" calcext:value-type="float">
            <text:p>8640000</text:p>
          </table:table-cell>
          <table:table-cell table:formula="of:=[.B1140]/[.C1140]" office:value-type="float" office:value="0.00145011574074074" calcext:value-type="float">
            <text:p>0,00145011574074074000</text:p>
          </table:table-cell>
          <table:table-cell table:formula="of:=[.D1141]-[.D1140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[.B1140]+11" office:value-type="float" office:value="12540" calcext:value-type="float">
            <text:p>12540</text:p>
          </table:table-cell>
          <table:table-cell office:value-type="float" office:value="8640000" calcext:value-type="float">
            <text:p>8640000</text:p>
          </table:table-cell>
          <table:table-cell table:formula="of:=[.B1141]/[.C1141]" office:value-type="float" office:value="0.00145138888888889" calcext:value-type="float">
            <text:p>0,00145138888888889000</text:p>
          </table:table-cell>
          <table:table-cell table:formula="of:=[.D1142]-[.D114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[.B1141]+11" office:value-type="float" office:value="12551" calcext:value-type="float">
            <text:p>12551</text:p>
          </table:table-cell>
          <table:table-cell office:value-type="float" office:value="8640000" calcext:value-type="float">
            <text:p>8640000</text:p>
          </table:table-cell>
          <table:table-cell table:formula="of:=[.B1142]/[.C1142]" office:value-type="float" office:value="0.00145266203703704" calcext:value-type="float">
            <text:p>0,00145266203703704000</text:p>
          </table:table-cell>
          <table:table-cell table:formula="of:=[.D1143]-[.D114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table:formula="of:=[.B1142]+11" office:value-type="float" office:value="12562" calcext:value-type="float">
            <text:p>12562</text:p>
          </table:table-cell>
          <table:table-cell office:value-type="float" office:value="8640000" calcext:value-type="float">
            <text:p>8640000</text:p>
          </table:table-cell>
          <table:table-cell table:formula="of:=[.B1143]/[.C1143]" office:value-type="float" office:value="0.00145393518518519" calcext:value-type="float">
            <text:p>0,00145393518518519000</text:p>
          </table:table-cell>
          <table:table-cell table:formula="of:=[.D1144]-[.D1143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table:formula="of:=[.B1143]+11" office:value-type="float" office:value="12573" calcext:value-type="float">
            <text:p>12573</text:p>
          </table:table-cell>
          <table:table-cell office:value-type="float" office:value="8640000" calcext:value-type="float">
            <text:p>8640000</text:p>
          </table:table-cell>
          <table:table-cell table:formula="of:=[.B1144]/[.C1144]" office:value-type="float" office:value="0.00145520833333333" calcext:value-type="float">
            <text:p>0,00145520833333333000</text:p>
          </table:table-cell>
          <table:table-cell table:formula="of:=[.D1145]-[.D114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table:formula="of:=[.B1144]+11" office:value-type="float" office:value="12584" calcext:value-type="float">
            <text:p>12584</text:p>
          </table:table-cell>
          <table:table-cell office:value-type="float" office:value="8640000" calcext:value-type="float">
            <text:p>8640000</text:p>
          </table:table-cell>
          <table:table-cell table:formula="of:=[.B1145]/[.C1145]" office:value-type="float" office:value="0.00145648148148148" calcext:value-type="float">
            <text:p>0,00145648148148148000</text:p>
          </table:table-cell>
          <table:table-cell table:formula="of:=[.D1146]-[.D1145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table:formula="of:=[.B1145]+11" office:value-type="float" office:value="12595" calcext:value-type="float">
            <text:p>12595</text:p>
          </table:table-cell>
          <table:table-cell office:value-type="float" office:value="8640000" calcext:value-type="float">
            <text:p>8640000</text:p>
          </table:table-cell>
          <table:table-cell table:formula="of:=[.B1146]/[.C1146]" office:value-type="float" office:value="0.00145775462962963" calcext:value-type="float">
            <text:p>0,00145775462962963000</text:p>
          </table:table-cell>
          <table:table-cell table:formula="of:=[.D1147]-[.D114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[.B1146]+11" office:value-type="float" office:value="12606" calcext:value-type="float">
            <text:p>12606</text:p>
          </table:table-cell>
          <table:table-cell office:value-type="float" office:value="8640000" calcext:value-type="float">
            <text:p>8640000</text:p>
          </table:table-cell>
          <table:table-cell table:formula="of:=[.B1147]/[.C1147]" office:value-type="float" office:value="0.00145902777777778" calcext:value-type="float">
            <text:p>0,00145902777777778000</text:p>
          </table:table-cell>
          <table:table-cell table:formula="of:=[.D1148]-[.D1147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table:formula="of:=[.B1147]+11" office:value-type="float" office:value="12617" calcext:value-type="float">
            <text:p>12617</text:p>
          </table:table-cell>
          <table:table-cell office:value-type="float" office:value="8640000" calcext:value-type="float">
            <text:p>8640000</text:p>
          </table:table-cell>
          <table:table-cell table:formula="of:=[.B1148]/[.C1148]" office:value-type="float" office:value="0.00146030092592593" calcext:value-type="float">
            <text:p>0,00146030092592593000</text:p>
          </table:table-cell>
          <table:table-cell table:formula="of:=[.D1149]-[.D114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[.B1148]+11" office:value-type="float" office:value="12628" calcext:value-type="float">
            <text:p>12628</text:p>
          </table:table-cell>
          <table:table-cell office:value-type="float" office:value="8640000" calcext:value-type="float">
            <text:p>8640000</text:p>
          </table:table-cell>
          <table:table-cell table:formula="of:=[.B1149]/[.C1149]" office:value-type="float" office:value="0.00146157407407407" calcext:value-type="float">
            <text:p>0,00146157407407407000</text:p>
          </table:table-cell>
          <table:table-cell table:formula="of:=[.D1150]-[.D1149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table:formula="of:=[.B1149]+11" office:value-type="float" office:value="12639" calcext:value-type="float">
            <text:p>12639</text:p>
          </table:table-cell>
          <table:table-cell office:value-type="float" office:value="8640000" calcext:value-type="float">
            <text:p>8640000</text:p>
          </table:table-cell>
          <table:table-cell table:formula="of:=[.B1150]/[.C1150]" office:value-type="float" office:value="0.00146284722222222" calcext:value-type="float">
            <text:p>0,00146284722222222000</text:p>
          </table:table-cell>
          <table:table-cell table:formula="of:=[.D1151]-[.D115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[.B1150]+11" office:value-type="float" office:value="12650" calcext:value-type="float">
            <text:p>12650</text:p>
          </table:table-cell>
          <table:table-cell office:value-type="float" office:value="8640000" calcext:value-type="float">
            <text:p>8640000</text:p>
          </table:table-cell>
          <table:table-cell table:formula="of:=[.B1151]/[.C1151]" office:value-type="float" office:value="0.00146412037037037" calcext:value-type="float">
            <text:p>0,00146412037037037000</text:p>
          </table:table-cell>
          <table:table-cell table:formula="of:=[.D1152]-[.D1151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[.B1151]+11" office:value-type="float" office:value="12661" calcext:value-type="float">
            <text:p>12661</text:p>
          </table:table-cell>
          <table:table-cell office:value-type="float" office:value="8640000" calcext:value-type="float">
            <text:p>8640000</text:p>
          </table:table-cell>
          <table:table-cell table:formula="of:=[.B1152]/[.C1152]" office:value-type="float" office:value="0.00146539351851852" calcext:value-type="float">
            <text:p>0,00146539351851852000</text:p>
          </table:table-cell>
          <table:table-cell table:formula="of:=[.D1153]-[.D115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table:formula="of:=[.B1152]+11" office:value-type="float" office:value="12672" calcext:value-type="float">
            <text:p>12672</text:p>
          </table:table-cell>
          <table:table-cell office:value-type="float" office:value="8640000" calcext:value-type="float">
            <text:p>8640000</text:p>
          </table:table-cell>
          <table:table-cell table:formula="of:=[.B1153]/[.C1153]" office:value-type="float" office:value="0.00146666666666667" calcext:value-type="float">
            <text:p>0,00146666666666667000</text:p>
          </table:table-cell>
          <table:table-cell table:formula="of:=[.D1154]-[.D1153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table:formula="of:=[.B1153]+11" office:value-type="float" office:value="12683" calcext:value-type="float">
            <text:p>12683</text:p>
          </table:table-cell>
          <table:table-cell office:value-type="float" office:value="8640000" calcext:value-type="float">
            <text:p>8640000</text:p>
          </table:table-cell>
          <table:table-cell table:formula="of:=[.B1154]/[.C1154]" office:value-type="float" office:value="0.00146793981481481" calcext:value-type="float">
            <text:p>0,00146793981481481000</text:p>
          </table:table-cell>
          <table:table-cell table:formula="of:=[.D1155]-[.D115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table:formula="of:=[.B1154]+11" office:value-type="float" office:value="12694" calcext:value-type="float">
            <text:p>12694</text:p>
          </table:table-cell>
          <table:table-cell office:value-type="float" office:value="8640000" calcext:value-type="float">
            <text:p>8640000</text:p>
          </table:table-cell>
          <table:table-cell table:formula="of:=[.B1155]/[.C1155]" office:value-type="float" office:value="0.00146921296296296" calcext:value-type="float">
            <text:p>0,00146921296296296000</text:p>
          </table:table-cell>
          <table:table-cell table:formula="of:=[.D1156]-[.D115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table:formula="of:=[.B1155]+11" office:value-type="float" office:value="12705" calcext:value-type="float">
            <text:p>12705</text:p>
          </table:table-cell>
          <table:table-cell office:value-type="float" office:value="8640000" calcext:value-type="float">
            <text:p>8640000</text:p>
          </table:table-cell>
          <table:table-cell table:formula="of:=[.B1156]/[.C1156]" office:value-type="float" office:value="0.00147048611111111" calcext:value-type="float">
            <text:p>0,00147048611111111000</text:p>
          </table:table-cell>
          <table:table-cell table:formula="of:=[.D1157]-[.D1156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table:formula="of:=[.B1156]+11" office:value-type="float" office:value="12716" calcext:value-type="float">
            <text:p>12716</text:p>
          </table:table-cell>
          <table:table-cell office:value-type="float" office:value="8640000" calcext:value-type="float">
            <text:p>8640000</text:p>
          </table:table-cell>
          <table:table-cell table:formula="of:=[.B1157]/[.C1157]" office:value-type="float" office:value="0.00147175925925926" calcext:value-type="float">
            <text:p>0,00147175925925926000</text:p>
          </table:table-cell>
          <table:table-cell table:formula="of:=[.D1158]-[.D115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table:formula="of:=[.B1157]+11" office:value-type="float" office:value="12727" calcext:value-type="float">
            <text:p>12727</text:p>
          </table:table-cell>
          <table:table-cell office:value-type="float" office:value="8640000" calcext:value-type="float">
            <text:p>8640000</text:p>
          </table:table-cell>
          <table:table-cell table:formula="of:=[.B1158]/[.C1158]" office:value-type="float" office:value="0.00147303240740741" calcext:value-type="float">
            <text:p>0,00147303240740741000</text:p>
          </table:table-cell>
          <table:table-cell table:formula="of:=[.D1159]-[.D1158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table:formula="of:=[.B1158]+11" office:value-type="float" office:value="12738" calcext:value-type="float">
            <text:p>12738</text:p>
          </table:table-cell>
          <table:table-cell office:value-type="float" office:value="8640000" calcext:value-type="float">
            <text:p>8640000</text:p>
          </table:table-cell>
          <table:table-cell table:formula="of:=[.B1159]/[.C1159]" office:value-type="float" office:value="0.00147430555555556" calcext:value-type="float">
            <text:p>0,00147430555555556000</text:p>
          </table:table-cell>
          <table:table-cell table:formula="of:=[.D1160]-[.D115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table:formula="of:=[.B1159]+11" office:value-type="float" office:value="12749" calcext:value-type="float">
            <text:p>12749</text:p>
          </table:table-cell>
          <table:table-cell office:value-type="float" office:value="8640000" calcext:value-type="float">
            <text:p>8640000</text:p>
          </table:table-cell>
          <table:table-cell table:formula="of:=[.B1160]/[.C1160]" office:value-type="float" office:value="0.0014755787037037" calcext:value-type="float">
            <text:p>0,00147557870370370000</text:p>
          </table:table-cell>
          <table:table-cell table:formula="of:=[.D1161]-[.D1160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table:formula="of:=[.B1160]+11" office:value-type="float" office:value="12760" calcext:value-type="float">
            <text:p>12760</text:p>
          </table:table-cell>
          <table:table-cell office:value-type="float" office:value="8640000" calcext:value-type="float">
            <text:p>8640000</text:p>
          </table:table-cell>
          <table:table-cell table:formula="of:=[.B1161]/[.C1161]" office:value-type="float" office:value="0.00147685185185185" calcext:value-type="float">
            <text:p>0,00147685185185185000</text:p>
          </table:table-cell>
          <table:table-cell table:formula="of:=[.D1162]-[.D116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table:formula="of:=[.B1161]+11" office:value-type="float" office:value="12771" calcext:value-type="float">
            <text:p>12771</text:p>
          </table:table-cell>
          <table:table-cell office:value-type="float" office:value="8640000" calcext:value-type="float">
            <text:p>8640000</text:p>
          </table:table-cell>
          <table:table-cell table:formula="of:=[.B1162]/[.C1162]" office:value-type="float" office:value="0.001478125" calcext:value-type="float">
            <text:p>0,00147812500000000000</text:p>
          </table:table-cell>
          <table:table-cell table:formula="of:=[.D1163]-[.D1162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table:formula="of:=[.B1162]+11" office:value-type="float" office:value="12782" calcext:value-type="float">
            <text:p>12782</text:p>
          </table:table-cell>
          <table:table-cell office:value-type="float" office:value="8640000" calcext:value-type="float">
            <text:p>8640000</text:p>
          </table:table-cell>
          <table:table-cell table:formula="of:=[.B1163]/[.C1163]" office:value-type="float" office:value="0.00147939814814815" calcext:value-type="float">
            <text:p>0,00147939814814815000</text:p>
          </table:table-cell>
          <table:table-cell table:formula="of:=[.D1164]-[.D116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table:formula="of:=[.B1163]+11" office:value-type="float" office:value="12793" calcext:value-type="float">
            <text:p>12793</text:p>
          </table:table-cell>
          <table:table-cell office:value-type="float" office:value="8640000" calcext:value-type="float">
            <text:p>8640000</text:p>
          </table:table-cell>
          <table:table-cell table:formula="of:=[.B1164]/[.C1164]" office:value-type="float" office:value="0.0014806712962963" calcext:value-type="float">
            <text:p>0,00148067129629630000</text:p>
          </table:table-cell>
          <table:table-cell table:formula="of:=[.D1165]-[.D1164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table:formula="of:=[.B1164]+11" office:value-type="float" office:value="12804" calcext:value-type="float">
            <text:p>12804</text:p>
          </table:table-cell>
          <table:table-cell office:value-type="float" office:value="8640000" calcext:value-type="float">
            <text:p>8640000</text:p>
          </table:table-cell>
          <table:table-cell table:formula="of:=[.B1165]/[.C1165]" office:value-type="float" office:value="0.00148194444444444" calcext:value-type="float">
            <text:p>0,00148194444444444000</text:p>
          </table:table-cell>
          <table:table-cell table:formula="of:=[.D1166]-[.D116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table:formula="of:=[.B1165]+11" office:value-type="float" office:value="12815" calcext:value-type="float">
            <text:p>12815</text:p>
          </table:table-cell>
          <table:table-cell office:value-type="float" office:value="8640000" calcext:value-type="float">
            <text:p>8640000</text:p>
          </table:table-cell>
          <table:table-cell table:formula="of:=[.B1166]/[.C1166]" office:value-type="float" office:value="0.00148321759259259" calcext:value-type="float">
            <text:p>0,00148321759259259000</text:p>
          </table:table-cell>
          <table:table-cell table:formula="of:=[.D1167]-[.D1166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table:formula="of:=[.B1166]+11" office:value-type="float" office:value="12826" calcext:value-type="float">
            <text:p>12826</text:p>
          </table:table-cell>
          <table:table-cell office:value-type="float" office:value="8640000" calcext:value-type="float">
            <text:p>8640000</text:p>
          </table:table-cell>
          <table:table-cell table:formula="of:=[.B1167]/[.C1167]" office:value-type="float" office:value="0.00148449074074074" calcext:value-type="float">
            <text:p>0,00148449074074074000</text:p>
          </table:table-cell>
          <table:table-cell table:formula="of:=[.D1168]-[.D116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table:formula="of:=[.B1167]+11" office:value-type="float" office:value="12837" calcext:value-type="float">
            <text:p>12837</text:p>
          </table:table-cell>
          <table:table-cell office:value-type="float" office:value="8640000" calcext:value-type="float">
            <text:p>8640000</text:p>
          </table:table-cell>
          <table:table-cell table:formula="of:=[.B1168]/[.C1168]" office:value-type="float" office:value="0.00148576388888889" calcext:value-type="float">
            <text:p>0,00148576388888889000</text:p>
          </table:table-cell>
          <table:table-cell table:formula="of:=[.D1169]-[.D1168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table:formula="of:=[.B1168]+11" office:value-type="float" office:value="12848" calcext:value-type="float">
            <text:p>12848</text:p>
          </table:table-cell>
          <table:table-cell office:value-type="float" office:value="8640000" calcext:value-type="float">
            <text:p>8640000</text:p>
          </table:table-cell>
          <table:table-cell table:formula="of:=[.B1169]/[.C1169]" office:value-type="float" office:value="0.00148703703703704" calcext:value-type="float">
            <text:p>0,00148703703703704000</text:p>
          </table:table-cell>
          <table:table-cell table:formula="of:=[.D1170]-[.D116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table:formula="of:=[.B1169]+11" office:value-type="float" office:value="12859" calcext:value-type="float">
            <text:p>12859</text:p>
          </table:table-cell>
          <table:table-cell office:value-type="float" office:value="8640000" calcext:value-type="float">
            <text:p>8640000</text:p>
          </table:table-cell>
          <table:table-cell table:formula="of:=[.B1170]/[.C1170]" office:value-type="float" office:value="0.00148831018518519" calcext:value-type="float">
            <text:p>0,00148831018518519000</text:p>
          </table:table-cell>
          <table:table-cell table:formula="of:=[.D1171]-[.D117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table:formula="of:=[.B1170]+11" office:value-type="float" office:value="12870" calcext:value-type="float">
            <text:p>12870</text:p>
          </table:table-cell>
          <table:table-cell office:value-type="float" office:value="8640000" calcext:value-type="float">
            <text:p>8640000</text:p>
          </table:table-cell>
          <table:table-cell table:formula="of:=[.B1171]/[.C1171]" office:value-type="float" office:value="0.00148958333333333" calcext:value-type="float">
            <text:p>0,00148958333333333000</text:p>
          </table:table-cell>
          <table:table-cell table:formula="of:=[.D1172]-[.D1171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[.B1171]+11" office:value-type="float" office:value="12881" calcext:value-type="float">
            <text:p>12881</text:p>
          </table:table-cell>
          <table:table-cell office:value-type="float" office:value="8640000" calcext:value-type="float">
            <text:p>8640000</text:p>
          </table:table-cell>
          <table:table-cell table:formula="of:=[.B1172]/[.C1172]" office:value-type="float" office:value="0.00149085648148148" calcext:value-type="float">
            <text:p>0,00149085648148148000</text:p>
          </table:table-cell>
          <table:table-cell table:formula="of:=[.D1173]-[.D117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table:formula="of:=[.B1172]+11" office:value-type="float" office:value="12892" calcext:value-type="float">
            <text:p>12892</text:p>
          </table:table-cell>
          <table:table-cell office:value-type="float" office:value="8640000" calcext:value-type="float">
            <text:p>8640000</text:p>
          </table:table-cell>
          <table:table-cell table:formula="of:=[.B1173]/[.C1173]" office:value-type="float" office:value="0.00149212962962963" calcext:value-type="float">
            <text:p>0,00149212962962963000</text:p>
          </table:table-cell>
          <table:table-cell table:formula="of:=[.D1174]-[.D1173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table:formula="of:=[.B1173]+11" office:value-type="float" office:value="12903" calcext:value-type="float">
            <text:p>12903</text:p>
          </table:table-cell>
          <table:table-cell office:value-type="float" office:value="8640000" calcext:value-type="float">
            <text:p>8640000</text:p>
          </table:table-cell>
          <table:table-cell table:formula="of:=[.B1174]/[.C1174]" office:value-type="float" office:value="0.00149340277777778" calcext:value-type="float">
            <text:p>0,00149340277777778000</text:p>
          </table:table-cell>
          <table:table-cell table:formula="of:=[.D1175]-[.D117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table:formula="of:=[.B1174]+11" office:value-type="float" office:value="12914" calcext:value-type="float">
            <text:p>12914</text:p>
          </table:table-cell>
          <table:table-cell office:value-type="float" office:value="8640000" calcext:value-type="float">
            <text:p>8640000</text:p>
          </table:table-cell>
          <table:table-cell table:formula="of:=[.B1175]/[.C1175]" office:value-type="float" office:value="0.00149467592592593" calcext:value-type="float">
            <text:p>0,00149467592592593000</text:p>
          </table:table-cell>
          <table:table-cell table:formula="of:=[.D1176]-[.D1175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table:formula="of:=[.B1175]+11" office:value-type="float" office:value="12925" calcext:value-type="float">
            <text:p>12925</text:p>
          </table:table-cell>
          <table:table-cell office:value-type="float" office:value="8640000" calcext:value-type="float">
            <text:p>8640000</text:p>
          </table:table-cell>
          <table:table-cell table:formula="of:=[.B1176]/[.C1176]" office:value-type="float" office:value="0.00149594907407407" calcext:value-type="float">
            <text:p>0,00149594907407407000</text:p>
          </table:table-cell>
          <table:table-cell table:formula="of:=[.D1177]-[.D117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[.B1176]+11" office:value-type="float" office:value="12936" calcext:value-type="float">
            <text:p>12936</text:p>
          </table:table-cell>
          <table:table-cell office:value-type="float" office:value="8640000" calcext:value-type="float">
            <text:p>8640000</text:p>
          </table:table-cell>
          <table:table-cell table:formula="of:=[.B1177]/[.C1177]" office:value-type="float" office:value="0.00149722222222222" calcext:value-type="float">
            <text:p>0,00149722222222222000</text:p>
          </table:table-cell>
          <table:table-cell table:formula="of:=[.D1178]-[.D1177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table:formula="of:=[.B1177]+11" office:value-type="float" office:value="12947" calcext:value-type="float">
            <text:p>12947</text:p>
          </table:table-cell>
          <table:table-cell office:value-type="float" office:value="8640000" calcext:value-type="float">
            <text:p>8640000</text:p>
          </table:table-cell>
          <table:table-cell table:formula="of:=[.B1178]/[.C1178]" office:value-type="float" office:value="0.00149849537037037" calcext:value-type="float">
            <text:p>0,00149849537037037000</text:p>
          </table:table-cell>
          <table:table-cell table:formula="of:=[.D1179]-[.D117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table:formula="of:=[.B1178]+11" office:value-type="float" office:value="12958" calcext:value-type="float">
            <text:p>12958</text:p>
          </table:table-cell>
          <table:table-cell office:value-type="float" office:value="8640000" calcext:value-type="float">
            <text:p>8640000</text:p>
          </table:table-cell>
          <table:table-cell table:formula="of:=[.B1179]/[.C1179]" office:value-type="float" office:value="0.00149976851851852" calcext:value-type="float">
            <text:p>0,00149976851851852000</text:p>
          </table:table-cell>
          <table:table-cell table:formula="of:=[.D1180]-[.D1179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table:formula="of:=[.B1179]+11" office:value-type="float" office:value="12969" calcext:value-type="float">
            <text:p>12969</text:p>
          </table:table-cell>
          <table:table-cell office:value-type="float" office:value="8640000" calcext:value-type="float">
            <text:p>8640000</text:p>
          </table:table-cell>
          <table:table-cell table:formula="of:=[.B1180]/[.C1180]" office:value-type="float" office:value="0.00150104166666667" calcext:value-type="float">
            <text:p>0,00150104166666667000</text:p>
          </table:table-cell>
          <table:table-cell table:formula="of:=[.D1181]-[.D118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table:formula="of:=[.B1180]+11" office:value-type="float" office:value="12980" calcext:value-type="float">
            <text:p>12980</text:p>
          </table:table-cell>
          <table:table-cell office:value-type="float" office:value="8640000" calcext:value-type="float">
            <text:p>8640000</text:p>
          </table:table-cell>
          <table:table-cell table:formula="of:=[.B1181]/[.C1181]" office:value-type="float" office:value="0.00150231481481481" calcext:value-type="float">
            <text:p>0,00150231481481481000</text:p>
          </table:table-cell>
          <table:table-cell table:formula="of:=[.D1182]-[.D1181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table:formula="of:=[.B1181]+11" office:value-type="float" office:value="12991" calcext:value-type="float">
            <text:p>12991</text:p>
          </table:table-cell>
          <table:table-cell office:value-type="float" office:value="8640000" calcext:value-type="float">
            <text:p>8640000</text:p>
          </table:table-cell>
          <table:table-cell table:formula="of:=[.B1182]/[.C1182]" office:value-type="float" office:value="0.00150358796296296" calcext:value-type="float">
            <text:p>0,00150358796296296000</text:p>
          </table:table-cell>
          <table:table-cell table:formula="of:=[.D1183]-[.D118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table:formula="of:=[.B1182]+11" office:value-type="float" office:value="13002" calcext:value-type="float">
            <text:p>13002</text:p>
          </table:table-cell>
          <table:table-cell office:value-type="float" office:value="8640000" calcext:value-type="float">
            <text:p>8640000</text:p>
          </table:table-cell>
          <table:table-cell table:formula="of:=[.B1183]/[.C1183]" office:value-type="float" office:value="0.00150486111111111" calcext:value-type="float">
            <text:p>0,00150486111111111000</text:p>
          </table:table-cell>
          <table:table-cell table:formula="of:=[.D1184]-[.D118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table:formula="of:=[.B1183]+11" office:value-type="float" office:value="13013" calcext:value-type="float">
            <text:p>13013</text:p>
          </table:table-cell>
          <table:table-cell office:value-type="float" office:value="8640000" calcext:value-type="float">
            <text:p>8640000</text:p>
          </table:table-cell>
          <table:table-cell table:formula="of:=[.B1184]/[.C1184]" office:value-type="float" office:value="0.00150613425925926" calcext:value-type="float">
            <text:p>0,00150613425925926000</text:p>
          </table:table-cell>
          <table:table-cell table:formula="of:=[.D1185]-[.D1184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table:formula="of:=[.B1184]+11" office:value-type="float" office:value="13024" calcext:value-type="float">
            <text:p>13024</text:p>
          </table:table-cell>
          <table:table-cell office:value-type="float" office:value="8640000" calcext:value-type="float">
            <text:p>8640000</text:p>
          </table:table-cell>
          <table:table-cell table:formula="of:=[.B1185]/[.C1185]" office:value-type="float" office:value="0.00150740740740741" calcext:value-type="float">
            <text:p>0,00150740740740741000</text:p>
          </table:table-cell>
          <table:table-cell table:formula="of:=[.D1186]-[.D118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[.B1185]+11" office:value-type="float" office:value="13035" calcext:value-type="float">
            <text:p>13035</text:p>
          </table:table-cell>
          <table:table-cell office:value-type="float" office:value="8640000" calcext:value-type="float">
            <text:p>8640000</text:p>
          </table:table-cell>
          <table:table-cell table:formula="of:=[.B1186]/[.C1186]" office:value-type="float" office:value="0.00150868055555556" calcext:value-type="float">
            <text:p>0,00150868055555556000</text:p>
          </table:table-cell>
          <table:table-cell table:formula="of:=[.D1187]-[.D1186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table:formula="of:=[.B1186]+11" office:value-type="float" office:value="13046" calcext:value-type="float">
            <text:p>13046</text:p>
          </table:table-cell>
          <table:table-cell office:value-type="float" office:value="8640000" calcext:value-type="float">
            <text:p>8640000</text:p>
          </table:table-cell>
          <table:table-cell table:formula="of:=[.B1187]/[.C1187]" office:value-type="float" office:value="0.0015099537037037" calcext:value-type="float">
            <text:p>0,00150995370370370000</text:p>
          </table:table-cell>
          <table:table-cell table:formula="of:=[.D1188]-[.D118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table:formula="of:=[.B1187]+11" office:value-type="float" office:value="13057" calcext:value-type="float">
            <text:p>13057</text:p>
          </table:table-cell>
          <table:table-cell office:value-type="float" office:value="8640000" calcext:value-type="float">
            <text:p>8640000</text:p>
          </table:table-cell>
          <table:table-cell table:formula="of:=[.B1188]/[.C1188]" office:value-type="float" office:value="0.00151122685185185" calcext:value-type="float">
            <text:p>0,00151122685185185000</text:p>
          </table:table-cell>
          <table:table-cell table:formula="of:=[.D1189]-[.D1188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table:formula="of:=[.B1188]+11" office:value-type="float" office:value="13068" calcext:value-type="float">
            <text:p>13068</text:p>
          </table:table-cell>
          <table:table-cell office:value-type="float" office:value="8640000" calcext:value-type="float">
            <text:p>8640000</text:p>
          </table:table-cell>
          <table:table-cell table:formula="of:=[.B1189]/[.C1189]" office:value-type="float" office:value="0.0015125" calcext:value-type="float">
            <text:p>0,00151250000000000000</text:p>
          </table:table-cell>
          <table:table-cell table:formula="of:=[.D1190]-[.D118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table:formula="of:=[.B1189]+11" office:value-type="float" office:value="13079" calcext:value-type="float">
            <text:p>13079</text:p>
          </table:table-cell>
          <table:table-cell office:value-type="float" office:value="8640000" calcext:value-type="float">
            <text:p>8640000</text:p>
          </table:table-cell>
          <table:table-cell table:formula="of:=[.B1190]/[.C1190]" office:value-type="float" office:value="0.00151377314814815" calcext:value-type="float">
            <text:p>0,00151377314814815000</text:p>
          </table:table-cell>
          <table:table-cell table:formula="of:=[.D1191]-[.D1190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table:formula="of:=[.B1190]+11" office:value-type="float" office:value="13090" calcext:value-type="float">
            <text:p>13090</text:p>
          </table:table-cell>
          <table:table-cell office:value-type="float" office:value="8640000" calcext:value-type="float">
            <text:p>8640000</text:p>
          </table:table-cell>
          <table:table-cell table:formula="of:=[.B1191]/[.C1191]" office:value-type="float" office:value="0.0015150462962963" calcext:value-type="float">
            <text:p>0,00151504629629630000</text:p>
          </table:table-cell>
          <table:table-cell table:formula="of:=[.D1192]-[.D119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table:formula="of:=[.B1191]+11" office:value-type="float" office:value="13101" calcext:value-type="float">
            <text:p>13101</text:p>
          </table:table-cell>
          <table:table-cell office:value-type="float" office:value="8640000" calcext:value-type="float">
            <text:p>8640000</text:p>
          </table:table-cell>
          <table:table-cell table:formula="of:=[.B1192]/[.C1192]" office:value-type="float" office:value="0.00151631944444444" calcext:value-type="float">
            <text:p>0,00151631944444444000</text:p>
          </table:table-cell>
          <table:table-cell table:formula="of:=[.D1193]-[.D1192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table:formula="of:=[.B1192]+11" office:value-type="float" office:value="13112" calcext:value-type="float">
            <text:p>13112</text:p>
          </table:table-cell>
          <table:table-cell office:value-type="float" office:value="8640000" calcext:value-type="float">
            <text:p>8640000</text:p>
          </table:table-cell>
          <table:table-cell table:formula="of:=[.B1193]/[.C1193]" office:value-type="float" office:value="0.00151759259259259" calcext:value-type="float">
            <text:p>0,00151759259259259000</text:p>
          </table:table-cell>
          <table:table-cell table:formula="of:=[.D1194]-[.D119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[.B1193]+11" office:value-type="float" office:value="13123" calcext:value-type="float">
            <text:p>13123</text:p>
          </table:table-cell>
          <table:table-cell office:value-type="float" office:value="8640000" calcext:value-type="float">
            <text:p>8640000</text:p>
          </table:table-cell>
          <table:table-cell table:formula="of:=[.B1194]/[.C1194]" office:value-type="float" office:value="0.00151886574074074" calcext:value-type="float">
            <text:p>0,00151886574074074000</text:p>
          </table:table-cell>
          <table:table-cell table:formula="of:=[.D1195]-[.D1194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table:formula="of:=[.B1194]+11" office:value-type="float" office:value="13134" calcext:value-type="float">
            <text:p>13134</text:p>
          </table:table-cell>
          <table:table-cell office:value-type="float" office:value="8640000" calcext:value-type="float">
            <text:p>8640000</text:p>
          </table:table-cell>
          <table:table-cell table:formula="of:=[.B1195]/[.C1195]" office:value-type="float" office:value="0.00152013888888889" calcext:value-type="float">
            <text:p>0,00152013888888889000</text:p>
          </table:table-cell>
          <table:table-cell table:formula="of:=[.D1196]-[.D119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table:formula="of:=[.B1195]+11" office:value-type="float" office:value="13145" calcext:value-type="float">
            <text:p>13145</text:p>
          </table:table-cell>
          <table:table-cell office:value-type="float" office:value="8640000" calcext:value-type="float">
            <text:p>8640000</text:p>
          </table:table-cell>
          <table:table-cell table:formula="of:=[.B1196]/[.C1196]" office:value-type="float" office:value="0.00152141203703704" calcext:value-type="float">
            <text:p>0,00152141203703704000</text:p>
          </table:table-cell>
          <table:table-cell table:formula="of:=[.D1197]-[.D1196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table:formula="of:=[.B1196]+11" office:value-type="float" office:value="13156" calcext:value-type="float">
            <text:p>13156</text:p>
          </table:table-cell>
          <table:table-cell office:value-type="float" office:value="8640000" calcext:value-type="float">
            <text:p>8640000</text:p>
          </table:table-cell>
          <table:table-cell table:formula="of:=[.B1197]/[.C1197]" office:value-type="float" office:value="0.00152268518518519" calcext:value-type="float">
            <text:p>0,00152268518518518000</text:p>
          </table:table-cell>
          <table:table-cell table:formula="of:=[.D1198]-[.D119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table:formula="of:=[.B1197]+11" office:value-type="float" office:value="13167" calcext:value-type="float">
            <text:p>13167</text:p>
          </table:table-cell>
          <table:table-cell office:value-type="float" office:value="8640000" calcext:value-type="float">
            <text:p>8640000</text:p>
          </table:table-cell>
          <table:table-cell table:formula="of:=[.B1198]/[.C1198]" office:value-type="float" office:value="0.00152395833333333" calcext:value-type="float">
            <text:p>0,00152395833333333000</text:p>
          </table:table-cell>
          <table:table-cell table:formula="of:=[.D1199]-[.D119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table:formula="of:=[.B1198]+11" office:value-type="float" office:value="13178" calcext:value-type="float">
            <text:p>13178</text:p>
          </table:table-cell>
          <table:table-cell office:value-type="float" office:value="8640000" calcext:value-type="float">
            <text:p>8640000</text:p>
          </table:table-cell>
          <table:table-cell table:formula="of:=[.B1199]/[.C1199]" office:value-type="float" office:value="0.00152523148148148" calcext:value-type="float">
            <text:p>0,00152523148148148000</text:p>
          </table:table-cell>
          <table:table-cell table:formula="of:=[.D1200]-[.D1199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table:formula="of:=[.B1199]+11" office:value-type="float" office:value="13189" calcext:value-type="float">
            <text:p>13189</text:p>
          </table:table-cell>
          <table:table-cell office:value-type="float" office:value="8640000" calcext:value-type="float">
            <text:p>8640000</text:p>
          </table:table-cell>
          <table:table-cell table:formula="of:=[.B1200]/[.C1200]" office:value-type="float" office:value="0.00152650462962963" calcext:value-type="float">
            <text:p>0,00152650462962963000</text:p>
          </table:table-cell>
          <table:table-cell table:formula="of:=[.D1201]-[.D120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.B1200]+11" office:value-type="float" office:value="13200" calcext:value-type="float">
            <text:p>13200</text:p>
          </table:table-cell>
          <table:table-cell office:value-type="float" office:value="8640000" calcext:value-type="float">
            <text:p>8640000</text:p>
          </table:table-cell>
          <table:table-cell table:formula="of:=[.B1201]/[.C1201]" office:value-type="float" office:value="0.00152777777777778" calcext:value-type="float">
            <text:p>0,00152777777777778000</text:p>
          </table:table-cell>
          <table:table-cell table:formula="of:=[.D1202]-[.D1201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[.B1201]+11" office:value-type="float" office:value="13211" calcext:value-type="float">
            <text:p>13211</text:p>
          </table:table-cell>
          <table:table-cell office:value-type="float" office:value="8640000" calcext:value-type="float">
            <text:p>8640000</text:p>
          </table:table-cell>
          <table:table-cell table:formula="of:=[.B1202]/[.C1202]" office:value-type="float" office:value="0.00152905092592593" calcext:value-type="float">
            <text:p>0,00152905092592593000</text:p>
          </table:table-cell>
          <table:table-cell table:formula="of:=[.D1203]-[.D120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table:formula="of:=[.B1202]+11" office:value-type="float" office:value="13222" calcext:value-type="float">
            <text:p>13222</text:p>
          </table:table-cell>
          <table:table-cell office:value-type="float" office:value="8640000" calcext:value-type="float">
            <text:p>8640000</text:p>
          </table:table-cell>
          <table:table-cell table:formula="of:=[.B1203]/[.C1203]" office:value-type="float" office:value="0.00153032407407407" calcext:value-type="float">
            <text:p>0,00153032407407407000</text:p>
          </table:table-cell>
          <table:table-cell table:formula="of:=[.D1204]-[.D1203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table:formula="of:=[.B1203]+11" office:value-type="float" office:value="13233" calcext:value-type="float">
            <text:p>13233</text:p>
          </table:table-cell>
          <table:table-cell office:value-type="float" office:value="8640000" calcext:value-type="float">
            <text:p>8640000</text:p>
          </table:table-cell>
          <table:table-cell table:formula="of:=[.B1204]/[.C1204]" office:value-type="float" office:value="0.00153159722222222" calcext:value-type="float">
            <text:p>0,00153159722222222000</text:p>
          </table:table-cell>
          <table:table-cell table:formula="of:=[.D1205]-[.D120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table:formula="of:=[.B1204]+11" office:value-type="float" office:value="13244" calcext:value-type="float">
            <text:p>13244</text:p>
          </table:table-cell>
          <table:table-cell office:value-type="float" office:value="8640000" calcext:value-type="float">
            <text:p>8640000</text:p>
          </table:table-cell>
          <table:table-cell table:formula="of:=[.B1205]/[.C1205]" office:value-type="float" office:value="0.00153287037037037" calcext:value-type="float">
            <text:p>0,00153287037037037000</text:p>
          </table:table-cell>
          <table:table-cell table:formula="of:=[.D1206]-[.D1205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table:formula="of:=[.B1205]+11" office:value-type="float" office:value="13255" calcext:value-type="float">
            <text:p>13255</text:p>
          </table:table-cell>
          <table:table-cell office:value-type="float" office:value="8640000" calcext:value-type="float">
            <text:p>8640000</text:p>
          </table:table-cell>
          <table:table-cell table:formula="of:=[.B1206]/[.C1206]" office:value-type="float" office:value="0.00153414351851852" calcext:value-type="float">
            <text:p>0,00153414351851852000</text:p>
          </table:table-cell>
          <table:table-cell table:formula="of:=[.D1207]-[.D120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table:formula="of:=[.B1206]+11" office:value-type="float" office:value="13266" calcext:value-type="float">
            <text:p>13266</text:p>
          </table:table-cell>
          <table:table-cell office:value-type="float" office:value="8640000" calcext:value-type="float">
            <text:p>8640000</text:p>
          </table:table-cell>
          <table:table-cell table:formula="of:=[.B1207]/[.C1207]" office:value-type="float" office:value="0.00153541666666667" calcext:value-type="float">
            <text:p>0,00153541666666667000</text:p>
          </table:table-cell>
          <table:table-cell table:formula="of:=[.D1208]-[.D1207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table:formula="of:=[.B1207]+11" office:value-type="float" office:value="13277" calcext:value-type="float">
            <text:p>13277</text:p>
          </table:table-cell>
          <table:table-cell office:value-type="float" office:value="8640000" calcext:value-type="float">
            <text:p>8640000</text:p>
          </table:table-cell>
          <table:table-cell table:formula="of:=[.B1208]/[.C1208]" office:value-type="float" office:value="0.00153668981481481" calcext:value-type="float">
            <text:p>0,00153668981481481000</text:p>
          </table:table-cell>
          <table:table-cell table:formula="of:=[.D1209]-[.D120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table:formula="of:=[.B1208]+11" office:value-type="float" office:value="13288" calcext:value-type="float">
            <text:p>13288</text:p>
          </table:table-cell>
          <table:table-cell office:value-type="float" office:value="8640000" calcext:value-type="float">
            <text:p>8640000</text:p>
          </table:table-cell>
          <table:table-cell table:formula="of:=[.B1209]/[.C1209]" office:value-type="float" office:value="0.00153796296296296" calcext:value-type="float">
            <text:p>0,00153796296296296000</text:p>
          </table:table-cell>
          <table:table-cell table:formula="of:=[.D1210]-[.D1209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table:formula="of:=[.B1209]+11" office:value-type="float" office:value="13299" calcext:value-type="float">
            <text:p>13299</text:p>
          </table:table-cell>
          <table:table-cell office:value-type="float" office:value="8640000" calcext:value-type="float">
            <text:p>8640000</text:p>
          </table:table-cell>
          <table:table-cell table:formula="of:=[.B1210]/[.C1210]" office:value-type="float" office:value="0.00153923611111111" calcext:value-type="float">
            <text:p>0,00153923611111111000</text:p>
          </table:table-cell>
          <table:table-cell table:formula="of:=[.D1211]-[.D121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table:formula="of:=[.B1210]+11" office:value-type="float" office:value="13310" calcext:value-type="float">
            <text:p>13310</text:p>
          </table:table-cell>
          <table:table-cell office:value-type="float" office:value="8640000" calcext:value-type="float">
            <text:p>8640000</text:p>
          </table:table-cell>
          <table:table-cell table:formula="of:=[.B1211]/[.C1211]" office:value-type="float" office:value="0.00154050925925926" calcext:value-type="float">
            <text:p>0,00154050925925926000</text:p>
          </table:table-cell>
          <table:table-cell table:formula="of:=[.D1212]-[.D121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table:formula="of:=[.B1211]+11" office:value-type="float" office:value="13321" calcext:value-type="float">
            <text:p>13321</text:p>
          </table:table-cell>
          <table:table-cell office:value-type="float" office:value="8640000" calcext:value-type="float">
            <text:p>8640000</text:p>
          </table:table-cell>
          <table:table-cell table:formula="of:=[.B1212]/[.C1212]" office:value-type="float" office:value="0.00154178240740741" calcext:value-type="float">
            <text:p>0,00154178240740741000</text:p>
          </table:table-cell>
          <table:table-cell table:formula="of:=[.D1213]-[.D1212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table:formula="of:=[.B1212]+11" office:value-type="float" office:value="13332" calcext:value-type="float">
            <text:p>13332</text:p>
          </table:table-cell>
          <table:table-cell office:value-type="float" office:value="8640000" calcext:value-type="float">
            <text:p>8640000</text:p>
          </table:table-cell>
          <table:table-cell table:formula="of:=[.B1213]/[.C1213]" office:value-type="float" office:value="0.00154305555555556" calcext:value-type="float">
            <text:p>0,00154305555555556000</text:p>
          </table:table-cell>
          <table:table-cell table:formula="of:=[.D1214]-[.D121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table:formula="of:=[.B1213]+11" office:value-type="float" office:value="13343" calcext:value-type="float">
            <text:p>13343</text:p>
          </table:table-cell>
          <table:table-cell office:value-type="float" office:value="8640000" calcext:value-type="float">
            <text:p>8640000</text:p>
          </table:table-cell>
          <table:table-cell table:formula="of:=[.B1214]/[.C1214]" office:value-type="float" office:value="0.0015443287037037" calcext:value-type="float">
            <text:p>0,00154432870370370000</text:p>
          </table:table-cell>
          <table:table-cell table:formula="of:=[.D1215]-[.D1214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table:formula="of:=[.B1214]+11" office:value-type="float" office:value="13354" calcext:value-type="float">
            <text:p>13354</text:p>
          </table:table-cell>
          <table:table-cell office:value-type="float" office:value="8640000" calcext:value-type="float">
            <text:p>8640000</text:p>
          </table:table-cell>
          <table:table-cell table:formula="of:=[.B1215]/[.C1215]" office:value-type="float" office:value="0.00154560185185185" calcext:value-type="float">
            <text:p>0,00154560185185185000</text:p>
          </table:table-cell>
          <table:table-cell table:formula="of:=[.D1216]-[.D121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table:formula="of:=[.B1215]+11" office:value-type="float" office:value="13365" calcext:value-type="float">
            <text:p>13365</text:p>
          </table:table-cell>
          <table:table-cell office:value-type="float" office:value="8640000" calcext:value-type="float">
            <text:p>8640000</text:p>
          </table:table-cell>
          <table:table-cell table:formula="of:=[.B1216]/[.C1216]" office:value-type="float" office:value="0.001546875" calcext:value-type="float">
            <text:p>0,00154687500000000000</text:p>
          </table:table-cell>
          <table:table-cell table:formula="of:=[.D1217]-[.D1216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table:formula="of:=[.B1216]+11" office:value-type="float" office:value="13376" calcext:value-type="float">
            <text:p>13376</text:p>
          </table:table-cell>
          <table:table-cell office:value-type="float" office:value="8640000" calcext:value-type="float">
            <text:p>8640000</text:p>
          </table:table-cell>
          <table:table-cell table:formula="of:=[.B1217]/[.C1217]" office:value-type="float" office:value="0.00154814814814815" calcext:value-type="float">
            <text:p>0,00154814814814815000</text:p>
          </table:table-cell>
          <table:table-cell table:formula="of:=[.D1218]-[.D121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table:formula="of:=[.B1217]+11" office:value-type="float" office:value="13387" calcext:value-type="float">
            <text:p>13387</text:p>
          </table:table-cell>
          <table:table-cell office:value-type="float" office:value="8640000" calcext:value-type="float">
            <text:p>8640000</text:p>
          </table:table-cell>
          <table:table-cell table:formula="of:=[.B1218]/[.C1218]" office:value-type="float" office:value="0.0015494212962963" calcext:value-type="float">
            <text:p>0,00154942129629630000</text:p>
          </table:table-cell>
          <table:table-cell table:formula="of:=[.D1219]-[.D1218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table:formula="of:=[.B1218]+11" office:value-type="float" office:value="13398" calcext:value-type="float">
            <text:p>13398</text:p>
          </table:table-cell>
          <table:table-cell office:value-type="float" office:value="8640000" calcext:value-type="float">
            <text:p>8640000</text:p>
          </table:table-cell>
          <table:table-cell table:formula="of:=[.B1219]/[.C1219]" office:value-type="float" office:value="0.00155069444444444" calcext:value-type="float">
            <text:p>0,00155069444444444000</text:p>
          </table:table-cell>
          <table:table-cell table:formula="of:=[.D1220]-[.D121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table:formula="of:=[.B1219]+11" office:value-type="float" office:value="13409" calcext:value-type="float">
            <text:p>13409</text:p>
          </table:table-cell>
          <table:table-cell office:value-type="float" office:value="8640000" calcext:value-type="float">
            <text:p>8640000</text:p>
          </table:table-cell>
          <table:table-cell table:formula="of:=[.B1220]/[.C1220]" office:value-type="float" office:value="0.00155196759259259" calcext:value-type="float">
            <text:p>0,00155196759259259000</text:p>
          </table:table-cell>
          <table:table-cell table:formula="of:=[.D1221]-[.D1220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[.B1220]+11" office:value-type="float" office:value="13420" calcext:value-type="float">
            <text:p>13420</text:p>
          </table:table-cell>
          <table:table-cell office:value-type="float" office:value="8640000" calcext:value-type="float">
            <text:p>8640000</text:p>
          </table:table-cell>
          <table:table-cell table:formula="of:=[.B1221]/[.C1221]" office:value-type="float" office:value="0.00155324074074074" calcext:value-type="float">
            <text:p>0,00155324074074074000</text:p>
          </table:table-cell>
          <table:table-cell table:formula="of:=[.D1222]-[.D122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table:formula="of:=[.B1221]+11" office:value-type="float" office:value="13431" calcext:value-type="float">
            <text:p>13431</text:p>
          </table:table-cell>
          <table:table-cell office:value-type="float" office:value="8640000" calcext:value-type="float">
            <text:p>8640000</text:p>
          </table:table-cell>
          <table:table-cell table:formula="of:=[.B1222]/[.C1222]" office:value-type="float" office:value="0.00155451388888889" calcext:value-type="float">
            <text:p>0,00155451388888889000</text:p>
          </table:table-cell>
          <table:table-cell table:formula="of:=[.D1223]-[.D1222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table:formula="of:=[.B1222]+11" office:value-type="float" office:value="13442" calcext:value-type="float">
            <text:p>13442</text:p>
          </table:table-cell>
          <table:table-cell office:value-type="float" office:value="8640000" calcext:value-type="float">
            <text:p>8640000</text:p>
          </table:table-cell>
          <table:table-cell table:formula="of:=[.B1223]/[.C1223]" office:value-type="float" office:value="0.00155578703703704" calcext:value-type="float">
            <text:p>0,00155578703703704000</text:p>
          </table:table-cell>
          <table:table-cell table:formula="of:=[.D1224]-[.D122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table:formula="of:=[.B1223]+11" office:value-type="float" office:value="13453" calcext:value-type="float">
            <text:p>13453</text:p>
          </table:table-cell>
          <table:table-cell office:value-type="float" office:value="8640000" calcext:value-type="float">
            <text:p>8640000</text:p>
          </table:table-cell>
          <table:table-cell table:formula="of:=[.B1224]/[.C1224]" office:value-type="float" office:value="0.00155706018518519" calcext:value-type="float">
            <text:p>0,00155706018518519000</text:p>
          </table:table-cell>
          <table:table-cell table:formula="of:=[.D1225]-[.D1224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table:formula="of:=[.B1224]+11" office:value-type="float" office:value="13464" calcext:value-type="float">
            <text:p>13464</text:p>
          </table:table-cell>
          <table:table-cell office:value-type="float" office:value="8640000" calcext:value-type="float">
            <text:p>8640000</text:p>
          </table:table-cell>
          <table:table-cell table:formula="of:=[.B1225]/[.C1225]" office:value-type="float" office:value="0.00155833333333333" calcext:value-type="float">
            <text:p>0,00155833333333333000</text:p>
          </table:table-cell>
          <table:table-cell table:formula="of:=[.D1226]-[.D122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table:formula="of:=[.B1225]+11" office:value-type="float" office:value="13475" calcext:value-type="float">
            <text:p>13475</text:p>
          </table:table-cell>
          <table:table-cell office:value-type="float" office:value="8640000" calcext:value-type="float">
            <text:p>8640000</text:p>
          </table:table-cell>
          <table:table-cell table:formula="of:=[.B1226]/[.C1226]" office:value-type="float" office:value="0.00155960648148148" calcext:value-type="float">
            <text:p>0,00155960648148148000</text:p>
          </table:table-cell>
          <table:table-cell table:formula="of:=[.D1227]-[.D122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table:formula="of:=[.B1226]+11" office:value-type="float" office:value="13486" calcext:value-type="float">
            <text:p>13486</text:p>
          </table:table-cell>
          <table:table-cell office:value-type="float" office:value="8640000" calcext:value-type="float">
            <text:p>8640000</text:p>
          </table:table-cell>
          <table:table-cell table:formula="of:=[.B1227]/[.C1227]" office:value-type="float" office:value="0.00156087962962963" calcext:value-type="float">
            <text:p>0,00156087962962963000</text:p>
          </table:table-cell>
          <table:table-cell table:formula="of:=[.D1228]-[.D1227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table:formula="of:=[.B1227]+11" office:value-type="float" office:value="13497" calcext:value-type="float">
            <text:p>13497</text:p>
          </table:table-cell>
          <table:table-cell office:value-type="float" office:value="8640000" calcext:value-type="float">
            <text:p>8640000</text:p>
          </table:table-cell>
          <table:table-cell table:formula="of:=[.B1228]/[.C1228]" office:value-type="float" office:value="0.00156215277777778" calcext:value-type="float">
            <text:p>0,00156215277777778000</text:p>
          </table:table-cell>
          <table:table-cell table:formula="of:=[.D1229]-[.D122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table:formula="of:=[.B1228]+11" office:value-type="float" office:value="13508" calcext:value-type="float">
            <text:p>13508</text:p>
          </table:table-cell>
          <table:table-cell office:value-type="float" office:value="8640000" calcext:value-type="float">
            <text:p>8640000</text:p>
          </table:table-cell>
          <table:table-cell table:formula="of:=[.B1229]/[.C1229]" office:value-type="float" office:value="0.00156342592592593" calcext:value-type="float">
            <text:p>0,00156342592592593000</text:p>
          </table:table-cell>
          <table:table-cell table:formula="of:=[.D1230]-[.D1229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table:formula="of:=[.B1229]+11" office:value-type="float" office:value="13519" calcext:value-type="float">
            <text:p>13519</text:p>
          </table:table-cell>
          <table:table-cell office:value-type="float" office:value="8640000" calcext:value-type="float">
            <text:p>8640000</text:p>
          </table:table-cell>
          <table:table-cell table:formula="of:=[.B1230]/[.C1230]" office:value-type="float" office:value="0.00156469907407407" calcext:value-type="float">
            <text:p>0,00156469907407407000</text:p>
          </table:table-cell>
          <table:table-cell table:formula="of:=[.D1231]-[.D123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table:formula="of:=[.B1230]+11" office:value-type="float" office:value="13530" calcext:value-type="float">
            <text:p>13530</text:p>
          </table:table-cell>
          <table:table-cell office:value-type="float" office:value="8640000" calcext:value-type="float">
            <text:p>8640000</text:p>
          </table:table-cell>
          <table:table-cell table:formula="of:=[.B1231]/[.C1231]" office:value-type="float" office:value="0.00156597222222222" calcext:value-type="float">
            <text:p>0,00156597222222222000</text:p>
          </table:table-cell>
          <table:table-cell table:formula="of:=[.D1232]-[.D1231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table:formula="of:=[.B1231]+11" office:value-type="float" office:value="13541" calcext:value-type="float">
            <text:p>13541</text:p>
          </table:table-cell>
          <table:table-cell office:value-type="float" office:value="8640000" calcext:value-type="float">
            <text:p>8640000</text:p>
          </table:table-cell>
          <table:table-cell table:formula="of:=[.B1232]/[.C1232]" office:value-type="float" office:value="0.00156724537037037" calcext:value-type="float">
            <text:p>0,00156724537037037000</text:p>
          </table:table-cell>
          <table:table-cell table:formula="of:=[.D1233]-[.D123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table:formula="of:=[.B1232]+11" office:value-type="float" office:value="13552" calcext:value-type="float">
            <text:p>13552</text:p>
          </table:table-cell>
          <table:table-cell office:value-type="float" office:value="8640000" calcext:value-type="float">
            <text:p>8640000</text:p>
          </table:table-cell>
          <table:table-cell table:formula="of:=[.B1233]/[.C1233]" office:value-type="float" office:value="0.00156851851851852" calcext:value-type="float">
            <text:p>0,00156851851851852000</text:p>
          </table:table-cell>
          <table:table-cell table:formula="of:=[.D1234]-[.D1233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table:formula="of:=[.B1233]+11" office:value-type="float" office:value="13563" calcext:value-type="float">
            <text:p>13563</text:p>
          </table:table-cell>
          <table:table-cell office:value-type="float" office:value="8640000" calcext:value-type="float">
            <text:p>8640000</text:p>
          </table:table-cell>
          <table:table-cell table:formula="of:=[.B1234]/[.C1234]" office:value-type="float" office:value="0.00156979166666667" calcext:value-type="float">
            <text:p>0,00156979166666667000</text:p>
          </table:table-cell>
          <table:table-cell table:formula="of:=[.D1235]-[.D123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table:formula="of:=[.B1234]+11" office:value-type="float" office:value="13574" calcext:value-type="float">
            <text:p>13574</text:p>
          </table:table-cell>
          <table:table-cell office:value-type="float" office:value="8640000" calcext:value-type="float">
            <text:p>8640000</text:p>
          </table:table-cell>
          <table:table-cell table:formula="of:=[.B1235]/[.C1235]" office:value-type="float" office:value="0.00157106481481481" calcext:value-type="float">
            <text:p>0,00157106481481481000</text:p>
          </table:table-cell>
          <table:table-cell table:formula="of:=[.D1236]-[.D1235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table:formula="of:=[.B1235]+11" office:value-type="float" office:value="13585" calcext:value-type="float">
            <text:p>13585</text:p>
          </table:table-cell>
          <table:table-cell office:value-type="float" office:value="8640000" calcext:value-type="float">
            <text:p>8640000</text:p>
          </table:table-cell>
          <table:table-cell table:formula="of:=[.B1236]/[.C1236]" office:value-type="float" office:value="0.00157233796296296" calcext:value-type="float">
            <text:p>0,00157233796296296000</text:p>
          </table:table-cell>
          <table:table-cell table:formula="of:=[.D1237]-[.D123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table:formula="of:=[.B1236]+11" office:value-type="float" office:value="13596" calcext:value-type="float">
            <text:p>13596</text:p>
          </table:table-cell>
          <table:table-cell office:value-type="float" office:value="8640000" calcext:value-type="float">
            <text:p>8640000</text:p>
          </table:table-cell>
          <table:table-cell table:formula="of:=[.B1237]/[.C1237]" office:value-type="float" office:value="0.00157361111111111" calcext:value-type="float">
            <text:p>0,00157361111111111000</text:p>
          </table:table-cell>
          <table:table-cell table:formula="of:=[.D1238]-[.D1237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table:formula="of:=[.B1237]+11" office:value-type="float" office:value="13607" calcext:value-type="float">
            <text:p>13607</text:p>
          </table:table-cell>
          <table:table-cell office:value-type="float" office:value="8640000" calcext:value-type="float">
            <text:p>8640000</text:p>
          </table:table-cell>
          <table:table-cell table:formula="of:=[.B1238]/[.C1238]" office:value-type="float" office:value="0.00157488425925926" calcext:value-type="float">
            <text:p>0,00157488425925926000</text:p>
          </table:table-cell>
          <table:table-cell table:formula="of:=[.D1239]-[.D123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table:formula="of:=[.B1238]+11" office:value-type="float" office:value="13618" calcext:value-type="float">
            <text:p>13618</text:p>
          </table:table-cell>
          <table:table-cell office:value-type="float" office:value="8640000" calcext:value-type="float">
            <text:p>8640000</text:p>
          </table:table-cell>
          <table:table-cell table:formula="of:=[.B1239]/[.C1239]" office:value-type="float" office:value="0.00157615740740741" calcext:value-type="float">
            <text:p>0,00157615740740741000</text:p>
          </table:table-cell>
          <table:table-cell table:formula="of:=[.D1240]-[.D123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table:formula="of:=[.B1239]+11" office:value-type="float" office:value="13629" calcext:value-type="float">
            <text:p>13629</text:p>
          </table:table-cell>
          <table:table-cell office:value-type="float" office:value="8640000" calcext:value-type="float">
            <text:p>8640000</text:p>
          </table:table-cell>
          <table:table-cell table:formula="of:=[.B1240]/[.C1240]" office:value-type="float" office:value="0.00157743055555556" calcext:value-type="float">
            <text:p>0,00157743055555556000</text:p>
          </table:table-cell>
          <table:table-cell table:formula="of:=[.D1241]-[.D1240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table:formula="of:=[.B1240]+11" office:value-type="float" office:value="13640" calcext:value-type="float">
            <text:p>13640</text:p>
          </table:table-cell>
          <table:table-cell office:value-type="float" office:value="8640000" calcext:value-type="float">
            <text:p>8640000</text:p>
          </table:table-cell>
          <table:table-cell table:formula="of:=[.B1241]/[.C1241]" office:value-type="float" office:value="0.0015787037037037" calcext:value-type="float">
            <text:p>0,00157870370370370000</text:p>
          </table:table-cell>
          <table:table-cell table:formula="of:=[.D1242]-[.D124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table:formula="of:=[.B1241]+11" office:value-type="float" office:value="13651" calcext:value-type="float">
            <text:p>13651</text:p>
          </table:table-cell>
          <table:table-cell office:value-type="float" office:value="8640000" calcext:value-type="float">
            <text:p>8640000</text:p>
          </table:table-cell>
          <table:table-cell table:formula="of:=[.B1242]/[.C1242]" office:value-type="float" office:value="0.00157997685185185" calcext:value-type="float">
            <text:p>0,00157997685185185000</text:p>
          </table:table-cell>
          <table:table-cell table:formula="of:=[.D1243]-[.D1242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table:formula="of:=[.B1242]+11" office:value-type="float" office:value="13662" calcext:value-type="float">
            <text:p>13662</text:p>
          </table:table-cell>
          <table:table-cell office:value-type="float" office:value="8640000" calcext:value-type="float">
            <text:p>8640000</text:p>
          </table:table-cell>
          <table:table-cell table:formula="of:=[.B1243]/[.C1243]" office:value-type="float" office:value="0.00158125" calcext:value-type="float">
            <text:p>0,00158125000000000000</text:p>
          </table:table-cell>
          <table:table-cell table:formula="of:=[.D1244]-[.D124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table:formula="of:=[.B1243]+11" office:value-type="float" office:value="13673" calcext:value-type="float">
            <text:p>13673</text:p>
          </table:table-cell>
          <table:table-cell office:value-type="float" office:value="8640000" calcext:value-type="float">
            <text:p>8640000</text:p>
          </table:table-cell>
          <table:table-cell table:formula="of:=[.B1244]/[.C1244]" office:value-type="float" office:value="0.00158252314814815" calcext:value-type="float">
            <text:p>0,00158252314814815000</text:p>
          </table:table-cell>
          <table:table-cell table:formula="of:=[.D1245]-[.D1244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[.B1244]+11" office:value-type="float" office:value="13684" calcext:value-type="float">
            <text:p>13684</text:p>
          </table:table-cell>
          <table:table-cell office:value-type="float" office:value="8640000" calcext:value-type="float">
            <text:p>8640000</text:p>
          </table:table-cell>
          <table:table-cell table:formula="of:=[.B1245]/[.C1245]" office:value-type="float" office:value="0.0015837962962963" calcext:value-type="float">
            <text:p>0,00158379629629630000</text:p>
          </table:table-cell>
          <table:table-cell table:formula="of:=[.D1246]-[.D124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table:formula="of:=[.B1245]+11" office:value-type="float" office:value="13695" calcext:value-type="float">
            <text:p>13695</text:p>
          </table:table-cell>
          <table:table-cell office:value-type="float" office:value="8640000" calcext:value-type="float">
            <text:p>8640000</text:p>
          </table:table-cell>
          <table:table-cell table:formula="of:=[.B1246]/[.C1246]" office:value-type="float" office:value="0.00158506944444444" calcext:value-type="float">
            <text:p>0,00158506944444444000</text:p>
          </table:table-cell>
          <table:table-cell table:formula="of:=[.D1247]-[.D1246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table:formula="of:=[.B1246]+11" office:value-type="float" office:value="13706" calcext:value-type="float">
            <text:p>13706</text:p>
          </table:table-cell>
          <table:table-cell office:value-type="float" office:value="8640000" calcext:value-type="float">
            <text:p>8640000</text:p>
          </table:table-cell>
          <table:table-cell table:formula="of:=[.B1247]/[.C1247]" office:value-type="float" office:value="0.00158634259259259" calcext:value-type="float">
            <text:p>0,00158634259259259000</text:p>
          </table:table-cell>
          <table:table-cell table:formula="of:=[.D1248]-[.D124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table:formula="of:=[.B1247]+11" office:value-type="float" office:value="13717" calcext:value-type="float">
            <text:p>13717</text:p>
          </table:table-cell>
          <table:table-cell office:value-type="float" office:value="8640000" calcext:value-type="float">
            <text:p>8640000</text:p>
          </table:table-cell>
          <table:table-cell table:formula="of:=[.B1248]/[.C1248]" office:value-type="float" office:value="0.00158761574074074" calcext:value-type="float">
            <text:p>0,00158761574074074000</text:p>
          </table:table-cell>
          <table:table-cell table:formula="of:=[.D1249]-[.D1248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table:formula="of:=[.B1248]+11" office:value-type="float" office:value="13728" calcext:value-type="float">
            <text:p>13728</text:p>
          </table:table-cell>
          <table:table-cell office:value-type="float" office:value="8640000" calcext:value-type="float">
            <text:p>8640000</text:p>
          </table:table-cell>
          <table:table-cell table:formula="of:=[.B1249]/[.C1249]" office:value-type="float" office:value="0.00158888888888889" calcext:value-type="float">
            <text:p>0,00158888888888889000</text:p>
          </table:table-cell>
          <table:table-cell table:formula="of:=[.D1250]-[.D124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table:formula="of:=[.B1249]+11" office:value-type="float" office:value="13739" calcext:value-type="float">
            <text:p>13739</text:p>
          </table:table-cell>
          <table:table-cell office:value-type="float" office:value="8640000" calcext:value-type="float">
            <text:p>8640000</text:p>
          </table:table-cell>
          <table:table-cell table:formula="of:=[.B1250]/[.C1250]" office:value-type="float" office:value="0.00159016203703704" calcext:value-type="float">
            <text:p>0,00159016203703704000</text:p>
          </table:table-cell>
          <table:table-cell table:formula="of:=[.D1251]-[.D1250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[.B1250]+11" office:value-type="float" office:value="13750" calcext:value-type="float">
            <text:p>13750</text:p>
          </table:table-cell>
          <table:table-cell office:value-type="float" office:value="8640000" calcext:value-type="float">
            <text:p>8640000</text:p>
          </table:table-cell>
          <table:table-cell table:formula="of:=[.B1251]/[.C1251]" office:value-type="float" office:value="0.00159143518518519" calcext:value-type="float">
            <text:p>0,00159143518518518000</text:p>
          </table:table-cell>
          <table:table-cell table:formula="of:=[.D1252]-[.D125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table:formula="of:=[.B1251]+11" office:value-type="float" office:value="13761" calcext:value-type="float">
            <text:p>13761</text:p>
          </table:table-cell>
          <table:table-cell office:value-type="float" office:value="8640000" calcext:value-type="float">
            <text:p>8640000</text:p>
          </table:table-cell>
          <table:table-cell table:formula="of:=[.B1252]/[.C1252]" office:value-type="float" office:value="0.00159270833333333" calcext:value-type="float">
            <text:p>0,00159270833333333000</text:p>
          </table:table-cell>
          <table:table-cell table:formula="of:=[.D1253]-[.D1252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table:formula="of:=[.B1252]+11" office:value-type="float" office:value="13772" calcext:value-type="float">
            <text:p>13772</text:p>
          </table:table-cell>
          <table:table-cell office:value-type="float" office:value="8640000" calcext:value-type="float">
            <text:p>8640000</text:p>
          </table:table-cell>
          <table:table-cell table:formula="of:=[.B1253]/[.C1253]" office:value-type="float" office:value="0.00159398148148148" calcext:value-type="float">
            <text:p>0,00159398148148148000</text:p>
          </table:table-cell>
          <table:table-cell table:formula="of:=[.D1254]-[.D125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table:formula="of:=[.B1253]+11" office:value-type="float" office:value="13783" calcext:value-type="float">
            <text:p>13783</text:p>
          </table:table-cell>
          <table:table-cell office:value-type="float" office:value="8640000" calcext:value-type="float">
            <text:p>8640000</text:p>
          </table:table-cell>
          <table:table-cell table:formula="of:=[.B1254]/[.C1254]" office:value-type="float" office:value="0.00159525462962963" calcext:value-type="float">
            <text:p>0,00159525462962963000</text:p>
          </table:table-cell>
          <table:table-cell table:formula="of:=[.D1255]-[.D125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table:formula="of:=[.B1254]+11" office:value-type="float" office:value="13794" calcext:value-type="float">
            <text:p>13794</text:p>
          </table:table-cell>
          <table:table-cell office:value-type="float" office:value="8640000" calcext:value-type="float">
            <text:p>8640000</text:p>
          </table:table-cell>
          <table:table-cell table:formula="of:=[.B1255]/[.C1255]" office:value-type="float" office:value="0.00159652777777778" calcext:value-type="float">
            <text:p>0,00159652777777778000</text:p>
          </table:table-cell>
          <table:table-cell table:formula="of:=[.D1256]-[.D1255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table:formula="of:=[.B1255]+11" office:value-type="float" office:value="13805" calcext:value-type="float">
            <text:p>13805</text:p>
          </table:table-cell>
          <table:table-cell office:value-type="float" office:value="8640000" calcext:value-type="float">
            <text:p>8640000</text:p>
          </table:table-cell>
          <table:table-cell table:formula="of:=[.B1256]/[.C1256]" office:value-type="float" office:value="0.00159780092592593" calcext:value-type="float">
            <text:p>0,00159780092592593000</text:p>
          </table:table-cell>
          <table:table-cell table:formula="of:=[.D1257]-[.D125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table:formula="of:=[.B1256]+11" office:value-type="float" office:value="13816" calcext:value-type="float">
            <text:p>13816</text:p>
          </table:table-cell>
          <table:table-cell office:value-type="float" office:value="8640000" calcext:value-type="float">
            <text:p>8640000</text:p>
          </table:table-cell>
          <table:table-cell table:formula="of:=[.B1257]/[.C1257]" office:value-type="float" office:value="0.00159907407407407" calcext:value-type="float">
            <text:p>0,00159907407407407000</text:p>
          </table:table-cell>
          <table:table-cell table:formula="of:=[.D1258]-[.D1257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table:formula="of:=[.B1257]+11" office:value-type="float" office:value="13827" calcext:value-type="float">
            <text:p>13827</text:p>
          </table:table-cell>
          <table:table-cell office:value-type="float" office:value="8640000" calcext:value-type="float">
            <text:p>8640000</text:p>
          </table:table-cell>
          <table:table-cell table:formula="of:=[.B1258]/[.C1258]" office:value-type="float" office:value="0.00160034722222222" calcext:value-type="float">
            <text:p>0,00160034722222222000</text:p>
          </table:table-cell>
          <table:table-cell table:formula="of:=[.D1259]-[.D125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table:formula="of:=[.B1258]+11" office:value-type="float" office:value="13838" calcext:value-type="float">
            <text:p>13838</text:p>
          </table:table-cell>
          <table:table-cell office:value-type="float" office:value="8640000" calcext:value-type="float">
            <text:p>8640000</text:p>
          </table:table-cell>
          <table:table-cell table:formula="of:=[.B1259]/[.C1259]" office:value-type="float" office:value="0.00160162037037037" calcext:value-type="float">
            <text:p>0,00160162037037037000</text:p>
          </table:table-cell>
          <table:table-cell table:formula="of:=[.D1260]-[.D1259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table:formula="of:=[.B1259]+11" office:value-type="float" office:value="13849" calcext:value-type="float">
            <text:p>13849</text:p>
          </table:table-cell>
          <table:table-cell office:value-type="float" office:value="8640000" calcext:value-type="float">
            <text:p>8640000</text:p>
          </table:table-cell>
          <table:table-cell table:formula="of:=[.B1260]/[.C1260]" office:value-type="float" office:value="0.00160289351851852" calcext:value-type="float">
            <text:p>0,00160289351851852000</text:p>
          </table:table-cell>
          <table:table-cell table:formula="of:=[.D1261]-[.D126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[.B1260]+11" office:value-type="float" office:value="13860" calcext:value-type="float">
            <text:p>13860</text:p>
          </table:table-cell>
          <table:table-cell office:value-type="float" office:value="8640000" calcext:value-type="float">
            <text:p>8640000</text:p>
          </table:table-cell>
          <table:table-cell table:formula="of:=[.B1261]/[.C1261]" office:value-type="float" office:value="0.00160416666666667" calcext:value-type="float">
            <text:p>0,00160416666666667000</text:p>
          </table:table-cell>
          <table:table-cell table:formula="of:=[.D1262]-[.D1261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table:formula="of:=[.B1261]+11" office:value-type="float" office:value="13871" calcext:value-type="float">
            <text:p>13871</text:p>
          </table:table-cell>
          <table:table-cell office:value-type="float" office:value="8640000" calcext:value-type="float">
            <text:p>8640000</text:p>
          </table:table-cell>
          <table:table-cell table:formula="of:=[.B1262]/[.C1262]" office:value-type="float" office:value="0.00160543981481481" calcext:value-type="float">
            <text:p>0,00160543981481481000</text:p>
          </table:table-cell>
          <table:table-cell table:formula="of:=[.D1263]-[.D126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table:formula="of:=[.B1262]+11" office:value-type="float" office:value="13882" calcext:value-type="float">
            <text:p>13882</text:p>
          </table:table-cell>
          <table:table-cell office:value-type="float" office:value="8640000" calcext:value-type="float">
            <text:p>8640000</text:p>
          </table:table-cell>
          <table:table-cell table:formula="of:=[.B1263]/[.C1263]" office:value-type="float" office:value="0.00160671296296296" calcext:value-type="float">
            <text:p>0,00160671296296296000</text:p>
          </table:table-cell>
          <table:table-cell table:formula="of:=[.D1264]-[.D1263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table:formula="of:=[.B1263]+11" office:value-type="float" office:value="13893" calcext:value-type="float">
            <text:p>13893</text:p>
          </table:table-cell>
          <table:table-cell office:value-type="float" office:value="8640000" calcext:value-type="float">
            <text:p>8640000</text:p>
          </table:table-cell>
          <table:table-cell table:formula="of:=[.B1264]/[.C1264]" office:value-type="float" office:value="0.00160798611111111" calcext:value-type="float">
            <text:p>0,00160798611111111000</text:p>
          </table:table-cell>
          <table:table-cell table:formula="of:=[.D1265]-[.D126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table:formula="of:=[.B1264]+11" office:value-type="float" office:value="13904" calcext:value-type="float">
            <text:p>13904</text:p>
          </table:table-cell>
          <table:table-cell office:value-type="float" office:value="8640000" calcext:value-type="float">
            <text:p>8640000</text:p>
          </table:table-cell>
          <table:table-cell table:formula="of:=[.B1265]/[.C1265]" office:value-type="float" office:value="0.00160925925925926" calcext:value-type="float">
            <text:p>0,00160925925925926000</text:p>
          </table:table-cell>
          <table:table-cell table:formula="of:=[.D1266]-[.D1265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table:formula="of:=[.B1265]+11" office:value-type="float" office:value="13915" calcext:value-type="float">
            <text:p>13915</text:p>
          </table:table-cell>
          <table:table-cell office:value-type="float" office:value="8640000" calcext:value-type="float">
            <text:p>8640000</text:p>
          </table:table-cell>
          <table:table-cell table:formula="of:=[.B1266]/[.C1266]" office:value-type="float" office:value="0.00161053240740741" calcext:value-type="float">
            <text:p>0,00161053240740741000</text:p>
          </table:table-cell>
          <table:table-cell table:formula="of:=[.D1267]-[.D126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table:formula="of:=[.B1266]+11" office:value-type="float" office:value="13926" calcext:value-type="float">
            <text:p>13926</text:p>
          </table:table-cell>
          <table:table-cell office:value-type="float" office:value="8640000" calcext:value-type="float">
            <text:p>8640000</text:p>
          </table:table-cell>
          <table:table-cell table:formula="of:=[.B1267]/[.C1267]" office:value-type="float" office:value="0.00161180555555556" calcext:value-type="float">
            <text:p>0,00161180555555556000</text:p>
          </table:table-cell>
          <table:table-cell table:formula="of:=[.D1268]-[.D126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table:formula="of:=[.B1267]+11" office:value-type="float" office:value="13937" calcext:value-type="float">
            <text:p>13937</text:p>
          </table:table-cell>
          <table:table-cell office:value-type="float" office:value="8640000" calcext:value-type="float">
            <text:p>8640000</text:p>
          </table:table-cell>
          <table:table-cell table:formula="of:=[.B1268]/[.C1268]" office:value-type="float" office:value="0.0016130787037037" calcext:value-type="float">
            <text:p>0,00161307870370370000</text:p>
          </table:table-cell>
          <table:table-cell table:formula="of:=[.D1269]-[.D1268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table:formula="of:=[.B1268]+11" office:value-type="float" office:value="13948" calcext:value-type="float">
            <text:p>13948</text:p>
          </table:table-cell>
          <table:table-cell office:value-type="float" office:value="8640000" calcext:value-type="float">
            <text:p>8640000</text:p>
          </table:table-cell>
          <table:table-cell table:formula="of:=[.B1269]/[.C1269]" office:value-type="float" office:value="0.00161435185185185" calcext:value-type="float">
            <text:p>0,00161435185185185000</text:p>
          </table:table-cell>
          <table:table-cell table:formula="of:=[.D1270]-[.D126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table:formula="of:=[.B1269]+11" office:value-type="float" office:value="13959" calcext:value-type="float">
            <text:p>13959</text:p>
          </table:table-cell>
          <table:table-cell office:value-type="float" office:value="8640000" calcext:value-type="float">
            <text:p>8640000</text:p>
          </table:table-cell>
          <table:table-cell table:formula="of:=[.B1270]/[.C1270]" office:value-type="float" office:value="0.001615625" calcext:value-type="float">
            <text:p>0,00161562500000000000</text:p>
          </table:table-cell>
          <table:table-cell table:formula="of:=[.D1271]-[.D1270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table:formula="of:=[.B1270]+11" office:value-type="float" office:value="13970" calcext:value-type="float">
            <text:p>13970</text:p>
          </table:table-cell>
          <table:table-cell office:value-type="float" office:value="8640000" calcext:value-type="float">
            <text:p>8640000</text:p>
          </table:table-cell>
          <table:table-cell table:formula="of:=[.B1271]/[.C1271]" office:value-type="float" office:value="0.00161689814814815" calcext:value-type="float">
            <text:p>0,00161689814814815000</text:p>
          </table:table-cell>
          <table:table-cell table:formula="of:=[.D1272]-[.D127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table:formula="of:=[.B1271]+11" office:value-type="float" office:value="13981" calcext:value-type="float">
            <text:p>13981</text:p>
          </table:table-cell>
          <table:table-cell office:value-type="float" office:value="8640000" calcext:value-type="float">
            <text:p>8640000</text:p>
          </table:table-cell>
          <table:table-cell table:formula="of:=[.B1272]/[.C1272]" office:value-type="float" office:value="0.0016181712962963" calcext:value-type="float">
            <text:p>0,00161817129629630000</text:p>
          </table:table-cell>
          <table:table-cell table:formula="of:=[.D1273]-[.D1272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table:formula="of:=[.B1272]+11" office:value-type="float" office:value="13992" calcext:value-type="float">
            <text:p>13992</text:p>
          </table:table-cell>
          <table:table-cell office:value-type="float" office:value="8640000" calcext:value-type="float">
            <text:p>8640000</text:p>
          </table:table-cell>
          <table:table-cell table:formula="of:=[.B1273]/[.C1273]" office:value-type="float" office:value="0.00161944444444444" calcext:value-type="float">
            <text:p>0,00161944444444444000</text:p>
          </table:table-cell>
          <table:table-cell table:formula="of:=[.D1274]-[.D127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table:formula="of:=[.B1273]+11" office:value-type="float" office:value="14003" calcext:value-type="float">
            <text:p>14003</text:p>
          </table:table-cell>
          <table:table-cell office:value-type="float" office:value="8640000" calcext:value-type="float">
            <text:p>8640000</text:p>
          </table:table-cell>
          <table:table-cell table:formula="of:=[.B1274]/[.C1274]" office:value-type="float" office:value="0.00162071759259259" calcext:value-type="float">
            <text:p>0,00162071759259259000</text:p>
          </table:table-cell>
          <table:table-cell table:formula="of:=[.D1275]-[.D1274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table:formula="of:=[.B1274]+11" office:value-type="float" office:value="14014" calcext:value-type="float">
            <text:p>14014</text:p>
          </table:table-cell>
          <table:table-cell office:value-type="float" office:value="8640000" calcext:value-type="float">
            <text:p>8640000</text:p>
          </table:table-cell>
          <table:table-cell table:formula="of:=[.B1275]/[.C1275]" office:value-type="float" office:value="0.00162199074074074" calcext:value-type="float">
            <text:p>0,00162199074074074000</text:p>
          </table:table-cell>
          <table:table-cell table:formula="of:=[.D1276]-[.D127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table:formula="of:=[.B1275]+11" office:value-type="float" office:value="14025" calcext:value-type="float">
            <text:p>14025</text:p>
          </table:table-cell>
          <table:table-cell office:value-type="float" office:value="8640000" calcext:value-type="float">
            <text:p>8640000</text:p>
          </table:table-cell>
          <table:table-cell table:formula="of:=[.B1276]/[.C1276]" office:value-type="float" office:value="0.00162326388888889" calcext:value-type="float">
            <text:p>0,00162326388888889000</text:p>
          </table:table-cell>
          <table:table-cell table:formula="of:=[.D1277]-[.D1276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table:formula="of:=[.B1276]+11" office:value-type="float" office:value="14036" calcext:value-type="float">
            <text:p>14036</text:p>
          </table:table-cell>
          <table:table-cell office:value-type="float" office:value="8640000" calcext:value-type="float">
            <text:p>8640000</text:p>
          </table:table-cell>
          <table:table-cell table:formula="of:=[.B1277]/[.C1277]" office:value-type="float" office:value="0.00162453703703704" calcext:value-type="float">
            <text:p>0,00162453703703704000</text:p>
          </table:table-cell>
          <table:table-cell table:formula="of:=[.D1278]-[.D127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table:formula="of:=[.B1277]+11" office:value-type="float" office:value="14047" calcext:value-type="float">
            <text:p>14047</text:p>
          </table:table-cell>
          <table:table-cell office:value-type="float" office:value="8640000" calcext:value-type="float">
            <text:p>8640000</text:p>
          </table:table-cell>
          <table:table-cell table:formula="of:=[.B1278]/[.C1278]" office:value-type="float" office:value="0.00162581018518519" calcext:value-type="float">
            <text:p>0,00162581018518519000</text:p>
          </table:table-cell>
          <table:table-cell table:formula="of:=[.D1279]-[.D1278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formula="of:=[.B1278]+11" office:value-type="float" office:value="14058" calcext:value-type="float">
            <text:p>14058</text:p>
          </table:table-cell>
          <table:table-cell office:value-type="float" office:value="8640000" calcext:value-type="float">
            <text:p>8640000</text:p>
          </table:table-cell>
          <table:table-cell table:formula="of:=[.B1279]/[.C1279]" office:value-type="float" office:value="0.00162708333333333" calcext:value-type="float">
            <text:p>0,00162708333333333000</text:p>
          </table:table-cell>
          <table:table-cell table:formula="of:=[.D1280]-[.D127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table:formula="of:=[.B1279]+11" office:value-type="float" office:value="14069" calcext:value-type="float">
            <text:p>14069</text:p>
          </table:table-cell>
          <table:table-cell office:value-type="float" office:value="8640000" calcext:value-type="float">
            <text:p>8640000</text:p>
          </table:table-cell>
          <table:table-cell table:formula="of:=[.B1280]/[.C1280]" office:value-type="float" office:value="0.00162835648148148" calcext:value-type="float">
            <text:p>0,00162835648148148000</text:p>
          </table:table-cell>
          <table:table-cell table:formula="of:=[.D1281]-[.D1280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[.B1280]+11" office:value-type="float" office:value="14080" calcext:value-type="float">
            <text:p>14080</text:p>
          </table:table-cell>
          <table:table-cell office:value-type="float" office:value="8640000" calcext:value-type="float">
            <text:p>8640000</text:p>
          </table:table-cell>
          <table:table-cell table:formula="of:=[.B1281]/[.C1281]" office:value-type="float" office:value="0.00162962962962963" calcext:value-type="float">
            <text:p>0,00162962962962963000</text:p>
          </table:table-cell>
          <table:table-cell table:formula="of:=[.D1282]-[.D128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table:formula="of:=[.B1281]+11" office:value-type="float" office:value="14091" calcext:value-type="float">
            <text:p>14091</text:p>
          </table:table-cell>
          <table:table-cell office:value-type="float" office:value="8640000" calcext:value-type="float">
            <text:p>8640000</text:p>
          </table:table-cell>
          <table:table-cell table:formula="of:=[.B1282]/[.C1282]" office:value-type="float" office:value="0.00163090277777778" calcext:value-type="float">
            <text:p>0,00163090277777778000</text:p>
          </table:table-cell>
          <table:table-cell table:formula="of:=[.D1283]-[.D128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table:formula="of:=[.B1282]+11" office:value-type="float" office:value="14102" calcext:value-type="float">
            <text:p>14102</text:p>
          </table:table-cell>
          <table:table-cell office:value-type="float" office:value="8640000" calcext:value-type="float">
            <text:p>8640000</text:p>
          </table:table-cell>
          <table:table-cell table:formula="of:=[.B1283]/[.C1283]" office:value-type="float" office:value="0.00163217592592593" calcext:value-type="float">
            <text:p>0,00163217592592593000</text:p>
          </table:table-cell>
          <table:table-cell table:formula="of:=[.D1284]-[.D1283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table:formula="of:=[.B1283]+11" office:value-type="float" office:value="14113" calcext:value-type="float">
            <text:p>14113</text:p>
          </table:table-cell>
          <table:table-cell office:value-type="float" office:value="8640000" calcext:value-type="float">
            <text:p>8640000</text:p>
          </table:table-cell>
          <table:table-cell table:formula="of:=[.B1284]/[.C1284]" office:value-type="float" office:value="0.00163344907407407" calcext:value-type="float">
            <text:p>0,00163344907407407000</text:p>
          </table:table-cell>
          <table:table-cell table:formula="of:=[.D1285]-[.D128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table:formula="of:=[.B1284]+11" office:value-type="float" office:value="14124" calcext:value-type="float">
            <text:p>14124</text:p>
          </table:table-cell>
          <table:table-cell office:value-type="float" office:value="8640000" calcext:value-type="float">
            <text:p>8640000</text:p>
          </table:table-cell>
          <table:table-cell table:formula="of:=[.B1285]/[.C1285]" office:value-type="float" office:value="0.00163472222222222" calcext:value-type="float">
            <text:p>0,00163472222222222000</text:p>
          </table:table-cell>
          <table:table-cell table:formula="of:=[.D1286]-[.D1285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table:formula="of:=[.B1285]+11" office:value-type="float" office:value="14135" calcext:value-type="float">
            <text:p>14135</text:p>
          </table:table-cell>
          <table:table-cell office:value-type="float" office:value="8640000" calcext:value-type="float">
            <text:p>8640000</text:p>
          </table:table-cell>
          <table:table-cell table:formula="of:=[.B1286]/[.C1286]" office:value-type="float" office:value="0.00163599537037037" calcext:value-type="float">
            <text:p>0,00163599537037037000</text:p>
          </table:table-cell>
          <table:table-cell table:formula="of:=[.D1287]-[.D128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formula="of:=[.B1286]+11" office:value-type="float" office:value="14146" calcext:value-type="float">
            <text:p>14146</text:p>
          </table:table-cell>
          <table:table-cell office:value-type="float" office:value="8640000" calcext:value-type="float">
            <text:p>8640000</text:p>
          </table:table-cell>
          <table:table-cell table:formula="of:=[.B1287]/[.C1287]" office:value-type="float" office:value="0.00163726851851852" calcext:value-type="float">
            <text:p>0,00163726851851852000</text:p>
          </table:table-cell>
          <table:table-cell table:formula="of:=[.D1288]-[.D1287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table:formula="of:=[.B1287]+11" office:value-type="float" office:value="14157" calcext:value-type="float">
            <text:p>14157</text:p>
          </table:table-cell>
          <table:table-cell office:value-type="float" office:value="8640000" calcext:value-type="float">
            <text:p>8640000</text:p>
          </table:table-cell>
          <table:table-cell table:formula="of:=[.B1288]/[.C1288]" office:value-type="float" office:value="0.00163854166666667" calcext:value-type="float">
            <text:p>0,00163854166666667000</text:p>
          </table:table-cell>
          <table:table-cell table:formula="of:=[.D1289]-[.D128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table:formula="of:=[.B1288]+11" office:value-type="float" office:value="14168" calcext:value-type="float">
            <text:p>14168</text:p>
          </table:table-cell>
          <table:table-cell office:value-type="float" office:value="8640000" calcext:value-type="float">
            <text:p>8640000</text:p>
          </table:table-cell>
          <table:table-cell table:formula="of:=[.B1289]/[.C1289]" office:value-type="float" office:value="0.00163981481481481" calcext:value-type="float">
            <text:p>0,00163981481481481000</text:p>
          </table:table-cell>
          <table:table-cell table:formula="of:=[.D1290]-[.D1289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table:formula="of:=[.B1289]+11" office:value-type="float" office:value="14179" calcext:value-type="float">
            <text:p>14179</text:p>
          </table:table-cell>
          <table:table-cell office:value-type="float" office:value="8640000" calcext:value-type="float">
            <text:p>8640000</text:p>
          </table:table-cell>
          <table:table-cell table:formula="of:=[.B1290]/[.C1290]" office:value-type="float" office:value="0.00164108796296296" calcext:value-type="float">
            <text:p>0,00164108796296296000</text:p>
          </table:table-cell>
          <table:table-cell table:formula="of:=[.D1291]-[.D129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table:formula="of:=[.B1290]+11" office:value-type="float" office:value="14190" calcext:value-type="float">
            <text:p>14190</text:p>
          </table:table-cell>
          <table:table-cell office:value-type="float" office:value="8640000" calcext:value-type="float">
            <text:p>8640000</text:p>
          </table:table-cell>
          <table:table-cell table:formula="of:=[.B1291]/[.C1291]" office:value-type="float" office:value="0.00164236111111111" calcext:value-type="float">
            <text:p>0,00164236111111111000</text:p>
          </table:table-cell>
          <table:table-cell table:formula="of:=[.D1292]-[.D1291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table:formula="of:=[.B1291]+11" office:value-type="float" office:value="14201" calcext:value-type="float">
            <text:p>14201</text:p>
          </table:table-cell>
          <table:table-cell office:value-type="float" office:value="8640000" calcext:value-type="float">
            <text:p>8640000</text:p>
          </table:table-cell>
          <table:table-cell table:formula="of:=[.B1292]/[.C1292]" office:value-type="float" office:value="0.00164363425925926" calcext:value-type="float">
            <text:p>0,00164363425925926000</text:p>
          </table:table-cell>
          <table:table-cell table:formula="of:=[.D1293]-[.D129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table:formula="of:=[.B1292]+11" office:value-type="float" office:value="14212" calcext:value-type="float">
            <text:p>14212</text:p>
          </table:table-cell>
          <table:table-cell office:value-type="float" office:value="8640000" calcext:value-type="float">
            <text:p>8640000</text:p>
          </table:table-cell>
          <table:table-cell table:formula="of:=[.B1293]/[.C1293]" office:value-type="float" office:value="0.00164490740740741" calcext:value-type="float">
            <text:p>0,00164490740740741000</text:p>
          </table:table-cell>
          <table:table-cell table:formula="of:=[.D1294]-[.D1293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table:formula="of:=[.B1293]+11" office:value-type="float" office:value="14223" calcext:value-type="float">
            <text:p>14223</text:p>
          </table:table-cell>
          <table:table-cell office:value-type="float" office:value="8640000" calcext:value-type="float">
            <text:p>8640000</text:p>
          </table:table-cell>
          <table:table-cell table:formula="of:=[.B1294]/[.C1294]" office:value-type="float" office:value="0.00164618055555556" calcext:value-type="float">
            <text:p>0,00164618055555556000</text:p>
          </table:table-cell>
          <table:table-cell table:formula="of:=[.D1295]-[.D129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table:formula="of:=[.B1294]+11" office:value-type="float" office:value="14234" calcext:value-type="float">
            <text:p>14234</text:p>
          </table:table-cell>
          <table:table-cell office:value-type="float" office:value="8640000" calcext:value-type="float">
            <text:p>8640000</text:p>
          </table:table-cell>
          <table:table-cell table:formula="of:=[.B1295]/[.C1295]" office:value-type="float" office:value="0.0016474537037037" calcext:value-type="float">
            <text:p>0,00164745370370370000</text:p>
          </table:table-cell>
          <table:table-cell table:formula="of:=[.D1296]-[.D129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table:formula="of:=[.B1295]+11" office:value-type="float" office:value="14245" calcext:value-type="float">
            <text:p>14245</text:p>
          </table:table-cell>
          <table:table-cell office:value-type="float" office:value="8640000" calcext:value-type="float">
            <text:p>8640000</text:p>
          </table:table-cell>
          <table:table-cell table:formula="of:=[.B1296]/[.C1296]" office:value-type="float" office:value="0.00164872685185185" calcext:value-type="float">
            <text:p>0,00164872685185185000</text:p>
          </table:table-cell>
          <table:table-cell table:formula="of:=[.D1297]-[.D1296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table:formula="of:=[.B1296]+11" office:value-type="float" office:value="14256" calcext:value-type="float">
            <text:p>14256</text:p>
          </table:table-cell>
          <table:table-cell office:value-type="float" office:value="8640000" calcext:value-type="float">
            <text:p>8640000</text:p>
          </table:table-cell>
          <table:table-cell table:formula="of:=[.B1297]/[.C1297]" office:value-type="float" office:value="0.00165" calcext:value-type="float">
            <text:p>0,00165000000000000000</text:p>
          </table:table-cell>
          <table:table-cell table:formula="of:=[.D1298]-[.D129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table:formula="of:=[.B1297]+11" office:value-type="float" office:value="14267" calcext:value-type="float">
            <text:p>14267</text:p>
          </table:table-cell>
          <table:table-cell office:value-type="float" office:value="8640000" calcext:value-type="float">
            <text:p>8640000</text:p>
          </table:table-cell>
          <table:table-cell table:formula="of:=[.B1298]/[.C1298]" office:value-type="float" office:value="0.00165127314814815" calcext:value-type="float">
            <text:p>0,00165127314814815000</text:p>
          </table:table-cell>
          <table:table-cell table:formula="of:=[.D1299]-[.D1298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table:formula="of:=[.B1298]+11" office:value-type="float" office:value="14278" calcext:value-type="float">
            <text:p>14278</text:p>
          </table:table-cell>
          <table:table-cell office:value-type="float" office:value="8640000" calcext:value-type="float">
            <text:p>8640000</text:p>
          </table:table-cell>
          <table:table-cell table:formula="of:=[.B1299]/[.C1299]" office:value-type="float" office:value="0.0016525462962963" calcext:value-type="float">
            <text:p>0,00165254629629630000</text:p>
          </table:table-cell>
          <table:table-cell table:formula="of:=[.D1300]-[.D129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table:formula="of:=[.B1299]+11" office:value-type="float" office:value="14289" calcext:value-type="float">
            <text:p>14289</text:p>
          </table:table-cell>
          <table:table-cell office:value-type="float" office:value="8640000" calcext:value-type="float">
            <text:p>8640000</text:p>
          </table:table-cell>
          <table:table-cell table:formula="of:=[.B1300]/[.C1300]" office:value-type="float" office:value="0.00165381944444444" calcext:value-type="float">
            <text:p>0,00165381944444444000</text:p>
          </table:table-cell>
          <table:table-cell table:formula="of:=[.D1301]-[.D1300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[.B1300]+11" office:value-type="float" office:value="14300" calcext:value-type="float">
            <text:p>14300</text:p>
          </table:table-cell>
          <table:table-cell office:value-type="float" office:value="8640000" calcext:value-type="float">
            <text:p>8640000</text:p>
          </table:table-cell>
          <table:table-cell table:formula="of:=[.B1301]/[.C1301]" office:value-type="float" office:value="0.00165509259259259" calcext:value-type="float">
            <text:p>0,00165509259259259000</text:p>
          </table:table-cell>
          <table:table-cell table:formula="of:=[.D1302]-[.D130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table:formula="of:=[.B1301]+11" office:value-type="float" office:value="14311" calcext:value-type="float">
            <text:p>14311</text:p>
          </table:table-cell>
          <table:table-cell office:value-type="float" office:value="8640000" calcext:value-type="float">
            <text:p>8640000</text:p>
          </table:table-cell>
          <table:table-cell table:formula="of:=[.B1302]/[.C1302]" office:value-type="float" office:value="0.00165636574074074" calcext:value-type="float">
            <text:p>0,00165636574074074000</text:p>
          </table:table-cell>
          <table:table-cell table:formula="of:=[.D1303]-[.D1302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table:formula="of:=[.B1302]+11" office:value-type="float" office:value="14322" calcext:value-type="float">
            <text:p>14322</text:p>
          </table:table-cell>
          <table:table-cell office:value-type="float" office:value="8640000" calcext:value-type="float">
            <text:p>8640000</text:p>
          </table:table-cell>
          <table:table-cell table:formula="of:=[.B1303]/[.C1303]" office:value-type="float" office:value="0.00165763888888889" calcext:value-type="float">
            <text:p>0,00165763888888889000</text:p>
          </table:table-cell>
          <table:table-cell table:formula="of:=[.D1304]-[.D130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table:formula="of:=[.B1303]+11" office:value-type="float" office:value="14333" calcext:value-type="float">
            <text:p>14333</text:p>
          </table:table-cell>
          <table:table-cell office:value-type="float" office:value="8640000" calcext:value-type="float">
            <text:p>8640000</text:p>
          </table:table-cell>
          <table:table-cell table:formula="of:=[.B1304]/[.C1304]" office:value-type="float" office:value="0.00165891203703704" calcext:value-type="float">
            <text:p>0,00165891203703704000</text:p>
          </table:table-cell>
          <table:table-cell table:formula="of:=[.D1305]-[.D1304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table:formula="of:=[.B1304]+11" office:value-type="float" office:value="14344" calcext:value-type="float">
            <text:p>14344</text:p>
          </table:table-cell>
          <table:table-cell office:value-type="float" office:value="8640000" calcext:value-type="float">
            <text:p>8640000</text:p>
          </table:table-cell>
          <table:table-cell table:formula="of:=[.B1305]/[.C1305]" office:value-type="float" office:value="0.00166018518518519" calcext:value-type="float">
            <text:p>0,00166018518518519000</text:p>
          </table:table-cell>
          <table:table-cell table:formula="of:=[.D1306]-[.D130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table:formula="of:=[.B1305]+11" office:value-type="float" office:value="14355" calcext:value-type="float">
            <text:p>14355</text:p>
          </table:table-cell>
          <table:table-cell office:value-type="float" office:value="8640000" calcext:value-type="float">
            <text:p>8640000</text:p>
          </table:table-cell>
          <table:table-cell table:formula="of:=[.B1306]/[.C1306]" office:value-type="float" office:value="0.00166145833333333" calcext:value-type="float">
            <text:p>0,00166145833333333000</text:p>
          </table:table-cell>
          <table:table-cell table:formula="of:=[.D1307]-[.D1306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table:formula="of:=[.B1306]+11" office:value-type="float" office:value="14366" calcext:value-type="float">
            <text:p>14366</text:p>
          </table:table-cell>
          <table:table-cell office:value-type="float" office:value="8640000" calcext:value-type="float">
            <text:p>8640000</text:p>
          </table:table-cell>
          <table:table-cell table:formula="of:=[.B1307]/[.C1307]" office:value-type="float" office:value="0.00166273148148148" calcext:value-type="float">
            <text:p>0,00166273148148148000</text:p>
          </table:table-cell>
          <table:table-cell table:formula="of:=[.D1308]-[.D130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table:formula="of:=[.B1307]+11" office:value-type="float" office:value="14377" calcext:value-type="float">
            <text:p>14377</text:p>
          </table:table-cell>
          <table:table-cell office:value-type="float" office:value="8640000" calcext:value-type="float">
            <text:p>8640000</text:p>
          </table:table-cell>
          <table:table-cell table:formula="of:=[.B1308]/[.C1308]" office:value-type="float" office:value="0.00166400462962963" calcext:value-type="float">
            <text:p>0,00166400462962963000</text:p>
          </table:table-cell>
          <table:table-cell table:formula="of:=[.D1309]-[.D1308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formula="of:=[.B1308]+11" office:value-type="float" office:value="14388" calcext:value-type="float">
            <text:p>14388</text:p>
          </table:table-cell>
          <table:table-cell office:value-type="float" office:value="8640000" calcext:value-type="float">
            <text:p>8640000</text:p>
          </table:table-cell>
          <table:table-cell table:formula="of:=[.B1309]/[.C1309]" office:value-type="float" office:value="0.00166527777777778" calcext:value-type="float">
            <text:p>0,00166527777777778000</text:p>
          </table:table-cell>
          <table:table-cell table:formula="of:=[.D1310]-[.D130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table:formula="of:=[.B1309]+11" office:value-type="float" office:value="14399" calcext:value-type="float">
            <text:p>14399</text:p>
          </table:table-cell>
          <table:table-cell office:value-type="float" office:value="8640000" calcext:value-type="float">
            <text:p>8640000</text:p>
          </table:table-cell>
          <table:table-cell table:formula="of:=[.B1310]/[.C1310]" office:value-type="float" office:value="0.00166655092592593" calcext:value-type="float">
            <text:p>0,00166655092592593000</text:p>
          </table:table-cell>
          <table:table-cell table:formula="of:=[.D1311]-[.D131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table:formula="of:=[.B1310]+11" office:value-type="float" office:value="14410" calcext:value-type="float">
            <text:p>14410</text:p>
          </table:table-cell>
          <table:table-cell office:value-type="float" office:value="8640000" calcext:value-type="float">
            <text:p>8640000</text:p>
          </table:table-cell>
          <table:table-cell table:formula="of:=[.B1311]/[.C1311]" office:value-type="float" office:value="0.00166782407407407" calcext:value-type="float">
            <text:p>0,00166782407407407000</text:p>
          </table:table-cell>
          <table:table-cell table:formula="of:=[.D1312]-[.D1311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table:formula="of:=[.B1311]+11" office:value-type="float" office:value="14421" calcext:value-type="float">
            <text:p>14421</text:p>
          </table:table-cell>
          <table:table-cell office:value-type="float" office:value="8640000" calcext:value-type="float">
            <text:p>8640000</text:p>
          </table:table-cell>
          <table:table-cell table:formula="of:=[.B1312]/[.C1312]" office:value-type="float" office:value="0.00166909722222222" calcext:value-type="float">
            <text:p>0,00166909722222222000</text:p>
          </table:table-cell>
          <table:table-cell table:formula="of:=[.D1313]-[.D131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table:formula="of:=[.B1312]+11" office:value-type="float" office:value="14432" calcext:value-type="float">
            <text:p>14432</text:p>
          </table:table-cell>
          <table:table-cell office:value-type="float" office:value="8640000" calcext:value-type="float">
            <text:p>8640000</text:p>
          </table:table-cell>
          <table:table-cell table:formula="of:=[.B1313]/[.C1313]" office:value-type="float" office:value="0.00167037037037037" calcext:value-type="float">
            <text:p>0,00167037037037037000</text:p>
          </table:table-cell>
          <table:table-cell table:formula="of:=[.D1314]-[.D1313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table:formula="of:=[.B1313]+11" office:value-type="float" office:value="14443" calcext:value-type="float">
            <text:p>14443</text:p>
          </table:table-cell>
          <table:table-cell office:value-type="float" office:value="8640000" calcext:value-type="float">
            <text:p>8640000</text:p>
          </table:table-cell>
          <table:table-cell table:formula="of:=[.B1314]/[.C1314]" office:value-type="float" office:value="0.00167164351851852" calcext:value-type="float">
            <text:p>0,00167164351851852000</text:p>
          </table:table-cell>
          <table:table-cell table:formula="of:=[.D1315]-[.D131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formula="of:=[.B1314]+11" office:value-type="float" office:value="14454" calcext:value-type="float">
            <text:p>14454</text:p>
          </table:table-cell>
          <table:table-cell office:value-type="float" office:value="8640000" calcext:value-type="float">
            <text:p>8640000</text:p>
          </table:table-cell>
          <table:table-cell table:formula="of:=[.B1315]/[.C1315]" office:value-type="float" office:value="0.00167291666666667" calcext:value-type="float">
            <text:p>0,00167291666666667000</text:p>
          </table:table-cell>
          <table:table-cell table:formula="of:=[.D1316]-[.D1315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formula="of:=[.B1315]+11" office:value-type="float" office:value="14465" calcext:value-type="float">
            <text:p>14465</text:p>
          </table:table-cell>
          <table:table-cell office:value-type="float" office:value="8640000" calcext:value-type="float">
            <text:p>8640000</text:p>
          </table:table-cell>
          <table:table-cell table:formula="of:=[.B1316]/[.C1316]" office:value-type="float" office:value="0.00167418981481481" calcext:value-type="float">
            <text:p>0,00167418981481481000</text:p>
          </table:table-cell>
          <table:table-cell table:formula="of:=[.D1317]-[.D131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formula="of:=[.B1316]+11" office:value-type="float" office:value="14476" calcext:value-type="float">
            <text:p>14476</text:p>
          </table:table-cell>
          <table:table-cell office:value-type="float" office:value="8640000" calcext:value-type="float">
            <text:p>8640000</text:p>
          </table:table-cell>
          <table:table-cell table:formula="of:=[.B1317]/[.C1317]" office:value-type="float" office:value="0.00167546296296296" calcext:value-type="float">
            <text:p>0,00167546296296296000</text:p>
          </table:table-cell>
          <table:table-cell table:formula="of:=[.D1318]-[.D1317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formula="of:=[.B1317]+11" office:value-type="float" office:value="14487" calcext:value-type="float">
            <text:p>14487</text:p>
          </table:table-cell>
          <table:table-cell office:value-type="float" office:value="8640000" calcext:value-type="float">
            <text:p>8640000</text:p>
          </table:table-cell>
          <table:table-cell table:formula="of:=[.B1318]/[.C1318]" office:value-type="float" office:value="0.00167673611111111" calcext:value-type="float">
            <text:p>0,00167673611111111000</text:p>
          </table:table-cell>
          <table:table-cell table:formula="of:=[.D1319]-[.D131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formula="of:=[.B1318]+11" office:value-type="float" office:value="14498" calcext:value-type="float">
            <text:p>14498</text:p>
          </table:table-cell>
          <table:table-cell office:value-type="float" office:value="8640000" calcext:value-type="float">
            <text:p>8640000</text:p>
          </table:table-cell>
          <table:table-cell table:formula="of:=[.B1319]/[.C1319]" office:value-type="float" office:value="0.00167800925925926" calcext:value-type="float">
            <text:p>0,00167800925925926000</text:p>
          </table:table-cell>
          <table:table-cell table:formula="of:=[.D1320]-[.D1319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formula="of:=[.B1319]+11" office:value-type="float" office:value="14509" calcext:value-type="float">
            <text:p>14509</text:p>
          </table:table-cell>
          <table:table-cell office:value-type="float" office:value="8640000" calcext:value-type="float">
            <text:p>8640000</text:p>
          </table:table-cell>
          <table:table-cell table:formula="of:=[.B1320]/[.C1320]" office:value-type="float" office:value="0.00167928240740741" calcext:value-type="float">
            <text:p>0,00167928240740741000</text:p>
          </table:table-cell>
          <table:table-cell table:formula="of:=[.D1321]-[.D132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[.B1320]+11" office:value-type="float" office:value="14520" calcext:value-type="float">
            <text:p>14520</text:p>
          </table:table-cell>
          <table:table-cell office:value-type="float" office:value="8640000" calcext:value-type="float">
            <text:p>8640000</text:p>
          </table:table-cell>
          <table:table-cell table:formula="of:=[.B1321]/[.C1321]" office:value-type="float" office:value="0.00168055555555556" calcext:value-type="float">
            <text:p>0,00168055555555556000</text:p>
          </table:table-cell>
          <table:table-cell table:formula="of:=[.D1322]-[.D1321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formula="of:=[.B1321]+11" office:value-type="float" office:value="14531" calcext:value-type="float">
            <text:p>14531</text:p>
          </table:table-cell>
          <table:table-cell office:value-type="float" office:value="8640000" calcext:value-type="float">
            <text:p>8640000</text:p>
          </table:table-cell>
          <table:table-cell table:formula="of:=[.B1322]/[.C1322]" office:value-type="float" office:value="0.0016818287037037" calcext:value-type="float">
            <text:p>0,00168182870370370000</text:p>
          </table:table-cell>
          <table:table-cell table:formula="of:=[.D1323]-[.D132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formula="of:=[.B1322]+11" office:value-type="float" office:value="14542" calcext:value-type="float">
            <text:p>14542</text:p>
          </table:table-cell>
          <table:table-cell office:value-type="float" office:value="8640000" calcext:value-type="float">
            <text:p>8640000</text:p>
          </table:table-cell>
          <table:table-cell table:formula="of:=[.B1323]/[.C1323]" office:value-type="float" office:value="0.00168310185185185" calcext:value-type="float">
            <text:p>0,00168310185185185000</text:p>
          </table:table-cell>
          <table:table-cell table:formula="of:=[.D1324]-[.D132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formula="of:=[.B1323]+11" office:value-type="float" office:value="14553" calcext:value-type="float">
            <text:p>14553</text:p>
          </table:table-cell>
          <table:table-cell office:value-type="float" office:value="8640000" calcext:value-type="float">
            <text:p>8640000</text:p>
          </table:table-cell>
          <table:table-cell table:formula="of:=[.B1324]/[.C1324]" office:value-type="float" office:value="0.001684375" calcext:value-type="float">
            <text:p>0,00168437500000000000</text:p>
          </table:table-cell>
          <table:table-cell table:formula="of:=[.D1325]-[.D1324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formula="of:=[.B1324]+11" office:value-type="float" office:value="14564" calcext:value-type="float">
            <text:p>14564</text:p>
          </table:table-cell>
          <table:table-cell office:value-type="float" office:value="8640000" calcext:value-type="float">
            <text:p>8640000</text:p>
          </table:table-cell>
          <table:table-cell table:formula="of:=[.B1325]/[.C1325]" office:value-type="float" office:value="0.00168564814814815" calcext:value-type="float">
            <text:p>0,00168564814814815000</text:p>
          </table:table-cell>
          <table:table-cell table:formula="of:=[.D1326]-[.D132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formula="of:=[.B1325]+11" office:value-type="float" office:value="14575" calcext:value-type="float">
            <text:p>14575</text:p>
          </table:table-cell>
          <table:table-cell office:value-type="float" office:value="8640000" calcext:value-type="float">
            <text:p>8640000</text:p>
          </table:table-cell>
          <table:table-cell table:formula="of:=[.B1326]/[.C1326]" office:value-type="float" office:value="0.0016869212962963" calcext:value-type="float">
            <text:p>0,00168692129629630000</text:p>
          </table:table-cell>
          <table:table-cell table:formula="of:=[.D1327]-[.D1326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formula="of:=[.B1326]+11" office:value-type="float" office:value="14586" calcext:value-type="float">
            <text:p>14586</text:p>
          </table:table-cell>
          <table:table-cell office:value-type="float" office:value="8640000" calcext:value-type="float">
            <text:p>8640000</text:p>
          </table:table-cell>
          <table:table-cell table:formula="of:=[.B1327]/[.C1327]" office:value-type="float" office:value="0.00168819444444444" calcext:value-type="float">
            <text:p>0,00168819444444444000</text:p>
          </table:table-cell>
          <table:table-cell table:formula="of:=[.D1328]-[.D132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formula="of:=[.B1327]+11" office:value-type="float" office:value="14597" calcext:value-type="float">
            <text:p>14597</text:p>
          </table:table-cell>
          <table:table-cell office:value-type="float" office:value="8640000" calcext:value-type="float">
            <text:p>8640000</text:p>
          </table:table-cell>
          <table:table-cell table:formula="of:=[.B1328]/[.C1328]" office:value-type="float" office:value="0.00168946759259259" calcext:value-type="float">
            <text:p>0,00168946759259259000</text:p>
          </table:table-cell>
          <table:table-cell table:formula="of:=[.D1329]-[.D1328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[.B1328]+11" office:value-type="float" office:value="14608" calcext:value-type="float">
            <text:p>14608</text:p>
          </table:table-cell>
          <table:table-cell office:value-type="float" office:value="8640000" calcext:value-type="float">
            <text:p>8640000</text:p>
          </table:table-cell>
          <table:table-cell table:formula="of:=[.B1329]/[.C1329]" office:value-type="float" office:value="0.00169074074074074" calcext:value-type="float">
            <text:p>0,00169074074074074000</text:p>
          </table:table-cell>
          <table:table-cell table:formula="of:=[.D1330]-[.D132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formula="of:=[.B1329]+11" office:value-type="float" office:value="14619" calcext:value-type="float">
            <text:p>14619</text:p>
          </table:table-cell>
          <table:table-cell office:value-type="float" office:value="8640000" calcext:value-type="float">
            <text:p>8640000</text:p>
          </table:table-cell>
          <table:table-cell table:formula="of:=[.B1330]/[.C1330]" office:value-type="float" office:value="0.00169201388888889" calcext:value-type="float">
            <text:p>0,00169201388888889000</text:p>
          </table:table-cell>
          <table:table-cell table:formula="of:=[.D1331]-[.D1330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formula="of:=[.B1330]+11" office:value-type="float" office:value="14630" calcext:value-type="float">
            <text:p>14630</text:p>
          </table:table-cell>
          <table:table-cell office:value-type="float" office:value="8640000" calcext:value-type="float">
            <text:p>8640000</text:p>
          </table:table-cell>
          <table:table-cell table:formula="of:=[.B1331]/[.C1331]" office:value-type="float" office:value="0.00169328703703704" calcext:value-type="float">
            <text:p>0,00169328703703704000</text:p>
          </table:table-cell>
          <table:table-cell table:formula="of:=[.D1332]-[.D133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formula="of:=[.B1331]+11" office:value-type="float" office:value="14641" calcext:value-type="float">
            <text:p>14641</text:p>
          </table:table-cell>
          <table:table-cell office:value-type="float" office:value="8640000" calcext:value-type="float">
            <text:p>8640000</text:p>
          </table:table-cell>
          <table:table-cell table:formula="of:=[.B1332]/[.C1332]" office:value-type="float" office:value="0.00169456018518519" calcext:value-type="float">
            <text:p>0,00169456018518519000</text:p>
          </table:table-cell>
          <table:table-cell table:formula="of:=[.D1333]-[.D1332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formula="of:=[.B1332]+11" office:value-type="float" office:value="14652" calcext:value-type="float">
            <text:p>14652</text:p>
          </table:table-cell>
          <table:table-cell office:value-type="float" office:value="8640000" calcext:value-type="float">
            <text:p>8640000</text:p>
          </table:table-cell>
          <table:table-cell table:formula="of:=[.B1333]/[.C1333]" office:value-type="float" office:value="0.00169583333333333" calcext:value-type="float">
            <text:p>0,00169583333333333000</text:p>
          </table:table-cell>
          <table:table-cell table:formula="of:=[.D1334]-[.D133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formula="of:=[.B1333]+11" office:value-type="float" office:value="14663" calcext:value-type="float">
            <text:p>14663</text:p>
          </table:table-cell>
          <table:table-cell office:value-type="float" office:value="8640000" calcext:value-type="float">
            <text:p>8640000</text:p>
          </table:table-cell>
          <table:table-cell table:formula="of:=[.B1334]/[.C1334]" office:value-type="float" office:value="0.00169710648148148" calcext:value-type="float">
            <text:p>0,00169710648148148000</text:p>
          </table:table-cell>
          <table:table-cell table:formula="of:=[.D1335]-[.D1334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formula="of:=[.B1334]+11" office:value-type="float" office:value="14674" calcext:value-type="float">
            <text:p>14674</text:p>
          </table:table-cell>
          <table:table-cell office:value-type="float" office:value="8640000" calcext:value-type="float">
            <text:p>8640000</text:p>
          </table:table-cell>
          <table:table-cell table:formula="of:=[.B1335]/[.C1335]" office:value-type="float" office:value="0.00169837962962963" calcext:value-type="float">
            <text:p>0,00169837962962963000</text:p>
          </table:table-cell>
          <table:table-cell table:formula="of:=[.D1336]-[.D133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formula="of:=[.B1335]+11" office:value-type="float" office:value="14685" calcext:value-type="float">
            <text:p>14685</text:p>
          </table:table-cell>
          <table:table-cell office:value-type="float" office:value="8640000" calcext:value-type="float">
            <text:p>8640000</text:p>
          </table:table-cell>
          <table:table-cell table:formula="of:=[.B1336]/[.C1336]" office:value-type="float" office:value="0.00169965277777778" calcext:value-type="float">
            <text:p>0,00169965277777778000</text:p>
          </table:table-cell>
          <table:table-cell table:formula="of:=[.D1337]-[.D1336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[.B1336]+11" office:value-type="float" office:value="14696" calcext:value-type="float">
            <text:p>14696</text:p>
          </table:table-cell>
          <table:table-cell office:value-type="float" office:value="8640000" calcext:value-type="float">
            <text:p>8640000</text:p>
          </table:table-cell>
          <table:table-cell table:formula="of:=[.B1337]/[.C1337]" office:value-type="float" office:value="0.00170092592592593" calcext:value-type="float">
            <text:p>0,00170092592592593000</text:p>
          </table:table-cell>
          <table:table-cell table:formula="of:=[.D1338]-[.D133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formula="of:=[.B1337]+11" office:value-type="float" office:value="14707" calcext:value-type="float">
            <text:p>14707</text:p>
          </table:table-cell>
          <table:table-cell office:value-type="float" office:value="8640000" calcext:value-type="float">
            <text:p>8640000</text:p>
          </table:table-cell>
          <table:table-cell table:formula="of:=[.B1338]/[.C1338]" office:value-type="float" office:value="0.00170219907407407" calcext:value-type="float">
            <text:p>0,00170219907407407000</text:p>
          </table:table-cell>
          <table:table-cell table:formula="of:=[.D1339]-[.D133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formula="of:=[.B1338]+11" office:value-type="float" office:value="14718" calcext:value-type="float">
            <text:p>14718</text:p>
          </table:table-cell>
          <table:table-cell office:value-type="float" office:value="8640000" calcext:value-type="float">
            <text:p>8640000</text:p>
          </table:table-cell>
          <table:table-cell table:formula="of:=[.B1339]/[.C1339]" office:value-type="float" office:value="0.00170347222222222" calcext:value-type="float">
            <text:p>0,00170347222222222000</text:p>
          </table:table-cell>
          <table:table-cell table:formula="of:=[.D1340]-[.D1339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formula="of:=[.B1339]+11" office:value-type="float" office:value="14729" calcext:value-type="float">
            <text:p>14729</text:p>
          </table:table-cell>
          <table:table-cell office:value-type="float" office:value="8640000" calcext:value-type="float">
            <text:p>8640000</text:p>
          </table:table-cell>
          <table:table-cell table:formula="of:=[.B1340]/[.C1340]" office:value-type="float" office:value="0.00170474537037037" calcext:value-type="float">
            <text:p>0,00170474537037037000</text:p>
          </table:table-cell>
          <table:table-cell table:formula="of:=[.D1341]-[.D134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formula="of:=[.B1340]+11" office:value-type="float" office:value="14740" calcext:value-type="float">
            <text:p>14740</text:p>
          </table:table-cell>
          <table:table-cell office:value-type="float" office:value="8640000" calcext:value-type="float">
            <text:p>8640000</text:p>
          </table:table-cell>
          <table:table-cell table:formula="of:=[.B1341]/[.C1341]" office:value-type="float" office:value="0.00170601851851852" calcext:value-type="float">
            <text:p>0,00170601851851852000</text:p>
          </table:table-cell>
          <table:table-cell table:formula="of:=[.D1342]-[.D1341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formula="of:=[.B1341]+11" office:value-type="float" office:value="14751" calcext:value-type="float">
            <text:p>14751</text:p>
          </table:table-cell>
          <table:table-cell office:value-type="float" office:value="8640000" calcext:value-type="float">
            <text:p>8640000</text:p>
          </table:table-cell>
          <table:table-cell table:formula="of:=[.B1342]/[.C1342]" office:value-type="float" office:value="0.00170729166666667" calcext:value-type="float">
            <text:p>0,00170729166666667000</text:p>
          </table:table-cell>
          <table:table-cell table:formula="of:=[.D1343]-[.D134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formula="of:=[.B1342]+11" office:value-type="float" office:value="14762" calcext:value-type="float">
            <text:p>14762</text:p>
          </table:table-cell>
          <table:table-cell office:value-type="float" office:value="8640000" calcext:value-type="float">
            <text:p>8640000</text:p>
          </table:table-cell>
          <table:table-cell table:formula="of:=[.B1343]/[.C1343]" office:value-type="float" office:value="0.00170856481481481" calcext:value-type="float">
            <text:p>0,00170856481481482000</text:p>
          </table:table-cell>
          <table:table-cell table:formula="of:=[.D1344]-[.D1343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formula="of:=[.B1343]+11" office:value-type="float" office:value="14773" calcext:value-type="float">
            <text:p>14773</text:p>
          </table:table-cell>
          <table:table-cell office:value-type="float" office:value="8640000" calcext:value-type="float">
            <text:p>8640000</text:p>
          </table:table-cell>
          <table:table-cell table:formula="of:=[.B1344]/[.C1344]" office:value-type="float" office:value="0.00170983796296296" calcext:value-type="float">
            <text:p>0,00170983796296296000</text:p>
          </table:table-cell>
          <table:table-cell table:formula="of:=[.D1345]-[.D134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formula="of:=[.B1344]+11" office:value-type="float" office:value="14784" calcext:value-type="float">
            <text:p>14784</text:p>
          </table:table-cell>
          <table:table-cell office:value-type="float" office:value="8640000" calcext:value-type="float">
            <text:p>8640000</text:p>
          </table:table-cell>
          <table:table-cell table:formula="of:=[.B1345]/[.C1345]" office:value-type="float" office:value="0.00171111111111111" calcext:value-type="float">
            <text:p>0,00171111111111111000</text:p>
          </table:table-cell>
          <table:table-cell table:formula="of:=[.D1346]-[.D1345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formula="of:=[.B1345]+11" office:value-type="float" office:value="14795" calcext:value-type="float">
            <text:p>14795</text:p>
          </table:table-cell>
          <table:table-cell office:value-type="float" office:value="8640000" calcext:value-type="float">
            <text:p>8640000</text:p>
          </table:table-cell>
          <table:table-cell table:formula="of:=[.B1346]/[.C1346]" office:value-type="float" office:value="0.00171238425925926" calcext:value-type="float">
            <text:p>0,00171238425925926000</text:p>
          </table:table-cell>
          <table:table-cell table:formula="of:=[.D1347]-[.D134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formula="of:=[.B1346]+11" office:value-type="float" office:value="14806" calcext:value-type="float">
            <text:p>14806</text:p>
          </table:table-cell>
          <table:table-cell office:value-type="float" office:value="8640000" calcext:value-type="float">
            <text:p>8640000</text:p>
          </table:table-cell>
          <table:table-cell table:formula="of:=[.B1347]/[.C1347]" office:value-type="float" office:value="0.00171365740740741" calcext:value-type="float">
            <text:p>0,00171365740740741000</text:p>
          </table:table-cell>
          <table:table-cell table:formula="of:=[.D1348]-[.D1347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formula="of:=[.B1347]+11" office:value-type="float" office:value="14817" calcext:value-type="float">
            <text:p>14817</text:p>
          </table:table-cell>
          <table:table-cell office:value-type="float" office:value="8640000" calcext:value-type="float">
            <text:p>8640000</text:p>
          </table:table-cell>
          <table:table-cell table:formula="of:=[.B1348]/[.C1348]" office:value-type="float" office:value="0.00171493055555556" calcext:value-type="float">
            <text:p>0,00171493055555556000</text:p>
          </table:table-cell>
          <table:table-cell table:formula="of:=[.D1349]-[.D134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[.B1348]+11" office:value-type="float" office:value="14828" calcext:value-type="float">
            <text:p>14828</text:p>
          </table:table-cell>
          <table:table-cell office:value-type="float" office:value="8640000" calcext:value-type="float">
            <text:p>8640000</text:p>
          </table:table-cell>
          <table:table-cell table:formula="of:=[.B1349]/[.C1349]" office:value-type="float" office:value="0.0017162037037037" calcext:value-type="float">
            <text:p>0,00171620370370370000</text:p>
          </table:table-cell>
          <table:table-cell table:formula="of:=[.D1350]-[.D1349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table:formula="of:=[.B1349]+11" office:value-type="float" office:value="14839" calcext:value-type="float">
            <text:p>14839</text:p>
          </table:table-cell>
          <table:table-cell office:value-type="float" office:value="8640000" calcext:value-type="float">
            <text:p>8640000</text:p>
          </table:table-cell>
          <table:table-cell table:formula="of:=[.B1350]/[.C1350]" office:value-type="float" office:value="0.00171747685185185" calcext:value-type="float">
            <text:p>0,00171747685185185000</text:p>
          </table:table-cell>
          <table:table-cell table:formula="of:=[.D1351]-[.D135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[.B1350]+11" office:value-type="float" office:value="14850" calcext:value-type="float">
            <text:p>14850</text:p>
          </table:table-cell>
          <table:table-cell office:value-type="float" office:value="8640000" calcext:value-type="float">
            <text:p>8640000</text:p>
          </table:table-cell>
          <table:table-cell table:formula="of:=[.B1351]/[.C1351]" office:value-type="float" office:value="0.00171875" calcext:value-type="float">
            <text:p>0,00171875000000000000</text:p>
          </table:table-cell>
          <table:table-cell table:formula="of:=[.D1352]-[.D1351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table:formula="of:=[.B1351]+11" office:value-type="float" office:value="14861" calcext:value-type="float">
            <text:p>14861</text:p>
          </table:table-cell>
          <table:table-cell office:value-type="float" office:value="8640000" calcext:value-type="float">
            <text:p>8640000</text:p>
          </table:table-cell>
          <table:table-cell table:formula="of:=[.B1352]/[.C1352]" office:value-type="float" office:value="0.00172002314814815" calcext:value-type="float">
            <text:p>0,00172002314814815000</text:p>
          </table:table-cell>
          <table:table-cell table:formula="of:=[.D1353]-[.D135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table:formula="of:=[.B1352]+11" office:value-type="float" office:value="14872" calcext:value-type="float">
            <text:p>14872</text:p>
          </table:table-cell>
          <table:table-cell office:value-type="float" office:value="8640000" calcext:value-type="float">
            <text:p>8640000</text:p>
          </table:table-cell>
          <table:table-cell table:formula="of:=[.B1353]/[.C1353]" office:value-type="float" office:value="0.0017212962962963" calcext:value-type="float">
            <text:p>0,00172129629629630000</text:p>
          </table:table-cell>
          <table:table-cell table:formula="of:=[.D1354]-[.D135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table:formula="of:=[.B1353]+11" office:value-type="float" office:value="14883" calcext:value-type="float">
            <text:p>14883</text:p>
          </table:table-cell>
          <table:table-cell office:value-type="float" office:value="8640000" calcext:value-type="float">
            <text:p>8640000</text:p>
          </table:table-cell>
          <table:table-cell table:formula="of:=[.B1354]/[.C1354]" office:value-type="float" office:value="0.00172256944444444" calcext:value-type="float">
            <text:p>0,00172256944444444000</text:p>
          </table:table-cell>
          <table:table-cell table:formula="of:=[.D1355]-[.D1354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table:formula="of:=[.B1354]+11" office:value-type="float" office:value="14894" calcext:value-type="float">
            <text:p>14894</text:p>
          </table:table-cell>
          <table:table-cell office:value-type="float" office:value="8640000" calcext:value-type="float">
            <text:p>8640000</text:p>
          </table:table-cell>
          <table:table-cell table:formula="of:=[.B1355]/[.C1355]" office:value-type="float" office:value="0.00172384259259259" calcext:value-type="float">
            <text:p>0,00172384259259259000</text:p>
          </table:table-cell>
          <table:table-cell table:formula="of:=[.D1356]-[.D135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table:formula="of:=[.B1355]+11" office:value-type="float" office:value="14905" calcext:value-type="float">
            <text:p>14905</text:p>
          </table:table-cell>
          <table:table-cell office:value-type="float" office:value="8640000" calcext:value-type="float">
            <text:p>8640000</text:p>
          </table:table-cell>
          <table:table-cell table:formula="of:=[.B1356]/[.C1356]" office:value-type="float" office:value="0.00172511574074074" calcext:value-type="float">
            <text:p>0,00172511574074074000</text:p>
          </table:table-cell>
          <table:table-cell table:formula="of:=[.D1357]-[.D1356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table:formula="of:=[.B1356]+11" office:value-type="float" office:value="14916" calcext:value-type="float">
            <text:p>14916</text:p>
          </table:table-cell>
          <table:table-cell office:value-type="float" office:value="8640000" calcext:value-type="float">
            <text:p>8640000</text:p>
          </table:table-cell>
          <table:table-cell table:formula="of:=[.B1357]/[.C1357]" office:value-type="float" office:value="0.00172638888888889" calcext:value-type="float">
            <text:p>0,00172638888888889000</text:p>
          </table:table-cell>
          <table:table-cell table:formula="of:=[.D1358]-[.D135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table:formula="of:=[.B1357]+11" office:value-type="float" office:value="14927" calcext:value-type="float">
            <text:p>14927</text:p>
          </table:table-cell>
          <table:table-cell office:value-type="float" office:value="8640000" calcext:value-type="float">
            <text:p>8640000</text:p>
          </table:table-cell>
          <table:table-cell table:formula="of:=[.B1358]/[.C1358]" office:value-type="float" office:value="0.00172766203703704" calcext:value-type="float">
            <text:p>0,00172766203703704000</text:p>
          </table:table-cell>
          <table:table-cell table:formula="of:=[.D1359]-[.D1358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table:formula="of:=[.B1358]+11" office:value-type="float" office:value="14938" calcext:value-type="float">
            <text:p>14938</text:p>
          </table:table-cell>
          <table:table-cell office:value-type="float" office:value="8640000" calcext:value-type="float">
            <text:p>8640000</text:p>
          </table:table-cell>
          <table:table-cell table:formula="of:=[.B1359]/[.C1359]" office:value-type="float" office:value="0.00172893518518519" calcext:value-type="float">
            <text:p>0,00172893518518519000</text:p>
          </table:table-cell>
          <table:table-cell table:formula="of:=[.D1360]-[.D135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table:formula="of:=[.B1359]+11" office:value-type="float" office:value="14949" calcext:value-type="float">
            <text:p>14949</text:p>
          </table:table-cell>
          <table:table-cell office:value-type="float" office:value="8640000" calcext:value-type="float">
            <text:p>8640000</text:p>
          </table:table-cell>
          <table:table-cell table:formula="of:=[.B1360]/[.C1360]" office:value-type="float" office:value="0.00173020833333333" calcext:value-type="float">
            <text:p>0,00173020833333333000</text:p>
          </table:table-cell>
          <table:table-cell table:formula="of:=[.D1361]-[.D1360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[.B1360]+11" office:value-type="float" office:value="14960" calcext:value-type="float">
            <text:p>14960</text:p>
          </table:table-cell>
          <table:table-cell office:value-type="float" office:value="8640000" calcext:value-type="float">
            <text:p>8640000</text:p>
          </table:table-cell>
          <table:table-cell table:formula="of:=[.B1361]/[.C1361]" office:value-type="float" office:value="0.00173148148148148" calcext:value-type="float">
            <text:p>0,00173148148148148000</text:p>
          </table:table-cell>
          <table:table-cell table:formula="of:=[.D1362]-[.D136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table:formula="of:=[.B1361]+11" office:value-type="float" office:value="14971" calcext:value-type="float">
            <text:p>14971</text:p>
          </table:table-cell>
          <table:table-cell office:value-type="float" office:value="8640000" calcext:value-type="float">
            <text:p>8640000</text:p>
          </table:table-cell>
          <table:table-cell table:formula="of:=[.B1362]/[.C1362]" office:value-type="float" office:value="0.00173275462962963" calcext:value-type="float">
            <text:p>0,00173275462962963000</text:p>
          </table:table-cell>
          <table:table-cell table:formula="of:=[.D1363]-[.D1362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table:formula="of:=[.B1362]+11" office:value-type="float" office:value="14982" calcext:value-type="float">
            <text:p>14982</text:p>
          </table:table-cell>
          <table:table-cell office:value-type="float" office:value="8640000" calcext:value-type="float">
            <text:p>8640000</text:p>
          </table:table-cell>
          <table:table-cell table:formula="of:=[.B1363]/[.C1363]" office:value-type="float" office:value="0.00173402777777778" calcext:value-type="float">
            <text:p>0,00173402777777778000</text:p>
          </table:table-cell>
          <table:table-cell table:formula="of:=[.D1364]-[.D136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table:formula="of:=[.B1363]+11" office:value-type="float" office:value="14993" calcext:value-type="float">
            <text:p>14993</text:p>
          </table:table-cell>
          <table:table-cell office:value-type="float" office:value="8640000" calcext:value-type="float">
            <text:p>8640000</text:p>
          </table:table-cell>
          <table:table-cell table:formula="of:=[.B1364]/[.C1364]" office:value-type="float" office:value="0.00173530092592593" calcext:value-type="float">
            <text:p>0,00173530092592593000</text:p>
          </table:table-cell>
          <table:table-cell table:formula="of:=[.D1365]-[.D1364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table:formula="of:=[.B1364]+11" office:value-type="float" office:value="15004" calcext:value-type="float">
            <text:p>15004</text:p>
          </table:table-cell>
          <table:table-cell office:value-type="float" office:value="8640000" calcext:value-type="float">
            <text:p>8640000</text:p>
          </table:table-cell>
          <table:table-cell table:formula="of:=[.B1365]/[.C1365]" office:value-type="float" office:value="0.00173657407407407" calcext:value-type="float">
            <text:p>0,00173657407407407000</text:p>
          </table:table-cell>
          <table:table-cell table:formula="of:=[.D1366]-[.D136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table:formula="of:=[.B1365]+11" office:value-type="float" office:value="15015" calcext:value-type="float">
            <text:p>15015</text:p>
          </table:table-cell>
          <table:table-cell office:value-type="float" office:value="8640000" calcext:value-type="float">
            <text:p>8640000</text:p>
          </table:table-cell>
          <table:table-cell table:formula="of:=[.B1366]/[.C1366]" office:value-type="float" office:value="0.00173784722222222" calcext:value-type="float">
            <text:p>0,00173784722222222000</text:p>
          </table:table-cell>
          <table:table-cell table:formula="of:=[.D1367]-[.D136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table:formula="of:=[.B1366]+11" office:value-type="float" office:value="15026" calcext:value-type="float">
            <text:p>15026</text:p>
          </table:table-cell>
          <table:table-cell office:value-type="float" office:value="8640000" calcext:value-type="float">
            <text:p>8640000</text:p>
          </table:table-cell>
          <table:table-cell table:formula="of:=[.B1367]/[.C1367]" office:value-type="float" office:value="0.00173912037037037" calcext:value-type="float">
            <text:p>0,00173912037037037000</text:p>
          </table:table-cell>
          <table:table-cell table:formula="of:=[.D1368]-[.D1367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table:formula="of:=[.B1367]+11" office:value-type="float" office:value="15037" calcext:value-type="float">
            <text:p>15037</text:p>
          </table:table-cell>
          <table:table-cell office:value-type="float" office:value="8640000" calcext:value-type="float">
            <text:p>8640000</text:p>
          </table:table-cell>
          <table:table-cell table:formula="of:=[.B1368]/[.C1368]" office:value-type="float" office:value="0.00174039351851852" calcext:value-type="float">
            <text:p>0,00174039351851852000</text:p>
          </table:table-cell>
          <table:table-cell table:formula="of:=[.D1369]-[.D136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table:formula="of:=[.B1368]+11" office:value-type="float" office:value="15048" calcext:value-type="float">
            <text:p>15048</text:p>
          </table:table-cell>
          <table:table-cell office:value-type="float" office:value="8640000" calcext:value-type="float">
            <text:p>8640000</text:p>
          </table:table-cell>
          <table:table-cell table:formula="of:=[.B1369]/[.C1369]" office:value-type="float" office:value="0.00174166666666667" calcext:value-type="float">
            <text:p>0,00174166666666667000</text:p>
          </table:table-cell>
          <table:table-cell table:formula="of:=[.D1370]-[.D1369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table:formula="of:=[.B1369]+11" office:value-type="float" office:value="15059" calcext:value-type="float">
            <text:p>15059</text:p>
          </table:table-cell>
          <table:table-cell office:value-type="float" office:value="8640000" calcext:value-type="float">
            <text:p>8640000</text:p>
          </table:table-cell>
          <table:table-cell table:formula="of:=[.B1370]/[.C1370]" office:value-type="float" office:value="0.00174293981481481" calcext:value-type="float">
            <text:p>0,00174293981481481000</text:p>
          </table:table-cell>
          <table:table-cell table:formula="of:=[.D1371]-[.D137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table:formula="of:=[.B1370]+11" office:value-type="float" office:value="15070" calcext:value-type="float">
            <text:p>15070</text:p>
          </table:table-cell>
          <table:table-cell office:value-type="float" office:value="8640000" calcext:value-type="float">
            <text:p>8640000</text:p>
          </table:table-cell>
          <table:table-cell table:formula="of:=[.B1371]/[.C1371]" office:value-type="float" office:value="0.00174421296296296" calcext:value-type="float">
            <text:p>0,00174421296296296000</text:p>
          </table:table-cell>
          <table:table-cell table:formula="of:=[.D1372]-[.D1371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table:formula="of:=[.B1371]+11" office:value-type="float" office:value="15081" calcext:value-type="float">
            <text:p>15081</text:p>
          </table:table-cell>
          <table:table-cell office:value-type="float" office:value="8640000" calcext:value-type="float">
            <text:p>8640000</text:p>
          </table:table-cell>
          <table:table-cell table:formula="of:=[.B1372]/[.C1372]" office:value-type="float" office:value="0.00174548611111111" calcext:value-type="float">
            <text:p>0,00174548611111111000</text:p>
          </table:table-cell>
          <table:table-cell table:formula="of:=[.D1373]-[.D137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table:formula="of:=[.B1372]+11" office:value-type="float" office:value="15092" calcext:value-type="float">
            <text:p>15092</text:p>
          </table:table-cell>
          <table:table-cell office:value-type="float" office:value="8640000" calcext:value-type="float">
            <text:p>8640000</text:p>
          </table:table-cell>
          <table:table-cell table:formula="of:=[.B1373]/[.C1373]" office:value-type="float" office:value="0.00174675925925926" calcext:value-type="float">
            <text:p>0,00174675925925926000</text:p>
          </table:table-cell>
          <table:table-cell table:formula="of:=[.D1374]-[.D1373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table:formula="of:=[.B1373]+11" office:value-type="float" office:value="15103" calcext:value-type="float">
            <text:p>15103</text:p>
          </table:table-cell>
          <table:table-cell office:value-type="float" office:value="8640000" calcext:value-type="float">
            <text:p>8640000</text:p>
          </table:table-cell>
          <table:table-cell table:formula="of:=[.B1374]/[.C1374]" office:value-type="float" office:value="0.00174803240740741" calcext:value-type="float">
            <text:p>0,00174803240740741000</text:p>
          </table:table-cell>
          <table:table-cell table:formula="of:=[.D1375]-[.D137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table:formula="of:=[.B1374]+11" office:value-type="float" office:value="15114" calcext:value-type="float">
            <text:p>15114</text:p>
          </table:table-cell>
          <table:table-cell office:value-type="float" office:value="8640000" calcext:value-type="float">
            <text:p>8640000</text:p>
          </table:table-cell>
          <table:table-cell table:formula="of:=[.B1375]/[.C1375]" office:value-type="float" office:value="0.00174930555555556" calcext:value-type="float">
            <text:p>0,00174930555555556000</text:p>
          </table:table-cell>
          <table:table-cell table:formula="of:=[.D1376]-[.D1375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table:formula="of:=[.B1375]+11" office:value-type="float" office:value="15125" calcext:value-type="float">
            <text:p>15125</text:p>
          </table:table-cell>
          <table:table-cell office:value-type="float" office:value="8640000" calcext:value-type="float">
            <text:p>8640000</text:p>
          </table:table-cell>
          <table:table-cell table:formula="of:=[.B1376]/[.C1376]" office:value-type="float" office:value="0.0017505787037037" calcext:value-type="float">
            <text:p>0,00175057870370370000</text:p>
          </table:table-cell>
          <table:table-cell table:formula="of:=[.D1377]-[.D137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table:formula="of:=[.B1376]+11" office:value-type="float" office:value="15136" calcext:value-type="float">
            <text:p>15136</text:p>
          </table:table-cell>
          <table:table-cell office:value-type="float" office:value="8640000" calcext:value-type="float">
            <text:p>8640000</text:p>
          </table:table-cell>
          <table:table-cell table:formula="of:=[.B1377]/[.C1377]" office:value-type="float" office:value="0.00175185185185185" calcext:value-type="float">
            <text:p>0,00175185185185185000</text:p>
          </table:table-cell>
          <table:table-cell table:formula="of:=[.D1378]-[.D1377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table:formula="of:=[.B1377]+11" office:value-type="float" office:value="15147" calcext:value-type="float">
            <text:p>15147</text:p>
          </table:table-cell>
          <table:table-cell office:value-type="float" office:value="8640000" calcext:value-type="float">
            <text:p>8640000</text:p>
          </table:table-cell>
          <table:table-cell table:formula="of:=[.B1378]/[.C1378]" office:value-type="float" office:value="0.001753125" calcext:value-type="float">
            <text:p>0,00175312500000000000</text:p>
          </table:table-cell>
          <table:table-cell table:formula="of:=[.D1379]-[.D137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table:formula="of:=[.B1378]+11" office:value-type="float" office:value="15158" calcext:value-type="float">
            <text:p>15158</text:p>
          </table:table-cell>
          <table:table-cell office:value-type="float" office:value="8640000" calcext:value-type="float">
            <text:p>8640000</text:p>
          </table:table-cell>
          <table:table-cell table:formula="of:=[.B1379]/[.C1379]" office:value-type="float" office:value="0.00175439814814815" calcext:value-type="float">
            <text:p>0,00175439814814815000</text:p>
          </table:table-cell>
          <table:table-cell table:formula="of:=[.D1380]-[.D1379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table:formula="of:=[.B1379]+11" office:value-type="float" office:value="15169" calcext:value-type="float">
            <text:p>15169</text:p>
          </table:table-cell>
          <table:table-cell office:value-type="float" office:value="8640000" calcext:value-type="float">
            <text:p>8640000</text:p>
          </table:table-cell>
          <table:table-cell table:formula="of:=[.B1380]/[.C1380]" office:value-type="float" office:value="0.0017556712962963" calcext:value-type="float">
            <text:p>0,00175567129629630000</text:p>
          </table:table-cell>
          <table:table-cell table:formula="of:=[.D1381]-[.D138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[.B1380]+11" office:value-type="float" office:value="15180" calcext:value-type="float">
            <text:p>15180</text:p>
          </table:table-cell>
          <table:table-cell office:value-type="float" office:value="8640000" calcext:value-type="float">
            <text:p>8640000</text:p>
          </table:table-cell>
          <table:table-cell table:formula="of:=[.B1381]/[.C1381]" office:value-type="float" office:value="0.00175694444444444" calcext:value-type="float">
            <text:p>0,00175694444444444000</text:p>
          </table:table-cell>
          <table:table-cell table:formula="of:=[.D1382]-[.D138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table:formula="of:=[.B1381]+11" office:value-type="float" office:value="15191" calcext:value-type="float">
            <text:p>15191</text:p>
          </table:table-cell>
          <table:table-cell office:value-type="float" office:value="8640000" calcext:value-type="float">
            <text:p>8640000</text:p>
          </table:table-cell>
          <table:table-cell table:formula="of:=[.B1382]/[.C1382]" office:value-type="float" office:value="0.00175821759259259" calcext:value-type="float">
            <text:p>0,00175821759259259000</text:p>
          </table:table-cell>
          <table:table-cell table:formula="of:=[.D1383]-[.D1382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table:formula="of:=[.B1382]+11" office:value-type="float" office:value="15202" calcext:value-type="float">
            <text:p>15202</text:p>
          </table:table-cell>
          <table:table-cell office:value-type="float" office:value="8640000" calcext:value-type="float">
            <text:p>8640000</text:p>
          </table:table-cell>
          <table:table-cell table:formula="of:=[.B1383]/[.C1383]" office:value-type="float" office:value="0.00175949074074074" calcext:value-type="float">
            <text:p>0,00175949074074074000</text:p>
          </table:table-cell>
          <table:table-cell table:formula="of:=[.D1384]-[.D138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table:formula="of:=[.B1383]+11" office:value-type="float" office:value="15213" calcext:value-type="float">
            <text:p>15213</text:p>
          </table:table-cell>
          <table:table-cell office:value-type="float" office:value="8640000" calcext:value-type="float">
            <text:p>8640000</text:p>
          </table:table-cell>
          <table:table-cell table:formula="of:=[.B1384]/[.C1384]" office:value-type="float" office:value="0.00176076388888889" calcext:value-type="float">
            <text:p>0,00176076388888889000</text:p>
          </table:table-cell>
          <table:table-cell table:formula="of:=[.D1385]-[.D1384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table:formula="of:=[.B1384]+11" office:value-type="float" office:value="15224" calcext:value-type="float">
            <text:p>15224</text:p>
          </table:table-cell>
          <table:table-cell office:value-type="float" office:value="8640000" calcext:value-type="float">
            <text:p>8640000</text:p>
          </table:table-cell>
          <table:table-cell table:formula="of:=[.B1385]/[.C1385]" office:value-type="float" office:value="0.00176203703703704" calcext:value-type="float">
            <text:p>0,00176203703703704000</text:p>
          </table:table-cell>
          <table:table-cell table:formula="of:=[.D1386]-[.D138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table:formula="of:=[.B1385]+11" office:value-type="float" office:value="15235" calcext:value-type="float">
            <text:p>15235</text:p>
          </table:table-cell>
          <table:table-cell office:value-type="float" office:value="8640000" calcext:value-type="float">
            <text:p>8640000</text:p>
          </table:table-cell>
          <table:table-cell table:formula="of:=[.B1386]/[.C1386]" office:value-type="float" office:value="0.00176331018518519" calcext:value-type="float">
            <text:p>0,00176331018518519000</text:p>
          </table:table-cell>
          <table:table-cell table:formula="of:=[.D1387]-[.D1386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table:formula="of:=[.B1386]+11" office:value-type="float" office:value="15246" calcext:value-type="float">
            <text:p>15246</text:p>
          </table:table-cell>
          <table:table-cell office:value-type="float" office:value="8640000" calcext:value-type="float">
            <text:p>8640000</text:p>
          </table:table-cell>
          <table:table-cell table:formula="of:=[.B1387]/[.C1387]" office:value-type="float" office:value="0.00176458333333333" calcext:value-type="float">
            <text:p>0,00176458333333333000</text:p>
          </table:table-cell>
          <table:table-cell table:formula="of:=[.D1388]-[.D138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table:formula="of:=[.B1387]+11" office:value-type="float" office:value="15257" calcext:value-type="float">
            <text:p>15257</text:p>
          </table:table-cell>
          <table:table-cell office:value-type="float" office:value="8640000" calcext:value-type="float">
            <text:p>8640000</text:p>
          </table:table-cell>
          <table:table-cell table:formula="of:=[.B1388]/[.C1388]" office:value-type="float" office:value="0.00176585648148148" calcext:value-type="float">
            <text:p>0,00176585648148148000</text:p>
          </table:table-cell>
          <table:table-cell table:formula="of:=[.D1389]-[.D1388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table:formula="of:=[.B1388]+11" office:value-type="float" office:value="15268" calcext:value-type="float">
            <text:p>15268</text:p>
          </table:table-cell>
          <table:table-cell office:value-type="float" office:value="8640000" calcext:value-type="float">
            <text:p>8640000</text:p>
          </table:table-cell>
          <table:table-cell table:formula="of:=[.B1389]/[.C1389]" office:value-type="float" office:value="0.00176712962962963" calcext:value-type="float">
            <text:p>0,00176712962962963000</text:p>
          </table:table-cell>
          <table:table-cell table:formula="of:=[.D1390]-[.D138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table:formula="of:=[.B1389]+11" office:value-type="float" office:value="15279" calcext:value-type="float">
            <text:p>15279</text:p>
          </table:table-cell>
          <table:table-cell office:value-type="float" office:value="8640000" calcext:value-type="float">
            <text:p>8640000</text:p>
          </table:table-cell>
          <table:table-cell table:formula="of:=[.B1390]/[.C1390]" office:value-type="float" office:value="0.00176840277777778" calcext:value-type="float">
            <text:p>0,00176840277777778000</text:p>
          </table:table-cell>
          <table:table-cell table:formula="of:=[.D1391]-[.D1390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table:formula="of:=[.B1390]+11" office:value-type="float" office:value="15290" calcext:value-type="float">
            <text:p>15290</text:p>
          </table:table-cell>
          <table:table-cell office:value-type="float" office:value="8640000" calcext:value-type="float">
            <text:p>8640000</text:p>
          </table:table-cell>
          <table:table-cell table:formula="of:=[.B1391]/[.C1391]" office:value-type="float" office:value="0.00176967592592593" calcext:value-type="float">
            <text:p>0,00176967592592593000</text:p>
          </table:table-cell>
          <table:table-cell table:formula="of:=[.D1392]-[.D139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table:formula="of:=[.B1391]+11" office:value-type="float" office:value="15301" calcext:value-type="float">
            <text:p>15301</text:p>
          </table:table-cell>
          <table:table-cell office:value-type="float" office:value="8640000" calcext:value-type="float">
            <text:p>8640000</text:p>
          </table:table-cell>
          <table:table-cell table:formula="of:=[.B1392]/[.C1392]" office:value-type="float" office:value="0.00177094907407407" calcext:value-type="float">
            <text:p>0,00177094907407407000</text:p>
          </table:table-cell>
          <table:table-cell table:formula="of:=[.D1393]-[.D1392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table:formula="of:=[.B1392]+11" office:value-type="float" office:value="15312" calcext:value-type="float">
            <text:p>15312</text:p>
          </table:table-cell>
          <table:table-cell office:value-type="float" office:value="8640000" calcext:value-type="float">
            <text:p>8640000</text:p>
          </table:table-cell>
          <table:table-cell table:formula="of:=[.B1393]/[.C1393]" office:value-type="float" office:value="0.00177222222222222" calcext:value-type="float">
            <text:p>0,00177222222222222000</text:p>
          </table:table-cell>
          <table:table-cell table:formula="of:=[.D1394]-[.D139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table:formula="of:=[.B1393]+11" office:value-type="float" office:value="15323" calcext:value-type="float">
            <text:p>15323</text:p>
          </table:table-cell>
          <table:table-cell office:value-type="float" office:value="8640000" calcext:value-type="float">
            <text:p>8640000</text:p>
          </table:table-cell>
          <table:table-cell table:formula="of:=[.B1394]/[.C1394]" office:value-type="float" office:value="0.00177349537037037" calcext:value-type="float">
            <text:p>0,00177349537037037000</text:p>
          </table:table-cell>
          <table:table-cell table:formula="of:=[.D1395]-[.D139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table:formula="of:=[.B1394]+11" office:value-type="float" office:value="15334" calcext:value-type="float">
            <text:p>15334</text:p>
          </table:table-cell>
          <table:table-cell office:value-type="float" office:value="8640000" calcext:value-type="float">
            <text:p>8640000</text:p>
          </table:table-cell>
          <table:table-cell table:formula="of:=[.B1395]/[.C1395]" office:value-type="float" office:value="0.00177476851851852" calcext:value-type="float">
            <text:p>0,00177476851851852000</text:p>
          </table:table-cell>
          <table:table-cell table:formula="of:=[.D1396]-[.D1395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table:formula="of:=[.B1395]+11" office:value-type="float" office:value="15345" calcext:value-type="float">
            <text:p>15345</text:p>
          </table:table-cell>
          <table:table-cell office:value-type="float" office:value="8640000" calcext:value-type="float">
            <text:p>8640000</text:p>
          </table:table-cell>
          <table:table-cell table:formula="of:=[.B1396]/[.C1396]" office:value-type="float" office:value="0.00177604166666667" calcext:value-type="float">
            <text:p>0,00177604166666667000</text:p>
          </table:table-cell>
          <table:table-cell table:formula="of:=[.D1397]-[.D139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table:formula="of:=[.B1396]+11" office:value-type="float" office:value="15356" calcext:value-type="float">
            <text:p>15356</text:p>
          </table:table-cell>
          <table:table-cell office:value-type="float" office:value="8640000" calcext:value-type="float">
            <text:p>8640000</text:p>
          </table:table-cell>
          <table:table-cell table:formula="of:=[.B1397]/[.C1397]" office:value-type="float" office:value="0.00177731481481482" calcext:value-type="float">
            <text:p>0,00177731481481482000</text:p>
          </table:table-cell>
          <table:table-cell table:formula="of:=[.D1398]-[.D1397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table:formula="of:=[.B1397]+11" office:value-type="float" office:value="15367" calcext:value-type="float">
            <text:p>15367</text:p>
          </table:table-cell>
          <table:table-cell office:value-type="float" office:value="8640000" calcext:value-type="float">
            <text:p>8640000</text:p>
          </table:table-cell>
          <table:table-cell table:formula="of:=[.B1398]/[.C1398]" office:value-type="float" office:value="0.00177858796296296" calcext:value-type="float">
            <text:p>0,00177858796296296000</text:p>
          </table:table-cell>
          <table:table-cell table:formula="of:=[.D1399]-[.D139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table:formula="of:=[.B1398]+11" office:value-type="float" office:value="15378" calcext:value-type="float">
            <text:p>15378</text:p>
          </table:table-cell>
          <table:table-cell office:value-type="float" office:value="8640000" calcext:value-type="float">
            <text:p>8640000</text:p>
          </table:table-cell>
          <table:table-cell table:formula="of:=[.B1399]/[.C1399]" office:value-type="float" office:value="0.00177986111111111" calcext:value-type="float">
            <text:p>0,00177986111111111000</text:p>
          </table:table-cell>
          <table:table-cell table:formula="of:=[.D1400]-[.D1399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table:formula="of:=[.B1399]+11" office:value-type="float" office:value="15389" calcext:value-type="float">
            <text:p>15389</text:p>
          </table:table-cell>
          <table:table-cell office:value-type="float" office:value="8640000" calcext:value-type="float">
            <text:p>8640000</text:p>
          </table:table-cell>
          <table:table-cell table:formula="of:=[.B1400]/[.C1400]" office:value-type="float" office:value="0.00178113425925926" calcext:value-type="float">
            <text:p>0,00178113425925926000</text:p>
          </table:table-cell>
          <table:table-cell table:formula="of:=[.D1401]-[.D140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[.B1400]+11" office:value-type="float" office:value="15400" calcext:value-type="float">
            <text:p>15400</text:p>
          </table:table-cell>
          <table:table-cell office:value-type="float" office:value="8640000" calcext:value-type="float">
            <text:p>8640000</text:p>
          </table:table-cell>
          <table:table-cell table:formula="of:=[.B1401]/[.C1401]" office:value-type="float" office:value="0.00178240740740741" calcext:value-type="float">
            <text:p>0,00178240740740741000</text:p>
          </table:table-cell>
          <table:table-cell table:formula="of:=[.D1402]-[.D1401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table:formula="of:=[.B1401]+11" office:value-type="float" office:value="15411" calcext:value-type="float">
            <text:p>15411</text:p>
          </table:table-cell>
          <table:table-cell office:value-type="float" office:value="8640000" calcext:value-type="float">
            <text:p>8640000</text:p>
          </table:table-cell>
          <table:table-cell table:formula="of:=[.B1402]/[.C1402]" office:value-type="float" office:value="0.00178368055555556" calcext:value-type="float">
            <text:p>0,00178368055555556000</text:p>
          </table:table-cell>
          <table:table-cell table:formula="of:=[.D1403]-[.D140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table:formula="of:=[.B1402]+11" office:value-type="float" office:value="15422" calcext:value-type="float">
            <text:p>15422</text:p>
          </table:table-cell>
          <table:table-cell office:value-type="float" office:value="8640000" calcext:value-type="float">
            <text:p>8640000</text:p>
          </table:table-cell>
          <table:table-cell table:formula="of:=[.B1403]/[.C1403]" office:value-type="float" office:value="0.0017849537037037" calcext:value-type="float">
            <text:p>0,00178495370370370000</text:p>
          </table:table-cell>
          <table:table-cell table:formula="of:=[.D1404]-[.D1403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table:formula="of:=[.B1403]+11" office:value-type="float" office:value="15433" calcext:value-type="float">
            <text:p>15433</text:p>
          </table:table-cell>
          <table:table-cell office:value-type="float" office:value="8640000" calcext:value-type="float">
            <text:p>8640000</text:p>
          </table:table-cell>
          <table:table-cell table:formula="of:=[.B1404]/[.C1404]" office:value-type="float" office:value="0.00178622685185185" calcext:value-type="float">
            <text:p>0,00178622685185185000</text:p>
          </table:table-cell>
          <table:table-cell table:formula="of:=[.D1405]-[.D140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table:formula="of:=[.B1404]+11" office:value-type="float" office:value="15444" calcext:value-type="float">
            <text:p>15444</text:p>
          </table:table-cell>
          <table:table-cell office:value-type="float" office:value="8640000" calcext:value-type="float">
            <text:p>8640000</text:p>
          </table:table-cell>
          <table:table-cell table:formula="of:=[.B1405]/[.C1405]" office:value-type="float" office:value="0.0017875" calcext:value-type="float">
            <text:p>0,00178750000000000000</text:p>
          </table:table-cell>
          <table:table-cell table:formula="of:=[.D1406]-[.D1405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table:formula="of:=[.B1405]+11" office:value-type="float" office:value="15455" calcext:value-type="float">
            <text:p>15455</text:p>
          </table:table-cell>
          <table:table-cell office:value-type="float" office:value="8640000" calcext:value-type="float">
            <text:p>8640000</text:p>
          </table:table-cell>
          <table:table-cell table:formula="of:=[.B1406]/[.C1406]" office:value-type="float" office:value="0.00178877314814815" calcext:value-type="float">
            <text:p>0,00178877314814815000</text:p>
          </table:table-cell>
          <table:table-cell table:formula="of:=[.D1407]-[.D140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table:formula="of:=[.B1406]+11" office:value-type="float" office:value="15466" calcext:value-type="float">
            <text:p>15466</text:p>
          </table:table-cell>
          <table:table-cell office:value-type="float" office:value="8640000" calcext:value-type="float">
            <text:p>8640000</text:p>
          </table:table-cell>
          <table:table-cell table:formula="of:=[.B1407]/[.C1407]" office:value-type="float" office:value="0.0017900462962963" calcext:value-type="float">
            <text:p>0,00179004629629630000</text:p>
          </table:table-cell>
          <table:table-cell table:formula="of:=[.D1408]-[.D1407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table:formula="of:=[.B1407]+11" office:value-type="float" office:value="15477" calcext:value-type="float">
            <text:p>15477</text:p>
          </table:table-cell>
          <table:table-cell office:value-type="float" office:value="8640000" calcext:value-type="float">
            <text:p>8640000</text:p>
          </table:table-cell>
          <table:table-cell table:formula="of:=[.B1408]/[.C1408]" office:value-type="float" office:value="0.00179131944444444" calcext:value-type="float">
            <text:p>0,00179131944444444000</text:p>
          </table:table-cell>
          <table:table-cell table:formula="of:=[.D1409]-[.D140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table:formula="of:=[.B1408]+11" office:value-type="float" office:value="15488" calcext:value-type="float">
            <text:p>15488</text:p>
          </table:table-cell>
          <table:table-cell office:value-type="float" office:value="8640000" calcext:value-type="float">
            <text:p>8640000</text:p>
          </table:table-cell>
          <table:table-cell table:formula="of:=[.B1409]/[.C1409]" office:value-type="float" office:value="0.00179259259259259" calcext:value-type="float">
            <text:p>0,00179259259259259000</text:p>
          </table:table-cell>
          <table:table-cell table:formula="of:=[.D1410]-[.D140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table:formula="of:=[.B1409]+11" office:value-type="float" office:value="15499" calcext:value-type="float">
            <text:p>15499</text:p>
          </table:table-cell>
          <table:table-cell office:value-type="float" office:value="8640000" calcext:value-type="float">
            <text:p>8640000</text:p>
          </table:table-cell>
          <table:table-cell table:formula="of:=[.B1410]/[.C1410]" office:value-type="float" office:value="0.00179386574074074" calcext:value-type="float">
            <text:p>0,00179386574074074000</text:p>
          </table:table-cell>
          <table:table-cell table:formula="of:=[.D1411]-[.D1410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table:formula="of:=[.B1410]+11" office:value-type="float" office:value="15510" calcext:value-type="float">
            <text:p>15510</text:p>
          </table:table-cell>
          <table:table-cell office:value-type="float" office:value="8640000" calcext:value-type="float">
            <text:p>8640000</text:p>
          </table:table-cell>
          <table:table-cell table:formula="of:=[.B1411]/[.C1411]" office:value-type="float" office:value="0.00179513888888889" calcext:value-type="float">
            <text:p>0,00179513888888889000</text:p>
          </table:table-cell>
          <table:table-cell table:formula="of:=[.D1412]-[.D141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table:formula="of:=[.B1411]+11" office:value-type="float" office:value="15521" calcext:value-type="float">
            <text:p>15521</text:p>
          </table:table-cell>
          <table:table-cell office:value-type="float" office:value="8640000" calcext:value-type="float">
            <text:p>8640000</text:p>
          </table:table-cell>
          <table:table-cell table:formula="of:=[.B1412]/[.C1412]" office:value-type="float" office:value="0.00179641203703704" calcext:value-type="float">
            <text:p>0,00179641203703704000</text:p>
          </table:table-cell>
          <table:table-cell table:formula="of:=[.D1413]-[.D1412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table:formula="of:=[.B1412]+11" office:value-type="float" office:value="15532" calcext:value-type="float">
            <text:p>15532</text:p>
          </table:table-cell>
          <table:table-cell office:value-type="float" office:value="8640000" calcext:value-type="float">
            <text:p>8640000</text:p>
          </table:table-cell>
          <table:table-cell table:formula="of:=[.B1413]/[.C1413]" office:value-type="float" office:value="0.00179768518518519" calcext:value-type="float">
            <text:p>0,00179768518518519000</text:p>
          </table:table-cell>
          <table:table-cell table:formula="of:=[.D1414]-[.D141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table:formula="of:=[.B1413]+11" office:value-type="float" office:value="15543" calcext:value-type="float">
            <text:p>15543</text:p>
          </table:table-cell>
          <table:table-cell office:value-type="float" office:value="8640000" calcext:value-type="float">
            <text:p>8640000</text:p>
          </table:table-cell>
          <table:table-cell table:formula="of:=[.B1414]/[.C1414]" office:value-type="float" office:value="0.00179895833333333" calcext:value-type="float">
            <text:p>0,00179895833333333000</text:p>
          </table:table-cell>
          <table:table-cell table:formula="of:=[.D1415]-[.D1414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table:formula="of:=[.B1414]+11" office:value-type="float" office:value="15554" calcext:value-type="float">
            <text:p>15554</text:p>
          </table:table-cell>
          <table:table-cell office:value-type="float" office:value="8640000" calcext:value-type="float">
            <text:p>8640000</text:p>
          </table:table-cell>
          <table:table-cell table:formula="of:=[.B1415]/[.C1415]" office:value-type="float" office:value="0.00180023148148148" calcext:value-type="float">
            <text:p>0,00180023148148148000</text:p>
          </table:table-cell>
          <table:table-cell table:formula="of:=[.D1416]-[.D141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table:formula="of:=[.B1415]+11" office:value-type="float" office:value="15565" calcext:value-type="float">
            <text:p>15565</text:p>
          </table:table-cell>
          <table:table-cell office:value-type="float" office:value="8640000" calcext:value-type="float">
            <text:p>8640000</text:p>
          </table:table-cell>
          <table:table-cell table:formula="of:=[.B1416]/[.C1416]" office:value-type="float" office:value="0.00180150462962963" calcext:value-type="float">
            <text:p>0,00180150462962963000</text:p>
          </table:table-cell>
          <table:table-cell table:formula="of:=[.D1417]-[.D1416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table:formula="of:=[.B1416]+11" office:value-type="float" office:value="15576" calcext:value-type="float">
            <text:p>15576</text:p>
          </table:table-cell>
          <table:table-cell office:value-type="float" office:value="8640000" calcext:value-type="float">
            <text:p>8640000</text:p>
          </table:table-cell>
          <table:table-cell table:formula="of:=[.B1417]/[.C1417]" office:value-type="float" office:value="0.00180277777777778" calcext:value-type="float">
            <text:p>0,00180277777777778000</text:p>
          </table:table-cell>
          <table:table-cell table:formula="of:=[.D1418]-[.D141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table:formula="of:=[.B1417]+11" office:value-type="float" office:value="15587" calcext:value-type="float">
            <text:p>15587</text:p>
          </table:table-cell>
          <table:table-cell office:value-type="float" office:value="8640000" calcext:value-type="float">
            <text:p>8640000</text:p>
          </table:table-cell>
          <table:table-cell table:formula="of:=[.B1418]/[.C1418]" office:value-type="float" office:value="0.00180405092592593" calcext:value-type="float">
            <text:p>0,00180405092592593000</text:p>
          </table:table-cell>
          <table:table-cell table:formula="of:=[.D1419]-[.D1418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table:formula="of:=[.B1418]+11" office:value-type="float" office:value="15598" calcext:value-type="float">
            <text:p>15598</text:p>
          </table:table-cell>
          <table:table-cell office:value-type="float" office:value="8640000" calcext:value-type="float">
            <text:p>8640000</text:p>
          </table:table-cell>
          <table:table-cell table:formula="of:=[.B1419]/[.C1419]" office:value-type="float" office:value="0.00180532407407407" calcext:value-type="float">
            <text:p>0,00180532407407407000</text:p>
          </table:table-cell>
          <table:table-cell table:formula="of:=[.D1420]-[.D141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table:formula="of:=[.B1419]+11" office:value-type="float" office:value="15609" calcext:value-type="float">
            <text:p>15609</text:p>
          </table:table-cell>
          <table:table-cell office:value-type="float" office:value="8640000" calcext:value-type="float">
            <text:p>8640000</text:p>
          </table:table-cell>
          <table:table-cell table:formula="of:=[.B1420]/[.C1420]" office:value-type="float" office:value="0.00180659722222222" calcext:value-type="float">
            <text:p>0,00180659722222222000</text:p>
          </table:table-cell>
          <table:table-cell table:formula="of:=[.D1421]-[.D1420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table:formula="of:=[.B1420]+11" office:value-type="float" office:value="15620" calcext:value-type="float">
            <text:p>15620</text:p>
          </table:table-cell>
          <table:table-cell office:value-type="float" office:value="8640000" calcext:value-type="float">
            <text:p>8640000</text:p>
          </table:table-cell>
          <table:table-cell table:formula="of:=[.B1421]/[.C1421]" office:value-type="float" office:value="0.00180787037037037" calcext:value-type="float">
            <text:p>0,00180787037037037000</text:p>
          </table:table-cell>
          <table:table-cell table:formula="of:=[.D1422]-[.D142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table:formula="of:=[.B1421]+11" office:value-type="float" office:value="15631" calcext:value-type="float">
            <text:p>15631</text:p>
          </table:table-cell>
          <table:table-cell office:value-type="float" office:value="8640000" calcext:value-type="float">
            <text:p>8640000</text:p>
          </table:table-cell>
          <table:table-cell table:formula="of:=[.B1422]/[.C1422]" office:value-type="float" office:value="0.00180914351851852" calcext:value-type="float">
            <text:p>0,00180914351851852000</text:p>
          </table:table-cell>
          <table:table-cell table:formula="of:=[.D1423]-[.D142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table:formula="of:=[.B1422]+11" office:value-type="float" office:value="15642" calcext:value-type="float">
            <text:p>15642</text:p>
          </table:table-cell>
          <table:table-cell office:value-type="float" office:value="8640000" calcext:value-type="float">
            <text:p>8640000</text:p>
          </table:table-cell>
          <table:table-cell table:formula="of:=[.B1423]/[.C1423]" office:value-type="float" office:value="0.00181041666666667" calcext:value-type="float">
            <text:p>0,00181041666666667000</text:p>
          </table:table-cell>
          <table:table-cell table:formula="of:=[.D1424]-[.D1423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table:formula="of:=[.B1423]+11" office:value-type="float" office:value="15653" calcext:value-type="float">
            <text:p>15653</text:p>
          </table:table-cell>
          <table:table-cell office:value-type="float" office:value="8640000" calcext:value-type="float">
            <text:p>8640000</text:p>
          </table:table-cell>
          <table:table-cell table:formula="of:=[.B1424]/[.C1424]" office:value-type="float" office:value="0.00181168981481481" calcext:value-type="float">
            <text:p>0,00181168981481481000</text:p>
          </table:table-cell>
          <table:table-cell table:formula="of:=[.D1425]-[.D142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table:formula="of:=[.B1424]+11" office:value-type="float" office:value="15664" calcext:value-type="float">
            <text:p>15664</text:p>
          </table:table-cell>
          <table:table-cell office:value-type="float" office:value="8640000" calcext:value-type="float">
            <text:p>8640000</text:p>
          </table:table-cell>
          <table:table-cell table:formula="of:=[.B1425]/[.C1425]" office:value-type="float" office:value="0.00181296296296296" calcext:value-type="float">
            <text:p>0,00181296296296296000</text:p>
          </table:table-cell>
          <table:table-cell table:formula="of:=[.D1426]-[.D1425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table:formula="of:=[.B1425]+11" office:value-type="float" office:value="15675" calcext:value-type="float">
            <text:p>15675</text:p>
          </table:table-cell>
          <table:table-cell office:value-type="float" office:value="8640000" calcext:value-type="float">
            <text:p>8640000</text:p>
          </table:table-cell>
          <table:table-cell table:formula="of:=[.B1426]/[.C1426]" office:value-type="float" office:value="0.00181423611111111" calcext:value-type="float">
            <text:p>0,00181423611111111000</text:p>
          </table:table-cell>
          <table:table-cell table:formula="of:=[.D1427]-[.D142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table:formula="of:=[.B1426]+11" office:value-type="float" office:value="15686" calcext:value-type="float">
            <text:p>15686</text:p>
          </table:table-cell>
          <table:table-cell office:value-type="float" office:value="8640000" calcext:value-type="float">
            <text:p>8640000</text:p>
          </table:table-cell>
          <table:table-cell table:formula="of:=[.B1427]/[.C1427]" office:value-type="float" office:value="0.00181550925925926" calcext:value-type="float">
            <text:p>0,00181550925925926000</text:p>
          </table:table-cell>
          <table:table-cell table:formula="of:=[.D1428]-[.D1427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table:formula="of:=[.B1427]+11" office:value-type="float" office:value="15697" calcext:value-type="float">
            <text:p>15697</text:p>
          </table:table-cell>
          <table:table-cell office:value-type="float" office:value="8640000" calcext:value-type="float">
            <text:p>8640000</text:p>
          </table:table-cell>
          <table:table-cell table:formula="of:=[.B1428]/[.C1428]" office:value-type="float" office:value="0.00181678240740741" calcext:value-type="float">
            <text:p>0,00181678240740741000</text:p>
          </table:table-cell>
          <table:table-cell table:formula="of:=[.D1429]-[.D142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table:formula="of:=[.B1428]+11" office:value-type="float" office:value="15708" calcext:value-type="float">
            <text:p>15708</text:p>
          </table:table-cell>
          <table:table-cell office:value-type="float" office:value="8640000" calcext:value-type="float">
            <text:p>8640000</text:p>
          </table:table-cell>
          <table:table-cell table:formula="of:=[.B1429]/[.C1429]" office:value-type="float" office:value="0.00181805555555556" calcext:value-type="float">
            <text:p>0,00181805555555556000</text:p>
          </table:table-cell>
          <table:table-cell table:formula="of:=[.D1430]-[.D1429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table:formula="of:=[.B1429]+11" office:value-type="float" office:value="15719" calcext:value-type="float">
            <text:p>15719</text:p>
          </table:table-cell>
          <table:table-cell office:value-type="float" office:value="8640000" calcext:value-type="float">
            <text:p>8640000</text:p>
          </table:table-cell>
          <table:table-cell table:formula="of:=[.B1430]/[.C1430]" office:value-type="float" office:value="0.0018193287037037" calcext:value-type="float">
            <text:p>0,00181932870370370000</text:p>
          </table:table-cell>
          <table:table-cell table:formula="of:=[.D1431]-[.D143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table:formula="of:=[.B1430]+11" office:value-type="float" office:value="15730" calcext:value-type="float">
            <text:p>15730</text:p>
          </table:table-cell>
          <table:table-cell office:value-type="float" office:value="8640000" calcext:value-type="float">
            <text:p>8640000</text:p>
          </table:table-cell>
          <table:table-cell table:formula="of:=[.B1431]/[.C1431]" office:value-type="float" office:value="0.00182060185185185" calcext:value-type="float">
            <text:p>0,00182060185185185000</text:p>
          </table:table-cell>
          <table:table-cell table:formula="of:=[.D1432]-[.D1431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table:formula="of:=[.B1431]+11" office:value-type="float" office:value="15741" calcext:value-type="float">
            <text:p>15741</text:p>
          </table:table-cell>
          <table:table-cell office:value-type="float" office:value="8640000" calcext:value-type="float">
            <text:p>8640000</text:p>
          </table:table-cell>
          <table:table-cell table:formula="of:=[.B1432]/[.C1432]" office:value-type="float" office:value="0.001821875" calcext:value-type="float">
            <text:p>0,00182187500000000000</text:p>
          </table:table-cell>
          <table:table-cell table:formula="of:=[.D1433]-[.D143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[.B1432]+11" office:value-type="float" office:value="15752" calcext:value-type="float">
            <text:p>15752</text:p>
          </table:table-cell>
          <table:table-cell office:value-type="float" office:value="8640000" calcext:value-type="float">
            <text:p>8640000</text:p>
          </table:table-cell>
          <table:table-cell table:formula="of:=[.B1433]/[.C1433]" office:value-type="float" office:value="0.00182314814814815" calcext:value-type="float">
            <text:p>0,00182314814814815000</text:p>
          </table:table-cell>
          <table:table-cell table:formula="of:=[.D1434]-[.D1433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table:formula="of:=[.B1433]+11" office:value-type="float" office:value="15763" calcext:value-type="float">
            <text:p>15763</text:p>
          </table:table-cell>
          <table:table-cell office:value-type="float" office:value="8640000" calcext:value-type="float">
            <text:p>8640000</text:p>
          </table:table-cell>
          <table:table-cell table:formula="of:=[.B1434]/[.C1434]" office:value-type="float" office:value="0.0018244212962963" calcext:value-type="float">
            <text:p>0,00182442129629630000</text:p>
          </table:table-cell>
          <table:table-cell table:formula="of:=[.D1435]-[.D143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table:formula="of:=[.B1434]+11" office:value-type="float" office:value="15774" calcext:value-type="float">
            <text:p>15774</text:p>
          </table:table-cell>
          <table:table-cell office:value-type="float" office:value="8640000" calcext:value-type="float">
            <text:p>8640000</text:p>
          </table:table-cell>
          <table:table-cell table:formula="of:=[.B1435]/[.C1435]" office:value-type="float" office:value="0.00182569444444444" calcext:value-type="float">
            <text:p>0,00182569444444444000</text:p>
          </table:table-cell>
          <table:table-cell table:formula="of:=[.D1436]-[.D1435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table:formula="of:=[.B1435]+11" office:value-type="float" office:value="15785" calcext:value-type="float">
            <text:p>15785</text:p>
          </table:table-cell>
          <table:table-cell office:value-type="float" office:value="8640000" calcext:value-type="float">
            <text:p>8640000</text:p>
          </table:table-cell>
          <table:table-cell table:formula="of:=[.B1436]/[.C1436]" office:value-type="float" office:value="0.00182696759259259" calcext:value-type="float">
            <text:p>0,00182696759259259000</text:p>
          </table:table-cell>
          <table:table-cell table:formula="of:=[.D1437]-[.D143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table:formula="of:=[.B1436]+11" office:value-type="float" office:value="15796" calcext:value-type="float">
            <text:p>15796</text:p>
          </table:table-cell>
          <table:table-cell office:value-type="float" office:value="8640000" calcext:value-type="float">
            <text:p>8640000</text:p>
          </table:table-cell>
          <table:table-cell table:formula="of:=[.B1437]/[.C1437]" office:value-type="float" office:value="0.00182824074074074" calcext:value-type="float">
            <text:p>0,00182824074074074000</text:p>
          </table:table-cell>
          <table:table-cell table:formula="of:=[.D1438]-[.D143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table:formula="of:=[.B1437]+11" office:value-type="float" office:value="15807" calcext:value-type="float">
            <text:p>15807</text:p>
          </table:table-cell>
          <table:table-cell office:value-type="float" office:value="8640000" calcext:value-type="float">
            <text:p>8640000</text:p>
          </table:table-cell>
          <table:table-cell table:formula="of:=[.B1438]/[.C1438]" office:value-type="float" office:value="0.00182951388888889" calcext:value-type="float">
            <text:p>0,00182951388888889000</text:p>
          </table:table-cell>
          <table:table-cell table:formula="of:=[.D1439]-[.D1438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table:formula="of:=[.B1438]+11" office:value-type="float" office:value="15818" calcext:value-type="float">
            <text:p>15818</text:p>
          </table:table-cell>
          <table:table-cell office:value-type="float" office:value="8640000" calcext:value-type="float">
            <text:p>8640000</text:p>
          </table:table-cell>
          <table:table-cell table:formula="of:=[.B1439]/[.C1439]" office:value-type="float" office:value="0.00183078703703704" calcext:value-type="float">
            <text:p>0,00183078703703704000</text:p>
          </table:table-cell>
          <table:table-cell table:formula="of:=[.D1440]-[.D143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table:formula="of:=[.B1439]+11" office:value-type="float" office:value="15829" calcext:value-type="float">
            <text:p>15829</text:p>
          </table:table-cell>
          <table:table-cell office:value-type="float" office:value="8640000" calcext:value-type="float">
            <text:p>8640000</text:p>
          </table:table-cell>
          <table:table-cell table:formula="of:=[.B1440]/[.C1440]" office:value-type="float" office:value="0.00183206018518519" calcext:value-type="float">
            <text:p>0,00183206018518519000</text:p>
          </table:table-cell>
          <table:table-cell table:formula="of:=[.D1441]-[.D1440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[.B1440]+11" office:value-type="float" office:value="15840" calcext:value-type="float">
            <text:p>15840</text:p>
          </table:table-cell>
          <table:table-cell office:value-type="float" office:value="8640000" calcext:value-type="float">
            <text:p>8640000</text:p>
          </table:table-cell>
          <table:table-cell table:formula="of:=[.B1441]/[.C1441]" office:value-type="float" office:value="0.00183333333333333" calcext:value-type="float">
            <text:p>0,00183333333333333000</text:p>
          </table:table-cell>
          <table:table-cell table:formula="of:=[.D1442]-[.D144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table:formula="of:=[.B1441]+11" office:value-type="float" office:value="15851" calcext:value-type="float">
            <text:p>15851</text:p>
          </table:table-cell>
          <table:table-cell office:value-type="float" office:value="8640000" calcext:value-type="float">
            <text:p>8640000</text:p>
          </table:table-cell>
          <table:table-cell table:formula="of:=[.B1442]/[.C1442]" office:value-type="float" office:value="0.00183460648148148" calcext:value-type="float">
            <text:p>0,00183460648148148000</text:p>
          </table:table-cell>
          <table:table-cell table:formula="of:=[.D1443]-[.D1442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table:formula="of:=[.B1442]+11" office:value-type="float" office:value="15862" calcext:value-type="float">
            <text:p>15862</text:p>
          </table:table-cell>
          <table:table-cell office:value-type="float" office:value="8640000" calcext:value-type="float">
            <text:p>8640000</text:p>
          </table:table-cell>
          <table:table-cell table:formula="of:=[.B1443]/[.C1443]" office:value-type="float" office:value="0.00183587962962963" calcext:value-type="float">
            <text:p>0,00183587962962963000</text:p>
          </table:table-cell>
          <table:table-cell table:formula="of:=[.D1444]-[.D144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table:formula="of:=[.B1443]+11" office:value-type="float" office:value="15873" calcext:value-type="float">
            <text:p>15873</text:p>
          </table:table-cell>
          <table:table-cell office:value-type="float" office:value="8640000" calcext:value-type="float">
            <text:p>8640000</text:p>
          </table:table-cell>
          <table:table-cell table:formula="of:=[.B1444]/[.C1444]" office:value-type="float" office:value="0.00183715277777778" calcext:value-type="float">
            <text:p>0,00183715277777778000</text:p>
          </table:table-cell>
          <table:table-cell table:formula="of:=[.D1445]-[.D1444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table:formula="of:=[.B1444]+11" office:value-type="float" office:value="15884" calcext:value-type="float">
            <text:p>15884</text:p>
          </table:table-cell>
          <table:table-cell office:value-type="float" office:value="8640000" calcext:value-type="float">
            <text:p>8640000</text:p>
          </table:table-cell>
          <table:table-cell table:formula="of:=[.B1445]/[.C1445]" office:value-type="float" office:value="0.00183842592592593" calcext:value-type="float">
            <text:p>0,00183842592592593000</text:p>
          </table:table-cell>
          <table:table-cell table:formula="of:=[.D1446]-[.D144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table:formula="of:=[.B1445]+11" office:value-type="float" office:value="15895" calcext:value-type="float">
            <text:p>15895</text:p>
          </table:table-cell>
          <table:table-cell office:value-type="float" office:value="8640000" calcext:value-type="float">
            <text:p>8640000</text:p>
          </table:table-cell>
          <table:table-cell table:formula="of:=[.B1446]/[.C1446]" office:value-type="float" office:value="0.00183969907407407" calcext:value-type="float">
            <text:p>0,00183969907407407000</text:p>
          </table:table-cell>
          <table:table-cell table:formula="of:=[.D1447]-[.D1446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table:formula="of:=[.B1446]+11" office:value-type="float" office:value="15906" calcext:value-type="float">
            <text:p>15906</text:p>
          </table:table-cell>
          <table:table-cell office:value-type="float" office:value="8640000" calcext:value-type="float">
            <text:p>8640000</text:p>
          </table:table-cell>
          <table:table-cell table:formula="of:=[.B1447]/[.C1447]" office:value-type="float" office:value="0.00184097222222222" calcext:value-type="float">
            <text:p>0,00184097222222222000</text:p>
          </table:table-cell>
          <table:table-cell table:formula="of:=[.D1448]-[.D144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table:formula="of:=[.B1447]+11" office:value-type="float" office:value="15917" calcext:value-type="float">
            <text:p>15917</text:p>
          </table:table-cell>
          <table:table-cell office:value-type="float" office:value="8640000" calcext:value-type="float">
            <text:p>8640000</text:p>
          </table:table-cell>
          <table:table-cell table:formula="of:=[.B1448]/[.C1448]" office:value-type="float" office:value="0.00184224537037037" calcext:value-type="float">
            <text:p>0,00184224537037037000</text:p>
          </table:table-cell>
          <table:table-cell table:formula="of:=[.D1449]-[.D1448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table:formula="of:=[.B1448]+11" office:value-type="float" office:value="15928" calcext:value-type="float">
            <text:p>15928</text:p>
          </table:table-cell>
          <table:table-cell office:value-type="float" office:value="8640000" calcext:value-type="float">
            <text:p>8640000</text:p>
          </table:table-cell>
          <table:table-cell table:formula="of:=[.B1449]/[.C1449]" office:value-type="float" office:value="0.00184351851851852" calcext:value-type="float">
            <text:p>0,00184351851851852000</text:p>
          </table:table-cell>
          <table:table-cell table:formula="of:=[.D1450]-[.D144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table:formula="of:=[.B1449]+11" office:value-type="float" office:value="15939" calcext:value-type="float">
            <text:p>15939</text:p>
          </table:table-cell>
          <table:table-cell office:value-type="float" office:value="8640000" calcext:value-type="float">
            <text:p>8640000</text:p>
          </table:table-cell>
          <table:table-cell table:formula="of:=[.B1450]/[.C1450]" office:value-type="float" office:value="0.00184479166666667" calcext:value-type="float">
            <text:p>0,00184479166666667000</text:p>
          </table:table-cell>
          <table:table-cell table:formula="of:=[.D1451]-[.D145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[.B1450]+11" office:value-type="float" office:value="15950" calcext:value-type="float">
            <text:p>15950</text:p>
          </table:table-cell>
          <table:table-cell office:value-type="float" office:value="8640000" calcext:value-type="float">
            <text:p>8640000</text:p>
          </table:table-cell>
          <table:table-cell table:formula="of:=[.B1451]/[.C1451]" office:value-type="float" office:value="0.00184606481481482" calcext:value-type="float">
            <text:p>0,00184606481481482000</text:p>
          </table:table-cell>
          <table:table-cell table:formula="of:=[.D1452]-[.D1451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table:formula="of:=[.B1451]+11" office:value-type="float" office:value="15961" calcext:value-type="float">
            <text:p>15961</text:p>
          </table:table-cell>
          <table:table-cell office:value-type="float" office:value="8640000" calcext:value-type="float">
            <text:p>8640000</text:p>
          </table:table-cell>
          <table:table-cell table:formula="of:=[.B1452]/[.C1452]" office:value-type="float" office:value="0.00184733796296296" calcext:value-type="float">
            <text:p>0,00184733796296296000</text:p>
          </table:table-cell>
          <table:table-cell table:formula="of:=[.D1453]-[.D145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table:formula="of:=[.B1452]+11" office:value-type="float" office:value="15972" calcext:value-type="float">
            <text:p>15972</text:p>
          </table:table-cell>
          <table:table-cell office:value-type="float" office:value="8640000" calcext:value-type="float">
            <text:p>8640000</text:p>
          </table:table-cell>
          <table:table-cell table:formula="of:=[.B1453]/[.C1453]" office:value-type="float" office:value="0.00184861111111111" calcext:value-type="float">
            <text:p>0,00184861111111111000</text:p>
          </table:table-cell>
          <table:table-cell table:formula="of:=[.D1454]-[.D1453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table:formula="of:=[.B1453]+11" office:value-type="float" office:value="15983" calcext:value-type="float">
            <text:p>15983</text:p>
          </table:table-cell>
          <table:table-cell office:value-type="float" office:value="8640000" calcext:value-type="float">
            <text:p>8640000</text:p>
          </table:table-cell>
          <table:table-cell table:formula="of:=[.B1454]/[.C1454]" office:value-type="float" office:value="0.00184988425925926" calcext:value-type="float">
            <text:p>0,00184988425925926000</text:p>
          </table:table-cell>
          <table:table-cell table:formula="of:=[.D1455]-[.D145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table:formula="of:=[.B1454]+11" office:value-type="float" office:value="15994" calcext:value-type="float">
            <text:p>15994</text:p>
          </table:table-cell>
          <table:table-cell office:value-type="float" office:value="8640000" calcext:value-type="float">
            <text:p>8640000</text:p>
          </table:table-cell>
          <table:table-cell table:formula="of:=[.B1455]/[.C1455]" office:value-type="float" office:value="0.00185115740740741" calcext:value-type="float">
            <text:p>0,00185115740740741000</text:p>
          </table:table-cell>
          <table:table-cell table:formula="of:=[.D1456]-[.D1455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table:formula="of:=[.B1455]+11" office:value-type="float" office:value="16005" calcext:value-type="float">
            <text:p>16005</text:p>
          </table:table-cell>
          <table:table-cell office:value-type="float" office:value="8640000" calcext:value-type="float">
            <text:p>8640000</text:p>
          </table:table-cell>
          <table:table-cell table:formula="of:=[.B1456]/[.C1456]" office:value-type="float" office:value="0.00185243055555556" calcext:value-type="float">
            <text:p>0,00185243055555556000</text:p>
          </table:table-cell>
          <table:table-cell table:formula="of:=[.D1457]-[.D145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table:formula="of:=[.B1456]+11" office:value-type="float" office:value="16016" calcext:value-type="float">
            <text:p>16016</text:p>
          </table:table-cell>
          <table:table-cell office:value-type="float" office:value="8640000" calcext:value-type="float">
            <text:p>8640000</text:p>
          </table:table-cell>
          <table:table-cell table:formula="of:=[.B1457]/[.C1457]" office:value-type="float" office:value="0.0018537037037037" calcext:value-type="float">
            <text:p>0,00185370370370370000</text:p>
          </table:table-cell>
          <table:table-cell table:formula="of:=[.D1458]-[.D1457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table:formula="of:=[.B1457]+11" office:value-type="float" office:value="16027" calcext:value-type="float">
            <text:p>16027</text:p>
          </table:table-cell>
          <table:table-cell office:value-type="float" office:value="8640000" calcext:value-type="float">
            <text:p>8640000</text:p>
          </table:table-cell>
          <table:table-cell table:formula="of:=[.B1458]/[.C1458]" office:value-type="float" office:value="0.00185497685185185" calcext:value-type="float">
            <text:p>0,00185497685185185000</text:p>
          </table:table-cell>
          <table:table-cell table:formula="of:=[.D1459]-[.D145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table:formula="of:=[.B1458]+11" office:value-type="float" office:value="16038" calcext:value-type="float">
            <text:p>16038</text:p>
          </table:table-cell>
          <table:table-cell office:value-type="float" office:value="8640000" calcext:value-type="float">
            <text:p>8640000</text:p>
          </table:table-cell>
          <table:table-cell table:formula="of:=[.B1459]/[.C1459]" office:value-type="float" office:value="0.00185625" calcext:value-type="float">
            <text:p>0,00185625000000000000</text:p>
          </table:table-cell>
          <table:table-cell table:formula="of:=[.D1460]-[.D1459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table:formula="of:=[.B1459]+11" office:value-type="float" office:value="16049" calcext:value-type="float">
            <text:p>16049</text:p>
          </table:table-cell>
          <table:table-cell office:value-type="float" office:value="8640000" calcext:value-type="float">
            <text:p>8640000</text:p>
          </table:table-cell>
          <table:table-cell table:formula="of:=[.B1460]/[.C1460]" office:value-type="float" office:value="0.00185752314814815" calcext:value-type="float">
            <text:p>0,00185752314814815000</text:p>
          </table:table-cell>
          <table:table-cell table:formula="of:=[.D1461]-[.D146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[.B1460]+11" office:value-type="float" office:value="16060" calcext:value-type="float">
            <text:p>16060</text:p>
          </table:table-cell>
          <table:table-cell office:value-type="float" office:value="8640000" calcext:value-type="float">
            <text:p>8640000</text:p>
          </table:table-cell>
          <table:table-cell table:formula="of:=[.B1461]/[.C1461]" office:value-type="float" office:value="0.0018587962962963" calcext:value-type="float">
            <text:p>0,00185879629629630000</text:p>
          </table:table-cell>
          <table:table-cell table:formula="of:=[.D1462]-[.D1461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table:formula="of:=[.B1461]+11" office:value-type="float" office:value="16071" calcext:value-type="float">
            <text:p>16071</text:p>
          </table:table-cell>
          <table:table-cell office:value-type="float" office:value="8640000" calcext:value-type="float">
            <text:p>8640000</text:p>
          </table:table-cell>
          <table:table-cell table:formula="of:=[.B1462]/[.C1462]" office:value-type="float" office:value="0.00186006944444444" calcext:value-type="float">
            <text:p>0,00186006944444444000</text:p>
          </table:table-cell>
          <table:table-cell table:formula="of:=[.D1463]-[.D146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table:formula="of:=[.B1462]+11" office:value-type="float" office:value="16082" calcext:value-type="float">
            <text:p>16082</text:p>
          </table:table-cell>
          <table:table-cell office:value-type="float" office:value="8640000" calcext:value-type="float">
            <text:p>8640000</text:p>
          </table:table-cell>
          <table:table-cell table:formula="of:=[.B1463]/[.C1463]" office:value-type="float" office:value="0.00186134259259259" calcext:value-type="float">
            <text:p>0,00186134259259259000</text:p>
          </table:table-cell>
          <table:table-cell table:formula="of:=[.D1464]-[.D1463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table:formula="of:=[.B1463]+11" office:value-type="float" office:value="16093" calcext:value-type="float">
            <text:p>16093</text:p>
          </table:table-cell>
          <table:table-cell office:value-type="float" office:value="8640000" calcext:value-type="float">
            <text:p>8640000</text:p>
          </table:table-cell>
          <table:table-cell table:formula="of:=[.B1464]/[.C1464]" office:value-type="float" office:value="0.00186261574074074" calcext:value-type="float">
            <text:p>0,00186261574074074000</text:p>
          </table:table-cell>
          <table:table-cell table:formula="of:=[.D1465]-[.D146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table:formula="of:=[.B1464]+11" office:value-type="float" office:value="16104" calcext:value-type="float">
            <text:p>16104</text:p>
          </table:table-cell>
          <table:table-cell office:value-type="float" office:value="8640000" calcext:value-type="float">
            <text:p>8640000</text:p>
          </table:table-cell>
          <table:table-cell table:formula="of:=[.B1465]/[.C1465]" office:value-type="float" office:value="0.00186388888888889" calcext:value-type="float">
            <text:p>0,00186388888888889000</text:p>
          </table:table-cell>
          <table:table-cell table:formula="of:=[.D1466]-[.D146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table:formula="of:=[.B1465]+11" office:value-type="float" office:value="16115" calcext:value-type="float">
            <text:p>16115</text:p>
          </table:table-cell>
          <table:table-cell office:value-type="float" office:value="8640000" calcext:value-type="float">
            <text:p>8640000</text:p>
          </table:table-cell>
          <table:table-cell table:formula="of:=[.B1466]/[.C1466]" office:value-type="float" office:value="0.00186516203703704" calcext:value-type="float">
            <text:p>0,00186516203703704000</text:p>
          </table:table-cell>
          <table:table-cell table:formula="of:=[.D1467]-[.D1466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table:formula="of:=[.B1466]+11" office:value-type="float" office:value="16126" calcext:value-type="float">
            <text:p>16126</text:p>
          </table:table-cell>
          <table:table-cell office:value-type="float" office:value="8640000" calcext:value-type="float">
            <text:p>8640000</text:p>
          </table:table-cell>
          <table:table-cell table:formula="of:=[.B1467]/[.C1467]" office:value-type="float" office:value="0.00186643518518519" calcext:value-type="float">
            <text:p>0,00186643518518519000</text:p>
          </table:table-cell>
          <table:table-cell table:formula="of:=[.D1468]-[.D146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table:formula="of:=[.B1467]+11" office:value-type="float" office:value="16137" calcext:value-type="float">
            <text:p>16137</text:p>
          </table:table-cell>
          <table:table-cell office:value-type="float" office:value="8640000" calcext:value-type="float">
            <text:p>8640000</text:p>
          </table:table-cell>
          <table:table-cell table:formula="of:=[.B1468]/[.C1468]" office:value-type="float" office:value="0.00186770833333333" calcext:value-type="float">
            <text:p>0,00186770833333333000</text:p>
          </table:table-cell>
          <table:table-cell table:formula="of:=[.D1469]-[.D1468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table:formula="of:=[.B1468]+11" office:value-type="float" office:value="16148" calcext:value-type="float">
            <text:p>16148</text:p>
          </table:table-cell>
          <table:table-cell office:value-type="float" office:value="8640000" calcext:value-type="float">
            <text:p>8640000</text:p>
          </table:table-cell>
          <table:table-cell table:formula="of:=[.B1469]/[.C1469]" office:value-type="float" office:value="0.00186898148148148" calcext:value-type="float">
            <text:p>0,00186898148148148000</text:p>
          </table:table-cell>
          <table:table-cell table:formula="of:=[.D1470]-[.D146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table:formula="of:=[.B1469]+11" office:value-type="float" office:value="16159" calcext:value-type="float">
            <text:p>16159</text:p>
          </table:table-cell>
          <table:table-cell office:value-type="float" office:value="8640000" calcext:value-type="float">
            <text:p>8640000</text:p>
          </table:table-cell>
          <table:table-cell table:formula="of:=[.B1470]/[.C1470]" office:value-type="float" office:value="0.00187025462962963" calcext:value-type="float">
            <text:p>0,00187025462962963000</text:p>
          </table:table-cell>
          <table:table-cell table:formula="of:=[.D1471]-[.D1470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[.B1470]+11" office:value-type="float" office:value="16170" calcext:value-type="float">
            <text:p>16170</text:p>
          </table:table-cell>
          <table:table-cell office:value-type="float" office:value="8640000" calcext:value-type="float">
            <text:p>8640000</text:p>
          </table:table-cell>
          <table:table-cell table:formula="of:=[.B1471]/[.C1471]" office:value-type="float" office:value="0.00187152777777778" calcext:value-type="float">
            <text:p>0,00187152777777778000</text:p>
          </table:table-cell>
          <table:table-cell table:formula="of:=[.D1472]-[.D147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table:formula="of:=[.B1471]+11" office:value-type="float" office:value="16181" calcext:value-type="float">
            <text:p>16181</text:p>
          </table:table-cell>
          <table:table-cell office:value-type="float" office:value="8640000" calcext:value-type="float">
            <text:p>8640000</text:p>
          </table:table-cell>
          <table:table-cell table:formula="of:=[.B1472]/[.C1472]" office:value-type="float" office:value="0.00187280092592593" calcext:value-type="float">
            <text:p>0,00187280092592593000</text:p>
          </table:table-cell>
          <table:table-cell table:formula="of:=[.D1473]-[.D1472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table:formula="of:=[.B1472]+11" office:value-type="float" office:value="16192" calcext:value-type="float">
            <text:p>16192</text:p>
          </table:table-cell>
          <table:table-cell office:value-type="float" office:value="8640000" calcext:value-type="float">
            <text:p>8640000</text:p>
          </table:table-cell>
          <table:table-cell table:formula="of:=[.B1473]/[.C1473]" office:value-type="float" office:value="0.00187407407407407" calcext:value-type="float">
            <text:p>0,00187407407407407000</text:p>
          </table:table-cell>
          <table:table-cell table:formula="of:=[.D1474]-[.D147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table:formula="of:=[.B1473]+11" office:value-type="float" office:value="16203" calcext:value-type="float">
            <text:p>16203</text:p>
          </table:table-cell>
          <table:table-cell office:value-type="float" office:value="8640000" calcext:value-type="float">
            <text:p>8640000</text:p>
          </table:table-cell>
          <table:table-cell table:formula="of:=[.B1474]/[.C1474]" office:value-type="float" office:value="0.00187534722222222" calcext:value-type="float">
            <text:p>0,00187534722222222000</text:p>
          </table:table-cell>
          <table:table-cell table:formula="of:=[.D1475]-[.D1474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table:formula="of:=[.B1474]+11" office:value-type="float" office:value="16214" calcext:value-type="float">
            <text:p>16214</text:p>
          </table:table-cell>
          <table:table-cell office:value-type="float" office:value="8640000" calcext:value-type="float">
            <text:p>8640000</text:p>
          </table:table-cell>
          <table:table-cell table:formula="of:=[.B1475]/[.C1475]" office:value-type="float" office:value="0.00187662037037037" calcext:value-type="float">
            <text:p>0,00187662037037037000</text:p>
          </table:table-cell>
          <table:table-cell table:formula="of:=[.D1476]-[.D147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table:formula="of:=[.B1475]+11" office:value-type="float" office:value="16225" calcext:value-type="float">
            <text:p>16225</text:p>
          </table:table-cell>
          <table:table-cell office:value-type="float" office:value="8640000" calcext:value-type="float">
            <text:p>8640000</text:p>
          </table:table-cell>
          <table:table-cell table:formula="of:=[.B1476]/[.C1476]" office:value-type="float" office:value="0.00187789351851852" calcext:value-type="float">
            <text:p>0,00187789351851852000</text:p>
          </table:table-cell>
          <table:table-cell table:formula="of:=[.D1477]-[.D1476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table:formula="of:=[.B1476]+11" office:value-type="float" office:value="16236" calcext:value-type="float">
            <text:p>16236</text:p>
          </table:table-cell>
          <table:table-cell office:value-type="float" office:value="8640000" calcext:value-type="float">
            <text:p>8640000</text:p>
          </table:table-cell>
          <table:table-cell table:formula="of:=[.B1477]/[.C1477]" office:value-type="float" office:value="0.00187916666666667" calcext:value-type="float">
            <text:p>0,00187916666666667000</text:p>
          </table:table-cell>
          <table:table-cell table:formula="of:=[.D1478]-[.D147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table:formula="of:=[.B1477]+11" office:value-type="float" office:value="16247" calcext:value-type="float">
            <text:p>16247</text:p>
          </table:table-cell>
          <table:table-cell office:value-type="float" office:value="8640000" calcext:value-type="float">
            <text:p>8640000</text:p>
          </table:table-cell>
          <table:table-cell table:formula="of:=[.B1478]/[.C1478]" office:value-type="float" office:value="0.00188043981481481" calcext:value-type="float">
            <text:p>0,00188043981481481000</text:p>
          </table:table-cell>
          <table:table-cell table:formula="of:=[.D1479]-[.D147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table:formula="of:=[.B1478]+11" office:value-type="float" office:value="16258" calcext:value-type="float">
            <text:p>16258</text:p>
          </table:table-cell>
          <table:table-cell office:value-type="float" office:value="8640000" calcext:value-type="float">
            <text:p>8640000</text:p>
          </table:table-cell>
          <table:table-cell table:formula="of:=[.B1479]/[.C1479]" office:value-type="float" office:value="0.00188171296296296" calcext:value-type="float">
            <text:p>0,00188171296296296000</text:p>
          </table:table-cell>
          <table:table-cell table:formula="of:=[.D1480]-[.D1479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table:formula="of:=[.B1479]+11" office:value-type="float" office:value="16269" calcext:value-type="float">
            <text:p>16269</text:p>
          </table:table-cell>
          <table:table-cell office:value-type="float" office:value="8640000" calcext:value-type="float">
            <text:p>8640000</text:p>
          </table:table-cell>
          <table:table-cell table:formula="of:=[.B1480]/[.C1480]" office:value-type="float" office:value="0.00188298611111111" calcext:value-type="float">
            <text:p>0,00188298611111111000</text:p>
          </table:table-cell>
          <table:table-cell table:formula="of:=[.D1481]-[.D148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table:formula="of:=[.B1480]+11" office:value-type="float" office:value="16280" calcext:value-type="float">
            <text:p>16280</text:p>
          </table:table-cell>
          <table:table-cell office:value-type="float" office:value="8640000" calcext:value-type="float">
            <text:p>8640000</text:p>
          </table:table-cell>
          <table:table-cell table:formula="of:=[.B1481]/[.C1481]" office:value-type="float" office:value="0.00188425925925926" calcext:value-type="float">
            <text:p>0,00188425925925926000</text:p>
          </table:table-cell>
          <table:table-cell table:formula="of:=[.D1482]-[.D1481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table:formula="of:=[.B1481]+11" office:value-type="float" office:value="16291" calcext:value-type="float">
            <text:p>16291</text:p>
          </table:table-cell>
          <table:table-cell office:value-type="float" office:value="8640000" calcext:value-type="float">
            <text:p>8640000</text:p>
          </table:table-cell>
          <table:table-cell table:formula="of:=[.B1482]/[.C1482]" office:value-type="float" office:value="0.00188553240740741" calcext:value-type="float">
            <text:p>0,00188553240740741000</text:p>
          </table:table-cell>
          <table:table-cell table:formula="of:=[.D1483]-[.D148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table:formula="of:=[.B1482]+11" office:value-type="float" office:value="16302" calcext:value-type="float">
            <text:p>16302</text:p>
          </table:table-cell>
          <table:table-cell office:value-type="float" office:value="8640000" calcext:value-type="float">
            <text:p>8640000</text:p>
          </table:table-cell>
          <table:table-cell table:formula="of:=[.B1483]/[.C1483]" office:value-type="float" office:value="0.00188680555555556" calcext:value-type="float">
            <text:p>0,00188680555555556000</text:p>
          </table:table-cell>
          <table:table-cell table:formula="of:=[.D1484]-[.D1483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table:formula="of:=[.B1483]+11" office:value-type="float" office:value="16313" calcext:value-type="float">
            <text:p>16313</text:p>
          </table:table-cell>
          <table:table-cell office:value-type="float" office:value="8640000" calcext:value-type="float">
            <text:p>8640000</text:p>
          </table:table-cell>
          <table:table-cell table:formula="of:=[.B1484]/[.C1484]" office:value-type="float" office:value="0.0018880787037037" calcext:value-type="float">
            <text:p>0,00188807870370370000</text:p>
          </table:table-cell>
          <table:table-cell table:formula="of:=[.D1485]-[.D148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table:formula="of:=[.B1484]+11" office:value-type="float" office:value="16324" calcext:value-type="float">
            <text:p>16324</text:p>
          </table:table-cell>
          <table:table-cell office:value-type="float" office:value="8640000" calcext:value-type="float">
            <text:p>8640000</text:p>
          </table:table-cell>
          <table:table-cell table:formula="of:=[.B1485]/[.C1485]" office:value-type="float" office:value="0.00188935185185185" calcext:value-type="float">
            <text:p>0,00188935185185185000</text:p>
          </table:table-cell>
          <table:table-cell table:formula="of:=[.D1486]-[.D1485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table:formula="of:=[.B1485]+11" office:value-type="float" office:value="16335" calcext:value-type="float">
            <text:p>16335</text:p>
          </table:table-cell>
          <table:table-cell office:value-type="float" office:value="8640000" calcext:value-type="float">
            <text:p>8640000</text:p>
          </table:table-cell>
          <table:table-cell table:formula="of:=[.B1486]/[.C1486]" office:value-type="float" office:value="0.001890625" calcext:value-type="float">
            <text:p>0,00189062500000000000</text:p>
          </table:table-cell>
          <table:table-cell table:formula="of:=[.D1487]-[.D148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table:formula="of:=[.B1486]+11" office:value-type="float" office:value="16346" calcext:value-type="float">
            <text:p>16346</text:p>
          </table:table-cell>
          <table:table-cell office:value-type="float" office:value="8640000" calcext:value-type="float">
            <text:p>8640000</text:p>
          </table:table-cell>
          <table:table-cell table:formula="of:=[.B1487]/[.C1487]" office:value-type="float" office:value="0.00189189814814815" calcext:value-type="float">
            <text:p>0,00189189814814815000</text:p>
          </table:table-cell>
          <table:table-cell table:formula="of:=[.D1488]-[.D1487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table:formula="of:=[.B1487]+11" office:value-type="float" office:value="16357" calcext:value-type="float">
            <text:p>16357</text:p>
          </table:table-cell>
          <table:table-cell office:value-type="float" office:value="8640000" calcext:value-type="float">
            <text:p>8640000</text:p>
          </table:table-cell>
          <table:table-cell table:formula="of:=[.B1488]/[.C1488]" office:value-type="float" office:value="0.0018931712962963" calcext:value-type="float">
            <text:p>0,00189317129629630000</text:p>
          </table:table-cell>
          <table:table-cell table:formula="of:=[.D1489]-[.D148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table:formula="of:=[.B1488]+11" office:value-type="float" office:value="16368" calcext:value-type="float">
            <text:p>16368</text:p>
          </table:table-cell>
          <table:table-cell office:value-type="float" office:value="8640000" calcext:value-type="float">
            <text:p>8640000</text:p>
          </table:table-cell>
          <table:table-cell table:formula="of:=[.B1489]/[.C1489]" office:value-type="float" office:value="0.00189444444444444" calcext:value-type="float">
            <text:p>0,00189444444444444000</text:p>
          </table:table-cell>
          <table:table-cell table:formula="of:=[.D1490]-[.D1489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table:formula="of:=[.B1489]+11" office:value-type="float" office:value="16379" calcext:value-type="float">
            <text:p>16379</text:p>
          </table:table-cell>
          <table:table-cell office:value-type="float" office:value="8640000" calcext:value-type="float">
            <text:p>8640000</text:p>
          </table:table-cell>
          <table:table-cell table:formula="of:=[.B1490]/[.C1490]" office:value-type="float" office:value="0.00189571759259259" calcext:value-type="float">
            <text:p>0,00189571759259259000</text:p>
          </table:table-cell>
          <table:table-cell table:formula="of:=[.D1491]-[.D149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table:formula="of:=[.B1490]+11" office:value-type="float" office:value="16390" calcext:value-type="float">
            <text:p>16390</text:p>
          </table:table-cell>
          <table:table-cell office:value-type="float" office:value="8640000" calcext:value-type="float">
            <text:p>8640000</text:p>
          </table:table-cell>
          <table:table-cell table:formula="of:=[.B1491]/[.C1491]" office:value-type="float" office:value="0.00189699074074074" calcext:value-type="float">
            <text:p>0,00189699074074074000</text:p>
          </table:table-cell>
          <table:table-cell table:formula="of:=[.D1492]-[.D1491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table:formula="of:=[.B1491]+11" office:value-type="float" office:value="16401" calcext:value-type="float">
            <text:p>16401</text:p>
          </table:table-cell>
          <table:table-cell office:value-type="float" office:value="8640000" calcext:value-type="float">
            <text:p>8640000</text:p>
          </table:table-cell>
          <table:table-cell table:formula="of:=[.B1492]/[.C1492]" office:value-type="float" office:value="0.00189826388888889" calcext:value-type="float">
            <text:p>0,00189826388888889000</text:p>
          </table:table-cell>
          <table:table-cell table:formula="of:=[.D1493]-[.D149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table:formula="of:=[.B1492]+11" office:value-type="float" office:value="16412" calcext:value-type="float">
            <text:p>16412</text:p>
          </table:table-cell>
          <table:table-cell office:value-type="float" office:value="8640000" calcext:value-type="float">
            <text:p>8640000</text:p>
          </table:table-cell>
          <table:table-cell table:formula="of:=[.B1493]/[.C1493]" office:value-type="float" office:value="0.00189953703703704" calcext:value-type="float">
            <text:p>0,00189953703703704000</text:p>
          </table:table-cell>
          <table:table-cell table:formula="of:=[.D1494]-[.D149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table:formula="of:=[.B1493]+11" office:value-type="float" office:value="16423" calcext:value-type="float">
            <text:p>16423</text:p>
          </table:table-cell>
          <table:table-cell office:value-type="float" office:value="8640000" calcext:value-type="float">
            <text:p>8640000</text:p>
          </table:table-cell>
          <table:table-cell table:formula="of:=[.B1494]/[.C1494]" office:value-type="float" office:value="0.00190081018518519" calcext:value-type="float">
            <text:p>0,00190081018518519000</text:p>
          </table:table-cell>
          <table:table-cell table:formula="of:=[.D1495]-[.D1494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table:formula="of:=[.B1494]+11" office:value-type="float" office:value="16434" calcext:value-type="float">
            <text:p>16434</text:p>
          </table:table-cell>
          <table:table-cell office:value-type="float" office:value="8640000" calcext:value-type="float">
            <text:p>8640000</text:p>
          </table:table-cell>
          <table:table-cell table:formula="of:=[.B1495]/[.C1495]" office:value-type="float" office:value="0.00190208333333333" calcext:value-type="float">
            <text:p>0,00190208333333333000</text:p>
          </table:table-cell>
          <table:table-cell table:formula="of:=[.D1496]-[.D149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table:formula="of:=[.B1495]+11" office:value-type="float" office:value="16445" calcext:value-type="float">
            <text:p>16445</text:p>
          </table:table-cell>
          <table:table-cell office:value-type="float" office:value="8640000" calcext:value-type="float">
            <text:p>8640000</text:p>
          </table:table-cell>
          <table:table-cell table:formula="of:=[.B1496]/[.C1496]" office:value-type="float" office:value="0.00190335648148148" calcext:value-type="float">
            <text:p>0,00190335648148148000</text:p>
          </table:table-cell>
          <table:table-cell table:formula="of:=[.D1497]-[.D1496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table:formula="of:=[.B1496]+11" office:value-type="float" office:value="16456" calcext:value-type="float">
            <text:p>16456</text:p>
          </table:table-cell>
          <table:table-cell office:value-type="float" office:value="8640000" calcext:value-type="float">
            <text:p>8640000</text:p>
          </table:table-cell>
          <table:table-cell table:formula="of:=[.B1497]/[.C1497]" office:value-type="float" office:value="0.00190462962962963" calcext:value-type="float">
            <text:p>0,00190462962962963000</text:p>
          </table:table-cell>
          <table:table-cell table:formula="of:=[.D1498]-[.D149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table:formula="of:=[.B1497]+11" office:value-type="float" office:value="16467" calcext:value-type="float">
            <text:p>16467</text:p>
          </table:table-cell>
          <table:table-cell office:value-type="float" office:value="8640000" calcext:value-type="float">
            <text:p>8640000</text:p>
          </table:table-cell>
          <table:table-cell table:formula="of:=[.B1498]/[.C1498]" office:value-type="float" office:value="0.00190590277777778" calcext:value-type="float">
            <text:p>0,00190590277777778000</text:p>
          </table:table-cell>
          <table:table-cell table:formula="of:=[.D1499]-[.D1498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table:formula="of:=[.B1498]+11" office:value-type="float" office:value="16478" calcext:value-type="float">
            <text:p>16478</text:p>
          </table:table-cell>
          <table:table-cell office:value-type="float" office:value="8640000" calcext:value-type="float">
            <text:p>8640000</text:p>
          </table:table-cell>
          <table:table-cell table:formula="of:=[.B1499]/[.C1499]" office:value-type="float" office:value="0.00190717592592593" calcext:value-type="float">
            <text:p>0,00190717592592593000</text:p>
          </table:table-cell>
          <table:table-cell table:formula="of:=[.D1500]-[.D149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table:formula="of:=[.B1499]+11" office:value-type="float" office:value="16489" calcext:value-type="float">
            <text:p>16489</text:p>
          </table:table-cell>
          <table:table-cell office:value-type="float" office:value="8640000" calcext:value-type="float">
            <text:p>8640000</text:p>
          </table:table-cell>
          <table:table-cell table:formula="of:=[.B1500]/[.C1500]" office:value-type="float" office:value="0.00190844907407407" calcext:value-type="float">
            <text:p>0,00190844907407407000</text:p>
          </table:table-cell>
          <table:table-cell table:formula="of:=[.D1501]-[.D1500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B1500]+11" office:value-type="float" office:value="16500" calcext:value-type="float">
            <text:p>16500</text:p>
          </table:table-cell>
          <table:table-cell office:value-type="float" office:value="8640000" calcext:value-type="float">
            <text:p>8640000</text:p>
          </table:table-cell>
          <table:table-cell table:formula="of:=[.B1501]/[.C1501]" office:value-type="float" office:value="0.00190972222222222" calcext:value-type="float">
            <text:p>0,00190972222222222000</text:p>
          </table:table-cell>
          <table:table-cell table:formula="of:=[.D1502]-[.D150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table:formula="of:=[.B1501]+11" office:value-type="float" office:value="16511" calcext:value-type="float">
            <text:p>16511</text:p>
          </table:table-cell>
          <table:table-cell office:value-type="float" office:value="8640000" calcext:value-type="float">
            <text:p>8640000</text:p>
          </table:table-cell>
          <table:table-cell table:formula="of:=[.B1502]/[.C1502]" office:value-type="float" office:value="0.00191099537037037" calcext:value-type="float">
            <text:p>0,00191099537037037000</text:p>
          </table:table-cell>
          <table:table-cell table:formula="of:=[.D1503]-[.D1502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table:formula="of:=[.B1502]+11" office:value-type="float" office:value="16522" calcext:value-type="float">
            <text:p>16522</text:p>
          </table:table-cell>
          <table:table-cell office:value-type="float" office:value="8640000" calcext:value-type="float">
            <text:p>8640000</text:p>
          </table:table-cell>
          <table:table-cell table:formula="of:=[.B1503]/[.C1503]" office:value-type="float" office:value="0.00191226851851852" calcext:value-type="float">
            <text:p>0,00191226851851852000</text:p>
          </table:table-cell>
          <table:table-cell table:formula="of:=[.D1504]-[.D150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table:formula="of:=[.B1503]+11" office:value-type="float" office:value="16533" calcext:value-type="float">
            <text:p>16533</text:p>
          </table:table-cell>
          <table:table-cell office:value-type="float" office:value="8640000" calcext:value-type="float">
            <text:p>8640000</text:p>
          </table:table-cell>
          <table:table-cell table:formula="of:=[.B1504]/[.C1504]" office:value-type="float" office:value="0.00191354166666667" calcext:value-type="float">
            <text:p>0,00191354166666667000</text:p>
          </table:table-cell>
          <table:table-cell table:formula="of:=[.D1505]-[.D1504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table:formula="of:=[.B1504]+11" office:value-type="float" office:value="16544" calcext:value-type="float">
            <text:p>16544</text:p>
          </table:table-cell>
          <table:table-cell office:value-type="float" office:value="8640000" calcext:value-type="float">
            <text:p>8640000</text:p>
          </table:table-cell>
          <table:table-cell table:formula="of:=[.B1505]/[.C1505]" office:value-type="float" office:value="0.00191481481481481" calcext:value-type="float">
            <text:p>0,00191481481481481000</text:p>
          </table:table-cell>
          <table:table-cell table:formula="of:=[.D1506]-[.D150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table:formula="of:=[.B1505]+11" office:value-type="float" office:value="16555" calcext:value-type="float">
            <text:p>16555</text:p>
          </table:table-cell>
          <table:table-cell office:value-type="float" office:value="8640000" calcext:value-type="float">
            <text:p>8640000</text:p>
          </table:table-cell>
          <table:table-cell table:formula="of:=[.B1506]/[.C1506]" office:value-type="float" office:value="0.00191608796296296" calcext:value-type="float">
            <text:p>0,00191608796296296000</text:p>
          </table:table-cell>
          <table:table-cell table:formula="of:=[.D1507]-[.D150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table:formula="of:=[.B1506]+11" office:value-type="float" office:value="16566" calcext:value-type="float">
            <text:p>16566</text:p>
          </table:table-cell>
          <table:table-cell office:value-type="float" office:value="8640000" calcext:value-type="float">
            <text:p>8640000</text:p>
          </table:table-cell>
          <table:table-cell table:formula="of:=[.B1507]/[.C1507]" office:value-type="float" office:value="0.00191736111111111" calcext:value-type="float">
            <text:p>0,00191736111111111000</text:p>
          </table:table-cell>
          <table:table-cell table:formula="of:=[.D1508]-[.D1507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table:formula="of:=[.B1507]+11" office:value-type="float" office:value="16577" calcext:value-type="float">
            <text:p>16577</text:p>
          </table:table-cell>
          <table:table-cell office:value-type="float" office:value="8640000" calcext:value-type="float">
            <text:p>8640000</text:p>
          </table:table-cell>
          <table:table-cell table:formula="of:=[.B1508]/[.C1508]" office:value-type="float" office:value="0.00191863425925926" calcext:value-type="float">
            <text:p>0,00191863425925926000</text:p>
          </table:table-cell>
          <table:table-cell table:formula="of:=[.D1509]-[.D150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table:formula="of:=[.B1508]+11" office:value-type="float" office:value="16588" calcext:value-type="float">
            <text:p>16588</text:p>
          </table:table-cell>
          <table:table-cell office:value-type="float" office:value="8640000" calcext:value-type="float">
            <text:p>8640000</text:p>
          </table:table-cell>
          <table:table-cell table:formula="of:=[.B1509]/[.C1509]" office:value-type="float" office:value="0.00191990740740741" calcext:value-type="float">
            <text:p>0,00191990740740741000</text:p>
          </table:table-cell>
          <table:table-cell table:formula="of:=[.D1510]-[.D1509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table:formula="of:=[.B1509]+11" office:value-type="float" office:value="16599" calcext:value-type="float">
            <text:p>16599</text:p>
          </table:table-cell>
          <table:table-cell office:value-type="float" office:value="8640000" calcext:value-type="float">
            <text:p>8640000</text:p>
          </table:table-cell>
          <table:table-cell table:formula="of:=[.B1510]/[.C1510]" office:value-type="float" office:value="0.00192118055555556" calcext:value-type="float">
            <text:p>0,00192118055555556000</text:p>
          </table:table-cell>
          <table:table-cell table:formula="of:=[.D1511]-[.D151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table:formula="of:=[.B1510]+11" office:value-type="float" office:value="16610" calcext:value-type="float">
            <text:p>16610</text:p>
          </table:table-cell>
          <table:table-cell office:value-type="float" office:value="8640000" calcext:value-type="float">
            <text:p>8640000</text:p>
          </table:table-cell>
          <table:table-cell table:formula="of:=[.B1511]/[.C1511]" office:value-type="float" office:value="0.0019224537037037" calcext:value-type="float">
            <text:p>0,00192245370370370000</text:p>
          </table:table-cell>
          <table:table-cell table:formula="of:=[.D1512]-[.D1511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table:formula="of:=[.B1511]+11" office:value-type="float" office:value="16621" calcext:value-type="float">
            <text:p>16621</text:p>
          </table:table-cell>
          <table:table-cell office:value-type="float" office:value="8640000" calcext:value-type="float">
            <text:p>8640000</text:p>
          </table:table-cell>
          <table:table-cell table:formula="of:=[.B1512]/[.C1512]" office:value-type="float" office:value="0.00192372685185185" calcext:value-type="float">
            <text:p>0,00192372685185185000</text:p>
          </table:table-cell>
          <table:table-cell table:formula="of:=[.D1513]-[.D151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table:formula="of:=[.B1512]+11" office:value-type="float" office:value="16632" calcext:value-type="float">
            <text:p>16632</text:p>
          </table:table-cell>
          <table:table-cell office:value-type="float" office:value="8640000" calcext:value-type="float">
            <text:p>8640000</text:p>
          </table:table-cell>
          <table:table-cell table:formula="of:=[.B1513]/[.C1513]" office:value-type="float" office:value="0.001925" calcext:value-type="float">
            <text:p>0,00192500000000000000</text:p>
          </table:table-cell>
          <table:table-cell table:formula="of:=[.D1514]-[.D1513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table:formula="of:=[.B1513]+11" office:value-type="float" office:value="16643" calcext:value-type="float">
            <text:p>16643</text:p>
          </table:table-cell>
          <table:table-cell office:value-type="float" office:value="8640000" calcext:value-type="float">
            <text:p>8640000</text:p>
          </table:table-cell>
          <table:table-cell table:formula="of:=[.B1514]/[.C1514]" office:value-type="float" office:value="0.00192627314814815" calcext:value-type="float">
            <text:p>0,00192627314814815000</text:p>
          </table:table-cell>
          <table:table-cell table:formula="of:=[.D1515]-[.D151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table:formula="of:=[.B1514]+11" office:value-type="float" office:value="16654" calcext:value-type="float">
            <text:p>16654</text:p>
          </table:table-cell>
          <table:table-cell office:value-type="float" office:value="8640000" calcext:value-type="float">
            <text:p>8640000</text:p>
          </table:table-cell>
          <table:table-cell table:formula="of:=[.B1515]/[.C1515]" office:value-type="float" office:value="0.0019275462962963" calcext:value-type="float">
            <text:p>0,00192754629629630000</text:p>
          </table:table-cell>
          <table:table-cell table:formula="of:=[.D1516]-[.D1515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table:formula="of:=[.B1515]+11" office:value-type="float" office:value="16665" calcext:value-type="float">
            <text:p>16665</text:p>
          </table:table-cell>
          <table:table-cell office:value-type="float" office:value="8640000" calcext:value-type="float">
            <text:p>8640000</text:p>
          </table:table-cell>
          <table:table-cell table:formula="of:=[.B1516]/[.C1516]" office:value-type="float" office:value="0.00192881944444444" calcext:value-type="float">
            <text:p>0,00192881944444444000</text:p>
          </table:table-cell>
          <table:table-cell table:formula="of:=[.D1517]-[.D151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table:formula="of:=[.B1516]+11" office:value-type="float" office:value="16676" calcext:value-type="float">
            <text:p>16676</text:p>
          </table:table-cell>
          <table:table-cell office:value-type="float" office:value="8640000" calcext:value-type="float">
            <text:p>8640000</text:p>
          </table:table-cell>
          <table:table-cell table:formula="of:=[.B1517]/[.C1517]" office:value-type="float" office:value="0.00193009259259259" calcext:value-type="float">
            <text:p>0,00193009259259259000</text:p>
          </table:table-cell>
          <table:table-cell table:formula="of:=[.D1518]-[.D1517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table:formula="of:=[.B1517]+11" office:value-type="float" office:value="16687" calcext:value-type="float">
            <text:p>16687</text:p>
          </table:table-cell>
          <table:table-cell office:value-type="float" office:value="8640000" calcext:value-type="float">
            <text:p>8640000</text:p>
          </table:table-cell>
          <table:table-cell table:formula="of:=[.B1518]/[.C1518]" office:value-type="float" office:value="0.00193136574074074" calcext:value-type="float">
            <text:p>0,00193136574074074000</text:p>
          </table:table-cell>
          <table:table-cell table:formula="of:=[.D1519]-[.D151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table:formula="of:=[.B1518]+11" office:value-type="float" office:value="16698" calcext:value-type="float">
            <text:p>16698</text:p>
          </table:table-cell>
          <table:table-cell office:value-type="float" office:value="8640000" calcext:value-type="float">
            <text:p>8640000</text:p>
          </table:table-cell>
          <table:table-cell table:formula="of:=[.B1519]/[.C1519]" office:value-type="float" office:value="0.00193263888888889" calcext:value-type="float">
            <text:p>0,00193263888888889000</text:p>
          </table:table-cell>
          <table:table-cell table:formula="of:=[.D1520]-[.D1519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table:formula="of:=[.B1519]+11" office:value-type="float" office:value="16709" calcext:value-type="float">
            <text:p>16709</text:p>
          </table:table-cell>
          <table:table-cell office:value-type="float" office:value="8640000" calcext:value-type="float">
            <text:p>8640000</text:p>
          </table:table-cell>
          <table:table-cell table:formula="of:=[.B1520]/[.C1520]" office:value-type="float" office:value="0.00193391203703704" calcext:value-type="float">
            <text:p>0,00193391203703704000</text:p>
          </table:table-cell>
          <table:table-cell table:formula="of:=[.D1521]-[.D152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table:formula="of:=[.B1520]+11" office:value-type="float" office:value="16720" calcext:value-type="float">
            <text:p>16720</text:p>
          </table:table-cell>
          <table:table-cell office:value-type="float" office:value="8640000" calcext:value-type="float">
            <text:p>8640000</text:p>
          </table:table-cell>
          <table:table-cell table:formula="of:=[.B1521]/[.C1521]" office:value-type="float" office:value="0.00193518518518519" calcext:value-type="float">
            <text:p>0,00193518518518519000</text:p>
          </table:table-cell>
          <table:table-cell table:formula="of:=[.D1522]-[.D152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table:formula="of:=[.B1521]+11" office:value-type="float" office:value="16731" calcext:value-type="float">
            <text:p>16731</text:p>
          </table:table-cell>
          <table:table-cell office:value-type="float" office:value="8640000" calcext:value-type="float">
            <text:p>8640000</text:p>
          </table:table-cell>
          <table:table-cell table:formula="of:=[.B1522]/[.C1522]" office:value-type="float" office:value="0.00193645833333333" calcext:value-type="float">
            <text:p>0,00193645833333333000</text:p>
          </table:table-cell>
          <table:table-cell table:formula="of:=[.D1523]-[.D1522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table:formula="of:=[.B1522]+11" office:value-type="float" office:value="16742" calcext:value-type="float">
            <text:p>16742</text:p>
          </table:table-cell>
          <table:table-cell office:value-type="float" office:value="8640000" calcext:value-type="float">
            <text:p>8640000</text:p>
          </table:table-cell>
          <table:table-cell table:formula="of:=[.B1523]/[.C1523]" office:value-type="float" office:value="0.00193773148148148" calcext:value-type="float">
            <text:p>0,00193773148148148000</text:p>
          </table:table-cell>
          <table:table-cell table:formula="of:=[.D1524]-[.D152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table:formula="of:=[.B1523]+11" office:value-type="float" office:value="16753" calcext:value-type="float">
            <text:p>16753</text:p>
          </table:table-cell>
          <table:table-cell office:value-type="float" office:value="8640000" calcext:value-type="float">
            <text:p>8640000</text:p>
          </table:table-cell>
          <table:table-cell table:formula="of:=[.B1524]/[.C1524]" office:value-type="float" office:value="0.00193900462962963" calcext:value-type="float">
            <text:p>0,00193900462962963000</text:p>
          </table:table-cell>
          <table:table-cell table:formula="of:=[.D1525]-[.D1524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table:formula="of:=[.B1524]+11" office:value-type="float" office:value="16764" calcext:value-type="float">
            <text:p>16764</text:p>
          </table:table-cell>
          <table:table-cell office:value-type="float" office:value="8640000" calcext:value-type="float">
            <text:p>8640000</text:p>
          </table:table-cell>
          <table:table-cell table:formula="of:=[.B1525]/[.C1525]" office:value-type="float" office:value="0.00194027777777778" calcext:value-type="float">
            <text:p>0,00194027777777778000</text:p>
          </table:table-cell>
          <table:table-cell table:formula="of:=[.D1526]-[.D152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table:formula="of:=[.B1525]+11" office:value-type="float" office:value="16775" calcext:value-type="float">
            <text:p>16775</text:p>
          </table:table-cell>
          <table:table-cell office:value-type="float" office:value="8640000" calcext:value-type="float">
            <text:p>8640000</text:p>
          </table:table-cell>
          <table:table-cell table:formula="of:=[.B1526]/[.C1526]" office:value-type="float" office:value="0.00194155092592593" calcext:value-type="float">
            <text:p>0,00194155092592593000</text:p>
          </table:table-cell>
          <table:table-cell table:formula="of:=[.D1527]-[.D1526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table:formula="of:=[.B1526]+11" office:value-type="float" office:value="16786" calcext:value-type="float">
            <text:p>16786</text:p>
          </table:table-cell>
          <table:table-cell office:value-type="float" office:value="8640000" calcext:value-type="float">
            <text:p>8640000</text:p>
          </table:table-cell>
          <table:table-cell table:formula="of:=[.B1527]/[.C1527]" office:value-type="float" office:value="0.00194282407407407" calcext:value-type="float">
            <text:p>0,00194282407407407000</text:p>
          </table:table-cell>
          <table:table-cell table:formula="of:=[.D1528]-[.D152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table:formula="of:=[.B1527]+11" office:value-type="float" office:value="16797" calcext:value-type="float">
            <text:p>16797</text:p>
          </table:table-cell>
          <table:table-cell office:value-type="float" office:value="8640000" calcext:value-type="float">
            <text:p>8640000</text:p>
          </table:table-cell>
          <table:table-cell table:formula="of:=[.B1528]/[.C1528]" office:value-type="float" office:value="0.00194409722222222" calcext:value-type="float">
            <text:p>0,00194409722222222000</text:p>
          </table:table-cell>
          <table:table-cell table:formula="of:=[.D1529]-[.D1528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table:formula="of:=[.B1528]+11" office:value-type="float" office:value="16808" calcext:value-type="float">
            <text:p>16808</text:p>
          </table:table-cell>
          <table:table-cell office:value-type="float" office:value="8640000" calcext:value-type="float">
            <text:p>8640000</text:p>
          </table:table-cell>
          <table:table-cell table:formula="of:=[.B1529]/[.C1529]" office:value-type="float" office:value="0.00194537037037037" calcext:value-type="float">
            <text:p>0,00194537037037037000</text:p>
          </table:table-cell>
          <table:table-cell table:formula="of:=[.D1530]-[.D152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table:formula="of:=[.B1529]+11" office:value-type="float" office:value="16819" calcext:value-type="float">
            <text:p>16819</text:p>
          </table:table-cell>
          <table:table-cell office:value-type="float" office:value="8640000" calcext:value-type="float">
            <text:p>8640000</text:p>
          </table:table-cell>
          <table:table-cell table:formula="of:=[.B1530]/[.C1530]" office:value-type="float" office:value="0.00194664351851852" calcext:value-type="float">
            <text:p>0,00194664351851852000</text:p>
          </table:table-cell>
          <table:table-cell table:formula="of:=[.D1531]-[.D1530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table:formula="of:=[.B1530]+11" office:value-type="float" office:value="16830" calcext:value-type="float">
            <text:p>16830</text:p>
          </table:table-cell>
          <table:table-cell office:value-type="float" office:value="8640000" calcext:value-type="float">
            <text:p>8640000</text:p>
          </table:table-cell>
          <table:table-cell table:formula="of:=[.B1531]/[.C1531]" office:value-type="float" office:value="0.00194791666666667" calcext:value-type="float">
            <text:p>0,00194791666666667000</text:p>
          </table:table-cell>
          <table:table-cell table:formula="of:=[.D1532]-[.D153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table:formula="of:=[.B1531]+11" office:value-type="float" office:value="16841" calcext:value-type="float">
            <text:p>16841</text:p>
          </table:table-cell>
          <table:table-cell office:value-type="float" office:value="8640000" calcext:value-type="float">
            <text:p>8640000</text:p>
          </table:table-cell>
          <table:table-cell table:formula="of:=[.B1532]/[.C1532]" office:value-type="float" office:value="0.00194918981481481" calcext:value-type="float">
            <text:p>0,00194918981481481000</text:p>
          </table:table-cell>
          <table:table-cell table:formula="of:=[.D1533]-[.D1532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table:formula="of:=[.B1532]+11" office:value-type="float" office:value="16852" calcext:value-type="float">
            <text:p>16852</text:p>
          </table:table-cell>
          <table:table-cell office:value-type="float" office:value="8640000" calcext:value-type="float">
            <text:p>8640000</text:p>
          </table:table-cell>
          <table:table-cell table:formula="of:=[.B1533]/[.C1533]" office:value-type="float" office:value="0.00195046296296296" calcext:value-type="float">
            <text:p>0,00195046296296296000</text:p>
          </table:table-cell>
          <table:table-cell table:formula="of:=[.D1534]-[.D153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table:formula="of:=[.B1533]+11" office:value-type="float" office:value="16863" calcext:value-type="float">
            <text:p>16863</text:p>
          </table:table-cell>
          <table:table-cell office:value-type="float" office:value="8640000" calcext:value-type="float">
            <text:p>8640000</text:p>
          </table:table-cell>
          <table:table-cell table:formula="of:=[.B1534]/[.C1534]" office:value-type="float" office:value="0.00195173611111111" calcext:value-type="float">
            <text:p>0,00195173611111111000</text:p>
          </table:table-cell>
          <table:table-cell table:formula="of:=[.D1535]-[.D1534]" office:value-type="float" office:value="0.00000127314814814803" calcext:value-type="float">
            <text:p>0,00000127314814814803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table:formula="of:=[.B1534]+11" office:value-type="float" office:value="16874" calcext:value-type="float">
            <text:p>16874</text:p>
          </table:table-cell>
          <table:table-cell office:value-type="float" office:value="8640000" calcext:value-type="float">
            <text:p>8640000</text:p>
          </table:table-cell>
          <table:table-cell table:formula="of:=[.B1535]/[.C1535]" office:value-type="float" office:value="0.00195300925925926" calcext:value-type="float">
            <text:p>0,00195300925925926000</text:p>
          </table:table-cell>
          <table:table-cell table:formula="of:=[.D1536]-[.D1535]" office:value-type="float" office:value="0.00000127314814814847" calcext:value-type="float">
            <text:p>0,00000127314814814847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table:formula="of:=[.B1535]+11" office:value-type="float" office:value="16885" calcext:value-type="float">
            <text:p>16885</text:p>
          </table:table-cell>
          <table:table-cell office:value-type="float" office:value="8640000" calcext:value-type="float">
            <text:p>8640000</text:p>
          </table:table-cell>
          <table:table-cell table:formula="of:=[.B1536]/[.C1536]" office:value-type="float" office:value="0.00195428240740741" calcext:value-type="float">
            <text:p>0,00195428240740741000</text:p>
          </table:table-cell>
          <table:table-cell table:formula="of:=[.D1537]-[.D1536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table:formula="of:=[.B1536]+11" office:value-type="float" office:value="16896" calcext:value-type="float">
            <text:p>16896</text:p>
          </table:table-cell>
          <table:table-cell office:value-type="float" office:value="8640000" calcext:value-type="float">
            <text:p>8640000</text:p>
          </table:table-cell>
          <table:table-cell table:formula="of:=[.B1537]/[.C1537]" office:value-type="float" office:value="0.00195555555555556" calcext:value-type="float">
            <text:p>0,00195555555555556000</text:p>
          </table:table-cell>
          <table:table-cell table:formula="of:=[.D1538]-[.D153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table:formula="of:=[.B1537]+11" office:value-type="float" office:value="16907" calcext:value-type="float">
            <text:p>16907</text:p>
          </table:table-cell>
          <table:table-cell office:value-type="float" office:value="8640000" calcext:value-type="float">
            <text:p>8640000</text:p>
          </table:table-cell>
          <table:table-cell table:formula="of:=[.B1538]/[.C1538]" office:value-type="float" office:value="0.0019568287037037" calcext:value-type="float">
            <text:p>0,00195682870370370000</text:p>
          </table:table-cell>
          <table:table-cell table:formula="of:=[.D1539]-[.D153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table:formula="of:=[.B1538]+11" office:value-type="float" office:value="16918" calcext:value-type="float">
            <text:p>16918</text:p>
          </table:table-cell>
          <table:table-cell office:value-type="float" office:value="8640000" calcext:value-type="float">
            <text:p>8640000</text:p>
          </table:table-cell>
          <table:table-cell table:formula="of:=[.B1539]/[.C1539]" office:value-type="float" office:value="0.00195810185185185" calcext:value-type="float">
            <text:p>0,00195810185185185000</text:p>
          </table:table-cell>
          <table:table-cell table:formula="of:=[.D1540]-[.D153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table:formula="of:=[.B1539]+11" office:value-type="float" office:value="16929" calcext:value-type="float">
            <text:p>16929</text:p>
          </table:table-cell>
          <table:table-cell office:value-type="float" office:value="8640000" calcext:value-type="float">
            <text:p>8640000</text:p>
          </table:table-cell>
          <table:table-cell table:formula="of:=[.B1540]/[.C1540]" office:value-type="float" office:value="0.001959375" calcext:value-type="float">
            <text:p>0,00195937500000000000</text:p>
          </table:table-cell>
          <table:table-cell table:formula="of:=[.D1541]-[.D1540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table:formula="of:=[.B1540]+11" office:value-type="float" office:value="16940" calcext:value-type="float">
            <text:p>16940</text:p>
          </table:table-cell>
          <table:table-cell office:value-type="float" office:value="8640000" calcext:value-type="float">
            <text:p>8640000</text:p>
          </table:table-cell>
          <table:table-cell table:formula="of:=[.B1541]/[.C1541]" office:value-type="float" office:value="0.00196064814814815" calcext:value-type="float">
            <text:p>0,00196064814814815000</text:p>
          </table:table-cell>
          <table:table-cell table:formula="of:=[.D1542]-[.D154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table:formula="of:=[.B1541]+11" office:value-type="float" office:value="16951" calcext:value-type="float">
            <text:p>16951</text:p>
          </table:table-cell>
          <table:table-cell office:value-type="float" office:value="8640000" calcext:value-type="float">
            <text:p>8640000</text:p>
          </table:table-cell>
          <table:table-cell table:formula="of:=[.B1542]/[.C1542]" office:value-type="float" office:value="0.0019619212962963" calcext:value-type="float">
            <text:p>0,00196192129629630000</text:p>
          </table:table-cell>
          <table:table-cell table:formula="of:=[.D1543]-[.D154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table:formula="of:=[.B1542]+11" office:value-type="float" office:value="16962" calcext:value-type="float">
            <text:p>16962</text:p>
          </table:table-cell>
          <table:table-cell office:value-type="float" office:value="8640000" calcext:value-type="float">
            <text:p>8640000</text:p>
          </table:table-cell>
          <table:table-cell table:formula="of:=[.B1543]/[.C1543]" office:value-type="float" office:value="0.00196319444444444" calcext:value-type="float">
            <text:p>0,00196319444444444000</text:p>
          </table:table-cell>
          <table:table-cell table:formula="of:=[.D1544]-[.D154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table:formula="of:=[.B1543]+11" office:value-type="float" office:value="16973" calcext:value-type="float">
            <text:p>16973</text:p>
          </table:table-cell>
          <table:table-cell office:value-type="float" office:value="8640000" calcext:value-type="float">
            <text:p>8640000</text:p>
          </table:table-cell>
          <table:table-cell table:formula="of:=[.B1544]/[.C1544]" office:value-type="float" office:value="0.00196446759259259" calcext:value-type="float">
            <text:p>0,00196446759259259000</text:p>
          </table:table-cell>
          <table:table-cell table:formula="of:=[.D1545]-[.D1544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table:formula="of:=[.B1544]+11" office:value-type="float" office:value="16984" calcext:value-type="float">
            <text:p>16984</text:p>
          </table:table-cell>
          <table:table-cell office:value-type="float" office:value="8640000" calcext:value-type="float">
            <text:p>8640000</text:p>
          </table:table-cell>
          <table:table-cell table:formula="of:=[.B1545]/[.C1545]" office:value-type="float" office:value="0.00196574074074074" calcext:value-type="float">
            <text:p>0,00196574074074074000</text:p>
          </table:table-cell>
          <table:table-cell table:formula="of:=[.D1546]-[.D154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table:formula="of:=[.B1545]+11" office:value-type="float" office:value="16995" calcext:value-type="float">
            <text:p>16995</text:p>
          </table:table-cell>
          <table:table-cell office:value-type="float" office:value="8640000" calcext:value-type="float">
            <text:p>8640000</text:p>
          </table:table-cell>
          <table:table-cell table:formula="of:=[.B1546]/[.C1546]" office:value-type="float" office:value="0.00196701388888889" calcext:value-type="float">
            <text:p>0,00196701388888889000</text:p>
          </table:table-cell>
          <table:table-cell table:formula="of:=[.D1547]-[.D154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table:formula="of:=[.B1546]+11" office:value-type="float" office:value="17006" calcext:value-type="float">
            <text:p>17006</text:p>
          </table:table-cell>
          <table:table-cell office:value-type="float" office:value="8640000" calcext:value-type="float">
            <text:p>8640000</text:p>
          </table:table-cell>
          <table:table-cell table:formula="of:=[.B1547]/[.C1547]" office:value-type="float" office:value="0.00196828703703704" calcext:value-type="float">
            <text:p>0,00196828703703704000</text:p>
          </table:table-cell>
          <table:table-cell table:formula="of:=[.D1548]-[.D154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table:formula="of:=[.B1547]+11" office:value-type="float" office:value="17017" calcext:value-type="float">
            <text:p>17017</text:p>
          </table:table-cell>
          <table:table-cell office:value-type="float" office:value="8640000" calcext:value-type="float">
            <text:p>8640000</text:p>
          </table:table-cell>
          <table:table-cell table:formula="of:=[.B1548]/[.C1548]" office:value-type="float" office:value="0.00196956018518519" calcext:value-type="float">
            <text:p>0,00196956018518519000</text:p>
          </table:table-cell>
          <table:table-cell table:formula="of:=[.D1549]-[.D1548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table:formula="of:=[.B1548]+11" office:value-type="float" office:value="17028" calcext:value-type="float">
            <text:p>17028</text:p>
          </table:table-cell>
          <table:table-cell office:value-type="float" office:value="8640000" calcext:value-type="float">
            <text:p>8640000</text:p>
          </table:table-cell>
          <table:table-cell table:formula="of:=[.B1549]/[.C1549]" office:value-type="float" office:value="0.00197083333333333" calcext:value-type="float">
            <text:p>0,00197083333333333000</text:p>
          </table:table-cell>
          <table:table-cell table:formula="of:=[.D1550]-[.D154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table:formula="of:=[.B1549]+11" office:value-type="float" office:value="17039" calcext:value-type="float">
            <text:p>17039</text:p>
          </table:table-cell>
          <table:table-cell office:value-type="float" office:value="8640000" calcext:value-type="float">
            <text:p>8640000</text:p>
          </table:table-cell>
          <table:table-cell table:formula="of:=[.B1550]/[.C1550]" office:value-type="float" office:value="0.00197210648148148" calcext:value-type="float">
            <text:p>0,00197210648148148000</text:p>
          </table:table-cell>
          <table:table-cell table:formula="of:=[.D1551]-[.D155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table:formula="of:=[.B1550]+11" office:value-type="float" office:value="17050" calcext:value-type="float">
            <text:p>17050</text:p>
          </table:table-cell>
          <table:table-cell office:value-type="float" office:value="8640000" calcext:value-type="float">
            <text:p>8640000</text:p>
          </table:table-cell>
          <table:table-cell table:formula="of:=[.B1551]/[.C1551]" office:value-type="float" office:value="0.00197337962962963" calcext:value-type="float">
            <text:p>0,00197337962962963000</text:p>
          </table:table-cell>
          <table:table-cell table:formula="of:=[.D1552]-[.D155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table:formula="of:=[.B1551]+11" office:value-type="float" office:value="17061" calcext:value-type="float">
            <text:p>17061</text:p>
          </table:table-cell>
          <table:table-cell office:value-type="float" office:value="8640000" calcext:value-type="float">
            <text:p>8640000</text:p>
          </table:table-cell>
          <table:table-cell table:formula="of:=[.B1552]/[.C1552]" office:value-type="float" office:value="0.00197465277777778" calcext:value-type="float">
            <text:p>0,00197465277777778000</text:p>
          </table:table-cell>
          <table:table-cell table:formula="of:=[.D1553]-[.D155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table:formula="of:=[.B1552]+11" office:value-type="float" office:value="17072" calcext:value-type="float">
            <text:p>17072</text:p>
          </table:table-cell>
          <table:table-cell office:value-type="float" office:value="8640000" calcext:value-type="float">
            <text:p>8640000</text:p>
          </table:table-cell>
          <table:table-cell table:formula="of:=[.B1553]/[.C1553]" office:value-type="float" office:value="0.00197592592592593" calcext:value-type="float">
            <text:p>0,00197592592592593000</text:p>
          </table:table-cell>
          <table:table-cell table:formula="of:=[.D1554]-[.D1553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table:formula="of:=[.B1553]+11" office:value-type="float" office:value="17083" calcext:value-type="float">
            <text:p>17083</text:p>
          </table:table-cell>
          <table:table-cell office:value-type="float" office:value="8640000" calcext:value-type="float">
            <text:p>8640000</text:p>
          </table:table-cell>
          <table:table-cell table:formula="of:=[.B1554]/[.C1554]" office:value-type="float" office:value="0.00197719907407407" calcext:value-type="float">
            <text:p>0,00197719907407407000</text:p>
          </table:table-cell>
          <table:table-cell table:formula="of:=[.D1555]-[.D155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table:formula="of:=[.B1554]+11" office:value-type="float" office:value="17094" calcext:value-type="float">
            <text:p>17094</text:p>
          </table:table-cell>
          <table:table-cell office:value-type="float" office:value="8640000" calcext:value-type="float">
            <text:p>8640000</text:p>
          </table:table-cell>
          <table:table-cell table:formula="of:=[.B1555]/[.C1555]" office:value-type="float" office:value="0.00197847222222222" calcext:value-type="float">
            <text:p>0,00197847222222222000</text:p>
          </table:table-cell>
          <table:table-cell table:formula="of:=[.D1556]-[.D155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table:formula="of:=[.B1555]+11" office:value-type="float" office:value="17105" calcext:value-type="float">
            <text:p>17105</text:p>
          </table:table-cell>
          <table:table-cell office:value-type="float" office:value="8640000" calcext:value-type="float">
            <text:p>8640000</text:p>
          </table:table-cell>
          <table:table-cell table:formula="of:=[.B1556]/[.C1556]" office:value-type="float" office:value="0.00197974537037037" calcext:value-type="float">
            <text:p>0,00197974537037037000</text:p>
          </table:table-cell>
          <table:table-cell table:formula="of:=[.D1557]-[.D155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table:formula="of:=[.B1556]+11" office:value-type="float" office:value="17116" calcext:value-type="float">
            <text:p>17116</text:p>
          </table:table-cell>
          <table:table-cell office:value-type="float" office:value="8640000" calcext:value-type="float">
            <text:p>8640000</text:p>
          </table:table-cell>
          <table:table-cell table:formula="of:=[.B1557]/[.C1557]" office:value-type="float" office:value="0.00198101851851852" calcext:value-type="float">
            <text:p>0,00198101851851852000</text:p>
          </table:table-cell>
          <table:table-cell table:formula="of:=[.D1558]-[.D1557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table:formula="of:=[.B1557]+11" office:value-type="float" office:value="17127" calcext:value-type="float">
            <text:p>17127</text:p>
          </table:table-cell>
          <table:table-cell office:value-type="float" office:value="8640000" calcext:value-type="float">
            <text:p>8640000</text:p>
          </table:table-cell>
          <table:table-cell table:formula="of:=[.B1558]/[.C1558]" office:value-type="float" office:value="0.00198229166666667" calcext:value-type="float">
            <text:p>0,00198229166666667000</text:p>
          </table:table-cell>
          <table:table-cell table:formula="of:=[.D1559]-[.D155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table:formula="of:=[.B1558]+11" office:value-type="float" office:value="17138" calcext:value-type="float">
            <text:p>17138</text:p>
          </table:table-cell>
          <table:table-cell office:value-type="float" office:value="8640000" calcext:value-type="float">
            <text:p>8640000</text:p>
          </table:table-cell>
          <table:table-cell table:formula="of:=[.B1559]/[.C1559]" office:value-type="float" office:value="0.00198356481481481" calcext:value-type="float">
            <text:p>0,00198356481481481000</text:p>
          </table:table-cell>
          <table:table-cell table:formula="of:=[.D1560]-[.D155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table:formula="of:=[.B1559]+11" office:value-type="float" office:value="17149" calcext:value-type="float">
            <text:p>17149</text:p>
          </table:table-cell>
          <table:table-cell office:value-type="float" office:value="8640000" calcext:value-type="float">
            <text:p>8640000</text:p>
          </table:table-cell>
          <table:table-cell table:formula="of:=[.B1560]/[.C1560]" office:value-type="float" office:value="0.00198483796296296" calcext:value-type="float">
            <text:p>0,00198483796296296000</text:p>
          </table:table-cell>
          <table:table-cell table:formula="of:=[.D1561]-[.D156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table:formula="of:=[.B1560]+11" office:value-type="float" office:value="17160" calcext:value-type="float">
            <text:p>17160</text:p>
          </table:table-cell>
          <table:table-cell office:value-type="float" office:value="8640000" calcext:value-type="float">
            <text:p>8640000</text:p>
          </table:table-cell>
          <table:table-cell table:formula="of:=[.B1561]/[.C1561]" office:value-type="float" office:value="0.00198611111111111" calcext:value-type="float">
            <text:p>0,00198611111111111000</text:p>
          </table:table-cell>
          <table:table-cell table:formula="of:=[.D1562]-[.D1561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table:formula="of:=[.B1561]+11" office:value-type="float" office:value="17171" calcext:value-type="float">
            <text:p>17171</text:p>
          </table:table-cell>
          <table:table-cell office:value-type="float" office:value="8640000" calcext:value-type="float">
            <text:p>8640000</text:p>
          </table:table-cell>
          <table:table-cell table:formula="of:=[.B1562]/[.C1562]" office:value-type="float" office:value="0.00198738425925926" calcext:value-type="float">
            <text:p>0,00198738425925926000</text:p>
          </table:table-cell>
          <table:table-cell table:formula="of:=[.D1563]-[.D156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table:formula="of:=[.B1562]+11" office:value-type="float" office:value="17182" calcext:value-type="float">
            <text:p>17182</text:p>
          </table:table-cell>
          <table:table-cell office:value-type="float" office:value="8640000" calcext:value-type="float">
            <text:p>8640000</text:p>
          </table:table-cell>
          <table:table-cell table:formula="of:=[.B1563]/[.C1563]" office:value-type="float" office:value="0.00198865740740741" calcext:value-type="float">
            <text:p>0,00198865740740741000</text:p>
          </table:table-cell>
          <table:table-cell table:formula="of:=[.D1564]-[.D156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table:formula="of:=[.B1563]+11" office:value-type="float" office:value="17193" calcext:value-type="float">
            <text:p>17193</text:p>
          </table:table-cell>
          <table:table-cell office:value-type="float" office:value="8640000" calcext:value-type="float">
            <text:p>8640000</text:p>
          </table:table-cell>
          <table:table-cell table:formula="of:=[.B1564]/[.C1564]" office:value-type="float" office:value="0.00198993055555556" calcext:value-type="float">
            <text:p>0,00198993055555556000</text:p>
          </table:table-cell>
          <table:table-cell table:formula="of:=[.D1565]-[.D156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table:formula="of:=[.B1564]+11" office:value-type="float" office:value="17204" calcext:value-type="float">
            <text:p>17204</text:p>
          </table:table-cell>
          <table:table-cell office:value-type="float" office:value="8640000" calcext:value-type="float">
            <text:p>8640000</text:p>
          </table:table-cell>
          <table:table-cell table:formula="of:=[.B1565]/[.C1565]" office:value-type="float" office:value="0.0019912037037037" calcext:value-type="float">
            <text:p>0,00199120370370370000</text:p>
          </table:table-cell>
          <table:table-cell table:formula="of:=[.D1566]-[.D156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table:formula="of:=[.B1565]+11" office:value-type="float" office:value="17215" calcext:value-type="float">
            <text:p>17215</text:p>
          </table:table-cell>
          <table:table-cell office:value-type="float" office:value="8640000" calcext:value-type="float">
            <text:p>8640000</text:p>
          </table:table-cell>
          <table:table-cell table:formula="of:=[.B1566]/[.C1566]" office:value-type="float" office:value="0.00199247685185185" calcext:value-type="float">
            <text:p>0,00199247685185185000</text:p>
          </table:table-cell>
          <table:table-cell table:formula="of:=[.D1567]-[.D1566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table:formula="of:=[.B1566]+11" office:value-type="float" office:value="17226" calcext:value-type="float">
            <text:p>17226</text:p>
          </table:table-cell>
          <table:table-cell office:value-type="float" office:value="8640000" calcext:value-type="float">
            <text:p>8640000</text:p>
          </table:table-cell>
          <table:table-cell table:formula="of:=[.B1567]/[.C1567]" office:value-type="float" office:value="0.00199375" calcext:value-type="float">
            <text:p>0,00199375000000000000</text:p>
          </table:table-cell>
          <table:table-cell table:formula="of:=[.D1568]-[.D156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table:formula="of:=[.B1567]+11" office:value-type="float" office:value="17237" calcext:value-type="float">
            <text:p>17237</text:p>
          </table:table-cell>
          <table:table-cell office:value-type="float" office:value="8640000" calcext:value-type="float">
            <text:p>8640000</text:p>
          </table:table-cell>
          <table:table-cell table:formula="of:=[.B1568]/[.C1568]" office:value-type="float" office:value="0.00199502314814815" calcext:value-type="float">
            <text:p>0,00199502314814815000</text:p>
          </table:table-cell>
          <table:table-cell table:formula="of:=[.D1569]-[.D156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table:formula="of:=[.B1568]+11" office:value-type="float" office:value="17248" calcext:value-type="float">
            <text:p>17248</text:p>
          </table:table-cell>
          <table:table-cell office:value-type="float" office:value="8640000" calcext:value-type="float">
            <text:p>8640000</text:p>
          </table:table-cell>
          <table:table-cell table:formula="of:=[.B1569]/[.C1569]" office:value-type="float" office:value="0.0019962962962963" calcext:value-type="float">
            <text:p>0,00199629629629630000</text:p>
          </table:table-cell>
          <table:table-cell table:formula="of:=[.D1570]-[.D156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table:formula="of:=[.B1569]+11" office:value-type="float" office:value="17259" calcext:value-type="float">
            <text:p>17259</text:p>
          </table:table-cell>
          <table:table-cell office:value-type="float" office:value="8640000" calcext:value-type="float">
            <text:p>8640000</text:p>
          </table:table-cell>
          <table:table-cell table:formula="of:=[.B1570]/[.C1570]" office:value-type="float" office:value="0.00199756944444444" calcext:value-type="float">
            <text:p>0,00199756944444444000</text:p>
          </table:table-cell>
          <table:table-cell table:formula="of:=[.D1571]-[.D1570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table:formula="of:=[.B1570]+11" office:value-type="float" office:value="17270" calcext:value-type="float">
            <text:p>17270</text:p>
          </table:table-cell>
          <table:table-cell office:value-type="float" office:value="8640000" calcext:value-type="float">
            <text:p>8640000</text:p>
          </table:table-cell>
          <table:table-cell table:formula="of:=[.B1571]/[.C1571]" office:value-type="float" office:value="0.00199884259259259" calcext:value-type="float">
            <text:p>0,00199884259259259000</text:p>
          </table:table-cell>
          <table:table-cell table:formula="of:=[.D1572]-[.D157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table:formula="of:=[.B1571]+11" office:value-type="float" office:value="17281" calcext:value-type="float">
            <text:p>17281</text:p>
          </table:table-cell>
          <table:table-cell office:value-type="float" office:value="8640000" calcext:value-type="float">
            <text:p>8640000</text:p>
          </table:table-cell>
          <table:table-cell table:formula="of:=[.B1572]/[.C1572]" office:value-type="float" office:value="0.00200011574074074" calcext:value-type="float">
            <text:p>0,00200011574074074000</text:p>
          </table:table-cell>
          <table:table-cell table:formula="of:=[.D1573]-[.D157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table:formula="of:=[.B1572]+11" office:value-type="float" office:value="17292" calcext:value-type="float">
            <text:p>17292</text:p>
          </table:table-cell>
          <table:table-cell office:value-type="float" office:value="8640000" calcext:value-type="float">
            <text:p>8640000</text:p>
          </table:table-cell>
          <table:table-cell table:formula="of:=[.B1573]/[.C1573]" office:value-type="float" office:value="0.00200138888888889" calcext:value-type="float">
            <text:p>0,00200138888888889000</text:p>
          </table:table-cell>
          <table:table-cell table:formula="of:=[.D1574]-[.D157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table:formula="of:=[.B1573]+11" office:value-type="float" office:value="17303" calcext:value-type="float">
            <text:p>17303</text:p>
          </table:table-cell>
          <table:table-cell office:value-type="float" office:value="8640000" calcext:value-type="float">
            <text:p>8640000</text:p>
          </table:table-cell>
          <table:table-cell table:formula="of:=[.B1574]/[.C1574]" office:value-type="float" office:value="0.00200266203703704" calcext:value-type="float">
            <text:p>0,00200266203703704000</text:p>
          </table:table-cell>
          <table:table-cell table:formula="of:=[.D1575]-[.D1574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table:formula="of:=[.B1574]+11" office:value-type="float" office:value="17314" calcext:value-type="float">
            <text:p>17314</text:p>
          </table:table-cell>
          <table:table-cell office:value-type="float" office:value="8640000" calcext:value-type="float">
            <text:p>8640000</text:p>
          </table:table-cell>
          <table:table-cell table:formula="of:=[.B1575]/[.C1575]" office:value-type="float" office:value="0.00200393518518519" calcext:value-type="float">
            <text:p>0,00200393518518519000</text:p>
          </table:table-cell>
          <table:table-cell table:formula="of:=[.D1576]-[.D157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table:formula="of:=[.B1575]+11" office:value-type="float" office:value="17325" calcext:value-type="float">
            <text:p>17325</text:p>
          </table:table-cell>
          <table:table-cell office:value-type="float" office:value="8640000" calcext:value-type="float">
            <text:p>8640000</text:p>
          </table:table-cell>
          <table:table-cell table:formula="of:=[.B1576]/[.C1576]" office:value-type="float" office:value="0.00200520833333333" calcext:value-type="float">
            <text:p>0,00200520833333333000</text:p>
          </table:table-cell>
          <table:table-cell table:formula="of:=[.D1577]-[.D157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table:formula="of:=[.B1576]+11" office:value-type="float" office:value="17336" calcext:value-type="float">
            <text:p>17336</text:p>
          </table:table-cell>
          <table:table-cell office:value-type="float" office:value="8640000" calcext:value-type="float">
            <text:p>8640000</text:p>
          </table:table-cell>
          <table:table-cell table:formula="of:=[.B1577]/[.C1577]" office:value-type="float" office:value="0.00200648148148148" calcext:value-type="float">
            <text:p>0,00200648148148148000</text:p>
          </table:table-cell>
          <table:table-cell table:formula="of:=[.D1578]-[.D157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table:formula="of:=[.B1577]+11" office:value-type="float" office:value="17347" calcext:value-type="float">
            <text:p>17347</text:p>
          </table:table-cell>
          <table:table-cell office:value-type="float" office:value="8640000" calcext:value-type="float">
            <text:p>8640000</text:p>
          </table:table-cell>
          <table:table-cell table:formula="of:=[.B1578]/[.C1578]" office:value-type="float" office:value="0.00200775462962963" calcext:value-type="float">
            <text:p>0,00200775462962963000</text:p>
          </table:table-cell>
          <table:table-cell table:formula="of:=[.D1579]-[.D157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table:formula="of:=[.B1578]+11" office:value-type="float" office:value="17358" calcext:value-type="float">
            <text:p>17358</text:p>
          </table:table-cell>
          <table:table-cell office:value-type="float" office:value="8640000" calcext:value-type="float">
            <text:p>8640000</text:p>
          </table:table-cell>
          <table:table-cell table:formula="of:=[.B1579]/[.C1579]" office:value-type="float" office:value="0.00200902777777778" calcext:value-type="float">
            <text:p>0,00200902777777778000</text:p>
          </table:table-cell>
          <table:table-cell table:formula="of:=[.D1580]-[.D1579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table:formula="of:=[.B1579]+11" office:value-type="float" office:value="17369" calcext:value-type="float">
            <text:p>17369</text:p>
          </table:table-cell>
          <table:table-cell office:value-type="float" office:value="8640000" calcext:value-type="float">
            <text:p>8640000</text:p>
          </table:table-cell>
          <table:table-cell table:formula="of:=[.B1580]/[.C1580]" office:value-type="float" office:value="0.00201030092592593" calcext:value-type="float">
            <text:p>0,00201030092592593000</text:p>
          </table:table-cell>
          <table:table-cell table:formula="of:=[.D1581]-[.D158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table:formula="of:=[.B1580]+11" office:value-type="float" office:value="17380" calcext:value-type="float">
            <text:p>17380</text:p>
          </table:table-cell>
          <table:table-cell office:value-type="float" office:value="8640000" calcext:value-type="float">
            <text:p>8640000</text:p>
          </table:table-cell>
          <table:table-cell table:formula="of:=[.B1581]/[.C1581]" office:value-type="float" office:value="0.00201157407407407" calcext:value-type="float">
            <text:p>0,00201157407407407000</text:p>
          </table:table-cell>
          <table:table-cell table:formula="of:=[.D1582]-[.D158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table:formula="of:=[.B1581]+11" office:value-type="float" office:value="17391" calcext:value-type="float">
            <text:p>17391</text:p>
          </table:table-cell>
          <table:table-cell office:value-type="float" office:value="8640000" calcext:value-type="float">
            <text:p>8640000</text:p>
          </table:table-cell>
          <table:table-cell table:formula="of:=[.B1582]/[.C1582]" office:value-type="float" office:value="0.00201284722222222" calcext:value-type="float">
            <text:p>0,00201284722222222000</text:p>
          </table:table-cell>
          <table:table-cell table:formula="of:=[.D1583]-[.D158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table:formula="of:=[.B1582]+11" office:value-type="float" office:value="17402" calcext:value-type="float">
            <text:p>17402</text:p>
          </table:table-cell>
          <table:table-cell office:value-type="float" office:value="8640000" calcext:value-type="float">
            <text:p>8640000</text:p>
          </table:table-cell>
          <table:table-cell table:formula="of:=[.B1583]/[.C1583]" office:value-type="float" office:value="0.00201412037037037" calcext:value-type="float">
            <text:p>0,00201412037037037000</text:p>
          </table:table-cell>
          <table:table-cell table:formula="of:=[.D1584]-[.D1583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table:formula="of:=[.B1583]+11" office:value-type="float" office:value="17413" calcext:value-type="float">
            <text:p>17413</text:p>
          </table:table-cell>
          <table:table-cell office:value-type="float" office:value="8640000" calcext:value-type="float">
            <text:p>8640000</text:p>
          </table:table-cell>
          <table:table-cell table:formula="of:=[.B1584]/[.C1584]" office:value-type="float" office:value="0.00201539351851852" calcext:value-type="float">
            <text:p>0,00201539351851852000</text:p>
          </table:table-cell>
          <table:table-cell table:formula="of:=[.D1585]-[.D158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table:formula="of:=[.B1584]+11" office:value-type="float" office:value="17424" calcext:value-type="float">
            <text:p>17424</text:p>
          </table:table-cell>
          <table:table-cell office:value-type="float" office:value="8640000" calcext:value-type="float">
            <text:p>8640000</text:p>
          </table:table-cell>
          <table:table-cell table:formula="of:=[.B1585]/[.C1585]" office:value-type="float" office:value="0.00201666666666667" calcext:value-type="float">
            <text:p>0,00201666666666667000</text:p>
          </table:table-cell>
          <table:table-cell table:formula="of:=[.D1586]-[.D158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table:formula="of:=[.B1585]+11" office:value-type="float" office:value="17435" calcext:value-type="float">
            <text:p>17435</text:p>
          </table:table-cell>
          <table:table-cell office:value-type="float" office:value="8640000" calcext:value-type="float">
            <text:p>8640000</text:p>
          </table:table-cell>
          <table:table-cell table:formula="of:=[.B1586]/[.C1586]" office:value-type="float" office:value="0.00201793981481482" calcext:value-type="float">
            <text:p>0,00201793981481482000</text:p>
          </table:table-cell>
          <table:table-cell table:formula="of:=[.D1587]-[.D158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table:formula="of:=[.B1586]+11" office:value-type="float" office:value="17446" calcext:value-type="float">
            <text:p>17446</text:p>
          </table:table-cell>
          <table:table-cell office:value-type="float" office:value="8640000" calcext:value-type="float">
            <text:p>8640000</text:p>
          </table:table-cell>
          <table:table-cell table:formula="of:=[.B1587]/[.C1587]" office:value-type="float" office:value="0.00201921296296296" calcext:value-type="float">
            <text:p>0,00201921296296296000</text:p>
          </table:table-cell>
          <table:table-cell table:formula="of:=[.D1588]-[.D1587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table:formula="of:=[.B1587]+11" office:value-type="float" office:value="17457" calcext:value-type="float">
            <text:p>17457</text:p>
          </table:table-cell>
          <table:table-cell office:value-type="float" office:value="8640000" calcext:value-type="float">
            <text:p>8640000</text:p>
          </table:table-cell>
          <table:table-cell table:formula="of:=[.B1588]/[.C1588]" office:value-type="float" office:value="0.00202048611111111" calcext:value-type="float">
            <text:p>0,00202048611111111000</text:p>
          </table:table-cell>
          <table:table-cell table:formula="of:=[.D1589]-[.D158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table:formula="of:=[.B1588]+11" office:value-type="float" office:value="17468" calcext:value-type="float">
            <text:p>17468</text:p>
          </table:table-cell>
          <table:table-cell office:value-type="float" office:value="8640000" calcext:value-type="float">
            <text:p>8640000</text:p>
          </table:table-cell>
          <table:table-cell table:formula="of:=[.B1589]/[.C1589]" office:value-type="float" office:value="0.00202175925925926" calcext:value-type="float">
            <text:p>0,00202175925925926000</text:p>
          </table:table-cell>
          <table:table-cell table:formula="of:=[.D1590]-[.D158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table:formula="of:=[.B1589]+11" office:value-type="float" office:value="17479" calcext:value-type="float">
            <text:p>17479</text:p>
          </table:table-cell>
          <table:table-cell office:value-type="float" office:value="8640000" calcext:value-type="float">
            <text:p>8640000</text:p>
          </table:table-cell>
          <table:table-cell table:formula="of:=[.B1590]/[.C1590]" office:value-type="float" office:value="0.00202303240740741" calcext:value-type="float">
            <text:p>0,00202303240740741000</text:p>
          </table:table-cell>
          <table:table-cell table:formula="of:=[.D1591]-[.D159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table:formula="of:=[.B1590]+11" office:value-type="float" office:value="17490" calcext:value-type="float">
            <text:p>17490</text:p>
          </table:table-cell>
          <table:table-cell office:value-type="float" office:value="8640000" calcext:value-type="float">
            <text:p>8640000</text:p>
          </table:table-cell>
          <table:table-cell table:formula="of:=[.B1591]/[.C1591]" office:value-type="float" office:value="0.00202430555555556" calcext:value-type="float">
            <text:p>0,00202430555555556000</text:p>
          </table:table-cell>
          <table:table-cell table:formula="of:=[.D1592]-[.D159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table:formula="of:=[.B1591]+11" office:value-type="float" office:value="17501" calcext:value-type="float">
            <text:p>17501</text:p>
          </table:table-cell>
          <table:table-cell office:value-type="float" office:value="8640000" calcext:value-type="float">
            <text:p>8640000</text:p>
          </table:table-cell>
          <table:table-cell table:formula="of:=[.B1592]/[.C1592]" office:value-type="float" office:value="0.0020255787037037" calcext:value-type="float">
            <text:p>0,00202557870370370000</text:p>
          </table:table-cell>
          <table:table-cell table:formula="of:=[.D1593]-[.D1592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table:formula="of:=[.B1592]+11" office:value-type="float" office:value="17512" calcext:value-type="float">
            <text:p>17512</text:p>
          </table:table-cell>
          <table:table-cell office:value-type="float" office:value="8640000" calcext:value-type="float">
            <text:p>8640000</text:p>
          </table:table-cell>
          <table:table-cell table:formula="of:=[.B1593]/[.C1593]" office:value-type="float" office:value="0.00202685185185185" calcext:value-type="float">
            <text:p>0,00202685185185185000</text:p>
          </table:table-cell>
          <table:table-cell table:formula="of:=[.D1594]-[.D159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table:formula="of:=[.B1593]+11" office:value-type="float" office:value="17523" calcext:value-type="float">
            <text:p>17523</text:p>
          </table:table-cell>
          <table:table-cell office:value-type="float" office:value="8640000" calcext:value-type="float">
            <text:p>8640000</text:p>
          </table:table-cell>
          <table:table-cell table:formula="of:=[.B1594]/[.C1594]" office:value-type="float" office:value="0.002028125" calcext:value-type="float">
            <text:p>0,00202812500000000000</text:p>
          </table:table-cell>
          <table:table-cell table:formula="of:=[.D1595]-[.D159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table:formula="of:=[.B1594]+11" office:value-type="float" office:value="17534" calcext:value-type="float">
            <text:p>17534</text:p>
          </table:table-cell>
          <table:table-cell office:value-type="float" office:value="8640000" calcext:value-type="float">
            <text:p>8640000</text:p>
          </table:table-cell>
          <table:table-cell table:formula="of:=[.B1595]/[.C1595]" office:value-type="float" office:value="0.00202939814814815" calcext:value-type="float">
            <text:p>0,00202939814814815000</text:p>
          </table:table-cell>
          <table:table-cell table:formula="of:=[.D1596]-[.D159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table:formula="of:=[.B1595]+11" office:value-type="float" office:value="17545" calcext:value-type="float">
            <text:p>17545</text:p>
          </table:table-cell>
          <table:table-cell office:value-type="float" office:value="8640000" calcext:value-type="float">
            <text:p>8640000</text:p>
          </table:table-cell>
          <table:table-cell table:formula="of:=[.B1596]/[.C1596]" office:value-type="float" office:value="0.0020306712962963" calcext:value-type="float">
            <text:p>0,00203067129629630000</text:p>
          </table:table-cell>
          <table:table-cell table:formula="of:=[.D1597]-[.D1596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table:formula="of:=[.B1596]+11" office:value-type="float" office:value="17556" calcext:value-type="float">
            <text:p>17556</text:p>
          </table:table-cell>
          <table:table-cell office:value-type="float" office:value="8640000" calcext:value-type="float">
            <text:p>8640000</text:p>
          </table:table-cell>
          <table:table-cell table:formula="of:=[.B1597]/[.C1597]" office:value-type="float" office:value="0.00203194444444444" calcext:value-type="float">
            <text:p>0,00203194444444444000</text:p>
          </table:table-cell>
          <table:table-cell table:formula="of:=[.D1598]-[.D159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table:formula="of:=[.B1597]+11" office:value-type="float" office:value="17567" calcext:value-type="float">
            <text:p>17567</text:p>
          </table:table-cell>
          <table:table-cell office:value-type="float" office:value="8640000" calcext:value-type="float">
            <text:p>8640000</text:p>
          </table:table-cell>
          <table:table-cell table:formula="of:=[.B1598]/[.C1598]" office:value-type="float" office:value="0.00203321759259259" calcext:value-type="float">
            <text:p>0,00203321759259259000</text:p>
          </table:table-cell>
          <table:table-cell table:formula="of:=[.D1599]-[.D159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table:formula="of:=[.B1598]+11" office:value-type="float" office:value="17578" calcext:value-type="float">
            <text:p>17578</text:p>
          </table:table-cell>
          <table:table-cell office:value-type="float" office:value="8640000" calcext:value-type="float">
            <text:p>8640000</text:p>
          </table:table-cell>
          <table:table-cell table:formula="of:=[.B1599]/[.C1599]" office:value-type="float" office:value="0.00203449074074074" calcext:value-type="float">
            <text:p>0,00203449074074074000</text:p>
          </table:table-cell>
          <table:table-cell table:formula="of:=[.D1600]-[.D159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table:formula="of:=[.B1599]+11" office:value-type="float" office:value="17589" calcext:value-type="float">
            <text:p>17589</text:p>
          </table:table-cell>
          <table:table-cell office:value-type="float" office:value="8640000" calcext:value-type="float">
            <text:p>8640000</text:p>
          </table:table-cell>
          <table:table-cell table:formula="of:=[.B1600]/[.C1600]" office:value-type="float" office:value="0.00203576388888889" calcext:value-type="float">
            <text:p>0,00203576388888889000</text:p>
          </table:table-cell>
          <table:table-cell table:formula="of:=[.D1601]-[.D1600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.B1600]+11" office:value-type="float" office:value="17600" calcext:value-type="float">
            <text:p>17600</text:p>
          </table:table-cell>
          <table:table-cell office:value-type="float" office:value="8640000" calcext:value-type="float">
            <text:p>8640000</text:p>
          </table:table-cell>
          <table:table-cell table:formula="of:=[.B1601]/[.C1601]" office:value-type="float" office:value="0.00203703703703704" calcext:value-type="float">
            <text:p>0,00203703703703704000</text:p>
          </table:table-cell>
          <table:table-cell table:formula="of:=[.D1602]-[.D160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table:formula="of:=[.B1601]+11" office:value-type="float" office:value="17611" calcext:value-type="float">
            <text:p>17611</text:p>
          </table:table-cell>
          <table:table-cell office:value-type="float" office:value="8640000" calcext:value-type="float">
            <text:p>8640000</text:p>
          </table:table-cell>
          <table:table-cell table:formula="of:=[.B1602]/[.C1602]" office:value-type="float" office:value="0.00203831018518519" calcext:value-type="float">
            <text:p>0,00203831018518519000</text:p>
          </table:table-cell>
          <table:table-cell table:formula="of:=[.D1603]-[.D160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table:formula="of:=[.B1602]+11" office:value-type="float" office:value="17622" calcext:value-type="float">
            <text:p>17622</text:p>
          </table:table-cell>
          <table:table-cell office:value-type="float" office:value="8640000" calcext:value-type="float">
            <text:p>8640000</text:p>
          </table:table-cell>
          <table:table-cell table:formula="of:=[.B1603]/[.C1603]" office:value-type="float" office:value="0.00203958333333333" calcext:value-type="float">
            <text:p>0,00203958333333333000</text:p>
          </table:table-cell>
          <table:table-cell table:formula="of:=[.D1604]-[.D160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table:formula="of:=[.B1603]+11" office:value-type="float" office:value="17633" calcext:value-type="float">
            <text:p>17633</text:p>
          </table:table-cell>
          <table:table-cell office:value-type="float" office:value="8640000" calcext:value-type="float">
            <text:p>8640000</text:p>
          </table:table-cell>
          <table:table-cell table:formula="of:=[.B1604]/[.C1604]" office:value-type="float" office:value="0.00204085648148148" calcext:value-type="float">
            <text:p>0,00204085648148148000</text:p>
          </table:table-cell>
          <table:table-cell table:formula="of:=[.D1605]-[.D1604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table:formula="of:=[.B1604]+11" office:value-type="float" office:value="17644" calcext:value-type="float">
            <text:p>17644</text:p>
          </table:table-cell>
          <table:table-cell office:value-type="float" office:value="8640000" calcext:value-type="float">
            <text:p>8640000</text:p>
          </table:table-cell>
          <table:table-cell table:formula="of:=[.B1605]/[.C1605]" office:value-type="float" office:value="0.00204212962962963" calcext:value-type="float">
            <text:p>0,00204212962962963000</text:p>
          </table:table-cell>
          <table:table-cell table:formula="of:=[.D1606]-[.D160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table:formula="of:=[.B1605]+11" office:value-type="float" office:value="17655" calcext:value-type="float">
            <text:p>17655</text:p>
          </table:table-cell>
          <table:table-cell office:value-type="float" office:value="8640000" calcext:value-type="float">
            <text:p>8640000</text:p>
          </table:table-cell>
          <table:table-cell table:formula="of:=[.B1606]/[.C1606]" office:value-type="float" office:value="0.00204340277777778" calcext:value-type="float">
            <text:p>0,00204340277777778000</text:p>
          </table:table-cell>
          <table:table-cell table:formula="of:=[.D1607]-[.D160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table:formula="of:=[.B1606]+11" office:value-type="float" office:value="17666" calcext:value-type="float">
            <text:p>17666</text:p>
          </table:table-cell>
          <table:table-cell office:value-type="float" office:value="8640000" calcext:value-type="float">
            <text:p>8640000</text:p>
          </table:table-cell>
          <table:table-cell table:formula="of:=[.B1607]/[.C1607]" office:value-type="float" office:value="0.00204467592592593" calcext:value-type="float">
            <text:p>0,00204467592592593000</text:p>
          </table:table-cell>
          <table:table-cell table:formula="of:=[.D1608]-[.D160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table:formula="of:=[.B1607]+11" office:value-type="float" office:value="17677" calcext:value-type="float">
            <text:p>17677</text:p>
          </table:table-cell>
          <table:table-cell office:value-type="float" office:value="8640000" calcext:value-type="float">
            <text:p>8640000</text:p>
          </table:table-cell>
          <table:table-cell table:formula="of:=[.B1608]/[.C1608]" office:value-type="float" office:value="0.00204594907407407" calcext:value-type="float">
            <text:p>0,00204594907407407000</text:p>
          </table:table-cell>
          <table:table-cell table:formula="of:=[.D1609]-[.D160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table:formula="of:=[.B1608]+11" office:value-type="float" office:value="17688" calcext:value-type="float">
            <text:p>17688</text:p>
          </table:table-cell>
          <table:table-cell office:value-type="float" office:value="8640000" calcext:value-type="float">
            <text:p>8640000</text:p>
          </table:table-cell>
          <table:table-cell table:formula="of:=[.B1609]/[.C1609]" office:value-type="float" office:value="0.00204722222222222" calcext:value-type="float">
            <text:p>0,00204722222222222000</text:p>
          </table:table-cell>
          <table:table-cell table:formula="of:=[.D1610]-[.D1609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table:formula="of:=[.B1609]+11" office:value-type="float" office:value="17699" calcext:value-type="float">
            <text:p>17699</text:p>
          </table:table-cell>
          <table:table-cell office:value-type="float" office:value="8640000" calcext:value-type="float">
            <text:p>8640000</text:p>
          </table:table-cell>
          <table:table-cell table:formula="of:=[.B1610]/[.C1610]" office:value-type="float" office:value="0.00204849537037037" calcext:value-type="float">
            <text:p>0,00204849537037037000</text:p>
          </table:table-cell>
          <table:table-cell table:formula="of:=[.D1611]-[.D161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table:formula="of:=[.B1610]+11" office:value-type="float" office:value="17710" calcext:value-type="float">
            <text:p>17710</text:p>
          </table:table-cell>
          <table:table-cell office:value-type="float" office:value="8640000" calcext:value-type="float">
            <text:p>8640000</text:p>
          </table:table-cell>
          <table:table-cell table:formula="of:=[.B1611]/[.C1611]" office:value-type="float" office:value="0.00204976851851852" calcext:value-type="float">
            <text:p>0,00204976851851852000</text:p>
          </table:table-cell>
          <table:table-cell table:formula="of:=[.D1612]-[.D161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table:formula="of:=[.B1611]+11" office:value-type="float" office:value="17721" calcext:value-type="float">
            <text:p>17721</text:p>
          </table:table-cell>
          <table:table-cell office:value-type="float" office:value="8640000" calcext:value-type="float">
            <text:p>8640000</text:p>
          </table:table-cell>
          <table:table-cell table:formula="of:=[.B1612]/[.C1612]" office:value-type="float" office:value="0.00205104166666667" calcext:value-type="float">
            <text:p>0,00205104166666667000</text:p>
          </table:table-cell>
          <table:table-cell table:formula="of:=[.D1613]-[.D161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table:formula="of:=[.B1612]+11" office:value-type="float" office:value="17732" calcext:value-type="float">
            <text:p>17732</text:p>
          </table:table-cell>
          <table:table-cell office:value-type="float" office:value="8640000" calcext:value-type="float">
            <text:p>8640000</text:p>
          </table:table-cell>
          <table:table-cell table:formula="of:=[.B1613]/[.C1613]" office:value-type="float" office:value="0.00205231481481482" calcext:value-type="float">
            <text:p>0,00205231481481482000</text:p>
          </table:table-cell>
          <table:table-cell table:formula="of:=[.D1614]-[.D1613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table:formula="of:=[.B1613]+11" office:value-type="float" office:value="17743" calcext:value-type="float">
            <text:p>17743</text:p>
          </table:table-cell>
          <table:table-cell office:value-type="float" office:value="8640000" calcext:value-type="float">
            <text:p>8640000</text:p>
          </table:table-cell>
          <table:table-cell table:formula="of:=[.B1614]/[.C1614]" office:value-type="float" office:value="0.00205358796296296" calcext:value-type="float">
            <text:p>0,00205358796296296000</text:p>
          </table:table-cell>
          <table:table-cell table:formula="of:=[.D1615]-[.D161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table:formula="of:=[.B1614]+11" office:value-type="float" office:value="17754" calcext:value-type="float">
            <text:p>17754</text:p>
          </table:table-cell>
          <table:table-cell office:value-type="float" office:value="8640000" calcext:value-type="float">
            <text:p>8640000</text:p>
          </table:table-cell>
          <table:table-cell table:formula="of:=[.B1615]/[.C1615]" office:value-type="float" office:value="0.00205486111111111" calcext:value-type="float">
            <text:p>0,00205486111111111000</text:p>
          </table:table-cell>
          <table:table-cell table:formula="of:=[.D1616]-[.D161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table:formula="of:=[.B1615]+11" office:value-type="float" office:value="17765" calcext:value-type="float">
            <text:p>17765</text:p>
          </table:table-cell>
          <table:table-cell office:value-type="float" office:value="8640000" calcext:value-type="float">
            <text:p>8640000</text:p>
          </table:table-cell>
          <table:table-cell table:formula="of:=[.B1616]/[.C1616]" office:value-type="float" office:value="0.00205613425925926" calcext:value-type="float">
            <text:p>0,00205613425925926000</text:p>
          </table:table-cell>
          <table:table-cell table:formula="of:=[.D1617]-[.D161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table:formula="of:=[.B1616]+11" office:value-type="float" office:value="17776" calcext:value-type="float">
            <text:p>17776</text:p>
          </table:table-cell>
          <table:table-cell office:value-type="float" office:value="8640000" calcext:value-type="float">
            <text:p>8640000</text:p>
          </table:table-cell>
          <table:table-cell table:formula="of:=[.B1617]/[.C1617]" office:value-type="float" office:value="0.00205740740740741" calcext:value-type="float">
            <text:p>0,00205740740740741000</text:p>
          </table:table-cell>
          <table:table-cell table:formula="of:=[.D1618]-[.D1617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table:formula="of:=[.B1617]+11" office:value-type="float" office:value="17787" calcext:value-type="float">
            <text:p>17787</text:p>
          </table:table-cell>
          <table:table-cell office:value-type="float" office:value="8640000" calcext:value-type="float">
            <text:p>8640000</text:p>
          </table:table-cell>
          <table:table-cell table:formula="of:=[.B1618]/[.C1618]" office:value-type="float" office:value="0.00205868055555556" calcext:value-type="float">
            <text:p>0,00205868055555556000</text:p>
          </table:table-cell>
          <table:table-cell table:formula="of:=[.D1619]-[.D161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table:formula="of:=[.B1618]+11" office:value-type="float" office:value="17798" calcext:value-type="float">
            <text:p>17798</text:p>
          </table:table-cell>
          <table:table-cell office:value-type="float" office:value="8640000" calcext:value-type="float">
            <text:p>8640000</text:p>
          </table:table-cell>
          <table:table-cell table:formula="of:=[.B1619]/[.C1619]" office:value-type="float" office:value="0.0020599537037037" calcext:value-type="float">
            <text:p>0,00205995370370370000</text:p>
          </table:table-cell>
          <table:table-cell table:formula="of:=[.D1620]-[.D161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table:formula="of:=[.B1619]+11" office:value-type="float" office:value="17809" calcext:value-type="float">
            <text:p>17809</text:p>
          </table:table-cell>
          <table:table-cell office:value-type="float" office:value="8640000" calcext:value-type="float">
            <text:p>8640000</text:p>
          </table:table-cell>
          <table:table-cell table:formula="of:=[.B1620]/[.C1620]" office:value-type="float" office:value="0.00206122685185185" calcext:value-type="float">
            <text:p>0,00206122685185185000</text:p>
          </table:table-cell>
          <table:table-cell table:formula="of:=[.D1621]-[.D162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table:formula="of:=[.B1620]+11" office:value-type="float" office:value="17820" calcext:value-type="float">
            <text:p>17820</text:p>
          </table:table-cell>
          <table:table-cell office:value-type="float" office:value="8640000" calcext:value-type="float">
            <text:p>8640000</text:p>
          </table:table-cell>
          <table:table-cell table:formula="of:=[.B1621]/[.C1621]" office:value-type="float" office:value="0.0020625" calcext:value-type="float">
            <text:p>0,00206250000000000000</text:p>
          </table:table-cell>
          <table:table-cell table:formula="of:=[.D1622]-[.D162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table:formula="of:=[.B1621]+11" office:value-type="float" office:value="17831" calcext:value-type="float">
            <text:p>17831</text:p>
          </table:table-cell>
          <table:table-cell office:value-type="float" office:value="8640000" calcext:value-type="float">
            <text:p>8640000</text:p>
          </table:table-cell>
          <table:table-cell table:formula="of:=[.B1622]/[.C1622]" office:value-type="float" office:value="0.00206377314814815" calcext:value-type="float">
            <text:p>0,00206377314814815000</text:p>
          </table:table-cell>
          <table:table-cell table:formula="of:=[.D1623]-[.D1622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table:formula="of:=[.B1622]+11" office:value-type="float" office:value="17842" calcext:value-type="float">
            <text:p>17842</text:p>
          </table:table-cell>
          <table:table-cell office:value-type="float" office:value="8640000" calcext:value-type="float">
            <text:p>8640000</text:p>
          </table:table-cell>
          <table:table-cell table:formula="of:=[.B1623]/[.C1623]" office:value-type="float" office:value="0.0020650462962963" calcext:value-type="float">
            <text:p>0,00206504629629630000</text:p>
          </table:table-cell>
          <table:table-cell table:formula="of:=[.D1624]-[.D162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table:formula="of:=[.B1623]+11" office:value-type="float" office:value="17853" calcext:value-type="float">
            <text:p>17853</text:p>
          </table:table-cell>
          <table:table-cell office:value-type="float" office:value="8640000" calcext:value-type="float">
            <text:p>8640000</text:p>
          </table:table-cell>
          <table:table-cell table:formula="of:=[.B1624]/[.C1624]" office:value-type="float" office:value="0.00206631944444444" calcext:value-type="float">
            <text:p>0,00206631944444444000</text:p>
          </table:table-cell>
          <table:table-cell table:formula="of:=[.D1625]-[.D162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table:formula="of:=[.B1624]+11" office:value-type="float" office:value="17864" calcext:value-type="float">
            <text:p>17864</text:p>
          </table:table-cell>
          <table:table-cell office:value-type="float" office:value="8640000" calcext:value-type="float">
            <text:p>8640000</text:p>
          </table:table-cell>
          <table:table-cell table:formula="of:=[.B1625]/[.C1625]" office:value-type="float" office:value="0.00206759259259259" calcext:value-type="float">
            <text:p>0,00206759259259259000</text:p>
          </table:table-cell>
          <table:table-cell table:formula="of:=[.D1626]-[.D162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table:formula="of:=[.B1625]+11" office:value-type="float" office:value="17875" calcext:value-type="float">
            <text:p>17875</text:p>
          </table:table-cell>
          <table:table-cell office:value-type="float" office:value="8640000" calcext:value-type="float">
            <text:p>8640000</text:p>
          </table:table-cell>
          <table:table-cell table:formula="of:=[.B1626]/[.C1626]" office:value-type="float" office:value="0.00206886574074074" calcext:value-type="float">
            <text:p>0,00206886574074074000</text:p>
          </table:table-cell>
          <table:table-cell table:formula="of:=[.D1627]-[.D1626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table:formula="of:=[.B1626]+11" office:value-type="float" office:value="17886" calcext:value-type="float">
            <text:p>17886</text:p>
          </table:table-cell>
          <table:table-cell office:value-type="float" office:value="8640000" calcext:value-type="float">
            <text:p>8640000</text:p>
          </table:table-cell>
          <table:table-cell table:formula="of:=[.B1627]/[.C1627]" office:value-type="float" office:value="0.00207013888888889" calcext:value-type="float">
            <text:p>0,00207013888888889000</text:p>
          </table:table-cell>
          <table:table-cell table:formula="of:=[.D1628]-[.D162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table:formula="of:=[.B1627]+11" office:value-type="float" office:value="17897" calcext:value-type="float">
            <text:p>17897</text:p>
          </table:table-cell>
          <table:table-cell office:value-type="float" office:value="8640000" calcext:value-type="float">
            <text:p>8640000</text:p>
          </table:table-cell>
          <table:table-cell table:formula="of:=[.B1628]/[.C1628]" office:value-type="float" office:value="0.00207141203703704" calcext:value-type="float">
            <text:p>0,00207141203703704000</text:p>
          </table:table-cell>
          <table:table-cell table:formula="of:=[.D1629]-[.D162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table:formula="of:=[.B1628]+11" office:value-type="float" office:value="17908" calcext:value-type="float">
            <text:p>17908</text:p>
          </table:table-cell>
          <table:table-cell office:value-type="float" office:value="8640000" calcext:value-type="float">
            <text:p>8640000</text:p>
          </table:table-cell>
          <table:table-cell table:formula="of:=[.B1629]/[.C1629]" office:value-type="float" office:value="0.00207268518518519" calcext:value-type="float">
            <text:p>0,00207268518518519000</text:p>
          </table:table-cell>
          <table:table-cell table:formula="of:=[.D1630]-[.D162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table:formula="of:=[.B1629]+11" office:value-type="float" office:value="17919" calcext:value-type="float">
            <text:p>17919</text:p>
          </table:table-cell>
          <table:table-cell office:value-type="float" office:value="8640000" calcext:value-type="float">
            <text:p>8640000</text:p>
          </table:table-cell>
          <table:table-cell table:formula="of:=[.B1630]/[.C1630]" office:value-type="float" office:value="0.00207395833333333" calcext:value-type="float">
            <text:p>0,00207395833333333000</text:p>
          </table:table-cell>
          <table:table-cell table:formula="of:=[.D1631]-[.D1630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table:formula="of:=[.B1630]+11" office:value-type="float" office:value="17930" calcext:value-type="float">
            <text:p>17930</text:p>
          </table:table-cell>
          <table:table-cell office:value-type="float" office:value="8640000" calcext:value-type="float">
            <text:p>8640000</text:p>
          </table:table-cell>
          <table:table-cell table:formula="of:=[.B1631]/[.C1631]" office:value-type="float" office:value="0.00207523148148148" calcext:value-type="float">
            <text:p>0,00207523148148148000</text:p>
          </table:table-cell>
          <table:table-cell table:formula="of:=[.D1632]-[.D163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table:formula="of:=[.B1631]+11" office:value-type="float" office:value="17941" calcext:value-type="float">
            <text:p>17941</text:p>
          </table:table-cell>
          <table:table-cell office:value-type="float" office:value="8640000" calcext:value-type="float">
            <text:p>8640000</text:p>
          </table:table-cell>
          <table:table-cell table:formula="of:=[.B1632]/[.C1632]" office:value-type="float" office:value="0.00207650462962963" calcext:value-type="float">
            <text:p>0,00207650462962963000</text:p>
          </table:table-cell>
          <table:table-cell table:formula="of:=[.D1633]-[.D163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table:formula="of:=[.B1632]+11" office:value-type="float" office:value="17952" calcext:value-type="float">
            <text:p>17952</text:p>
          </table:table-cell>
          <table:table-cell office:value-type="float" office:value="8640000" calcext:value-type="float">
            <text:p>8640000</text:p>
          </table:table-cell>
          <table:table-cell table:formula="of:=[.B1633]/[.C1633]" office:value-type="float" office:value="0.00207777777777778" calcext:value-type="float">
            <text:p>0,00207777777777778000</text:p>
          </table:table-cell>
          <table:table-cell table:formula="of:=[.D1634]-[.D163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table:formula="of:=[.B1633]+11" office:value-type="float" office:value="17963" calcext:value-type="float">
            <text:p>17963</text:p>
          </table:table-cell>
          <table:table-cell office:value-type="float" office:value="8640000" calcext:value-type="float">
            <text:p>8640000</text:p>
          </table:table-cell>
          <table:table-cell table:formula="of:=[.B1634]/[.C1634]" office:value-type="float" office:value="0.00207905092592593" calcext:value-type="float">
            <text:p>0,00207905092592593000</text:p>
          </table:table-cell>
          <table:table-cell table:formula="of:=[.D1635]-[.D163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table:formula="of:=[.B1634]+11" office:value-type="float" office:value="17974" calcext:value-type="float">
            <text:p>17974</text:p>
          </table:table-cell>
          <table:table-cell office:value-type="float" office:value="8640000" calcext:value-type="float">
            <text:p>8640000</text:p>
          </table:table-cell>
          <table:table-cell table:formula="of:=[.B1635]/[.C1635]" office:value-type="float" office:value="0.00208032407407407" calcext:value-type="float">
            <text:p>0,00208032407407407000</text:p>
          </table:table-cell>
          <table:table-cell table:formula="of:=[.D1636]-[.D1635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table:formula="of:=[.B1635]+11" office:value-type="float" office:value="17985" calcext:value-type="float">
            <text:p>17985</text:p>
          </table:table-cell>
          <table:table-cell office:value-type="float" office:value="8640000" calcext:value-type="float">
            <text:p>8640000</text:p>
          </table:table-cell>
          <table:table-cell table:formula="of:=[.B1636]/[.C1636]" office:value-type="float" office:value="0.00208159722222222" calcext:value-type="float">
            <text:p>0,00208159722222222000</text:p>
          </table:table-cell>
          <table:table-cell table:formula="of:=[.D1637]-[.D163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table:formula="of:=[.B1636]+11" office:value-type="float" office:value="17996" calcext:value-type="float">
            <text:p>17996</text:p>
          </table:table-cell>
          <table:table-cell office:value-type="float" office:value="8640000" calcext:value-type="float">
            <text:p>8640000</text:p>
          </table:table-cell>
          <table:table-cell table:formula="of:=[.B1637]/[.C1637]" office:value-type="float" office:value="0.00208287037037037" calcext:value-type="float">
            <text:p>0,00208287037037037000</text:p>
          </table:table-cell>
          <table:table-cell table:formula="of:=[.D1638]-[.D163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table:formula="of:=[.B1637]+11" office:value-type="float" office:value="18007" calcext:value-type="float">
            <text:p>18007</text:p>
          </table:table-cell>
          <table:table-cell office:value-type="float" office:value="8640000" calcext:value-type="float">
            <text:p>8640000</text:p>
          </table:table-cell>
          <table:table-cell table:formula="of:=[.B1638]/[.C1638]" office:value-type="float" office:value="0.00208414351851852" calcext:value-type="float">
            <text:p>0,00208414351851852000</text:p>
          </table:table-cell>
          <table:table-cell table:formula="of:=[.D1639]-[.D163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table:formula="of:=[.B1638]+11" office:value-type="float" office:value="18018" calcext:value-type="float">
            <text:p>18018</text:p>
          </table:table-cell>
          <table:table-cell office:value-type="float" office:value="8640000" calcext:value-type="float">
            <text:p>8640000</text:p>
          </table:table-cell>
          <table:table-cell table:formula="of:=[.B1639]/[.C1639]" office:value-type="float" office:value="0.00208541666666667" calcext:value-type="float">
            <text:p>0,00208541666666667000</text:p>
          </table:table-cell>
          <table:table-cell table:formula="of:=[.D1640]-[.D1639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table:formula="of:=[.B1639]+11" office:value-type="float" office:value="18029" calcext:value-type="float">
            <text:p>18029</text:p>
          </table:table-cell>
          <table:table-cell office:value-type="float" office:value="8640000" calcext:value-type="float">
            <text:p>8640000</text:p>
          </table:table-cell>
          <table:table-cell table:formula="of:=[.B1640]/[.C1640]" office:value-type="float" office:value="0.00208668981481481" calcext:value-type="float">
            <text:p>0,00208668981481481000</text:p>
          </table:table-cell>
          <table:table-cell table:formula="of:=[.D1641]-[.D164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table:formula="of:=[.B1640]+11" office:value-type="float" office:value="18040" calcext:value-type="float">
            <text:p>18040</text:p>
          </table:table-cell>
          <table:table-cell office:value-type="float" office:value="8640000" calcext:value-type="float">
            <text:p>8640000</text:p>
          </table:table-cell>
          <table:table-cell table:formula="of:=[.B1641]/[.C1641]" office:value-type="float" office:value="0.00208796296296296" calcext:value-type="float">
            <text:p>0,00208796296296296000</text:p>
          </table:table-cell>
          <table:table-cell table:formula="of:=[.D1642]-[.D164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table:formula="of:=[.B1641]+11" office:value-type="float" office:value="18051" calcext:value-type="float">
            <text:p>18051</text:p>
          </table:table-cell>
          <table:table-cell office:value-type="float" office:value="8640000" calcext:value-type="float">
            <text:p>8640000</text:p>
          </table:table-cell>
          <table:table-cell table:formula="of:=[.B1642]/[.C1642]" office:value-type="float" office:value="0.00208923611111111" calcext:value-type="float">
            <text:p>0,00208923611111111000</text:p>
          </table:table-cell>
          <table:table-cell table:formula="of:=[.D1643]-[.D164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table:formula="of:=[.B1642]+11" office:value-type="float" office:value="18062" calcext:value-type="float">
            <text:p>18062</text:p>
          </table:table-cell>
          <table:table-cell office:value-type="float" office:value="8640000" calcext:value-type="float">
            <text:p>8640000</text:p>
          </table:table-cell>
          <table:table-cell table:formula="of:=[.B1643]/[.C1643]" office:value-type="float" office:value="0.00209050925925926" calcext:value-type="float">
            <text:p>0,00209050925925926000</text:p>
          </table:table-cell>
          <table:table-cell table:formula="of:=[.D1644]-[.D1643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table:formula="of:=[.B1643]+11" office:value-type="float" office:value="18073" calcext:value-type="float">
            <text:p>18073</text:p>
          </table:table-cell>
          <table:table-cell office:value-type="float" office:value="8640000" calcext:value-type="float">
            <text:p>8640000</text:p>
          </table:table-cell>
          <table:table-cell table:formula="of:=[.B1644]/[.C1644]" office:value-type="float" office:value="0.00209178240740741" calcext:value-type="float">
            <text:p>0,00209178240740741000</text:p>
          </table:table-cell>
          <table:table-cell table:formula="of:=[.D1645]-[.D164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table:formula="of:=[.B1644]+11" office:value-type="float" office:value="18084" calcext:value-type="float">
            <text:p>18084</text:p>
          </table:table-cell>
          <table:table-cell office:value-type="float" office:value="8640000" calcext:value-type="float">
            <text:p>8640000</text:p>
          </table:table-cell>
          <table:table-cell table:formula="of:=[.B1645]/[.C1645]" office:value-type="float" office:value="0.00209305555555556" calcext:value-type="float">
            <text:p>0,00209305555555556000</text:p>
          </table:table-cell>
          <table:table-cell table:formula="of:=[.D1646]-[.D164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table:formula="of:=[.B1645]+11" office:value-type="float" office:value="18095" calcext:value-type="float">
            <text:p>18095</text:p>
          </table:table-cell>
          <table:table-cell office:value-type="float" office:value="8640000" calcext:value-type="float">
            <text:p>8640000</text:p>
          </table:table-cell>
          <table:table-cell table:formula="of:=[.B1646]/[.C1646]" office:value-type="float" office:value="0.0020943287037037" calcext:value-type="float">
            <text:p>0,00209432870370370000</text:p>
          </table:table-cell>
          <table:table-cell table:formula="of:=[.D1647]-[.D164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table:formula="of:=[.B1646]+11" office:value-type="float" office:value="18106" calcext:value-type="float">
            <text:p>18106</text:p>
          </table:table-cell>
          <table:table-cell office:value-type="float" office:value="8640000" calcext:value-type="float">
            <text:p>8640000</text:p>
          </table:table-cell>
          <table:table-cell table:formula="of:=[.B1647]/[.C1647]" office:value-type="float" office:value="0.00209560185185185" calcext:value-type="float">
            <text:p>0,00209560185185185000</text:p>
          </table:table-cell>
          <table:table-cell table:formula="of:=[.D1648]-[.D164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table:formula="of:=[.B1647]+11" office:value-type="float" office:value="18117" calcext:value-type="float">
            <text:p>18117</text:p>
          </table:table-cell>
          <table:table-cell office:value-type="float" office:value="8640000" calcext:value-type="float">
            <text:p>8640000</text:p>
          </table:table-cell>
          <table:table-cell table:formula="of:=[.B1648]/[.C1648]" office:value-type="float" office:value="0.002096875" calcext:value-type="float">
            <text:p>0,00209687500000000000</text:p>
          </table:table-cell>
          <table:table-cell table:formula="of:=[.D1649]-[.D1648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table:formula="of:=[.B1648]+11" office:value-type="float" office:value="18128" calcext:value-type="float">
            <text:p>18128</text:p>
          </table:table-cell>
          <table:table-cell office:value-type="float" office:value="8640000" calcext:value-type="float">
            <text:p>8640000</text:p>
          </table:table-cell>
          <table:table-cell table:formula="of:=[.B1649]/[.C1649]" office:value-type="float" office:value="0.00209814814814815" calcext:value-type="float">
            <text:p>0,00209814814814815000</text:p>
          </table:table-cell>
          <table:table-cell table:formula="of:=[.D1650]-[.D164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table:formula="of:=[.B1649]+11" office:value-type="float" office:value="18139" calcext:value-type="float">
            <text:p>18139</text:p>
          </table:table-cell>
          <table:table-cell office:value-type="float" office:value="8640000" calcext:value-type="float">
            <text:p>8640000</text:p>
          </table:table-cell>
          <table:table-cell table:formula="of:=[.B1650]/[.C1650]" office:value-type="float" office:value="0.0020994212962963" calcext:value-type="float">
            <text:p>0,00209942129629630000</text:p>
          </table:table-cell>
          <table:table-cell table:formula="of:=[.D1651]-[.D165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[.B1650]+11" office:value-type="float" office:value="18150" calcext:value-type="float">
            <text:p>18150</text:p>
          </table:table-cell>
          <table:table-cell office:value-type="float" office:value="8640000" calcext:value-type="float">
            <text:p>8640000</text:p>
          </table:table-cell>
          <table:table-cell table:formula="of:=[.B1651]/[.C1651]" office:value-type="float" office:value="0.00210069444444444" calcext:value-type="float">
            <text:p>0,00210069444444444000</text:p>
          </table:table-cell>
          <table:table-cell table:formula="of:=[.D1652]-[.D165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table:formula="of:=[.B1651]+11" office:value-type="float" office:value="18161" calcext:value-type="float">
            <text:p>18161</text:p>
          </table:table-cell>
          <table:table-cell office:value-type="float" office:value="8640000" calcext:value-type="float">
            <text:p>8640000</text:p>
          </table:table-cell>
          <table:table-cell table:formula="of:=[.B1652]/[.C1652]" office:value-type="float" office:value="0.00210196759259259" calcext:value-type="float">
            <text:p>0,00210196759259259000</text:p>
          </table:table-cell>
          <table:table-cell table:formula="of:=[.D1653]-[.D1652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table:formula="of:=[.B1652]+11" office:value-type="float" office:value="18172" calcext:value-type="float">
            <text:p>18172</text:p>
          </table:table-cell>
          <table:table-cell office:value-type="float" office:value="8640000" calcext:value-type="float">
            <text:p>8640000</text:p>
          </table:table-cell>
          <table:table-cell table:formula="of:=[.B1653]/[.C1653]" office:value-type="float" office:value="0.00210324074074074" calcext:value-type="float">
            <text:p>0,00210324074074074000</text:p>
          </table:table-cell>
          <table:table-cell table:formula="of:=[.D1654]-[.D165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table:formula="of:=[.B1653]+11" office:value-type="float" office:value="18183" calcext:value-type="float">
            <text:p>18183</text:p>
          </table:table-cell>
          <table:table-cell office:value-type="float" office:value="8640000" calcext:value-type="float">
            <text:p>8640000</text:p>
          </table:table-cell>
          <table:table-cell table:formula="of:=[.B1654]/[.C1654]" office:value-type="float" office:value="0.00210451388888889" calcext:value-type="float">
            <text:p>0,00210451388888889000</text:p>
          </table:table-cell>
          <table:table-cell table:formula="of:=[.D1655]-[.D165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table:formula="of:=[.B1654]+11" office:value-type="float" office:value="18194" calcext:value-type="float">
            <text:p>18194</text:p>
          </table:table-cell>
          <table:table-cell office:value-type="float" office:value="8640000" calcext:value-type="float">
            <text:p>8640000</text:p>
          </table:table-cell>
          <table:table-cell table:formula="of:=[.B1655]/[.C1655]" office:value-type="float" office:value="0.00210578703703704" calcext:value-type="float">
            <text:p>0,00210578703703704000</text:p>
          </table:table-cell>
          <table:table-cell table:formula="of:=[.D1656]-[.D165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table:formula="of:=[.B1655]+11" office:value-type="float" office:value="18205" calcext:value-type="float">
            <text:p>18205</text:p>
          </table:table-cell>
          <table:table-cell office:value-type="float" office:value="8640000" calcext:value-type="float">
            <text:p>8640000</text:p>
          </table:table-cell>
          <table:table-cell table:formula="of:=[.B1656]/[.C1656]" office:value-type="float" office:value="0.00210706018518519" calcext:value-type="float">
            <text:p>0,00210706018518519000</text:p>
          </table:table-cell>
          <table:table-cell table:formula="of:=[.D1657]-[.D1656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table:formula="of:=[.B1656]+11" office:value-type="float" office:value="18216" calcext:value-type="float">
            <text:p>18216</text:p>
          </table:table-cell>
          <table:table-cell office:value-type="float" office:value="8640000" calcext:value-type="float">
            <text:p>8640000</text:p>
          </table:table-cell>
          <table:table-cell table:formula="of:=[.B1657]/[.C1657]" office:value-type="float" office:value="0.00210833333333333" calcext:value-type="float">
            <text:p>0,00210833333333333000</text:p>
          </table:table-cell>
          <table:table-cell table:formula="of:=[.D1658]-[.D165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table:formula="of:=[.B1657]+11" office:value-type="float" office:value="18227" calcext:value-type="float">
            <text:p>18227</text:p>
          </table:table-cell>
          <table:table-cell office:value-type="float" office:value="8640000" calcext:value-type="float">
            <text:p>8640000</text:p>
          </table:table-cell>
          <table:table-cell table:formula="of:=[.B1658]/[.C1658]" office:value-type="float" office:value="0.00210960648148148" calcext:value-type="float">
            <text:p>0,00210960648148148000</text:p>
          </table:table-cell>
          <table:table-cell table:formula="of:=[.D1659]-[.D165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table:formula="of:=[.B1658]+11" office:value-type="float" office:value="18238" calcext:value-type="float">
            <text:p>18238</text:p>
          </table:table-cell>
          <table:table-cell office:value-type="float" office:value="8640000" calcext:value-type="float">
            <text:p>8640000</text:p>
          </table:table-cell>
          <table:table-cell table:formula="of:=[.B1659]/[.C1659]" office:value-type="float" office:value="0.00211087962962963" calcext:value-type="float">
            <text:p>0,00211087962962963000</text:p>
          </table:table-cell>
          <table:table-cell table:formula="of:=[.D1660]-[.D165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table:formula="of:=[.B1659]+11" office:value-type="float" office:value="18249" calcext:value-type="float">
            <text:p>18249</text:p>
          </table:table-cell>
          <table:table-cell office:value-type="float" office:value="8640000" calcext:value-type="float">
            <text:p>8640000</text:p>
          </table:table-cell>
          <table:table-cell table:formula="of:=[.B1660]/[.C1660]" office:value-type="float" office:value="0.00211215277777778" calcext:value-type="float">
            <text:p>0,00211215277777778000</text:p>
          </table:table-cell>
          <table:table-cell table:formula="of:=[.D1661]-[.D1660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table:formula="of:=[.B1660]+11" office:value-type="float" office:value="18260" calcext:value-type="float">
            <text:p>18260</text:p>
          </table:table-cell>
          <table:table-cell office:value-type="float" office:value="8640000" calcext:value-type="float">
            <text:p>8640000</text:p>
          </table:table-cell>
          <table:table-cell table:formula="of:=[.B1661]/[.C1661]" office:value-type="float" office:value="0.00211342592592593" calcext:value-type="float">
            <text:p>0,00211342592592593000</text:p>
          </table:table-cell>
          <table:table-cell table:formula="of:=[.D1662]-[.D166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table:formula="of:=[.B1661]+11" office:value-type="float" office:value="18271" calcext:value-type="float">
            <text:p>18271</text:p>
          </table:table-cell>
          <table:table-cell office:value-type="float" office:value="8640000" calcext:value-type="float">
            <text:p>8640000</text:p>
          </table:table-cell>
          <table:table-cell table:formula="of:=[.B1662]/[.C1662]" office:value-type="float" office:value="0.00211469907407407" calcext:value-type="float">
            <text:p>0,00211469907407407000</text:p>
          </table:table-cell>
          <table:table-cell table:formula="of:=[.D1663]-[.D166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table:formula="of:=[.B1662]+11" office:value-type="float" office:value="18282" calcext:value-type="float">
            <text:p>18282</text:p>
          </table:table-cell>
          <table:table-cell office:value-type="float" office:value="8640000" calcext:value-type="float">
            <text:p>8640000</text:p>
          </table:table-cell>
          <table:table-cell table:formula="of:=[.B1663]/[.C1663]" office:value-type="float" office:value="0.00211597222222222" calcext:value-type="float">
            <text:p>0,00211597222222222000</text:p>
          </table:table-cell>
          <table:table-cell table:formula="of:=[.D1664]-[.D166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[.B1663]+11" office:value-type="float" office:value="18293" calcext:value-type="float">
            <text:p>18293</text:p>
          </table:table-cell>
          <table:table-cell office:value-type="float" office:value="8640000" calcext:value-type="float">
            <text:p>8640000</text:p>
          </table:table-cell>
          <table:table-cell table:formula="of:=[.B1664]/[.C1664]" office:value-type="float" office:value="0.00211724537037037" calcext:value-type="float">
            <text:p>0,00211724537037037000</text:p>
          </table:table-cell>
          <table:table-cell table:formula="of:=[.D1665]-[.D166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table:formula="of:=[.B1664]+11" office:value-type="float" office:value="18304" calcext:value-type="float">
            <text:p>18304</text:p>
          </table:table-cell>
          <table:table-cell office:value-type="float" office:value="8640000" calcext:value-type="float">
            <text:p>8640000</text:p>
          </table:table-cell>
          <table:table-cell table:formula="of:=[.B1665]/[.C1665]" office:value-type="float" office:value="0.00211851851851852" calcext:value-type="float">
            <text:p>0,00211851851851852000</text:p>
          </table:table-cell>
          <table:table-cell table:formula="of:=[.D1666]-[.D1665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table:formula="of:=[.B1665]+11" office:value-type="float" office:value="18315" calcext:value-type="float">
            <text:p>18315</text:p>
          </table:table-cell>
          <table:table-cell office:value-type="float" office:value="8640000" calcext:value-type="float">
            <text:p>8640000</text:p>
          </table:table-cell>
          <table:table-cell table:formula="of:=[.B1666]/[.C1666]" office:value-type="float" office:value="0.00211979166666667" calcext:value-type="float">
            <text:p>0,00211979166666667000</text:p>
          </table:table-cell>
          <table:table-cell table:formula="of:=[.D1667]-[.D166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table:formula="of:=[.B1666]+11" office:value-type="float" office:value="18326" calcext:value-type="float">
            <text:p>18326</text:p>
          </table:table-cell>
          <table:table-cell office:value-type="float" office:value="8640000" calcext:value-type="float">
            <text:p>8640000</text:p>
          </table:table-cell>
          <table:table-cell table:formula="of:=[.B1667]/[.C1667]" office:value-type="float" office:value="0.00212106481481481" calcext:value-type="float">
            <text:p>0,00212106481481481000</text:p>
          </table:table-cell>
          <table:table-cell table:formula="of:=[.D1668]-[.D166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table:formula="of:=[.B1667]+11" office:value-type="float" office:value="18337" calcext:value-type="float">
            <text:p>18337</text:p>
          </table:table-cell>
          <table:table-cell office:value-type="float" office:value="8640000" calcext:value-type="float">
            <text:p>8640000</text:p>
          </table:table-cell>
          <table:table-cell table:formula="of:=[.B1668]/[.C1668]" office:value-type="float" office:value="0.00212233796296296" calcext:value-type="float">
            <text:p>0,00212233796296296000</text:p>
          </table:table-cell>
          <table:table-cell table:formula="of:=[.D1669]-[.D166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table:formula="of:=[.B1668]+11" office:value-type="float" office:value="18348" calcext:value-type="float">
            <text:p>18348</text:p>
          </table:table-cell>
          <table:table-cell office:value-type="float" office:value="8640000" calcext:value-type="float">
            <text:p>8640000</text:p>
          </table:table-cell>
          <table:table-cell table:formula="of:=[.B1669]/[.C1669]" office:value-type="float" office:value="0.00212361111111111" calcext:value-type="float">
            <text:p>0,00212361111111111000</text:p>
          </table:table-cell>
          <table:table-cell table:formula="of:=[.D1670]-[.D1669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table:formula="of:=[.B1669]+11" office:value-type="float" office:value="18359" calcext:value-type="float">
            <text:p>18359</text:p>
          </table:table-cell>
          <table:table-cell office:value-type="float" office:value="8640000" calcext:value-type="float">
            <text:p>8640000</text:p>
          </table:table-cell>
          <table:table-cell table:formula="of:=[.B1670]/[.C1670]" office:value-type="float" office:value="0.00212488425925926" calcext:value-type="float">
            <text:p>0,00212488425925926000</text:p>
          </table:table-cell>
          <table:table-cell table:formula="of:=[.D1671]-[.D167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table:formula="of:=[.B1670]+11" office:value-type="float" office:value="18370" calcext:value-type="float">
            <text:p>18370</text:p>
          </table:table-cell>
          <table:table-cell office:value-type="float" office:value="8640000" calcext:value-type="float">
            <text:p>8640000</text:p>
          </table:table-cell>
          <table:table-cell table:formula="of:=[.B1671]/[.C1671]" office:value-type="float" office:value="0.00212615740740741" calcext:value-type="float">
            <text:p>0,00212615740740741000</text:p>
          </table:table-cell>
          <table:table-cell table:formula="of:=[.D1672]-[.D167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table:formula="of:=[.B1671]+11" office:value-type="float" office:value="18381" calcext:value-type="float">
            <text:p>18381</text:p>
          </table:table-cell>
          <table:table-cell office:value-type="float" office:value="8640000" calcext:value-type="float">
            <text:p>8640000</text:p>
          </table:table-cell>
          <table:table-cell table:formula="of:=[.B1672]/[.C1672]" office:value-type="float" office:value="0.00212743055555556" calcext:value-type="float">
            <text:p>0,00212743055555556000</text:p>
          </table:table-cell>
          <table:table-cell table:formula="of:=[.D1673]-[.D167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table:formula="of:=[.B1672]+11" office:value-type="float" office:value="18392" calcext:value-type="float">
            <text:p>18392</text:p>
          </table:table-cell>
          <table:table-cell office:value-type="float" office:value="8640000" calcext:value-type="float">
            <text:p>8640000</text:p>
          </table:table-cell>
          <table:table-cell table:formula="of:=[.B1673]/[.C1673]" office:value-type="float" office:value="0.0021287037037037" calcext:value-type="float">
            <text:p>0,00212870370370370000</text:p>
          </table:table-cell>
          <table:table-cell table:formula="of:=[.D1674]-[.D1673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table:formula="of:=[.B1673]+11" office:value-type="float" office:value="18403" calcext:value-type="float">
            <text:p>18403</text:p>
          </table:table-cell>
          <table:table-cell office:value-type="float" office:value="8640000" calcext:value-type="float">
            <text:p>8640000</text:p>
          </table:table-cell>
          <table:table-cell table:formula="of:=[.B1674]/[.C1674]" office:value-type="float" office:value="0.00212997685185185" calcext:value-type="float">
            <text:p>0,00212997685185185000</text:p>
          </table:table-cell>
          <table:table-cell table:formula="of:=[.D1675]-[.D167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table:formula="of:=[.B1674]+11" office:value-type="float" office:value="18414" calcext:value-type="float">
            <text:p>18414</text:p>
          </table:table-cell>
          <table:table-cell office:value-type="float" office:value="8640000" calcext:value-type="float">
            <text:p>8640000</text:p>
          </table:table-cell>
          <table:table-cell table:formula="of:=[.B1675]/[.C1675]" office:value-type="float" office:value="0.00213125" calcext:value-type="float">
            <text:p>0,00213125000000000000</text:p>
          </table:table-cell>
          <table:table-cell table:formula="of:=[.D1676]-[.D167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table:formula="of:=[.B1675]+11" office:value-type="float" office:value="18425" calcext:value-type="float">
            <text:p>18425</text:p>
          </table:table-cell>
          <table:table-cell office:value-type="float" office:value="8640000" calcext:value-type="float">
            <text:p>8640000</text:p>
          </table:table-cell>
          <table:table-cell table:formula="of:=[.B1676]/[.C1676]" office:value-type="float" office:value="0.00213252314814815" calcext:value-type="float">
            <text:p>0,00213252314814815000</text:p>
          </table:table-cell>
          <table:table-cell table:formula="of:=[.D1677]-[.D167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table:formula="of:=[.B1676]+11" office:value-type="float" office:value="18436" calcext:value-type="float">
            <text:p>18436</text:p>
          </table:table-cell>
          <table:table-cell office:value-type="float" office:value="8640000" calcext:value-type="float">
            <text:p>8640000</text:p>
          </table:table-cell>
          <table:table-cell table:formula="of:=[.B1677]/[.C1677]" office:value-type="float" office:value="0.0021337962962963" calcext:value-type="float">
            <text:p>0,00213379629629630000</text:p>
          </table:table-cell>
          <table:table-cell table:formula="of:=[.D1678]-[.D167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table:formula="of:=[.B1677]+11" office:value-type="float" office:value="18447" calcext:value-type="float">
            <text:p>18447</text:p>
          </table:table-cell>
          <table:table-cell office:value-type="float" office:value="8640000" calcext:value-type="float">
            <text:p>8640000</text:p>
          </table:table-cell>
          <table:table-cell table:formula="of:=[.B1678]/[.C1678]" office:value-type="float" office:value="0.00213506944444444" calcext:value-type="float">
            <text:p>0,00213506944444444000</text:p>
          </table:table-cell>
          <table:table-cell table:formula="of:=[.D1679]-[.D1678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table:formula="of:=[.B1678]+11" office:value-type="float" office:value="18458" calcext:value-type="float">
            <text:p>18458</text:p>
          </table:table-cell>
          <table:table-cell office:value-type="float" office:value="8640000" calcext:value-type="float">
            <text:p>8640000</text:p>
          </table:table-cell>
          <table:table-cell table:formula="of:=[.B1679]/[.C1679]" office:value-type="float" office:value="0.00213634259259259" calcext:value-type="float">
            <text:p>0,00213634259259259000</text:p>
          </table:table-cell>
          <table:table-cell table:formula="of:=[.D1680]-[.D167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table:formula="of:=[.B1679]+11" office:value-type="float" office:value="18469" calcext:value-type="float">
            <text:p>18469</text:p>
          </table:table-cell>
          <table:table-cell office:value-type="float" office:value="8640000" calcext:value-type="float">
            <text:p>8640000</text:p>
          </table:table-cell>
          <table:table-cell table:formula="of:=[.B1680]/[.C1680]" office:value-type="float" office:value="0.00213761574074074" calcext:value-type="float">
            <text:p>0,00213761574074074000</text:p>
          </table:table-cell>
          <table:table-cell table:formula="of:=[.D1681]-[.D168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[.B1680]+11" office:value-type="float" office:value="18480" calcext:value-type="float">
            <text:p>18480</text:p>
          </table:table-cell>
          <table:table-cell office:value-type="float" office:value="8640000" calcext:value-type="float">
            <text:p>8640000</text:p>
          </table:table-cell>
          <table:table-cell table:formula="of:=[.B1681]/[.C1681]" office:value-type="float" office:value="0.00213888888888889" calcext:value-type="float">
            <text:p>0,00213888888888889000</text:p>
          </table:table-cell>
          <table:table-cell table:formula="of:=[.D1682]-[.D168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table:formula="of:=[.B1681]+11" office:value-type="float" office:value="18491" calcext:value-type="float">
            <text:p>18491</text:p>
          </table:table-cell>
          <table:table-cell office:value-type="float" office:value="8640000" calcext:value-type="float">
            <text:p>8640000</text:p>
          </table:table-cell>
          <table:table-cell table:formula="of:=[.B1682]/[.C1682]" office:value-type="float" office:value="0.00214016203703704" calcext:value-type="float">
            <text:p>0,00214016203703704000</text:p>
          </table:table-cell>
          <table:table-cell table:formula="of:=[.D1683]-[.D1682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table:formula="of:=[.B1682]+11" office:value-type="float" office:value="18502" calcext:value-type="float">
            <text:p>18502</text:p>
          </table:table-cell>
          <table:table-cell office:value-type="float" office:value="8640000" calcext:value-type="float">
            <text:p>8640000</text:p>
          </table:table-cell>
          <table:table-cell table:formula="of:=[.B1683]/[.C1683]" office:value-type="float" office:value="0.00214143518518519" calcext:value-type="float">
            <text:p>0,00214143518518519000</text:p>
          </table:table-cell>
          <table:table-cell table:formula="of:=[.D1684]-[.D168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table:formula="of:=[.B1683]+11" office:value-type="float" office:value="18513" calcext:value-type="float">
            <text:p>18513</text:p>
          </table:table-cell>
          <table:table-cell office:value-type="float" office:value="8640000" calcext:value-type="float">
            <text:p>8640000</text:p>
          </table:table-cell>
          <table:table-cell table:formula="of:=[.B1684]/[.C1684]" office:value-type="float" office:value="0.00214270833333333" calcext:value-type="float">
            <text:p>0,00214270833333333000</text:p>
          </table:table-cell>
          <table:table-cell table:formula="of:=[.D1685]-[.D168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table:formula="of:=[.B1684]+11" office:value-type="float" office:value="18524" calcext:value-type="float">
            <text:p>18524</text:p>
          </table:table-cell>
          <table:table-cell office:value-type="float" office:value="8640000" calcext:value-type="float">
            <text:p>8640000</text:p>
          </table:table-cell>
          <table:table-cell table:formula="of:=[.B1685]/[.C1685]" office:value-type="float" office:value="0.00214398148148148" calcext:value-type="float">
            <text:p>0,00214398148148148000</text:p>
          </table:table-cell>
          <table:table-cell table:formula="of:=[.D1686]-[.D168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table:formula="of:=[.B1685]+11" office:value-type="float" office:value="18535" calcext:value-type="float">
            <text:p>18535</text:p>
          </table:table-cell>
          <table:table-cell office:value-type="float" office:value="8640000" calcext:value-type="float">
            <text:p>8640000</text:p>
          </table:table-cell>
          <table:table-cell table:formula="of:=[.B1686]/[.C1686]" office:value-type="float" office:value="0.00214525462962963" calcext:value-type="float">
            <text:p>0,00214525462962963000</text:p>
          </table:table-cell>
          <table:table-cell table:formula="of:=[.D1687]-[.D1686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table:formula="of:=[.B1686]+11" office:value-type="float" office:value="18546" calcext:value-type="float">
            <text:p>18546</text:p>
          </table:table-cell>
          <table:table-cell office:value-type="float" office:value="8640000" calcext:value-type="float">
            <text:p>8640000</text:p>
          </table:table-cell>
          <table:table-cell table:formula="of:=[.B1687]/[.C1687]" office:value-type="float" office:value="0.00214652777777778" calcext:value-type="float">
            <text:p>0,00214652777777778000</text:p>
          </table:table-cell>
          <table:table-cell table:formula="of:=[.D1688]-[.D168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table:formula="of:=[.B1687]+11" office:value-type="float" office:value="18557" calcext:value-type="float">
            <text:p>18557</text:p>
          </table:table-cell>
          <table:table-cell office:value-type="float" office:value="8640000" calcext:value-type="float">
            <text:p>8640000</text:p>
          </table:table-cell>
          <table:table-cell table:formula="of:=[.B1688]/[.C1688]" office:value-type="float" office:value="0.00214780092592593" calcext:value-type="float">
            <text:p>0,00214780092592593000</text:p>
          </table:table-cell>
          <table:table-cell table:formula="of:=[.D1689]-[.D168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table:formula="of:=[.B1688]+11" office:value-type="float" office:value="18568" calcext:value-type="float">
            <text:p>18568</text:p>
          </table:table-cell>
          <table:table-cell office:value-type="float" office:value="8640000" calcext:value-type="float">
            <text:p>8640000</text:p>
          </table:table-cell>
          <table:table-cell table:formula="of:=[.B1689]/[.C1689]" office:value-type="float" office:value="0.00214907407407407" calcext:value-type="float">
            <text:p>0,00214907407407407000</text:p>
          </table:table-cell>
          <table:table-cell table:formula="of:=[.D1690]-[.D168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table:formula="of:=[.B1689]+11" office:value-type="float" office:value="18579" calcext:value-type="float">
            <text:p>18579</text:p>
          </table:table-cell>
          <table:table-cell office:value-type="float" office:value="8640000" calcext:value-type="float">
            <text:p>8640000</text:p>
          </table:table-cell>
          <table:table-cell table:formula="of:=[.B1690]/[.C1690]" office:value-type="float" office:value="0.00215034722222222" calcext:value-type="float">
            <text:p>0,00215034722222222000</text:p>
          </table:table-cell>
          <table:table-cell table:formula="of:=[.D1691]-[.D169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table:formula="of:=[.B1690]+11" office:value-type="float" office:value="18590" calcext:value-type="float">
            <text:p>18590</text:p>
          </table:table-cell>
          <table:table-cell office:value-type="float" office:value="8640000" calcext:value-type="float">
            <text:p>8640000</text:p>
          </table:table-cell>
          <table:table-cell table:formula="of:=[.B1691]/[.C1691]" office:value-type="float" office:value="0.00215162037037037" calcext:value-type="float">
            <text:p>0,00215162037037037000</text:p>
          </table:table-cell>
          <table:table-cell table:formula="of:=[.D1692]-[.D1691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table:formula="of:=[.B1691]+11" office:value-type="float" office:value="18601" calcext:value-type="float">
            <text:p>18601</text:p>
          </table:table-cell>
          <table:table-cell office:value-type="float" office:value="8640000" calcext:value-type="float">
            <text:p>8640000</text:p>
          </table:table-cell>
          <table:table-cell table:formula="of:=[.B1692]/[.C1692]" office:value-type="float" office:value="0.00215289351851852" calcext:value-type="float">
            <text:p>0,00215289351851852000</text:p>
          </table:table-cell>
          <table:table-cell table:formula="of:=[.D1693]-[.D169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table:formula="of:=[.B1692]+11" office:value-type="float" office:value="18612" calcext:value-type="float">
            <text:p>18612</text:p>
          </table:table-cell>
          <table:table-cell office:value-type="float" office:value="8640000" calcext:value-type="float">
            <text:p>8640000</text:p>
          </table:table-cell>
          <table:table-cell table:formula="of:=[.B1693]/[.C1693]" office:value-type="float" office:value="0.00215416666666667" calcext:value-type="float">
            <text:p>0,00215416666666667000</text:p>
          </table:table-cell>
          <table:table-cell table:formula="of:=[.D1694]-[.D169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table:formula="of:=[.B1693]+11" office:value-type="float" office:value="18623" calcext:value-type="float">
            <text:p>18623</text:p>
          </table:table-cell>
          <table:table-cell office:value-type="float" office:value="8640000" calcext:value-type="float">
            <text:p>8640000</text:p>
          </table:table-cell>
          <table:table-cell table:formula="of:=[.B1694]/[.C1694]" office:value-type="float" office:value="0.00215543981481482" calcext:value-type="float">
            <text:p>0,00215543981481482000</text:p>
          </table:table-cell>
          <table:table-cell table:formula="of:=[.D1695]-[.D169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table:formula="of:=[.B1694]+11" office:value-type="float" office:value="18634" calcext:value-type="float">
            <text:p>18634</text:p>
          </table:table-cell>
          <table:table-cell office:value-type="float" office:value="8640000" calcext:value-type="float">
            <text:p>8640000</text:p>
          </table:table-cell>
          <table:table-cell table:formula="of:=[.B1695]/[.C1695]" office:value-type="float" office:value="0.00215671296296296" calcext:value-type="float">
            <text:p>0,00215671296296296000</text:p>
          </table:table-cell>
          <table:table-cell table:formula="of:=[.D1696]-[.D1695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table:formula="of:=[.B1695]+11" office:value-type="float" office:value="18645" calcext:value-type="float">
            <text:p>18645</text:p>
          </table:table-cell>
          <table:table-cell office:value-type="float" office:value="8640000" calcext:value-type="float">
            <text:p>8640000</text:p>
          </table:table-cell>
          <table:table-cell table:formula="of:=[.B1696]/[.C1696]" office:value-type="float" office:value="0.00215798611111111" calcext:value-type="float">
            <text:p>0,00215798611111111000</text:p>
          </table:table-cell>
          <table:table-cell table:formula="of:=[.D1697]-[.D169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table:formula="of:=[.B1696]+11" office:value-type="float" office:value="18656" calcext:value-type="float">
            <text:p>18656</text:p>
          </table:table-cell>
          <table:table-cell office:value-type="float" office:value="8640000" calcext:value-type="float">
            <text:p>8640000</text:p>
          </table:table-cell>
          <table:table-cell table:formula="of:=[.B1697]/[.C1697]" office:value-type="float" office:value="0.00215925925925926" calcext:value-type="float">
            <text:p>0,00215925925925926000</text:p>
          </table:table-cell>
          <table:table-cell table:formula="of:=[.D1698]-[.D169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table:formula="of:=[.B1697]+11" office:value-type="float" office:value="18667" calcext:value-type="float">
            <text:p>18667</text:p>
          </table:table-cell>
          <table:table-cell office:value-type="float" office:value="8640000" calcext:value-type="float">
            <text:p>8640000</text:p>
          </table:table-cell>
          <table:table-cell table:formula="of:=[.B1698]/[.C1698]" office:value-type="float" office:value="0.00216053240740741" calcext:value-type="float">
            <text:p>0,00216053240740741000</text:p>
          </table:table-cell>
          <table:table-cell table:formula="of:=[.D1699]-[.D169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table:formula="of:=[.B1698]+11" office:value-type="float" office:value="18678" calcext:value-type="float">
            <text:p>18678</text:p>
          </table:table-cell>
          <table:table-cell office:value-type="float" office:value="8640000" calcext:value-type="float">
            <text:p>8640000</text:p>
          </table:table-cell>
          <table:table-cell table:formula="of:=[.B1699]/[.C1699]" office:value-type="float" office:value="0.00216180555555556" calcext:value-type="float">
            <text:p>0,00216180555555556000</text:p>
          </table:table-cell>
          <table:table-cell table:formula="of:=[.D1700]-[.D1699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table:formula="of:=[.B1699]+11" office:value-type="float" office:value="18689" calcext:value-type="float">
            <text:p>18689</text:p>
          </table:table-cell>
          <table:table-cell office:value-type="float" office:value="8640000" calcext:value-type="float">
            <text:p>8640000</text:p>
          </table:table-cell>
          <table:table-cell table:formula="of:=[.B1700]/[.C1700]" office:value-type="float" office:value="0.0021630787037037" calcext:value-type="float">
            <text:p>0,00216307870370370000</text:p>
          </table:table-cell>
          <table:table-cell table:formula="of:=[.D1701]-[.D170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[.B1700]+11" office:value-type="float" office:value="18700" calcext:value-type="float">
            <text:p>18700</text:p>
          </table:table-cell>
          <table:table-cell office:value-type="float" office:value="8640000" calcext:value-type="float">
            <text:p>8640000</text:p>
          </table:table-cell>
          <table:table-cell table:formula="of:=[.B1701]/[.C1701]" office:value-type="float" office:value="0.00216435185185185" calcext:value-type="float">
            <text:p>0,00216435185185185000</text:p>
          </table:table-cell>
          <table:table-cell table:formula="of:=[.D1702]-[.D170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table:formula="of:=[.B1701]+11" office:value-type="float" office:value="18711" calcext:value-type="float">
            <text:p>18711</text:p>
          </table:table-cell>
          <table:table-cell office:value-type="float" office:value="8640000" calcext:value-type="float">
            <text:p>8640000</text:p>
          </table:table-cell>
          <table:table-cell table:formula="of:=[.B1702]/[.C1702]" office:value-type="float" office:value="0.002165625" calcext:value-type="float">
            <text:p>0,00216562500000000000</text:p>
          </table:table-cell>
          <table:table-cell table:formula="of:=[.D1703]-[.D170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table:formula="of:=[.B1702]+11" office:value-type="float" office:value="18722" calcext:value-type="float">
            <text:p>18722</text:p>
          </table:table-cell>
          <table:table-cell office:value-type="float" office:value="8640000" calcext:value-type="float">
            <text:p>8640000</text:p>
          </table:table-cell>
          <table:table-cell table:formula="of:=[.B1703]/[.C1703]" office:value-type="float" office:value="0.00216689814814815" calcext:value-type="float">
            <text:p>0,00216689814814815000</text:p>
          </table:table-cell>
          <table:table-cell table:formula="of:=[.D1704]-[.D170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table:formula="of:=[.B1703]+11" office:value-type="float" office:value="18733" calcext:value-type="float">
            <text:p>18733</text:p>
          </table:table-cell>
          <table:table-cell office:value-type="float" office:value="8640000" calcext:value-type="float">
            <text:p>8640000</text:p>
          </table:table-cell>
          <table:table-cell table:formula="of:=[.B1704]/[.C1704]" office:value-type="float" office:value="0.0021681712962963" calcext:value-type="float">
            <text:p>0,00216817129629630000</text:p>
          </table:table-cell>
          <table:table-cell table:formula="of:=[.D1705]-[.D1704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table:formula="of:=[.B1704]+11" office:value-type="float" office:value="18744" calcext:value-type="float">
            <text:p>18744</text:p>
          </table:table-cell>
          <table:table-cell office:value-type="float" office:value="8640000" calcext:value-type="float">
            <text:p>8640000</text:p>
          </table:table-cell>
          <table:table-cell table:formula="of:=[.B1705]/[.C1705]" office:value-type="float" office:value="0.00216944444444444" calcext:value-type="float">
            <text:p>0,00216944444444444000</text:p>
          </table:table-cell>
          <table:table-cell table:formula="of:=[.D1706]-[.D170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table:formula="of:=[.B1705]+11" office:value-type="float" office:value="18755" calcext:value-type="float">
            <text:p>18755</text:p>
          </table:table-cell>
          <table:table-cell office:value-type="float" office:value="8640000" calcext:value-type="float">
            <text:p>8640000</text:p>
          </table:table-cell>
          <table:table-cell table:formula="of:=[.B1706]/[.C1706]" office:value-type="float" office:value="0.00217071759259259" calcext:value-type="float">
            <text:p>0,00217071759259259000</text:p>
          </table:table-cell>
          <table:table-cell table:formula="of:=[.D1707]-[.D170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table:formula="of:=[.B1706]+11" office:value-type="float" office:value="18766" calcext:value-type="float">
            <text:p>18766</text:p>
          </table:table-cell>
          <table:table-cell office:value-type="float" office:value="8640000" calcext:value-type="float">
            <text:p>8640000</text:p>
          </table:table-cell>
          <table:table-cell table:formula="of:=[.B1707]/[.C1707]" office:value-type="float" office:value="0.00217199074074074" calcext:value-type="float">
            <text:p>0,00217199074074074000</text:p>
          </table:table-cell>
          <table:table-cell table:formula="of:=[.D1708]-[.D170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table:formula="of:=[.B1707]+11" office:value-type="float" office:value="18777" calcext:value-type="float">
            <text:p>18777</text:p>
          </table:table-cell>
          <table:table-cell office:value-type="float" office:value="8640000" calcext:value-type="float">
            <text:p>8640000</text:p>
          </table:table-cell>
          <table:table-cell table:formula="of:=[.B1708]/[.C1708]" office:value-type="float" office:value="0.00217326388888889" calcext:value-type="float">
            <text:p>0,00217326388888889000</text:p>
          </table:table-cell>
          <table:table-cell table:formula="of:=[.D1709]-[.D1708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table:formula="of:=[.B1708]+11" office:value-type="float" office:value="18788" calcext:value-type="float">
            <text:p>18788</text:p>
          </table:table-cell>
          <table:table-cell office:value-type="float" office:value="8640000" calcext:value-type="float">
            <text:p>8640000</text:p>
          </table:table-cell>
          <table:table-cell table:formula="of:=[.B1709]/[.C1709]" office:value-type="float" office:value="0.00217453703703704" calcext:value-type="float">
            <text:p>0,00217453703703704000</text:p>
          </table:table-cell>
          <table:table-cell table:formula="of:=[.D1710]-[.D170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table:formula="of:=[.B1709]+11" office:value-type="float" office:value="18799" calcext:value-type="float">
            <text:p>18799</text:p>
          </table:table-cell>
          <table:table-cell office:value-type="float" office:value="8640000" calcext:value-type="float">
            <text:p>8640000</text:p>
          </table:table-cell>
          <table:table-cell table:formula="of:=[.B1710]/[.C1710]" office:value-type="float" office:value="0.00217581018518519" calcext:value-type="float">
            <text:p>0,00217581018518519000</text:p>
          </table:table-cell>
          <table:table-cell table:formula="of:=[.D1711]-[.D171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table:formula="of:=[.B1710]+11" office:value-type="float" office:value="18810" calcext:value-type="float">
            <text:p>18810</text:p>
          </table:table-cell>
          <table:table-cell office:value-type="float" office:value="8640000" calcext:value-type="float">
            <text:p>8640000</text:p>
          </table:table-cell>
          <table:table-cell table:formula="of:=[.B1711]/[.C1711]" office:value-type="float" office:value="0.00217708333333333" calcext:value-type="float">
            <text:p>0,00217708333333333000</text:p>
          </table:table-cell>
          <table:table-cell table:formula="of:=[.D1712]-[.D171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table:formula="of:=[.B1711]+11" office:value-type="float" office:value="18821" calcext:value-type="float">
            <text:p>18821</text:p>
          </table:table-cell>
          <table:table-cell office:value-type="float" office:value="8640000" calcext:value-type="float">
            <text:p>8640000</text:p>
          </table:table-cell>
          <table:table-cell table:formula="of:=[.B1712]/[.C1712]" office:value-type="float" office:value="0.00217835648148148" calcext:value-type="float">
            <text:p>0,00217835648148148000</text:p>
          </table:table-cell>
          <table:table-cell table:formula="of:=[.D1713]-[.D1712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table:formula="of:=[.B1712]+11" office:value-type="float" office:value="18832" calcext:value-type="float">
            <text:p>18832</text:p>
          </table:table-cell>
          <table:table-cell office:value-type="float" office:value="8640000" calcext:value-type="float">
            <text:p>8640000</text:p>
          </table:table-cell>
          <table:table-cell table:formula="of:=[.B1713]/[.C1713]" office:value-type="float" office:value="0.00217962962962963" calcext:value-type="float">
            <text:p>0,00217962962962963000</text:p>
          </table:table-cell>
          <table:table-cell table:formula="of:=[.D1714]-[.D171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table:formula="of:=[.B1713]+11" office:value-type="float" office:value="18843" calcext:value-type="float">
            <text:p>18843</text:p>
          </table:table-cell>
          <table:table-cell office:value-type="float" office:value="8640000" calcext:value-type="float">
            <text:p>8640000</text:p>
          </table:table-cell>
          <table:table-cell table:formula="of:=[.B1714]/[.C1714]" office:value-type="float" office:value="0.00218090277777778" calcext:value-type="float">
            <text:p>0,00218090277777778000</text:p>
          </table:table-cell>
          <table:table-cell table:formula="of:=[.D1715]-[.D171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table:formula="of:=[.B1714]+11" office:value-type="float" office:value="18854" calcext:value-type="float">
            <text:p>18854</text:p>
          </table:table-cell>
          <table:table-cell office:value-type="float" office:value="8640000" calcext:value-type="float">
            <text:p>8640000</text:p>
          </table:table-cell>
          <table:table-cell table:formula="of:=[.B1715]/[.C1715]" office:value-type="float" office:value="0.00218217592592593" calcext:value-type="float">
            <text:p>0,00218217592592593000</text:p>
          </table:table-cell>
          <table:table-cell table:formula="of:=[.D1716]-[.D171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table:formula="of:=[.B1715]+11" office:value-type="float" office:value="18865" calcext:value-type="float">
            <text:p>18865</text:p>
          </table:table-cell>
          <table:table-cell office:value-type="float" office:value="8640000" calcext:value-type="float">
            <text:p>8640000</text:p>
          </table:table-cell>
          <table:table-cell table:formula="of:=[.B1716]/[.C1716]" office:value-type="float" office:value="0.00218344907407407" calcext:value-type="float">
            <text:p>0,00218344907407407000</text:p>
          </table:table-cell>
          <table:table-cell table:formula="of:=[.D1717]-[.D1716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table:formula="of:=[.B1716]+11" office:value-type="float" office:value="18876" calcext:value-type="float">
            <text:p>18876</text:p>
          </table:table-cell>
          <table:table-cell office:value-type="float" office:value="8640000" calcext:value-type="float">
            <text:p>8640000</text:p>
          </table:table-cell>
          <table:table-cell table:formula="of:=[.B1717]/[.C1717]" office:value-type="float" office:value="0.00218472222222222" calcext:value-type="float">
            <text:p>0,00218472222222222000</text:p>
          </table:table-cell>
          <table:table-cell table:formula="of:=[.D1718]-[.D171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table:formula="of:=[.B1717]+11" office:value-type="float" office:value="18887" calcext:value-type="float">
            <text:p>18887</text:p>
          </table:table-cell>
          <table:table-cell office:value-type="float" office:value="8640000" calcext:value-type="float">
            <text:p>8640000</text:p>
          </table:table-cell>
          <table:table-cell table:formula="of:=[.B1718]/[.C1718]" office:value-type="float" office:value="0.00218599537037037" calcext:value-type="float">
            <text:p>0,00218599537037037000</text:p>
          </table:table-cell>
          <table:table-cell table:formula="of:=[.D1719]-[.D171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table:formula="of:=[.B1718]+11" office:value-type="float" office:value="18898" calcext:value-type="float">
            <text:p>18898</text:p>
          </table:table-cell>
          <table:table-cell office:value-type="float" office:value="8640000" calcext:value-type="float">
            <text:p>8640000</text:p>
          </table:table-cell>
          <table:table-cell table:formula="of:=[.B1719]/[.C1719]" office:value-type="float" office:value="0.00218726851851852" calcext:value-type="float">
            <text:p>0,00218726851851852000</text:p>
          </table:table-cell>
          <table:table-cell table:formula="of:=[.D1720]-[.D171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table:formula="of:=[.B1719]+11" office:value-type="float" office:value="18909" calcext:value-type="float">
            <text:p>18909</text:p>
          </table:table-cell>
          <table:table-cell office:value-type="float" office:value="8640000" calcext:value-type="float">
            <text:p>8640000</text:p>
          </table:table-cell>
          <table:table-cell table:formula="of:=[.B1720]/[.C1720]" office:value-type="float" office:value="0.00218854166666667" calcext:value-type="float">
            <text:p>0,00218854166666667000</text:p>
          </table:table-cell>
          <table:table-cell table:formula="of:=[.D1721]-[.D172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table:formula="of:=[.B1720]+11" office:value-type="float" office:value="18920" calcext:value-type="float">
            <text:p>18920</text:p>
          </table:table-cell>
          <table:table-cell office:value-type="float" office:value="8640000" calcext:value-type="float">
            <text:p>8640000</text:p>
          </table:table-cell>
          <table:table-cell table:formula="of:=[.B1721]/[.C1721]" office:value-type="float" office:value="0.00218981481481482" calcext:value-type="float">
            <text:p>0,00218981481481482000</text:p>
          </table:table-cell>
          <table:table-cell table:formula="of:=[.D1722]-[.D1721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table:formula="of:=[.B1721]+11" office:value-type="float" office:value="18931" calcext:value-type="float">
            <text:p>18931</text:p>
          </table:table-cell>
          <table:table-cell office:value-type="float" office:value="8640000" calcext:value-type="float">
            <text:p>8640000</text:p>
          </table:table-cell>
          <table:table-cell table:formula="of:=[.B1722]/[.C1722]" office:value-type="float" office:value="0.00219108796296296" calcext:value-type="float">
            <text:p>0,00219108796296296000</text:p>
          </table:table-cell>
          <table:table-cell table:formula="of:=[.D1723]-[.D172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table:formula="of:=[.B1722]+11" office:value-type="float" office:value="18942" calcext:value-type="float">
            <text:p>18942</text:p>
          </table:table-cell>
          <table:table-cell office:value-type="float" office:value="8640000" calcext:value-type="float">
            <text:p>8640000</text:p>
          </table:table-cell>
          <table:table-cell table:formula="of:=[.B1723]/[.C1723]" office:value-type="float" office:value="0.00219236111111111" calcext:value-type="float">
            <text:p>0,00219236111111111000</text:p>
          </table:table-cell>
          <table:table-cell table:formula="of:=[.D1724]-[.D172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table:formula="of:=[.B1723]+11" office:value-type="float" office:value="18953" calcext:value-type="float">
            <text:p>18953</text:p>
          </table:table-cell>
          <table:table-cell office:value-type="float" office:value="8640000" calcext:value-type="float">
            <text:p>8640000</text:p>
          </table:table-cell>
          <table:table-cell table:formula="of:=[.B1724]/[.C1724]" office:value-type="float" office:value="0.00219363425925926" calcext:value-type="float">
            <text:p>0,00219363425925926000</text:p>
          </table:table-cell>
          <table:table-cell table:formula="of:=[.D1725]-[.D172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table:formula="of:=[.B1724]+11" office:value-type="float" office:value="18964" calcext:value-type="float">
            <text:p>18964</text:p>
          </table:table-cell>
          <table:table-cell office:value-type="float" office:value="8640000" calcext:value-type="float">
            <text:p>8640000</text:p>
          </table:table-cell>
          <table:table-cell table:formula="of:=[.B1725]/[.C1725]" office:value-type="float" office:value="0.00219490740740741" calcext:value-type="float">
            <text:p>0,00219490740740741000</text:p>
          </table:table-cell>
          <table:table-cell table:formula="of:=[.D1726]-[.D1725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table:formula="of:=[.B1725]+11" office:value-type="float" office:value="18975" calcext:value-type="float">
            <text:p>18975</text:p>
          </table:table-cell>
          <table:table-cell office:value-type="float" office:value="8640000" calcext:value-type="float">
            <text:p>8640000</text:p>
          </table:table-cell>
          <table:table-cell table:formula="of:=[.B1726]/[.C1726]" office:value-type="float" office:value="0.00219618055555556" calcext:value-type="float">
            <text:p>0,00219618055555556000</text:p>
          </table:table-cell>
          <table:table-cell table:formula="of:=[.D1727]-[.D172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table:formula="of:=[.B1726]+11" office:value-type="float" office:value="18986" calcext:value-type="float">
            <text:p>18986</text:p>
          </table:table-cell>
          <table:table-cell office:value-type="float" office:value="8640000" calcext:value-type="float">
            <text:p>8640000</text:p>
          </table:table-cell>
          <table:table-cell table:formula="of:=[.B1727]/[.C1727]" office:value-type="float" office:value="0.0021974537037037" calcext:value-type="float">
            <text:p>0,00219745370370370000</text:p>
          </table:table-cell>
          <table:table-cell table:formula="of:=[.D1728]-[.D172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table:formula="of:=[.B1727]+11" office:value-type="float" office:value="18997" calcext:value-type="float">
            <text:p>18997</text:p>
          </table:table-cell>
          <table:table-cell office:value-type="float" office:value="8640000" calcext:value-type="float">
            <text:p>8640000</text:p>
          </table:table-cell>
          <table:table-cell table:formula="of:=[.B1728]/[.C1728]" office:value-type="float" office:value="0.00219872685185185" calcext:value-type="float">
            <text:p>0,00219872685185185000</text:p>
          </table:table-cell>
          <table:table-cell table:formula="of:=[.D1729]-[.D172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table:formula="of:=[.B1728]+11" office:value-type="float" office:value="19008" calcext:value-type="float">
            <text:p>19008</text:p>
          </table:table-cell>
          <table:table-cell office:value-type="float" office:value="8640000" calcext:value-type="float">
            <text:p>8640000</text:p>
          </table:table-cell>
          <table:table-cell table:formula="of:=[.B1729]/[.C1729]" office:value-type="float" office:value="0.0022" calcext:value-type="float">
            <text:p>0,00220000000000000000</text:p>
          </table:table-cell>
          <table:table-cell table:formula="of:=[.D1730]-[.D1729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table:formula="of:=[.B1729]+11" office:value-type="float" office:value="19019" calcext:value-type="float">
            <text:p>19019</text:p>
          </table:table-cell>
          <table:table-cell office:value-type="float" office:value="8640000" calcext:value-type="float">
            <text:p>8640000</text:p>
          </table:table-cell>
          <table:table-cell table:formula="of:=[.B1730]/[.C1730]" office:value-type="float" office:value="0.00220127314814815" calcext:value-type="float">
            <text:p>0,00220127314814815000</text:p>
          </table:table-cell>
          <table:table-cell table:formula="of:=[.D1731]-[.D173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table:formula="of:=[.B1730]+11" office:value-type="float" office:value="19030" calcext:value-type="float">
            <text:p>19030</text:p>
          </table:table-cell>
          <table:table-cell office:value-type="float" office:value="8640000" calcext:value-type="float">
            <text:p>8640000</text:p>
          </table:table-cell>
          <table:table-cell table:formula="of:=[.B1731]/[.C1731]" office:value-type="float" office:value="0.0022025462962963" calcext:value-type="float">
            <text:p>0,00220254629629630000</text:p>
          </table:table-cell>
          <table:table-cell table:formula="of:=[.D1732]-[.D173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table:formula="of:=[.B1731]+11" office:value-type="float" office:value="19041" calcext:value-type="float">
            <text:p>19041</text:p>
          </table:table-cell>
          <table:table-cell office:value-type="float" office:value="8640000" calcext:value-type="float">
            <text:p>8640000</text:p>
          </table:table-cell>
          <table:table-cell table:formula="of:=[.B1732]/[.C1732]" office:value-type="float" office:value="0.00220381944444444" calcext:value-type="float">
            <text:p>0,00220381944444444000</text:p>
          </table:table-cell>
          <table:table-cell table:formula="of:=[.D1733]-[.D173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table:formula="of:=[.B1732]+11" office:value-type="float" office:value="19052" calcext:value-type="float">
            <text:p>19052</text:p>
          </table:table-cell>
          <table:table-cell office:value-type="float" office:value="8640000" calcext:value-type="float">
            <text:p>8640000</text:p>
          </table:table-cell>
          <table:table-cell table:formula="of:=[.B1733]/[.C1733]" office:value-type="float" office:value="0.00220509259259259" calcext:value-type="float">
            <text:p>0,00220509259259259000</text:p>
          </table:table-cell>
          <table:table-cell table:formula="of:=[.D1734]-[.D173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table:formula="of:=[.B1733]+11" office:value-type="float" office:value="19063" calcext:value-type="float">
            <text:p>19063</text:p>
          </table:table-cell>
          <table:table-cell office:value-type="float" office:value="8640000" calcext:value-type="float">
            <text:p>8640000</text:p>
          </table:table-cell>
          <table:table-cell table:formula="of:=[.B1734]/[.C1734]" office:value-type="float" office:value="0.00220636574074074" calcext:value-type="float">
            <text:p>0,00220636574074074000</text:p>
          </table:table-cell>
          <table:table-cell table:formula="of:=[.D1735]-[.D1734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table:formula="of:=[.B1734]+11" office:value-type="float" office:value="19074" calcext:value-type="float">
            <text:p>19074</text:p>
          </table:table-cell>
          <table:table-cell office:value-type="float" office:value="8640000" calcext:value-type="float">
            <text:p>8640000</text:p>
          </table:table-cell>
          <table:table-cell table:formula="of:=[.B1735]/[.C1735]" office:value-type="float" office:value="0.00220763888888889" calcext:value-type="float">
            <text:p>0,00220763888888889000</text:p>
          </table:table-cell>
          <table:table-cell table:formula="of:=[.D1736]-[.D173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table:formula="of:=[.B1735]+11" office:value-type="float" office:value="19085" calcext:value-type="float">
            <text:p>19085</text:p>
          </table:table-cell>
          <table:table-cell office:value-type="float" office:value="8640000" calcext:value-type="float">
            <text:p>8640000</text:p>
          </table:table-cell>
          <table:table-cell table:formula="of:=[.B1736]/[.C1736]" office:value-type="float" office:value="0.00220891203703704" calcext:value-type="float">
            <text:p>0,00220891203703704000</text:p>
          </table:table-cell>
          <table:table-cell table:formula="of:=[.D1737]-[.D173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table:formula="of:=[.B1736]+11" office:value-type="float" office:value="19096" calcext:value-type="float">
            <text:p>19096</text:p>
          </table:table-cell>
          <table:table-cell office:value-type="float" office:value="8640000" calcext:value-type="float">
            <text:p>8640000</text:p>
          </table:table-cell>
          <table:table-cell table:formula="of:=[.B1737]/[.C1737]" office:value-type="float" office:value="0.00221018518518519" calcext:value-type="float">
            <text:p>0,00221018518518519000</text:p>
          </table:table-cell>
          <table:table-cell table:formula="of:=[.D1738]-[.D173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table:formula="of:=[.B1737]+11" office:value-type="float" office:value="19107" calcext:value-type="float">
            <text:p>19107</text:p>
          </table:table-cell>
          <table:table-cell office:value-type="float" office:value="8640000" calcext:value-type="float">
            <text:p>8640000</text:p>
          </table:table-cell>
          <table:table-cell table:formula="of:=[.B1738]/[.C1738]" office:value-type="float" office:value="0.00221145833333333" calcext:value-type="float">
            <text:p>0,00221145833333333000</text:p>
          </table:table-cell>
          <table:table-cell table:formula="of:=[.D1739]-[.D1738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table:formula="of:=[.B1738]+11" office:value-type="float" office:value="19118" calcext:value-type="float">
            <text:p>19118</text:p>
          </table:table-cell>
          <table:table-cell office:value-type="float" office:value="8640000" calcext:value-type="float">
            <text:p>8640000</text:p>
          </table:table-cell>
          <table:table-cell table:formula="of:=[.B1739]/[.C1739]" office:value-type="float" office:value="0.00221273148148148" calcext:value-type="float">
            <text:p>0,00221273148148148000</text:p>
          </table:table-cell>
          <table:table-cell table:formula="of:=[.D1740]-[.D173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table:formula="of:=[.B1739]+11" office:value-type="float" office:value="19129" calcext:value-type="float">
            <text:p>19129</text:p>
          </table:table-cell>
          <table:table-cell office:value-type="float" office:value="8640000" calcext:value-type="float">
            <text:p>8640000</text:p>
          </table:table-cell>
          <table:table-cell table:formula="of:=[.B1740]/[.C1740]" office:value-type="float" office:value="0.00221400462962963" calcext:value-type="float">
            <text:p>0,00221400462962963000</text:p>
          </table:table-cell>
          <table:table-cell table:formula="of:=[.D1741]-[.D174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table:formula="of:=[.B1740]+11" office:value-type="float" office:value="19140" calcext:value-type="float">
            <text:p>19140</text:p>
          </table:table-cell>
          <table:table-cell office:value-type="float" office:value="8640000" calcext:value-type="float">
            <text:p>8640000</text:p>
          </table:table-cell>
          <table:table-cell table:formula="of:=[.B1741]/[.C1741]" office:value-type="float" office:value="0.00221527777777778" calcext:value-type="float">
            <text:p>0,00221527777777778000</text:p>
          </table:table-cell>
          <table:table-cell table:formula="of:=[.D1742]-[.D174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table:formula="of:=[.B1741]+11" office:value-type="float" office:value="19151" calcext:value-type="float">
            <text:p>19151</text:p>
          </table:table-cell>
          <table:table-cell office:value-type="float" office:value="8640000" calcext:value-type="float">
            <text:p>8640000</text:p>
          </table:table-cell>
          <table:table-cell table:formula="of:=[.B1742]/[.C1742]" office:value-type="float" office:value="0.00221655092592593" calcext:value-type="float">
            <text:p>0,00221655092592593000</text:p>
          </table:table-cell>
          <table:table-cell table:formula="of:=[.D1743]-[.D1742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table:formula="of:=[.B1742]+11" office:value-type="float" office:value="19162" calcext:value-type="float">
            <text:p>19162</text:p>
          </table:table-cell>
          <table:table-cell office:value-type="float" office:value="8640000" calcext:value-type="float">
            <text:p>8640000</text:p>
          </table:table-cell>
          <table:table-cell table:formula="of:=[.B1743]/[.C1743]" office:value-type="float" office:value="0.00221782407407407" calcext:value-type="float">
            <text:p>0,00221782407407407000</text:p>
          </table:table-cell>
          <table:table-cell table:formula="of:=[.D1744]-[.D174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table:formula="of:=[.B1743]+11" office:value-type="float" office:value="19173" calcext:value-type="float">
            <text:p>19173</text:p>
          </table:table-cell>
          <table:table-cell office:value-type="float" office:value="8640000" calcext:value-type="float">
            <text:p>8640000</text:p>
          </table:table-cell>
          <table:table-cell table:formula="of:=[.B1744]/[.C1744]" office:value-type="float" office:value="0.00221909722222222" calcext:value-type="float">
            <text:p>0,00221909722222222000</text:p>
          </table:table-cell>
          <table:table-cell table:formula="of:=[.D1745]-[.D174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table:formula="of:=[.B1744]+11" office:value-type="float" office:value="19184" calcext:value-type="float">
            <text:p>19184</text:p>
          </table:table-cell>
          <table:table-cell office:value-type="float" office:value="8640000" calcext:value-type="float">
            <text:p>8640000</text:p>
          </table:table-cell>
          <table:table-cell table:formula="of:=[.B1745]/[.C1745]" office:value-type="float" office:value="0.00222037037037037" calcext:value-type="float">
            <text:p>0,00222037037037037000</text:p>
          </table:table-cell>
          <table:table-cell table:formula="of:=[.D1746]-[.D174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table:formula="of:=[.B1745]+11" office:value-type="float" office:value="19195" calcext:value-type="float">
            <text:p>19195</text:p>
          </table:table-cell>
          <table:table-cell office:value-type="float" office:value="8640000" calcext:value-type="float">
            <text:p>8640000</text:p>
          </table:table-cell>
          <table:table-cell table:formula="of:=[.B1746]/[.C1746]" office:value-type="float" office:value="0.00222164351851852" calcext:value-type="float">
            <text:p>0,00222164351851852000</text:p>
          </table:table-cell>
          <table:table-cell table:formula="of:=[.D1747]-[.D174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table:formula="of:=[.B1746]+11" office:value-type="float" office:value="19206" calcext:value-type="float">
            <text:p>19206</text:p>
          </table:table-cell>
          <table:table-cell office:value-type="float" office:value="8640000" calcext:value-type="float">
            <text:p>8640000</text:p>
          </table:table-cell>
          <table:table-cell table:formula="of:=[.B1747]/[.C1747]" office:value-type="float" office:value="0.00222291666666667" calcext:value-type="float">
            <text:p>0,00222291666666667000</text:p>
          </table:table-cell>
          <table:table-cell table:formula="of:=[.D1748]-[.D1747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table:formula="of:=[.B1747]+11" office:value-type="float" office:value="19217" calcext:value-type="float">
            <text:p>19217</text:p>
          </table:table-cell>
          <table:table-cell office:value-type="float" office:value="8640000" calcext:value-type="float">
            <text:p>8640000</text:p>
          </table:table-cell>
          <table:table-cell table:formula="of:=[.B1748]/[.C1748]" office:value-type="float" office:value="0.00222418981481481" calcext:value-type="float">
            <text:p>0,00222418981481481000</text:p>
          </table:table-cell>
          <table:table-cell table:formula="of:=[.D1749]-[.D174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table:formula="of:=[.B1748]+11" office:value-type="float" office:value="19228" calcext:value-type="float">
            <text:p>19228</text:p>
          </table:table-cell>
          <table:table-cell office:value-type="float" office:value="8640000" calcext:value-type="float">
            <text:p>8640000</text:p>
          </table:table-cell>
          <table:table-cell table:formula="of:=[.B1749]/[.C1749]" office:value-type="float" office:value="0.00222546296296296" calcext:value-type="float">
            <text:p>0,00222546296296296000</text:p>
          </table:table-cell>
          <table:table-cell table:formula="of:=[.D1750]-[.D174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table:formula="of:=[.B1749]+11" office:value-type="float" office:value="19239" calcext:value-type="float">
            <text:p>19239</text:p>
          </table:table-cell>
          <table:table-cell office:value-type="float" office:value="8640000" calcext:value-type="float">
            <text:p>8640000</text:p>
          </table:table-cell>
          <table:table-cell table:formula="of:=[.B1750]/[.C1750]" office:value-type="float" office:value="0.00222673611111111" calcext:value-type="float">
            <text:p>0,00222673611111111000</text:p>
          </table:table-cell>
          <table:table-cell table:formula="of:=[.D1751]-[.D175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formula="of:=[.B1750]+11" office:value-type="float" office:value="19250" calcext:value-type="float">
            <text:p>19250</text:p>
          </table:table-cell>
          <table:table-cell office:value-type="float" office:value="8640000" calcext:value-type="float">
            <text:p>8640000</text:p>
          </table:table-cell>
          <table:table-cell table:formula="of:=[.B1751]/[.C1751]" office:value-type="float" office:value="0.00222800925925926" calcext:value-type="float">
            <text:p>0,00222800925925926000</text:p>
          </table:table-cell>
          <table:table-cell table:formula="of:=[.D1752]-[.D1751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table:formula="of:=[.B1751]+11" office:value-type="float" office:value="19261" calcext:value-type="float">
            <text:p>19261</text:p>
          </table:table-cell>
          <table:table-cell office:value-type="float" office:value="8640000" calcext:value-type="float">
            <text:p>8640000</text:p>
          </table:table-cell>
          <table:table-cell table:formula="of:=[.B1752]/[.C1752]" office:value-type="float" office:value="0.00222928240740741" calcext:value-type="float">
            <text:p>0,00222928240740741000</text:p>
          </table:table-cell>
          <table:table-cell table:formula="of:=[.D1753]-[.D175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table:formula="of:=[.B1752]+11" office:value-type="float" office:value="19272" calcext:value-type="float">
            <text:p>19272</text:p>
          </table:table-cell>
          <table:table-cell office:value-type="float" office:value="8640000" calcext:value-type="float">
            <text:p>8640000</text:p>
          </table:table-cell>
          <table:table-cell table:formula="of:=[.B1753]/[.C1753]" office:value-type="float" office:value="0.00223055555555556" calcext:value-type="float">
            <text:p>0,00223055555555556000</text:p>
          </table:table-cell>
          <table:table-cell table:formula="of:=[.D1754]-[.D175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table:formula="of:=[.B1753]+11" office:value-type="float" office:value="19283" calcext:value-type="float">
            <text:p>19283</text:p>
          </table:table-cell>
          <table:table-cell office:value-type="float" office:value="8640000" calcext:value-type="float">
            <text:p>8640000</text:p>
          </table:table-cell>
          <table:table-cell table:formula="of:=[.B1754]/[.C1754]" office:value-type="float" office:value="0.0022318287037037" calcext:value-type="float">
            <text:p>0,00223182870370370000</text:p>
          </table:table-cell>
          <table:table-cell table:formula="of:=[.D1755]-[.D175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table:formula="of:=[.B1754]+11" office:value-type="float" office:value="19294" calcext:value-type="float">
            <text:p>19294</text:p>
          </table:table-cell>
          <table:table-cell office:value-type="float" office:value="8640000" calcext:value-type="float">
            <text:p>8640000</text:p>
          </table:table-cell>
          <table:table-cell table:formula="of:=[.B1755]/[.C1755]" office:value-type="float" office:value="0.00223310185185185" calcext:value-type="float">
            <text:p>0,00223310185185185000</text:p>
          </table:table-cell>
          <table:table-cell table:formula="of:=[.D1756]-[.D1755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table:formula="of:=[.B1755]+11" office:value-type="float" office:value="19305" calcext:value-type="float">
            <text:p>19305</text:p>
          </table:table-cell>
          <table:table-cell office:value-type="float" office:value="8640000" calcext:value-type="float">
            <text:p>8640000</text:p>
          </table:table-cell>
          <table:table-cell table:formula="of:=[.B1756]/[.C1756]" office:value-type="float" office:value="0.002234375" calcext:value-type="float">
            <text:p>0,00223437500000000000</text:p>
          </table:table-cell>
          <table:table-cell table:formula="of:=[.D1757]-[.D175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table:formula="of:=[.B1756]+11" office:value-type="float" office:value="19316" calcext:value-type="float">
            <text:p>19316</text:p>
          </table:table-cell>
          <table:table-cell office:value-type="float" office:value="8640000" calcext:value-type="float">
            <text:p>8640000</text:p>
          </table:table-cell>
          <table:table-cell table:formula="of:=[.B1757]/[.C1757]" office:value-type="float" office:value="0.00223564814814815" calcext:value-type="float">
            <text:p>0,00223564814814815000</text:p>
          </table:table-cell>
          <table:table-cell table:formula="of:=[.D1758]-[.D175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table:formula="of:=[.B1757]+11" office:value-type="float" office:value="19327" calcext:value-type="float">
            <text:p>19327</text:p>
          </table:table-cell>
          <table:table-cell office:value-type="float" office:value="8640000" calcext:value-type="float">
            <text:p>8640000</text:p>
          </table:table-cell>
          <table:table-cell table:formula="of:=[.B1758]/[.C1758]" office:value-type="float" office:value="0.0022369212962963" calcext:value-type="float">
            <text:p>0,00223692129629630000</text:p>
          </table:table-cell>
          <table:table-cell table:formula="of:=[.D1759]-[.D175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table:formula="of:=[.B1758]+11" office:value-type="float" office:value="19338" calcext:value-type="float">
            <text:p>19338</text:p>
          </table:table-cell>
          <table:table-cell office:value-type="float" office:value="8640000" calcext:value-type="float">
            <text:p>8640000</text:p>
          </table:table-cell>
          <table:table-cell table:formula="of:=[.B1759]/[.C1759]" office:value-type="float" office:value="0.00223819444444444" calcext:value-type="float">
            <text:p>0,00223819444444444000</text:p>
          </table:table-cell>
          <table:table-cell table:formula="of:=[.D1760]-[.D1759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table:formula="of:=[.B1759]+11" office:value-type="float" office:value="19349" calcext:value-type="float">
            <text:p>19349</text:p>
          </table:table-cell>
          <table:table-cell office:value-type="float" office:value="8640000" calcext:value-type="float">
            <text:p>8640000</text:p>
          </table:table-cell>
          <table:table-cell table:formula="of:=[.B1760]/[.C1760]" office:value-type="float" office:value="0.00223946759259259" calcext:value-type="float">
            <text:p>0,00223946759259259000</text:p>
          </table:table-cell>
          <table:table-cell table:formula="of:=[.D1761]-[.D176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table:formula="of:=[.B1760]+11" office:value-type="float" office:value="19360" calcext:value-type="float">
            <text:p>19360</text:p>
          </table:table-cell>
          <table:table-cell office:value-type="float" office:value="8640000" calcext:value-type="float">
            <text:p>8640000</text:p>
          </table:table-cell>
          <table:table-cell table:formula="of:=[.B1761]/[.C1761]" office:value-type="float" office:value="0.00224074074074074" calcext:value-type="float">
            <text:p>0,00224074074074074000</text:p>
          </table:table-cell>
          <table:table-cell table:formula="of:=[.D1762]-[.D176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table:formula="of:=[.B1761]+11" office:value-type="float" office:value="19371" calcext:value-type="float">
            <text:p>19371</text:p>
          </table:table-cell>
          <table:table-cell office:value-type="float" office:value="8640000" calcext:value-type="float">
            <text:p>8640000</text:p>
          </table:table-cell>
          <table:table-cell table:formula="of:=[.B1762]/[.C1762]" office:value-type="float" office:value="0.00224201388888889" calcext:value-type="float">
            <text:p>0,00224201388888889000</text:p>
          </table:table-cell>
          <table:table-cell table:formula="of:=[.D1763]-[.D176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table:formula="of:=[.B1762]+11" office:value-type="float" office:value="19382" calcext:value-type="float">
            <text:p>19382</text:p>
          </table:table-cell>
          <table:table-cell office:value-type="float" office:value="8640000" calcext:value-type="float">
            <text:p>8640000</text:p>
          </table:table-cell>
          <table:table-cell table:formula="of:=[.B1763]/[.C1763]" office:value-type="float" office:value="0.00224328703703704" calcext:value-type="float">
            <text:p>0,00224328703703704000</text:p>
          </table:table-cell>
          <table:table-cell table:formula="of:=[.D1764]-[.D176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table:formula="of:=[.B1763]+11" office:value-type="float" office:value="19393" calcext:value-type="float">
            <text:p>19393</text:p>
          </table:table-cell>
          <table:table-cell office:value-type="float" office:value="8640000" calcext:value-type="float">
            <text:p>8640000</text:p>
          </table:table-cell>
          <table:table-cell table:formula="of:=[.B1764]/[.C1764]" office:value-type="float" office:value="0.00224456018518519" calcext:value-type="float">
            <text:p>0,00224456018518519000</text:p>
          </table:table-cell>
          <table:table-cell table:formula="of:=[.D1765]-[.D1764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table:formula="of:=[.B1764]+11" office:value-type="float" office:value="19404" calcext:value-type="float">
            <text:p>19404</text:p>
          </table:table-cell>
          <table:table-cell office:value-type="float" office:value="8640000" calcext:value-type="float">
            <text:p>8640000</text:p>
          </table:table-cell>
          <table:table-cell table:formula="of:=[.B1765]/[.C1765]" office:value-type="float" office:value="0.00224583333333333" calcext:value-type="float">
            <text:p>0,00224583333333333000</text:p>
          </table:table-cell>
          <table:table-cell table:formula="of:=[.D1766]-[.D176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table:formula="of:=[.B1765]+11" office:value-type="float" office:value="19415" calcext:value-type="float">
            <text:p>19415</text:p>
          </table:table-cell>
          <table:table-cell office:value-type="float" office:value="8640000" calcext:value-type="float">
            <text:p>8640000</text:p>
          </table:table-cell>
          <table:table-cell table:formula="of:=[.B1766]/[.C1766]" office:value-type="float" office:value="0.00224710648148148" calcext:value-type="float">
            <text:p>0,00224710648148148000</text:p>
          </table:table-cell>
          <table:table-cell table:formula="of:=[.D1767]-[.D176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table:formula="of:=[.B1766]+11" office:value-type="float" office:value="19426" calcext:value-type="float">
            <text:p>19426</text:p>
          </table:table-cell>
          <table:table-cell office:value-type="float" office:value="8640000" calcext:value-type="float">
            <text:p>8640000</text:p>
          </table:table-cell>
          <table:table-cell table:formula="of:=[.B1767]/[.C1767]" office:value-type="float" office:value="0.00224837962962963" calcext:value-type="float">
            <text:p>0,00224837962962963000</text:p>
          </table:table-cell>
          <table:table-cell table:formula="of:=[.D1768]-[.D176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table:formula="of:=[.B1767]+11" office:value-type="float" office:value="19437" calcext:value-type="float">
            <text:p>19437</text:p>
          </table:table-cell>
          <table:table-cell office:value-type="float" office:value="8640000" calcext:value-type="float">
            <text:p>8640000</text:p>
          </table:table-cell>
          <table:table-cell table:formula="of:=[.B1768]/[.C1768]" office:value-type="float" office:value="0.00224965277777778" calcext:value-type="float">
            <text:p>0,00224965277777778000</text:p>
          </table:table-cell>
          <table:table-cell table:formula="of:=[.D1769]-[.D1768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table:formula="of:=[.B1768]+11" office:value-type="float" office:value="19448" calcext:value-type="float">
            <text:p>19448</text:p>
          </table:table-cell>
          <table:table-cell office:value-type="float" office:value="8640000" calcext:value-type="float">
            <text:p>8640000</text:p>
          </table:table-cell>
          <table:table-cell table:formula="of:=[.B1769]/[.C1769]" office:value-type="float" office:value="0.00225092592592593" calcext:value-type="float">
            <text:p>0,00225092592592593000</text:p>
          </table:table-cell>
          <table:table-cell table:formula="of:=[.D1770]-[.D176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table:formula="of:=[.B1769]+11" office:value-type="float" office:value="19459" calcext:value-type="float">
            <text:p>19459</text:p>
          </table:table-cell>
          <table:table-cell office:value-type="float" office:value="8640000" calcext:value-type="float">
            <text:p>8640000</text:p>
          </table:table-cell>
          <table:table-cell table:formula="of:=[.B1770]/[.C1770]" office:value-type="float" office:value="0.00225219907407407" calcext:value-type="float">
            <text:p>0,00225219907407407000</text:p>
          </table:table-cell>
          <table:table-cell table:formula="of:=[.D1771]-[.D177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table:formula="of:=[.B1770]+11" office:value-type="float" office:value="19470" calcext:value-type="float">
            <text:p>19470</text:p>
          </table:table-cell>
          <table:table-cell office:value-type="float" office:value="8640000" calcext:value-type="float">
            <text:p>8640000</text:p>
          </table:table-cell>
          <table:table-cell table:formula="of:=[.B1771]/[.C1771]" office:value-type="float" office:value="0.00225347222222222" calcext:value-type="float">
            <text:p>0,00225347222222222000</text:p>
          </table:table-cell>
          <table:table-cell table:formula="of:=[.D1772]-[.D177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table:formula="of:=[.B1771]+11" office:value-type="float" office:value="19481" calcext:value-type="float">
            <text:p>19481</text:p>
          </table:table-cell>
          <table:table-cell office:value-type="float" office:value="8640000" calcext:value-type="float">
            <text:p>8640000</text:p>
          </table:table-cell>
          <table:table-cell table:formula="of:=[.B1772]/[.C1772]" office:value-type="float" office:value="0.00225474537037037" calcext:value-type="float">
            <text:p>0,00225474537037037000</text:p>
          </table:table-cell>
          <table:table-cell table:formula="of:=[.D1773]-[.D1772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table:formula="of:=[.B1772]+11" office:value-type="float" office:value="19492" calcext:value-type="float">
            <text:p>19492</text:p>
          </table:table-cell>
          <table:table-cell office:value-type="float" office:value="8640000" calcext:value-type="float">
            <text:p>8640000</text:p>
          </table:table-cell>
          <table:table-cell table:formula="of:=[.B1773]/[.C1773]" office:value-type="float" office:value="0.00225601851851852" calcext:value-type="float">
            <text:p>0,00225601851851852000</text:p>
          </table:table-cell>
          <table:table-cell table:formula="of:=[.D1774]-[.D177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table:formula="of:=[.B1773]+11" office:value-type="float" office:value="19503" calcext:value-type="float">
            <text:p>19503</text:p>
          </table:table-cell>
          <table:table-cell office:value-type="float" office:value="8640000" calcext:value-type="float">
            <text:p>8640000</text:p>
          </table:table-cell>
          <table:table-cell table:formula="of:=[.B1774]/[.C1774]" office:value-type="float" office:value="0.00225729166666667" calcext:value-type="float">
            <text:p>0,00225729166666667000</text:p>
          </table:table-cell>
          <table:table-cell table:formula="of:=[.D1775]-[.D177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table:formula="of:=[.B1774]+11" office:value-type="float" office:value="19514" calcext:value-type="float">
            <text:p>19514</text:p>
          </table:table-cell>
          <table:table-cell office:value-type="float" office:value="8640000" calcext:value-type="float">
            <text:p>8640000</text:p>
          </table:table-cell>
          <table:table-cell table:formula="of:=[.B1775]/[.C1775]" office:value-type="float" office:value="0.00225856481481482" calcext:value-type="float">
            <text:p>0,00225856481481482000</text:p>
          </table:table-cell>
          <table:table-cell table:formula="of:=[.D1776]-[.D177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table:formula="of:=[.B1775]+11" office:value-type="float" office:value="19525" calcext:value-type="float">
            <text:p>19525</text:p>
          </table:table-cell>
          <table:table-cell office:value-type="float" office:value="8640000" calcext:value-type="float">
            <text:p>8640000</text:p>
          </table:table-cell>
          <table:table-cell table:formula="of:=[.B1776]/[.C1776]" office:value-type="float" office:value="0.00225983796296296" calcext:value-type="float">
            <text:p>0,00225983796296296000</text:p>
          </table:table-cell>
          <table:table-cell table:formula="of:=[.D1777]-[.D177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table:formula="of:=[.B1776]+11" office:value-type="float" office:value="19536" calcext:value-type="float">
            <text:p>19536</text:p>
          </table:table-cell>
          <table:table-cell office:value-type="float" office:value="8640000" calcext:value-type="float">
            <text:p>8640000</text:p>
          </table:table-cell>
          <table:table-cell table:formula="of:=[.B1777]/[.C1777]" office:value-type="float" office:value="0.00226111111111111" calcext:value-type="float">
            <text:p>0,00226111111111111000</text:p>
          </table:table-cell>
          <table:table-cell table:formula="of:=[.D1778]-[.D1777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table:formula="of:=[.B1777]+11" office:value-type="float" office:value="19547" calcext:value-type="float">
            <text:p>19547</text:p>
          </table:table-cell>
          <table:table-cell office:value-type="float" office:value="8640000" calcext:value-type="float">
            <text:p>8640000</text:p>
          </table:table-cell>
          <table:table-cell table:formula="of:=[.B1778]/[.C1778]" office:value-type="float" office:value="0.00226238425925926" calcext:value-type="float">
            <text:p>0,00226238425925926000</text:p>
          </table:table-cell>
          <table:table-cell table:formula="of:=[.D1779]-[.D177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table:formula="of:=[.B1778]+11" office:value-type="float" office:value="19558" calcext:value-type="float">
            <text:p>19558</text:p>
          </table:table-cell>
          <table:table-cell office:value-type="float" office:value="8640000" calcext:value-type="float">
            <text:p>8640000</text:p>
          </table:table-cell>
          <table:table-cell table:formula="of:=[.B1779]/[.C1779]" office:value-type="float" office:value="0.00226365740740741" calcext:value-type="float">
            <text:p>0,00226365740740741000</text:p>
          </table:table-cell>
          <table:table-cell table:formula="of:=[.D1780]-[.D177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table:formula="of:=[.B1779]+11" office:value-type="float" office:value="19569" calcext:value-type="float">
            <text:p>19569</text:p>
          </table:table-cell>
          <table:table-cell office:value-type="float" office:value="8640000" calcext:value-type="float">
            <text:p>8640000</text:p>
          </table:table-cell>
          <table:table-cell table:formula="of:=[.B1780]/[.C1780]" office:value-type="float" office:value="0.00226493055555556" calcext:value-type="float">
            <text:p>0,00226493055555556000</text:p>
          </table:table-cell>
          <table:table-cell table:formula="of:=[.D1781]-[.D178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table:formula="of:=[.B1780]+11" office:value-type="float" office:value="19580" calcext:value-type="float">
            <text:p>19580</text:p>
          </table:table-cell>
          <table:table-cell office:value-type="float" office:value="8640000" calcext:value-type="float">
            <text:p>8640000</text:p>
          </table:table-cell>
          <table:table-cell table:formula="of:=[.B1781]/[.C1781]" office:value-type="float" office:value="0.0022662037037037" calcext:value-type="float">
            <text:p>0,00226620370370370000</text:p>
          </table:table-cell>
          <table:table-cell table:formula="of:=[.D1782]-[.D1781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table:formula="of:=[.B1781]+11" office:value-type="float" office:value="19591" calcext:value-type="float">
            <text:p>19591</text:p>
          </table:table-cell>
          <table:table-cell office:value-type="float" office:value="8640000" calcext:value-type="float">
            <text:p>8640000</text:p>
          </table:table-cell>
          <table:table-cell table:formula="of:=[.B1782]/[.C1782]" office:value-type="float" office:value="0.00226747685185185" calcext:value-type="float">
            <text:p>0,00226747685185185000</text:p>
          </table:table-cell>
          <table:table-cell table:formula="of:=[.D1783]-[.D178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table:formula="of:=[.B1782]+11" office:value-type="float" office:value="19602" calcext:value-type="float">
            <text:p>19602</text:p>
          </table:table-cell>
          <table:table-cell office:value-type="float" office:value="8640000" calcext:value-type="float">
            <text:p>8640000</text:p>
          </table:table-cell>
          <table:table-cell table:formula="of:=[.B1783]/[.C1783]" office:value-type="float" office:value="0.00226875" calcext:value-type="float">
            <text:p>0,00226875000000000000</text:p>
          </table:table-cell>
          <table:table-cell table:formula="of:=[.D1784]-[.D178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table:formula="of:=[.B1783]+11" office:value-type="float" office:value="19613" calcext:value-type="float">
            <text:p>19613</text:p>
          </table:table-cell>
          <table:table-cell office:value-type="float" office:value="8640000" calcext:value-type="float">
            <text:p>8640000</text:p>
          </table:table-cell>
          <table:table-cell table:formula="of:=[.B1784]/[.C1784]" office:value-type="float" office:value="0.00227002314814815" calcext:value-type="float">
            <text:p>0,00227002314814815000</text:p>
          </table:table-cell>
          <table:table-cell table:formula="of:=[.D1785]-[.D178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table:formula="of:=[.B1784]+11" office:value-type="float" office:value="19624" calcext:value-type="float">
            <text:p>19624</text:p>
          </table:table-cell>
          <table:table-cell office:value-type="float" office:value="8640000" calcext:value-type="float">
            <text:p>8640000</text:p>
          </table:table-cell>
          <table:table-cell table:formula="of:=[.B1785]/[.C1785]" office:value-type="float" office:value="0.0022712962962963" calcext:value-type="float">
            <text:p>0,00227129629629630000</text:p>
          </table:table-cell>
          <table:table-cell table:formula="of:=[.D1786]-[.D1785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table:formula="of:=[.B1785]+11" office:value-type="float" office:value="19635" calcext:value-type="float">
            <text:p>19635</text:p>
          </table:table-cell>
          <table:table-cell office:value-type="float" office:value="8640000" calcext:value-type="float">
            <text:p>8640000</text:p>
          </table:table-cell>
          <table:table-cell table:formula="of:=[.B1786]/[.C1786]" office:value-type="float" office:value="0.00227256944444444" calcext:value-type="float">
            <text:p>0,00227256944444444000</text:p>
          </table:table-cell>
          <table:table-cell table:formula="of:=[.D1787]-[.D178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table:formula="of:=[.B1786]+11" office:value-type="float" office:value="19646" calcext:value-type="float">
            <text:p>19646</text:p>
          </table:table-cell>
          <table:table-cell office:value-type="float" office:value="8640000" calcext:value-type="float">
            <text:p>8640000</text:p>
          </table:table-cell>
          <table:table-cell table:formula="of:=[.B1787]/[.C1787]" office:value-type="float" office:value="0.00227384259259259" calcext:value-type="float">
            <text:p>0,00227384259259259000</text:p>
          </table:table-cell>
          <table:table-cell table:formula="of:=[.D1788]-[.D178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table:formula="of:=[.B1787]+11" office:value-type="float" office:value="19657" calcext:value-type="float">
            <text:p>19657</text:p>
          </table:table-cell>
          <table:table-cell office:value-type="float" office:value="8640000" calcext:value-type="float">
            <text:p>8640000</text:p>
          </table:table-cell>
          <table:table-cell table:formula="of:=[.B1788]/[.C1788]" office:value-type="float" office:value="0.00227511574074074" calcext:value-type="float">
            <text:p>0,00227511574074074000</text:p>
          </table:table-cell>
          <table:table-cell table:formula="of:=[.D1789]-[.D178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table:formula="of:=[.B1788]+11" office:value-type="float" office:value="19668" calcext:value-type="float">
            <text:p>19668</text:p>
          </table:table-cell>
          <table:table-cell office:value-type="float" office:value="8640000" calcext:value-type="float">
            <text:p>8640000</text:p>
          </table:table-cell>
          <table:table-cell table:formula="of:=[.B1789]/[.C1789]" office:value-type="float" office:value="0.00227638888888889" calcext:value-type="float">
            <text:p>0,00227638888888889000</text:p>
          </table:table-cell>
          <table:table-cell table:formula="of:=[.D1790]-[.D178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table:formula="of:=[.B1789]+11" office:value-type="float" office:value="19679" calcext:value-type="float">
            <text:p>19679</text:p>
          </table:table-cell>
          <table:table-cell office:value-type="float" office:value="8640000" calcext:value-type="float">
            <text:p>8640000</text:p>
          </table:table-cell>
          <table:table-cell table:formula="of:=[.B1790]/[.C1790]" office:value-type="float" office:value="0.00227766203703704" calcext:value-type="float">
            <text:p>0,00227766203703704000</text:p>
          </table:table-cell>
          <table:table-cell table:formula="of:=[.D1791]-[.D1790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table:formula="of:=[.B1790]+11" office:value-type="float" office:value="19690" calcext:value-type="float">
            <text:p>19690</text:p>
          </table:table-cell>
          <table:table-cell office:value-type="float" office:value="8640000" calcext:value-type="float">
            <text:p>8640000</text:p>
          </table:table-cell>
          <table:table-cell table:formula="of:=[.B1791]/[.C1791]" office:value-type="float" office:value="0.00227893518518519" calcext:value-type="float">
            <text:p>0,00227893518518519000</text:p>
          </table:table-cell>
          <table:table-cell table:formula="of:=[.D1792]-[.D179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table:formula="of:=[.B1791]+11" office:value-type="float" office:value="19701" calcext:value-type="float">
            <text:p>19701</text:p>
          </table:table-cell>
          <table:table-cell office:value-type="float" office:value="8640000" calcext:value-type="float">
            <text:p>8640000</text:p>
          </table:table-cell>
          <table:table-cell table:formula="of:=[.B1792]/[.C1792]" office:value-type="float" office:value="0.00228020833333333" calcext:value-type="float">
            <text:p>0,00228020833333333000</text:p>
          </table:table-cell>
          <table:table-cell table:formula="of:=[.D1793]-[.D179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table:formula="of:=[.B1792]+11" office:value-type="float" office:value="19712" calcext:value-type="float">
            <text:p>19712</text:p>
          </table:table-cell>
          <table:table-cell office:value-type="float" office:value="8640000" calcext:value-type="float">
            <text:p>8640000</text:p>
          </table:table-cell>
          <table:table-cell table:formula="of:=[.B1793]/[.C1793]" office:value-type="float" office:value="0.00228148148148148" calcext:value-type="float">
            <text:p>0,00228148148148148000</text:p>
          </table:table-cell>
          <table:table-cell table:formula="of:=[.D1794]-[.D179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table:formula="of:=[.B1793]+11" office:value-type="float" office:value="19723" calcext:value-type="float">
            <text:p>19723</text:p>
          </table:table-cell>
          <table:table-cell office:value-type="float" office:value="8640000" calcext:value-type="float">
            <text:p>8640000</text:p>
          </table:table-cell>
          <table:table-cell table:formula="of:=[.B1794]/[.C1794]" office:value-type="float" office:value="0.00228275462962963" calcext:value-type="float">
            <text:p>0,00228275462962963000</text:p>
          </table:table-cell>
          <table:table-cell table:formula="of:=[.D1795]-[.D1794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table:formula="of:=[.B1794]+11" office:value-type="float" office:value="19734" calcext:value-type="float">
            <text:p>19734</text:p>
          </table:table-cell>
          <table:table-cell office:value-type="float" office:value="8640000" calcext:value-type="float">
            <text:p>8640000</text:p>
          </table:table-cell>
          <table:table-cell table:formula="of:=[.B1795]/[.C1795]" office:value-type="float" office:value="0.00228402777777778" calcext:value-type="float">
            <text:p>0,00228402777777778000</text:p>
          </table:table-cell>
          <table:table-cell table:formula="of:=[.D1796]-[.D179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table:formula="of:=[.B1795]+11" office:value-type="float" office:value="19745" calcext:value-type="float">
            <text:p>19745</text:p>
          </table:table-cell>
          <table:table-cell office:value-type="float" office:value="8640000" calcext:value-type="float">
            <text:p>8640000</text:p>
          </table:table-cell>
          <table:table-cell table:formula="of:=[.B1796]/[.C1796]" office:value-type="float" office:value="0.00228530092592593" calcext:value-type="float">
            <text:p>0,00228530092592593000</text:p>
          </table:table-cell>
          <table:table-cell table:formula="of:=[.D1797]-[.D179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table:formula="of:=[.B1796]+11" office:value-type="float" office:value="19756" calcext:value-type="float">
            <text:p>19756</text:p>
          </table:table-cell>
          <table:table-cell office:value-type="float" office:value="8640000" calcext:value-type="float">
            <text:p>8640000</text:p>
          </table:table-cell>
          <table:table-cell table:formula="of:=[.B1797]/[.C1797]" office:value-type="float" office:value="0.00228657407407407" calcext:value-type="float">
            <text:p>0,00228657407407407000</text:p>
          </table:table-cell>
          <table:table-cell table:formula="of:=[.D1798]-[.D179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table:formula="of:=[.B1797]+11" office:value-type="float" office:value="19767" calcext:value-type="float">
            <text:p>19767</text:p>
          </table:table-cell>
          <table:table-cell office:value-type="float" office:value="8640000" calcext:value-type="float">
            <text:p>8640000</text:p>
          </table:table-cell>
          <table:table-cell table:formula="of:=[.B1798]/[.C1798]" office:value-type="float" office:value="0.00228784722222222" calcext:value-type="float">
            <text:p>0,00228784722222222000</text:p>
          </table:table-cell>
          <table:table-cell table:formula="of:=[.D1799]-[.D1798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table:formula="of:=[.B1798]+11" office:value-type="float" office:value="19778" calcext:value-type="float">
            <text:p>19778</text:p>
          </table:table-cell>
          <table:table-cell office:value-type="float" office:value="8640000" calcext:value-type="float">
            <text:p>8640000</text:p>
          </table:table-cell>
          <table:table-cell table:formula="of:=[.B1799]/[.C1799]" office:value-type="float" office:value="0.00228912037037037" calcext:value-type="float">
            <text:p>0,00228912037037037000</text:p>
          </table:table-cell>
          <table:table-cell table:formula="of:=[.D1800]-[.D179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table:formula="of:=[.B1799]+11" office:value-type="float" office:value="19789" calcext:value-type="float">
            <text:p>19789</text:p>
          </table:table-cell>
          <table:table-cell office:value-type="float" office:value="8640000" calcext:value-type="float">
            <text:p>8640000</text:p>
          </table:table-cell>
          <table:table-cell table:formula="of:=[.B1800]/[.C1800]" office:value-type="float" office:value="0.00229039351851852" calcext:value-type="float">
            <text:p>0,00229039351851852000</text:p>
          </table:table-cell>
          <table:table-cell table:formula="of:=[.D1801]-[.D180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[.B1800]+11" office:value-type="float" office:value="19800" calcext:value-type="float">
            <text:p>19800</text:p>
          </table:table-cell>
          <table:table-cell office:value-type="float" office:value="8640000" calcext:value-type="float">
            <text:p>8640000</text:p>
          </table:table-cell>
          <table:table-cell table:formula="of:=[.B1801]/[.C1801]" office:value-type="float" office:value="0.00229166666666667" calcext:value-type="float">
            <text:p>0,00229166666666667000</text:p>
          </table:table-cell>
          <table:table-cell table:formula="of:=[.D1802]-[.D180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table:formula="of:=[.B1801]+11" office:value-type="float" office:value="19811" calcext:value-type="float">
            <text:p>19811</text:p>
          </table:table-cell>
          <table:table-cell office:value-type="float" office:value="8640000" calcext:value-type="float">
            <text:p>8640000</text:p>
          </table:table-cell>
          <table:table-cell table:formula="of:=[.B1802]/[.C1802]" office:value-type="float" office:value="0.00229293981481482" calcext:value-type="float">
            <text:p>0,00229293981481482000</text:p>
          </table:table-cell>
          <table:table-cell table:formula="of:=[.D1803]-[.D180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table:formula="of:=[.B1802]+11" office:value-type="float" office:value="19822" calcext:value-type="float">
            <text:p>19822</text:p>
          </table:table-cell>
          <table:table-cell office:value-type="float" office:value="8640000" calcext:value-type="float">
            <text:p>8640000</text:p>
          </table:table-cell>
          <table:table-cell table:formula="of:=[.B1803]/[.C1803]" office:value-type="float" office:value="0.00229421296296296" calcext:value-type="float">
            <text:p>0,00229421296296296000</text:p>
          </table:table-cell>
          <table:table-cell table:formula="of:=[.D1804]-[.D1803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table:formula="of:=[.B1803]+11" office:value-type="float" office:value="19833" calcext:value-type="float">
            <text:p>19833</text:p>
          </table:table-cell>
          <table:table-cell office:value-type="float" office:value="8640000" calcext:value-type="float">
            <text:p>8640000</text:p>
          </table:table-cell>
          <table:table-cell table:formula="of:=[.B1804]/[.C1804]" office:value-type="float" office:value="0.00229548611111111" calcext:value-type="float">
            <text:p>0,00229548611111111000</text:p>
          </table:table-cell>
          <table:table-cell table:formula="of:=[.D1805]-[.D180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table:formula="of:=[.B1804]+11" office:value-type="float" office:value="19844" calcext:value-type="float">
            <text:p>19844</text:p>
          </table:table-cell>
          <table:table-cell office:value-type="float" office:value="8640000" calcext:value-type="float">
            <text:p>8640000</text:p>
          </table:table-cell>
          <table:table-cell table:formula="of:=[.B1805]/[.C1805]" office:value-type="float" office:value="0.00229675925925926" calcext:value-type="float">
            <text:p>0,00229675925925926000</text:p>
          </table:table-cell>
          <table:table-cell table:formula="of:=[.D1806]-[.D180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table:formula="of:=[.B1805]+11" office:value-type="float" office:value="19855" calcext:value-type="float">
            <text:p>19855</text:p>
          </table:table-cell>
          <table:table-cell office:value-type="float" office:value="8640000" calcext:value-type="float">
            <text:p>8640000</text:p>
          </table:table-cell>
          <table:table-cell table:formula="of:=[.B1806]/[.C1806]" office:value-type="float" office:value="0.00229803240740741" calcext:value-type="float">
            <text:p>0,00229803240740741000</text:p>
          </table:table-cell>
          <table:table-cell table:formula="of:=[.D1807]-[.D180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table:formula="of:=[.B1806]+11" office:value-type="float" office:value="19866" calcext:value-type="float">
            <text:p>19866</text:p>
          </table:table-cell>
          <table:table-cell office:value-type="float" office:value="8640000" calcext:value-type="float">
            <text:p>8640000</text:p>
          </table:table-cell>
          <table:table-cell table:formula="of:=[.B1807]/[.C1807]" office:value-type="float" office:value="0.00229930555555556" calcext:value-type="float">
            <text:p>0,00229930555555556000</text:p>
          </table:table-cell>
          <table:table-cell table:formula="of:=[.D1808]-[.D1807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table:formula="of:=[.B1807]+11" office:value-type="float" office:value="19877" calcext:value-type="float">
            <text:p>19877</text:p>
          </table:table-cell>
          <table:table-cell office:value-type="float" office:value="8640000" calcext:value-type="float">
            <text:p>8640000</text:p>
          </table:table-cell>
          <table:table-cell table:formula="of:=[.B1808]/[.C1808]" office:value-type="float" office:value="0.0023005787037037" calcext:value-type="float">
            <text:p>0,00230057870370370000</text:p>
          </table:table-cell>
          <table:table-cell table:formula="of:=[.D1809]-[.D180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table:formula="of:=[.B1808]+11" office:value-type="float" office:value="19888" calcext:value-type="float">
            <text:p>19888</text:p>
          </table:table-cell>
          <table:table-cell office:value-type="float" office:value="8640000" calcext:value-type="float">
            <text:p>8640000</text:p>
          </table:table-cell>
          <table:table-cell table:formula="of:=[.B1809]/[.C1809]" office:value-type="float" office:value="0.00230185185185185" calcext:value-type="float">
            <text:p>0,00230185185185185000</text:p>
          </table:table-cell>
          <table:table-cell table:formula="of:=[.D1810]-[.D180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table:formula="of:=[.B1809]+11" office:value-type="float" office:value="19899" calcext:value-type="float">
            <text:p>19899</text:p>
          </table:table-cell>
          <table:table-cell office:value-type="float" office:value="8640000" calcext:value-type="float">
            <text:p>8640000</text:p>
          </table:table-cell>
          <table:table-cell table:formula="of:=[.B1810]/[.C1810]" office:value-type="float" office:value="0.002303125" calcext:value-type="float">
            <text:p>0,00230312500000000000</text:p>
          </table:table-cell>
          <table:table-cell table:formula="of:=[.D1811]-[.D181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table:formula="of:=[.B1810]+11" office:value-type="float" office:value="19910" calcext:value-type="float">
            <text:p>19910</text:p>
          </table:table-cell>
          <table:table-cell office:value-type="float" office:value="8640000" calcext:value-type="float">
            <text:p>8640000</text:p>
          </table:table-cell>
          <table:table-cell table:formula="of:=[.B1811]/[.C1811]" office:value-type="float" office:value="0.00230439814814815" calcext:value-type="float">
            <text:p>0,00230439814814815000</text:p>
          </table:table-cell>
          <table:table-cell table:formula="of:=[.D1812]-[.D1811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table:formula="of:=[.B1811]+11" office:value-type="float" office:value="19921" calcext:value-type="float">
            <text:p>19921</text:p>
          </table:table-cell>
          <table:table-cell office:value-type="float" office:value="8640000" calcext:value-type="float">
            <text:p>8640000</text:p>
          </table:table-cell>
          <table:table-cell table:formula="of:=[.B1812]/[.C1812]" office:value-type="float" office:value="0.0023056712962963" calcext:value-type="float">
            <text:p>0,00230567129629630000</text:p>
          </table:table-cell>
          <table:table-cell table:formula="of:=[.D1813]-[.D181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table:formula="of:=[.B1812]+11" office:value-type="float" office:value="19932" calcext:value-type="float">
            <text:p>19932</text:p>
          </table:table-cell>
          <table:table-cell office:value-type="float" office:value="8640000" calcext:value-type="float">
            <text:p>8640000</text:p>
          </table:table-cell>
          <table:table-cell table:formula="of:=[.B1813]/[.C1813]" office:value-type="float" office:value="0.00230694444444444" calcext:value-type="float">
            <text:p>0,00230694444444444000</text:p>
          </table:table-cell>
          <table:table-cell table:formula="of:=[.D1814]-[.D181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table:formula="of:=[.B1813]+11" office:value-type="float" office:value="19943" calcext:value-type="float">
            <text:p>19943</text:p>
          </table:table-cell>
          <table:table-cell office:value-type="float" office:value="8640000" calcext:value-type="float">
            <text:p>8640000</text:p>
          </table:table-cell>
          <table:table-cell table:formula="of:=[.B1814]/[.C1814]" office:value-type="float" office:value="0.00230821759259259" calcext:value-type="float">
            <text:p>0,00230821759259259000</text:p>
          </table:table-cell>
          <table:table-cell table:formula="of:=[.D1815]-[.D181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table:formula="of:=[.B1814]+11" office:value-type="float" office:value="19954" calcext:value-type="float">
            <text:p>19954</text:p>
          </table:table-cell>
          <table:table-cell office:value-type="float" office:value="8640000" calcext:value-type="float">
            <text:p>8640000</text:p>
          </table:table-cell>
          <table:table-cell table:formula="of:=[.B1815]/[.C1815]" office:value-type="float" office:value="0.00230949074074074" calcext:value-type="float">
            <text:p>0,00230949074074074000</text:p>
          </table:table-cell>
          <table:table-cell table:formula="of:=[.D1816]-[.D1815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table:formula="of:=[.B1815]+11" office:value-type="float" office:value="19965" calcext:value-type="float">
            <text:p>19965</text:p>
          </table:table-cell>
          <table:table-cell office:value-type="float" office:value="8640000" calcext:value-type="float">
            <text:p>8640000</text:p>
          </table:table-cell>
          <table:table-cell table:formula="of:=[.B1816]/[.C1816]" office:value-type="float" office:value="0.00231076388888889" calcext:value-type="float">
            <text:p>0,00231076388888889000</text:p>
          </table:table-cell>
          <table:table-cell table:formula="of:=[.D1817]-[.D181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table:formula="of:=[.B1816]+11" office:value-type="float" office:value="19976" calcext:value-type="float">
            <text:p>19976</text:p>
          </table:table-cell>
          <table:table-cell office:value-type="float" office:value="8640000" calcext:value-type="float">
            <text:p>8640000</text:p>
          </table:table-cell>
          <table:table-cell table:formula="of:=[.B1817]/[.C1817]" office:value-type="float" office:value="0.00231203703703704" calcext:value-type="float">
            <text:p>0,00231203703703704000</text:p>
          </table:table-cell>
          <table:table-cell table:formula="of:=[.D1818]-[.D181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table:formula="of:=[.B1817]+11" office:value-type="float" office:value="19987" calcext:value-type="float">
            <text:p>19987</text:p>
          </table:table-cell>
          <table:table-cell office:value-type="float" office:value="8640000" calcext:value-type="float">
            <text:p>8640000</text:p>
          </table:table-cell>
          <table:table-cell table:formula="of:=[.B1818]/[.C1818]" office:value-type="float" office:value="0.00231331018518519" calcext:value-type="float">
            <text:p>0,00231331018518519000</text:p>
          </table:table-cell>
          <table:table-cell table:formula="of:=[.D1819]-[.D181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table:formula="of:=[.B1818]+11" office:value-type="float" office:value="19998" calcext:value-type="float">
            <text:p>19998</text:p>
          </table:table-cell>
          <table:table-cell office:value-type="float" office:value="8640000" calcext:value-type="float">
            <text:p>8640000</text:p>
          </table:table-cell>
          <table:table-cell table:formula="of:=[.B1819]/[.C1819]" office:value-type="float" office:value="0.00231458333333333" calcext:value-type="float">
            <text:p>0,00231458333333333000</text:p>
          </table:table-cell>
          <table:table-cell table:formula="of:=[.D1820]-[.D181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table:formula="of:=[.B1819]+11" office:value-type="float" office:value="20009" calcext:value-type="float">
            <text:p>20009</text:p>
          </table:table-cell>
          <table:table-cell office:value-type="float" office:value="8640000" calcext:value-type="float">
            <text:p>8640000</text:p>
          </table:table-cell>
          <table:table-cell table:formula="of:=[.B1820]/[.C1820]" office:value-type="float" office:value="0.00231585648148148" calcext:value-type="float">
            <text:p>0,00231585648148148000</text:p>
          </table:table-cell>
          <table:table-cell table:formula="of:=[.D1821]-[.D1820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table:formula="of:=[.B1820]+11" office:value-type="float" office:value="20020" calcext:value-type="float">
            <text:p>20020</text:p>
          </table:table-cell>
          <table:table-cell office:value-type="float" office:value="8640000" calcext:value-type="float">
            <text:p>8640000</text:p>
          </table:table-cell>
          <table:table-cell table:formula="of:=[.B1821]/[.C1821]" office:value-type="float" office:value="0.00231712962962963" calcext:value-type="float">
            <text:p>0,00231712962962963000</text:p>
          </table:table-cell>
          <table:table-cell table:formula="of:=[.D1822]-[.D182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table:formula="of:=[.B1821]+11" office:value-type="float" office:value="20031" calcext:value-type="float">
            <text:p>20031</text:p>
          </table:table-cell>
          <table:table-cell office:value-type="float" office:value="8640000" calcext:value-type="float">
            <text:p>8640000</text:p>
          </table:table-cell>
          <table:table-cell table:formula="of:=[.B1822]/[.C1822]" office:value-type="float" office:value="0.00231840277777778" calcext:value-type="float">
            <text:p>0,00231840277777778000</text:p>
          </table:table-cell>
          <table:table-cell table:formula="of:=[.D1823]-[.D182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table:formula="of:=[.B1822]+11" office:value-type="float" office:value="20042" calcext:value-type="float">
            <text:p>20042</text:p>
          </table:table-cell>
          <table:table-cell office:value-type="float" office:value="8640000" calcext:value-type="float">
            <text:p>8640000</text:p>
          </table:table-cell>
          <table:table-cell table:formula="of:=[.B1823]/[.C1823]" office:value-type="float" office:value="0.00231967592592593" calcext:value-type="float">
            <text:p>0,00231967592592593000</text:p>
          </table:table-cell>
          <table:table-cell table:formula="of:=[.D1824]-[.D182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table:formula="of:=[.B1823]+11" office:value-type="float" office:value="20053" calcext:value-type="float">
            <text:p>20053</text:p>
          </table:table-cell>
          <table:table-cell office:value-type="float" office:value="8640000" calcext:value-type="float">
            <text:p>8640000</text:p>
          </table:table-cell>
          <table:table-cell table:formula="of:=[.B1824]/[.C1824]" office:value-type="float" office:value="0.00232094907407407" calcext:value-type="float">
            <text:p>0,00232094907407407000</text:p>
          </table:table-cell>
          <table:table-cell table:formula="of:=[.D1825]-[.D1824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table:formula="of:=[.B1824]+11" office:value-type="float" office:value="20064" calcext:value-type="float">
            <text:p>20064</text:p>
          </table:table-cell>
          <table:table-cell office:value-type="float" office:value="8640000" calcext:value-type="float">
            <text:p>8640000</text:p>
          </table:table-cell>
          <table:table-cell table:formula="of:=[.B1825]/[.C1825]" office:value-type="float" office:value="0.00232222222222222" calcext:value-type="float">
            <text:p>0,00232222222222222000</text:p>
          </table:table-cell>
          <table:table-cell table:formula="of:=[.D1826]-[.D182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table:formula="of:=[.B1825]+11" office:value-type="float" office:value="20075" calcext:value-type="float">
            <text:p>20075</text:p>
          </table:table-cell>
          <table:table-cell office:value-type="float" office:value="8640000" calcext:value-type="float">
            <text:p>8640000</text:p>
          </table:table-cell>
          <table:table-cell table:formula="of:=[.B1826]/[.C1826]" office:value-type="float" office:value="0.00232349537037037" calcext:value-type="float">
            <text:p>0,00232349537037037000</text:p>
          </table:table-cell>
          <table:table-cell table:formula="of:=[.D1827]-[.D182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table:formula="of:=[.B1826]+11" office:value-type="float" office:value="20086" calcext:value-type="float">
            <text:p>20086</text:p>
          </table:table-cell>
          <table:table-cell office:value-type="float" office:value="8640000" calcext:value-type="float">
            <text:p>8640000</text:p>
          </table:table-cell>
          <table:table-cell table:formula="of:=[.B1827]/[.C1827]" office:value-type="float" office:value="0.00232476851851852" calcext:value-type="float">
            <text:p>0,00232476851851852000</text:p>
          </table:table-cell>
          <table:table-cell table:formula="of:=[.D1828]-[.D182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table:formula="of:=[.B1827]+11" office:value-type="float" office:value="20097" calcext:value-type="float">
            <text:p>20097</text:p>
          </table:table-cell>
          <table:table-cell office:value-type="float" office:value="8640000" calcext:value-type="float">
            <text:p>8640000</text:p>
          </table:table-cell>
          <table:table-cell table:formula="of:=[.B1828]/[.C1828]" office:value-type="float" office:value="0.00232604166666667" calcext:value-type="float">
            <text:p>0,00232604166666667000</text:p>
          </table:table-cell>
          <table:table-cell table:formula="of:=[.D1829]-[.D1828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table:formula="of:=[.B1828]+11" office:value-type="float" office:value="20108" calcext:value-type="float">
            <text:p>20108</text:p>
          </table:table-cell>
          <table:table-cell office:value-type="float" office:value="8640000" calcext:value-type="float">
            <text:p>8640000</text:p>
          </table:table-cell>
          <table:table-cell table:formula="of:=[.B1829]/[.C1829]" office:value-type="float" office:value="0.00232731481481481" calcext:value-type="float">
            <text:p>0,00232731481481481000</text:p>
          </table:table-cell>
          <table:table-cell table:formula="of:=[.D1830]-[.D182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table:formula="of:=[.B1829]+11" office:value-type="float" office:value="20119" calcext:value-type="float">
            <text:p>20119</text:p>
          </table:table-cell>
          <table:table-cell office:value-type="float" office:value="8640000" calcext:value-type="float">
            <text:p>8640000</text:p>
          </table:table-cell>
          <table:table-cell table:formula="of:=[.B1830]/[.C1830]" office:value-type="float" office:value="0.00232858796296296" calcext:value-type="float">
            <text:p>0,00232858796296296000</text:p>
          </table:table-cell>
          <table:table-cell table:formula="of:=[.D1831]-[.D183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table:formula="of:=[.B1830]+11" office:value-type="float" office:value="20130" calcext:value-type="float">
            <text:p>20130</text:p>
          </table:table-cell>
          <table:table-cell office:value-type="float" office:value="8640000" calcext:value-type="float">
            <text:p>8640000</text:p>
          </table:table-cell>
          <table:table-cell table:formula="of:=[.B1831]/[.C1831]" office:value-type="float" office:value="0.00232986111111111" calcext:value-type="float">
            <text:p>0,00232986111111111000</text:p>
          </table:table-cell>
          <table:table-cell table:formula="of:=[.D1832]-[.D183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table:formula="of:=[.B1831]+11" office:value-type="float" office:value="20141" calcext:value-type="float">
            <text:p>20141</text:p>
          </table:table-cell>
          <table:table-cell office:value-type="float" office:value="8640000" calcext:value-type="float">
            <text:p>8640000</text:p>
          </table:table-cell>
          <table:table-cell table:formula="of:=[.B1832]/[.C1832]" office:value-type="float" office:value="0.00233113425925926" calcext:value-type="float">
            <text:p>0,00233113425925926000</text:p>
          </table:table-cell>
          <table:table-cell table:formula="of:=[.D1833]-[.D183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table:formula="of:=[.B1832]+11" office:value-type="float" office:value="20152" calcext:value-type="float">
            <text:p>20152</text:p>
          </table:table-cell>
          <table:table-cell office:value-type="float" office:value="8640000" calcext:value-type="float">
            <text:p>8640000</text:p>
          </table:table-cell>
          <table:table-cell table:formula="of:=[.B1833]/[.C1833]" office:value-type="float" office:value="0.00233240740740741" calcext:value-type="float">
            <text:p>0,00233240740740741000</text:p>
          </table:table-cell>
          <table:table-cell table:formula="of:=[.D1834]-[.D1833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table:formula="of:=[.B1833]+11" office:value-type="float" office:value="20163" calcext:value-type="float">
            <text:p>20163</text:p>
          </table:table-cell>
          <table:table-cell office:value-type="float" office:value="8640000" calcext:value-type="float">
            <text:p>8640000</text:p>
          </table:table-cell>
          <table:table-cell table:formula="of:=[.B1834]/[.C1834]" office:value-type="float" office:value="0.00233368055555556" calcext:value-type="float">
            <text:p>0,00233368055555556000</text:p>
          </table:table-cell>
          <table:table-cell table:formula="of:=[.D1835]-[.D183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table:formula="of:=[.B1834]+11" office:value-type="float" office:value="20174" calcext:value-type="float">
            <text:p>20174</text:p>
          </table:table-cell>
          <table:table-cell office:value-type="float" office:value="8640000" calcext:value-type="float">
            <text:p>8640000</text:p>
          </table:table-cell>
          <table:table-cell table:formula="of:=[.B1835]/[.C1835]" office:value-type="float" office:value="0.0023349537037037" calcext:value-type="float">
            <text:p>0,00233495370370370000</text:p>
          </table:table-cell>
          <table:table-cell table:formula="of:=[.D1836]-[.D183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table:formula="of:=[.B1835]+11" office:value-type="float" office:value="20185" calcext:value-type="float">
            <text:p>20185</text:p>
          </table:table-cell>
          <table:table-cell office:value-type="float" office:value="8640000" calcext:value-type="float">
            <text:p>8640000</text:p>
          </table:table-cell>
          <table:table-cell table:formula="of:=[.B1836]/[.C1836]" office:value-type="float" office:value="0.00233622685185185" calcext:value-type="float">
            <text:p>0,00233622685185185000</text:p>
          </table:table-cell>
          <table:table-cell table:formula="of:=[.D1837]-[.D183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table:formula="of:=[.B1836]+11" office:value-type="float" office:value="20196" calcext:value-type="float">
            <text:p>20196</text:p>
          </table:table-cell>
          <table:table-cell office:value-type="float" office:value="8640000" calcext:value-type="float">
            <text:p>8640000</text:p>
          </table:table-cell>
          <table:table-cell table:formula="of:=[.B1837]/[.C1837]" office:value-type="float" office:value="0.0023375" calcext:value-type="float">
            <text:p>0,00233750000000000000</text:p>
          </table:table-cell>
          <table:table-cell table:formula="of:=[.D1838]-[.D1837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table:formula="of:=[.B1837]+11" office:value-type="float" office:value="20207" calcext:value-type="float">
            <text:p>20207</text:p>
          </table:table-cell>
          <table:table-cell office:value-type="float" office:value="8640000" calcext:value-type="float">
            <text:p>8640000</text:p>
          </table:table-cell>
          <table:table-cell table:formula="of:=[.B1838]/[.C1838]" office:value-type="float" office:value="0.00233877314814815" calcext:value-type="float">
            <text:p>0,00233877314814815000</text:p>
          </table:table-cell>
          <table:table-cell table:formula="of:=[.D1839]-[.D183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table:formula="of:=[.B1838]+11" office:value-type="float" office:value="20218" calcext:value-type="float">
            <text:p>20218</text:p>
          </table:table-cell>
          <table:table-cell office:value-type="float" office:value="8640000" calcext:value-type="float">
            <text:p>8640000</text:p>
          </table:table-cell>
          <table:table-cell table:formula="of:=[.B1839]/[.C1839]" office:value-type="float" office:value="0.0023400462962963" calcext:value-type="float">
            <text:p>0,00234004629629630000</text:p>
          </table:table-cell>
          <table:table-cell table:formula="of:=[.D1840]-[.D183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table:formula="of:=[.B1839]+11" office:value-type="float" office:value="20229" calcext:value-type="float">
            <text:p>20229</text:p>
          </table:table-cell>
          <table:table-cell office:value-type="float" office:value="8640000" calcext:value-type="float">
            <text:p>8640000</text:p>
          </table:table-cell>
          <table:table-cell table:formula="of:=[.B1840]/[.C1840]" office:value-type="float" office:value="0.00234131944444444" calcext:value-type="float">
            <text:p>0,00234131944444444000</text:p>
          </table:table-cell>
          <table:table-cell table:formula="of:=[.D1841]-[.D184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table:formula="of:=[.B1840]+11" office:value-type="float" office:value="20240" calcext:value-type="float">
            <text:p>20240</text:p>
          </table:table-cell>
          <table:table-cell office:value-type="float" office:value="8640000" calcext:value-type="float">
            <text:p>8640000</text:p>
          </table:table-cell>
          <table:table-cell table:formula="of:=[.B1841]/[.C1841]" office:value-type="float" office:value="0.00234259259259259" calcext:value-type="float">
            <text:p>0,00234259259259259000</text:p>
          </table:table-cell>
          <table:table-cell table:formula="of:=[.D1842]-[.D1841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table:formula="of:=[.B1841]+11" office:value-type="float" office:value="20251" calcext:value-type="float">
            <text:p>20251</text:p>
          </table:table-cell>
          <table:table-cell office:value-type="float" office:value="8640000" calcext:value-type="float">
            <text:p>8640000</text:p>
          </table:table-cell>
          <table:table-cell table:formula="of:=[.B1842]/[.C1842]" office:value-type="float" office:value="0.00234386574074074" calcext:value-type="float">
            <text:p>0,00234386574074074000</text:p>
          </table:table-cell>
          <table:table-cell table:formula="of:=[.D1843]-[.D184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table:formula="of:=[.B1842]+11" office:value-type="float" office:value="20262" calcext:value-type="float">
            <text:p>20262</text:p>
          </table:table-cell>
          <table:table-cell office:value-type="float" office:value="8640000" calcext:value-type="float">
            <text:p>8640000</text:p>
          </table:table-cell>
          <table:table-cell table:formula="of:=[.B1843]/[.C1843]" office:value-type="float" office:value="0.00234513888888889" calcext:value-type="float">
            <text:p>0,00234513888888889000</text:p>
          </table:table-cell>
          <table:table-cell table:formula="of:=[.D1844]-[.D184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table:formula="of:=[.B1843]+11" office:value-type="float" office:value="20273" calcext:value-type="float">
            <text:p>20273</text:p>
          </table:table-cell>
          <table:table-cell office:value-type="float" office:value="8640000" calcext:value-type="float">
            <text:p>8640000</text:p>
          </table:table-cell>
          <table:table-cell table:formula="of:=[.B1844]/[.C1844]" office:value-type="float" office:value="0.00234641203703704" calcext:value-type="float">
            <text:p>0,00234641203703704000</text:p>
          </table:table-cell>
          <table:table-cell table:formula="of:=[.D1845]-[.D184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table:formula="of:=[.B1844]+11" office:value-type="float" office:value="20284" calcext:value-type="float">
            <text:p>20284</text:p>
          </table:table-cell>
          <table:table-cell office:value-type="float" office:value="8640000" calcext:value-type="float">
            <text:p>8640000</text:p>
          </table:table-cell>
          <table:table-cell table:formula="of:=[.B1845]/[.C1845]" office:value-type="float" office:value="0.00234768518518519" calcext:value-type="float">
            <text:p>0,00234768518518519000</text:p>
          </table:table-cell>
          <table:table-cell table:formula="of:=[.D1846]-[.D184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table:formula="of:=[.B1845]+11" office:value-type="float" office:value="20295" calcext:value-type="float">
            <text:p>20295</text:p>
          </table:table-cell>
          <table:table-cell office:value-type="float" office:value="8640000" calcext:value-type="float">
            <text:p>8640000</text:p>
          </table:table-cell>
          <table:table-cell table:formula="of:=[.B1846]/[.C1846]" office:value-type="float" office:value="0.00234895833333333" calcext:value-type="float">
            <text:p>0,00234895833333333000</text:p>
          </table:table-cell>
          <table:table-cell table:formula="of:=[.D1847]-[.D1846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table:formula="of:=[.B1846]+11" office:value-type="float" office:value="20306" calcext:value-type="float">
            <text:p>20306</text:p>
          </table:table-cell>
          <table:table-cell office:value-type="float" office:value="8640000" calcext:value-type="float">
            <text:p>8640000</text:p>
          </table:table-cell>
          <table:table-cell table:formula="of:=[.B1847]/[.C1847]" office:value-type="float" office:value="0.00235023148148148" calcext:value-type="float">
            <text:p>0,00235023148148148000</text:p>
          </table:table-cell>
          <table:table-cell table:formula="of:=[.D1848]-[.D184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table:formula="of:=[.B1847]+11" office:value-type="float" office:value="20317" calcext:value-type="float">
            <text:p>20317</text:p>
          </table:table-cell>
          <table:table-cell office:value-type="float" office:value="8640000" calcext:value-type="float">
            <text:p>8640000</text:p>
          </table:table-cell>
          <table:table-cell table:formula="of:=[.B1848]/[.C1848]" office:value-type="float" office:value="0.00235150462962963" calcext:value-type="float">
            <text:p>0,00235150462962963000</text:p>
          </table:table-cell>
          <table:table-cell table:formula="of:=[.D1849]-[.D184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table:formula="of:=[.B1848]+11" office:value-type="float" office:value="20328" calcext:value-type="float">
            <text:p>20328</text:p>
          </table:table-cell>
          <table:table-cell office:value-type="float" office:value="8640000" calcext:value-type="float">
            <text:p>8640000</text:p>
          </table:table-cell>
          <table:table-cell table:formula="of:=[.B1849]/[.C1849]" office:value-type="float" office:value="0.00235277777777778" calcext:value-type="float">
            <text:p>0,00235277777777778000</text:p>
          </table:table-cell>
          <table:table-cell table:formula="of:=[.D1850]-[.D184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table:formula="of:=[.B1849]+11" office:value-type="float" office:value="20339" calcext:value-type="float">
            <text:p>20339</text:p>
          </table:table-cell>
          <table:table-cell office:value-type="float" office:value="8640000" calcext:value-type="float">
            <text:p>8640000</text:p>
          </table:table-cell>
          <table:table-cell table:formula="of:=[.B1850]/[.C1850]" office:value-type="float" office:value="0.00235405092592593" calcext:value-type="float">
            <text:p>0,00235405092592593000</text:p>
          </table:table-cell>
          <table:table-cell table:formula="of:=[.D1851]-[.D1850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table:formula="of:=[.B1850]+11" office:value-type="float" office:value="20350" calcext:value-type="float">
            <text:p>20350</text:p>
          </table:table-cell>
          <table:table-cell office:value-type="float" office:value="8640000" calcext:value-type="float">
            <text:p>8640000</text:p>
          </table:table-cell>
          <table:table-cell table:formula="of:=[.B1851]/[.C1851]" office:value-type="float" office:value="0.00235532407407407" calcext:value-type="float">
            <text:p>0,00235532407407407000</text:p>
          </table:table-cell>
          <table:table-cell table:formula="of:=[.D1852]-[.D185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table:formula="of:=[.B1851]+11" office:value-type="float" office:value="20361" calcext:value-type="float">
            <text:p>20361</text:p>
          </table:table-cell>
          <table:table-cell office:value-type="float" office:value="8640000" calcext:value-type="float">
            <text:p>8640000</text:p>
          </table:table-cell>
          <table:table-cell table:formula="of:=[.B1852]/[.C1852]" office:value-type="float" office:value="0.00235659722222222" calcext:value-type="float">
            <text:p>0,00235659722222222000</text:p>
          </table:table-cell>
          <table:table-cell table:formula="of:=[.D1853]-[.D185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table:formula="of:=[.B1852]+11" office:value-type="float" office:value="20372" calcext:value-type="float">
            <text:p>20372</text:p>
          </table:table-cell>
          <table:table-cell office:value-type="float" office:value="8640000" calcext:value-type="float">
            <text:p>8640000</text:p>
          </table:table-cell>
          <table:table-cell table:formula="of:=[.B1853]/[.C1853]" office:value-type="float" office:value="0.00235787037037037" calcext:value-type="float">
            <text:p>0,00235787037037037000</text:p>
          </table:table-cell>
          <table:table-cell table:formula="of:=[.D1854]-[.D185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table:formula="of:=[.B1853]+11" office:value-type="float" office:value="20383" calcext:value-type="float">
            <text:p>20383</text:p>
          </table:table-cell>
          <table:table-cell office:value-type="float" office:value="8640000" calcext:value-type="float">
            <text:p>8640000</text:p>
          </table:table-cell>
          <table:table-cell table:formula="of:=[.B1854]/[.C1854]" office:value-type="float" office:value="0.00235914351851852" calcext:value-type="float">
            <text:p>0,00235914351851852000</text:p>
          </table:table-cell>
          <table:table-cell table:formula="of:=[.D1855]-[.D1854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table:formula="of:=[.B1854]+11" office:value-type="float" office:value="20394" calcext:value-type="float">
            <text:p>20394</text:p>
          </table:table-cell>
          <table:table-cell office:value-type="float" office:value="8640000" calcext:value-type="float">
            <text:p>8640000</text:p>
          </table:table-cell>
          <table:table-cell table:formula="of:=[.B1855]/[.C1855]" office:value-type="float" office:value="0.00236041666666667" calcext:value-type="float">
            <text:p>0,00236041666666667000</text:p>
          </table:table-cell>
          <table:table-cell table:formula="of:=[.D1856]-[.D185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table:formula="of:=[.B1855]+11" office:value-type="float" office:value="20405" calcext:value-type="float">
            <text:p>20405</text:p>
          </table:table-cell>
          <table:table-cell office:value-type="float" office:value="8640000" calcext:value-type="float">
            <text:p>8640000</text:p>
          </table:table-cell>
          <table:table-cell table:formula="of:=[.B1856]/[.C1856]" office:value-type="float" office:value="0.00236168981481481" calcext:value-type="float">
            <text:p>0,00236168981481481000</text:p>
          </table:table-cell>
          <table:table-cell table:formula="of:=[.D1857]-[.D185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table:formula="of:=[.B1856]+11" office:value-type="float" office:value="20416" calcext:value-type="float">
            <text:p>20416</text:p>
          </table:table-cell>
          <table:table-cell office:value-type="float" office:value="8640000" calcext:value-type="float">
            <text:p>8640000</text:p>
          </table:table-cell>
          <table:table-cell table:formula="of:=[.B1857]/[.C1857]" office:value-type="float" office:value="0.00236296296296296" calcext:value-type="float">
            <text:p>0,00236296296296296000</text:p>
          </table:table-cell>
          <table:table-cell table:formula="of:=[.D1858]-[.D185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table:formula="of:=[.B1857]+11" office:value-type="float" office:value="20427" calcext:value-type="float">
            <text:p>20427</text:p>
          </table:table-cell>
          <table:table-cell office:value-type="float" office:value="8640000" calcext:value-type="float">
            <text:p>8640000</text:p>
          </table:table-cell>
          <table:table-cell table:formula="of:=[.B1858]/[.C1858]" office:value-type="float" office:value="0.00236423611111111" calcext:value-type="float">
            <text:p>0,00236423611111111000</text:p>
          </table:table-cell>
          <table:table-cell table:formula="of:=[.D1859]-[.D185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table:formula="of:=[.B1858]+11" office:value-type="float" office:value="20438" calcext:value-type="float">
            <text:p>20438</text:p>
          </table:table-cell>
          <table:table-cell office:value-type="float" office:value="8640000" calcext:value-type="float">
            <text:p>8640000</text:p>
          </table:table-cell>
          <table:table-cell table:formula="of:=[.B1859]/[.C1859]" office:value-type="float" office:value="0.00236550925925926" calcext:value-type="float">
            <text:p>0,00236550925925926000</text:p>
          </table:table-cell>
          <table:table-cell table:formula="of:=[.D1860]-[.D1859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table:formula="of:=[.B1859]+11" office:value-type="float" office:value="20449" calcext:value-type="float">
            <text:p>20449</text:p>
          </table:table-cell>
          <table:table-cell office:value-type="float" office:value="8640000" calcext:value-type="float">
            <text:p>8640000</text:p>
          </table:table-cell>
          <table:table-cell table:formula="of:=[.B1860]/[.C1860]" office:value-type="float" office:value="0.00236678240740741" calcext:value-type="float">
            <text:p>0,00236678240740741000</text:p>
          </table:table-cell>
          <table:table-cell table:formula="of:=[.D1861]-[.D186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table:formula="of:=[.B1860]+11" office:value-type="float" office:value="20460" calcext:value-type="float">
            <text:p>20460</text:p>
          </table:table-cell>
          <table:table-cell office:value-type="float" office:value="8640000" calcext:value-type="float">
            <text:p>8640000</text:p>
          </table:table-cell>
          <table:table-cell table:formula="of:=[.B1861]/[.C1861]" office:value-type="float" office:value="0.00236805555555556" calcext:value-type="float">
            <text:p>0,00236805555555556000</text:p>
          </table:table-cell>
          <table:table-cell table:formula="of:=[.D1862]-[.D186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table:formula="of:=[.B1861]+11" office:value-type="float" office:value="20471" calcext:value-type="float">
            <text:p>20471</text:p>
          </table:table-cell>
          <table:table-cell office:value-type="float" office:value="8640000" calcext:value-type="float">
            <text:p>8640000</text:p>
          </table:table-cell>
          <table:table-cell table:formula="of:=[.B1862]/[.C1862]" office:value-type="float" office:value="0.0023693287037037" calcext:value-type="float">
            <text:p>0,00236932870370370000</text:p>
          </table:table-cell>
          <table:table-cell table:formula="of:=[.D1863]-[.D186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table:formula="of:=[.B1862]+11" office:value-type="float" office:value="20482" calcext:value-type="float">
            <text:p>20482</text:p>
          </table:table-cell>
          <table:table-cell office:value-type="float" office:value="8640000" calcext:value-type="float">
            <text:p>8640000</text:p>
          </table:table-cell>
          <table:table-cell table:formula="of:=[.B1863]/[.C1863]" office:value-type="float" office:value="0.00237060185185185" calcext:value-type="float">
            <text:p>0,00237060185185185000</text:p>
          </table:table-cell>
          <table:table-cell table:formula="of:=[.D1864]-[.D1863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table:formula="of:=[.B1863]+11" office:value-type="float" office:value="20493" calcext:value-type="float">
            <text:p>20493</text:p>
          </table:table-cell>
          <table:table-cell office:value-type="float" office:value="8640000" calcext:value-type="float">
            <text:p>8640000</text:p>
          </table:table-cell>
          <table:table-cell table:formula="of:=[.B1864]/[.C1864]" office:value-type="float" office:value="0.002371875" calcext:value-type="float">
            <text:p>0,00237187500000000000</text:p>
          </table:table-cell>
          <table:table-cell table:formula="of:=[.D1865]-[.D186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table:formula="of:=[.B1864]+11" office:value-type="float" office:value="20504" calcext:value-type="float">
            <text:p>20504</text:p>
          </table:table-cell>
          <table:table-cell office:value-type="float" office:value="8640000" calcext:value-type="float">
            <text:p>8640000</text:p>
          </table:table-cell>
          <table:table-cell table:formula="of:=[.B1865]/[.C1865]" office:value-type="float" office:value="0.00237314814814815" calcext:value-type="float">
            <text:p>0,00237314814814815000</text:p>
          </table:table-cell>
          <table:table-cell table:formula="of:=[.D1866]-[.D186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table:formula="of:=[.B1865]+11" office:value-type="float" office:value="20515" calcext:value-type="float">
            <text:p>20515</text:p>
          </table:table-cell>
          <table:table-cell office:value-type="float" office:value="8640000" calcext:value-type="float">
            <text:p>8640000</text:p>
          </table:table-cell>
          <table:table-cell table:formula="of:=[.B1866]/[.C1866]" office:value-type="float" office:value="0.0023744212962963" calcext:value-type="float">
            <text:p>0,00237442129629630000</text:p>
          </table:table-cell>
          <table:table-cell table:formula="of:=[.D1867]-[.D186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table:formula="of:=[.B1866]+11" office:value-type="float" office:value="20526" calcext:value-type="float">
            <text:p>20526</text:p>
          </table:table-cell>
          <table:table-cell office:value-type="float" office:value="8640000" calcext:value-type="float">
            <text:p>8640000</text:p>
          </table:table-cell>
          <table:table-cell table:formula="of:=[.B1867]/[.C1867]" office:value-type="float" office:value="0.00237569444444444" calcext:value-type="float">
            <text:p>0,00237569444444444000</text:p>
          </table:table-cell>
          <table:table-cell table:formula="of:=[.D1868]-[.D1867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table:formula="of:=[.B1867]+11" office:value-type="float" office:value="20537" calcext:value-type="float">
            <text:p>20537</text:p>
          </table:table-cell>
          <table:table-cell office:value-type="float" office:value="8640000" calcext:value-type="float">
            <text:p>8640000</text:p>
          </table:table-cell>
          <table:table-cell table:formula="of:=[.B1868]/[.C1868]" office:value-type="float" office:value="0.00237696759259259" calcext:value-type="float">
            <text:p>0,00237696759259259000</text:p>
          </table:table-cell>
          <table:table-cell table:formula="of:=[.D1869]-[.D186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table:formula="of:=[.B1868]+11" office:value-type="float" office:value="20548" calcext:value-type="float">
            <text:p>20548</text:p>
          </table:table-cell>
          <table:table-cell office:value-type="float" office:value="8640000" calcext:value-type="float">
            <text:p>8640000</text:p>
          </table:table-cell>
          <table:table-cell table:formula="of:=[.B1869]/[.C1869]" office:value-type="float" office:value="0.00237824074074074" calcext:value-type="float">
            <text:p>0,00237824074074074000</text:p>
          </table:table-cell>
          <table:table-cell table:formula="of:=[.D1870]-[.D186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table:formula="of:=[.B1869]+11" office:value-type="float" office:value="20559" calcext:value-type="float">
            <text:p>20559</text:p>
          </table:table-cell>
          <table:table-cell office:value-type="float" office:value="8640000" calcext:value-type="float">
            <text:p>8640000</text:p>
          </table:table-cell>
          <table:table-cell table:formula="of:=[.B1870]/[.C1870]" office:value-type="float" office:value="0.00237951388888889" calcext:value-type="float">
            <text:p>0,00237951388888889000</text:p>
          </table:table-cell>
          <table:table-cell table:formula="of:=[.D1871]-[.D187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formula="of:=[.B1870]+11" office:value-type="float" office:value="20570" calcext:value-type="float">
            <text:p>20570</text:p>
          </table:table-cell>
          <table:table-cell office:value-type="float" office:value="8640000" calcext:value-type="float">
            <text:p>8640000</text:p>
          </table:table-cell>
          <table:table-cell table:formula="of:=[.B1871]/[.C1871]" office:value-type="float" office:value="0.00238078703703704" calcext:value-type="float">
            <text:p>0,00238078703703704000</text:p>
          </table:table-cell>
          <table:table-cell table:formula="of:=[.D1872]-[.D1871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table:formula="of:=[.B1871]+11" office:value-type="float" office:value="20581" calcext:value-type="float">
            <text:p>20581</text:p>
          </table:table-cell>
          <table:table-cell office:value-type="float" office:value="8640000" calcext:value-type="float">
            <text:p>8640000</text:p>
          </table:table-cell>
          <table:table-cell table:formula="of:=[.B1872]/[.C1872]" office:value-type="float" office:value="0.00238206018518519" calcext:value-type="float">
            <text:p>0,00238206018518519000</text:p>
          </table:table-cell>
          <table:table-cell table:formula="of:=[.D1873]-[.D187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table:formula="of:=[.B1872]+11" office:value-type="float" office:value="20592" calcext:value-type="float">
            <text:p>20592</text:p>
          </table:table-cell>
          <table:table-cell office:value-type="float" office:value="8640000" calcext:value-type="float">
            <text:p>8640000</text:p>
          </table:table-cell>
          <table:table-cell table:formula="of:=[.B1873]/[.C1873]" office:value-type="float" office:value="0.00238333333333333" calcext:value-type="float">
            <text:p>0,00238333333333333000</text:p>
          </table:table-cell>
          <table:table-cell table:formula="of:=[.D1874]-[.D187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table:formula="of:=[.B1873]+11" office:value-type="float" office:value="20603" calcext:value-type="float">
            <text:p>20603</text:p>
          </table:table-cell>
          <table:table-cell office:value-type="float" office:value="8640000" calcext:value-type="float">
            <text:p>8640000</text:p>
          </table:table-cell>
          <table:table-cell table:formula="of:=[.B1874]/[.C1874]" office:value-type="float" office:value="0.00238460648148148" calcext:value-type="float">
            <text:p>0,00238460648148148000</text:p>
          </table:table-cell>
          <table:table-cell table:formula="of:=[.D1875]-[.D187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table:formula="of:=[.B1874]+11" office:value-type="float" office:value="20614" calcext:value-type="float">
            <text:p>20614</text:p>
          </table:table-cell>
          <table:table-cell office:value-type="float" office:value="8640000" calcext:value-type="float">
            <text:p>8640000</text:p>
          </table:table-cell>
          <table:table-cell table:formula="of:=[.B1875]/[.C1875]" office:value-type="float" office:value="0.00238587962962963" calcext:value-type="float">
            <text:p>0,00238587962962963000</text:p>
          </table:table-cell>
          <table:table-cell table:formula="of:=[.D1876]-[.D187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table:formula="of:=[.B1875]+11" office:value-type="float" office:value="20625" calcext:value-type="float">
            <text:p>20625</text:p>
          </table:table-cell>
          <table:table-cell office:value-type="float" office:value="8640000" calcext:value-type="float">
            <text:p>8640000</text:p>
          </table:table-cell>
          <table:table-cell table:formula="of:=[.B1876]/[.C1876]" office:value-type="float" office:value="0.00238715277777778" calcext:value-type="float">
            <text:p>0,00238715277777778000</text:p>
          </table:table-cell>
          <table:table-cell table:formula="of:=[.D1877]-[.D1876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table:formula="of:=[.B1876]+11" office:value-type="float" office:value="20636" calcext:value-type="float">
            <text:p>20636</text:p>
          </table:table-cell>
          <table:table-cell office:value-type="float" office:value="8640000" calcext:value-type="float">
            <text:p>8640000</text:p>
          </table:table-cell>
          <table:table-cell table:formula="of:=[.B1877]/[.C1877]" office:value-type="float" office:value="0.00238842592592593" calcext:value-type="float">
            <text:p>0,00238842592592593000</text:p>
          </table:table-cell>
          <table:table-cell table:formula="of:=[.D1878]-[.D187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table:formula="of:=[.B1877]+11" office:value-type="float" office:value="20647" calcext:value-type="float">
            <text:p>20647</text:p>
          </table:table-cell>
          <table:table-cell office:value-type="float" office:value="8640000" calcext:value-type="float">
            <text:p>8640000</text:p>
          </table:table-cell>
          <table:table-cell table:formula="of:=[.B1878]/[.C1878]" office:value-type="float" office:value="0.00238969907407407" calcext:value-type="float">
            <text:p>0,00238969907407407000</text:p>
          </table:table-cell>
          <table:table-cell table:formula="of:=[.D1879]-[.D187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table:formula="of:=[.B1878]+11" office:value-type="float" office:value="20658" calcext:value-type="float">
            <text:p>20658</text:p>
          </table:table-cell>
          <table:table-cell office:value-type="float" office:value="8640000" calcext:value-type="float">
            <text:p>8640000</text:p>
          </table:table-cell>
          <table:table-cell table:formula="of:=[.B1879]/[.C1879]" office:value-type="float" office:value="0.00239097222222222" calcext:value-type="float">
            <text:p>0,00239097222222222000</text:p>
          </table:table-cell>
          <table:table-cell table:formula="of:=[.D1880]-[.D187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table:formula="of:=[.B1879]+11" office:value-type="float" office:value="20669" calcext:value-type="float">
            <text:p>20669</text:p>
          </table:table-cell>
          <table:table-cell office:value-type="float" office:value="8640000" calcext:value-type="float">
            <text:p>8640000</text:p>
          </table:table-cell>
          <table:table-cell table:formula="of:=[.B1880]/[.C1880]" office:value-type="float" office:value="0.00239224537037037" calcext:value-type="float">
            <text:p>0,00239224537037037000</text:p>
          </table:table-cell>
          <table:table-cell table:formula="of:=[.D1881]-[.D1880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table:formula="of:=[.B1880]+11" office:value-type="float" office:value="20680" calcext:value-type="float">
            <text:p>20680</text:p>
          </table:table-cell>
          <table:table-cell office:value-type="float" office:value="8640000" calcext:value-type="float">
            <text:p>8640000</text:p>
          </table:table-cell>
          <table:table-cell table:formula="of:=[.B1881]/[.C1881]" office:value-type="float" office:value="0.00239351851851852" calcext:value-type="float">
            <text:p>0,00239351851851852000</text:p>
          </table:table-cell>
          <table:table-cell table:formula="of:=[.D1882]-[.D188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table:formula="of:=[.B1881]+11" office:value-type="float" office:value="20691" calcext:value-type="float">
            <text:p>20691</text:p>
          </table:table-cell>
          <table:table-cell office:value-type="float" office:value="8640000" calcext:value-type="float">
            <text:p>8640000</text:p>
          </table:table-cell>
          <table:table-cell table:formula="of:=[.B1882]/[.C1882]" office:value-type="float" office:value="0.00239479166666667" calcext:value-type="float">
            <text:p>0,00239479166666667000</text:p>
          </table:table-cell>
          <table:table-cell table:formula="of:=[.D1883]-[.D188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table:formula="of:=[.B1882]+11" office:value-type="float" office:value="20702" calcext:value-type="float">
            <text:p>20702</text:p>
          </table:table-cell>
          <table:table-cell office:value-type="float" office:value="8640000" calcext:value-type="float">
            <text:p>8640000</text:p>
          </table:table-cell>
          <table:table-cell table:formula="of:=[.B1883]/[.C1883]" office:value-type="float" office:value="0.00239606481481482" calcext:value-type="float">
            <text:p>0,00239606481481482000</text:p>
          </table:table-cell>
          <table:table-cell table:formula="of:=[.D1884]-[.D188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table:formula="of:=[.B1883]+11" office:value-type="float" office:value="20713" calcext:value-type="float">
            <text:p>20713</text:p>
          </table:table-cell>
          <table:table-cell office:value-type="float" office:value="8640000" calcext:value-type="float">
            <text:p>8640000</text:p>
          </table:table-cell>
          <table:table-cell table:formula="of:=[.B1884]/[.C1884]" office:value-type="float" office:value="0.00239733796296296" calcext:value-type="float">
            <text:p>0,00239733796296296000</text:p>
          </table:table-cell>
          <table:table-cell table:formula="of:=[.D1885]-[.D1884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table:formula="of:=[.B1884]+11" office:value-type="float" office:value="20724" calcext:value-type="float">
            <text:p>20724</text:p>
          </table:table-cell>
          <table:table-cell office:value-type="float" office:value="8640000" calcext:value-type="float">
            <text:p>8640000</text:p>
          </table:table-cell>
          <table:table-cell table:formula="of:=[.B1885]/[.C1885]" office:value-type="float" office:value="0.00239861111111111" calcext:value-type="float">
            <text:p>0,00239861111111111000</text:p>
          </table:table-cell>
          <table:table-cell table:formula="of:=[.D1886]-[.D188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table:formula="of:=[.B1885]+11" office:value-type="float" office:value="20735" calcext:value-type="float">
            <text:p>20735</text:p>
          </table:table-cell>
          <table:table-cell office:value-type="float" office:value="8640000" calcext:value-type="float">
            <text:p>8640000</text:p>
          </table:table-cell>
          <table:table-cell table:formula="of:=[.B1886]/[.C1886]" office:value-type="float" office:value="0.00239988425925926" calcext:value-type="float">
            <text:p>0,00239988425925926000</text:p>
          </table:table-cell>
          <table:table-cell table:formula="of:=[.D1887]-[.D188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table:formula="of:=[.B1886]+11" office:value-type="float" office:value="20746" calcext:value-type="float">
            <text:p>20746</text:p>
          </table:table-cell>
          <table:table-cell office:value-type="float" office:value="8640000" calcext:value-type="float">
            <text:p>8640000</text:p>
          </table:table-cell>
          <table:table-cell table:formula="of:=[.B1887]/[.C1887]" office:value-type="float" office:value="0.00240115740740741" calcext:value-type="float">
            <text:p>0,00240115740740741000</text:p>
          </table:table-cell>
          <table:table-cell table:formula="of:=[.D1888]-[.D188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table:formula="of:=[.B1887]+11" office:value-type="float" office:value="20757" calcext:value-type="float">
            <text:p>20757</text:p>
          </table:table-cell>
          <table:table-cell office:value-type="float" office:value="8640000" calcext:value-type="float">
            <text:p>8640000</text:p>
          </table:table-cell>
          <table:table-cell table:formula="of:=[.B1888]/[.C1888]" office:value-type="float" office:value="0.00240243055555556" calcext:value-type="float">
            <text:p>0,00240243055555556000</text:p>
          </table:table-cell>
          <table:table-cell table:formula="of:=[.D1889]-[.D188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table:formula="of:=[.B1888]+11" office:value-type="float" office:value="20768" calcext:value-type="float">
            <text:p>20768</text:p>
          </table:table-cell>
          <table:table-cell office:value-type="float" office:value="8640000" calcext:value-type="float">
            <text:p>8640000</text:p>
          </table:table-cell>
          <table:table-cell table:formula="of:=[.B1889]/[.C1889]" office:value-type="float" office:value="0.0024037037037037" calcext:value-type="float">
            <text:p>0,00240370370370370000</text:p>
          </table:table-cell>
          <table:table-cell table:formula="of:=[.D1890]-[.D1889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table:formula="of:=[.B1889]+11" office:value-type="float" office:value="20779" calcext:value-type="float">
            <text:p>20779</text:p>
          </table:table-cell>
          <table:table-cell office:value-type="float" office:value="8640000" calcext:value-type="float">
            <text:p>8640000</text:p>
          </table:table-cell>
          <table:table-cell table:formula="of:=[.B1890]/[.C1890]" office:value-type="float" office:value="0.00240497685185185" calcext:value-type="float">
            <text:p>0,00240497685185185000</text:p>
          </table:table-cell>
          <table:table-cell table:formula="of:=[.D1891]-[.D189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formula="of:=[.B1890]+11" office:value-type="float" office:value="20790" calcext:value-type="float">
            <text:p>20790</text:p>
          </table:table-cell>
          <table:table-cell office:value-type="float" office:value="8640000" calcext:value-type="float">
            <text:p>8640000</text:p>
          </table:table-cell>
          <table:table-cell table:formula="of:=[.B1891]/[.C1891]" office:value-type="float" office:value="0.00240625" calcext:value-type="float">
            <text:p>0,00240625000000000000</text:p>
          </table:table-cell>
          <table:table-cell table:formula="of:=[.D1892]-[.D189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table:formula="of:=[.B1891]+11" office:value-type="float" office:value="20801" calcext:value-type="float">
            <text:p>20801</text:p>
          </table:table-cell>
          <table:table-cell office:value-type="float" office:value="8640000" calcext:value-type="float">
            <text:p>8640000</text:p>
          </table:table-cell>
          <table:table-cell table:formula="of:=[.B1892]/[.C1892]" office:value-type="float" office:value="0.00240752314814815" calcext:value-type="float">
            <text:p>0,00240752314814815000</text:p>
          </table:table-cell>
          <table:table-cell table:formula="of:=[.D1893]-[.D189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table:formula="of:=[.B1892]+11" office:value-type="float" office:value="20812" calcext:value-type="float">
            <text:p>20812</text:p>
          </table:table-cell>
          <table:table-cell office:value-type="float" office:value="8640000" calcext:value-type="float">
            <text:p>8640000</text:p>
          </table:table-cell>
          <table:table-cell table:formula="of:=[.B1893]/[.C1893]" office:value-type="float" office:value="0.0024087962962963" calcext:value-type="float">
            <text:p>0,00240879629629630000</text:p>
          </table:table-cell>
          <table:table-cell table:formula="of:=[.D1894]-[.D1893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table:formula="of:=[.B1893]+11" office:value-type="float" office:value="20823" calcext:value-type="float">
            <text:p>20823</text:p>
          </table:table-cell>
          <table:table-cell office:value-type="float" office:value="8640000" calcext:value-type="float">
            <text:p>8640000</text:p>
          </table:table-cell>
          <table:table-cell table:formula="of:=[.B1894]/[.C1894]" office:value-type="float" office:value="0.00241006944444444" calcext:value-type="float">
            <text:p>0,00241006944444444000</text:p>
          </table:table-cell>
          <table:table-cell table:formula="of:=[.D1895]-[.D189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table:formula="of:=[.B1894]+11" office:value-type="float" office:value="20834" calcext:value-type="float">
            <text:p>20834</text:p>
          </table:table-cell>
          <table:table-cell office:value-type="float" office:value="8640000" calcext:value-type="float">
            <text:p>8640000</text:p>
          </table:table-cell>
          <table:table-cell table:formula="of:=[.B1895]/[.C1895]" office:value-type="float" office:value="0.00241134259259259" calcext:value-type="float">
            <text:p>0,00241134259259259000</text:p>
          </table:table-cell>
          <table:table-cell table:formula="of:=[.D1896]-[.D189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table:formula="of:=[.B1895]+11" office:value-type="float" office:value="20845" calcext:value-type="float">
            <text:p>20845</text:p>
          </table:table-cell>
          <table:table-cell office:value-type="float" office:value="8640000" calcext:value-type="float">
            <text:p>8640000</text:p>
          </table:table-cell>
          <table:table-cell table:formula="of:=[.B1896]/[.C1896]" office:value-type="float" office:value="0.00241261574074074" calcext:value-type="float">
            <text:p>0,00241261574074074000</text:p>
          </table:table-cell>
          <table:table-cell table:formula="of:=[.D1897]-[.D189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table:formula="of:=[.B1896]+11" office:value-type="float" office:value="20856" calcext:value-type="float">
            <text:p>20856</text:p>
          </table:table-cell>
          <table:table-cell office:value-type="float" office:value="8640000" calcext:value-type="float">
            <text:p>8640000</text:p>
          </table:table-cell>
          <table:table-cell table:formula="of:=[.B1897]/[.C1897]" office:value-type="float" office:value="0.00241388888888889" calcext:value-type="float">
            <text:p>0,00241388888888889000</text:p>
          </table:table-cell>
          <table:table-cell table:formula="of:=[.D1898]-[.D1897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table:formula="of:=[.B1897]+11" office:value-type="float" office:value="20867" calcext:value-type="float">
            <text:p>20867</text:p>
          </table:table-cell>
          <table:table-cell office:value-type="float" office:value="8640000" calcext:value-type="float">
            <text:p>8640000</text:p>
          </table:table-cell>
          <table:table-cell table:formula="of:=[.B1898]/[.C1898]" office:value-type="float" office:value="0.00241516203703704" calcext:value-type="float">
            <text:p>0,00241516203703704000</text:p>
          </table:table-cell>
          <table:table-cell table:formula="of:=[.D1899]-[.D189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table:formula="of:=[.B1898]+11" office:value-type="float" office:value="20878" calcext:value-type="float">
            <text:p>20878</text:p>
          </table:table-cell>
          <table:table-cell office:value-type="float" office:value="8640000" calcext:value-type="float">
            <text:p>8640000</text:p>
          </table:table-cell>
          <table:table-cell table:formula="of:=[.B1899]/[.C1899]" office:value-type="float" office:value="0.00241643518518519" calcext:value-type="float">
            <text:p>0,00241643518518519000</text:p>
          </table:table-cell>
          <table:table-cell table:formula="of:=[.D1900]-[.D189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table:formula="of:=[.B1899]+11" office:value-type="float" office:value="20889" calcext:value-type="float">
            <text:p>20889</text:p>
          </table:table-cell>
          <table:table-cell office:value-type="float" office:value="8640000" calcext:value-type="float">
            <text:p>8640000</text:p>
          </table:table-cell>
          <table:table-cell table:formula="of:=[.B1900]/[.C1900]" office:value-type="float" office:value="0.00241770833333333" calcext:value-type="float">
            <text:p>0,00241770833333333000</text:p>
          </table:table-cell>
          <table:table-cell table:formula="of:=[.D1901]-[.D190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[.B1900]+11" office:value-type="float" office:value="20900" calcext:value-type="float">
            <text:p>20900</text:p>
          </table:table-cell>
          <table:table-cell office:value-type="float" office:value="8640000" calcext:value-type="float">
            <text:p>8640000</text:p>
          </table:table-cell>
          <table:table-cell table:formula="of:=[.B1901]/[.C1901]" office:value-type="float" office:value="0.00241898148148148" calcext:value-type="float">
            <text:p>0,00241898148148148000</text:p>
          </table:table-cell>
          <table:table-cell table:formula="of:=[.D1902]-[.D190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table:formula="of:=[.B1901]+11" office:value-type="float" office:value="20911" calcext:value-type="float">
            <text:p>20911</text:p>
          </table:table-cell>
          <table:table-cell office:value-type="float" office:value="8640000" calcext:value-type="float">
            <text:p>8640000</text:p>
          </table:table-cell>
          <table:table-cell table:formula="of:=[.B1902]/[.C1902]" office:value-type="float" office:value="0.00242025462962963" calcext:value-type="float">
            <text:p>0,00242025462962963000</text:p>
          </table:table-cell>
          <table:table-cell table:formula="of:=[.D1903]-[.D1902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table:formula="of:=[.B1902]+11" office:value-type="float" office:value="20922" calcext:value-type="float">
            <text:p>20922</text:p>
          </table:table-cell>
          <table:table-cell office:value-type="float" office:value="8640000" calcext:value-type="float">
            <text:p>8640000</text:p>
          </table:table-cell>
          <table:table-cell table:formula="of:=[.B1903]/[.C1903]" office:value-type="float" office:value="0.00242152777777778" calcext:value-type="float">
            <text:p>0,00242152777777778000</text:p>
          </table:table-cell>
          <table:table-cell table:formula="of:=[.D1904]-[.D190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table:formula="of:=[.B1903]+11" office:value-type="float" office:value="20933" calcext:value-type="float">
            <text:p>20933</text:p>
          </table:table-cell>
          <table:table-cell office:value-type="float" office:value="8640000" calcext:value-type="float">
            <text:p>8640000</text:p>
          </table:table-cell>
          <table:table-cell table:formula="of:=[.B1904]/[.C1904]" office:value-type="float" office:value="0.00242280092592593" calcext:value-type="float">
            <text:p>0,00242280092592593000</text:p>
          </table:table-cell>
          <table:table-cell table:formula="of:=[.D1905]-[.D190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table:formula="of:=[.B1904]+11" office:value-type="float" office:value="20944" calcext:value-type="float">
            <text:p>20944</text:p>
          </table:table-cell>
          <table:table-cell office:value-type="float" office:value="8640000" calcext:value-type="float">
            <text:p>8640000</text:p>
          </table:table-cell>
          <table:table-cell table:formula="of:=[.B1905]/[.C1905]" office:value-type="float" office:value="0.00242407407407407" calcext:value-type="float">
            <text:p>0,00242407407407407000</text:p>
          </table:table-cell>
          <table:table-cell table:formula="of:=[.D1906]-[.D190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table:formula="of:=[.B1905]+11" office:value-type="float" office:value="20955" calcext:value-type="float">
            <text:p>20955</text:p>
          </table:table-cell>
          <table:table-cell office:value-type="float" office:value="8640000" calcext:value-type="float">
            <text:p>8640000</text:p>
          </table:table-cell>
          <table:table-cell table:formula="of:=[.B1906]/[.C1906]" office:value-type="float" office:value="0.00242534722222222" calcext:value-type="float">
            <text:p>0,00242534722222222000</text:p>
          </table:table-cell>
          <table:table-cell table:formula="of:=[.D1907]-[.D1906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table:formula="of:=[.B1906]+11" office:value-type="float" office:value="20966" calcext:value-type="float">
            <text:p>20966</text:p>
          </table:table-cell>
          <table:table-cell office:value-type="float" office:value="8640000" calcext:value-type="float">
            <text:p>8640000</text:p>
          </table:table-cell>
          <table:table-cell table:formula="of:=[.B1907]/[.C1907]" office:value-type="float" office:value="0.00242662037037037" calcext:value-type="float">
            <text:p>0,00242662037037037000</text:p>
          </table:table-cell>
          <table:table-cell table:formula="of:=[.D1908]-[.D190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table:formula="of:=[.B1907]+11" office:value-type="float" office:value="20977" calcext:value-type="float">
            <text:p>20977</text:p>
          </table:table-cell>
          <table:table-cell office:value-type="float" office:value="8640000" calcext:value-type="float">
            <text:p>8640000</text:p>
          </table:table-cell>
          <table:table-cell table:formula="of:=[.B1908]/[.C1908]" office:value-type="float" office:value="0.00242789351851852" calcext:value-type="float">
            <text:p>0,00242789351851852000</text:p>
          </table:table-cell>
          <table:table-cell table:formula="of:=[.D1909]-[.D190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table:formula="of:=[.B1908]+11" office:value-type="float" office:value="20988" calcext:value-type="float">
            <text:p>20988</text:p>
          </table:table-cell>
          <table:table-cell office:value-type="float" office:value="8640000" calcext:value-type="float">
            <text:p>8640000</text:p>
          </table:table-cell>
          <table:table-cell table:formula="of:=[.B1909]/[.C1909]" office:value-type="float" office:value="0.00242916666666667" calcext:value-type="float">
            <text:p>0,00242916666666667000</text:p>
          </table:table-cell>
          <table:table-cell table:formula="of:=[.D1910]-[.D190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table:formula="of:=[.B1909]+11" office:value-type="float" office:value="20999" calcext:value-type="float">
            <text:p>20999</text:p>
          </table:table-cell>
          <table:table-cell office:value-type="float" office:value="8640000" calcext:value-type="float">
            <text:p>8640000</text:p>
          </table:table-cell>
          <table:table-cell table:formula="of:=[.B1910]/[.C1910]" office:value-type="float" office:value="0.00243043981481482" calcext:value-type="float">
            <text:p>0,00243043981481482000</text:p>
          </table:table-cell>
          <table:table-cell table:formula="of:=[.D1911]-[.D1910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table:formula="of:=[.B1910]+11" office:value-type="float" office:value="21010" calcext:value-type="float">
            <text:p>21010</text:p>
          </table:table-cell>
          <table:table-cell office:value-type="float" office:value="8640000" calcext:value-type="float">
            <text:p>8640000</text:p>
          </table:table-cell>
          <table:table-cell table:formula="of:=[.B1911]/[.C1911]" office:value-type="float" office:value="0.00243171296296296" calcext:value-type="float">
            <text:p>0,00243171296296296000</text:p>
          </table:table-cell>
          <table:table-cell table:formula="of:=[.D1912]-[.D191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table:formula="of:=[.B1911]+11" office:value-type="float" office:value="21021" calcext:value-type="float">
            <text:p>21021</text:p>
          </table:table-cell>
          <table:table-cell office:value-type="float" office:value="8640000" calcext:value-type="float">
            <text:p>8640000</text:p>
          </table:table-cell>
          <table:table-cell table:formula="of:=[.B1912]/[.C1912]" office:value-type="float" office:value="0.00243298611111111" calcext:value-type="float">
            <text:p>0,00243298611111111000</text:p>
          </table:table-cell>
          <table:table-cell table:formula="of:=[.D1913]-[.D191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table:formula="of:=[.B1912]+11" office:value-type="float" office:value="21032" calcext:value-type="float">
            <text:p>21032</text:p>
          </table:table-cell>
          <table:table-cell office:value-type="float" office:value="8640000" calcext:value-type="float">
            <text:p>8640000</text:p>
          </table:table-cell>
          <table:table-cell table:formula="of:=[.B1913]/[.C1913]" office:value-type="float" office:value="0.00243425925925926" calcext:value-type="float">
            <text:p>0,00243425925925926000</text:p>
          </table:table-cell>
          <table:table-cell table:formula="of:=[.D1914]-[.D191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table:formula="of:=[.B1913]+11" office:value-type="float" office:value="21043" calcext:value-type="float">
            <text:p>21043</text:p>
          </table:table-cell>
          <table:table-cell office:value-type="float" office:value="8640000" calcext:value-type="float">
            <text:p>8640000</text:p>
          </table:table-cell>
          <table:table-cell table:formula="of:=[.B1914]/[.C1914]" office:value-type="float" office:value="0.00243553240740741" calcext:value-type="float">
            <text:p>0,00243553240740741000</text:p>
          </table:table-cell>
          <table:table-cell table:formula="of:=[.D1915]-[.D1914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table:formula="of:=[.B1914]+11" office:value-type="float" office:value="21054" calcext:value-type="float">
            <text:p>21054</text:p>
          </table:table-cell>
          <table:table-cell office:value-type="float" office:value="8640000" calcext:value-type="float">
            <text:p>8640000</text:p>
          </table:table-cell>
          <table:table-cell table:formula="of:=[.B1915]/[.C1915]" office:value-type="float" office:value="0.00243680555555556" calcext:value-type="float">
            <text:p>0,00243680555555556000</text:p>
          </table:table-cell>
          <table:table-cell table:formula="of:=[.D1916]-[.D191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table:formula="of:=[.B1915]+11" office:value-type="float" office:value="21065" calcext:value-type="float">
            <text:p>21065</text:p>
          </table:table-cell>
          <table:table-cell office:value-type="float" office:value="8640000" calcext:value-type="float">
            <text:p>8640000</text:p>
          </table:table-cell>
          <table:table-cell table:formula="of:=[.B1916]/[.C1916]" office:value-type="float" office:value="0.0024380787037037" calcext:value-type="float">
            <text:p>0,00243807870370370000</text:p>
          </table:table-cell>
          <table:table-cell table:formula="of:=[.D1917]-[.D191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table:formula="of:=[.B1916]+11" office:value-type="float" office:value="21076" calcext:value-type="float">
            <text:p>21076</text:p>
          </table:table-cell>
          <table:table-cell office:value-type="float" office:value="8640000" calcext:value-type="float">
            <text:p>8640000</text:p>
          </table:table-cell>
          <table:table-cell table:formula="of:=[.B1917]/[.C1917]" office:value-type="float" office:value="0.00243935185185185" calcext:value-type="float">
            <text:p>0,00243935185185185000</text:p>
          </table:table-cell>
          <table:table-cell table:formula="of:=[.D1918]-[.D191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table:formula="of:=[.B1917]+11" office:value-type="float" office:value="21087" calcext:value-type="float">
            <text:p>21087</text:p>
          </table:table-cell>
          <table:table-cell office:value-type="float" office:value="8640000" calcext:value-type="float">
            <text:p>8640000</text:p>
          </table:table-cell>
          <table:table-cell table:formula="of:=[.B1918]/[.C1918]" office:value-type="float" office:value="0.002440625" calcext:value-type="float">
            <text:p>0,00244062500000000000</text:p>
          </table:table-cell>
          <table:table-cell table:formula="of:=[.D1919]-[.D191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table:formula="of:=[.B1918]+11" office:value-type="float" office:value="21098" calcext:value-type="float">
            <text:p>21098</text:p>
          </table:table-cell>
          <table:table-cell office:value-type="float" office:value="8640000" calcext:value-type="float">
            <text:p>8640000</text:p>
          </table:table-cell>
          <table:table-cell table:formula="of:=[.B1919]/[.C1919]" office:value-type="float" office:value="0.00244189814814815" calcext:value-type="float">
            <text:p>0,00244189814814815000</text:p>
          </table:table-cell>
          <table:table-cell table:formula="of:=[.D1920]-[.D1919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table:formula="of:=[.B1919]+11" office:value-type="float" office:value="21109" calcext:value-type="float">
            <text:p>21109</text:p>
          </table:table-cell>
          <table:table-cell office:value-type="float" office:value="8640000" calcext:value-type="float">
            <text:p>8640000</text:p>
          </table:table-cell>
          <table:table-cell table:formula="of:=[.B1920]/[.C1920]" office:value-type="float" office:value="0.0024431712962963" calcext:value-type="float">
            <text:p>0,00244317129629630000</text:p>
          </table:table-cell>
          <table:table-cell table:formula="of:=[.D1921]-[.D192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table:formula="of:=[.B1920]+11" office:value-type="float" office:value="21120" calcext:value-type="float">
            <text:p>21120</text:p>
          </table:table-cell>
          <table:table-cell office:value-type="float" office:value="8640000" calcext:value-type="float">
            <text:p>8640000</text:p>
          </table:table-cell>
          <table:table-cell table:formula="of:=[.B1921]/[.C1921]" office:value-type="float" office:value="0.00244444444444444" calcext:value-type="float">
            <text:p>0,00244444444444444000</text:p>
          </table:table-cell>
          <table:table-cell table:formula="of:=[.D1922]-[.D192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table:formula="of:=[.B1921]+11" office:value-type="float" office:value="21131" calcext:value-type="float">
            <text:p>21131</text:p>
          </table:table-cell>
          <table:table-cell office:value-type="float" office:value="8640000" calcext:value-type="float">
            <text:p>8640000</text:p>
          </table:table-cell>
          <table:table-cell table:formula="of:=[.B1922]/[.C1922]" office:value-type="float" office:value="0.00244571759259259" calcext:value-type="float">
            <text:p>0,00244571759259259000</text:p>
          </table:table-cell>
          <table:table-cell table:formula="of:=[.D1923]-[.D192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table:formula="of:=[.B1922]+11" office:value-type="float" office:value="21142" calcext:value-type="float">
            <text:p>21142</text:p>
          </table:table-cell>
          <table:table-cell office:value-type="float" office:value="8640000" calcext:value-type="float">
            <text:p>8640000</text:p>
          </table:table-cell>
          <table:table-cell table:formula="of:=[.B1923]/[.C1923]" office:value-type="float" office:value="0.00244699074074074" calcext:value-type="float">
            <text:p>0,00244699074074074000</text:p>
          </table:table-cell>
          <table:table-cell table:formula="of:=[.D1924]-[.D1923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table:formula="of:=[.B1923]+11" office:value-type="float" office:value="21153" calcext:value-type="float">
            <text:p>21153</text:p>
          </table:table-cell>
          <table:table-cell office:value-type="float" office:value="8640000" calcext:value-type="float">
            <text:p>8640000</text:p>
          </table:table-cell>
          <table:table-cell table:formula="of:=[.B1924]/[.C1924]" office:value-type="float" office:value="0.00244826388888889" calcext:value-type="float">
            <text:p>0,00244826388888889000</text:p>
          </table:table-cell>
          <table:table-cell table:formula="of:=[.D1925]-[.D192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table:formula="of:=[.B1924]+11" office:value-type="float" office:value="21164" calcext:value-type="float">
            <text:p>21164</text:p>
          </table:table-cell>
          <table:table-cell office:value-type="float" office:value="8640000" calcext:value-type="float">
            <text:p>8640000</text:p>
          </table:table-cell>
          <table:table-cell table:formula="of:=[.B1925]/[.C1925]" office:value-type="float" office:value="0.00244953703703704" calcext:value-type="float">
            <text:p>0,00244953703703704000</text:p>
          </table:table-cell>
          <table:table-cell table:formula="of:=[.D1926]-[.D192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table:formula="of:=[.B1925]+11" office:value-type="float" office:value="21175" calcext:value-type="float">
            <text:p>21175</text:p>
          </table:table-cell>
          <table:table-cell office:value-type="float" office:value="8640000" calcext:value-type="float">
            <text:p>8640000</text:p>
          </table:table-cell>
          <table:table-cell table:formula="of:=[.B1926]/[.C1926]" office:value-type="float" office:value="0.00245081018518519" calcext:value-type="float">
            <text:p>0,00245081018518519000</text:p>
          </table:table-cell>
          <table:table-cell table:formula="of:=[.D1927]-[.D192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table:formula="of:=[.B1926]+11" office:value-type="float" office:value="21186" calcext:value-type="float">
            <text:p>21186</text:p>
          </table:table-cell>
          <table:table-cell office:value-type="float" office:value="8640000" calcext:value-type="float">
            <text:p>8640000</text:p>
          </table:table-cell>
          <table:table-cell table:formula="of:=[.B1927]/[.C1927]" office:value-type="float" office:value="0.00245208333333333" calcext:value-type="float">
            <text:p>0,00245208333333333000</text:p>
          </table:table-cell>
          <table:table-cell table:formula="of:=[.D1928]-[.D1927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table:formula="of:=[.B1927]+11" office:value-type="float" office:value="21197" calcext:value-type="float">
            <text:p>21197</text:p>
          </table:table-cell>
          <table:table-cell office:value-type="float" office:value="8640000" calcext:value-type="float">
            <text:p>8640000</text:p>
          </table:table-cell>
          <table:table-cell table:formula="of:=[.B1928]/[.C1928]" office:value-type="float" office:value="0.00245335648148148" calcext:value-type="float">
            <text:p>0,00245335648148148000</text:p>
          </table:table-cell>
          <table:table-cell table:formula="of:=[.D1929]-[.D192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table:formula="of:=[.B1928]+11" office:value-type="float" office:value="21208" calcext:value-type="float">
            <text:p>21208</text:p>
          </table:table-cell>
          <table:table-cell office:value-type="float" office:value="8640000" calcext:value-type="float">
            <text:p>8640000</text:p>
          </table:table-cell>
          <table:table-cell table:formula="of:=[.B1929]/[.C1929]" office:value-type="float" office:value="0.00245462962962963" calcext:value-type="float">
            <text:p>0,00245462962962963000</text:p>
          </table:table-cell>
          <table:table-cell table:formula="of:=[.D1930]-[.D192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table:formula="of:=[.B1929]+11" office:value-type="float" office:value="21219" calcext:value-type="float">
            <text:p>21219</text:p>
          </table:table-cell>
          <table:table-cell office:value-type="float" office:value="8640000" calcext:value-type="float">
            <text:p>8640000</text:p>
          </table:table-cell>
          <table:table-cell table:formula="of:=[.B1930]/[.C1930]" office:value-type="float" office:value="0.00245590277777778" calcext:value-type="float">
            <text:p>0,00245590277777778000</text:p>
          </table:table-cell>
          <table:table-cell table:formula="of:=[.D1931]-[.D193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table:formula="of:=[.B1930]+11" office:value-type="float" office:value="21230" calcext:value-type="float">
            <text:p>21230</text:p>
          </table:table-cell>
          <table:table-cell office:value-type="float" office:value="8640000" calcext:value-type="float">
            <text:p>8640000</text:p>
          </table:table-cell>
          <table:table-cell table:formula="of:=[.B1931]/[.C1931]" office:value-type="float" office:value="0.00245717592592593" calcext:value-type="float">
            <text:p>0,00245717592592593000</text:p>
          </table:table-cell>
          <table:table-cell table:formula="of:=[.D1932]-[.D193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table:formula="of:=[.B1931]+11" office:value-type="float" office:value="21241" calcext:value-type="float">
            <text:p>21241</text:p>
          </table:table-cell>
          <table:table-cell office:value-type="float" office:value="8640000" calcext:value-type="float">
            <text:p>8640000</text:p>
          </table:table-cell>
          <table:table-cell table:formula="of:=[.B1932]/[.C1932]" office:value-type="float" office:value="0.00245844907407407" calcext:value-type="float">
            <text:p>0,00245844907407407000</text:p>
          </table:table-cell>
          <table:table-cell table:formula="of:=[.D1933]-[.D1932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table:formula="of:=[.B1932]+11" office:value-type="float" office:value="21252" calcext:value-type="float">
            <text:p>21252</text:p>
          </table:table-cell>
          <table:table-cell office:value-type="float" office:value="8640000" calcext:value-type="float">
            <text:p>8640000</text:p>
          </table:table-cell>
          <table:table-cell table:formula="of:=[.B1933]/[.C1933]" office:value-type="float" office:value="0.00245972222222222" calcext:value-type="float">
            <text:p>0,00245972222222222000</text:p>
          </table:table-cell>
          <table:table-cell table:formula="of:=[.D1934]-[.D193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table:formula="of:=[.B1933]+11" office:value-type="float" office:value="21263" calcext:value-type="float">
            <text:p>21263</text:p>
          </table:table-cell>
          <table:table-cell office:value-type="float" office:value="8640000" calcext:value-type="float">
            <text:p>8640000</text:p>
          </table:table-cell>
          <table:table-cell table:formula="of:=[.B1934]/[.C1934]" office:value-type="float" office:value="0.00246099537037037" calcext:value-type="float">
            <text:p>0,00246099537037037000</text:p>
          </table:table-cell>
          <table:table-cell table:formula="of:=[.D1935]-[.D193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table:formula="of:=[.B1934]+11" office:value-type="float" office:value="21274" calcext:value-type="float">
            <text:p>21274</text:p>
          </table:table-cell>
          <table:table-cell office:value-type="float" office:value="8640000" calcext:value-type="float">
            <text:p>8640000</text:p>
          </table:table-cell>
          <table:table-cell table:formula="of:=[.B1935]/[.C1935]" office:value-type="float" office:value="0.00246226851851852" calcext:value-type="float">
            <text:p>0,00246226851851852000</text:p>
          </table:table-cell>
          <table:table-cell table:formula="of:=[.D1936]-[.D193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table:formula="of:=[.B1935]+11" office:value-type="float" office:value="21285" calcext:value-type="float">
            <text:p>21285</text:p>
          </table:table-cell>
          <table:table-cell office:value-type="float" office:value="8640000" calcext:value-type="float">
            <text:p>8640000</text:p>
          </table:table-cell>
          <table:table-cell table:formula="of:=[.B1936]/[.C1936]" office:value-type="float" office:value="0.00246354166666667" calcext:value-type="float">
            <text:p>0,00246354166666667000</text:p>
          </table:table-cell>
          <table:table-cell table:formula="of:=[.D1937]-[.D1936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table:formula="of:=[.B1936]+11" office:value-type="float" office:value="21296" calcext:value-type="float">
            <text:p>21296</text:p>
          </table:table-cell>
          <table:table-cell office:value-type="float" office:value="8640000" calcext:value-type="float">
            <text:p>8640000</text:p>
          </table:table-cell>
          <table:table-cell table:formula="of:=[.B1937]/[.C1937]" office:value-type="float" office:value="0.00246481481481481" calcext:value-type="float">
            <text:p>0,00246481481481481000</text:p>
          </table:table-cell>
          <table:table-cell table:formula="of:=[.D1938]-[.D193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table:formula="of:=[.B1937]+11" office:value-type="float" office:value="21307" calcext:value-type="float">
            <text:p>21307</text:p>
          </table:table-cell>
          <table:table-cell office:value-type="float" office:value="8640000" calcext:value-type="float">
            <text:p>8640000</text:p>
          </table:table-cell>
          <table:table-cell table:formula="of:=[.B1938]/[.C1938]" office:value-type="float" office:value="0.00246608796296296" calcext:value-type="float">
            <text:p>0,00246608796296296000</text:p>
          </table:table-cell>
          <table:table-cell table:formula="of:=[.D1939]-[.D193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table:formula="of:=[.B1938]+11" office:value-type="float" office:value="21318" calcext:value-type="float">
            <text:p>21318</text:p>
          </table:table-cell>
          <table:table-cell office:value-type="float" office:value="8640000" calcext:value-type="float">
            <text:p>8640000</text:p>
          </table:table-cell>
          <table:table-cell table:formula="of:=[.B1939]/[.C1939]" office:value-type="float" office:value="0.00246736111111111" calcext:value-type="float">
            <text:p>0,00246736111111111000</text:p>
          </table:table-cell>
          <table:table-cell table:formula="of:=[.D1940]-[.D193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table:formula="of:=[.B1939]+11" office:value-type="float" office:value="21329" calcext:value-type="float">
            <text:p>21329</text:p>
          </table:table-cell>
          <table:table-cell office:value-type="float" office:value="8640000" calcext:value-type="float">
            <text:p>8640000</text:p>
          </table:table-cell>
          <table:table-cell table:formula="of:=[.B1940]/[.C1940]" office:value-type="float" office:value="0.00246863425925926" calcext:value-type="float">
            <text:p>0,00246863425925926000</text:p>
          </table:table-cell>
          <table:table-cell table:formula="of:=[.D1941]-[.D1940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table:formula="of:=[.B1940]+11" office:value-type="float" office:value="21340" calcext:value-type="float">
            <text:p>21340</text:p>
          </table:table-cell>
          <table:table-cell office:value-type="float" office:value="8640000" calcext:value-type="float">
            <text:p>8640000</text:p>
          </table:table-cell>
          <table:table-cell table:formula="of:=[.B1941]/[.C1941]" office:value-type="float" office:value="0.00246990740740741" calcext:value-type="float">
            <text:p>0,00246990740740741000</text:p>
          </table:table-cell>
          <table:table-cell table:formula="of:=[.D1942]-[.D194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table:formula="of:=[.B1941]+11" office:value-type="float" office:value="21351" calcext:value-type="float">
            <text:p>21351</text:p>
          </table:table-cell>
          <table:table-cell office:value-type="float" office:value="8640000" calcext:value-type="float">
            <text:p>8640000</text:p>
          </table:table-cell>
          <table:table-cell table:formula="of:=[.B1942]/[.C1942]" office:value-type="float" office:value="0.00247118055555556" calcext:value-type="float">
            <text:p>0,00247118055555556000</text:p>
          </table:table-cell>
          <table:table-cell table:formula="of:=[.D1943]-[.D194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table:formula="of:=[.B1942]+11" office:value-type="float" office:value="21362" calcext:value-type="float">
            <text:p>21362</text:p>
          </table:table-cell>
          <table:table-cell office:value-type="float" office:value="8640000" calcext:value-type="float">
            <text:p>8640000</text:p>
          </table:table-cell>
          <table:table-cell table:formula="of:=[.B1943]/[.C1943]" office:value-type="float" office:value="0.0024724537037037" calcext:value-type="float">
            <text:p>0,00247245370370370000</text:p>
          </table:table-cell>
          <table:table-cell table:formula="of:=[.D1944]-[.D194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table:formula="of:=[.B1943]+11" office:value-type="float" office:value="21373" calcext:value-type="float">
            <text:p>21373</text:p>
          </table:table-cell>
          <table:table-cell office:value-type="float" office:value="8640000" calcext:value-type="float">
            <text:p>8640000</text:p>
          </table:table-cell>
          <table:table-cell table:formula="of:=[.B1944]/[.C1944]" office:value-type="float" office:value="0.00247372685185185" calcext:value-type="float">
            <text:p>0,00247372685185185000</text:p>
          </table:table-cell>
          <table:table-cell table:formula="of:=[.D1945]-[.D194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table:formula="of:=[.B1944]+11" office:value-type="float" office:value="21384" calcext:value-type="float">
            <text:p>21384</text:p>
          </table:table-cell>
          <table:table-cell office:value-type="float" office:value="8640000" calcext:value-type="float">
            <text:p>8640000</text:p>
          </table:table-cell>
          <table:table-cell table:formula="of:=[.B1945]/[.C1945]" office:value-type="float" office:value="0.002475" calcext:value-type="float">
            <text:p>0,00247500000000000000</text:p>
          </table:table-cell>
          <table:table-cell table:formula="of:=[.D1946]-[.D1945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table:formula="of:=[.B1945]+11" office:value-type="float" office:value="21395" calcext:value-type="float">
            <text:p>21395</text:p>
          </table:table-cell>
          <table:table-cell office:value-type="float" office:value="8640000" calcext:value-type="float">
            <text:p>8640000</text:p>
          </table:table-cell>
          <table:table-cell table:formula="of:=[.B1946]/[.C1946]" office:value-type="float" office:value="0.00247627314814815" calcext:value-type="float">
            <text:p>0,00247627314814815000</text:p>
          </table:table-cell>
          <table:table-cell table:formula="of:=[.D1947]-[.D194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table:formula="of:=[.B1946]+11" office:value-type="float" office:value="21406" calcext:value-type="float">
            <text:p>21406</text:p>
          </table:table-cell>
          <table:table-cell office:value-type="float" office:value="8640000" calcext:value-type="float">
            <text:p>8640000</text:p>
          </table:table-cell>
          <table:table-cell table:formula="of:=[.B1947]/[.C1947]" office:value-type="float" office:value="0.0024775462962963" calcext:value-type="float">
            <text:p>0,00247754629629630000</text:p>
          </table:table-cell>
          <table:table-cell table:formula="of:=[.D1948]-[.D194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table:formula="of:=[.B1947]+11" office:value-type="float" office:value="21417" calcext:value-type="float">
            <text:p>21417</text:p>
          </table:table-cell>
          <table:table-cell office:value-type="float" office:value="8640000" calcext:value-type="float">
            <text:p>8640000</text:p>
          </table:table-cell>
          <table:table-cell table:formula="of:=[.B1948]/[.C1948]" office:value-type="float" office:value="0.00247881944444444" calcext:value-type="float">
            <text:p>0,00247881944444444000</text:p>
          </table:table-cell>
          <table:table-cell table:formula="of:=[.D1949]-[.D194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table:formula="of:=[.B1948]+11" office:value-type="float" office:value="21428" calcext:value-type="float">
            <text:p>21428</text:p>
          </table:table-cell>
          <table:table-cell office:value-type="float" office:value="8640000" calcext:value-type="float">
            <text:p>8640000</text:p>
          </table:table-cell>
          <table:table-cell table:formula="of:=[.B1949]/[.C1949]" office:value-type="float" office:value="0.00248009259259259" calcext:value-type="float">
            <text:p>0,00248009259259259000</text:p>
          </table:table-cell>
          <table:table-cell table:formula="of:=[.D1950]-[.D1949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table:formula="of:=[.B1949]+11" office:value-type="float" office:value="21439" calcext:value-type="float">
            <text:p>21439</text:p>
          </table:table-cell>
          <table:table-cell office:value-type="float" office:value="8640000" calcext:value-type="float">
            <text:p>8640000</text:p>
          </table:table-cell>
          <table:table-cell table:formula="of:=[.B1950]/[.C1950]" office:value-type="float" office:value="0.00248136574074074" calcext:value-type="float">
            <text:p>0,00248136574074074000</text:p>
          </table:table-cell>
          <table:table-cell table:formula="of:=[.D1951]-[.D195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table:formula="of:=[.B1950]+11" office:value-type="float" office:value="21450" calcext:value-type="float">
            <text:p>21450</text:p>
          </table:table-cell>
          <table:table-cell office:value-type="float" office:value="8640000" calcext:value-type="float">
            <text:p>8640000</text:p>
          </table:table-cell>
          <table:table-cell table:formula="of:=[.B1951]/[.C1951]" office:value-type="float" office:value="0.00248263888888889" calcext:value-type="float">
            <text:p>0,00248263888888889000</text:p>
          </table:table-cell>
          <table:table-cell table:formula="of:=[.D1952]-[.D195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table:formula="of:=[.B1951]+11" office:value-type="float" office:value="21461" calcext:value-type="float">
            <text:p>21461</text:p>
          </table:table-cell>
          <table:table-cell office:value-type="float" office:value="8640000" calcext:value-type="float">
            <text:p>8640000</text:p>
          </table:table-cell>
          <table:table-cell table:formula="of:=[.B1952]/[.C1952]" office:value-type="float" office:value="0.00248391203703704" calcext:value-type="float">
            <text:p>0,00248391203703704000</text:p>
          </table:table-cell>
          <table:table-cell table:formula="of:=[.D1953]-[.D195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table:formula="of:=[.B1952]+11" office:value-type="float" office:value="21472" calcext:value-type="float">
            <text:p>21472</text:p>
          </table:table-cell>
          <table:table-cell office:value-type="float" office:value="8640000" calcext:value-type="float">
            <text:p>8640000</text:p>
          </table:table-cell>
          <table:table-cell table:formula="of:=[.B1953]/[.C1953]" office:value-type="float" office:value="0.00248518518518519" calcext:value-type="float">
            <text:p>0,00248518518518519000</text:p>
          </table:table-cell>
          <table:table-cell table:formula="of:=[.D1954]-[.D1953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table:formula="of:=[.B1953]+11" office:value-type="float" office:value="21483" calcext:value-type="float">
            <text:p>21483</text:p>
          </table:table-cell>
          <table:table-cell office:value-type="float" office:value="8640000" calcext:value-type="float">
            <text:p>8640000</text:p>
          </table:table-cell>
          <table:table-cell table:formula="of:=[.B1954]/[.C1954]" office:value-type="float" office:value="0.00248645833333333" calcext:value-type="float">
            <text:p>0,00248645833333333000</text:p>
          </table:table-cell>
          <table:table-cell table:formula="of:=[.D1955]-[.D195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table:formula="of:=[.B1954]+11" office:value-type="float" office:value="21494" calcext:value-type="float">
            <text:p>21494</text:p>
          </table:table-cell>
          <table:table-cell office:value-type="float" office:value="8640000" calcext:value-type="float">
            <text:p>8640000</text:p>
          </table:table-cell>
          <table:table-cell table:formula="of:=[.B1955]/[.C1955]" office:value-type="float" office:value="0.00248773148148148" calcext:value-type="float">
            <text:p>0,00248773148148148000</text:p>
          </table:table-cell>
          <table:table-cell table:formula="of:=[.D1956]-[.D195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table:formula="of:=[.B1955]+11" office:value-type="float" office:value="21505" calcext:value-type="float">
            <text:p>21505</text:p>
          </table:table-cell>
          <table:table-cell office:value-type="float" office:value="8640000" calcext:value-type="float">
            <text:p>8640000</text:p>
          </table:table-cell>
          <table:table-cell table:formula="of:=[.B1956]/[.C1956]" office:value-type="float" office:value="0.00248900462962963" calcext:value-type="float">
            <text:p>0,00248900462962963000</text:p>
          </table:table-cell>
          <table:table-cell table:formula="of:=[.D1957]-[.D195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table:formula="of:=[.B1956]+11" office:value-type="float" office:value="21516" calcext:value-type="float">
            <text:p>21516</text:p>
          </table:table-cell>
          <table:table-cell office:value-type="float" office:value="8640000" calcext:value-type="float">
            <text:p>8640000</text:p>
          </table:table-cell>
          <table:table-cell table:formula="of:=[.B1957]/[.C1957]" office:value-type="float" office:value="0.00249027777777778" calcext:value-type="float">
            <text:p>0,00249027777777778000</text:p>
          </table:table-cell>
          <table:table-cell table:formula="of:=[.D1958]-[.D195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table:formula="of:=[.B1957]+11" office:value-type="float" office:value="21527" calcext:value-type="float">
            <text:p>21527</text:p>
          </table:table-cell>
          <table:table-cell office:value-type="float" office:value="8640000" calcext:value-type="float">
            <text:p>8640000</text:p>
          </table:table-cell>
          <table:table-cell table:formula="of:=[.B1958]/[.C1958]" office:value-type="float" office:value="0.00249155092592593" calcext:value-type="float">
            <text:p>0,00249155092592593000</text:p>
          </table:table-cell>
          <table:table-cell table:formula="of:=[.D1959]-[.D1958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table:formula="of:=[.B1958]+11" office:value-type="float" office:value="21538" calcext:value-type="float">
            <text:p>21538</text:p>
          </table:table-cell>
          <table:table-cell office:value-type="float" office:value="8640000" calcext:value-type="float">
            <text:p>8640000</text:p>
          </table:table-cell>
          <table:table-cell table:formula="of:=[.B1959]/[.C1959]" office:value-type="float" office:value="0.00249282407407407" calcext:value-type="float">
            <text:p>0,00249282407407407000</text:p>
          </table:table-cell>
          <table:table-cell table:formula="of:=[.D1960]-[.D195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table:formula="of:=[.B1959]+11" office:value-type="float" office:value="21549" calcext:value-type="float">
            <text:p>21549</text:p>
          </table:table-cell>
          <table:table-cell office:value-type="float" office:value="8640000" calcext:value-type="float">
            <text:p>8640000</text:p>
          </table:table-cell>
          <table:table-cell table:formula="of:=[.B1960]/[.C1960]" office:value-type="float" office:value="0.00249409722222222" calcext:value-type="float">
            <text:p>0,00249409722222222000</text:p>
          </table:table-cell>
          <table:table-cell table:formula="of:=[.D1961]-[.D196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table:formula="of:=[.B1960]+11" office:value-type="float" office:value="21560" calcext:value-type="float">
            <text:p>21560</text:p>
          </table:table-cell>
          <table:table-cell office:value-type="float" office:value="8640000" calcext:value-type="float">
            <text:p>8640000</text:p>
          </table:table-cell>
          <table:table-cell table:formula="of:=[.B1961]/[.C1961]" office:value-type="float" office:value="0.00249537037037037" calcext:value-type="float">
            <text:p>0,00249537037037037000</text:p>
          </table:table-cell>
          <table:table-cell table:formula="of:=[.D1962]-[.D196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table:formula="of:=[.B1961]+11" office:value-type="float" office:value="21571" calcext:value-type="float">
            <text:p>21571</text:p>
          </table:table-cell>
          <table:table-cell office:value-type="float" office:value="8640000" calcext:value-type="float">
            <text:p>8640000</text:p>
          </table:table-cell>
          <table:table-cell table:formula="of:=[.B1962]/[.C1962]" office:value-type="float" office:value="0.00249664351851852" calcext:value-type="float">
            <text:p>0,00249664351851852000</text:p>
          </table:table-cell>
          <table:table-cell table:formula="of:=[.D1963]-[.D1962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table:formula="of:=[.B1962]+11" office:value-type="float" office:value="21582" calcext:value-type="float">
            <text:p>21582</text:p>
          </table:table-cell>
          <table:table-cell office:value-type="float" office:value="8640000" calcext:value-type="float">
            <text:p>8640000</text:p>
          </table:table-cell>
          <table:table-cell table:formula="of:=[.B1963]/[.C1963]" office:value-type="float" office:value="0.00249791666666667" calcext:value-type="float">
            <text:p>0,00249791666666667000</text:p>
          </table:table-cell>
          <table:table-cell table:formula="of:=[.D1964]-[.D196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table:formula="of:=[.B1963]+11" office:value-type="float" office:value="21593" calcext:value-type="float">
            <text:p>21593</text:p>
          </table:table-cell>
          <table:table-cell office:value-type="float" office:value="8640000" calcext:value-type="float">
            <text:p>8640000</text:p>
          </table:table-cell>
          <table:table-cell table:formula="of:=[.B1964]/[.C1964]" office:value-type="float" office:value="0.00249918981481481" calcext:value-type="float">
            <text:p>0,00249918981481481000</text:p>
          </table:table-cell>
          <table:table-cell table:formula="of:=[.D1965]-[.D196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table:formula="of:=[.B1964]+11" office:value-type="float" office:value="21604" calcext:value-type="float">
            <text:p>21604</text:p>
          </table:table-cell>
          <table:table-cell office:value-type="float" office:value="8640000" calcext:value-type="float">
            <text:p>8640000</text:p>
          </table:table-cell>
          <table:table-cell table:formula="of:=[.B1965]/[.C1965]" office:value-type="float" office:value="0.00250046296296296" calcext:value-type="float">
            <text:p>0,00250046296296296000</text:p>
          </table:table-cell>
          <table:table-cell table:formula="of:=[.D1966]-[.D196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table:formula="of:=[.B1965]+11" office:value-type="float" office:value="21615" calcext:value-type="float">
            <text:p>21615</text:p>
          </table:table-cell>
          <table:table-cell office:value-type="float" office:value="8640000" calcext:value-type="float">
            <text:p>8640000</text:p>
          </table:table-cell>
          <table:table-cell table:formula="of:=[.B1966]/[.C1966]" office:value-type="float" office:value="0.00250173611111111" calcext:value-type="float">
            <text:p>0,00250173611111111000</text:p>
          </table:table-cell>
          <table:table-cell table:formula="of:=[.D1967]-[.D1966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table:formula="of:=[.B1966]+11" office:value-type="float" office:value="21626" calcext:value-type="float">
            <text:p>21626</text:p>
          </table:table-cell>
          <table:table-cell office:value-type="float" office:value="8640000" calcext:value-type="float">
            <text:p>8640000</text:p>
          </table:table-cell>
          <table:table-cell table:formula="of:=[.B1967]/[.C1967]" office:value-type="float" office:value="0.00250300925925926" calcext:value-type="float">
            <text:p>0,00250300925925926000</text:p>
          </table:table-cell>
          <table:table-cell table:formula="of:=[.D1968]-[.D196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table:formula="of:=[.B1967]+11" office:value-type="float" office:value="21637" calcext:value-type="float">
            <text:p>21637</text:p>
          </table:table-cell>
          <table:table-cell office:value-type="float" office:value="8640000" calcext:value-type="float">
            <text:p>8640000</text:p>
          </table:table-cell>
          <table:table-cell table:formula="of:=[.B1968]/[.C1968]" office:value-type="float" office:value="0.00250428240740741" calcext:value-type="float">
            <text:p>0,00250428240740741000</text:p>
          </table:table-cell>
          <table:table-cell table:formula="of:=[.D1969]-[.D196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table:formula="of:=[.B1968]+11" office:value-type="float" office:value="21648" calcext:value-type="float">
            <text:p>21648</text:p>
          </table:table-cell>
          <table:table-cell office:value-type="float" office:value="8640000" calcext:value-type="float">
            <text:p>8640000</text:p>
          </table:table-cell>
          <table:table-cell table:formula="of:=[.B1969]/[.C1969]" office:value-type="float" office:value="0.00250555555555556" calcext:value-type="float">
            <text:p>0,00250555555555556000</text:p>
          </table:table-cell>
          <table:table-cell table:formula="of:=[.D1970]-[.D196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table:formula="of:=[.B1969]+11" office:value-type="float" office:value="21659" calcext:value-type="float">
            <text:p>21659</text:p>
          </table:table-cell>
          <table:table-cell office:value-type="float" office:value="8640000" calcext:value-type="float">
            <text:p>8640000</text:p>
          </table:table-cell>
          <table:table-cell table:formula="of:=[.B1970]/[.C1970]" office:value-type="float" office:value="0.0025068287037037" calcext:value-type="float">
            <text:p>0,00250682870370370000</text:p>
          </table:table-cell>
          <table:table-cell table:formula="of:=[.D1971]-[.D1970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formula="of:=[.B1970]+11" office:value-type="float" office:value="21670" calcext:value-type="float">
            <text:p>21670</text:p>
          </table:table-cell>
          <table:table-cell office:value-type="float" office:value="8640000" calcext:value-type="float">
            <text:p>8640000</text:p>
          </table:table-cell>
          <table:table-cell table:formula="of:=[.B1971]/[.C1971]" office:value-type="float" office:value="0.00250810185185185" calcext:value-type="float">
            <text:p>0,00250810185185185000</text:p>
          </table:table-cell>
          <table:table-cell table:formula="of:=[.D1972]-[.D197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table:formula="of:=[.B1971]+11" office:value-type="float" office:value="21681" calcext:value-type="float">
            <text:p>21681</text:p>
          </table:table-cell>
          <table:table-cell office:value-type="float" office:value="8640000" calcext:value-type="float">
            <text:p>8640000</text:p>
          </table:table-cell>
          <table:table-cell table:formula="of:=[.B1972]/[.C1972]" office:value-type="float" office:value="0.002509375" calcext:value-type="float">
            <text:p>0,00250937500000000000</text:p>
          </table:table-cell>
          <table:table-cell table:formula="of:=[.D1973]-[.D197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table:formula="of:=[.B1972]+11" office:value-type="float" office:value="21692" calcext:value-type="float">
            <text:p>21692</text:p>
          </table:table-cell>
          <table:table-cell office:value-type="float" office:value="8640000" calcext:value-type="float">
            <text:p>8640000</text:p>
          </table:table-cell>
          <table:table-cell table:formula="of:=[.B1973]/[.C1973]" office:value-type="float" office:value="0.00251064814814815" calcext:value-type="float">
            <text:p>0,00251064814814815000</text:p>
          </table:table-cell>
          <table:table-cell table:formula="of:=[.D1974]-[.D197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table:formula="of:=[.B1973]+11" office:value-type="float" office:value="21703" calcext:value-type="float">
            <text:p>21703</text:p>
          </table:table-cell>
          <table:table-cell office:value-type="float" office:value="8640000" calcext:value-type="float">
            <text:p>8640000</text:p>
          </table:table-cell>
          <table:table-cell table:formula="of:=[.B1974]/[.C1974]" office:value-type="float" office:value="0.0025119212962963" calcext:value-type="float">
            <text:p>0,00251192129629630000</text:p>
          </table:table-cell>
          <table:table-cell table:formula="of:=[.D1975]-[.D197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table:formula="of:=[.B1974]+11" office:value-type="float" office:value="21714" calcext:value-type="float">
            <text:p>21714</text:p>
          </table:table-cell>
          <table:table-cell office:value-type="float" office:value="8640000" calcext:value-type="float">
            <text:p>8640000</text:p>
          </table:table-cell>
          <table:table-cell table:formula="of:=[.B1975]/[.C1975]" office:value-type="float" office:value="0.00251319444444444" calcext:value-type="float">
            <text:p>0,00251319444444444000</text:p>
          </table:table-cell>
          <table:table-cell table:formula="of:=[.D1976]-[.D1975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table:formula="of:=[.B1975]+11" office:value-type="float" office:value="21725" calcext:value-type="float">
            <text:p>21725</text:p>
          </table:table-cell>
          <table:table-cell office:value-type="float" office:value="8640000" calcext:value-type="float">
            <text:p>8640000</text:p>
          </table:table-cell>
          <table:table-cell table:formula="of:=[.B1976]/[.C1976]" office:value-type="float" office:value="0.00251446759259259" calcext:value-type="float">
            <text:p>0,00251446759259259000</text:p>
          </table:table-cell>
          <table:table-cell table:formula="of:=[.D1977]-[.D197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[.B1976]+11" office:value-type="float" office:value="21736" calcext:value-type="float">
            <text:p>21736</text:p>
          </table:table-cell>
          <table:table-cell office:value-type="float" office:value="8640000" calcext:value-type="float">
            <text:p>8640000</text:p>
          </table:table-cell>
          <table:table-cell table:formula="of:=[.B1977]/[.C1977]" office:value-type="float" office:value="0.00251574074074074" calcext:value-type="float">
            <text:p>0,00251574074074074000</text:p>
          </table:table-cell>
          <table:table-cell table:formula="of:=[.D1978]-[.D197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[.B1977]+11" office:value-type="float" office:value="21747" calcext:value-type="float">
            <text:p>21747</text:p>
          </table:table-cell>
          <table:table-cell office:value-type="float" office:value="8640000" calcext:value-type="float">
            <text:p>8640000</text:p>
          </table:table-cell>
          <table:table-cell table:formula="of:=[.B1978]/[.C1978]" office:value-type="float" office:value="0.00251701388888889" calcext:value-type="float">
            <text:p>0,00251701388888889000</text:p>
          </table:table-cell>
          <table:table-cell table:formula="of:=[.D1979]-[.D197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[.B1978]+11" office:value-type="float" office:value="21758" calcext:value-type="float">
            <text:p>21758</text:p>
          </table:table-cell>
          <table:table-cell office:value-type="float" office:value="8640000" calcext:value-type="float">
            <text:p>8640000</text:p>
          </table:table-cell>
          <table:table-cell table:formula="of:=[.B1979]/[.C1979]" office:value-type="float" office:value="0.00251828703703704" calcext:value-type="float">
            <text:p>0,00251828703703704000</text:p>
          </table:table-cell>
          <table:table-cell table:formula="of:=[.D1980]-[.D1979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[.B1979]+11" office:value-type="float" office:value="21769" calcext:value-type="float">
            <text:p>21769</text:p>
          </table:table-cell>
          <table:table-cell office:value-type="float" office:value="8640000" calcext:value-type="float">
            <text:p>8640000</text:p>
          </table:table-cell>
          <table:table-cell table:formula="of:=[.B1980]/[.C1980]" office:value-type="float" office:value="0.00251956018518519" calcext:value-type="float">
            <text:p>0,00251956018518519000</text:p>
          </table:table-cell>
          <table:table-cell table:formula="of:=[.D1981]-[.D198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[.B1980]+11" office:value-type="float" office:value="21780" calcext:value-type="float">
            <text:p>21780</text:p>
          </table:table-cell>
          <table:table-cell office:value-type="float" office:value="8640000" calcext:value-type="float">
            <text:p>8640000</text:p>
          </table:table-cell>
          <table:table-cell table:formula="of:=[.B1981]/[.C1981]" office:value-type="float" office:value="0.00252083333333333" calcext:value-type="float">
            <text:p>0,00252083333333333000</text:p>
          </table:table-cell>
          <table:table-cell table:formula="of:=[.D1982]-[.D198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[.B1981]+11" office:value-type="float" office:value="21791" calcext:value-type="float">
            <text:p>21791</text:p>
          </table:table-cell>
          <table:table-cell office:value-type="float" office:value="8640000" calcext:value-type="float">
            <text:p>8640000</text:p>
          </table:table-cell>
          <table:table-cell table:formula="of:=[.B1982]/[.C1982]" office:value-type="float" office:value="0.00252210648148148" calcext:value-type="float">
            <text:p>0,00252210648148148000</text:p>
          </table:table-cell>
          <table:table-cell table:formula="of:=[.D1983]-[.D198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[.B1982]+11" office:value-type="float" office:value="21802" calcext:value-type="float">
            <text:p>21802</text:p>
          </table:table-cell>
          <table:table-cell office:value-type="float" office:value="8640000" calcext:value-type="float">
            <text:p>8640000</text:p>
          </table:table-cell>
          <table:table-cell table:formula="of:=[.B1983]/[.C1983]" office:value-type="float" office:value="0.00252337962962963" calcext:value-type="float">
            <text:p>0,00252337962962963000</text:p>
          </table:table-cell>
          <table:table-cell table:formula="of:=[.D1984]-[.D1983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table:formula="of:=[.B1983]+11" office:value-type="float" office:value="21813" calcext:value-type="float">
            <text:p>21813</text:p>
          </table:table-cell>
          <table:table-cell office:value-type="float" office:value="8640000" calcext:value-type="float">
            <text:p>8640000</text:p>
          </table:table-cell>
          <table:table-cell table:formula="of:=[.B1984]/[.C1984]" office:value-type="float" office:value="0.00252465277777778" calcext:value-type="float">
            <text:p>0,00252465277777778000</text:p>
          </table:table-cell>
          <table:table-cell table:formula="of:=[.D1985]-[.D198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[.B1984]+11" office:value-type="float" office:value="21824" calcext:value-type="float">
            <text:p>21824</text:p>
          </table:table-cell>
          <table:table-cell office:value-type="float" office:value="8640000" calcext:value-type="float">
            <text:p>8640000</text:p>
          </table:table-cell>
          <table:table-cell table:formula="of:=[.B1985]/[.C1985]" office:value-type="float" office:value="0.00252592592592593" calcext:value-type="float">
            <text:p>0,00252592592592593000</text:p>
          </table:table-cell>
          <table:table-cell table:formula="of:=[.D1986]-[.D198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[.B1985]+11" office:value-type="float" office:value="21835" calcext:value-type="float">
            <text:p>21835</text:p>
          </table:table-cell>
          <table:table-cell office:value-type="float" office:value="8640000" calcext:value-type="float">
            <text:p>8640000</text:p>
          </table:table-cell>
          <table:table-cell table:formula="of:=[.B1986]/[.C1986]" office:value-type="float" office:value="0.00252719907407407" calcext:value-type="float">
            <text:p>0,00252719907407407000</text:p>
          </table:table-cell>
          <table:table-cell table:formula="of:=[.D1987]-[.D198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[.B1986]+11" office:value-type="float" office:value="21846" calcext:value-type="float">
            <text:p>21846</text:p>
          </table:table-cell>
          <table:table-cell office:value-type="float" office:value="8640000" calcext:value-type="float">
            <text:p>8640000</text:p>
          </table:table-cell>
          <table:table-cell table:formula="of:=[.B1987]/[.C1987]" office:value-type="float" office:value="0.00252847222222222" calcext:value-type="float">
            <text:p>0,00252847222222222000</text:p>
          </table:table-cell>
          <table:table-cell table:formula="of:=[.D1988]-[.D198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[.B1987]+11" office:value-type="float" office:value="21857" calcext:value-type="float">
            <text:p>21857</text:p>
          </table:table-cell>
          <table:table-cell office:value-type="float" office:value="8640000" calcext:value-type="float">
            <text:p>8640000</text:p>
          </table:table-cell>
          <table:table-cell table:formula="of:=[.B1988]/[.C1988]" office:value-type="float" office:value="0.00252974537037037" calcext:value-type="float">
            <text:p>0,00252974537037037000</text:p>
          </table:table-cell>
          <table:table-cell table:formula="of:=[.D1989]-[.D1988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[.B1988]+11" office:value-type="float" office:value="21868" calcext:value-type="float">
            <text:p>21868</text:p>
          </table:table-cell>
          <table:table-cell office:value-type="float" office:value="8640000" calcext:value-type="float">
            <text:p>8640000</text:p>
          </table:table-cell>
          <table:table-cell table:formula="of:=[.B1989]/[.C1989]" office:value-type="float" office:value="0.00253101851851852" calcext:value-type="float">
            <text:p>0,00253101851851852000</text:p>
          </table:table-cell>
          <table:table-cell table:formula="of:=[.D1990]-[.D198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[.B1989]+11" office:value-type="float" office:value="21879" calcext:value-type="float">
            <text:p>21879</text:p>
          </table:table-cell>
          <table:table-cell office:value-type="float" office:value="8640000" calcext:value-type="float">
            <text:p>8640000</text:p>
          </table:table-cell>
          <table:table-cell table:formula="of:=[.B1990]/[.C1990]" office:value-type="float" office:value="0.00253229166666667" calcext:value-type="float">
            <text:p>0,00253229166666667000</text:p>
          </table:table-cell>
          <table:table-cell table:formula="of:=[.D1991]-[.D199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.B1990]+11" office:value-type="float" office:value="21890" calcext:value-type="float">
            <text:p>21890</text:p>
          </table:table-cell>
          <table:table-cell office:value-type="float" office:value="8640000" calcext:value-type="float">
            <text:p>8640000</text:p>
          </table:table-cell>
          <table:table-cell table:formula="of:=[.B1991]/[.C1991]" office:value-type="float" office:value="0.00253356481481482" calcext:value-type="float">
            <text:p>0,00253356481481482000</text:p>
          </table:table-cell>
          <table:table-cell table:formula="of:=[.D1992]-[.D199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[.B1991]+11" office:value-type="float" office:value="21901" calcext:value-type="float">
            <text:p>21901</text:p>
          </table:table-cell>
          <table:table-cell office:value-type="float" office:value="8640000" calcext:value-type="float">
            <text:p>8640000</text:p>
          </table:table-cell>
          <table:table-cell table:formula="of:=[.B1992]/[.C1992]" office:value-type="float" office:value="0.00253483796296296" calcext:value-type="float">
            <text:p>0,00253483796296296000</text:p>
          </table:table-cell>
          <table:table-cell table:formula="of:=[.D1993]-[.D1992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.B1992]+11" office:value-type="float" office:value="21912" calcext:value-type="float">
            <text:p>21912</text:p>
          </table:table-cell>
          <table:table-cell office:value-type="float" office:value="8640000" calcext:value-type="float">
            <text:p>8640000</text:p>
          </table:table-cell>
          <table:table-cell table:formula="of:=[.B1993]/[.C1993]" office:value-type="float" office:value="0.00253611111111111" calcext:value-type="float">
            <text:p>0,00253611111111111000</text:p>
          </table:table-cell>
          <table:table-cell table:formula="of:=[.D1994]-[.D199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[.B1993]+11" office:value-type="float" office:value="21923" calcext:value-type="float">
            <text:p>21923</text:p>
          </table:table-cell>
          <table:table-cell office:value-type="float" office:value="8640000" calcext:value-type="float">
            <text:p>8640000</text:p>
          </table:table-cell>
          <table:table-cell table:formula="of:=[.B1994]/[.C1994]" office:value-type="float" office:value="0.00253738425925926" calcext:value-type="float">
            <text:p>0,00253738425925926000</text:p>
          </table:table-cell>
          <table:table-cell table:formula="of:=[.D1995]-[.D199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[.B1994]+11" office:value-type="float" office:value="21934" calcext:value-type="float">
            <text:p>21934</text:p>
          </table:table-cell>
          <table:table-cell office:value-type="float" office:value="8640000" calcext:value-type="float">
            <text:p>8640000</text:p>
          </table:table-cell>
          <table:table-cell table:formula="of:=[.B1995]/[.C1995]" office:value-type="float" office:value="0.00253865740740741" calcext:value-type="float">
            <text:p>0,00253865740740741000</text:p>
          </table:table-cell>
          <table:table-cell table:formula="of:=[.D1996]-[.D199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[.B1995]+11" office:value-type="float" office:value="21945" calcext:value-type="float">
            <text:p>21945</text:p>
          </table:table-cell>
          <table:table-cell office:value-type="float" office:value="8640000" calcext:value-type="float">
            <text:p>8640000</text:p>
          </table:table-cell>
          <table:table-cell table:formula="of:=[.B1996]/[.C1996]" office:value-type="float" office:value="0.00253993055555556" calcext:value-type="float">
            <text:p>0,00253993055555556000</text:p>
          </table:table-cell>
          <table:table-cell table:formula="of:=[.D1997]-[.D1996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.B1996]+11" office:value-type="float" office:value="21956" calcext:value-type="float">
            <text:p>21956</text:p>
          </table:table-cell>
          <table:table-cell office:value-type="float" office:value="8640000" calcext:value-type="float">
            <text:p>8640000</text:p>
          </table:table-cell>
          <table:table-cell table:formula="of:=[.B1997]/[.C1997]" office:value-type="float" office:value="0.0025412037037037" calcext:value-type="float">
            <text:p>0,00254120370370370000</text:p>
          </table:table-cell>
          <table:table-cell table:formula="of:=[.D1998]-[.D199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.B1997]+11" office:value-type="float" office:value="21967" calcext:value-type="float">
            <text:p>21967</text:p>
          </table:table-cell>
          <table:table-cell office:value-type="float" office:value="8640000" calcext:value-type="float">
            <text:p>8640000</text:p>
          </table:table-cell>
          <table:table-cell table:formula="of:=[.B1998]/[.C1998]" office:value-type="float" office:value="0.00254247685185185" calcext:value-type="float">
            <text:p>0,00254247685185185000</text:p>
          </table:table-cell>
          <table:table-cell table:formula="of:=[.D1999]-[.D199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.B1998]+11" office:value-type="float" office:value="21978" calcext:value-type="float">
            <text:p>21978</text:p>
          </table:table-cell>
          <table:table-cell office:value-type="float" office:value="8640000" calcext:value-type="float">
            <text:p>8640000</text:p>
          </table:table-cell>
          <table:table-cell table:formula="of:=[.B1999]/[.C1999]" office:value-type="float" office:value="0.00254375" calcext:value-type="float">
            <text:p>0,00254375000000000000</text:p>
          </table:table-cell>
          <table:table-cell table:formula="of:=[.D2000]-[.D199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.B1999]+11" office:value-type="float" office:value="21989" calcext:value-type="float">
            <text:p>21989</text:p>
          </table:table-cell>
          <table:table-cell office:value-type="float" office:value="8640000" calcext:value-type="float">
            <text:p>8640000</text:p>
          </table:table-cell>
          <table:table-cell table:formula="of:=[.B2000]/[.C2000]" office:value-type="float" office:value="0.00254502314814815" calcext:value-type="float">
            <text:p>0,00254502314814815000</text:p>
          </table:table-cell>
          <table:table-cell table:formula="of:=[.D2001]-[.D200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B2000]+11" office:value-type="float" office:value="22000" calcext:value-type="float">
            <text:p>22000</text:p>
          </table:table-cell>
          <table:table-cell office:value-type="float" office:value="8640000" calcext:value-type="float">
            <text:p>8640000</text:p>
          </table:table-cell>
          <table:table-cell table:formula="of:=[.B2001]/[.C2001]" office:value-type="float" office:value="0.0025462962962963" calcext:value-type="float">
            <text:p>0,00254629629629630000</text:p>
          </table:table-cell>
          <table:table-cell table:formula="of:=[.D2002]-[.D2001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.B2001]+11" office:value-type="float" office:value="22011" calcext:value-type="float">
            <text:p>22011</text:p>
          </table:table-cell>
          <table:table-cell office:value-type="float" office:value="8640000" calcext:value-type="float">
            <text:p>8640000</text:p>
          </table:table-cell>
          <table:table-cell table:formula="of:=[.B2002]/[.C2002]" office:value-type="float" office:value="0.00254756944444444" calcext:value-type="float">
            <text:p>0,00254756944444444000</text:p>
          </table:table-cell>
          <table:table-cell table:formula="of:=[.D2003]-[.D200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.B2002]+11" office:value-type="float" office:value="22022" calcext:value-type="float">
            <text:p>22022</text:p>
          </table:table-cell>
          <table:table-cell office:value-type="float" office:value="8640000" calcext:value-type="float">
            <text:p>8640000</text:p>
          </table:table-cell>
          <table:table-cell table:formula="of:=[.B2003]/[.C2003]" office:value-type="float" office:value="0.00254884259259259" calcext:value-type="float">
            <text:p>0,00254884259259259000</text:p>
          </table:table-cell>
          <table:table-cell table:formula="of:=[.D2004]-[.D200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.B2003]+11" office:value-type="float" office:value="22033" calcext:value-type="float">
            <text:p>22033</text:p>
          </table:table-cell>
          <table:table-cell office:value-type="float" office:value="8640000" calcext:value-type="float">
            <text:p>8640000</text:p>
          </table:table-cell>
          <table:table-cell table:formula="of:=[.B2004]/[.C2004]" office:value-type="float" office:value="0.00255011574074074" calcext:value-type="float">
            <text:p>0,00255011574074074000</text:p>
          </table:table-cell>
          <table:table-cell table:formula="of:=[.D2005]-[.D200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.B2004]+11" office:value-type="float" office:value="22044" calcext:value-type="float">
            <text:p>22044</text:p>
          </table:table-cell>
          <table:table-cell office:value-type="float" office:value="8640000" calcext:value-type="float">
            <text:p>8640000</text:p>
          </table:table-cell>
          <table:table-cell table:formula="of:=[.B2005]/[.C2005]" office:value-type="float" office:value="0.00255138888888889" calcext:value-type="float">
            <text:p>0,00255138888888889000</text:p>
          </table:table-cell>
          <table:table-cell table:formula="of:=[.D2006]-[.D2005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.B2005]+11" office:value-type="float" office:value="22055" calcext:value-type="float">
            <text:p>22055</text:p>
          </table:table-cell>
          <table:table-cell office:value-type="float" office:value="8640000" calcext:value-type="float">
            <text:p>8640000</text:p>
          </table:table-cell>
          <table:table-cell table:formula="of:=[.B2006]/[.C2006]" office:value-type="float" office:value="0.00255266203703704" calcext:value-type="float">
            <text:p>0,00255266203703704000</text:p>
          </table:table-cell>
          <table:table-cell table:formula="of:=[.D2007]-[.D200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.B2006]+11" office:value-type="float" office:value="22066" calcext:value-type="float">
            <text:p>22066</text:p>
          </table:table-cell>
          <table:table-cell office:value-type="float" office:value="8640000" calcext:value-type="float">
            <text:p>8640000</text:p>
          </table:table-cell>
          <table:table-cell table:formula="of:=[.B2007]/[.C2007]" office:value-type="float" office:value="0.00255393518518519" calcext:value-type="float">
            <text:p>0,00255393518518519000</text:p>
          </table:table-cell>
          <table:table-cell table:formula="of:=[.D2008]-[.D200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.B2007]+11" office:value-type="float" office:value="22077" calcext:value-type="float">
            <text:p>22077</text:p>
          </table:table-cell>
          <table:table-cell office:value-type="float" office:value="8640000" calcext:value-type="float">
            <text:p>8640000</text:p>
          </table:table-cell>
          <table:table-cell table:formula="of:=[.B2008]/[.C2008]" office:value-type="float" office:value="0.00255520833333333" calcext:value-type="float">
            <text:p>0,00255520833333333000</text:p>
          </table:table-cell>
          <table:table-cell table:formula="of:=[.D2009]-[.D200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.B2008]+11" office:value-type="float" office:value="22088" calcext:value-type="float">
            <text:p>22088</text:p>
          </table:table-cell>
          <table:table-cell office:value-type="float" office:value="8640000" calcext:value-type="float">
            <text:p>8640000</text:p>
          </table:table-cell>
          <table:table-cell table:formula="of:=[.B2009]/[.C2009]" office:value-type="float" office:value="0.00255648148148148" calcext:value-type="float">
            <text:p>0,00255648148148148000</text:p>
          </table:table-cell>
          <table:table-cell table:formula="of:=[.D2010]-[.D2009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.B2009]+11" office:value-type="float" office:value="22099" calcext:value-type="float">
            <text:p>22099</text:p>
          </table:table-cell>
          <table:table-cell office:value-type="float" office:value="8640000" calcext:value-type="float">
            <text:p>8640000</text:p>
          </table:table-cell>
          <table:table-cell table:formula="of:=[.B2010]/[.C2010]" office:value-type="float" office:value="0.00255775462962963" calcext:value-type="float">
            <text:p>0,00255775462962963000</text:p>
          </table:table-cell>
          <table:table-cell table:formula="of:=[.D2011]-[.D201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.B2010]+11" office:value-type="float" office:value="22110" calcext:value-type="float">
            <text:p>22110</text:p>
          </table:table-cell>
          <table:table-cell office:value-type="float" office:value="8640000" calcext:value-type="float">
            <text:p>8640000</text:p>
          </table:table-cell>
          <table:table-cell table:formula="of:=[.B2011]/[.C2011]" office:value-type="float" office:value="0.00255902777777778" calcext:value-type="float">
            <text:p>0,00255902777777778000</text:p>
          </table:table-cell>
          <table:table-cell table:formula="of:=[.D2012]-[.D201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.B2011]+11" office:value-type="float" office:value="22121" calcext:value-type="float">
            <text:p>22121</text:p>
          </table:table-cell>
          <table:table-cell office:value-type="float" office:value="8640000" calcext:value-type="float">
            <text:p>8640000</text:p>
          </table:table-cell>
          <table:table-cell table:formula="of:=[.B2012]/[.C2012]" office:value-type="float" office:value="0.00256030092592593" calcext:value-type="float">
            <text:p>0,00256030092592593000</text:p>
          </table:table-cell>
          <table:table-cell table:formula="of:=[.D2013]-[.D201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.B2012]+11" office:value-type="float" office:value="22132" calcext:value-type="float">
            <text:p>22132</text:p>
          </table:table-cell>
          <table:table-cell office:value-type="float" office:value="8640000" calcext:value-type="float">
            <text:p>8640000</text:p>
          </table:table-cell>
          <table:table-cell table:formula="of:=[.B2013]/[.C2013]" office:value-type="float" office:value="0.00256157407407407" calcext:value-type="float">
            <text:p>0,00256157407407407000</text:p>
          </table:table-cell>
          <table:table-cell table:formula="of:=[.D2014]-[.D201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.B2013]+11" office:value-type="float" office:value="22143" calcext:value-type="float">
            <text:p>22143</text:p>
          </table:table-cell>
          <table:table-cell office:value-type="float" office:value="8640000" calcext:value-type="float">
            <text:p>8640000</text:p>
          </table:table-cell>
          <table:table-cell table:formula="of:=[.B2014]/[.C2014]" office:value-type="float" office:value="0.00256284722222222" calcext:value-type="float">
            <text:p>0,00256284722222222000</text:p>
          </table:table-cell>
          <table:table-cell table:formula="of:=[.D2015]-[.D2014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.B2014]+11" office:value-type="float" office:value="22154" calcext:value-type="float">
            <text:p>22154</text:p>
          </table:table-cell>
          <table:table-cell office:value-type="float" office:value="8640000" calcext:value-type="float">
            <text:p>8640000</text:p>
          </table:table-cell>
          <table:table-cell table:formula="of:=[.B2015]/[.C2015]" office:value-type="float" office:value="0.00256412037037037" calcext:value-type="float">
            <text:p>0,00256412037037037000</text:p>
          </table:table-cell>
          <table:table-cell table:formula="of:=[.D2016]-[.D201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.B2015]+11" office:value-type="float" office:value="22165" calcext:value-type="float">
            <text:p>22165</text:p>
          </table:table-cell>
          <table:table-cell office:value-type="float" office:value="8640000" calcext:value-type="float">
            <text:p>8640000</text:p>
          </table:table-cell>
          <table:table-cell table:formula="of:=[.B2016]/[.C2016]" office:value-type="float" office:value="0.00256539351851852" calcext:value-type="float">
            <text:p>0,00256539351851852000</text:p>
          </table:table-cell>
          <table:table-cell table:formula="of:=[.D2017]-[.D201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[.B2016]+11" office:value-type="float" office:value="22176" calcext:value-type="float">
            <text:p>22176</text:p>
          </table:table-cell>
          <table:table-cell office:value-type="float" office:value="8640000" calcext:value-type="float">
            <text:p>8640000</text:p>
          </table:table-cell>
          <table:table-cell table:formula="of:=[.B2017]/[.C2017]" office:value-type="float" office:value="0.00256666666666667" calcext:value-type="float">
            <text:p>0,00256666666666667000</text:p>
          </table:table-cell>
          <table:table-cell table:formula="of:=[.D2018]-[.D201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[.B2017]+11" office:value-type="float" office:value="22187" calcext:value-type="float">
            <text:p>22187</text:p>
          </table:table-cell>
          <table:table-cell office:value-type="float" office:value="8640000" calcext:value-type="float">
            <text:p>8640000</text:p>
          </table:table-cell>
          <table:table-cell table:formula="of:=[.B2018]/[.C2018]" office:value-type="float" office:value="0.00256793981481482" calcext:value-type="float">
            <text:p>0,00256793981481482000</text:p>
          </table:table-cell>
          <table:table-cell table:formula="of:=[.D2019]-[.D2018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formula="of:=[.B2018]+11" office:value-type="float" office:value="22198" calcext:value-type="float">
            <text:p>22198</text:p>
          </table:table-cell>
          <table:table-cell office:value-type="float" office:value="8640000" calcext:value-type="float">
            <text:p>8640000</text:p>
          </table:table-cell>
          <table:table-cell table:formula="of:=[.B2019]/[.C2019]" office:value-type="float" office:value="0.00256921296296296" calcext:value-type="float">
            <text:p>0,00256921296296296000</text:p>
          </table:table-cell>
          <table:table-cell table:formula="of:=[.D2020]-[.D201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formula="of:=[.B2019]+11" office:value-type="float" office:value="22209" calcext:value-type="float">
            <text:p>22209</text:p>
          </table:table-cell>
          <table:table-cell office:value-type="float" office:value="8640000" calcext:value-type="float">
            <text:p>8640000</text:p>
          </table:table-cell>
          <table:table-cell table:formula="of:=[.B2020]/[.C2020]" office:value-type="float" office:value="0.00257048611111111" calcext:value-type="float">
            <text:p>0,00257048611111111000</text:p>
          </table:table-cell>
          <table:table-cell table:formula="of:=[.D2021]-[.D202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formula="of:=[.B2020]+11" office:value-type="float" office:value="22220" calcext:value-type="float">
            <text:p>22220</text:p>
          </table:table-cell>
          <table:table-cell office:value-type="float" office:value="8640000" calcext:value-type="float">
            <text:p>8640000</text:p>
          </table:table-cell>
          <table:table-cell table:formula="of:=[.B2021]/[.C2021]" office:value-type="float" office:value="0.00257175925925926" calcext:value-type="float">
            <text:p>0,00257175925925926000</text:p>
          </table:table-cell>
          <table:table-cell table:formula="of:=[.D2022]-[.D202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formula="of:=[.B2021]+11" office:value-type="float" office:value="22231" calcext:value-type="float">
            <text:p>22231</text:p>
          </table:table-cell>
          <table:table-cell office:value-type="float" office:value="8640000" calcext:value-type="float">
            <text:p>8640000</text:p>
          </table:table-cell>
          <table:table-cell table:formula="of:=[.B2022]/[.C2022]" office:value-type="float" office:value="0.00257303240740741" calcext:value-type="float">
            <text:p>0,00257303240740741000</text:p>
          </table:table-cell>
          <table:table-cell table:formula="of:=[.D2023]-[.D2022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table:formula="of:=[.B2022]+11" office:value-type="float" office:value="22242" calcext:value-type="float">
            <text:p>22242</text:p>
          </table:table-cell>
          <table:table-cell office:value-type="float" office:value="8640000" calcext:value-type="float">
            <text:p>8640000</text:p>
          </table:table-cell>
          <table:table-cell table:formula="of:=[.B2023]/[.C2023]" office:value-type="float" office:value="0.00257430555555556" calcext:value-type="float">
            <text:p>0,00257430555555556000</text:p>
          </table:table-cell>
          <table:table-cell table:formula="of:=[.D2024]-[.D202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table:formula="of:=[.B2023]+11" office:value-type="float" office:value="22253" calcext:value-type="float">
            <text:p>22253</text:p>
          </table:table-cell>
          <table:table-cell office:value-type="float" office:value="8640000" calcext:value-type="float">
            <text:p>8640000</text:p>
          </table:table-cell>
          <table:table-cell table:formula="of:=[.B2024]/[.C2024]" office:value-type="float" office:value="0.0025755787037037" calcext:value-type="float">
            <text:p>0,00257557870370370000</text:p>
          </table:table-cell>
          <table:table-cell table:formula="of:=[.D2025]-[.D202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table:formula="of:=[.B2024]+11" office:value-type="float" office:value="22264" calcext:value-type="float">
            <text:p>22264</text:p>
          </table:table-cell>
          <table:table-cell office:value-type="float" office:value="8640000" calcext:value-type="float">
            <text:p>8640000</text:p>
          </table:table-cell>
          <table:table-cell table:formula="of:=[.B2025]/[.C2025]" office:value-type="float" office:value="0.00257685185185185" calcext:value-type="float">
            <text:p>0,00257685185185185000</text:p>
          </table:table-cell>
          <table:table-cell table:formula="of:=[.D2026]-[.D202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table:formula="of:=[.B2025]+11" office:value-type="float" office:value="22275" calcext:value-type="float">
            <text:p>22275</text:p>
          </table:table-cell>
          <table:table-cell office:value-type="float" office:value="8640000" calcext:value-type="float">
            <text:p>8640000</text:p>
          </table:table-cell>
          <table:table-cell table:formula="of:=[.B2026]/[.C2026]" office:value-type="float" office:value="0.002578125" calcext:value-type="float">
            <text:p>0,00257812500000000000</text:p>
          </table:table-cell>
          <table:table-cell table:formula="of:=[.D2027]-[.D2026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table:formula="of:=[.B2026]+11" office:value-type="float" office:value="22286" calcext:value-type="float">
            <text:p>22286</text:p>
          </table:table-cell>
          <table:table-cell office:value-type="float" office:value="8640000" calcext:value-type="float">
            <text:p>8640000</text:p>
          </table:table-cell>
          <table:table-cell table:formula="of:=[.B2027]/[.C2027]" office:value-type="float" office:value="0.00257939814814815" calcext:value-type="float">
            <text:p>0,00257939814814815000</text:p>
          </table:table-cell>
          <table:table-cell table:formula="of:=[.D2028]-[.D202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table:formula="of:=[.B2027]+11" office:value-type="float" office:value="22297" calcext:value-type="float">
            <text:p>22297</text:p>
          </table:table-cell>
          <table:table-cell office:value-type="float" office:value="8640000" calcext:value-type="float">
            <text:p>8640000</text:p>
          </table:table-cell>
          <table:table-cell table:formula="of:=[.B2028]/[.C2028]" office:value-type="float" office:value="0.0025806712962963" calcext:value-type="float">
            <text:p>0,00258067129629630000</text:p>
          </table:table-cell>
          <table:table-cell table:formula="of:=[.D2029]-[.D202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table:formula="of:=[.B2028]+11" office:value-type="float" office:value="22308" calcext:value-type="float">
            <text:p>22308</text:p>
          </table:table-cell>
          <table:table-cell office:value-type="float" office:value="8640000" calcext:value-type="float">
            <text:p>8640000</text:p>
          </table:table-cell>
          <table:table-cell table:formula="of:=[.B2029]/[.C2029]" office:value-type="float" office:value="0.00258194444444444" calcext:value-type="float">
            <text:p>0,00258194444444444000</text:p>
          </table:table-cell>
          <table:table-cell table:formula="of:=[.D2030]-[.D202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table:formula="of:=[.B2029]+11" office:value-type="float" office:value="22319" calcext:value-type="float">
            <text:p>22319</text:p>
          </table:table-cell>
          <table:table-cell office:value-type="float" office:value="8640000" calcext:value-type="float">
            <text:p>8640000</text:p>
          </table:table-cell>
          <table:table-cell table:formula="of:=[.B2030]/[.C2030]" office:value-type="float" office:value="0.00258321759259259" calcext:value-type="float">
            <text:p>0,00258321759259259000</text:p>
          </table:table-cell>
          <table:table-cell table:formula="of:=[.D2031]-[.D203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table:formula="of:=[.B2030]+11" office:value-type="float" office:value="22330" calcext:value-type="float">
            <text:p>22330</text:p>
          </table:table-cell>
          <table:table-cell office:value-type="float" office:value="8640000" calcext:value-type="float">
            <text:p>8640000</text:p>
          </table:table-cell>
          <table:table-cell table:formula="of:=[.B2031]/[.C2031]" office:value-type="float" office:value="0.00258449074074074" calcext:value-type="float">
            <text:p>0,00258449074074074000</text:p>
          </table:table-cell>
          <table:table-cell table:formula="of:=[.D2032]-[.D2031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table:formula="of:=[.B2031]+11" office:value-type="float" office:value="22341" calcext:value-type="float">
            <text:p>22341</text:p>
          </table:table-cell>
          <table:table-cell office:value-type="float" office:value="8640000" calcext:value-type="float">
            <text:p>8640000</text:p>
          </table:table-cell>
          <table:table-cell table:formula="of:=[.B2032]/[.C2032]" office:value-type="float" office:value="0.00258576388888889" calcext:value-type="float">
            <text:p>0,00258576388888889000</text:p>
          </table:table-cell>
          <table:table-cell table:formula="of:=[.D2033]-[.D203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table:formula="of:=[.B2032]+11" office:value-type="float" office:value="22352" calcext:value-type="float">
            <text:p>22352</text:p>
          </table:table-cell>
          <table:table-cell office:value-type="float" office:value="8640000" calcext:value-type="float">
            <text:p>8640000</text:p>
          </table:table-cell>
          <table:table-cell table:formula="of:=[.B2033]/[.C2033]" office:value-type="float" office:value="0.00258703703703704" calcext:value-type="float">
            <text:p>0,00258703703703704000</text:p>
          </table:table-cell>
          <table:table-cell table:formula="of:=[.D2034]-[.D203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table:formula="of:=[.B2033]+11" office:value-type="float" office:value="22363" calcext:value-type="float">
            <text:p>22363</text:p>
          </table:table-cell>
          <table:table-cell office:value-type="float" office:value="8640000" calcext:value-type="float">
            <text:p>8640000</text:p>
          </table:table-cell>
          <table:table-cell table:formula="of:=[.B2034]/[.C2034]" office:value-type="float" office:value="0.00258831018518519" calcext:value-type="float">
            <text:p>0,00258831018518519000</text:p>
          </table:table-cell>
          <table:table-cell table:formula="of:=[.D2035]-[.D203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table:formula="of:=[.B2034]+11" office:value-type="float" office:value="22374" calcext:value-type="float">
            <text:p>22374</text:p>
          </table:table-cell>
          <table:table-cell office:value-type="float" office:value="8640000" calcext:value-type="float">
            <text:p>8640000</text:p>
          </table:table-cell>
          <table:table-cell table:formula="of:=[.B2035]/[.C2035]" office:value-type="float" office:value="0.00258958333333333" calcext:value-type="float">
            <text:p>0,00258958333333333000</text:p>
          </table:table-cell>
          <table:table-cell table:formula="of:=[.D2036]-[.D2035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table:formula="of:=[.B2035]+11" office:value-type="float" office:value="22385" calcext:value-type="float">
            <text:p>22385</text:p>
          </table:table-cell>
          <table:table-cell office:value-type="float" office:value="8640000" calcext:value-type="float">
            <text:p>8640000</text:p>
          </table:table-cell>
          <table:table-cell table:formula="of:=[.B2036]/[.C2036]" office:value-type="float" office:value="0.00259085648148148" calcext:value-type="float">
            <text:p>0,00259085648148148000</text:p>
          </table:table-cell>
          <table:table-cell table:formula="of:=[.D2037]-[.D203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table:formula="of:=[.B2036]+11" office:value-type="float" office:value="22396" calcext:value-type="float">
            <text:p>22396</text:p>
          </table:table-cell>
          <table:table-cell office:value-type="float" office:value="8640000" calcext:value-type="float">
            <text:p>8640000</text:p>
          </table:table-cell>
          <table:table-cell table:formula="of:=[.B2037]/[.C2037]" office:value-type="float" office:value="0.00259212962962963" calcext:value-type="float">
            <text:p>0,00259212962962963000</text:p>
          </table:table-cell>
          <table:table-cell table:formula="of:=[.D2038]-[.D203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table:formula="of:=[.B2037]+11" office:value-type="float" office:value="22407" calcext:value-type="float">
            <text:p>22407</text:p>
          </table:table-cell>
          <table:table-cell office:value-type="float" office:value="8640000" calcext:value-type="float">
            <text:p>8640000</text:p>
          </table:table-cell>
          <table:table-cell table:formula="of:=[.B2038]/[.C2038]" office:value-type="float" office:value="0.00259340277777778" calcext:value-type="float">
            <text:p>0,00259340277777778000</text:p>
          </table:table-cell>
          <table:table-cell table:formula="of:=[.D2039]-[.D203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table:formula="of:=[.B2038]+11" office:value-type="float" office:value="22418" calcext:value-type="float">
            <text:p>22418</text:p>
          </table:table-cell>
          <table:table-cell office:value-type="float" office:value="8640000" calcext:value-type="float">
            <text:p>8640000</text:p>
          </table:table-cell>
          <table:table-cell table:formula="of:=[.B2039]/[.C2039]" office:value-type="float" office:value="0.00259467592592593" calcext:value-type="float">
            <text:p>0,00259467592592593000</text:p>
          </table:table-cell>
          <table:table-cell table:formula="of:=[.D2040]-[.D2039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table:formula="of:=[.B2039]+11" office:value-type="float" office:value="22429" calcext:value-type="float">
            <text:p>22429</text:p>
          </table:table-cell>
          <table:table-cell office:value-type="float" office:value="8640000" calcext:value-type="float">
            <text:p>8640000</text:p>
          </table:table-cell>
          <table:table-cell table:formula="of:=[.B2040]/[.C2040]" office:value-type="float" office:value="0.00259594907407407" calcext:value-type="float">
            <text:p>0,00259594907407407000</text:p>
          </table:table-cell>
          <table:table-cell table:formula="of:=[.D2041]-[.D204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table:formula="of:=[.B2040]+11" office:value-type="float" office:value="22440" calcext:value-type="float">
            <text:p>22440</text:p>
          </table:table-cell>
          <table:table-cell office:value-type="float" office:value="8640000" calcext:value-type="float">
            <text:p>8640000</text:p>
          </table:table-cell>
          <table:table-cell table:formula="of:=[.B2041]/[.C2041]" office:value-type="float" office:value="0.00259722222222222" calcext:value-type="float">
            <text:p>0,00259722222222222000</text:p>
          </table:table-cell>
          <table:table-cell table:formula="of:=[.D2042]-[.D204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table:formula="of:=[.B2041]+11" office:value-type="float" office:value="22451" calcext:value-type="float">
            <text:p>22451</text:p>
          </table:table-cell>
          <table:table-cell office:value-type="float" office:value="8640000" calcext:value-type="float">
            <text:p>8640000</text:p>
          </table:table-cell>
          <table:table-cell table:formula="of:=[.B2042]/[.C2042]" office:value-type="float" office:value="0.00259849537037037" calcext:value-type="float">
            <text:p>0,00259849537037037000</text:p>
          </table:table-cell>
          <table:table-cell table:formula="of:=[.D2043]-[.D204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table:formula="of:=[.B2042]+11" office:value-type="float" office:value="22462" calcext:value-type="float">
            <text:p>22462</text:p>
          </table:table-cell>
          <table:table-cell office:value-type="float" office:value="8640000" calcext:value-type="float">
            <text:p>8640000</text:p>
          </table:table-cell>
          <table:table-cell table:formula="of:=[.B2043]/[.C2043]" office:value-type="float" office:value="0.00259976851851852" calcext:value-type="float">
            <text:p>0,00259976851851852000</text:p>
          </table:table-cell>
          <table:table-cell table:formula="of:=[.D2044]-[.D204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table:formula="of:=[.B2043]+11" office:value-type="float" office:value="22473" calcext:value-type="float">
            <text:p>22473</text:p>
          </table:table-cell>
          <table:table-cell office:value-type="float" office:value="8640000" calcext:value-type="float">
            <text:p>8640000</text:p>
          </table:table-cell>
          <table:table-cell table:formula="of:=[.B2044]/[.C2044]" office:value-type="float" office:value="0.00260104166666667" calcext:value-type="float">
            <text:p>0,00260104166666667000</text:p>
          </table:table-cell>
          <table:table-cell table:formula="of:=[.D2045]-[.D2044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table:formula="of:=[.B2044]+11" office:value-type="float" office:value="22484" calcext:value-type="float">
            <text:p>22484</text:p>
          </table:table-cell>
          <table:table-cell office:value-type="float" office:value="8640000" calcext:value-type="float">
            <text:p>8640000</text:p>
          </table:table-cell>
          <table:table-cell table:formula="of:=[.B2045]/[.C2045]" office:value-type="float" office:value="0.00260231481481481" calcext:value-type="float">
            <text:p>0,00260231481481481000</text:p>
          </table:table-cell>
          <table:table-cell table:formula="of:=[.D2046]-[.D204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table:formula="of:=[.B2045]+11" office:value-type="float" office:value="22495" calcext:value-type="float">
            <text:p>22495</text:p>
          </table:table-cell>
          <table:table-cell office:value-type="float" office:value="8640000" calcext:value-type="float">
            <text:p>8640000</text:p>
          </table:table-cell>
          <table:table-cell table:formula="of:=[.B2046]/[.C2046]" office:value-type="float" office:value="0.00260358796296296" calcext:value-type="float">
            <text:p>0,00260358796296296000</text:p>
          </table:table-cell>
          <table:table-cell table:formula="of:=[.D2047]-[.D204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table:formula="of:=[.B2046]+11" office:value-type="float" office:value="22506" calcext:value-type="float">
            <text:p>22506</text:p>
          </table:table-cell>
          <table:table-cell office:value-type="float" office:value="8640000" calcext:value-type="float">
            <text:p>8640000</text:p>
          </table:table-cell>
          <table:table-cell table:formula="of:=[.B2047]/[.C2047]" office:value-type="float" office:value="0.00260486111111111" calcext:value-type="float">
            <text:p>0,00260486111111111000</text:p>
          </table:table-cell>
          <table:table-cell table:formula="of:=[.D2048]-[.D204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table:formula="of:=[.B2047]+11" office:value-type="float" office:value="22517" calcext:value-type="float">
            <text:p>22517</text:p>
          </table:table-cell>
          <table:table-cell office:value-type="float" office:value="8640000" calcext:value-type="float">
            <text:p>8640000</text:p>
          </table:table-cell>
          <table:table-cell table:formula="of:=[.B2048]/[.C2048]" office:value-type="float" office:value="0.00260613425925926" calcext:value-type="float">
            <text:p>0,00260613425925926000</text:p>
          </table:table-cell>
          <table:table-cell table:formula="of:=[.D2049]-[.D2048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.B2048]+11" office:value-type="float" office:value="22528" calcext:value-type="float">
            <text:p>22528</text:p>
          </table:table-cell>
          <table:table-cell office:value-type="float" office:value="8640000" calcext:value-type="float">
            <text:p>8640000</text:p>
          </table:table-cell>
          <table:table-cell table:formula="of:=[.B2049]/[.C2049]" office:value-type="float" office:value="0.00260740740740741" calcext:value-type="float">
            <text:p>0,00260740740740741000</text:p>
          </table:table-cell>
          <table:table-cell table:formula="of:=[.D2050]-[.D204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table:formula="of:=[.B2049]+11" office:value-type="float" office:value="22539" calcext:value-type="float">
            <text:p>22539</text:p>
          </table:table-cell>
          <table:table-cell office:value-type="float" office:value="8640000" calcext:value-type="float">
            <text:p>8640000</text:p>
          </table:table-cell>
          <table:table-cell table:formula="of:=[.B2050]/[.C2050]" office:value-type="float" office:value="0.00260868055555556" calcext:value-type="float">
            <text:p>0,00260868055555556000</text:p>
          </table:table-cell>
          <table:table-cell table:formula="of:=[.D2051]-[.D205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table:formula="of:=[.B2050]+11" office:value-type="float" office:value="22550" calcext:value-type="float">
            <text:p>22550</text:p>
          </table:table-cell>
          <table:table-cell office:value-type="float" office:value="8640000" calcext:value-type="float">
            <text:p>8640000</text:p>
          </table:table-cell>
          <table:table-cell table:formula="of:=[.B2051]/[.C2051]" office:value-type="float" office:value="0.0026099537037037" calcext:value-type="float">
            <text:p>0,00260995370370370000</text:p>
          </table:table-cell>
          <table:table-cell table:formula="of:=[.D2052]-[.D205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table:formula="of:=[.B2051]+11" office:value-type="float" office:value="22561" calcext:value-type="float">
            <text:p>22561</text:p>
          </table:table-cell>
          <table:table-cell office:value-type="float" office:value="8640000" calcext:value-type="float">
            <text:p>8640000</text:p>
          </table:table-cell>
          <table:table-cell table:formula="of:=[.B2052]/[.C2052]" office:value-type="float" office:value="0.00261122685185185" calcext:value-type="float">
            <text:p>0,00261122685185185000</text:p>
          </table:table-cell>
          <table:table-cell table:formula="of:=[.D2053]-[.D2052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table:formula="of:=[.B2052]+11" office:value-type="float" office:value="22572" calcext:value-type="float">
            <text:p>22572</text:p>
          </table:table-cell>
          <table:table-cell office:value-type="float" office:value="8640000" calcext:value-type="float">
            <text:p>8640000</text:p>
          </table:table-cell>
          <table:table-cell table:formula="of:=[.B2053]/[.C2053]" office:value-type="float" office:value="0.0026125" calcext:value-type="float">
            <text:p>0,00261250000000000000</text:p>
          </table:table-cell>
          <table:table-cell table:formula="of:=[.D2054]-[.D205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table:formula="of:=[.B2053]+11" office:value-type="float" office:value="22583" calcext:value-type="float">
            <text:p>22583</text:p>
          </table:table-cell>
          <table:table-cell office:value-type="float" office:value="8640000" calcext:value-type="float">
            <text:p>8640000</text:p>
          </table:table-cell>
          <table:table-cell table:formula="of:=[.B2054]/[.C2054]" office:value-type="float" office:value="0.00261377314814815" calcext:value-type="float">
            <text:p>0,00261377314814815000</text:p>
          </table:table-cell>
          <table:table-cell table:formula="of:=[.D2055]-[.D205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table:formula="of:=[.B2054]+11" office:value-type="float" office:value="22594" calcext:value-type="float">
            <text:p>22594</text:p>
          </table:table-cell>
          <table:table-cell office:value-type="float" office:value="8640000" calcext:value-type="float">
            <text:p>8640000</text:p>
          </table:table-cell>
          <table:table-cell table:formula="of:=[.B2055]/[.C2055]" office:value-type="float" office:value="0.0026150462962963" calcext:value-type="float">
            <text:p>0,00261504629629630000</text:p>
          </table:table-cell>
          <table:table-cell table:formula="of:=[.D2056]-[.D205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table:formula="of:=[.B2055]+11" office:value-type="float" office:value="22605" calcext:value-type="float">
            <text:p>22605</text:p>
          </table:table-cell>
          <table:table-cell office:value-type="float" office:value="8640000" calcext:value-type="float">
            <text:p>8640000</text:p>
          </table:table-cell>
          <table:table-cell table:formula="of:=[.B2056]/[.C2056]" office:value-type="float" office:value="0.00261631944444444" calcext:value-type="float">
            <text:p>0,00261631944444444000</text:p>
          </table:table-cell>
          <table:table-cell table:formula="of:=[.D2057]-[.D205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table:formula="of:=[.B2056]+11" office:value-type="float" office:value="22616" calcext:value-type="float">
            <text:p>22616</text:p>
          </table:table-cell>
          <table:table-cell office:value-type="float" office:value="8640000" calcext:value-type="float">
            <text:p>8640000</text:p>
          </table:table-cell>
          <table:table-cell table:formula="of:=[.B2057]/[.C2057]" office:value-type="float" office:value="0.00261759259259259" calcext:value-type="float">
            <text:p>0,00261759259259259000</text:p>
          </table:table-cell>
          <table:table-cell table:formula="of:=[.D2058]-[.D2057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table:formula="of:=[.B2057]+11" office:value-type="float" office:value="22627" calcext:value-type="float">
            <text:p>22627</text:p>
          </table:table-cell>
          <table:table-cell office:value-type="float" office:value="8640000" calcext:value-type="float">
            <text:p>8640000</text:p>
          </table:table-cell>
          <table:table-cell table:formula="of:=[.B2058]/[.C2058]" office:value-type="float" office:value="0.00261886574074074" calcext:value-type="float">
            <text:p>0,00261886574074074000</text:p>
          </table:table-cell>
          <table:table-cell table:formula="of:=[.D2059]-[.D205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table:formula="of:=[.B2058]+11" office:value-type="float" office:value="22638" calcext:value-type="float">
            <text:p>22638</text:p>
          </table:table-cell>
          <table:table-cell office:value-type="float" office:value="8640000" calcext:value-type="float">
            <text:p>8640000</text:p>
          </table:table-cell>
          <table:table-cell table:formula="of:=[.B2059]/[.C2059]" office:value-type="float" office:value="0.00262013888888889" calcext:value-type="float">
            <text:p>0,00262013888888889000</text:p>
          </table:table-cell>
          <table:table-cell table:formula="of:=[.D2060]-[.D205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table:formula="of:=[.B2059]+11" office:value-type="float" office:value="22649" calcext:value-type="float">
            <text:p>22649</text:p>
          </table:table-cell>
          <table:table-cell office:value-type="float" office:value="8640000" calcext:value-type="float">
            <text:p>8640000</text:p>
          </table:table-cell>
          <table:table-cell table:formula="of:=[.B2060]/[.C2060]" office:value-type="float" office:value="0.00262141203703704" calcext:value-type="float">
            <text:p>0,00262141203703704000</text:p>
          </table:table-cell>
          <table:table-cell table:formula="of:=[.D2061]-[.D206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table:formula="of:=[.B2060]+11" office:value-type="float" office:value="22660" calcext:value-type="float">
            <text:p>22660</text:p>
          </table:table-cell>
          <table:table-cell office:value-type="float" office:value="8640000" calcext:value-type="float">
            <text:p>8640000</text:p>
          </table:table-cell>
          <table:table-cell table:formula="of:=[.B2061]/[.C2061]" office:value-type="float" office:value="0.00262268518518519" calcext:value-type="float">
            <text:p>0,00262268518518519000</text:p>
          </table:table-cell>
          <table:table-cell table:formula="of:=[.D2062]-[.D2061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table:formula="of:=[.B2061]+11" office:value-type="float" office:value="22671" calcext:value-type="float">
            <text:p>22671</text:p>
          </table:table-cell>
          <table:table-cell office:value-type="float" office:value="8640000" calcext:value-type="float">
            <text:p>8640000</text:p>
          </table:table-cell>
          <table:table-cell table:formula="of:=[.B2062]/[.C2062]" office:value-type="float" office:value="0.00262395833333333" calcext:value-type="float">
            <text:p>0,00262395833333333000</text:p>
          </table:table-cell>
          <table:table-cell table:formula="of:=[.D2063]-[.D206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table:formula="of:=[.B2062]+11" office:value-type="float" office:value="22682" calcext:value-type="float">
            <text:p>22682</text:p>
          </table:table-cell>
          <table:table-cell office:value-type="float" office:value="8640000" calcext:value-type="float">
            <text:p>8640000</text:p>
          </table:table-cell>
          <table:table-cell table:formula="of:=[.B2063]/[.C2063]" office:value-type="float" office:value="0.00262523148148148" calcext:value-type="float">
            <text:p>0,00262523148148148000</text:p>
          </table:table-cell>
          <table:table-cell table:formula="of:=[.D2064]-[.D206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table:formula="of:=[.B2063]+11" office:value-type="float" office:value="22693" calcext:value-type="float">
            <text:p>22693</text:p>
          </table:table-cell>
          <table:table-cell office:value-type="float" office:value="8640000" calcext:value-type="float">
            <text:p>8640000</text:p>
          </table:table-cell>
          <table:table-cell table:formula="of:=[.B2064]/[.C2064]" office:value-type="float" office:value="0.00262650462962963" calcext:value-type="float">
            <text:p>0,00262650462962963000</text:p>
          </table:table-cell>
          <table:table-cell table:formula="of:=[.D2065]-[.D206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table:formula="of:=[.B2064]+11" office:value-type="float" office:value="22704" calcext:value-type="float">
            <text:p>22704</text:p>
          </table:table-cell>
          <table:table-cell office:value-type="float" office:value="8640000" calcext:value-type="float">
            <text:p>8640000</text:p>
          </table:table-cell>
          <table:table-cell table:formula="of:=[.B2065]/[.C2065]" office:value-type="float" office:value="0.00262777777777778" calcext:value-type="float">
            <text:p>0,00262777777777778000</text:p>
          </table:table-cell>
          <table:table-cell table:formula="of:=[.D2066]-[.D2065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B2065]+11" office:value-type="float" office:value="22715" calcext:value-type="float">
            <text:p>22715</text:p>
          </table:table-cell>
          <table:table-cell office:value-type="float" office:value="8640000" calcext:value-type="float">
            <text:p>8640000</text:p>
          </table:table-cell>
          <table:table-cell table:formula="of:=[.B2066]/[.C2066]" office:value-type="float" office:value="0.00262905092592593" calcext:value-type="float">
            <text:p>0,00262905092592593000</text:p>
          </table:table-cell>
          <table:table-cell table:formula="of:=[.D2067]-[.D206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B2066]+11" office:value-type="float" office:value="22726" calcext:value-type="float">
            <text:p>22726</text:p>
          </table:table-cell>
          <table:table-cell office:value-type="float" office:value="8640000" calcext:value-type="float">
            <text:p>8640000</text:p>
          </table:table-cell>
          <table:table-cell table:formula="of:=[.B2067]/[.C2067]" office:value-type="float" office:value="0.00263032407407407" calcext:value-type="float">
            <text:p>0,00263032407407407000</text:p>
          </table:table-cell>
          <table:table-cell table:formula="of:=[.D2068]-[.D206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B2067]+11" office:value-type="float" office:value="22737" calcext:value-type="float">
            <text:p>22737</text:p>
          </table:table-cell>
          <table:table-cell office:value-type="float" office:value="8640000" calcext:value-type="float">
            <text:p>8640000</text:p>
          </table:table-cell>
          <table:table-cell table:formula="of:=[.B2068]/[.C2068]" office:value-type="float" office:value="0.00263159722222222" calcext:value-type="float">
            <text:p>0,00263159722222222000</text:p>
          </table:table-cell>
          <table:table-cell table:formula="of:=[.D2069]-[.D206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B2068]+11" office:value-type="float" office:value="22748" calcext:value-type="float">
            <text:p>22748</text:p>
          </table:table-cell>
          <table:table-cell office:value-type="float" office:value="8640000" calcext:value-type="float">
            <text:p>8640000</text:p>
          </table:table-cell>
          <table:table-cell table:formula="of:=[.B2069]/[.C2069]" office:value-type="float" office:value="0.00263287037037037" calcext:value-type="float">
            <text:p>0,00263287037037037000</text:p>
          </table:table-cell>
          <table:table-cell table:formula="of:=[.D2070]-[.D206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B2069]+11" office:value-type="float" office:value="22759" calcext:value-type="float">
            <text:p>22759</text:p>
          </table:table-cell>
          <table:table-cell office:value-type="float" office:value="8640000" calcext:value-type="float">
            <text:p>8640000</text:p>
          </table:table-cell>
          <table:table-cell table:formula="of:=[.B2070]/[.C2070]" office:value-type="float" office:value="0.00263414351851852" calcext:value-type="float">
            <text:p>0,00263414351851852000</text:p>
          </table:table-cell>
          <table:table-cell table:formula="of:=[.D2071]-[.D2070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B2070]+11" office:value-type="float" office:value="22770" calcext:value-type="float">
            <text:p>22770</text:p>
          </table:table-cell>
          <table:table-cell office:value-type="float" office:value="8640000" calcext:value-type="float">
            <text:p>8640000</text:p>
          </table:table-cell>
          <table:table-cell table:formula="of:=[.B2071]/[.C2071]" office:value-type="float" office:value="0.00263541666666667" calcext:value-type="float">
            <text:p>0,00263541666666667000</text:p>
          </table:table-cell>
          <table:table-cell table:formula="of:=[.D2072]-[.D207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B2071]+11" office:value-type="float" office:value="22781" calcext:value-type="float">
            <text:p>22781</text:p>
          </table:table-cell>
          <table:table-cell office:value-type="float" office:value="8640000" calcext:value-type="float">
            <text:p>8640000</text:p>
          </table:table-cell>
          <table:table-cell table:formula="of:=[.B2072]/[.C2072]" office:value-type="float" office:value="0.00263668981481482" calcext:value-type="float">
            <text:p>0,00263668981481482000</text:p>
          </table:table-cell>
          <table:table-cell table:formula="of:=[.D2073]-[.D207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B2072]+11" office:value-type="float" office:value="22792" calcext:value-type="float">
            <text:p>22792</text:p>
          </table:table-cell>
          <table:table-cell office:value-type="float" office:value="8640000" calcext:value-type="float">
            <text:p>8640000</text:p>
          </table:table-cell>
          <table:table-cell table:formula="of:=[.B2073]/[.C2073]" office:value-type="float" office:value="0.00263796296296296" calcext:value-type="float">
            <text:p>0,00263796296296296000</text:p>
          </table:table-cell>
          <table:table-cell table:formula="of:=[.D2074]-[.D207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B2073]+11" office:value-type="float" office:value="22803" calcext:value-type="float">
            <text:p>22803</text:p>
          </table:table-cell>
          <table:table-cell office:value-type="float" office:value="8640000" calcext:value-type="float">
            <text:p>8640000</text:p>
          </table:table-cell>
          <table:table-cell table:formula="of:=[.B2074]/[.C2074]" office:value-type="float" office:value="0.00263923611111111" calcext:value-type="float">
            <text:p>0,00263923611111111000</text:p>
          </table:table-cell>
          <table:table-cell table:formula="of:=[.D2075]-[.D2074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table:formula="of:=[.B2074]+11" office:value-type="float" office:value="22814" calcext:value-type="float">
            <text:p>22814</text:p>
          </table:table-cell>
          <table:table-cell office:value-type="float" office:value="8640000" calcext:value-type="float">
            <text:p>8640000</text:p>
          </table:table-cell>
          <table:table-cell table:formula="of:=[.B2075]/[.C2075]" office:value-type="float" office:value="0.00264050925925926" calcext:value-type="float">
            <text:p>0,00264050925925926000</text:p>
          </table:table-cell>
          <table:table-cell table:formula="of:=[.D2076]-[.D207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table:formula="of:=[.B2075]+11" office:value-type="float" office:value="22825" calcext:value-type="float">
            <text:p>22825</text:p>
          </table:table-cell>
          <table:table-cell office:value-type="float" office:value="8640000" calcext:value-type="float">
            <text:p>8640000</text:p>
          </table:table-cell>
          <table:table-cell table:formula="of:=[.B2076]/[.C2076]" office:value-type="float" office:value="0.00264178240740741" calcext:value-type="float">
            <text:p>0,00264178240740741000</text:p>
          </table:table-cell>
          <table:table-cell table:formula="of:=[.D2077]-[.D207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table:formula="of:=[.B2076]+11" office:value-type="float" office:value="22836" calcext:value-type="float">
            <text:p>22836</text:p>
          </table:table-cell>
          <table:table-cell office:value-type="float" office:value="8640000" calcext:value-type="float">
            <text:p>8640000</text:p>
          </table:table-cell>
          <table:table-cell table:formula="of:=[.B2077]/[.C2077]" office:value-type="float" office:value="0.00264305555555556" calcext:value-type="float">
            <text:p>0,00264305555555556000</text:p>
          </table:table-cell>
          <table:table-cell table:formula="of:=[.D2078]-[.D207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table:formula="of:=[.B2077]+11" office:value-type="float" office:value="22847" calcext:value-type="float">
            <text:p>22847</text:p>
          </table:table-cell>
          <table:table-cell office:value-type="float" office:value="8640000" calcext:value-type="float">
            <text:p>8640000</text:p>
          </table:table-cell>
          <table:table-cell table:formula="of:=[.B2078]/[.C2078]" office:value-type="float" office:value="0.0026443287037037" calcext:value-type="float">
            <text:p>0,00264432870370370000</text:p>
          </table:table-cell>
          <table:table-cell table:formula="of:=[.D2079]-[.D2078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table:formula="of:=[.B2078]+11" office:value-type="float" office:value="22858" calcext:value-type="float">
            <text:p>22858</text:p>
          </table:table-cell>
          <table:table-cell office:value-type="float" office:value="8640000" calcext:value-type="float">
            <text:p>8640000</text:p>
          </table:table-cell>
          <table:table-cell table:formula="of:=[.B2079]/[.C2079]" office:value-type="float" office:value="0.00264560185185185" calcext:value-type="float">
            <text:p>0,00264560185185185000</text:p>
          </table:table-cell>
          <table:table-cell table:formula="of:=[.D2080]-[.D207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table:formula="of:=[.B2079]+11" office:value-type="float" office:value="22869" calcext:value-type="float">
            <text:p>22869</text:p>
          </table:table-cell>
          <table:table-cell office:value-type="float" office:value="8640000" calcext:value-type="float">
            <text:p>8640000</text:p>
          </table:table-cell>
          <table:table-cell table:formula="of:=[.B2080]/[.C2080]" office:value-type="float" office:value="0.002646875" calcext:value-type="float">
            <text:p>0,00264687500000000000</text:p>
          </table:table-cell>
          <table:table-cell table:formula="of:=[.D2081]-[.D208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table:formula="of:=[.B2080]+11" office:value-type="float" office:value="22880" calcext:value-type="float">
            <text:p>22880</text:p>
          </table:table-cell>
          <table:table-cell office:value-type="float" office:value="8640000" calcext:value-type="float">
            <text:p>8640000</text:p>
          </table:table-cell>
          <table:table-cell table:formula="of:=[.B2081]/[.C2081]" office:value-type="float" office:value="0.00264814814814815" calcext:value-type="float">
            <text:p>0,00264814814814815000</text:p>
          </table:table-cell>
          <table:table-cell table:formula="of:=[.D2082]-[.D208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table:formula="of:=[.B2081]+11" office:value-type="float" office:value="22891" calcext:value-type="float">
            <text:p>22891</text:p>
          </table:table-cell>
          <table:table-cell office:value-type="float" office:value="8640000" calcext:value-type="float">
            <text:p>8640000</text:p>
          </table:table-cell>
          <table:table-cell table:formula="of:=[.B2082]/[.C2082]" office:value-type="float" office:value="0.0026494212962963" calcext:value-type="float">
            <text:p>0,00264942129629630000</text:p>
          </table:table-cell>
          <table:table-cell table:formula="of:=[.D2083]-[.D2082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table:formula="of:=[.B2082]+11" office:value-type="float" office:value="22902" calcext:value-type="float">
            <text:p>22902</text:p>
          </table:table-cell>
          <table:table-cell office:value-type="float" office:value="8640000" calcext:value-type="float">
            <text:p>8640000</text:p>
          </table:table-cell>
          <table:table-cell table:formula="of:=[.B2083]/[.C2083]" office:value-type="float" office:value="0.00265069444444444" calcext:value-type="float">
            <text:p>0,00265069444444444000</text:p>
          </table:table-cell>
          <table:table-cell table:formula="of:=[.D2084]-[.D208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table:formula="of:=[.B2083]+11" office:value-type="float" office:value="22913" calcext:value-type="float">
            <text:p>22913</text:p>
          </table:table-cell>
          <table:table-cell office:value-type="float" office:value="8640000" calcext:value-type="float">
            <text:p>8640000</text:p>
          </table:table-cell>
          <table:table-cell table:formula="of:=[.B2084]/[.C2084]" office:value-type="float" office:value="0.00265196759259259" calcext:value-type="float">
            <text:p>0,00265196759259259000</text:p>
          </table:table-cell>
          <table:table-cell table:formula="of:=[.D2085]-[.D208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table:formula="of:=[.B2084]+11" office:value-type="float" office:value="22924" calcext:value-type="float">
            <text:p>22924</text:p>
          </table:table-cell>
          <table:table-cell office:value-type="float" office:value="8640000" calcext:value-type="float">
            <text:p>8640000</text:p>
          </table:table-cell>
          <table:table-cell table:formula="of:=[.B2085]/[.C2085]" office:value-type="float" office:value="0.00265324074074074" calcext:value-type="float">
            <text:p>0,00265324074074074000</text:p>
          </table:table-cell>
          <table:table-cell table:formula="of:=[.D2086]-[.D208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table:formula="of:=[.B2085]+11" office:value-type="float" office:value="22935" calcext:value-type="float">
            <text:p>22935</text:p>
          </table:table-cell>
          <table:table-cell office:value-type="float" office:value="8640000" calcext:value-type="float">
            <text:p>8640000</text:p>
          </table:table-cell>
          <table:table-cell table:formula="of:=[.B2086]/[.C2086]" office:value-type="float" office:value="0.00265451388888889" calcext:value-type="float">
            <text:p>0,00265451388888889000</text:p>
          </table:table-cell>
          <table:table-cell table:formula="of:=[.D2087]-[.D208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table:formula="of:=[.B2086]+11" office:value-type="float" office:value="22946" calcext:value-type="float">
            <text:p>22946</text:p>
          </table:table-cell>
          <table:table-cell office:value-type="float" office:value="8640000" calcext:value-type="float">
            <text:p>8640000</text:p>
          </table:table-cell>
          <table:table-cell table:formula="of:=[.B2087]/[.C2087]" office:value-type="float" office:value="0.00265578703703704" calcext:value-type="float">
            <text:p>0,00265578703703704000</text:p>
          </table:table-cell>
          <table:table-cell table:formula="of:=[.D2088]-[.D2087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table:formula="of:=[.B2087]+11" office:value-type="float" office:value="22957" calcext:value-type="float">
            <text:p>22957</text:p>
          </table:table-cell>
          <table:table-cell office:value-type="float" office:value="8640000" calcext:value-type="float">
            <text:p>8640000</text:p>
          </table:table-cell>
          <table:table-cell table:formula="of:=[.B2088]/[.C2088]" office:value-type="float" office:value="0.00265706018518519" calcext:value-type="float">
            <text:p>0,00265706018518519000</text:p>
          </table:table-cell>
          <table:table-cell table:formula="of:=[.D2089]-[.D208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table:formula="of:=[.B2088]+11" office:value-type="float" office:value="22968" calcext:value-type="float">
            <text:p>22968</text:p>
          </table:table-cell>
          <table:table-cell office:value-type="float" office:value="8640000" calcext:value-type="float">
            <text:p>8640000</text:p>
          </table:table-cell>
          <table:table-cell table:formula="of:=[.B2089]/[.C2089]" office:value-type="float" office:value="0.00265833333333333" calcext:value-type="float">
            <text:p>0,00265833333333333000</text:p>
          </table:table-cell>
          <table:table-cell table:formula="of:=[.D2090]-[.D208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table:formula="of:=[.B2089]+11" office:value-type="float" office:value="22979" calcext:value-type="float">
            <text:p>22979</text:p>
          </table:table-cell>
          <table:table-cell office:value-type="float" office:value="8640000" calcext:value-type="float">
            <text:p>8640000</text:p>
          </table:table-cell>
          <table:table-cell table:formula="of:=[.B2090]/[.C2090]" office:value-type="float" office:value="0.00265960648148148" calcext:value-type="float">
            <text:p>0,00265960648148148000</text:p>
          </table:table-cell>
          <table:table-cell table:formula="of:=[.D2091]-[.D209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table:formula="of:=[.B2090]+11" office:value-type="float" office:value="22990" calcext:value-type="float">
            <text:p>22990</text:p>
          </table:table-cell>
          <table:table-cell office:value-type="float" office:value="8640000" calcext:value-type="float">
            <text:p>8640000</text:p>
          </table:table-cell>
          <table:table-cell table:formula="of:=[.B2091]/[.C2091]" office:value-type="float" office:value="0.00266087962962963" calcext:value-type="float">
            <text:p>0,00266087962962963000</text:p>
          </table:table-cell>
          <table:table-cell table:formula="of:=[.D2092]-[.D2091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table:formula="of:=[.B2091]+11" office:value-type="float" office:value="23001" calcext:value-type="float">
            <text:p>23001</text:p>
          </table:table-cell>
          <table:table-cell office:value-type="float" office:value="8640000" calcext:value-type="float">
            <text:p>8640000</text:p>
          </table:table-cell>
          <table:table-cell table:formula="of:=[.B2092]/[.C2092]" office:value-type="float" office:value="0.00266215277777778" calcext:value-type="float">
            <text:p>0,00266215277777778000</text:p>
          </table:table-cell>
          <table:table-cell table:formula="of:=[.D2093]-[.D209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table:formula="of:=[.B2092]+11" office:value-type="float" office:value="23012" calcext:value-type="float">
            <text:p>23012</text:p>
          </table:table-cell>
          <table:table-cell office:value-type="float" office:value="8640000" calcext:value-type="float">
            <text:p>8640000</text:p>
          </table:table-cell>
          <table:table-cell table:formula="of:=[.B2093]/[.C2093]" office:value-type="float" office:value="0.00266342592592593" calcext:value-type="float">
            <text:p>0,00266342592592593000</text:p>
          </table:table-cell>
          <table:table-cell table:formula="of:=[.D2094]-[.D209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table:formula="of:=[.B2093]+11" office:value-type="float" office:value="23023" calcext:value-type="float">
            <text:p>23023</text:p>
          </table:table-cell>
          <table:table-cell office:value-type="float" office:value="8640000" calcext:value-type="float">
            <text:p>8640000</text:p>
          </table:table-cell>
          <table:table-cell table:formula="of:=[.B2094]/[.C2094]" office:value-type="float" office:value="0.00266469907407407" calcext:value-type="float">
            <text:p>0,00266469907407407000</text:p>
          </table:table-cell>
          <table:table-cell table:formula="of:=[.D2095]-[.D209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table:formula="of:=[.B2094]+11" office:value-type="float" office:value="23034" calcext:value-type="float">
            <text:p>23034</text:p>
          </table:table-cell>
          <table:table-cell office:value-type="float" office:value="8640000" calcext:value-type="float">
            <text:p>8640000</text:p>
          </table:table-cell>
          <table:table-cell table:formula="of:=[.B2095]/[.C2095]" office:value-type="float" office:value="0.00266597222222222" calcext:value-type="float">
            <text:p>0,00266597222222222000</text:p>
          </table:table-cell>
          <table:table-cell table:formula="of:=[.D2096]-[.D2095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table:formula="of:=[.B2095]+11" office:value-type="float" office:value="23045" calcext:value-type="float">
            <text:p>23045</text:p>
          </table:table-cell>
          <table:table-cell office:value-type="float" office:value="8640000" calcext:value-type="float">
            <text:p>8640000</text:p>
          </table:table-cell>
          <table:table-cell table:formula="of:=[.B2096]/[.C2096]" office:value-type="float" office:value="0.00266724537037037" calcext:value-type="float">
            <text:p>0,00266724537037037000</text:p>
          </table:table-cell>
          <table:table-cell table:formula="of:=[.D2097]-[.D209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table:formula="of:=[.B2096]+11" office:value-type="float" office:value="23056" calcext:value-type="float">
            <text:p>23056</text:p>
          </table:table-cell>
          <table:table-cell office:value-type="float" office:value="8640000" calcext:value-type="float">
            <text:p>8640000</text:p>
          </table:table-cell>
          <table:table-cell table:formula="of:=[.B2097]/[.C2097]" office:value-type="float" office:value="0.00266851851851852" calcext:value-type="float">
            <text:p>0,00266851851851852000</text:p>
          </table:table-cell>
          <table:table-cell table:formula="of:=[.D2098]-[.D209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table:formula="of:=[.B2097]+11" office:value-type="float" office:value="23067" calcext:value-type="float">
            <text:p>23067</text:p>
          </table:table-cell>
          <table:table-cell office:value-type="float" office:value="8640000" calcext:value-type="float">
            <text:p>8640000</text:p>
          </table:table-cell>
          <table:table-cell table:formula="of:=[.B2098]/[.C2098]" office:value-type="float" office:value="0.00266979166666667" calcext:value-type="float">
            <text:p>0,00266979166666667000</text:p>
          </table:table-cell>
          <table:table-cell table:formula="of:=[.D2099]-[.D209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table:formula="of:=[.B2098]+11" office:value-type="float" office:value="23078" calcext:value-type="float">
            <text:p>23078</text:p>
          </table:table-cell>
          <table:table-cell office:value-type="float" office:value="8640000" calcext:value-type="float">
            <text:p>8640000</text:p>
          </table:table-cell>
          <table:table-cell table:formula="of:=[.B2099]/[.C2099]" office:value-type="float" office:value="0.00267106481481482" calcext:value-type="float">
            <text:p>0,00267106481481482000</text:p>
          </table:table-cell>
          <table:table-cell table:formula="of:=[.D2100]-[.D209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table:formula="of:=[.B2099]+11" office:value-type="float" office:value="23089" calcext:value-type="float">
            <text:p>23089</text:p>
          </table:table-cell>
          <table:table-cell office:value-type="float" office:value="8640000" calcext:value-type="float">
            <text:p>8640000</text:p>
          </table:table-cell>
          <table:table-cell table:formula="of:=[.B2100]/[.C2100]" office:value-type="float" office:value="0.00267233796296296" calcext:value-type="float">
            <text:p>0,00267233796296296000</text:p>
          </table:table-cell>
          <table:table-cell table:formula="of:=[.D2101]-[.D2100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table:formula="of:=[.B2100]+11" office:value-type="float" office:value="23100" calcext:value-type="float">
            <text:p>23100</text:p>
          </table:table-cell>
          <table:table-cell office:value-type="float" office:value="8640000" calcext:value-type="float">
            <text:p>8640000</text:p>
          </table:table-cell>
          <table:table-cell table:formula="of:=[.B2101]/[.C2101]" office:value-type="float" office:value="0.00267361111111111" calcext:value-type="float">
            <text:p>0,00267361111111111000</text:p>
          </table:table-cell>
          <table:table-cell table:formula="of:=[.D2102]-[.D210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table:formula="of:=[.B2101]+11" office:value-type="float" office:value="23111" calcext:value-type="float">
            <text:p>23111</text:p>
          </table:table-cell>
          <table:table-cell office:value-type="float" office:value="8640000" calcext:value-type="float">
            <text:p>8640000</text:p>
          </table:table-cell>
          <table:table-cell table:formula="of:=[.B2102]/[.C2102]" office:value-type="float" office:value="0.00267488425925926" calcext:value-type="float">
            <text:p>0,00267488425925926000</text:p>
          </table:table-cell>
          <table:table-cell table:formula="of:=[.D2103]-[.D210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table:formula="of:=[.B2102]+11" office:value-type="float" office:value="23122" calcext:value-type="float">
            <text:p>23122</text:p>
          </table:table-cell>
          <table:table-cell office:value-type="float" office:value="8640000" calcext:value-type="float">
            <text:p>8640000</text:p>
          </table:table-cell>
          <table:table-cell table:formula="of:=[.B2103]/[.C2103]" office:value-type="float" office:value="0.00267615740740741" calcext:value-type="float">
            <text:p>0,00267615740740741000</text:p>
          </table:table-cell>
          <table:table-cell table:formula="of:=[.D2104]-[.D210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table:formula="of:=[.B2103]+11" office:value-type="float" office:value="23133" calcext:value-type="float">
            <text:p>23133</text:p>
          </table:table-cell>
          <table:table-cell office:value-type="float" office:value="8640000" calcext:value-type="float">
            <text:p>8640000</text:p>
          </table:table-cell>
          <table:table-cell table:formula="of:=[.B2104]/[.C2104]" office:value-type="float" office:value="0.00267743055555556" calcext:value-type="float">
            <text:p>0,00267743055555556000</text:p>
          </table:table-cell>
          <table:table-cell table:formula="of:=[.D2105]-[.D2104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table:formula="of:=[.B2104]+11" office:value-type="float" office:value="23144" calcext:value-type="float">
            <text:p>23144</text:p>
          </table:table-cell>
          <table:table-cell office:value-type="float" office:value="8640000" calcext:value-type="float">
            <text:p>8640000</text:p>
          </table:table-cell>
          <table:table-cell table:formula="of:=[.B2105]/[.C2105]" office:value-type="float" office:value="0.0026787037037037" calcext:value-type="float">
            <text:p>0,00267870370370370000</text:p>
          </table:table-cell>
          <table:table-cell table:formula="of:=[.D2106]-[.D210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table:formula="of:=[.B2105]+11" office:value-type="float" office:value="23155" calcext:value-type="float">
            <text:p>23155</text:p>
          </table:table-cell>
          <table:table-cell office:value-type="float" office:value="8640000" calcext:value-type="float">
            <text:p>8640000</text:p>
          </table:table-cell>
          <table:table-cell table:formula="of:=[.B2106]/[.C2106]" office:value-type="float" office:value="0.00267997685185185" calcext:value-type="float">
            <text:p>0,00267997685185185000</text:p>
          </table:table-cell>
          <table:table-cell table:formula="of:=[.D2107]-[.D210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table:formula="of:=[.B2106]+11" office:value-type="float" office:value="23166" calcext:value-type="float">
            <text:p>23166</text:p>
          </table:table-cell>
          <table:table-cell office:value-type="float" office:value="8640000" calcext:value-type="float">
            <text:p>8640000</text:p>
          </table:table-cell>
          <table:table-cell table:formula="of:=[.B2107]/[.C2107]" office:value-type="float" office:value="0.00268125" calcext:value-type="float">
            <text:p>0,00268125000000000000</text:p>
          </table:table-cell>
          <table:table-cell table:formula="of:=[.D2108]-[.D210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table:formula="of:=[.B2107]+11" office:value-type="float" office:value="23177" calcext:value-type="float">
            <text:p>23177</text:p>
          </table:table-cell>
          <table:table-cell office:value-type="float" office:value="8640000" calcext:value-type="float">
            <text:p>8640000</text:p>
          </table:table-cell>
          <table:table-cell table:formula="of:=[.B2108]/[.C2108]" office:value-type="float" office:value="0.00268252314814815" calcext:value-type="float">
            <text:p>0,00268252314814815000</text:p>
          </table:table-cell>
          <table:table-cell table:formula="of:=[.D2109]-[.D2108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table:formula="of:=[.B2108]+11" office:value-type="float" office:value="23188" calcext:value-type="float">
            <text:p>23188</text:p>
          </table:table-cell>
          <table:table-cell office:value-type="float" office:value="8640000" calcext:value-type="float">
            <text:p>8640000</text:p>
          </table:table-cell>
          <table:table-cell table:formula="of:=[.B2109]/[.C2109]" office:value-type="float" office:value="0.0026837962962963" calcext:value-type="float">
            <text:p>0,00268379629629630000</text:p>
          </table:table-cell>
          <table:table-cell table:formula="of:=[.D2110]-[.D210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table:formula="of:=[.B2109]+11" office:value-type="float" office:value="23199" calcext:value-type="float">
            <text:p>23199</text:p>
          </table:table-cell>
          <table:table-cell office:value-type="float" office:value="8640000" calcext:value-type="float">
            <text:p>8640000</text:p>
          </table:table-cell>
          <table:table-cell table:formula="of:=[.B2110]/[.C2110]" office:value-type="float" office:value="0.00268506944444444" calcext:value-type="float">
            <text:p>0,00268506944444444000</text:p>
          </table:table-cell>
          <table:table-cell table:formula="of:=[.D2111]-[.D211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table:formula="of:=[.B2110]+11" office:value-type="float" office:value="23210" calcext:value-type="float">
            <text:p>23210</text:p>
          </table:table-cell>
          <table:table-cell office:value-type="float" office:value="8640000" calcext:value-type="float">
            <text:p>8640000</text:p>
          </table:table-cell>
          <table:table-cell table:formula="of:=[.B2111]/[.C2111]" office:value-type="float" office:value="0.00268634259259259" calcext:value-type="float">
            <text:p>0,00268634259259259000</text:p>
          </table:table-cell>
          <table:table-cell table:formula="of:=[.D2112]-[.D211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table:formula="of:=[.B2111]+11" office:value-type="float" office:value="23221" calcext:value-type="float">
            <text:p>23221</text:p>
          </table:table-cell>
          <table:table-cell office:value-type="float" office:value="8640000" calcext:value-type="float">
            <text:p>8640000</text:p>
          </table:table-cell>
          <table:table-cell table:formula="of:=[.B2112]/[.C2112]" office:value-type="float" office:value="0.00268761574074074" calcext:value-type="float">
            <text:p>0,00268761574074074000</text:p>
          </table:table-cell>
          <table:table-cell table:formula="of:=[.D2113]-[.D211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table:formula="of:=[.B2112]+11" office:value-type="float" office:value="23232" calcext:value-type="float">
            <text:p>23232</text:p>
          </table:table-cell>
          <table:table-cell office:value-type="float" office:value="8640000" calcext:value-type="float">
            <text:p>8640000</text:p>
          </table:table-cell>
          <table:table-cell table:formula="of:=[.B2113]/[.C2113]" office:value-type="float" office:value="0.00268888888888889" calcext:value-type="float">
            <text:p>0,00268888888888889000</text:p>
          </table:table-cell>
          <table:table-cell table:formula="of:=[.D2114]-[.D2113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table:formula="of:=[.B2113]+11" office:value-type="float" office:value="23243" calcext:value-type="float">
            <text:p>23243</text:p>
          </table:table-cell>
          <table:table-cell office:value-type="float" office:value="8640000" calcext:value-type="float">
            <text:p>8640000</text:p>
          </table:table-cell>
          <table:table-cell table:formula="of:=[.B2114]/[.C2114]" office:value-type="float" office:value="0.00269016203703704" calcext:value-type="float">
            <text:p>0,00269016203703704000</text:p>
          </table:table-cell>
          <table:table-cell table:formula="of:=[.D2115]-[.D211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table:formula="of:=[.B2114]+11" office:value-type="float" office:value="23254" calcext:value-type="float">
            <text:p>23254</text:p>
          </table:table-cell>
          <table:table-cell office:value-type="float" office:value="8640000" calcext:value-type="float">
            <text:p>8640000</text:p>
          </table:table-cell>
          <table:table-cell table:formula="of:=[.B2115]/[.C2115]" office:value-type="float" office:value="0.00269143518518519" calcext:value-type="float">
            <text:p>0,00269143518518519000</text:p>
          </table:table-cell>
          <table:table-cell table:formula="of:=[.D2116]-[.D211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table:formula="of:=[.B2115]+11" office:value-type="float" office:value="23265" calcext:value-type="float">
            <text:p>23265</text:p>
          </table:table-cell>
          <table:table-cell office:value-type="float" office:value="8640000" calcext:value-type="float">
            <text:p>8640000</text:p>
          </table:table-cell>
          <table:table-cell table:formula="of:=[.B2116]/[.C2116]" office:value-type="float" office:value="0.00269270833333333" calcext:value-type="float">
            <text:p>0,00269270833333333000</text:p>
          </table:table-cell>
          <table:table-cell table:formula="of:=[.D2117]-[.D211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table:formula="of:=[.B2116]+11" office:value-type="float" office:value="23276" calcext:value-type="float">
            <text:p>23276</text:p>
          </table:table-cell>
          <table:table-cell office:value-type="float" office:value="8640000" calcext:value-type="float">
            <text:p>8640000</text:p>
          </table:table-cell>
          <table:table-cell table:formula="of:=[.B2117]/[.C2117]" office:value-type="float" office:value="0.00269398148148148" calcext:value-type="float">
            <text:p>0,00269398148148148000</text:p>
          </table:table-cell>
          <table:table-cell table:formula="of:=[.D2118]-[.D2117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table:formula="of:=[.B2117]+11" office:value-type="float" office:value="23287" calcext:value-type="float">
            <text:p>23287</text:p>
          </table:table-cell>
          <table:table-cell office:value-type="float" office:value="8640000" calcext:value-type="float">
            <text:p>8640000</text:p>
          </table:table-cell>
          <table:table-cell table:formula="of:=[.B2118]/[.C2118]" office:value-type="float" office:value="0.00269525462962963" calcext:value-type="float">
            <text:p>0,00269525462962963000</text:p>
          </table:table-cell>
          <table:table-cell table:formula="of:=[.D2119]-[.D211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table:formula="of:=[.B2118]+11" office:value-type="float" office:value="23298" calcext:value-type="float">
            <text:p>23298</text:p>
          </table:table-cell>
          <table:table-cell office:value-type="float" office:value="8640000" calcext:value-type="float">
            <text:p>8640000</text:p>
          </table:table-cell>
          <table:table-cell table:formula="of:=[.B2119]/[.C2119]" office:value-type="float" office:value="0.00269652777777778" calcext:value-type="float">
            <text:p>0,00269652777777778000</text:p>
          </table:table-cell>
          <table:table-cell table:formula="of:=[.D2120]-[.D211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table:formula="of:=[.B2119]+11" office:value-type="float" office:value="23309" calcext:value-type="float">
            <text:p>23309</text:p>
          </table:table-cell>
          <table:table-cell office:value-type="float" office:value="8640000" calcext:value-type="float">
            <text:p>8640000</text:p>
          </table:table-cell>
          <table:table-cell table:formula="of:=[.B2120]/[.C2120]" office:value-type="float" office:value="0.00269780092592593" calcext:value-type="float">
            <text:p>0,00269780092592593000</text:p>
          </table:table-cell>
          <table:table-cell table:formula="of:=[.D2121]-[.D212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table:formula="of:=[.B2120]+11" office:value-type="float" office:value="23320" calcext:value-type="float">
            <text:p>23320</text:p>
          </table:table-cell>
          <table:table-cell office:value-type="float" office:value="8640000" calcext:value-type="float">
            <text:p>8640000</text:p>
          </table:table-cell>
          <table:table-cell table:formula="of:=[.B2121]/[.C2121]" office:value-type="float" office:value="0.00269907407407407" calcext:value-type="float">
            <text:p>0,00269907407407407000</text:p>
          </table:table-cell>
          <table:table-cell table:formula="of:=[.D2122]-[.D2121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table:formula="of:=[.B2121]+11" office:value-type="float" office:value="23331" calcext:value-type="float">
            <text:p>23331</text:p>
          </table:table-cell>
          <table:table-cell office:value-type="float" office:value="8640000" calcext:value-type="float">
            <text:p>8640000</text:p>
          </table:table-cell>
          <table:table-cell table:formula="of:=[.B2122]/[.C2122]" office:value-type="float" office:value="0.00270034722222222" calcext:value-type="float">
            <text:p>0,00270034722222222000</text:p>
          </table:table-cell>
          <table:table-cell table:formula="of:=[.D2123]-[.D212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table:formula="of:=[.B2122]+11" office:value-type="float" office:value="23342" calcext:value-type="float">
            <text:p>23342</text:p>
          </table:table-cell>
          <table:table-cell office:value-type="float" office:value="8640000" calcext:value-type="float">
            <text:p>8640000</text:p>
          </table:table-cell>
          <table:table-cell table:formula="of:=[.B2123]/[.C2123]" office:value-type="float" office:value="0.00270162037037037" calcext:value-type="float">
            <text:p>0,00270162037037037000</text:p>
          </table:table-cell>
          <table:table-cell table:formula="of:=[.D2124]-[.D212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table:formula="of:=[.B2123]+11" office:value-type="float" office:value="23353" calcext:value-type="float">
            <text:p>23353</text:p>
          </table:table-cell>
          <table:table-cell office:value-type="float" office:value="8640000" calcext:value-type="float">
            <text:p>8640000</text:p>
          </table:table-cell>
          <table:table-cell table:formula="of:=[.B2124]/[.C2124]" office:value-type="float" office:value="0.00270289351851852" calcext:value-type="float">
            <text:p>0,00270289351851852000</text:p>
          </table:table-cell>
          <table:table-cell table:formula="of:=[.D2125]-[.D212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table:formula="of:=[.B2124]+11" office:value-type="float" office:value="23364" calcext:value-type="float">
            <text:p>23364</text:p>
          </table:table-cell>
          <table:table-cell office:value-type="float" office:value="8640000" calcext:value-type="float">
            <text:p>8640000</text:p>
          </table:table-cell>
          <table:table-cell table:formula="of:=[.B2125]/[.C2125]" office:value-type="float" office:value="0.00270416666666667" calcext:value-type="float">
            <text:p>0,00270416666666667000</text:p>
          </table:table-cell>
          <table:table-cell table:formula="of:=[.D2126]-[.D2125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table:formula="of:=[.B2125]+11" office:value-type="float" office:value="23375" calcext:value-type="float">
            <text:p>23375</text:p>
          </table:table-cell>
          <table:table-cell office:value-type="float" office:value="8640000" calcext:value-type="float">
            <text:p>8640000</text:p>
          </table:table-cell>
          <table:table-cell table:formula="of:=[.B2126]/[.C2126]" office:value-type="float" office:value="0.00270543981481481" calcext:value-type="float">
            <text:p>0,00270543981481481000</text:p>
          </table:table-cell>
          <table:table-cell table:formula="of:=[.D2127]-[.D212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table:formula="of:=[.B2126]+11" office:value-type="float" office:value="23386" calcext:value-type="float">
            <text:p>23386</text:p>
          </table:table-cell>
          <table:table-cell office:value-type="float" office:value="8640000" calcext:value-type="float">
            <text:p>8640000</text:p>
          </table:table-cell>
          <table:table-cell table:formula="of:=[.B2127]/[.C2127]" office:value-type="float" office:value="0.00270671296296296" calcext:value-type="float">
            <text:p>0,00270671296296296000</text:p>
          </table:table-cell>
          <table:table-cell table:formula="of:=[.D2128]-[.D212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table:formula="of:=[.B2127]+11" office:value-type="float" office:value="23397" calcext:value-type="float">
            <text:p>23397</text:p>
          </table:table-cell>
          <table:table-cell office:value-type="float" office:value="8640000" calcext:value-type="float">
            <text:p>8640000</text:p>
          </table:table-cell>
          <table:table-cell table:formula="of:=[.B2128]/[.C2128]" office:value-type="float" office:value="0.00270798611111111" calcext:value-type="float">
            <text:p>0,00270798611111111000</text:p>
          </table:table-cell>
          <table:table-cell table:formula="of:=[.D2129]-[.D212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table:formula="of:=[.B2128]+11" office:value-type="float" office:value="23408" calcext:value-type="float">
            <text:p>23408</text:p>
          </table:table-cell>
          <table:table-cell office:value-type="float" office:value="8640000" calcext:value-type="float">
            <text:p>8640000</text:p>
          </table:table-cell>
          <table:table-cell table:formula="of:=[.B2129]/[.C2129]" office:value-type="float" office:value="0.00270925925925926" calcext:value-type="float">
            <text:p>0,00270925925925926000</text:p>
          </table:table-cell>
          <table:table-cell table:formula="of:=[.D2130]-[.D212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table:formula="of:=[.B2129]+11" office:value-type="float" office:value="23419" calcext:value-type="float">
            <text:p>23419</text:p>
          </table:table-cell>
          <table:table-cell office:value-type="float" office:value="8640000" calcext:value-type="float">
            <text:p>8640000</text:p>
          </table:table-cell>
          <table:table-cell table:formula="of:=[.B2130]/[.C2130]" office:value-type="float" office:value="0.00271053240740741" calcext:value-type="float">
            <text:p>0,00271053240740741000</text:p>
          </table:table-cell>
          <table:table-cell table:formula="of:=[.D2131]-[.D2130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table:formula="of:=[.B2130]+11" office:value-type="float" office:value="23430" calcext:value-type="float">
            <text:p>23430</text:p>
          </table:table-cell>
          <table:table-cell office:value-type="float" office:value="8640000" calcext:value-type="float">
            <text:p>8640000</text:p>
          </table:table-cell>
          <table:table-cell table:formula="of:=[.B2131]/[.C2131]" office:value-type="float" office:value="0.00271180555555556" calcext:value-type="float">
            <text:p>0,00271180555555556000</text:p>
          </table:table-cell>
          <table:table-cell table:formula="of:=[.D2132]-[.D213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table:formula="of:=[.B2131]+11" office:value-type="float" office:value="23441" calcext:value-type="float">
            <text:p>23441</text:p>
          </table:table-cell>
          <table:table-cell office:value-type="float" office:value="8640000" calcext:value-type="float">
            <text:p>8640000</text:p>
          </table:table-cell>
          <table:table-cell table:formula="of:=[.B2132]/[.C2132]" office:value-type="float" office:value="0.0027130787037037" calcext:value-type="float">
            <text:p>0,00271307870370370000</text:p>
          </table:table-cell>
          <table:table-cell table:formula="of:=[.D2133]-[.D213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table:formula="of:=[.B2132]+11" office:value-type="float" office:value="23452" calcext:value-type="float">
            <text:p>23452</text:p>
          </table:table-cell>
          <table:table-cell office:value-type="float" office:value="8640000" calcext:value-type="float">
            <text:p>8640000</text:p>
          </table:table-cell>
          <table:table-cell table:formula="of:=[.B2133]/[.C2133]" office:value-type="float" office:value="0.00271435185185185" calcext:value-type="float">
            <text:p>0,00271435185185185000</text:p>
          </table:table-cell>
          <table:table-cell table:formula="of:=[.D2134]-[.D213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table:formula="of:=[.B2133]+11" office:value-type="float" office:value="23463" calcext:value-type="float">
            <text:p>23463</text:p>
          </table:table-cell>
          <table:table-cell office:value-type="float" office:value="8640000" calcext:value-type="float">
            <text:p>8640000</text:p>
          </table:table-cell>
          <table:table-cell table:formula="of:=[.B2134]/[.C2134]" office:value-type="float" office:value="0.002715625" calcext:value-type="float">
            <text:p>0,00271562500000000000</text:p>
          </table:table-cell>
          <table:table-cell table:formula="of:=[.D2135]-[.D2134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table:formula="of:=[.B2134]+11" office:value-type="float" office:value="23474" calcext:value-type="float">
            <text:p>23474</text:p>
          </table:table-cell>
          <table:table-cell office:value-type="float" office:value="8640000" calcext:value-type="float">
            <text:p>8640000</text:p>
          </table:table-cell>
          <table:table-cell table:formula="of:=[.B2135]/[.C2135]" office:value-type="float" office:value="0.00271689814814815" calcext:value-type="float">
            <text:p>0,00271689814814815000</text:p>
          </table:table-cell>
          <table:table-cell table:formula="of:=[.D2136]-[.D213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table:formula="of:=[.B2135]+11" office:value-type="float" office:value="23485" calcext:value-type="float">
            <text:p>23485</text:p>
          </table:table-cell>
          <table:table-cell office:value-type="float" office:value="8640000" calcext:value-type="float">
            <text:p>8640000</text:p>
          </table:table-cell>
          <table:table-cell table:formula="of:=[.B2136]/[.C2136]" office:value-type="float" office:value="0.0027181712962963" calcext:value-type="float">
            <text:p>0,00271817129629630000</text:p>
          </table:table-cell>
          <table:table-cell table:formula="of:=[.D2137]-[.D213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table:formula="of:=[.B2136]+11" office:value-type="float" office:value="23496" calcext:value-type="float">
            <text:p>23496</text:p>
          </table:table-cell>
          <table:table-cell office:value-type="float" office:value="8640000" calcext:value-type="float">
            <text:p>8640000</text:p>
          </table:table-cell>
          <table:table-cell table:formula="of:=[.B2137]/[.C2137]" office:value-type="float" office:value="0.00271944444444444" calcext:value-type="float">
            <text:p>0,00271944444444444000</text:p>
          </table:table-cell>
          <table:table-cell table:formula="of:=[.D2138]-[.D213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table:formula="of:=[.B2137]+11" office:value-type="float" office:value="23507" calcext:value-type="float">
            <text:p>23507</text:p>
          </table:table-cell>
          <table:table-cell office:value-type="float" office:value="8640000" calcext:value-type="float">
            <text:p>8640000</text:p>
          </table:table-cell>
          <table:table-cell table:formula="of:=[.B2138]/[.C2138]" office:value-type="float" office:value="0.00272071759259259" calcext:value-type="float">
            <text:p>0,00272071759259259000</text:p>
          </table:table-cell>
          <table:table-cell table:formula="of:=[.D2139]-[.D2138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table:formula="of:=[.B2138]+11" office:value-type="float" office:value="23518" calcext:value-type="float">
            <text:p>23518</text:p>
          </table:table-cell>
          <table:table-cell office:value-type="float" office:value="8640000" calcext:value-type="float">
            <text:p>8640000</text:p>
          </table:table-cell>
          <table:table-cell table:formula="of:=[.B2139]/[.C2139]" office:value-type="float" office:value="0.00272199074074074" calcext:value-type="float">
            <text:p>0,00272199074074074000</text:p>
          </table:table-cell>
          <table:table-cell table:formula="of:=[.D2140]-[.D213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table:formula="of:=[.B2139]+11" office:value-type="float" office:value="23529" calcext:value-type="float">
            <text:p>23529</text:p>
          </table:table-cell>
          <table:table-cell office:value-type="float" office:value="8640000" calcext:value-type="float">
            <text:p>8640000</text:p>
          </table:table-cell>
          <table:table-cell table:formula="of:=[.B2140]/[.C2140]" office:value-type="float" office:value="0.00272326388888889" calcext:value-type="float">
            <text:p>0,00272326388888889000</text:p>
          </table:table-cell>
          <table:table-cell table:formula="of:=[.D2141]-[.D214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table:formula="of:=[.B2140]+11" office:value-type="float" office:value="23540" calcext:value-type="float">
            <text:p>23540</text:p>
          </table:table-cell>
          <table:table-cell office:value-type="float" office:value="8640000" calcext:value-type="float">
            <text:p>8640000</text:p>
          </table:table-cell>
          <table:table-cell table:formula="of:=[.B2141]/[.C2141]" office:value-type="float" office:value="0.00272453703703704" calcext:value-type="float">
            <text:p>0,00272453703703704000</text:p>
          </table:table-cell>
          <table:table-cell table:formula="of:=[.D2142]-[.D214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table:formula="of:=[.B2141]+11" office:value-type="float" office:value="23551" calcext:value-type="float">
            <text:p>23551</text:p>
          </table:table-cell>
          <table:table-cell office:value-type="float" office:value="8640000" calcext:value-type="float">
            <text:p>8640000</text:p>
          </table:table-cell>
          <table:table-cell table:formula="of:=[.B2142]/[.C2142]" office:value-type="float" office:value="0.00272581018518519" calcext:value-type="float">
            <text:p>0,00272581018518519000</text:p>
          </table:table-cell>
          <table:table-cell table:formula="of:=[.D2143]-[.D214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table:formula="of:=[.B2142]+11" office:value-type="float" office:value="23562" calcext:value-type="float">
            <text:p>23562</text:p>
          </table:table-cell>
          <table:table-cell office:value-type="float" office:value="8640000" calcext:value-type="float">
            <text:p>8640000</text:p>
          </table:table-cell>
          <table:table-cell table:formula="of:=[.B2143]/[.C2143]" office:value-type="float" office:value="0.00272708333333333" calcext:value-type="float">
            <text:p>0,00272708333333333000</text:p>
          </table:table-cell>
          <table:table-cell table:formula="of:=[.D2144]-[.D2143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table:formula="of:=[.B2143]+11" office:value-type="float" office:value="23573" calcext:value-type="float">
            <text:p>23573</text:p>
          </table:table-cell>
          <table:table-cell office:value-type="float" office:value="8640000" calcext:value-type="float">
            <text:p>8640000</text:p>
          </table:table-cell>
          <table:table-cell table:formula="of:=[.B2144]/[.C2144]" office:value-type="float" office:value="0.00272835648148148" calcext:value-type="float">
            <text:p>0,00272835648148148000</text:p>
          </table:table-cell>
          <table:table-cell table:formula="of:=[.D2145]-[.D214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table:formula="of:=[.B2144]+11" office:value-type="float" office:value="23584" calcext:value-type="float">
            <text:p>23584</text:p>
          </table:table-cell>
          <table:table-cell office:value-type="float" office:value="8640000" calcext:value-type="float">
            <text:p>8640000</text:p>
          </table:table-cell>
          <table:table-cell table:formula="of:=[.B2145]/[.C2145]" office:value-type="float" office:value="0.00272962962962963" calcext:value-type="float">
            <text:p>0,00272962962962963000</text:p>
          </table:table-cell>
          <table:table-cell table:formula="of:=[.D2146]-[.D214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table:formula="of:=[.B2145]+11" office:value-type="float" office:value="23595" calcext:value-type="float">
            <text:p>23595</text:p>
          </table:table-cell>
          <table:table-cell office:value-type="float" office:value="8640000" calcext:value-type="float">
            <text:p>8640000</text:p>
          </table:table-cell>
          <table:table-cell table:formula="of:=[.B2146]/[.C2146]" office:value-type="float" office:value="0.00273090277777778" calcext:value-type="float">
            <text:p>0,00273090277777778000</text:p>
          </table:table-cell>
          <table:table-cell table:formula="of:=[.D2147]-[.D214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table:formula="of:=[.B2146]+11" office:value-type="float" office:value="23606" calcext:value-type="float">
            <text:p>23606</text:p>
          </table:table-cell>
          <table:table-cell office:value-type="float" office:value="8640000" calcext:value-type="float">
            <text:p>8640000</text:p>
          </table:table-cell>
          <table:table-cell table:formula="of:=[.B2147]/[.C2147]" office:value-type="float" office:value="0.00273217592592593" calcext:value-type="float">
            <text:p>0,00273217592592593000</text:p>
          </table:table-cell>
          <table:table-cell table:formula="of:=[.D2148]-[.D2147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table:formula="of:=[.B2147]+11" office:value-type="float" office:value="23617" calcext:value-type="float">
            <text:p>23617</text:p>
          </table:table-cell>
          <table:table-cell office:value-type="float" office:value="8640000" calcext:value-type="float">
            <text:p>8640000</text:p>
          </table:table-cell>
          <table:table-cell table:formula="of:=[.B2148]/[.C2148]" office:value-type="float" office:value="0.00273344907407407" calcext:value-type="float">
            <text:p>0,00273344907407407000</text:p>
          </table:table-cell>
          <table:table-cell table:formula="of:=[.D2149]-[.D214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table:formula="of:=[.B2148]+11" office:value-type="float" office:value="23628" calcext:value-type="float">
            <text:p>23628</text:p>
          </table:table-cell>
          <table:table-cell office:value-type="float" office:value="8640000" calcext:value-type="float">
            <text:p>8640000</text:p>
          </table:table-cell>
          <table:table-cell table:formula="of:=[.B2149]/[.C2149]" office:value-type="float" office:value="0.00273472222222222" calcext:value-type="float">
            <text:p>0,00273472222222222000</text:p>
          </table:table-cell>
          <table:table-cell table:formula="of:=[.D2150]-[.D214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table:formula="of:=[.B2149]+11" office:value-type="float" office:value="23639" calcext:value-type="float">
            <text:p>23639</text:p>
          </table:table-cell>
          <table:table-cell office:value-type="float" office:value="8640000" calcext:value-type="float">
            <text:p>8640000</text:p>
          </table:table-cell>
          <table:table-cell table:formula="of:=[.B2150]/[.C2150]" office:value-type="float" office:value="0.00273599537037037" calcext:value-type="float">
            <text:p>0,00273599537037037000</text:p>
          </table:table-cell>
          <table:table-cell table:formula="of:=[.D2151]-[.D215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table:formula="of:=[.B2150]+11" office:value-type="float" office:value="23650" calcext:value-type="float">
            <text:p>23650</text:p>
          </table:table-cell>
          <table:table-cell office:value-type="float" office:value="8640000" calcext:value-type="float">
            <text:p>8640000</text:p>
          </table:table-cell>
          <table:table-cell table:formula="of:=[.B2151]/[.C2151]" office:value-type="float" office:value="0.00273726851851852" calcext:value-type="float">
            <text:p>0,00273726851851852000</text:p>
          </table:table-cell>
          <table:table-cell table:formula="of:=[.D2152]-[.D2151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table:formula="of:=[.B2151]+11" office:value-type="float" office:value="23661" calcext:value-type="float">
            <text:p>23661</text:p>
          </table:table-cell>
          <table:table-cell office:value-type="float" office:value="8640000" calcext:value-type="float">
            <text:p>8640000</text:p>
          </table:table-cell>
          <table:table-cell table:formula="of:=[.B2152]/[.C2152]" office:value-type="float" office:value="0.00273854166666667" calcext:value-type="float">
            <text:p>0,00273854166666667000</text:p>
          </table:table-cell>
          <table:table-cell table:formula="of:=[.D2153]-[.D215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table:formula="of:=[.B2152]+11" office:value-type="float" office:value="23672" calcext:value-type="float">
            <text:p>23672</text:p>
          </table:table-cell>
          <table:table-cell office:value-type="float" office:value="8640000" calcext:value-type="float">
            <text:p>8640000</text:p>
          </table:table-cell>
          <table:table-cell table:formula="of:=[.B2153]/[.C2153]" office:value-type="float" office:value="0.00273981481481481" calcext:value-type="float">
            <text:p>0,00273981481481481000</text:p>
          </table:table-cell>
          <table:table-cell table:formula="of:=[.D2154]-[.D215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table:formula="of:=[.B2153]+11" office:value-type="float" office:value="23683" calcext:value-type="float">
            <text:p>23683</text:p>
          </table:table-cell>
          <table:table-cell office:value-type="float" office:value="8640000" calcext:value-type="float">
            <text:p>8640000</text:p>
          </table:table-cell>
          <table:table-cell table:formula="of:=[.B2154]/[.C2154]" office:value-type="float" office:value="0.00274108796296296" calcext:value-type="float">
            <text:p>0,00274108796296296000</text:p>
          </table:table-cell>
          <table:table-cell table:formula="of:=[.D2155]-[.D215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table:formula="of:=[.B2154]+11" office:value-type="float" office:value="23694" calcext:value-type="float">
            <text:p>23694</text:p>
          </table:table-cell>
          <table:table-cell office:value-type="float" office:value="8640000" calcext:value-type="float">
            <text:p>8640000</text:p>
          </table:table-cell>
          <table:table-cell table:formula="of:=[.B2155]/[.C2155]" office:value-type="float" office:value="0.00274236111111111" calcext:value-type="float">
            <text:p>0,00274236111111111000</text:p>
          </table:table-cell>
          <table:table-cell table:formula="of:=[.D2156]-[.D215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table:formula="of:=[.B2155]+11" office:value-type="float" office:value="23705" calcext:value-type="float">
            <text:p>23705</text:p>
          </table:table-cell>
          <table:table-cell office:value-type="float" office:value="8640000" calcext:value-type="float">
            <text:p>8640000</text:p>
          </table:table-cell>
          <table:table-cell table:formula="of:=[.B2156]/[.C2156]" office:value-type="float" office:value="0.00274363425925926" calcext:value-type="float">
            <text:p>0,00274363425925926000</text:p>
          </table:table-cell>
          <table:table-cell table:formula="of:=[.D2157]-[.D2156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table:formula="of:=[.B2156]+11" office:value-type="float" office:value="23716" calcext:value-type="float">
            <text:p>23716</text:p>
          </table:table-cell>
          <table:table-cell office:value-type="float" office:value="8640000" calcext:value-type="float">
            <text:p>8640000</text:p>
          </table:table-cell>
          <table:table-cell table:formula="of:=[.B2157]/[.C2157]" office:value-type="float" office:value="0.00274490740740741" calcext:value-type="float">
            <text:p>0,00274490740740741000</text:p>
          </table:table-cell>
          <table:table-cell table:formula="of:=[.D2158]-[.D215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table:formula="of:=[.B2157]+11" office:value-type="float" office:value="23727" calcext:value-type="float">
            <text:p>23727</text:p>
          </table:table-cell>
          <table:table-cell office:value-type="float" office:value="8640000" calcext:value-type="float">
            <text:p>8640000</text:p>
          </table:table-cell>
          <table:table-cell table:formula="of:=[.B2158]/[.C2158]" office:value-type="float" office:value="0.00274618055555556" calcext:value-type="float">
            <text:p>0,00274618055555556000</text:p>
          </table:table-cell>
          <table:table-cell table:formula="of:=[.D2159]-[.D215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table:formula="of:=[.B2158]+11" office:value-type="float" office:value="23738" calcext:value-type="float">
            <text:p>23738</text:p>
          </table:table-cell>
          <table:table-cell office:value-type="float" office:value="8640000" calcext:value-type="float">
            <text:p>8640000</text:p>
          </table:table-cell>
          <table:table-cell table:formula="of:=[.B2159]/[.C2159]" office:value-type="float" office:value="0.0027474537037037" calcext:value-type="float">
            <text:p>0,00274745370370370000</text:p>
          </table:table-cell>
          <table:table-cell table:formula="of:=[.D2160]-[.D215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table:formula="of:=[.B2159]+11" office:value-type="float" office:value="23749" calcext:value-type="float">
            <text:p>23749</text:p>
          </table:table-cell>
          <table:table-cell office:value-type="float" office:value="8640000" calcext:value-type="float">
            <text:p>8640000</text:p>
          </table:table-cell>
          <table:table-cell table:formula="of:=[.B2160]/[.C2160]" office:value-type="float" office:value="0.00274872685185185" calcext:value-type="float">
            <text:p>0,00274872685185185000</text:p>
          </table:table-cell>
          <table:table-cell table:formula="of:=[.D2161]-[.D2160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table:formula="of:=[.B2160]+11" office:value-type="float" office:value="23760" calcext:value-type="float">
            <text:p>23760</text:p>
          </table:table-cell>
          <table:table-cell office:value-type="float" office:value="8640000" calcext:value-type="float">
            <text:p>8640000</text:p>
          </table:table-cell>
          <table:table-cell table:formula="of:=[.B2161]/[.C2161]" office:value-type="float" office:value="0.00275" calcext:value-type="float">
            <text:p>0,00275000000000000000</text:p>
          </table:table-cell>
          <table:table-cell table:formula="of:=[.D2162]-[.D216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table:formula="of:=[.B2161]+11" office:value-type="float" office:value="23771" calcext:value-type="float">
            <text:p>23771</text:p>
          </table:table-cell>
          <table:table-cell office:value-type="float" office:value="8640000" calcext:value-type="float">
            <text:p>8640000</text:p>
          </table:table-cell>
          <table:table-cell table:formula="of:=[.B2162]/[.C2162]" office:value-type="float" office:value="0.00275127314814815" calcext:value-type="float">
            <text:p>0,00275127314814815000</text:p>
          </table:table-cell>
          <table:table-cell table:formula="of:=[.D2163]-[.D216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table:formula="of:=[.B2162]+11" office:value-type="float" office:value="23782" calcext:value-type="float">
            <text:p>23782</text:p>
          </table:table-cell>
          <table:table-cell office:value-type="float" office:value="8640000" calcext:value-type="float">
            <text:p>8640000</text:p>
          </table:table-cell>
          <table:table-cell table:formula="of:=[.B2163]/[.C2163]" office:value-type="float" office:value="0.0027525462962963" calcext:value-type="float">
            <text:p>0,00275254629629630000</text:p>
          </table:table-cell>
          <table:table-cell table:formula="of:=[.D2164]-[.D2163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table:formula="of:=[.B2163]+11" office:value-type="float" office:value="23793" calcext:value-type="float">
            <text:p>23793</text:p>
          </table:table-cell>
          <table:table-cell office:value-type="float" office:value="8640000" calcext:value-type="float">
            <text:p>8640000</text:p>
          </table:table-cell>
          <table:table-cell table:formula="of:=[.B2164]/[.C2164]" office:value-type="float" office:value="0.00275381944444444" calcext:value-type="float">
            <text:p>0,00275381944444444000</text:p>
          </table:table-cell>
          <table:table-cell table:formula="of:=[.D2165]-[.D2164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table:formula="of:=[.B2164]+11" office:value-type="float" office:value="23804" calcext:value-type="float">
            <text:p>23804</text:p>
          </table:table-cell>
          <table:table-cell office:value-type="float" office:value="8640000" calcext:value-type="float">
            <text:p>8640000</text:p>
          </table:table-cell>
          <table:table-cell table:formula="of:=[.B2165]/[.C2165]" office:value-type="float" office:value="0.00275509259259259" calcext:value-type="float">
            <text:p>0,00275509259259259000</text:p>
          </table:table-cell>
          <table:table-cell table:formula="of:=[.D2166]-[.D216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table:formula="of:=[.B2165]+11" office:value-type="float" office:value="23815" calcext:value-type="float">
            <text:p>23815</text:p>
          </table:table-cell>
          <table:table-cell office:value-type="float" office:value="8640000" calcext:value-type="float">
            <text:p>8640000</text:p>
          </table:table-cell>
          <table:table-cell table:formula="of:=[.B2166]/[.C2166]" office:value-type="float" office:value="0.00275636574074074" calcext:value-type="float">
            <text:p>0,00275636574074074000</text:p>
          </table:table-cell>
          <table:table-cell table:formula="of:=[.D2167]-[.D216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table:formula="of:=[.B2166]+11" office:value-type="float" office:value="23826" calcext:value-type="float">
            <text:p>23826</text:p>
          </table:table-cell>
          <table:table-cell office:value-type="float" office:value="8640000" calcext:value-type="float">
            <text:p>8640000</text:p>
          </table:table-cell>
          <table:table-cell table:formula="of:=[.B2167]/[.C2167]" office:value-type="float" office:value="0.00275763888888889" calcext:value-type="float">
            <text:p>0,00275763888888889000</text:p>
          </table:table-cell>
          <table:table-cell table:formula="of:=[.D2168]-[.D2167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table:formula="of:=[.B2167]+11" office:value-type="float" office:value="23837" calcext:value-type="float">
            <text:p>23837</text:p>
          </table:table-cell>
          <table:table-cell office:value-type="float" office:value="8640000" calcext:value-type="float">
            <text:p>8640000</text:p>
          </table:table-cell>
          <table:table-cell table:formula="of:=[.B2168]/[.C2168]" office:value-type="float" office:value="0.00275891203703704" calcext:value-type="float">
            <text:p>0,00275891203703704000</text:p>
          </table:table-cell>
          <table:table-cell table:formula="of:=[.D2169]-[.D216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table:formula="of:=[.B2168]+11" office:value-type="float" office:value="23848" calcext:value-type="float">
            <text:p>23848</text:p>
          </table:table-cell>
          <table:table-cell office:value-type="float" office:value="8640000" calcext:value-type="float">
            <text:p>8640000</text:p>
          </table:table-cell>
          <table:table-cell table:formula="of:=[.B2169]/[.C2169]" office:value-type="float" office:value="0.00276018518518519" calcext:value-type="float">
            <text:p>0,00276018518518519000</text:p>
          </table:table-cell>
          <table:table-cell table:formula="of:=[.D2170]-[.D2169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table:formula="of:=[.B2169]+11" office:value-type="float" office:value="23859" calcext:value-type="float">
            <text:p>23859</text:p>
          </table:table-cell>
          <table:table-cell office:value-type="float" office:value="8640000" calcext:value-type="float">
            <text:p>8640000</text:p>
          </table:table-cell>
          <table:table-cell table:formula="of:=[.B2170]/[.C2170]" office:value-type="float" office:value="0.00276145833333333" calcext:value-type="float">
            <text:p>0,00276145833333333000</text:p>
          </table:table-cell>
          <table:table-cell table:formula="of:=[.D2171]-[.D217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table:formula="of:=[.B2170]+11" office:value-type="float" office:value="23870" calcext:value-type="float">
            <text:p>23870</text:p>
          </table:table-cell>
          <table:table-cell office:value-type="float" office:value="8640000" calcext:value-type="float">
            <text:p>8640000</text:p>
          </table:table-cell>
          <table:table-cell table:formula="of:=[.B2171]/[.C2171]" office:value-type="float" office:value="0.00276273148148148" calcext:value-type="float">
            <text:p>0,00276273148148148000</text:p>
          </table:table-cell>
          <table:table-cell table:formula="of:=[.D2172]-[.D2171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table:formula="of:=[.B2171]+11" office:value-type="float" office:value="23881" calcext:value-type="float">
            <text:p>23881</text:p>
          </table:table-cell>
          <table:table-cell office:value-type="float" office:value="8640000" calcext:value-type="float">
            <text:p>8640000</text:p>
          </table:table-cell>
          <table:table-cell table:formula="of:=[.B2172]/[.C2172]" office:value-type="float" office:value="0.00276400462962963" calcext:value-type="float">
            <text:p>0,00276400462962963000</text:p>
          </table:table-cell>
          <table:table-cell table:formula="of:=[.D2173]-[.D2172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table:formula="of:=[.B2172]+11" office:value-type="float" office:value="23892" calcext:value-type="float">
            <text:p>23892</text:p>
          </table:table-cell>
          <table:table-cell office:value-type="float" office:value="8640000" calcext:value-type="float">
            <text:p>8640000</text:p>
          </table:table-cell>
          <table:table-cell table:formula="of:=[.B2173]/[.C2173]" office:value-type="float" office:value="0.00276527777777778" calcext:value-type="float">
            <text:p>0,00276527777777778000</text:p>
          </table:table-cell>
          <table:table-cell table:formula="of:=[.D2174]-[.D2173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table:formula="of:=[.B2173]+11" office:value-type="float" office:value="23903" calcext:value-type="float">
            <text:p>23903</text:p>
          </table:table-cell>
          <table:table-cell office:value-type="float" office:value="8640000" calcext:value-type="float">
            <text:p>8640000</text:p>
          </table:table-cell>
          <table:table-cell table:formula="of:=[.B2174]/[.C2174]" office:value-type="float" office:value="0.00276655092592593" calcext:value-type="float">
            <text:p>0,00276655092592593000</text:p>
          </table:table-cell>
          <table:table-cell table:formula="of:=[.D2175]-[.D2174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table:formula="of:=[.B2174]+11" office:value-type="float" office:value="23914" calcext:value-type="float">
            <text:p>23914</text:p>
          </table:table-cell>
          <table:table-cell office:value-type="float" office:value="8640000" calcext:value-type="float">
            <text:p>8640000</text:p>
          </table:table-cell>
          <table:table-cell table:formula="of:=[.B2175]/[.C2175]" office:value-type="float" office:value="0.00276782407407407" calcext:value-type="float">
            <text:p>0,00276782407407407000</text:p>
          </table:table-cell>
          <table:table-cell table:formula="of:=[.D2176]-[.D2175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table:formula="of:=[.B2175]+11" office:value-type="float" office:value="23925" calcext:value-type="float">
            <text:p>23925</text:p>
          </table:table-cell>
          <table:table-cell office:value-type="float" office:value="8640000" calcext:value-type="float">
            <text:p>8640000</text:p>
          </table:table-cell>
          <table:table-cell table:formula="of:=[.B2176]/[.C2176]" office:value-type="float" office:value="0.00276909722222222" calcext:value-type="float">
            <text:p>0,00276909722222222000</text:p>
          </table:table-cell>
          <table:table-cell table:formula="of:=[.D2177]-[.D2176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table:formula="of:=[.B2176]+11" office:value-type="float" office:value="23936" calcext:value-type="float">
            <text:p>23936</text:p>
          </table:table-cell>
          <table:table-cell office:value-type="float" office:value="8640000" calcext:value-type="float">
            <text:p>8640000</text:p>
          </table:table-cell>
          <table:table-cell table:formula="of:=[.B2177]/[.C2177]" office:value-type="float" office:value="0.00277037037037037" calcext:value-type="float">
            <text:p>0,00277037037037037000</text:p>
          </table:table-cell>
          <table:table-cell table:formula="of:=[.D2178]-[.D2177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table:formula="of:=[.B2177]+11" office:value-type="float" office:value="23947" calcext:value-type="float">
            <text:p>23947</text:p>
          </table:table-cell>
          <table:table-cell office:value-type="float" office:value="8640000" calcext:value-type="float">
            <text:p>8640000</text:p>
          </table:table-cell>
          <table:table-cell table:formula="of:=[.B2178]/[.C2178]" office:value-type="float" office:value="0.00277164351851852" calcext:value-type="float">
            <text:p>0,00277164351851852000</text:p>
          </table:table-cell>
          <table:table-cell table:formula="of:=[.D2179]-[.D2178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table:formula="of:=[.B2178]+11" office:value-type="float" office:value="23958" calcext:value-type="float">
            <text:p>23958</text:p>
          </table:table-cell>
          <table:table-cell office:value-type="float" office:value="8640000" calcext:value-type="float">
            <text:p>8640000</text:p>
          </table:table-cell>
          <table:table-cell table:formula="of:=[.B2179]/[.C2179]" office:value-type="float" office:value="0.00277291666666667" calcext:value-type="float">
            <text:p>0,00277291666666667000</text:p>
          </table:table-cell>
          <table:table-cell table:formula="of:=[.D2180]-[.D2179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table:formula="of:=[.B2179]+11" office:value-type="float" office:value="23969" calcext:value-type="float">
            <text:p>23969</text:p>
          </table:table-cell>
          <table:table-cell office:value-type="float" office:value="8640000" calcext:value-type="float">
            <text:p>8640000</text:p>
          </table:table-cell>
          <table:table-cell table:formula="of:=[.B2180]/[.C2180]" office:value-type="float" office:value="0.00277418981481482" calcext:value-type="float">
            <text:p>0,00277418981481482000</text:p>
          </table:table-cell>
          <table:table-cell table:formula="of:=[.D2181]-[.D2180]" office:value-type="float" office:value="0.00000127314814814825" calcext:value-type="float">
            <text:p>0,00000127314814814825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table:formula="of:=[.B2180]+11" office:value-type="float" office:value="23980" calcext:value-type="float">
            <text:p>23980</text:p>
          </table:table-cell>
          <table:table-cell office:value-type="float" office:value="8640000" calcext:value-type="float">
            <text:p>8640000</text:p>
          </table:table-cell>
          <table:table-cell table:formula="of:=[.B2181]/[.C2181]" office:value-type="float" office:value="0.00277546296296296" calcext:value-type="float">
            <text:p>0,00277546296296296000</text:p>
          </table:table-cell>
          <table:table-cell table:formula="of:=[.D2182]-[.D2181]" office:value-type="float" office:value="0.00000127314814814782" calcext:value-type="float">
            <text:p>0,00000127314814814782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table:formula="of:=[.B2181]+11" office:value-type="float" office:value="23991" calcext:value-type="float">
            <text:p>23991</text:p>
          </table:table-cell>
          <table:table-cell office:value-type="float" office:value="8640000" calcext:value-type="float">
            <text:p>8640000</text:p>
          </table:table-cell>
          <table:table-cell table:formula="of:=[.B2182]/[.C2182]" office:value-type="float" office:value="0.00277673611111111" calcext:value-type="float">
            <text:p>0,00277673611111111000</text:p>
          </table:table-cell>
          <table:table-cell table:formula="of:=#REF!-[.D2182]" office:value-type="string" office:string-value="" calcext:value-type="error">
            <text:p>#REF!</text:p>
          </table:table-cell>
        </table:table-row>
        <table:table-row table:style-name="ro1" table:number-rows-repeated="104639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5:32:53.606713208</meta:creation-date>
    <dc:date>2026-05-17T15:33:02.868545205</dc:date>
    <meta:editing-duration>PT10S</meta:editing-duration>
    <meta:editing-cycles>1</meta:editing-cycles>
    <meta:document-statistic meta:table-count="1" meta:cell-count="10910" meta:object-count="0"/>
    <meta:generator>LibreOffice/24.2.7.2$Linux_X86_64 LibreOffice_project/420$Build-2</meta:generator>
  </office:meta>
</office:document-meta>
</file>