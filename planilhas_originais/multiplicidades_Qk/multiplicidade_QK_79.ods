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14351851851852" calcext:value-type="float">
            <text:p>0,00000914351851851852</text:p>
          </table:table-cell>
          <table:table-cell table:formula="of:=[.D3]-[.D2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9" office:value-type="float" office:value="158" calcext:value-type="float">
            <text:p>15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8287037037037" calcext:value-type="float">
            <text:p>0,00001828703703703700</text:p>
          </table:table-cell>
          <table:table-cell table:formula="of:=[.D4]-[.D3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9" office:value-type="float" office:value="237" calcext:value-type="float">
            <text:p>23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74305555555556" calcext:value-type="float">
            <text:p>0,00002743055555555560</text:p>
          </table:table-cell>
          <table:table-cell table:formula="of:=[.D5]-[.D4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9" office:value-type="float" office:value="316" calcext:value-type="float">
            <text:p>31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65740740740741" calcext:value-type="float">
            <text:p>0,00003657407407407410</text:p>
          </table:table-cell>
          <table:table-cell table:formula="of:=[.D6]-[.D5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9" office:value-type="float" office:value="395" calcext:value-type="float">
            <text:p>39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57175925925926" calcext:value-type="float">
            <text:p>0,00004571759259259260</text:p>
          </table:table-cell>
          <table:table-cell table:formula="of:=[.D7]-[.D6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9" office:value-type="float" office:value="474" calcext:value-type="float">
            <text:p>47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48611111111111" calcext:value-type="float">
            <text:p>0,00005486111111111110</text:p>
          </table:table-cell>
          <table:table-cell table:formula="of:=[.D8]-[.D7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9" office:value-type="float" office:value="553" calcext:value-type="float">
            <text:p>55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40046296296296" calcext:value-type="float">
            <text:p>0,00006400462962962960</text:p>
          </table:table-cell>
          <table:table-cell table:formula="of:=[.D9]-[.D8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9" office:value-type="float" office:value="632" calcext:value-type="float">
            <text:p>63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31481481481482" calcext:value-type="float">
            <text:p>0,00007314814814814820</text:p>
          </table:table-cell>
          <table:table-cell table:formula="of:=[.D10]-[.D9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9" office:value-type="float" office:value="711" calcext:value-type="float">
            <text:p>71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22916666666667" calcext:value-type="float">
            <text:p>0,00008229166666666670</text:p>
          </table:table-cell>
          <table:table-cell table:formula="of:=[.D11]-[.D10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9" office:value-type="float" office:value="790" calcext:value-type="float">
            <text:p>7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14351851851852" calcext:value-type="float">
            <text:p>0,00009143518518518520</text:p>
          </table:table-cell>
          <table:table-cell table:formula="of:=[.D12]-[.D11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9" office:value-type="float" office:value="869" calcext:value-type="float">
            <text:p>86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0578703703704" calcext:value-type="float">
            <text:p>0,00010057870370370400</text:p>
          </table:table-cell>
          <table:table-cell table:formula="of:=[.D13]-[.D12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9" office:value-type="float" office:value="948" calcext:value-type="float">
            <text:p>94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9722222222222" calcext:value-type="float">
            <text:p>0,00010972222222222200</text:p>
          </table:table-cell>
          <table:table-cell table:formula="of:=[.D14]-[.D13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9" office:value-type="float" office:value="1027" calcext:value-type="float">
            <text:p>102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18865740740741" calcext:value-type="float">
            <text:p>0,00011886574074074100</text:p>
          </table:table-cell>
          <table:table-cell table:formula="of:=[.D15]-[.D14]" office:value-type="float" office:value="0.00000914351851851853" calcext:value-type="float">
            <text:p>0,000009143518518518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9" office:value-type="float" office:value="1106" calcext:value-type="float">
            <text:p>110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28009259259259" calcext:value-type="float">
            <text:p>0,00012800925925925900</text:p>
          </table:table-cell>
          <table:table-cell table:formula="of:=[.D16]-[.D15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9" office:value-type="float" office:value="1185" calcext:value-type="float">
            <text:p>118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37152777777778" calcext:value-type="float">
            <text:p>0,00013715277777777800</text:p>
          </table:table-cell>
          <table:table-cell table:formula="of:=[.D17]-[.D16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9" office:value-type="float" office:value="1264" calcext:value-type="float">
            <text:p>126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46296296296296" calcext:value-type="float">
            <text:p>0,00014629629629629600</text:p>
          </table:table-cell>
          <table:table-cell table:formula="of:=[.D18]-[.D17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9" office:value-type="float" office:value="1343" calcext:value-type="float">
            <text:p>134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55439814814815" calcext:value-type="float">
            <text:p>0,00015543981481481500</text:p>
          </table:table-cell>
          <table:table-cell table:formula="of:=[.D19]-[.D18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9" office:value-type="float" office:value="1422" calcext:value-type="float">
            <text:p>142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64583333333333" calcext:value-type="float">
            <text:p>0,00016458333333333300</text:p>
          </table:table-cell>
          <table:table-cell table:formula="of:=[.D20]-[.D19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9" office:value-type="float" office:value="1501" calcext:value-type="float">
            <text:p>150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73726851851852" calcext:value-type="float">
            <text:p>0,00017372685185185200</text:p>
          </table:table-cell>
          <table:table-cell table:formula="of:=[.D21]-[.D20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9" office:value-type="float" office:value="1580" calcext:value-type="float">
            <text:p>15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8287037037037" calcext:value-type="float">
            <text:p>0,00018287037037037000</text:p>
          </table:table-cell>
          <table:table-cell table:formula="of:=[.D22]-[.D21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9" office:value-type="float" office:value="1659" calcext:value-type="float">
            <text:p>165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92013888888889" calcext:value-type="float">
            <text:p>0,00019201388888888900</text:p>
          </table:table-cell>
          <table:table-cell table:formula="of:=[.D23]-[.D22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9" office:value-type="float" office:value="1738" calcext:value-type="float">
            <text:p>173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01157407407407" calcext:value-type="float">
            <text:p>0,00020115740740740700</text:p>
          </table:table-cell>
          <table:table-cell table:formula="of:=[.D24]-[.D23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9" office:value-type="float" office:value="1817" calcext:value-type="float">
            <text:p>181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10300925925926" calcext:value-type="float">
            <text:p>0,00021030092592592600</text:p>
          </table:table-cell>
          <table:table-cell table:formula="of:=[.D25]-[.D24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9" office:value-type="float" office:value="1896" calcext:value-type="float">
            <text:p>189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19444444444444" calcext:value-type="float">
            <text:p>0,00021944444444444400</text:p>
          </table:table-cell>
          <table:table-cell table:formula="of:=[.D26]-[.D25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9" office:value-type="float" office:value="1975" calcext:value-type="float">
            <text:p>19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28587962962963" calcext:value-type="float">
            <text:p>0,00022858796296296300</text:p>
          </table:table-cell>
          <table:table-cell table:formula="of:=[.D27]-[.D26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9" office:value-type="float" office:value="2054" calcext:value-type="float">
            <text:p>205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37731481481481" calcext:value-type="float">
            <text:p>0,00023773148148148100</text:p>
          </table:table-cell>
          <table:table-cell table:formula="of:=[.D28]-[.D27]" office:value-type="float" office:value="0.00000914351851851855" calcext:value-type="float">
            <text:p>0,0000091435185185185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9" office:value-type="float" office:value="2133" calcext:value-type="float">
            <text:p>213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46875" calcext:value-type="float">
            <text:p>0,00024687500000000000</text:p>
          </table:table-cell>
          <table:table-cell table:formula="of:=[.D29]-[.D28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9" office:value-type="float" office:value="2212" calcext:value-type="float">
            <text:p>221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56018518518519" calcext:value-type="float">
            <text:p>0,00025601851851851900</text:p>
          </table:table-cell>
          <table:table-cell table:formula="of:=[.D30]-[.D29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9" office:value-type="float" office:value="2291" calcext:value-type="float">
            <text:p>229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65162037037037" calcext:value-type="float">
            <text:p>0,00026516203703703700</text:p>
          </table:table-cell>
          <table:table-cell table:formula="of:=[.D31]-[.D30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9" office:value-type="float" office:value="2370" calcext:value-type="float">
            <text:p>23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74305555555556" calcext:value-type="float">
            <text:p>0,00027430555555555600</text:p>
          </table:table-cell>
          <table:table-cell table:formula="of:=[.D32]-[.D31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9" office:value-type="float" office:value="2449" calcext:value-type="float">
            <text:p>244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83449074074074" calcext:value-type="float">
            <text:p>0,00028344907407407400</text:p>
          </table:table-cell>
          <table:table-cell table:formula="of:=[.D33]-[.D32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9" office:value-type="float" office:value="2528" calcext:value-type="float">
            <text:p>252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92592592592593" calcext:value-type="float">
            <text:p>0,00029259259259259300</text:p>
          </table:table-cell>
          <table:table-cell table:formula="of:=[.D34]-[.D33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9" office:value-type="float" office:value="2607" calcext:value-type="float">
            <text:p>260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01736111111111" calcext:value-type="float">
            <text:p>0,00030173611111111100</text:p>
          </table:table-cell>
          <table:table-cell table:formula="of:=[.D35]-[.D34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9" office:value-type="float" office:value="2686" calcext:value-type="float">
            <text:p>268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1087962962963" calcext:value-type="float">
            <text:p>0,00031087962962963000</text:p>
          </table:table-cell>
          <table:table-cell table:formula="of:=[.D36]-[.D35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9" office:value-type="float" office:value="2765" calcext:value-type="float">
            <text:p>276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20023148148148" calcext:value-type="float">
            <text:p>0,00032002314814814800</text:p>
          </table:table-cell>
          <table:table-cell table:formula="of:=[.D37]-[.D36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9" office:value-type="float" office:value="2844" calcext:value-type="float">
            <text:p>284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29166666666667" calcext:value-type="float">
            <text:p>0,00032916666666666700</text:p>
          </table:table-cell>
          <table:table-cell table:formula="of:=[.D38]-[.D37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9" office:value-type="float" office:value="2923" calcext:value-type="float">
            <text:p>292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38310185185185" calcext:value-type="float">
            <text:p>0,00033831018518518500</text:p>
          </table:table-cell>
          <table:table-cell table:formula="of:=[.D39]-[.D38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9" office:value-type="float" office:value="3002" calcext:value-type="float">
            <text:p>300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47453703703704" calcext:value-type="float">
            <text:p>0,00034745370370370400</text:p>
          </table:table-cell>
          <table:table-cell table:formula="of:=[.D40]-[.D39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9" office:value-type="float" office:value="3081" calcext:value-type="float">
            <text:p>308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56597222222222" calcext:value-type="float">
            <text:p>0,00035659722222222200</text:p>
          </table:table-cell>
          <table:table-cell table:formula="of:=[.D41]-[.D40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9" office:value-type="float" office:value="3160" calcext:value-type="float">
            <text:p>31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65740740740741" calcext:value-type="float">
            <text:p>0,00036574074074074100</text:p>
          </table:table-cell>
          <table:table-cell table:formula="of:=[.D42]-[.D41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9" office:value-type="float" office:value="3239" calcext:value-type="float">
            <text:p>323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74884259259259" calcext:value-type="float">
            <text:p>0,00037488425925925900</text:p>
          </table:table-cell>
          <table:table-cell table:formula="of:=[.D43]-[.D42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9" office:value-type="float" office:value="3318" calcext:value-type="float">
            <text:p>331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84027777777778" calcext:value-type="float">
            <text:p>0,00038402777777777800</text:p>
          </table:table-cell>
          <table:table-cell table:formula="of:=[.D44]-[.D43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9" office:value-type="float" office:value="3397" calcext:value-type="float">
            <text:p>339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93171296296296" calcext:value-type="float">
            <text:p>0,00039317129629629600</text:p>
          </table:table-cell>
          <table:table-cell table:formula="of:=[.D45]-[.D44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9" office:value-type="float" office:value="3476" calcext:value-type="float">
            <text:p>347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02314814814815" calcext:value-type="float">
            <text:p>0,00040231481481481500</text:p>
          </table:table-cell>
          <table:table-cell table:formula="of:=[.D46]-[.D45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9" office:value-type="float" office:value="3555" calcext:value-type="float">
            <text:p>355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11458333333333" calcext:value-type="float">
            <text:p>0,00041145833333333300</text:p>
          </table:table-cell>
          <table:table-cell table:formula="of:=[.D47]-[.D46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9" office:value-type="float" office:value="3634" calcext:value-type="float">
            <text:p>363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20601851851852" calcext:value-type="float">
            <text:p>0,00042060185185185200</text:p>
          </table:table-cell>
          <table:table-cell table:formula="of:=[.D48]-[.D47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9" office:value-type="float" office:value="3713" calcext:value-type="float">
            <text:p>371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2974537037037" calcext:value-type="float">
            <text:p>0,00042974537037037000</text:p>
          </table:table-cell>
          <table:table-cell table:formula="of:=[.D49]-[.D48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9" office:value-type="float" office:value="3792" calcext:value-type="float">
            <text:p>379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38888888888889" calcext:value-type="float">
            <text:p>0,00043888888888888900</text:p>
          </table:table-cell>
          <table:table-cell table:formula="of:=[.D50]-[.D49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9" office:value-type="float" office:value="3871" calcext:value-type="float">
            <text:p>387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48032407407407" calcext:value-type="float">
            <text:p>0,00044803240740740700</text:p>
          </table:table-cell>
          <table:table-cell table:formula="of:=[.D51]-[.D50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9" office:value-type="float" office:value="3950" calcext:value-type="float">
            <text:p>39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57175925925926" calcext:value-type="float">
            <text:p>0,00045717592592592600</text:p>
          </table:table-cell>
          <table:table-cell table:formula="of:=[.D52]-[.D51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9" office:value-type="float" office:value="4029" calcext:value-type="float">
            <text:p>402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66319444444444" calcext:value-type="float">
            <text:p>0,00046631944444444500</text:p>
          </table:table-cell>
          <table:table-cell table:formula="of:=[.D53]-[.D52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9" office:value-type="float" office:value="4108" calcext:value-type="float">
            <text:p>410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75462962962963" calcext:value-type="float">
            <text:p>0,00047546296296296300</text:p>
          </table:table-cell>
          <table:table-cell table:formula="of:=[.D54]-[.D53]" office:value-type="float" office:value="0.00000914351851851852" calcext:value-type="float">
            <text:p>0,000009143518518518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9" office:value-type="float" office:value="4187" calcext:value-type="float">
            <text:p>418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84606481481482" calcext:value-type="float">
            <text:p>0,00048460648148148100</text:p>
          </table:table-cell>
          <table:table-cell table:formula="of:=[.D55]-[.D5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9" office:value-type="float" office:value="4266" calcext:value-type="float">
            <text:p>426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9375" calcext:value-type="float">
            <text:p>0,00049375000000000000</text:p>
          </table:table-cell>
          <table:table-cell table:formula="of:=[.D56]-[.D55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9" office:value-type="float" office:value="4345" calcext:value-type="float">
            <text:p>434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02893518518519" calcext:value-type="float">
            <text:p>0,00050289351851851900</text:p>
          </table:table-cell>
          <table:table-cell table:formula="of:=[.D57]-[.D5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9" office:value-type="float" office:value="4424" calcext:value-type="float">
            <text:p>442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12037037037037" calcext:value-type="float">
            <text:p>0,00051203703703703700</text:p>
          </table:table-cell>
          <table:table-cell table:formula="of:=[.D58]-[.D57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9" office:value-type="float" office:value="4503" calcext:value-type="float">
            <text:p>450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21180555555556" calcext:value-type="float">
            <text:p>0,00052118055555555600</text:p>
          </table:table-cell>
          <table:table-cell table:formula="of:=[.D59]-[.D5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9" office:value-type="float" office:value="4582" calcext:value-type="float">
            <text:p>458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30324074074074" calcext:value-type="float">
            <text:p>0,00053032407407407400</text:p>
          </table:table-cell>
          <table:table-cell table:formula="of:=[.D60]-[.D59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9" office:value-type="float" office:value="4661" calcext:value-type="float">
            <text:p>466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39467592592593" calcext:value-type="float">
            <text:p>0,00053946759259259300</text:p>
          </table:table-cell>
          <table:table-cell table:formula="of:=[.D61]-[.D6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9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48611111111111" calcext:value-type="float">
            <text:p>0,00054861111111111100</text:p>
          </table:table-cell>
          <table:table-cell table:formula="of:=[.D62]-[.D61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9" office:value-type="float" office:value="4819" calcext:value-type="float">
            <text:p>481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5775462962963" calcext:value-type="float">
            <text:p>0,00055775462962963000</text:p>
          </table:table-cell>
          <table:table-cell table:formula="of:=[.D63]-[.D6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9" office:value-type="float" office:value="4898" calcext:value-type="float">
            <text:p>489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66898148148148" calcext:value-type="float">
            <text:p>0,00056689814814814800</text:p>
          </table:table-cell>
          <table:table-cell table:formula="of:=[.D64]-[.D63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9" office:value-type="float" office:value="4977" calcext:value-type="float">
            <text:p>497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76041666666667" calcext:value-type="float">
            <text:p>0,00057604166666666700</text:p>
          </table:table-cell>
          <table:table-cell table:formula="of:=[.D65]-[.D6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9" office:value-type="float" office:value="5056" calcext:value-type="float">
            <text:p>505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85185185185185" calcext:value-type="float">
            <text:p>0,00058518518518518500</text:p>
          </table:table-cell>
          <table:table-cell table:formula="of:=[.D66]-[.D65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9" office:value-type="float" office:value="5135" calcext:value-type="float">
            <text:p>513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94328703703704" calcext:value-type="float">
            <text:p>0,00059432870370370400</text:p>
          </table:table-cell>
          <table:table-cell table:formula="of:=[.D67]-[.D6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9" office:value-type="float" office:value="5214" calcext:value-type="float">
            <text:p>521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03472222222222" calcext:value-type="float">
            <text:p>0,00060347222222222200</text:p>
          </table:table-cell>
          <table:table-cell table:formula="of:=[.D68]-[.D67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9" office:value-type="float" office:value="5293" calcext:value-type="float">
            <text:p>529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12615740740741" calcext:value-type="float">
            <text:p>0,00061261574074074100</text:p>
          </table:table-cell>
          <table:table-cell table:formula="of:=[.D69]-[.D6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9" office:value-type="float" office:value="5372" calcext:value-type="float">
            <text:p>537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21759259259259" calcext:value-type="float">
            <text:p>0,00062175925925925900</text:p>
          </table:table-cell>
          <table:table-cell table:formula="of:=[.D70]-[.D69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9" office:value-type="float" office:value="5451" calcext:value-type="float">
            <text:p>545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30902777777778" calcext:value-type="float">
            <text:p>0,00063090277777777800</text:p>
          </table:table-cell>
          <table:table-cell table:formula="of:=[.D71]-[.D7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9" office:value-type="float" office:value="5530" calcext:value-type="float">
            <text:p>55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40046296296296" calcext:value-type="float">
            <text:p>0,00064004629629629600</text:p>
          </table:table-cell>
          <table:table-cell table:formula="of:=[.D72]-[.D71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9" office:value-type="float" office:value="5609" calcext:value-type="float">
            <text:p>560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49189814814815" calcext:value-type="float">
            <text:p>0,00064918981481481500</text:p>
          </table:table-cell>
          <table:table-cell table:formula="of:=[.D73]-[.D7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9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58333333333333" calcext:value-type="float">
            <text:p>0,00065833333333333300</text:p>
          </table:table-cell>
          <table:table-cell table:formula="of:=[.D74]-[.D73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9" office:value-type="float" office:value="5767" calcext:value-type="float">
            <text:p>576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67476851851852" calcext:value-type="float">
            <text:p>0,00066747685185185200</text:p>
          </table:table-cell>
          <table:table-cell table:formula="of:=[.D75]-[.D7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9" office:value-type="float" office:value="5846" calcext:value-type="float">
            <text:p>584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7662037037037" calcext:value-type="float">
            <text:p>0,00067662037037037000</text:p>
          </table:table-cell>
          <table:table-cell table:formula="of:=[.D76]-[.D75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9" office:value-type="float" office:value="5925" calcext:value-type="float">
            <text:p>59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85763888888889" calcext:value-type="float">
            <text:p>0,00068576388888888900</text:p>
          </table:table-cell>
          <table:table-cell table:formula="of:=[.D77]-[.D7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9" office:value-type="float" office:value="6004" calcext:value-type="float">
            <text:p>600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94907407407407" calcext:value-type="float">
            <text:p>0,00069490740740740700</text:p>
          </table:table-cell>
          <table:table-cell table:formula="of:=[.D78]-[.D77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9" office:value-type="float" office:value="6083" calcext:value-type="float">
            <text:p>608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04050925925926" calcext:value-type="float">
            <text:p>0,00070405092592592600</text:p>
          </table:table-cell>
          <table:table-cell table:formula="of:=[.D79]-[.D7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9" office:value-type="float" office:value="6162" calcext:value-type="float">
            <text:p>616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13194444444445" calcext:value-type="float">
            <text:p>0,00071319444444444500</text:p>
          </table:table-cell>
          <table:table-cell table:formula="of:=[.D80]-[.D79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9" office:value-type="float" office:value="6241" calcext:value-type="float">
            <text:p>624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22337962962963" calcext:value-type="float">
            <text:p>0,00072233796296296300</text:p>
          </table:table-cell>
          <table:table-cell table:formula="of:=[.D81]-[.D8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9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31481481481482" calcext:value-type="float">
            <text:p>0,00073148148148148100</text:p>
          </table:table-cell>
          <table:table-cell table:formula="of:=[.D82]-[.D81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9" office:value-type="float" office:value="6399" calcext:value-type="float">
            <text:p>639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40625" calcext:value-type="float">
            <text:p>0,00074062500000000000</text:p>
          </table:table-cell>
          <table:table-cell table:formula="of:=[.D83]-[.D8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9" office:value-type="float" office:value="6478" calcext:value-type="float">
            <text:p>647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49768518518519" calcext:value-type="float">
            <text:p>0,00074976851851851900</text:p>
          </table:table-cell>
          <table:table-cell table:formula="of:=[.D84]-[.D83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9" office:value-type="float" office:value="6557" calcext:value-type="float">
            <text:p>655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58912037037037" calcext:value-type="float">
            <text:p>0,00075891203703703700</text:p>
          </table:table-cell>
          <table:table-cell table:formula="of:=[.D85]-[.D8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9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68055555555556" calcext:value-type="float">
            <text:p>0,00076805555555555600</text:p>
          </table:table-cell>
          <table:table-cell table:formula="of:=[.D86]-[.D85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9" office:value-type="float" office:value="6715" calcext:value-type="float">
            <text:p>671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77199074074074" calcext:value-type="float">
            <text:p>0,00077719907407407400</text:p>
          </table:table-cell>
          <table:table-cell table:formula="of:=[.D87]-[.D8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9" office:value-type="float" office:value="6794" calcext:value-type="float">
            <text:p>679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86342592592593" calcext:value-type="float">
            <text:p>0,00078634259259259300</text:p>
          </table:table-cell>
          <table:table-cell table:formula="of:=[.D88]-[.D87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9" office:value-type="float" office:value="6873" calcext:value-type="float">
            <text:p>687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95486111111111" calcext:value-type="float">
            <text:p>0,00079548611111111100</text:p>
          </table:table-cell>
          <table:table-cell table:formula="of:=[.D89]-[.D8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9" office:value-type="float" office:value="6952" calcext:value-type="float">
            <text:p>695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0462962962963" calcext:value-type="float">
            <text:p>0,00080462962962963000</text:p>
          </table:table-cell>
          <table:table-cell table:formula="of:=[.D90]-[.D89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9" office:value-type="float" office:value="7031" calcext:value-type="float">
            <text:p>703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13773148148148" calcext:value-type="float">
            <text:p>0,00081377314814814800</text:p>
          </table:table-cell>
          <table:table-cell table:formula="of:=[.D91]-[.D9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9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22916666666667" calcext:value-type="float">
            <text:p>0,00082291666666666700</text:p>
          </table:table-cell>
          <table:table-cell table:formula="of:=[.D92]-[.D91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9" office:value-type="float" office:value="7189" calcext:value-type="float">
            <text:p>718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32060185185185" calcext:value-type="float">
            <text:p>0,00083206018518518500</text:p>
          </table:table-cell>
          <table:table-cell table:formula="of:=[.D93]-[.D9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9" office:value-type="float" office:value="7268" calcext:value-type="float">
            <text:p>726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41203703703704" calcext:value-type="float">
            <text:p>0,00084120370370370400</text:p>
          </table:table-cell>
          <table:table-cell table:formula="of:=[.D94]-[.D93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9" office:value-type="float" office:value="7347" calcext:value-type="float">
            <text:p>734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50347222222222" calcext:value-type="float">
            <text:p>0,00085034722222222200</text:p>
          </table:table-cell>
          <table:table-cell table:formula="of:=[.D95]-[.D9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9" office:value-type="float" office:value="7426" calcext:value-type="float">
            <text:p>742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59490740740741" calcext:value-type="float">
            <text:p>0,00085949074074074100</text:p>
          </table:table-cell>
          <table:table-cell table:formula="of:=[.D96]-[.D95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9" office:value-type="float" office:value="7505" calcext:value-type="float">
            <text:p>750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68634259259259" calcext:value-type="float">
            <text:p>0,00086863425925925900</text:p>
          </table:table-cell>
          <table:table-cell table:formula="of:=[.D97]-[.D9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9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77777777777778" calcext:value-type="float">
            <text:p>0,00087777777777777800</text:p>
          </table:table-cell>
          <table:table-cell table:formula="of:=[.D98]-[.D97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9" office:value-type="float" office:value="7663" calcext:value-type="float">
            <text:p>766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86921296296296" calcext:value-type="float">
            <text:p>0,00088692129629629600</text:p>
          </table:table-cell>
          <table:table-cell table:formula="of:=[.D99]-[.D9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9" office:value-type="float" office:value="7742" calcext:value-type="float">
            <text:p>774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96064814814815" calcext:value-type="float">
            <text:p>0,00089606481481481500</text:p>
          </table:table-cell>
          <table:table-cell table:formula="of:=[.D100]-[.D9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9" office:value-type="float" office:value="7821" calcext:value-type="float">
            <text:p>782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05208333333333" calcext:value-type="float">
            <text:p>0,00090520833333333400</text:p>
          </table:table-cell>
          <table:table-cell table:formula="of:=[.D101]-[.D100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9" office:value-type="float" office:value="7900" calcext:value-type="float">
            <text:p>7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14351851851852" calcext:value-type="float">
            <text:p>0,00091435185185185200</text:p>
          </table:table-cell>
          <table:table-cell table:formula="of:=[.D102]-[.D10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9" office:value-type="float" office:value="7979" calcext:value-type="float">
            <text:p>797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2349537037037" calcext:value-type="float">
            <text:p>0,00092349537037037000</text:p>
          </table:table-cell>
          <table:table-cell table:formula="of:=[.D103]-[.D102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9" office:value-type="float" office:value="8058" calcext:value-type="float">
            <text:p>805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32638888888889" calcext:value-type="float">
            <text:p>0,00093263888888888900</text:p>
          </table:table-cell>
          <table:table-cell table:formula="of:=[.D104]-[.D10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9" office:value-type="float" office:value="8137" calcext:value-type="float">
            <text:p>813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41782407407408" calcext:value-type="float">
            <text:p>0,00094178240740740800</text:p>
          </table:table-cell>
          <table:table-cell table:formula="of:=[.D105]-[.D104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9" office:value-type="float" office:value="8216" calcext:value-type="float">
            <text:p>821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50925925925926" calcext:value-type="float">
            <text:p>0,00095092592592592600</text:p>
          </table:table-cell>
          <table:table-cell table:formula="of:=[.D106]-[.D10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9" office:value-type="float" office:value="8295" calcext:value-type="float">
            <text:p>829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60069444444445" calcext:value-type="float">
            <text:p>0,00096006944444444500</text:p>
          </table:table-cell>
          <table:table-cell table:formula="of:=[.D107]-[.D106]" office:value-type="float" office:value="0.00000914351851851846" calcext:value-type="float">
            <text:p>0,0000091435185185184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9" office:value-type="float" office:value="8374" calcext:value-type="float">
            <text:p>837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69212962962963" calcext:value-type="float">
            <text:p>0,00096921296296296300</text:p>
          </table:table-cell>
          <table:table-cell table:formula="of:=[.D108]-[.D10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9" office:value-type="float" office:value="8453" calcext:value-type="float">
            <text:p>845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78356481481482" calcext:value-type="float">
            <text:p>0,00097835648148148200</text:p>
          </table:table-cell>
          <table:table-cell table:formula="of:=[.D109]-[.D10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9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875" calcext:value-type="float">
            <text:p>0,00098750000000000000</text:p>
          </table:table-cell>
          <table:table-cell table:formula="of:=[.D110]-[.D109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9" office:value-type="float" office:value="8611" calcext:value-type="float">
            <text:p>861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96643518518519" calcext:value-type="float">
            <text:p>0,00099664351851851900</text:p>
          </table:table-cell>
          <table:table-cell table:formula="of:=[.D111]-[.D11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9" office:value-type="float" office:value="8690" calcext:value-type="float">
            <text:p>86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0578703703704" calcext:value-type="float">
            <text:p>0,00100578703703704000</text:p>
          </table:table-cell>
          <table:table-cell table:formula="of:=[.D112]-[.D11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9" office:value-type="float" office:value="8769" calcext:value-type="float">
            <text:p>876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1493055555556" calcext:value-type="float">
            <text:p>0,00101493055555556000</text:p>
          </table:table-cell>
          <table:table-cell table:formula="of:=[.D113]-[.D11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9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2407407407407" calcext:value-type="float">
            <text:p>0,00102407407407407000</text:p>
          </table:table-cell>
          <table:table-cell table:formula="of:=[.D114]-[.D113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9" office:value-type="float" office:value="8927" calcext:value-type="float">
            <text:p>892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3321759259259" calcext:value-type="float">
            <text:p>0,00103321759259259000</text:p>
          </table:table-cell>
          <table:table-cell table:formula="of:=[.D115]-[.D11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9" office:value-type="float" office:value="9006" calcext:value-type="float">
            <text:p>900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4236111111111" calcext:value-type="float">
            <text:p>0,00104236111111111000</text:p>
          </table:table-cell>
          <table:table-cell table:formula="of:=[.D116]-[.D11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9" office:value-type="float" office:value="9085" calcext:value-type="float">
            <text:p>908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5150462962963" calcext:value-type="float">
            <text:p>0,00105150462962963000</text:p>
          </table:table-cell>
          <table:table-cell table:formula="of:=[.D117]-[.D11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9" office:value-type="float" office:value="9164" calcext:value-type="float">
            <text:p>916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6064814814815" calcext:value-type="float">
            <text:p>0,00106064814814815000</text:p>
          </table:table-cell>
          <table:table-cell table:formula="of:=[.D118]-[.D117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9" office:value-type="float" office:value="9243" calcext:value-type="float">
            <text:p>924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6979166666667" calcext:value-type="float">
            <text:p>0,00106979166666667000</text:p>
          </table:table-cell>
          <table:table-cell table:formula="of:=[.D119]-[.D11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9" office:value-type="float" office:value="9322" calcext:value-type="float">
            <text:p>932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7893518518519" calcext:value-type="float">
            <text:p>0,00107893518518519000</text:p>
          </table:table-cell>
          <table:table-cell table:formula="of:=[.D120]-[.D11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9" office:value-type="float" office:value="9401" calcext:value-type="float">
            <text:p>940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880787037037" calcext:value-type="float">
            <text:p>0,00108807870370370000</text:p>
          </table:table-cell>
          <table:table-cell table:formula="of:=[.D121]-[.D12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9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9722222222222" calcext:value-type="float">
            <text:p>0,00109722222222222000</text:p>
          </table:table-cell>
          <table:table-cell table:formula="of:=[.D122]-[.D121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9" office:value-type="float" office:value="9559" calcext:value-type="float">
            <text:p>955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0636574074074" calcext:value-type="float">
            <text:p>0,00110636574074074000</text:p>
          </table:table-cell>
          <table:table-cell table:formula="of:=[.D123]-[.D12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9" office:value-type="float" office:value="9638" calcext:value-type="float">
            <text:p>963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1550925925926" calcext:value-type="float">
            <text:p>0,00111550925925926000</text:p>
          </table:table-cell>
          <table:table-cell table:formula="of:=[.D124]-[.D12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9" office:value-type="float" office:value="9717" calcext:value-type="float">
            <text:p>971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2465277777778" calcext:value-type="float">
            <text:p>0,00112465277777778000</text:p>
          </table:table-cell>
          <table:table-cell table:formula="of:=[.D125]-[.D12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9" office:value-type="float" office:value="9796" calcext:value-type="float">
            <text:p>979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337962962963" calcext:value-type="float">
            <text:p>0,00113379629629630000</text:p>
          </table:table-cell>
          <table:table-cell table:formula="of:=[.D126]-[.D125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9" office:value-type="float" office:value="9875" calcext:value-type="float">
            <text:p>9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14293981481481" calcext:value-type="float">
            <text:p>0,00114293981481481000</text:p>
          </table:table-cell>
          <table:table-cell table:formula="of:=[.D127]-[.D12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9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5208333333333" calcext:value-type="float">
            <text:p>0,00115208333333333000</text:p>
          </table:table-cell>
          <table:table-cell table:formula="of:=[.D128]-[.D12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9" office:value-type="float" office:value="10033" calcext:value-type="float">
            <text:p>1003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6122685185185" calcext:value-type="float">
            <text:p>0,00116122685185185000</text:p>
          </table:table-cell>
          <table:table-cell table:formula="of:=[.D129]-[.D12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9" office:value-type="float" office:value="10112" calcext:value-type="float">
            <text:p>1011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17037037037037" calcext:value-type="float">
            <text:p>0,00117037037037037000</text:p>
          </table:table-cell>
          <table:table-cell table:formula="of:=[.D130]-[.D129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9" office:value-type="float" office:value="10191" calcext:value-type="float">
            <text:p>1019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7951388888889" calcext:value-type="float">
            <text:p>0,00117951388888889000</text:p>
          </table:table-cell>
          <table:table-cell table:formula="of:=[.D131]-[.D13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9" office:value-type="float" office:value="10270" calcext:value-type="float">
            <text:p>102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18865740740741" calcext:value-type="float">
            <text:p>0,00118865740740741000</text:p>
          </table:table-cell>
          <table:table-cell table:formula="of:=[.D132]-[.D13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9" office:value-type="float" office:value="10349" calcext:value-type="float">
            <text:p>1034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9780092592593" calcext:value-type="float">
            <text:p>0,00119780092592593000</text:p>
          </table:table-cell>
          <table:table-cell table:formula="of:=[.D133]-[.D13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9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0694444444444" calcext:value-type="float">
            <text:p>0,00120694444444444000</text:p>
          </table:table-cell>
          <table:table-cell table:formula="of:=[.D134]-[.D133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9" office:value-type="float" office:value="10507" calcext:value-type="float">
            <text:p>1050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1608796296296" calcext:value-type="float">
            <text:p>0,00121608796296296000</text:p>
          </table:table-cell>
          <table:table-cell table:formula="of:=[.D135]-[.D13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9" office:value-type="float" office:value="10586" calcext:value-type="float">
            <text:p>1058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22523148148148" calcext:value-type="float">
            <text:p>0,00122523148148148000</text:p>
          </table:table-cell>
          <table:table-cell table:formula="of:=[.D136]-[.D13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9" office:value-type="float" office:value="10665" calcext:value-type="float">
            <text:p>1066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34375" calcext:value-type="float">
            <text:p>0,00123437500000000000</text:p>
          </table:table-cell>
          <table:table-cell table:formula="of:=[.D137]-[.D13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9" office:value-type="float" office:value="10744" calcext:value-type="float">
            <text:p>1074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24351851851852" calcext:value-type="float">
            <text:p>0,00124351851851852000</text:p>
          </table:table-cell>
          <table:table-cell table:formula="of:=[.D138]-[.D137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9" office:value-type="float" office:value="10823" calcext:value-type="float">
            <text:p>1082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25266203703704" calcext:value-type="float">
            <text:p>0,00125266203703704000</text:p>
          </table:table-cell>
          <table:table-cell table:formula="of:=[.D139]-[.D13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9" office:value-type="float" office:value="10902" calcext:value-type="float">
            <text:p>1090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26180555555556" calcext:value-type="float">
            <text:p>0,00126180555555556000</text:p>
          </table:table-cell>
          <table:table-cell table:formula="of:=[.D140]-[.D13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9" office:value-type="float" office:value="10981" calcext:value-type="float">
            <text:p>1098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27094907407407" calcext:value-type="float">
            <text:p>0,00127094907407407000</text:p>
          </table:table-cell>
          <table:table-cell table:formula="of:=[.D141]-[.D14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9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28009259259259" calcext:value-type="float">
            <text:p>0,00128009259259259000</text:p>
          </table:table-cell>
          <table:table-cell table:formula="of:=[.D142]-[.D141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9" office:value-type="float" office:value="11139" calcext:value-type="float">
            <text:p>1113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28923611111111" calcext:value-type="float">
            <text:p>0,00128923611111111000</text:p>
          </table:table-cell>
          <table:table-cell table:formula="of:=[.D143]-[.D14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9" office:value-type="float" office:value="11218" calcext:value-type="float">
            <text:p>1121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29837962962963" calcext:value-type="float">
            <text:p>0,00129837962962963000</text:p>
          </table:table-cell>
          <table:table-cell table:formula="of:=[.D144]-[.D14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9" office:value-type="float" office:value="11297" calcext:value-type="float">
            <text:p>1129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30752314814815" calcext:value-type="float">
            <text:p>0,00130752314814815000</text:p>
          </table:table-cell>
          <table:table-cell table:formula="of:=[.D145]-[.D14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9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31666666666667" calcext:value-type="float">
            <text:p>0,00131666666666667000</text:p>
          </table:table-cell>
          <table:table-cell table:formula="of:=[.D146]-[.D145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9" office:value-type="float" office:value="11455" calcext:value-type="float">
            <text:p>1145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32581018518519" calcext:value-type="float">
            <text:p>0,00132581018518519000</text:p>
          </table:table-cell>
          <table:table-cell table:formula="of:=[.D147]-[.D14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9" office:value-type="float" office:value="11534" calcext:value-type="float">
            <text:p>1153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3349537037037" calcext:value-type="float">
            <text:p>0,00133495370370370000</text:p>
          </table:table-cell>
          <table:table-cell table:formula="of:=[.D148]-[.D14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9" office:value-type="float" office:value="11613" calcext:value-type="float">
            <text:p>1161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34409722222222" calcext:value-type="float">
            <text:p>0,00134409722222222000</text:p>
          </table:table-cell>
          <table:table-cell table:formula="of:=[.D149]-[.D14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9" office:value-type="float" office:value="11692" calcext:value-type="float">
            <text:p>1169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35324074074074" calcext:value-type="float">
            <text:p>0,00135324074074074000</text:p>
          </table:table-cell>
          <table:table-cell table:formula="of:=[.D150]-[.D14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9" office:value-type="float" office:value="11771" calcext:value-type="float">
            <text:p>1177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36238425925926" calcext:value-type="float">
            <text:p>0,00136238425925926000</text:p>
          </table:table-cell>
          <table:table-cell table:formula="of:=[.D151]-[.D150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9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37152777777778" calcext:value-type="float">
            <text:p>0,00137152777777778000</text:p>
          </table:table-cell>
          <table:table-cell table:formula="of:=[.D152]-[.D15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9" office:value-type="float" office:value="11929" calcext:value-type="float">
            <text:p>1192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3806712962963" calcext:value-type="float">
            <text:p>0,00138067129629630000</text:p>
          </table:table-cell>
          <table:table-cell table:formula="of:=[.D153]-[.D15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9" office:value-type="float" office:value="12008" calcext:value-type="float">
            <text:p>1200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38981481481481" calcext:value-type="float">
            <text:p>0,00138981481481481000</text:p>
          </table:table-cell>
          <table:table-cell table:formula="of:=[.D154]-[.D15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9" office:value-type="float" office:value="12087" calcext:value-type="float">
            <text:p>1208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39895833333333" calcext:value-type="float">
            <text:p>0,00139895833333333000</text:p>
          </table:table-cell>
          <table:table-cell table:formula="of:=[.D155]-[.D154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9" office:value-type="float" office:value="12166" calcext:value-type="float">
            <text:p>1216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40810185185185" calcext:value-type="float">
            <text:p>0,00140810185185185000</text:p>
          </table:table-cell>
          <table:table-cell table:formula="of:=[.D156]-[.D15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9" office:value-type="float" office:value="12245" calcext:value-type="float">
            <text:p>1224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41724537037037" calcext:value-type="float">
            <text:p>0,00141724537037037000</text:p>
          </table:table-cell>
          <table:table-cell table:formula="of:=[.D157]-[.D15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9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42638888888889" calcext:value-type="float">
            <text:p>0,00142638888888889000</text:p>
          </table:table-cell>
          <table:table-cell table:formula="of:=[.D158]-[.D15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9" office:value-type="float" office:value="12403" calcext:value-type="float">
            <text:p>1240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43553240740741" calcext:value-type="float">
            <text:p>0,00143553240740741000</text:p>
          </table:table-cell>
          <table:table-cell table:formula="of:=[.D159]-[.D158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9" office:value-type="float" office:value="12482" calcext:value-type="float">
            <text:p>1248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44467592592593" calcext:value-type="float">
            <text:p>0,00144467592592593000</text:p>
          </table:table-cell>
          <table:table-cell table:formula="of:=[.D160]-[.D15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9" office:value-type="float" office:value="12561" calcext:value-type="float">
            <text:p>1256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45381944444444" calcext:value-type="float">
            <text:p>0,00145381944444444000</text:p>
          </table:table-cell>
          <table:table-cell table:formula="of:=[.D161]-[.D16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9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46296296296296" calcext:value-type="float">
            <text:p>0,00146296296296296000</text:p>
          </table:table-cell>
          <table:table-cell table:formula="of:=[.D162]-[.D16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9" office:value-type="float" office:value="12719" calcext:value-type="float">
            <text:p>1271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47210648148148" calcext:value-type="float">
            <text:p>0,00147210648148148000</text:p>
          </table:table-cell>
          <table:table-cell table:formula="of:=[.D163]-[.D162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9" office:value-type="float" office:value="12798" calcext:value-type="float">
            <text:p>1279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48125" calcext:value-type="float">
            <text:p>0,00148125000000000000</text:p>
          </table:table-cell>
          <table:table-cell table:formula="of:=[.D164]-[.D16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9" office:value-type="float" office:value="12877" calcext:value-type="float">
            <text:p>1287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49039351851852" calcext:value-type="float">
            <text:p>0,00149039351851852000</text:p>
          </table:table-cell>
          <table:table-cell table:formula="of:=[.D165]-[.D16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9" office:value-type="float" office:value="12956" calcext:value-type="float">
            <text:p>1295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49953703703704" calcext:value-type="float">
            <text:p>0,00149953703703704000</text:p>
          </table:table-cell>
          <table:table-cell table:formula="of:=[.D166]-[.D16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9" office:value-type="float" office:value="13035" calcext:value-type="float">
            <text:p>1303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50868055555556" calcext:value-type="float">
            <text:p>0,00150868055555556000</text:p>
          </table:table-cell>
          <table:table-cell table:formula="of:=[.D167]-[.D166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9" office:value-type="float" office:value="13114" calcext:value-type="float">
            <text:p>1311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51782407407407" calcext:value-type="float">
            <text:p>0,00151782407407407000</text:p>
          </table:table-cell>
          <table:table-cell table:formula="of:=[.D168]-[.D16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9" office:value-type="float" office:value="13193" calcext:value-type="float">
            <text:p>1319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52696759259259" calcext:value-type="float">
            <text:p>0,00152696759259259000</text:p>
          </table:table-cell>
          <table:table-cell table:formula="of:=[.D169]-[.D16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9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53611111111111" calcext:value-type="float">
            <text:p>0,00153611111111111000</text:p>
          </table:table-cell>
          <table:table-cell table:formula="of:=[.D170]-[.D16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9" office:value-type="float" office:value="13351" calcext:value-type="float">
            <text:p>1335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54525462962963" calcext:value-type="float">
            <text:p>0,00154525462962963000</text:p>
          </table:table-cell>
          <table:table-cell table:formula="of:=[.D171]-[.D170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9" office:value-type="float" office:value="13430" calcext:value-type="float">
            <text:p>134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55439814814815" calcext:value-type="float">
            <text:p>0,00155439814814815000</text:p>
          </table:table-cell>
          <table:table-cell table:formula="of:=[.D172]-[.D17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9" office:value-type="float" office:value="13509" calcext:value-type="float">
            <text:p>1350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56354166666667" calcext:value-type="float">
            <text:p>0,00156354166666667000</text:p>
          </table:table-cell>
          <table:table-cell table:formula="of:=[.D173]-[.D17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9" office:value-type="float" office:value="13588" calcext:value-type="float">
            <text:p>1358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57268518518519" calcext:value-type="float">
            <text:p>0,00157268518518519000</text:p>
          </table:table-cell>
          <table:table-cell table:formula="of:=[.D174]-[.D17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9" office:value-type="float" office:value="13667" calcext:value-type="float">
            <text:p>1366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5818287037037" calcext:value-type="float">
            <text:p>0,00158182870370370000</text:p>
          </table:table-cell>
          <table:table-cell table:formula="of:=[.D175]-[.D174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9" office:value-type="float" office:value="13746" calcext:value-type="float">
            <text:p>1374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59097222222222" calcext:value-type="float">
            <text:p>0,00159097222222222000</text:p>
          </table:table-cell>
          <table:table-cell table:formula="of:=[.D176]-[.D17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9" office:value-type="float" office:value="13825" calcext:value-type="float">
            <text:p>138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60011574074074" calcext:value-type="float">
            <text:p>0,00160011574074074000</text:p>
          </table:table-cell>
          <table:table-cell table:formula="of:=[.D177]-[.D17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9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60925925925926" calcext:value-type="float">
            <text:p>0,00160925925925926000</text:p>
          </table:table-cell>
          <table:table-cell table:formula="of:=[.D178]-[.D17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9" office:value-type="float" office:value="13983" calcext:value-type="float">
            <text:p>1398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61840277777778" calcext:value-type="float">
            <text:p>0,00161840277777778000</text:p>
          </table:table-cell>
          <table:table-cell table:formula="of:=[.D179]-[.D178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9" office:value-type="float" office:value="14062" calcext:value-type="float">
            <text:p>1406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6275462962963" calcext:value-type="float">
            <text:p>0,00162754629629630000</text:p>
          </table:table-cell>
          <table:table-cell table:formula="of:=[.D180]-[.D17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9" office:value-type="float" office:value="14141" calcext:value-type="float">
            <text:p>1414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63668981481481" calcext:value-type="float">
            <text:p>0,00163668981481481000</text:p>
          </table:table-cell>
          <table:table-cell table:formula="of:=[.D181]-[.D18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9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64583333333333" calcext:value-type="float">
            <text:p>0,00164583333333333000</text:p>
          </table:table-cell>
          <table:table-cell table:formula="of:=[.D182]-[.D18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9" office:value-type="float" office:value="14299" calcext:value-type="float">
            <text:p>1429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65497685185185" calcext:value-type="float">
            <text:p>0,00165497685185185000</text:p>
          </table:table-cell>
          <table:table-cell table:formula="of:=[.D183]-[.D182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9" office:value-type="float" office:value="14378" calcext:value-type="float">
            <text:p>1437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66412037037037" calcext:value-type="float">
            <text:p>0,00166412037037037000</text:p>
          </table:table-cell>
          <table:table-cell table:formula="of:=[.D184]-[.D18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9" office:value-type="float" office:value="14457" calcext:value-type="float">
            <text:p>1445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67326388888889" calcext:value-type="float">
            <text:p>0,00167326388888889000</text:p>
          </table:table-cell>
          <table:table-cell table:formula="of:=[.D185]-[.D18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9" office:value-type="float" office:value="14536" calcext:value-type="float">
            <text:p>1453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68240740740741" calcext:value-type="float">
            <text:p>0,00168240740740741000</text:p>
          </table:table-cell>
          <table:table-cell table:formula="of:=[.D186]-[.D18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9" office:value-type="float" office:value="14615" calcext:value-type="float">
            <text:p>1461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69155092592593" calcext:value-type="float">
            <text:p>0,00169155092592593000</text:p>
          </table:table-cell>
          <table:table-cell table:formula="of:=[.D187]-[.D186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9" office:value-type="float" office:value="14694" calcext:value-type="float">
            <text:p>1469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70069444444444" calcext:value-type="float">
            <text:p>0,00170069444444444000</text:p>
          </table:table-cell>
          <table:table-cell table:formula="of:=[.D188]-[.D18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9" office:value-type="float" office:value="14773" calcext:value-type="float">
            <text:p>1477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70983796296296" calcext:value-type="float">
            <text:p>0,00170983796296296000</text:p>
          </table:table-cell>
          <table:table-cell table:formula="of:=[.D189]-[.D18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9" office:value-type="float" office:value="14852" calcext:value-type="float">
            <text:p>1485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71898148148148" calcext:value-type="float">
            <text:p>0,00171898148148148000</text:p>
          </table:table-cell>
          <table:table-cell table:formula="of:=[.D190]-[.D18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9" office:value-type="float" office:value="14931" calcext:value-type="float">
            <text:p>1493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728125" calcext:value-type="float">
            <text:p>0,00172812500000000000</text:p>
          </table:table-cell>
          <table:table-cell table:formula="of:=[.D191]-[.D190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9" office:value-type="float" office:value="15010" calcext:value-type="float">
            <text:p>150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73726851851852" calcext:value-type="float">
            <text:p>0,00173726851851852000</text:p>
          </table:table-cell>
          <table:table-cell table:formula="of:=[.D192]-[.D19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9" office:value-type="float" office:value="15089" calcext:value-type="float">
            <text:p>1508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74641203703704" calcext:value-type="float">
            <text:p>0,00174641203703704000</text:p>
          </table:table-cell>
          <table:table-cell table:formula="of:=[.D193]-[.D19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9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75555555555556" calcext:value-type="float">
            <text:p>0,00175555555555556000</text:p>
          </table:table-cell>
          <table:table-cell table:formula="of:=[.D194]-[.D19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9" office:value-type="float" office:value="15247" calcext:value-type="float">
            <text:p>1524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76469907407407" calcext:value-type="float">
            <text:p>0,00176469907407407000</text:p>
          </table:table-cell>
          <table:table-cell table:formula="of:=[.D195]-[.D194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9" office:value-type="float" office:value="15326" calcext:value-type="float">
            <text:p>1532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77384259259259" calcext:value-type="float">
            <text:p>0,00177384259259259000</text:p>
          </table:table-cell>
          <table:table-cell table:formula="of:=[.D196]-[.D19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9" office:value-type="float" office:value="15405" calcext:value-type="float">
            <text:p>1540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78298611111111" calcext:value-type="float">
            <text:p>0,00178298611111111000</text:p>
          </table:table-cell>
          <table:table-cell table:formula="of:=[.D197]-[.D19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9" office:value-type="float" office:value="15484" calcext:value-type="float">
            <text:p>1548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79212962962963" calcext:value-type="float">
            <text:p>0,00179212962962963000</text:p>
          </table:table-cell>
          <table:table-cell table:formula="of:=[.D198]-[.D19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9" office:value-type="float" office:value="15563" calcext:value-type="float">
            <text:p>1556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80127314814815" calcext:value-type="float">
            <text:p>0,00180127314814815000</text:p>
          </table:table-cell>
          <table:table-cell table:formula="of:=[.D199]-[.D19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9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81041666666667" calcext:value-type="float">
            <text:p>0,00181041666666667000</text:p>
          </table:table-cell>
          <table:table-cell table:formula="of:=[.D200]-[.D199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9" office:value-type="float" office:value="15721" calcext:value-type="float">
            <text:p>1572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81956018518519" calcext:value-type="float">
            <text:p>0,00181956018518519000</text:p>
          </table:table-cell>
          <table:table-cell table:formula="of:=[.D201]-[.D20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9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8287037037037" calcext:value-type="float">
            <text:p>0,00182870370370370000</text:p>
          </table:table-cell>
          <table:table-cell table:formula="of:=[.D202]-[.D20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9" office:value-type="float" office:value="15879" calcext:value-type="float">
            <text:p>1587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83784722222222" calcext:value-type="float">
            <text:p>0,00183784722222222000</text:p>
          </table:table-cell>
          <table:table-cell table:formula="of:=[.D203]-[.D20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9" office:value-type="float" office:value="15958" calcext:value-type="float">
            <text:p>1595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84699074074074" calcext:value-type="float">
            <text:p>0,00184699074074074000</text:p>
          </table:table-cell>
          <table:table-cell table:formula="of:=[.D204]-[.D203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9" office:value-type="float" office:value="16037" calcext:value-type="float">
            <text:p>1603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85613425925926" calcext:value-type="float">
            <text:p>0,00185613425925926000</text:p>
          </table:table-cell>
          <table:table-cell table:formula="of:=[.D205]-[.D20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9" office:value-type="float" office:value="16116" calcext:value-type="float">
            <text:p>1611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86527777777778" calcext:value-type="float">
            <text:p>0,00186527777777778000</text:p>
          </table:table-cell>
          <table:table-cell table:formula="of:=[.D206]-[.D20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9" office:value-type="float" office:value="16195" calcext:value-type="float">
            <text:p>1619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8744212962963" calcext:value-type="float">
            <text:p>0,00187442129629630000</text:p>
          </table:table-cell>
          <table:table-cell table:formula="of:=[.D207]-[.D20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9" office:value-type="float" office:value="16274" calcext:value-type="float">
            <text:p>1627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88356481481482" calcext:value-type="float">
            <text:p>0,00188356481481482000</text:p>
          </table:table-cell>
          <table:table-cell table:formula="of:=[.D208]-[.D207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9" office:value-type="float" office:value="16353" calcext:value-type="float">
            <text:p>1635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89270833333333" calcext:value-type="float">
            <text:p>0,00189270833333333000</text:p>
          </table:table-cell>
          <table:table-cell table:formula="of:=[.D209]-[.D20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9" office:value-type="float" office:value="16432" calcext:value-type="float">
            <text:p>1643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90185185185185" calcext:value-type="float">
            <text:p>0,00190185185185185000</text:p>
          </table:table-cell>
          <table:table-cell table:formula="of:=[.D210]-[.D20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9" office:value-type="float" office:value="16511" calcext:value-type="float">
            <text:p>1651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91099537037037" calcext:value-type="float">
            <text:p>0,00191099537037037000</text:p>
          </table:table-cell>
          <table:table-cell table:formula="of:=[.D211]-[.D21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9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92013888888889" calcext:value-type="float">
            <text:p>0,00192013888888889000</text:p>
          </table:table-cell>
          <table:table-cell table:formula="of:=[.D212]-[.D211]" office:value-type="float" office:value="0.00000914351851851836" calcext:value-type="float">
            <text:p>0,00000914351851851836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9" office:value-type="float" office:value="16669" calcext:value-type="float">
            <text:p>1666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92928240740741" calcext:value-type="float">
            <text:p>0,00192928240740741000</text:p>
          </table:table-cell>
          <table:table-cell table:formula="of:=[.D213]-[.D21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9" office:value-type="float" office:value="16748" calcext:value-type="float">
            <text:p>1674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93842592592593" calcext:value-type="float">
            <text:p>0,00193842592592593000</text:p>
          </table:table-cell>
          <table:table-cell table:formula="of:=[.D214]-[.D21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9" office:value-type="float" office:value="16827" calcext:value-type="float">
            <text:p>1682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94756944444444" calcext:value-type="float">
            <text:p>0,00194756944444444000</text:p>
          </table:table-cell>
          <table:table-cell table:formula="of:=[.D215]-[.D21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9" office:value-type="float" office:value="16906" calcext:value-type="float">
            <text:p>1690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95671296296296" calcext:value-type="float">
            <text:p>0,00195671296296296000</text:p>
          </table:table-cell>
          <table:table-cell table:formula="of:=[.D216]-[.D21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9" office:value-type="float" office:value="16985" calcext:value-type="float">
            <text:p>1698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96585648148148" calcext:value-type="float">
            <text:p>0,00196585648148148000</text:p>
          </table:table-cell>
          <table:table-cell table:formula="of:=[.D217]-[.D21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9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975" calcext:value-type="float">
            <text:p>0,00197500000000000000</text:p>
          </table:table-cell>
          <table:table-cell table:formula="of:=[.D218]-[.D217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9" office:value-type="float" office:value="17143" calcext:value-type="float">
            <text:p>1714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98414351851852" calcext:value-type="float">
            <text:p>0,00198414351851852000</text:p>
          </table:table-cell>
          <table:table-cell table:formula="of:=[.D219]-[.D21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9" office:value-type="float" office:value="17222" calcext:value-type="float">
            <text:p>1722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99328703703704" calcext:value-type="float">
            <text:p>0,00199328703703704000</text:p>
          </table:table-cell>
          <table:table-cell table:formula="of:=[.D220]-[.D21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9" office:value-type="float" office:value="17301" calcext:value-type="float">
            <text:p>1730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00243055555556" calcext:value-type="float">
            <text:p>0,00200243055555556000</text:p>
          </table:table-cell>
          <table:table-cell table:formula="of:=[.D221]-[.D22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9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01157407407407" calcext:value-type="float">
            <text:p>0,00201157407407407000</text:p>
          </table:table-cell>
          <table:table-cell table:formula="of:=[.D222]-[.D22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9" office:value-type="float" office:value="17459" calcext:value-type="float">
            <text:p>1745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02071759259259" calcext:value-type="float">
            <text:p>0,00202071759259259000</text:p>
          </table:table-cell>
          <table:table-cell table:formula="of:=[.D223]-[.D22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9" office:value-type="float" office:value="17538" calcext:value-type="float">
            <text:p>1753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02986111111111" calcext:value-type="float">
            <text:p>0,00202986111111111000</text:p>
          </table:table-cell>
          <table:table-cell table:formula="of:=[.D224]-[.D22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9" office:value-type="float" office:value="17617" calcext:value-type="float">
            <text:p>1761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03900462962963" calcext:value-type="float">
            <text:p>0,00203900462962963000</text:p>
          </table:table-cell>
          <table:table-cell table:formula="of:=[.D225]-[.D22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9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04814814814815" calcext:value-type="float">
            <text:p>0,00204814814814815000</text:p>
          </table:table-cell>
          <table:table-cell table:formula="of:=[.D226]-[.D225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9" office:value-type="float" office:value="17775" calcext:value-type="float">
            <text:p>177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05729166666667" calcext:value-type="float">
            <text:p>0,00205729166666667000</text:p>
          </table:table-cell>
          <table:table-cell table:formula="of:=[.D227]-[.D22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9" office:value-type="float" office:value="17854" calcext:value-type="float">
            <text:p>1785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06643518518519" calcext:value-type="float">
            <text:p>0,00206643518518519000</text:p>
          </table:table-cell>
          <table:table-cell table:formula="of:=[.D228]-[.D22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9" office:value-type="float" office:value="17933" calcext:value-type="float">
            <text:p>1793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0755787037037" calcext:value-type="float">
            <text:p>0,00207557870370370000</text:p>
          </table:table-cell>
          <table:table-cell table:formula="of:=[.D229]-[.D22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9" office:value-type="float" office:value="18012" calcext:value-type="float">
            <text:p>1801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08472222222222" calcext:value-type="float">
            <text:p>0,00208472222222222000</text:p>
          </table:table-cell>
          <table:table-cell table:formula="of:=[.D230]-[.D22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9" office:value-type="float" office:value="18091" calcext:value-type="float">
            <text:p>1809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09386574074074" calcext:value-type="float">
            <text:p>0,00209386574074074000</text:p>
          </table:table-cell>
          <table:table-cell table:formula="of:=[.D231]-[.D23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9" office:value-type="float" office:value="18170" calcext:value-type="float">
            <text:p>181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10300925925926" calcext:value-type="float">
            <text:p>0,00210300925925926000</text:p>
          </table:table-cell>
          <table:table-cell table:formula="of:=[.D232]-[.D23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9" office:value-type="float" office:value="18249" calcext:value-type="float">
            <text:p>1824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11215277777778" calcext:value-type="float">
            <text:p>0,00211215277777778000</text:p>
          </table:table-cell>
          <table:table-cell table:formula="of:=[.D233]-[.D23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9" office:value-type="float" office:value="18328" calcext:value-type="float">
            <text:p>1832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1212962962963" calcext:value-type="float">
            <text:p>0,00212129629629630000</text:p>
          </table:table-cell>
          <table:table-cell table:formula="of:=[.D234]-[.D233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9" office:value-type="float" office:value="18407" calcext:value-type="float">
            <text:p>1840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13043981481481" calcext:value-type="float">
            <text:p>0,00213043981481481000</text:p>
          </table:table-cell>
          <table:table-cell table:formula="of:=[.D235]-[.D23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9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13958333333333" calcext:value-type="float">
            <text:p>0,00213958333333333000</text:p>
          </table:table-cell>
          <table:table-cell table:formula="of:=[.D236]-[.D23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9" office:value-type="float" office:value="18565" calcext:value-type="float">
            <text:p>1856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14872685185185" calcext:value-type="float">
            <text:p>0,00214872685185185000</text:p>
          </table:table-cell>
          <table:table-cell table:formula="of:=[.D237]-[.D23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9" office:value-type="float" office:value="18644" calcext:value-type="float">
            <text:p>1864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15787037037037" calcext:value-type="float">
            <text:p>0,00215787037037037000</text:p>
          </table:table-cell>
          <table:table-cell table:formula="of:=[.D238]-[.D23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9" office:value-type="float" office:value="18723" calcext:value-type="float">
            <text:p>1872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16701388888889" calcext:value-type="float">
            <text:p>0,00216701388888889000</text:p>
          </table:table-cell>
          <table:table-cell table:formula="of:=[.D239]-[.D23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9" office:value-type="float" office:value="18802" calcext:value-type="float">
            <text:p>1880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17615740740741" calcext:value-type="float">
            <text:p>0,00217615740740741000</text:p>
          </table:table-cell>
          <table:table-cell table:formula="of:=[.D240]-[.D23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9" office:value-type="float" office:value="18881" calcext:value-type="float">
            <text:p>1888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18530092592593" calcext:value-type="float">
            <text:p>0,00218530092592593000</text:p>
          </table:table-cell>
          <table:table-cell table:formula="of:=[.D241]-[.D24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9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19444444444444" calcext:value-type="float">
            <text:p>0,00219444444444444000</text:p>
          </table:table-cell>
          <table:table-cell table:formula="of:=[.D242]-[.D241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9" office:value-type="float" office:value="19039" calcext:value-type="float">
            <text:p>1903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20358796296296" calcext:value-type="float">
            <text:p>0,00220358796296296000</text:p>
          </table:table-cell>
          <table:table-cell table:formula="of:=[.D243]-[.D24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9" office:value-type="float" office:value="19118" calcext:value-type="float">
            <text:p>1911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21273148148148" calcext:value-type="float">
            <text:p>0,00221273148148148000</text:p>
          </table:table-cell>
          <table:table-cell table:formula="of:=[.D244]-[.D24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9" office:value-type="float" office:value="19197" calcext:value-type="float">
            <text:p>1919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221875" calcext:value-type="float">
            <text:p>0,00222187500000000000</text:p>
          </table:table-cell>
          <table:table-cell table:formula="of:=[.D245]-[.D24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9" office:value-type="float" office:value="19276" calcext:value-type="float">
            <text:p>1927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23101851851852" calcext:value-type="float">
            <text:p>0,00223101851851852000</text:p>
          </table:table-cell>
          <table:table-cell table:formula="of:=[.D246]-[.D24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9" office:value-type="float" office:value="19355" calcext:value-type="float">
            <text:p>1935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24016203703704" calcext:value-type="float">
            <text:p>0,00224016203703704000</text:p>
          </table:table-cell>
          <table:table-cell table:formula="of:=[.D247]-[.D24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9" office:value-type="float" office:value="19434" calcext:value-type="float">
            <text:p>1943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24930555555556" calcext:value-type="float">
            <text:p>0,00224930555555556000</text:p>
          </table:table-cell>
          <table:table-cell table:formula="of:=[.D248]-[.D24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9" office:value-type="float" office:value="19513" calcext:value-type="float">
            <text:p>1951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25844907407407" calcext:value-type="float">
            <text:p>0,00225844907407407000</text:p>
          </table:table-cell>
          <table:table-cell table:formula="of:=[.D249]-[.D24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9" office:value-type="float" office:value="19592" calcext:value-type="float">
            <text:p>1959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26759259259259" calcext:value-type="float">
            <text:p>0,00226759259259259000</text:p>
          </table:table-cell>
          <table:table-cell table:formula="of:=[.D250]-[.D24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9" office:value-type="float" office:value="19671" calcext:value-type="float">
            <text:p>1967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27673611111111" calcext:value-type="float">
            <text:p>0,00227673611111111000</text:p>
          </table:table-cell>
          <table:table-cell table:formula="of:=[.D251]-[.D250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9" office:value-type="float" office:value="19750" calcext:value-type="float">
            <text:p>19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28587962962963" calcext:value-type="float">
            <text:p>0,00228587962962963000</text:p>
          </table:table-cell>
          <table:table-cell table:formula="of:=[.D252]-[.D25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9" office:value-type="float" office:value="19829" calcext:value-type="float">
            <text:p>1982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29502314814815" calcext:value-type="float">
            <text:p>0,00229502314814815000</text:p>
          </table:table-cell>
          <table:table-cell table:formula="of:=[.D253]-[.D25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9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30416666666667" calcext:value-type="float">
            <text:p>0,00230416666666667000</text:p>
          </table:table-cell>
          <table:table-cell table:formula="of:=[.D254]-[.D25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9" office:value-type="float" office:value="19987" calcext:value-type="float">
            <text:p>1998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31331018518519" calcext:value-type="float">
            <text:p>0,00231331018518519000</text:p>
          </table:table-cell>
          <table:table-cell table:formula="of:=[.D255]-[.D25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9" office:value-type="float" office:value="20066" calcext:value-type="float">
            <text:p>2006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3224537037037" calcext:value-type="float">
            <text:p>0,00232245370370370000</text:p>
          </table:table-cell>
          <table:table-cell table:formula="of:=[.D256]-[.D25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9" office:value-type="float" office:value="20145" calcext:value-type="float">
            <text:p>2014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33159722222222" calcext:value-type="float">
            <text:p>0,00233159722222222000</text:p>
          </table:table-cell>
          <table:table-cell table:formula="of:=[.D257]-[.D25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9" office:value-type="float" office:value="20224" calcext:value-type="float">
            <text:p>2022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34074074074074" calcext:value-type="float">
            <text:p>0,00234074074074074000</text:p>
          </table:table-cell>
          <table:table-cell table:formula="of:=[.D258]-[.D25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9" office:value-type="float" office:value="20303" calcext:value-type="float">
            <text:p>2030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34988425925926" calcext:value-type="float">
            <text:p>0,00234988425925926000</text:p>
          </table:table-cell>
          <table:table-cell table:formula="of:=[.D259]-[.D258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9" office:value-type="float" office:value="20382" calcext:value-type="float">
            <text:p>2038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35902777777778" calcext:value-type="float">
            <text:p>0,00235902777777778000</text:p>
          </table:table-cell>
          <table:table-cell table:formula="of:=[.D260]-[.D25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9" office:value-type="float" office:value="20461" calcext:value-type="float">
            <text:p>2046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3681712962963" calcext:value-type="float">
            <text:p>0,00236817129629630000</text:p>
          </table:table-cell>
          <table:table-cell table:formula="of:=[.D261]-[.D26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9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37731481481481" calcext:value-type="float">
            <text:p>0,00237731481481481000</text:p>
          </table:table-cell>
          <table:table-cell table:formula="of:=[.D262]-[.D26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9" office:value-type="float" office:value="20619" calcext:value-type="float">
            <text:p>2061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38645833333333" calcext:value-type="float">
            <text:p>0,00238645833333333000</text:p>
          </table:table-cell>
          <table:table-cell table:formula="of:=[.D263]-[.D26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9" office:value-type="float" office:value="20698" calcext:value-type="float">
            <text:p>2069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39560185185185" calcext:value-type="float">
            <text:p>0,00239560185185185000</text:p>
          </table:table-cell>
          <table:table-cell table:formula="of:=[.D264]-[.D26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9" office:value-type="float" office:value="20777" calcext:value-type="float">
            <text:p>2077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40474537037037" calcext:value-type="float">
            <text:p>0,00240474537037037000</text:p>
          </table:table-cell>
          <table:table-cell table:formula="of:=[.D265]-[.D26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9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41388888888889" calcext:value-type="float">
            <text:p>0,00241388888888889000</text:p>
          </table:table-cell>
          <table:table-cell table:formula="of:=[.D266]-[.D26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9" office:value-type="float" office:value="20935" calcext:value-type="float">
            <text:p>2093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42303240740741" calcext:value-type="float">
            <text:p>0,00242303240740741000</text:p>
          </table:table-cell>
          <table:table-cell table:formula="of:=[.D267]-[.D266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9" office:value-type="float" office:value="21014" calcext:value-type="float">
            <text:p>2101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43217592592593" calcext:value-type="float">
            <text:p>0,00243217592592593000</text:p>
          </table:table-cell>
          <table:table-cell table:formula="of:=[.D268]-[.D26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9" office:value-type="float" office:value="21093" calcext:value-type="float">
            <text:p>2109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44131944444444" calcext:value-type="float">
            <text:p>0,00244131944444444000</text:p>
          </table:table-cell>
          <table:table-cell table:formula="of:=[.D269]-[.D26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9" office:value-type="float" office:value="21172" calcext:value-type="float">
            <text:p>2117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45046296296296" calcext:value-type="float">
            <text:p>0,00245046296296296000</text:p>
          </table:table-cell>
          <table:table-cell table:formula="of:=[.D270]-[.D26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9" office:value-type="float" office:value="21251" calcext:value-type="float">
            <text:p>2125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45960648148148" calcext:value-type="float">
            <text:p>0,00245960648148148000</text:p>
          </table:table-cell>
          <table:table-cell table:formula="of:=[.D271]-[.D27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9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46875" calcext:value-type="float">
            <text:p>0,00246875000000000000</text:p>
          </table:table-cell>
          <table:table-cell table:formula="of:=[.D272]-[.D27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9" office:value-type="float" office:value="21409" calcext:value-type="float">
            <text:p>2140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47789351851852" calcext:value-type="float">
            <text:p>0,00247789351851852000</text:p>
          </table:table-cell>
          <table:table-cell table:formula="of:=[.D273]-[.D27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9" office:value-type="float" office:value="21488" calcext:value-type="float">
            <text:p>2148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48703703703704" calcext:value-type="float">
            <text:p>0,00248703703703704000</text:p>
          </table:table-cell>
          <table:table-cell table:formula="of:=[.D274]-[.D27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9" office:value-type="float" office:value="21567" calcext:value-type="float">
            <text:p>2156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49618055555556" calcext:value-type="float">
            <text:p>0,00249618055555556000</text:p>
          </table:table-cell>
          <table:table-cell table:formula="of:=[.D275]-[.D274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9" office:value-type="float" office:value="21646" calcext:value-type="float">
            <text:p>2164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50532407407407" calcext:value-type="float">
            <text:p>0,00250532407407407000</text:p>
          </table:table-cell>
          <table:table-cell table:formula="of:=[.D276]-[.D27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9" office:value-type="float" office:value="21725" calcext:value-type="float">
            <text:p>217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51446759259259" calcext:value-type="float">
            <text:p>0,00251446759259259000</text:p>
          </table:table-cell>
          <table:table-cell table:formula="of:=[.D277]-[.D27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9" office:value-type="float" office:value="21804" calcext:value-type="float">
            <text:p>2180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52361111111111" calcext:value-type="float">
            <text:p>0,00252361111111111000</text:p>
          </table:table-cell>
          <table:table-cell table:formula="of:=[.D278]-[.D27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9" office:value-type="float" office:value="21883" calcext:value-type="float">
            <text:p>2188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53275462962963" calcext:value-type="float">
            <text:p>0,00253275462962963000</text:p>
          </table:table-cell>
          <table:table-cell table:formula="of:=[.D279]-[.D27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9" office:value-type="float" office:value="21962" calcext:value-type="float">
            <text:p>2196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54189814814815" calcext:value-type="float">
            <text:p>0,00254189814814815000</text:p>
          </table:table-cell>
          <table:table-cell table:formula="of:=[.D280]-[.D27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9" office:value-type="float" office:value="22041" calcext:value-type="float">
            <text:p>2204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55104166666667" calcext:value-type="float">
            <text:p>0,00255104166666667000</text:p>
          </table:table-cell>
          <table:table-cell table:formula="of:=[.D281]-[.D28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9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56018518518519" calcext:value-type="float">
            <text:p>0,00256018518518519000</text:p>
          </table:table-cell>
          <table:table-cell table:formula="of:=[.D282]-[.D28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9" office:value-type="float" office:value="22199" calcext:value-type="float">
            <text:p>2219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5693287037037" calcext:value-type="float">
            <text:p>0,00256932870370370000</text:p>
          </table:table-cell>
          <table:table-cell table:formula="of:=[.D283]-[.D282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9" office:value-type="float" office:value="22278" calcext:value-type="float">
            <text:p>2227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57847222222222" calcext:value-type="float">
            <text:p>0,00257847222222222000</text:p>
          </table:table-cell>
          <table:table-cell table:formula="of:=[.D284]-[.D28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9" office:value-type="float" office:value="22357" calcext:value-type="float">
            <text:p>2235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58761574074074" calcext:value-type="float">
            <text:p>0,00258761574074074000</text:p>
          </table:table-cell>
          <table:table-cell table:formula="of:=[.D285]-[.D28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9" office:value-type="float" office:value="22436" calcext:value-type="float">
            <text:p>2243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59675925925926" calcext:value-type="float">
            <text:p>0,00259675925925926000</text:p>
          </table:table-cell>
          <table:table-cell table:formula="of:=[.D286]-[.D28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9" office:value-type="float" office:value="22515" calcext:value-type="float">
            <text:p>2251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60590277777778" calcext:value-type="float">
            <text:p>0,00260590277777778000</text:p>
          </table:table-cell>
          <table:table-cell table:formula="of:=[.D287]-[.D28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9" office:value-type="float" office:value="22594" calcext:value-type="float">
            <text:p>2259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6150462962963" calcext:value-type="float">
            <text:p>0,00261504629629630000</text:p>
          </table:table-cell>
          <table:table-cell table:formula="of:=[.D288]-[.D28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9" office:value-type="float" office:value="22673" calcext:value-type="float">
            <text:p>2267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62418981481482" calcext:value-type="float">
            <text:p>0,00262418981481482000</text:p>
          </table:table-cell>
          <table:table-cell table:formula="of:=[.D289]-[.D28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9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63333333333333" calcext:value-type="float">
            <text:p>0,00263333333333333000</text:p>
          </table:table-cell>
          <table:table-cell table:formula="of:=[.D290]-[.D289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9" office:value-type="float" office:value="22831" calcext:value-type="float">
            <text:p>2283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64247685185185" calcext:value-type="float">
            <text:p>0,00264247685185185000</text:p>
          </table:table-cell>
          <table:table-cell table:formula="of:=[.D291]-[.D290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9" office:value-type="float" office:value="22910" calcext:value-type="float">
            <text:p>229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65162037037037" calcext:value-type="float">
            <text:p>0,00265162037037037000</text:p>
          </table:table-cell>
          <table:table-cell table:formula="of:=[.D292]-[.D29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9" office:value-type="float" office:value="22989" calcext:value-type="float">
            <text:p>2298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66076388888889" calcext:value-type="float">
            <text:p>0,00266076388888889000</text:p>
          </table:table-cell>
          <table:table-cell table:formula="of:=[.D293]-[.D29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9" office:value-type="float" office:value="23068" calcext:value-type="float">
            <text:p>2306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66990740740741" calcext:value-type="float">
            <text:p>0,00266990740740741000</text:p>
          </table:table-cell>
          <table:table-cell table:formula="of:=[.D294]-[.D29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9" office:value-type="float" office:value="23147" calcext:value-type="float">
            <text:p>2314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67905092592593" calcext:value-type="float">
            <text:p>0,00267905092592593000</text:p>
          </table:table-cell>
          <table:table-cell table:formula="of:=[.D295]-[.D294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9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68819444444444" calcext:value-type="float">
            <text:p>0,00268819444444444000</text:p>
          </table:table-cell>
          <table:table-cell table:formula="of:=[.D296]-[.D295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9" office:value-type="float" office:value="23305" calcext:value-type="float">
            <text:p>2330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69733796296296" calcext:value-type="float">
            <text:p>0,00269733796296296000</text:p>
          </table:table-cell>
          <table:table-cell table:formula="of:=[.D297]-[.D296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9" office:value-type="float" office:value="23384" calcext:value-type="float">
            <text:p>2338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70648148148148" calcext:value-type="float">
            <text:p>0,00270648148148148000</text:p>
          </table:table-cell>
          <table:table-cell table:formula="of:=[.D298]-[.D297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9" office:value-type="float" office:value="23463" calcext:value-type="float">
            <text:p>2346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715625" calcext:value-type="float">
            <text:p>0,00271562500000000000</text:p>
          </table:table-cell>
          <table:table-cell table:formula="of:=[.D299]-[.D298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9" office:value-type="float" office:value="23542" calcext:value-type="float">
            <text:p>2354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72476851851852" calcext:value-type="float">
            <text:p>0,00272476851851852000</text:p>
          </table:table-cell>
          <table:table-cell table:formula="of:=[.D300]-[.D299]" office:value-type="float" office:value="0.00000914351851851814" calcext:value-type="float">
            <text:p>0,00000914351851851814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9" office:value-type="float" office:value="23621" calcext:value-type="float">
            <text:p>2362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73391203703704" calcext:value-type="float">
            <text:p>0,00273391203703704000</text:p>
          </table:table-cell>
          <table:table-cell table:formula="of:=[.D301]-[.D300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9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74305555555556" calcext:value-type="float">
            <text:p>0,00274305555555556000</text:p>
          </table:table-cell>
          <table:table-cell table:formula="of:=[.D302]-[.D301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9" office:value-type="float" office:value="23779" calcext:value-type="float">
            <text:p>2377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75219907407407" calcext:value-type="float">
            <text:p>0,00275219907407407000</text:p>
          </table:table-cell>
          <table:table-cell table:formula="of:=[.D303]-[.D302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9" office:value-type="float" office:value="23858" calcext:value-type="float">
            <text:p>2385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76134259259259" calcext:value-type="float">
            <text:p>0,00276134259259259000</text:p>
          </table:table-cell>
          <table:table-cell table:formula="of:=[.D304]-[.D303]" office:value-type="float" office:value="0.00000914351851851857" calcext:value-type="float">
            <text:p>0,00000914351851851857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9" office:value-type="float" office:value="23937" calcext:value-type="float">
            <text:p>2393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77048611111111" calcext:value-type="float">
            <text:p>0,00277048611111111000</text:p>
          </table:table-cell>
          <table:table-cell table:formula="of:=#REF!-[.D304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59:10.499558593</meta:creation-date>
    <dc:date>2026-05-17T18:59:19.876041728</dc:date>
    <meta:editing-duration>PT10S</meta:editing-duration>
    <meta:editing-cycles>1</meta:editing-cycles>
    <meta:document-statistic meta:table-count="1" meta:cell-count="1520" meta:object-count="0"/>
    <meta:generator>LibreOffice/24.2.7.2$Linux_X86_64 LibreOffice_project/420$Build-2</meta:generator>
  </office:meta>
</office:document-meta>
</file>