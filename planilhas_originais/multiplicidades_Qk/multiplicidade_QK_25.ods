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2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25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289351851851852" calcext:value-type="float">
            <text:p>0,00000289351851851852</text:p>
          </table:table-cell>
          <table:table-cell table:formula="of:=[.D3]-[.D2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25" office:value-type="float" office:value="50" calcext:value-type="float">
            <text:p>5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578703703703704" calcext:value-type="float">
            <text:p>0,00000578703703703704</text:p>
          </table:table-cell>
          <table:table-cell table:formula="of:=[.D4]-[.D3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25" office:value-type="float" office:value="75" calcext:value-type="float">
            <text:p>75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868055555555556" calcext:value-type="float">
            <text:p>0,00000868055555555556</text:p>
          </table:table-cell>
          <table:table-cell table:formula="of:=[.D5]-[.D4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25" office:value-type="float" office:value="100" calcext:value-type="float">
            <text:p>10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15740740740741" calcext:value-type="float">
            <text:p>0,00001157407407407410</text:p>
          </table:table-cell>
          <table:table-cell table:formula="of:=[.D6]-[.D5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25" office:value-type="float" office:value="125" calcext:value-type="float">
            <text:p>12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44675925925926" calcext:value-type="float">
            <text:p>0,00001446759259259260</text:p>
          </table:table-cell>
          <table:table-cell table:formula="of:=[.D7]-[.D6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25" office:value-type="float" office:value="150" calcext:value-type="float">
            <text:p>15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73611111111111" calcext:value-type="float">
            <text:p>0,00001736111111111110</text:p>
          </table:table-cell>
          <table:table-cell table:formula="of:=[.D8]-[.D7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25" office:value-type="float" office:value="175" calcext:value-type="float">
            <text:p>175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202546296296296" calcext:value-type="float">
            <text:p>0,00002025462962962960</text:p>
          </table:table-cell>
          <table:table-cell table:formula="of:=[.D9]-[.D8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25" office:value-type="float" office:value="200" calcext:value-type="float">
            <text:p>20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231481481481481" calcext:value-type="float">
            <text:p>0,00002314814814814820</text:p>
          </table:table-cell>
          <table:table-cell table:formula="of:=[.D10]-[.D9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25" office:value-type="float" office:value="225" calcext:value-type="float">
            <text:p>225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260416666666667" calcext:value-type="float">
            <text:p>0,00002604166666666670</text:p>
          </table:table-cell>
          <table:table-cell table:formula="of:=[.D11]-[.D10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25" office:value-type="float" office:value="250" calcext:value-type="float">
            <text:p>25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289351851851852" calcext:value-type="float">
            <text:p>0,00002893518518518520</text:p>
          </table:table-cell>
          <table:table-cell table:formula="of:=[.D12]-[.D11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25" office:value-type="float" office:value="275" calcext:value-type="float">
            <text:p>275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318287037037037" calcext:value-type="float">
            <text:p>0,00003182870370370370</text:p>
          </table:table-cell>
          <table:table-cell table:formula="of:=[.D13]-[.D12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25" office:value-type="float" office:value="300" calcext:value-type="float">
            <text:p>30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347222222222222" calcext:value-type="float">
            <text:p>0,00003472222222222220</text:p>
          </table:table-cell>
          <table:table-cell table:formula="of:=[.D14]-[.D13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25" office:value-type="float" office:value="325" calcext:value-type="float">
            <text:p>325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376157407407407" calcext:value-type="float">
            <text:p>0,00003761574074074080</text:p>
          </table:table-cell>
          <table:table-cell table:formula="of:=[.D15]-[.D14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25" office:value-type="float" office:value="350" calcext:value-type="float">
            <text:p>35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405092592592593" calcext:value-type="float">
            <text:p>0,00004050925925925930</text:p>
          </table:table-cell>
          <table:table-cell table:formula="of:=[.D16]-[.D15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25" office:value-type="float" office:value="375" calcext:value-type="float">
            <text:p>37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434027777777778" calcext:value-type="float">
            <text:p>0,00004340277777777780</text:p>
          </table:table-cell>
          <table:table-cell table:formula="of:=[.D17]-[.D16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25" office:value-type="float" office:value="400" calcext:value-type="float">
            <text:p>40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462962962962963" calcext:value-type="float">
            <text:p>0,00004629629629629630</text:p>
          </table:table-cell>
          <table:table-cell table:formula="of:=[.D18]-[.D17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25" office:value-type="float" office:value="425" calcext:value-type="float">
            <text:p>425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491898148148148" calcext:value-type="float">
            <text:p>0,00004918981481481480</text:p>
          </table:table-cell>
          <table:table-cell table:formula="of:=[.D19]-[.D18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25" office:value-type="float" office:value="450" calcext:value-type="float">
            <text:p>45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520833333333333" calcext:value-type="float">
            <text:p>0,00005208333333333330</text:p>
          </table:table-cell>
          <table:table-cell table:formula="of:=[.D20]-[.D19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25" office:value-type="float" office:value="475" calcext:value-type="float">
            <text:p>475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549768518518519" calcext:value-type="float">
            <text:p>0,00005497685185185190</text:p>
          </table:table-cell>
          <table:table-cell table:formula="of:=[.D21]-[.D20]" office:value-type="float" office:value="0.00000289351851851852" calcext:value-type="float">
            <text:p>0,000002893518518518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25" office:value-type="float" office:value="500" calcext:value-type="float">
            <text:p>5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578703703703704" calcext:value-type="float">
            <text:p>0,00005787037037037040</text:p>
          </table:table-cell>
          <table:table-cell table:formula="of:=[.D22]-[.D21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25" office:value-type="float" office:value="525" calcext:value-type="float">
            <text:p>525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607638888888889" calcext:value-type="float">
            <text:p>0,00006076388888888890</text:p>
          </table:table-cell>
          <table:table-cell table:formula="of:=[.D23]-[.D22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25" office:value-type="float" office:value="550" calcext:value-type="float">
            <text:p>55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636574074074074" calcext:value-type="float">
            <text:p>0,00006365740740740740</text:p>
          </table:table-cell>
          <table:table-cell table:formula="of:=[.D24]-[.D23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25" office:value-type="float" office:value="575" calcext:value-type="float">
            <text:p>575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665509259259259" calcext:value-type="float">
            <text:p>0,00006655092592592590</text:p>
          </table:table-cell>
          <table:table-cell table:formula="of:=[.D25]-[.D24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25" office:value-type="float" office:value="600" calcext:value-type="float">
            <text:p>60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694444444444444" calcext:value-type="float">
            <text:p>0,00006944444444444440</text:p>
          </table:table-cell>
          <table:table-cell table:formula="of:=[.D26]-[.D25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25" office:value-type="float" office:value="625" calcext:value-type="float">
            <text:p>6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72337962962963" calcext:value-type="float">
            <text:p>0,00007233796296296300</text:p>
          </table:table-cell>
          <table:table-cell table:formula="of:=[.D27]-[.D26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25" office:value-type="float" office:value="650" calcext:value-type="float">
            <text:p>65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752314814814815" calcext:value-type="float">
            <text:p>0,00007523148148148150</text:p>
          </table:table-cell>
          <table:table-cell table:formula="of:=[.D28]-[.D27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25" office:value-type="float" office:value="675" calcext:value-type="float">
            <text:p>675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78125" calcext:value-type="float">
            <text:p>0,00007812500000000000</text:p>
          </table:table-cell>
          <table:table-cell table:formula="of:=[.D29]-[.D28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25" office:value-type="float" office:value="700" calcext:value-type="float">
            <text:p>70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810185185185185" calcext:value-type="float">
            <text:p>0,00008101851851851850</text:p>
          </table:table-cell>
          <table:table-cell table:formula="of:=[.D30]-[.D29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25" office:value-type="float" office:value="725" calcext:value-type="float">
            <text:p>725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83912037037037" calcext:value-type="float">
            <text:p>0,00008391203703703700</text:p>
          </table:table-cell>
          <table:table-cell table:formula="of:=[.D31]-[.D30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25" office:value-type="float" office:value="750" calcext:value-type="float">
            <text:p>75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868055555555556" calcext:value-type="float">
            <text:p>0,00008680555555555560</text:p>
          </table:table-cell>
          <table:table-cell table:formula="of:=[.D32]-[.D31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25" office:value-type="float" office:value="775" calcext:value-type="float">
            <text:p>775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896990740740741" calcext:value-type="float">
            <text:p>0,00008969907407407410</text:p>
          </table:table-cell>
          <table:table-cell table:formula="of:=[.D33]-[.D32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25" office:value-type="float" office:value="800" calcext:value-type="float">
            <text:p>80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925925925925926" calcext:value-type="float">
            <text:p>0,00009259259259259260</text:p>
          </table:table-cell>
          <table:table-cell table:formula="of:=[.D34]-[.D33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25" office:value-type="float" office:value="825" calcext:value-type="float">
            <text:p>825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954861111111111" calcext:value-type="float">
            <text:p>0,00009548611111111110</text:p>
          </table:table-cell>
          <table:table-cell table:formula="of:=[.D35]-[.D34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25" office:value-type="float" office:value="850" calcext:value-type="float">
            <text:p>85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983796296296296" calcext:value-type="float">
            <text:p>0,00009837962962962960</text:p>
          </table:table-cell>
          <table:table-cell table:formula="of:=[.D36]-[.D35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25" office:value-type="float" office:value="875" calcext:value-type="float">
            <text:p>87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01273148148148" calcext:value-type="float">
            <text:p>0,00010127314814814800</text:p>
          </table:table-cell>
          <table:table-cell table:formula="of:=[.D37]-[.D36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25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04166666666667" calcext:value-type="float">
            <text:p>0,00010416666666666700</text:p>
          </table:table-cell>
          <table:table-cell table:formula="of:=[.D38]-[.D37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25" office:value-type="float" office:value="925" calcext:value-type="float">
            <text:p>925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07060185185185" calcext:value-type="float">
            <text:p>0,00010706018518518500</text:p>
          </table:table-cell>
          <table:table-cell table:formula="of:=[.D39]-[.D38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25" office:value-type="float" office:value="950" calcext:value-type="float">
            <text:p>95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09953703703704" calcext:value-type="float">
            <text:p>0,00010995370370370400</text:p>
          </table:table-cell>
          <table:table-cell table:formula="of:=[.D40]-[.D39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25" office:value-type="float" office:value="975" calcext:value-type="float">
            <text:p>975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12847222222222" calcext:value-type="float">
            <text:p>0,00011284722222222200</text:p>
          </table:table-cell>
          <table:table-cell table:formula="of:=[.D41]-[.D40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25" office:value-type="float" office:value="1000" calcext:value-type="float">
            <text:p>10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15740740740741" calcext:value-type="float">
            <text:p>0,00011574074074074100</text:p>
          </table:table-cell>
          <table:table-cell table:formula="of:=[.D42]-[.D41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25" office:value-type="float" office:value="1025" calcext:value-type="float">
            <text:p>1025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18634259259259" calcext:value-type="float">
            <text:p>0,00011863425925925900</text:p>
          </table:table-cell>
          <table:table-cell table:formula="of:=[.D43]-[.D42]" office:value-type="float" office:value="0.00000289351851851851" calcext:value-type="float">
            <text:p>0,000002893518518518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25" office:value-type="float" office:value="1050" calcext:value-type="float">
            <text:p>105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21527777777778" calcext:value-type="float">
            <text:p>0,00012152777777777800</text:p>
          </table:table-cell>
          <table:table-cell table:formula="of:=[.D44]-[.D43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25" office:value-type="float" office:value="1075" calcext:value-type="float">
            <text:p>1075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24421296296296" calcext:value-type="float">
            <text:p>0,00012442129629629600</text:p>
          </table:table-cell>
          <table:table-cell table:formula="of:=[.D45]-[.D4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25" office:value-type="float" office:value="1100" calcext:value-type="float">
            <text:p>110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27314814814815" calcext:value-type="float">
            <text:p>0,00012731481481481500</text:p>
          </table:table-cell>
          <table:table-cell table:formula="of:=[.D46]-[.D45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25" office:value-type="float" office:value="1125" calcext:value-type="float">
            <text:p>112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30208333333333" calcext:value-type="float">
            <text:p>0,00013020833333333300</text:p>
          </table:table-cell>
          <table:table-cell table:formula="of:=[.D47]-[.D46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25" office:value-type="float" office:value="1150" calcext:value-type="float">
            <text:p>115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33101851851852" calcext:value-type="float">
            <text:p>0,00013310185185185200</text:p>
          </table:table-cell>
          <table:table-cell table:formula="of:=[.D48]-[.D4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25" office:value-type="float" office:value="1175" calcext:value-type="float">
            <text:p>1175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3599537037037" calcext:value-type="float">
            <text:p>0,00013599537037037000</text:p>
          </table:table-cell>
          <table:table-cell table:formula="of:=[.D49]-[.D48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25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38888888888889" calcext:value-type="float">
            <text:p>0,00013888888888888900</text:p>
          </table:table-cell>
          <table:table-cell table:formula="of:=[.D50]-[.D49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25" office:value-type="float" office:value="1225" calcext:value-type="float">
            <text:p>1225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41782407407407" calcext:value-type="float">
            <text:p>0,00014178240740740700</text:p>
          </table:table-cell>
          <table:table-cell table:formula="of:=[.D51]-[.D5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25" office:value-type="float" office:value="1250" calcext:value-type="float">
            <text:p>12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44675925925926" calcext:value-type="float">
            <text:p>0,00014467592592592600</text:p>
          </table:table-cell>
          <table:table-cell table:formula="of:=[.D52]-[.D51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25" office:value-type="float" office:value="1275" calcext:value-type="float">
            <text:p>1275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47569444444444" calcext:value-type="float">
            <text:p>0,00014756944444444400</text:p>
          </table:table-cell>
          <table:table-cell table:formula="of:=[.D53]-[.D52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25" office:value-type="float" office:value="1300" calcext:value-type="float">
            <text:p>130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50462962962963" calcext:value-type="float">
            <text:p>0,00015046296296296300</text:p>
          </table:table-cell>
          <table:table-cell table:formula="of:=[.D54]-[.D5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25" office:value-type="float" office:value="1325" calcext:value-type="float">
            <text:p>1325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53356481481481" calcext:value-type="float">
            <text:p>0,00015335648148148100</text:p>
          </table:table-cell>
          <table:table-cell table:formula="of:=[.D55]-[.D54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25" office:value-type="float" office:value="1350" calcext:value-type="float">
            <text:p>135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5625" calcext:value-type="float">
            <text:p>0,00015625000000000000</text:p>
          </table:table-cell>
          <table:table-cell table:formula="of:=[.D56]-[.D55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25" office:value-type="float" office:value="1375" calcext:value-type="float">
            <text:p>137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59143518518519" calcext:value-type="float">
            <text:p>0,00015914351851851900</text:p>
          </table:table-cell>
          <table:table-cell table:formula="of:=[.D57]-[.D5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25" office:value-type="float" office:value="1400" calcext:value-type="float">
            <text:p>140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62037037037037" calcext:value-type="float">
            <text:p>0,00016203703703703700</text:p>
          </table:table-cell>
          <table:table-cell table:formula="of:=[.D58]-[.D57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25" office:value-type="float" office:value="1425" calcext:value-type="float">
            <text:p>1425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64930555555556" calcext:value-type="float">
            <text:p>0,00016493055555555600</text:p>
          </table:table-cell>
          <table:table-cell table:formula="of:=[.D59]-[.D5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25" office:value-type="float" office:value="1450" calcext:value-type="float">
            <text:p>145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67824074074074" calcext:value-type="float">
            <text:p>0,00016782407407407400</text:p>
          </table:table-cell>
          <table:table-cell table:formula="of:=[.D60]-[.D59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25" office:value-type="float" office:value="1475" calcext:value-type="float">
            <text:p>1475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70717592592593" calcext:value-type="float">
            <text:p>0,00017071759259259300</text:p>
          </table:table-cell>
          <table:table-cell table:formula="of:=[.D61]-[.D60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25" office:value-type="float" office:value="1500" calcext:value-type="float">
            <text:p>15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73611111111111" calcext:value-type="float">
            <text:p>0,00017361111111111100</text:p>
          </table:table-cell>
          <table:table-cell table:formula="of:=[.D62]-[.D6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25" office:value-type="float" office:value="1525" calcext:value-type="float">
            <text:p>1525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7650462962963" calcext:value-type="float">
            <text:p>0,00017650462962963000</text:p>
          </table:table-cell>
          <table:table-cell table:formula="of:=[.D63]-[.D62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25" office:value-type="float" office:value="1550" calcext:value-type="float">
            <text:p>155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79398148148148" calcext:value-type="float">
            <text:p>0,00017939814814814800</text:p>
          </table:table-cell>
          <table:table-cell table:formula="of:=[.D64]-[.D63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25" office:value-type="float" office:value="1575" calcext:value-type="float">
            <text:p>1575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82291666666667" calcext:value-type="float">
            <text:p>0,00018229166666666700</text:p>
          </table:table-cell>
          <table:table-cell table:formula="of:=[.D65]-[.D6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25" office:value-type="float" office:value="1600" calcext:value-type="float">
            <text:p>160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185185185185185" calcext:value-type="float">
            <text:p>0,00018518518518518500</text:p>
          </table:table-cell>
          <table:table-cell table:formula="of:=[.D66]-[.D65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25" office:value-type="float" office:value="1625" calcext:value-type="float">
            <text:p>162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188078703703704" calcext:value-type="float">
            <text:p>0,00018807870370370400</text:p>
          </table:table-cell>
          <table:table-cell table:formula="of:=[.D67]-[.D66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25" office:value-type="float" office:value="1650" calcext:value-type="float">
            <text:p>165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190972222222222" calcext:value-type="float">
            <text:p>0,00019097222222222200</text:p>
          </table:table-cell>
          <table:table-cell table:formula="of:=[.D68]-[.D6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25" office:value-type="float" office:value="1675" calcext:value-type="float">
            <text:p>1675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193865740740741" calcext:value-type="float">
            <text:p>0,00019386574074074100</text:p>
          </table:table-cell>
          <table:table-cell table:formula="of:=[.D69]-[.D68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25" office:value-type="float" office:value="1700" calcext:value-type="float">
            <text:p>170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196759259259259" calcext:value-type="float">
            <text:p>0,00019675925925925900</text:p>
          </table:table-cell>
          <table:table-cell table:formula="of:=[.D70]-[.D69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25" office:value-type="float" office:value="1725" calcext:value-type="float">
            <text:p>1725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199652777777778" calcext:value-type="float">
            <text:p>0,00019965277777777800</text:p>
          </table:table-cell>
          <table:table-cell table:formula="of:=[.D71]-[.D7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25" office:value-type="float" office:value="1750" calcext:value-type="float">
            <text:p>175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202546296296296" calcext:value-type="float">
            <text:p>0,00020254629629629600</text:p>
          </table:table-cell>
          <table:table-cell table:formula="of:=[.D72]-[.D71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25" office:value-type="float" office:value="1775" calcext:value-type="float">
            <text:p>1775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205439814814815" calcext:value-type="float">
            <text:p>0,00020543981481481500</text:p>
          </table:table-cell>
          <table:table-cell table:formula="of:=[.D73]-[.D72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25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208333333333333" calcext:value-type="float">
            <text:p>0,00020833333333333300</text:p>
          </table:table-cell>
          <table:table-cell table:formula="of:=[.D74]-[.D7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25" office:value-type="float" office:value="1825" calcext:value-type="float">
            <text:p>1825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211226851851852" calcext:value-type="float">
            <text:p>0,00021122685185185200</text:p>
          </table:table-cell>
          <table:table-cell table:formula="of:=[.D75]-[.D74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25" office:value-type="float" office:value="1850" calcext:value-type="float">
            <text:p>185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21412037037037" calcext:value-type="float">
            <text:p>0,00021412037037037000</text:p>
          </table:table-cell>
          <table:table-cell table:formula="of:=[.D76]-[.D7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25" office:value-type="float" office:value="1875" calcext:value-type="float">
            <text:p>18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217013888888889" calcext:value-type="float">
            <text:p>0,00021701388888888900</text:p>
          </table:table-cell>
          <table:table-cell table:formula="of:=[.D77]-[.D76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25" office:value-type="float" office:value="1900" calcext:value-type="float">
            <text:p>190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219907407407407" calcext:value-type="float">
            <text:p>0,00021990740740740700</text:p>
          </table:table-cell>
          <table:table-cell table:formula="of:=[.D78]-[.D77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25" office:value-type="float" office:value="1925" calcext:value-type="float">
            <text:p>1925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222800925925926" calcext:value-type="float">
            <text:p>0,00022280092592592600</text:p>
          </table:table-cell>
          <table:table-cell table:formula="of:=[.D79]-[.D7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25" office:value-type="float" office:value="1950" calcext:value-type="float">
            <text:p>195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225694444444444" calcext:value-type="float">
            <text:p>0,00022569444444444400</text:p>
          </table:table-cell>
          <table:table-cell table:formula="of:=[.D80]-[.D79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25" office:value-type="float" office:value="1975" calcext:value-type="float">
            <text:p>1975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228587962962963" calcext:value-type="float">
            <text:p>0,00022858796296296300</text:p>
          </table:table-cell>
          <table:table-cell table:formula="of:=[.D81]-[.D80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25" office:value-type="float" office:value="2000" calcext:value-type="float">
            <text:p>20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231481481481482" calcext:value-type="float">
            <text:p>0,00023148148148148200</text:p>
          </table:table-cell>
          <table:table-cell table:formula="of:=[.D82]-[.D8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25" office:value-type="float" office:value="2025" calcext:value-type="float">
            <text:p>2025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234375" calcext:value-type="float">
            <text:p>0,00023437500000000000</text:p>
          </table:table-cell>
          <table:table-cell table:formula="of:=[.D83]-[.D82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25" office:value-type="float" office:value="2050" calcext:value-type="float">
            <text:p>205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237268518518519" calcext:value-type="float">
            <text:p>0,00023726851851851900</text:p>
          </table:table-cell>
          <table:table-cell table:formula="of:=[.D84]-[.D83]" office:value-type="float" office:value="0.00000289351851851853" calcext:value-type="float">
            <text:p>0,000002893518518518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25" office:value-type="float" office:value="2075" calcext:value-type="float">
            <text:p>2075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240162037037037" calcext:value-type="float">
            <text:p>0,00024016203703703700</text:p>
          </table:table-cell>
          <table:table-cell table:formula="of:=[.D85]-[.D8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25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243055555555556" calcext:value-type="float">
            <text:p>0,00024305555555555600</text:p>
          </table:table-cell>
          <table:table-cell table:formula="of:=[.D86]-[.D8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25" office:value-type="float" office:value="2125" calcext:value-type="float">
            <text:p>212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245949074074074" calcext:value-type="float">
            <text:p>0,00024594907407407400</text:p>
          </table:table-cell>
          <table:table-cell table:formula="of:=[.D87]-[.D86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25" office:value-type="float" office:value="2150" calcext:value-type="float">
            <text:p>215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248842592592593" calcext:value-type="float">
            <text:p>0,00024884259259259300</text:p>
          </table:table-cell>
          <table:table-cell table:formula="of:=[.D88]-[.D8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25" office:value-type="float" office:value="2175" calcext:value-type="float">
            <text:p>2175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251736111111111" calcext:value-type="float">
            <text:p>0,00025173611111111100</text:p>
          </table:table-cell>
          <table:table-cell table:formula="of:=[.D89]-[.D8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25" office:value-type="float" office:value="2200" calcext:value-type="float">
            <text:p>220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25462962962963" calcext:value-type="float">
            <text:p>0,00025462962962963000</text:p>
          </table:table-cell>
          <table:table-cell table:formula="of:=[.D90]-[.D89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25" office:value-type="float" office:value="2225" calcext:value-type="float">
            <text:p>2225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257523148148148" calcext:value-type="float">
            <text:p>0,00025752314814814800</text:p>
          </table:table-cell>
          <table:table-cell table:formula="of:=[.D91]-[.D9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25" office:value-type="float" office:value="2250" calcext:value-type="float">
            <text:p>225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260416666666667" calcext:value-type="float">
            <text:p>0,00026041666666666700</text:p>
          </table:table-cell>
          <table:table-cell table:formula="of:=[.D92]-[.D9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25" office:value-type="float" office:value="2275" calcext:value-type="float">
            <text:p>2275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263310185185185" calcext:value-type="float">
            <text:p>0,00026331018518518500</text:p>
          </table:table-cell>
          <table:table-cell table:formula="of:=[.D93]-[.D92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25" office:value-type="float" office:value="2300" calcext:value-type="float">
            <text:p>230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266203703703704" calcext:value-type="float">
            <text:p>0,00026620370370370400</text:p>
          </table:table-cell>
          <table:table-cell table:formula="of:=[.D94]-[.D9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25" office:value-type="float" office:value="2325" calcext:value-type="float">
            <text:p>2325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269097222222222" calcext:value-type="float">
            <text:p>0,00026909722222222200</text:p>
          </table:table-cell>
          <table:table-cell table:formula="of:=[.D95]-[.D9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25" office:value-type="float" office:value="2350" calcext:value-type="float">
            <text:p>235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271990740740741" calcext:value-type="float">
            <text:p>0,00027199074074074100</text:p>
          </table:table-cell>
          <table:table-cell table:formula="of:=[.D96]-[.D95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25" office:value-type="float" office:value="2375" calcext:value-type="float">
            <text:p>237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274884259259259" calcext:value-type="float">
            <text:p>0,00027488425925925900</text:p>
          </table:table-cell>
          <table:table-cell table:formula="of:=[.D97]-[.D9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25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277777777777778" calcext:value-type="float">
            <text:p>0,00027777777777777800</text:p>
          </table:table-cell>
          <table:table-cell table:formula="of:=[.D98]-[.D9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25" office:value-type="float" office:value="2425" calcext:value-type="float">
            <text:p>2425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280671296296296" calcext:value-type="float">
            <text:p>0,00028067129629629600</text:p>
          </table:table-cell>
          <table:table-cell table:formula="of:=[.D99]-[.D98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25" office:value-type="float" office:value="2450" calcext:value-type="float">
            <text:p>245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283564814814815" calcext:value-type="float">
            <text:p>0,00028356481481481500</text:p>
          </table:table-cell>
          <table:table-cell table:formula="of:=[.D100]-[.D9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25" office:value-type="float" office:value="2475" calcext:value-type="float">
            <text:p>2475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286458333333333" calcext:value-type="float">
            <text:p>0,00028645833333333300</text:p>
          </table:table-cell>
          <table:table-cell table:formula="of:=[.D101]-[.D10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25" office:value-type="float" office:value="2500" calcext:value-type="float">
            <text:p>25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289351851851852" calcext:value-type="float">
            <text:p>0,00028935185185185200</text:p>
          </table:table-cell>
          <table:table-cell table:formula="of:=[.D102]-[.D101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25" office:value-type="float" office:value="2525" calcext:value-type="float">
            <text:p>2525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29224537037037" calcext:value-type="float">
            <text:p>0,00029224537037037000</text:p>
          </table:table-cell>
          <table:table-cell table:formula="of:=[.D103]-[.D10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25" office:value-type="float" office:value="2550" calcext:value-type="float">
            <text:p>255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295138888888889" calcext:value-type="float">
            <text:p>0,00029513888888888900</text:p>
          </table:table-cell>
          <table:table-cell table:formula="of:=[.D104]-[.D10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25" office:value-type="float" office:value="2575" calcext:value-type="float">
            <text:p>2575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298032407407407" calcext:value-type="float">
            <text:p>0,00029803240740740700</text:p>
          </table:table-cell>
          <table:table-cell table:formula="of:=[.D105]-[.D104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25" office:value-type="float" office:value="2600" calcext:value-type="float">
            <text:p>260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300925925925926" calcext:value-type="float">
            <text:p>0,00030092592592592600</text:p>
          </table:table-cell>
          <table:table-cell table:formula="of:=[.D106]-[.D10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25" office:value-type="float" office:value="2625" calcext:value-type="float">
            <text:p>262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303819444444444" calcext:value-type="float">
            <text:p>0,00030381944444444400</text:p>
          </table:table-cell>
          <table:table-cell table:formula="of:=[.D107]-[.D10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25" office:value-type="float" office:value="2650" calcext:value-type="float">
            <text:p>265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306712962962963" calcext:value-type="float">
            <text:p>0,00030671296296296300</text:p>
          </table:table-cell>
          <table:table-cell table:formula="of:=[.D108]-[.D107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25" office:value-type="float" office:value="2675" calcext:value-type="float">
            <text:p>2675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309606481481482" calcext:value-type="float">
            <text:p>0,00030960648148148200</text:p>
          </table:table-cell>
          <table:table-cell table:formula="of:=[.D109]-[.D10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25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3125" calcext:value-type="float">
            <text:p>0,00031250000000000000</text:p>
          </table:table-cell>
          <table:table-cell table:formula="of:=[.D110]-[.D10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25" office:value-type="float" office:value="2725" calcext:value-type="float">
            <text:p>2725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315393518518519" calcext:value-type="float">
            <text:p>0,00031539351851851900</text:p>
          </table:table-cell>
          <table:table-cell table:formula="of:=[.D111]-[.D110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25" office:value-type="float" office:value="2750" calcext:value-type="float">
            <text:p>275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318287037037037" calcext:value-type="float">
            <text:p>0,00031828703703703700</text:p>
          </table:table-cell>
          <table:table-cell table:formula="of:=[.D112]-[.D11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25" office:value-type="float" office:value="2775" calcext:value-type="float">
            <text:p>2775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321180555555556" calcext:value-type="float">
            <text:p>0,00032118055555555600</text:p>
          </table:table-cell>
          <table:table-cell table:formula="of:=[.D113]-[.D11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25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324074074074074" calcext:value-type="float">
            <text:p>0,00032407407407407400</text:p>
          </table:table-cell>
          <table:table-cell table:formula="of:=[.D114]-[.D11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25" office:value-type="float" office:value="2825" calcext:value-type="float">
            <text:p>2825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326967592592593" calcext:value-type="float">
            <text:p>0,00032696759259259300</text:p>
          </table:table-cell>
          <table:table-cell table:formula="of:=[.D115]-[.D114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25" office:value-type="float" office:value="2850" calcext:value-type="float">
            <text:p>285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329861111111111" calcext:value-type="float">
            <text:p>0,00032986111111111100</text:p>
          </table:table-cell>
          <table:table-cell table:formula="of:=[.D116]-[.D11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25" office:value-type="float" office:value="2875" calcext:value-type="float">
            <text:p>287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33275462962963" calcext:value-type="float">
            <text:p>0,00033275462962963000</text:p>
          </table:table-cell>
          <table:table-cell table:formula="of:=[.D117]-[.D11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25" office:value-type="float" office:value="2900" calcext:value-type="float">
            <text:p>290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335648148148148" calcext:value-type="float">
            <text:p>0,00033564814814814800</text:p>
          </table:table-cell>
          <table:table-cell table:formula="of:=[.D118]-[.D117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25" office:value-type="float" office:value="2925" calcext:value-type="float">
            <text:p>2925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338541666666667" calcext:value-type="float">
            <text:p>0,00033854166666666700</text:p>
          </table:table-cell>
          <table:table-cell table:formula="of:=[.D119]-[.D11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25" office:value-type="float" office:value="2950" calcext:value-type="float">
            <text:p>295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341435185185185" calcext:value-type="float">
            <text:p>0,00034143518518518500</text:p>
          </table:table-cell>
          <table:table-cell table:formula="of:=[.D120]-[.D11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25" office:value-type="float" office:value="2975" calcext:value-type="float">
            <text:p>2975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344328703703704" calcext:value-type="float">
            <text:p>0,00034432870370370400</text:p>
          </table:table-cell>
          <table:table-cell table:formula="of:=[.D121]-[.D120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25" office:value-type="float" office:value="3000" calcext:value-type="float">
            <text:p>30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347222222222222" calcext:value-type="float">
            <text:p>0,00034722222222222200</text:p>
          </table:table-cell>
          <table:table-cell table:formula="of:=[.D122]-[.D12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25" office:value-type="float" office:value="3025" calcext:value-type="float">
            <text:p>3025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350115740740741" calcext:value-type="float">
            <text:p>0,00035011574074074100</text:p>
          </table:table-cell>
          <table:table-cell table:formula="of:=[.D123]-[.D12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25" office:value-type="float" office:value="3050" calcext:value-type="float">
            <text:p>305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353009259259259" calcext:value-type="float">
            <text:p>0,00035300925925925900</text:p>
          </table:table-cell>
          <table:table-cell table:formula="of:=[.D124]-[.D123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25" office:value-type="float" office:value="3075" calcext:value-type="float">
            <text:p>3075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355902777777778" calcext:value-type="float">
            <text:p>0,00035590277777777800</text:p>
          </table:table-cell>
          <table:table-cell table:formula="of:=[.D125]-[.D12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25" office:value-type="float" office:value="3100" calcext:value-type="float">
            <text:p>310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358796296296296" calcext:value-type="float">
            <text:p>0,00035879629629629600</text:p>
          </table:table-cell>
          <table:table-cell table:formula="of:=[.D126]-[.D12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25" office:value-type="float" office:value="3125" calcext:value-type="float">
            <text:p>31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361689814814815" calcext:value-type="float">
            <text:p>0,00036168981481481500</text:p>
          </table:table-cell>
          <table:table-cell table:formula="of:=[.D127]-[.D126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25" office:value-type="float" office:value="3150" calcext:value-type="float">
            <text:p>315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364583333333333" calcext:value-type="float">
            <text:p>0,00036458333333333300</text:p>
          </table:table-cell>
          <table:table-cell table:formula="of:=[.D128]-[.D12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25" office:value-type="float" office:value="3175" calcext:value-type="float">
            <text:p>3175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367476851851852" calcext:value-type="float">
            <text:p>0,00036747685185185200</text:p>
          </table:table-cell>
          <table:table-cell table:formula="of:=[.D129]-[.D12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25" office:value-type="float" office:value="3200" calcext:value-type="float">
            <text:p>320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37037037037037" calcext:value-type="float">
            <text:p>0,00037037037037037000</text:p>
          </table:table-cell>
          <table:table-cell table:formula="of:=[.D130]-[.D129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25" office:value-type="float" office:value="3225" calcext:value-type="float">
            <text:p>3225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373263888888889" calcext:value-type="float">
            <text:p>0,00037326388888888900</text:p>
          </table:table-cell>
          <table:table-cell table:formula="of:=[.D131]-[.D13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25" office:value-type="float" office:value="3250" calcext:value-type="float">
            <text:p>325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376157407407407" calcext:value-type="float">
            <text:p>0,00037615740740740700</text:p>
          </table:table-cell>
          <table:table-cell table:formula="of:=[.D132]-[.D13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25" office:value-type="float" office:value="3275" calcext:value-type="float">
            <text:p>3275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379050925925926" calcext:value-type="float">
            <text:p>0,00037905092592592600</text:p>
          </table:table-cell>
          <table:table-cell table:formula="of:=[.D133]-[.D132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25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381944444444444" calcext:value-type="float">
            <text:p>0,00038194444444444400</text:p>
          </table:table-cell>
          <table:table-cell table:formula="of:=[.D134]-[.D13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25" office:value-type="float" office:value="3325" calcext:value-type="float">
            <text:p>3325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384837962962963" calcext:value-type="float">
            <text:p>0,00038483796296296300</text:p>
          </table:table-cell>
          <table:table-cell table:formula="of:=[.D135]-[.D13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25" office:value-type="float" office:value="3350" calcext:value-type="float">
            <text:p>335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387731481481481" calcext:value-type="float">
            <text:p>0,00038773148148148100</text:p>
          </table:table-cell>
          <table:table-cell table:formula="of:=[.D136]-[.D135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25" office:value-type="float" office:value="3375" calcext:value-type="float">
            <text:p>337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390625" calcext:value-type="float">
            <text:p>0,00039062500000000000</text:p>
          </table:table-cell>
          <table:table-cell table:formula="of:=[.D137]-[.D13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25" office:value-type="float" office:value="3400" calcext:value-type="float">
            <text:p>340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393518518518519" calcext:value-type="float">
            <text:p>0,00039351851851851900</text:p>
          </table:table-cell>
          <table:table-cell table:formula="of:=[.D138]-[.D13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25" office:value-type="float" office:value="3425" calcext:value-type="float">
            <text:p>3425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396412037037037" calcext:value-type="float">
            <text:p>0,00039641203703703700</text:p>
          </table:table-cell>
          <table:table-cell table:formula="of:=[.D139]-[.D138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25" office:value-type="float" office:value="3450" calcext:value-type="float">
            <text:p>345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399305555555556" calcext:value-type="float">
            <text:p>0,00039930555555555600</text:p>
          </table:table-cell>
          <table:table-cell table:formula="of:=[.D140]-[.D13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25" office:value-type="float" office:value="3475" calcext:value-type="float">
            <text:p>3475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402199074074074" calcext:value-type="float">
            <text:p>0,00040219907407407400</text:p>
          </table:table-cell>
          <table:table-cell table:formula="of:=[.D141]-[.D14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25" office:value-type="float" office:value="3500" calcext:value-type="float">
            <text:p>35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405092592592593" calcext:value-type="float">
            <text:p>0,00040509259259259300</text:p>
          </table:table-cell>
          <table:table-cell table:formula="of:=[.D142]-[.D141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25" office:value-type="float" office:value="3525" calcext:value-type="float">
            <text:p>3525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407986111111111" calcext:value-type="float">
            <text:p>0,00040798611111111100</text:p>
          </table:table-cell>
          <table:table-cell table:formula="of:=[.D143]-[.D14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25" office:value-type="float" office:value="3550" calcext:value-type="float">
            <text:p>355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41087962962963" calcext:value-type="float">
            <text:p>0,00041087962962963000</text:p>
          </table:table-cell>
          <table:table-cell table:formula="of:=[.D144]-[.D14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25" office:value-type="float" office:value="3575" calcext:value-type="float">
            <text:p>3575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413773148148148" calcext:value-type="float">
            <text:p>0,00041377314814814800</text:p>
          </table:table-cell>
          <table:table-cell table:formula="of:=[.D145]-[.D144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25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416666666666667" calcext:value-type="float">
            <text:p>0,00041666666666666700</text:p>
          </table:table-cell>
          <table:table-cell table:formula="of:=[.D146]-[.D14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25" office:value-type="float" office:value="3625" calcext:value-type="float">
            <text:p>362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419560185185185" calcext:value-type="float">
            <text:p>0,00041956018518518500</text:p>
          </table:table-cell>
          <table:table-cell table:formula="of:=[.D147]-[.D14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25" office:value-type="float" office:value="3650" calcext:value-type="float">
            <text:p>365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422453703703704" calcext:value-type="float">
            <text:p>0,00042245370370370400</text:p>
          </table:table-cell>
          <table:table-cell table:formula="of:=[.D148]-[.D14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25" office:value-type="float" office:value="3675" calcext:value-type="float">
            <text:p>3675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425347222222222" calcext:value-type="float">
            <text:p>0,00042534722222222200</text:p>
          </table:table-cell>
          <table:table-cell table:formula="of:=[.D149]-[.D148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25" office:value-type="float" office:value="3700" calcext:value-type="float">
            <text:p>370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428240740740741" calcext:value-type="float">
            <text:p>0,00042824074074074100</text:p>
          </table:table-cell>
          <table:table-cell table:formula="of:=[.D150]-[.D14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25" office:value-type="float" office:value="3725" calcext:value-type="float">
            <text:p>3725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431134259259259" calcext:value-type="float">
            <text:p>0,00043113425925925900</text:p>
          </table:table-cell>
          <table:table-cell table:formula="of:=[.D151]-[.D15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25" office:value-type="float" office:value="3750" calcext:value-type="float">
            <text:p>37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434027777777778" calcext:value-type="float">
            <text:p>0,00043402777777777800</text:p>
          </table:table-cell>
          <table:table-cell table:formula="of:=[.D152]-[.D151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25" office:value-type="float" office:value="3775" calcext:value-type="float">
            <text:p>3775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436921296296296" calcext:value-type="float">
            <text:p>0,00043692129629629600</text:p>
          </table:table-cell>
          <table:table-cell table:formula="of:=[.D153]-[.D15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25" office:value-type="float" office:value="3800" calcext:value-type="float">
            <text:p>380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439814814814815" calcext:value-type="float">
            <text:p>0,00043981481481481500</text:p>
          </table:table-cell>
          <table:table-cell table:formula="of:=[.D154]-[.D15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25" office:value-type="float" office:value="3825" calcext:value-type="float">
            <text:p>3825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442708333333333" calcext:value-type="float">
            <text:p>0,00044270833333333300</text:p>
          </table:table-cell>
          <table:table-cell table:formula="of:=[.D155]-[.D154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25" office:value-type="float" office:value="3850" calcext:value-type="float">
            <text:p>385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445601851851852" calcext:value-type="float">
            <text:p>0,00044560185185185200</text:p>
          </table:table-cell>
          <table:table-cell table:formula="of:=[.D156]-[.D15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25" office:value-type="float" office:value="3875" calcext:value-type="float">
            <text:p>387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44849537037037" calcext:value-type="float">
            <text:p>0,00044849537037037000</text:p>
          </table:table-cell>
          <table:table-cell table:formula="of:=[.D157]-[.D15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25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451388888888889" calcext:value-type="float">
            <text:p>0,00045138888888888900</text:p>
          </table:table-cell>
          <table:table-cell table:formula="of:=[.D158]-[.D157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25" office:value-type="float" office:value="3925" calcext:value-type="float">
            <text:p>3925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454282407407407" calcext:value-type="float">
            <text:p>0,00045428240740740700</text:p>
          </table:table-cell>
          <table:table-cell table:formula="of:=[.D159]-[.D15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25" office:value-type="float" office:value="3950" calcext:value-type="float">
            <text:p>395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457175925925926" calcext:value-type="float">
            <text:p>0,00045717592592592600</text:p>
          </table:table-cell>
          <table:table-cell table:formula="of:=[.D160]-[.D15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25" office:value-type="float" office:value="3975" calcext:value-type="float">
            <text:p>3975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460069444444444" calcext:value-type="float">
            <text:p>0,00046006944444444400</text:p>
          </table:table-cell>
          <table:table-cell table:formula="of:=[.D161]-[.D160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25" office:value-type="float" office:value="4000" calcext:value-type="float">
            <text:p>40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462962962962963" calcext:value-type="float">
            <text:p>0,00046296296296296300</text:p>
          </table:table-cell>
          <table:table-cell table:formula="of:=[.D162]-[.D16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25" office:value-type="float" office:value="4025" calcext:value-type="float">
            <text:p>4025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465856481481482" calcext:value-type="float">
            <text:p>0,00046585648148148200</text:p>
          </table:table-cell>
          <table:table-cell table:formula="of:=[.D163]-[.D16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25" office:value-type="float" office:value="4050" calcext:value-type="float">
            <text:p>405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46875" calcext:value-type="float">
            <text:p>0,00046875000000000000</text:p>
          </table:table-cell>
          <table:table-cell table:formula="of:=[.D164]-[.D163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25" office:value-type="float" office:value="4075" calcext:value-type="float">
            <text:p>4075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471643518518519" calcext:value-type="float">
            <text:p>0,00047164351851851900</text:p>
          </table:table-cell>
          <table:table-cell table:formula="of:=[.D165]-[.D16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25" office:value-type="float" office:value="4100" calcext:value-type="float">
            <text:p>410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474537037037037" calcext:value-type="float">
            <text:p>0,00047453703703703700</text:p>
          </table:table-cell>
          <table:table-cell table:formula="of:=[.D166]-[.D16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25" office:value-type="float" office:value="4125" calcext:value-type="float">
            <text:p>412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477430555555556" calcext:value-type="float">
            <text:p>0,00047743055555555600</text:p>
          </table:table-cell>
          <table:table-cell table:formula="of:=[.D167]-[.D166]" office:value-type="float" office:value="0.00000289351851851856" calcext:value-type="float">
            <text:p>0,000002893518518518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25" office:value-type="float" office:value="4150" calcext:value-type="float">
            <text:p>415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480324074074074" calcext:value-type="float">
            <text:p>0,00048032407407407400</text:p>
          </table:table-cell>
          <table:table-cell table:formula="of:=[.D168]-[.D16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25" office:value-type="float" office:value="4175" calcext:value-type="float">
            <text:p>4175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483217592592593" calcext:value-type="float">
            <text:p>0,00048321759259259300</text:p>
          </table:table-cell>
          <table:table-cell table:formula="of:=[.D169]-[.D16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25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486111111111111" calcext:value-type="float">
            <text:p>0,00048611111111111100</text:p>
          </table:table-cell>
          <table:table-cell table:formula="of:=[.D170]-[.D16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25" office:value-type="float" office:value="4225" calcext:value-type="float">
            <text:p>4225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48900462962963" calcext:value-type="float">
            <text:p>0,00048900462962963000</text:p>
          </table:table-cell>
          <table:table-cell table:formula="of:=[.D171]-[.D17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25" office:value-type="float" office:value="4250" calcext:value-type="float">
            <text:p>425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491898148148148" calcext:value-type="float">
            <text:p>0,00049189814814814800</text:p>
          </table:table-cell>
          <table:table-cell table:formula="of:=[.D172]-[.D17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25" office:value-type="float" office:value="4275" calcext:value-type="float">
            <text:p>4275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494791666666667" calcext:value-type="float">
            <text:p>0,00049479166666666700</text:p>
          </table:table-cell>
          <table:table-cell table:formula="of:=[.D173]-[.D17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25" office:value-type="float" office:value="4300" calcext:value-type="float">
            <text:p>430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497685185185185" calcext:value-type="float">
            <text:p>0,00049768518518518500</text:p>
          </table:table-cell>
          <table:table-cell table:formula="of:=[.D174]-[.D17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25" office:value-type="float" office:value="4325" calcext:value-type="float">
            <text:p>4325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500578703703704" calcext:value-type="float">
            <text:p>0,00050057870370370400</text:p>
          </table:table-cell>
          <table:table-cell table:formula="of:=[.D175]-[.D17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25" office:value-type="float" office:value="4350" calcext:value-type="float">
            <text:p>435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503472222222222" calcext:value-type="float">
            <text:p>0,00050347222222222200</text:p>
          </table:table-cell>
          <table:table-cell table:formula="of:=[.D176]-[.D17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25" office:value-type="float" office:value="4375" calcext:value-type="float">
            <text:p>43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506365740740741" calcext:value-type="float">
            <text:p>0,00050636574074074100</text:p>
          </table:table-cell>
          <table:table-cell table:formula="of:=[.D177]-[.D17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25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509259259259259" calcext:value-type="float">
            <text:p>0,00050925925925925900</text:p>
          </table:table-cell>
          <table:table-cell table:formula="of:=[.D178]-[.D17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25" office:value-type="float" office:value="4425" calcext:value-type="float">
            <text:p>4425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512152777777778" calcext:value-type="float">
            <text:p>0,00051215277777777800</text:p>
          </table:table-cell>
          <table:table-cell table:formula="of:=[.D179]-[.D17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25" office:value-type="float" office:value="4450" calcext:value-type="float">
            <text:p>445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515046296296296" calcext:value-type="float">
            <text:p>0,00051504629629629600</text:p>
          </table:table-cell>
          <table:table-cell table:formula="of:=[.D180]-[.D17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25" office:value-type="float" office:value="4475" calcext:value-type="float">
            <text:p>4475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517939814814815" calcext:value-type="float">
            <text:p>0,00051793981481481500</text:p>
          </table:table-cell>
          <table:table-cell table:formula="of:=[.D181]-[.D18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25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520833333333333" calcext:value-type="float">
            <text:p>0,00052083333333333300</text:p>
          </table:table-cell>
          <table:table-cell table:formula="of:=[.D182]-[.D18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25" office:value-type="float" office:value="4525" calcext:value-type="float">
            <text:p>4525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523726851851852" calcext:value-type="float">
            <text:p>0,00052372685185185200</text:p>
          </table:table-cell>
          <table:table-cell table:formula="of:=[.D183]-[.D18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25" office:value-type="float" office:value="4550" calcext:value-type="float">
            <text:p>455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52662037037037" calcext:value-type="float">
            <text:p>0,00052662037037037000</text:p>
          </table:table-cell>
          <table:table-cell table:formula="of:=[.D184]-[.D18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25" office:value-type="float" office:value="4575" calcext:value-type="float">
            <text:p>4575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529513888888889" calcext:value-type="float">
            <text:p>0,00052951388888888900</text:p>
          </table:table-cell>
          <table:table-cell table:formula="of:=[.D185]-[.D18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25" office:value-type="float" office:value="4600" calcext:value-type="float">
            <text:p>460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532407407407407" calcext:value-type="float">
            <text:p>0,00053240740740740700</text:p>
          </table:table-cell>
          <table:table-cell table:formula="of:=[.D186]-[.D18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25" office:value-type="float" office:value="4625" calcext:value-type="float">
            <text:p>462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535300925925926" calcext:value-type="float">
            <text:p>0,00053530092592592600</text:p>
          </table:table-cell>
          <table:table-cell table:formula="of:=[.D187]-[.D18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25" office:value-type="float" office:value="4650" calcext:value-type="float">
            <text:p>465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538194444444444" calcext:value-type="float">
            <text:p>0,00053819444444444400</text:p>
          </table:table-cell>
          <table:table-cell table:formula="of:=[.D188]-[.D18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25" office:value-type="float" office:value="4675" calcext:value-type="float">
            <text:p>4675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541087962962963" calcext:value-type="float">
            <text:p>0,00054108796296296300</text:p>
          </table:table-cell>
          <table:table-cell table:formula="of:=[.D189]-[.D18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25" office:value-type="float" office:value="4700" calcext:value-type="float">
            <text:p>470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543981481481481" calcext:value-type="float">
            <text:p>0,00054398148148148100</text:p>
          </table:table-cell>
          <table:table-cell table:formula="of:=[.D190]-[.D18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25" office:value-type="float" office:value="4725" calcext:value-type="float">
            <text:p>4725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546875" calcext:value-type="float">
            <text:p>0,00054687500000000000</text:p>
          </table:table-cell>
          <table:table-cell table:formula="of:=[.D191]-[.D19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25" office:value-type="float" office:value="4750" calcext:value-type="float">
            <text:p>475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549768518518519" calcext:value-type="float">
            <text:p>0,00054976851851851900</text:p>
          </table:table-cell>
          <table:table-cell table:formula="of:=[.D192]-[.D19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25" office:value-type="float" office:value="4775" calcext:value-type="float">
            <text:p>4775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552662037037037" calcext:value-type="float">
            <text:p>0,00055266203703703700</text:p>
          </table:table-cell>
          <table:table-cell table:formula="of:=[.D193]-[.D19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25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555555555555556" calcext:value-type="float">
            <text:p>0,00055555555555555600</text:p>
          </table:table-cell>
          <table:table-cell table:formula="of:=[.D194]-[.D19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25" office:value-type="float" office:value="4825" calcext:value-type="float">
            <text:p>4825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558449074074074" calcext:value-type="float">
            <text:p>0,00055844907407407400</text:p>
          </table:table-cell>
          <table:table-cell table:formula="of:=[.D195]-[.D19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25" office:value-type="float" office:value="4850" calcext:value-type="float">
            <text:p>485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561342592592593" calcext:value-type="float">
            <text:p>0,00056134259259259300</text:p>
          </table:table-cell>
          <table:table-cell table:formula="of:=[.D196]-[.D19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25" office:value-type="float" office:value="4875" calcext:value-type="float">
            <text:p>487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564236111111111" calcext:value-type="float">
            <text:p>0,00056423611111111100</text:p>
          </table:table-cell>
          <table:table-cell table:formula="of:=[.D197]-[.D19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25" office:value-type="float" office:value="4900" calcext:value-type="float">
            <text:p>490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56712962962963" calcext:value-type="float">
            <text:p>0,00056712962962963000</text:p>
          </table:table-cell>
          <table:table-cell table:formula="of:=[.D198]-[.D19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25" office:value-type="float" office:value="4925" calcext:value-type="float">
            <text:p>4925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570023148148148" calcext:value-type="float">
            <text:p>0,00057002314814814800</text:p>
          </table:table-cell>
          <table:table-cell table:formula="of:=[.D199]-[.D19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25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572916666666667" calcext:value-type="float">
            <text:p>0,00057291666666666700</text:p>
          </table:table-cell>
          <table:table-cell table:formula="of:=[.D200]-[.D19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25" office:value-type="float" office:value="4975" calcext:value-type="float">
            <text:p>4975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575810185185185" calcext:value-type="float">
            <text:p>0,00057581018518518500</text:p>
          </table:table-cell>
          <table:table-cell table:formula="of:=[.D201]-[.D20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25" office:value-type="float" office:value="5000" calcext:value-type="float">
            <text:p>5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578703703703704" calcext:value-type="float">
            <text:p>0,00057870370370370400</text:p>
          </table:table-cell>
          <table:table-cell table:formula="of:=[.D202]-[.D20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25" office:value-type="float" office:value="5025" calcext:value-type="float">
            <text:p>5025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581597222222222" calcext:value-type="float">
            <text:p>0,00058159722222222200</text:p>
          </table:table-cell>
          <table:table-cell table:formula="of:=[.D203]-[.D20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25" office:value-type="float" office:value="5050" calcext:value-type="float">
            <text:p>505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584490740740741" calcext:value-type="float">
            <text:p>0,00058449074074074100</text:p>
          </table:table-cell>
          <table:table-cell table:formula="of:=[.D204]-[.D20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25" office:value-type="float" office:value="5075" calcext:value-type="float">
            <text:p>5075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587384259259259" calcext:value-type="float">
            <text:p>0,00058738425925925900</text:p>
          </table:table-cell>
          <table:table-cell table:formula="of:=[.D205]-[.D20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25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590277777777778" calcext:value-type="float">
            <text:p>0,00059027777777777800</text:p>
          </table:table-cell>
          <table:table-cell table:formula="of:=[.D206]-[.D20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25" office:value-type="float" office:value="5125" calcext:value-type="float">
            <text:p>512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593171296296296" calcext:value-type="float">
            <text:p>0,00059317129629629600</text:p>
          </table:table-cell>
          <table:table-cell table:formula="of:=[.D207]-[.D20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25" office:value-type="float" office:value="5150" calcext:value-type="float">
            <text:p>515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596064814814815" calcext:value-type="float">
            <text:p>0,00059606481481481500</text:p>
          </table:table-cell>
          <table:table-cell table:formula="of:=[.D208]-[.D20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25" office:value-type="float" office:value="5175" calcext:value-type="float">
            <text:p>5175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598958333333333" calcext:value-type="float">
            <text:p>0,00059895833333333300</text:p>
          </table:table-cell>
          <table:table-cell table:formula="of:=[.D209]-[.D20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25" office:value-type="float" office:value="5200" calcext:value-type="float">
            <text:p>520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601851851851852" calcext:value-type="float">
            <text:p>0,00060185185185185200</text:p>
          </table:table-cell>
          <table:table-cell table:formula="of:=[.D210]-[.D20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25" office:value-type="float" office:value="5225" calcext:value-type="float">
            <text:p>5225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60474537037037" calcext:value-type="float">
            <text:p>0,00060474537037037000</text:p>
          </table:table-cell>
          <table:table-cell table:formula="of:=[.D211]-[.D21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25" office:value-type="float" office:value="5250" calcext:value-type="float">
            <text:p>525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607638888888889" calcext:value-type="float">
            <text:p>0,00060763888888888900</text:p>
          </table:table-cell>
          <table:table-cell table:formula="of:=[.D212]-[.D21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25" office:value-type="float" office:value="5275" calcext:value-type="float">
            <text:p>5275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610532407407407" calcext:value-type="float">
            <text:p>0,00061053240740740700</text:p>
          </table:table-cell>
          <table:table-cell table:formula="of:=[.D213]-[.D21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25" office:value-type="float" office:value="5300" calcext:value-type="float">
            <text:p>530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613425925925926" calcext:value-type="float">
            <text:p>0,00061342592592592600</text:p>
          </table:table-cell>
          <table:table-cell table:formula="of:=[.D214]-[.D21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25" office:value-type="float" office:value="5325" calcext:value-type="float">
            <text:p>5325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616319444444444" calcext:value-type="float">
            <text:p>0,00061631944444444400</text:p>
          </table:table-cell>
          <table:table-cell table:formula="of:=[.D215]-[.D21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25" office:value-type="float" office:value="5350" calcext:value-type="float">
            <text:p>535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619212962962963" calcext:value-type="float">
            <text:p>0,00061921296296296300</text:p>
          </table:table-cell>
          <table:table-cell table:formula="of:=[.D216]-[.D21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25" office:value-type="float" office:value="5375" calcext:value-type="float">
            <text:p>537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622106481481482" calcext:value-type="float">
            <text:p>0,00062210648148148200</text:p>
          </table:table-cell>
          <table:table-cell table:formula="of:=[.D217]-[.D21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25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625" calcext:value-type="float">
            <text:p>0,00062500000000000000</text:p>
          </table:table-cell>
          <table:table-cell table:formula="of:=[.D218]-[.D21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25" office:value-type="float" office:value="5425" calcext:value-type="float">
            <text:p>5425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627893518518519" calcext:value-type="float">
            <text:p>0,00062789351851851900</text:p>
          </table:table-cell>
          <table:table-cell table:formula="of:=[.D219]-[.D21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25" office:value-type="float" office:value="5450" calcext:value-type="float">
            <text:p>545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630787037037037" calcext:value-type="float">
            <text:p>0,00063078703703703700</text:p>
          </table:table-cell>
          <table:table-cell table:formula="of:=[.D220]-[.D21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25" office:value-type="float" office:value="5475" calcext:value-type="float">
            <text:p>5475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633680555555556" calcext:value-type="float">
            <text:p>0,00063368055555555600</text:p>
          </table:table-cell>
          <table:table-cell table:formula="of:=[.D221]-[.D22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25" office:value-type="float" office:value="5500" calcext:value-type="float">
            <text:p>55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636574074074074" calcext:value-type="float">
            <text:p>0,00063657407407407400</text:p>
          </table:table-cell>
          <table:table-cell table:formula="of:=[.D222]-[.D22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25" office:value-type="float" office:value="5525" calcext:value-type="float">
            <text:p>5525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639467592592593" calcext:value-type="float">
            <text:p>0,00063946759259259300</text:p>
          </table:table-cell>
          <table:table-cell table:formula="of:=[.D223]-[.D22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25" office:value-type="float" office:value="5550" calcext:value-type="float">
            <text:p>555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642361111111111" calcext:value-type="float">
            <text:p>0,00064236111111111100</text:p>
          </table:table-cell>
          <table:table-cell table:formula="of:=[.D224]-[.D22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25" office:value-type="float" office:value="5575" calcext:value-type="float">
            <text:p>5575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64525462962963" calcext:value-type="float">
            <text:p>0,00064525462962963000</text:p>
          </table:table-cell>
          <table:table-cell table:formula="of:=[.D225]-[.D22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25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648148148148148" calcext:value-type="float">
            <text:p>0,00064814814814814800</text:p>
          </table:table-cell>
          <table:table-cell table:formula="of:=[.D226]-[.D22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25" office:value-type="float" office:value="5625" calcext:value-type="float">
            <text:p>56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651041666666667" calcext:value-type="float">
            <text:p>0,00065104166666666700</text:p>
          </table:table-cell>
          <table:table-cell table:formula="of:=[.D227]-[.D22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25" office:value-type="float" office:value="5650" calcext:value-type="float">
            <text:p>565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653935185185185" calcext:value-type="float">
            <text:p>0,00065393518518518500</text:p>
          </table:table-cell>
          <table:table-cell table:formula="of:=[.D228]-[.D22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25" office:value-type="float" office:value="5675" calcext:value-type="float">
            <text:p>5675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656828703703704" calcext:value-type="float">
            <text:p>0,00065682870370370400</text:p>
          </table:table-cell>
          <table:table-cell table:formula="of:=[.D229]-[.D22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25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659722222222222" calcext:value-type="float">
            <text:p>0,00065972222222222200</text:p>
          </table:table-cell>
          <table:table-cell table:formula="of:=[.D230]-[.D22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25" office:value-type="float" office:value="5725" calcext:value-type="float">
            <text:p>5725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662615740740741" calcext:value-type="float">
            <text:p>0,00066261574074074100</text:p>
          </table:table-cell>
          <table:table-cell table:formula="of:=[.D231]-[.D23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25" office:value-type="float" office:value="5750" calcext:value-type="float">
            <text:p>575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665509259259259" calcext:value-type="float">
            <text:p>0,00066550925925925900</text:p>
          </table:table-cell>
          <table:table-cell table:formula="of:=[.D232]-[.D23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25" office:value-type="float" office:value="5775" calcext:value-type="float">
            <text:p>5775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668402777777778" calcext:value-type="float">
            <text:p>0,00066840277777777800</text:p>
          </table:table-cell>
          <table:table-cell table:formula="of:=[.D233]-[.D23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25" office:value-type="float" office:value="5800" calcext:value-type="float">
            <text:p>580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671296296296296" calcext:value-type="float">
            <text:p>0,00067129629629629600</text:p>
          </table:table-cell>
          <table:table-cell table:formula="of:=[.D234]-[.D23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25" office:value-type="float" office:value="5825" calcext:value-type="float">
            <text:p>5825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674189814814815" calcext:value-type="float">
            <text:p>0,00067418981481481500</text:p>
          </table:table-cell>
          <table:table-cell table:formula="of:=[.D235]-[.D23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25" office:value-type="float" office:value="5850" calcext:value-type="float">
            <text:p>585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677083333333333" calcext:value-type="float">
            <text:p>0,00067708333333333300</text:p>
          </table:table-cell>
          <table:table-cell table:formula="of:=[.D236]-[.D23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25" office:value-type="float" office:value="5875" calcext:value-type="float">
            <text:p>587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679976851851852" calcext:value-type="float">
            <text:p>0,00067997685185185200</text:p>
          </table:table-cell>
          <table:table-cell table:formula="of:=[.D237]-[.D23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25" office:value-type="float" office:value="5900" calcext:value-type="float">
            <text:p>590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68287037037037" calcext:value-type="float">
            <text:p>0,00068287037037037000</text:p>
          </table:table-cell>
          <table:table-cell table:formula="of:=[.D238]-[.D23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25" office:value-type="float" office:value="5925" calcext:value-type="float">
            <text:p>5925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685763888888889" calcext:value-type="float">
            <text:p>0,00068576388888888900</text:p>
          </table:table-cell>
          <table:table-cell table:formula="of:=[.D239]-[.D23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25" office:value-type="float" office:value="5950" calcext:value-type="float">
            <text:p>595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688657407407407" calcext:value-type="float">
            <text:p>0,00068865740740740700</text:p>
          </table:table-cell>
          <table:table-cell table:formula="of:=[.D240]-[.D23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25" office:value-type="float" office:value="5975" calcext:value-type="float">
            <text:p>5975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691550925925926" calcext:value-type="float">
            <text:p>0,00069155092592592600</text:p>
          </table:table-cell>
          <table:table-cell table:formula="of:=[.D241]-[.D24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25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694444444444445" calcext:value-type="float">
            <text:p>0,00069444444444444500</text:p>
          </table:table-cell>
          <table:table-cell table:formula="of:=[.D242]-[.D24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25" office:value-type="float" office:value="6025" calcext:value-type="float">
            <text:p>6025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697337962962963" calcext:value-type="float">
            <text:p>0,00069733796296296300</text:p>
          </table:table-cell>
          <table:table-cell table:formula="of:=[.D243]-[.D24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25" office:value-type="float" office:value="6050" calcext:value-type="float">
            <text:p>605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700231481481482" calcext:value-type="float">
            <text:p>0,00070023148148148200</text:p>
          </table:table-cell>
          <table:table-cell table:formula="of:=[.D244]-[.D24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25" office:value-type="float" office:value="6075" calcext:value-type="float">
            <text:p>6075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703125" calcext:value-type="float">
            <text:p>0,00070312500000000000</text:p>
          </table:table-cell>
          <table:table-cell table:formula="of:=[.D245]-[.D24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25" office:value-type="float" office:value="6100" calcext:value-type="float">
            <text:p>610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706018518518519" calcext:value-type="float">
            <text:p>0,00070601851851851900</text:p>
          </table:table-cell>
          <table:table-cell table:formula="of:=[.D246]-[.D24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25" office:value-type="float" office:value="6125" calcext:value-type="float">
            <text:p>612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708912037037037" calcext:value-type="float">
            <text:p>0,00070891203703703700</text:p>
          </table:table-cell>
          <table:table-cell table:formula="of:=[.D247]-[.D24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25" office:value-type="float" office:value="6150" calcext:value-type="float">
            <text:p>615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711805555555556" calcext:value-type="float">
            <text:p>0,00071180555555555600</text:p>
          </table:table-cell>
          <table:table-cell table:formula="of:=[.D248]-[.D24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25" office:value-type="float" office:value="6175" calcext:value-type="float">
            <text:p>6175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714699074074074" calcext:value-type="float">
            <text:p>0,00071469907407407400</text:p>
          </table:table-cell>
          <table:table-cell table:formula="of:=[.D249]-[.D24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25" office:value-type="float" office:value="6200" calcext:value-type="float">
            <text:p>620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717592592592593" calcext:value-type="float">
            <text:p>0,00071759259259259300</text:p>
          </table:table-cell>
          <table:table-cell table:formula="of:=[.D250]-[.D24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25" office:value-type="float" office:value="6225" calcext:value-type="float">
            <text:p>6225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720486111111111" calcext:value-type="float">
            <text:p>0,00072048611111111100</text:p>
          </table:table-cell>
          <table:table-cell table:formula="of:=[.D251]-[.D25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25" office:value-type="float" office:value="6250" calcext:value-type="float">
            <text:p>6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72337962962963" calcext:value-type="float">
            <text:p>0,00072337962962963000</text:p>
          </table:table-cell>
          <table:table-cell table:formula="of:=[.D252]-[.D25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25" office:value-type="float" office:value="6275" calcext:value-type="float">
            <text:p>6275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726273148148148" calcext:value-type="float">
            <text:p>0,00072627314814814800</text:p>
          </table:table-cell>
          <table:table-cell table:formula="of:=[.D253]-[.D25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25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729166666666667" calcext:value-type="float">
            <text:p>0,00072916666666666700</text:p>
          </table:table-cell>
          <table:table-cell table:formula="of:=[.D254]-[.D25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25" office:value-type="float" office:value="6325" calcext:value-type="float">
            <text:p>6325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732060185185185" calcext:value-type="float">
            <text:p>0,00073206018518518500</text:p>
          </table:table-cell>
          <table:table-cell table:formula="of:=[.D255]-[.D25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25" office:value-type="float" office:value="6350" calcext:value-type="float">
            <text:p>635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734953703703704" calcext:value-type="float">
            <text:p>0,00073495370370370400</text:p>
          </table:table-cell>
          <table:table-cell table:formula="of:=[.D256]-[.D25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25" office:value-type="float" office:value="6375" calcext:value-type="float">
            <text:p>637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737847222222222" calcext:value-type="float">
            <text:p>0,00073784722222222200</text:p>
          </table:table-cell>
          <table:table-cell table:formula="of:=[.D257]-[.D25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25" office:value-type="float" office:value="6400" calcext:value-type="float">
            <text:p>640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740740740740741" calcext:value-type="float">
            <text:p>0,00074074074074074100</text:p>
          </table:table-cell>
          <table:table-cell table:formula="of:=[.D258]-[.D25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25" office:value-type="float" office:value="6425" calcext:value-type="float">
            <text:p>6425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743634259259259" calcext:value-type="float">
            <text:p>0,00074363425925925900</text:p>
          </table:table-cell>
          <table:table-cell table:formula="of:=[.D259]-[.D25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25" office:value-type="float" office:value="6450" calcext:value-type="float">
            <text:p>645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746527777777778" calcext:value-type="float">
            <text:p>0,00074652777777777800</text:p>
          </table:table-cell>
          <table:table-cell table:formula="of:=[.D260]-[.D25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25" office:value-type="float" office:value="6475" calcext:value-type="float">
            <text:p>6475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749421296296296" calcext:value-type="float">
            <text:p>0,00074942129629629600</text:p>
          </table:table-cell>
          <table:table-cell table:formula="of:=[.D261]-[.D26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25" office:value-type="float" office:value="6500" calcext:value-type="float">
            <text:p>65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752314814814815" calcext:value-type="float">
            <text:p>0,00075231481481481500</text:p>
          </table:table-cell>
          <table:table-cell table:formula="of:=[.D262]-[.D26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25" office:value-type="float" office:value="6525" calcext:value-type="float">
            <text:p>6525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755208333333333" calcext:value-type="float">
            <text:p>0,00075520833333333300</text:p>
          </table:table-cell>
          <table:table-cell table:formula="of:=[.D263]-[.D26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25" office:value-type="float" office:value="6550" calcext:value-type="float">
            <text:p>655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758101851851852" calcext:value-type="float">
            <text:p>0,00075810185185185200</text:p>
          </table:table-cell>
          <table:table-cell table:formula="of:=[.D264]-[.D26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25" office:value-type="float" office:value="6575" calcext:value-type="float">
            <text:p>6575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76099537037037" calcext:value-type="float">
            <text:p>0,00076099537037037000</text:p>
          </table:table-cell>
          <table:table-cell table:formula="of:=[.D265]-[.D26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25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763888888888889" calcext:value-type="float">
            <text:p>0,00076388888888888900</text:p>
          </table:table-cell>
          <table:table-cell table:formula="of:=[.D266]-[.D26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25" office:value-type="float" office:value="6625" calcext:value-type="float">
            <text:p>662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766782407407407" calcext:value-type="float">
            <text:p>0,00076678240740740700</text:p>
          </table:table-cell>
          <table:table-cell table:formula="of:=[.D267]-[.D26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25" office:value-type="float" office:value="6650" calcext:value-type="float">
            <text:p>665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769675925925926" calcext:value-type="float">
            <text:p>0,00076967592592592600</text:p>
          </table:table-cell>
          <table:table-cell table:formula="of:=[.D268]-[.D26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25" office:value-type="float" office:value="6675" calcext:value-type="float">
            <text:p>6675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772569444444444" calcext:value-type="float">
            <text:p>0,00077256944444444400</text:p>
          </table:table-cell>
          <table:table-cell table:formula="of:=[.D269]-[.D26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25" office:value-type="float" office:value="6700" calcext:value-type="float">
            <text:p>670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775462962962963" calcext:value-type="float">
            <text:p>0,00077546296296296300</text:p>
          </table:table-cell>
          <table:table-cell table:formula="of:=[.D270]-[.D26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25" office:value-type="float" office:value="6725" calcext:value-type="float">
            <text:p>6725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778356481481481" calcext:value-type="float">
            <text:p>0,00077835648148148100</text:p>
          </table:table-cell>
          <table:table-cell table:formula="of:=[.D271]-[.D27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25" office:value-type="float" office:value="6750" calcext:value-type="float">
            <text:p>675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78125" calcext:value-type="float">
            <text:p>0,00078125000000000000</text:p>
          </table:table-cell>
          <table:table-cell table:formula="of:=[.D272]-[.D27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25" office:value-type="float" office:value="6775" calcext:value-type="float">
            <text:p>6775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784143518518519" calcext:value-type="float">
            <text:p>0,00078414351851851900</text:p>
          </table:table-cell>
          <table:table-cell table:formula="of:=[.D273]-[.D27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25" office:value-type="float" office:value="6800" calcext:value-type="float">
            <text:p>680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787037037037037" calcext:value-type="float">
            <text:p>0,00078703703703703700</text:p>
          </table:table-cell>
          <table:table-cell table:formula="of:=[.D274]-[.D27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25" office:value-type="float" office:value="6825" calcext:value-type="float">
            <text:p>6825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789930555555556" calcext:value-type="float">
            <text:p>0,00078993055555555600</text:p>
          </table:table-cell>
          <table:table-cell table:formula="of:=[.D275]-[.D27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25" office:value-type="float" office:value="6850" calcext:value-type="float">
            <text:p>685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792824074074074" calcext:value-type="float">
            <text:p>0,00079282407407407400</text:p>
          </table:table-cell>
          <table:table-cell table:formula="of:=[.D276]-[.D27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25" office:value-type="float" office:value="6875" calcext:value-type="float">
            <text:p>68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795717592592593" calcext:value-type="float">
            <text:p>0,00079571759259259200</text:p>
          </table:table-cell>
          <table:table-cell table:formula="of:=[.D277]-[.D27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25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798611111111111" calcext:value-type="float">
            <text:p>0,00079861111111111100</text:p>
          </table:table-cell>
          <table:table-cell table:formula="of:=[.D278]-[.D27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25" office:value-type="float" office:value="6925" calcext:value-type="float">
            <text:p>6925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80150462962963" calcext:value-type="float">
            <text:p>0,00080150462962963000</text:p>
          </table:table-cell>
          <table:table-cell table:formula="of:=[.D279]-[.D27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25" office:value-type="float" office:value="6950" calcext:value-type="float">
            <text:p>695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804398148148148" calcext:value-type="float">
            <text:p>0,00080439814814814800</text:p>
          </table:table-cell>
          <table:table-cell table:formula="of:=[.D280]-[.D27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25" office:value-type="float" office:value="6975" calcext:value-type="float">
            <text:p>6975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807291666666667" calcext:value-type="float">
            <text:p>0,00080729166666666700</text:p>
          </table:table-cell>
          <table:table-cell table:formula="of:=[.D281]-[.D28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25" office:value-type="float" office:value="7000" calcext:value-type="float">
            <text:p>70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810185185185185" calcext:value-type="float">
            <text:p>0,00081018518518518500</text:p>
          </table:table-cell>
          <table:table-cell table:formula="of:=[.D282]-[.D28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25" office:value-type="float" office:value="7025" calcext:value-type="float">
            <text:p>7025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813078703703704" calcext:value-type="float">
            <text:p>0,00081307870370370400</text:p>
          </table:table-cell>
          <table:table-cell table:formula="of:=[.D283]-[.D28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25" office:value-type="float" office:value="7050" calcext:value-type="float">
            <text:p>705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815972222222222" calcext:value-type="float">
            <text:p>0,00081597222222222200</text:p>
          </table:table-cell>
          <table:table-cell table:formula="of:=[.D284]-[.D28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25" office:value-type="float" office:value="7075" calcext:value-type="float">
            <text:p>7075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818865740740741" calcext:value-type="float">
            <text:p>0,00081886574074074100</text:p>
          </table:table-cell>
          <table:table-cell table:formula="of:=[.D285]-[.D28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25" office:value-type="float" office:value="7100" calcext:value-type="float">
            <text:p>710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821759259259259" calcext:value-type="float">
            <text:p>0,00082175925925925900</text:p>
          </table:table-cell>
          <table:table-cell table:formula="of:=[.D286]-[.D28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25" office:value-type="float" office:value="7125" calcext:value-type="float">
            <text:p>712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824652777777778" calcext:value-type="float">
            <text:p>0,00082465277777777800</text:p>
          </table:table-cell>
          <table:table-cell table:formula="of:=[.D287]-[.D28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25" office:value-type="float" office:value="7150" calcext:value-type="float">
            <text:p>715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827546296296296" calcext:value-type="float">
            <text:p>0,00082754629629629600</text:p>
          </table:table-cell>
          <table:table-cell table:formula="of:=[.D288]-[.D28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25" office:value-type="float" office:value="7175" calcext:value-type="float">
            <text:p>7175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830439814814815" calcext:value-type="float">
            <text:p>0,00083043981481481500</text:p>
          </table:table-cell>
          <table:table-cell table:formula="of:=[.D289]-[.D28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25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833333333333333" calcext:value-type="float">
            <text:p>0,00083333333333333300</text:p>
          </table:table-cell>
          <table:table-cell table:formula="of:=[.D290]-[.D28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25" office:value-type="float" office:value="7225" calcext:value-type="float">
            <text:p>7225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836226851851852" calcext:value-type="float">
            <text:p>0,00083622685185185200</text:p>
          </table:table-cell>
          <table:table-cell table:formula="of:=[.D291]-[.D29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25" office:value-type="float" office:value="7250" calcext:value-type="float">
            <text:p>725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83912037037037" calcext:value-type="float">
            <text:p>0,00083912037037037000</text:p>
          </table:table-cell>
          <table:table-cell table:formula="of:=[.D292]-[.D29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25" office:value-type="float" office:value="7275" calcext:value-type="float">
            <text:p>7275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842013888888889" calcext:value-type="float">
            <text:p>0,00084201388888888900</text:p>
          </table:table-cell>
          <table:table-cell table:formula="of:=[.D293]-[.D29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25" office:value-type="float" office:value="7300" calcext:value-type="float">
            <text:p>730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844907407407407" calcext:value-type="float">
            <text:p>0,00084490740740740700</text:p>
          </table:table-cell>
          <table:table-cell table:formula="of:=[.D294]-[.D29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25" office:value-type="float" office:value="7325" calcext:value-type="float">
            <text:p>7325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847800925925926" calcext:value-type="float">
            <text:p>0,00084780092592592600</text:p>
          </table:table-cell>
          <table:table-cell table:formula="of:=[.D295]-[.D29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25" office:value-type="float" office:value="7350" calcext:value-type="float">
            <text:p>735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850694444444444" calcext:value-type="float">
            <text:p>0,00085069444444444400</text:p>
          </table:table-cell>
          <table:table-cell table:formula="of:=[.D296]-[.D29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25" office:value-type="float" office:value="7375" calcext:value-type="float">
            <text:p>737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853587962962963" calcext:value-type="float">
            <text:p>0,00085358796296296300</text:p>
          </table:table-cell>
          <table:table-cell table:formula="of:=[.D297]-[.D29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25" office:value-type="float" office:value="7400" calcext:value-type="float">
            <text:p>740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856481481481482" calcext:value-type="float">
            <text:p>0,00085648148148148100</text:p>
          </table:table-cell>
          <table:table-cell table:formula="of:=[.D298]-[.D29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25" office:value-type="float" office:value="7425" calcext:value-type="float">
            <text:p>7425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859375" calcext:value-type="float">
            <text:p>0,00085937500000000000</text:p>
          </table:table-cell>
          <table:table-cell table:formula="of:=[.D299]-[.D29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25" office:value-type="float" office:value="7450" calcext:value-type="float">
            <text:p>745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862268518518519" calcext:value-type="float">
            <text:p>0,00086226851851851900</text:p>
          </table:table-cell>
          <table:table-cell table:formula="of:=[.D300]-[.D29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25" office:value-type="float" office:value="7475" calcext:value-type="float">
            <text:p>7475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865162037037037" calcext:value-type="float">
            <text:p>0,00086516203703703700</text:p>
          </table:table-cell>
          <table:table-cell table:formula="of:=[.D301]-[.D30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25" office:value-type="float" office:value="7500" calcext:value-type="float">
            <text:p>75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868055555555556" calcext:value-type="float">
            <text:p>0,00086805555555555600</text:p>
          </table:table-cell>
          <table:table-cell table:formula="of:=[.D302]-[.D30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25" office:value-type="float" office:value="7525" calcext:value-type="float">
            <text:p>7525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870949074074074" calcext:value-type="float">
            <text:p>0,00087094907407407400</text:p>
          </table:table-cell>
          <table:table-cell table:formula="of:=[.D303]-[.D30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25" office:value-type="float" office:value="7550" calcext:value-type="float">
            <text:p>755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873842592592593" calcext:value-type="float">
            <text:p>0,00087384259259259300</text:p>
          </table:table-cell>
          <table:table-cell table:formula="of:=[.D304]-[.D30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25" office:value-type="float" office:value="7575" calcext:value-type="float">
            <text:p>7575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876736111111111" calcext:value-type="float">
            <text:p>0,00087673611111111100</text:p>
          </table:table-cell>
          <table:table-cell table:formula="of:=[.D305]-[.D30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25" office:value-type="float" office:value="7600" calcext:value-type="float">
            <text:p>760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87962962962963" calcext:value-type="float">
            <text:p>0,00087962962962963000</text:p>
          </table:table-cell>
          <table:table-cell table:formula="of:=[.D306]-[.D30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25" office:value-type="float" office:value="7625" calcext:value-type="float">
            <text:p>762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882523148148148" calcext:value-type="float">
            <text:p>0,00088252314814814800</text:p>
          </table:table-cell>
          <table:table-cell table:formula="of:=[.D307]-[.D30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25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885416666666667" calcext:value-type="float">
            <text:p>0,00088541666666666700</text:p>
          </table:table-cell>
          <table:table-cell table:formula="of:=[.D308]-[.D30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25" office:value-type="float" office:value="7675" calcext:value-type="float">
            <text:p>7675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888310185185185" calcext:value-type="float">
            <text:p>0,00088831018518518500</text:p>
          </table:table-cell>
          <table:table-cell table:formula="of:=[.D309]-[.D30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25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891203703703704" calcext:value-type="float">
            <text:p>0,00089120370370370400</text:p>
          </table:table-cell>
          <table:table-cell table:formula="of:=[.D310]-[.D30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25" office:value-type="float" office:value="7725" calcext:value-type="float">
            <text:p>7725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894097222222222" calcext:value-type="float">
            <text:p>0,00089409722222222200</text:p>
          </table:table-cell>
          <table:table-cell table:formula="of:=[.D311]-[.D31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25" office:value-type="float" office:value="7750" calcext:value-type="float">
            <text:p>775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896990740740741" calcext:value-type="float">
            <text:p>0,00089699074074074100</text:p>
          </table:table-cell>
          <table:table-cell table:formula="of:=[.D312]-[.D31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25" office:value-type="float" office:value="7775" calcext:value-type="float">
            <text:p>7775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899884259259259" calcext:value-type="float">
            <text:p>0,00089988425925925900</text:p>
          </table:table-cell>
          <table:table-cell table:formula="of:=[.D313]-[.D31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25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902777777777778" calcext:value-type="float">
            <text:p>0,00090277777777777800</text:p>
          </table:table-cell>
          <table:table-cell table:formula="of:=[.D314]-[.D31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25" office:value-type="float" office:value="7825" calcext:value-type="float">
            <text:p>7825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905671296296296" calcext:value-type="float">
            <text:p>0,00090567129629629600</text:p>
          </table:table-cell>
          <table:table-cell table:formula="of:=[.D315]-[.D31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25" office:value-type="float" office:value="7850" calcext:value-type="float">
            <text:p>785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908564814814815" calcext:value-type="float">
            <text:p>0,00090856481481481500</text:p>
          </table:table-cell>
          <table:table-cell table:formula="of:=[.D316]-[.D31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25" office:value-type="float" office:value="7875" calcext:value-type="float">
            <text:p>787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911458333333333" calcext:value-type="float">
            <text:p>0,00091145833333333300</text:p>
          </table:table-cell>
          <table:table-cell table:formula="of:=[.D317]-[.D31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25" office:value-type="float" office:value="7900" calcext:value-type="float">
            <text:p>790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914351851851852" calcext:value-type="float">
            <text:p>0,00091435185185185200</text:p>
          </table:table-cell>
          <table:table-cell table:formula="of:=[.D318]-[.D31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25" office:value-type="float" office:value="7925" calcext:value-type="float">
            <text:p>7925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91724537037037" calcext:value-type="float">
            <text:p>0,00091724537037037000</text:p>
          </table:table-cell>
          <table:table-cell table:formula="of:=[.D319]-[.D31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25" office:value-type="float" office:value="7950" calcext:value-type="float">
            <text:p>795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920138888888889" calcext:value-type="float">
            <text:p>0,00092013888888888900</text:p>
          </table:table-cell>
          <table:table-cell table:formula="of:=[.D320]-[.D31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25" office:value-type="float" office:value="7975" calcext:value-type="float">
            <text:p>7975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923032407407408" calcext:value-type="float">
            <text:p>0,00092303240740740800</text:p>
          </table:table-cell>
          <table:table-cell table:formula="of:=[.D321]-[.D32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25" office:value-type="float" office:value="8000" calcext:value-type="float">
            <text:p>80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925925925925926" calcext:value-type="float">
            <text:p>0,00092592592592592600</text:p>
          </table:table-cell>
          <table:table-cell table:formula="of:=[.D322]-[.D32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25" office:value-type="float" office:value="8025" calcext:value-type="float">
            <text:p>8025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928819444444445" calcext:value-type="float">
            <text:p>0,00092881944444444500</text:p>
          </table:table-cell>
          <table:table-cell table:formula="of:=[.D323]-[.D322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25" office:value-type="float" office:value="8050" calcext:value-type="float">
            <text:p>8050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931712962962963" calcext:value-type="float">
            <text:p>0,00093171296296296300</text:p>
          </table:table-cell>
          <table:table-cell table:formula="of:=[.D324]-[.D32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25" office:value-type="float" office:value="8075" calcext:value-type="float">
            <text:p>8075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934606481481482" calcext:value-type="float">
            <text:p>0,00093460648148148200</text:p>
          </table:table-cell>
          <table:table-cell table:formula="of:=[.D325]-[.D32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25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9375" calcext:value-type="float">
            <text:p>0,00093750000000000000</text:p>
          </table:table-cell>
          <table:table-cell table:formula="of:=[.D326]-[.D32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25" office:value-type="float" office:value="8125" calcext:value-type="float">
            <text:p>81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940393518518519" calcext:value-type="float">
            <text:p>0,00094039351851851800</text:p>
          </table:table-cell>
          <table:table-cell table:formula="of:=[.D327]-[.D32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25" office:value-type="float" office:value="8150" calcext:value-type="float">
            <text:p>8150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943287037037037" calcext:value-type="float">
            <text:p>0,00094328703703703700</text:p>
          </table:table-cell>
          <table:table-cell table:formula="of:=[.D328]-[.D32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25" office:value-type="float" office:value="8175" calcext:value-type="float">
            <text:p>8175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946180555555556" calcext:value-type="float">
            <text:p>0,00094618055555555600</text:p>
          </table:table-cell>
          <table:table-cell table:formula="of:=[.D329]-[.D32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25" office:value-type="float" office:value="8200" calcext:value-type="float">
            <text:p>8200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949074074074074" calcext:value-type="float">
            <text:p>0,00094907407407407400</text:p>
          </table:table-cell>
          <table:table-cell table:formula="of:=[.D330]-[.D329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25" office:value-type="float" office:value="8225" calcext:value-type="float">
            <text:p>8225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951967592592593" calcext:value-type="float">
            <text:p>0,00095196759259259300</text:p>
          </table:table-cell>
          <table:table-cell table:formula="of:=[.D331]-[.D330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25" office:value-type="float" office:value="8250" calcext:value-type="float">
            <text:p>825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954861111111111" calcext:value-type="float">
            <text:p>0,00095486111111111100</text:p>
          </table:table-cell>
          <table:table-cell table:formula="of:=[.D332]-[.D331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25" office:value-type="float" office:value="8275" calcext:value-type="float">
            <text:p>8275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95775462962963" calcext:value-type="float">
            <text:p>0,00095775462962963000</text:p>
          </table:table-cell>
          <table:table-cell table:formula="of:=[.D333]-[.D33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25" office:value-type="float" office:value="8300" calcext:value-type="float">
            <text:p>8300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960648148148148" calcext:value-type="float">
            <text:p>0,00096064814814814800</text:p>
          </table:table-cell>
          <table:table-cell table:formula="of:=[.D334]-[.D333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25" office:value-type="float" office:value="8325" calcext:value-type="float">
            <text:p>8325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963541666666667" calcext:value-type="float">
            <text:p>0,00096354166666666700</text:p>
          </table:table-cell>
          <table:table-cell table:formula="of:=[.D335]-[.D334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25" office:value-type="float" office:value="8350" calcext:value-type="float">
            <text:p>8350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966435185185185" calcext:value-type="float">
            <text:p>0,00096643518518518500</text:p>
          </table:table-cell>
          <table:table-cell table:formula="of:=[.D336]-[.D335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25" office:value-type="float" office:value="8375" calcext:value-type="float">
            <text:p>837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969328703703704" calcext:value-type="float">
            <text:p>0,00096932870370370400</text:p>
          </table:table-cell>
          <table:table-cell table:formula="of:=[.D337]-[.D336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25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972222222222222" calcext:value-type="float">
            <text:p>0,00097222222222222200</text:p>
          </table:table-cell>
          <table:table-cell table:formula="of:=[.D338]-[.D337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25" office:value-type="float" office:value="8425" calcext:value-type="float">
            <text:p>8425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975115740740741" calcext:value-type="float">
            <text:p>0,00097511574074074100</text:p>
          </table:table-cell>
          <table:table-cell table:formula="of:=[.D339]-[.D338]" office:value-type="float" office:value="0.0000028935185185185" calcext:value-type="float">
            <text:p>0,0000028935185185185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25" office:value-type="float" office:value="8450" calcext:value-type="float">
            <text:p>8450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978009259259259" calcext:value-type="float">
            <text:p>0,00097800925925925900</text:p>
          </table:table-cell>
          <table:table-cell table:formula="of:=[.D340]-[.D33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25" office:value-type="float" office:value="8475" calcext:value-type="float">
            <text:p>8475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980902777777778" calcext:value-type="float">
            <text:p>0,00098090277777777800</text:p>
          </table:table-cell>
          <table:table-cell table:formula="of:=[.D341]-[.D34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25" office:value-type="float" office:value="8500" calcext:value-type="float">
            <text:p>850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983796296296296" calcext:value-type="float">
            <text:p>0,00098379629629629600</text:p>
          </table:table-cell>
          <table:table-cell table:formula="of:=[.D342]-[.D34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25" office:value-type="float" office:value="8525" calcext:value-type="float">
            <text:p>8525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986689814814815" calcext:value-type="float">
            <text:p>0,00098668981481481500</text:p>
          </table:table-cell>
          <table:table-cell table:formula="of:=[.D343]-[.D34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25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989583333333333" calcext:value-type="float">
            <text:p>0,00098958333333333300</text:p>
          </table:table-cell>
          <table:table-cell table:formula="of:=[.D344]-[.D34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25" office:value-type="float" office:value="8575" calcext:value-type="float">
            <text:p>8575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992476851851852" calcext:value-type="float">
            <text:p>0,00099247685185185200</text:p>
          </table:table-cell>
          <table:table-cell table:formula="of:=[.D345]-[.D34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25" office:value-type="float" office:value="8600" calcext:value-type="float">
            <text:p>8600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99537037037037" calcext:value-type="float">
            <text:p>0,00099537037037037000</text:p>
          </table:table-cell>
          <table:table-cell table:formula="of:=[.D346]-[.D34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25" office:value-type="float" office:value="8625" calcext:value-type="float">
            <text:p>862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998263888888889" calcext:value-type="float">
            <text:p>0,00099826388888888900</text:p>
          </table:table-cell>
          <table:table-cell table:formula="of:=[.D347]-[.D34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25" office:value-type="float" office:value="8650" calcext:value-type="float">
            <text:p>8650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00115740740741" calcext:value-type="float">
            <text:p>0,00100115740740741000</text:p>
          </table:table-cell>
          <table:table-cell table:formula="of:=[.D348]-[.D34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25" office:value-type="float" office:value="8675" calcext:value-type="float">
            <text:p>8675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00405092592593" calcext:value-type="float">
            <text:p>0,00100405092592593000</text:p>
          </table:table-cell>
          <table:table-cell table:formula="of:=[.D349]-[.D34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25" office:value-type="float" office:value="8700" calcext:value-type="float">
            <text:p>8700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00694444444444" calcext:value-type="float">
            <text:p>0,00100694444444444000</text:p>
          </table:table-cell>
          <table:table-cell table:formula="of:=[.D350]-[.D34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25" office:value-type="float" office:value="8725" calcext:value-type="float">
            <text:p>8725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00983796296296" calcext:value-type="float">
            <text:p>0,00100983796296296000</text:p>
          </table:table-cell>
          <table:table-cell table:formula="of:=[.D351]-[.D35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25" office:value-type="float" office:value="8750" calcext:value-type="float">
            <text:p>87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01273148148148" calcext:value-type="float">
            <text:p>0,00101273148148148000</text:p>
          </table:table-cell>
          <table:table-cell table:formula="of:=[.D352]-[.D35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25" office:value-type="float" office:value="8775" calcext:value-type="float">
            <text:p>8775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015625" calcext:value-type="float">
            <text:p>0,00101562500000000000</text:p>
          </table:table-cell>
          <table:table-cell table:formula="of:=[.D353]-[.D35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25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01851851851852" calcext:value-type="float">
            <text:p>0,00101851851851852000</text:p>
          </table:table-cell>
          <table:table-cell table:formula="of:=[.D354]-[.D35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25" office:value-type="float" office:value="8825" calcext:value-type="float">
            <text:p>8825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02141203703704" calcext:value-type="float">
            <text:p>0,00102141203703704000</text:p>
          </table:table-cell>
          <table:table-cell table:formula="of:=[.D355]-[.D35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25" office:value-type="float" office:value="8850" calcext:value-type="float">
            <text:p>8850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02430555555556" calcext:value-type="float">
            <text:p>0,00102430555555556000</text:p>
          </table:table-cell>
          <table:table-cell table:formula="of:=[.D356]-[.D35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25" office:value-type="float" office:value="8875" calcext:value-type="float">
            <text:p>887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02719907407407" calcext:value-type="float">
            <text:p>0,00102719907407407000</text:p>
          </table:table-cell>
          <table:table-cell table:formula="of:=[.D357]-[.D35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25" office:value-type="float" office:value="8900" calcext:value-type="float">
            <text:p>8900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03009259259259" calcext:value-type="float">
            <text:p>0,00103009259259259000</text:p>
          </table:table-cell>
          <table:table-cell table:formula="of:=[.D358]-[.D35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25" office:value-type="float" office:value="8925" calcext:value-type="float">
            <text:p>8925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03298611111111" calcext:value-type="float">
            <text:p>0,00103298611111111000</text:p>
          </table:table-cell>
          <table:table-cell table:formula="of:=[.D359]-[.D35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25" office:value-type="float" office:value="8950" calcext:value-type="float">
            <text:p>8950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03587962962963" calcext:value-type="float">
            <text:p>0,00103587962962963000</text:p>
          </table:table-cell>
          <table:table-cell table:formula="of:=[.D360]-[.D35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25" office:value-type="float" office:value="8975" calcext:value-type="float">
            <text:p>8975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03877314814815" calcext:value-type="float">
            <text:p>0,00103877314814815000</text:p>
          </table:table-cell>
          <table:table-cell table:formula="of:=[.D361]-[.D36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25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04166666666667" calcext:value-type="float">
            <text:p>0,00104166666666667000</text:p>
          </table:table-cell>
          <table:table-cell table:formula="of:=[.D362]-[.D36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25" office:value-type="float" office:value="9025" calcext:value-type="float">
            <text:p>9025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04456018518519" calcext:value-type="float">
            <text:p>0,00104456018518519000</text:p>
          </table:table-cell>
          <table:table-cell table:formula="of:=[.D363]-[.D36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25" office:value-type="float" office:value="9050" calcext:value-type="float">
            <text:p>9050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0474537037037" calcext:value-type="float">
            <text:p>0,00104745370370370000</text:p>
          </table:table-cell>
          <table:table-cell table:formula="of:=[.D364]-[.D36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25" office:value-type="float" office:value="9075" calcext:value-type="float">
            <text:p>9075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05034722222222" calcext:value-type="float">
            <text:p>0,00105034722222222000</text:p>
          </table:table-cell>
          <table:table-cell table:formula="of:=[.D365]-[.D36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25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05324074074074" calcext:value-type="float">
            <text:p>0,00105324074074074000</text:p>
          </table:table-cell>
          <table:table-cell table:formula="of:=[.D366]-[.D36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25" office:value-type="float" office:value="9125" calcext:value-type="float">
            <text:p>912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05613425925926" calcext:value-type="float">
            <text:p>0,00105613425925926000</text:p>
          </table:table-cell>
          <table:table-cell table:formula="of:=[.D367]-[.D36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25" office:value-type="float" office:value="9150" calcext:value-type="float">
            <text:p>9150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05902777777778" calcext:value-type="float">
            <text:p>0,00105902777777778000</text:p>
          </table:table-cell>
          <table:table-cell table:formula="of:=[.D368]-[.D36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25" office:value-type="float" office:value="9175" calcext:value-type="float">
            <text:p>9175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0619212962963" calcext:value-type="float">
            <text:p>0,00106192129629630000</text:p>
          </table:table-cell>
          <table:table-cell table:formula="of:=[.D369]-[.D36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25" office:value-type="float" office:value="9200" calcext:value-type="float">
            <text:p>9200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06481481481481" calcext:value-type="float">
            <text:p>0,00106481481481481000</text:p>
          </table:table-cell>
          <table:table-cell table:formula="of:=[.D370]-[.D36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25" office:value-type="float" office:value="9225" calcext:value-type="float">
            <text:p>9225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06770833333333" calcext:value-type="float">
            <text:p>0,00106770833333333000</text:p>
          </table:table-cell>
          <table:table-cell table:formula="of:=[.D371]-[.D37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25" office:value-type="float" office:value="9250" calcext:value-type="float">
            <text:p>925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07060185185185" calcext:value-type="float">
            <text:p>0,00107060185185185000</text:p>
          </table:table-cell>
          <table:table-cell table:formula="of:=[.D372]-[.D37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25" office:value-type="float" office:value="9275" calcext:value-type="float">
            <text:p>9275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07349537037037" calcext:value-type="float">
            <text:p>0,00107349537037037000</text:p>
          </table:table-cell>
          <table:table-cell table:formula="of:=[.D373]-[.D37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25" office:value-type="float" office:value="9300" calcext:value-type="float">
            <text:p>9300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07638888888889" calcext:value-type="float">
            <text:p>0,00107638888888889000</text:p>
          </table:table-cell>
          <table:table-cell table:formula="of:=[.D374]-[.D37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25" office:value-type="float" office:value="9325" calcext:value-type="float">
            <text:p>9325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07928240740741" calcext:value-type="float">
            <text:p>0,00107928240740741000</text:p>
          </table:table-cell>
          <table:table-cell table:formula="of:=[.D375]-[.D37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25" office:value-type="float" office:value="9350" calcext:value-type="float">
            <text:p>9350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08217592592593" calcext:value-type="float">
            <text:p>0,00108217592592593000</text:p>
          </table:table-cell>
          <table:table-cell table:formula="of:=[.D376]-[.D37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25" office:value-type="float" office:value="9375" calcext:value-type="float">
            <text:p>93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08506944444444" calcext:value-type="float">
            <text:p>0,00108506944444444000</text:p>
          </table:table-cell>
          <table:table-cell table:formula="of:=[.D377]-[.D37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25" office:value-type="float" office:value="9400" calcext:value-type="float">
            <text:p>9400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08796296296296" calcext:value-type="float">
            <text:p>0,00108796296296296000</text:p>
          </table:table-cell>
          <table:table-cell table:formula="of:=[.D378]-[.D37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25" office:value-type="float" office:value="9425" calcext:value-type="float">
            <text:p>9425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09085648148148" calcext:value-type="float">
            <text:p>0,00109085648148148000</text:p>
          </table:table-cell>
          <table:table-cell table:formula="of:=[.D379]-[.D37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25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09375" calcext:value-type="float">
            <text:p>0,00109375000000000000</text:p>
          </table:table-cell>
          <table:table-cell table:formula="of:=[.D380]-[.D37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25" office:value-type="float" office:value="9475" calcext:value-type="float">
            <text:p>9475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09664351851852" calcext:value-type="float">
            <text:p>0,00109664351851852000</text:p>
          </table:table-cell>
          <table:table-cell table:formula="of:=[.D381]-[.D38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25" office:value-type="float" office:value="9500" calcext:value-type="float">
            <text:p>950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09953703703704" calcext:value-type="float">
            <text:p>0,00109953703703704000</text:p>
          </table:table-cell>
          <table:table-cell table:formula="of:=[.D382]-[.D38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25" office:value-type="float" office:value="9525" calcext:value-type="float">
            <text:p>9525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10243055555556" calcext:value-type="float">
            <text:p>0,00110243055555556000</text:p>
          </table:table-cell>
          <table:table-cell table:formula="of:=[.D383]-[.D38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25" office:value-type="float" office:value="9550" calcext:value-type="float">
            <text:p>9550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10532407407407" calcext:value-type="float">
            <text:p>0,00110532407407407000</text:p>
          </table:table-cell>
          <table:table-cell table:formula="of:=[.D384]-[.D38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25" office:value-type="float" office:value="9575" calcext:value-type="float">
            <text:p>9575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10821759259259" calcext:value-type="float">
            <text:p>0,00110821759259259000</text:p>
          </table:table-cell>
          <table:table-cell table:formula="of:=[.D385]-[.D38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25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11111111111111" calcext:value-type="float">
            <text:p>0,00111111111111111000</text:p>
          </table:table-cell>
          <table:table-cell table:formula="of:=[.D386]-[.D38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25" office:value-type="float" office:value="9625" calcext:value-type="float">
            <text:p>962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11400462962963" calcext:value-type="float">
            <text:p>0,00111400462962963000</text:p>
          </table:table-cell>
          <table:table-cell table:formula="of:=[.D387]-[.D38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25" office:value-type="float" office:value="9650" calcext:value-type="float">
            <text:p>9650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11689814814815" calcext:value-type="float">
            <text:p>0,00111689814814815000</text:p>
          </table:table-cell>
          <table:table-cell table:formula="of:=[.D388]-[.D38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25" office:value-type="float" office:value="9675" calcext:value-type="float">
            <text:p>9675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11979166666667" calcext:value-type="float">
            <text:p>0,00111979166666667000</text:p>
          </table:table-cell>
          <table:table-cell table:formula="of:=[.D389]-[.D38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25" office:value-type="float" office:value="9700" calcext:value-type="float">
            <text:p>9700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12268518518519" calcext:value-type="float">
            <text:p>0,00112268518518519000</text:p>
          </table:table-cell>
          <table:table-cell table:formula="of:=[.D390]-[.D38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25" office:value-type="float" office:value="9725" calcext:value-type="float">
            <text:p>9725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1255787037037" calcext:value-type="float">
            <text:p>0,00112557870370370000</text:p>
          </table:table-cell>
          <table:table-cell table:formula="of:=[.D391]-[.D39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25" office:value-type="float" office:value="9750" calcext:value-type="float">
            <text:p>975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12847222222222" calcext:value-type="float">
            <text:p>0,00112847222222222000</text:p>
          </table:table-cell>
          <table:table-cell table:formula="of:=[.D392]-[.D39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25" office:value-type="float" office:value="9775" calcext:value-type="float">
            <text:p>9775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13136574074074" calcext:value-type="float">
            <text:p>0,00113136574074074000</text:p>
          </table:table-cell>
          <table:table-cell table:formula="of:=[.D393]-[.D39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25" office:value-type="float" office:value="9800" calcext:value-type="float">
            <text:p>9800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13425925925926" calcext:value-type="float">
            <text:p>0,00113425925925926000</text:p>
          </table:table-cell>
          <table:table-cell table:formula="of:=[.D394]-[.D39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25" office:value-type="float" office:value="9825" calcext:value-type="float">
            <text:p>9825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13715277777778" calcext:value-type="float">
            <text:p>0,00113715277777778000</text:p>
          </table:table-cell>
          <table:table-cell table:formula="of:=[.D395]-[.D39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25" office:value-type="float" office:value="9850" calcext:value-type="float">
            <text:p>9850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1400462962963" calcext:value-type="float">
            <text:p>0,00114004629629630000</text:p>
          </table:table-cell>
          <table:table-cell table:formula="of:=[.D396]-[.D39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25" office:value-type="float" office:value="9875" calcext:value-type="float">
            <text:p>987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14293981481481" calcext:value-type="float">
            <text:p>0,00114293981481481000</text:p>
          </table:table-cell>
          <table:table-cell table:formula="of:=[.D397]-[.D39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25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14583333333333" calcext:value-type="float">
            <text:p>0,00114583333333333000</text:p>
          </table:table-cell>
          <table:table-cell table:formula="of:=[.D398]-[.D39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25" office:value-type="float" office:value="9925" calcext:value-type="float">
            <text:p>9925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14872685185185" calcext:value-type="float">
            <text:p>0,00114872685185185000</text:p>
          </table:table-cell>
          <table:table-cell table:formula="of:=[.D399]-[.D39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25" office:value-type="float" office:value="9950" calcext:value-type="float">
            <text:p>9950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15162037037037" calcext:value-type="float">
            <text:p>0,00115162037037037000</text:p>
          </table:table-cell>
          <table:table-cell table:formula="of:=[.D400]-[.D39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25" office:value-type="float" office:value="9975" calcext:value-type="float">
            <text:p>9975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15451388888889" calcext:value-type="float">
            <text:p>0,00115451388888889000</text:p>
          </table:table-cell>
          <table:table-cell table:formula="of:=[.D401]-[.D40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25" office:value-type="float" office:value="10000" calcext:value-type="float">
            <text:p>100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15740740740741" calcext:value-type="float">
            <text:p>0,00115740740740741000</text:p>
          </table:table-cell>
          <table:table-cell table:formula="of:=[.D402]-[.D40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25" office:value-type="float" office:value="10025" calcext:value-type="float">
            <text:p>10025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16030092592593" calcext:value-type="float">
            <text:p>0,00116030092592593000</text:p>
          </table:table-cell>
          <table:table-cell table:formula="of:=[.D403]-[.D40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25" office:value-type="float" office:value="10050" calcext:value-type="float">
            <text:p>10050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16319444444444" calcext:value-type="float">
            <text:p>0,00116319444444444000</text:p>
          </table:table-cell>
          <table:table-cell table:formula="of:=[.D404]-[.D40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25" office:value-type="float" office:value="10075" calcext:value-type="float">
            <text:p>10075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16608796296296" calcext:value-type="float">
            <text:p>0,00116608796296296000</text:p>
          </table:table-cell>
          <table:table-cell table:formula="of:=[.D405]-[.D40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25" office:value-type="float" office:value="10100" calcext:value-type="float">
            <text:p>10100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16898148148148" calcext:value-type="float">
            <text:p>0,00116898148148148000</text:p>
          </table:table-cell>
          <table:table-cell table:formula="of:=[.D406]-[.D40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25" office:value-type="float" office:value="10125" calcext:value-type="float">
            <text:p>1012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171875" calcext:value-type="float">
            <text:p>0,00117187500000000000</text:p>
          </table:table-cell>
          <table:table-cell table:formula="of:=[.D407]-[.D40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25" office:value-type="float" office:value="10150" calcext:value-type="float">
            <text:p>10150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17476851851852" calcext:value-type="float">
            <text:p>0,00117476851851852000</text:p>
          </table:table-cell>
          <table:table-cell table:formula="of:=[.D408]-[.D40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25" office:value-type="float" office:value="10175" calcext:value-type="float">
            <text:p>10175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17766203703704" calcext:value-type="float">
            <text:p>0,00117766203703704000</text:p>
          </table:table-cell>
          <table:table-cell table:formula="of:=[.D409]-[.D40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25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18055555555556" calcext:value-type="float">
            <text:p>0,00118055555555556000</text:p>
          </table:table-cell>
          <table:table-cell table:formula="of:=[.D410]-[.D40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25" office:value-type="float" office:value="10225" calcext:value-type="float">
            <text:p>10225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18344907407407" calcext:value-type="float">
            <text:p>0,00118344907407407000</text:p>
          </table:table-cell>
          <table:table-cell table:formula="of:=[.D411]-[.D41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25" office:value-type="float" office:value="10250" calcext:value-type="float">
            <text:p>1025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18634259259259" calcext:value-type="float">
            <text:p>0,00118634259259259000</text:p>
          </table:table-cell>
          <table:table-cell table:formula="of:=[.D412]-[.D41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25" office:value-type="float" office:value="10275" calcext:value-type="float">
            <text:p>10275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18923611111111" calcext:value-type="float">
            <text:p>0,00118923611111111000</text:p>
          </table:table-cell>
          <table:table-cell table:formula="of:=[.D413]-[.D41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25" office:value-type="float" office:value="10300" calcext:value-type="float">
            <text:p>10300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19212962962963" calcext:value-type="float">
            <text:p>0,00119212962962963000</text:p>
          </table:table-cell>
          <table:table-cell table:formula="of:=[.D414]-[.D41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25" office:value-type="float" office:value="10325" calcext:value-type="float">
            <text:p>10325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19502314814815" calcext:value-type="float">
            <text:p>0,00119502314814815000</text:p>
          </table:table-cell>
          <table:table-cell table:formula="of:=[.D415]-[.D41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25" office:value-type="float" office:value="10350" calcext:value-type="float">
            <text:p>10350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19791666666667" calcext:value-type="float">
            <text:p>0,00119791666666667000</text:p>
          </table:table-cell>
          <table:table-cell table:formula="of:=[.D416]-[.D41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25" office:value-type="float" office:value="10375" calcext:value-type="float">
            <text:p>1037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20081018518519" calcext:value-type="float">
            <text:p>0,00120081018518519000</text:p>
          </table:table-cell>
          <table:table-cell table:formula="of:=[.D417]-[.D41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25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2037037037037" calcext:value-type="float">
            <text:p>0,00120370370370370000</text:p>
          </table:table-cell>
          <table:table-cell table:formula="of:=[.D418]-[.D41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25" office:value-type="float" office:value="10425" calcext:value-type="float">
            <text:p>10425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20659722222222" calcext:value-type="float">
            <text:p>0,00120659722222222000</text:p>
          </table:table-cell>
          <table:table-cell table:formula="of:=[.D419]-[.D41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25" office:value-type="float" office:value="10450" calcext:value-type="float">
            <text:p>10450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20949074074074" calcext:value-type="float">
            <text:p>0,00120949074074074000</text:p>
          </table:table-cell>
          <table:table-cell table:formula="of:=[.D420]-[.D41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25" office:value-type="float" office:value="10475" calcext:value-type="float">
            <text:p>10475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21238425925926" calcext:value-type="float">
            <text:p>0,00121238425925926000</text:p>
          </table:table-cell>
          <table:table-cell table:formula="of:=[.D421]-[.D42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25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21527777777778" calcext:value-type="float">
            <text:p>0,00121527777777778000</text:p>
          </table:table-cell>
          <table:table-cell table:formula="of:=[.D422]-[.D42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25" office:value-type="float" office:value="10525" calcext:value-type="float">
            <text:p>10525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2181712962963" calcext:value-type="float">
            <text:p>0,00121817129629630000</text:p>
          </table:table-cell>
          <table:table-cell table:formula="of:=[.D423]-[.D42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25" office:value-type="float" office:value="10550" calcext:value-type="float">
            <text:p>10550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22106481481481" calcext:value-type="float">
            <text:p>0,00122106481481481000</text:p>
          </table:table-cell>
          <table:table-cell table:formula="of:=[.D424]-[.D42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25" office:value-type="float" office:value="10575" calcext:value-type="float">
            <text:p>10575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22395833333333" calcext:value-type="float">
            <text:p>0,00122395833333333000</text:p>
          </table:table-cell>
          <table:table-cell table:formula="of:=[.D425]-[.D42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25" office:value-type="float" office:value="10600" calcext:value-type="float">
            <text:p>10600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22685185185185" calcext:value-type="float">
            <text:p>0,00122685185185185000</text:p>
          </table:table-cell>
          <table:table-cell table:formula="of:=[.D426]-[.D42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25" office:value-type="float" office:value="10625" calcext:value-type="float">
            <text:p>1062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22974537037037" calcext:value-type="float">
            <text:p>0,00122974537037037000</text:p>
          </table:table-cell>
          <table:table-cell table:formula="of:=[.D427]-[.D42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25" office:value-type="float" office:value="10650" calcext:value-type="float">
            <text:p>10650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23263888888889" calcext:value-type="float">
            <text:p>0,00123263888888889000</text:p>
          </table:table-cell>
          <table:table-cell table:formula="of:=[.D428]-[.D42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25" office:value-type="float" office:value="10675" calcext:value-type="float">
            <text:p>10675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23553240740741" calcext:value-type="float">
            <text:p>0,00123553240740741000</text:p>
          </table:table-cell>
          <table:table-cell table:formula="of:=[.D429]-[.D42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25" office:value-type="float" office:value="10700" calcext:value-type="float">
            <text:p>10700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23842592592593" calcext:value-type="float">
            <text:p>0,00123842592592593000</text:p>
          </table:table-cell>
          <table:table-cell table:formula="of:=[.D430]-[.D42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25" office:value-type="float" office:value="10725" calcext:value-type="float">
            <text:p>10725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24131944444444" calcext:value-type="float">
            <text:p>0,00124131944444444000</text:p>
          </table:table-cell>
          <table:table-cell table:formula="of:=[.D431]-[.D43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25" office:value-type="float" office:value="10750" calcext:value-type="float">
            <text:p>1075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24421296296296" calcext:value-type="float">
            <text:p>0,00124421296296296000</text:p>
          </table:table-cell>
          <table:table-cell table:formula="of:=[.D432]-[.D43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25" office:value-type="float" office:value="10775" calcext:value-type="float">
            <text:p>10775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24710648148148" calcext:value-type="float">
            <text:p>0,00124710648148148000</text:p>
          </table:table-cell>
          <table:table-cell table:formula="of:=[.D433]-[.D43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25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25" calcext:value-type="float">
            <text:p>0,00125000000000000000</text:p>
          </table:table-cell>
          <table:table-cell table:formula="of:=[.D434]-[.D43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25" office:value-type="float" office:value="10825" calcext:value-type="float">
            <text:p>10825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25289351851852" calcext:value-type="float">
            <text:p>0,00125289351851852000</text:p>
          </table:table-cell>
          <table:table-cell table:formula="of:=[.D435]-[.D43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25" office:value-type="float" office:value="10850" calcext:value-type="float">
            <text:p>10850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25578703703704" calcext:value-type="float">
            <text:p>0,00125578703703704000</text:p>
          </table:table-cell>
          <table:table-cell table:formula="of:=[.D436]-[.D43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25" office:value-type="float" office:value="10875" calcext:value-type="float">
            <text:p>1087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25868055555556" calcext:value-type="float">
            <text:p>0,00125868055555556000</text:p>
          </table:table-cell>
          <table:table-cell table:formula="of:=[.D437]-[.D43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25" office:value-type="float" office:value="10900" calcext:value-type="float">
            <text:p>10900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26157407407407" calcext:value-type="float">
            <text:p>0,00126157407407407000</text:p>
          </table:table-cell>
          <table:table-cell table:formula="of:=[.D438]-[.D43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25" office:value-type="float" office:value="10925" calcext:value-type="float">
            <text:p>10925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26446759259259" calcext:value-type="float">
            <text:p>0,00126446759259259000</text:p>
          </table:table-cell>
          <table:table-cell table:formula="of:=[.D439]-[.D43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25" office:value-type="float" office:value="10950" calcext:value-type="float">
            <text:p>10950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26736111111111" calcext:value-type="float">
            <text:p>0,00126736111111111000</text:p>
          </table:table-cell>
          <table:table-cell table:formula="of:=[.D440]-[.D43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25" office:value-type="float" office:value="10975" calcext:value-type="float">
            <text:p>10975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27025462962963" calcext:value-type="float">
            <text:p>0,00127025462962963000</text:p>
          </table:table-cell>
          <table:table-cell table:formula="of:=[.D441]-[.D44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25" office:value-type="float" office:value="11000" calcext:value-type="float">
            <text:p>1100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27314814814815" calcext:value-type="float">
            <text:p>0,00127314814814815000</text:p>
          </table:table-cell>
          <table:table-cell table:formula="of:=[.D442]-[.D44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25" office:value-type="float" office:value="11025" calcext:value-type="float">
            <text:p>11025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27604166666667" calcext:value-type="float">
            <text:p>0,00127604166666667000</text:p>
          </table:table-cell>
          <table:table-cell table:formula="of:=[.D443]-[.D44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25" office:value-type="float" office:value="11050" calcext:value-type="float">
            <text:p>11050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27893518518519" calcext:value-type="float">
            <text:p>0,00127893518518519000</text:p>
          </table:table-cell>
          <table:table-cell table:formula="of:=[.D444]-[.D44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25" office:value-type="float" office:value="11075" calcext:value-type="float">
            <text:p>11075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2818287037037" calcext:value-type="float">
            <text:p>0,00128182870370370000</text:p>
          </table:table-cell>
          <table:table-cell table:formula="of:=[.D445]-[.D44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25" office:value-type="float" office:value="11100" calcext:value-type="float">
            <text:p>11100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28472222222222" calcext:value-type="float">
            <text:p>0,00128472222222222000</text:p>
          </table:table-cell>
          <table:table-cell table:formula="of:=[.D446]-[.D44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25" office:value-type="float" office:value="11125" calcext:value-type="float">
            <text:p>1112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28761574074074" calcext:value-type="float">
            <text:p>0,00128761574074074000</text:p>
          </table:table-cell>
          <table:table-cell table:formula="of:=[.D447]-[.D44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25" office:value-type="float" office:value="11150" calcext:value-type="float">
            <text:p>11150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29050925925926" calcext:value-type="float">
            <text:p>0,00129050925925926000</text:p>
          </table:table-cell>
          <table:table-cell table:formula="of:=[.D448]-[.D44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25" office:value-type="float" office:value="11175" calcext:value-type="float">
            <text:p>11175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29340277777778" calcext:value-type="float">
            <text:p>0,00129340277777778000</text:p>
          </table:table-cell>
          <table:table-cell table:formula="of:=[.D449]-[.D44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25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2962962962963" calcext:value-type="float">
            <text:p>0,00129629629629630000</text:p>
          </table:table-cell>
          <table:table-cell table:formula="of:=[.D450]-[.D44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25" office:value-type="float" office:value="11225" calcext:value-type="float">
            <text:p>11225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29918981481481" calcext:value-type="float">
            <text:p>0,00129918981481481000</text:p>
          </table:table-cell>
          <table:table-cell table:formula="of:=[.D451]-[.D45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25" office:value-type="float" office:value="11250" calcext:value-type="float">
            <text:p>112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30208333333333" calcext:value-type="float">
            <text:p>0,00130208333333333000</text:p>
          </table:table-cell>
          <table:table-cell table:formula="of:=[.D452]-[.D45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25" office:value-type="float" office:value="11275" calcext:value-type="float">
            <text:p>11275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30497685185185" calcext:value-type="float">
            <text:p>0,00130497685185185000</text:p>
          </table:table-cell>
          <table:table-cell table:formula="of:=[.D453]-[.D45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25" office:value-type="float" office:value="11300" calcext:value-type="float">
            <text:p>11300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30787037037037" calcext:value-type="float">
            <text:p>0,00130787037037037000</text:p>
          </table:table-cell>
          <table:table-cell table:formula="of:=[.D454]-[.D45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25" office:value-type="float" office:value="11325" calcext:value-type="float">
            <text:p>11325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31076388888889" calcext:value-type="float">
            <text:p>0,00131076388888889000</text:p>
          </table:table-cell>
          <table:table-cell table:formula="of:=[.D455]-[.D45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25" office:value-type="float" office:value="11350" calcext:value-type="float">
            <text:p>11350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31365740740741" calcext:value-type="float">
            <text:p>0,00131365740740741000</text:p>
          </table:table-cell>
          <table:table-cell table:formula="of:=[.D456]-[.D45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25" office:value-type="float" office:value="11375" calcext:value-type="float">
            <text:p>1137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31655092592593" calcext:value-type="float">
            <text:p>0,00131655092592593000</text:p>
          </table:table-cell>
          <table:table-cell table:formula="of:=[.D457]-[.D45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25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31944444444444" calcext:value-type="float">
            <text:p>0,00131944444444444000</text:p>
          </table:table-cell>
          <table:table-cell table:formula="of:=[.D458]-[.D45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25" office:value-type="float" office:value="11425" calcext:value-type="float">
            <text:p>11425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32233796296296" calcext:value-type="float">
            <text:p>0,00132233796296296000</text:p>
          </table:table-cell>
          <table:table-cell table:formula="of:=[.D459]-[.D45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25" office:value-type="float" office:value="11450" calcext:value-type="float">
            <text:p>11450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32523148148148" calcext:value-type="float">
            <text:p>0,00132523148148148000</text:p>
          </table:table-cell>
          <table:table-cell table:formula="of:=[.D460]-[.D45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25" office:value-type="float" office:value="11475" calcext:value-type="float">
            <text:p>11475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328125" calcext:value-type="float">
            <text:p>0,00132812500000000000</text:p>
          </table:table-cell>
          <table:table-cell table:formula="of:=[.D461]-[.D46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25" office:value-type="float" office:value="11500" calcext:value-type="float">
            <text:p>1150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33101851851852" calcext:value-type="float">
            <text:p>0,00133101851851852000</text:p>
          </table:table-cell>
          <table:table-cell table:formula="of:=[.D462]-[.D46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25" office:value-type="float" office:value="11525" calcext:value-type="float">
            <text:p>11525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33391203703704" calcext:value-type="float">
            <text:p>0,00133391203703704000</text:p>
          </table:table-cell>
          <table:table-cell table:formula="of:=[.D463]-[.D46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25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33680555555556" calcext:value-type="float">
            <text:p>0,00133680555555556000</text:p>
          </table:table-cell>
          <table:table-cell table:formula="of:=[.D464]-[.D46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25" office:value-type="float" office:value="11575" calcext:value-type="float">
            <text:p>11575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33969907407407" calcext:value-type="float">
            <text:p>0,00133969907407407000</text:p>
          </table:table-cell>
          <table:table-cell table:formula="of:=[.D465]-[.D46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25" office:value-type="float" office:value="11600" calcext:value-type="float">
            <text:p>11600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34259259259259" calcext:value-type="float">
            <text:p>0,00134259259259259000</text:p>
          </table:table-cell>
          <table:table-cell table:formula="of:=[.D466]-[.D46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25" office:value-type="float" office:value="11625" calcext:value-type="float">
            <text:p>1162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34548611111111" calcext:value-type="float">
            <text:p>0,00134548611111111000</text:p>
          </table:table-cell>
          <table:table-cell table:formula="of:=[.D467]-[.D46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25" office:value-type="float" office:value="11650" calcext:value-type="float">
            <text:p>11650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34837962962963" calcext:value-type="float">
            <text:p>0,00134837962962963000</text:p>
          </table:table-cell>
          <table:table-cell table:formula="of:=[.D468]-[.D46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25" office:value-type="float" office:value="11675" calcext:value-type="float">
            <text:p>11675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35127314814815" calcext:value-type="float">
            <text:p>0,00135127314814815000</text:p>
          </table:table-cell>
          <table:table-cell table:formula="of:=[.D469]-[.D46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25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35416666666667" calcext:value-type="float">
            <text:p>0,00135416666666667000</text:p>
          </table:table-cell>
          <table:table-cell table:formula="of:=[.D470]-[.D46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25" office:value-type="float" office:value="11725" calcext:value-type="float">
            <text:p>11725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35706018518519" calcext:value-type="float">
            <text:p>0,00135706018518519000</text:p>
          </table:table-cell>
          <table:table-cell table:formula="of:=[.D471]-[.D47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25" office:value-type="float" office:value="11750" calcext:value-type="float">
            <text:p>1175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3599537037037" calcext:value-type="float">
            <text:p>0,00135995370370370000</text:p>
          </table:table-cell>
          <table:table-cell table:formula="of:=[.D472]-[.D47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25" office:value-type="float" office:value="11775" calcext:value-type="float">
            <text:p>11775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36284722222222" calcext:value-type="float">
            <text:p>0,00136284722222222000</text:p>
          </table:table-cell>
          <table:table-cell table:formula="of:=[.D473]-[.D47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25" office:value-type="float" office:value="11800" calcext:value-type="float">
            <text:p>11800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36574074074074" calcext:value-type="float">
            <text:p>0,00136574074074074000</text:p>
          </table:table-cell>
          <table:table-cell table:formula="of:=[.D474]-[.D47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25" office:value-type="float" office:value="11825" calcext:value-type="float">
            <text:p>11825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36863425925926" calcext:value-type="float">
            <text:p>0,00136863425925926000</text:p>
          </table:table-cell>
          <table:table-cell table:formula="of:=[.D475]-[.D47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25" office:value-type="float" office:value="11850" calcext:value-type="float">
            <text:p>11850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37152777777778" calcext:value-type="float">
            <text:p>0,00137152777777778000</text:p>
          </table:table-cell>
          <table:table-cell table:formula="of:=[.D476]-[.D47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25" office:value-type="float" office:value="11875" calcext:value-type="float">
            <text:p>1187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3744212962963" calcext:value-type="float">
            <text:p>0,00137442129629630000</text:p>
          </table:table-cell>
          <table:table-cell table:formula="of:=[.D477]-[.D47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25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37731481481481" calcext:value-type="float">
            <text:p>0,00137731481481481000</text:p>
          </table:table-cell>
          <table:table-cell table:formula="of:=[.D478]-[.D47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25" office:value-type="float" office:value="11925" calcext:value-type="float">
            <text:p>11925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38020833333333" calcext:value-type="float">
            <text:p>0,00138020833333333000</text:p>
          </table:table-cell>
          <table:table-cell table:formula="of:=[.D479]-[.D47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25" office:value-type="float" office:value="11950" calcext:value-type="float">
            <text:p>11950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38310185185185" calcext:value-type="float">
            <text:p>0,00138310185185185000</text:p>
          </table:table-cell>
          <table:table-cell table:formula="of:=[.D480]-[.D47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25" office:value-type="float" office:value="11975" calcext:value-type="float">
            <text:p>11975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38599537037037" calcext:value-type="float">
            <text:p>0,00138599537037037000</text:p>
          </table:table-cell>
          <table:table-cell table:formula="of:=[.D481]-[.D48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25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38888888888889" calcext:value-type="float">
            <text:p>0,00138888888888889000</text:p>
          </table:table-cell>
          <table:table-cell table:formula="of:=[.D482]-[.D48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25" office:value-type="float" office:value="12025" calcext:value-type="float">
            <text:p>12025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39178240740741" calcext:value-type="float">
            <text:p>0,00139178240740741000</text:p>
          </table:table-cell>
          <table:table-cell table:formula="of:=[.D483]-[.D48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25" office:value-type="float" office:value="12050" calcext:value-type="float">
            <text:p>12050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39467592592593" calcext:value-type="float">
            <text:p>0,00139467592592593000</text:p>
          </table:table-cell>
          <table:table-cell table:formula="of:=[.D484]-[.D48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25" office:value-type="float" office:value="12075" calcext:value-type="float">
            <text:p>12075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39756944444444" calcext:value-type="float">
            <text:p>0,00139756944444444000</text:p>
          </table:table-cell>
          <table:table-cell table:formula="of:=[.D485]-[.D48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25" office:value-type="float" office:value="12100" calcext:value-type="float">
            <text:p>12100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40046296296296" calcext:value-type="float">
            <text:p>0,00140046296296296000</text:p>
          </table:table-cell>
          <table:table-cell table:formula="of:=[.D486]-[.D48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25" office:value-type="float" office:value="12125" calcext:value-type="float">
            <text:p>1212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40335648148148" calcext:value-type="float">
            <text:p>0,00140335648148148000</text:p>
          </table:table-cell>
          <table:table-cell table:formula="of:=[.D487]-[.D48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25" office:value-type="float" office:value="12150" calcext:value-type="float">
            <text:p>12150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40625" calcext:value-type="float">
            <text:p>0,00140625000000000000</text:p>
          </table:table-cell>
          <table:table-cell table:formula="of:=[.D488]-[.D48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25" office:value-type="float" office:value="12175" calcext:value-type="float">
            <text:p>12175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40914351851852" calcext:value-type="float">
            <text:p>0,00140914351851852000</text:p>
          </table:table-cell>
          <table:table-cell table:formula="of:=[.D489]-[.D48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25" office:value-type="float" office:value="12200" calcext:value-type="float">
            <text:p>12200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41203703703704" calcext:value-type="float">
            <text:p>0,00141203703703704000</text:p>
          </table:table-cell>
          <table:table-cell table:formula="of:=[.D490]-[.D48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25" office:value-type="float" office:value="12225" calcext:value-type="float">
            <text:p>12225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41493055555556" calcext:value-type="float">
            <text:p>0,00141493055555556000</text:p>
          </table:table-cell>
          <table:table-cell table:formula="of:=[.D491]-[.D49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25" office:value-type="float" office:value="12250" calcext:value-type="float">
            <text:p>1225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41782407407407" calcext:value-type="float">
            <text:p>0,00141782407407407000</text:p>
          </table:table-cell>
          <table:table-cell table:formula="of:=[.D492]-[.D49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25" office:value-type="float" office:value="12275" calcext:value-type="float">
            <text:p>12275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42071759259259" calcext:value-type="float">
            <text:p>0,00142071759259259000</text:p>
          </table:table-cell>
          <table:table-cell table:formula="of:=[.D493]-[.D49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25" office:value-type="float" office:value="12300" calcext:value-type="float">
            <text:p>12300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42361111111111" calcext:value-type="float">
            <text:p>0,00142361111111111000</text:p>
          </table:table-cell>
          <table:table-cell table:formula="of:=[.D494]-[.D49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25" office:value-type="float" office:value="12325" calcext:value-type="float">
            <text:p>12325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42650462962963" calcext:value-type="float">
            <text:p>0,00142650462962963000</text:p>
          </table:table-cell>
          <table:table-cell table:formula="of:=[.D495]-[.D49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25" office:value-type="float" office:value="12350" calcext:value-type="float">
            <text:p>12350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42939814814815" calcext:value-type="float">
            <text:p>0,00142939814814815000</text:p>
          </table:table-cell>
          <table:table-cell table:formula="of:=[.D496]-[.D49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25" office:value-type="float" office:value="12375" calcext:value-type="float">
            <text:p>1237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43229166666667" calcext:value-type="float">
            <text:p>0,00143229166666667000</text:p>
          </table:table-cell>
          <table:table-cell table:formula="of:=[.D497]-[.D49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25" office:value-type="float" office:value="12400" calcext:value-type="float">
            <text:p>12400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43518518518519" calcext:value-type="float">
            <text:p>0,00143518518518519000</text:p>
          </table:table-cell>
          <table:table-cell table:formula="of:=[.D498]-[.D49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25" office:value-type="float" office:value="12425" calcext:value-type="float">
            <text:p>12425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4380787037037" calcext:value-type="float">
            <text:p>0,00143807870370370000</text:p>
          </table:table-cell>
          <table:table-cell table:formula="of:=[.D499]-[.D49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25" office:value-type="float" office:value="12450" calcext:value-type="float">
            <text:p>12450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44097222222222" calcext:value-type="float">
            <text:p>0,00144097222222222000</text:p>
          </table:table-cell>
          <table:table-cell table:formula="of:=[.D500]-[.D49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25" office:value-type="float" office:value="12475" calcext:value-type="float">
            <text:p>12475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44386574074074" calcext:value-type="float">
            <text:p>0,00144386574074074000</text:p>
          </table:table-cell>
          <table:table-cell table:formula="of:=[.D501]-[.D50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25" office:value-type="float" office:value="12500" calcext:value-type="float">
            <text:p>12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44675925925926" calcext:value-type="float">
            <text:p>0,00144675925925926000</text:p>
          </table:table-cell>
          <table:table-cell table:formula="of:=[.D502]-[.D50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25" office:value-type="float" office:value="12525" calcext:value-type="float">
            <text:p>12525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44965277777778" calcext:value-type="float">
            <text:p>0,00144965277777778000</text:p>
          </table:table-cell>
          <table:table-cell table:formula="of:=[.D503]-[.D50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25" office:value-type="float" office:value="12550" calcext:value-type="float">
            <text:p>12550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4525462962963" calcext:value-type="float">
            <text:p>0,00145254629629630000</text:p>
          </table:table-cell>
          <table:table-cell table:formula="of:=[.D504]-[.D50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25" office:value-type="float" office:value="12575" calcext:value-type="float">
            <text:p>12575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45543981481481" calcext:value-type="float">
            <text:p>0,00145543981481481000</text:p>
          </table:table-cell>
          <table:table-cell table:formula="of:=[.D505]-[.D50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25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45833333333333" calcext:value-type="float">
            <text:p>0,00145833333333333000</text:p>
          </table:table-cell>
          <table:table-cell table:formula="of:=[.D506]-[.D50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25" office:value-type="float" office:value="12625" calcext:value-type="float">
            <text:p>1262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46122685185185" calcext:value-type="float">
            <text:p>0,00146122685185185000</text:p>
          </table:table-cell>
          <table:table-cell table:formula="of:=[.D507]-[.D50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25" office:value-type="float" office:value="12650" calcext:value-type="float">
            <text:p>12650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46412037037037" calcext:value-type="float">
            <text:p>0,00146412037037037000</text:p>
          </table:table-cell>
          <table:table-cell table:formula="of:=[.D508]-[.D50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25" office:value-type="float" office:value="12675" calcext:value-type="float">
            <text:p>12675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46701388888889" calcext:value-type="float">
            <text:p>0,00146701388888889000</text:p>
          </table:table-cell>
          <table:table-cell table:formula="of:=[.D509]-[.D50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25" office:value-type="float" office:value="12700" calcext:value-type="float">
            <text:p>12700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46990740740741" calcext:value-type="float">
            <text:p>0,00146990740740741000</text:p>
          </table:table-cell>
          <table:table-cell table:formula="of:=[.D510]-[.D50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25" office:value-type="float" office:value="12725" calcext:value-type="float">
            <text:p>12725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47280092592593" calcext:value-type="float">
            <text:p>0,00147280092592593000</text:p>
          </table:table-cell>
          <table:table-cell table:formula="of:=[.D511]-[.D51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25" office:value-type="float" office:value="12750" calcext:value-type="float">
            <text:p>1275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47569444444444" calcext:value-type="float">
            <text:p>0,00147569444444444000</text:p>
          </table:table-cell>
          <table:table-cell table:formula="of:=[.D512]-[.D51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25" office:value-type="float" office:value="12775" calcext:value-type="float">
            <text:p>12775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47858796296296" calcext:value-type="float">
            <text:p>0,00147858796296296000</text:p>
          </table:table-cell>
          <table:table-cell table:formula="of:=[.D513]-[.D51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25" office:value-type="float" office:value="12800" calcext:value-type="float">
            <text:p>12800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48148148148148" calcext:value-type="float">
            <text:p>0,00148148148148148000</text:p>
          </table:table-cell>
          <table:table-cell table:formula="of:=[.D514]-[.D51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25" office:value-type="float" office:value="12825" calcext:value-type="float">
            <text:p>12825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484375" calcext:value-type="float">
            <text:p>0,00148437500000000000</text:p>
          </table:table-cell>
          <table:table-cell table:formula="of:=[.D515]-[.D51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25" office:value-type="float" office:value="12850" calcext:value-type="float">
            <text:p>12850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48726851851852" calcext:value-type="float">
            <text:p>0,00148726851851852000</text:p>
          </table:table-cell>
          <table:table-cell table:formula="of:=[.D516]-[.D51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25" office:value-type="float" office:value="12875" calcext:value-type="float">
            <text:p>1287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49016203703704" calcext:value-type="float">
            <text:p>0,00149016203703704000</text:p>
          </table:table-cell>
          <table:table-cell table:formula="of:=[.D517]-[.D51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25" office:value-type="float" office:value="12900" calcext:value-type="float">
            <text:p>12900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49305555555556" calcext:value-type="float">
            <text:p>0,00149305555555556000</text:p>
          </table:table-cell>
          <table:table-cell table:formula="of:=[.D518]-[.D51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25" office:value-type="float" office:value="12925" calcext:value-type="float">
            <text:p>12925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49594907407407" calcext:value-type="float">
            <text:p>0,00149594907407407000</text:p>
          </table:table-cell>
          <table:table-cell table:formula="of:=[.D519]-[.D51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25" office:value-type="float" office:value="12950" calcext:value-type="float">
            <text:p>12950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49884259259259" calcext:value-type="float">
            <text:p>0,00149884259259259000</text:p>
          </table:table-cell>
          <table:table-cell table:formula="of:=[.D520]-[.D51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25" office:value-type="float" office:value="12975" calcext:value-type="float">
            <text:p>12975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50173611111111" calcext:value-type="float">
            <text:p>0,00150173611111111000</text:p>
          </table:table-cell>
          <table:table-cell table:formula="of:=[.D521]-[.D52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25" office:value-type="float" office:value="13000" calcext:value-type="float">
            <text:p>1300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50462962962963" calcext:value-type="float">
            <text:p>0,00150462962962963000</text:p>
          </table:table-cell>
          <table:table-cell table:formula="of:=[.D522]-[.D52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25" office:value-type="float" office:value="13025" calcext:value-type="float">
            <text:p>13025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50752314814815" calcext:value-type="float">
            <text:p>0,00150752314814815000</text:p>
          </table:table-cell>
          <table:table-cell table:formula="of:=[.D523]-[.D52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25" office:value-type="float" office:value="13050" calcext:value-type="float">
            <text:p>13050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51041666666667" calcext:value-type="float">
            <text:p>0,00151041666666667000</text:p>
          </table:table-cell>
          <table:table-cell table:formula="of:=[.D524]-[.D52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25" office:value-type="float" office:value="13075" calcext:value-type="float">
            <text:p>13075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51331018518519" calcext:value-type="float">
            <text:p>0,00151331018518519000</text:p>
          </table:table-cell>
          <table:table-cell table:formula="of:=[.D525]-[.D52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25" office:value-type="float" office:value="13100" calcext:value-type="float">
            <text:p>13100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5162037037037" calcext:value-type="float">
            <text:p>0,00151620370370370000</text:p>
          </table:table-cell>
          <table:table-cell table:formula="of:=[.D526]-[.D52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25" office:value-type="float" office:value="13125" calcext:value-type="float">
            <text:p>1312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51909722222222" calcext:value-type="float">
            <text:p>0,00151909722222222000</text:p>
          </table:table-cell>
          <table:table-cell table:formula="of:=[.D527]-[.D52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25" office:value-type="float" office:value="13150" calcext:value-type="float">
            <text:p>13150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52199074074074" calcext:value-type="float">
            <text:p>0,00152199074074074000</text:p>
          </table:table-cell>
          <table:table-cell table:formula="of:=[.D528]-[.D52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25" office:value-type="float" office:value="13175" calcext:value-type="float">
            <text:p>13175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52488425925926" calcext:value-type="float">
            <text:p>0,00152488425925926000</text:p>
          </table:table-cell>
          <table:table-cell table:formula="of:=[.D529]-[.D52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25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52777777777778" calcext:value-type="float">
            <text:p>0,00152777777777778000</text:p>
          </table:table-cell>
          <table:table-cell table:formula="of:=[.D530]-[.D52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25" office:value-type="float" office:value="13225" calcext:value-type="float">
            <text:p>13225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5306712962963" calcext:value-type="float">
            <text:p>0,00153067129629630000</text:p>
          </table:table-cell>
          <table:table-cell table:formula="of:=[.D531]-[.D53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25" office:value-type="float" office:value="13250" calcext:value-type="float">
            <text:p>1325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53356481481481" calcext:value-type="float">
            <text:p>0,00153356481481481000</text:p>
          </table:table-cell>
          <table:table-cell table:formula="of:=[.D532]-[.D53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25" office:value-type="float" office:value="13275" calcext:value-type="float">
            <text:p>13275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53645833333333" calcext:value-type="float">
            <text:p>0,00153645833333333000</text:p>
          </table:table-cell>
          <table:table-cell table:formula="of:=[.D533]-[.D53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25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53935185185185" calcext:value-type="float">
            <text:p>0,00153935185185185000</text:p>
          </table:table-cell>
          <table:table-cell table:formula="of:=[.D534]-[.D53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25" office:value-type="float" office:value="13325" calcext:value-type="float">
            <text:p>13325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54224537037037" calcext:value-type="float">
            <text:p>0,00154224537037037000</text:p>
          </table:table-cell>
          <table:table-cell table:formula="of:=[.D535]-[.D53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25" office:value-type="float" office:value="13350" calcext:value-type="float">
            <text:p>13350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54513888888889" calcext:value-type="float">
            <text:p>0,00154513888888889000</text:p>
          </table:table-cell>
          <table:table-cell table:formula="of:=[.D536]-[.D53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25" office:value-type="float" office:value="13375" calcext:value-type="float">
            <text:p>1337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54803240740741" calcext:value-type="float">
            <text:p>0,00154803240740741000</text:p>
          </table:table-cell>
          <table:table-cell table:formula="of:=[.D537]-[.D53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25" office:value-type="float" office:value="13400" calcext:value-type="float">
            <text:p>13400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55092592592593" calcext:value-type="float">
            <text:p>0,00155092592592593000</text:p>
          </table:table-cell>
          <table:table-cell table:formula="of:=[.D538]-[.D53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25" office:value-type="float" office:value="13425" calcext:value-type="float">
            <text:p>13425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55381944444444" calcext:value-type="float">
            <text:p>0,00155381944444444000</text:p>
          </table:table-cell>
          <table:table-cell table:formula="of:=[.D539]-[.D53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25" office:value-type="float" office:value="13450" calcext:value-type="float">
            <text:p>13450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55671296296296" calcext:value-type="float">
            <text:p>0,00155671296296296000</text:p>
          </table:table-cell>
          <table:table-cell table:formula="of:=[.D540]-[.D53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25" office:value-type="float" office:value="13475" calcext:value-type="float">
            <text:p>13475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55960648148148" calcext:value-type="float">
            <text:p>0,00155960648148148000</text:p>
          </table:table-cell>
          <table:table-cell table:formula="of:=[.D541]-[.D54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25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5625" calcext:value-type="float">
            <text:p>0,00156250000000000000</text:p>
          </table:table-cell>
          <table:table-cell table:formula="of:=[.D542]-[.D54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25" office:value-type="float" office:value="13525" calcext:value-type="float">
            <text:p>13525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56539351851852" calcext:value-type="float">
            <text:p>0,00156539351851852000</text:p>
          </table:table-cell>
          <table:table-cell table:formula="of:=[.D543]-[.D54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25" office:value-type="float" office:value="13550" calcext:value-type="float">
            <text:p>13550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56828703703704" calcext:value-type="float">
            <text:p>0,00156828703703704000</text:p>
          </table:table-cell>
          <table:table-cell table:formula="of:=[.D544]-[.D54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25" office:value-type="float" office:value="13575" calcext:value-type="float">
            <text:p>13575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57118055555556" calcext:value-type="float">
            <text:p>0,00157118055555556000</text:p>
          </table:table-cell>
          <table:table-cell table:formula="of:=[.D545]-[.D54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25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57407407407407" calcext:value-type="float">
            <text:p>0,00157407407407407000</text:p>
          </table:table-cell>
          <table:table-cell table:formula="of:=[.D546]-[.D54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25" office:value-type="float" office:value="13625" calcext:value-type="float">
            <text:p>1362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57696759259259" calcext:value-type="float">
            <text:p>0,00157696759259259000</text:p>
          </table:table-cell>
          <table:table-cell table:formula="of:=[.D547]-[.D54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25" office:value-type="float" office:value="13650" calcext:value-type="float">
            <text:p>13650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57986111111111" calcext:value-type="float">
            <text:p>0,00157986111111111000</text:p>
          </table:table-cell>
          <table:table-cell table:formula="of:=[.D548]-[.D54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25" office:value-type="float" office:value="13675" calcext:value-type="float">
            <text:p>13675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58275462962963" calcext:value-type="float">
            <text:p>0,00158275462962963000</text:p>
          </table:table-cell>
          <table:table-cell table:formula="of:=[.D549]-[.D54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25" office:value-type="float" office:value="13700" calcext:value-type="float">
            <text:p>13700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58564814814815" calcext:value-type="float">
            <text:p>0,00158564814814815000</text:p>
          </table:table-cell>
          <table:table-cell table:formula="of:=[.D550]-[.D54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25" office:value-type="float" office:value="13725" calcext:value-type="float">
            <text:p>13725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58854166666667" calcext:value-type="float">
            <text:p>0,00158854166666667000</text:p>
          </table:table-cell>
          <table:table-cell table:formula="of:=[.D551]-[.D55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25" office:value-type="float" office:value="13750" calcext:value-type="float">
            <text:p>137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59143518518519" calcext:value-type="float">
            <text:p>0,00159143518518518000</text:p>
          </table:table-cell>
          <table:table-cell table:formula="of:=[.D552]-[.D55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25" office:value-type="float" office:value="13775" calcext:value-type="float">
            <text:p>13775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5943287037037" calcext:value-type="float">
            <text:p>0,00159432870370370000</text:p>
          </table:table-cell>
          <table:table-cell table:formula="of:=[.D553]-[.D55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25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59722222222222" calcext:value-type="float">
            <text:p>0,00159722222222222000</text:p>
          </table:table-cell>
          <table:table-cell table:formula="of:=[.D554]-[.D55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25" office:value-type="float" office:value="13825" calcext:value-type="float">
            <text:p>13825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60011574074074" calcext:value-type="float">
            <text:p>0,00160011574074074000</text:p>
          </table:table-cell>
          <table:table-cell table:formula="of:=[.D555]-[.D55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25" office:value-type="float" office:value="13850" calcext:value-type="float">
            <text:p>13850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60300925925926" calcext:value-type="float">
            <text:p>0,00160300925925926000</text:p>
          </table:table-cell>
          <table:table-cell table:formula="of:=[.D556]-[.D55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25" office:value-type="float" office:value="13875" calcext:value-type="float">
            <text:p>1387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60590277777778" calcext:value-type="float">
            <text:p>0,00160590277777778000</text:p>
          </table:table-cell>
          <table:table-cell table:formula="of:=[.D557]-[.D55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25" office:value-type="float" office:value="13900" calcext:value-type="float">
            <text:p>13900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6087962962963" calcext:value-type="float">
            <text:p>0,00160879629629630000</text:p>
          </table:table-cell>
          <table:table-cell table:formula="of:=[.D558]-[.D55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25" office:value-type="float" office:value="13925" calcext:value-type="float">
            <text:p>13925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61168981481481" calcext:value-type="float">
            <text:p>0,00161168981481481000</text:p>
          </table:table-cell>
          <table:table-cell table:formula="of:=[.D559]-[.D55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25" office:value-type="float" office:value="13950" calcext:value-type="float">
            <text:p>13950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61458333333333" calcext:value-type="float">
            <text:p>0,00161458333333333000</text:p>
          </table:table-cell>
          <table:table-cell table:formula="of:=[.D560]-[.D55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25" office:value-type="float" office:value="13975" calcext:value-type="float">
            <text:p>13975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61747685185185" calcext:value-type="float">
            <text:p>0,00161747685185185000</text:p>
          </table:table-cell>
          <table:table-cell table:formula="of:=[.D561]-[.D56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25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62037037037037" calcext:value-type="float">
            <text:p>0,00162037037037037000</text:p>
          </table:table-cell>
          <table:table-cell table:formula="of:=[.D562]-[.D56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25" office:value-type="float" office:value="14025" calcext:value-type="float">
            <text:p>14025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62326388888889" calcext:value-type="float">
            <text:p>0,00162326388888889000</text:p>
          </table:table-cell>
          <table:table-cell table:formula="of:=[.D563]-[.D56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25" office:value-type="float" office:value="14050" calcext:value-type="float">
            <text:p>14050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62615740740741" calcext:value-type="float">
            <text:p>0,00162615740740741000</text:p>
          </table:table-cell>
          <table:table-cell table:formula="of:=[.D564]-[.D56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25" office:value-type="float" office:value="14075" calcext:value-type="float">
            <text:p>14075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62905092592593" calcext:value-type="float">
            <text:p>0,00162905092592593000</text:p>
          </table:table-cell>
          <table:table-cell table:formula="of:=[.D565]-[.D56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25" office:value-type="float" office:value="14100" calcext:value-type="float">
            <text:p>14100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63194444444444" calcext:value-type="float">
            <text:p>0,00163194444444444000</text:p>
          </table:table-cell>
          <table:table-cell table:formula="of:=[.D566]-[.D56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25" office:value-type="float" office:value="14125" calcext:value-type="float">
            <text:p>1412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63483796296296" calcext:value-type="float">
            <text:p>0,00163483796296296000</text:p>
          </table:table-cell>
          <table:table-cell table:formula="of:=[.D567]-[.D56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25" office:value-type="float" office:value="14150" calcext:value-type="float">
            <text:p>14150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63773148148148" calcext:value-type="float">
            <text:p>0,00163773148148148000</text:p>
          </table:table-cell>
          <table:table-cell table:formula="of:=[.D568]-[.D56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25" office:value-type="float" office:value="14175" calcext:value-type="float">
            <text:p>14175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640625" calcext:value-type="float">
            <text:p>0,00164062500000000000</text:p>
          </table:table-cell>
          <table:table-cell table:formula="of:=[.D569]-[.D56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25" office:value-type="float" office:value="14200" calcext:value-type="float">
            <text:p>14200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64351851851852" calcext:value-type="float">
            <text:p>0,00164351851851852000</text:p>
          </table:table-cell>
          <table:table-cell table:formula="of:=[.D570]-[.D56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25" office:value-type="float" office:value="14225" calcext:value-type="float">
            <text:p>14225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64641203703704" calcext:value-type="float">
            <text:p>0,00164641203703704000</text:p>
          </table:table-cell>
          <table:table-cell table:formula="of:=[.D571]-[.D57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25" office:value-type="float" office:value="14250" calcext:value-type="float">
            <text:p>1425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64930555555556" calcext:value-type="float">
            <text:p>0,00164930555555556000</text:p>
          </table:table-cell>
          <table:table-cell table:formula="of:=[.D572]-[.D57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25" office:value-type="float" office:value="14275" calcext:value-type="float">
            <text:p>14275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65219907407407" calcext:value-type="float">
            <text:p>0,00165219907407407000</text:p>
          </table:table-cell>
          <table:table-cell table:formula="of:=[.D573]-[.D57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25" office:value-type="float" office:value="14300" calcext:value-type="float">
            <text:p>14300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65509259259259" calcext:value-type="float">
            <text:p>0,00165509259259259000</text:p>
          </table:table-cell>
          <table:table-cell table:formula="of:=[.D574]-[.D57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25" office:value-type="float" office:value="14325" calcext:value-type="float">
            <text:p>14325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65798611111111" calcext:value-type="float">
            <text:p>0,00165798611111111000</text:p>
          </table:table-cell>
          <table:table-cell table:formula="of:=[.D575]-[.D57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25" office:value-type="float" office:value="14350" calcext:value-type="float">
            <text:p>14350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66087962962963" calcext:value-type="float">
            <text:p>0,00166087962962963000</text:p>
          </table:table-cell>
          <table:table-cell table:formula="of:=[.D576]-[.D57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25" office:value-type="float" office:value="14375" calcext:value-type="float">
            <text:p>1437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66377314814815" calcext:value-type="float">
            <text:p>0,00166377314814815000</text:p>
          </table:table-cell>
          <table:table-cell table:formula="of:=[.D577]-[.D57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25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66666666666667" calcext:value-type="float">
            <text:p>0,00166666666666667000</text:p>
          </table:table-cell>
          <table:table-cell table:formula="of:=[.D578]-[.D57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25" office:value-type="float" office:value="14425" calcext:value-type="float">
            <text:p>14425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66956018518519" calcext:value-type="float">
            <text:p>0,00166956018518519000</text:p>
          </table:table-cell>
          <table:table-cell table:formula="of:=[.D579]-[.D57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25" office:value-type="float" office:value="14450" calcext:value-type="float">
            <text:p>14450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6724537037037" calcext:value-type="float">
            <text:p>0,00167245370370370000</text:p>
          </table:table-cell>
          <table:table-cell table:formula="of:=[.D580]-[.D57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25" office:value-type="float" office:value="14475" calcext:value-type="float">
            <text:p>14475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67534722222222" calcext:value-type="float">
            <text:p>0,00167534722222222000</text:p>
          </table:table-cell>
          <table:table-cell table:formula="of:=[.D581]-[.D58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25" office:value-type="float" office:value="14500" calcext:value-type="float">
            <text:p>1450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67824074074074" calcext:value-type="float">
            <text:p>0,00167824074074074000</text:p>
          </table:table-cell>
          <table:table-cell table:formula="of:=[.D582]-[.D58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25" office:value-type="float" office:value="14525" calcext:value-type="float">
            <text:p>14525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68113425925926" calcext:value-type="float">
            <text:p>0,00168113425925926000</text:p>
          </table:table-cell>
          <table:table-cell table:formula="of:=[.D583]-[.D58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25" office:value-type="float" office:value="14550" calcext:value-type="float">
            <text:p>14550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68402777777778" calcext:value-type="float">
            <text:p>0,00168402777777778000</text:p>
          </table:table-cell>
          <table:table-cell table:formula="of:=[.D584]-[.D58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25" office:value-type="float" office:value="14575" calcext:value-type="float">
            <text:p>14575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6869212962963" calcext:value-type="float">
            <text:p>0,00168692129629630000</text:p>
          </table:table-cell>
          <table:table-cell table:formula="of:=[.D585]-[.D58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25" office:value-type="float" office:value="14600" calcext:value-type="float">
            <text:p>14600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68981481481481" calcext:value-type="float">
            <text:p>0,00168981481481481000</text:p>
          </table:table-cell>
          <table:table-cell table:formula="of:=[.D586]-[.D58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25" office:value-type="float" office:value="14625" calcext:value-type="float">
            <text:p>1462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69270833333333" calcext:value-type="float">
            <text:p>0,00169270833333333000</text:p>
          </table:table-cell>
          <table:table-cell table:formula="of:=[.D587]-[.D58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25" office:value-type="float" office:value="14650" calcext:value-type="float">
            <text:p>14650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69560185185185" calcext:value-type="float">
            <text:p>0,00169560185185185000</text:p>
          </table:table-cell>
          <table:table-cell table:formula="of:=[.D588]-[.D58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25" office:value-type="float" office:value="14675" calcext:value-type="float">
            <text:p>14675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69849537037037" calcext:value-type="float">
            <text:p>0,00169849537037037000</text:p>
          </table:table-cell>
          <table:table-cell table:formula="of:=[.D589]-[.D58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25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70138888888889" calcext:value-type="float">
            <text:p>0,00170138888888889000</text:p>
          </table:table-cell>
          <table:table-cell table:formula="of:=[.D590]-[.D58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25" office:value-type="float" office:value="14725" calcext:value-type="float">
            <text:p>14725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70428240740741" calcext:value-type="float">
            <text:p>0,00170428240740741000</text:p>
          </table:table-cell>
          <table:table-cell table:formula="of:=[.D591]-[.D59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25" office:value-type="float" office:value="14750" calcext:value-type="float">
            <text:p>1475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70717592592593" calcext:value-type="float">
            <text:p>0,00170717592592593000</text:p>
          </table:table-cell>
          <table:table-cell table:formula="of:=[.D592]-[.D59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25" office:value-type="float" office:value="14775" calcext:value-type="float">
            <text:p>14775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71006944444444" calcext:value-type="float">
            <text:p>0,00171006944444444000</text:p>
          </table:table-cell>
          <table:table-cell table:formula="of:=[.D593]-[.D59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25" office:value-type="float" office:value="14800" calcext:value-type="float">
            <text:p>14800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71296296296296" calcext:value-type="float">
            <text:p>0,00171296296296296000</text:p>
          </table:table-cell>
          <table:table-cell table:formula="of:=[.D594]-[.D59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25" office:value-type="float" office:value="14825" calcext:value-type="float">
            <text:p>14825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71585648148148" calcext:value-type="float">
            <text:p>0,00171585648148148000</text:p>
          </table:table-cell>
          <table:table-cell table:formula="of:=[.D595]-[.D59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25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71875" calcext:value-type="float">
            <text:p>0,00171875000000000000</text:p>
          </table:table-cell>
          <table:table-cell table:formula="of:=[.D596]-[.D59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25" office:value-type="float" office:value="14875" calcext:value-type="float">
            <text:p>1487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72164351851852" calcext:value-type="float">
            <text:p>0,00172164351851852000</text:p>
          </table:table-cell>
          <table:table-cell table:formula="of:=[.D597]-[.D59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25" office:value-type="float" office:value="14900" calcext:value-type="float">
            <text:p>14900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72453703703704" calcext:value-type="float">
            <text:p>0,00172453703703704000</text:p>
          </table:table-cell>
          <table:table-cell table:formula="of:=[.D598]-[.D59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25" office:value-type="float" office:value="14925" calcext:value-type="float">
            <text:p>14925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72743055555556" calcext:value-type="float">
            <text:p>0,00172743055555556000</text:p>
          </table:table-cell>
          <table:table-cell table:formula="of:=[.D599]-[.D59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25" office:value-type="float" office:value="14950" calcext:value-type="float">
            <text:p>14950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73032407407407" calcext:value-type="float">
            <text:p>0,00173032407407407000</text:p>
          </table:table-cell>
          <table:table-cell table:formula="of:=[.D600]-[.D59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25" office:value-type="float" office:value="14975" calcext:value-type="float">
            <text:p>14975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73321759259259" calcext:value-type="float">
            <text:p>0,00173321759259259000</text:p>
          </table:table-cell>
          <table:table-cell table:formula="of:=[.D601]-[.D60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25" office:value-type="float" office:value="15000" calcext:value-type="float">
            <text:p>150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73611111111111" calcext:value-type="float">
            <text:p>0,00173611111111111000</text:p>
          </table:table-cell>
          <table:table-cell table:formula="of:=[.D602]-[.D60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25" office:value-type="float" office:value="15025" calcext:value-type="float">
            <text:p>15025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73900462962963" calcext:value-type="float">
            <text:p>0,00173900462962963000</text:p>
          </table:table-cell>
          <table:table-cell table:formula="of:=[.D603]-[.D60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25" office:value-type="float" office:value="15050" calcext:value-type="float">
            <text:p>15050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74189814814815" calcext:value-type="float">
            <text:p>0,00174189814814815000</text:p>
          </table:table-cell>
          <table:table-cell table:formula="of:=[.D604]-[.D60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25" office:value-type="float" office:value="15075" calcext:value-type="float">
            <text:p>15075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74479166666667" calcext:value-type="float">
            <text:p>0,00174479166666667000</text:p>
          </table:table-cell>
          <table:table-cell table:formula="of:=[.D605]-[.D60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25" office:value-type="float" office:value="15100" calcext:value-type="float">
            <text:p>15100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74768518518519" calcext:value-type="float">
            <text:p>0,00174768518518519000</text:p>
          </table:table-cell>
          <table:table-cell table:formula="of:=[.D606]-[.D60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25" office:value-type="float" office:value="15125" calcext:value-type="float">
            <text:p>1512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7505787037037" calcext:value-type="float">
            <text:p>0,00175057870370370000</text:p>
          </table:table-cell>
          <table:table-cell table:formula="of:=[.D607]-[.D60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25" office:value-type="float" office:value="15150" calcext:value-type="float">
            <text:p>15150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75347222222222" calcext:value-type="float">
            <text:p>0,00175347222222222000</text:p>
          </table:table-cell>
          <table:table-cell table:formula="of:=[.D608]-[.D60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25" office:value-type="float" office:value="15175" calcext:value-type="float">
            <text:p>15175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75636574074074" calcext:value-type="float">
            <text:p>0,00175636574074074000</text:p>
          </table:table-cell>
          <table:table-cell table:formula="of:=[.D609]-[.D60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25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75925925925926" calcext:value-type="float">
            <text:p>0,00175925925925926000</text:p>
          </table:table-cell>
          <table:table-cell table:formula="of:=[.D610]-[.D60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25" office:value-type="float" office:value="15225" calcext:value-type="float">
            <text:p>15225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76215277777778" calcext:value-type="float">
            <text:p>0,00176215277777778000</text:p>
          </table:table-cell>
          <table:table-cell table:formula="of:=[.D611]-[.D61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25" office:value-type="float" office:value="15250" calcext:value-type="float">
            <text:p>1525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7650462962963" calcext:value-type="float">
            <text:p>0,00176504629629630000</text:p>
          </table:table-cell>
          <table:table-cell table:formula="of:=[.D612]-[.D61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25" office:value-type="float" office:value="15275" calcext:value-type="float">
            <text:p>15275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76793981481481" calcext:value-type="float">
            <text:p>0,00176793981481481000</text:p>
          </table:table-cell>
          <table:table-cell table:formula="of:=[.D613]-[.D61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25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77083333333333" calcext:value-type="float">
            <text:p>0,00177083333333333000</text:p>
          </table:table-cell>
          <table:table-cell table:formula="of:=[.D614]-[.D61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25" office:value-type="float" office:value="15325" calcext:value-type="float">
            <text:p>15325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77372685185185" calcext:value-type="float">
            <text:p>0,00177372685185185000</text:p>
          </table:table-cell>
          <table:table-cell table:formula="of:=[.D615]-[.D61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25" office:value-type="float" office:value="15350" calcext:value-type="float">
            <text:p>15350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77662037037037" calcext:value-type="float">
            <text:p>0,00177662037037037000</text:p>
          </table:table-cell>
          <table:table-cell table:formula="of:=[.D616]-[.D61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25" office:value-type="float" office:value="15375" calcext:value-type="float">
            <text:p>1537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77951388888889" calcext:value-type="float">
            <text:p>0,00177951388888889000</text:p>
          </table:table-cell>
          <table:table-cell table:formula="of:=[.D617]-[.D61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25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78240740740741" calcext:value-type="float">
            <text:p>0,00178240740740741000</text:p>
          </table:table-cell>
          <table:table-cell table:formula="of:=[.D618]-[.D61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25" office:value-type="float" office:value="15425" calcext:value-type="float">
            <text:p>15425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78530092592593" calcext:value-type="float">
            <text:p>0,00178530092592593000</text:p>
          </table:table-cell>
          <table:table-cell table:formula="of:=[.D619]-[.D61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25" office:value-type="float" office:value="15450" calcext:value-type="float">
            <text:p>15450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78819444444444" calcext:value-type="float">
            <text:p>0,00178819444444444000</text:p>
          </table:table-cell>
          <table:table-cell table:formula="of:=[.D620]-[.D61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25" office:value-type="float" office:value="15475" calcext:value-type="float">
            <text:p>15475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79108796296296" calcext:value-type="float">
            <text:p>0,00179108796296296000</text:p>
          </table:table-cell>
          <table:table-cell table:formula="of:=[.D621]-[.D62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25" office:value-type="float" office:value="15500" calcext:value-type="float">
            <text:p>1550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79398148148148" calcext:value-type="float">
            <text:p>0,00179398148148148000</text:p>
          </table:table-cell>
          <table:table-cell table:formula="of:=[.D622]-[.D62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25" office:value-type="float" office:value="15525" calcext:value-type="float">
            <text:p>15525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796875" calcext:value-type="float">
            <text:p>0,00179687500000000000</text:p>
          </table:table-cell>
          <table:table-cell table:formula="of:=[.D623]-[.D62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25" office:value-type="float" office:value="15550" calcext:value-type="float">
            <text:p>15550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79976851851852" calcext:value-type="float">
            <text:p>0,00179976851851852000</text:p>
          </table:table-cell>
          <table:table-cell table:formula="of:=[.D624]-[.D62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25" office:value-type="float" office:value="15575" calcext:value-type="float">
            <text:p>15575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80266203703704" calcext:value-type="float">
            <text:p>0,00180266203703704000</text:p>
          </table:table-cell>
          <table:table-cell table:formula="of:=[.D625]-[.D62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25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80555555555556" calcext:value-type="float">
            <text:p>0,00180555555555556000</text:p>
          </table:table-cell>
          <table:table-cell table:formula="of:=[.D626]-[.D62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25" office:value-type="float" office:value="15625" calcext:value-type="float">
            <text:p>1562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80844907407407" calcext:value-type="float">
            <text:p>0,00180844907407407000</text:p>
          </table:table-cell>
          <table:table-cell table:formula="of:=[.D627]-[.D62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25" office:value-type="float" office:value="15650" calcext:value-type="float">
            <text:p>15650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81134259259259" calcext:value-type="float">
            <text:p>0,00181134259259259000</text:p>
          </table:table-cell>
          <table:table-cell table:formula="of:=[.D628]-[.D62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25" office:value-type="float" office:value="15675" calcext:value-type="float">
            <text:p>15675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81423611111111" calcext:value-type="float">
            <text:p>0,00181423611111111000</text:p>
          </table:table-cell>
          <table:table-cell table:formula="of:=[.D629]-[.D62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25" office:value-type="float" office:value="15700" calcext:value-type="float">
            <text:p>15700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81712962962963" calcext:value-type="float">
            <text:p>0,00181712962962963000</text:p>
          </table:table-cell>
          <table:table-cell table:formula="of:=[.D630]-[.D62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25" office:value-type="float" office:value="15725" calcext:value-type="float">
            <text:p>15725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82002314814815" calcext:value-type="float">
            <text:p>0,00182002314814815000</text:p>
          </table:table-cell>
          <table:table-cell table:formula="of:=[.D631]-[.D63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25" office:value-type="float" office:value="15750" calcext:value-type="float">
            <text:p>1575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82291666666667" calcext:value-type="float">
            <text:p>0,00182291666666667000</text:p>
          </table:table-cell>
          <table:table-cell table:formula="of:=[.D632]-[.D63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25" office:value-type="float" office:value="15775" calcext:value-type="float">
            <text:p>15775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82581018518519" calcext:value-type="float">
            <text:p>0,00182581018518518000</text:p>
          </table:table-cell>
          <table:table-cell table:formula="of:=[.D633]-[.D63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25" office:value-type="float" office:value="15800" calcext:value-type="float">
            <text:p>15800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8287037037037" calcext:value-type="float">
            <text:p>0,00182870370370370000</text:p>
          </table:table-cell>
          <table:table-cell table:formula="of:=[.D634]-[.D63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25" office:value-type="float" office:value="15825" calcext:value-type="float">
            <text:p>15825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83159722222222" calcext:value-type="float">
            <text:p>0,00183159722222222000</text:p>
          </table:table-cell>
          <table:table-cell table:formula="of:=[.D635]-[.D63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25" office:value-type="float" office:value="15850" calcext:value-type="float">
            <text:p>15850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83449074074074" calcext:value-type="float">
            <text:p>0,00183449074074074000</text:p>
          </table:table-cell>
          <table:table-cell table:formula="of:=[.D636]-[.D63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25" office:value-type="float" office:value="15875" calcext:value-type="float">
            <text:p>1587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83738425925926" calcext:value-type="float">
            <text:p>0,00183738425925926000</text:p>
          </table:table-cell>
          <table:table-cell table:formula="of:=[.D637]-[.D63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25" office:value-type="float" office:value="15900" calcext:value-type="float">
            <text:p>15900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84027777777778" calcext:value-type="float">
            <text:p>0,00184027777777778000</text:p>
          </table:table-cell>
          <table:table-cell table:formula="of:=[.D638]-[.D63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25" office:value-type="float" office:value="15925" calcext:value-type="float">
            <text:p>15925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8431712962963" calcext:value-type="float">
            <text:p>0,00184317129629630000</text:p>
          </table:table-cell>
          <table:table-cell table:formula="of:=[.D639]-[.D63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25" office:value-type="float" office:value="15950" calcext:value-type="float">
            <text:p>15950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84606481481482" calcext:value-type="float">
            <text:p>0,00184606481481482000</text:p>
          </table:table-cell>
          <table:table-cell table:formula="of:=[.D640]-[.D63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25" office:value-type="float" office:value="15975" calcext:value-type="float">
            <text:p>15975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84895833333333" calcext:value-type="float">
            <text:p>0,00184895833333333000</text:p>
          </table:table-cell>
          <table:table-cell table:formula="of:=[.D641]-[.D640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25" office:value-type="float" office:value="16000" calcext:value-type="float">
            <text:p>1600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185185185185185" calcext:value-type="float">
            <text:p>0,00185185185185185000</text:p>
          </table:table-cell>
          <table:table-cell table:formula="of:=[.D642]-[.D64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25" office:value-type="float" office:value="16025" calcext:value-type="float">
            <text:p>16025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185474537037037" calcext:value-type="float">
            <text:p>0,00185474537037037000</text:p>
          </table:table-cell>
          <table:table-cell table:formula="of:=[.D643]-[.D64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25" office:value-type="float" office:value="16050" calcext:value-type="float">
            <text:p>16050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185763888888889" calcext:value-type="float">
            <text:p>0,00185763888888889000</text:p>
          </table:table-cell>
          <table:table-cell table:formula="of:=[.D644]-[.D64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25" office:value-type="float" office:value="16075" calcext:value-type="float">
            <text:p>16075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186053240740741" calcext:value-type="float">
            <text:p>0,00186053240740741000</text:p>
          </table:table-cell>
          <table:table-cell table:formula="of:=[.D645]-[.D64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25" office:value-type="float" office:value="16100" calcext:value-type="float">
            <text:p>16100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186342592592593" calcext:value-type="float">
            <text:p>0,00186342592592593000</text:p>
          </table:table-cell>
          <table:table-cell table:formula="of:=[.D646]-[.D64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25" office:value-type="float" office:value="16125" calcext:value-type="float">
            <text:p>1612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186631944444444" calcext:value-type="float">
            <text:p>0,00186631944444444000</text:p>
          </table:table-cell>
          <table:table-cell table:formula="of:=[.D647]-[.D64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25" office:value-type="float" office:value="16150" calcext:value-type="float">
            <text:p>16150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186921296296296" calcext:value-type="float">
            <text:p>0,00186921296296296000</text:p>
          </table:table-cell>
          <table:table-cell table:formula="of:=[.D648]-[.D64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25" office:value-type="float" office:value="16175" calcext:value-type="float">
            <text:p>16175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187210648148148" calcext:value-type="float">
            <text:p>0,00187210648148148000</text:p>
          </table:table-cell>
          <table:table-cell table:formula="of:=[.D649]-[.D64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25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1875" calcext:value-type="float">
            <text:p>0,00187500000000000000</text:p>
          </table:table-cell>
          <table:table-cell table:formula="of:=[.D650]-[.D64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25" office:value-type="float" office:value="16225" calcext:value-type="float">
            <text:p>16225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187789351851852" calcext:value-type="float">
            <text:p>0,00187789351851852000</text:p>
          </table:table-cell>
          <table:table-cell table:formula="of:=[.D651]-[.D65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25" office:value-type="float" office:value="16250" calcext:value-type="float">
            <text:p>162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188078703703704" calcext:value-type="float">
            <text:p>0,00188078703703704000</text:p>
          </table:table-cell>
          <table:table-cell table:formula="of:=[.D652]-[.D65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25" office:value-type="float" office:value="16275" calcext:value-type="float">
            <text:p>16275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188368055555556" calcext:value-type="float">
            <text:p>0,00188368055555556000</text:p>
          </table:table-cell>
          <table:table-cell table:formula="of:=[.D653]-[.D652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25" office:value-type="float" office:value="16300" calcext:value-type="float">
            <text:p>16300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188657407407407" calcext:value-type="float">
            <text:p>0,00188657407407407000</text:p>
          </table:table-cell>
          <table:table-cell table:formula="of:=[.D654]-[.D65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25" office:value-type="float" office:value="16325" calcext:value-type="float">
            <text:p>16325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188946759259259" calcext:value-type="float">
            <text:p>0,00188946759259259000</text:p>
          </table:table-cell>
          <table:table-cell table:formula="of:=[.D655]-[.D65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25" office:value-type="float" office:value="16350" calcext:value-type="float">
            <text:p>16350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189236111111111" calcext:value-type="float">
            <text:p>0,00189236111111111000</text:p>
          </table:table-cell>
          <table:table-cell table:formula="of:=[.D656]-[.D65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25" office:value-type="float" office:value="16375" calcext:value-type="float">
            <text:p>1637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189525462962963" calcext:value-type="float">
            <text:p>0,00189525462962963000</text:p>
          </table:table-cell>
          <table:table-cell table:formula="of:=[.D657]-[.D65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25" office:value-type="float" office:value="16400" calcext:value-type="float">
            <text:p>16400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189814814814815" calcext:value-type="float">
            <text:p>0,00189814814814815000</text:p>
          </table:table-cell>
          <table:table-cell table:formula="of:=[.D658]-[.D657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25" office:value-type="float" office:value="16425" calcext:value-type="float">
            <text:p>16425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190104166666667" calcext:value-type="float">
            <text:p>0,00190104166666667000</text:p>
          </table:table-cell>
          <table:table-cell table:formula="of:=[.D659]-[.D65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25" office:value-type="float" office:value="16450" calcext:value-type="float">
            <text:p>16450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190393518518519" calcext:value-type="float">
            <text:p>0,00190393518518519000</text:p>
          </table:table-cell>
          <table:table-cell table:formula="of:=[.D660]-[.D65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25" office:value-type="float" office:value="16475" calcext:value-type="float">
            <text:p>16475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19068287037037" calcext:value-type="float">
            <text:p>0,00190682870370370000</text:p>
          </table:table-cell>
          <table:table-cell table:formula="of:=[.D661]-[.D66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25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190972222222222" calcext:value-type="float">
            <text:p>0,00190972222222222000</text:p>
          </table:table-cell>
          <table:table-cell table:formula="of:=[.D662]-[.D66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25" office:value-type="float" office:value="16525" calcext:value-type="float">
            <text:p>16525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191261574074074" calcext:value-type="float">
            <text:p>0,00191261574074074000</text:p>
          </table:table-cell>
          <table:table-cell table:formula="of:=[.D663]-[.D66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25" office:value-type="float" office:value="16550" calcext:value-type="float">
            <text:p>16550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191550925925926" calcext:value-type="float">
            <text:p>0,00191550925925926000</text:p>
          </table:table-cell>
          <table:table-cell table:formula="of:=[.D664]-[.D66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25" office:value-type="float" office:value="16575" calcext:value-type="float">
            <text:p>16575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191840277777778" calcext:value-type="float">
            <text:p>0,00191840277777778000</text:p>
          </table:table-cell>
          <table:table-cell table:formula="of:=[.D665]-[.D664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25" office:value-type="float" office:value="16600" calcext:value-type="float">
            <text:p>16600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19212962962963" calcext:value-type="float">
            <text:p>0,00192129629629630000</text:p>
          </table:table-cell>
          <table:table-cell table:formula="of:=[.D666]-[.D66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25" office:value-type="float" office:value="16625" calcext:value-type="float">
            <text:p>1662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192418981481481" calcext:value-type="float">
            <text:p>0,00192418981481481000</text:p>
          </table:table-cell>
          <table:table-cell table:formula="of:=[.D667]-[.D666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25" office:value-type="float" office:value="16650" calcext:value-type="float">
            <text:p>16650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192708333333333" calcext:value-type="float">
            <text:p>0,00192708333333333000</text:p>
          </table:table-cell>
          <table:table-cell table:formula="of:=[.D668]-[.D66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25" office:value-type="float" office:value="16675" calcext:value-type="float">
            <text:p>16675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192997685185185" calcext:value-type="float">
            <text:p>0,00192997685185185000</text:p>
          </table:table-cell>
          <table:table-cell table:formula="of:=[.D669]-[.D668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25" office:value-type="float" office:value="16700" calcext:value-type="float">
            <text:p>16700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193287037037037" calcext:value-type="float">
            <text:p>0,00193287037037037000</text:p>
          </table:table-cell>
          <table:table-cell table:formula="of:=[.D670]-[.D669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25" office:value-type="float" office:value="16725" calcext:value-type="float">
            <text:p>16725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193576388888889" calcext:value-type="float">
            <text:p>0,00193576388888889000</text:p>
          </table:table-cell>
          <table:table-cell table:formula="of:=[.D671]-[.D67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25" office:value-type="float" office:value="16750" calcext:value-type="float">
            <text:p>1675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193865740740741" calcext:value-type="float">
            <text:p>0,00193865740740741000</text:p>
          </table:table-cell>
          <table:table-cell table:formula="of:=[.D672]-[.D671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25" office:value-type="float" office:value="16775" calcext:value-type="float">
            <text:p>16775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194155092592593" calcext:value-type="float">
            <text:p>0,00194155092592593000</text:p>
          </table:table-cell>
          <table:table-cell table:formula="of:=[.D673]-[.D67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25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194444444444444" calcext:value-type="float">
            <text:p>0,00194444444444444000</text:p>
          </table:table-cell>
          <table:table-cell table:formula="of:=[.D674]-[.D673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25" office:value-type="float" office:value="16825" calcext:value-type="float">
            <text:p>16825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194733796296296" calcext:value-type="float">
            <text:p>0,00194733796296296000</text:p>
          </table:table-cell>
          <table:table-cell table:formula="of:=[.D675]-[.D67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25" office:value-type="float" office:value="16850" calcext:value-type="float">
            <text:p>16850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195023148148148" calcext:value-type="float">
            <text:p>0,00195023148148148000</text:p>
          </table:table-cell>
          <table:table-cell table:formula="of:=[.D676]-[.D675]" office:value-type="float" office:value="0.00000289351851851861" calcext:value-type="float">
            <text:p>0,0000028935185185186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25" office:value-type="float" office:value="16875" calcext:value-type="float">
            <text:p>1687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1953125" calcext:value-type="float">
            <text:p>0,00195312500000000000</text:p>
          </table:table-cell>
          <table:table-cell table:formula="of:=[.D677]-[.D67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25" office:value-type="float" office:value="16900" calcext:value-type="float">
            <text:p>16900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195601851851852" calcext:value-type="float">
            <text:p>0,00195601851851852000</text:p>
          </table:table-cell>
          <table:table-cell table:formula="of:=[.D678]-[.D677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25" office:value-type="float" office:value="16925" calcext:value-type="float">
            <text:p>16925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195891203703704" calcext:value-type="float">
            <text:p>0,00195891203703704000</text:p>
          </table:table-cell>
          <table:table-cell table:formula="of:=[.D679]-[.D67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25" office:value-type="float" office:value="16950" calcext:value-type="float">
            <text:p>16950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196180555555556" calcext:value-type="float">
            <text:p>0,00196180555555556000</text:p>
          </table:table-cell>
          <table:table-cell table:formula="of:=[.D680]-[.D67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25" office:value-type="float" office:value="16975" calcext:value-type="float">
            <text:p>16975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196469907407407" calcext:value-type="float">
            <text:p>0,00196469907407407000</text:p>
          </table:table-cell>
          <table:table-cell table:formula="of:=[.D681]-[.D68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25" office:value-type="float" office:value="17000" calcext:value-type="float">
            <text:p>1700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196759259259259" calcext:value-type="float">
            <text:p>0,00196759259259259000</text:p>
          </table:table-cell>
          <table:table-cell table:formula="of:=[.D682]-[.D681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25" office:value-type="float" office:value="17025" calcext:value-type="float">
            <text:p>17025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197048611111111" calcext:value-type="float">
            <text:p>0,00197048611111111000</text:p>
          </table:table-cell>
          <table:table-cell table:formula="of:=[.D683]-[.D68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25" office:value-type="float" office:value="17050" calcext:value-type="float">
            <text:p>17050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197337962962963" calcext:value-type="float">
            <text:p>0,00197337962962963000</text:p>
          </table:table-cell>
          <table:table-cell table:formula="of:=[.D684]-[.D68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25" office:value-type="float" office:value="17075" calcext:value-type="float">
            <text:p>17075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197627314814815" calcext:value-type="float">
            <text:p>0,00197627314814815000</text:p>
          </table:table-cell>
          <table:table-cell table:formula="of:=[.D685]-[.D684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25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197916666666667" calcext:value-type="float">
            <text:p>0,00197916666666667000</text:p>
          </table:table-cell>
          <table:table-cell table:formula="of:=[.D686]-[.D68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25" office:value-type="float" office:value="17125" calcext:value-type="float">
            <text:p>1712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198206018518519" calcext:value-type="float">
            <text:p>0,00198206018518519000</text:p>
          </table:table-cell>
          <table:table-cell table:formula="of:=[.D687]-[.D68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25" office:value-type="float" office:value="17150" calcext:value-type="float">
            <text:p>17150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19849537037037" calcext:value-type="float">
            <text:p>0,00198495370370370000</text:p>
          </table:table-cell>
          <table:table-cell table:formula="of:=[.D688]-[.D68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25" office:value-type="float" office:value="17175" calcext:value-type="float">
            <text:p>17175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198784722222222" calcext:value-type="float">
            <text:p>0,00198784722222222000</text:p>
          </table:table-cell>
          <table:table-cell table:formula="of:=[.D689]-[.D688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25" office:value-type="float" office:value="17200" calcext:value-type="float">
            <text:p>17200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199074074074074" calcext:value-type="float">
            <text:p>0,00199074074074074000</text:p>
          </table:table-cell>
          <table:table-cell table:formula="of:=[.D690]-[.D68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25" office:value-type="float" office:value="17225" calcext:value-type="float">
            <text:p>17225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199363425925926" calcext:value-type="float">
            <text:p>0,00199363425925926000</text:p>
          </table:table-cell>
          <table:table-cell table:formula="of:=[.D691]-[.D69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25" office:value-type="float" office:value="17250" calcext:value-type="float">
            <text:p>1725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199652777777778" calcext:value-type="float">
            <text:p>0,00199652777777778000</text:p>
          </table:table-cell>
          <table:table-cell table:formula="of:=[.D692]-[.D691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25" office:value-type="float" office:value="17275" calcext:value-type="float">
            <text:p>17275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19994212962963" calcext:value-type="float">
            <text:p>0,00199942129629630000</text:p>
          </table:table-cell>
          <table:table-cell table:formula="of:=[.D693]-[.D69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25" office:value-type="float" office:value="17300" calcext:value-type="float">
            <text:p>17300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200231481481482" calcext:value-type="float">
            <text:p>0,00200231481481482000</text:p>
          </table:table-cell>
          <table:table-cell table:formula="of:=[.D694]-[.D69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25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200520833333333" calcext:value-type="float">
            <text:p>0,00200520833333333000</text:p>
          </table:table-cell>
          <table:table-cell table:formula="of:=[.D695]-[.D694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25" office:value-type="float" office:value="17350" calcext:value-type="float">
            <text:p>17350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200810185185185" calcext:value-type="float">
            <text:p>0,00200810185185185000</text:p>
          </table:table-cell>
          <table:table-cell table:formula="of:=[.D696]-[.D69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25" office:value-type="float" office:value="17375" calcext:value-type="float">
            <text:p>1737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201099537037037" calcext:value-type="float">
            <text:p>0,00201099537037037000</text:p>
          </table:table-cell>
          <table:table-cell table:formula="of:=[.D697]-[.D69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25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201388888888889" calcext:value-type="float">
            <text:p>0,00201388888888889000</text:p>
          </table:table-cell>
          <table:table-cell table:formula="of:=[.D698]-[.D69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25" office:value-type="float" office:value="17425" calcext:value-type="float">
            <text:p>17425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201678240740741" calcext:value-type="float">
            <text:p>0,00201678240740741000</text:p>
          </table:table-cell>
          <table:table-cell table:formula="of:=[.D699]-[.D698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25" office:value-type="float" office:value="17450" calcext:value-type="float">
            <text:p>17450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201967592592593" calcext:value-type="float">
            <text:p>0,00201967592592593000</text:p>
          </table:table-cell>
          <table:table-cell table:formula="of:=[.D700]-[.D69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25" office:value-type="float" office:value="17475" calcext:value-type="float">
            <text:p>17475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202256944444444" calcext:value-type="float">
            <text:p>0,00202256944444444000</text:p>
          </table:table-cell>
          <table:table-cell table:formula="of:=[.D701]-[.D70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25" office:value-type="float" office:value="17500" calcext:value-type="float">
            <text:p>175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202546296296296" calcext:value-type="float">
            <text:p>0,00202546296296296000</text:p>
          </table:table-cell>
          <table:table-cell table:formula="of:=[.D702]-[.D701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25" office:value-type="float" office:value="17525" calcext:value-type="float">
            <text:p>17525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202835648148148" calcext:value-type="float">
            <text:p>0,00202835648148148000</text:p>
          </table:table-cell>
          <table:table-cell table:formula="of:=[.D703]-[.D70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25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203125" calcext:value-type="float">
            <text:p>0,00203125000000000000</text:p>
          </table:table-cell>
          <table:table-cell table:formula="of:=[.D704]-[.D70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25" office:value-type="float" office:value="17575" calcext:value-type="float">
            <text:p>17575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203414351851852" calcext:value-type="float">
            <text:p>0,00203414351851852000</text:p>
          </table:table-cell>
          <table:table-cell table:formula="of:=[.D705]-[.D70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25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203703703703704" calcext:value-type="float">
            <text:p>0,00203703703703704000</text:p>
          </table:table-cell>
          <table:table-cell table:formula="of:=[.D706]-[.D705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25" office:value-type="float" office:value="17625" calcext:value-type="float">
            <text:p>1762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203993055555556" calcext:value-type="float">
            <text:p>0,00203993055555556000</text:p>
          </table:table-cell>
          <table:table-cell table:formula="of:=[.D707]-[.D70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25" office:value-type="float" office:value="17650" calcext:value-type="float">
            <text:p>17650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204282407407407" calcext:value-type="float">
            <text:p>0,00204282407407407000</text:p>
          </table:table-cell>
          <table:table-cell table:formula="of:=[.D708]-[.D70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25" office:value-type="float" office:value="17675" calcext:value-type="float">
            <text:p>17675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204571759259259" calcext:value-type="float">
            <text:p>0,00204571759259259000</text:p>
          </table:table-cell>
          <table:table-cell table:formula="of:=[.D709]-[.D708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25" office:value-type="float" office:value="17700" calcext:value-type="float">
            <text:p>17700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204861111111111" calcext:value-type="float">
            <text:p>0,00204861111111111000</text:p>
          </table:table-cell>
          <table:table-cell table:formula="of:=[.D710]-[.D70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25" office:value-type="float" office:value="17725" calcext:value-type="float">
            <text:p>17725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205150462962963" calcext:value-type="float">
            <text:p>0,00205150462962963000</text:p>
          </table:table-cell>
          <table:table-cell table:formula="of:=[.D711]-[.D71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25" office:value-type="float" office:value="17750" calcext:value-type="float">
            <text:p>1775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205439814814815" calcext:value-type="float">
            <text:p>0,00205439814814815000</text:p>
          </table:table-cell>
          <table:table-cell table:formula="of:=[.D712]-[.D71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25" office:value-type="float" office:value="17775" calcext:value-type="float">
            <text:p>17775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205729166666667" calcext:value-type="float">
            <text:p>0,00205729166666667000</text:p>
          </table:table-cell>
          <table:table-cell table:formula="of:=[.D713]-[.D712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25" office:value-type="float" office:value="17800" calcext:value-type="float">
            <text:p>17800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206018518518519" calcext:value-type="float">
            <text:p>0,00206018518518519000</text:p>
          </table:table-cell>
          <table:table-cell table:formula="of:=[.D714]-[.D71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25" office:value-type="float" office:value="17825" calcext:value-type="float">
            <text:p>17825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20630787037037" calcext:value-type="float">
            <text:p>0,00206307870370370000</text:p>
          </table:table-cell>
          <table:table-cell table:formula="of:=[.D715]-[.D71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25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206597222222222" calcext:value-type="float">
            <text:p>0,00206597222222222000</text:p>
          </table:table-cell>
          <table:table-cell table:formula="of:=[.D716]-[.D715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25" office:value-type="float" office:value="17875" calcext:value-type="float">
            <text:p>1787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206886574074074" calcext:value-type="float">
            <text:p>0,00206886574074074000</text:p>
          </table:table-cell>
          <table:table-cell table:formula="of:=[.D717]-[.D71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25" office:value-type="float" office:value="17900" calcext:value-type="float">
            <text:p>17900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207175925925926" calcext:value-type="float">
            <text:p>0,00207175925925926000</text:p>
          </table:table-cell>
          <table:table-cell table:formula="of:=[.D718]-[.D71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25" office:value-type="float" office:value="17925" calcext:value-type="float">
            <text:p>17925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207465277777778" calcext:value-type="float">
            <text:p>0,00207465277777778000</text:p>
          </table:table-cell>
          <table:table-cell table:formula="of:=[.D719]-[.D71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25" office:value-type="float" office:value="17950" calcext:value-type="float">
            <text:p>17950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20775462962963" calcext:value-type="float">
            <text:p>0,00207754629629630000</text:p>
          </table:table-cell>
          <table:table-cell table:formula="of:=[.D720]-[.D719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25" office:value-type="float" office:value="17975" calcext:value-type="float">
            <text:p>17975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208043981481482" calcext:value-type="float">
            <text:p>0,00208043981481482000</text:p>
          </table:table-cell>
          <table:table-cell table:formula="of:=[.D721]-[.D72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25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208333333333333" calcext:value-type="float">
            <text:p>0,00208333333333333000</text:p>
          </table:table-cell>
          <table:table-cell table:formula="of:=[.D722]-[.D72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25" office:value-type="float" office:value="18025" calcext:value-type="float">
            <text:p>18025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208622685185185" calcext:value-type="float">
            <text:p>0,00208622685185185000</text:p>
          </table:table-cell>
          <table:table-cell table:formula="of:=[.D723]-[.D722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25" office:value-type="float" office:value="18050" calcext:value-type="float">
            <text:p>18050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208912037037037" calcext:value-type="float">
            <text:p>0,00208912037037037000</text:p>
          </table:table-cell>
          <table:table-cell table:formula="of:=[.D724]-[.D72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25" office:value-type="float" office:value="18075" calcext:value-type="float">
            <text:p>18075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209201388888889" calcext:value-type="float">
            <text:p>0,00209201388888889000</text:p>
          </table:table-cell>
          <table:table-cell table:formula="of:=[.D725]-[.D72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25" office:value-type="float" office:value="18100" calcext:value-type="float">
            <text:p>18100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209490740740741" calcext:value-type="float">
            <text:p>0,00209490740740741000</text:p>
          </table:table-cell>
          <table:table-cell table:formula="of:=[.D726]-[.D725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25" office:value-type="float" office:value="18125" calcext:value-type="float">
            <text:p>1812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209780092592593" calcext:value-type="float">
            <text:p>0,00209780092592593000</text:p>
          </table:table-cell>
          <table:table-cell table:formula="of:=[.D727]-[.D72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25" office:value-type="float" office:value="18150" calcext:value-type="float">
            <text:p>18150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210069444444444" calcext:value-type="float">
            <text:p>0,00210069444444444000</text:p>
          </table:table-cell>
          <table:table-cell table:formula="of:=[.D728]-[.D72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25" office:value-type="float" office:value="18175" calcext:value-type="float">
            <text:p>18175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210358796296296" calcext:value-type="float">
            <text:p>0,00210358796296296000</text:p>
          </table:table-cell>
          <table:table-cell table:formula="of:=[.D729]-[.D72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25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210648148148148" calcext:value-type="float">
            <text:p>0,00210648148148148000</text:p>
          </table:table-cell>
          <table:table-cell table:formula="of:=[.D730]-[.D729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25" office:value-type="float" office:value="18225" calcext:value-type="float">
            <text:p>18225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2109375" calcext:value-type="float">
            <text:p>0,00210937500000000000</text:p>
          </table:table-cell>
          <table:table-cell table:formula="of:=[.D731]-[.D73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25" office:value-type="float" office:value="18250" calcext:value-type="float">
            <text:p>1825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211226851851852" calcext:value-type="float">
            <text:p>0,00211226851851852000</text:p>
          </table:table-cell>
          <table:table-cell table:formula="of:=[.D732]-[.D73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25" office:value-type="float" office:value="18275" calcext:value-type="float">
            <text:p>18275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211516203703704" calcext:value-type="float">
            <text:p>0,00211516203703704000</text:p>
          </table:table-cell>
          <table:table-cell table:formula="of:=[.D733]-[.D732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25" office:value-type="float" office:value="18300" calcext:value-type="float">
            <text:p>18300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211805555555556" calcext:value-type="float">
            <text:p>0,00211805555555556000</text:p>
          </table:table-cell>
          <table:table-cell table:formula="of:=[.D734]-[.D73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25" office:value-type="float" office:value="18325" calcext:value-type="float">
            <text:p>18325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212094907407407" calcext:value-type="float">
            <text:p>0,00212094907407407000</text:p>
          </table:table-cell>
          <table:table-cell table:formula="of:=[.D735]-[.D73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25" office:value-type="float" office:value="18350" calcext:value-type="float">
            <text:p>18350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212384259259259" calcext:value-type="float">
            <text:p>0,00212384259259259000</text:p>
          </table:table-cell>
          <table:table-cell table:formula="of:=[.D736]-[.D73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25" office:value-type="float" office:value="18375" calcext:value-type="float">
            <text:p>18375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212673611111111" calcext:value-type="float">
            <text:p>0,00212673611111111000</text:p>
          </table:table-cell>
          <table:table-cell table:formula="of:=[.D737]-[.D736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25" office:value-type="float" office:value="18400" calcext:value-type="float">
            <text:p>18400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212962962962963" calcext:value-type="float">
            <text:p>0,00212962962962963000</text:p>
          </table:table-cell>
          <table:table-cell table:formula="of:=[.D738]-[.D73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25" office:value-type="float" office:value="18425" calcext:value-type="float">
            <text:p>18425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213252314814815" calcext:value-type="float">
            <text:p>0,00213252314814815000</text:p>
          </table:table-cell>
          <table:table-cell table:formula="of:=[.D739]-[.D73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25" office:value-type="float" office:value="18450" calcext:value-type="float">
            <text:p>18450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213541666666667" calcext:value-type="float">
            <text:p>0,00213541666666667000</text:p>
          </table:table-cell>
          <table:table-cell table:formula="of:=[.D740]-[.D739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25" office:value-type="float" office:value="18475" calcext:value-type="float">
            <text:p>18475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213831018518519" calcext:value-type="float">
            <text:p>0,00213831018518519000</text:p>
          </table:table-cell>
          <table:table-cell table:formula="of:=[.D741]-[.D74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25" office:value-type="float" office:value="18500" calcext:value-type="float">
            <text:p>1850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21412037037037" calcext:value-type="float">
            <text:p>0,00214120370370370000</text:p>
          </table:table-cell>
          <table:table-cell table:formula="of:=[.D742]-[.D74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25" office:value-type="float" office:value="18525" calcext:value-type="float">
            <text:p>18525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214409722222222" calcext:value-type="float">
            <text:p>0,00214409722222222000</text:p>
          </table:table-cell>
          <table:table-cell table:formula="of:=[.D743]-[.D74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25" office:value-type="float" office:value="18550" calcext:value-type="float">
            <text:p>18550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214699074074074" calcext:value-type="float">
            <text:p>0,00214699074074074000</text:p>
          </table:table-cell>
          <table:table-cell table:formula="of:=[.D744]-[.D743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25" office:value-type="float" office:value="18575" calcext:value-type="float">
            <text:p>18575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214988425925926" calcext:value-type="float">
            <text:p>0,00214988425925926000</text:p>
          </table:table-cell>
          <table:table-cell table:formula="of:=[.D745]-[.D74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25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215277777777778" calcext:value-type="float">
            <text:p>0,00215277777777778000</text:p>
          </table:table-cell>
          <table:table-cell table:formula="of:=[.D746]-[.D74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25" office:value-type="float" office:value="18625" calcext:value-type="float">
            <text:p>18625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21556712962963" calcext:value-type="float">
            <text:p>0,00215567129629630000</text:p>
          </table:table-cell>
          <table:table-cell table:formula="of:=[.D747]-[.D746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25" office:value-type="float" office:value="18650" calcext:value-type="float">
            <text:p>18650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215856481481482" calcext:value-type="float">
            <text:p>0,00215856481481482000</text:p>
          </table:table-cell>
          <table:table-cell table:formula="of:=[.D748]-[.D74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25" office:value-type="float" office:value="18675" calcext:value-type="float">
            <text:p>18675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216145833333333" calcext:value-type="float">
            <text:p>0,00216145833333333000</text:p>
          </table:table-cell>
          <table:table-cell table:formula="of:=[.D749]-[.D74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25" office:value-type="float" office:value="18700" calcext:value-type="float">
            <text:p>18700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216435185185185" calcext:value-type="float">
            <text:p>0,00216435185185185000</text:p>
          </table:table-cell>
          <table:table-cell table:formula="of:=[.D750]-[.D74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25" office:value-type="float" office:value="18725" calcext:value-type="float">
            <text:p>18725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216724537037037" calcext:value-type="float">
            <text:p>0,00216724537037037000</text:p>
          </table:table-cell>
          <table:table-cell table:formula="of:=[.D751]-[.D750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25" office:value-type="float" office:value="18750" calcext:value-type="float">
            <text:p>1875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217013888888889" calcext:value-type="float">
            <text:p>0,00217013888888889000</text:p>
          </table:table-cell>
          <table:table-cell table:formula="of:=[.D752]-[.D75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25" office:value-type="float" office:value="18775" calcext:value-type="float">
            <text:p>18775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217303240740741" calcext:value-type="float">
            <text:p>0,00217303240740741000</text:p>
          </table:table-cell>
          <table:table-cell table:formula="of:=[.D753]-[.D75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25" office:value-type="float" office:value="18800" calcext:value-type="float">
            <text:p>18800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217592592592593" calcext:value-type="float">
            <text:p>0,00217592592592593000</text:p>
          </table:table-cell>
          <table:table-cell table:formula="of:=[.D754]-[.D753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25" office:value-type="float" office:value="18825" calcext:value-type="float">
            <text:p>18825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217881944444444" calcext:value-type="float">
            <text:p>0,00217881944444444000</text:p>
          </table:table-cell>
          <table:table-cell table:formula="of:=[.D755]-[.D75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25" office:value-type="float" office:value="18850" calcext:value-type="float">
            <text:p>18850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218171296296296" calcext:value-type="float">
            <text:p>0,00218171296296296000</text:p>
          </table:table-cell>
          <table:table-cell table:formula="of:=[.D756]-[.D75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25" office:value-type="float" office:value="18875" calcext:value-type="float">
            <text:p>18875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218460648148148" calcext:value-type="float">
            <text:p>0,00218460648148148000</text:p>
          </table:table-cell>
          <table:table-cell table:formula="of:=[.D757]-[.D756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25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21875" calcext:value-type="float">
            <text:p>0,00218750000000000000</text:p>
          </table:table-cell>
          <table:table-cell table:formula="of:=[.D758]-[.D75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25" office:value-type="float" office:value="18925" calcext:value-type="float">
            <text:p>18925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219039351851852" calcext:value-type="float">
            <text:p>0,00219039351851852000</text:p>
          </table:table-cell>
          <table:table-cell table:formula="of:=[.D759]-[.D75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25" office:value-type="float" office:value="18950" calcext:value-type="float">
            <text:p>18950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219328703703704" calcext:value-type="float">
            <text:p>0,00219328703703704000</text:p>
          </table:table-cell>
          <table:table-cell table:formula="of:=[.D760]-[.D75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25" office:value-type="float" office:value="18975" calcext:value-type="float">
            <text:p>18975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219618055555556" calcext:value-type="float">
            <text:p>0,00219618055555556000</text:p>
          </table:table-cell>
          <table:table-cell table:formula="of:=[.D761]-[.D760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25" office:value-type="float" office:value="19000" calcext:value-type="float">
            <text:p>1900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219907407407407" calcext:value-type="float">
            <text:p>0,00219907407407407000</text:p>
          </table:table-cell>
          <table:table-cell table:formula="of:=[.D762]-[.D76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25" office:value-type="float" office:value="19025" calcext:value-type="float">
            <text:p>19025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220196759259259" calcext:value-type="float">
            <text:p>0,00220196759259259000</text:p>
          </table:table-cell>
          <table:table-cell table:formula="of:=[.D763]-[.D76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25" office:value-type="float" office:value="19050" calcext:value-type="float">
            <text:p>19050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220486111111111" calcext:value-type="float">
            <text:p>0,00220486111111111000</text:p>
          </table:table-cell>
          <table:table-cell table:formula="of:=[.D764]-[.D763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25" office:value-type="float" office:value="19075" calcext:value-type="float">
            <text:p>19075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220775462962963" calcext:value-type="float">
            <text:p>0,00220775462962963000</text:p>
          </table:table-cell>
          <table:table-cell table:formula="of:=[.D765]-[.D76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25" office:value-type="float" office:value="19100" calcext:value-type="float">
            <text:p>19100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221064814814815" calcext:value-type="float">
            <text:p>0,00221064814814815000</text:p>
          </table:table-cell>
          <table:table-cell table:formula="of:=[.D766]-[.D76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25" office:value-type="float" office:value="19125" calcext:value-type="float">
            <text:p>19125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221354166666667" calcext:value-type="float">
            <text:p>0,00221354166666667000</text:p>
          </table:table-cell>
          <table:table-cell table:formula="of:=[.D767]-[.D76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25" office:value-type="float" office:value="19150" calcext:value-type="float">
            <text:p>19150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221643518518519" calcext:value-type="float">
            <text:p>0,00221643518518519000</text:p>
          </table:table-cell>
          <table:table-cell table:formula="of:=[.D768]-[.D767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25" office:value-type="float" office:value="19175" calcext:value-type="float">
            <text:p>19175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22193287037037" calcext:value-type="float">
            <text:p>0,00221932870370370000</text:p>
          </table:table-cell>
          <table:table-cell table:formula="of:=[.D769]-[.D76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25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222222222222222" calcext:value-type="float">
            <text:p>0,00222222222222222000</text:p>
          </table:table-cell>
          <table:table-cell table:formula="of:=[.D770]-[.D76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25" office:value-type="float" office:value="19225" calcext:value-type="float">
            <text:p>19225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222511574074074" calcext:value-type="float">
            <text:p>0,00222511574074074000</text:p>
          </table:table-cell>
          <table:table-cell table:formula="of:=[.D771]-[.D770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25" office:value-type="float" office:value="19250" calcext:value-type="float">
            <text:p>1925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222800925925926" calcext:value-type="float">
            <text:p>0,00222800925925926000</text:p>
          </table:table-cell>
          <table:table-cell table:formula="of:=[.D772]-[.D77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25" office:value-type="float" office:value="19275" calcext:value-type="float">
            <text:p>19275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223090277777778" calcext:value-type="float">
            <text:p>0,00223090277777778000</text:p>
          </table:table-cell>
          <table:table-cell table:formula="of:=[.D773]-[.D77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25" office:value-type="float" office:value="19300" calcext:value-type="float">
            <text:p>19300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22337962962963" calcext:value-type="float">
            <text:p>0,00223379629629630000</text:p>
          </table:table-cell>
          <table:table-cell table:formula="of:=[.D774]-[.D77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25" office:value-type="float" office:value="19325" calcext:value-type="float">
            <text:p>19325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223668981481481" calcext:value-type="float">
            <text:p>0,00223668981481481000</text:p>
          </table:table-cell>
          <table:table-cell table:formula="of:=[.D775]-[.D774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25" office:value-type="float" office:value="19350" calcext:value-type="float">
            <text:p>19350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223958333333333" calcext:value-type="float">
            <text:p>0,00223958333333333000</text:p>
          </table:table-cell>
          <table:table-cell table:formula="of:=[.D776]-[.D77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25" office:value-type="float" office:value="19375" calcext:value-type="float">
            <text:p>19375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224247685185185" calcext:value-type="float">
            <text:p>0,00224247685185185000</text:p>
          </table:table-cell>
          <table:table-cell table:formula="of:=[.D777]-[.D77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25" office:value-type="float" office:value="19400" calcext:value-type="float">
            <text:p>19400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224537037037037" calcext:value-type="float">
            <text:p>0,00224537037037037000</text:p>
          </table:table-cell>
          <table:table-cell table:formula="of:=[.D778]-[.D777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25" office:value-type="float" office:value="19425" calcext:value-type="float">
            <text:p>19425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224826388888889" calcext:value-type="float">
            <text:p>0,00224826388888889000</text:p>
          </table:table-cell>
          <table:table-cell table:formula="of:=[.D779]-[.D77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25" office:value-type="float" office:value="19450" calcext:value-type="float">
            <text:p>19450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225115740740741" calcext:value-type="float">
            <text:p>0,00225115740740741000</text:p>
          </table:table-cell>
          <table:table-cell table:formula="of:=[.D780]-[.D77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25" office:value-type="float" office:value="19475" calcext:value-type="float">
            <text:p>19475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225405092592593" calcext:value-type="float">
            <text:p>0,00225405092592593000</text:p>
          </table:table-cell>
          <table:table-cell table:formula="of:=[.D781]-[.D78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25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225694444444444" calcext:value-type="float">
            <text:p>0,00225694444444444000</text:p>
          </table:table-cell>
          <table:table-cell table:formula="of:=[.D782]-[.D781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25" office:value-type="float" office:value="19525" calcext:value-type="float">
            <text:p>19525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225983796296296" calcext:value-type="float">
            <text:p>0,00225983796296296000</text:p>
          </table:table-cell>
          <table:table-cell table:formula="of:=[.D783]-[.D78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25" office:value-type="float" office:value="19550" calcext:value-type="float">
            <text:p>19550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226273148148148" calcext:value-type="float">
            <text:p>0,00226273148148148000</text:p>
          </table:table-cell>
          <table:table-cell table:formula="of:=[.D784]-[.D78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25" office:value-type="float" office:value="19575" calcext:value-type="float">
            <text:p>19575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2265625" calcext:value-type="float">
            <text:p>0,00226562500000000000</text:p>
          </table:table-cell>
          <table:table-cell table:formula="of:=[.D785]-[.D784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25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226851851851852" calcext:value-type="float">
            <text:p>0,00226851851851852000</text:p>
          </table:table-cell>
          <table:table-cell table:formula="of:=[.D786]-[.D78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25" office:value-type="float" office:value="19625" calcext:value-type="float">
            <text:p>19625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227141203703704" calcext:value-type="float">
            <text:p>0,00227141203703704000</text:p>
          </table:table-cell>
          <table:table-cell table:formula="of:=[.D787]-[.D78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25" office:value-type="float" office:value="19650" calcext:value-type="float">
            <text:p>19650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227430555555556" calcext:value-type="float">
            <text:p>0,00227430555555556000</text:p>
          </table:table-cell>
          <table:table-cell table:formula="of:=[.D788]-[.D787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25" office:value-type="float" office:value="19675" calcext:value-type="float">
            <text:p>19675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227719907407407" calcext:value-type="float">
            <text:p>0,00227719907407407000</text:p>
          </table:table-cell>
          <table:table-cell table:formula="of:=[.D789]-[.D78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25" office:value-type="float" office:value="19700" calcext:value-type="float">
            <text:p>19700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228009259259259" calcext:value-type="float">
            <text:p>0,00228009259259259000</text:p>
          </table:table-cell>
          <table:table-cell table:formula="of:=[.D790]-[.D78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25" office:value-type="float" office:value="19725" calcext:value-type="float">
            <text:p>19725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228298611111111" calcext:value-type="float">
            <text:p>0,00228298611111111000</text:p>
          </table:table-cell>
          <table:table-cell table:formula="of:=[.D791]-[.D79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25" office:value-type="float" office:value="19750" calcext:value-type="float">
            <text:p>1975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228587962962963" calcext:value-type="float">
            <text:p>0,00228587962962963000</text:p>
          </table:table-cell>
          <table:table-cell table:formula="of:=[.D792]-[.D791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25" office:value-type="float" office:value="19775" calcext:value-type="float">
            <text:p>19775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228877314814815" calcext:value-type="float">
            <text:p>0,00228877314814815000</text:p>
          </table:table-cell>
          <table:table-cell table:formula="of:=[.D793]-[.D79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25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229166666666667" calcext:value-type="float">
            <text:p>0,00229166666666667000</text:p>
          </table:table-cell>
          <table:table-cell table:formula="of:=[.D794]-[.D79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25" office:value-type="float" office:value="19825" calcext:value-type="float">
            <text:p>19825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229456018518519" calcext:value-type="float">
            <text:p>0,00229456018518519000</text:p>
          </table:table-cell>
          <table:table-cell table:formula="of:=[.D795]-[.D794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25" office:value-type="float" office:value="19850" calcext:value-type="float">
            <text:p>19850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22974537037037" calcext:value-type="float">
            <text:p>0,00229745370370370000</text:p>
          </table:table-cell>
          <table:table-cell table:formula="of:=[.D796]-[.D79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25" office:value-type="float" office:value="19875" calcext:value-type="float">
            <text:p>19875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230034722222222" calcext:value-type="float">
            <text:p>0,00230034722222222000</text:p>
          </table:table-cell>
          <table:table-cell table:formula="of:=[.D797]-[.D79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25" office:value-type="float" office:value="19900" calcext:value-type="float">
            <text:p>19900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230324074074074" calcext:value-type="float">
            <text:p>0,00230324074074074000</text:p>
          </table:table-cell>
          <table:table-cell table:formula="of:=[.D798]-[.D79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25" office:value-type="float" office:value="19925" calcext:value-type="float">
            <text:p>19925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230613425925926" calcext:value-type="float">
            <text:p>0,00230613425925926000</text:p>
          </table:table-cell>
          <table:table-cell table:formula="of:=[.D799]-[.D798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25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230902777777778" calcext:value-type="float">
            <text:p>0,00230902777777778000</text:p>
          </table:table-cell>
          <table:table-cell table:formula="of:=[.D800]-[.D79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25" office:value-type="float" office:value="19975" calcext:value-type="float">
            <text:p>19975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23119212962963" calcext:value-type="float">
            <text:p>0,00231192129629630000</text:p>
          </table:table-cell>
          <table:table-cell table:formula="of:=[.D801]-[.D80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25" office:value-type="float" office:value="20000" calcext:value-type="float">
            <text:p>200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231481481481481" calcext:value-type="float">
            <text:p>0,00231481481481481000</text:p>
          </table:table-cell>
          <table:table-cell table:formula="of:=[.D802]-[.D801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25" office:value-type="float" office:value="20025" calcext:value-type="float">
            <text:p>20025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231770833333333" calcext:value-type="float">
            <text:p>0,00231770833333333000</text:p>
          </table:table-cell>
          <table:table-cell table:formula="of:=[.D803]-[.D80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25" office:value-type="float" office:value="20050" calcext:value-type="float">
            <text:p>20050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232060185185185" calcext:value-type="float">
            <text:p>0,00232060185185185000</text:p>
          </table:table-cell>
          <table:table-cell table:formula="of:=[.D804]-[.D80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25" office:value-type="float" office:value="20075" calcext:value-type="float">
            <text:p>20075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232349537037037" calcext:value-type="float">
            <text:p>0,00232349537037037000</text:p>
          </table:table-cell>
          <table:table-cell table:formula="of:=[.D805]-[.D80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25" office:value-type="float" office:value="20100" calcext:value-type="float">
            <text:p>20100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232638888888889" calcext:value-type="float">
            <text:p>0,00232638888888889000</text:p>
          </table:table-cell>
          <table:table-cell table:formula="of:=[.D806]-[.D805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25" office:value-type="float" office:value="20125" calcext:value-type="float">
            <text:p>20125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232928240740741" calcext:value-type="float">
            <text:p>0,00232928240740741000</text:p>
          </table:table-cell>
          <table:table-cell table:formula="of:=[.D807]-[.D80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25" office:value-type="float" office:value="20150" calcext:value-type="float">
            <text:p>20150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233217592592593" calcext:value-type="float">
            <text:p>0,00233217592592593000</text:p>
          </table:table-cell>
          <table:table-cell table:formula="of:=[.D808]-[.D80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25" office:value-type="float" office:value="20175" calcext:value-type="float">
            <text:p>20175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233506944444444" calcext:value-type="float">
            <text:p>0,00233506944444444000</text:p>
          </table:table-cell>
          <table:table-cell table:formula="of:=[.D809]-[.D808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25" office:value-type="float" office:value="20200" calcext:value-type="float">
            <text:p>20200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233796296296296" calcext:value-type="float">
            <text:p>0,00233796296296296000</text:p>
          </table:table-cell>
          <table:table-cell table:formula="of:=[.D810]-[.D80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25" office:value-type="float" office:value="20225" calcext:value-type="float">
            <text:p>20225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234085648148148" calcext:value-type="float">
            <text:p>0,00234085648148148000</text:p>
          </table:table-cell>
          <table:table-cell table:formula="of:=[.D811]-[.D81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25" office:value-type="float" office:value="20250" calcext:value-type="float">
            <text:p>2025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234375" calcext:value-type="float">
            <text:p>0,00234375000000000000</text:p>
          </table:table-cell>
          <table:table-cell table:formula="of:=[.D812]-[.D81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25" office:value-type="float" office:value="20275" calcext:value-type="float">
            <text:p>20275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234664351851852" calcext:value-type="float">
            <text:p>0,00234664351851852000</text:p>
          </table:table-cell>
          <table:table-cell table:formula="of:=[.D813]-[.D812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25" office:value-type="float" office:value="20300" calcext:value-type="float">
            <text:p>20300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234953703703704" calcext:value-type="float">
            <text:p>0,00234953703703704000</text:p>
          </table:table-cell>
          <table:table-cell table:formula="of:=[.D814]-[.D81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25" office:value-type="float" office:value="20325" calcext:value-type="float">
            <text:p>20325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235243055555556" calcext:value-type="float">
            <text:p>0,00235243055555556000</text:p>
          </table:table-cell>
          <table:table-cell table:formula="of:=[.D815]-[.D81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25" office:value-type="float" office:value="20350" calcext:value-type="float">
            <text:p>20350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235532407407407" calcext:value-type="float">
            <text:p>0,00235532407407407000</text:p>
          </table:table-cell>
          <table:table-cell table:formula="of:=[.D816]-[.D815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25" office:value-type="float" office:value="20375" calcext:value-type="float">
            <text:p>20375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235821759259259" calcext:value-type="float">
            <text:p>0,00235821759259259000</text:p>
          </table:table-cell>
          <table:table-cell table:formula="of:=[.D817]-[.D81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25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236111111111111" calcext:value-type="float">
            <text:p>0,00236111111111111000</text:p>
          </table:table-cell>
          <table:table-cell table:formula="of:=[.D818]-[.D81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25" office:value-type="float" office:value="20425" calcext:value-type="float">
            <text:p>20425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236400462962963" calcext:value-type="float">
            <text:p>0,00236400462962963000</text:p>
          </table:table-cell>
          <table:table-cell table:formula="of:=[.D819]-[.D818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25" office:value-type="float" office:value="20450" calcext:value-type="float">
            <text:p>20450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236689814814815" calcext:value-type="float">
            <text:p>0,00236689814814815000</text:p>
          </table:table-cell>
          <table:table-cell table:formula="of:=[.D820]-[.D81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25" office:value-type="float" office:value="20475" calcext:value-type="float">
            <text:p>20475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236979166666667" calcext:value-type="float">
            <text:p>0,00236979166666667000</text:p>
          </table:table-cell>
          <table:table-cell table:formula="of:=[.D821]-[.D82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25" office:value-type="float" office:value="20500" calcext:value-type="float">
            <text:p>2050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237268518518519" calcext:value-type="float">
            <text:p>0,00237268518518519000</text:p>
          </table:table-cell>
          <table:table-cell table:formula="of:=[.D822]-[.D82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25" office:value-type="float" office:value="20525" calcext:value-type="float">
            <text:p>20525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23755787037037" calcext:value-type="float">
            <text:p>0,00237557870370370000</text:p>
          </table:table-cell>
          <table:table-cell table:formula="of:=[.D823]-[.D822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25" office:value-type="float" office:value="20550" calcext:value-type="float">
            <text:p>20550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237847222222222" calcext:value-type="float">
            <text:p>0,00237847222222222000</text:p>
          </table:table-cell>
          <table:table-cell table:formula="of:=[.D824]-[.D82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25" office:value-type="float" office:value="20575" calcext:value-type="float">
            <text:p>20575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238136574074074" calcext:value-type="float">
            <text:p>0,00238136574074074000</text:p>
          </table:table-cell>
          <table:table-cell table:formula="of:=[.D825]-[.D82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25" office:value-type="float" office:value="20600" calcext:value-type="float">
            <text:p>20600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238425925925926" calcext:value-type="float">
            <text:p>0,00238425925925926000</text:p>
          </table:table-cell>
          <table:table-cell table:formula="of:=[.D826]-[.D825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25" office:value-type="float" office:value="20625" calcext:value-type="float">
            <text:p>20625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238715277777778" calcext:value-type="float">
            <text:p>0,00238715277777778000</text:p>
          </table:table-cell>
          <table:table-cell table:formula="of:=[.D827]-[.D82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25" office:value-type="float" office:value="20650" calcext:value-type="float">
            <text:p>20650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23900462962963" calcext:value-type="float">
            <text:p>0,00239004629629630000</text:p>
          </table:table-cell>
          <table:table-cell table:formula="of:=[.D828]-[.D82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25" office:value-type="float" office:value="20675" calcext:value-type="float">
            <text:p>20675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239293981481481" calcext:value-type="float">
            <text:p>0,00239293981481481000</text:p>
          </table:table-cell>
          <table:table-cell table:formula="of:=[.D829]-[.D82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25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239583333333333" calcext:value-type="float">
            <text:p>0,00239583333333333000</text:p>
          </table:table-cell>
          <table:table-cell table:formula="of:=[.D830]-[.D829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25" office:value-type="float" office:value="20725" calcext:value-type="float">
            <text:p>20725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239872685185185" calcext:value-type="float">
            <text:p>0,00239872685185185000</text:p>
          </table:table-cell>
          <table:table-cell table:formula="of:=[.D831]-[.D83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25" office:value-type="float" office:value="20750" calcext:value-type="float">
            <text:p>2075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240162037037037" calcext:value-type="float">
            <text:p>0,00240162037037037000</text:p>
          </table:table-cell>
          <table:table-cell table:formula="of:=[.D832]-[.D83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25" office:value-type="float" office:value="20775" calcext:value-type="float">
            <text:p>20775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240451388888889" calcext:value-type="float">
            <text:p>0,00240451388888889000</text:p>
          </table:table-cell>
          <table:table-cell table:formula="of:=[.D833]-[.D832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25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240740740740741" calcext:value-type="float">
            <text:p>0,00240740740740741000</text:p>
          </table:table-cell>
          <table:table-cell table:formula="of:=[.D834]-[.D83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25" office:value-type="float" office:value="20825" calcext:value-type="float">
            <text:p>20825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241030092592593" calcext:value-type="float">
            <text:p>0,00241030092592593000</text:p>
          </table:table-cell>
          <table:table-cell table:formula="of:=[.D835]-[.D83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25" office:value-type="float" office:value="20850" calcext:value-type="float">
            <text:p>20850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241319444444444" calcext:value-type="float">
            <text:p>0,00241319444444444000</text:p>
          </table:table-cell>
          <table:table-cell table:formula="of:=[.D836]-[.D83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25" office:value-type="float" office:value="20875" calcext:value-type="float">
            <text:p>20875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241608796296296" calcext:value-type="float">
            <text:p>0,00241608796296296000</text:p>
          </table:table-cell>
          <table:table-cell table:formula="of:=[.D837]-[.D836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25" office:value-type="float" office:value="20900" calcext:value-type="float">
            <text:p>20900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241898148148148" calcext:value-type="float">
            <text:p>0,00241898148148148000</text:p>
          </table:table-cell>
          <table:table-cell table:formula="of:=[.D838]-[.D83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25" office:value-type="float" office:value="20925" calcext:value-type="float">
            <text:p>20925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2421875" calcext:value-type="float">
            <text:p>0,00242187500000000000</text:p>
          </table:table-cell>
          <table:table-cell table:formula="of:=[.D839]-[.D83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25" office:value-type="float" office:value="20950" calcext:value-type="float">
            <text:p>20950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242476851851852" calcext:value-type="float">
            <text:p>0,00242476851851852000</text:p>
          </table:table-cell>
          <table:table-cell table:formula="of:=[.D840]-[.D839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25" office:value-type="float" office:value="20975" calcext:value-type="float">
            <text:p>20975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242766203703704" calcext:value-type="float">
            <text:p>0,00242766203703704000</text:p>
          </table:table-cell>
          <table:table-cell table:formula="of:=[.D841]-[.D84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25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243055555555556" calcext:value-type="float">
            <text:p>0,00243055555555556000</text:p>
          </table:table-cell>
          <table:table-cell table:formula="of:=[.D842]-[.D84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25" office:value-type="float" office:value="21025" calcext:value-type="float">
            <text:p>21025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243344907407407" calcext:value-type="float">
            <text:p>0,00243344907407407000</text:p>
          </table:table-cell>
          <table:table-cell table:formula="of:=[.D843]-[.D84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25" office:value-type="float" office:value="21050" calcext:value-type="float">
            <text:p>21050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243634259259259" calcext:value-type="float">
            <text:p>0,00243634259259259000</text:p>
          </table:table-cell>
          <table:table-cell table:formula="of:=[.D844]-[.D843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25" office:value-type="float" office:value="21075" calcext:value-type="float">
            <text:p>21075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243923611111111" calcext:value-type="float">
            <text:p>0,00243923611111111000</text:p>
          </table:table-cell>
          <table:table-cell table:formula="of:=[.D845]-[.D84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25" office:value-type="float" office:value="21100" calcext:value-type="float">
            <text:p>21100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244212962962963" calcext:value-type="float">
            <text:p>0,00244212962962963000</text:p>
          </table:table-cell>
          <table:table-cell table:formula="of:=[.D846]-[.D84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25" office:value-type="float" office:value="21125" calcext:value-type="float">
            <text:p>21125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244502314814815" calcext:value-type="float">
            <text:p>0,00244502314814815000</text:p>
          </table:table-cell>
          <table:table-cell table:formula="of:=[.D847]-[.D846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25" office:value-type="float" office:value="21150" calcext:value-type="float">
            <text:p>21150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244791666666667" calcext:value-type="float">
            <text:p>0,00244791666666667000</text:p>
          </table:table-cell>
          <table:table-cell table:formula="of:=[.D848]-[.D84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25" office:value-type="float" office:value="21175" calcext:value-type="float">
            <text:p>21175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245081018518519" calcext:value-type="float">
            <text:p>0,00245081018518519000</text:p>
          </table:table-cell>
          <table:table-cell table:formula="of:=[.D849]-[.D84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25" office:value-type="float" office:value="21200" calcext:value-type="float">
            <text:p>21200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24537037037037" calcext:value-type="float">
            <text:p>0,00245370370370370000</text:p>
          </table:table-cell>
          <table:table-cell table:formula="of:=[.D850]-[.D849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25" office:value-type="float" office:value="21225" calcext:value-type="float">
            <text:p>21225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245659722222222" calcext:value-type="float">
            <text:p>0,00245659722222222000</text:p>
          </table:table-cell>
          <table:table-cell table:formula="of:=[.D851]-[.D85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25" office:value-type="float" office:value="21250" calcext:value-type="float">
            <text:p>2125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245949074074074" calcext:value-type="float">
            <text:p>0,00245949074074074000</text:p>
          </table:table-cell>
          <table:table-cell table:formula="of:=[.D852]-[.D85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25" office:value-type="float" office:value="21275" calcext:value-type="float">
            <text:p>21275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246238425925926" calcext:value-type="float">
            <text:p>0,00246238425925926000</text:p>
          </table:table-cell>
          <table:table-cell table:formula="of:=[.D853]-[.D85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25" office:value-type="float" office:value="21300" calcext:value-type="float">
            <text:p>21300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246527777777778" calcext:value-type="float">
            <text:p>0,00246527777777778000</text:p>
          </table:table-cell>
          <table:table-cell table:formula="of:=[.D854]-[.D853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25" office:value-type="float" office:value="21325" calcext:value-type="float">
            <text:p>21325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24681712962963" calcext:value-type="float">
            <text:p>0,00246817129629630000</text:p>
          </table:table-cell>
          <table:table-cell table:formula="of:=[.D855]-[.D85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25" office:value-type="float" office:value="21350" calcext:value-type="float">
            <text:p>21350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247106481481482" calcext:value-type="float">
            <text:p>0,00247106481481482000</text:p>
          </table:table-cell>
          <table:table-cell table:formula="of:=[.D856]-[.D85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25" office:value-type="float" office:value="21375" calcext:value-type="float">
            <text:p>21375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247395833333333" calcext:value-type="float">
            <text:p>0,00247395833333333000</text:p>
          </table:table-cell>
          <table:table-cell table:formula="of:=[.D857]-[.D856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25" office:value-type="float" office:value="21400" calcext:value-type="float">
            <text:p>21400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247685185185185" calcext:value-type="float">
            <text:p>0,00247685185185185000</text:p>
          </table:table-cell>
          <table:table-cell table:formula="of:=[.D858]-[.D85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25" office:value-type="float" office:value="21425" calcext:value-type="float">
            <text:p>21425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247974537037037" calcext:value-type="float">
            <text:p>0,00247974537037037000</text:p>
          </table:table-cell>
          <table:table-cell table:formula="of:=[.D859]-[.D85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25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248263888888889" calcext:value-type="float">
            <text:p>0,00248263888888889000</text:p>
          </table:table-cell>
          <table:table-cell table:formula="of:=[.D860]-[.D85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25" office:value-type="float" office:value="21475" calcext:value-type="float">
            <text:p>21475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248553240740741" calcext:value-type="float">
            <text:p>0,00248553240740741000</text:p>
          </table:table-cell>
          <table:table-cell table:formula="of:=[.D861]-[.D860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25" office:value-type="float" office:value="21500" calcext:value-type="float">
            <text:p>2150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248842592592593" calcext:value-type="float">
            <text:p>0,00248842592592593000</text:p>
          </table:table-cell>
          <table:table-cell table:formula="of:=[.D862]-[.D86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25" office:value-type="float" office:value="21525" calcext:value-type="float">
            <text:p>21525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249131944444444" calcext:value-type="float">
            <text:p>0,00249131944444444000</text:p>
          </table:table-cell>
          <table:table-cell table:formula="of:=[.D863]-[.D86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25" office:value-type="float" office:value="21550" calcext:value-type="float">
            <text:p>21550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249421296296296" calcext:value-type="float">
            <text:p>0,00249421296296296000</text:p>
          </table:table-cell>
          <table:table-cell table:formula="of:=[.D864]-[.D863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25" office:value-type="float" office:value="21575" calcext:value-type="float">
            <text:p>21575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249710648148148" calcext:value-type="float">
            <text:p>0,00249710648148148000</text:p>
          </table:table-cell>
          <table:table-cell table:formula="of:=[.D865]-[.D86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25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25" calcext:value-type="float">
            <text:p>0,00250000000000000000</text:p>
          </table:table-cell>
          <table:table-cell table:formula="of:=[.D866]-[.D86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25" office:value-type="float" office:value="21625" calcext:value-type="float">
            <text:p>21625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250289351851852" calcext:value-type="float">
            <text:p>0,00250289351851852000</text:p>
          </table:table-cell>
          <table:table-cell table:formula="of:=[.D867]-[.D86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25" office:value-type="float" office:value="21650" calcext:value-type="float">
            <text:p>21650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250578703703704" calcext:value-type="float">
            <text:p>0,00250578703703704000</text:p>
          </table:table-cell>
          <table:table-cell table:formula="of:=[.D868]-[.D867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25" office:value-type="float" office:value="21675" calcext:value-type="float">
            <text:p>21675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250868055555556" calcext:value-type="float">
            <text:p>0,00250868055555556000</text:p>
          </table:table-cell>
          <table:table-cell table:formula="of:=[.D869]-[.D86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25" office:value-type="float" office:value="21700" calcext:value-type="float">
            <text:p>21700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251157407407407" calcext:value-type="float">
            <text:p>0,00251157407407407000</text:p>
          </table:table-cell>
          <table:table-cell table:formula="of:=[.D870]-[.D86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25" office:value-type="float" office:value="21725" calcext:value-type="float">
            <text:p>21725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251446759259259" calcext:value-type="float">
            <text:p>0,00251446759259259000</text:p>
          </table:table-cell>
          <table:table-cell table:formula="of:=[.D871]-[.D870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25" office:value-type="float" office:value="21750" calcext:value-type="float">
            <text:p>2175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251736111111111" calcext:value-type="float">
            <text:p>0,00251736111111111000</text:p>
          </table:table-cell>
          <table:table-cell table:formula="of:=[.D872]-[.D87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25" office:value-type="float" office:value="21775" calcext:value-type="float">
            <text:p>21775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252025462962963" calcext:value-type="float">
            <text:p>0,00252025462962963000</text:p>
          </table:table-cell>
          <table:table-cell table:formula="of:=[.D873]-[.D87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25" office:value-type="float" office:value="21800" calcext:value-type="float">
            <text:p>21800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252314814814815" calcext:value-type="float">
            <text:p>0,00252314814814815000</text:p>
          </table:table-cell>
          <table:table-cell table:formula="of:=[.D874]-[.D87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25" office:value-type="float" office:value="21825" calcext:value-type="float">
            <text:p>21825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252604166666667" calcext:value-type="float">
            <text:p>0,00252604166666667000</text:p>
          </table:table-cell>
          <table:table-cell table:formula="of:=[.D875]-[.D874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25" office:value-type="float" office:value="21850" calcext:value-type="float">
            <text:p>21850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252893518518519" calcext:value-type="float">
            <text:p>0,00252893518518519000</text:p>
          </table:table-cell>
          <table:table-cell table:formula="of:=[.D876]-[.D87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25" office:value-type="float" office:value="21875" calcext:value-type="float">
            <text:p>21875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25318287037037" calcext:value-type="float">
            <text:p>0,00253182870370370000</text:p>
          </table:table-cell>
          <table:table-cell table:formula="of:=[.D877]-[.D87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25" office:value-type="float" office:value="21900" calcext:value-type="float">
            <text:p>21900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253472222222222" calcext:value-type="float">
            <text:p>0,00253472222222222000</text:p>
          </table:table-cell>
          <table:table-cell table:formula="of:=[.D878]-[.D877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25" office:value-type="float" office:value="21925" calcext:value-type="float">
            <text:p>21925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253761574074074" calcext:value-type="float">
            <text:p>0,00253761574074074000</text:p>
          </table:table-cell>
          <table:table-cell table:formula="of:=[.D879]-[.D87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25" office:value-type="float" office:value="21950" calcext:value-type="float">
            <text:p>21950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254050925925926" calcext:value-type="float">
            <text:p>0,00254050925925926000</text:p>
          </table:table-cell>
          <table:table-cell table:formula="of:=[.D880]-[.D87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25" office:value-type="float" office:value="21975" calcext:value-type="float">
            <text:p>21975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254340277777778" calcext:value-type="float">
            <text:p>0,00254340277777778000</text:p>
          </table:table-cell>
          <table:table-cell table:formula="of:=[.D881]-[.D880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25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25462962962963" calcext:value-type="float">
            <text:p>0,00254629629629630000</text:p>
          </table:table-cell>
          <table:table-cell table:formula="of:=[.D882]-[.D88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25" office:value-type="float" office:value="22025" calcext:value-type="float">
            <text:p>22025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254918981481482" calcext:value-type="float">
            <text:p>0,00254918981481482000</text:p>
          </table:table-cell>
          <table:table-cell table:formula="of:=[.D883]-[.D88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25" office:value-type="float" office:value="22050" calcext:value-type="float">
            <text:p>22050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255208333333333" calcext:value-type="float">
            <text:p>0,00255208333333333000</text:p>
          </table:table-cell>
          <table:table-cell table:formula="of:=[.D884]-[.D88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25" office:value-type="float" office:value="22075" calcext:value-type="float">
            <text:p>22075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255497685185185" calcext:value-type="float">
            <text:p>0,00255497685185185000</text:p>
          </table:table-cell>
          <table:table-cell table:formula="of:=[.D885]-[.D884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25" office:value-type="float" office:value="22100" calcext:value-type="float">
            <text:p>22100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255787037037037" calcext:value-type="float">
            <text:p>0,00255787037037037000</text:p>
          </table:table-cell>
          <table:table-cell table:formula="of:=[.D886]-[.D88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25" office:value-type="float" office:value="22125" calcext:value-type="float">
            <text:p>22125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256076388888889" calcext:value-type="float">
            <text:p>0,00256076388888889000</text:p>
          </table:table-cell>
          <table:table-cell table:formula="of:=[.D887]-[.D88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25" office:value-type="float" office:value="22150" calcext:value-type="float">
            <text:p>22150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256365740740741" calcext:value-type="float">
            <text:p>0,00256365740740741000</text:p>
          </table:table-cell>
          <table:table-cell table:formula="of:=[.D888]-[.D887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25" office:value-type="float" office:value="22175" calcext:value-type="float">
            <text:p>22175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256655092592593" calcext:value-type="float">
            <text:p>0,00256655092592593000</text:p>
          </table:table-cell>
          <table:table-cell table:formula="of:=[.D889]-[.D88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25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256944444444444" calcext:value-type="float">
            <text:p>0,00256944444444444000</text:p>
          </table:table-cell>
          <table:table-cell table:formula="of:=[.D890]-[.D88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25" office:value-type="float" office:value="22225" calcext:value-type="float">
            <text:p>22225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257233796296296" calcext:value-type="float">
            <text:p>0,00257233796296296000</text:p>
          </table:table-cell>
          <table:table-cell table:formula="of:=[.D891]-[.D89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25" office:value-type="float" office:value="22250" calcext:value-type="float">
            <text:p>2225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257523148148148" calcext:value-type="float">
            <text:p>0,00257523148148148000</text:p>
          </table:table-cell>
          <table:table-cell table:formula="of:=[.D892]-[.D891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25" office:value-type="float" office:value="22275" calcext:value-type="float">
            <text:p>22275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2578125" calcext:value-type="float">
            <text:p>0,00257812500000000000</text:p>
          </table:table-cell>
          <table:table-cell table:formula="of:=[.D893]-[.D89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25" office:value-type="float" office:value="22300" calcext:value-type="float">
            <text:p>22300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258101851851852" calcext:value-type="float">
            <text:p>0,00258101851851852000</text:p>
          </table:table-cell>
          <table:table-cell table:formula="of:=[.D894]-[.D89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25" office:value-type="float" office:value="22325" calcext:value-type="float">
            <text:p>22325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258391203703704" calcext:value-type="float">
            <text:p>0,00258391203703704000</text:p>
          </table:table-cell>
          <table:table-cell table:formula="of:=[.D895]-[.D894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25" office:value-type="float" office:value="22350" calcext:value-type="float">
            <text:p>22350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258680555555556" calcext:value-type="float">
            <text:p>0,00258680555555556000</text:p>
          </table:table-cell>
          <table:table-cell table:formula="of:=[.D896]-[.D89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25" office:value-type="float" office:value="22375" calcext:value-type="float">
            <text:p>22375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258969907407407" calcext:value-type="float">
            <text:p>0,00258969907407407000</text:p>
          </table:table-cell>
          <table:table-cell table:formula="of:=[.D897]-[.D89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25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259259259259259" calcext:value-type="float">
            <text:p>0,00259259259259259000</text:p>
          </table:table-cell>
          <table:table-cell table:formula="of:=[.D898]-[.D89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25" office:value-type="float" office:value="22425" calcext:value-type="float">
            <text:p>22425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259548611111111" calcext:value-type="float">
            <text:p>0,00259548611111111000</text:p>
          </table:table-cell>
          <table:table-cell table:formula="of:=[.D899]-[.D898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25" office:value-type="float" office:value="22450" calcext:value-type="float">
            <text:p>22450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259837962962963" calcext:value-type="float">
            <text:p>0,00259837962962963000</text:p>
          </table:table-cell>
          <table:table-cell table:formula="of:=[.D900]-[.D89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25" office:value-type="float" office:value="22475" calcext:value-type="float">
            <text:p>22475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260127314814815" calcext:value-type="float">
            <text:p>0,00260127314814815000</text:p>
          </table:table-cell>
          <table:table-cell table:formula="of:=[.D901]-[.D90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25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260416666666667" calcext:value-type="float">
            <text:p>0,00260416666666667000</text:p>
          </table:table-cell>
          <table:table-cell table:formula="of:=[.D902]-[.D901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25" office:value-type="float" office:value="22525" calcext:value-type="float">
            <text:p>22525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260706018518519" calcext:value-type="float">
            <text:p>0,00260706018518519000</text:p>
          </table:table-cell>
          <table:table-cell table:formula="of:=[.D903]-[.D90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25" office:value-type="float" office:value="22550" calcext:value-type="float">
            <text:p>22550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26099537037037" calcext:value-type="float">
            <text:p>0,00260995370370370000</text:p>
          </table:table-cell>
          <table:table-cell table:formula="of:=[.D904]-[.D90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25" office:value-type="float" office:value="22575" calcext:value-type="float">
            <text:p>22575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261284722222222" calcext:value-type="float">
            <text:p>0,00261284722222222000</text:p>
          </table:table-cell>
          <table:table-cell table:formula="of:=[.D905]-[.D90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25" office:value-type="float" office:value="22600" calcext:value-type="float">
            <text:p>22600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261574074074074" calcext:value-type="float">
            <text:p>0,00261574074074074000</text:p>
          </table:table-cell>
          <table:table-cell table:formula="of:=[.D906]-[.D905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25" office:value-type="float" office:value="22625" calcext:value-type="float">
            <text:p>22625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261863425925926" calcext:value-type="float">
            <text:p>0,00261863425925926000</text:p>
          </table:table-cell>
          <table:table-cell table:formula="of:=[.D907]-[.D90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25" office:value-type="float" office:value="22650" calcext:value-type="float">
            <text:p>22650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262152777777778" calcext:value-type="float">
            <text:p>0,00262152777777778000</text:p>
          </table:table-cell>
          <table:table-cell table:formula="of:=[.D908]-[.D90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25" office:value-type="float" office:value="22675" calcext:value-type="float">
            <text:p>22675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26244212962963" calcext:value-type="float">
            <text:p>0,00262442129629630000</text:p>
          </table:table-cell>
          <table:table-cell table:formula="of:=[.D909]-[.D908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25" office:value-type="float" office:value="22700" calcext:value-type="float">
            <text:p>22700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262731481481482" calcext:value-type="float">
            <text:p>0,00262731481481482000</text:p>
          </table:table-cell>
          <table:table-cell table:formula="of:=[.D910]-[.D90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25" office:value-type="float" office:value="22725" calcext:value-type="float">
            <text:p>22725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263020833333333" calcext:value-type="float">
            <text:p>0,00263020833333333000</text:p>
          </table:table-cell>
          <table:table-cell table:formula="of:=[.D911]-[.D91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25" office:value-type="float" office:value="22750" calcext:value-type="float">
            <text:p>2275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263310185185185" calcext:value-type="float">
            <text:p>0,00263310185185185000</text:p>
          </table:table-cell>
          <table:table-cell table:formula="of:=[.D912]-[.D911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25" office:value-type="float" office:value="22775" calcext:value-type="float">
            <text:p>22775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263599537037037" calcext:value-type="float">
            <text:p>0,00263599537037037000</text:p>
          </table:table-cell>
          <table:table-cell table:formula="of:=[.D913]-[.D91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25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263888888888889" calcext:value-type="float">
            <text:p>0,00263888888888889000</text:p>
          </table:table-cell>
          <table:table-cell table:formula="of:=[.D914]-[.D91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25" office:value-type="float" office:value="22825" calcext:value-type="float">
            <text:p>22825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264178240740741" calcext:value-type="float">
            <text:p>0,00264178240740741000</text:p>
          </table:table-cell>
          <table:table-cell table:formula="of:=[.D915]-[.D91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25" office:value-type="float" office:value="22850" calcext:value-type="float">
            <text:p>22850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264467592592593" calcext:value-type="float">
            <text:p>0,00264467592592593000</text:p>
          </table:table-cell>
          <table:table-cell table:formula="of:=[.D916]-[.D915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25" office:value-type="float" office:value="22875" calcext:value-type="float">
            <text:p>22875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264756944444444" calcext:value-type="float">
            <text:p>0,00264756944444444000</text:p>
          </table:table-cell>
          <table:table-cell table:formula="of:=[.D917]-[.D91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25" office:value-type="float" office:value="22900" calcext:value-type="float">
            <text:p>22900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265046296296296" calcext:value-type="float">
            <text:p>0,00265046296296296000</text:p>
          </table:table-cell>
          <table:table-cell table:formula="of:=[.D918]-[.D91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25" office:value-type="float" office:value="22925" calcext:value-type="float">
            <text:p>22925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265335648148148" calcext:value-type="float">
            <text:p>0,00265335648148148000</text:p>
          </table:table-cell>
          <table:table-cell table:formula="of:=[.D919]-[.D918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25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265625" calcext:value-type="float">
            <text:p>0,00265625000000000000</text:p>
          </table:table-cell>
          <table:table-cell table:formula="of:=[.D920]-[.D91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25" office:value-type="float" office:value="22975" calcext:value-type="float">
            <text:p>22975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265914351851852" calcext:value-type="float">
            <text:p>0,00265914351851852000</text:p>
          </table:table-cell>
          <table:table-cell table:formula="of:=[.D921]-[.D92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25" office:value-type="float" office:value="23000" calcext:value-type="float">
            <text:p>2300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266203703703704" calcext:value-type="float">
            <text:p>0,00266203703703704000</text:p>
          </table:table-cell>
          <table:table-cell table:formula="of:=[.D922]-[.D92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25" office:value-type="float" office:value="23025" calcext:value-type="float">
            <text:p>23025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266493055555556" calcext:value-type="float">
            <text:p>0,00266493055555556000</text:p>
          </table:table-cell>
          <table:table-cell table:formula="of:=[.D923]-[.D922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25" office:value-type="float" office:value="23050" calcext:value-type="float">
            <text:p>23050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266782407407407" calcext:value-type="float">
            <text:p>0,00266782407407407000</text:p>
          </table:table-cell>
          <table:table-cell table:formula="of:=[.D924]-[.D92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25" office:value-type="float" office:value="23075" calcext:value-type="float">
            <text:p>23075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267071759259259" calcext:value-type="float">
            <text:p>0,00267071759259259000</text:p>
          </table:table-cell>
          <table:table-cell table:formula="of:=[.D925]-[.D92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25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267361111111111" calcext:value-type="float">
            <text:p>0,00267361111111111000</text:p>
          </table:table-cell>
          <table:table-cell table:formula="of:=[.D926]-[.D925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25" office:value-type="float" office:value="23125" calcext:value-type="float">
            <text:p>23125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267650462962963" calcext:value-type="float">
            <text:p>0,00267650462962963000</text:p>
          </table:table-cell>
          <table:table-cell table:formula="of:=[.D927]-[.D926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25" office:value-type="float" office:value="23150" calcext:value-type="float">
            <text:p>23150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267939814814815" calcext:value-type="float">
            <text:p>0,00267939814814815000</text:p>
          </table:table-cell>
          <table:table-cell table:formula="of:=[.D928]-[.D92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25" office:value-type="float" office:value="23175" calcext:value-type="float">
            <text:p>23175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268229166666667" calcext:value-type="float">
            <text:p>0,00268229166666667000</text:p>
          </table:table-cell>
          <table:table-cell table:formula="of:=[.D929]-[.D92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25" office:value-type="float" office:value="23200" calcext:value-type="float">
            <text:p>23200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268518518518519" calcext:value-type="float">
            <text:p>0,00268518518518519000</text:p>
          </table:table-cell>
          <table:table-cell table:formula="of:=[.D930]-[.D929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25" office:value-type="float" office:value="23225" calcext:value-type="float">
            <text:p>23225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26880787037037" calcext:value-type="float">
            <text:p>0,00268807870370370000</text:p>
          </table:table-cell>
          <table:table-cell table:formula="of:=[.D931]-[.D93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25" office:value-type="float" office:value="23250" calcext:value-type="float">
            <text:p>2325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269097222222222" calcext:value-type="float">
            <text:p>0,00269097222222222000</text:p>
          </table:table-cell>
          <table:table-cell table:formula="of:=[.D932]-[.D93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25" office:value-type="float" office:value="23275" calcext:value-type="float">
            <text:p>23275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269386574074074" calcext:value-type="float">
            <text:p>0,00269386574074074000</text:p>
          </table:table-cell>
          <table:table-cell table:formula="of:=[.D933]-[.D932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25" office:value-type="float" office:value="23300" calcext:value-type="float">
            <text:p>23300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269675925925926" calcext:value-type="float">
            <text:p>0,00269675925925926000</text:p>
          </table:table-cell>
          <table:table-cell table:formula="of:=[.D934]-[.D93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25" office:value-type="float" office:value="23325" calcext:value-type="float">
            <text:p>23325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269965277777778" calcext:value-type="float">
            <text:p>0,00269965277777778000</text:p>
          </table:table-cell>
          <table:table-cell table:formula="of:=[.D935]-[.D93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25" office:value-type="float" office:value="23350" calcext:value-type="float">
            <text:p>23350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27025462962963" calcext:value-type="float">
            <text:p>0,00270254629629630000</text:p>
          </table:table-cell>
          <table:table-cell table:formula="of:=[.D936]-[.D93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25" office:value-type="float" office:value="23375" calcext:value-type="float">
            <text:p>23375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270543981481481" calcext:value-type="float">
            <text:p>0,00270543981481481000</text:p>
          </table:table-cell>
          <table:table-cell table:formula="of:=[.D937]-[.D936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25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270833333333333" calcext:value-type="float">
            <text:p>0,00270833333333333000</text:p>
          </table:table-cell>
          <table:table-cell table:formula="of:=[.D938]-[.D93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25" office:value-type="float" office:value="23425" calcext:value-type="float">
            <text:p>23425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271122685185185" calcext:value-type="float">
            <text:p>0,00271122685185185000</text:p>
          </table:table-cell>
          <table:table-cell table:formula="of:=[.D939]-[.D93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25" office:value-type="float" office:value="23450" calcext:value-type="float">
            <text:p>23450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271412037037037" calcext:value-type="float">
            <text:p>0,00271412037037037000</text:p>
          </table:table-cell>
          <table:table-cell table:formula="of:=[.D940]-[.D939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25" office:value-type="float" office:value="23475" calcext:value-type="float">
            <text:p>23475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271701388888889" calcext:value-type="float">
            <text:p>0,00271701388888889000</text:p>
          </table:table-cell>
          <table:table-cell table:formula="of:=[.D941]-[.D94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25" office:value-type="float" office:value="23500" calcext:value-type="float">
            <text:p>2350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271990740740741" calcext:value-type="float">
            <text:p>0,00271990740740741000</text:p>
          </table:table-cell>
          <table:table-cell table:formula="of:=[.D942]-[.D94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25" office:value-type="float" office:value="23525" calcext:value-type="float">
            <text:p>23525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272280092592593" calcext:value-type="float">
            <text:p>0,00272280092592593000</text:p>
          </table:table-cell>
          <table:table-cell table:formula="of:=[.D943]-[.D942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25" office:value-type="float" office:value="23550" calcext:value-type="float">
            <text:p>23550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272569444444444" calcext:value-type="float">
            <text:p>0,00272569444444444000</text:p>
          </table:table-cell>
          <table:table-cell table:formula="of:=[.D944]-[.D943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25" office:value-type="float" office:value="23575" calcext:value-type="float">
            <text:p>23575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272858796296296" calcext:value-type="float">
            <text:p>0,00272858796296296000</text:p>
          </table:table-cell>
          <table:table-cell table:formula="of:=[.D945]-[.D94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25" office:value-type="float" office:value="23600" calcext:value-type="float">
            <text:p>23600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273148148148148" calcext:value-type="float">
            <text:p>0,00273148148148148000</text:p>
          </table:table-cell>
          <table:table-cell table:formula="of:=[.D946]-[.D94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25" office:value-type="float" office:value="23625" calcext:value-type="float">
            <text:p>23625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2734375" calcext:value-type="float">
            <text:p>0,00273437500000000000</text:p>
          </table:table-cell>
          <table:table-cell table:formula="of:=[.D947]-[.D946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25" office:value-type="float" office:value="23650" calcext:value-type="float">
            <text:p>23650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273726851851852" calcext:value-type="float">
            <text:p>0,00273726851851852000</text:p>
          </table:table-cell>
          <table:table-cell table:formula="of:=[.D948]-[.D94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25" office:value-type="float" office:value="23675" calcext:value-type="float">
            <text:p>23675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274016203703704" calcext:value-type="float">
            <text:p>0,00274016203703704000</text:p>
          </table:table-cell>
          <table:table-cell table:formula="of:=[.D949]-[.D94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25" office:value-type="float" office:value="23700" calcext:value-type="float">
            <text:p>23700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274305555555556" calcext:value-type="float">
            <text:p>0,00274305555555556000</text:p>
          </table:table-cell>
          <table:table-cell table:formula="of:=[.D950]-[.D949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25" office:value-type="float" office:value="23725" calcext:value-type="float">
            <text:p>23725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274594907407407" calcext:value-type="float">
            <text:p>0,00274594907407407000</text:p>
          </table:table-cell>
          <table:table-cell table:formula="of:=[.D951]-[.D950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25" office:value-type="float" office:value="23750" calcext:value-type="float">
            <text:p>2375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274884259259259" calcext:value-type="float">
            <text:p>0,00274884259259259000</text:p>
          </table:table-cell>
          <table:table-cell table:formula="of:=[.D952]-[.D951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25" office:value-type="float" office:value="23775" calcext:value-type="float">
            <text:p>23775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275173611111111" calcext:value-type="float">
            <text:p>0,00275173611111111000</text:p>
          </table:table-cell>
          <table:table-cell table:formula="of:=[.D953]-[.D952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25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275462962962963" calcext:value-type="float">
            <text:p>0,00275462962962963000</text:p>
          </table:table-cell>
          <table:table-cell table:formula="of:=[.D954]-[.D953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25" office:value-type="float" office:value="23825" calcext:value-type="float">
            <text:p>23825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275752314814815" calcext:value-type="float">
            <text:p>0,00275752314814815000</text:p>
          </table:table-cell>
          <table:table-cell table:formula="of:=[.D955]-[.D954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25" office:value-type="float" office:value="23850" calcext:value-type="float">
            <text:p>23850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276041666666667" calcext:value-type="float">
            <text:p>0,00276041666666667000</text:p>
          </table:table-cell>
          <table:table-cell table:formula="of:=[.D956]-[.D955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25" office:value-type="float" office:value="23875" calcext:value-type="float">
            <text:p>23875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276331018518519" calcext:value-type="float">
            <text:p>0,00276331018518519000</text:p>
          </table:table-cell>
          <table:table-cell table:formula="of:=[.D957]-[.D956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25" office:value-type="float" office:value="23900" calcext:value-type="float">
            <text:p>23900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27662037037037" calcext:value-type="float">
            <text:p>0,00276620370370370000</text:p>
          </table:table-cell>
          <table:table-cell table:formula="of:=[.D958]-[.D957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25" office:value-type="float" office:value="23925" calcext:value-type="float">
            <text:p>23925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276909722222222" calcext:value-type="float">
            <text:p>0,00276909722222222000</text:p>
          </table:table-cell>
          <table:table-cell table:formula="of:=[.D959]-[.D958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25" office:value-type="float" office:value="23950" calcext:value-type="float">
            <text:p>23950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277199074074074" calcext:value-type="float">
            <text:p>0,00277199074074074000</text:p>
          </table:table-cell>
          <table:table-cell table:formula="of:=[.D960]-[.D959]" office:value-type="float" office:value="0.00000289351851851839" calcext:value-type="float">
            <text:p>0,0000028935185185183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25" office:value-type="float" office:value="23975" calcext:value-type="float">
            <text:p>23975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277488425925926" calcext:value-type="float">
            <text:p>0,00277488425925926000</text:p>
          </table:table-cell>
          <table:table-cell table:formula="of:=[.D961]-[.D960]" office:value-type="float" office:value="0.00000289351851851883" calcext:value-type="float">
            <text:p>0,0000028935185185188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25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277777777777778" calcext:value-type="float">
            <text:p>0,00277777777777778000</text:p>
          </table:table-cell>
          <table:table-cell table:formula="of:=#REF!-[.D961]" office:value-type="string" office:string-value="" calcext:value-type="error">
            <text:p>#REF!</text:p>
          </table:table-cell>
        </table:table-row>
        <table:table-row table:style-name="ro1" table:number-rows-repeated="104761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53:17.215852432</meta:creation-date>
    <dc:date>2026-05-17T15:53:24.967032081</dc:date>
    <meta:editing-duration>PT9S</meta:editing-duration>
    <meta:editing-cycles>1</meta:editing-cycles>
    <meta:document-statistic meta:table-count="1" meta:cell-count="4805" meta:object-count="0"/>
    <meta:generator>LibreOffice/24.2.7.2$Linux_X86_64 LibreOffice_project/420$Build-2</meta:generator>
  </office:meta>
</office:document-meta>
</file>