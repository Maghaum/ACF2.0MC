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63888888888889" calcext:value-type="float">
            <text:p>0,00000763888888888889</text:p>
          </table:table-cell>
          <table:table-cell table:formula="of:=[.D3]-[.D2]" office:value-type="float" office:value="0.00000763888888888889" calcext:value-type="float">
            <text:p>0,00000763888888888889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6" office:value-type="float" office:value="132" calcext:value-type="float">
            <text:p>13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52777777777778" calcext:value-type="float">
            <text:p>0,00001527777777777780</text:p>
          </table:table-cell>
          <table:table-cell table:formula="of:=[.D4]-[.D3]" office:value-type="float" office:value="0.00000763888888888889" calcext:value-type="float">
            <text:p>0,00000763888888888889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6" office:value-type="float" office:value="198" calcext:value-type="float">
            <text:p>19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29166666666667" calcext:value-type="float">
            <text:p>0,00002291666666666670</text:p>
          </table:table-cell>
          <table:table-cell table:formula="of:=[.D5]-[.D4]" office:value-type="float" office:value="0.00000763888888888889" calcext:value-type="float">
            <text:p>0,00000763888888888889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6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05555555555556" calcext:value-type="float">
            <text:p>0,00003055555555555560</text:p>
          </table:table-cell>
          <table:table-cell table:formula="of:=[.D6]-[.D5]" office:value-type="float" office:value="0.00000763888888888889" calcext:value-type="float">
            <text:p>0,00000763888888888889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6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81944444444444" calcext:value-type="float">
            <text:p>0,00003819444444444450</text:p>
          </table:table-cell>
          <table:table-cell table:formula="of:=[.D7]-[.D6]" office:value-type="float" office:value="0.00000763888888888889" calcext:value-type="float">
            <text:p>0,00000763888888888889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6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58333333333333" calcext:value-type="float">
            <text:p>0,00004583333333333330</text:p>
          </table:table-cell>
          <table:table-cell table:formula="of:=[.D8]-[.D7]" office:value-type="float" office:value="0.00000763888888888889" calcext:value-type="float">
            <text:p>0,00000763888888888889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6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34722222222222" calcext:value-type="float">
            <text:p>0,00005347222222222220</text:p>
          </table:table-cell>
          <table:table-cell table:formula="of:=[.D9]-[.D8]" office:value-type="float" office:value="0.00000763888888888888" calcext:value-type="float">
            <text:p>0,00000763888888888888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6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11111111111111" calcext:value-type="float">
            <text:p>0,00006111111111111110</text:p>
          </table:table-cell>
          <table:table-cell table:formula="of:=[.D10]-[.D9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6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875" calcext:value-type="float">
            <text:p>0,00006875000000000000</text:p>
          </table:table-cell>
          <table:table-cell table:formula="of:=[.D11]-[.D10]" office:value-type="float" office:value="0.00000763888888888888" calcext:value-type="float">
            <text:p>0,00000763888888888888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6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63888888888889" calcext:value-type="float">
            <text:p>0,00007638888888888890</text:p>
          </table:table-cell>
          <table:table-cell table:formula="of:=[.D12]-[.D11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6" office:value-type="float" office:value="726" calcext:value-type="float">
            <text:p>72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40277777777778" calcext:value-type="float">
            <text:p>0,00008402777777777780</text:p>
          </table:table-cell>
          <table:table-cell table:formula="of:=[.D13]-[.D12]" office:value-type="float" office:value="0.00000763888888888888" calcext:value-type="float">
            <text:p>0,00000763888888888888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6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916666666666667" calcext:value-type="float">
            <text:p>0,00009166666666666670</text:p>
          </table:table-cell>
          <table:table-cell table:formula="of:=[.D14]-[.D13]" office:value-type="float" office:value="0.00000763888888888888" calcext:value-type="float">
            <text:p>0,00000763888888888888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6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993055555555556" calcext:value-type="float">
            <text:p>0,00009930555555555560</text:p>
          </table:table-cell>
          <table:table-cell table:formula="of:=[.D15]-[.D14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6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06944444444444" calcext:value-type="float">
            <text:p>0,00010694444444444400</text:p>
          </table:table-cell>
          <table:table-cell table:formula="of:=[.D16]-[.D15]" office:value-type="float" office:value="0.00000763888888888888" calcext:value-type="float">
            <text:p>0,00000763888888888888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6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14583333333333" calcext:value-type="float">
            <text:p>0,00011458333333333300</text:p>
          </table:table-cell>
          <table:table-cell table:formula="of:=[.D17]-[.D16]" office:value-type="float" office:value="0.00000763888888888888" calcext:value-type="float">
            <text:p>0,00000763888888888888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6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22222222222222" calcext:value-type="float">
            <text:p>0,00012222222222222200</text:p>
          </table:table-cell>
          <table:table-cell table:formula="of:=[.D18]-[.D17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6" office:value-type="float" office:value="1122" calcext:value-type="float">
            <text:p>112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29861111111111" calcext:value-type="float">
            <text:p>0,00012986111111111100</text:p>
          </table:table-cell>
          <table:table-cell table:formula="of:=[.D19]-[.D18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6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375" calcext:value-type="float">
            <text:p>0,00013750000000000000</text:p>
          </table:table-cell>
          <table:table-cell table:formula="of:=[.D20]-[.D19]" office:value-type="float" office:value="0.00000763888888888887" calcext:value-type="float">
            <text:p>0,00000763888888888887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6" office:value-type="float" office:value="1254" calcext:value-type="float">
            <text:p>125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45138888888889" calcext:value-type="float">
            <text:p>0,00014513888888888900</text:p>
          </table:table-cell>
          <table:table-cell table:formula="of:=[.D21]-[.D20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6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52777777777778" calcext:value-type="float">
            <text:p>0,00015277777777777800</text:p>
          </table:table-cell>
          <table:table-cell table:formula="of:=[.D22]-[.D21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6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60416666666667" calcext:value-type="float">
            <text:p>0,00016041666666666700</text:p>
          </table:table-cell>
          <table:table-cell table:formula="of:=[.D23]-[.D22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6" office:value-type="float" office:value="1452" calcext:value-type="float">
            <text:p>145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68055555555556" calcext:value-type="float">
            <text:p>0,00016805555555555600</text:p>
          </table:table-cell>
          <table:table-cell table:formula="of:=[.D24]-[.D23]" office:value-type="float" office:value="0.00000763888888888887" calcext:value-type="float">
            <text:p>0,00000763888888888887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6" office:value-type="float" office:value="1518" calcext:value-type="float">
            <text:p>151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75694444444444" calcext:value-type="float">
            <text:p>0,00017569444444444400</text:p>
          </table:table-cell>
          <table:table-cell table:formula="of:=[.D25]-[.D24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6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83333333333333" calcext:value-type="float">
            <text:p>0,00018333333333333300</text:p>
          </table:table-cell>
          <table:table-cell table:formula="of:=[.D26]-[.D25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6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90972222222222" calcext:value-type="float">
            <text:p>0,00019097222222222200</text:p>
          </table:table-cell>
          <table:table-cell table:formula="of:=[.D27]-[.D26]" office:value-type="float" office:value="0.00000763888888888887" calcext:value-type="float">
            <text:p>0,00000763888888888887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6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98611111111111" calcext:value-type="float">
            <text:p>0,00019861111111111100</text:p>
          </table:table-cell>
          <table:table-cell table:formula="of:=[.D28]-[.D27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6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0625" calcext:value-type="float">
            <text:p>0,00020625000000000000</text:p>
          </table:table-cell>
          <table:table-cell table:formula="of:=[.D29]-[.D28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6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13888888888889" calcext:value-type="float">
            <text:p>0,00021388888888888900</text:p>
          </table:table-cell>
          <table:table-cell table:formula="of:=[.D30]-[.D29]" office:value-type="float" office:value="0.00000763888888888887" calcext:value-type="float">
            <text:p>0,00000763888888888887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6" office:value-type="float" office:value="1914" calcext:value-type="float">
            <text:p>191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21527777777778" calcext:value-type="float">
            <text:p>0,00022152777777777800</text:p>
          </table:table-cell>
          <table:table-cell table:formula="of:=[.D31]-[.D30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6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29166666666667" calcext:value-type="float">
            <text:p>0,00022916666666666700</text:p>
          </table:table-cell>
          <table:table-cell table:formula="of:=[.D32]-[.D31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6" office:value-type="float" office:value="2046" calcext:value-type="float">
            <text:p>204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36805555555556" calcext:value-type="float">
            <text:p>0,00023680555555555600</text:p>
          </table:table-cell>
          <table:table-cell table:formula="of:=[.D33]-[.D32]" office:value-type="float" office:value="0.00000763888888888887" calcext:value-type="float">
            <text:p>0,00000763888888888887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6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44444444444444" calcext:value-type="float">
            <text:p>0,00024444444444444400</text:p>
          </table:table-cell>
          <table:table-cell table:formula="of:=[.D34]-[.D33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6" office:value-type="float" office:value="2178" calcext:value-type="float">
            <text:p>217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52083333333333" calcext:value-type="float">
            <text:p>0,00025208333333333300</text:p>
          </table:table-cell>
          <table:table-cell table:formula="of:=[.D35]-[.D34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6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59722222222222" calcext:value-type="float">
            <text:p>0,00025972222222222200</text:p>
          </table:table-cell>
          <table:table-cell table:formula="of:=[.D36]-[.D35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6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67361111111111" calcext:value-type="float">
            <text:p>0,00026736111111111100</text:p>
          </table:table-cell>
          <table:table-cell table:formula="of:=[.D37]-[.D36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6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75" calcext:value-type="float">
            <text:p>0,00027500000000000000</text:p>
          </table:table-cell>
          <table:table-cell table:formula="of:=[.D38]-[.D37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6" office:value-type="float" office:value="2442" calcext:value-type="float">
            <text:p>244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82638888888889" calcext:value-type="float">
            <text:p>0,00028263888888888900</text:p>
          </table:table-cell>
          <table:table-cell table:formula="of:=[.D39]-[.D3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6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90277777777778" calcext:value-type="float">
            <text:p>0,00029027777777777800</text:p>
          </table:table-cell>
          <table:table-cell table:formula="of:=[.D40]-[.D39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6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97916666666667" calcext:value-type="float">
            <text:p>0,00029791666666666700</text:p>
          </table:table-cell>
          <table:table-cell table:formula="of:=[.D41]-[.D40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6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05555555555556" calcext:value-type="float">
            <text:p>0,00030555555555555600</text:p>
          </table:table-cell>
          <table:table-cell table:formula="of:=[.D42]-[.D41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6" office:value-type="float" office:value="2706" calcext:value-type="float">
            <text:p>270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13194444444444" calcext:value-type="float">
            <text:p>0,00031319444444444400</text:p>
          </table:table-cell>
          <table:table-cell table:formula="of:=[.D43]-[.D42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6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20833333333333" calcext:value-type="float">
            <text:p>0,00032083333333333300</text:p>
          </table:table-cell>
          <table:table-cell table:formula="of:=[.D44]-[.D43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6" office:value-type="float" office:value="2838" calcext:value-type="float">
            <text:p>283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28472222222222" calcext:value-type="float">
            <text:p>0,00032847222222222200</text:p>
          </table:table-cell>
          <table:table-cell table:formula="of:=[.D45]-[.D44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6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36111111111111" calcext:value-type="float">
            <text:p>0,00033611111111111100</text:p>
          </table:table-cell>
          <table:table-cell table:formula="of:=[.D46]-[.D4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6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4375" calcext:value-type="float">
            <text:p>0,00034375000000000000</text:p>
          </table:table-cell>
          <table:table-cell table:formula="of:=[.D47]-[.D46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6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51388888888889" calcext:value-type="float">
            <text:p>0,00035138888888888900</text:p>
          </table:table-cell>
          <table:table-cell table:formula="of:=[.D48]-[.D47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6" office:value-type="float" office:value="3102" calcext:value-type="float">
            <text:p>310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59027777777778" calcext:value-type="float">
            <text:p>0,00035902777777777800</text:p>
          </table:table-cell>
          <table:table-cell table:formula="of:=[.D49]-[.D48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6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66666666666667" calcext:value-type="float">
            <text:p>0,00036666666666666700</text:p>
          </table:table-cell>
          <table:table-cell table:formula="of:=[.D50]-[.D49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6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74305555555556" calcext:value-type="float">
            <text:p>0,00037430555555555600</text:p>
          </table:table-cell>
          <table:table-cell table:formula="of:=[.D51]-[.D50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6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81944444444444" calcext:value-type="float">
            <text:p>0,00038194444444444400</text:p>
          </table:table-cell>
          <table:table-cell table:formula="of:=[.D52]-[.D5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6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89583333333333" calcext:value-type="float">
            <text:p>0,00038958333333333300</text:p>
          </table:table-cell>
          <table:table-cell table:formula="of:=[.D53]-[.D52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6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97222222222222" calcext:value-type="float">
            <text:p>0,00039722222222222200</text:p>
          </table:table-cell>
          <table:table-cell table:formula="of:=[.D54]-[.D53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6" office:value-type="float" office:value="3498" calcext:value-type="float">
            <text:p>349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04861111111111" calcext:value-type="float">
            <text:p>0,00040486111111111100</text:p>
          </table:table-cell>
          <table:table-cell table:formula="of:=[.D55]-[.D54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6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125" calcext:value-type="float">
            <text:p>0,00041250000000000000</text:p>
          </table:table-cell>
          <table:table-cell table:formula="of:=[.D56]-[.D55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6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20138888888889" calcext:value-type="float">
            <text:p>0,00042013888888888900</text:p>
          </table:table-cell>
          <table:table-cell table:formula="of:=[.D57]-[.D56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6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27777777777778" calcext:value-type="float">
            <text:p>0,00042777777777777800</text:p>
          </table:table-cell>
          <table:table-cell table:formula="of:=[.D58]-[.D57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6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35416666666667" calcext:value-type="float">
            <text:p>0,00043541666666666700</text:p>
          </table:table-cell>
          <table:table-cell table:formula="of:=[.D59]-[.D5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6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43055555555556" calcext:value-type="float">
            <text:p>0,00044305555555555600</text:p>
          </table:table-cell>
          <table:table-cell table:formula="of:=[.D60]-[.D59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6" office:value-type="float" office:value="3894" calcext:value-type="float">
            <text:p>389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50694444444444" calcext:value-type="float">
            <text:p>0,00045069444444444400</text:p>
          </table:table-cell>
          <table:table-cell table:formula="of:=[.D61]-[.D60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6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58333333333333" calcext:value-type="float">
            <text:p>0,00045833333333333300</text:p>
          </table:table-cell>
          <table:table-cell table:formula="of:=[.D62]-[.D61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6" office:value-type="float" office:value="4026" calcext:value-type="float">
            <text:p>402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65972222222222" calcext:value-type="float">
            <text:p>0,00046597222222222200</text:p>
          </table:table-cell>
          <table:table-cell table:formula="of:=[.D63]-[.D62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6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73611111111111" calcext:value-type="float">
            <text:p>0,00047361111111111100</text:p>
          </table:table-cell>
          <table:table-cell table:formula="of:=[.D64]-[.D63]" office:value-type="float" office:value="0.0000076388888888889" calcext:value-type="float">
            <text:p>0,0000076388888888889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6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8125" calcext:value-type="float">
            <text:p>0,00048125000000000000</text:p>
          </table:table-cell>
          <table:table-cell table:formula="of:=[.D65]-[.D6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6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88888888888889" calcext:value-type="float">
            <text:p>0,00048888888888888900</text:p>
          </table:table-cell>
          <table:table-cell table:formula="of:=[.D66]-[.D65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6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96527777777778" calcext:value-type="float">
            <text:p>0,00049652777777777800</text:p>
          </table:table-cell>
          <table:table-cell table:formula="of:=[.D67]-[.D6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6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04166666666667" calcext:value-type="float">
            <text:p>0,00050416666666666700</text:p>
          </table:table-cell>
          <table:table-cell table:formula="of:=[.D68]-[.D67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6" office:value-type="float" office:value="4422" calcext:value-type="float">
            <text:p>442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11805555555556" calcext:value-type="float">
            <text:p>0,00051180555555555600</text:p>
          </table:table-cell>
          <table:table-cell table:formula="of:=[.D69]-[.D6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6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19444444444444" calcext:value-type="float">
            <text:p>0,00051944444444444400</text:p>
          </table:table-cell>
          <table:table-cell table:formula="of:=[.D70]-[.D6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6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27083333333333" calcext:value-type="float">
            <text:p>0,00052708333333333300</text:p>
          </table:table-cell>
          <table:table-cell table:formula="of:=[.D71]-[.D70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6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34722222222222" calcext:value-type="float">
            <text:p>0,00053472222222222200</text:p>
          </table:table-cell>
          <table:table-cell table:formula="of:=[.D72]-[.D7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6" office:value-type="float" office:value="4686" calcext:value-type="float">
            <text:p>468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42361111111111" calcext:value-type="float">
            <text:p>0,00054236111111111100</text:p>
          </table:table-cell>
          <table:table-cell table:formula="of:=[.D73]-[.D72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6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5" calcext:value-type="float">
            <text:p>0,00055000000000000000</text:p>
          </table:table-cell>
          <table:table-cell table:formula="of:=[.D74]-[.D7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6" office:value-type="float" office:value="4818" calcext:value-type="float">
            <text:p>481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57638888888889" calcext:value-type="float">
            <text:p>0,00055763888888888900</text:p>
          </table:table-cell>
          <table:table-cell table:formula="of:=[.D75]-[.D74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6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65277777777778" calcext:value-type="float">
            <text:p>0,00056527777777777800</text:p>
          </table:table-cell>
          <table:table-cell table:formula="of:=[.D76]-[.D7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6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72916666666667" calcext:value-type="float">
            <text:p>0,00057291666666666700</text:p>
          </table:table-cell>
          <table:table-cell table:formula="of:=[.D77]-[.D7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6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80555555555556" calcext:value-type="float">
            <text:p>0,00058055555555555600</text:p>
          </table:table-cell>
          <table:table-cell table:formula="of:=[.D78]-[.D77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6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88194444444445" calcext:value-type="float">
            <text:p>0,00058819444444444500</text:p>
          </table:table-cell>
          <table:table-cell table:formula="of:=[.D79]-[.D7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6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95833333333333" calcext:value-type="float">
            <text:p>0,00059583333333333300</text:p>
          </table:table-cell>
          <table:table-cell table:formula="of:=[.D80]-[.D79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6" office:value-type="float" office:value="5214" calcext:value-type="float">
            <text:p>521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03472222222222" calcext:value-type="float">
            <text:p>0,00060347222222222200</text:p>
          </table:table-cell>
          <table:table-cell table:formula="of:=[.D81]-[.D8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6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11111111111111" calcext:value-type="float">
            <text:p>0,00061111111111111100</text:p>
          </table:table-cell>
          <table:table-cell table:formula="of:=[.D82]-[.D81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6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1875" calcext:value-type="float">
            <text:p>0,00061875000000000000</text:p>
          </table:table-cell>
          <table:table-cell table:formula="of:=[.D83]-[.D8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6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26388888888889" calcext:value-type="float">
            <text:p>0,00062638888888888900</text:p>
          </table:table-cell>
          <table:table-cell table:formula="of:=[.D84]-[.D8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6" office:value-type="float" office:value="5478" calcext:value-type="float">
            <text:p>547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34027777777778" calcext:value-type="float">
            <text:p>0,00063402777777777800</text:p>
          </table:table-cell>
          <table:table-cell table:formula="of:=[.D85]-[.D84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6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41666666666667" calcext:value-type="float">
            <text:p>0,00064166666666666700</text:p>
          </table:table-cell>
          <table:table-cell table:formula="of:=[.D86]-[.D8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6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49305555555556" calcext:value-type="float">
            <text:p>0,00064930555555555600</text:p>
          </table:table-cell>
          <table:table-cell table:formula="of:=[.D87]-[.D86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6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56944444444445" calcext:value-type="float">
            <text:p>0,00065694444444444500</text:p>
          </table:table-cell>
          <table:table-cell table:formula="of:=[.D88]-[.D8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6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64583333333333" calcext:value-type="float">
            <text:p>0,00066458333333333300</text:p>
          </table:table-cell>
          <table:table-cell table:formula="of:=[.D89]-[.D88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6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72222222222222" calcext:value-type="float">
            <text:p>0,00067222222222222200</text:p>
          </table:table-cell>
          <table:table-cell table:formula="of:=[.D90]-[.D8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6" office:value-type="float" office:value="5874" calcext:value-type="float">
            <text:p>587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79861111111111" calcext:value-type="float">
            <text:p>0,00067986111111111100</text:p>
          </table:table-cell>
          <table:table-cell table:formula="of:=[.D91]-[.D9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6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875" calcext:value-type="float">
            <text:p>0,00068750000000000000</text:p>
          </table:table-cell>
          <table:table-cell table:formula="of:=[.D92]-[.D91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6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95138888888889" calcext:value-type="float">
            <text:p>0,00069513888888888900</text:p>
          </table:table-cell>
          <table:table-cell table:formula="of:=[.D93]-[.D9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6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02777777777778" calcext:value-type="float">
            <text:p>0,00070277777777777800</text:p>
          </table:table-cell>
          <table:table-cell table:formula="of:=[.D94]-[.D93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6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10416666666667" calcext:value-type="float">
            <text:p>0,00071041666666666700</text:p>
          </table:table-cell>
          <table:table-cell table:formula="of:=[.D95]-[.D9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6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18055555555556" calcext:value-type="float">
            <text:p>0,00071805555555555600</text:p>
          </table:table-cell>
          <table:table-cell table:formula="of:=[.D96]-[.D9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6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25694444444444" calcext:value-type="float">
            <text:p>0,00072569444444444400</text:p>
          </table:table-cell>
          <table:table-cell table:formula="of:=[.D97]-[.D96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6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33333333333333" calcext:value-type="float">
            <text:p>0,00073333333333333300</text:p>
          </table:table-cell>
          <table:table-cell table:formula="of:=[.D98]-[.D9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6" office:value-type="float" office:value="6402" calcext:value-type="float">
            <text:p>640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40972222222222" calcext:value-type="float">
            <text:p>0,00074097222222222200</text:p>
          </table:table-cell>
          <table:table-cell table:formula="of:=[.D99]-[.D98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6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48611111111111" calcext:value-type="float">
            <text:p>0,00074861111111111100</text:p>
          </table:table-cell>
          <table:table-cell table:formula="of:=[.D100]-[.D9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6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5625" calcext:value-type="float">
            <text:p>0,00075625000000000000</text:p>
          </table:table-cell>
          <table:table-cell table:formula="of:=[.D101]-[.D100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6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63888888888889" calcext:value-type="float">
            <text:p>0,00076388888888888900</text:p>
          </table:table-cell>
          <table:table-cell table:formula="of:=[.D102]-[.D10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6" office:value-type="float" office:value="6666" calcext:value-type="float">
            <text:p>666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71527777777778" calcext:value-type="float">
            <text:p>0,00077152777777777800</text:p>
          </table:table-cell>
          <table:table-cell table:formula="of:=[.D103]-[.D10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6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79166666666667" calcext:value-type="float">
            <text:p>0,00077916666666666700</text:p>
          </table:table-cell>
          <table:table-cell table:formula="of:=[.D104]-[.D103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6" office:value-type="float" office:value="6798" calcext:value-type="float">
            <text:p>679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86805555555556" calcext:value-type="float">
            <text:p>0,00078680555555555600</text:p>
          </table:table-cell>
          <table:table-cell table:formula="of:=[.D105]-[.D10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6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94444444444444" calcext:value-type="float">
            <text:p>0,00079444444444444500</text:p>
          </table:table-cell>
          <table:table-cell table:formula="of:=[.D106]-[.D105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6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02083333333333" calcext:value-type="float">
            <text:p>0,00080208333333333300</text:p>
          </table:table-cell>
          <table:table-cell table:formula="of:=[.D107]-[.D10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6" office:value-type="float" office:value="6996" calcext:value-type="float">
            <text:p>699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09722222222222" calcext:value-type="float">
            <text:p>0,00080972222222222200</text:p>
          </table:table-cell>
          <table:table-cell table:formula="of:=[.D108]-[.D107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6" office:value-type="float" office:value="7062" calcext:value-type="float">
            <text:p>706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17361111111111" calcext:value-type="float">
            <text:p>0,00081736111111111100</text:p>
          </table:table-cell>
          <table:table-cell table:formula="of:=[.D109]-[.D10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6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25" calcext:value-type="float">
            <text:p>0,00082500000000000000</text:p>
          </table:table-cell>
          <table:table-cell table:formula="of:=[.D110]-[.D10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6" office:value-type="float" office:value="7194" calcext:value-type="float">
            <text:p>719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32638888888889" calcext:value-type="float">
            <text:p>0,00083263888888888900</text:p>
          </table:table-cell>
          <table:table-cell table:formula="of:=[.D111]-[.D110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6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40277777777778" calcext:value-type="float">
            <text:p>0,00084027777777777800</text:p>
          </table:table-cell>
          <table:table-cell table:formula="of:=[.D112]-[.D11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6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47916666666667" calcext:value-type="float">
            <text:p>0,00084791666666666700</text:p>
          </table:table-cell>
          <table:table-cell table:formula="of:=[.D113]-[.D112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6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55555555555556" calcext:value-type="float">
            <text:p>0,00085555555555555600</text:p>
          </table:table-cell>
          <table:table-cell table:formula="of:=[.D114]-[.D11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6" office:value-type="float" office:value="7458" calcext:value-type="float">
            <text:p>745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863194444444444" calcext:value-type="float">
            <text:p>0,00086319444444444500</text:p>
          </table:table-cell>
          <table:table-cell table:formula="of:=[.D115]-[.D114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6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70833333333333" calcext:value-type="float">
            <text:p>0,00087083333333333400</text:p>
          </table:table-cell>
          <table:table-cell table:formula="of:=[.D116]-[.D11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6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878472222222222" calcext:value-type="float">
            <text:p>0,00087847222222222200</text:p>
          </table:table-cell>
          <table:table-cell table:formula="of:=[.D117]-[.D11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6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86111111111111" calcext:value-type="float">
            <text:p>0,00088611111111111100</text:p>
          </table:table-cell>
          <table:table-cell table:formula="of:=[.D118]-[.D117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6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89375" calcext:value-type="float">
            <text:p>0,00089375000000000000</text:p>
          </table:table-cell>
          <table:table-cell table:formula="of:=[.D119]-[.D11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6" office:value-type="float" office:value="7788" calcext:value-type="float">
            <text:p>778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01388888888889" calcext:value-type="float">
            <text:p>0,00090138888888888900</text:p>
          </table:table-cell>
          <table:table-cell table:formula="of:=[.D120]-[.D119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6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909027777777778" calcext:value-type="float">
            <text:p>0,00090902777777777800</text:p>
          </table:table-cell>
          <table:table-cell table:formula="of:=[.D121]-[.D12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6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916666666666667" calcext:value-type="float">
            <text:p>0,00091666666666666700</text:p>
          </table:table-cell>
          <table:table-cell table:formula="of:=[.D122]-[.D121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6" office:value-type="float" office:value="7986" calcext:value-type="float">
            <text:p>798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924305555555556" calcext:value-type="float">
            <text:p>0,00092430555555555600</text:p>
          </table:table-cell>
          <table:table-cell table:formula="of:=[.D123]-[.D12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6" office:value-type="float" office:value="8052" calcext:value-type="float">
            <text:p>805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931944444444444" calcext:value-type="float">
            <text:p>0,00093194444444444400</text:p>
          </table:table-cell>
          <table:table-cell table:formula="of:=[.D124]-[.D12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6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939583333333333" calcext:value-type="float">
            <text:p>0,00093958333333333300</text:p>
          </table:table-cell>
          <table:table-cell table:formula="of:=[.D125]-[.D124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6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947222222222222" calcext:value-type="float">
            <text:p>0,00094722222222222200</text:p>
          </table:table-cell>
          <table:table-cell table:formula="of:=[.D126]-[.D12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6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954861111111111" calcext:value-type="float">
            <text:p>0,00095486111111111100</text:p>
          </table:table-cell>
          <table:table-cell table:formula="of:=[.D127]-[.D126]" office:value-type="float" office:value="0.00000763888888888895" calcext:value-type="float">
            <text:p>0,00000763888888888895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6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9625" calcext:value-type="float">
            <text:p>0,00096250000000000000</text:p>
          </table:table-cell>
          <table:table-cell table:formula="of:=[.D128]-[.D12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6" office:value-type="float" office:value="8382" calcext:value-type="float">
            <text:p>838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970138888888889" calcext:value-type="float">
            <text:p>0,00097013888888888900</text:p>
          </table:table-cell>
          <table:table-cell table:formula="of:=[.D129]-[.D12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6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977777777777778" calcext:value-type="float">
            <text:p>0,00097777777777777800</text:p>
          </table:table-cell>
          <table:table-cell table:formula="of:=[.D130]-[.D12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6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985416666666667" calcext:value-type="float">
            <text:p>0,00098541666666666700</text:p>
          </table:table-cell>
          <table:table-cell table:formula="of:=[.D131]-[.D13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6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993055555555556" calcext:value-type="float">
            <text:p>0,00099305555555555600</text:p>
          </table:table-cell>
          <table:table-cell table:formula="of:=[.D132]-[.D13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6" office:value-type="float" office:value="8646" calcext:value-type="float">
            <text:p>864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00069444444444" calcext:value-type="float">
            <text:p>0,00100069444444444000</text:p>
          </table:table-cell>
          <table:table-cell table:formula="of:=[.D133]-[.D13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6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00833333333333" calcext:value-type="float">
            <text:p>0,00100833333333333000</text:p>
          </table:table-cell>
          <table:table-cell table:formula="of:=[.D134]-[.D13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6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01597222222222" calcext:value-type="float">
            <text:p>0,00101597222222222000</text:p>
          </table:table-cell>
          <table:table-cell table:formula="of:=[.D135]-[.D134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6" office:value-type="float" office:value="8844" calcext:value-type="float">
            <text:p>884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02361111111111" calcext:value-type="float">
            <text:p>0,00102361111111111000</text:p>
          </table:table-cell>
          <table:table-cell table:formula="of:=[.D136]-[.D13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6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03125" calcext:value-type="float">
            <text:p>0,00103125000000000000</text:p>
          </table:table-cell>
          <table:table-cell table:formula="of:=[.D137]-[.D13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6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03888888888889" calcext:value-type="float">
            <text:p>0,00103888888888889000</text:p>
          </table:table-cell>
          <table:table-cell table:formula="of:=[.D138]-[.D13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6" office:value-type="float" office:value="9042" calcext:value-type="float">
            <text:p>904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04652777777778" calcext:value-type="float">
            <text:p>0,00104652777777778000</text:p>
          </table:table-cell>
          <table:table-cell table:formula="of:=[.D139]-[.D13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6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05416666666667" calcext:value-type="float">
            <text:p>0,00105416666666667000</text:p>
          </table:table-cell>
          <table:table-cell table:formula="of:=[.D140]-[.D13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6" office:value-type="float" office:value="9174" calcext:value-type="float">
            <text:p>917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06180555555556" calcext:value-type="float">
            <text:p>0,00106180555555556000</text:p>
          </table:table-cell>
          <table:table-cell table:formula="of:=[.D141]-[.D14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6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06944444444444" calcext:value-type="float">
            <text:p>0,00106944444444444000</text:p>
          </table:table-cell>
          <table:table-cell table:formula="of:=[.D142]-[.D14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6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07708333333333" calcext:value-type="float">
            <text:p>0,00107708333333333000</text:p>
          </table:table-cell>
          <table:table-cell table:formula="of:=[.D143]-[.D14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6" office:value-type="float" office:value="9372" calcext:value-type="float">
            <text:p>937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08472222222222" calcext:value-type="float">
            <text:p>0,00108472222222222000</text:p>
          </table:table-cell>
          <table:table-cell table:formula="of:=[.D144]-[.D14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6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09236111111111" calcext:value-type="float">
            <text:p>0,00109236111111111000</text:p>
          </table:table-cell>
          <table:table-cell table:formula="of:=[.D145]-[.D144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6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1" calcext:value-type="float">
            <text:p>0,00110000000000000000</text:p>
          </table:table-cell>
          <table:table-cell table:formula="of:=[.D146]-[.D14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6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10763888888889" calcext:value-type="float">
            <text:p>0,00110763888888889000</text:p>
          </table:table-cell>
          <table:table-cell table:formula="of:=[.D147]-[.D14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6" office:value-type="float" office:value="9636" calcext:value-type="float">
            <text:p>963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11527777777778" calcext:value-type="float">
            <text:p>0,00111527777777778000</text:p>
          </table:table-cell>
          <table:table-cell table:formula="of:=[.D148]-[.D14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6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12291666666667" calcext:value-type="float">
            <text:p>0,00112291666666667000</text:p>
          </table:table-cell>
          <table:table-cell table:formula="of:=[.D149]-[.D14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6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13055555555556" calcext:value-type="float">
            <text:p>0,00113055555555556000</text:p>
          </table:table-cell>
          <table:table-cell table:formula="of:=[.D150]-[.D14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6" office:value-type="float" office:value="9834" calcext:value-type="float">
            <text:p>983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13819444444444" calcext:value-type="float">
            <text:p>0,00113819444444444000</text:p>
          </table:table-cell>
          <table:table-cell table:formula="of:=[.D151]-[.D15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6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14583333333333" calcext:value-type="float">
            <text:p>0,00114583333333333000</text:p>
          </table:table-cell>
          <table:table-cell table:formula="of:=[.D152]-[.D15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6" office:value-type="float" office:value="9966" calcext:value-type="float">
            <text:p>996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15347222222222" calcext:value-type="float">
            <text:p>0,00115347222222222000</text:p>
          </table:table-cell>
          <table:table-cell table:formula="of:=[.D153]-[.D15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6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16111111111111" calcext:value-type="float">
            <text:p>0,00116111111111111000</text:p>
          </table:table-cell>
          <table:table-cell table:formula="of:=[.D154]-[.D15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6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16875" calcext:value-type="float">
            <text:p>0,00116875000000000000</text:p>
          </table:table-cell>
          <table:table-cell table:formula="of:=[.D155]-[.D15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6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17638888888889" calcext:value-type="float">
            <text:p>0,00117638888888889000</text:p>
          </table:table-cell>
          <table:table-cell table:formula="of:=[.D156]-[.D15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6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18402777777778" calcext:value-type="float">
            <text:p>0,00118402777777778000</text:p>
          </table:table-cell>
          <table:table-cell table:formula="of:=[.D157]-[.D15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6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19166666666667" calcext:value-type="float">
            <text:p>0,00119166666666667000</text:p>
          </table:table-cell>
          <table:table-cell table:formula="of:=[.D158]-[.D15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6" office:value-type="float" office:value="10362" calcext:value-type="float">
            <text:p>1036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19930555555556" calcext:value-type="float">
            <text:p>0,00119930555555556000</text:p>
          </table:table-cell>
          <table:table-cell table:formula="of:=[.D159]-[.D15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6" office:value-type="float" office:value="10428" calcext:value-type="float">
            <text:p>1042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20694444444444" calcext:value-type="float">
            <text:p>0,00120694444444444000</text:p>
          </table:table-cell>
          <table:table-cell table:formula="of:=[.D160]-[.D15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6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21458333333333" calcext:value-type="float">
            <text:p>0,00121458333333333000</text:p>
          </table:table-cell>
          <table:table-cell table:formula="of:=[.D161]-[.D16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6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22222222222222" calcext:value-type="float">
            <text:p>0,00122222222222222000</text:p>
          </table:table-cell>
          <table:table-cell table:formula="of:=[.D162]-[.D16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6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22986111111111" calcext:value-type="float">
            <text:p>0,00122986111111111000</text:p>
          </table:table-cell>
          <table:table-cell table:formula="of:=[.D163]-[.D16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6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2375" calcext:value-type="float">
            <text:p>0,00123750000000000000</text:p>
          </table:table-cell>
          <table:table-cell table:formula="of:=[.D164]-[.D16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6" office:value-type="float" office:value="10758" calcext:value-type="float">
            <text:p>1075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24513888888889" calcext:value-type="float">
            <text:p>0,00124513888888889000</text:p>
          </table:table-cell>
          <table:table-cell table:formula="of:=[.D165]-[.D16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6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25277777777778" calcext:value-type="float">
            <text:p>0,00125277777777778000</text:p>
          </table:table-cell>
          <table:table-cell table:formula="of:=[.D166]-[.D16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6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26041666666667" calcext:value-type="float">
            <text:p>0,00126041666666667000</text:p>
          </table:table-cell>
          <table:table-cell table:formula="of:=[.D167]-[.D16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6" office:value-type="float" office:value="10956" calcext:value-type="float">
            <text:p>1095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26805555555556" calcext:value-type="float">
            <text:p>0,00126805555555556000</text:p>
          </table:table-cell>
          <table:table-cell table:formula="of:=[.D168]-[.D16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6" office:value-type="float" office:value="11022" calcext:value-type="float">
            <text:p>1102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27569444444444" calcext:value-type="float">
            <text:p>0,00127569444444444000</text:p>
          </table:table-cell>
          <table:table-cell table:formula="of:=[.D169]-[.D16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6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28333333333333" calcext:value-type="float">
            <text:p>0,00128333333333333000</text:p>
          </table:table-cell>
          <table:table-cell table:formula="of:=[.D170]-[.D16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6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29097222222222" calcext:value-type="float">
            <text:p>0,00129097222222222000</text:p>
          </table:table-cell>
          <table:table-cell table:formula="of:=[.D171]-[.D17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6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29861111111111" calcext:value-type="float">
            <text:p>0,00129861111111111000</text:p>
          </table:table-cell>
          <table:table-cell table:formula="of:=[.D172]-[.D17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6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30625" calcext:value-type="float">
            <text:p>0,00130625000000000000</text:p>
          </table:table-cell>
          <table:table-cell table:formula="of:=[.D173]-[.D17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6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31388888888889" calcext:value-type="float">
            <text:p>0,00131388888888889000</text:p>
          </table:table-cell>
          <table:table-cell table:formula="of:=[.D174]-[.D17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6" office:value-type="float" office:value="11418" calcext:value-type="float">
            <text:p>1141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32152777777778" calcext:value-type="float">
            <text:p>0,00132152777777778000</text:p>
          </table:table-cell>
          <table:table-cell table:formula="of:=[.D175]-[.D17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6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32916666666667" calcext:value-type="float">
            <text:p>0,00132916666666667000</text:p>
          </table:table-cell>
          <table:table-cell table:formula="of:=[.D176]-[.D17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6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33680555555556" calcext:value-type="float">
            <text:p>0,00133680555555556000</text:p>
          </table:table-cell>
          <table:table-cell table:formula="of:=[.D177]-[.D17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6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34444444444444" calcext:value-type="float">
            <text:p>0,00134444444444444000</text:p>
          </table:table-cell>
          <table:table-cell table:formula="of:=[.D178]-[.D17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6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35208333333333" calcext:value-type="float">
            <text:p>0,00135208333333333000</text:p>
          </table:table-cell>
          <table:table-cell table:formula="of:=[.D179]-[.D17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6" office:value-type="float" office:value="11748" calcext:value-type="float">
            <text:p>1174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35972222222222" calcext:value-type="float">
            <text:p>0,00135972222222222000</text:p>
          </table:table-cell>
          <table:table-cell table:formula="of:=[.D180]-[.D17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6" office:value-type="float" office:value="11814" calcext:value-type="float">
            <text:p>1181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36736111111111" calcext:value-type="float">
            <text:p>0,00136736111111111000</text:p>
          </table:table-cell>
          <table:table-cell table:formula="of:=[.D181]-[.D18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6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375" calcext:value-type="float">
            <text:p>0,00137500000000000000</text:p>
          </table:table-cell>
          <table:table-cell table:formula="of:=[.D182]-[.D18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6" office:value-type="float" office:value="11946" calcext:value-type="float">
            <text:p>1194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38263888888889" calcext:value-type="float">
            <text:p>0,00138263888888889000</text:p>
          </table:table-cell>
          <table:table-cell table:formula="of:=[.D183]-[.D18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6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39027777777778" calcext:value-type="float">
            <text:p>0,00139027777777778000</text:p>
          </table:table-cell>
          <table:table-cell table:formula="of:=[.D184]-[.D18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6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39791666666667" calcext:value-type="float">
            <text:p>0,00139791666666667000</text:p>
          </table:table-cell>
          <table:table-cell table:formula="of:=[.D185]-[.D18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6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40555555555556" calcext:value-type="float">
            <text:p>0,00140555555555556000</text:p>
          </table:table-cell>
          <table:table-cell table:formula="of:=[.D186]-[.D18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6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41319444444444" calcext:value-type="float">
            <text:p>0,00141319444444444000</text:p>
          </table:table-cell>
          <table:table-cell table:formula="of:=[.D187]-[.D18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6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42083333333333" calcext:value-type="float">
            <text:p>0,00142083333333333000</text:p>
          </table:table-cell>
          <table:table-cell table:formula="of:=[.D188]-[.D18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6" office:value-type="float" office:value="12342" calcext:value-type="float">
            <text:p>1234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42847222222222" calcext:value-type="float">
            <text:p>0,00142847222222222000</text:p>
          </table:table-cell>
          <table:table-cell table:formula="of:=[.D189]-[.D18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6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43611111111111" calcext:value-type="float">
            <text:p>0,00143611111111111000</text:p>
          </table:table-cell>
          <table:table-cell table:formula="of:=[.D190]-[.D18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6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44375" calcext:value-type="float">
            <text:p>0,00144375000000000000</text:p>
          </table:table-cell>
          <table:table-cell table:formula="of:=[.D191]-[.D19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6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45138888888889" calcext:value-type="float">
            <text:p>0,00145138888888889000</text:p>
          </table:table-cell>
          <table:table-cell table:formula="of:=[.D192]-[.D19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6" office:value-type="float" office:value="12606" calcext:value-type="float">
            <text:p>1260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45902777777778" calcext:value-type="float">
            <text:p>0,00145902777777778000</text:p>
          </table:table-cell>
          <table:table-cell table:formula="of:=[.D193]-[.D19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6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46666666666667" calcext:value-type="float">
            <text:p>0,00146666666666667000</text:p>
          </table:table-cell>
          <table:table-cell table:formula="of:=[.D194]-[.D19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6" office:value-type="float" office:value="12738" calcext:value-type="float">
            <text:p>1273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47430555555556" calcext:value-type="float">
            <text:p>0,00147430555555556000</text:p>
          </table:table-cell>
          <table:table-cell table:formula="of:=[.D195]-[.D19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6" office:value-type="float" office:value="12804" calcext:value-type="float">
            <text:p>1280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48194444444444" calcext:value-type="float">
            <text:p>0,00148194444444444000</text:p>
          </table:table-cell>
          <table:table-cell table:formula="of:=[.D196]-[.D19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6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48958333333333" calcext:value-type="float">
            <text:p>0,00148958333333333000</text:p>
          </table:table-cell>
          <table:table-cell table:formula="of:=[.D197]-[.D19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6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49722222222222" calcext:value-type="float">
            <text:p>0,00149722222222222000</text:p>
          </table:table-cell>
          <table:table-cell table:formula="of:=[.D198]-[.D19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6" office:value-type="float" office:value="13002" calcext:value-type="float">
            <text:p>1300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50486111111111" calcext:value-type="float">
            <text:p>0,00150486111111111000</text:p>
          </table:table-cell>
          <table:table-cell table:formula="of:=[.D199]-[.D19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6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5125" calcext:value-type="float">
            <text:p>0,00151250000000000000</text:p>
          </table:table-cell>
          <table:table-cell table:formula="of:=[.D200]-[.D19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6" office:value-type="float" office:value="13134" calcext:value-type="float">
            <text:p>1313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52013888888889" calcext:value-type="float">
            <text:p>0,00152013888888889000</text:p>
          </table:table-cell>
          <table:table-cell table:formula="of:=[.D201]-[.D20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6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52777777777778" calcext:value-type="float">
            <text:p>0,00152777777777778000</text:p>
          </table:table-cell>
          <table:table-cell table:formula="of:=[.D202]-[.D20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6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53541666666667" calcext:value-type="float">
            <text:p>0,00153541666666667000</text:p>
          </table:table-cell>
          <table:table-cell table:formula="of:=[.D203]-[.D20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6" office:value-type="float" office:value="13332" calcext:value-type="float">
            <text:p>1333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54305555555556" calcext:value-type="float">
            <text:p>0,00154305555555556000</text:p>
          </table:table-cell>
          <table:table-cell table:formula="of:=[.D204]-[.D20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6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55069444444444" calcext:value-type="float">
            <text:p>0,00155069444444444000</text:p>
          </table:table-cell>
          <table:table-cell table:formula="of:=[.D205]-[.D20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6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55833333333333" calcext:value-type="float">
            <text:p>0,00155833333333333000</text:p>
          </table:table-cell>
          <table:table-cell table:formula="of:=[.D206]-[.D20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6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56597222222222" calcext:value-type="float">
            <text:p>0,00156597222222222000</text:p>
          </table:table-cell>
          <table:table-cell table:formula="of:=[.D207]-[.D20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6" office:value-type="float" office:value="13596" calcext:value-type="float">
            <text:p>1359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57361111111111" calcext:value-type="float">
            <text:p>0,00157361111111111000</text:p>
          </table:table-cell>
          <table:table-cell table:formula="of:=[.D208]-[.D20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6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58125" calcext:value-type="float">
            <text:p>0,00158125000000000000</text:p>
          </table:table-cell>
          <table:table-cell table:formula="of:=[.D209]-[.D20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6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58888888888889" calcext:value-type="float">
            <text:p>0,00158888888888889000</text:p>
          </table:table-cell>
          <table:table-cell table:formula="of:=[.D210]-[.D20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6" office:value-type="float" office:value="13794" calcext:value-type="float">
            <text:p>1379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59652777777778" calcext:value-type="float">
            <text:p>0,00159652777777778000</text:p>
          </table:table-cell>
          <table:table-cell table:formula="of:=[.D211]-[.D21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6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60416666666667" calcext:value-type="float">
            <text:p>0,00160416666666667000</text:p>
          </table:table-cell>
          <table:table-cell table:formula="of:=[.D212]-[.D21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6" office:value-type="float" office:value="13926" calcext:value-type="float">
            <text:p>1392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61180555555556" calcext:value-type="float">
            <text:p>0,00161180555555556000</text:p>
          </table:table-cell>
          <table:table-cell table:formula="of:=[.D213]-[.D21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6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61944444444444" calcext:value-type="float">
            <text:p>0,00161944444444444000</text:p>
          </table:table-cell>
          <table:table-cell table:formula="of:=[.D214]-[.D21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6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62708333333333" calcext:value-type="float">
            <text:p>0,00162708333333333000</text:p>
          </table:table-cell>
          <table:table-cell table:formula="of:=[.D215]-[.D214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6" office:value-type="float" office:value="14124" calcext:value-type="float">
            <text:p>1412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63472222222222" calcext:value-type="float">
            <text:p>0,00163472222222222000</text:p>
          </table:table-cell>
          <table:table-cell table:formula="of:=[.D216]-[.D21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6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64236111111111" calcext:value-type="float">
            <text:p>0,00164236111111111000</text:p>
          </table:table-cell>
          <table:table-cell table:formula="of:=[.D217]-[.D21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6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65" calcext:value-type="float">
            <text:p>0,00165000000000000000</text:p>
          </table:table-cell>
          <table:table-cell table:formula="of:=[.D218]-[.D21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6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65763888888889" calcext:value-type="float">
            <text:p>0,00165763888888889000</text:p>
          </table:table-cell>
          <table:table-cell table:formula="of:=[.D219]-[.D21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6" office:value-type="float" office:value="14388" calcext:value-type="float">
            <text:p>1438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66527777777778" calcext:value-type="float">
            <text:p>0,00166527777777778000</text:p>
          </table:table-cell>
          <table:table-cell table:formula="of:=[.D220]-[.D21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6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67291666666667" calcext:value-type="float">
            <text:p>0,00167291666666667000</text:p>
          </table:table-cell>
          <table:table-cell table:formula="of:=[.D221]-[.D22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6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68055555555556" calcext:value-type="float">
            <text:p>0,00168055555555556000</text:p>
          </table:table-cell>
          <table:table-cell table:formula="of:=[.D222]-[.D22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6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68819444444444" calcext:value-type="float">
            <text:p>0,00168819444444444000</text:p>
          </table:table-cell>
          <table:table-cell table:formula="of:=[.D223]-[.D22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6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69583333333333" calcext:value-type="float">
            <text:p>0,00169583333333333000</text:p>
          </table:table-cell>
          <table:table-cell table:formula="of:=[.D224]-[.D22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6" office:value-type="float" office:value="14718" calcext:value-type="float">
            <text:p>1471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70347222222222" calcext:value-type="float">
            <text:p>0,00170347222222222000</text:p>
          </table:table-cell>
          <table:table-cell table:formula="of:=[.D225]-[.D22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6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71111111111111" calcext:value-type="float">
            <text:p>0,00171111111111111000</text:p>
          </table:table-cell>
          <table:table-cell table:formula="of:=[.D226]-[.D22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6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71875" calcext:value-type="float">
            <text:p>0,00171875000000000000</text:p>
          </table:table-cell>
          <table:table-cell table:formula="of:=[.D227]-[.D22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6" office:value-type="float" office:value="14916" calcext:value-type="float">
            <text:p>1491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72638888888889" calcext:value-type="float">
            <text:p>0,00172638888888889000</text:p>
          </table:table-cell>
          <table:table-cell table:formula="of:=[.D228]-[.D227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6" office:value-type="float" office:value="14982" calcext:value-type="float">
            <text:p>1498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73402777777778" calcext:value-type="float">
            <text:p>0,00173402777777778000</text:p>
          </table:table-cell>
          <table:table-cell table:formula="of:=[.D229]-[.D22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6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74166666666667" calcext:value-type="float">
            <text:p>0,00174166666666667000</text:p>
          </table:table-cell>
          <table:table-cell table:formula="of:=[.D230]-[.D22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6" office:value-type="float" office:value="15114" calcext:value-type="float">
            <text:p>1511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74930555555556" calcext:value-type="float">
            <text:p>0,00174930555555556000</text:p>
          </table:table-cell>
          <table:table-cell table:formula="of:=[.D231]-[.D23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6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75694444444444" calcext:value-type="float">
            <text:p>0,00175694444444444000</text:p>
          </table:table-cell>
          <table:table-cell table:formula="of:=[.D232]-[.D23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6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76458333333333" calcext:value-type="float">
            <text:p>0,00176458333333333000</text:p>
          </table:table-cell>
          <table:table-cell table:formula="of:=[.D233]-[.D23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6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77222222222222" calcext:value-type="float">
            <text:p>0,00177222222222222000</text:p>
          </table:table-cell>
          <table:table-cell table:formula="of:=[.D234]-[.D23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6" office:value-type="float" office:value="15378" calcext:value-type="float">
            <text:p>1537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77986111111111" calcext:value-type="float">
            <text:p>0,00177986111111111000</text:p>
          </table:table-cell>
          <table:table-cell table:formula="of:=[.D235]-[.D23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6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7875" calcext:value-type="float">
            <text:p>0,00178750000000000000</text:p>
          </table:table-cell>
          <table:table-cell table:formula="of:=[.D236]-[.D23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6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79513888888889" calcext:value-type="float">
            <text:p>0,00179513888888889000</text:p>
          </table:table-cell>
          <table:table-cell table:formula="of:=[.D237]-[.D23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6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80277777777778" calcext:value-type="float">
            <text:p>0,00180277777777778000</text:p>
          </table:table-cell>
          <table:table-cell table:formula="of:=[.D238]-[.D23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6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81041666666667" calcext:value-type="float">
            <text:p>0,00181041666666667000</text:p>
          </table:table-cell>
          <table:table-cell table:formula="of:=[.D239]-[.D23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6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81805555555556" calcext:value-type="float">
            <text:p>0,00181805555555556000</text:p>
          </table:table-cell>
          <table:table-cell table:formula="of:=[.D240]-[.D23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6" office:value-type="float" office:value="15774" calcext:value-type="float">
            <text:p>1577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82569444444444" calcext:value-type="float">
            <text:p>0,00182569444444444000</text:p>
          </table:table-cell>
          <table:table-cell table:formula="of:=[.D241]-[.D24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6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83333333333333" calcext:value-type="float">
            <text:p>0,00183333333333333000</text:p>
          </table:table-cell>
          <table:table-cell table:formula="of:=[.D242]-[.D241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6" office:value-type="float" office:value="15906" calcext:value-type="float">
            <text:p>1590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84097222222222" calcext:value-type="float">
            <text:p>0,00184097222222222000</text:p>
          </table:table-cell>
          <table:table-cell table:formula="of:=[.D243]-[.D24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6" office:value-type="float" office:value="15972" calcext:value-type="float">
            <text:p>1597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84861111111111" calcext:value-type="float">
            <text:p>0,00184861111111111000</text:p>
          </table:table-cell>
          <table:table-cell table:formula="of:=[.D244]-[.D24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6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85625" calcext:value-type="float">
            <text:p>0,00185625000000000000</text:p>
          </table:table-cell>
          <table:table-cell table:formula="of:=[.D245]-[.D24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6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86388888888889" calcext:value-type="float">
            <text:p>0,00186388888888889000</text:p>
          </table:table-cell>
          <table:table-cell table:formula="of:=[.D246]-[.D24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6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87152777777778" calcext:value-type="float">
            <text:p>0,00187152777777778000</text:p>
          </table:table-cell>
          <table:table-cell table:formula="of:=[.D247]-[.D24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6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87916666666667" calcext:value-type="float">
            <text:p>0,00187916666666667000</text:p>
          </table:table-cell>
          <table:table-cell table:formula="of:=[.D248]-[.D24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6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88680555555556" calcext:value-type="float">
            <text:p>0,00188680555555556000</text:p>
          </table:table-cell>
          <table:table-cell table:formula="of:=[.D249]-[.D248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6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89444444444444" calcext:value-type="float">
            <text:p>0,00189444444444444000</text:p>
          </table:table-cell>
          <table:table-cell table:formula="of:=[.D250]-[.D249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6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90208333333333" calcext:value-type="float">
            <text:p>0,00190208333333333000</text:p>
          </table:table-cell>
          <table:table-cell table:formula="of:=[.D251]-[.D250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6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90972222222222" calcext:value-type="float">
            <text:p>0,00190972222222222000</text:p>
          </table:table-cell>
          <table:table-cell table:formula="of:=[.D252]-[.D25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6" office:value-type="float" office:value="16566" calcext:value-type="float">
            <text:p>1656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91736111111111" calcext:value-type="float">
            <text:p>0,00191736111111111000</text:p>
          </table:table-cell>
          <table:table-cell table:formula="of:=[.D253]-[.D252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6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925" calcext:value-type="float">
            <text:p>0,00192500000000000000</text:p>
          </table:table-cell>
          <table:table-cell table:formula="of:=[.D254]-[.D253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6" office:value-type="float" office:value="16698" calcext:value-type="float">
            <text:p>1669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93263888888889" calcext:value-type="float">
            <text:p>0,00193263888888889000</text:p>
          </table:table-cell>
          <table:table-cell table:formula="of:=[.D255]-[.D254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6" office:value-type="float" office:value="16764" calcext:value-type="float">
            <text:p>1676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94027777777778" calcext:value-type="float">
            <text:p>0,00194027777777778000</text:p>
          </table:table-cell>
          <table:table-cell table:formula="of:=[.D256]-[.D255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6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94791666666667" calcext:value-type="float">
            <text:p>0,00194791666666667000</text:p>
          </table:table-cell>
          <table:table-cell table:formula="of:=[.D257]-[.D256]" office:value-type="float" office:value="0.00000763888888888884" calcext:value-type="float">
            <text:p>0,00000763888888888884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6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95555555555556" calcext:value-type="float">
            <text:p>0,00195555555555556000</text:p>
          </table:table-cell>
          <table:table-cell table:formula="of:=[.D258]-[.D25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6" office:value-type="float" office:value="16962" calcext:value-type="float">
            <text:p>1696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96319444444444" calcext:value-type="float">
            <text:p>0,00196319444444444000</text:p>
          </table:table-cell>
          <table:table-cell table:formula="of:=[.D259]-[.D258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6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97083333333333" calcext:value-type="float">
            <text:p>0,00197083333333333000</text:p>
          </table:table-cell>
          <table:table-cell table:formula="of:=[.D260]-[.D25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6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97847222222222" calcext:value-type="float">
            <text:p>0,00197847222222222000</text:p>
          </table:table-cell>
          <table:table-cell table:formula="of:=[.D261]-[.D26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6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98611111111111" calcext:value-type="float">
            <text:p>0,00198611111111111000</text:p>
          </table:table-cell>
          <table:table-cell table:formula="of:=[.D262]-[.D261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6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99375" calcext:value-type="float">
            <text:p>0,00199375000000000000</text:p>
          </table:table-cell>
          <table:table-cell table:formula="of:=[.D263]-[.D26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6" office:value-type="float" office:value="17292" calcext:value-type="float">
            <text:p>1729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00138888888889" calcext:value-type="float">
            <text:p>0,00200138888888889000</text:p>
          </table:table-cell>
          <table:table-cell table:formula="of:=[.D264]-[.D26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6" office:value-type="float" office:value="17358" calcext:value-type="float">
            <text:p>1735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00902777777778" calcext:value-type="float">
            <text:p>0,00200902777777778000</text:p>
          </table:table-cell>
          <table:table-cell table:formula="of:=[.D265]-[.D264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6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01666666666667" calcext:value-type="float">
            <text:p>0,00201666666666667000</text:p>
          </table:table-cell>
          <table:table-cell table:formula="of:=[.D266]-[.D26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6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02430555555556" calcext:value-type="float">
            <text:p>0,00202430555555556000</text:p>
          </table:table-cell>
          <table:table-cell table:formula="of:=[.D267]-[.D266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6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03194444444444" calcext:value-type="float">
            <text:p>0,00203194444444444000</text:p>
          </table:table-cell>
          <table:table-cell table:formula="of:=[.D268]-[.D26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6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03958333333333" calcext:value-type="float">
            <text:p>0,00203958333333333000</text:p>
          </table:table-cell>
          <table:table-cell table:formula="of:=[.D269]-[.D26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6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04722222222222" calcext:value-type="float">
            <text:p>0,00204722222222222000</text:p>
          </table:table-cell>
          <table:table-cell table:formula="of:=[.D270]-[.D269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6" office:value-type="float" office:value="17754" calcext:value-type="float">
            <text:p>1775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05486111111111" calcext:value-type="float">
            <text:p>0,00205486111111111000</text:p>
          </table:table-cell>
          <table:table-cell table:formula="of:=[.D271]-[.D27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6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0625" calcext:value-type="float">
            <text:p>0,00206250000000000000</text:p>
          </table:table-cell>
          <table:table-cell table:formula="of:=[.D272]-[.D271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6" office:value-type="float" office:value="17886" calcext:value-type="float">
            <text:p>1788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07013888888889" calcext:value-type="float">
            <text:p>0,00207013888888889000</text:p>
          </table:table-cell>
          <table:table-cell table:formula="of:=[.D273]-[.D27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6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07777777777778" calcext:value-type="float">
            <text:p>0,00207777777777778000</text:p>
          </table:table-cell>
          <table:table-cell table:formula="of:=[.D274]-[.D27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6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08541666666667" calcext:value-type="float">
            <text:p>0,00208541666666667000</text:p>
          </table:table-cell>
          <table:table-cell table:formula="of:=[.D275]-[.D274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6" office:value-type="float" office:value="18084" calcext:value-type="float">
            <text:p>1808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09305555555556" calcext:value-type="float">
            <text:p>0,00209305555555556000</text:p>
          </table:table-cell>
          <table:table-cell table:formula="of:=[.D276]-[.D27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6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10069444444444" calcext:value-type="float">
            <text:p>0,00210069444444444000</text:p>
          </table:table-cell>
          <table:table-cell table:formula="of:=[.D277]-[.D276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6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10833333333333" calcext:value-type="float">
            <text:p>0,00210833333333333000</text:p>
          </table:table-cell>
          <table:table-cell table:formula="of:=[.D278]-[.D27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6" office:value-type="float" office:value="18282" calcext:value-type="float">
            <text:p>1828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11597222222222" calcext:value-type="float">
            <text:p>0,00211597222222222000</text:p>
          </table:table-cell>
          <table:table-cell table:formula="of:=[.D279]-[.D27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6" office:value-type="float" office:value="18348" calcext:value-type="float">
            <text:p>1834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12361111111111" calcext:value-type="float">
            <text:p>0,00212361111111111000</text:p>
          </table:table-cell>
          <table:table-cell table:formula="of:=[.D280]-[.D279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6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13125" calcext:value-type="float">
            <text:p>0,00213125000000000000</text:p>
          </table:table-cell>
          <table:table-cell table:formula="of:=[.D281]-[.D28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6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13888888888889" calcext:value-type="float">
            <text:p>0,00213888888888889000</text:p>
          </table:table-cell>
          <table:table-cell table:formula="of:=[.D282]-[.D281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6" office:value-type="float" office:value="18546" calcext:value-type="float">
            <text:p>18546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14652777777778" calcext:value-type="float">
            <text:p>0,00214652777777778000</text:p>
          </table:table-cell>
          <table:table-cell table:formula="of:=[.D283]-[.D28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6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15416666666667" calcext:value-type="float">
            <text:p>0,00215416666666667000</text:p>
          </table:table-cell>
          <table:table-cell table:formula="of:=[.D284]-[.D28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6" office:value-type="float" office:value="18678" calcext:value-type="float">
            <text:p>18678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16180555555556" calcext:value-type="float">
            <text:p>0,00216180555555556000</text:p>
          </table:table-cell>
          <table:table-cell table:formula="of:=[.D285]-[.D284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6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16944444444444" calcext:value-type="float">
            <text:p>0,00216944444444444000</text:p>
          </table:table-cell>
          <table:table-cell table:formula="of:=[.D286]-[.D28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6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17708333333333" calcext:value-type="float">
            <text:p>0,00217708333333333000</text:p>
          </table:table-cell>
          <table:table-cell table:formula="of:=[.D287]-[.D286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6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18472222222222" calcext:value-type="float">
            <text:p>0,00218472222222222000</text:p>
          </table:table-cell>
          <table:table-cell table:formula="of:=[.D288]-[.D28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6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19236111111111" calcext:value-type="float">
            <text:p>0,00219236111111111000</text:p>
          </table:table-cell>
          <table:table-cell table:formula="of:=[.D289]-[.D28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6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2" calcext:value-type="float">
            <text:p>0,00220000000000000000</text:p>
          </table:table-cell>
          <table:table-cell table:formula="of:=[.D290]-[.D289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6" office:value-type="float" office:value="19074" calcext:value-type="float">
            <text:p>19074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20763888888889" calcext:value-type="float">
            <text:p>0,00220763888888889000</text:p>
          </table:table-cell>
          <table:table-cell table:formula="of:=[.D291]-[.D29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6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21527777777778" calcext:value-type="float">
            <text:p>0,00221527777777778000</text:p>
          </table:table-cell>
          <table:table-cell table:formula="of:=[.D292]-[.D29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6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22291666666667" calcext:value-type="float">
            <text:p>0,00222291666666667000</text:p>
          </table:table-cell>
          <table:table-cell table:formula="of:=[.D293]-[.D292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6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23055555555556" calcext:value-type="float">
            <text:p>0,00223055555555556000</text:p>
          </table:table-cell>
          <table:table-cell table:formula="of:=[.D294]-[.D29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6" office:value-type="float" office:value="19338" calcext:value-type="float">
            <text:p>19338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23819444444444" calcext:value-type="float">
            <text:p>0,00223819444444444000</text:p>
          </table:table-cell>
          <table:table-cell table:formula="of:=[.D295]-[.D294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6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24583333333333" calcext:value-type="float">
            <text:p>0,00224583333333333000</text:p>
          </table:table-cell>
          <table:table-cell table:formula="of:=[.D296]-[.D29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6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25347222222222" calcext:value-type="float">
            <text:p>0,00225347222222222000</text:p>
          </table:table-cell>
          <table:table-cell table:formula="of:=[.D297]-[.D29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6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26111111111111" calcext:value-type="float">
            <text:p>0,00226111111111111000</text:p>
          </table:table-cell>
          <table:table-cell table:formula="of:=[.D298]-[.D297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6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26875" calcext:value-type="float">
            <text:p>0,00226875000000000000</text:p>
          </table:table-cell>
          <table:table-cell table:formula="of:=[.D299]-[.D29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6" office:value-type="float" office:value="19668" calcext:value-type="float">
            <text:p>1966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27638888888889" calcext:value-type="float">
            <text:p>0,00227638888888889000</text:p>
          </table:table-cell>
          <table:table-cell table:formula="of:=[.D300]-[.D299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6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28402777777778" calcext:value-type="float">
            <text:p>0,00228402777777778000</text:p>
          </table:table-cell>
          <table:table-cell table:formula="of:=[.D301]-[.D30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6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29166666666667" calcext:value-type="float">
            <text:p>0,00229166666666667000</text:p>
          </table:table-cell>
          <table:table-cell table:formula="of:=[.D302]-[.D30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6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29930555555556" calcext:value-type="float">
            <text:p>0,00229930555555556000</text:p>
          </table:table-cell>
          <table:table-cell table:formula="of:=[.D303]-[.D302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6" office:value-type="float" office:value="19932" calcext:value-type="float">
            <text:p>1993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30694444444444" calcext:value-type="float">
            <text:p>0,00230694444444444000</text:p>
          </table:table-cell>
          <table:table-cell table:formula="of:=[.D304]-[.D30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6" office:value-type="float" office:value="19998" calcext:value-type="float">
            <text:p>19998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31458333333333" calcext:value-type="float">
            <text:p>0,00231458333333333000</text:p>
          </table:table-cell>
          <table:table-cell table:formula="of:=[.D305]-[.D304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6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32222222222222" calcext:value-type="float">
            <text:p>0,00232222222222222000</text:p>
          </table:table-cell>
          <table:table-cell table:formula="of:=[.D306]-[.D30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6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32986111111111" calcext:value-type="float">
            <text:p>0,00232986111111111000</text:p>
          </table:table-cell>
          <table:table-cell table:formula="of:=[.D307]-[.D30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6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3375" calcext:value-type="float">
            <text:p>0,00233750000000000000</text:p>
          </table:table-cell>
          <table:table-cell table:formula="of:=[.D308]-[.D307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6" office:value-type="float" office:value="20262" calcext:value-type="float">
            <text:p>20262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34513888888889" calcext:value-type="float">
            <text:p>0,00234513888888889000</text:p>
          </table:table-cell>
          <table:table-cell table:formula="of:=[.D309]-[.D30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6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35277777777778" calcext:value-type="float">
            <text:p>0,00235277777777778000</text:p>
          </table:table-cell>
          <table:table-cell table:formula="of:=[.D310]-[.D309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6" office:value-type="float" office:value="20394" calcext:value-type="float">
            <text:p>20394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36041666666667" calcext:value-type="float">
            <text:p>0,00236041666666667000</text:p>
          </table:table-cell>
          <table:table-cell table:formula="of:=[.D311]-[.D31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6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36805555555556" calcext:value-type="float">
            <text:p>0,00236805555555556000</text:p>
          </table:table-cell>
          <table:table-cell table:formula="of:=[.D312]-[.D31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6" office:value-type="float" office:value="20526" calcext:value-type="float">
            <text:p>20526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37569444444444" calcext:value-type="float">
            <text:p>0,00237569444444444000</text:p>
          </table:table-cell>
          <table:table-cell table:formula="of:=[.D313]-[.D312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6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38333333333333" calcext:value-type="float">
            <text:p>0,00238333333333333000</text:p>
          </table:table-cell>
          <table:table-cell table:formula="of:=[.D314]-[.D31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6" office:value-type="float" office:value="20658" calcext:value-type="float">
            <text:p>20658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39097222222222" calcext:value-type="float">
            <text:p>0,00239097222222222000</text:p>
          </table:table-cell>
          <table:table-cell table:formula="of:=[.D315]-[.D314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6" office:value-type="float" office:value="20724" calcext:value-type="float">
            <text:p>2072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39861111111111" calcext:value-type="float">
            <text:p>0,00239861111111111000</text:p>
          </table:table-cell>
          <table:table-cell table:formula="of:=[.D316]-[.D315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6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40625" calcext:value-type="float">
            <text:p>0,00240625000000000000</text:p>
          </table:table-cell>
          <table:table-cell table:formula="of:=[.D317]-[.D31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6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41388888888889" calcext:value-type="float">
            <text:p>0,00241388888888889000</text:p>
          </table:table-cell>
          <table:table-cell table:formula="of:=[.D318]-[.D317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6" office:value-type="float" office:value="20922" calcext:value-type="float">
            <text:p>20922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42152777777778" calcext:value-type="float">
            <text:p>0,00242152777777778000</text:p>
          </table:table-cell>
          <table:table-cell table:formula="of:=[.D319]-[.D31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6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42916666666667" calcext:value-type="float">
            <text:p>0,00242916666666667000</text:p>
          </table:table-cell>
          <table:table-cell table:formula="of:=[.D320]-[.D319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6" office:value-type="float" office:value="21054" calcext:value-type="float">
            <text:p>21054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43680555555556" calcext:value-type="float">
            <text:p>0,00243680555555556000</text:p>
          </table:table-cell>
          <table:table-cell table:formula="of:=[.D321]-[.D320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6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44444444444444" calcext:value-type="float">
            <text:p>0,00244444444444444000</text:p>
          </table:table-cell>
          <table:table-cell table:formula="of:=[.D322]-[.D32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6" office:value-type="float" office:value="21186" calcext:value-type="float">
            <text:p>21186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45208333333333" calcext:value-type="float">
            <text:p>0,00245208333333333000</text:p>
          </table:table-cell>
          <table:table-cell table:formula="of:=[.D323]-[.D322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6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45972222222222" calcext:value-type="float">
            <text:p>0,00245972222222222000</text:p>
          </table:table-cell>
          <table:table-cell table:formula="of:=[.D324]-[.D32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6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46736111111111" calcext:value-type="float">
            <text:p>0,00246736111111111000</text:p>
          </table:table-cell>
          <table:table-cell table:formula="of:=[.D325]-[.D324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6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475" calcext:value-type="float">
            <text:p>0,00247500000000000000</text:p>
          </table:table-cell>
          <table:table-cell table:formula="of:=[.D326]-[.D325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6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48263888888889" calcext:value-type="float">
            <text:p>0,00248263888888889000</text:p>
          </table:table-cell>
          <table:table-cell table:formula="of:=[.D327]-[.D32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6" office:value-type="float" office:value="21516" calcext:value-type="float">
            <text:p>2151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49027777777778" calcext:value-type="float">
            <text:p>0,00249027777777778000</text:p>
          </table:table-cell>
          <table:table-cell table:formula="of:=[.D328]-[.D327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6" office:value-type="float" office:value="21582" calcext:value-type="float">
            <text:p>21582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49791666666667" calcext:value-type="float">
            <text:p>0,00249791666666667000</text:p>
          </table:table-cell>
          <table:table-cell table:formula="of:=[.D329]-[.D32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6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50555555555556" calcext:value-type="float">
            <text:p>0,00250555555555556000</text:p>
          </table:table-cell>
          <table:table-cell table:formula="of:=[.D330]-[.D32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6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51319444444444" calcext:value-type="float">
            <text:p>0,00251319444444444000</text:p>
          </table:table-cell>
          <table:table-cell table:formula="of:=[.D331]-[.D330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6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52083333333333" calcext:value-type="float">
            <text:p>0,00252083333333333000</text:p>
          </table:table-cell>
          <table:table-cell table:formula="of:=[.D332]-[.D33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6" office:value-type="float" office:value="21846" calcext:value-type="float">
            <text:p>21846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52847222222222" calcext:value-type="float">
            <text:p>0,00252847222222222000</text:p>
          </table:table-cell>
          <table:table-cell table:formula="of:=[.D333]-[.D332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6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53611111111111" calcext:value-type="float">
            <text:p>0,00253611111111111000</text:p>
          </table:table-cell>
          <table:table-cell table:formula="of:=[.D334]-[.D33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6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54375" calcext:value-type="float">
            <text:p>0,00254375000000000000</text:p>
          </table:table-cell>
          <table:table-cell table:formula="of:=[.D335]-[.D334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6" office:value-type="float" office:value="22044" calcext:value-type="float">
            <text:p>2204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55138888888889" calcext:value-type="float">
            <text:p>0,00255138888888889000</text:p>
          </table:table-cell>
          <table:table-cell table:formula="of:=[.D336]-[.D335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6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55902777777778" calcext:value-type="float">
            <text:p>0,00255902777777778000</text:p>
          </table:table-cell>
          <table:table-cell table:formula="of:=[.D337]-[.D33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6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56666666666667" calcext:value-type="float">
            <text:p>0,00256666666666667000</text:p>
          </table:table-cell>
          <table:table-cell table:formula="of:=[.D338]-[.D337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6" office:value-type="float" office:value="22242" calcext:value-type="float">
            <text:p>22242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57430555555556" calcext:value-type="float">
            <text:p>0,00257430555555556000</text:p>
          </table:table-cell>
          <table:table-cell table:formula="of:=[.D339]-[.D33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6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58194444444444" calcext:value-type="float">
            <text:p>0,00258194444444444000</text:p>
          </table:table-cell>
          <table:table-cell table:formula="of:=[.D340]-[.D33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6" office:value-type="float" office:value="22374" calcext:value-type="float">
            <text:p>22374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58958333333333" calcext:value-type="float">
            <text:p>0,00258958333333333000</text:p>
          </table:table-cell>
          <table:table-cell table:formula="of:=[.D341]-[.D340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6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59722222222222" calcext:value-type="float">
            <text:p>0,00259722222222222000</text:p>
          </table:table-cell>
          <table:table-cell table:formula="of:=[.D342]-[.D34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6" office:value-type="float" office:value="22506" calcext:value-type="float">
            <text:p>22506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60486111111111" calcext:value-type="float">
            <text:p>0,00260486111111111000</text:p>
          </table:table-cell>
          <table:table-cell table:formula="of:=[.D343]-[.D342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6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6125" calcext:value-type="float">
            <text:p>0,00261250000000000000</text:p>
          </table:table-cell>
          <table:table-cell table:formula="of:=[.D344]-[.D343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6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62013888888889" calcext:value-type="float">
            <text:p>0,00262013888888889000</text:p>
          </table:table-cell>
          <table:table-cell table:formula="of:=[.D345]-[.D344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6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62777777777778" calcext:value-type="float">
            <text:p>0,00262777777777778000</text:p>
          </table:table-cell>
          <table:table-cell table:formula="of:=[.D346]-[.D345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6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63541666666667" calcext:value-type="float">
            <text:p>0,00263541666666667000</text:p>
          </table:table-cell>
          <table:table-cell table:formula="of:=[.D347]-[.D34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6" office:value-type="float" office:value="22836" calcext:value-type="float">
            <text:p>2283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64305555555556" calcext:value-type="float">
            <text:p>0,00264305555555556000</text:p>
          </table:table-cell>
          <table:table-cell table:formula="of:=[.D348]-[.D347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6" office:value-type="float" office:value="22902" calcext:value-type="float">
            <text:p>22902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65069444444444" calcext:value-type="float">
            <text:p>0,00265069444444444000</text:p>
          </table:table-cell>
          <table:table-cell table:formula="of:=[.D349]-[.D348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6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65833333333333" calcext:value-type="float">
            <text:p>0,00265833333333333000</text:p>
          </table:table-cell>
          <table:table-cell table:formula="of:=[.D350]-[.D34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6" office:value-type="float" office:value="23034" calcext:value-type="float">
            <text:p>23034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66597222222222" calcext:value-type="float">
            <text:p>0,00266597222222222000</text:p>
          </table:table-cell>
          <table:table-cell table:formula="of:=[.D351]-[.D350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6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67361111111111" calcext:value-type="float">
            <text:p>0,00267361111111111000</text:p>
          </table:table-cell>
          <table:table-cell table:formula="of:=[.D352]-[.D35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6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68125" calcext:value-type="float">
            <text:p>0,00268125000000000000</text:p>
          </table:table-cell>
          <table:table-cell table:formula="of:=[.D353]-[.D35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6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68888888888889" calcext:value-type="float">
            <text:p>0,00268888888888889000</text:p>
          </table:table-cell>
          <table:table-cell table:formula="of:=[.D354]-[.D353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6" office:value-type="float" office:value="23298" calcext:value-type="float">
            <text:p>23298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69652777777778" calcext:value-type="float">
            <text:p>0,00269652777777778000</text:p>
          </table:table-cell>
          <table:table-cell table:formula="of:=[.D355]-[.D354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6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70416666666667" calcext:value-type="float">
            <text:p>0,00270416666666667000</text:p>
          </table:table-cell>
          <table:table-cell table:formula="of:=[.D356]-[.D355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6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71180555555556" calcext:value-type="float">
            <text:p>0,00271180555555556000</text:p>
          </table:table-cell>
          <table:table-cell table:formula="of:=[.D357]-[.D356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6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71944444444444" calcext:value-type="float">
            <text:p>0,00271944444444444000</text:p>
          </table:table-cell>
          <table:table-cell table:formula="of:=[.D358]-[.D357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6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72708333333333" calcext:value-type="float">
            <text:p>0,00272708333333333000</text:p>
          </table:table-cell>
          <table:table-cell table:formula="of:=[.D359]-[.D358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6" office:value-type="float" office:value="23628" calcext:value-type="float">
            <text:p>2362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73472222222222" calcext:value-type="float">
            <text:p>0,00273472222222222000</text:p>
          </table:table-cell>
          <table:table-cell table:formula="of:=[.D360]-[.D359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66" office:value-type="float" office:value="23694" calcext:value-type="float">
            <text:p>23694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74236111111111" calcext:value-type="float">
            <text:p>0,00274236111111111000</text:p>
          </table:table-cell>
          <table:table-cell table:formula="of:=[.D361]-[.D360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66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75" calcext:value-type="float">
            <text:p>0,00275000000000000000</text:p>
          </table:table-cell>
          <table:table-cell table:formula="of:=[.D362]-[.D361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66" office:value-type="float" office:value="23826" calcext:value-type="float">
            <text:p>23826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75763888888889" calcext:value-type="float">
            <text:p>0,00275763888888889000</text:p>
          </table:table-cell>
          <table:table-cell table:formula="of:=[.D363]-[.D362]" office:value-type="float" office:value="0.00000763888888888906" calcext:value-type="float">
            <text:p>0,00000763888888888906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66" office:value-type="float" office:value="23892" calcext:value-type="float">
            <text:p>2389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76527777777778" calcext:value-type="float">
            <text:p>0,00276527777777778000</text:p>
          </table:table-cell>
          <table:table-cell table:formula="of:=[.D364]-[.D363]" office:value-type="float" office:value="0.00000763888888888863" calcext:value-type="float">
            <text:p>0,00000763888888888863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66" office:value-type="float" office:value="23958" calcext:value-type="float">
            <text:p>23958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77291666666667" calcext:value-type="float">
            <text:p>0,00277291666666667000</text:p>
          </table:table-cell>
          <table:table-cell table:formula="of:=#REF!-[.D364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6:37.348200269</meta:creation-date>
    <dc:date>2026-05-17T18:26:48.751730568</dc:date>
    <meta:editing-duration>PT12S</meta:editing-duration>
    <meta:editing-cycles>1</meta:editing-cycles>
    <meta:document-statistic meta:table-count="1" meta:cell-count="1820" meta:object-count="0"/>
    <meta:generator>LibreOffice/24.2.7.2$Linux_X86_64 LibreOffice_project/420$Build-2</meta:generator>
  </office:meta>
</office:document-meta>
</file>