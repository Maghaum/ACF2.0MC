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7962962962963" calcext:value-type="float">
            <text:p>0,00000879629629629630</text:p>
          </table:table-cell>
          <table:table-cell table:formula="of:=[.D3]-[.D2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6" office:value-type="float" office:value="152" calcext:value-type="float">
            <text:p>15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75925925925926" calcext:value-type="float">
            <text:p>0,00001759259259259260</text:p>
          </table:table-cell>
          <table:table-cell table:formula="of:=[.D4]-[.D3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6" office:value-type="float" office:value="228" calcext:value-type="float">
            <text:p>22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63888888888889" calcext:value-type="float">
            <text:p>0,00002638888888888890</text:p>
          </table:table-cell>
          <table:table-cell table:formula="of:=[.D5]-[.D4]" office:value-type="float" office:value="0.00000879629629629629" calcext:value-type="float">
            <text:p>0,00000879629629629629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6" office:value-type="float" office:value="304" calcext:value-type="float">
            <text:p>30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51851851851852" calcext:value-type="float">
            <text:p>0,00003518518518518520</text:p>
          </table:table-cell>
          <table:table-cell table:formula="of:=[.D6]-[.D5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6" office:value-type="float" office:value="380" calcext:value-type="float">
            <text:p>38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39814814814815" calcext:value-type="float">
            <text:p>0,00004398148148148150</text:p>
          </table:table-cell>
          <table:table-cell table:formula="of:=[.D7]-[.D6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6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27777777777778" calcext:value-type="float">
            <text:p>0,00005277777777777780</text:p>
          </table:table-cell>
          <table:table-cell table:formula="of:=[.D8]-[.D7]" office:value-type="float" office:value="0.00000879629629629629" calcext:value-type="float">
            <text:p>0,00000879629629629629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6" office:value-type="float" office:value="532" calcext:value-type="float">
            <text:p>53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15740740740741" calcext:value-type="float">
            <text:p>0,00006157407407407410</text:p>
          </table:table-cell>
          <table:table-cell table:formula="of:=[.D9]-[.D8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6" office:value-type="float" office:value="608" calcext:value-type="float">
            <text:p>60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03703703703704" calcext:value-type="float">
            <text:p>0,00007037037037037040</text:p>
          </table:table-cell>
          <table:table-cell table:formula="of:=[.D10]-[.D9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6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91666666666667" calcext:value-type="float">
            <text:p>0,00007916666666666670</text:p>
          </table:table-cell>
          <table:table-cell table:formula="of:=[.D11]-[.D10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6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7962962962963" calcext:value-type="float">
            <text:p>0,00008796296296296300</text:p>
          </table:table-cell>
          <table:table-cell table:formula="of:=[.D12]-[.D11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6" office:value-type="float" office:value="836" calcext:value-type="float">
            <text:p>83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67592592592593" calcext:value-type="float">
            <text:p>0,00009675925925925930</text:p>
          </table:table-cell>
          <table:table-cell table:formula="of:=[.D13]-[.D12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6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5555555555556" calcext:value-type="float">
            <text:p>0,00010555555555555600</text:p>
          </table:table-cell>
          <table:table-cell table:formula="of:=[.D14]-[.D13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6" office:value-type="float" office:value="988" calcext:value-type="float">
            <text:p>98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14351851851852" calcext:value-type="float">
            <text:p>0,00011435185185185200</text:p>
          </table:table-cell>
          <table:table-cell table:formula="of:=[.D15]-[.D14]" office:value-type="float" office:value="0.00000879629629629628" calcext:value-type="float">
            <text:p>0,0000087962962962962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6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23148148148148" calcext:value-type="float">
            <text:p>0,00012314814814814800</text:p>
          </table:table-cell>
          <table:table-cell table:formula="of:=[.D16]-[.D15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6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31944444444444" calcext:value-type="float">
            <text:p>0,00013194444444444400</text:p>
          </table:table-cell>
          <table:table-cell table:formula="of:=[.D17]-[.D16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6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40740740740741" calcext:value-type="float">
            <text:p>0,00014074074074074100</text:p>
          </table:table-cell>
          <table:table-cell table:formula="of:=[.D18]-[.D17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6" office:value-type="float" office:value="1292" calcext:value-type="float">
            <text:p>129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49537037037037" calcext:value-type="float">
            <text:p>0,00014953703703703700</text:p>
          </table:table-cell>
          <table:table-cell table:formula="of:=[.D19]-[.D18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6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58333333333333" calcext:value-type="float">
            <text:p>0,00015833333333333300</text:p>
          </table:table-cell>
          <table:table-cell table:formula="of:=[.D20]-[.D19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6" office:value-type="float" office:value="1444" calcext:value-type="float">
            <text:p>144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6712962962963" calcext:value-type="float">
            <text:p>0,00016712962962963000</text:p>
          </table:table-cell>
          <table:table-cell table:formula="of:=[.D21]-[.D20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6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75925925925926" calcext:value-type="float">
            <text:p>0,00017592592592592600</text:p>
          </table:table-cell>
          <table:table-cell table:formula="of:=[.D22]-[.D21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6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84722222222222" calcext:value-type="float">
            <text:p>0,00018472222222222200</text:p>
          </table:table-cell>
          <table:table-cell table:formula="of:=[.D23]-[.D22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6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93518518518519" calcext:value-type="float">
            <text:p>0,00019351851851851900</text:p>
          </table:table-cell>
          <table:table-cell table:formula="of:=[.D24]-[.D23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6" office:value-type="float" office:value="1748" calcext:value-type="float">
            <text:p>174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02314814814815" calcext:value-type="float">
            <text:p>0,00020231481481481500</text:p>
          </table:table-cell>
          <table:table-cell table:formula="of:=[.D25]-[.D24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6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11111111111111" calcext:value-type="float">
            <text:p>0,00021111111111111100</text:p>
          </table:table-cell>
          <table:table-cell table:formula="of:=[.D26]-[.D25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6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19907407407407" calcext:value-type="float">
            <text:p>0,00021990740740740700</text:p>
          </table:table-cell>
          <table:table-cell table:formula="of:=[.D27]-[.D26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6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28703703703704" calcext:value-type="float">
            <text:p>0,00022870370370370400</text:p>
          </table:table-cell>
          <table:table-cell table:formula="of:=[.D28]-[.D27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6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375" calcext:value-type="float">
            <text:p>0,00023750000000000000</text:p>
          </table:table-cell>
          <table:table-cell table:formula="of:=[.D29]-[.D28]" office:value-type="float" office:value="0.00000879629629629627" calcext:value-type="float">
            <text:p>0,00000879629629629627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6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46296296296296" calcext:value-type="float">
            <text:p>0,00024629629629629600</text:p>
          </table:table-cell>
          <table:table-cell table:formula="of:=[.D30]-[.D29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6" office:value-type="float" office:value="2204" calcext:value-type="float">
            <text:p>220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55092592592593" calcext:value-type="float">
            <text:p>0,00025509259259259300</text:p>
          </table:table-cell>
          <table:table-cell table:formula="of:=[.D31]-[.D30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6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63888888888889" calcext:value-type="float">
            <text:p>0,00026388888888888900</text:p>
          </table:table-cell>
          <table:table-cell table:formula="of:=[.D32]-[.D31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6" office:value-type="float" office:value="2356" calcext:value-type="float">
            <text:p>235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72685185185185" calcext:value-type="float">
            <text:p>0,00027268518518518500</text:p>
          </table:table-cell>
          <table:table-cell table:formula="of:=[.D33]-[.D32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6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81481481481481" calcext:value-type="float">
            <text:p>0,00028148148148148100</text:p>
          </table:table-cell>
          <table:table-cell table:formula="of:=[.D34]-[.D33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6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90277777777778" calcext:value-type="float">
            <text:p>0,00029027777777777800</text:p>
          </table:table-cell>
          <table:table-cell table:formula="of:=[.D35]-[.D34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6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99074074074074" calcext:value-type="float">
            <text:p>0,00029907407407407400</text:p>
          </table:table-cell>
          <table:table-cell table:formula="of:=[.D36]-[.D35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6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0787037037037" calcext:value-type="float">
            <text:p>0,00030787037037037000</text:p>
          </table:table-cell>
          <table:table-cell table:formula="of:=[.D37]-[.D36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6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16666666666667" calcext:value-type="float">
            <text:p>0,00031666666666666700</text:p>
          </table:table-cell>
          <table:table-cell table:formula="of:=[.D38]-[.D37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6" office:value-type="float" office:value="2812" calcext:value-type="float">
            <text:p>281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25462962962963" calcext:value-type="float">
            <text:p>0,00032546296296296300</text:p>
          </table:table-cell>
          <table:table-cell table:formula="of:=[.D39]-[.D38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6" office:value-type="float" office:value="2888" calcext:value-type="float">
            <text:p>288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34259259259259" calcext:value-type="float">
            <text:p>0,00033425925925925900</text:p>
          </table:table-cell>
          <table:table-cell table:formula="of:=[.D40]-[.D39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6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43055555555556" calcext:value-type="float">
            <text:p>0,00034305555555555600</text:p>
          </table:table-cell>
          <table:table-cell table:formula="of:=[.D41]-[.D40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6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51851851851852" calcext:value-type="float">
            <text:p>0,00035185185185185200</text:p>
          </table:table-cell>
          <table:table-cell table:formula="of:=[.D42]-[.D41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6" office:value-type="float" office:value="3116" calcext:value-type="float">
            <text:p>311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60648148148148" calcext:value-type="float">
            <text:p>0,00036064814814814800</text:p>
          </table:table-cell>
          <table:table-cell table:formula="of:=[.D43]-[.D42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6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69444444444444" calcext:value-type="float">
            <text:p>0,00036944444444444400</text:p>
          </table:table-cell>
          <table:table-cell table:formula="of:=[.D44]-[.D43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6" office:value-type="float" office:value="3268" calcext:value-type="float">
            <text:p>326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78240740740741" calcext:value-type="float">
            <text:p>0,00037824074074074100</text:p>
          </table:table-cell>
          <table:table-cell table:formula="of:=[.D45]-[.D44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6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87037037037037" calcext:value-type="float">
            <text:p>0,00038703703703703700</text:p>
          </table:table-cell>
          <table:table-cell table:formula="of:=[.D46]-[.D45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6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95833333333333" calcext:value-type="float">
            <text:p>0,00039583333333333300</text:p>
          </table:table-cell>
          <table:table-cell table:formula="of:=[.D47]-[.D46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6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0462962962963" calcext:value-type="float">
            <text:p>0,00040462962962963000</text:p>
          </table:table-cell>
          <table:table-cell table:formula="of:=[.D48]-[.D47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6" office:value-type="float" office:value="3572" calcext:value-type="float">
            <text:p>357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13425925925926" calcext:value-type="float">
            <text:p>0,00041342592592592600</text:p>
          </table:table-cell>
          <table:table-cell table:formula="of:=[.D49]-[.D48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6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22222222222222" calcext:value-type="float">
            <text:p>0,00042222222222222200</text:p>
          </table:table-cell>
          <table:table-cell table:formula="of:=[.D50]-[.D49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6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31018518518519" calcext:value-type="float">
            <text:p>0,00043101851851851800</text:p>
          </table:table-cell>
          <table:table-cell table:formula="of:=[.D51]-[.D50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6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39814814814815" calcext:value-type="float">
            <text:p>0,00043981481481481500</text:p>
          </table:table-cell>
          <table:table-cell table:formula="of:=[.D52]-[.D51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6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48611111111111" calcext:value-type="float">
            <text:p>0,00044861111111111100</text:p>
          </table:table-cell>
          <table:table-cell table:formula="of:=[.D53]-[.D52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6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57407407407407" calcext:value-type="float">
            <text:p>0,00045740740740740700</text:p>
          </table:table-cell>
          <table:table-cell table:formula="of:=[.D54]-[.D53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6" office:value-type="float" office:value="4028" calcext:value-type="float">
            <text:p>402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66203703703704" calcext:value-type="float">
            <text:p>0,00046620370370370400</text:p>
          </table:table-cell>
          <table:table-cell table:formula="of:=[.D55]-[.D54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6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75" calcext:value-type="float">
            <text:p>0,00047500000000000000</text:p>
          </table:table-cell>
          <table:table-cell table:formula="of:=[.D56]-[.D55]" office:value-type="float" office:value="0.0000087962962962963" calcext:value-type="float">
            <text:p>0,0000087962962962963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6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83796296296296" calcext:value-type="float">
            <text:p>0,00048379629629629600</text:p>
          </table:table-cell>
          <table:table-cell table:formula="of:=[.D57]-[.D5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6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92592592592593" calcext:value-type="float">
            <text:p>0,00049259259259259300</text:p>
          </table:table-cell>
          <table:table-cell table:formula="of:=[.D58]-[.D57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6" office:value-type="float" office:value="4332" calcext:value-type="float">
            <text:p>433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01388888888889" calcext:value-type="float">
            <text:p>0,00050138888888888900</text:p>
          </table:table-cell>
          <table:table-cell table:formula="of:=[.D59]-[.D5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6" office:value-type="float" office:value="4408" calcext:value-type="float">
            <text:p>440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10185185185185" calcext:value-type="float">
            <text:p>0,00051018518518518500</text:p>
          </table:table-cell>
          <table:table-cell table:formula="of:=[.D60]-[.D59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6" office:value-type="float" office:value="4484" calcext:value-type="float">
            <text:p>448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18981481481482" calcext:value-type="float">
            <text:p>0,00051898148148148200</text:p>
          </table:table-cell>
          <table:table-cell table:formula="of:=[.D61]-[.D6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6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27777777777778" calcext:value-type="float">
            <text:p>0,00052777777777777800</text:p>
          </table:table-cell>
          <table:table-cell table:formula="of:=[.D62]-[.D61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6" office:value-type="float" office:value="4636" calcext:value-type="float">
            <text:p>463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36574074074074" calcext:value-type="float">
            <text:p>0,00053657407407407400</text:p>
          </table:table-cell>
          <table:table-cell table:formula="of:=[.D63]-[.D6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6" office:value-type="float" office:value="4712" calcext:value-type="float">
            <text:p>471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4537037037037" calcext:value-type="float">
            <text:p>0,00054537037037037000</text:p>
          </table:table-cell>
          <table:table-cell table:formula="of:=[.D64]-[.D63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6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54166666666667" calcext:value-type="float">
            <text:p>0,00055416666666666700</text:p>
          </table:table-cell>
          <table:table-cell table:formula="of:=[.D65]-[.D6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6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62962962962963" calcext:value-type="float">
            <text:p>0,00056296296296296300</text:p>
          </table:table-cell>
          <table:table-cell table:formula="of:=[.D66]-[.D65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6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71759259259259" calcext:value-type="float">
            <text:p>0,00057175925925925900</text:p>
          </table:table-cell>
          <table:table-cell table:formula="of:=[.D67]-[.D6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6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80555555555556" calcext:value-type="float">
            <text:p>0,00058055555555555600</text:p>
          </table:table-cell>
          <table:table-cell table:formula="of:=[.D68]-[.D67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6" office:value-type="float" office:value="5092" calcext:value-type="float">
            <text:p>509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89351851851852" calcext:value-type="float">
            <text:p>0,00058935185185185200</text:p>
          </table:table-cell>
          <table:table-cell table:formula="of:=[.D69]-[.D6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6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98148148148148" calcext:value-type="float">
            <text:p>0,00059814814814814800</text:p>
          </table:table-cell>
          <table:table-cell table:formula="of:=[.D70]-[.D69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6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06944444444445" calcext:value-type="float">
            <text:p>0,00060694444444444500</text:p>
          </table:table-cell>
          <table:table-cell table:formula="of:=[.D71]-[.D7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6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15740740740741" calcext:value-type="float">
            <text:p>0,00061574074074074100</text:p>
          </table:table-cell>
          <table:table-cell table:formula="of:=[.D72]-[.D71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6" office:value-type="float" office:value="5396" calcext:value-type="float">
            <text:p>539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24537037037037" calcext:value-type="float">
            <text:p>0,00062453703703703700</text:p>
          </table:table-cell>
          <table:table-cell table:formula="of:=[.D73]-[.D7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6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33333333333333" calcext:value-type="float">
            <text:p>0,00063333333333333300</text:p>
          </table:table-cell>
          <table:table-cell table:formula="of:=[.D74]-[.D73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6" office:value-type="float" office:value="5548" calcext:value-type="float">
            <text:p>554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4212962962963" calcext:value-type="float">
            <text:p>0,00064212962962963000</text:p>
          </table:table-cell>
          <table:table-cell table:formula="of:=[.D75]-[.D7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6" office:value-type="float" office:value="5624" calcext:value-type="float">
            <text:p>562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50925925925926" calcext:value-type="float">
            <text:p>0,00065092592592592600</text:p>
          </table:table-cell>
          <table:table-cell table:formula="of:=[.D76]-[.D75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6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59722222222222" calcext:value-type="float">
            <text:p>0,00065972222222222200</text:p>
          </table:table-cell>
          <table:table-cell table:formula="of:=[.D77]-[.D7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6" office:value-type="float" office:value="5776" calcext:value-type="float">
            <text:p>577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68518518518519" calcext:value-type="float">
            <text:p>0,00066851851851851900</text:p>
          </table:table-cell>
          <table:table-cell table:formula="of:=[.D78]-[.D77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6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77314814814815" calcext:value-type="float">
            <text:p>0,00067731481481481500</text:p>
          </table:table-cell>
          <table:table-cell table:formula="of:=[.D79]-[.D7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6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86111111111111" calcext:value-type="float">
            <text:p>0,00068611111111111100</text:p>
          </table:table-cell>
          <table:table-cell table:formula="of:=[.D80]-[.D79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6" office:value-type="float" office:value="6004" calcext:value-type="float">
            <text:p>600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94907407407407" calcext:value-type="float">
            <text:p>0,00069490740740740700</text:p>
          </table:table-cell>
          <table:table-cell table:formula="of:=[.D81]-[.D8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6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03703703703704" calcext:value-type="float">
            <text:p>0,00070370370370370400</text:p>
          </table:table-cell>
          <table:table-cell table:formula="of:=[.D82]-[.D81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6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125" calcext:value-type="float">
            <text:p>0,00071250000000000000</text:p>
          </table:table-cell>
          <table:table-cell table:formula="of:=[.D83]-[.D8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6" office:value-type="float" office:value="6232" calcext:value-type="float">
            <text:p>623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21296296296296" calcext:value-type="float">
            <text:p>0,00072129629629629600</text:p>
          </table:table-cell>
          <table:table-cell table:formula="of:=[.D84]-[.D83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6" office:value-type="float" office:value="6308" calcext:value-type="float">
            <text:p>630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30092592592593" calcext:value-type="float">
            <text:p>0,00073009259259259300</text:p>
          </table:table-cell>
          <table:table-cell table:formula="of:=[.D85]-[.D8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6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38888888888889" calcext:value-type="float">
            <text:p>0,00073888888888888900</text:p>
          </table:table-cell>
          <table:table-cell table:formula="of:=[.D86]-[.D85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6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47685185185185" calcext:value-type="float">
            <text:p>0,00074768518518518500</text:p>
          </table:table-cell>
          <table:table-cell table:formula="of:=[.D87]-[.D8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6" office:value-type="float" office:value="6536" calcext:value-type="float">
            <text:p>653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56481481481482" calcext:value-type="float">
            <text:p>0,00075648148148148200</text:p>
          </table:table-cell>
          <table:table-cell table:formula="of:=[.D88]-[.D87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6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65277777777778" calcext:value-type="float">
            <text:p>0,00076527777777777800</text:p>
          </table:table-cell>
          <table:table-cell table:formula="of:=[.D89]-[.D8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6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74074074074074" calcext:value-type="float">
            <text:p>0,00077407407407407400</text:p>
          </table:table-cell>
          <table:table-cell table:formula="of:=[.D90]-[.D89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6" office:value-type="float" office:value="6764" calcext:value-type="float">
            <text:p>676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8287037037037" calcext:value-type="float">
            <text:p>0,00078287037037037000</text:p>
          </table:table-cell>
          <table:table-cell table:formula="of:=[.D91]-[.D9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6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91666666666667" calcext:value-type="float">
            <text:p>0,00079166666666666700</text:p>
          </table:table-cell>
          <table:table-cell table:formula="of:=[.D92]-[.D91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6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00462962962963" calcext:value-type="float">
            <text:p>0,00080046296296296300</text:p>
          </table:table-cell>
          <table:table-cell table:formula="of:=[.D93]-[.D9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6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09259259259259" calcext:value-type="float">
            <text:p>0,00080925925925925900</text:p>
          </table:table-cell>
          <table:table-cell table:formula="of:=[.D94]-[.D93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6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18055555555556" calcext:value-type="float">
            <text:p>0,00081805555555555600</text:p>
          </table:table-cell>
          <table:table-cell table:formula="of:=[.D95]-[.D9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6" office:value-type="float" office:value="7144" calcext:value-type="float">
            <text:p>714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26851851851852" calcext:value-type="float">
            <text:p>0,00082685185185185200</text:p>
          </table:table-cell>
          <table:table-cell table:formula="of:=[.D96]-[.D95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6" office:value-type="float" office:value="7220" calcext:value-type="float">
            <text:p>722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35648148148148" calcext:value-type="float">
            <text:p>0,00083564814814814800</text:p>
          </table:table-cell>
          <table:table-cell table:formula="of:=[.D97]-[.D9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6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44444444444444" calcext:value-type="float">
            <text:p>0,00084444444444444400</text:p>
          </table:table-cell>
          <table:table-cell table:formula="of:=[.D98]-[.D97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6" office:value-type="float" office:value="7372" calcext:value-type="float">
            <text:p>737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53240740740741" calcext:value-type="float">
            <text:p>0,00085324074074074100</text:p>
          </table:table-cell>
          <table:table-cell table:formula="of:=[.D99]-[.D9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6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62037037037037" calcext:value-type="float">
            <text:p>0,00086203703703703700</text:p>
          </table:table-cell>
          <table:table-cell table:formula="of:=[.D100]-[.D99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6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70833333333333" calcext:value-type="float">
            <text:p>0,00087083333333333400</text:p>
          </table:table-cell>
          <table:table-cell table:formula="of:=[.D101]-[.D10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6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7962962962963" calcext:value-type="float">
            <text:p>0,00087962962962963000</text:p>
          </table:table-cell>
          <table:table-cell table:formula="of:=[.D102]-[.D101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6" office:value-type="float" office:value="7676" calcext:value-type="float">
            <text:p>767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88425925925926" calcext:value-type="float">
            <text:p>0,00088842592592592600</text:p>
          </table:table-cell>
          <table:table-cell table:formula="of:=[.D103]-[.D10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6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97222222222222" calcext:value-type="float">
            <text:p>0,00089722222222222200</text:p>
          </table:table-cell>
          <table:table-cell table:formula="of:=[.D104]-[.D103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6" office:value-type="float" office:value="7828" calcext:value-type="float">
            <text:p>782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06018518518519" calcext:value-type="float">
            <text:p>0,00090601851851851900</text:p>
          </table:table-cell>
          <table:table-cell table:formula="of:=[.D105]-[.D10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6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14814814814815" calcext:value-type="float">
            <text:p>0,00091481481481481500</text:p>
          </table:table-cell>
          <table:table-cell table:formula="of:=[.D106]-[.D105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6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23611111111111" calcext:value-type="float">
            <text:p>0,00092361111111111100</text:p>
          </table:table-cell>
          <table:table-cell table:formula="of:=[.D107]-[.D10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6" office:value-type="float" office:value="8056" calcext:value-type="float">
            <text:p>805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32407407407407" calcext:value-type="float">
            <text:p>0,00093240740740740700</text:p>
          </table:table-cell>
          <table:table-cell table:formula="of:=[.D108]-[.D107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6" office:value-type="float" office:value="8132" calcext:value-type="float">
            <text:p>813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41203703703704" calcext:value-type="float">
            <text:p>0,00094120370370370400</text:p>
          </table:table-cell>
          <table:table-cell table:formula="of:=[.D109]-[.D10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6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5" calcext:value-type="float">
            <text:p>0,00095000000000000000</text:p>
          </table:table-cell>
          <table:table-cell table:formula="of:=[.D110]-[.D109]" office:value-type="float" office:value="0.00000879629629629635" calcext:value-type="float">
            <text:p>0,00000879629629629635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6" office:value-type="float" office:value="8284" calcext:value-type="float">
            <text:p>828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58796296296296" calcext:value-type="float">
            <text:p>0,00095879629629629600</text:p>
          </table:table-cell>
          <table:table-cell table:formula="of:=[.D111]-[.D11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6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67592592592593" calcext:value-type="float">
            <text:p>0,00096759259259259300</text:p>
          </table:table-cell>
          <table:table-cell table:formula="of:=[.D112]-[.D11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6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76388888888889" calcext:value-type="float">
            <text:p>0,00097638888888888900</text:p>
          </table:table-cell>
          <table:table-cell table:formula="of:=[.D113]-[.D11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6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85185185185185" calcext:value-type="float">
            <text:p>0,00098518518518518500</text:p>
          </table:table-cell>
          <table:table-cell table:formula="of:=[.D114]-[.D113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6" office:value-type="float" office:value="8588" calcext:value-type="float">
            <text:p>858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93981481481482" calcext:value-type="float">
            <text:p>0,00099398148148148200</text:p>
          </table:table-cell>
          <table:table-cell table:formula="of:=[.D115]-[.D11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6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0277777777778" calcext:value-type="float">
            <text:p>0,00100277777777778000</text:p>
          </table:table-cell>
          <table:table-cell table:formula="of:=[.D116]-[.D11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6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1157407407407" calcext:value-type="float">
            <text:p>0,00101157407407407000</text:p>
          </table:table-cell>
          <table:table-cell table:formula="of:=[.D117]-[.D11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6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2037037037037" calcext:value-type="float">
            <text:p>0,00102037037037037000</text:p>
          </table:table-cell>
          <table:table-cell table:formula="of:=[.D118]-[.D117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6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2916666666667" calcext:value-type="float">
            <text:p>0,00102916666666667000</text:p>
          </table:table-cell>
          <table:table-cell table:formula="of:=[.D119]-[.D11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6" office:value-type="float" office:value="8968" calcext:value-type="float">
            <text:p>896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3796296296296" calcext:value-type="float">
            <text:p>0,00103796296296296000</text:p>
          </table:table-cell>
          <table:table-cell table:formula="of:=[.D120]-[.D11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6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4675925925926" calcext:value-type="float">
            <text:p>0,00104675925925926000</text:p>
          </table:table-cell>
          <table:table-cell table:formula="of:=[.D121]-[.D12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6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5555555555556" calcext:value-type="float">
            <text:p>0,00105555555555556000</text:p>
          </table:table-cell>
          <table:table-cell table:formula="of:=[.D122]-[.D121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6" office:value-type="float" office:value="9196" calcext:value-type="float">
            <text:p>919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6435185185185" calcext:value-type="float">
            <text:p>0,00106435185185185000</text:p>
          </table:table-cell>
          <table:table-cell table:formula="of:=[.D123]-[.D12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6" office:value-type="float" office:value="9272" calcext:value-type="float">
            <text:p>927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7314814814815" calcext:value-type="float">
            <text:p>0,00107314814814815000</text:p>
          </table:table-cell>
          <table:table-cell table:formula="of:=[.D124]-[.D12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6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8194444444444" calcext:value-type="float">
            <text:p>0,00108194444444444000</text:p>
          </table:table-cell>
          <table:table-cell table:formula="of:=[.D125]-[.D12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6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9074074074074" calcext:value-type="float">
            <text:p>0,00109074074074074000</text:p>
          </table:table-cell>
          <table:table-cell table:formula="of:=[.D126]-[.D125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6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9953703703704" calcext:value-type="float">
            <text:p>0,00109953703703704000</text:p>
          </table:table-cell>
          <table:table-cell table:formula="of:=[.D127]-[.D12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6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0833333333333" calcext:value-type="float">
            <text:p>0,00110833333333333000</text:p>
          </table:table-cell>
          <table:table-cell table:formula="of:=[.D128]-[.D12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6" office:value-type="float" office:value="9652" calcext:value-type="float">
            <text:p>965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1712962962963" calcext:value-type="float">
            <text:p>0,00111712962962963000</text:p>
          </table:table-cell>
          <table:table-cell table:formula="of:=[.D129]-[.D12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6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12592592592593" calcext:value-type="float">
            <text:p>0,00112592592592593000</text:p>
          </table:table-cell>
          <table:table-cell table:formula="of:=[.D130]-[.D129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6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3472222222222" calcext:value-type="float">
            <text:p>0,00113472222222222000</text:p>
          </table:table-cell>
          <table:table-cell table:formula="of:=[.D131]-[.D13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6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14351851851852" calcext:value-type="float">
            <text:p>0,00114351851851852000</text:p>
          </table:table-cell>
          <table:table-cell table:formula="of:=[.D132]-[.D13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6" office:value-type="float" office:value="9956" calcext:value-type="float">
            <text:p>995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5231481481481" calcext:value-type="float">
            <text:p>0,00115231481481481000</text:p>
          </table:table-cell>
          <table:table-cell table:formula="of:=[.D133]-[.D13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6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6111111111111" calcext:value-type="float">
            <text:p>0,00116111111111111000</text:p>
          </table:table-cell>
          <table:table-cell table:formula="of:=[.D134]-[.D133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6" office:value-type="float" office:value="10108" calcext:value-type="float">
            <text:p>1010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16990740740741" calcext:value-type="float">
            <text:p>0,00116990740740741000</text:p>
          </table:table-cell>
          <table:table-cell table:formula="of:=[.D135]-[.D13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6" office:value-type="float" office:value="10184" calcext:value-type="float">
            <text:p>1018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787037037037" calcext:value-type="float">
            <text:p>0,00117870370370370000</text:p>
          </table:table-cell>
          <table:table-cell table:formula="of:=[.D136]-[.D13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6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1875" calcext:value-type="float">
            <text:p>0,00118750000000000000</text:p>
          </table:table-cell>
          <table:table-cell table:formula="of:=[.D137]-[.D13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6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962962962963" calcext:value-type="float">
            <text:p>0,00119629629629630000</text:p>
          </table:table-cell>
          <table:table-cell table:formula="of:=[.D138]-[.D137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6" office:value-type="float" office:value="10412" calcext:value-type="float">
            <text:p>1041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20509259259259" calcext:value-type="float">
            <text:p>0,00120509259259259000</text:p>
          </table:table-cell>
          <table:table-cell table:formula="of:=[.D139]-[.D13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6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21388888888889" calcext:value-type="float">
            <text:p>0,00121388888888889000</text:p>
          </table:table-cell>
          <table:table-cell table:formula="of:=[.D140]-[.D13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6" office:value-type="float" office:value="10564" calcext:value-type="float">
            <text:p>1056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22268518518519" calcext:value-type="float">
            <text:p>0,00122268518518519000</text:p>
          </table:table-cell>
          <table:table-cell table:formula="of:=[.D141]-[.D14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6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23148148148148" calcext:value-type="float">
            <text:p>0,00123148148148148000</text:p>
          </table:table-cell>
          <table:table-cell table:formula="of:=[.D142]-[.D141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6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24027777777778" calcext:value-type="float">
            <text:p>0,00124027777777778000</text:p>
          </table:table-cell>
          <table:table-cell table:formula="of:=[.D143]-[.D14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6" office:value-type="float" office:value="10792" calcext:value-type="float">
            <text:p>1079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24907407407407" calcext:value-type="float">
            <text:p>0,00124907407407407000</text:p>
          </table:table-cell>
          <table:table-cell table:formula="of:=[.D144]-[.D14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6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25787037037037" calcext:value-type="float">
            <text:p>0,00125787037037037000</text:p>
          </table:table-cell>
          <table:table-cell table:formula="of:=[.D145]-[.D14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6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26666666666667" calcext:value-type="float">
            <text:p>0,00126666666666667000</text:p>
          </table:table-cell>
          <table:table-cell table:formula="of:=[.D146]-[.D145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6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27546296296296" calcext:value-type="float">
            <text:p>0,00127546296296296000</text:p>
          </table:table-cell>
          <table:table-cell table:formula="of:=[.D147]-[.D14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6" office:value-type="float" office:value="11096" calcext:value-type="float">
            <text:p>1109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28425925925926" calcext:value-type="float">
            <text:p>0,00128425925925926000</text:p>
          </table:table-cell>
          <table:table-cell table:formula="of:=[.D148]-[.D14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6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29305555555556" calcext:value-type="float">
            <text:p>0,00129305555555556000</text:p>
          </table:table-cell>
          <table:table-cell table:formula="of:=[.D149]-[.D14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6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30185185185185" calcext:value-type="float">
            <text:p>0,00130185185185185000</text:p>
          </table:table-cell>
          <table:table-cell table:formula="of:=[.D150]-[.D149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6" office:value-type="float" office:value="11324" calcext:value-type="float">
            <text:p>1132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31064814814815" calcext:value-type="float">
            <text:p>0,00131064814814815000</text:p>
          </table:table-cell>
          <table:table-cell table:formula="of:=[.D151]-[.D15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6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31944444444444" calcext:value-type="float">
            <text:p>0,00131944444444444000</text:p>
          </table:table-cell>
          <table:table-cell table:formula="of:=[.D152]-[.D15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6" office:value-type="float" office:value="11476" calcext:value-type="float">
            <text:p>1147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32824074074074" calcext:value-type="float">
            <text:p>0,00132824074074074000</text:p>
          </table:table-cell>
          <table:table-cell table:formula="of:=[.D153]-[.D15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6" office:value-type="float" office:value="11552" calcext:value-type="float">
            <text:p>1155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33703703703704" calcext:value-type="float">
            <text:p>0,00133703703703704000</text:p>
          </table:table-cell>
          <table:table-cell table:formula="of:=[.D154]-[.D153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6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34583333333333" calcext:value-type="float">
            <text:p>0,00134583333333333000</text:p>
          </table:table-cell>
          <table:table-cell table:formula="of:=[.D155]-[.D15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6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35462962962963" calcext:value-type="float">
            <text:p>0,00135462962962963000</text:p>
          </table:table-cell>
          <table:table-cell table:formula="of:=[.D156]-[.D15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6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36342592592593" calcext:value-type="float">
            <text:p>0,00136342592592593000</text:p>
          </table:table-cell>
          <table:table-cell table:formula="of:=[.D157]-[.D15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6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37222222222222" calcext:value-type="float">
            <text:p>0,00137222222222222000</text:p>
          </table:table-cell>
          <table:table-cell table:formula="of:=[.D158]-[.D157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6" office:value-type="float" office:value="11932" calcext:value-type="float">
            <text:p>1193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38101851851852" calcext:value-type="float">
            <text:p>0,00138101851851852000</text:p>
          </table:table-cell>
          <table:table-cell table:formula="of:=[.D159]-[.D15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6" office:value-type="float" office:value="12008" calcext:value-type="float">
            <text:p>1200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38981481481481" calcext:value-type="float">
            <text:p>0,00138981481481481000</text:p>
          </table:table-cell>
          <table:table-cell table:formula="of:=[.D160]-[.D15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6" office:value-type="float" office:value="12084" calcext:value-type="float">
            <text:p>1208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39861111111111" calcext:value-type="float">
            <text:p>0,00139861111111111000</text:p>
          </table:table-cell>
          <table:table-cell table:formula="of:=[.D161]-[.D16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6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40740740740741" calcext:value-type="float">
            <text:p>0,00140740740740741000</text:p>
          </table:table-cell>
          <table:table-cell table:formula="of:=[.D162]-[.D161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6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4162037037037" calcext:value-type="float">
            <text:p>0,00141620370370370000</text:p>
          </table:table-cell>
          <table:table-cell table:formula="of:=[.D163]-[.D16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6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425" calcext:value-type="float">
            <text:p>0,00142500000000000000</text:p>
          </table:table-cell>
          <table:table-cell table:formula="of:=[.D164]-[.D16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6" office:value-type="float" office:value="12388" calcext:value-type="float">
            <text:p>1238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4337962962963" calcext:value-type="float">
            <text:p>0,00143379629629630000</text:p>
          </table:table-cell>
          <table:table-cell table:formula="of:=[.D165]-[.D16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6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44259259259259" calcext:value-type="float">
            <text:p>0,00144259259259259000</text:p>
          </table:table-cell>
          <table:table-cell table:formula="of:=[.D166]-[.D16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6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45138888888889" calcext:value-type="float">
            <text:p>0,00145138888888889000</text:p>
          </table:table-cell>
          <table:table-cell table:formula="of:=[.D167]-[.D166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6" office:value-type="float" office:value="12616" calcext:value-type="float">
            <text:p>1261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46018518518519" calcext:value-type="float">
            <text:p>0,00146018518518519000</text:p>
          </table:table-cell>
          <table:table-cell table:formula="of:=[.D168]-[.D16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6" office:value-type="float" office:value="12692" calcext:value-type="float">
            <text:p>1269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46898148148148" calcext:value-type="float">
            <text:p>0,00146898148148148000</text:p>
          </table:table-cell>
          <table:table-cell table:formula="of:=[.D169]-[.D16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6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47777777777778" calcext:value-type="float">
            <text:p>0,00147777777777778000</text:p>
          </table:table-cell>
          <table:table-cell table:formula="of:=[.D170]-[.D16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6" office:value-type="float" office:value="12844" calcext:value-type="float">
            <text:p>1284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48657407407407" calcext:value-type="float">
            <text:p>0,00148657407407407000</text:p>
          </table:table-cell>
          <table:table-cell table:formula="of:=[.D171]-[.D170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6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49537037037037" calcext:value-type="float">
            <text:p>0,00149537037037037000</text:p>
          </table:table-cell>
          <table:table-cell table:formula="of:=[.D172]-[.D17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6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50416666666667" calcext:value-type="float">
            <text:p>0,00150416666666667000</text:p>
          </table:table-cell>
          <table:table-cell table:formula="of:=[.D173]-[.D17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6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51296296296296" calcext:value-type="float">
            <text:p>0,00151296296296296000</text:p>
          </table:table-cell>
          <table:table-cell table:formula="of:=[.D174]-[.D17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6" office:value-type="float" office:value="13148" calcext:value-type="float">
            <text:p>1314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52175925925926" calcext:value-type="float">
            <text:p>0,00152175925925926000</text:p>
          </table:table-cell>
          <table:table-cell table:formula="of:=[.D175]-[.D174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6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53055555555556" calcext:value-type="float">
            <text:p>0,00153055555555556000</text:p>
          </table:table-cell>
          <table:table-cell table:formula="of:=[.D176]-[.D17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6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53935185185185" calcext:value-type="float">
            <text:p>0,00153935185185185000</text:p>
          </table:table-cell>
          <table:table-cell table:formula="of:=[.D177]-[.D17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6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54814814814815" calcext:value-type="float">
            <text:p>0,00154814814814815000</text:p>
          </table:table-cell>
          <table:table-cell table:formula="of:=[.D178]-[.D17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6" office:value-type="float" office:value="13452" calcext:value-type="float">
            <text:p>1345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55694444444444" calcext:value-type="float">
            <text:p>0,00155694444444444000</text:p>
          </table:table-cell>
          <table:table-cell table:formula="of:=[.D179]-[.D178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6" office:value-type="float" office:value="13528" calcext:value-type="float">
            <text:p>1352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56574074074074" calcext:value-type="float">
            <text:p>0,00156574074074074000</text:p>
          </table:table-cell>
          <table:table-cell table:formula="of:=[.D180]-[.D17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6" office:value-type="float" office:value="13604" calcext:value-type="float">
            <text:p>1360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57453703703704" calcext:value-type="float">
            <text:p>0,00157453703703704000</text:p>
          </table:table-cell>
          <table:table-cell table:formula="of:=[.D181]-[.D18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6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58333333333333" calcext:value-type="float">
            <text:p>0,00158333333333333000</text:p>
          </table:table-cell>
          <table:table-cell table:formula="of:=[.D182]-[.D18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6" office:value-type="float" office:value="13756" calcext:value-type="float">
            <text:p>1375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59212962962963" calcext:value-type="float">
            <text:p>0,00159212962962963000</text:p>
          </table:table-cell>
          <table:table-cell table:formula="of:=[.D183]-[.D182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6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60092592592593" calcext:value-type="float">
            <text:p>0,00160092592592593000</text:p>
          </table:table-cell>
          <table:table-cell table:formula="of:=[.D184]-[.D18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6" office:value-type="float" office:value="13908" calcext:value-type="float">
            <text:p>1390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60972222222222" calcext:value-type="float">
            <text:p>0,00160972222222222000</text:p>
          </table:table-cell>
          <table:table-cell table:formula="of:=[.D185]-[.D18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6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61851851851852" calcext:value-type="float">
            <text:p>0,00161851851851852000</text:p>
          </table:table-cell>
          <table:table-cell table:formula="of:=[.D186]-[.D18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6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62731481481481" calcext:value-type="float">
            <text:p>0,00162731481481481000</text:p>
          </table:table-cell>
          <table:table-cell table:formula="of:=[.D187]-[.D186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6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63611111111111" calcext:value-type="float">
            <text:p>0,00163611111111111000</text:p>
          </table:table-cell>
          <table:table-cell table:formula="of:=[.D188]-[.D18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6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64490740740741" calcext:value-type="float">
            <text:p>0,00164490740740741000</text:p>
          </table:table-cell>
          <table:table-cell table:formula="of:=[.D189]-[.D18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6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6537037037037" calcext:value-type="float">
            <text:p>0,00165370370370370000</text:p>
          </table:table-cell>
          <table:table-cell table:formula="of:=[.D190]-[.D18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6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6625" calcext:value-type="float">
            <text:p>0,00166250000000000000</text:p>
          </table:table-cell>
          <table:table-cell table:formula="of:=[.D191]-[.D190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6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6712962962963" calcext:value-type="float">
            <text:p>0,00167129629629630000</text:p>
          </table:table-cell>
          <table:table-cell table:formula="of:=[.D192]-[.D19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6" office:value-type="float" office:value="14516" calcext:value-type="float">
            <text:p>1451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68009259259259" calcext:value-type="float">
            <text:p>0,00168009259259259000</text:p>
          </table:table-cell>
          <table:table-cell table:formula="of:=[.D193]-[.D19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6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68888888888889" calcext:value-type="float">
            <text:p>0,00168888888888889000</text:p>
          </table:table-cell>
          <table:table-cell table:formula="of:=[.D194]-[.D19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6" office:value-type="float" office:value="14668" calcext:value-type="float">
            <text:p>1466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69768518518519" calcext:value-type="float">
            <text:p>0,00169768518518518000</text:p>
          </table:table-cell>
          <table:table-cell table:formula="of:=[.D195]-[.D194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6" office:value-type="float" office:value="14744" calcext:value-type="float">
            <text:p>1474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70648148148148" calcext:value-type="float">
            <text:p>0,00170648148148148000</text:p>
          </table:table-cell>
          <table:table-cell table:formula="of:=[.D196]-[.D19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6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71527777777778" calcext:value-type="float">
            <text:p>0,00171527777777778000</text:p>
          </table:table-cell>
          <table:table-cell table:formula="of:=[.D197]-[.D19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6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72407407407407" calcext:value-type="float">
            <text:p>0,00172407407407407000</text:p>
          </table:table-cell>
          <table:table-cell table:formula="of:=[.D198]-[.D19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6" office:value-type="float" office:value="14972" calcext:value-type="float">
            <text:p>1497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73287037037037" calcext:value-type="float">
            <text:p>0,00173287037037037000</text:p>
          </table:table-cell>
          <table:table-cell table:formula="of:=[.D199]-[.D198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6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74166666666667" calcext:value-type="float">
            <text:p>0,00174166666666667000</text:p>
          </table:table-cell>
          <table:table-cell table:formula="of:=[.D200]-[.D19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6" office:value-type="float" office:value="15124" calcext:value-type="float">
            <text:p>1512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75046296296296" calcext:value-type="float">
            <text:p>0,00175046296296296000</text:p>
          </table:table-cell>
          <table:table-cell table:formula="of:=[.D201]-[.D20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6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75925925925926" calcext:value-type="float">
            <text:p>0,00175925925925926000</text:p>
          </table:table-cell>
          <table:table-cell table:formula="of:=[.D202]-[.D20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6" office:value-type="float" office:value="15276" calcext:value-type="float">
            <text:p>1527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76805555555556" calcext:value-type="float">
            <text:p>0,00176805555555556000</text:p>
          </table:table-cell>
          <table:table-cell table:formula="of:=[.D203]-[.D202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6" office:value-type="float" office:value="15352" calcext:value-type="float">
            <text:p>1535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77685185185185" calcext:value-type="float">
            <text:p>0,00177685185185185000</text:p>
          </table:table-cell>
          <table:table-cell table:formula="of:=[.D204]-[.D20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6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78564814814815" calcext:value-type="float">
            <text:p>0,00178564814814815000</text:p>
          </table:table-cell>
          <table:table-cell table:formula="of:=[.D205]-[.D20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6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79444444444444" calcext:value-type="float">
            <text:p>0,00179444444444444000</text:p>
          </table:table-cell>
          <table:table-cell table:formula="of:=[.D206]-[.D20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6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80324074074074" calcext:value-type="float">
            <text:p>0,00180324074074074000</text:p>
          </table:table-cell>
          <table:table-cell table:formula="of:=[.D207]-[.D206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6" office:value-type="float" office:value="15656" calcext:value-type="float">
            <text:p>1565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81203703703704" calcext:value-type="float">
            <text:p>0,00181203703703704000</text:p>
          </table:table-cell>
          <table:table-cell table:formula="of:=[.D208]-[.D20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6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82083333333333" calcext:value-type="float">
            <text:p>0,00182083333333333000</text:p>
          </table:table-cell>
          <table:table-cell table:formula="of:=[.D209]-[.D20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6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82962962962963" calcext:value-type="float">
            <text:p>0,00182962962962963000</text:p>
          </table:table-cell>
          <table:table-cell table:formula="of:=[.D210]-[.D20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6" office:value-type="float" office:value="15884" calcext:value-type="float">
            <text:p>1588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83842592592593" calcext:value-type="float">
            <text:p>0,00183842592592593000</text:p>
          </table:table-cell>
          <table:table-cell table:formula="of:=[.D211]-[.D210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6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84722222222222" calcext:value-type="float">
            <text:p>0,00184722222222222000</text:p>
          </table:table-cell>
          <table:table-cell table:formula="of:=[.D212]-[.D21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6" office:value-type="float" office:value="16036" calcext:value-type="float">
            <text:p>1603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85601851851852" calcext:value-type="float">
            <text:p>0,00185601851851852000</text:p>
          </table:table-cell>
          <table:table-cell table:formula="of:=[.D213]-[.D21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6" office:value-type="float" office:value="16112" calcext:value-type="float">
            <text:p>1611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86481481481481" calcext:value-type="float">
            <text:p>0,00186481481481481000</text:p>
          </table:table-cell>
          <table:table-cell table:formula="of:=[.D214]-[.D21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6" office:value-type="float" office:value="16188" calcext:value-type="float">
            <text:p>1618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87361111111111" calcext:value-type="float">
            <text:p>0,00187361111111111000</text:p>
          </table:table-cell>
          <table:table-cell table:formula="of:=[.D215]-[.D214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6" office:value-type="float" office:value="16264" calcext:value-type="float">
            <text:p>1626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88240740740741" calcext:value-type="float">
            <text:p>0,00188240740740741000</text:p>
          </table:table-cell>
          <table:table-cell table:formula="of:=[.D216]-[.D21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6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8912037037037" calcext:value-type="float">
            <text:p>0,00189120370370370000</text:p>
          </table:table-cell>
          <table:table-cell table:formula="of:=[.D217]-[.D21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6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9" calcext:value-type="float">
            <text:p>0,00190000000000000000</text:p>
          </table:table-cell>
          <table:table-cell table:formula="of:=[.D218]-[.D21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6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9087962962963" calcext:value-type="float">
            <text:p>0,00190879629629630000</text:p>
          </table:table-cell>
          <table:table-cell table:formula="of:=[.D219]-[.D218]" office:value-type="float" office:value="0.00000879629629629646" calcext:value-type="float">
            <text:p>0,00000879629629629646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6" office:value-type="float" office:value="16568" calcext:value-type="float">
            <text:p>1656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91759259259259" calcext:value-type="float">
            <text:p>0,00191759259259259000</text:p>
          </table:table-cell>
          <table:table-cell table:formula="of:=[.D220]-[.D21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6" office:value-type="float" office:value="16644" calcext:value-type="float">
            <text:p>1664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92638888888889" calcext:value-type="float">
            <text:p>0,00192638888888889000</text:p>
          </table:table-cell>
          <table:table-cell table:formula="of:=[.D221]-[.D22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6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93518518518519" calcext:value-type="float">
            <text:p>0,00193518518518519000</text:p>
          </table:table-cell>
          <table:table-cell table:formula="of:=[.D222]-[.D22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6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94398148148148" calcext:value-type="float">
            <text:p>0,00194398148148148000</text:p>
          </table:table-cell>
          <table:table-cell table:formula="of:=[.D223]-[.D22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6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95277777777778" calcext:value-type="float">
            <text:p>0,00195277777777778000</text:p>
          </table:table-cell>
          <table:table-cell table:formula="of:=[.D224]-[.D22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6" office:value-type="float" office:value="16948" calcext:value-type="float">
            <text:p>1694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96157407407407" calcext:value-type="float">
            <text:p>0,00196157407407407000</text:p>
          </table:table-cell>
          <table:table-cell table:formula="of:=[.D225]-[.D22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6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97037037037037" calcext:value-type="float">
            <text:p>0,00197037037037037000</text:p>
          </table:table-cell>
          <table:table-cell table:formula="of:=[.D226]-[.D225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6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97916666666667" calcext:value-type="float">
            <text:p>0,00197916666666667000</text:p>
          </table:table-cell>
          <table:table-cell table:formula="of:=[.D227]-[.D22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6" office:value-type="float" office:value="17176" calcext:value-type="float">
            <text:p>1717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98796296296296" calcext:value-type="float">
            <text:p>0,00198796296296296000</text:p>
          </table:table-cell>
          <table:table-cell table:formula="of:=[.D228]-[.D22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6" office:value-type="float" office:value="17252" calcext:value-type="float">
            <text:p>1725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99675925925926" calcext:value-type="float">
            <text:p>0,00199675925925926000</text:p>
          </table:table-cell>
          <table:table-cell table:formula="of:=[.D229]-[.D22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6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00555555555556" calcext:value-type="float">
            <text:p>0,00200555555555556000</text:p>
          </table:table-cell>
          <table:table-cell table:formula="of:=[.D230]-[.D22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6" office:value-type="float" office:value="17404" calcext:value-type="float">
            <text:p>1740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01435185185185" calcext:value-type="float">
            <text:p>0,00201435185185185000</text:p>
          </table:table-cell>
          <table:table-cell table:formula="of:=[.D231]-[.D23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6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02314814814815" calcext:value-type="float">
            <text:p>0,00202314814814815000</text:p>
          </table:table-cell>
          <table:table-cell table:formula="of:=[.D232]-[.D23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6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03194444444444" calcext:value-type="float">
            <text:p>0,00203194444444444000</text:p>
          </table:table-cell>
          <table:table-cell table:formula="of:=[.D233]-[.D23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6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04074074074074" calcext:value-type="float">
            <text:p>0,00204074074074074000</text:p>
          </table:table-cell>
          <table:table-cell table:formula="of:=[.D234]-[.D233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6" office:value-type="float" office:value="17708" calcext:value-type="float">
            <text:p>1770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04953703703704" calcext:value-type="float">
            <text:p>0,00204953703703704000</text:p>
          </table:table-cell>
          <table:table-cell table:formula="of:=[.D235]-[.D23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6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05833333333333" calcext:value-type="float">
            <text:p>0,00205833333333333000</text:p>
          </table:table-cell>
          <table:table-cell table:formula="of:=[.D236]-[.D23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6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06712962962963" calcext:value-type="float">
            <text:p>0,00206712962962963000</text:p>
          </table:table-cell>
          <table:table-cell table:formula="of:=[.D237]-[.D23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6" office:value-type="float" office:value="17936" calcext:value-type="float">
            <text:p>1793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07592592592593" calcext:value-type="float">
            <text:p>0,00207592592592593000</text:p>
          </table:table-cell>
          <table:table-cell table:formula="of:=[.D238]-[.D23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6" office:value-type="float" office:value="18012" calcext:value-type="float">
            <text:p>1801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08472222222222" calcext:value-type="float">
            <text:p>0,00208472222222222000</text:p>
          </table:table-cell>
          <table:table-cell table:formula="of:=[.D239]-[.D23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6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09351851851852" calcext:value-type="float">
            <text:p>0,00209351851851852000</text:p>
          </table:table-cell>
          <table:table-cell table:formula="of:=[.D240]-[.D23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6" office:value-type="float" office:value="18164" calcext:value-type="float">
            <text:p>1816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10231481481481" calcext:value-type="float">
            <text:p>0,00210231481481481000</text:p>
          </table:table-cell>
          <table:table-cell table:formula="of:=[.D241]-[.D24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6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11111111111111" calcext:value-type="float">
            <text:p>0,00211111111111111000</text:p>
          </table:table-cell>
          <table:table-cell table:formula="of:=[.D242]-[.D241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6" office:value-type="float" office:value="18316" calcext:value-type="float">
            <text:p>1831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11990740740741" calcext:value-type="float">
            <text:p>0,00211990740740741000</text:p>
          </table:table-cell>
          <table:table-cell table:formula="of:=[.D243]-[.D24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6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1287037037037" calcext:value-type="float">
            <text:p>0,00212870370370370000</text:p>
          </table:table-cell>
          <table:table-cell table:formula="of:=[.D244]-[.D24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6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1375" calcext:value-type="float">
            <text:p>0,00213750000000000000</text:p>
          </table:table-cell>
          <table:table-cell table:formula="of:=[.D245]-[.D24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6" office:value-type="float" office:value="18544" calcext:value-type="float">
            <text:p>1854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1462962962963" calcext:value-type="float">
            <text:p>0,00214629629629630000</text:p>
          </table:table-cell>
          <table:table-cell table:formula="of:=[.D246]-[.D24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6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15509259259259" calcext:value-type="float">
            <text:p>0,00215509259259259000</text:p>
          </table:table-cell>
          <table:table-cell table:formula="of:=[.D247]-[.D24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6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16388888888889" calcext:value-type="float">
            <text:p>0,00216388888888889000</text:p>
          </table:table-cell>
          <table:table-cell table:formula="of:=[.D248]-[.D24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6" office:value-type="float" office:value="18772" calcext:value-type="float">
            <text:p>1877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17268518518519" calcext:value-type="float">
            <text:p>0,00217268518518519000</text:p>
          </table:table-cell>
          <table:table-cell table:formula="of:=[.D249]-[.D24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6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18148148148148" calcext:value-type="float">
            <text:p>0,00218148148148148000</text:p>
          </table:table-cell>
          <table:table-cell table:formula="of:=[.D250]-[.D249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6" office:value-type="float" office:value="18924" calcext:value-type="float">
            <text:p>1892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19027777777778" calcext:value-type="float">
            <text:p>0,00219027777777778000</text:p>
          </table:table-cell>
          <table:table-cell table:formula="of:=[.D251]-[.D25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6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19907407407407" calcext:value-type="float">
            <text:p>0,00219907407407407000</text:p>
          </table:table-cell>
          <table:table-cell table:formula="of:=[.D252]-[.D25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6" office:value-type="float" office:value="19076" calcext:value-type="float">
            <text:p>1907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20787037037037" calcext:value-type="float">
            <text:p>0,00220787037037037000</text:p>
          </table:table-cell>
          <table:table-cell table:formula="of:=[.D253]-[.D25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6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21666666666667" calcext:value-type="float">
            <text:p>0,00221666666666667000</text:p>
          </table:table-cell>
          <table:table-cell table:formula="of:=[.D254]-[.D25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6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22546296296296" calcext:value-type="float">
            <text:p>0,00222546296296296000</text:p>
          </table:table-cell>
          <table:table-cell table:formula="of:=[.D255]-[.D25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6" office:value-type="float" office:value="19304" calcext:value-type="float">
            <text:p>1930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23425925925926" calcext:value-type="float">
            <text:p>0,00223425925925926000</text:p>
          </table:table-cell>
          <table:table-cell table:formula="of:=[.D256]-[.D25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6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24305555555556" calcext:value-type="float">
            <text:p>0,00224305555555556000</text:p>
          </table:table-cell>
          <table:table-cell table:formula="of:=[.D257]-[.D25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6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25185185185185" calcext:value-type="float">
            <text:p>0,00225185185185185000</text:p>
          </table:table-cell>
          <table:table-cell table:formula="of:=[.D258]-[.D257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6" office:value-type="float" office:value="19532" calcext:value-type="float">
            <text:p>1953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26064814814815" calcext:value-type="float">
            <text:p>0,00226064814814815000</text:p>
          </table:table-cell>
          <table:table-cell table:formula="of:=[.D259]-[.D25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6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26944444444444" calcext:value-type="float">
            <text:p>0,00226944444444444000</text:p>
          </table:table-cell>
          <table:table-cell table:formula="of:=[.D260]-[.D25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6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27824074074074" calcext:value-type="float">
            <text:p>0,00227824074074074000</text:p>
          </table:table-cell>
          <table:table-cell table:formula="of:=[.D261]-[.D26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6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28703703703704" calcext:value-type="float">
            <text:p>0,00228703703703704000</text:p>
          </table:table-cell>
          <table:table-cell table:formula="of:=[.D262]-[.D26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6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29583333333333" calcext:value-type="float">
            <text:p>0,00229583333333333000</text:p>
          </table:table-cell>
          <table:table-cell table:formula="of:=[.D263]-[.D26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6" office:value-type="float" office:value="19912" calcext:value-type="float">
            <text:p>1991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30462962962963" calcext:value-type="float">
            <text:p>0,00230462962962963000</text:p>
          </table:table-cell>
          <table:table-cell table:formula="of:=[.D264]-[.D26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6" office:value-type="float" office:value="19988" calcext:value-type="float">
            <text:p>1998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31342592592593" calcext:value-type="float">
            <text:p>0,00231342592592593000</text:p>
          </table:table-cell>
          <table:table-cell table:formula="of:=[.D265]-[.D26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6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32222222222222" calcext:value-type="float">
            <text:p>0,00232222222222222000</text:p>
          </table:table-cell>
          <table:table-cell table:formula="of:=[.D266]-[.D265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6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33101851851852" calcext:value-type="float">
            <text:p>0,00233101851851852000</text:p>
          </table:table-cell>
          <table:table-cell table:formula="of:=[.D267]-[.D26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6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33981481481482" calcext:value-type="float">
            <text:p>0,00233981481481482000</text:p>
          </table:table-cell>
          <table:table-cell table:formula="of:=[.D268]-[.D26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6" office:value-type="float" office:value="20292" calcext:value-type="float">
            <text:p>2029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34861111111111" calcext:value-type="float">
            <text:p>0,00234861111111111000</text:p>
          </table:table-cell>
          <table:table-cell table:formula="of:=[.D269]-[.D26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6" office:value-type="float" office:value="20368" calcext:value-type="float">
            <text:p>2036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35740740740741" calcext:value-type="float">
            <text:p>0,00235740740740741000</text:p>
          </table:table-cell>
          <table:table-cell table:formula="of:=[.D270]-[.D26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6" office:value-type="float" office:value="20444" calcext:value-type="float">
            <text:p>2044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3662037037037" calcext:value-type="float">
            <text:p>0,00236620370370370000</text:p>
          </table:table-cell>
          <table:table-cell table:formula="of:=[.D271]-[.D27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6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375" calcext:value-type="float">
            <text:p>0,00237500000000000000</text:p>
          </table:table-cell>
          <table:table-cell table:formula="of:=[.D272]-[.D27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6" office:value-type="float" office:value="20596" calcext:value-type="float">
            <text:p>2059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3837962962963" calcext:value-type="float">
            <text:p>0,00238379629629630000</text:p>
          </table:table-cell>
          <table:table-cell table:formula="of:=[.D273]-[.D27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6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39259259259259" calcext:value-type="float">
            <text:p>0,00239259259259259000</text:p>
          </table:table-cell>
          <table:table-cell table:formula="of:=[.D274]-[.D273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6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40138888888889" calcext:value-type="float">
            <text:p>0,00240138888888889000</text:p>
          </table:table-cell>
          <table:table-cell table:formula="of:=[.D275]-[.D27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6" office:value-type="float" office:value="20824" calcext:value-type="float">
            <text:p>2082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41018518518519" calcext:value-type="float">
            <text:p>0,00241018518518519000</text:p>
          </table:table-cell>
          <table:table-cell table:formula="of:=[.D276]-[.D27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6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41898148148148" calcext:value-type="float">
            <text:p>0,00241898148148148000</text:p>
          </table:table-cell>
          <table:table-cell table:formula="of:=[.D277]-[.D27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6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42777777777778" calcext:value-type="float">
            <text:p>0,00242777777777778000</text:p>
          </table:table-cell>
          <table:table-cell table:formula="of:=[.D278]-[.D27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6" office:value-type="float" office:value="21052" calcext:value-type="float">
            <text:p>2105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43657407407407" calcext:value-type="float">
            <text:p>0,00243657407407407000</text:p>
          </table:table-cell>
          <table:table-cell table:formula="of:=[.D279]-[.D27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6" office:value-type="float" office:value="21128" calcext:value-type="float">
            <text:p>2112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44537037037037" calcext:value-type="float">
            <text:p>0,00244537037037037000</text:p>
          </table:table-cell>
          <table:table-cell table:formula="of:=[.D280]-[.D27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6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45416666666667" calcext:value-type="float">
            <text:p>0,00245416666666667000</text:p>
          </table:table-cell>
          <table:table-cell table:formula="of:=[.D281]-[.D28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6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46296296296296" calcext:value-type="float">
            <text:p>0,00246296296296296000</text:p>
          </table:table-cell>
          <table:table-cell table:formula="of:=[.D282]-[.D28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6" office:value-type="float" office:value="21356" calcext:value-type="float">
            <text:p>2135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47175925925926" calcext:value-type="float">
            <text:p>0,00247175925925926000</text:p>
          </table:table-cell>
          <table:table-cell table:formula="of:=[.D283]-[.D282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6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48055555555556" calcext:value-type="float">
            <text:p>0,00248055555555556000</text:p>
          </table:table-cell>
          <table:table-cell table:formula="of:=[.D284]-[.D28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6" office:value-type="float" office:value="21508" calcext:value-type="float">
            <text:p>2150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48935185185185" calcext:value-type="float">
            <text:p>0,00248935185185185000</text:p>
          </table:table-cell>
          <table:table-cell table:formula="of:=[.D285]-[.D28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6" office:value-type="float" office:value="21584" calcext:value-type="float">
            <text:p>2158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49814814814815" calcext:value-type="float">
            <text:p>0,00249814814814815000</text:p>
          </table:table-cell>
          <table:table-cell table:formula="of:=[.D286]-[.D28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6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50694444444444" calcext:value-type="float">
            <text:p>0,00250694444444444000</text:p>
          </table:table-cell>
          <table:table-cell table:formula="of:=[.D287]-[.D28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6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51574074074074" calcext:value-type="float">
            <text:p>0,00251574074074074000</text:p>
          </table:table-cell>
          <table:table-cell table:formula="of:=[.D288]-[.D28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6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52453703703704" calcext:value-type="float">
            <text:p>0,00252453703703704000</text:p>
          </table:table-cell>
          <table:table-cell table:formula="of:=[.D289]-[.D28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6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53333333333333" calcext:value-type="float">
            <text:p>0,00253333333333333000</text:p>
          </table:table-cell>
          <table:table-cell table:formula="of:=[.D290]-[.D28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6" office:value-type="float" office:value="21964" calcext:value-type="float">
            <text:p>2196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54212962962963" calcext:value-type="float">
            <text:p>0,00254212962962963000</text:p>
          </table:table-cell>
          <table:table-cell table:formula="of:=[.D291]-[.D290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6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55092592592593" calcext:value-type="float">
            <text:p>0,00255092592592593000</text:p>
          </table:table-cell>
          <table:table-cell table:formula="of:=[.D292]-[.D29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6" office:value-type="float" office:value="22116" calcext:value-type="float">
            <text:p>2211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55972222222222" calcext:value-type="float">
            <text:p>0,00255972222222222000</text:p>
          </table:table-cell>
          <table:table-cell table:formula="of:=[.D293]-[.D29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6" office:value-type="float" office:value="22192" calcext:value-type="float">
            <text:p>2219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56851851851852" calcext:value-type="float">
            <text:p>0,00256851851851852000</text:p>
          </table:table-cell>
          <table:table-cell table:formula="of:=[.D294]-[.D29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6" office:value-type="float" office:value="22268" calcext:value-type="float">
            <text:p>2226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57731481481482" calcext:value-type="float">
            <text:p>0,00257731481481482000</text:p>
          </table:table-cell>
          <table:table-cell table:formula="of:=[.D295]-[.D29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6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58611111111111" calcext:value-type="float">
            <text:p>0,00258611111111111000</text:p>
          </table:table-cell>
          <table:table-cell table:formula="of:=[.D296]-[.D29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6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59490740740741" calcext:value-type="float">
            <text:p>0,00259490740740741000</text:p>
          </table:table-cell>
          <table:table-cell table:formula="of:=[.D297]-[.D296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6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6037037037037" calcext:value-type="float">
            <text:p>0,00260370370370370000</text:p>
          </table:table-cell>
          <table:table-cell table:formula="of:=[.D298]-[.D29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6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6125" calcext:value-type="float">
            <text:p>0,00261250000000000000</text:p>
          </table:table-cell>
          <table:table-cell table:formula="of:=[.D299]-[.D298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6" office:value-type="float" office:value="22648" calcext:value-type="float">
            <text:p>2264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6212962962963" calcext:value-type="float">
            <text:p>0,00262129629629630000</text:p>
          </table:table-cell>
          <table:table-cell table:formula="of:=[.D300]-[.D29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6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63009259259259" calcext:value-type="float">
            <text:p>0,00263009259259259000</text:p>
          </table:table-cell>
          <table:table-cell table:formula="of:=[.D301]-[.D30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6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63888888888889" calcext:value-type="float">
            <text:p>0,00263888888888889000</text:p>
          </table:table-cell>
          <table:table-cell table:formula="of:=[.D302]-[.D30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6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64768518518519" calcext:value-type="float">
            <text:p>0,00264768518518519000</text:p>
          </table:table-cell>
          <table:table-cell table:formula="of:=[.D303]-[.D30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6" office:value-type="float" office:value="22952" calcext:value-type="float">
            <text:p>2295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65648148148148" calcext:value-type="float">
            <text:p>0,00265648148148148000</text:p>
          </table:table-cell>
          <table:table-cell table:formula="of:=[.D304]-[.D30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6" office:value-type="float" office:value="23028" calcext:value-type="float">
            <text:p>2302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66527777777778" calcext:value-type="float">
            <text:p>0,00266527777777778000</text:p>
          </table:table-cell>
          <table:table-cell table:formula="of:=[.D305]-[.D304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6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67407407407407" calcext:value-type="float">
            <text:p>0,00267407407407407000</text:p>
          </table:table-cell>
          <table:table-cell table:formula="of:=[.D306]-[.D30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6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68287037037037" calcext:value-type="float">
            <text:p>0,00268287037037037000</text:p>
          </table:table-cell>
          <table:table-cell table:formula="of:=[.D307]-[.D306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6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69166666666667" calcext:value-type="float">
            <text:p>0,00269166666666667000</text:p>
          </table:table-cell>
          <table:table-cell table:formula="of:=[.D308]-[.D307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6" office:value-type="float" office:value="23332" calcext:value-type="float">
            <text:p>2333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70046296296296" calcext:value-type="float">
            <text:p>0,00270046296296296000</text:p>
          </table:table-cell>
          <table:table-cell table:formula="of:=[.D309]-[.D308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6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70925925925926" calcext:value-type="float">
            <text:p>0,00270925925925926000</text:p>
          </table:table-cell>
          <table:table-cell table:formula="of:=[.D310]-[.D309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6" office:value-type="float" office:value="23484" calcext:value-type="float">
            <text:p>2348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71805555555556" calcext:value-type="float">
            <text:p>0,00271805555555556000</text:p>
          </table:table-cell>
          <table:table-cell table:formula="of:=[.D311]-[.D310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6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72685185185185" calcext:value-type="float">
            <text:p>0,00272685185185185000</text:p>
          </table:table-cell>
          <table:table-cell table:formula="of:=[.D312]-[.D311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6" office:value-type="float" office:value="23636" calcext:value-type="float">
            <text:p>2363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73564814814815" calcext:value-type="float">
            <text:p>0,00273564814814815000</text:p>
          </table:table-cell>
          <table:table-cell table:formula="of:=[.D313]-[.D312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6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74444444444444" calcext:value-type="float">
            <text:p>0,00274444444444444000</text:p>
          </table:table-cell>
          <table:table-cell table:formula="of:=[.D314]-[.D313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6" office:value-type="float" office:value="23788" calcext:value-type="float">
            <text:p>2378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75324074074074" calcext:value-type="float">
            <text:p>0,00275324074074074000</text:p>
          </table:table-cell>
          <table:table-cell table:formula="of:=[.D315]-[.D314]" office:value-type="float" office:value="0.00000879629629629668" calcext:value-type="float">
            <text:p>0,00000879629629629668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6" office:value-type="float" office:value="23864" calcext:value-type="float">
            <text:p>2386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76203703703704" calcext:value-type="float">
            <text:p>0,00276203703703704000</text:p>
          </table:table-cell>
          <table:table-cell table:formula="of:=[.D316]-[.D315]" office:value-type="float" office:value="0.00000879629629629624" calcext:value-type="float">
            <text:p>0,00000879629629629624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6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77083333333333" calcext:value-type="float">
            <text:p>0,00277083333333333000</text:p>
          </table:table-cell>
          <table:table-cell table:formula="of:=#REF!-[.D316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53:42.220358976</meta:creation-date>
    <dc:date>2026-05-17T18:54:40.117770244</dc:date>
    <meta:editing-duration>PT59S</meta:editing-duration>
    <meta:editing-cycles>1</meta:editing-cycles>
    <meta:document-statistic meta:table-count="1" meta:cell-count="1580" meta:object-count="0"/>
    <meta:generator>LibreOffice/24.2.7.2$Linux_X86_64 LibreOffice_project/420$Build-2</meta:generator>
  </office:meta>
</office:document-meta>
</file>