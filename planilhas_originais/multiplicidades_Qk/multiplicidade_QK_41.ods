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4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41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474537037037037" calcext:value-type="float">
            <text:p>0,00000474537037037037</text:p>
          </table:table-cell>
          <table:table-cell table:formula="of:=[.D3]-[.D2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41" office:value-type="float" office:value="82" calcext:value-type="float">
            <text:p>8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949074074074074" calcext:value-type="float">
            <text:p>0,00000949074074074074</text:p>
          </table:table-cell>
          <table:table-cell table:formula="of:=[.D4]-[.D3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41" office:value-type="float" office:value="123" calcext:value-type="float">
            <text:p>123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42361111111111" calcext:value-type="float">
            <text:p>0,00001423611111111110</text:p>
          </table:table-cell>
          <table:table-cell table:formula="of:=[.D5]-[.D4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41" office:value-type="float" office:value="164" calcext:value-type="float">
            <text:p>16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89814814814815" calcext:value-type="float">
            <text:p>0,00001898148148148150</text:p>
          </table:table-cell>
          <table:table-cell table:formula="of:=[.D6]-[.D5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41" office:value-type="float" office:value="205" calcext:value-type="float">
            <text:p>20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37268518518519" calcext:value-type="float">
            <text:p>0,00002372685185185190</text:p>
          </table:table-cell>
          <table:table-cell table:formula="of:=[.D7]-[.D6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41" office:value-type="float" office:value="246" calcext:value-type="float">
            <text:p>24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84722222222222" calcext:value-type="float">
            <text:p>0,00002847222222222220</text:p>
          </table:table-cell>
          <table:table-cell table:formula="of:=[.D8]-[.D7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41" office:value-type="float" office:value="287" calcext:value-type="float">
            <text:p>287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32175925925926" calcext:value-type="float">
            <text:p>0,00003321759259259260</text:p>
          </table:table-cell>
          <table:table-cell table:formula="of:=[.D9]-[.D8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41" office:value-type="float" office:value="328" calcext:value-type="float">
            <text:p>32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7962962962963" calcext:value-type="float">
            <text:p>0,00003796296296296300</text:p>
          </table:table-cell>
          <table:table-cell table:formula="of:=[.D10]-[.D9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41" office:value-type="float" office:value="369" calcext:value-type="float">
            <text:p>369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427083333333333" calcext:value-type="float">
            <text:p>0,00004270833333333330</text:p>
          </table:table-cell>
          <table:table-cell table:formula="of:=[.D11]-[.D10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41" office:value-type="float" office:value="410" calcext:value-type="float">
            <text:p>41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474537037037037" calcext:value-type="float">
            <text:p>0,00004745370370370370</text:p>
          </table:table-cell>
          <table:table-cell table:formula="of:=[.D12]-[.D11]" office:value-type="float" office:value="0.00000474537037037038" calcext:value-type="float">
            <text:p>0,000004745370370370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41" office:value-type="float" office:value="451" calcext:value-type="float">
            <text:p>451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521990740740741" calcext:value-type="float">
            <text:p>0,00005219907407407410</text:p>
          </table:table-cell>
          <table:table-cell table:formula="of:=[.D13]-[.D12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41" office:value-type="float" office:value="492" calcext:value-type="float">
            <text:p>49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569444444444444" calcext:value-type="float">
            <text:p>0,00005694444444444450</text:p>
          </table:table-cell>
          <table:table-cell table:formula="of:=[.D14]-[.D13]" office:value-type="float" office:value="0.00000474537037037038" calcext:value-type="float">
            <text:p>0,00000474537037037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41" office:value-type="float" office:value="533" calcext:value-type="float">
            <text:p>533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616898148148148" calcext:value-type="float">
            <text:p>0,00006168981481481480</text:p>
          </table:table-cell>
          <table:table-cell table:formula="of:=[.D15]-[.D14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41" office:value-type="float" office:value="574" calcext:value-type="float">
            <text:p>57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664351851851852" calcext:value-type="float">
            <text:p>0,00006643518518518520</text:p>
          </table:table-cell>
          <table:table-cell table:formula="of:=[.D16]-[.D15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41" office:value-type="float" office:value="615" calcext:value-type="float">
            <text:p>61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711805555555556" calcext:value-type="float">
            <text:p>0,00007118055555555560</text:p>
          </table:table-cell>
          <table:table-cell table:formula="of:=[.D17]-[.D16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41" office:value-type="float" office:value="656" calcext:value-type="float">
            <text:p>65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759259259259259" calcext:value-type="float">
            <text:p>0,00007592592592592590</text:p>
          </table:table-cell>
          <table:table-cell table:formula="of:=[.D18]-[.D17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41" office:value-type="float" office:value="697" calcext:value-type="float">
            <text:p>697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806712962962963" calcext:value-type="float">
            <text:p>0,00008067129629629630</text:p>
          </table:table-cell>
          <table:table-cell table:formula="of:=[.D19]-[.D18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41" office:value-type="float" office:value="738" calcext:value-type="float">
            <text:p>73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854166666666667" calcext:value-type="float">
            <text:p>0,00008541666666666670</text:p>
          </table:table-cell>
          <table:table-cell table:formula="of:=[.D20]-[.D19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41" office:value-type="float" office:value="779" calcext:value-type="float">
            <text:p>779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90162037037037" calcext:value-type="float">
            <text:p>0,00009016203703703700</text:p>
          </table:table-cell>
          <table:table-cell table:formula="of:=[.D21]-[.D20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41" office:value-type="float" office:value="820" calcext:value-type="float">
            <text:p>8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949074074074074" calcext:value-type="float">
            <text:p>0,00009490740740740740</text:p>
          </table:table-cell>
          <table:table-cell table:formula="of:=[.D22]-[.D21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41" office:value-type="float" office:value="861" calcext:value-type="float">
            <text:p>861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996527777777778" calcext:value-type="float">
            <text:p>0,00009965277777777780</text:p>
          </table:table-cell>
          <table:table-cell table:formula="of:=[.D23]-[.D22]" office:value-type="float" office:value="0.00000474537037037038" calcext:value-type="float">
            <text:p>0,00000474537037037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41" office:value-type="float" office:value="902" calcext:value-type="float">
            <text:p>90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04398148148148" calcext:value-type="float">
            <text:p>0,00010439814814814800</text:p>
          </table:table-cell>
          <table:table-cell table:formula="of:=[.D24]-[.D23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41" office:value-type="float" office:value="943" calcext:value-type="float">
            <text:p>943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09143518518519" calcext:value-type="float">
            <text:p>0,00010914351851851900</text:p>
          </table:table-cell>
          <table:table-cell table:formula="of:=[.D25]-[.D24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41" office:value-type="float" office:value="984" calcext:value-type="float">
            <text:p>98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13888888888889" calcext:value-type="float">
            <text:p>0,00011388888888888900</text:p>
          </table:table-cell>
          <table:table-cell table:formula="of:=[.D26]-[.D25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41" office:value-type="float" office:value="1025" calcext:value-type="float">
            <text:p>10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18634259259259" calcext:value-type="float">
            <text:p>0,00011863425925925900</text:p>
          </table:table-cell>
          <table:table-cell table:formula="of:=[.D27]-[.D26]" office:value-type="float" office:value="0.00000474537037037038" calcext:value-type="float">
            <text:p>0,000004745370370370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41" office:value-type="float" office:value="1066" calcext:value-type="float">
            <text:p>106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2337962962963" calcext:value-type="float">
            <text:p>0,00012337962962963000</text:p>
          </table:table-cell>
          <table:table-cell table:formula="of:=[.D28]-[.D27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41" office:value-type="float" office:value="1107" calcext:value-type="float">
            <text:p>1107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28125" calcext:value-type="float">
            <text:p>0,00012812500000000000</text:p>
          </table:table-cell>
          <table:table-cell table:formula="of:=[.D29]-[.D28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41" office:value-type="float" office:value="1148" calcext:value-type="float">
            <text:p>114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3287037037037" calcext:value-type="float">
            <text:p>0,00013287037037037000</text:p>
          </table:table-cell>
          <table:table-cell table:formula="of:=[.D30]-[.D29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41" office:value-type="float" office:value="1189" calcext:value-type="float">
            <text:p>1189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37615740740741" calcext:value-type="float">
            <text:p>0,00013761574074074100</text:p>
          </table:table-cell>
          <table:table-cell table:formula="of:=[.D31]-[.D30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41" office:value-type="float" office:value="1230" calcext:value-type="float">
            <text:p>123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42361111111111" calcext:value-type="float">
            <text:p>0,00014236111111111100</text:p>
          </table:table-cell>
          <table:table-cell table:formula="of:=[.D32]-[.D31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41" office:value-type="float" office:value="1271" calcext:value-type="float">
            <text:p>1271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47106481481481" calcext:value-type="float">
            <text:p>0,00014710648148148100</text:p>
          </table:table-cell>
          <table:table-cell table:formula="of:=[.D33]-[.D32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41" office:value-type="float" office:value="1312" calcext:value-type="float">
            <text:p>131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51851851851852" calcext:value-type="float">
            <text:p>0,00015185185185185200</text:p>
          </table:table-cell>
          <table:table-cell table:formula="of:=[.D34]-[.D33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41" office:value-type="float" office:value="1353" calcext:value-type="float">
            <text:p>1353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56597222222222" calcext:value-type="float">
            <text:p>0,00015659722222222200</text:p>
          </table:table-cell>
          <table:table-cell table:formula="of:=[.D35]-[.D34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41" office:value-type="float" office:value="1394" calcext:value-type="float">
            <text:p>139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61342592592593" calcext:value-type="float">
            <text:p>0,00016134259259259300</text:p>
          </table:table-cell>
          <table:table-cell table:formula="of:=[.D36]-[.D35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41" office:value-type="float" office:value="1435" calcext:value-type="float">
            <text:p>143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66087962962963" calcext:value-type="float">
            <text:p>0,00016608796296296300</text:p>
          </table:table-cell>
          <table:table-cell table:formula="of:=[.D37]-[.D36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41" office:value-type="float" office:value="1476" calcext:value-type="float">
            <text:p>147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70833333333333" calcext:value-type="float">
            <text:p>0,00017083333333333300</text:p>
          </table:table-cell>
          <table:table-cell table:formula="of:=[.D38]-[.D37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41" office:value-type="float" office:value="1517" calcext:value-type="float">
            <text:p>1517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75578703703704" calcext:value-type="float">
            <text:p>0,00017557870370370400</text:p>
          </table:table-cell>
          <table:table-cell table:formula="of:=[.D39]-[.D38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41" office:value-type="float" office:value="1558" calcext:value-type="float">
            <text:p>155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80324074074074" calcext:value-type="float">
            <text:p>0,00018032407407407400</text:p>
          </table:table-cell>
          <table:table-cell table:formula="of:=[.D40]-[.D39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41" office:value-type="float" office:value="1599" calcext:value-type="float">
            <text:p>1599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85069444444444" calcext:value-type="float">
            <text:p>0,00018506944444444400</text:p>
          </table:table-cell>
          <table:table-cell table:formula="of:=[.D41]-[.D40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41" office:value-type="float" office:value="1640" calcext:value-type="float">
            <text:p>16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89814814814815" calcext:value-type="float">
            <text:p>0,00018981481481481500</text:p>
          </table:table-cell>
          <table:table-cell table:formula="of:=[.D42]-[.D41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41" office:value-type="float" office:value="1681" calcext:value-type="float">
            <text:p>1681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94560185185185" calcext:value-type="float">
            <text:p>0,00019456018518518500</text:p>
          </table:table-cell>
          <table:table-cell table:formula="of:=[.D43]-[.D42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41" office:value-type="float" office:value="1722" calcext:value-type="float">
            <text:p>172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99305555555556" calcext:value-type="float">
            <text:p>0,00019930555555555600</text:p>
          </table:table-cell>
          <table:table-cell table:formula="of:=[.D44]-[.D43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41" office:value-type="float" office:value="1763" calcext:value-type="float">
            <text:p>1763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04050925925926" calcext:value-type="float">
            <text:p>0,00020405092592592600</text:p>
          </table:table-cell>
          <table:table-cell table:formula="of:=[.D45]-[.D44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41" office:value-type="float" office:value="1804" calcext:value-type="float">
            <text:p>180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08796296296296" calcext:value-type="float">
            <text:p>0,00020879629629629600</text:p>
          </table:table-cell>
          <table:table-cell table:formula="of:=[.D46]-[.D45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41" office:value-type="float" office:value="1845" calcext:value-type="float">
            <text:p>184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13541666666667" calcext:value-type="float">
            <text:p>0,00021354166666666700</text:p>
          </table:table-cell>
          <table:table-cell table:formula="of:=[.D47]-[.D46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41" office:value-type="float" office:value="1886" calcext:value-type="float">
            <text:p>188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18287037037037" calcext:value-type="float">
            <text:p>0,00021828703703703700</text:p>
          </table:table-cell>
          <table:table-cell table:formula="of:=[.D48]-[.D47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41" office:value-type="float" office:value="1927" calcext:value-type="float">
            <text:p>1927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23032407407407" calcext:value-type="float">
            <text:p>0,00022303240740740700</text:p>
          </table:table-cell>
          <table:table-cell table:formula="of:=[.D49]-[.D48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41" office:value-type="float" office:value="1968" calcext:value-type="float">
            <text:p>196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27777777777778" calcext:value-type="float">
            <text:p>0,00022777777777777800</text:p>
          </table:table-cell>
          <table:table-cell table:formula="of:=[.D50]-[.D49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41" office:value-type="float" office:value="2009" calcext:value-type="float">
            <text:p>2009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32523148148148" calcext:value-type="float">
            <text:p>0,00023252314814814800</text:p>
          </table:table-cell>
          <table:table-cell table:formula="of:=[.D51]-[.D50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41" office:value-type="float" office:value="2050" calcext:value-type="float">
            <text:p>20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37268518518519" calcext:value-type="float">
            <text:p>0,00023726851851851900</text:p>
          </table:table-cell>
          <table:table-cell table:formula="of:=[.D52]-[.D51]" office:value-type="float" office:value="0.00000474537037037037" calcext:value-type="float">
            <text:p>0,000004745370370370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41" office:value-type="float" office:value="2091" calcext:value-type="float">
            <text:p>2091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42013888888889" calcext:value-type="float">
            <text:p>0,00024201388888888900</text:p>
          </table:table-cell>
          <table:table-cell table:formula="of:=[.D53]-[.D52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41" office:value-type="float" office:value="2132" calcext:value-type="float">
            <text:p>213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46759259259259" calcext:value-type="float">
            <text:p>0,00024675925925925900</text:p>
          </table:table-cell>
          <table:table-cell table:formula="of:=[.D54]-[.D5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41" office:value-type="float" office:value="2173" calcext:value-type="float">
            <text:p>2173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5150462962963" calcext:value-type="float">
            <text:p>0,00025150462962963000</text:p>
          </table:table-cell>
          <table:table-cell table:formula="of:=[.D55]-[.D54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41" office:value-type="float" office:value="2214" calcext:value-type="float">
            <text:p>221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5625" calcext:value-type="float">
            <text:p>0,00025625000000000000</text:p>
          </table:table-cell>
          <table:table-cell table:formula="of:=[.D56]-[.D5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41" office:value-type="float" office:value="2255" calcext:value-type="float">
            <text:p>225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6099537037037" calcext:value-type="float">
            <text:p>0,00026099537037037000</text:p>
          </table:table-cell>
          <table:table-cell table:formula="of:=[.D57]-[.D56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41" office:value-type="float" office:value="2296" calcext:value-type="float">
            <text:p>229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65740740740741" calcext:value-type="float">
            <text:p>0,00026574074074074100</text:p>
          </table:table-cell>
          <table:table-cell table:formula="of:=[.D58]-[.D5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41" office:value-type="float" office:value="2337" calcext:value-type="float">
            <text:p>2337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70486111111111" calcext:value-type="float">
            <text:p>0,00027048611111111100</text:p>
          </table:table-cell>
          <table:table-cell table:formula="of:=[.D59]-[.D58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41" office:value-type="float" office:value="2378" calcext:value-type="float">
            <text:p>237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75231481481482" calcext:value-type="float">
            <text:p>0,00027523148148148200</text:p>
          </table:table-cell>
          <table:table-cell table:formula="of:=[.D60]-[.D59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41" office:value-type="float" office:value="2419" calcext:value-type="float">
            <text:p>2419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79976851851852" calcext:value-type="float">
            <text:p>0,00027997685185185200</text:p>
          </table:table-cell>
          <table:table-cell table:formula="of:=[.D61]-[.D60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41" office:value-type="float" office:value="2460" calcext:value-type="float">
            <text:p>24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84722222222222" calcext:value-type="float">
            <text:p>0,00028472222222222200</text:p>
          </table:table-cell>
          <table:table-cell table:formula="of:=[.D62]-[.D61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41" office:value-type="float" office:value="2501" calcext:value-type="float">
            <text:p>2501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89467592592593" calcext:value-type="float">
            <text:p>0,00028946759259259300</text:p>
          </table:table-cell>
          <table:table-cell table:formula="of:=[.D63]-[.D62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41" office:value-type="float" office:value="2542" calcext:value-type="float">
            <text:p>254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94212962962963" calcext:value-type="float">
            <text:p>0,00029421296296296300</text:p>
          </table:table-cell>
          <table:table-cell table:formula="of:=[.D64]-[.D6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41" office:value-type="float" office:value="2583" calcext:value-type="float">
            <text:p>2583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98958333333333" calcext:value-type="float">
            <text:p>0,00029895833333333300</text:p>
          </table:table-cell>
          <table:table-cell table:formula="of:=[.D65]-[.D64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41" office:value-type="float" office:value="2624" calcext:value-type="float">
            <text:p>262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03703703703704" calcext:value-type="float">
            <text:p>0,00030370370370370400</text:p>
          </table:table-cell>
          <table:table-cell table:formula="of:=[.D66]-[.D6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41" office:value-type="float" office:value="2665" calcext:value-type="float">
            <text:p>266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08449074074074" calcext:value-type="float">
            <text:p>0,00030844907407407400</text:p>
          </table:table-cell>
          <table:table-cell table:formula="of:=[.D67]-[.D66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41" office:value-type="float" office:value="2706" calcext:value-type="float">
            <text:p>270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13194444444444" calcext:value-type="float">
            <text:p>0,00031319444444444400</text:p>
          </table:table-cell>
          <table:table-cell table:formula="of:=[.D68]-[.D6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41" office:value-type="float" office:value="2747" calcext:value-type="float">
            <text:p>2747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17939814814815" calcext:value-type="float">
            <text:p>0,00031793981481481500</text:p>
          </table:table-cell>
          <table:table-cell table:formula="of:=[.D69]-[.D68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41" office:value-type="float" office:value="2788" calcext:value-type="float">
            <text:p>278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22685185185185" calcext:value-type="float">
            <text:p>0,00032268518518518500</text:p>
          </table:table-cell>
          <table:table-cell table:formula="of:=[.D70]-[.D69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41" office:value-type="float" office:value="2829" calcext:value-type="float">
            <text:p>2829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27430555555556" calcext:value-type="float">
            <text:p>0,00032743055555555600</text:p>
          </table:table-cell>
          <table:table-cell table:formula="of:=[.D71]-[.D70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41" office:value-type="float" office:value="2870" calcext:value-type="float">
            <text:p>287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32175925925926" calcext:value-type="float">
            <text:p>0,00033217592592592600</text:p>
          </table:table-cell>
          <table:table-cell table:formula="of:=[.D72]-[.D71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41" office:value-type="float" office:value="2911" calcext:value-type="float">
            <text:p>2911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36921296296296" calcext:value-type="float">
            <text:p>0,00033692129629629600</text:p>
          </table:table-cell>
          <table:table-cell table:formula="of:=[.D73]-[.D72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41" office:value-type="float" office:value="2952" calcext:value-type="float">
            <text:p>295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41666666666667" calcext:value-type="float">
            <text:p>0,00034166666666666700</text:p>
          </table:table-cell>
          <table:table-cell table:formula="of:=[.D74]-[.D73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41" office:value-type="float" office:value="2993" calcext:value-type="float">
            <text:p>2993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46412037037037" calcext:value-type="float">
            <text:p>0,00034641203703703700</text:p>
          </table:table-cell>
          <table:table-cell table:formula="of:=[.D75]-[.D7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41" office:value-type="float" office:value="3034" calcext:value-type="float">
            <text:p>303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51157407407407" calcext:value-type="float">
            <text:p>0,00035115740740740700</text:p>
          </table:table-cell>
          <table:table-cell table:formula="of:=[.D76]-[.D75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41" office:value-type="float" office:value="3075" calcext:value-type="float">
            <text:p>30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55902777777778" calcext:value-type="float">
            <text:p>0,00035590277777777800</text:p>
          </table:table-cell>
          <table:table-cell table:formula="of:=[.D77]-[.D76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41" office:value-type="float" office:value="3116" calcext:value-type="float">
            <text:p>311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60648148148148" calcext:value-type="float">
            <text:p>0,00036064814814814800</text:p>
          </table:table-cell>
          <table:table-cell table:formula="of:=[.D78]-[.D77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41" office:value-type="float" office:value="3157" calcext:value-type="float">
            <text:p>3157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65393518518519" calcext:value-type="float">
            <text:p>0,00036539351851851900</text:p>
          </table:table-cell>
          <table:table-cell table:formula="of:=[.D79]-[.D78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41" office:value-type="float" office:value="3198" calcext:value-type="float">
            <text:p>319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70138888888889" calcext:value-type="float">
            <text:p>0,00037013888888888900</text:p>
          </table:table-cell>
          <table:table-cell table:formula="of:=[.D80]-[.D79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41" office:value-type="float" office:value="3239" calcext:value-type="float">
            <text:p>3239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74884259259259" calcext:value-type="float">
            <text:p>0,00037488425925925900</text:p>
          </table:table-cell>
          <table:table-cell table:formula="of:=[.D81]-[.D80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41" office:value-type="float" office:value="3280" calcext:value-type="float">
            <text:p>32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7962962962963" calcext:value-type="float">
            <text:p>0,00037962962962963000</text:p>
          </table:table-cell>
          <table:table-cell table:formula="of:=[.D82]-[.D81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41" office:value-type="float" office:value="3321" calcext:value-type="float">
            <text:p>3321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84375" calcext:value-type="float">
            <text:p>0,00038437500000000000</text:p>
          </table:table-cell>
          <table:table-cell table:formula="of:=[.D83]-[.D82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41" office:value-type="float" office:value="3362" calcext:value-type="float">
            <text:p>336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8912037037037" calcext:value-type="float">
            <text:p>0,00038912037037037000</text:p>
          </table:table-cell>
          <table:table-cell table:formula="of:=[.D84]-[.D83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41" office:value-type="float" office:value="3403" calcext:value-type="float">
            <text:p>3403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393865740740741" calcext:value-type="float">
            <text:p>0,00039386574074074100</text:p>
          </table:table-cell>
          <table:table-cell table:formula="of:=[.D85]-[.D8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41" office:value-type="float" office:value="3444" calcext:value-type="float">
            <text:p>344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98611111111111" calcext:value-type="float">
            <text:p>0,00039861111111111100</text:p>
          </table:table-cell>
          <table:table-cell table:formula="of:=[.D86]-[.D85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41" office:value-type="float" office:value="3485" calcext:value-type="float">
            <text:p>348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403356481481482" calcext:value-type="float">
            <text:p>0,00040335648148148200</text:p>
          </table:table-cell>
          <table:table-cell table:formula="of:=[.D87]-[.D86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41" office:value-type="float" office:value="3526" calcext:value-type="float">
            <text:p>352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408101851851852" calcext:value-type="float">
            <text:p>0,00040810185185185200</text:p>
          </table:table-cell>
          <table:table-cell table:formula="of:=[.D88]-[.D8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41" office:value-type="float" office:value="3567" calcext:value-type="float">
            <text:p>3567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412847222222222" calcext:value-type="float">
            <text:p>0,00041284722222222200</text:p>
          </table:table-cell>
          <table:table-cell table:formula="of:=[.D89]-[.D88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41" office:value-type="float" office:value="3608" calcext:value-type="float">
            <text:p>360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417592592592593" calcext:value-type="float">
            <text:p>0,00041759259259259300</text:p>
          </table:table-cell>
          <table:table-cell table:formula="of:=[.D90]-[.D89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41" office:value-type="float" office:value="3649" calcext:value-type="float">
            <text:p>3649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422337962962963" calcext:value-type="float">
            <text:p>0,00042233796296296300</text:p>
          </table:table-cell>
          <table:table-cell table:formula="of:=[.D91]-[.D90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41" office:value-type="float" office:value="3690" calcext:value-type="float">
            <text:p>369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427083333333333" calcext:value-type="float">
            <text:p>0,00042708333333333300</text:p>
          </table:table-cell>
          <table:table-cell table:formula="of:=[.D92]-[.D91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41" office:value-type="float" office:value="3731" calcext:value-type="float">
            <text:p>3731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431828703703704" calcext:value-type="float">
            <text:p>0,00043182870370370400</text:p>
          </table:table-cell>
          <table:table-cell table:formula="of:=[.D93]-[.D92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41" office:value-type="float" office:value="3772" calcext:value-type="float">
            <text:p>377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436574074074074" calcext:value-type="float">
            <text:p>0,00043657407407407400</text:p>
          </table:table-cell>
          <table:table-cell table:formula="of:=[.D94]-[.D9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41" office:value-type="float" office:value="3813" calcext:value-type="float">
            <text:p>3813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441319444444444" calcext:value-type="float">
            <text:p>0,00044131944444444400</text:p>
          </table:table-cell>
          <table:table-cell table:formula="of:=[.D95]-[.D94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41" office:value-type="float" office:value="3854" calcext:value-type="float">
            <text:p>385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446064814814815" calcext:value-type="float">
            <text:p>0,00044606481481481500</text:p>
          </table:table-cell>
          <table:table-cell table:formula="of:=[.D96]-[.D9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41" office:value-type="float" office:value="3895" calcext:value-type="float">
            <text:p>389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450810185185185" calcext:value-type="float">
            <text:p>0,00045081018518518500</text:p>
          </table:table-cell>
          <table:table-cell table:formula="of:=[.D97]-[.D96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41" office:value-type="float" office:value="3936" calcext:value-type="float">
            <text:p>393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455555555555556" calcext:value-type="float">
            <text:p>0,00045555555555555600</text:p>
          </table:table-cell>
          <table:table-cell table:formula="of:=[.D98]-[.D9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41" office:value-type="float" office:value="3977" calcext:value-type="float">
            <text:p>3977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460300925925926" calcext:value-type="float">
            <text:p>0,00046030092592592600</text:p>
          </table:table-cell>
          <table:table-cell table:formula="of:=[.D99]-[.D98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41" office:value-type="float" office:value="4018" calcext:value-type="float">
            <text:p>401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465046296296296" calcext:value-type="float">
            <text:p>0,00046504629629629600</text:p>
          </table:table-cell>
          <table:table-cell table:formula="of:=[.D100]-[.D99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41" office:value-type="float" office:value="4059" calcext:value-type="float">
            <text:p>4059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469791666666667" calcext:value-type="float">
            <text:p>0,00046979166666666700</text:p>
          </table:table-cell>
          <table:table-cell table:formula="of:=[.D101]-[.D100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41" office:value-type="float" office:value="4100" calcext:value-type="float">
            <text:p>41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474537037037037" calcext:value-type="float">
            <text:p>0,00047453703703703700</text:p>
          </table:table-cell>
          <table:table-cell table:formula="of:=[.D102]-[.D101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41" office:value-type="float" office:value="4141" calcext:value-type="float">
            <text:p>4141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479282407407407" calcext:value-type="float">
            <text:p>0,00047928240740740700</text:p>
          </table:table-cell>
          <table:table-cell table:formula="of:=[.D103]-[.D102]" office:value-type="float" office:value="0.0000047453703703704" calcext:value-type="float">
            <text:p>0,000004745370370370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41" office:value-type="float" office:value="4182" calcext:value-type="float">
            <text:p>418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484027777777778" calcext:value-type="float">
            <text:p>0,00048402777777777800</text:p>
          </table:table-cell>
          <table:table-cell table:formula="of:=[.D104]-[.D10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41" office:value-type="float" office:value="4223" calcext:value-type="float">
            <text:p>4223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488773148148148" calcext:value-type="float">
            <text:p>0,00048877314814814800</text:p>
          </table:table-cell>
          <table:table-cell table:formula="of:=[.D105]-[.D10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41" office:value-type="float" office:value="4264" calcext:value-type="float">
            <text:p>426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493518518518519" calcext:value-type="float">
            <text:p>0,00049351851851851900</text:p>
          </table:table-cell>
          <table:table-cell table:formula="of:=[.D106]-[.D10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41" office:value-type="float" office:value="4305" calcext:value-type="float">
            <text:p>430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498263888888889" calcext:value-type="float">
            <text:p>0,00049826388888888900</text:p>
          </table:table-cell>
          <table:table-cell table:formula="of:=[.D107]-[.D106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41" office:value-type="float" office:value="4346" calcext:value-type="float">
            <text:p>434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503009259259259" calcext:value-type="float">
            <text:p>0,00050300925925925900</text:p>
          </table:table-cell>
          <table:table-cell table:formula="of:=[.D108]-[.D10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41" office:value-type="float" office:value="4387" calcext:value-type="float">
            <text:p>4387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50775462962963" calcext:value-type="float">
            <text:p>0,00050775462962963000</text:p>
          </table:table-cell>
          <table:table-cell table:formula="of:=[.D109]-[.D10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41" office:value-type="float" office:value="4428" calcext:value-type="float">
            <text:p>442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5125" calcext:value-type="float">
            <text:p>0,00051250000000000000</text:p>
          </table:table-cell>
          <table:table-cell table:formula="of:=[.D110]-[.D109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41" office:value-type="float" office:value="4469" calcext:value-type="float">
            <text:p>4469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51724537037037" calcext:value-type="float">
            <text:p>0,00051724537037037000</text:p>
          </table:table-cell>
          <table:table-cell table:formula="of:=[.D111]-[.D110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41" office:value-type="float" office:value="4510" calcext:value-type="float">
            <text:p>451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521990740740741" calcext:value-type="float">
            <text:p>0,00052199074074074100</text:p>
          </table:table-cell>
          <table:table-cell table:formula="of:=[.D112]-[.D111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41" office:value-type="float" office:value="4551" calcext:value-type="float">
            <text:p>4551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526736111111111" calcext:value-type="float">
            <text:p>0,00052673611111111100</text:p>
          </table:table-cell>
          <table:table-cell table:formula="of:=[.D113]-[.D11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41" office:value-type="float" office:value="4592" calcext:value-type="float">
            <text:p>459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531481481481482" calcext:value-type="float">
            <text:p>0,00053148148148148200</text:p>
          </table:table-cell>
          <table:table-cell table:formula="of:=[.D114]-[.D11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41" office:value-type="float" office:value="4633" calcext:value-type="float">
            <text:p>4633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536226851851852" calcext:value-type="float">
            <text:p>0,00053622685185185200</text:p>
          </table:table-cell>
          <table:table-cell table:formula="of:=[.D115]-[.D11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41" office:value-type="float" office:value="4674" calcext:value-type="float">
            <text:p>467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540972222222222" calcext:value-type="float">
            <text:p>0,00054097222222222200</text:p>
          </table:table-cell>
          <table:table-cell table:formula="of:=[.D116]-[.D11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41" office:value-type="float" office:value="4715" calcext:value-type="float">
            <text:p>471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545717592592593" calcext:value-type="float">
            <text:p>0,00054571759259259300</text:p>
          </table:table-cell>
          <table:table-cell table:formula="of:=[.D117]-[.D11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41" office:value-type="float" office:value="4756" calcext:value-type="float">
            <text:p>475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550462962962963" calcext:value-type="float">
            <text:p>0,00055046296296296300</text:p>
          </table:table-cell>
          <table:table-cell table:formula="of:=[.D118]-[.D11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41" office:value-type="float" office:value="4797" calcext:value-type="float">
            <text:p>4797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555208333333333" calcext:value-type="float">
            <text:p>0,00055520833333333300</text:p>
          </table:table-cell>
          <table:table-cell table:formula="of:=[.D119]-[.D118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41" office:value-type="float" office:value="4838" calcext:value-type="float">
            <text:p>483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559953703703704" calcext:value-type="float">
            <text:p>0,00055995370370370400</text:p>
          </table:table-cell>
          <table:table-cell table:formula="of:=[.D120]-[.D11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41" office:value-type="float" office:value="4879" calcext:value-type="float">
            <text:p>4879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564699074074074" calcext:value-type="float">
            <text:p>0,00056469907407407400</text:p>
          </table:table-cell>
          <table:table-cell table:formula="of:=[.D121]-[.D120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41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569444444444445" calcext:value-type="float">
            <text:p>0,00056944444444444500</text:p>
          </table:table-cell>
          <table:table-cell table:formula="of:=[.D122]-[.D121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41" office:value-type="float" office:value="4961" calcext:value-type="float">
            <text:p>4961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574189814814815" calcext:value-type="float">
            <text:p>0,00057418981481481500</text:p>
          </table:table-cell>
          <table:table-cell table:formula="of:=[.D123]-[.D122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41" office:value-type="float" office:value="5002" calcext:value-type="float">
            <text:p>500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578935185185185" calcext:value-type="float">
            <text:p>0,00057893518518518500</text:p>
          </table:table-cell>
          <table:table-cell table:formula="of:=[.D124]-[.D12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41" office:value-type="float" office:value="5043" calcext:value-type="float">
            <text:p>5043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583680555555556" calcext:value-type="float">
            <text:p>0,00058368055555555600</text:p>
          </table:table-cell>
          <table:table-cell table:formula="of:=[.D125]-[.D12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41" office:value-type="float" office:value="5084" calcext:value-type="float">
            <text:p>508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588425925925926" calcext:value-type="float">
            <text:p>0,00058842592592592600</text:p>
          </table:table-cell>
          <table:table-cell table:formula="of:=[.D126]-[.D12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41" office:value-type="float" office:value="5125" calcext:value-type="float">
            <text:p>5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593171296296296" calcext:value-type="float">
            <text:p>0,00059317129629629600</text:p>
          </table:table-cell>
          <table:table-cell table:formula="of:=[.D127]-[.D126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41" office:value-type="float" office:value="5166" calcext:value-type="float">
            <text:p>516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597916666666667" calcext:value-type="float">
            <text:p>0,00059791666666666700</text:p>
          </table:table-cell>
          <table:table-cell table:formula="of:=[.D128]-[.D12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41" office:value-type="float" office:value="5207" calcext:value-type="float">
            <text:p>5207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602662037037037" calcext:value-type="float">
            <text:p>0,00060266203703703700</text:p>
          </table:table-cell>
          <table:table-cell table:formula="of:=[.D129]-[.D128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41" office:value-type="float" office:value="5248" calcext:value-type="float">
            <text:p>524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607407407407407" calcext:value-type="float">
            <text:p>0,00060740740740740700</text:p>
          </table:table-cell>
          <table:table-cell table:formula="of:=[.D130]-[.D129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41" office:value-type="float" office:value="5289" calcext:value-type="float">
            <text:p>5289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612152777777778" calcext:value-type="float">
            <text:p>0,00061215277777777800</text:p>
          </table:table-cell>
          <table:table-cell table:formula="of:=[.D131]-[.D130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41" office:value-type="float" office:value="5330" calcext:value-type="float">
            <text:p>533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616898148148148" calcext:value-type="float">
            <text:p>0,00061689814814814800</text:p>
          </table:table-cell>
          <table:table-cell table:formula="of:=[.D132]-[.D13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41" office:value-type="float" office:value="5371" calcext:value-type="float">
            <text:p>5371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621643518518519" calcext:value-type="float">
            <text:p>0,00062164351851851900</text:p>
          </table:table-cell>
          <table:table-cell table:formula="of:=[.D133]-[.D132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41" office:value-type="float" office:value="5412" calcext:value-type="float">
            <text:p>541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626388888888889" calcext:value-type="float">
            <text:p>0,00062638888888888900</text:p>
          </table:table-cell>
          <table:table-cell table:formula="of:=[.D134]-[.D13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41" office:value-type="float" office:value="5453" calcext:value-type="float">
            <text:p>5453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631134259259259" calcext:value-type="float">
            <text:p>0,00063113425925925900</text:p>
          </table:table-cell>
          <table:table-cell table:formula="of:=[.D135]-[.D13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41" office:value-type="float" office:value="5494" calcext:value-type="float">
            <text:p>549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63587962962963" calcext:value-type="float">
            <text:p>0,00063587962962963000</text:p>
          </table:table-cell>
          <table:table-cell table:formula="of:=[.D136]-[.D13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41" office:value-type="float" office:value="5535" calcext:value-type="float">
            <text:p>553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640625" calcext:value-type="float">
            <text:p>0,00064062500000000000</text:p>
          </table:table-cell>
          <table:table-cell table:formula="of:=[.D137]-[.D136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41" office:value-type="float" office:value="5576" calcext:value-type="float">
            <text:p>557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64537037037037" calcext:value-type="float">
            <text:p>0,00064537037037037000</text:p>
          </table:table-cell>
          <table:table-cell table:formula="of:=[.D138]-[.D13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41" office:value-type="float" office:value="5617" calcext:value-type="float">
            <text:p>5617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650115740740741" calcext:value-type="float">
            <text:p>0,00065011574074074100</text:p>
          </table:table-cell>
          <table:table-cell table:formula="of:=[.D139]-[.D13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41" office:value-type="float" office:value="5658" calcext:value-type="float">
            <text:p>565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654861111111111" calcext:value-type="float">
            <text:p>0,00065486111111111100</text:p>
          </table:table-cell>
          <table:table-cell table:formula="of:=[.D140]-[.D139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41" office:value-type="float" office:value="5699" calcext:value-type="float">
            <text:p>5699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659606481481482" calcext:value-type="float">
            <text:p>0,00065960648148148200</text:p>
          </table:table-cell>
          <table:table-cell table:formula="of:=[.D141]-[.D140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41" office:value-type="float" office:value="5740" calcext:value-type="float">
            <text:p>57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664351851851852" calcext:value-type="float">
            <text:p>0,00066435185185185200</text:p>
          </table:table-cell>
          <table:table-cell table:formula="of:=[.D142]-[.D141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41" office:value-type="float" office:value="5781" calcext:value-type="float">
            <text:p>5781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669097222222222" calcext:value-type="float">
            <text:p>0,00066909722222222200</text:p>
          </table:table-cell>
          <table:table-cell table:formula="of:=[.D143]-[.D14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41" office:value-type="float" office:value="5822" calcext:value-type="float">
            <text:p>582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673842592592593" calcext:value-type="float">
            <text:p>0,00067384259259259300</text:p>
          </table:table-cell>
          <table:table-cell table:formula="of:=[.D144]-[.D14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41" office:value-type="float" office:value="5863" calcext:value-type="float">
            <text:p>5863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678587962962963" calcext:value-type="float">
            <text:p>0,00067858796296296300</text:p>
          </table:table-cell>
          <table:table-cell table:formula="of:=[.D145]-[.D14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41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683333333333333" calcext:value-type="float">
            <text:p>0,00068333333333333300</text:p>
          </table:table-cell>
          <table:table-cell table:formula="of:=[.D146]-[.D14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41" office:value-type="float" office:value="5945" calcext:value-type="float">
            <text:p>594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688078703703704" calcext:value-type="float">
            <text:p>0,00068807870370370400</text:p>
          </table:table-cell>
          <table:table-cell table:formula="of:=[.D147]-[.D14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41" office:value-type="float" office:value="5986" calcext:value-type="float">
            <text:p>598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692824074074074" calcext:value-type="float">
            <text:p>0,00069282407407407400</text:p>
          </table:table-cell>
          <table:table-cell table:formula="of:=[.D148]-[.D14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41" office:value-type="float" office:value="6027" calcext:value-type="float">
            <text:p>6027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697569444444445" calcext:value-type="float">
            <text:p>0,00069756944444444500</text:p>
          </table:table-cell>
          <table:table-cell table:formula="of:=[.D149]-[.D148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41" office:value-type="float" office:value="6068" calcext:value-type="float">
            <text:p>606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702314814814815" calcext:value-type="float">
            <text:p>0,00070231481481481500</text:p>
          </table:table-cell>
          <table:table-cell table:formula="of:=[.D150]-[.D149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41" office:value-type="float" office:value="6109" calcext:value-type="float">
            <text:p>6109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707060185185185" calcext:value-type="float">
            <text:p>0,00070706018518518500</text:p>
          </table:table-cell>
          <table:table-cell table:formula="of:=[.D151]-[.D15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41" office:value-type="float" office:value="6150" calcext:value-type="float">
            <text:p>61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711805555555556" calcext:value-type="float">
            <text:p>0,00071180555555555600</text:p>
          </table:table-cell>
          <table:table-cell table:formula="of:=[.D152]-[.D151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41" office:value-type="float" office:value="6191" calcext:value-type="float">
            <text:p>6191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716550925925926" calcext:value-type="float">
            <text:p>0,00071655092592592600</text:p>
          </table:table-cell>
          <table:table-cell table:formula="of:=[.D153]-[.D152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41" office:value-type="float" office:value="6232" calcext:value-type="float">
            <text:p>623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721296296296296" calcext:value-type="float">
            <text:p>0,00072129629629629600</text:p>
          </table:table-cell>
          <table:table-cell table:formula="of:=[.D154]-[.D15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41" office:value-type="float" office:value="6273" calcext:value-type="float">
            <text:p>6273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726041666666667" calcext:value-type="float">
            <text:p>0,00072604166666666700</text:p>
          </table:table-cell>
          <table:table-cell table:formula="of:=[.D155]-[.D15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41" office:value-type="float" office:value="6314" calcext:value-type="float">
            <text:p>631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730787037037037" calcext:value-type="float">
            <text:p>0,00073078703703703700</text:p>
          </table:table-cell>
          <table:table-cell table:formula="of:=[.D156]-[.D15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41" office:value-type="float" office:value="6355" calcext:value-type="float">
            <text:p>635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735532407407407" calcext:value-type="float">
            <text:p>0,00073553240740740700</text:p>
          </table:table-cell>
          <table:table-cell table:formula="of:=[.D157]-[.D156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41" office:value-type="float" office:value="6396" calcext:value-type="float">
            <text:p>639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740277777777778" calcext:value-type="float">
            <text:p>0,00074027777777777800</text:p>
          </table:table-cell>
          <table:table-cell table:formula="of:=[.D158]-[.D15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41" office:value-type="float" office:value="6437" calcext:value-type="float">
            <text:p>6437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745023148148148" calcext:value-type="float">
            <text:p>0,00074502314814814800</text:p>
          </table:table-cell>
          <table:table-cell table:formula="of:=[.D159]-[.D158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41" office:value-type="float" office:value="6478" calcext:value-type="float">
            <text:p>647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749768518518519" calcext:value-type="float">
            <text:p>0,00074976851851851900</text:p>
          </table:table-cell>
          <table:table-cell table:formula="of:=[.D160]-[.D159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41" office:value-type="float" office:value="6519" calcext:value-type="float">
            <text:p>6519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754513888888889" calcext:value-type="float">
            <text:p>0,00075451388888888900</text:p>
          </table:table-cell>
          <table:table-cell table:formula="of:=[.D161]-[.D160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41" office:value-type="float" office:value="6560" calcext:value-type="float">
            <text:p>65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759259259259259" calcext:value-type="float">
            <text:p>0,00075925925925925900</text:p>
          </table:table-cell>
          <table:table-cell table:formula="of:=[.D162]-[.D16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41" office:value-type="float" office:value="6601" calcext:value-type="float">
            <text:p>6601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76400462962963" calcext:value-type="float">
            <text:p>0,00076400462962963000</text:p>
          </table:table-cell>
          <table:table-cell table:formula="of:=[.D163]-[.D162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41" office:value-type="float" office:value="6642" calcext:value-type="float">
            <text:p>664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76875" calcext:value-type="float">
            <text:p>0,00076875000000000000</text:p>
          </table:table-cell>
          <table:table-cell table:formula="of:=[.D164]-[.D16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41" office:value-type="float" office:value="6683" calcext:value-type="float">
            <text:p>6683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77349537037037" calcext:value-type="float">
            <text:p>0,00077349537037037000</text:p>
          </table:table-cell>
          <table:table-cell table:formula="of:=[.D165]-[.D16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41" office:value-type="float" office:value="6724" calcext:value-type="float">
            <text:p>672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778240740740741" calcext:value-type="float">
            <text:p>0,00077824074074074100</text:p>
          </table:table-cell>
          <table:table-cell table:formula="of:=[.D166]-[.D16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41" office:value-type="float" office:value="6765" calcext:value-type="float">
            <text:p>676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782986111111111" calcext:value-type="float">
            <text:p>0,00078298611111111100</text:p>
          </table:table-cell>
          <table:table-cell table:formula="of:=[.D167]-[.D166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41" office:value-type="float" office:value="6806" calcext:value-type="float">
            <text:p>680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787731481481482" calcext:value-type="float">
            <text:p>0,00078773148148148200</text:p>
          </table:table-cell>
          <table:table-cell table:formula="of:=[.D168]-[.D16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41" office:value-type="float" office:value="6847" calcext:value-type="float">
            <text:p>6847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792476851851852" calcext:value-type="float">
            <text:p>0,00079247685185185200</text:p>
          </table:table-cell>
          <table:table-cell table:formula="of:=[.D169]-[.D168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41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797222222222222" calcext:value-type="float">
            <text:p>0,00079722222222222200</text:p>
          </table:table-cell>
          <table:table-cell table:formula="of:=[.D170]-[.D16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41" office:value-type="float" office:value="6929" calcext:value-type="float">
            <text:p>6929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801967592592593" calcext:value-type="float">
            <text:p>0,00080196759259259300</text:p>
          </table:table-cell>
          <table:table-cell table:formula="of:=[.D171]-[.D170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41" office:value-type="float" office:value="6970" calcext:value-type="float">
            <text:p>697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806712962962963" calcext:value-type="float">
            <text:p>0,00080671296296296300</text:p>
          </table:table-cell>
          <table:table-cell table:formula="of:=[.D172]-[.D171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41" office:value-type="float" office:value="7011" calcext:value-type="float">
            <text:p>7011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811458333333333" calcext:value-type="float">
            <text:p>0,00081145833333333300</text:p>
          </table:table-cell>
          <table:table-cell table:formula="of:=[.D173]-[.D17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41" office:value-type="float" office:value="7052" calcext:value-type="float">
            <text:p>705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816203703703704" calcext:value-type="float">
            <text:p>0,00081620370370370400</text:p>
          </table:table-cell>
          <table:table-cell table:formula="of:=[.D174]-[.D17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41" office:value-type="float" office:value="7093" calcext:value-type="float">
            <text:p>7093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820949074074074" calcext:value-type="float">
            <text:p>0,00082094907407407400</text:p>
          </table:table-cell>
          <table:table-cell table:formula="of:=[.D175]-[.D17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41" office:value-type="float" office:value="7134" calcext:value-type="float">
            <text:p>713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825694444444444" calcext:value-type="float">
            <text:p>0,00082569444444444400</text:p>
          </table:table-cell>
          <table:table-cell table:formula="of:=[.D176]-[.D17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41" office:value-type="float" office:value="7175" calcext:value-type="float">
            <text:p>71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830439814814815" calcext:value-type="float">
            <text:p>0,00083043981481481500</text:p>
          </table:table-cell>
          <table:table-cell table:formula="of:=[.D177]-[.D17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41" office:value-type="float" office:value="7216" calcext:value-type="float">
            <text:p>721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835185185185185" calcext:value-type="float">
            <text:p>0,00083518518518518500</text:p>
          </table:table-cell>
          <table:table-cell table:formula="of:=[.D178]-[.D17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41" office:value-type="float" office:value="7257" calcext:value-type="float">
            <text:p>7257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839930555555556" calcext:value-type="float">
            <text:p>0,00083993055555555600</text:p>
          </table:table-cell>
          <table:table-cell table:formula="of:=[.D179]-[.D178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41" office:value-type="float" office:value="7298" calcext:value-type="float">
            <text:p>729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844675925925926" calcext:value-type="float">
            <text:p>0,00084467592592592600</text:p>
          </table:table-cell>
          <table:table-cell table:formula="of:=[.D180]-[.D179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41" office:value-type="float" office:value="7339" calcext:value-type="float">
            <text:p>7339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849421296296296" calcext:value-type="float">
            <text:p>0,00084942129629629600</text:p>
          </table:table-cell>
          <table:table-cell table:formula="of:=[.D181]-[.D18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41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854166666666667" calcext:value-type="float">
            <text:p>0,00085416666666666700</text:p>
          </table:table-cell>
          <table:table-cell table:formula="of:=[.D182]-[.D181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41" office:value-type="float" office:value="7421" calcext:value-type="float">
            <text:p>7421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858912037037037" calcext:value-type="float">
            <text:p>0,00085891203703703700</text:p>
          </table:table-cell>
          <table:table-cell table:formula="of:=[.D183]-[.D182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41" office:value-type="float" office:value="7462" calcext:value-type="float">
            <text:p>746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863657407407407" calcext:value-type="float">
            <text:p>0,00086365740740740700</text:p>
          </table:table-cell>
          <table:table-cell table:formula="of:=[.D184]-[.D18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41" office:value-type="float" office:value="7503" calcext:value-type="float">
            <text:p>7503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868402777777778" calcext:value-type="float">
            <text:p>0,00086840277777777800</text:p>
          </table:table-cell>
          <table:table-cell table:formula="of:=[.D185]-[.D18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41" office:value-type="float" office:value="7544" calcext:value-type="float">
            <text:p>754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873148148148148" calcext:value-type="float">
            <text:p>0,00087314814814814800</text:p>
          </table:table-cell>
          <table:table-cell table:formula="of:=[.D186]-[.D18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41" office:value-type="float" office:value="7585" calcext:value-type="float">
            <text:p>758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877893518518519" calcext:value-type="float">
            <text:p>0,00087789351851851900</text:p>
          </table:table-cell>
          <table:table-cell table:formula="of:=[.D187]-[.D186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41" office:value-type="float" office:value="7626" calcext:value-type="float">
            <text:p>762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882638888888889" calcext:value-type="float">
            <text:p>0,00088263888888888900</text:p>
          </table:table-cell>
          <table:table-cell table:formula="of:=[.D188]-[.D18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41" office:value-type="float" office:value="7667" calcext:value-type="float">
            <text:p>7667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887384259259259" calcext:value-type="float">
            <text:p>0,00088738425925925900</text:p>
          </table:table-cell>
          <table:table-cell table:formula="of:=[.D189]-[.D188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41" office:value-type="float" office:value="7708" calcext:value-type="float">
            <text:p>770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89212962962963" calcext:value-type="float">
            <text:p>0,00089212962962963000</text:p>
          </table:table-cell>
          <table:table-cell table:formula="of:=[.D190]-[.D189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41" office:value-type="float" office:value="7749" calcext:value-type="float">
            <text:p>7749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896875" calcext:value-type="float">
            <text:p>0,00089687500000000000</text:p>
          </table:table-cell>
          <table:table-cell table:formula="of:=[.D191]-[.D190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41" office:value-type="float" office:value="7790" calcext:value-type="float">
            <text:p>779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90162037037037" calcext:value-type="float">
            <text:p>0,00090162037037037000</text:p>
          </table:table-cell>
          <table:table-cell table:formula="of:=[.D192]-[.D19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41" office:value-type="float" office:value="7831" calcext:value-type="float">
            <text:p>7831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906365740740741" calcext:value-type="float">
            <text:p>0,00090636574074074100</text:p>
          </table:table-cell>
          <table:table-cell table:formula="of:=[.D193]-[.D192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41" office:value-type="float" office:value="7872" calcext:value-type="float">
            <text:p>787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911111111111111" calcext:value-type="float">
            <text:p>0,00091111111111111100</text:p>
          </table:table-cell>
          <table:table-cell table:formula="of:=[.D194]-[.D193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41" office:value-type="float" office:value="7913" calcext:value-type="float">
            <text:p>7913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915856481481482" calcext:value-type="float">
            <text:p>0,00091585648148148200</text:p>
          </table:table-cell>
          <table:table-cell table:formula="of:=[.D195]-[.D19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41" office:value-type="float" office:value="7954" calcext:value-type="float">
            <text:p>795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920601851851852" calcext:value-type="float">
            <text:p>0,00092060185185185200</text:p>
          </table:table-cell>
          <table:table-cell table:formula="of:=[.D196]-[.D19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41" office:value-type="float" office:value="7995" calcext:value-type="float">
            <text:p>799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925347222222222" calcext:value-type="float">
            <text:p>0,00092534722222222200</text:p>
          </table:table-cell>
          <table:table-cell table:formula="of:=[.D197]-[.D196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41" office:value-type="float" office:value="8036" calcext:value-type="float">
            <text:p>803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930092592592593" calcext:value-type="float">
            <text:p>0,00093009259259259300</text:p>
          </table:table-cell>
          <table:table-cell table:formula="of:=[.D198]-[.D197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41" office:value-type="float" office:value="8077" calcext:value-type="float">
            <text:p>8077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934837962962963" calcext:value-type="float">
            <text:p>0,00093483796296296300</text:p>
          </table:table-cell>
          <table:table-cell table:formula="of:=[.D199]-[.D198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41" office:value-type="float" office:value="8118" calcext:value-type="float">
            <text:p>811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939583333333333" calcext:value-type="float">
            <text:p>0,00093958333333333300</text:p>
          </table:table-cell>
          <table:table-cell table:formula="of:=[.D200]-[.D19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41" office:value-type="float" office:value="8159" calcext:value-type="float">
            <text:p>8159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944328703703704" calcext:value-type="float">
            <text:p>0,00094432870370370400</text:p>
          </table:table-cell>
          <table:table-cell table:formula="of:=[.D201]-[.D200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41" office:value-type="float" office:value="8200" calcext:value-type="float">
            <text:p>8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949074074074074" calcext:value-type="float">
            <text:p>0,00094907407407407400</text:p>
          </table:table-cell>
          <table:table-cell table:formula="of:=[.D202]-[.D201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41" office:value-type="float" office:value="8241" calcext:value-type="float">
            <text:p>8241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953819444444444" calcext:value-type="float">
            <text:p>0,00095381944444444500</text:p>
          </table:table-cell>
          <table:table-cell table:formula="of:=[.D203]-[.D202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41" office:value-type="float" office:value="8282" calcext:value-type="float">
            <text:p>828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958564814814815" calcext:value-type="float">
            <text:p>0,00095856481481481500</text:p>
          </table:table-cell>
          <table:table-cell table:formula="of:=[.D204]-[.D20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41" office:value-type="float" office:value="8323" calcext:value-type="float">
            <text:p>8323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963310185185185" calcext:value-type="float">
            <text:p>0,00096331018518518500</text:p>
          </table:table-cell>
          <table:table-cell table:formula="of:=[.D205]-[.D204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41" office:value-type="float" office:value="8364" calcext:value-type="float">
            <text:p>836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968055555555556" calcext:value-type="float">
            <text:p>0,00096805555555555600</text:p>
          </table:table-cell>
          <table:table-cell table:formula="of:=[.D206]-[.D205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41" office:value-type="float" office:value="8405" calcext:value-type="float">
            <text:p>840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972800925925926" calcext:value-type="float">
            <text:p>0,00097280092592592600</text:p>
          </table:table-cell>
          <table:table-cell table:formula="of:=[.D207]-[.D206]" office:value-type="float" office:value="0.00000474537037037034" calcext:value-type="float">
            <text:p>0,000004745370370370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41" office:value-type="float" office:value="8446" calcext:value-type="float">
            <text:p>844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977546296296296" calcext:value-type="float">
            <text:p>0,00097754629629629600</text:p>
          </table:table-cell>
          <table:table-cell table:formula="of:=[.D208]-[.D20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41" office:value-type="float" office:value="8487" calcext:value-type="float">
            <text:p>8487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982291666666667" calcext:value-type="float">
            <text:p>0,00098229166666666700</text:p>
          </table:table-cell>
          <table:table-cell table:formula="of:=[.D209]-[.D20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41" office:value-type="float" office:value="8528" calcext:value-type="float">
            <text:p>852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987037037037037" calcext:value-type="float">
            <text:p>0,00098703703703703700</text:p>
          </table:table-cell>
          <table:table-cell table:formula="of:=[.D210]-[.D20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41" office:value-type="float" office:value="8569" calcext:value-type="float">
            <text:p>8569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991782407407407" calcext:value-type="float">
            <text:p>0,00099178240740740700</text:p>
          </table:table-cell>
          <table:table-cell table:formula="of:=[.D211]-[.D21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41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996527777777778" calcext:value-type="float">
            <text:p>0,00099652777777777800</text:p>
          </table:table-cell>
          <table:table-cell table:formula="of:=[.D212]-[.D21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41" office:value-type="float" office:value="8651" calcext:value-type="float">
            <text:p>8651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00127314814815" calcext:value-type="float">
            <text:p>0,00100127314814815000</text:p>
          </table:table-cell>
          <table:table-cell table:formula="of:=[.D213]-[.D21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41" office:value-type="float" office:value="8692" calcext:value-type="float">
            <text:p>869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00601851851852" calcext:value-type="float">
            <text:p>0,00100601851851852000</text:p>
          </table:table-cell>
          <table:table-cell table:formula="of:=[.D214]-[.D21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41" office:value-type="float" office:value="8733" calcext:value-type="float">
            <text:p>8733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01076388888889" calcext:value-type="float">
            <text:p>0,00101076388888889000</text:p>
          </table:table-cell>
          <table:table-cell table:formula="of:=[.D215]-[.D21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41" office:value-type="float" office:value="8774" calcext:value-type="float">
            <text:p>877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01550925925926" calcext:value-type="float">
            <text:p>0,00101550925925926000</text:p>
          </table:table-cell>
          <table:table-cell table:formula="of:=[.D216]-[.D21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41" office:value-type="float" office:value="8815" calcext:value-type="float">
            <text:p>881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02025462962963" calcext:value-type="float">
            <text:p>0,00102025462962963000</text:p>
          </table:table-cell>
          <table:table-cell table:formula="of:=[.D217]-[.D21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41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025" calcext:value-type="float">
            <text:p>0,00102500000000000000</text:p>
          </table:table-cell>
          <table:table-cell table:formula="of:=[.D218]-[.D21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41" office:value-type="float" office:value="8897" calcext:value-type="float">
            <text:p>8897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02974537037037" calcext:value-type="float">
            <text:p>0,00102974537037037000</text:p>
          </table:table-cell>
          <table:table-cell table:formula="of:=[.D219]-[.D21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41" office:value-type="float" office:value="8938" calcext:value-type="float">
            <text:p>893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03449074074074" calcext:value-type="float">
            <text:p>0,00103449074074074000</text:p>
          </table:table-cell>
          <table:table-cell table:formula="of:=[.D220]-[.D21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41" office:value-type="float" office:value="8979" calcext:value-type="float">
            <text:p>8979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03923611111111" calcext:value-type="float">
            <text:p>0,00103923611111111000</text:p>
          </table:table-cell>
          <table:table-cell table:formula="of:=[.D221]-[.D22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41" office:value-type="float" office:value="9020" calcext:value-type="float">
            <text:p>90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04398148148148" calcext:value-type="float">
            <text:p>0,00104398148148148000</text:p>
          </table:table-cell>
          <table:table-cell table:formula="of:=[.D222]-[.D22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41" office:value-type="float" office:value="9061" calcext:value-type="float">
            <text:p>9061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04872685185185" calcext:value-type="float">
            <text:p>0,00104872685185185000</text:p>
          </table:table-cell>
          <table:table-cell table:formula="of:=[.D223]-[.D22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41" office:value-type="float" office:value="9102" calcext:value-type="float">
            <text:p>910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05347222222222" calcext:value-type="float">
            <text:p>0,00105347222222222000</text:p>
          </table:table-cell>
          <table:table-cell table:formula="of:=[.D224]-[.D22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41" office:value-type="float" office:value="9143" calcext:value-type="float">
            <text:p>9143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05821759259259" calcext:value-type="float">
            <text:p>0,00105821759259259000</text:p>
          </table:table-cell>
          <table:table-cell table:formula="of:=[.D225]-[.D22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41" office:value-type="float" office:value="9184" calcext:value-type="float">
            <text:p>918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06296296296296" calcext:value-type="float">
            <text:p>0,00106296296296296000</text:p>
          </table:table-cell>
          <table:table-cell table:formula="of:=[.D226]-[.D22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41" office:value-type="float" office:value="9225" calcext:value-type="float">
            <text:p>92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06770833333333" calcext:value-type="float">
            <text:p>0,00106770833333333000</text:p>
          </table:table-cell>
          <table:table-cell table:formula="of:=[.D227]-[.D22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41" office:value-type="float" office:value="9266" calcext:value-type="float">
            <text:p>926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0724537037037" calcext:value-type="float">
            <text:p>0,00107245370370370000</text:p>
          </table:table-cell>
          <table:table-cell table:formula="of:=[.D228]-[.D22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41" office:value-type="float" office:value="9307" calcext:value-type="float">
            <text:p>9307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07719907407407" calcext:value-type="float">
            <text:p>0,00107719907407407000</text:p>
          </table:table-cell>
          <table:table-cell table:formula="of:=[.D229]-[.D22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41" office:value-type="float" office:value="9348" calcext:value-type="float">
            <text:p>934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08194444444444" calcext:value-type="float">
            <text:p>0,00108194444444444000</text:p>
          </table:table-cell>
          <table:table-cell table:formula="of:=[.D230]-[.D22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41" office:value-type="float" office:value="9389" calcext:value-type="float">
            <text:p>9389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08668981481481" calcext:value-type="float">
            <text:p>0,00108668981481481000</text:p>
          </table:table-cell>
          <table:table-cell table:formula="of:=[.D231]-[.D23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41" office:value-type="float" office:value="9430" calcext:value-type="float">
            <text:p>943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09143518518519" calcext:value-type="float">
            <text:p>0,00109143518518519000</text:p>
          </table:table-cell>
          <table:table-cell table:formula="of:=[.D232]-[.D23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41" office:value-type="float" office:value="9471" calcext:value-type="float">
            <text:p>9471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09618055555556" calcext:value-type="float">
            <text:p>0,00109618055555556000</text:p>
          </table:table-cell>
          <table:table-cell table:formula="of:=[.D233]-[.D23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41" office:value-type="float" office:value="9512" calcext:value-type="float">
            <text:p>951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10092592592593" calcext:value-type="float">
            <text:p>0,00110092592592593000</text:p>
          </table:table-cell>
          <table:table-cell table:formula="of:=[.D234]-[.D23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41" office:value-type="float" office:value="9553" calcext:value-type="float">
            <text:p>9553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1056712962963" calcext:value-type="float">
            <text:p>0,00110567129629630000</text:p>
          </table:table-cell>
          <table:table-cell table:formula="of:=[.D235]-[.D23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41" office:value-type="float" office:value="9594" calcext:value-type="float">
            <text:p>959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11041666666667" calcext:value-type="float">
            <text:p>0,00111041666666667000</text:p>
          </table:table-cell>
          <table:table-cell table:formula="of:=[.D236]-[.D23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41" office:value-type="float" office:value="9635" calcext:value-type="float">
            <text:p>963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11516203703704" calcext:value-type="float">
            <text:p>0,00111516203703704000</text:p>
          </table:table-cell>
          <table:table-cell table:formula="of:=[.D237]-[.D23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41" office:value-type="float" office:value="9676" calcext:value-type="float">
            <text:p>967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11990740740741" calcext:value-type="float">
            <text:p>0,00111990740740741000</text:p>
          </table:table-cell>
          <table:table-cell table:formula="of:=[.D238]-[.D23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41" office:value-type="float" office:value="9717" calcext:value-type="float">
            <text:p>9717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12465277777778" calcext:value-type="float">
            <text:p>0,00112465277777778000</text:p>
          </table:table-cell>
          <table:table-cell table:formula="of:=[.D239]-[.D23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41" office:value-type="float" office:value="9758" calcext:value-type="float">
            <text:p>975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12939814814815" calcext:value-type="float">
            <text:p>0,00112939814814815000</text:p>
          </table:table-cell>
          <table:table-cell table:formula="of:=[.D240]-[.D23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41" office:value-type="float" office:value="9799" calcext:value-type="float">
            <text:p>9799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13414351851852" calcext:value-type="float">
            <text:p>0,00113414351851852000</text:p>
          </table:table-cell>
          <table:table-cell table:formula="of:=[.D241]-[.D24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41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13888888888889" calcext:value-type="float">
            <text:p>0,00113888888888889000</text:p>
          </table:table-cell>
          <table:table-cell table:formula="of:=[.D242]-[.D24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41" office:value-type="float" office:value="9881" calcext:value-type="float">
            <text:p>9881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14363425925926" calcext:value-type="float">
            <text:p>0,00114363425925926000</text:p>
          </table:table-cell>
          <table:table-cell table:formula="of:=[.D243]-[.D24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41" office:value-type="float" office:value="9922" calcext:value-type="float">
            <text:p>992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14837962962963" calcext:value-type="float">
            <text:p>0,00114837962962963000</text:p>
          </table:table-cell>
          <table:table-cell table:formula="of:=[.D244]-[.D24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41" office:value-type="float" office:value="9963" calcext:value-type="float">
            <text:p>9963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153125" calcext:value-type="float">
            <text:p>0,00115312500000000000</text:p>
          </table:table-cell>
          <table:table-cell table:formula="of:=[.D245]-[.D24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41" office:value-type="float" office:value="10004" calcext:value-type="float">
            <text:p>1000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15787037037037" calcext:value-type="float">
            <text:p>0,00115787037037037000</text:p>
          </table:table-cell>
          <table:table-cell table:formula="of:=[.D246]-[.D24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41" office:value-type="float" office:value="10045" calcext:value-type="float">
            <text:p>1004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16261574074074" calcext:value-type="float">
            <text:p>0,00116261574074074000</text:p>
          </table:table-cell>
          <table:table-cell table:formula="of:=[.D247]-[.D24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41" office:value-type="float" office:value="10086" calcext:value-type="float">
            <text:p>1008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16736111111111" calcext:value-type="float">
            <text:p>0,00116736111111111000</text:p>
          </table:table-cell>
          <table:table-cell table:formula="of:=[.D248]-[.D24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41" office:value-type="float" office:value="10127" calcext:value-type="float">
            <text:p>10127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17210648148148" calcext:value-type="float">
            <text:p>0,00117210648148148000</text:p>
          </table:table-cell>
          <table:table-cell table:formula="of:=[.D249]-[.D24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41" office:value-type="float" office:value="10168" calcext:value-type="float">
            <text:p>1016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17685185185185" calcext:value-type="float">
            <text:p>0,00117685185185185000</text:p>
          </table:table-cell>
          <table:table-cell table:formula="of:=[.D250]-[.D24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41" office:value-type="float" office:value="10209" calcext:value-type="float">
            <text:p>10209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18159722222222" calcext:value-type="float">
            <text:p>0,00118159722222222000</text:p>
          </table:table-cell>
          <table:table-cell table:formula="of:=[.D251]-[.D25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41" office:value-type="float" office:value="10250" calcext:value-type="float">
            <text:p>10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18634259259259" calcext:value-type="float">
            <text:p>0,00118634259259259000</text:p>
          </table:table-cell>
          <table:table-cell table:formula="of:=[.D252]-[.D25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41" office:value-type="float" office:value="10291" calcext:value-type="float">
            <text:p>10291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19108796296296" calcext:value-type="float">
            <text:p>0,00119108796296296000</text:p>
          </table:table-cell>
          <table:table-cell table:formula="of:=[.D253]-[.D25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41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19583333333333" calcext:value-type="float">
            <text:p>0,00119583333333333000</text:p>
          </table:table-cell>
          <table:table-cell table:formula="of:=[.D254]-[.D25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41" office:value-type="float" office:value="10373" calcext:value-type="float">
            <text:p>10373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2005787037037" calcext:value-type="float">
            <text:p>0,00120057870370370000</text:p>
          </table:table-cell>
          <table:table-cell table:formula="of:=[.D255]-[.D25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41" office:value-type="float" office:value="10414" calcext:value-type="float">
            <text:p>1041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20532407407407" calcext:value-type="float">
            <text:p>0,00120532407407407000</text:p>
          </table:table-cell>
          <table:table-cell table:formula="of:=[.D256]-[.D25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41" office:value-type="float" office:value="10455" calcext:value-type="float">
            <text:p>1045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21006944444444" calcext:value-type="float">
            <text:p>0,00121006944444444000</text:p>
          </table:table-cell>
          <table:table-cell table:formula="of:=[.D257]-[.D25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41" office:value-type="float" office:value="10496" calcext:value-type="float">
            <text:p>1049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21481481481481" calcext:value-type="float">
            <text:p>0,00121481481481481000</text:p>
          </table:table-cell>
          <table:table-cell table:formula="of:=[.D258]-[.D25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41" office:value-type="float" office:value="10537" calcext:value-type="float">
            <text:p>10537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21956018518519" calcext:value-type="float">
            <text:p>0,00121956018518519000</text:p>
          </table:table-cell>
          <table:table-cell table:formula="of:=[.D259]-[.D25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41" office:value-type="float" office:value="10578" calcext:value-type="float">
            <text:p>1057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22430555555556" calcext:value-type="float">
            <text:p>0,00122430555555556000</text:p>
          </table:table-cell>
          <table:table-cell table:formula="of:=[.D260]-[.D25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41" office:value-type="float" office:value="10619" calcext:value-type="float">
            <text:p>10619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22905092592593" calcext:value-type="float">
            <text:p>0,00122905092592593000</text:p>
          </table:table-cell>
          <table:table-cell table:formula="of:=[.D261]-[.D26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41" office:value-type="float" office:value="10660" calcext:value-type="float">
            <text:p>106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2337962962963" calcext:value-type="float">
            <text:p>0,00123379629629630000</text:p>
          </table:table-cell>
          <table:table-cell table:formula="of:=[.D262]-[.D26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41" office:value-type="float" office:value="10701" calcext:value-type="float">
            <text:p>10701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23854166666667" calcext:value-type="float">
            <text:p>0,00123854166666667000</text:p>
          </table:table-cell>
          <table:table-cell table:formula="of:=[.D263]-[.D26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41" office:value-type="float" office:value="10742" calcext:value-type="float">
            <text:p>1074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24328703703704" calcext:value-type="float">
            <text:p>0,00124328703703704000</text:p>
          </table:table-cell>
          <table:table-cell table:formula="of:=[.D264]-[.D26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41" office:value-type="float" office:value="10783" calcext:value-type="float">
            <text:p>10783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24803240740741" calcext:value-type="float">
            <text:p>0,00124803240740741000</text:p>
          </table:table-cell>
          <table:table-cell table:formula="of:=[.D265]-[.D26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41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25277777777778" calcext:value-type="float">
            <text:p>0,00125277777777778000</text:p>
          </table:table-cell>
          <table:table-cell table:formula="of:=[.D266]-[.D26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41" office:value-type="float" office:value="10865" calcext:value-type="float">
            <text:p>1086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25752314814815" calcext:value-type="float">
            <text:p>0,00125752314814815000</text:p>
          </table:table-cell>
          <table:table-cell table:formula="of:=[.D267]-[.D26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41" office:value-type="float" office:value="10906" calcext:value-type="float">
            <text:p>1090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26226851851852" calcext:value-type="float">
            <text:p>0,00126226851851852000</text:p>
          </table:table-cell>
          <table:table-cell table:formula="of:=[.D268]-[.D26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41" office:value-type="float" office:value="10947" calcext:value-type="float">
            <text:p>10947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26701388888889" calcext:value-type="float">
            <text:p>0,00126701388888889000</text:p>
          </table:table-cell>
          <table:table-cell table:formula="of:=[.D269]-[.D26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41" office:value-type="float" office:value="10988" calcext:value-type="float">
            <text:p>1098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27175925925926" calcext:value-type="float">
            <text:p>0,00127175925925926000</text:p>
          </table:table-cell>
          <table:table-cell table:formula="of:=[.D270]-[.D26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41" office:value-type="float" office:value="11029" calcext:value-type="float">
            <text:p>11029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27650462962963" calcext:value-type="float">
            <text:p>0,00127650462962963000</text:p>
          </table:table-cell>
          <table:table-cell table:formula="of:=[.D271]-[.D27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41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28125" calcext:value-type="float">
            <text:p>0,00128125000000000000</text:p>
          </table:table-cell>
          <table:table-cell table:formula="of:=[.D272]-[.D27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41" office:value-type="float" office:value="11111" calcext:value-type="float">
            <text:p>11111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28599537037037" calcext:value-type="float">
            <text:p>0,00128599537037037000</text:p>
          </table:table-cell>
          <table:table-cell table:formula="of:=[.D273]-[.D27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41" office:value-type="float" office:value="11152" calcext:value-type="float">
            <text:p>1115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29074074074074" calcext:value-type="float">
            <text:p>0,00129074074074074000</text:p>
          </table:table-cell>
          <table:table-cell table:formula="of:=[.D274]-[.D27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41" office:value-type="float" office:value="11193" calcext:value-type="float">
            <text:p>11193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29548611111111" calcext:value-type="float">
            <text:p>0,00129548611111111000</text:p>
          </table:table-cell>
          <table:table-cell table:formula="of:=[.D275]-[.D27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41" office:value-type="float" office:value="11234" calcext:value-type="float">
            <text:p>1123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30023148148148" calcext:value-type="float">
            <text:p>0,00130023148148148000</text:p>
          </table:table-cell>
          <table:table-cell table:formula="of:=[.D276]-[.D27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41" office:value-type="float" office:value="11275" calcext:value-type="float">
            <text:p>112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30497685185185" calcext:value-type="float">
            <text:p>0,00130497685185185000</text:p>
          </table:table-cell>
          <table:table-cell table:formula="of:=[.D277]-[.D27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41" office:value-type="float" office:value="11316" calcext:value-type="float">
            <text:p>1131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30972222222222" calcext:value-type="float">
            <text:p>0,00130972222222222000</text:p>
          </table:table-cell>
          <table:table-cell table:formula="of:=[.D278]-[.D27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41" office:value-type="float" office:value="11357" calcext:value-type="float">
            <text:p>11357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31446759259259" calcext:value-type="float">
            <text:p>0,00131446759259259000</text:p>
          </table:table-cell>
          <table:table-cell table:formula="of:=[.D279]-[.D27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41" office:value-type="float" office:value="11398" calcext:value-type="float">
            <text:p>1139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31921296296296" calcext:value-type="float">
            <text:p>0,00131921296296296000</text:p>
          </table:table-cell>
          <table:table-cell table:formula="of:=[.D280]-[.D27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41" office:value-type="float" office:value="11439" calcext:value-type="float">
            <text:p>11439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32395833333333" calcext:value-type="float">
            <text:p>0,00132395833333333000</text:p>
          </table:table-cell>
          <table:table-cell table:formula="of:=[.D281]-[.D28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41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3287037037037" calcext:value-type="float">
            <text:p>0,00132870370370370000</text:p>
          </table:table-cell>
          <table:table-cell table:formula="of:=[.D282]-[.D28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41" office:value-type="float" office:value="11521" calcext:value-type="float">
            <text:p>11521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33344907407407" calcext:value-type="float">
            <text:p>0,00133344907407407000</text:p>
          </table:table-cell>
          <table:table-cell table:formula="of:=[.D283]-[.D28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41" office:value-type="float" office:value="11562" calcext:value-type="float">
            <text:p>1156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33819444444444" calcext:value-type="float">
            <text:p>0,00133819444444444000</text:p>
          </table:table-cell>
          <table:table-cell table:formula="of:=[.D284]-[.D28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41" office:value-type="float" office:value="11603" calcext:value-type="float">
            <text:p>11603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34293981481481" calcext:value-type="float">
            <text:p>0,00134293981481481000</text:p>
          </table:table-cell>
          <table:table-cell table:formula="of:=[.D285]-[.D28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41" office:value-type="float" office:value="11644" calcext:value-type="float">
            <text:p>1164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34768518518519" calcext:value-type="float">
            <text:p>0,00134768518518519000</text:p>
          </table:table-cell>
          <table:table-cell table:formula="of:=[.D286]-[.D28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41" office:value-type="float" office:value="11685" calcext:value-type="float">
            <text:p>1168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35243055555556" calcext:value-type="float">
            <text:p>0,00135243055555556000</text:p>
          </table:table-cell>
          <table:table-cell table:formula="of:=[.D287]-[.D28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41" office:value-type="float" office:value="11726" calcext:value-type="float">
            <text:p>1172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35717592592593" calcext:value-type="float">
            <text:p>0,00135717592592593000</text:p>
          </table:table-cell>
          <table:table-cell table:formula="of:=[.D288]-[.D28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41" office:value-type="float" office:value="11767" calcext:value-type="float">
            <text:p>11767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3619212962963" calcext:value-type="float">
            <text:p>0,00136192129629630000</text:p>
          </table:table-cell>
          <table:table-cell table:formula="of:=[.D289]-[.D28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41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36666666666667" calcext:value-type="float">
            <text:p>0,00136666666666667000</text:p>
          </table:table-cell>
          <table:table-cell table:formula="of:=[.D290]-[.D28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41" office:value-type="float" office:value="11849" calcext:value-type="float">
            <text:p>11849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37141203703704" calcext:value-type="float">
            <text:p>0,00137141203703704000</text:p>
          </table:table-cell>
          <table:table-cell table:formula="of:=[.D291]-[.D29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41" office:value-type="float" office:value="11890" calcext:value-type="float">
            <text:p>1189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37615740740741" calcext:value-type="float">
            <text:p>0,00137615740740741000</text:p>
          </table:table-cell>
          <table:table-cell table:formula="of:=[.D292]-[.D29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41" office:value-type="float" office:value="11931" calcext:value-type="float">
            <text:p>11931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38090277777778" calcext:value-type="float">
            <text:p>0,00138090277777778000</text:p>
          </table:table-cell>
          <table:table-cell table:formula="of:=[.D293]-[.D29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41" office:value-type="float" office:value="11972" calcext:value-type="float">
            <text:p>1197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38564814814815" calcext:value-type="float">
            <text:p>0,00138564814814815000</text:p>
          </table:table-cell>
          <table:table-cell table:formula="of:=[.D294]-[.D29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41" office:value-type="float" office:value="12013" calcext:value-type="float">
            <text:p>12013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39039351851852" calcext:value-type="float">
            <text:p>0,00139039351851852000</text:p>
          </table:table-cell>
          <table:table-cell table:formula="of:=[.D295]-[.D29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41" office:value-type="float" office:value="12054" calcext:value-type="float">
            <text:p>1205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39513888888889" calcext:value-type="float">
            <text:p>0,00139513888888889000</text:p>
          </table:table-cell>
          <table:table-cell table:formula="of:=[.D296]-[.D29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41" office:value-type="float" office:value="12095" calcext:value-type="float">
            <text:p>1209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39988425925926" calcext:value-type="float">
            <text:p>0,00139988425925926000</text:p>
          </table:table-cell>
          <table:table-cell table:formula="of:=[.D297]-[.D29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41" office:value-type="float" office:value="12136" calcext:value-type="float">
            <text:p>1213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40462962962963" calcext:value-type="float">
            <text:p>0,00140462962962963000</text:p>
          </table:table-cell>
          <table:table-cell table:formula="of:=[.D298]-[.D29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41" office:value-type="float" office:value="12177" calcext:value-type="float">
            <text:p>12177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409375" calcext:value-type="float">
            <text:p>0,00140937500000000000</text:p>
          </table:table-cell>
          <table:table-cell table:formula="of:=[.D299]-[.D29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41" office:value-type="float" office:value="12218" calcext:value-type="float">
            <text:p>1221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41412037037037" calcext:value-type="float">
            <text:p>0,00141412037037037000</text:p>
          </table:table-cell>
          <table:table-cell table:formula="of:=[.D300]-[.D29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41" office:value-type="float" office:value="12259" calcext:value-type="float">
            <text:p>12259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41886574074074" calcext:value-type="float">
            <text:p>0,00141886574074074000</text:p>
          </table:table-cell>
          <table:table-cell table:formula="of:=[.D301]-[.D30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41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42361111111111" calcext:value-type="float">
            <text:p>0,00142361111111111000</text:p>
          </table:table-cell>
          <table:table-cell table:formula="of:=[.D302]-[.D30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41" office:value-type="float" office:value="12341" calcext:value-type="float">
            <text:p>12341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42835648148148" calcext:value-type="float">
            <text:p>0,00142835648148148000</text:p>
          </table:table-cell>
          <table:table-cell table:formula="of:=[.D303]-[.D30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41" office:value-type="float" office:value="12382" calcext:value-type="float">
            <text:p>1238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43310185185185" calcext:value-type="float">
            <text:p>0,00143310185185185000</text:p>
          </table:table-cell>
          <table:table-cell table:formula="of:=[.D304]-[.D30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41" office:value-type="float" office:value="12423" calcext:value-type="float">
            <text:p>12423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43784722222222" calcext:value-type="float">
            <text:p>0,00143784722222222000</text:p>
          </table:table-cell>
          <table:table-cell table:formula="of:=[.D305]-[.D30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41" office:value-type="float" office:value="12464" calcext:value-type="float">
            <text:p>1246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44259259259259" calcext:value-type="float">
            <text:p>0,00144259259259259000</text:p>
          </table:table-cell>
          <table:table-cell table:formula="of:=[.D306]-[.D30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41" office:value-type="float" office:value="12505" calcext:value-type="float">
            <text:p>1250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44733796296296" calcext:value-type="float">
            <text:p>0,00144733796296296000</text:p>
          </table:table-cell>
          <table:table-cell table:formula="of:=[.D307]-[.D30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41" office:value-type="float" office:value="12546" calcext:value-type="float">
            <text:p>1254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45208333333333" calcext:value-type="float">
            <text:p>0,00145208333333333000</text:p>
          </table:table-cell>
          <table:table-cell table:formula="of:=[.D308]-[.D30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41" office:value-type="float" office:value="12587" calcext:value-type="float">
            <text:p>12587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4568287037037" calcext:value-type="float">
            <text:p>0,00145682870370370000</text:p>
          </table:table-cell>
          <table:table-cell table:formula="of:=[.D309]-[.D30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41" office:value-type="float" office:value="12628" calcext:value-type="float">
            <text:p>1262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46157407407407" calcext:value-type="float">
            <text:p>0,00146157407407407000</text:p>
          </table:table-cell>
          <table:table-cell table:formula="of:=[.D310]-[.D30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41" office:value-type="float" office:value="12669" calcext:value-type="float">
            <text:p>12669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46631944444444" calcext:value-type="float">
            <text:p>0,00146631944444444000</text:p>
          </table:table-cell>
          <table:table-cell table:formula="of:=[.D311]-[.D31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41" office:value-type="float" office:value="12710" calcext:value-type="float">
            <text:p>1271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47106481481481" calcext:value-type="float">
            <text:p>0,00147106481481481000</text:p>
          </table:table-cell>
          <table:table-cell table:formula="of:=[.D312]-[.D31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41" office:value-type="float" office:value="12751" calcext:value-type="float">
            <text:p>12751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47581018518519" calcext:value-type="float">
            <text:p>0,00147581018518519000</text:p>
          </table:table-cell>
          <table:table-cell table:formula="of:=[.D313]-[.D31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41" office:value-type="float" office:value="12792" calcext:value-type="float">
            <text:p>1279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48055555555556" calcext:value-type="float">
            <text:p>0,00148055555555556000</text:p>
          </table:table-cell>
          <table:table-cell table:formula="of:=[.D314]-[.D31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41" office:value-type="float" office:value="12833" calcext:value-type="float">
            <text:p>12833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48530092592593" calcext:value-type="float">
            <text:p>0,00148530092592593000</text:p>
          </table:table-cell>
          <table:table-cell table:formula="of:=[.D315]-[.D31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41" office:value-type="float" office:value="12874" calcext:value-type="float">
            <text:p>1287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4900462962963" calcext:value-type="float">
            <text:p>0,00149004629629630000</text:p>
          </table:table-cell>
          <table:table-cell table:formula="of:=[.D316]-[.D31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41" office:value-type="float" office:value="12915" calcext:value-type="float">
            <text:p>1291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49479166666667" calcext:value-type="float">
            <text:p>0,00149479166666667000</text:p>
          </table:table-cell>
          <table:table-cell table:formula="of:=[.D317]-[.D31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41" office:value-type="float" office:value="12956" calcext:value-type="float">
            <text:p>1295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49953703703704" calcext:value-type="float">
            <text:p>0,00149953703703704000</text:p>
          </table:table-cell>
          <table:table-cell table:formula="of:=[.D318]-[.D31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41" office:value-type="float" office:value="12997" calcext:value-type="float">
            <text:p>12997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50428240740741" calcext:value-type="float">
            <text:p>0,00150428240740741000</text:p>
          </table:table-cell>
          <table:table-cell table:formula="of:=[.D319]-[.D31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41" office:value-type="float" office:value="13038" calcext:value-type="float">
            <text:p>1303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50902777777778" calcext:value-type="float">
            <text:p>0,00150902777777778000</text:p>
          </table:table-cell>
          <table:table-cell table:formula="of:=[.D320]-[.D31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41" office:value-type="float" office:value="13079" calcext:value-type="float">
            <text:p>13079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51377314814815" calcext:value-type="float">
            <text:p>0,00151377314814815000</text:p>
          </table:table-cell>
          <table:table-cell table:formula="of:=[.D321]-[.D32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41" office:value-type="float" office:value="13120" calcext:value-type="float">
            <text:p>131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51851851851852" calcext:value-type="float">
            <text:p>0,00151851851851852000</text:p>
          </table:table-cell>
          <table:table-cell table:formula="of:=[.D322]-[.D32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41" office:value-type="float" office:value="13161" calcext:value-type="float">
            <text:p>13161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52326388888889" calcext:value-type="float">
            <text:p>0,00152326388888889000</text:p>
          </table:table-cell>
          <table:table-cell table:formula="of:=[.D323]-[.D32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41" office:value-type="float" office:value="13202" calcext:value-type="float">
            <text:p>1320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52800925925926" calcext:value-type="float">
            <text:p>0,00152800925925926000</text:p>
          </table:table-cell>
          <table:table-cell table:formula="of:=[.D324]-[.D32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41" office:value-type="float" office:value="13243" calcext:value-type="float">
            <text:p>13243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53275462962963" calcext:value-type="float">
            <text:p>0,00153275462962963000</text:p>
          </table:table-cell>
          <table:table-cell table:formula="of:=[.D325]-[.D32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41" office:value-type="float" office:value="13284" calcext:value-type="float">
            <text:p>1328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5375" calcext:value-type="float">
            <text:p>0,00153750000000000000</text:p>
          </table:table-cell>
          <table:table-cell table:formula="of:=[.D326]-[.D32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41" office:value-type="float" office:value="13325" calcext:value-type="float">
            <text:p>133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54224537037037" calcext:value-type="float">
            <text:p>0,00154224537037037000</text:p>
          </table:table-cell>
          <table:table-cell table:formula="of:=[.D327]-[.D32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41" office:value-type="float" office:value="13366" calcext:value-type="float">
            <text:p>1336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54699074074074" calcext:value-type="float">
            <text:p>0,00154699074074074000</text:p>
          </table:table-cell>
          <table:table-cell table:formula="of:=[.D328]-[.D32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41" office:value-type="float" office:value="13407" calcext:value-type="float">
            <text:p>13407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55173611111111" calcext:value-type="float">
            <text:p>0,00155173611111111000</text:p>
          </table:table-cell>
          <table:table-cell table:formula="of:=[.D329]-[.D32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41" office:value-type="float" office:value="13448" calcext:value-type="float">
            <text:p>1344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55648148148148" calcext:value-type="float">
            <text:p>0,00155648148148148000</text:p>
          </table:table-cell>
          <table:table-cell table:formula="of:=[.D330]-[.D32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41" office:value-type="float" office:value="13489" calcext:value-type="float">
            <text:p>13489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56122685185185" calcext:value-type="float">
            <text:p>0,00156122685185185000</text:p>
          </table:table-cell>
          <table:table-cell table:formula="of:=[.D331]-[.D33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41" office:value-type="float" office:value="13530" calcext:value-type="float">
            <text:p>1353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56597222222222" calcext:value-type="float">
            <text:p>0,00156597222222222000</text:p>
          </table:table-cell>
          <table:table-cell table:formula="of:=[.D332]-[.D33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41" office:value-type="float" office:value="13571" calcext:value-type="float">
            <text:p>13571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57071759259259" calcext:value-type="float">
            <text:p>0,00157071759259259000</text:p>
          </table:table-cell>
          <table:table-cell table:formula="of:=[.D333]-[.D33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41" office:value-type="float" office:value="13612" calcext:value-type="float">
            <text:p>1361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57546296296296" calcext:value-type="float">
            <text:p>0,00157546296296296000</text:p>
          </table:table-cell>
          <table:table-cell table:formula="of:=[.D334]-[.D33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41" office:value-type="float" office:value="13653" calcext:value-type="float">
            <text:p>13653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58020833333333" calcext:value-type="float">
            <text:p>0,00158020833333333000</text:p>
          </table:table-cell>
          <table:table-cell table:formula="of:=[.D335]-[.D33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41" office:value-type="float" office:value="13694" calcext:value-type="float">
            <text:p>1369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5849537037037" calcext:value-type="float">
            <text:p>0,00158495370370370000</text:p>
          </table:table-cell>
          <table:table-cell table:formula="of:=[.D336]-[.D33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41" office:value-type="float" office:value="13735" calcext:value-type="float">
            <text:p>1373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58969907407407" calcext:value-type="float">
            <text:p>0,00158969907407407000</text:p>
          </table:table-cell>
          <table:table-cell table:formula="of:=[.D337]-[.D33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41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59444444444444" calcext:value-type="float">
            <text:p>0,00159444444444444000</text:p>
          </table:table-cell>
          <table:table-cell table:formula="of:=[.D338]-[.D33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41" office:value-type="float" office:value="13817" calcext:value-type="float">
            <text:p>13817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59918981481481" calcext:value-type="float">
            <text:p>0,00159918981481481000</text:p>
          </table:table-cell>
          <table:table-cell table:formula="of:=[.D339]-[.D33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41" office:value-type="float" office:value="13858" calcext:value-type="float">
            <text:p>1385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60393518518519" calcext:value-type="float">
            <text:p>0,00160393518518519000</text:p>
          </table:table-cell>
          <table:table-cell table:formula="of:=[.D340]-[.D33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41" office:value-type="float" office:value="13899" calcext:value-type="float">
            <text:p>13899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60868055555556" calcext:value-type="float">
            <text:p>0,00160868055555556000</text:p>
          </table:table-cell>
          <table:table-cell table:formula="of:=[.D341]-[.D34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41" office:value-type="float" office:value="13940" calcext:value-type="float">
            <text:p>139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61342592592593" calcext:value-type="float">
            <text:p>0,00161342592592593000</text:p>
          </table:table-cell>
          <table:table-cell table:formula="of:=[.D342]-[.D34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41" office:value-type="float" office:value="13981" calcext:value-type="float">
            <text:p>13981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6181712962963" calcext:value-type="float">
            <text:p>0,00161817129629630000</text:p>
          </table:table-cell>
          <table:table-cell table:formula="of:=[.D343]-[.D34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41" office:value-type="float" office:value="14022" calcext:value-type="float">
            <text:p>1402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62291666666667" calcext:value-type="float">
            <text:p>0,00162291666666667000</text:p>
          </table:table-cell>
          <table:table-cell table:formula="of:=[.D344]-[.D34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41" office:value-type="float" office:value="14063" calcext:value-type="float">
            <text:p>14063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62766203703704" calcext:value-type="float">
            <text:p>0,00162766203703704000</text:p>
          </table:table-cell>
          <table:table-cell table:formula="of:=[.D345]-[.D34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41" office:value-type="float" office:value="14104" calcext:value-type="float">
            <text:p>1410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63240740740741" calcext:value-type="float">
            <text:p>0,00163240740740741000</text:p>
          </table:table-cell>
          <table:table-cell table:formula="of:=[.D346]-[.D34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41" office:value-type="float" office:value="14145" calcext:value-type="float">
            <text:p>1414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63715277777778" calcext:value-type="float">
            <text:p>0,00163715277777778000</text:p>
          </table:table-cell>
          <table:table-cell table:formula="of:=[.D347]-[.D34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41" office:value-type="float" office:value="14186" calcext:value-type="float">
            <text:p>1418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64189814814815" calcext:value-type="float">
            <text:p>0,00164189814814815000</text:p>
          </table:table-cell>
          <table:table-cell table:formula="of:=[.D348]-[.D34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41" office:value-type="float" office:value="14227" calcext:value-type="float">
            <text:p>14227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64664351851852" calcext:value-type="float">
            <text:p>0,00164664351851852000</text:p>
          </table:table-cell>
          <table:table-cell table:formula="of:=[.D349]-[.D34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41" office:value-type="float" office:value="14268" calcext:value-type="float">
            <text:p>1426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65138888888889" calcext:value-type="float">
            <text:p>0,00165138888888889000</text:p>
          </table:table-cell>
          <table:table-cell table:formula="of:=[.D350]-[.D34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41" office:value-type="float" office:value="14309" calcext:value-type="float">
            <text:p>14309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65613425925926" calcext:value-type="float">
            <text:p>0,00165613425925926000</text:p>
          </table:table-cell>
          <table:table-cell table:formula="of:=[.D351]-[.D35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41" office:value-type="float" office:value="14350" calcext:value-type="float">
            <text:p>143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66087962962963" calcext:value-type="float">
            <text:p>0,00166087962962963000</text:p>
          </table:table-cell>
          <table:table-cell table:formula="of:=[.D352]-[.D35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41" office:value-type="float" office:value="14391" calcext:value-type="float">
            <text:p>14391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665625" calcext:value-type="float">
            <text:p>0,00166562500000000000</text:p>
          </table:table-cell>
          <table:table-cell table:formula="of:=[.D353]-[.D35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41" office:value-type="float" office:value="14432" calcext:value-type="float">
            <text:p>1443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67037037037037" calcext:value-type="float">
            <text:p>0,00167037037037037000</text:p>
          </table:table-cell>
          <table:table-cell table:formula="of:=[.D354]-[.D35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41" office:value-type="float" office:value="14473" calcext:value-type="float">
            <text:p>14473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67511574074074" calcext:value-type="float">
            <text:p>0,00167511574074074000</text:p>
          </table:table-cell>
          <table:table-cell table:formula="of:=[.D355]-[.D35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41" office:value-type="float" office:value="14514" calcext:value-type="float">
            <text:p>1451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67986111111111" calcext:value-type="float">
            <text:p>0,00167986111111111000</text:p>
          </table:table-cell>
          <table:table-cell table:formula="of:=[.D356]-[.D35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41" office:value-type="float" office:value="14555" calcext:value-type="float">
            <text:p>1455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68460648148148" calcext:value-type="float">
            <text:p>0,00168460648148148000</text:p>
          </table:table-cell>
          <table:table-cell table:formula="of:=[.D357]-[.D35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41" office:value-type="float" office:value="14596" calcext:value-type="float">
            <text:p>1459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68935185185185" calcext:value-type="float">
            <text:p>0,00168935185185185000</text:p>
          </table:table-cell>
          <table:table-cell table:formula="of:=[.D358]-[.D35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41" office:value-type="float" office:value="14637" calcext:value-type="float">
            <text:p>14637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69409722222222" calcext:value-type="float">
            <text:p>0,00169409722222222000</text:p>
          </table:table-cell>
          <table:table-cell table:formula="of:=[.D359]-[.D35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41" office:value-type="float" office:value="14678" calcext:value-type="float">
            <text:p>1467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69884259259259" calcext:value-type="float">
            <text:p>0,00169884259259259000</text:p>
          </table:table-cell>
          <table:table-cell table:formula="of:=[.D360]-[.D35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41" office:value-type="float" office:value="14719" calcext:value-type="float">
            <text:p>14719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70358796296296" calcext:value-type="float">
            <text:p>0,00170358796296296000</text:p>
          </table:table-cell>
          <table:table-cell table:formula="of:=[.D361]-[.D36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41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70833333333333" calcext:value-type="float">
            <text:p>0,00170833333333333000</text:p>
          </table:table-cell>
          <table:table-cell table:formula="of:=[.D362]-[.D36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41" office:value-type="float" office:value="14801" calcext:value-type="float">
            <text:p>14801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7130787037037" calcext:value-type="float">
            <text:p>0,00171307870370370000</text:p>
          </table:table-cell>
          <table:table-cell table:formula="of:=[.D363]-[.D36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41" office:value-type="float" office:value="14842" calcext:value-type="float">
            <text:p>1484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71782407407407" calcext:value-type="float">
            <text:p>0,00171782407407407000</text:p>
          </table:table-cell>
          <table:table-cell table:formula="of:=[.D364]-[.D36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41" office:value-type="float" office:value="14883" calcext:value-type="float">
            <text:p>14883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72256944444444" calcext:value-type="float">
            <text:p>0,00172256944444444000</text:p>
          </table:table-cell>
          <table:table-cell table:formula="of:=[.D365]-[.D36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41" office:value-type="float" office:value="14924" calcext:value-type="float">
            <text:p>1492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72731481481481" calcext:value-type="float">
            <text:p>0,00172731481481481000</text:p>
          </table:table-cell>
          <table:table-cell table:formula="of:=[.D366]-[.D36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41" office:value-type="float" office:value="14965" calcext:value-type="float">
            <text:p>1496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73206018518519" calcext:value-type="float">
            <text:p>0,00173206018518519000</text:p>
          </table:table-cell>
          <table:table-cell table:formula="of:=[.D367]-[.D36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41" office:value-type="float" office:value="15006" calcext:value-type="float">
            <text:p>1500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73680555555556" calcext:value-type="float">
            <text:p>0,00173680555555556000</text:p>
          </table:table-cell>
          <table:table-cell table:formula="of:=[.D368]-[.D36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41" office:value-type="float" office:value="15047" calcext:value-type="float">
            <text:p>15047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74155092592593" calcext:value-type="float">
            <text:p>0,00174155092592593000</text:p>
          </table:table-cell>
          <table:table-cell table:formula="of:=[.D369]-[.D36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41" office:value-type="float" office:value="15088" calcext:value-type="float">
            <text:p>1508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7462962962963" calcext:value-type="float">
            <text:p>0,00174629629629630000</text:p>
          </table:table-cell>
          <table:table-cell table:formula="of:=[.D370]-[.D36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41" office:value-type="float" office:value="15129" calcext:value-type="float">
            <text:p>15129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75104166666667" calcext:value-type="float">
            <text:p>0,00175104166666667000</text:p>
          </table:table-cell>
          <table:table-cell table:formula="of:=[.D371]-[.D37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41" office:value-type="float" office:value="15170" calcext:value-type="float">
            <text:p>1517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75578703703704" calcext:value-type="float">
            <text:p>0,00175578703703704000</text:p>
          </table:table-cell>
          <table:table-cell table:formula="of:=[.D372]-[.D37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41" office:value-type="float" office:value="15211" calcext:value-type="float">
            <text:p>15211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76053240740741" calcext:value-type="float">
            <text:p>0,00176053240740741000</text:p>
          </table:table-cell>
          <table:table-cell table:formula="of:=[.D373]-[.D37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41" office:value-type="float" office:value="15252" calcext:value-type="float">
            <text:p>1525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76527777777778" calcext:value-type="float">
            <text:p>0,00176527777777778000</text:p>
          </table:table-cell>
          <table:table-cell table:formula="of:=[.D374]-[.D37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41" office:value-type="float" office:value="15293" calcext:value-type="float">
            <text:p>15293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77002314814815" calcext:value-type="float">
            <text:p>0,00177002314814815000</text:p>
          </table:table-cell>
          <table:table-cell table:formula="of:=[.D375]-[.D37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41" office:value-type="float" office:value="15334" calcext:value-type="float">
            <text:p>1533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77476851851852" calcext:value-type="float">
            <text:p>0,00177476851851852000</text:p>
          </table:table-cell>
          <table:table-cell table:formula="of:=[.D376]-[.D37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41" office:value-type="float" office:value="15375" calcext:value-type="float">
            <text:p>153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77951388888889" calcext:value-type="float">
            <text:p>0,00177951388888889000</text:p>
          </table:table-cell>
          <table:table-cell table:formula="of:=[.D377]-[.D37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41" office:value-type="float" office:value="15416" calcext:value-type="float">
            <text:p>1541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78425925925926" calcext:value-type="float">
            <text:p>0,00178425925925926000</text:p>
          </table:table-cell>
          <table:table-cell table:formula="of:=[.D378]-[.D37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41" office:value-type="float" office:value="15457" calcext:value-type="float">
            <text:p>15457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78900462962963" calcext:value-type="float">
            <text:p>0,00178900462962963000</text:p>
          </table:table-cell>
          <table:table-cell table:formula="of:=[.D379]-[.D37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41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79375" calcext:value-type="float">
            <text:p>0,00179375000000000000</text:p>
          </table:table-cell>
          <table:table-cell table:formula="of:=[.D380]-[.D37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41" office:value-type="float" office:value="15539" calcext:value-type="float">
            <text:p>15539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79849537037037" calcext:value-type="float">
            <text:p>0,00179849537037037000</text:p>
          </table:table-cell>
          <table:table-cell table:formula="of:=[.D381]-[.D38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41" office:value-type="float" office:value="15580" calcext:value-type="float">
            <text:p>155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80324074074074" calcext:value-type="float">
            <text:p>0,00180324074074074000</text:p>
          </table:table-cell>
          <table:table-cell table:formula="of:=[.D382]-[.D38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41" office:value-type="float" office:value="15621" calcext:value-type="float">
            <text:p>15621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80798611111111" calcext:value-type="float">
            <text:p>0,00180798611111111000</text:p>
          </table:table-cell>
          <table:table-cell table:formula="of:=[.D383]-[.D38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41" office:value-type="float" office:value="15662" calcext:value-type="float">
            <text:p>1566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81273148148148" calcext:value-type="float">
            <text:p>0,00181273148148148000</text:p>
          </table:table-cell>
          <table:table-cell table:formula="of:=[.D384]-[.D38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41" office:value-type="float" office:value="15703" calcext:value-type="float">
            <text:p>15703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81747685185185" calcext:value-type="float">
            <text:p>0,00181747685185185000</text:p>
          </table:table-cell>
          <table:table-cell table:formula="of:=[.D385]-[.D384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41" office:value-type="float" office:value="15744" calcext:value-type="float">
            <text:p>1574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82222222222222" calcext:value-type="float">
            <text:p>0,00182222222222222000</text:p>
          </table:table-cell>
          <table:table-cell table:formula="of:=[.D386]-[.D38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41" office:value-type="float" office:value="15785" calcext:value-type="float">
            <text:p>1578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82696759259259" calcext:value-type="float">
            <text:p>0,00182696759259259000</text:p>
          </table:table-cell>
          <table:table-cell table:formula="of:=[.D387]-[.D38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41" office:value-type="float" office:value="15826" calcext:value-type="float">
            <text:p>1582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83171296296296" calcext:value-type="float">
            <text:p>0,00183171296296296000</text:p>
          </table:table-cell>
          <table:table-cell table:formula="of:=[.D388]-[.D38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41" office:value-type="float" office:value="15867" calcext:value-type="float">
            <text:p>15867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83645833333333" calcext:value-type="float">
            <text:p>0,00183645833333333000</text:p>
          </table:table-cell>
          <table:table-cell table:formula="of:=[.D389]-[.D38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41" office:value-type="float" office:value="15908" calcext:value-type="float">
            <text:p>1590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8412037037037" calcext:value-type="float">
            <text:p>0,00184120370370370000</text:p>
          </table:table-cell>
          <table:table-cell table:formula="of:=[.D390]-[.D38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41" office:value-type="float" office:value="15949" calcext:value-type="float">
            <text:p>15949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84594907407407" calcext:value-type="float">
            <text:p>0,00184594907407407000</text:p>
          </table:table-cell>
          <table:table-cell table:formula="of:=[.D391]-[.D39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41" office:value-type="float" office:value="15990" calcext:value-type="float">
            <text:p>1599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85069444444444" calcext:value-type="float">
            <text:p>0,00185069444444444000</text:p>
          </table:table-cell>
          <table:table-cell table:formula="of:=[.D392]-[.D39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41" office:value-type="float" office:value="16031" calcext:value-type="float">
            <text:p>16031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85543981481481" calcext:value-type="float">
            <text:p>0,00185543981481481000</text:p>
          </table:table-cell>
          <table:table-cell table:formula="of:=[.D393]-[.D392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41" office:value-type="float" office:value="16072" calcext:value-type="float">
            <text:p>1607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86018518518519" calcext:value-type="float">
            <text:p>0,00186018518518519000</text:p>
          </table:table-cell>
          <table:table-cell table:formula="of:=[.D394]-[.D39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41" office:value-type="float" office:value="16113" calcext:value-type="float">
            <text:p>16113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86493055555556" calcext:value-type="float">
            <text:p>0,00186493055555556000</text:p>
          </table:table-cell>
          <table:table-cell table:formula="of:=[.D395]-[.D39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41" office:value-type="float" office:value="16154" calcext:value-type="float">
            <text:p>16154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86967592592593" calcext:value-type="float">
            <text:p>0,00186967592592593000</text:p>
          </table:table-cell>
          <table:table-cell table:formula="of:=[.D396]-[.D39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41" office:value-type="float" office:value="16195" calcext:value-type="float">
            <text:p>1619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8744212962963" calcext:value-type="float">
            <text:p>0,00187442129629630000</text:p>
          </table:table-cell>
          <table:table-cell table:formula="of:=[.D397]-[.D39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41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87916666666667" calcext:value-type="float">
            <text:p>0,00187916666666667000</text:p>
          </table:table-cell>
          <table:table-cell table:formula="of:=[.D398]-[.D397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41" office:value-type="float" office:value="16277" calcext:value-type="float">
            <text:p>16277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88391203703704" calcext:value-type="float">
            <text:p>0,00188391203703704000</text:p>
          </table:table-cell>
          <table:table-cell table:formula="of:=[.D399]-[.D39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41" office:value-type="float" office:value="16318" calcext:value-type="float">
            <text:p>16318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88865740740741" calcext:value-type="float">
            <text:p>0,00188865740740741000</text:p>
          </table:table-cell>
          <table:table-cell table:formula="of:=[.D400]-[.D39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41" office:value-type="float" office:value="16359" calcext:value-type="float">
            <text:p>16359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89340277777778" calcext:value-type="float">
            <text:p>0,00189340277777778000</text:p>
          </table:table-cell>
          <table:table-cell table:formula="of:=[.D401]-[.D400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41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89814814814815" calcext:value-type="float">
            <text:p>0,00189814814814815000</text:p>
          </table:table-cell>
          <table:table-cell table:formula="of:=[.D402]-[.D40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41" office:value-type="float" office:value="16441" calcext:value-type="float">
            <text:p>16441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90289351851852" calcext:value-type="float">
            <text:p>0,00190289351851852000</text:p>
          </table:table-cell>
          <table:table-cell table:formula="of:=[.D403]-[.D40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41" office:value-type="float" office:value="16482" calcext:value-type="float">
            <text:p>16482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90763888888889" calcext:value-type="float">
            <text:p>0,00190763888888889000</text:p>
          </table:table-cell>
          <table:table-cell table:formula="of:=[.D404]-[.D403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41" office:value-type="float" office:value="16523" calcext:value-type="float">
            <text:p>16523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91238425925926" calcext:value-type="float">
            <text:p>0,00191238425925926000</text:p>
          </table:table-cell>
          <table:table-cell table:formula="of:=[.D405]-[.D40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41" office:value-type="float" office:value="16564" calcext:value-type="float">
            <text:p>16564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91712962962963" calcext:value-type="float">
            <text:p>0,00191712962962963000</text:p>
          </table:table-cell>
          <table:table-cell table:formula="of:=[.D406]-[.D405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41" office:value-type="float" office:value="16605" calcext:value-type="float">
            <text:p>1660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921875" calcext:value-type="float">
            <text:p>0,00192187500000000000</text:p>
          </table:table-cell>
          <table:table-cell table:formula="of:=[.D407]-[.D406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41" office:value-type="float" office:value="16646" calcext:value-type="float">
            <text:p>16646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92662037037037" calcext:value-type="float">
            <text:p>0,00192662037037037000</text:p>
          </table:table-cell>
          <table:table-cell table:formula="of:=[.D408]-[.D40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41" office:value-type="float" office:value="16687" calcext:value-type="float">
            <text:p>16687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93136574074074" calcext:value-type="float">
            <text:p>0,00193136574074074000</text:p>
          </table:table-cell>
          <table:table-cell table:formula="of:=[.D409]-[.D408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41" office:value-type="float" office:value="16728" calcext:value-type="float">
            <text:p>16728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93611111111111" calcext:value-type="float">
            <text:p>0,00193611111111111000</text:p>
          </table:table-cell>
          <table:table-cell table:formula="of:=[.D410]-[.D409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41" office:value-type="float" office:value="16769" calcext:value-type="float">
            <text:p>16769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94085648148148" calcext:value-type="float">
            <text:p>0,00194085648148148000</text:p>
          </table:table-cell>
          <table:table-cell table:formula="of:=[.D411]-[.D41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41" office:value-type="float" office:value="16810" calcext:value-type="float">
            <text:p>1681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94560185185185" calcext:value-type="float">
            <text:p>0,00194560185185185000</text:p>
          </table:table-cell>
          <table:table-cell table:formula="of:=[.D412]-[.D411]" office:value-type="float" office:value="0.00000474537037037045" calcext:value-type="float">
            <text:p>0,0000047453703703704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41" office:value-type="float" office:value="16851" calcext:value-type="float">
            <text:p>16851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95034722222222" calcext:value-type="float">
            <text:p>0,00195034722222222000</text:p>
          </table:table-cell>
          <table:table-cell table:formula="of:=[.D413]-[.D41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41" office:value-type="float" office:value="16892" calcext:value-type="float">
            <text:p>16892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95509259259259" calcext:value-type="float">
            <text:p>0,00195509259259259000</text:p>
          </table:table-cell>
          <table:table-cell table:formula="of:=[.D414]-[.D413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41" office:value-type="float" office:value="16933" calcext:value-type="float">
            <text:p>16933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95983796296296" calcext:value-type="float">
            <text:p>0,00195983796296296000</text:p>
          </table:table-cell>
          <table:table-cell table:formula="of:=[.D415]-[.D41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41" office:value-type="float" office:value="16974" calcext:value-type="float">
            <text:p>16974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96458333333333" calcext:value-type="float">
            <text:p>0,00196458333333333000</text:p>
          </table:table-cell>
          <table:table-cell table:formula="of:=[.D416]-[.D41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41" office:value-type="float" office:value="17015" calcext:value-type="float">
            <text:p>1701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9693287037037" calcext:value-type="float">
            <text:p>0,00196932870370370000</text:p>
          </table:table-cell>
          <table:table-cell table:formula="of:=[.D417]-[.D416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41" office:value-type="float" office:value="17056" calcext:value-type="float">
            <text:p>17056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97407407407407" calcext:value-type="float">
            <text:p>0,00197407407407407000</text:p>
          </table:table-cell>
          <table:table-cell table:formula="of:=[.D418]-[.D41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41" office:value-type="float" office:value="17097" calcext:value-type="float">
            <text:p>17097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97881944444444" calcext:value-type="float">
            <text:p>0,00197881944444444000</text:p>
          </table:table-cell>
          <table:table-cell table:formula="of:=[.D419]-[.D41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41" office:value-type="float" office:value="17138" calcext:value-type="float">
            <text:p>17138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98356481481481" calcext:value-type="float">
            <text:p>0,00198356481481481000</text:p>
          </table:table-cell>
          <table:table-cell table:formula="of:=[.D420]-[.D41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41" office:value-type="float" office:value="17179" calcext:value-type="float">
            <text:p>17179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98831018518519" calcext:value-type="float">
            <text:p>0,00198831018518519000</text:p>
          </table:table-cell>
          <table:table-cell table:formula="of:=[.D421]-[.D420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41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99305555555556" calcext:value-type="float">
            <text:p>0,00199305555555556000</text:p>
          </table:table-cell>
          <table:table-cell table:formula="of:=[.D422]-[.D42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41" office:value-type="float" office:value="17261" calcext:value-type="float">
            <text:p>17261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99780092592593" calcext:value-type="float">
            <text:p>0,00199780092592593000</text:p>
          </table:table-cell>
          <table:table-cell table:formula="of:=[.D423]-[.D42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41" office:value-type="float" office:value="17302" calcext:value-type="float">
            <text:p>17302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0025462962963" calcext:value-type="float">
            <text:p>0,00200254629629630000</text:p>
          </table:table-cell>
          <table:table-cell table:formula="of:=[.D424]-[.D423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41" office:value-type="float" office:value="17343" calcext:value-type="float">
            <text:p>17343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00729166666667" calcext:value-type="float">
            <text:p>0,00200729166666667000</text:p>
          </table:table-cell>
          <table:table-cell table:formula="of:=[.D425]-[.D42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41" office:value-type="float" office:value="17384" calcext:value-type="float">
            <text:p>17384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01203703703704" calcext:value-type="float">
            <text:p>0,00201203703703704000</text:p>
          </table:table-cell>
          <table:table-cell table:formula="of:=[.D426]-[.D42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41" office:value-type="float" office:value="17425" calcext:value-type="float">
            <text:p>174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01678240740741" calcext:value-type="float">
            <text:p>0,00201678240740741000</text:p>
          </table:table-cell>
          <table:table-cell table:formula="of:=[.D427]-[.D426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41" office:value-type="float" office:value="17466" calcext:value-type="float">
            <text:p>17466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02152777777778" calcext:value-type="float">
            <text:p>0,00202152777777778000</text:p>
          </table:table-cell>
          <table:table-cell table:formula="of:=[.D428]-[.D42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41" office:value-type="float" office:value="17507" calcext:value-type="float">
            <text:p>17507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02627314814815" calcext:value-type="float">
            <text:p>0,00202627314814815000</text:p>
          </table:table-cell>
          <table:table-cell table:formula="of:=[.D429]-[.D42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41" office:value-type="float" office:value="17548" calcext:value-type="float">
            <text:p>17548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03101851851852" calcext:value-type="float">
            <text:p>0,00203101851851852000</text:p>
          </table:table-cell>
          <table:table-cell table:formula="of:=[.D430]-[.D429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41" office:value-type="float" office:value="17589" calcext:value-type="float">
            <text:p>17589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03576388888889" calcext:value-type="float">
            <text:p>0,00203576388888889000</text:p>
          </table:table-cell>
          <table:table-cell table:formula="of:=[.D431]-[.D43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41" office:value-type="float" office:value="17630" calcext:value-type="float">
            <text:p>1763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04050925925926" calcext:value-type="float">
            <text:p>0,00204050925925926000</text:p>
          </table:table-cell>
          <table:table-cell table:formula="of:=[.D432]-[.D43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41" office:value-type="float" office:value="17671" calcext:value-type="float">
            <text:p>17671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04525462962963" calcext:value-type="float">
            <text:p>0,00204525462962963000</text:p>
          </table:table-cell>
          <table:table-cell table:formula="of:=[.D433]-[.D432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41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05" calcext:value-type="float">
            <text:p>0,00205000000000000000</text:p>
          </table:table-cell>
          <table:table-cell table:formula="of:=[.D434]-[.D43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41" office:value-type="float" office:value="17753" calcext:value-type="float">
            <text:p>17753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05474537037037" calcext:value-type="float">
            <text:p>0,00205474537037037000</text:p>
          </table:table-cell>
          <table:table-cell table:formula="of:=[.D435]-[.D43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41" office:value-type="float" office:value="17794" calcext:value-type="float">
            <text:p>17794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05949074074074" calcext:value-type="float">
            <text:p>0,00205949074074074000</text:p>
          </table:table-cell>
          <table:table-cell table:formula="of:=[.D436]-[.D435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41" office:value-type="float" office:value="17835" calcext:value-type="float">
            <text:p>1783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06423611111111" calcext:value-type="float">
            <text:p>0,00206423611111111000</text:p>
          </table:table-cell>
          <table:table-cell table:formula="of:=[.D437]-[.D43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41" office:value-type="float" office:value="17876" calcext:value-type="float">
            <text:p>17876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06898148148148" calcext:value-type="float">
            <text:p>0,00206898148148148000</text:p>
          </table:table-cell>
          <table:table-cell table:formula="of:=[.D438]-[.D43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41" office:value-type="float" office:value="17917" calcext:value-type="float">
            <text:p>17917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07372685185185" calcext:value-type="float">
            <text:p>0,00207372685185185000</text:p>
          </table:table-cell>
          <table:table-cell table:formula="of:=[.D439]-[.D43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41" office:value-type="float" office:value="17958" calcext:value-type="float">
            <text:p>17958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07847222222222" calcext:value-type="float">
            <text:p>0,00207847222222222000</text:p>
          </table:table-cell>
          <table:table-cell table:formula="of:=[.D440]-[.D439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41" office:value-type="float" office:value="17999" calcext:value-type="float">
            <text:p>17999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08321759259259" calcext:value-type="float">
            <text:p>0,00208321759259259000</text:p>
          </table:table-cell>
          <table:table-cell table:formula="of:=[.D441]-[.D44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41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08796296296296" calcext:value-type="float">
            <text:p>0,00208796296296296000</text:p>
          </table:table-cell>
          <table:table-cell table:formula="of:=[.D442]-[.D44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41" office:value-type="float" office:value="18081" calcext:value-type="float">
            <text:p>18081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09270833333333" calcext:value-type="float">
            <text:p>0,00209270833333333000</text:p>
          </table:table-cell>
          <table:table-cell table:formula="of:=[.D443]-[.D442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41" office:value-type="float" office:value="18122" calcext:value-type="float">
            <text:p>18122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0974537037037" calcext:value-type="float">
            <text:p>0,00209745370370370000</text:p>
          </table:table-cell>
          <table:table-cell table:formula="of:=[.D444]-[.D44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41" office:value-type="float" office:value="18163" calcext:value-type="float">
            <text:p>18163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10219907407407" calcext:value-type="float">
            <text:p>0,00210219907407407000</text:p>
          </table:table-cell>
          <table:table-cell table:formula="of:=[.D445]-[.D44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41" office:value-type="float" office:value="18204" calcext:value-type="float">
            <text:p>18204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10694444444444" calcext:value-type="float">
            <text:p>0,00210694444444444000</text:p>
          </table:table-cell>
          <table:table-cell table:formula="of:=[.D446]-[.D445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41" office:value-type="float" office:value="18245" calcext:value-type="float">
            <text:p>1824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11168981481482" calcext:value-type="float">
            <text:p>0,00211168981481482000</text:p>
          </table:table-cell>
          <table:table-cell table:formula="of:=[.D447]-[.D44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41" office:value-type="float" office:value="18286" calcext:value-type="float">
            <text:p>18286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11643518518519" calcext:value-type="float">
            <text:p>0,00211643518518519000</text:p>
          </table:table-cell>
          <table:table-cell table:formula="of:=[.D448]-[.D44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41" office:value-type="float" office:value="18327" calcext:value-type="float">
            <text:p>18327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12118055555556" calcext:value-type="float">
            <text:p>0,00212118055555556000</text:p>
          </table:table-cell>
          <table:table-cell table:formula="of:=[.D449]-[.D448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41" office:value-type="float" office:value="18368" calcext:value-type="float">
            <text:p>18368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12592592592593" calcext:value-type="float">
            <text:p>0,00212592592592593000</text:p>
          </table:table-cell>
          <table:table-cell table:formula="of:=[.D450]-[.D44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41" office:value-type="float" office:value="18409" calcext:value-type="float">
            <text:p>18409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1306712962963" calcext:value-type="float">
            <text:p>0,00213067129629630000</text:p>
          </table:table-cell>
          <table:table-cell table:formula="of:=[.D451]-[.D45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41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13541666666667" calcext:value-type="float">
            <text:p>0,00213541666666667000</text:p>
          </table:table-cell>
          <table:table-cell table:formula="of:=[.D452]-[.D451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41" office:value-type="float" office:value="18491" calcext:value-type="float">
            <text:p>18491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14016203703704" calcext:value-type="float">
            <text:p>0,00214016203703704000</text:p>
          </table:table-cell>
          <table:table-cell table:formula="of:=[.D453]-[.D45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41" office:value-type="float" office:value="18532" calcext:value-type="float">
            <text:p>18532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14490740740741" calcext:value-type="float">
            <text:p>0,00214490740740741000</text:p>
          </table:table-cell>
          <table:table-cell table:formula="of:=[.D454]-[.D45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41" office:value-type="float" office:value="18573" calcext:value-type="float">
            <text:p>18573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14965277777778" calcext:value-type="float">
            <text:p>0,00214965277777778000</text:p>
          </table:table-cell>
          <table:table-cell table:formula="of:=[.D455]-[.D454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41" office:value-type="float" office:value="18614" calcext:value-type="float">
            <text:p>18614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15439814814815" calcext:value-type="float">
            <text:p>0,00215439814814815000</text:p>
          </table:table-cell>
          <table:table-cell table:formula="of:=[.D456]-[.D45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41" office:value-type="float" office:value="18655" calcext:value-type="float">
            <text:p>1865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15914351851852" calcext:value-type="float">
            <text:p>0,00215914351851852000</text:p>
          </table:table-cell>
          <table:table-cell table:formula="of:=[.D457]-[.D45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41" office:value-type="float" office:value="18696" calcext:value-type="float">
            <text:p>18696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16388888888889" calcext:value-type="float">
            <text:p>0,00216388888888889000</text:p>
          </table:table-cell>
          <table:table-cell table:formula="of:=[.D458]-[.D457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41" office:value-type="float" office:value="18737" calcext:value-type="float">
            <text:p>18737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16863425925926" calcext:value-type="float">
            <text:p>0,00216863425925926000</text:p>
          </table:table-cell>
          <table:table-cell table:formula="of:=[.D459]-[.D45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41" office:value-type="float" office:value="18778" calcext:value-type="float">
            <text:p>18778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17337962962963" calcext:value-type="float">
            <text:p>0,00217337962962963000</text:p>
          </table:table-cell>
          <table:table-cell table:formula="of:=[.D460]-[.D45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41" office:value-type="float" office:value="18819" calcext:value-type="float">
            <text:p>18819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178125" calcext:value-type="float">
            <text:p>0,00217812500000000000</text:p>
          </table:table-cell>
          <table:table-cell table:formula="of:=[.D461]-[.D46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41" office:value-type="float" office:value="18860" calcext:value-type="float">
            <text:p>1886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18287037037037" calcext:value-type="float">
            <text:p>0,00218287037037037000</text:p>
          </table:table-cell>
          <table:table-cell table:formula="of:=[.D462]-[.D461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41" office:value-type="float" office:value="18901" calcext:value-type="float">
            <text:p>18901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18761574074074" calcext:value-type="float">
            <text:p>0,00218761574074074000</text:p>
          </table:table-cell>
          <table:table-cell table:formula="of:=[.D463]-[.D46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41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19236111111111" calcext:value-type="float">
            <text:p>0,00219236111111111000</text:p>
          </table:table-cell>
          <table:table-cell table:formula="of:=[.D464]-[.D46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41" office:value-type="float" office:value="18983" calcext:value-type="float">
            <text:p>18983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19710648148148" calcext:value-type="float">
            <text:p>0,00219710648148148000</text:p>
          </table:table-cell>
          <table:table-cell table:formula="of:=[.D465]-[.D464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41" office:value-type="float" office:value="19024" calcext:value-type="float">
            <text:p>19024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20185185185185" calcext:value-type="float">
            <text:p>0,00220185185185185000</text:p>
          </table:table-cell>
          <table:table-cell table:formula="of:=[.D466]-[.D46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41" office:value-type="float" office:value="19065" calcext:value-type="float">
            <text:p>1906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20659722222222" calcext:value-type="float">
            <text:p>0,00220659722222222000</text:p>
          </table:table-cell>
          <table:table-cell table:formula="of:=[.D467]-[.D46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41" office:value-type="float" office:value="19106" calcext:value-type="float">
            <text:p>19106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21134259259259" calcext:value-type="float">
            <text:p>0,00221134259259259000</text:p>
          </table:table-cell>
          <table:table-cell table:formula="of:=[.D468]-[.D467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41" office:value-type="float" office:value="19147" calcext:value-type="float">
            <text:p>19147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21608796296296" calcext:value-type="float">
            <text:p>0,00221608796296296000</text:p>
          </table:table-cell>
          <table:table-cell table:formula="of:=[.D469]-[.D46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41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22083333333333" calcext:value-type="float">
            <text:p>0,00222083333333333000</text:p>
          </table:table-cell>
          <table:table-cell table:formula="of:=[.D470]-[.D46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41" office:value-type="float" office:value="19229" calcext:value-type="float">
            <text:p>19229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2255787037037" calcext:value-type="float">
            <text:p>0,00222557870370370000</text:p>
          </table:table-cell>
          <table:table-cell table:formula="of:=[.D471]-[.D470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41" office:value-type="float" office:value="19270" calcext:value-type="float">
            <text:p>1927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23032407407407" calcext:value-type="float">
            <text:p>0,00223032407407407000</text:p>
          </table:table-cell>
          <table:table-cell table:formula="of:=[.D472]-[.D47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41" office:value-type="float" office:value="19311" calcext:value-type="float">
            <text:p>19311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23506944444444" calcext:value-type="float">
            <text:p>0,00223506944444444000</text:p>
          </table:table-cell>
          <table:table-cell table:formula="of:=[.D473]-[.D47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41" office:value-type="float" office:value="19352" calcext:value-type="float">
            <text:p>19352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23981481481481" calcext:value-type="float">
            <text:p>0,00223981481481481000</text:p>
          </table:table-cell>
          <table:table-cell table:formula="of:=[.D474]-[.D473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41" office:value-type="float" office:value="19393" calcext:value-type="float">
            <text:p>19393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24456018518519" calcext:value-type="float">
            <text:p>0,00224456018518519000</text:p>
          </table:table-cell>
          <table:table-cell table:formula="of:=[.D475]-[.D47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41" office:value-type="float" office:value="19434" calcext:value-type="float">
            <text:p>19434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24930555555556" calcext:value-type="float">
            <text:p>0,00224930555555556000</text:p>
          </table:table-cell>
          <table:table-cell table:formula="of:=[.D476]-[.D47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41" office:value-type="float" office:value="19475" calcext:value-type="float">
            <text:p>194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25405092592593" calcext:value-type="float">
            <text:p>0,00225405092592593000</text:p>
          </table:table-cell>
          <table:table-cell table:formula="of:=[.D477]-[.D476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41" office:value-type="float" office:value="19516" calcext:value-type="float">
            <text:p>19516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2587962962963" calcext:value-type="float">
            <text:p>0,00225879629629630000</text:p>
          </table:table-cell>
          <table:table-cell table:formula="of:=[.D478]-[.D47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41" office:value-type="float" office:value="19557" calcext:value-type="float">
            <text:p>19557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26354166666667" calcext:value-type="float">
            <text:p>0,00226354166666667000</text:p>
          </table:table-cell>
          <table:table-cell table:formula="of:=[.D479]-[.D47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41" office:value-type="float" office:value="19598" calcext:value-type="float">
            <text:p>19598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26828703703704" calcext:value-type="float">
            <text:p>0,00226828703703704000</text:p>
          </table:table-cell>
          <table:table-cell table:formula="of:=[.D480]-[.D47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41" office:value-type="float" office:value="19639" calcext:value-type="float">
            <text:p>19639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27303240740741" calcext:value-type="float">
            <text:p>0,00227303240740741000</text:p>
          </table:table-cell>
          <table:table-cell table:formula="of:=[.D481]-[.D480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41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27777777777778" calcext:value-type="float">
            <text:p>0,00227777777777778000</text:p>
          </table:table-cell>
          <table:table-cell table:formula="of:=[.D482]-[.D48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41" office:value-type="float" office:value="19721" calcext:value-type="float">
            <text:p>19721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28252314814815" calcext:value-type="float">
            <text:p>0,00228252314814815000</text:p>
          </table:table-cell>
          <table:table-cell table:formula="of:=[.D483]-[.D48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41" office:value-type="float" office:value="19762" calcext:value-type="float">
            <text:p>19762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28726851851852" calcext:value-type="float">
            <text:p>0,00228726851851852000</text:p>
          </table:table-cell>
          <table:table-cell table:formula="of:=[.D484]-[.D483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41" office:value-type="float" office:value="19803" calcext:value-type="float">
            <text:p>19803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29201388888889" calcext:value-type="float">
            <text:p>0,00229201388888889000</text:p>
          </table:table-cell>
          <table:table-cell table:formula="of:=[.D485]-[.D48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41" office:value-type="float" office:value="19844" calcext:value-type="float">
            <text:p>19844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29675925925926" calcext:value-type="float">
            <text:p>0,00229675925925926000</text:p>
          </table:table-cell>
          <table:table-cell table:formula="of:=[.D486]-[.D48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41" office:value-type="float" office:value="19885" calcext:value-type="float">
            <text:p>1988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30150462962963" calcext:value-type="float">
            <text:p>0,00230150462962963000</text:p>
          </table:table-cell>
          <table:table-cell table:formula="of:=[.D487]-[.D486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41" office:value-type="float" office:value="19926" calcext:value-type="float">
            <text:p>19926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30625" calcext:value-type="float">
            <text:p>0,00230625000000000000</text:p>
          </table:table-cell>
          <table:table-cell table:formula="of:=[.D488]-[.D48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41" office:value-type="float" office:value="19967" calcext:value-type="float">
            <text:p>19967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31099537037037" calcext:value-type="float">
            <text:p>0,00231099537037037000</text:p>
          </table:table-cell>
          <table:table-cell table:formula="of:=[.D489]-[.D48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41" office:value-type="float" office:value="20008" calcext:value-type="float">
            <text:p>20008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31574074074074" calcext:value-type="float">
            <text:p>0,00231574074074074000</text:p>
          </table:table-cell>
          <table:table-cell table:formula="of:=[.D490]-[.D489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41" office:value-type="float" office:value="20049" calcext:value-type="float">
            <text:p>20049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32048611111111" calcext:value-type="float">
            <text:p>0,00232048611111111000</text:p>
          </table:table-cell>
          <table:table-cell table:formula="of:=[.D491]-[.D49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41" office:value-type="float" office:value="20090" calcext:value-type="float">
            <text:p>2009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32523148148148" calcext:value-type="float">
            <text:p>0,00232523148148148000</text:p>
          </table:table-cell>
          <table:table-cell table:formula="of:=[.D492]-[.D49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41" office:value-type="float" office:value="20131" calcext:value-type="float">
            <text:p>20131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32997685185185" calcext:value-type="float">
            <text:p>0,00232997685185185000</text:p>
          </table:table-cell>
          <table:table-cell table:formula="of:=[.D493]-[.D492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41" office:value-type="float" office:value="20172" calcext:value-type="float">
            <text:p>20172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33472222222222" calcext:value-type="float">
            <text:p>0,00233472222222222000</text:p>
          </table:table-cell>
          <table:table-cell table:formula="of:=[.D494]-[.D49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41" office:value-type="float" office:value="20213" calcext:value-type="float">
            <text:p>20213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33946759259259" calcext:value-type="float">
            <text:p>0,00233946759259259000</text:p>
          </table:table-cell>
          <table:table-cell table:formula="of:=[.D495]-[.D49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41" office:value-type="float" office:value="20254" calcext:value-type="float">
            <text:p>20254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34421296296296" calcext:value-type="float">
            <text:p>0,00234421296296296000</text:p>
          </table:table-cell>
          <table:table-cell table:formula="of:=[.D496]-[.D495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41" office:value-type="float" office:value="20295" calcext:value-type="float">
            <text:p>2029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34895833333333" calcext:value-type="float">
            <text:p>0,00234895833333333000</text:p>
          </table:table-cell>
          <table:table-cell table:formula="of:=[.D497]-[.D49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41" office:value-type="float" office:value="20336" calcext:value-type="float">
            <text:p>20336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3537037037037" calcext:value-type="float">
            <text:p>0,00235370370370370000</text:p>
          </table:table-cell>
          <table:table-cell table:formula="of:=[.D498]-[.D49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41" office:value-type="float" office:value="20377" calcext:value-type="float">
            <text:p>20377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35844907407407" calcext:value-type="float">
            <text:p>0,00235844907407407000</text:p>
          </table:table-cell>
          <table:table-cell table:formula="of:=[.D499]-[.D49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41" office:value-type="float" office:value="20418" calcext:value-type="float">
            <text:p>20418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36319444444444" calcext:value-type="float">
            <text:p>0,00236319444444444000</text:p>
          </table:table-cell>
          <table:table-cell table:formula="of:=[.D500]-[.D499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41" office:value-type="float" office:value="20459" calcext:value-type="float">
            <text:p>20459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36793981481482" calcext:value-type="float">
            <text:p>0,00236793981481482000</text:p>
          </table:table-cell>
          <table:table-cell table:formula="of:=[.D501]-[.D50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41" office:value-type="float" office:value="20500" calcext:value-type="float">
            <text:p>20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37268518518519" calcext:value-type="float">
            <text:p>0,00237268518518519000</text:p>
          </table:table-cell>
          <table:table-cell table:formula="of:=[.D502]-[.D50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41" office:value-type="float" office:value="20541" calcext:value-type="float">
            <text:p>20541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37743055555556" calcext:value-type="float">
            <text:p>0,00237743055555556000</text:p>
          </table:table-cell>
          <table:table-cell table:formula="of:=[.D503]-[.D502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41" office:value-type="float" office:value="20582" calcext:value-type="float">
            <text:p>20582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38217592592593" calcext:value-type="float">
            <text:p>0,00238217592592593000</text:p>
          </table:table-cell>
          <table:table-cell table:formula="of:=[.D504]-[.D50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41" office:value-type="float" office:value="20623" calcext:value-type="float">
            <text:p>20623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3869212962963" calcext:value-type="float">
            <text:p>0,00238692129629630000</text:p>
          </table:table-cell>
          <table:table-cell table:formula="of:=[.D505]-[.D50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41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39166666666667" calcext:value-type="float">
            <text:p>0,00239166666666667000</text:p>
          </table:table-cell>
          <table:table-cell table:formula="of:=[.D506]-[.D505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41" office:value-type="float" office:value="20705" calcext:value-type="float">
            <text:p>2070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39641203703704" calcext:value-type="float">
            <text:p>0,00239641203703704000</text:p>
          </table:table-cell>
          <table:table-cell table:formula="of:=[.D507]-[.D50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41" office:value-type="float" office:value="20746" calcext:value-type="float">
            <text:p>20746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40115740740741" calcext:value-type="float">
            <text:p>0,00240115740740741000</text:p>
          </table:table-cell>
          <table:table-cell table:formula="of:=[.D508]-[.D50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41" office:value-type="float" office:value="20787" calcext:value-type="float">
            <text:p>20787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40590277777778" calcext:value-type="float">
            <text:p>0,00240590277777778000</text:p>
          </table:table-cell>
          <table:table-cell table:formula="of:=[.D509]-[.D508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41" office:value-type="float" office:value="20828" calcext:value-type="float">
            <text:p>20828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41064814814815" calcext:value-type="float">
            <text:p>0,00241064814814815000</text:p>
          </table:table-cell>
          <table:table-cell table:formula="of:=[.D510]-[.D50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41" office:value-type="float" office:value="20869" calcext:value-type="float">
            <text:p>20869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41539351851852" calcext:value-type="float">
            <text:p>0,00241539351851852000</text:p>
          </table:table-cell>
          <table:table-cell table:formula="of:=[.D511]-[.D51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41" office:value-type="float" office:value="20910" calcext:value-type="float">
            <text:p>2091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42013888888889" calcext:value-type="float">
            <text:p>0,00242013888888889000</text:p>
          </table:table-cell>
          <table:table-cell table:formula="of:=[.D512]-[.D511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41" office:value-type="float" office:value="20951" calcext:value-type="float">
            <text:p>20951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42488425925926" calcext:value-type="float">
            <text:p>0,00242488425925926000</text:p>
          </table:table-cell>
          <table:table-cell table:formula="of:=[.D513]-[.D51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41" office:value-type="float" office:value="20992" calcext:value-type="float">
            <text:p>20992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42962962962963" calcext:value-type="float">
            <text:p>0,00242962962962963000</text:p>
          </table:table-cell>
          <table:table-cell table:formula="of:=[.D514]-[.D51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41" office:value-type="float" office:value="21033" calcext:value-type="float">
            <text:p>21033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434375" calcext:value-type="float">
            <text:p>0,00243437500000000000</text:p>
          </table:table-cell>
          <table:table-cell table:formula="of:=[.D515]-[.D514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41" office:value-type="float" office:value="21074" calcext:value-type="float">
            <text:p>21074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43912037037037" calcext:value-type="float">
            <text:p>0,00243912037037037000</text:p>
          </table:table-cell>
          <table:table-cell table:formula="of:=[.D516]-[.D51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41" office:value-type="float" office:value="21115" calcext:value-type="float">
            <text:p>2111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44386574074074" calcext:value-type="float">
            <text:p>0,00244386574074074000</text:p>
          </table:table-cell>
          <table:table-cell table:formula="of:=[.D517]-[.D51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41" office:value-type="float" office:value="21156" calcext:value-type="float">
            <text:p>21156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44861111111111" calcext:value-type="float">
            <text:p>0,00244861111111111000</text:p>
          </table:table-cell>
          <table:table-cell table:formula="of:=[.D518]-[.D51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41" office:value-type="float" office:value="21197" calcext:value-type="float">
            <text:p>21197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45335648148148" calcext:value-type="float">
            <text:p>0,00245335648148148000</text:p>
          </table:table-cell>
          <table:table-cell table:formula="of:=[.D519]-[.D518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41" office:value-type="float" office:value="21238" calcext:value-type="float">
            <text:p>21238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45810185185185" calcext:value-type="float">
            <text:p>0,00245810185185185000</text:p>
          </table:table-cell>
          <table:table-cell table:formula="of:=[.D520]-[.D51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41" office:value-type="float" office:value="21279" calcext:value-type="float">
            <text:p>21279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46284722222222" calcext:value-type="float">
            <text:p>0,00246284722222222000</text:p>
          </table:table-cell>
          <table:table-cell table:formula="of:=[.D521]-[.D52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41" office:value-type="float" office:value="21320" calcext:value-type="float">
            <text:p>2132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46759259259259" calcext:value-type="float">
            <text:p>0,00246759259259259000</text:p>
          </table:table-cell>
          <table:table-cell table:formula="of:=[.D522]-[.D521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41" office:value-type="float" office:value="21361" calcext:value-type="float">
            <text:p>21361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47233796296296" calcext:value-type="float">
            <text:p>0,00247233796296296000</text:p>
          </table:table-cell>
          <table:table-cell table:formula="of:=[.D523]-[.D52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41" office:value-type="float" office:value="21402" calcext:value-type="float">
            <text:p>21402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47708333333333" calcext:value-type="float">
            <text:p>0,00247708333333333000</text:p>
          </table:table-cell>
          <table:table-cell table:formula="of:=[.D524]-[.D52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41" office:value-type="float" office:value="21443" calcext:value-type="float">
            <text:p>21443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4818287037037" calcext:value-type="float">
            <text:p>0,00248182870370370000</text:p>
          </table:table-cell>
          <table:table-cell table:formula="of:=[.D525]-[.D524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41" office:value-type="float" office:value="21484" calcext:value-type="float">
            <text:p>21484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48657407407407" calcext:value-type="float">
            <text:p>0,00248657407407407000</text:p>
          </table:table-cell>
          <table:table-cell table:formula="of:=[.D526]-[.D52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41" office:value-type="float" office:value="21525" calcext:value-type="float">
            <text:p>2152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49131944444444" calcext:value-type="float">
            <text:p>0,00249131944444444000</text:p>
          </table:table-cell>
          <table:table-cell table:formula="of:=[.D527]-[.D52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41" office:value-type="float" office:value="21566" calcext:value-type="float">
            <text:p>21566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49606481481481" calcext:value-type="float">
            <text:p>0,00249606481481481000</text:p>
          </table:table-cell>
          <table:table-cell table:formula="of:=[.D528]-[.D527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41" office:value-type="float" office:value="21607" calcext:value-type="float">
            <text:p>21607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50081018518519" calcext:value-type="float">
            <text:p>0,00250081018518519000</text:p>
          </table:table-cell>
          <table:table-cell table:formula="of:=[.D529]-[.D52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41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50555555555556" calcext:value-type="float">
            <text:p>0,00250555555555556000</text:p>
          </table:table-cell>
          <table:table-cell table:formula="of:=[.D530]-[.D52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41" office:value-type="float" office:value="21689" calcext:value-type="float">
            <text:p>21689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51030092592593" calcext:value-type="float">
            <text:p>0,00251030092592593000</text:p>
          </table:table-cell>
          <table:table-cell table:formula="of:=[.D531]-[.D530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41" office:value-type="float" office:value="21730" calcext:value-type="float">
            <text:p>2173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5150462962963" calcext:value-type="float">
            <text:p>0,00251504629629630000</text:p>
          </table:table-cell>
          <table:table-cell table:formula="of:=[.D532]-[.D53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41" office:value-type="float" office:value="21771" calcext:value-type="float">
            <text:p>21771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51979166666667" calcext:value-type="float">
            <text:p>0,00251979166666667000</text:p>
          </table:table-cell>
          <table:table-cell table:formula="of:=[.D533]-[.D53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41" office:value-type="float" office:value="21812" calcext:value-type="float">
            <text:p>21812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52453703703704" calcext:value-type="float">
            <text:p>0,00252453703703704000</text:p>
          </table:table-cell>
          <table:table-cell table:formula="of:=[.D534]-[.D533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41" office:value-type="float" office:value="21853" calcext:value-type="float">
            <text:p>21853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52928240740741" calcext:value-type="float">
            <text:p>0,00252928240740741000</text:p>
          </table:table-cell>
          <table:table-cell table:formula="of:=[.D535]-[.D53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41" office:value-type="float" office:value="21894" calcext:value-type="float">
            <text:p>21894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53402777777778" calcext:value-type="float">
            <text:p>0,00253402777777778000</text:p>
          </table:table-cell>
          <table:table-cell table:formula="of:=[.D536]-[.D53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41" office:value-type="float" office:value="21935" calcext:value-type="float">
            <text:p>2193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53877314814815" calcext:value-type="float">
            <text:p>0,00253877314814815000</text:p>
          </table:table-cell>
          <table:table-cell table:formula="of:=[.D537]-[.D53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41" office:value-type="float" office:value="21976" calcext:value-type="float">
            <text:p>21976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54351851851852" calcext:value-type="float">
            <text:p>0,00254351851851852000</text:p>
          </table:table-cell>
          <table:table-cell table:formula="of:=[.D538]-[.D537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41" office:value-type="float" office:value="22017" calcext:value-type="float">
            <text:p>22017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54826388888889" calcext:value-type="float">
            <text:p>0,00254826388888889000</text:p>
          </table:table-cell>
          <table:table-cell table:formula="of:=[.D539]-[.D53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41" office:value-type="float" office:value="22058" calcext:value-type="float">
            <text:p>22058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55300925925926" calcext:value-type="float">
            <text:p>0,00255300925925926000</text:p>
          </table:table-cell>
          <table:table-cell table:formula="of:=[.D540]-[.D53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41" office:value-type="float" office:value="22099" calcext:value-type="float">
            <text:p>22099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55775462962963" calcext:value-type="float">
            <text:p>0,00255775462962963000</text:p>
          </table:table-cell>
          <table:table-cell table:formula="of:=[.D541]-[.D540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41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5625" calcext:value-type="float">
            <text:p>0,00256250000000000000</text:p>
          </table:table-cell>
          <table:table-cell table:formula="of:=[.D542]-[.D54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41" office:value-type="float" office:value="22181" calcext:value-type="float">
            <text:p>22181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56724537037037" calcext:value-type="float">
            <text:p>0,00256724537037037000</text:p>
          </table:table-cell>
          <table:table-cell table:formula="of:=[.D543]-[.D54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41" office:value-type="float" office:value="22222" calcext:value-type="float">
            <text:p>22222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57199074074074" calcext:value-type="float">
            <text:p>0,00257199074074074000</text:p>
          </table:table-cell>
          <table:table-cell table:formula="of:=[.D544]-[.D543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41" office:value-type="float" office:value="22263" calcext:value-type="float">
            <text:p>22263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57673611111111" calcext:value-type="float">
            <text:p>0,00257673611111111000</text:p>
          </table:table-cell>
          <table:table-cell table:formula="of:=[.D545]-[.D54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41" office:value-type="float" office:value="22304" calcext:value-type="float">
            <text:p>22304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58148148148148" calcext:value-type="float">
            <text:p>0,00258148148148148000</text:p>
          </table:table-cell>
          <table:table-cell table:formula="of:=[.D546]-[.D54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41" office:value-type="float" office:value="22345" calcext:value-type="float">
            <text:p>2234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58622685185185" calcext:value-type="float">
            <text:p>0,00258622685185185000</text:p>
          </table:table-cell>
          <table:table-cell table:formula="of:=[.D547]-[.D546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41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59097222222222" calcext:value-type="float">
            <text:p>0,00259097222222222000</text:p>
          </table:table-cell>
          <table:table-cell table:formula="of:=[.D548]-[.D54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41" office:value-type="float" office:value="22427" calcext:value-type="float">
            <text:p>22427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59571759259259" calcext:value-type="float">
            <text:p>0,00259571759259259000</text:p>
          </table:table-cell>
          <table:table-cell table:formula="of:=[.D549]-[.D54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41" office:value-type="float" office:value="22468" calcext:value-type="float">
            <text:p>22468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60046296296296" calcext:value-type="float">
            <text:p>0,00260046296296296000</text:p>
          </table:table-cell>
          <table:table-cell table:formula="of:=[.D550]-[.D549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41" office:value-type="float" office:value="22509" calcext:value-type="float">
            <text:p>22509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60520833333333" calcext:value-type="float">
            <text:p>0,00260520833333333000</text:p>
          </table:table-cell>
          <table:table-cell table:formula="of:=[.D551]-[.D55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41" office:value-type="float" office:value="22550" calcext:value-type="float">
            <text:p>225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6099537037037" calcext:value-type="float">
            <text:p>0,00260995370370370000</text:p>
          </table:table-cell>
          <table:table-cell table:formula="of:=[.D552]-[.D55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41" office:value-type="float" office:value="22591" calcext:value-type="float">
            <text:p>22591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61469907407407" calcext:value-type="float">
            <text:p>0,00261469907407407000</text:p>
          </table:table-cell>
          <table:table-cell table:formula="of:=[.D553]-[.D552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41" office:value-type="float" office:value="22632" calcext:value-type="float">
            <text:p>22632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61944444444444" calcext:value-type="float">
            <text:p>0,00261944444444444000</text:p>
          </table:table-cell>
          <table:table-cell table:formula="of:=[.D554]-[.D55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41" office:value-type="float" office:value="22673" calcext:value-type="float">
            <text:p>22673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62418981481482" calcext:value-type="float">
            <text:p>0,00262418981481482000</text:p>
          </table:table-cell>
          <table:table-cell table:formula="of:=[.D555]-[.D55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41" office:value-type="float" office:value="22714" calcext:value-type="float">
            <text:p>22714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62893518518519" calcext:value-type="float">
            <text:p>0,00262893518518519000</text:p>
          </table:table-cell>
          <table:table-cell table:formula="of:=[.D556]-[.D55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41" office:value-type="float" office:value="22755" calcext:value-type="float">
            <text:p>2275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63368055555556" calcext:value-type="float">
            <text:p>0,00263368055555556000</text:p>
          </table:table-cell>
          <table:table-cell table:formula="of:=[.D557]-[.D556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41" office:value-type="float" office:value="22796" calcext:value-type="float">
            <text:p>22796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63842592592593" calcext:value-type="float">
            <text:p>0,00263842592592593000</text:p>
          </table:table-cell>
          <table:table-cell table:formula="of:=[.D558]-[.D55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41" office:value-type="float" office:value="22837" calcext:value-type="float">
            <text:p>22837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6431712962963" calcext:value-type="float">
            <text:p>0,00264317129629630000</text:p>
          </table:table-cell>
          <table:table-cell table:formula="of:=[.D559]-[.D558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41" office:value-type="float" office:value="22878" calcext:value-type="float">
            <text:p>22878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64791666666667" calcext:value-type="float">
            <text:p>0,00264791666666667000</text:p>
          </table:table-cell>
          <table:table-cell table:formula="of:=[.D560]-[.D559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41" office:value-type="float" office:value="22919" calcext:value-type="float">
            <text:p>22919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65266203703704" calcext:value-type="float">
            <text:p>0,00265266203703704000</text:p>
          </table:table-cell>
          <table:table-cell table:formula="of:=[.D561]-[.D56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41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65740740740741" calcext:value-type="float">
            <text:p>0,00265740740740741000</text:p>
          </table:table-cell>
          <table:table-cell table:formula="of:=[.D562]-[.D561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41" office:value-type="float" office:value="23001" calcext:value-type="float">
            <text:p>23001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66215277777778" calcext:value-type="float">
            <text:p>0,00266215277777778000</text:p>
          </table:table-cell>
          <table:table-cell table:formula="of:=[.D563]-[.D562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41" office:value-type="float" office:value="23042" calcext:value-type="float">
            <text:p>23042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66689814814815" calcext:value-type="float">
            <text:p>0,00266689814814815000</text:p>
          </table:table-cell>
          <table:table-cell table:formula="of:=[.D564]-[.D56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41" office:value-type="float" office:value="23083" calcext:value-type="float">
            <text:p>23083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67164351851852" calcext:value-type="float">
            <text:p>0,00267164351851852000</text:p>
          </table:table-cell>
          <table:table-cell table:formula="of:=[.D565]-[.D564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41" office:value-type="float" office:value="23124" calcext:value-type="float">
            <text:p>23124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67638888888889" calcext:value-type="float">
            <text:p>0,00267638888888889000</text:p>
          </table:table-cell>
          <table:table-cell table:formula="of:=[.D566]-[.D565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41" office:value-type="float" office:value="23165" calcext:value-type="float">
            <text:p>2316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68113425925926" calcext:value-type="float">
            <text:p>0,00268113425925926000</text:p>
          </table:table-cell>
          <table:table-cell table:formula="of:=[.D567]-[.D56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41" office:value-type="float" office:value="23206" calcext:value-type="float">
            <text:p>23206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68587962962963" calcext:value-type="float">
            <text:p>0,00268587962962963000</text:p>
          </table:table-cell>
          <table:table-cell table:formula="of:=[.D568]-[.D56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41" office:value-type="float" office:value="23247" calcext:value-type="float">
            <text:p>23247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690625" calcext:value-type="float">
            <text:p>0,00269062500000000000</text:p>
          </table:table-cell>
          <table:table-cell table:formula="of:=[.D569]-[.D568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41" office:value-type="float" office:value="23288" calcext:value-type="float">
            <text:p>23288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69537037037037" calcext:value-type="float">
            <text:p>0,00269537037037037000</text:p>
          </table:table-cell>
          <table:table-cell table:formula="of:=[.D570]-[.D56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41" office:value-type="float" office:value="23329" calcext:value-type="float">
            <text:p>23329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70011574074074" calcext:value-type="float">
            <text:p>0,00270011574074074000</text:p>
          </table:table-cell>
          <table:table-cell table:formula="of:=[.D571]-[.D57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41" office:value-type="float" office:value="23370" calcext:value-type="float">
            <text:p>2337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70486111111111" calcext:value-type="float">
            <text:p>0,00270486111111111000</text:p>
          </table:table-cell>
          <table:table-cell table:formula="of:=[.D572]-[.D571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41" office:value-type="float" office:value="23411" calcext:value-type="float">
            <text:p>23411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70960648148148" calcext:value-type="float">
            <text:p>0,00270960648148148000</text:p>
          </table:table-cell>
          <table:table-cell table:formula="of:=[.D573]-[.D57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41" office:value-type="float" office:value="23452" calcext:value-type="float">
            <text:p>23452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71435185185185" calcext:value-type="float">
            <text:p>0,00271435185185185000</text:p>
          </table:table-cell>
          <table:table-cell table:formula="of:=[.D574]-[.D57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41" office:value-type="float" office:value="23493" calcext:value-type="float">
            <text:p>23493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71909722222222" calcext:value-type="float">
            <text:p>0,00271909722222222000</text:p>
          </table:table-cell>
          <table:table-cell table:formula="of:=[.D575]-[.D574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41" office:value-type="float" office:value="23534" calcext:value-type="float">
            <text:p>23534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72384259259259" calcext:value-type="float">
            <text:p>0,00272384259259259000</text:p>
          </table:table-cell>
          <table:table-cell table:formula="of:=[.D576]-[.D57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41" office:value-type="float" office:value="23575" calcext:value-type="float">
            <text:p>2357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72858796296296" calcext:value-type="float">
            <text:p>0,00272858796296296000</text:p>
          </table:table-cell>
          <table:table-cell table:formula="of:=[.D577]-[.D576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41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73333333333333" calcext:value-type="float">
            <text:p>0,00273333333333333000</text:p>
          </table:table-cell>
          <table:table-cell table:formula="of:=[.D578]-[.D577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41" office:value-type="float" office:value="23657" calcext:value-type="float">
            <text:p>23657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7380787037037" calcext:value-type="float">
            <text:p>0,00273807870370370000</text:p>
          </table:table-cell>
          <table:table-cell table:formula="of:=[.D579]-[.D578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41" office:value-type="float" office:value="23698" calcext:value-type="float">
            <text:p>23698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74282407407407" calcext:value-type="float">
            <text:p>0,00274282407407407000</text:p>
          </table:table-cell>
          <table:table-cell table:formula="of:=[.D580]-[.D579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41" office:value-type="float" office:value="23739" calcext:value-type="float">
            <text:p>23739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74756944444444" calcext:value-type="float">
            <text:p>0,00274756944444444000</text:p>
          </table:table-cell>
          <table:table-cell table:formula="of:=[.D581]-[.D580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41" office:value-type="float" office:value="23780" calcext:value-type="float">
            <text:p>2378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75231481481481" calcext:value-type="float">
            <text:p>0,00275231481481481000</text:p>
          </table:table-cell>
          <table:table-cell table:formula="of:=[.D582]-[.D581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41" office:value-type="float" office:value="23821" calcext:value-type="float">
            <text:p>23821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75706018518519" calcext:value-type="float">
            <text:p>0,00275706018518519000</text:p>
          </table:table-cell>
          <table:table-cell table:formula="of:=[.D583]-[.D582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41" office:value-type="float" office:value="23862" calcext:value-type="float">
            <text:p>23862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76180555555556" calcext:value-type="float">
            <text:p>0,00276180555555556000</text:p>
          </table:table-cell>
          <table:table-cell table:formula="of:=[.D584]-[.D583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41" office:value-type="float" office:value="23903" calcext:value-type="float">
            <text:p>23903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76655092592593" calcext:value-type="float">
            <text:p>0,00276655092592593000</text:p>
          </table:table-cell>
          <table:table-cell table:formula="of:=[.D585]-[.D584]" office:value-type="float" office:value="0.00000474537037037067" calcext:value-type="float">
            <text:p>0,0000047453703703706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41" office:value-type="float" office:value="23944" calcext:value-type="float">
            <text:p>23944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7712962962963" calcext:value-type="float">
            <text:p>0,00277129629629630000</text:p>
          </table:table-cell>
          <table:table-cell table:formula="of:=[.D586]-[.D585]" office:value-type="float" office:value="0.00000474537037037023" calcext:value-type="float">
            <text:p>0,000004745370370370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41" office:value-type="float" office:value="23985" calcext:value-type="float">
            <text:p>2398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77604166666667" calcext:value-type="float">
            <text:p>0,00277604166666667000</text:p>
          </table:table-cell>
          <table:table-cell table:formula="of:=#REF!-[.D586]" office:value-type="string" office:string-value="" calcext:value-type="error">
            <text:p>#REF!</text:p>
          </table:table-cell>
        </table:table-row>
        <table:table-row table:style-name="ro1" table:number-rows-repeated="104798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36:21.456135617</meta:creation-date>
    <dc:date>2026-05-17T17:36:32.726991584</dc:date>
    <meta:editing-duration>PT12S</meta:editing-duration>
    <meta:editing-cycles>1</meta:editing-cycles>
    <meta:document-statistic meta:table-count="1" meta:cell-count="2930" meta:object-count="0"/>
    <meta:generator>LibreOffice/24.2.7.2$Linux_X86_64 LibreOffice_project/420$Build-2</meta:generator>
  </office:meta>
</office:document-meta>
</file>