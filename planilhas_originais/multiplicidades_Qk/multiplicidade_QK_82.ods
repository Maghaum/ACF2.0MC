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8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82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949074074074074" calcext:value-type="float">
            <text:p>0,00000949074074074074</text:p>
          </table:table-cell>
          <table:table-cell table:formula="of:=[.D3]-[.D2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82" office:value-type="float" office:value="164" calcext:value-type="float">
            <text:p>16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89814814814815" calcext:value-type="float">
            <text:p>0,00001898148148148150</text:p>
          </table:table-cell>
          <table:table-cell table:formula="of:=[.D4]-[.D3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82" office:value-type="float" office:value="246" calcext:value-type="float">
            <text:p>246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84722222222222" calcext:value-type="float">
            <text:p>0,00002847222222222220</text:p>
          </table:table-cell>
          <table:table-cell table:formula="of:=[.D5]-[.D4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82" office:value-type="float" office:value="328" calcext:value-type="float">
            <text:p>32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7962962962963" calcext:value-type="float">
            <text:p>0,00003796296296296300</text:p>
          </table:table-cell>
          <table:table-cell table:formula="of:=[.D6]-[.D5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82" office:value-type="float" office:value="410" calcext:value-type="float">
            <text:p>41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74537037037037" calcext:value-type="float">
            <text:p>0,00004745370370370370</text:p>
          </table:table-cell>
          <table:table-cell table:formula="of:=[.D7]-[.D6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82" office:value-type="float" office:value="492" calcext:value-type="float">
            <text:p>49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69444444444444" calcext:value-type="float">
            <text:p>0,00005694444444444450</text:p>
          </table:table-cell>
          <table:table-cell table:formula="of:=[.D8]-[.D7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82" office:value-type="float" office:value="574" calcext:value-type="float">
            <text:p>574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664351851851852" calcext:value-type="float">
            <text:p>0,00006643518518518520</text:p>
          </table:table-cell>
          <table:table-cell table:formula="of:=[.D9]-[.D8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82" office:value-type="float" office:value="656" calcext:value-type="float">
            <text:p>65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759259259259259" calcext:value-type="float">
            <text:p>0,00007592592592592590</text:p>
          </table:table-cell>
          <table:table-cell table:formula="of:=[.D10]-[.D9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82" office:value-type="float" office:value="738" calcext:value-type="float">
            <text:p>738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854166666666667" calcext:value-type="float">
            <text:p>0,00008541666666666670</text:p>
          </table:table-cell>
          <table:table-cell table:formula="of:=[.D11]-[.D10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82" office:value-type="float" office:value="820" calcext:value-type="float">
            <text:p>82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949074074074074" calcext:value-type="float">
            <text:p>0,00009490740740740740</text:p>
          </table:table-cell>
          <table:table-cell table:formula="of:=[.D12]-[.D11]" office:value-type="float" office:value="0.00000949074074074075" calcext:value-type="float">
            <text:p>0,0000094907407407407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82" office:value-type="float" office:value="902" calcext:value-type="float">
            <text:p>902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04398148148148" calcext:value-type="float">
            <text:p>0,00010439814814814800</text:p>
          </table:table-cell>
          <table:table-cell table:formula="of:=[.D13]-[.D12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82" office:value-type="float" office:value="984" calcext:value-type="float">
            <text:p>98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13888888888889" calcext:value-type="float">
            <text:p>0,00011388888888888900</text:p>
          </table:table-cell>
          <table:table-cell table:formula="of:=[.D14]-[.D13]" office:value-type="float" office:value="0.00000949074074074075" calcext:value-type="float">
            <text:p>0,0000094907407407407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82" office:value-type="float" office:value="1066" calcext:value-type="float">
            <text:p>1066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2337962962963" calcext:value-type="float">
            <text:p>0,00012337962962963000</text:p>
          </table:table-cell>
          <table:table-cell table:formula="of:=[.D15]-[.D14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82" office:value-type="float" office:value="1148" calcext:value-type="float">
            <text:p>114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3287037037037" calcext:value-type="float">
            <text:p>0,00013287037037037000</text:p>
          </table:table-cell>
          <table:table-cell table:formula="of:=[.D16]-[.D15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82" office:value-type="float" office:value="1230" calcext:value-type="float">
            <text:p>123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42361111111111" calcext:value-type="float">
            <text:p>0,00014236111111111100</text:p>
          </table:table-cell>
          <table:table-cell table:formula="of:=[.D17]-[.D16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82" office:value-type="float" office:value="1312" calcext:value-type="float">
            <text:p>131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51851851851852" calcext:value-type="float">
            <text:p>0,00015185185185185200</text:p>
          </table:table-cell>
          <table:table-cell table:formula="of:=[.D18]-[.D17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82" office:value-type="float" office:value="1394" calcext:value-type="float">
            <text:p>1394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61342592592593" calcext:value-type="float">
            <text:p>0,00016134259259259300</text:p>
          </table:table-cell>
          <table:table-cell table:formula="of:=[.D19]-[.D18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82" office:value-type="float" office:value="1476" calcext:value-type="float">
            <text:p>147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70833333333333" calcext:value-type="float">
            <text:p>0,00017083333333333300</text:p>
          </table:table-cell>
          <table:table-cell table:formula="of:=[.D20]-[.D19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82" office:value-type="float" office:value="1558" calcext:value-type="float">
            <text:p>1558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80324074074074" calcext:value-type="float">
            <text:p>0,00018032407407407400</text:p>
          </table:table-cell>
          <table:table-cell table:formula="of:=[.D21]-[.D20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82" office:value-type="float" office:value="1640" calcext:value-type="float">
            <text:p>16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89814814814815" calcext:value-type="float">
            <text:p>0,00018981481481481500</text:p>
          </table:table-cell>
          <table:table-cell table:formula="of:=[.D22]-[.D21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82" office:value-type="float" office:value="1722" calcext:value-type="float">
            <text:p>1722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99305555555556" calcext:value-type="float">
            <text:p>0,00019930555555555600</text:p>
          </table:table-cell>
          <table:table-cell table:formula="of:=[.D23]-[.D22]" office:value-type="float" office:value="0.00000949074074074077" calcext:value-type="float">
            <text:p>0,0000094907407407407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82" office:value-type="float" office:value="1804" calcext:value-type="float">
            <text:p>180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08796296296296" calcext:value-type="float">
            <text:p>0,00020879629629629600</text:p>
          </table:table-cell>
          <table:table-cell table:formula="of:=[.D24]-[.D23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82" office:value-type="float" office:value="1886" calcext:value-type="float">
            <text:p>1886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18287037037037" calcext:value-type="float">
            <text:p>0,00021828703703703700</text:p>
          </table:table-cell>
          <table:table-cell table:formula="of:=[.D25]-[.D24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82" office:value-type="float" office:value="1968" calcext:value-type="float">
            <text:p>196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27777777777778" calcext:value-type="float">
            <text:p>0,00022777777777777800</text:p>
          </table:table-cell>
          <table:table-cell table:formula="of:=[.D26]-[.D25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82" office:value-type="float" office:value="2050" calcext:value-type="float">
            <text:p>20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37268518518519" calcext:value-type="float">
            <text:p>0,00023726851851851900</text:p>
          </table:table-cell>
          <table:table-cell table:formula="of:=[.D27]-[.D26]" office:value-type="float" office:value="0.00000949074074074077" calcext:value-type="float">
            <text:p>0,0000094907407407407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82" office:value-type="float" office:value="2132" calcext:value-type="float">
            <text:p>213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46759259259259" calcext:value-type="float">
            <text:p>0,00024675925925925900</text:p>
          </table:table-cell>
          <table:table-cell table:formula="of:=[.D28]-[.D27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82" office:value-type="float" office:value="2214" calcext:value-type="float">
            <text:p>2214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5625" calcext:value-type="float">
            <text:p>0,00025625000000000000</text:p>
          </table:table-cell>
          <table:table-cell table:formula="of:=[.D29]-[.D28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82" office:value-type="float" office:value="2296" calcext:value-type="float">
            <text:p>229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65740740740741" calcext:value-type="float">
            <text:p>0,00026574074074074100</text:p>
          </table:table-cell>
          <table:table-cell table:formula="of:=[.D30]-[.D29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82" office:value-type="float" office:value="2378" calcext:value-type="float">
            <text:p>2378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75231481481482" calcext:value-type="float">
            <text:p>0,00027523148148148200</text:p>
          </table:table-cell>
          <table:table-cell table:formula="of:=[.D31]-[.D30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82" office:value-type="float" office:value="2460" calcext:value-type="float">
            <text:p>246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84722222222222" calcext:value-type="float">
            <text:p>0,00028472222222222200</text:p>
          </table:table-cell>
          <table:table-cell table:formula="of:=[.D32]-[.D31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82" office:value-type="float" office:value="2542" calcext:value-type="float">
            <text:p>2542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94212962962963" calcext:value-type="float">
            <text:p>0,00029421296296296300</text:p>
          </table:table-cell>
          <table:table-cell table:formula="of:=[.D33]-[.D32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82" office:value-type="float" office:value="2624" calcext:value-type="float">
            <text:p>262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03703703703704" calcext:value-type="float">
            <text:p>0,00030370370370370400</text:p>
          </table:table-cell>
          <table:table-cell table:formula="of:=[.D34]-[.D33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82" office:value-type="float" office:value="2706" calcext:value-type="float">
            <text:p>2706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13194444444444" calcext:value-type="float">
            <text:p>0,00031319444444444400</text:p>
          </table:table-cell>
          <table:table-cell table:formula="of:=[.D35]-[.D34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82" office:value-type="float" office:value="2788" calcext:value-type="float">
            <text:p>278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22685185185185" calcext:value-type="float">
            <text:p>0,00032268518518518500</text:p>
          </table:table-cell>
          <table:table-cell table:formula="of:=[.D36]-[.D35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82" office:value-type="float" office:value="2870" calcext:value-type="float">
            <text:p>287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32175925925926" calcext:value-type="float">
            <text:p>0,00033217592592592600</text:p>
          </table:table-cell>
          <table:table-cell table:formula="of:=[.D37]-[.D36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82" office:value-type="float" office:value="2952" calcext:value-type="float">
            <text:p>295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41666666666667" calcext:value-type="float">
            <text:p>0,00034166666666666700</text:p>
          </table:table-cell>
          <table:table-cell table:formula="of:=[.D38]-[.D37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82" office:value-type="float" office:value="3034" calcext:value-type="float">
            <text:p>3034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51157407407407" calcext:value-type="float">
            <text:p>0,00035115740740740700</text:p>
          </table:table-cell>
          <table:table-cell table:formula="of:=[.D39]-[.D38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82" office:value-type="float" office:value="3116" calcext:value-type="float">
            <text:p>311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60648148148148" calcext:value-type="float">
            <text:p>0,00036064814814814800</text:p>
          </table:table-cell>
          <table:table-cell table:formula="of:=[.D40]-[.D39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82" office:value-type="float" office:value="3198" calcext:value-type="float">
            <text:p>3198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70138888888889" calcext:value-type="float">
            <text:p>0,00037013888888888900</text:p>
          </table:table-cell>
          <table:table-cell table:formula="of:=[.D41]-[.D40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82" office:value-type="float" office:value="3280" calcext:value-type="float">
            <text:p>32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7962962962963" calcext:value-type="float">
            <text:p>0,00037962962962963000</text:p>
          </table:table-cell>
          <table:table-cell table:formula="of:=[.D42]-[.D41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82" office:value-type="float" office:value="3362" calcext:value-type="float">
            <text:p>3362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8912037037037" calcext:value-type="float">
            <text:p>0,00038912037037037000</text:p>
          </table:table-cell>
          <table:table-cell table:formula="of:=[.D43]-[.D42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82" office:value-type="float" office:value="3444" calcext:value-type="float">
            <text:p>344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98611111111111" calcext:value-type="float">
            <text:p>0,00039861111111111100</text:p>
          </table:table-cell>
          <table:table-cell table:formula="of:=[.D44]-[.D43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82" office:value-type="float" office:value="3526" calcext:value-type="float">
            <text:p>3526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08101851851852" calcext:value-type="float">
            <text:p>0,00040810185185185200</text:p>
          </table:table-cell>
          <table:table-cell table:formula="of:=[.D45]-[.D44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82" office:value-type="float" office:value="3608" calcext:value-type="float">
            <text:p>360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17592592592593" calcext:value-type="float">
            <text:p>0,00041759259259259300</text:p>
          </table:table-cell>
          <table:table-cell table:formula="of:=[.D46]-[.D45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82" office:value-type="float" office:value="3690" calcext:value-type="float">
            <text:p>369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27083333333333" calcext:value-type="float">
            <text:p>0,00042708333333333300</text:p>
          </table:table-cell>
          <table:table-cell table:formula="of:=[.D47]-[.D46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82" office:value-type="float" office:value="3772" calcext:value-type="float">
            <text:p>377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36574074074074" calcext:value-type="float">
            <text:p>0,00043657407407407400</text:p>
          </table:table-cell>
          <table:table-cell table:formula="of:=[.D48]-[.D47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82" office:value-type="float" office:value="3854" calcext:value-type="float">
            <text:p>3854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46064814814815" calcext:value-type="float">
            <text:p>0,00044606481481481500</text:p>
          </table:table-cell>
          <table:table-cell table:formula="of:=[.D49]-[.D48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82" office:value-type="float" office:value="3936" calcext:value-type="float">
            <text:p>393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55555555555556" calcext:value-type="float">
            <text:p>0,00045555555555555600</text:p>
          </table:table-cell>
          <table:table-cell table:formula="of:=[.D50]-[.D49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82" office:value-type="float" office:value="4018" calcext:value-type="float">
            <text:p>4018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65046296296296" calcext:value-type="float">
            <text:p>0,00046504629629629600</text:p>
          </table:table-cell>
          <table:table-cell table:formula="of:=[.D51]-[.D50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82" office:value-type="float" office:value="4100" calcext:value-type="float">
            <text:p>41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74537037037037" calcext:value-type="float">
            <text:p>0,00047453703703703700</text:p>
          </table:table-cell>
          <table:table-cell table:formula="of:=[.D52]-[.D51]" office:value-type="float" office:value="0.00000949074074074074" calcext:value-type="float">
            <text:p>0,0000094907407407407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82" office:value-type="float" office:value="4182" calcext:value-type="float">
            <text:p>4182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84027777777778" calcext:value-type="float">
            <text:p>0,00048402777777777800</text:p>
          </table:table-cell>
          <table:table-cell table:formula="of:=[.D53]-[.D52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82" office:value-type="float" office:value="4264" calcext:value-type="float">
            <text:p>426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93518518518519" calcext:value-type="float">
            <text:p>0,00049351851851851900</text:p>
          </table:table-cell>
          <table:table-cell table:formula="of:=[.D54]-[.D53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82" office:value-type="float" office:value="4346" calcext:value-type="float">
            <text:p>4346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03009259259259" calcext:value-type="float">
            <text:p>0,00050300925925925900</text:p>
          </table:table-cell>
          <table:table-cell table:formula="of:=[.D55]-[.D54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82" office:value-type="float" office:value="4428" calcext:value-type="float">
            <text:p>442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125" calcext:value-type="float">
            <text:p>0,00051250000000000000</text:p>
          </table:table-cell>
          <table:table-cell table:formula="of:=[.D56]-[.D55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82" office:value-type="float" office:value="4510" calcext:value-type="float">
            <text:p>451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21990740740741" calcext:value-type="float">
            <text:p>0,00052199074074074100</text:p>
          </table:table-cell>
          <table:table-cell table:formula="of:=[.D57]-[.D56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82" office:value-type="float" office:value="4592" calcext:value-type="float">
            <text:p>459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31481481481482" calcext:value-type="float">
            <text:p>0,00053148148148148200</text:p>
          </table:table-cell>
          <table:table-cell table:formula="of:=[.D58]-[.D57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82" office:value-type="float" office:value="4674" calcext:value-type="float">
            <text:p>4674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40972222222222" calcext:value-type="float">
            <text:p>0,00054097222222222200</text:p>
          </table:table-cell>
          <table:table-cell table:formula="of:=[.D59]-[.D58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82" office:value-type="float" office:value="4756" calcext:value-type="float">
            <text:p>475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50462962962963" calcext:value-type="float">
            <text:p>0,00055046296296296300</text:p>
          </table:table-cell>
          <table:table-cell table:formula="of:=[.D60]-[.D59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82" office:value-type="float" office:value="4838" calcext:value-type="float">
            <text:p>4838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559953703703704" calcext:value-type="float">
            <text:p>0,00055995370370370400</text:p>
          </table:table-cell>
          <table:table-cell table:formula="of:=[.D61]-[.D60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82" office:value-type="float" office:value="4920" calcext:value-type="float">
            <text:p>49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69444444444445" calcext:value-type="float">
            <text:p>0,00056944444444444500</text:p>
          </table:table-cell>
          <table:table-cell table:formula="of:=[.D62]-[.D61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82" office:value-type="float" office:value="5002" calcext:value-type="float">
            <text:p>5002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578935185185185" calcext:value-type="float">
            <text:p>0,00057893518518518500</text:p>
          </table:table-cell>
          <table:table-cell table:formula="of:=[.D63]-[.D62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82" office:value-type="float" office:value="5084" calcext:value-type="float">
            <text:p>508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588425925925926" calcext:value-type="float">
            <text:p>0,00058842592592592600</text:p>
          </table:table-cell>
          <table:table-cell table:formula="of:=[.D64]-[.D63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82" office:value-type="float" office:value="5166" calcext:value-type="float">
            <text:p>5166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597916666666667" calcext:value-type="float">
            <text:p>0,00059791666666666700</text:p>
          </table:table-cell>
          <table:table-cell table:formula="of:=[.D65]-[.D64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82" office:value-type="float" office:value="5248" calcext:value-type="float">
            <text:p>524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607407407407407" calcext:value-type="float">
            <text:p>0,00060740740740740700</text:p>
          </table:table-cell>
          <table:table-cell table:formula="of:=[.D66]-[.D65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82" office:value-type="float" office:value="5330" calcext:value-type="float">
            <text:p>533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616898148148148" calcext:value-type="float">
            <text:p>0,00061689814814814800</text:p>
          </table:table-cell>
          <table:table-cell table:formula="of:=[.D67]-[.D66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82" office:value-type="float" office:value="5412" calcext:value-type="float">
            <text:p>541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626388888888889" calcext:value-type="float">
            <text:p>0,00062638888888888900</text:p>
          </table:table-cell>
          <table:table-cell table:formula="of:=[.D68]-[.D67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82" office:value-type="float" office:value="5494" calcext:value-type="float">
            <text:p>5494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63587962962963" calcext:value-type="float">
            <text:p>0,00063587962962963000</text:p>
          </table:table-cell>
          <table:table-cell table:formula="of:=[.D69]-[.D68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82" office:value-type="float" office:value="5576" calcext:value-type="float">
            <text:p>557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64537037037037" calcext:value-type="float">
            <text:p>0,00064537037037037000</text:p>
          </table:table-cell>
          <table:table-cell table:formula="of:=[.D70]-[.D69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82" office:value-type="float" office:value="5658" calcext:value-type="float">
            <text:p>5658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654861111111111" calcext:value-type="float">
            <text:p>0,00065486111111111100</text:p>
          </table:table-cell>
          <table:table-cell table:formula="of:=[.D71]-[.D70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82" office:value-type="float" office:value="5740" calcext:value-type="float">
            <text:p>574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664351851851852" calcext:value-type="float">
            <text:p>0,00066435185185185200</text:p>
          </table:table-cell>
          <table:table-cell table:formula="of:=[.D72]-[.D71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82" office:value-type="float" office:value="5822" calcext:value-type="float">
            <text:p>5822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673842592592593" calcext:value-type="float">
            <text:p>0,00067384259259259300</text:p>
          </table:table-cell>
          <table:table-cell table:formula="of:=[.D73]-[.D72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82" office:value-type="float" office:value="5904" calcext:value-type="float">
            <text:p>590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683333333333333" calcext:value-type="float">
            <text:p>0,00068333333333333300</text:p>
          </table:table-cell>
          <table:table-cell table:formula="of:=[.D74]-[.D73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82" office:value-type="float" office:value="5986" calcext:value-type="float">
            <text:p>5986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692824074074074" calcext:value-type="float">
            <text:p>0,00069282407407407400</text:p>
          </table:table-cell>
          <table:table-cell table:formula="of:=[.D75]-[.D74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82" office:value-type="float" office:value="6068" calcext:value-type="float">
            <text:p>606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702314814814815" calcext:value-type="float">
            <text:p>0,00070231481481481500</text:p>
          </table:table-cell>
          <table:table-cell table:formula="of:=[.D76]-[.D75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82" office:value-type="float" office:value="6150" calcext:value-type="float">
            <text:p>61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711805555555556" calcext:value-type="float">
            <text:p>0,00071180555555555600</text:p>
          </table:table-cell>
          <table:table-cell table:formula="of:=[.D77]-[.D76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82" office:value-type="float" office:value="6232" calcext:value-type="float">
            <text:p>623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721296296296296" calcext:value-type="float">
            <text:p>0,00072129629629629600</text:p>
          </table:table-cell>
          <table:table-cell table:formula="of:=[.D78]-[.D77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82" office:value-type="float" office:value="6314" calcext:value-type="float">
            <text:p>6314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730787037037037" calcext:value-type="float">
            <text:p>0,00073078703703703700</text:p>
          </table:table-cell>
          <table:table-cell table:formula="of:=[.D79]-[.D78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82" office:value-type="float" office:value="6396" calcext:value-type="float">
            <text:p>639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740277777777778" calcext:value-type="float">
            <text:p>0,00074027777777777800</text:p>
          </table:table-cell>
          <table:table-cell table:formula="of:=[.D80]-[.D79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82" office:value-type="float" office:value="6478" calcext:value-type="float">
            <text:p>6478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749768518518519" calcext:value-type="float">
            <text:p>0,00074976851851851900</text:p>
          </table:table-cell>
          <table:table-cell table:formula="of:=[.D81]-[.D80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82" office:value-type="float" office:value="6560" calcext:value-type="float">
            <text:p>65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759259259259259" calcext:value-type="float">
            <text:p>0,00075925925925925900</text:p>
          </table:table-cell>
          <table:table-cell table:formula="of:=[.D82]-[.D81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82" office:value-type="float" office:value="6642" calcext:value-type="float">
            <text:p>6642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76875" calcext:value-type="float">
            <text:p>0,00076875000000000000</text:p>
          </table:table-cell>
          <table:table-cell table:formula="of:=[.D83]-[.D82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82" office:value-type="float" office:value="6724" calcext:value-type="float">
            <text:p>672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778240740740741" calcext:value-type="float">
            <text:p>0,00077824074074074100</text:p>
          </table:table-cell>
          <table:table-cell table:formula="of:=[.D84]-[.D83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82" office:value-type="float" office:value="6806" calcext:value-type="float">
            <text:p>6806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787731481481482" calcext:value-type="float">
            <text:p>0,00078773148148148200</text:p>
          </table:table-cell>
          <table:table-cell table:formula="of:=[.D85]-[.D84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82" office:value-type="float" office:value="6888" calcext:value-type="float">
            <text:p>688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797222222222222" calcext:value-type="float">
            <text:p>0,00079722222222222200</text:p>
          </table:table-cell>
          <table:table-cell table:formula="of:=[.D86]-[.D85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82" office:value-type="float" office:value="6970" calcext:value-type="float">
            <text:p>697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806712962962963" calcext:value-type="float">
            <text:p>0,00080671296296296300</text:p>
          </table:table-cell>
          <table:table-cell table:formula="of:=[.D87]-[.D86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82" office:value-type="float" office:value="7052" calcext:value-type="float">
            <text:p>705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816203703703704" calcext:value-type="float">
            <text:p>0,00081620370370370400</text:p>
          </table:table-cell>
          <table:table-cell table:formula="of:=[.D88]-[.D87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82" office:value-type="float" office:value="7134" calcext:value-type="float">
            <text:p>7134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825694444444444" calcext:value-type="float">
            <text:p>0,00082569444444444400</text:p>
          </table:table-cell>
          <table:table-cell table:formula="of:=[.D89]-[.D88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82" office:value-type="float" office:value="7216" calcext:value-type="float">
            <text:p>721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835185185185185" calcext:value-type="float">
            <text:p>0,00083518518518518500</text:p>
          </table:table-cell>
          <table:table-cell table:formula="of:=[.D90]-[.D89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82" office:value-type="float" office:value="7298" calcext:value-type="float">
            <text:p>7298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844675925925926" calcext:value-type="float">
            <text:p>0,00084467592592592600</text:p>
          </table:table-cell>
          <table:table-cell table:formula="of:=[.D91]-[.D90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82" office:value-type="float" office:value="7380" calcext:value-type="float">
            <text:p>738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854166666666667" calcext:value-type="float">
            <text:p>0,00085416666666666700</text:p>
          </table:table-cell>
          <table:table-cell table:formula="of:=[.D92]-[.D91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82" office:value-type="float" office:value="7462" calcext:value-type="float">
            <text:p>7462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863657407407407" calcext:value-type="float">
            <text:p>0,00086365740740740700</text:p>
          </table:table-cell>
          <table:table-cell table:formula="of:=[.D93]-[.D92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82" office:value-type="float" office:value="7544" calcext:value-type="float">
            <text:p>754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873148148148148" calcext:value-type="float">
            <text:p>0,00087314814814814800</text:p>
          </table:table-cell>
          <table:table-cell table:formula="of:=[.D94]-[.D93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82" office:value-type="float" office:value="7626" calcext:value-type="float">
            <text:p>7626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882638888888889" calcext:value-type="float">
            <text:p>0,00088263888888888900</text:p>
          </table:table-cell>
          <table:table-cell table:formula="of:=[.D95]-[.D94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82" office:value-type="float" office:value="7708" calcext:value-type="float">
            <text:p>770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89212962962963" calcext:value-type="float">
            <text:p>0,00089212962962963000</text:p>
          </table:table-cell>
          <table:table-cell table:formula="of:=[.D96]-[.D95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82" office:value-type="float" office:value="7790" calcext:value-type="float">
            <text:p>779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90162037037037" calcext:value-type="float">
            <text:p>0,00090162037037037000</text:p>
          </table:table-cell>
          <table:table-cell table:formula="of:=[.D97]-[.D96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82" office:value-type="float" office:value="7872" calcext:value-type="float">
            <text:p>787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911111111111111" calcext:value-type="float">
            <text:p>0,00091111111111111100</text:p>
          </table:table-cell>
          <table:table-cell table:formula="of:=[.D98]-[.D97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82" office:value-type="float" office:value="7954" calcext:value-type="float">
            <text:p>7954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920601851851852" calcext:value-type="float">
            <text:p>0,00092060185185185200</text:p>
          </table:table-cell>
          <table:table-cell table:formula="of:=[.D99]-[.D98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82" office:value-type="float" office:value="8036" calcext:value-type="float">
            <text:p>803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930092592592593" calcext:value-type="float">
            <text:p>0,00093009259259259300</text:p>
          </table:table-cell>
          <table:table-cell table:formula="of:=[.D100]-[.D99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82" office:value-type="float" office:value="8118" calcext:value-type="float">
            <text:p>8118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939583333333333" calcext:value-type="float">
            <text:p>0,00093958333333333300</text:p>
          </table:table-cell>
          <table:table-cell table:formula="of:=[.D101]-[.D100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82" office:value-type="float" office:value="8200" calcext:value-type="float">
            <text:p>82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949074074074074" calcext:value-type="float">
            <text:p>0,00094907407407407400</text:p>
          </table:table-cell>
          <table:table-cell table:formula="of:=[.D102]-[.D101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82" office:value-type="float" office:value="8282" calcext:value-type="float">
            <text:p>8282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958564814814815" calcext:value-type="float">
            <text:p>0,00095856481481481500</text:p>
          </table:table-cell>
          <table:table-cell table:formula="of:=[.D103]-[.D102]" office:value-type="float" office:value="0.00000949074074074079" calcext:value-type="float">
            <text:p>0,00000949074074074079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82" office:value-type="float" office:value="8364" calcext:value-type="float">
            <text:p>836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968055555555556" calcext:value-type="float">
            <text:p>0,00096805555555555600</text:p>
          </table:table-cell>
          <table:table-cell table:formula="of:=[.D104]-[.D103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82" office:value-type="float" office:value="8446" calcext:value-type="float">
            <text:p>8446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977546296296296" calcext:value-type="float">
            <text:p>0,00097754629629629600</text:p>
          </table:table-cell>
          <table:table-cell table:formula="of:=[.D105]-[.D104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82" office:value-type="float" office:value="8528" calcext:value-type="float">
            <text:p>852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987037037037037" calcext:value-type="float">
            <text:p>0,00098703703703703700</text:p>
          </table:table-cell>
          <table:table-cell table:formula="of:=[.D106]-[.D105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82" office:value-type="float" office:value="8610" calcext:value-type="float">
            <text:p>861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996527777777778" calcext:value-type="float">
            <text:p>0,00099652777777777800</text:p>
          </table:table-cell>
          <table:table-cell table:formula="of:=[.D107]-[.D106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82" office:value-type="float" office:value="8692" calcext:value-type="float">
            <text:p>869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00601851851852" calcext:value-type="float">
            <text:p>0,00100601851851852000</text:p>
          </table:table-cell>
          <table:table-cell table:formula="of:=[.D108]-[.D107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82" office:value-type="float" office:value="8774" calcext:value-type="float">
            <text:p>8774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01550925925926" calcext:value-type="float">
            <text:p>0,00101550925925926000</text:p>
          </table:table-cell>
          <table:table-cell table:formula="of:=[.D109]-[.D108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82" office:value-type="float" office:value="8856" calcext:value-type="float">
            <text:p>885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025" calcext:value-type="float">
            <text:p>0,00102500000000000000</text:p>
          </table:table-cell>
          <table:table-cell table:formula="of:=[.D110]-[.D109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82" office:value-type="float" office:value="8938" calcext:value-type="float">
            <text:p>8938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03449074074074" calcext:value-type="float">
            <text:p>0,00103449074074074000</text:p>
          </table:table-cell>
          <table:table-cell table:formula="of:=[.D111]-[.D110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82" office:value-type="float" office:value="9020" calcext:value-type="float">
            <text:p>902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04398148148148" calcext:value-type="float">
            <text:p>0,00104398148148148000</text:p>
          </table:table-cell>
          <table:table-cell table:formula="of:=[.D112]-[.D111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82" office:value-type="float" office:value="9102" calcext:value-type="float">
            <text:p>9102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05347222222222" calcext:value-type="float">
            <text:p>0,00105347222222222000</text:p>
          </table:table-cell>
          <table:table-cell table:formula="of:=[.D113]-[.D112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82" office:value-type="float" office:value="9184" calcext:value-type="float">
            <text:p>918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06296296296296" calcext:value-type="float">
            <text:p>0,00106296296296296000</text:p>
          </table:table-cell>
          <table:table-cell table:formula="of:=[.D114]-[.D113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82" office:value-type="float" office:value="9266" calcext:value-type="float">
            <text:p>9266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0724537037037" calcext:value-type="float">
            <text:p>0,00107245370370370000</text:p>
          </table:table-cell>
          <table:table-cell table:formula="of:=[.D115]-[.D114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82" office:value-type="float" office:value="9348" calcext:value-type="float">
            <text:p>934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08194444444444" calcext:value-type="float">
            <text:p>0,00108194444444444000</text:p>
          </table:table-cell>
          <table:table-cell table:formula="of:=[.D116]-[.D115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82" office:value-type="float" office:value="9430" calcext:value-type="float">
            <text:p>943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09143518518519" calcext:value-type="float">
            <text:p>0,00109143518518519000</text:p>
          </table:table-cell>
          <table:table-cell table:formula="of:=[.D117]-[.D116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82" office:value-type="float" office:value="9512" calcext:value-type="float">
            <text:p>951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10092592592593" calcext:value-type="float">
            <text:p>0,00110092592592593000</text:p>
          </table:table-cell>
          <table:table-cell table:formula="of:=[.D118]-[.D117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82" office:value-type="float" office:value="9594" calcext:value-type="float">
            <text:p>9594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11041666666667" calcext:value-type="float">
            <text:p>0,00111041666666667000</text:p>
          </table:table-cell>
          <table:table-cell table:formula="of:=[.D119]-[.D118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82" office:value-type="float" office:value="9676" calcext:value-type="float">
            <text:p>967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11990740740741" calcext:value-type="float">
            <text:p>0,00111990740740741000</text:p>
          </table:table-cell>
          <table:table-cell table:formula="of:=[.D120]-[.D119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82" office:value-type="float" office:value="9758" calcext:value-type="float">
            <text:p>9758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12939814814815" calcext:value-type="float">
            <text:p>0,00112939814814815000</text:p>
          </table:table-cell>
          <table:table-cell table:formula="of:=[.D121]-[.D120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82" office:value-type="float" office:value="9840" calcext:value-type="float">
            <text:p>98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13888888888889" calcext:value-type="float">
            <text:p>0,00113888888888889000</text:p>
          </table:table-cell>
          <table:table-cell table:formula="of:=[.D122]-[.D121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82" office:value-type="float" office:value="9922" calcext:value-type="float">
            <text:p>9922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14837962962963" calcext:value-type="float">
            <text:p>0,00114837962962963000</text:p>
          </table:table-cell>
          <table:table-cell table:formula="of:=[.D123]-[.D122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82" office:value-type="float" office:value="10004" calcext:value-type="float">
            <text:p>1000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15787037037037" calcext:value-type="float">
            <text:p>0,00115787037037037000</text:p>
          </table:table-cell>
          <table:table-cell table:formula="of:=[.D124]-[.D123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82" office:value-type="float" office:value="10086" calcext:value-type="float">
            <text:p>10086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16736111111111" calcext:value-type="float">
            <text:p>0,00116736111111111000</text:p>
          </table:table-cell>
          <table:table-cell table:formula="of:=[.D125]-[.D124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82" office:value-type="float" office:value="10168" calcext:value-type="float">
            <text:p>1016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17685185185185" calcext:value-type="float">
            <text:p>0,00117685185185185000</text:p>
          </table:table-cell>
          <table:table-cell table:formula="of:=[.D126]-[.D125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82" office:value-type="float" office:value="10250" calcext:value-type="float">
            <text:p>102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18634259259259" calcext:value-type="float">
            <text:p>0,00118634259259259000</text:p>
          </table:table-cell>
          <table:table-cell table:formula="of:=[.D127]-[.D126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82" office:value-type="float" office:value="10332" calcext:value-type="float">
            <text:p>1033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19583333333333" calcext:value-type="float">
            <text:p>0,00119583333333333000</text:p>
          </table:table-cell>
          <table:table-cell table:formula="of:=[.D128]-[.D127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82" office:value-type="float" office:value="10414" calcext:value-type="float">
            <text:p>10414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20532407407407" calcext:value-type="float">
            <text:p>0,00120532407407407000</text:p>
          </table:table-cell>
          <table:table-cell table:formula="of:=[.D129]-[.D128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82" office:value-type="float" office:value="10496" calcext:value-type="float">
            <text:p>1049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21481481481481" calcext:value-type="float">
            <text:p>0,00121481481481481000</text:p>
          </table:table-cell>
          <table:table-cell table:formula="of:=[.D130]-[.D129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82" office:value-type="float" office:value="10578" calcext:value-type="float">
            <text:p>10578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22430555555556" calcext:value-type="float">
            <text:p>0,00122430555555556000</text:p>
          </table:table-cell>
          <table:table-cell table:formula="of:=[.D131]-[.D130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82" office:value-type="float" office:value="10660" calcext:value-type="float">
            <text:p>1066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2337962962963" calcext:value-type="float">
            <text:p>0,00123379629629630000</text:p>
          </table:table-cell>
          <table:table-cell table:formula="of:=[.D132]-[.D131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82" office:value-type="float" office:value="10742" calcext:value-type="float">
            <text:p>10742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24328703703704" calcext:value-type="float">
            <text:p>0,00124328703703704000</text:p>
          </table:table-cell>
          <table:table-cell table:formula="of:=[.D133]-[.D132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82" office:value-type="float" office:value="10824" calcext:value-type="float">
            <text:p>1082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25277777777778" calcext:value-type="float">
            <text:p>0,00125277777777778000</text:p>
          </table:table-cell>
          <table:table-cell table:formula="of:=[.D134]-[.D133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82" office:value-type="float" office:value="10906" calcext:value-type="float">
            <text:p>10906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26226851851852" calcext:value-type="float">
            <text:p>0,00126226851851852000</text:p>
          </table:table-cell>
          <table:table-cell table:formula="of:=[.D135]-[.D134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82" office:value-type="float" office:value="10988" calcext:value-type="float">
            <text:p>1098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27175925925926" calcext:value-type="float">
            <text:p>0,00127175925925926000</text:p>
          </table:table-cell>
          <table:table-cell table:formula="of:=[.D136]-[.D135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82" office:value-type="float" office:value="11070" calcext:value-type="float">
            <text:p>1107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28125" calcext:value-type="float">
            <text:p>0,00128125000000000000</text:p>
          </table:table-cell>
          <table:table-cell table:formula="of:=[.D137]-[.D136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82" office:value-type="float" office:value="11152" calcext:value-type="float">
            <text:p>1115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29074074074074" calcext:value-type="float">
            <text:p>0,00129074074074074000</text:p>
          </table:table-cell>
          <table:table-cell table:formula="of:=[.D138]-[.D137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82" office:value-type="float" office:value="11234" calcext:value-type="float">
            <text:p>11234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30023148148148" calcext:value-type="float">
            <text:p>0,00130023148148148000</text:p>
          </table:table-cell>
          <table:table-cell table:formula="of:=[.D139]-[.D138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82" office:value-type="float" office:value="11316" calcext:value-type="float">
            <text:p>1131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30972222222222" calcext:value-type="float">
            <text:p>0,00130972222222222000</text:p>
          </table:table-cell>
          <table:table-cell table:formula="of:=[.D140]-[.D139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82" office:value-type="float" office:value="11398" calcext:value-type="float">
            <text:p>11398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31921296296296" calcext:value-type="float">
            <text:p>0,00131921296296296000</text:p>
          </table:table-cell>
          <table:table-cell table:formula="of:=[.D141]-[.D140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82" office:value-type="float" office:value="11480" calcext:value-type="float">
            <text:p>114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3287037037037" calcext:value-type="float">
            <text:p>0,00132870370370370000</text:p>
          </table:table-cell>
          <table:table-cell table:formula="of:=[.D142]-[.D141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82" office:value-type="float" office:value="11562" calcext:value-type="float">
            <text:p>11562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33819444444444" calcext:value-type="float">
            <text:p>0,00133819444444444000</text:p>
          </table:table-cell>
          <table:table-cell table:formula="of:=[.D143]-[.D142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82" office:value-type="float" office:value="11644" calcext:value-type="float">
            <text:p>1164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34768518518519" calcext:value-type="float">
            <text:p>0,00134768518518519000</text:p>
          </table:table-cell>
          <table:table-cell table:formula="of:=[.D144]-[.D143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82" office:value-type="float" office:value="11726" calcext:value-type="float">
            <text:p>11726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35717592592593" calcext:value-type="float">
            <text:p>0,00135717592592593000</text:p>
          </table:table-cell>
          <table:table-cell table:formula="of:=[.D145]-[.D144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82" office:value-type="float" office:value="11808" calcext:value-type="float">
            <text:p>1180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36666666666667" calcext:value-type="float">
            <text:p>0,00136666666666667000</text:p>
          </table:table-cell>
          <table:table-cell table:formula="of:=[.D146]-[.D145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82" office:value-type="float" office:value="11890" calcext:value-type="float">
            <text:p>1189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37615740740741" calcext:value-type="float">
            <text:p>0,00137615740740741000</text:p>
          </table:table-cell>
          <table:table-cell table:formula="of:=[.D147]-[.D146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82" office:value-type="float" office:value="11972" calcext:value-type="float">
            <text:p>1197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38564814814815" calcext:value-type="float">
            <text:p>0,00138564814814815000</text:p>
          </table:table-cell>
          <table:table-cell table:formula="of:=[.D148]-[.D147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82" office:value-type="float" office:value="12054" calcext:value-type="float">
            <text:p>12054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39513888888889" calcext:value-type="float">
            <text:p>0,00139513888888889000</text:p>
          </table:table-cell>
          <table:table-cell table:formula="of:=[.D149]-[.D148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82" office:value-type="float" office:value="12136" calcext:value-type="float">
            <text:p>1213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40462962962963" calcext:value-type="float">
            <text:p>0,00140462962962963000</text:p>
          </table:table-cell>
          <table:table-cell table:formula="of:=[.D150]-[.D149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82" office:value-type="float" office:value="12218" calcext:value-type="float">
            <text:p>12218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41412037037037" calcext:value-type="float">
            <text:p>0,00141412037037037000</text:p>
          </table:table-cell>
          <table:table-cell table:formula="of:=[.D151]-[.D150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82" office:value-type="float" office:value="12300" calcext:value-type="float">
            <text:p>123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42361111111111" calcext:value-type="float">
            <text:p>0,00142361111111111000</text:p>
          </table:table-cell>
          <table:table-cell table:formula="of:=[.D152]-[.D151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82" office:value-type="float" office:value="12382" calcext:value-type="float">
            <text:p>12382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43310185185185" calcext:value-type="float">
            <text:p>0,00143310185185185000</text:p>
          </table:table-cell>
          <table:table-cell table:formula="of:=[.D153]-[.D152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82" office:value-type="float" office:value="12464" calcext:value-type="float">
            <text:p>1246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44259259259259" calcext:value-type="float">
            <text:p>0,00144259259259259000</text:p>
          </table:table-cell>
          <table:table-cell table:formula="of:=[.D154]-[.D153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82" office:value-type="float" office:value="12546" calcext:value-type="float">
            <text:p>12546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45208333333333" calcext:value-type="float">
            <text:p>0,00145208333333333000</text:p>
          </table:table-cell>
          <table:table-cell table:formula="of:=[.D155]-[.D154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82" office:value-type="float" office:value="12628" calcext:value-type="float">
            <text:p>1262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46157407407407" calcext:value-type="float">
            <text:p>0,00146157407407407000</text:p>
          </table:table-cell>
          <table:table-cell table:formula="of:=[.D156]-[.D155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82" office:value-type="float" office:value="12710" calcext:value-type="float">
            <text:p>1271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47106481481481" calcext:value-type="float">
            <text:p>0,00147106481481481000</text:p>
          </table:table-cell>
          <table:table-cell table:formula="of:=[.D157]-[.D156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82" office:value-type="float" office:value="12792" calcext:value-type="float">
            <text:p>1279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48055555555556" calcext:value-type="float">
            <text:p>0,00148055555555556000</text:p>
          </table:table-cell>
          <table:table-cell table:formula="of:=[.D158]-[.D157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82" office:value-type="float" office:value="12874" calcext:value-type="float">
            <text:p>12874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4900462962963" calcext:value-type="float">
            <text:p>0,00149004629629630000</text:p>
          </table:table-cell>
          <table:table-cell table:formula="of:=[.D159]-[.D158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82" office:value-type="float" office:value="12956" calcext:value-type="float">
            <text:p>1295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49953703703704" calcext:value-type="float">
            <text:p>0,00149953703703704000</text:p>
          </table:table-cell>
          <table:table-cell table:formula="of:=[.D160]-[.D159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82" office:value-type="float" office:value="13038" calcext:value-type="float">
            <text:p>13038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50902777777778" calcext:value-type="float">
            <text:p>0,00150902777777778000</text:p>
          </table:table-cell>
          <table:table-cell table:formula="of:=[.D161]-[.D160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82" office:value-type="float" office:value="13120" calcext:value-type="float">
            <text:p>131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51851851851852" calcext:value-type="float">
            <text:p>0,00151851851851852000</text:p>
          </table:table-cell>
          <table:table-cell table:formula="of:=[.D162]-[.D161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82" office:value-type="float" office:value="13202" calcext:value-type="float">
            <text:p>13202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52800925925926" calcext:value-type="float">
            <text:p>0,00152800925925926000</text:p>
          </table:table-cell>
          <table:table-cell table:formula="of:=[.D163]-[.D162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82" office:value-type="float" office:value="13284" calcext:value-type="float">
            <text:p>1328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5375" calcext:value-type="float">
            <text:p>0,00153750000000000000</text:p>
          </table:table-cell>
          <table:table-cell table:formula="of:=[.D164]-[.D163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82" office:value-type="float" office:value="13366" calcext:value-type="float">
            <text:p>13366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54699074074074" calcext:value-type="float">
            <text:p>0,00154699074074074000</text:p>
          </table:table-cell>
          <table:table-cell table:formula="of:=[.D165]-[.D164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82" office:value-type="float" office:value="13448" calcext:value-type="float">
            <text:p>1344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55648148148148" calcext:value-type="float">
            <text:p>0,00155648148148148000</text:p>
          </table:table-cell>
          <table:table-cell table:formula="of:=[.D166]-[.D165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82" office:value-type="float" office:value="13530" calcext:value-type="float">
            <text:p>1353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56597222222222" calcext:value-type="float">
            <text:p>0,00156597222222222000</text:p>
          </table:table-cell>
          <table:table-cell table:formula="of:=[.D167]-[.D166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82" office:value-type="float" office:value="13612" calcext:value-type="float">
            <text:p>1361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57546296296296" calcext:value-type="float">
            <text:p>0,00157546296296296000</text:p>
          </table:table-cell>
          <table:table-cell table:formula="of:=[.D168]-[.D167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82" office:value-type="float" office:value="13694" calcext:value-type="float">
            <text:p>13694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5849537037037" calcext:value-type="float">
            <text:p>0,00158495370370370000</text:p>
          </table:table-cell>
          <table:table-cell table:formula="of:=[.D169]-[.D168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82" office:value-type="float" office:value="13776" calcext:value-type="float">
            <text:p>1377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59444444444444" calcext:value-type="float">
            <text:p>0,00159444444444444000</text:p>
          </table:table-cell>
          <table:table-cell table:formula="of:=[.D170]-[.D169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82" office:value-type="float" office:value="13858" calcext:value-type="float">
            <text:p>13858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60393518518519" calcext:value-type="float">
            <text:p>0,00160393518518519000</text:p>
          </table:table-cell>
          <table:table-cell table:formula="of:=[.D171]-[.D170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82" office:value-type="float" office:value="13940" calcext:value-type="float">
            <text:p>1394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61342592592593" calcext:value-type="float">
            <text:p>0,00161342592592593000</text:p>
          </table:table-cell>
          <table:table-cell table:formula="of:=[.D172]-[.D171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82" office:value-type="float" office:value="14022" calcext:value-type="float">
            <text:p>14022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62291666666667" calcext:value-type="float">
            <text:p>0,00162291666666667000</text:p>
          </table:table-cell>
          <table:table-cell table:formula="of:=[.D173]-[.D172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82" office:value-type="float" office:value="14104" calcext:value-type="float">
            <text:p>1410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63240740740741" calcext:value-type="float">
            <text:p>0,00163240740740741000</text:p>
          </table:table-cell>
          <table:table-cell table:formula="of:=[.D174]-[.D173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82" office:value-type="float" office:value="14186" calcext:value-type="float">
            <text:p>14186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64189814814815" calcext:value-type="float">
            <text:p>0,00164189814814815000</text:p>
          </table:table-cell>
          <table:table-cell table:formula="of:=[.D175]-[.D174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82" office:value-type="float" office:value="14268" calcext:value-type="float">
            <text:p>1426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65138888888889" calcext:value-type="float">
            <text:p>0,00165138888888889000</text:p>
          </table:table-cell>
          <table:table-cell table:formula="of:=[.D176]-[.D175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82" office:value-type="float" office:value="14350" calcext:value-type="float">
            <text:p>143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66087962962963" calcext:value-type="float">
            <text:p>0,00166087962962963000</text:p>
          </table:table-cell>
          <table:table-cell table:formula="of:=[.D177]-[.D176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82" office:value-type="float" office:value="14432" calcext:value-type="float">
            <text:p>1443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67037037037037" calcext:value-type="float">
            <text:p>0,00167037037037037000</text:p>
          </table:table-cell>
          <table:table-cell table:formula="of:=[.D178]-[.D177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82" office:value-type="float" office:value="14514" calcext:value-type="float">
            <text:p>14514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67986111111111" calcext:value-type="float">
            <text:p>0,00167986111111111000</text:p>
          </table:table-cell>
          <table:table-cell table:formula="of:=[.D179]-[.D178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82" office:value-type="float" office:value="14596" calcext:value-type="float">
            <text:p>1459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68935185185185" calcext:value-type="float">
            <text:p>0,00168935185185185000</text:p>
          </table:table-cell>
          <table:table-cell table:formula="of:=[.D180]-[.D179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82" office:value-type="float" office:value="14678" calcext:value-type="float">
            <text:p>14678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69884259259259" calcext:value-type="float">
            <text:p>0,00169884259259259000</text:p>
          </table:table-cell>
          <table:table-cell table:formula="of:=[.D181]-[.D180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82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70833333333333" calcext:value-type="float">
            <text:p>0,00170833333333333000</text:p>
          </table:table-cell>
          <table:table-cell table:formula="of:=[.D182]-[.D181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82" office:value-type="float" office:value="14842" calcext:value-type="float">
            <text:p>14842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71782407407407" calcext:value-type="float">
            <text:p>0,00171782407407407000</text:p>
          </table:table-cell>
          <table:table-cell table:formula="of:=[.D183]-[.D182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82" office:value-type="float" office:value="14924" calcext:value-type="float">
            <text:p>1492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72731481481481" calcext:value-type="float">
            <text:p>0,00172731481481481000</text:p>
          </table:table-cell>
          <table:table-cell table:formula="of:=[.D184]-[.D183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82" office:value-type="float" office:value="15006" calcext:value-type="float">
            <text:p>15006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73680555555556" calcext:value-type="float">
            <text:p>0,00173680555555556000</text:p>
          </table:table-cell>
          <table:table-cell table:formula="of:=[.D185]-[.D184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82" office:value-type="float" office:value="15088" calcext:value-type="float">
            <text:p>1508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7462962962963" calcext:value-type="float">
            <text:p>0,00174629629629630000</text:p>
          </table:table-cell>
          <table:table-cell table:formula="of:=[.D186]-[.D185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82" office:value-type="float" office:value="15170" calcext:value-type="float">
            <text:p>1517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75578703703704" calcext:value-type="float">
            <text:p>0,00175578703703704000</text:p>
          </table:table-cell>
          <table:table-cell table:formula="of:=[.D187]-[.D186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82" office:value-type="float" office:value="15252" calcext:value-type="float">
            <text:p>1525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76527777777778" calcext:value-type="float">
            <text:p>0,00176527777777778000</text:p>
          </table:table-cell>
          <table:table-cell table:formula="of:=[.D188]-[.D187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82" office:value-type="float" office:value="15334" calcext:value-type="float">
            <text:p>15334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77476851851852" calcext:value-type="float">
            <text:p>0,00177476851851852000</text:p>
          </table:table-cell>
          <table:table-cell table:formula="of:=[.D189]-[.D188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82" office:value-type="float" office:value="15416" calcext:value-type="float">
            <text:p>1541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78425925925926" calcext:value-type="float">
            <text:p>0,00178425925925926000</text:p>
          </table:table-cell>
          <table:table-cell table:formula="of:=[.D190]-[.D189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82" office:value-type="float" office:value="15498" calcext:value-type="float">
            <text:p>15498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79375" calcext:value-type="float">
            <text:p>0,00179375000000000000</text:p>
          </table:table-cell>
          <table:table-cell table:formula="of:=[.D191]-[.D190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82" office:value-type="float" office:value="15580" calcext:value-type="float">
            <text:p>1558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80324074074074" calcext:value-type="float">
            <text:p>0,00180324074074074000</text:p>
          </table:table-cell>
          <table:table-cell table:formula="of:=[.D192]-[.D191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82" office:value-type="float" office:value="15662" calcext:value-type="float">
            <text:p>15662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81273148148148" calcext:value-type="float">
            <text:p>0,00181273148148148000</text:p>
          </table:table-cell>
          <table:table-cell table:formula="of:=[.D193]-[.D192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82" office:value-type="float" office:value="15744" calcext:value-type="float">
            <text:p>1574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82222222222222" calcext:value-type="float">
            <text:p>0,00182222222222222000</text:p>
          </table:table-cell>
          <table:table-cell table:formula="of:=[.D194]-[.D193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82" office:value-type="float" office:value="15826" calcext:value-type="float">
            <text:p>15826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83171296296296" calcext:value-type="float">
            <text:p>0,00183171296296296000</text:p>
          </table:table-cell>
          <table:table-cell table:formula="of:=[.D195]-[.D194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82" office:value-type="float" office:value="15908" calcext:value-type="float">
            <text:p>1590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8412037037037" calcext:value-type="float">
            <text:p>0,00184120370370370000</text:p>
          </table:table-cell>
          <table:table-cell table:formula="of:=[.D196]-[.D195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82" office:value-type="float" office:value="15990" calcext:value-type="float">
            <text:p>1599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85069444444444" calcext:value-type="float">
            <text:p>0,00185069444444444000</text:p>
          </table:table-cell>
          <table:table-cell table:formula="of:=[.D197]-[.D196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82" office:value-type="float" office:value="16072" calcext:value-type="float">
            <text:p>1607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86018518518519" calcext:value-type="float">
            <text:p>0,00186018518518519000</text:p>
          </table:table-cell>
          <table:table-cell table:formula="of:=[.D198]-[.D197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82" office:value-type="float" office:value="16154" calcext:value-type="float">
            <text:p>16154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86967592592593" calcext:value-type="float">
            <text:p>0,00186967592592593000</text:p>
          </table:table-cell>
          <table:table-cell table:formula="of:=[.D199]-[.D198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82" office:value-type="float" office:value="16236" calcext:value-type="float">
            <text:p>1623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87916666666667" calcext:value-type="float">
            <text:p>0,00187916666666667000</text:p>
          </table:table-cell>
          <table:table-cell table:formula="of:=[.D200]-[.D199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82" office:value-type="float" office:value="16318" calcext:value-type="float">
            <text:p>16318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88865740740741" calcext:value-type="float">
            <text:p>0,00188865740740741000</text:p>
          </table:table-cell>
          <table:table-cell table:formula="of:=[.D201]-[.D200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82" office:value-type="float" office:value="16400" calcext:value-type="float">
            <text:p>16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89814814814815" calcext:value-type="float">
            <text:p>0,00189814814814815000</text:p>
          </table:table-cell>
          <table:table-cell table:formula="of:=[.D202]-[.D201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82" office:value-type="float" office:value="16482" calcext:value-type="float">
            <text:p>16482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90763888888889" calcext:value-type="float">
            <text:p>0,00190763888888889000</text:p>
          </table:table-cell>
          <table:table-cell table:formula="of:=[.D203]-[.D202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82" office:value-type="float" office:value="16564" calcext:value-type="float">
            <text:p>1656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91712962962963" calcext:value-type="float">
            <text:p>0,00191712962962963000</text:p>
          </table:table-cell>
          <table:table-cell table:formula="of:=[.D204]-[.D203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82" office:value-type="float" office:value="16646" calcext:value-type="float">
            <text:p>16646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92662037037037" calcext:value-type="float">
            <text:p>0,00192662037037037000</text:p>
          </table:table-cell>
          <table:table-cell table:formula="of:=[.D205]-[.D204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82" office:value-type="float" office:value="16728" calcext:value-type="float">
            <text:p>1672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93611111111111" calcext:value-type="float">
            <text:p>0,00193611111111111000</text:p>
          </table:table-cell>
          <table:table-cell table:formula="of:=[.D206]-[.D205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82" office:value-type="float" office:value="16810" calcext:value-type="float">
            <text:p>1681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94560185185185" calcext:value-type="float">
            <text:p>0,00194560185185185000</text:p>
          </table:table-cell>
          <table:table-cell table:formula="of:=[.D207]-[.D206]" office:value-type="float" office:value="0.00000949074074074068" calcext:value-type="float">
            <text:p>0,00000949074074074068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82" office:value-type="float" office:value="16892" calcext:value-type="float">
            <text:p>1689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95509259259259" calcext:value-type="float">
            <text:p>0,00195509259259259000</text:p>
          </table:table-cell>
          <table:table-cell table:formula="of:=[.D208]-[.D207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82" office:value-type="float" office:value="16974" calcext:value-type="float">
            <text:p>16974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96458333333333" calcext:value-type="float">
            <text:p>0,00196458333333333000</text:p>
          </table:table-cell>
          <table:table-cell table:formula="of:=[.D209]-[.D208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82" office:value-type="float" office:value="17056" calcext:value-type="float">
            <text:p>1705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97407407407407" calcext:value-type="float">
            <text:p>0,00197407407407407000</text:p>
          </table:table-cell>
          <table:table-cell table:formula="of:=[.D210]-[.D209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82" office:value-type="float" office:value="17138" calcext:value-type="float">
            <text:p>17138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98356481481481" calcext:value-type="float">
            <text:p>0,00198356481481481000</text:p>
          </table:table-cell>
          <table:table-cell table:formula="of:=[.D211]-[.D210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82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99305555555556" calcext:value-type="float">
            <text:p>0,00199305555555556000</text:p>
          </table:table-cell>
          <table:table-cell table:formula="of:=[.D212]-[.D211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82" office:value-type="float" office:value="17302" calcext:value-type="float">
            <text:p>17302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0025462962963" calcext:value-type="float">
            <text:p>0,00200254629629630000</text:p>
          </table:table-cell>
          <table:table-cell table:formula="of:=[.D213]-[.D212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82" office:value-type="float" office:value="17384" calcext:value-type="float">
            <text:p>1738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01203703703704" calcext:value-type="float">
            <text:p>0,00201203703703704000</text:p>
          </table:table-cell>
          <table:table-cell table:formula="of:=[.D214]-[.D213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82" office:value-type="float" office:value="17466" calcext:value-type="float">
            <text:p>17466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02152777777778" calcext:value-type="float">
            <text:p>0,00202152777777778000</text:p>
          </table:table-cell>
          <table:table-cell table:formula="of:=[.D215]-[.D214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82" office:value-type="float" office:value="17548" calcext:value-type="float">
            <text:p>1754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03101851851852" calcext:value-type="float">
            <text:p>0,00203101851851852000</text:p>
          </table:table-cell>
          <table:table-cell table:formula="of:=[.D216]-[.D215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82" office:value-type="float" office:value="17630" calcext:value-type="float">
            <text:p>1763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04050925925926" calcext:value-type="float">
            <text:p>0,00204050925925926000</text:p>
          </table:table-cell>
          <table:table-cell table:formula="of:=[.D217]-[.D216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82" office:value-type="float" office:value="17712" calcext:value-type="float">
            <text:p>1771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05" calcext:value-type="float">
            <text:p>0,00205000000000000000</text:p>
          </table:table-cell>
          <table:table-cell table:formula="of:=[.D218]-[.D217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82" office:value-type="float" office:value="17794" calcext:value-type="float">
            <text:p>17794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05949074074074" calcext:value-type="float">
            <text:p>0,00205949074074074000</text:p>
          </table:table-cell>
          <table:table-cell table:formula="of:=[.D219]-[.D218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82" office:value-type="float" office:value="17876" calcext:value-type="float">
            <text:p>1787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06898148148148" calcext:value-type="float">
            <text:p>0,00206898148148148000</text:p>
          </table:table-cell>
          <table:table-cell table:formula="of:=[.D220]-[.D219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82" office:value-type="float" office:value="17958" calcext:value-type="float">
            <text:p>17958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07847222222222" calcext:value-type="float">
            <text:p>0,00207847222222222000</text:p>
          </table:table-cell>
          <table:table-cell table:formula="of:=[.D221]-[.D220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82" office:value-type="float" office:value="18040" calcext:value-type="float">
            <text:p>180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08796296296296" calcext:value-type="float">
            <text:p>0,00208796296296296000</text:p>
          </table:table-cell>
          <table:table-cell table:formula="of:=[.D222]-[.D221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82" office:value-type="float" office:value="18122" calcext:value-type="float">
            <text:p>18122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0974537037037" calcext:value-type="float">
            <text:p>0,00209745370370370000</text:p>
          </table:table-cell>
          <table:table-cell table:formula="of:=[.D223]-[.D222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82" office:value-type="float" office:value="18204" calcext:value-type="float">
            <text:p>1820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10694444444444" calcext:value-type="float">
            <text:p>0,00210694444444444000</text:p>
          </table:table-cell>
          <table:table-cell table:formula="of:=[.D224]-[.D223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82" office:value-type="float" office:value="18286" calcext:value-type="float">
            <text:p>18286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11643518518519" calcext:value-type="float">
            <text:p>0,00211643518518519000</text:p>
          </table:table-cell>
          <table:table-cell table:formula="of:=[.D225]-[.D224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82" office:value-type="float" office:value="18368" calcext:value-type="float">
            <text:p>1836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12592592592593" calcext:value-type="float">
            <text:p>0,00212592592592593000</text:p>
          </table:table-cell>
          <table:table-cell table:formula="of:=[.D226]-[.D225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82" office:value-type="float" office:value="18450" calcext:value-type="float">
            <text:p>184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13541666666667" calcext:value-type="float">
            <text:p>0,00213541666666667000</text:p>
          </table:table-cell>
          <table:table-cell table:formula="of:=[.D227]-[.D226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82" office:value-type="float" office:value="18532" calcext:value-type="float">
            <text:p>1853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14490740740741" calcext:value-type="float">
            <text:p>0,00214490740740741000</text:p>
          </table:table-cell>
          <table:table-cell table:formula="of:=[.D228]-[.D227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82" office:value-type="float" office:value="18614" calcext:value-type="float">
            <text:p>18614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15439814814815" calcext:value-type="float">
            <text:p>0,00215439814814815000</text:p>
          </table:table-cell>
          <table:table-cell table:formula="of:=[.D229]-[.D228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82" office:value-type="float" office:value="18696" calcext:value-type="float">
            <text:p>1869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16388888888889" calcext:value-type="float">
            <text:p>0,00216388888888889000</text:p>
          </table:table-cell>
          <table:table-cell table:formula="of:=[.D230]-[.D229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82" office:value-type="float" office:value="18778" calcext:value-type="float">
            <text:p>18778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17337962962963" calcext:value-type="float">
            <text:p>0,00217337962962963000</text:p>
          </table:table-cell>
          <table:table-cell table:formula="of:=[.D231]-[.D230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82" office:value-type="float" office:value="18860" calcext:value-type="float">
            <text:p>1886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18287037037037" calcext:value-type="float">
            <text:p>0,00218287037037037000</text:p>
          </table:table-cell>
          <table:table-cell table:formula="of:=[.D232]-[.D231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82" office:value-type="float" office:value="18942" calcext:value-type="float">
            <text:p>18942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19236111111111" calcext:value-type="float">
            <text:p>0,00219236111111111000</text:p>
          </table:table-cell>
          <table:table-cell table:formula="of:=[.D233]-[.D232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82" office:value-type="float" office:value="19024" calcext:value-type="float">
            <text:p>1902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20185185185185" calcext:value-type="float">
            <text:p>0,00220185185185185000</text:p>
          </table:table-cell>
          <table:table-cell table:formula="of:=[.D234]-[.D233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82" office:value-type="float" office:value="19106" calcext:value-type="float">
            <text:p>19106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21134259259259" calcext:value-type="float">
            <text:p>0,00221134259259259000</text:p>
          </table:table-cell>
          <table:table-cell table:formula="of:=[.D235]-[.D234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82" office:value-type="float" office:value="19188" calcext:value-type="float">
            <text:p>1918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22083333333333" calcext:value-type="float">
            <text:p>0,00222083333333333000</text:p>
          </table:table-cell>
          <table:table-cell table:formula="of:=[.D236]-[.D235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82" office:value-type="float" office:value="19270" calcext:value-type="float">
            <text:p>1927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23032407407407" calcext:value-type="float">
            <text:p>0,00223032407407407000</text:p>
          </table:table-cell>
          <table:table-cell table:formula="of:=[.D237]-[.D236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82" office:value-type="float" office:value="19352" calcext:value-type="float">
            <text:p>1935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23981481481481" calcext:value-type="float">
            <text:p>0,00223981481481481000</text:p>
          </table:table-cell>
          <table:table-cell table:formula="of:=[.D238]-[.D237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82" office:value-type="float" office:value="19434" calcext:value-type="float">
            <text:p>19434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24930555555556" calcext:value-type="float">
            <text:p>0,00224930555555556000</text:p>
          </table:table-cell>
          <table:table-cell table:formula="of:=[.D239]-[.D238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82" office:value-type="float" office:value="19516" calcext:value-type="float">
            <text:p>1951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2587962962963" calcext:value-type="float">
            <text:p>0,00225879629629630000</text:p>
          </table:table-cell>
          <table:table-cell table:formula="of:=[.D240]-[.D239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82" office:value-type="float" office:value="19598" calcext:value-type="float">
            <text:p>19598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26828703703704" calcext:value-type="float">
            <text:p>0,00226828703703704000</text:p>
          </table:table-cell>
          <table:table-cell table:formula="of:=[.D241]-[.D240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82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27777777777778" calcext:value-type="float">
            <text:p>0,00227777777777778000</text:p>
          </table:table-cell>
          <table:table-cell table:formula="of:=[.D242]-[.D241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82" office:value-type="float" office:value="19762" calcext:value-type="float">
            <text:p>19762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28726851851852" calcext:value-type="float">
            <text:p>0,00228726851851852000</text:p>
          </table:table-cell>
          <table:table-cell table:formula="of:=[.D243]-[.D242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82" office:value-type="float" office:value="19844" calcext:value-type="float">
            <text:p>1984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29675925925926" calcext:value-type="float">
            <text:p>0,00229675925925926000</text:p>
          </table:table-cell>
          <table:table-cell table:formula="of:=[.D244]-[.D243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82" office:value-type="float" office:value="19926" calcext:value-type="float">
            <text:p>19926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30625" calcext:value-type="float">
            <text:p>0,00230625000000000000</text:p>
          </table:table-cell>
          <table:table-cell table:formula="of:=[.D245]-[.D244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82" office:value-type="float" office:value="20008" calcext:value-type="float">
            <text:p>2000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31574074074074" calcext:value-type="float">
            <text:p>0,00231574074074074000</text:p>
          </table:table-cell>
          <table:table-cell table:formula="of:=[.D246]-[.D245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82" office:value-type="float" office:value="20090" calcext:value-type="float">
            <text:p>2009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32523148148148" calcext:value-type="float">
            <text:p>0,00232523148148148000</text:p>
          </table:table-cell>
          <table:table-cell table:formula="of:=[.D247]-[.D246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82" office:value-type="float" office:value="20172" calcext:value-type="float">
            <text:p>2017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33472222222222" calcext:value-type="float">
            <text:p>0,00233472222222222000</text:p>
          </table:table-cell>
          <table:table-cell table:formula="of:=[.D248]-[.D247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82" office:value-type="float" office:value="20254" calcext:value-type="float">
            <text:p>20254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34421296296296" calcext:value-type="float">
            <text:p>0,00234421296296296000</text:p>
          </table:table-cell>
          <table:table-cell table:formula="of:=[.D249]-[.D248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82" office:value-type="float" office:value="20336" calcext:value-type="float">
            <text:p>2033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3537037037037" calcext:value-type="float">
            <text:p>0,00235370370370370000</text:p>
          </table:table-cell>
          <table:table-cell table:formula="of:=[.D250]-[.D249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82" office:value-type="float" office:value="20418" calcext:value-type="float">
            <text:p>20418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36319444444444" calcext:value-type="float">
            <text:p>0,00236319444444444000</text:p>
          </table:table-cell>
          <table:table-cell table:formula="of:=[.D251]-[.D250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82" office:value-type="float" office:value="20500" calcext:value-type="float">
            <text:p>20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37268518518519" calcext:value-type="float">
            <text:p>0,00237268518518519000</text:p>
          </table:table-cell>
          <table:table-cell table:formula="of:=[.D252]-[.D251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82" office:value-type="float" office:value="20582" calcext:value-type="float">
            <text:p>20582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38217592592593" calcext:value-type="float">
            <text:p>0,00238217592592593000</text:p>
          </table:table-cell>
          <table:table-cell table:formula="of:=[.D253]-[.D252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82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39166666666667" calcext:value-type="float">
            <text:p>0,00239166666666667000</text:p>
          </table:table-cell>
          <table:table-cell table:formula="of:=[.D254]-[.D253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82" office:value-type="float" office:value="20746" calcext:value-type="float">
            <text:p>20746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40115740740741" calcext:value-type="float">
            <text:p>0,00240115740740741000</text:p>
          </table:table-cell>
          <table:table-cell table:formula="of:=[.D255]-[.D254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82" office:value-type="float" office:value="20828" calcext:value-type="float">
            <text:p>2082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41064814814815" calcext:value-type="float">
            <text:p>0,00241064814814815000</text:p>
          </table:table-cell>
          <table:table-cell table:formula="of:=[.D256]-[.D255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82" office:value-type="float" office:value="20910" calcext:value-type="float">
            <text:p>2091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42013888888889" calcext:value-type="float">
            <text:p>0,00242013888888889000</text:p>
          </table:table-cell>
          <table:table-cell table:formula="of:=[.D257]-[.D256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82" office:value-type="float" office:value="20992" calcext:value-type="float">
            <text:p>2099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42962962962963" calcext:value-type="float">
            <text:p>0,00242962962962963000</text:p>
          </table:table-cell>
          <table:table-cell table:formula="of:=[.D258]-[.D257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82" office:value-type="float" office:value="21074" calcext:value-type="float">
            <text:p>21074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43912037037037" calcext:value-type="float">
            <text:p>0,00243912037037037000</text:p>
          </table:table-cell>
          <table:table-cell table:formula="of:=[.D259]-[.D258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82" office:value-type="float" office:value="21156" calcext:value-type="float">
            <text:p>2115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44861111111111" calcext:value-type="float">
            <text:p>0,00244861111111111000</text:p>
          </table:table-cell>
          <table:table-cell table:formula="of:=[.D260]-[.D259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82" office:value-type="float" office:value="21238" calcext:value-type="float">
            <text:p>21238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45810185185185" calcext:value-type="float">
            <text:p>0,00245810185185185000</text:p>
          </table:table-cell>
          <table:table-cell table:formula="of:=[.D261]-[.D260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82" office:value-type="float" office:value="21320" calcext:value-type="float">
            <text:p>213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46759259259259" calcext:value-type="float">
            <text:p>0,00246759259259259000</text:p>
          </table:table-cell>
          <table:table-cell table:formula="of:=[.D262]-[.D261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82" office:value-type="float" office:value="21402" calcext:value-type="float">
            <text:p>21402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47708333333333" calcext:value-type="float">
            <text:p>0,00247708333333333000</text:p>
          </table:table-cell>
          <table:table-cell table:formula="of:=[.D263]-[.D262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82" office:value-type="float" office:value="21484" calcext:value-type="float">
            <text:p>2148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48657407407407" calcext:value-type="float">
            <text:p>0,00248657407407407000</text:p>
          </table:table-cell>
          <table:table-cell table:formula="of:=[.D264]-[.D263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82" office:value-type="float" office:value="21566" calcext:value-type="float">
            <text:p>21566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49606481481481" calcext:value-type="float">
            <text:p>0,00249606481481481000</text:p>
          </table:table-cell>
          <table:table-cell table:formula="of:=[.D265]-[.D264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82" office:value-type="float" office:value="21648" calcext:value-type="float">
            <text:p>2164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50555555555556" calcext:value-type="float">
            <text:p>0,00250555555555556000</text:p>
          </table:table-cell>
          <table:table-cell table:formula="of:=[.D266]-[.D265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82" office:value-type="float" office:value="21730" calcext:value-type="float">
            <text:p>2173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5150462962963" calcext:value-type="float">
            <text:p>0,00251504629629630000</text:p>
          </table:table-cell>
          <table:table-cell table:formula="of:=[.D267]-[.D266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82" office:value-type="float" office:value="21812" calcext:value-type="float">
            <text:p>2181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52453703703704" calcext:value-type="float">
            <text:p>0,00252453703703704000</text:p>
          </table:table-cell>
          <table:table-cell table:formula="of:=[.D268]-[.D267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82" office:value-type="float" office:value="21894" calcext:value-type="float">
            <text:p>21894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53402777777778" calcext:value-type="float">
            <text:p>0,00253402777777778000</text:p>
          </table:table-cell>
          <table:table-cell table:formula="of:=[.D269]-[.D268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82" office:value-type="float" office:value="21976" calcext:value-type="float">
            <text:p>2197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54351851851852" calcext:value-type="float">
            <text:p>0,00254351851851852000</text:p>
          </table:table-cell>
          <table:table-cell table:formula="of:=[.D270]-[.D269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82" office:value-type="float" office:value="22058" calcext:value-type="float">
            <text:p>22058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55300925925926" calcext:value-type="float">
            <text:p>0,00255300925925926000</text:p>
          </table:table-cell>
          <table:table-cell table:formula="of:=[.D271]-[.D270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82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5625" calcext:value-type="float">
            <text:p>0,00256250000000000000</text:p>
          </table:table-cell>
          <table:table-cell table:formula="of:=[.D272]-[.D271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82" office:value-type="float" office:value="22222" calcext:value-type="float">
            <text:p>22222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57199074074074" calcext:value-type="float">
            <text:p>0,00257199074074074000</text:p>
          </table:table-cell>
          <table:table-cell table:formula="of:=[.D273]-[.D272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82" office:value-type="float" office:value="22304" calcext:value-type="float">
            <text:p>2230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58148148148148" calcext:value-type="float">
            <text:p>0,00258148148148148000</text:p>
          </table:table-cell>
          <table:table-cell table:formula="of:=[.D274]-[.D273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82" office:value-type="float" office:value="22386" calcext:value-type="float">
            <text:p>22386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59097222222222" calcext:value-type="float">
            <text:p>0,00259097222222222000</text:p>
          </table:table-cell>
          <table:table-cell table:formula="of:=[.D275]-[.D274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82" office:value-type="float" office:value="22468" calcext:value-type="float">
            <text:p>2246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60046296296296" calcext:value-type="float">
            <text:p>0,00260046296296296000</text:p>
          </table:table-cell>
          <table:table-cell table:formula="of:=[.D276]-[.D275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82" office:value-type="float" office:value="22550" calcext:value-type="float">
            <text:p>225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6099537037037" calcext:value-type="float">
            <text:p>0,00260995370370370000</text:p>
          </table:table-cell>
          <table:table-cell table:formula="of:=[.D277]-[.D276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82" office:value-type="float" office:value="22632" calcext:value-type="float">
            <text:p>2263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61944444444444" calcext:value-type="float">
            <text:p>0,00261944444444444000</text:p>
          </table:table-cell>
          <table:table-cell table:formula="of:=[.D278]-[.D277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82" office:value-type="float" office:value="22714" calcext:value-type="float">
            <text:p>22714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62893518518519" calcext:value-type="float">
            <text:p>0,00262893518518519000</text:p>
          </table:table-cell>
          <table:table-cell table:formula="of:=[.D279]-[.D278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82" office:value-type="float" office:value="22796" calcext:value-type="float">
            <text:p>2279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63842592592593" calcext:value-type="float">
            <text:p>0,00263842592592593000</text:p>
          </table:table-cell>
          <table:table-cell table:formula="of:=[.D280]-[.D279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82" office:value-type="float" office:value="22878" calcext:value-type="float">
            <text:p>22878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64791666666667" calcext:value-type="float">
            <text:p>0,00264791666666667000</text:p>
          </table:table-cell>
          <table:table-cell table:formula="of:=[.D281]-[.D280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82" office:value-type="float" office:value="22960" calcext:value-type="float">
            <text:p>229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65740740740741" calcext:value-type="float">
            <text:p>0,00265740740740741000</text:p>
          </table:table-cell>
          <table:table-cell table:formula="of:=[.D282]-[.D281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82" office:value-type="float" office:value="23042" calcext:value-type="float">
            <text:p>23042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66689814814815" calcext:value-type="float">
            <text:p>0,00266689814814815000</text:p>
          </table:table-cell>
          <table:table-cell table:formula="of:=[.D283]-[.D282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82" office:value-type="float" office:value="23124" calcext:value-type="float">
            <text:p>2312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67638888888889" calcext:value-type="float">
            <text:p>0,00267638888888889000</text:p>
          </table:table-cell>
          <table:table-cell table:formula="of:=[.D284]-[.D283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82" office:value-type="float" office:value="23206" calcext:value-type="float">
            <text:p>23206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68587962962963" calcext:value-type="float">
            <text:p>0,00268587962962963000</text:p>
          </table:table-cell>
          <table:table-cell table:formula="of:=[.D285]-[.D284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82" office:value-type="float" office:value="23288" calcext:value-type="float">
            <text:p>2328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69537037037037" calcext:value-type="float">
            <text:p>0,00269537037037037000</text:p>
          </table:table-cell>
          <table:table-cell table:formula="of:=[.D286]-[.D285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82" office:value-type="float" office:value="23370" calcext:value-type="float">
            <text:p>2337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70486111111111" calcext:value-type="float">
            <text:p>0,00270486111111111000</text:p>
          </table:table-cell>
          <table:table-cell table:formula="of:=[.D287]-[.D286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82" office:value-type="float" office:value="23452" calcext:value-type="float">
            <text:p>2345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71435185185185" calcext:value-type="float">
            <text:p>0,00271435185185185000</text:p>
          </table:table-cell>
          <table:table-cell table:formula="of:=[.D288]-[.D287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82" office:value-type="float" office:value="23534" calcext:value-type="float">
            <text:p>23534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72384259259259" calcext:value-type="float">
            <text:p>0,00272384259259259000</text:p>
          </table:table-cell>
          <table:table-cell table:formula="of:=[.D289]-[.D288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82" office:value-type="float" office:value="23616" calcext:value-type="float">
            <text:p>2361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73333333333333" calcext:value-type="float">
            <text:p>0,00273333333333333000</text:p>
          </table:table-cell>
          <table:table-cell table:formula="of:=[.D290]-[.D289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82" office:value-type="float" office:value="23698" calcext:value-type="float">
            <text:p>23698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74282407407407" calcext:value-type="float">
            <text:p>0,00274282407407407000</text:p>
          </table:table-cell>
          <table:table-cell table:formula="of:=[.D291]-[.D290]" office:value-type="float" office:value="0.00000949074074074047" calcext:value-type="float">
            <text:p>0,00000949074074074047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82" office:value-type="float" office:value="23780" calcext:value-type="float">
            <text:p>2378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75231481481481" calcext:value-type="float">
            <text:p>0,00275231481481481000</text:p>
          </table:table-cell>
          <table:table-cell table:formula="of:=[.D292]-[.D291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82" office:value-type="float" office:value="23862" calcext:value-type="float">
            <text:p>23862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76180555555556" calcext:value-type="float">
            <text:p>0,00276180555555556000</text:p>
          </table:table-cell>
          <table:table-cell table:formula="of:=[.D293]-[.D292]" office:value-type="float" office:value="0.0000094907407407409" calcext:value-type="float">
            <text:p>0,00000949074074074090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82" office:value-type="float" office:value="23944" calcext:value-type="float">
            <text:p>2394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7712962962963" calcext:value-type="float">
            <text:p>0,00277129629629630000</text:p>
          </table:table-cell>
          <table:table-cell table:formula="of:=#REF!-[.D293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28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04:49.487406073</meta:creation-date>
    <dc:date>2026-05-17T19:04:57.002455446</dc:date>
    <meta:editing-duration>PT8S</meta:editing-duration>
    <meta:editing-cycles>1</meta:editing-cycles>
    <meta:document-statistic meta:table-count="1" meta:cell-count="1465" meta:object-count="0"/>
    <meta:generator>LibreOffice/24.2.7.2$Linux_X86_64 LibreOffice_project/420$Build-2</meta:generator>
  </office:meta>
</office:document-meta>
</file>